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automatic-styles>
    <style:style style:name="su0" style:family="table-column" style:display-name="su0">
      <style:table-column-properties style:column-width="3.2cm"/>
    </style:style>
    <style:style style:name="su1" style:family="table-column" style:display-name="su1">
      <style:table-column-properties style:column-width="2.8cm"/>
    </style:style>
    <style:style style:name="su2" style:family="table-column" style:display-name="su2">
      <style:table-column-properties style:column-width="2.8cm"/>
    </style:style>
    <style:style style:name="su3" style:family="table-column" style:display-name="su3">
      <style:table-column-properties style:column-width="2.6cm"/>
    </style:style>
    <style:style style:name="su4" style:family="table-column" style:display-name="su4">
      <style:table-column-properties style:column-width="2cm"/>
    </style:style>
    <style:style style:name="su5" style:family="table-column" style:display-name="su5">
      <style:table-column-properties style:column-width="2.6cm"/>
    </style:style>
    <style:style style:name="su6" style:family="table-column" style:display-name="su6">
      <style:table-column-properties style:column-width="3.2cm"/>
    </style:style>
    <style:style style:name="c0" style:family="table-cell" style:display-name="c0">
      <style:table-cell-properties fo:border="0.5pt solid #d0d0d0" style:vertical-align="middle" fo:background-color="#D9D9D9"/>
      <style:text-properties fo:color="#000000" fo:font-weight="bold"/>
      <style:paragraph-properties fo:text-align="center"/>
    </style:style>
    <style:style style:name="c1" style:family="table-cell" style:display-name="c1">
      <style:table-cell-properties fo:border="0.5pt solid #d0d0d0" style:vertical-align="middle"/>
      <style:paragraph-properties fo:text-align="center"/>
    </style:style>
    <style:style style:name="c2" style:family="table-cell" style:display-name="c2">
      <style:table-cell-properties fo:border="0.5pt solid #d0d0d0" style:vertical-align="middle"/>
      <style:text-properties fo:color="#000000" fo:font-weight="bold"/>
      <style:paragraph-properties fo:text-align="center"/>
    </style:style>
    <style:style style:name="c3" style:family="table-cell" style:display-name="c3">
      <style:table-cell-properties fo:border="0.5pt solid #d0d0d0" style:vertical-align="middle" fo:background-color="#C6EFCE"/>
      <style:text-properties fo:color="#006100" fo:font-weight="bold"/>
      <style:paragraph-properties fo:text-align="center"/>
    </style:style>
    <style:style style:name="c4" style:family="table-cell" style:display-name="c4">
      <style:table-cell-properties fo:border="0.5pt solid #d0d0d0" style:vertical-align="middle"/>
      <style:text-properties fo:color="#107C41" fo:font-weight="normal"/>
      <style:paragraph-properties fo:text-align="center"/>
    </style:style>
    <style:style style:name="c5" style:family="table-cell" style:display-name="c5">
      <style:table-cell-properties fo:border="0.5pt solid #d0d0d0" style:vertical-align="middle"/>
      <style:text-properties fo:color="#C00000" fo:font-weight="normal"/>
      <style:paragraph-properties fo:text-align="center"/>
    </style:style>
    <style:style style:name="c6" style:family="table-cell" style:display-name="c6">
      <style:table-cell-properties fo:border="0.5pt solid #d0d0d0" style:vertical-align="middle" fo:background-color="#FFC7CE"/>
      <style:text-properties fo:color="#9C0006" fo:font-weight="bold"/>
      <style:paragraph-properties fo:text-align="center"/>
    </style:style>
    <style:style style:name="c7" style:family="table-cell" style:display-name="c7">
      <style:table-cell-properties fo:border="0.5pt solid #d0d0d0" style:vertical-align="middle" fo:background-color="#DDEBF7"/>
      <style:text-properties fo:color="#000000" fo:font-weight="bold"/>
      <style:paragraph-properties fo:text-align="center"/>
    </style:style>
    <style:style style:name="c8" style:family="table-cell" style:display-name="c8">
      <style:table-cell-properties fo:border="0.5pt solid #d0d0d0" style:vertical-align="middle" fo:background-color="#DDEBF7"/>
      <style:text-properties fo:color="#C00000" fo:font-weight="bold"/>
      <style:paragraph-properties fo:text-align="center"/>
    </style:style>
    <style:style style:name="tl0" style:family="table-column" style:display-name="tl0">
      <style:table-column-properties style:column-width="3.2cm"/>
    </style:style>
    <style:style style:name="tl1" style:family="table-column" style:display-name="tl1">
      <style:table-column-properties style:column-width="1.8cm"/>
    </style:style>
    <style:style style:name="tl2" style:family="table-column" style:display-name="tl2">
      <style:table-column-properties style:column-width="3.8cm"/>
    </style:style>
    <style:style style:name="tl3" style:family="table-column" style:display-name="tl3">
      <style:table-column-properties style:column-width="3.2cm"/>
    </style:style>
    <style:style style:name="tl4" style:family="table-column" style:display-name="tl4">
      <style:table-column-properties style:column-width="3.8cm"/>
    </style:style>
    <style:style style:name="tl5" style:family="table-column" style:display-name="tl5">
      <style:table-column-properties style:column-width="3.2cm"/>
    </style:style>
    <style:style style:name="tl6" style:family="table-column" style:display-name="tl6">
      <style:table-column-properties style:column-width="2.4cm"/>
    </style:style>
    <style:style style:name="c9" style:family="table-cell" style:display-name="c9">
      <style:table-cell-properties fo:border="0.5pt solid #d0d0d0" style:vertical-align="middle" fo:background-color="#F2F2F2"/>
      <style:text-properties fo:color="#000000" fo:font-weight="bold"/>
      <style:paragraph-properties fo:text-align="center"/>
    </style:style>
    <style:style style:name="c10" style:family="table-cell" style:display-name="c10">
      <style:table-cell-properties fo:border="0.5pt solid #d0d0d0" style:vertical-align="middle" fo:background-color="#F2F2F2"/>
      <style:paragraph-properties fo:text-align="center"/>
    </style:style>
    <style:style style:name="c11" style:family="table-cell" style:display-name="c11">
      <style:table-cell-properties fo:border="0.5pt solid #d0d0d0" style:vertical-align="middle" fo:background-color="#F2F2F2"/>
      <style:text-properties fo:color="#C00000" fo:font-weight="bold"/>
      <style:paragraph-properties fo:text-align="center"/>
    </style:style>
    <style:style style:name="c12" style:family="table-cell" style:display-name="c12">
      <style:table-cell-properties fo:border="0.5pt solid #d0d0d0" style:vertical-align="middle" fo:background-color="#F2F2F2"/>
      <style:text-properties fo:color="#107C41" fo:font-weight="bold"/>
      <style:paragraph-properties fo:text-align="center"/>
    </style:style>
    <style:style style:name="c13" style:family="table-cell" style:display-name="c13">
      <style:table-cell-properties fo:border="0.5pt solid #d0d0d0" style:vertical-align="middle"/>
      <style:text-properties fo:color="#C00000" fo:font-weight="bold"/>
      <style:paragraph-properties fo:text-align="center"/>
    </style:style>
    <style:style style:name="c14" style:family="table-cell" style:display-name="c14">
      <style:table-cell-properties fo:border="0.5pt solid #d0d0d0" style:vertical-align="middle"/>
      <style:text-properties fo:color="#107C41" fo:font-weight="bold"/>
      <style:paragraph-properties fo:text-align="center"/>
    </style:style>
  </office:automatic-styles>
  <office:body>
    <office:spreadsheet>
      <table:table table:name="Summary">
        <table:table-column table:style-name="su0"/>
        <table:table-column table:style-name="su1"/>
        <table:table-column table:style-name="su2"/>
        <table:table-column table:style-name="su3"/>
        <table:table-column table:style-name="su4"/>
        <table:table-column table:style-name="su5"/>
        <table:table-column table:style-name="su6"/>
        <table:table-row>
          <table:table-cell office:value-type="string" table:style-name="c0">
            <text:p>Coin</text:p>
          </table:table-cell>
          <table:table-cell office:value-type="string" table:style-name="c0">
            <text:p>Bot Return %</text:p>
          </table:table-cell>
          <table:table-cell office:value-type="string" table:style-name="c0">
            <text:p>Buy&amp;Hold %</text:p>
          </table:table-cell>
          <table:table-cell office:value-type="string" table:style-name="c0">
            <text:p>Diff %</text:p>
          </table:table-cell>
          <table:table-cell office:value-type="string" table:style-name="c0">
            <text:p>Trades</text:p>
          </table:table-cell>
          <table:table-cell office:value-type="string" table:style-name="c0">
            <text:p>Win Rate %</text:p>
          </table:table-cell>
          <table:table-cell office:value-type="string" table:style-name="c0">
            <text:p>Max Drawdown %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float" office:value="45.068269480244" table:style-name="c3">
            <text:p>+45.1</text:p>
          </table:table-cell>
          <table:table-cell office:value-type="float" office:value="35.891647855530465" table:style-name="c1">
            <text:p>+35.9</text:p>
          </table:table-cell>
          <table:table-cell office:value-type="float" office:value="9.176621624713533" table:style-name="c4">
            <text:p>+9.2</text:p>
          </table:table-cell>
          <table:table-cell office:value-type="float" office:value="10" table:style-name="c1">
            <text:p>10</text:p>
          </table:table-cell>
          <table:table-cell office:value-type="float" office:value="80.0" table:style-name="c1">
            <text:p>80.0</text:p>
          </table:table-cell>
          <table:table-cell office:value-type="float" office:value="9.845860555319947" table:style-name="c1">
            <text:p>9.8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float" office:value="26.624225034425375" table:style-name="c3">
            <text:p>+26.6</text:p>
          </table:table-cell>
          <table:table-cell office:value-type="float" office:value="96.8475073313783" table:style-name="c1">
            <text:p>+96.8</text:p>
          </table:table-cell>
          <table:table-cell office:value-type="float" office:value="-70.22328229695292" table:style-name="c5">
            <text:p>-70.2</text:p>
          </table:table-cell>
          <table:table-cell office:value-type="float" office:value="12" table:style-name="c1">
            <text:p>12</text:p>
          </table:table-cell>
          <table:table-cell office:value-type="float" office:value="50.0" table:style-name="c1">
            <text:p>50.0</text:p>
          </table:table-cell>
          <table:table-cell office:value-type="float" office:value="15.248712792164055" table:style-name="c1">
            <text:p>15.2</text:p>
          </table:table-cell>
        </table:table-row>
        <table:table-row>
          <table:table-cell office:value-type="string" table:style-name="c2">
            <text:p>TON/USDT</text:p>
          </table:table-cell>
          <table:table-cell office:value-type="float" office:value="15.747676178428582" table:style-name="c3">
            <text:p>+15.7</text:p>
          </table:table-cell>
          <table:table-cell office:value-type="float" office:value="58.14671814671816" table:style-name="c1">
            <text:p>+58.1</text:p>
          </table:table-cell>
          <table:table-cell office:value-type="float" office:value="-42.39904196828957" table:style-name="c5">
            <text:p>-42.4</text:p>
          </table:table-cell>
          <table:table-cell office:value-type="float" office:value="9" table:style-name="c1">
            <text:p>9</text:p>
          </table:table-cell>
          <table:table-cell office:value-type="float" office:value="44.44444444444444" table:style-name="c1">
            <text:p>44.4</text:p>
          </table:table-cell>
          <table:table-cell office:value-type="float" office:value="15.141682468998388" table:style-name="c1">
            <text:p>15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float" office:value="11.906094264961757" table:style-name="c3">
            <text:p>+11.9</text:p>
          </table:table-cell>
          <table:table-cell office:value-type="float" office:value="131.27425614489002" table:style-name="c1">
            <text:p>+131.3</text:p>
          </table:table-cell>
          <table:table-cell office:value-type="float" office:value="-119.36816187992827" table:style-name="c5">
            <text:p>-119.4</text:p>
          </table:table-cell>
          <table:table-cell office:value-type="float" office:value="16" table:style-name="c1">
            <text:p>16</text:p>
          </table:table-cell>
          <table:table-cell office:value-type="float" office:value="43.75" table:style-name="c1">
            <text:p>43.8</text:p>
          </table:table-cell>
          <table:table-cell office:value-type="float" office:value="19.412300358484117" table:style-name="c1">
            <text:p>19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float" office:value="8.87730283023111" table:style-name="c3">
            <text:p>+8.9</text:p>
          </table:table-cell>
          <table:table-cell office:value-type="float" office:value="-10.776545166402533" table:style-name="c1">
            <text:p>-10.8</text:p>
          </table:table-cell>
          <table:table-cell office:value-type="float" office:value="19.653847996633644" table:style-name="c4">
            <text:p>+19.7</text:p>
          </table:table-cell>
          <table:table-cell office:value-type="float" office:value="13" table:style-name="c1">
            <text:p>13</text:p>
          </table:table-cell>
          <table:table-cell office:value-type="float" office:value="53.84615384615385" table:style-name="c1">
            <text:p>53.8</text:p>
          </table:table-cell>
          <table:table-cell office:value-type="float" office:value="15.354762888101098" table:style-name="c1">
            <text:p>15.4</text:p>
          </table:table-cell>
        </table:table-row>
        <table:table-row>
          <table:table-cell office:value-type="string" table:style-name="c2">
            <text:p>BTC/USDT</text:p>
          </table:table-cell>
          <table:table-cell office:value-type="float" office:value="4.9275674026363045" table:style-name="c3">
            <text:p>+4.9</text:p>
          </table:table-cell>
          <table:table-cell office:value-type="float" office:value="-4.198424928646263" table:style-name="c1">
            <text:p>-4.2</text:p>
          </table:table-cell>
          <table:table-cell office:value-type="float" office:value="9.125992331282568" table:style-name="c4">
            <text:p>+9.1</text:p>
          </table:table-cell>
          <table:table-cell office:value-type="float" office:value="15" table:style-name="c1">
            <text:p>15</text:p>
          </table:table-cell>
          <table:table-cell office:value-type="float" office:value="53.333333333333336" table:style-name="c1">
            <text:p>53.3</text:p>
          </table:table-cell>
          <table:table-cell office:value-type="float" office:value="5.934919405972521" table:style-name="c1">
            <text:p>5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float" office:value="4.713604639394953" table:style-name="c3">
            <text:p>+4.7</text:p>
          </table:table-cell>
          <table:table-cell office:value-type="float" office:value="-4.489164086687317" table:style-name="c1">
            <text:p>-4.5</text:p>
          </table:table-cell>
          <table:table-cell office:value-type="float" office:value="9.202768726082269" table:style-name="c4">
            <text:p>+9.2</text:p>
          </table:table-cell>
          <table:table-cell office:value-type="float" office:value="13" table:style-name="c1">
            <text:p>13</text:p>
          </table:table-cell>
          <table:table-cell office:value-type="float" office:value="53.84615384615385" table:style-name="c1">
            <text:p>53.8</text:p>
          </table:table-cell>
          <table:table-cell office:value-type="float" office:value="14.601964499052716" table:style-name="c1">
            <text:p>14.6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float" office:value="4.0250281758280835" table:style-name="c3">
            <text:p>+4.0</text:p>
          </table:table-cell>
          <table:table-cell office:value-type="float" office:value="-5.106100476742569" table:style-name="c1">
            <text:p>-5.1</text:p>
          </table:table-cell>
          <table:table-cell office:value-type="float" office:value="9.131128652570652" table:style-name="c4">
            <text:p>+9.1</text:p>
          </table:table-cell>
          <table:table-cell office:value-type="float" office:value="12" table:style-name="c1">
            <text:p>12</text:p>
          </table:table-cell>
          <table:table-cell office:value-type="float" office:value="50.0" table:style-name="c1">
            <text:p>50.0</text:p>
          </table:table-cell>
          <table:table-cell office:value-type="float" office:value="11.13039561516279" table:style-name="c1">
            <text:p>11.1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float" office:value="2.3358379170998202" table:style-name="c3">
            <text:p>+2.3</text:p>
          </table:table-cell>
          <table:table-cell office:value-type="float" office:value="-10.129096325719948" table:style-name="c1">
            <text:p>-10.1</text:p>
          </table:table-cell>
          <table:table-cell office:value-type="float" office:value="12.464934242819767" table:style-name="c4">
            <text:p>+12.5</text:p>
          </table:table-cell>
          <table:table-cell office:value-type="float" office:value="9" table:style-name="c1">
            <text:p>9</text:p>
          </table:table-cell>
          <table:table-cell office:value-type="float" office:value="55.55555555555556" table:style-name="c1">
            <text:p>55.6</text:p>
          </table:table-cell>
          <table:table-cell office:value-type="float" office:value="9.65067308797979" table:style-name="c1">
            <text:p>9.7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float" office:value="1.495800926657978" table:style-name="c3">
            <text:p>+1.5</text:p>
          </table:table-cell>
          <table:table-cell office:value-type="float" office:value="-8.120649651972151" table:style-name="c1">
            <text:p>-8.1</text:p>
          </table:table-cell>
          <table:table-cell office:value-type="float" office:value="9.616450578630129" table:style-name="c4">
            <text:p>+9.6</text:p>
          </table:table-cell>
          <table:table-cell office:value-type="float" office:value="13" table:style-name="c1">
            <text:p>13</text:p>
          </table:table-cell>
          <table:table-cell office:value-type="float" office:value="53.84615384615385" table:style-name="c1">
            <text:p>53.8</text:p>
          </table:table-cell>
          <table:table-cell office:value-type="float" office:value="12.672589193518737" table:style-name="c1">
            <text:p>12.7</text:p>
          </table:table-cell>
        </table:table-row>
        <table:table-row>
          <table:table-cell office:value-type="string" table:style-name="c2">
            <text:p>XLM/USDT</text:p>
          </table:table-cell>
          <table:table-cell office:value-type="float" office:value="1.0773559179604943" table:style-name="c3">
            <text:p>+1.1</text:p>
          </table:table-cell>
          <table:table-cell office:value-type="float" office:value="49.291237113402055" table:style-name="c1">
            <text:p>+49.3</text:p>
          </table:table-cell>
          <table:table-cell office:value-type="float" office:value="-48.21388119544156" table:style-name="c5">
            <text:p>-48.2</text:p>
          </table:table-cell>
          <table:table-cell office:value-type="float" office:value="15" table:style-name="c1">
            <text:p>15</text:p>
          </table:table-cell>
          <table:table-cell office:value-type="float" office:value="26.666666666666668" table:style-name="c1">
            <text:p>26.7</text:p>
          </table:table-cell>
          <table:table-cell office:value-type="float" office:value="20.475367696683474" table:style-name="c1">
            <text:p>20.5</text:p>
          </table:table-cell>
        </table:table-row>
        <table:table-row>
          <table:table-cell office:value-type="string" table:style-name="c2">
            <text:p>BCH/USDT</text:p>
          </table:table-cell>
          <table:table-cell office:value-type="float" office:value="-0.7790015740571107" table:style-name="c6">
            <text:p>-0.8</text:p>
          </table:table-cell>
          <table:table-cell office:value-type="float" office:value="-38.01131418624892" table:style-name="c1">
            <text:p>-38.0</text:p>
          </table:table-cell>
          <table:table-cell office:value-type="float" office:value="37.232312612191805" table:style-name="c4">
            <text:p>+37.2</text:p>
          </table:table-cell>
          <table:table-cell office:value-type="float" office:value="6" table:style-name="c1">
            <text:p>6</text:p>
          </table:table-cell>
          <table:table-cell office:value-type="float" office:value="16.666666666666664" table:style-name="c1">
            <text:p>16.7</text:p>
          </table:table-cell>
          <table:table-cell office:value-type="float" office:value="5.684201172150731" table:style-name="c1">
            <text:p>5.7</text:p>
          </table:table-cell>
        </table:table-row>
        <table:table-row>
          <table:table-cell office:value-type="string" table:style-name="c2">
            <text:p>SOL/USDT</text:p>
          </table:table-cell>
          <table:table-cell office:value-type="float" office:value="-1.0628508258401212" table:style-name="c6">
            <text:p>-1.1</text:p>
          </table:table-cell>
          <table:table-cell office:value-type="float" office:value="-12.565154707774202" table:style-name="c1">
            <text:p>-12.6</text:p>
          </table:table-cell>
          <table:table-cell office:value-type="float" office:value="11.50230388193408" table:style-name="c4">
            <text:p>+11.5</text:p>
          </table:table-cell>
          <table:table-cell office:value-type="float" office:value="10" table:style-name="c1">
            <text:p>10</text:p>
          </table:table-cell>
          <table:table-cell office:value-type="float" office:value="40.0" table:style-name="c1">
            <text:p>40.0</text:p>
          </table:table-cell>
          <table:table-cell office:value-type="float" office:value="7.3584941331863645" table:style-name="c1">
            <text:p>7.4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float" office:value="-3.6294520079878336" table:style-name="c6">
            <text:p>-3.6</text:p>
          </table:table-cell>
          <table:table-cell office:value-type="float" office:value="0.21344717182496167" table:style-name="c1">
            <text:p>+0.2</text:p>
          </table:table-cell>
          <table:table-cell office:value-type="float" office:value="-3.8428991798127954" table:style-name="c5">
            <text:p>-3.8</text:p>
          </table:table-cell>
          <table:table-cell office:value-type="float" office:value="14" table:style-name="c1">
            <text:p>14</text:p>
          </table:table-cell>
          <table:table-cell office:value-type="float" office:value="42.857142857142854" table:style-name="c1">
            <text:p>42.9</text:p>
          </table:table-cell>
          <table:table-cell office:value-type="float" office:value="11.066129854432736" table:style-name="c1">
            <text:p>11.1</text:p>
          </table:table-cell>
        </table:table-row>
        <table:table-row>
          <table:table-cell office:value-type="string" table:style-name="c2">
            <text:p>LINK/USDT</text:p>
          </table:table-cell>
          <table:table-cell office:value-type="float" office:value="-4.586551699057338" table:style-name="c6">
            <text:p>-4.6</text:p>
          </table:table-cell>
          <table:table-cell office:value-type="float" office:value="-4.581976112920745" table:style-name="c1">
            <text:p>-4.6</text:p>
          </table:table-cell>
          <table:table-cell office:value-type="float" office:value="-0.004575586136593479" table:style-name="c5">
            <text:p>-0.0</text:p>
          </table:table-cell>
          <table:table-cell office:value-type="float" office:value="11" table:style-name="c1">
            <text:p>11</text:p>
          </table:table-cell>
          <table:table-cell office:value-type="float" office:value="45.45454545454545" table:style-name="c1">
            <text:p>45.5</text:p>
          </table:table-cell>
          <table:table-cell office:value-type="float" office:value="12.962938902497944" table:style-name="c1">
            <text:p>13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float" office:value="-4.668154861110986" table:style-name="c6">
            <text:p>-4.7</text:p>
          </table:table-cell>
          <table:table-cell office:value-type="float" office:value="-7.64643237486688" table:style-name="c1">
            <text:p>-7.6</text:p>
          </table:table-cell>
          <table:table-cell office:value-type="float" office:value="2.9782775137558932" table:style-name="c4">
            <text:p>+3.0</text:p>
          </table:table-cell>
          <table:table-cell office:value-type="float" office:value="16" table:style-name="c1">
            <text:p>16</text:p>
          </table:table-cell>
          <table:table-cell office:value-type="float" office:value="50.0" table:style-name="c1">
            <text:p>50.0</text:p>
          </table:table-cell>
          <table:table-cell office:value-type="float" office:value="12.729919710901328" table:style-name="c1">
            <text:p>12.7</text:p>
          </table:table-cell>
        </table:table-row>
        <table:table-row>
          <table:table-cell office:value-type="string" table:style-name="c2">
            <text:p>POL/USDT</text:p>
          </table:table-cell>
          <table:table-cell office:value-type="float" office:value="-6.022197987752883" table:style-name="c6">
            <text:p>-6.0</text:p>
          </table:table-cell>
          <table:table-cell office:value-type="float" office:value="-11.084220716360118" table:style-name="c1">
            <text:p>-11.1</text:p>
          </table:table-cell>
          <table:table-cell office:value-type="float" office:value="5.062022728607235" table:style-name="c4">
            <text:p>+5.1</text:p>
          </table:table-cell>
          <table:table-cell office:value-type="float" office:value="14" table:style-name="c1">
            <text:p>14</text:p>
          </table:table-cell>
          <table:table-cell office:value-type="float" office:value="50.0" table:style-name="c1">
            <text:p>50.0</text:p>
          </table:table-cell>
          <table:table-cell office:value-type="float" office:value="9.190347154456319" table:style-name="c1">
            <text:p>9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float" office:value="-6.92204889583868" table:style-name="c6">
            <text:p>-6.9</text:p>
          </table:table-cell>
          <table:table-cell office:value-type="float" office:value="-10.603264726756564" table:style-name="c1">
            <text:p>-10.6</text:p>
          </table:table-cell>
          <table:table-cell office:value-type="float" office:value="3.6812158309178837" table:style-name="c4">
            <text:p>+3.7</text:p>
          </table:table-cell>
          <table:table-cell office:value-type="float" office:value="8" table:style-name="c1">
            <text:p>8</text:p>
          </table:table-cell>
          <table:table-cell office:value-type="float" office:value="25.0" table:style-name="c1">
            <text:p>25.0</text:p>
          </table:table-cell>
          <table:table-cell office:value-type="float" office:value="12.413345011663083" table:style-name="c1">
            <text:p>12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float" office:value="-7.738042693680927" table:style-name="c6">
            <text:p>-7.7</text:p>
          </table:table-cell>
          <table:table-cell office:value-type="float" office:value="-21.671195652173914" table:style-name="c1">
            <text:p>-21.7</text:p>
          </table:table-cell>
          <table:table-cell office:value-type="float" office:value="13.933152958492986" table:style-name="c4">
            <text:p>+13.9</text:p>
          </table:table-cell>
          <table:table-cell office:value-type="float" office:value="10" table:style-name="c1">
            <text:p>10</text:p>
          </table:table-cell>
          <table:table-cell office:value-type="float" office:value="30.0" table:style-name="c1">
            <text:p>30.0</text:p>
          </table:table-cell>
          <table:table-cell office:value-type="float" office:value="12.927605669400219" table:style-name="c1">
            <text:p>12.9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float" office:value="-8.098681750483786" table:style-name="c6">
            <text:p>-8.1</text:p>
          </table:table-cell>
          <table:table-cell office:value-type="float" office:value="3.6605580624366927" table:style-name="c1">
            <text:p>+3.7</text:p>
          </table:table-cell>
          <table:table-cell office:value-type="float" office:value="-11.759239812920478" table:style-name="c5">
            <text:p>-11.8</text:p>
          </table:table-cell>
          <table:table-cell office:value-type="float" office:value="13" table:style-name="c1">
            <text:p>13</text:p>
          </table:table-cell>
          <table:table-cell office:value-type="float" office:value="30.76923076923077" table:style-name="c1">
            <text:p>30.8</text:p>
          </table:table-cell>
          <table:table-cell office:value-type="float" office:value="8.84824917892232" table:style-name="c1">
            <text:p>8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float" office:value="-8.801793485391295" table:style-name="c6">
            <text:p>-8.8</text:p>
          </table:table-cell>
          <table:table-cell office:value-type="float" office:value="19.465917076598735" table:style-name="c1">
            <text:p>+19.5</text:p>
          </table:table-cell>
          <table:table-cell office:value-type="float" office:value="-28.26771056199003" table:style-name="c5">
            <text:p>-28.3</text:p>
          </table:table-cell>
          <table:table-cell office:value-type="float" office:value="11" table:style-name="c1">
            <text:p>11</text:p>
          </table:table-cell>
          <table:table-cell office:value-type="float" office:value="27.27272727272727" table:style-name="c1">
            <text:p>27.3</text:p>
          </table:table-cell>
          <table:table-cell office:value-type="float" office:value="8.863354559441564" table:style-name="c1">
            <text:p>8.9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float" office:value="-9.302489056200159" table:style-name="c6">
            <text:p>-9.3</text:p>
          </table:table-cell>
          <table:table-cell office:value-type="float" office:value="-12.086536742356515" table:style-name="c1">
            <text:p>-12.1</text:p>
          </table:table-cell>
          <table:table-cell office:value-type="float" office:value="2.784047686156356" table:style-name="c4">
            <text:p>+2.8</text:p>
          </table:table-cell>
          <table:table-cell office:value-type="float" office:value="8" table:style-name="c1">
            <text:p>8</text:p>
          </table:table-cell>
          <table:table-cell office:value-type="float" office:value="25.0" table:style-name="c1">
            <text:p>25.0</text:p>
          </table:table-cell>
          <table:table-cell office:value-type="float" office:value="13.285370055325323" table:style-name="c1">
            <text:p>13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float" office:value="-9.953517964222897" table:style-name="c6">
            <text:p>-10.0</text:p>
          </table:table-cell>
          <table:table-cell office:value-type="float" office:value="-3.214285714285714" table:style-name="c1">
            <text:p>-3.2</text:p>
          </table:table-cell>
          <table:table-cell office:value-type="float" office:value="-6.739232249937183" table:style-name="c5">
            <text:p>-6.7</text:p>
          </table:table-cell>
          <table:table-cell office:value-type="float" office:value="16" table:style-name="c1">
            <text:p>16</text:p>
          </table:table-cell>
          <table:table-cell office:value-type="float" office:value="43.75" table:style-name="c1">
            <text:p>43.8</text:p>
          </table:table-cell>
          <table:table-cell office:value-type="float" office:value="18.22838707438254" table:style-name="c1">
            <text:p>18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float" office:value="-10.266774650783372" table:style-name="c6">
            <text:p>-10.3</text:p>
          </table:table-cell>
          <table:table-cell office:value-type="float" office:value="3.685711268349358" table:style-name="c1">
            <text:p>+3.7</text:p>
          </table:table-cell>
          <table:table-cell office:value-type="float" office:value="-13.95248591913273" table:style-name="c5">
            <text:p>-14.0</text:p>
          </table:table-cell>
          <table:table-cell office:value-type="float" office:value="17" table:style-name="c1">
            <text:p>17</text:p>
          </table:table-cell>
          <table:table-cell office:value-type="float" office:value="47.05882352941176" table:style-name="c1">
            <text:p>47.1</text:p>
          </table:table-cell>
          <table:table-cell office:value-type="float" office:value="16.069980117485986" table:style-name="c1">
            <text:p>16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float" office:value="-11.031559316199719" table:style-name="c6">
            <text:p>-11.0</text:p>
          </table:table-cell>
          <table:table-cell office:value-type="float" office:value="-8.512720156555769" table:style-name="c1">
            <text:p>-8.5</text:p>
          </table:table-cell>
          <table:table-cell office:value-type="float" office:value="-2.5188391596439494" table:style-name="c5">
            <text:p>-2.5</text:p>
          </table:table-cell>
          <table:table-cell office:value-type="float" office:value="12" table:style-name="c1">
            <text:p>12</text:p>
          </table:table-cell>
          <table:table-cell office:value-type="float" office:value="25.0" table:style-name="c1">
            <text:p>25.0</text:p>
          </table:table-cell>
          <table:table-cell office:value-type="float" office:value="22.144496039779142" table:style-name="c1">
            <text:p>22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float" office:value="-13.335711143551565" table:style-name="c6">
            <text:p>-13.3</text:p>
          </table:table-cell>
          <table:table-cell office:value-type="float" office:value="-5.694980694980697" table:style-name="c1">
            <text:p>-5.7</text:p>
          </table:table-cell>
          <table:table-cell office:value-type="float" office:value="-7.640730448570868" table:style-name="c5">
            <text:p>-7.6</text:p>
          </table:table-cell>
          <table:table-cell office:value-type="float" office:value="10" table:style-name="c1">
            <text:p>10</text:p>
          </table:table-cell>
          <table:table-cell office:value-type="float" office:value="30.0" table:style-name="c1">
            <text:p>30.0</text:p>
          </table:table-cell>
          <table:table-cell office:value-type="float" office:value="17.41941908085972" table:style-name="c1">
            <text:p>17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float" office:value="-14.058546449951804" table:style-name="c6">
            <text:p>-14.1</text:p>
          </table:table-cell>
          <table:table-cell office:value-type="float" office:value="-27.420973406924244" table:style-name="c1">
            <text:p>-27.4</text:p>
          </table:table-cell>
          <table:table-cell office:value-type="float" office:value="13.36242695697244" table:style-name="c4">
            <text:p>+13.4</text:p>
          </table:table-cell>
          <table:table-cell office:value-type="float" office:value="12" table:style-name="c1">
            <text:p>12</text:p>
          </table:table-cell>
          <table:table-cell office:value-type="float" office:value="25.0" table:style-name="c1">
            <text:p>25.0</text:p>
          </table:table-cell>
          <table:table-cell office:value-type="float" office:value="20.900356293114022" table:style-name="c1">
            <text:p>20.9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float" office:value="-14.549296439191858" table:style-name="c6">
            <text:p>-14.5</text:p>
          </table:table-cell>
          <table:table-cell office:value-type="float" office:value="-25.899280575539564" table:style-name="c1">
            <text:p>-25.9</text:p>
          </table:table-cell>
          <table:table-cell office:value-type="float" office:value="11.349984136347706" table:style-name="c4">
            <text:p>+11.3</text:p>
          </table:table-cell>
          <table:table-cell office:value-type="float" office:value="8" table:style-name="c1">
            <text:p>8</text:p>
          </table:table-cell>
          <table:table-cell office:value-type="float" office:value="12.5" table:style-name="c1">
            <text:p>12.5</text:p>
          </table:table-cell>
          <table:table-cell office:value-type="float" office:value="15.85978703350114" table:style-name="c1">
            <text:p>15.9</text:p>
          </table:table-cell>
        </table:table-row>
        <table:table-row>
          <table:table-cell office:value-type="string" table:style-name="c2">
            <text:p>HBAR/USDT</text:p>
          </table:table-cell>
          <table:table-cell office:value-type="float" office:value="-17.143748087620384" table:style-name="c6">
            <text:p>-17.1</text:p>
          </table:table-cell>
          <table:table-cell office:value-type="float" office:value="-11.241494921605359" table:style-name="c1">
            <text:p>-11.2</text:p>
          </table:table-cell>
          <table:table-cell office:value-type="float" office:value="-5.902253166015026" table:style-name="c5">
            <text:p>-5.9</text:p>
          </table:table-cell>
          <table:table-cell office:value-type="float" office:value="14" table:style-name="c1">
            <text:p>14</text:p>
          </table:table-cell>
          <table:table-cell office:value-type="float" office:value="35.714285714285715" table:style-name="c1">
            <text:p>35.7</text:p>
          </table:table-cell>
          <table:table-cell office:value-type="float" office:value="25.133138036919355" table:style-name="c1">
            <text:p>25.1</text:p>
          </table:table-cell>
        </table:table-row>
        <table:table-row>
          <table:table-cell office:value-type="string" table:style-name="c2">
            <text:p>ADA/USDT</text:p>
          </table:table-cell>
          <table:table-cell office:value-type="float" office:value="-18.109272619186903" table:style-name="c6">
            <text:p>-18.1</text:p>
          </table:table-cell>
          <table:table-cell office:value-type="float" office:value="-18.50494686698424" table:style-name="c1">
            <text:p>-18.5</text:p>
          </table:table-cell>
          <table:table-cell office:value-type="float" office:value="0.39567424779733784" table:style-name="c4">
            <text:p>+0.4</text:p>
          </table:table-cell>
          <table:table-cell office:value-type="float" office:value="13" table:style-name="c1">
            <text:p>13</text:p>
          </table:table-cell>
          <table:table-cell office:value-type="float" office:value="23.076923076923077" table:style-name="c1">
            <text:p>23.1</text:p>
          </table:table-cell>
          <table:table-cell office:value-type="float" office:value="19.69746154487399" table:style-name="c1">
            <text:p>19.7</text:p>
          </table:table-cell>
        </table:table-row>
        <table:table-row>
          <table:table-cell office:value-type="string" table:style-name="c7">
            <text:p>AVERAGE</text:p>
          </table:table-cell>
          <table:table-cell office:value-type="float" office:value="-1.4420309580080388" table:style-name="c8">
            <text:p>-1.4</text:p>
          </table:table-cell>
          <table:table-cell office:value-type="float" office:value="4.563941399287484" table:style-name="c7">
            <text:p>+4.6</text:p>
          </table:table-cell>
          <table:table-cell office:value-type="float" office:value="-6.005972357295523" table:style-name="c8">
            <text:p>-6.0</text:p>
          </table:table-cell>
          <table:table-cell office:value-type="float" office:value="360" table:style-name="c7">
            <text:p>360</text:p>
          </table:table-cell>
          <table:table-cell office:value-type="float" office:value="39.680293562646504" table:style-name="c7">
            <text:p>39.7</text:p>
          </table:table-cell>
          <table:table-cell office:value-type="float" office:value="14.008406972824382" table:style-name="c7">
            <text:p>14.0</text:p>
          </table:table-cell>
        </table:table-row>
      </table:table>
      <table:table table:name="Trade Log">
        <table:table-column table:style-name="tl0"/>
        <table:table-column table:style-name="tl1"/>
        <table:table-column table:style-name="tl2"/>
        <table:table-column table:style-name="tl3"/>
        <table:table-column table:style-name="tl4"/>
        <table:table-column table:style-name="tl5"/>
        <table:table-column table:style-name="tl6"/>
        <table:table-row>
          <table:table-cell office:value-type="string" table:style-name="c0">
            <text:p>Coin</text:p>
          </table:table-cell>
          <table:table-cell office:value-type="string" table:style-name="c0">
            <text:p>Type</text:p>
          </table:table-cell>
          <table:table-cell office:value-type="string" table:style-name="c0">
            <text:p>Entry Date</text:p>
          </table:table-cell>
          <table:table-cell office:value-type="string" table:style-name="c0">
            <text:p>Entry Price</text:p>
          </table:table-cell>
          <table:table-cell office:value-type="string" table:style-name="c0">
            <text:p>Exit Date</text:p>
          </table:table-cell>
          <table:table-cell office:value-type="string" table:style-name="c0">
            <text:p>Exit Price</text:p>
          </table:table-cell>
          <table:table-cell office:value-type="string" table:style-name="c0">
            <text:p>P/L %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0.27223605" table:style-name="c10">
            <text:p>0.27224</text:p>
          </table:table-cell>
          <table:table-cell office:value-type="string" table:style-name="c10">
            <text:p>2026-03-11 15:00</text:p>
          </table:table-cell>
          <table:table-cell office:value-type="float" office:value="0.2636681" table:style-name="c10">
            <text:p>0.26367</text:p>
          </table:table-cell>
          <table:table-cell office:value-type="float" office:value="-3.340858983187567" table:style-name="c11">
            <text:p>-3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8:30</text:p>
          </table:table-cell>
          <table:table-cell office:value-type="float" office:value="0.2615307" table:style-name="c10">
            <text:p>0.26153</text:p>
          </table:table-cell>
          <table:table-cell office:value-type="string" table:style-name="c10">
            <text:p>2026-03-13 08:30</text:p>
          </table:table-cell>
          <table:table-cell office:value-type="float" office:value="0.27216385" table:style-name="c10">
            <text:p>0.27216</text:p>
          </table:table-cell>
          <table:table-cell office:value-type="float" office:value="3.8577094252605804" table:style-name="c12">
            <text:p>+3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2:45</text:p>
          </table:table-cell>
          <table:table-cell office:value-type="float" office:value="0.2767383" table:style-name="c10">
            <text:p>0.27674</text:p>
          </table:table-cell>
          <table:table-cell office:value-type="string" table:style-name="c10">
            <text:p>2026-03-14 09:00</text:p>
          </table:table-cell>
          <table:table-cell office:value-type="float" office:value="0.2610694" table:style-name="c10">
            <text:p>0.26107</text:p>
          </table:table-cell>
          <table:table-cell office:value-type="float" office:value="-5.850573531238712" table:style-name="c11">
            <text:p>-5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0.2783391" table:style-name="c10">
            <text:p>0.27834</text:p>
          </table:table-cell>
          <table:table-cell office:value-type="string" table:style-name="c10">
            <text:p>2026-03-17 03:45</text:p>
          </table:table-cell>
          <table:table-cell office:value-type="float" office:value="0.28515735000000003" table:style-name="c10">
            <text:p>0.28516</text:p>
          </table:table-cell>
          <table:table-cell office:value-type="float" office:value="2.2448231158863408" table:style-name="c12">
            <text:p>+2.2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6:45</text:p>
          </table:table-cell>
          <table:table-cell office:value-type="float" office:value="0.2699349" table:style-name="c10">
            <text:p>0.26993</text:p>
          </table:table-cell>
          <table:table-cell office:value-type="string" table:style-name="c10">
            <text:p>2026-03-26 06:45</text:p>
          </table:table-cell>
          <table:table-cell office:value-type="float" office:value="0.26136925" table:style-name="c10">
            <text:p>0.26137</text:p>
          </table:table-cell>
          <table:table-cell office:value-type="float" office:value="-3.366784780608212" table:style-name="c11">
            <text:p>-3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3 15:15</text:p>
          </table:table-cell>
          <table:table-cell office:value-type="float" office:value="0.24962474999999998" table:style-name="c10">
            <text:p>0.24962</text:p>
          </table:table-cell>
          <table:table-cell office:value-type="string" table:style-name="c10">
            <text:p>2026-04-04 15:15</text:p>
          </table:table-cell>
          <table:table-cell office:value-type="float" office:value="0.24627680000000002" table:style-name="c10">
            <text:p>0.24628</text:p>
          </table:table-cell>
          <table:table-cell office:value-type="float" office:value="-1.538412085820795" table:style-name="c11">
            <text:p>-1.5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0.2491245" table:style-name="c10">
            <text:p>0.24912</text:p>
          </table:table-cell>
          <table:table-cell office:value-type="string" table:style-name="c10">
            <text:p>2026-04-17 02:45</text:p>
          </table:table-cell>
          <table:table-cell office:value-type="float" office:value="0.25497245" table:style-name="c10">
            <text:p>0.25497</text:p>
          </table:table-cell>
          <table:table-cell office:value-type="float" office:value="2.14280814309713" table:style-name="c12">
            <text:p>+2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2:30</text:p>
          </table:table-cell>
          <table:table-cell office:value-type="float" office:value="0.25382685" table:style-name="c10">
            <text:p>0.25383</text:p>
          </table:table-cell>
          <table:table-cell office:value-type="string" table:style-name="c10">
            <text:p>2026-04-23 02:30</text:p>
          </table:table-cell>
          <table:table-cell office:value-type="float" office:value="0.24647670000000002" table:style-name="c10">
            <text:p>0.24648</text:p>
          </table:table-cell>
          <table:table-cell office:value-type="float" office:value="-3.0898452718063463" table:style-name="c11">
            <text:p>-3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09:30</text:p>
          </table:table-cell>
          <table:table-cell office:value-type="float" office:value="0.25282635" table:style-name="c10">
            <text:p>0.25283</text:p>
          </table:table-cell>
          <table:table-cell office:value-type="string" table:style-name="c10">
            <text:p>2026-04-27 09:30</text:p>
          </table:table-cell>
          <table:table-cell office:value-type="float" office:value="0.2474762" table:style-name="c10">
            <text:p>0.24748</text:p>
          </table:table-cell>
          <table:table-cell office:value-type="float" office:value="-2.311806077095979" table:style-name="c11">
            <text:p>-2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00</text:p>
          </table:table-cell>
          <table:table-cell office:value-type="float" office:value="0.25302645" table:style-name="c10">
            <text:p>0.25303</text:p>
          </table:table-cell>
          <table:table-cell office:value-type="string" table:style-name="c10">
            <text:p>2026-04-29 18:00</text:p>
          </table:table-cell>
          <table:table-cell office:value-type="float" office:value="0.2448775" table:style-name="c10">
            <text:p>0.24488</text:p>
          </table:table-cell>
          <table:table-cell office:value-type="float" office:value="-3.4140541917653366" table:style-name="c11">
            <text:p>-3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00</text:p>
          </table:table-cell>
          <table:table-cell office:value-type="float" office:value="0.25232609999999994" table:style-name="c10">
            <text:p>0.25233</text:p>
          </table:table-cell>
          <table:table-cell office:value-type="string" table:style-name="c10">
            <text:p>2026-05-05 02:00</text:p>
          </table:table-cell>
          <table:table-cell office:value-type="float" office:value="0.25077455000000004" table:style-name="c10">
            <text:p>0.25077</text:p>
          </table:table-cell>
          <table:table-cell office:value-type="float" office:value="-0.8135695536252041" table:style-name="c11">
            <text:p>-0.8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21:45</text:p>
          </table:table-cell>
          <table:table-cell office:value-type="float" office:value="0.2773386" table:style-name="c10">
            <text:p>0.27734</text:p>
          </table:table-cell>
          <table:table-cell office:value-type="string" table:style-name="c10">
            <text:p>2026-05-09 21:45</text:p>
          </table:table-cell>
          <table:table-cell office:value-type="float" office:value="0.27196395" table:style-name="c10">
            <text:p>0.27196</text:p>
          </table:table-cell>
          <table:table-cell office:value-type="float" office:value="-2.1339640194513065" table:style-name="c11">
            <text:p>-2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0:15</text:p>
          </table:table-cell>
          <table:table-cell office:value-type="float" office:value="0.27983985" table:style-name="c10">
            <text:p>0.27984</text:p>
          </table:table-cell>
          <table:table-cell office:value-type="string" table:style-name="c10">
            <text:p>2026-05-12 10:15</text:p>
          </table:table-cell>
          <table:table-cell office:value-type="float" office:value="0.27546220000000005" table:style-name="c10">
            <text:p>0.27546</text:p>
          </table:table-cell>
          <table:table-cell office:value-type="float" office:value="-1.7611140578441375" table:style-name="c11">
            <text:p>-1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3:15</text:p>
          </table:table-cell>
          <table:table-cell office:value-type="float" office:value="0.0884442" table:style-name="c1">
            <text:p>0.088444</text:p>
          </table:table-cell>
          <table:table-cell office:value-type="string" table:style-name="c1">
            <text:p>2026-03-26 09:00</text:p>
          </table:table-cell>
          <table:table-cell office:value-type="float" office:value="0.08535730000000001" table:style-name="c1">
            <text:p>0.085357</text:p>
          </table:table-cell>
          <table:table-cell office:value-type="float" office:value="-3.683146257979608" table:style-name="c13">
            <text:p>-3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15</text:p>
          </table:table-cell>
          <table:table-cell office:value-type="float" office:value="0.084042" table:style-name="c1">
            <text:p>0.084042</text:p>
          </table:table-cell>
          <table:table-cell office:value-type="string" table:style-name="c1">
            <text:p>2026-03-31 08:15</text:p>
          </table:table-cell>
          <table:table-cell office:value-type="float" office:value="0.08595699999999999" table:style-name="c1">
            <text:p>0.085957</text:p>
          </table:table-cell>
          <table:table-cell office:value-type="float" office:value="2.0741676269008247" table:style-name="c14">
            <text:p>+2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0:15</text:p>
          </table:table-cell>
          <table:table-cell office:value-type="float" office:value="0.0878439" table:style-name="c1">
            <text:p>0.087844</text:p>
          </table:table-cell>
          <table:table-cell office:value-type="string" table:style-name="c1">
            <text:p>2026-04-01 10:15</text:p>
          </table:table-cell>
          <table:table-cell office:value-type="float" office:value="0.10384805000000001" table:style-name="c1">
            <text:p>0.10385</text:p>
          </table:table-cell>
          <table:table-cell office:value-type="float" office:value="17.98253236485403" table:style-name="c14">
            <text:p>+18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4:00</text:p>
          </table:table-cell>
          <table:table-cell office:value-type="float" office:value="0.12176084999999999" table:style-name="c1">
            <text:p>0.12176</text:p>
          </table:table-cell>
          <table:table-cell office:value-type="string" table:style-name="c1">
            <text:p>2026-04-07 03:00</text:p>
          </table:table-cell>
          <table:table-cell office:value-type="float" office:value="0.11464265" table:style-name="c1">
            <text:p>0.11464</text:p>
          </table:table-cell>
          <table:table-cell office:value-type="float" office:value="-6.034263605543155" table:style-name="c13">
            <text:p>-6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5:45</text:p>
          </table:table-cell>
          <table:table-cell office:value-type="float" office:value="0.1102551" table:style-name="c1">
            <text:p>0.11026</text:p>
          </table:table-cell>
          <table:table-cell office:value-type="string" table:style-name="c1">
            <text:p>2026-04-16 05:45</text:p>
          </table:table-cell>
          <table:table-cell office:value-type="float" office:value="0.11354320000000001" table:style-name="c1">
            <text:p>0.11354</text:p>
          </table:table-cell>
          <table:table-cell office:value-type="float" office:value="2.7764041238909076" table:style-name="c14">
            <text:p>+2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0:15</text:p>
          </table:table-cell>
          <table:table-cell office:value-type="float" office:value="0.10655324999999999" table:style-name="c1">
            <text:p>0.10655</text:p>
          </table:table-cell>
          <table:table-cell office:value-type="string" table:style-name="c1">
            <text:p>2026-04-25 10:15</text:p>
          </table:table-cell>
          <table:table-cell office:value-type="float" office:value="0.11604195" table:style-name="c1">
            <text:p>0.11604</text:p>
          </table:table-cell>
          <table:table-cell office:value-type="float" office:value="8.687423557657814" table:style-name="c14">
            <text:p>+8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3:45</text:p>
          </table:table-cell>
          <table:table-cell office:value-type="float" office:value="0.11355675" table:style-name="c1">
            <text:p>0.11356</text:p>
          </table:table-cell>
          <table:table-cell office:value-type="string" table:style-name="c1">
            <text:p>2026-05-04 03:45</text:p>
          </table:table-cell>
          <table:table-cell office:value-type="float" office:value="0.1155422" table:style-name="c1">
            <text:p>0.11554</text:p>
          </table:table-cell>
          <table:table-cell office:value-type="float" office:value="1.5450258502466951" table:style-name="c14">
            <text:p>+1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15</text:p>
          </table:table-cell>
          <table:table-cell office:value-type="float" office:value="0.11425709999999999" table:style-name="c1">
            <text:p>0.11426</text:p>
          </table:table-cell>
          <table:table-cell office:value-type="string" table:style-name="c1">
            <text:p>2026-05-05 15:15</text:p>
          </table:table-cell>
          <table:table-cell office:value-type="float" office:value="0.11934030000000001" table:style-name="c1">
            <text:p>0.11934</text:p>
          </table:table-cell>
          <table:table-cell office:value-type="float" office:value="4.240120517937207" table:style-name="c14">
            <text:p>+4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3:00</text:p>
          </table:table-cell>
          <table:table-cell office:value-type="float" office:value="0.1212606" table:style-name="c1">
            <text:p>0.12126</text:p>
          </table:table-cell>
          <table:table-cell office:value-type="string" table:style-name="c1">
            <text:p>2026-05-08 03:00</text:p>
          </table:table-cell>
          <table:table-cell office:value-type="float" office:value="0.12613690000000002" table:style-name="c1">
            <text:p>0.12614</text:p>
          </table:table-cell>
          <table:table-cell office:value-type="float" office:value="3.8134005084091926" table:style-name="c14">
            <text:p>+3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15:45</text:p>
          </table:table-cell>
          <table:table-cell office:value-type="float" office:value="0.11655825" table:style-name="c1">
            <text:p>0.11656</text:p>
          </table:table-cell>
          <table:table-cell office:value-type="string" table:style-name="c1">
            <text:p>2026-05-30 15:45</text:p>
          </table:table-cell>
          <table:table-cell office:value-type="float" office:value="0.12663665000000002" table:style-name="c1">
            <text:p>0.12664</text:p>
          </table:table-cell>
          <table:table-cell office:value-type="float" office:value="8.429479111645911" table:style-name="c14">
            <text:p>+8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7:15</text:p>
          </table:table-cell>
          <table:table-cell office:value-type="float" office:value="1.0075034999999999" table:style-name="c10">
            <text:p>1.0075</text:p>
          </table:table-cell>
          <table:table-cell office:value-type="string" table:style-name="c10">
            <text:p>2026-03-06 07:15</text:p>
          </table:table-cell>
          <table:table-cell office:value-type="float" office:value="1.0114940000000001" table:style-name="c10">
            <text:p>1.0115</text:p>
          </table:table-cell>
          <table:table-cell office:value-type="float" office:value="0.19538626853408125" table:style-name="c12">
            <text:p>+0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15</text:p>
          </table:table-cell>
          <table:table-cell office:value-type="float" office:value="0.9904949999999999" table:style-name="c10">
            <text:p>0.99049</text:p>
          </table:table-cell>
          <table:table-cell office:value-type="string" table:style-name="c10">
            <text:p>2026-03-11 06:00</text:p>
          </table:table-cell>
          <table:table-cell office:value-type="float" office:value="0.937531" table:style-name="c10">
            <text:p>0.93753</text:p>
          </table:table-cell>
          <table:table-cell office:value-type="float" office:value="-5.536436273681334" table:style-name="c11">
            <text:p>-5.5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3:45</text:p>
          </table:table-cell>
          <table:table-cell office:value-type="float" office:value="0.9974985" table:style-name="c10">
            <text:p>0.9975</text:p>
          </table:table-cell>
          <table:table-cell office:value-type="string" table:style-name="c10">
            <text:p>2026-03-17 13:45</text:p>
          </table:table-cell>
          <table:table-cell office:value-type="float" office:value="0.9865065000000001" table:style-name="c10">
            <text:p>0.98651</text:p>
          </table:table-cell>
          <table:table-cell office:value-type="float" office:value="-1.2996537331634972" table:style-name="c11">
            <text:p>-1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30</text:p>
          </table:table-cell>
          <table:table-cell office:value-type="float" office:value="0.8714354999999999" table:style-name="c10">
            <text:p>0.87144</text:p>
          </table:table-cell>
          <table:table-cell office:value-type="string" table:style-name="c10">
            <text:p>2026-04-14 22:30</text:p>
          </table:table-cell>
          <table:table-cell office:value-type="float" office:value="0.8565715" table:style-name="c10">
            <text:p>0.85657</text:p>
          </table:table-cell>
          <table:table-cell office:value-type="float" office:value="-1.9021816793669655" table:style-name="c11">
            <text:p>-1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0.902451" table:style-name="c10">
            <text:p>0.90245</text:p>
          </table:table-cell>
          <table:table-cell office:value-type="string" table:style-name="c10">
            <text:p>2026-04-17 02:45</text:p>
          </table:table-cell>
          <table:table-cell office:value-type="float" office:value="0.983508" table:style-name="c10">
            <text:p>0.98351</text:p>
          </table:table-cell>
          <table:table-cell office:value-type="float" office:value="8.764017936486312" table:style-name="c12">
            <text:p>+8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8:15</text:p>
          </table:table-cell>
          <table:table-cell office:value-type="float" office:value="0.9664829999999999" table:style-name="c10">
            <text:p>0.96648</text:p>
          </table:table-cell>
          <table:table-cell office:value-type="string" table:style-name="c10">
            <text:p>2026-04-23 08:15</text:p>
          </table:table-cell>
          <table:table-cell office:value-type="float" office:value="0.9495250000000001" table:style-name="c10">
            <text:p>0.94953</text:p>
          </table:table-cell>
          <table:table-cell office:value-type="float" office:value="-1.951001773957728" table:style-name="c11">
            <text:p>-2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04:45</text:p>
          </table:table-cell>
          <table:table-cell office:value-type="float" office:value="0.9684839999999999" table:style-name="c10">
            <text:p>0.96848</text:p>
          </table:table-cell>
          <table:table-cell office:value-type="string" table:style-name="c10">
            <text:p>2026-04-27 04:45</text:p>
          </table:table-cell>
          <table:table-cell office:value-type="float" office:value="0.9825085" table:style-name="c10">
            <text:p>0.98251</text:p>
          </table:table-cell>
          <table:table-cell office:value-type="float" office:value="1.2452932117102744" table:style-name="c12">
            <text:p>+1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8:15</text:p>
          </table:table-cell>
          <table:table-cell office:value-type="float" office:value="0.9704849999999999" table:style-name="c10">
            <text:p>0.97048</text:p>
          </table:table-cell>
          <table:table-cell office:value-type="string" table:style-name="c10">
            <text:p>2026-05-22 08:15</text:p>
          </table:table-cell>
          <table:table-cell office:value-type="float" office:value="0.983508" table:style-name="c10">
            <text:p>0.98351</text:p>
          </table:table-cell>
          <table:table-cell office:value-type="float" office:value="1.1393238955780038" table:style-name="c12">
            <text:p>+1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4:15</text:p>
          </table:table-cell>
          <table:table-cell office:value-type="float" office:value="0.9734864999999999" table:style-name="c10">
            <text:p>0.97349</text:p>
          </table:table-cell>
          <table:table-cell office:value-type="string" table:style-name="c10">
            <text:p>2026-05-26 14:15</text:p>
          </table:table-cell>
          <table:table-cell office:value-type="float" office:value="0.9975010000000001" table:style-name="c10">
            <text:p>0.9975</text:p>
          </table:table-cell>
          <table:table-cell office:value-type="float" office:value="2.2620237158913037" table:style-name="c12">
            <text:p>+2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30</text:p>
          </table:table-cell>
          <table:table-cell office:value-type="float" office:value="0.10095045" table:style-name="c1">
            <text:p>0.10095</text:p>
          </table:table-cell>
          <table:table-cell office:value-type="string" table:style-name="c1">
            <text:p>2026-03-10 19:30</text:p>
          </table:table-cell>
          <table:table-cell office:value-type="float" office:value="0.09795100000000001" table:style-name="c1">
            <text:p>0.097951</text:p>
          </table:table-cell>
          <table:table-cell office:value-type="float" office:value="-3.1651706842316996" table:style-name="c13">
            <text:p>-3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30</text:p>
          </table:table-cell>
          <table:table-cell office:value-type="float" office:value="0.10595294999999999" table:style-name="c1">
            <text:p>0.10595</text:p>
          </table:table-cell>
          <table:table-cell office:value-type="string" table:style-name="c1">
            <text:p>2026-03-14 12:00</text:p>
          </table:table-cell>
          <table:table-cell office:value-type="float" office:value="0.1001499" table:style-name="c1">
            <text:p>0.10015</text:p>
          </table:table-cell>
          <table:table-cell office:value-type="float" office:value="-5.6659580031513945" table:style-name="c13">
            <text:p>-5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0.10635315" table:style-name="c1">
            <text:p>0.10635</text:p>
          </table:table-cell>
          <table:table-cell office:value-type="string" table:style-name="c1">
            <text:p>2026-03-17 03:45</text:p>
          </table:table-cell>
          <table:table-cell office:value-type="float" office:value="0.10824585" table:style-name="c1">
            <text:p>0.10825</text:p>
          </table:table-cell>
          <table:table-cell office:value-type="float" office:value="1.5761794980684751" table:style-name="c14">
            <text:p>+1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15</text:p>
          </table:table-cell>
          <table:table-cell office:value-type="float" office:value="0.09294644999999999" table:style-name="c1">
            <text:p>0.092946</text:p>
          </table:table-cell>
          <table:table-cell office:value-type="string" table:style-name="c1">
            <text:p>2026-03-31 08:15</text:p>
          </table:table-cell>
          <table:table-cell office:value-type="float" office:value="0.09265365" table:style-name="c1">
            <text:p>0.092654</text:p>
          </table:table-cell>
          <table:table-cell office:value-type="float" office:value="-0.5142903751030548" table:style-name="c13">
            <text:p>-0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0.09674834999999998" table:style-name="c1">
            <text:p>0.096748</text:p>
          </table:table-cell>
          <table:table-cell office:value-type="string" table:style-name="c1">
            <text:p>2026-04-02 08:00</text:p>
          </table:table-cell>
          <table:table-cell office:value-type="float" office:value="0.0913543" table:style-name="c1">
            <text:p>0.091354</text:p>
          </table:table-cell>
          <table:table-cell office:value-type="float" office:value="-5.764095455581398" table:style-name="c13">
            <text:p>-5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8:45</text:p>
          </table:table-cell>
          <table:table-cell office:value-type="float" office:value="0.09694844999999999" table:style-name="c1">
            <text:p>0.096948</text:p>
          </table:table-cell>
          <table:table-cell office:value-type="string" table:style-name="c1">
            <text:p>2026-04-07 08:45</text:p>
          </table:table-cell>
          <table:table-cell office:value-type="float" office:value="0.09485255000000001" table:style-name="c1">
            <text:p>0.094853</text:p>
          </table:table-cell>
          <table:table-cell office:value-type="float" office:value="-2.357448981855814" table:style-name="c13">
            <text:p>-2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8:00</text:p>
          </table:table-cell>
          <table:table-cell office:value-type="float" office:value="0.09484739999999998" table:style-name="c1">
            <text:p>0.094847</text:p>
          </table:table-cell>
          <table:table-cell office:value-type="string" table:style-name="c1">
            <text:p>2026-04-08 18:00</text:p>
          </table:table-cell>
          <table:table-cell office:value-type="float" office:value="0.10124935" table:style-name="c1">
            <text:p>0.10125</text:p>
          </table:table-cell>
          <table:table-cell office:value-type="float" office:value="6.536344221718271" table:style-name="c14">
            <text:p>+6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7:15</text:p>
          </table:table-cell>
          <table:table-cell office:value-type="float" office:value="0.1270635" table:style-name="c1">
            <text:p>0.12706</text:p>
          </table:table-cell>
          <table:table-cell office:value-type="string" table:style-name="c1">
            <text:p>2026-04-23 10:00</text:p>
          </table:table-cell>
          <table:table-cell office:value-type="float" office:value="0.12503745" table:style-name="c1">
            <text:p>0.12504</text:p>
          </table:table-cell>
          <table:table-cell office:value-type="float" office:value="-1.7912302608931951" table:style-name="c13">
            <text:p>-1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0:15</text:p>
          </table:table-cell>
          <table:table-cell office:value-type="float" office:value="0.1258629" table:style-name="c1">
            <text:p>0.12586</text:p>
          </table:table-cell>
          <table:table-cell office:value-type="string" table:style-name="c1">
            <text:p>2026-05-07 20:15</text:p>
          </table:table-cell>
          <table:table-cell office:value-type="float" office:value="0.12703645" table:style-name="c1">
            <text:p>0.12704</text:p>
          </table:table-cell>
          <table:table-cell office:value-type="float" office:value="0.730639558162105" table:style-name="c14">
            <text:p>+0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15</text:p>
          </table:table-cell>
          <table:table-cell office:value-type="float" office:value="0.14497245" table:style-name="c1">
            <text:p>0.14497</text:p>
          </table:table-cell>
          <table:table-cell office:value-type="string" table:style-name="c1">
            <text:p>2026-05-11 23:15</text:p>
          </table:table-cell>
          <table:table-cell office:value-type="float" office:value="0.14062965" table:style-name="c1">
            <text:p>0.14063</text:p>
          </table:table-cell>
          <table:table-cell office:value-type="float" office:value="-3.1895154357603817" table:style-name="c13">
            <text:p>-3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0:15</text:p>
          </table:table-cell>
          <table:table-cell office:value-type="float" office:value="1.858929" table:style-name="c10">
            <text:p>1.8589</text:p>
          </table:table-cell>
          <table:table-cell office:value-type="string" table:style-name="c10">
            <text:p>2026-03-14 10:15</text:p>
          </table:table-cell>
          <table:table-cell office:value-type="float" office:value="1.8630680000000002" table:style-name="c10">
            <text:p>1.8631</text:p>
          </table:table-cell>
          <table:table-cell office:value-type="float" office:value="0.022310000435754596" table:style-name="c12">
            <text:p>+0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9:15</text:p>
          </table:table-cell>
          <table:table-cell office:value-type="float" office:value="2.0150069999999998" table:style-name="c10">
            <text:p>2.015</text:p>
          </table:table-cell>
          <table:table-cell office:value-type="string" table:style-name="c10">
            <text:p>2026-03-18 20:00</text:p>
          </table:table-cell>
          <table:table-cell office:value-type="float" office:value="1.877061" table:style-name="c10">
            <text:p>1.8771</text:p>
          </table:table-cell>
          <table:table-cell office:value-type="float" office:value="-7.032146535421468" table:style-name="c11">
            <text:p>-7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3 16:30</text:p>
          </table:table-cell>
          <table:table-cell office:value-type="float" office:value="1.7178585" table:style-name="c10">
            <text:p>1.7179</text:p>
          </table:table-cell>
          <table:table-cell office:value-type="string" table:style-name="c10">
            <text:p>2026-04-04 16:30</text:p>
          </table:table-cell>
          <table:table-cell office:value-type="float" office:value="1.707146" table:style-name="c10">
            <text:p>1.7071</text:p>
          </table:table-cell>
          <table:table-cell office:value-type="float" office:value="-0.8222496121769951" table:style-name="c11">
            <text:p>-0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1:15</text:p>
          </table:table-cell>
          <table:table-cell office:value-type="float" office:value="1.7398695" table:style-name="c10">
            <text:p>1.7399</text:p>
          </table:table-cell>
          <table:table-cell office:value-type="string" table:style-name="c10">
            <text:p>2026-04-08 21:15</text:p>
          </table:table-cell>
          <table:table-cell office:value-type="float" office:value="1.777111" table:style-name="c10">
            <text:p>1.7771</text:p>
          </table:table-cell>
          <table:table-cell office:value-type="float" office:value="1.9362978149223276" table:style-name="c12">
            <text:p>+1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15:30</text:p>
          </table:table-cell>
          <table:table-cell office:value-type="float" office:value="1.8219104999999998" table:style-name="c10">
            <text:p>1.8219</text:p>
          </table:table-cell>
          <table:table-cell office:value-type="string" table:style-name="c10">
            <text:p>2026-04-22 15:30</text:p>
          </table:table-cell>
          <table:table-cell office:value-type="float" office:value="1.8800595000000002" table:style-name="c10">
            <text:p>1.8801</text:p>
          </table:table-cell>
          <table:table-cell office:value-type="float" office:value="2.9853695370601674" table:style-name="c12">
            <text:p>+3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07:15</text:p>
          </table:table-cell>
          <table:table-cell office:value-type="float" office:value="1.8599294999999998" table:style-name="c10">
            <text:p>1.8599</text:p>
          </table:table-cell>
          <table:table-cell office:value-type="string" table:style-name="c10">
            <text:p>2026-04-24 07:15</text:p>
          </table:table-cell>
          <table:table-cell office:value-type="float" office:value="1.925037" table:style-name="c10">
            <text:p>1.925</text:p>
          </table:table-cell>
          <table:table-cell office:value-type="float" office:value="3.2936383361305" table:style-name="c12">
            <text:p>+3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4 08:15</text:p>
          </table:table-cell>
          <table:table-cell office:value-type="float" office:value="1.9379685" table:style-name="c10">
            <text:p>1.938</text:p>
          </table:table-cell>
          <table:table-cell office:value-type="string" table:style-name="c10">
            <text:p>2026-04-25 08:15</text:p>
          </table:table-cell>
          <table:table-cell office:value-type="float" office:value="2.0209889999999997" table:style-name="c10">
            <text:p>2.021</text:p>
          </table:table-cell>
          <table:table-cell office:value-type="float" office:value="4.075429656828766" table:style-name="c12">
            <text:p>+4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1:15</text:p>
          </table:table-cell>
          <table:table-cell office:value-type="float" office:value="1.9079534999999999" table:style-name="c10">
            <text:p>1.908</text:p>
          </table:table-cell>
          <table:table-cell office:value-type="string" table:style-name="c10">
            <text:p>2026-05-05 18:00</text:p>
          </table:table-cell>
          <table:table-cell office:value-type="float" office:value="1.8600695" table:style-name="c10">
            <text:p>1.8601</text:p>
          </table:table-cell>
          <table:table-cell office:value-type="float" office:value="-2.7045878702232518" table:style-name="c11">
            <text:p>-2.7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4:00</text:p>
          </table:table-cell>
          <table:table-cell office:value-type="float" office:value="1.9209599999999998" table:style-name="c10">
            <text:p>1.921</text:p>
          </table:table-cell>
          <table:table-cell office:value-type="string" table:style-name="c10">
            <text:p>2026-05-07 04:00</text:p>
          </table:table-cell>
          <table:table-cell office:value-type="float" office:value="1.8720635" table:style-name="c10">
            <text:p>1.8721</text:p>
          </table:table-cell>
          <table:table-cell office:value-type="float" office:value="-2.7402317037574786" table:style-name="c11">
            <text:p>-2.7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5:45</text:p>
          </table:table-cell>
          <table:table-cell office:value-type="float" office:value="1.9089539999999998" table:style-name="c10">
            <text:p>1.909</text:p>
          </table:table-cell>
          <table:table-cell office:value-type="string" table:style-name="c10">
            <text:p>2026-05-07 18:00</text:p>
          </table:table-cell>
          <table:table-cell office:value-type="float" office:value="1.887056" table:style-name="c10">
            <text:p>1.8871</text:p>
          </table:table-cell>
          <table:table-cell office:value-type="float" office:value="-1.34472726655539" table:style-name="c11">
            <text:p>-1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5:30</text:p>
          </table:table-cell>
          <table:table-cell office:value-type="float" office:value="1.9329659999999997" table:style-name="c10">
            <text:p>1.933</text:p>
          </table:table-cell>
          <table:table-cell office:value-type="string" table:style-name="c10">
            <text:p>2026-05-11 05:30</text:p>
          </table:table-cell>
          <table:table-cell office:value-type="float" office:value="2.0019985" table:style-name="c10">
            <text:p>2.002</text:p>
          </table:table-cell>
          <table:table-cell office:value-type="float" office:value="3.36428602461194" table:style-name="c12">
            <text:p>+3.4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17:15</text:p>
          </table:table-cell>
          <table:table-cell office:value-type="float" office:value="2.0620304999999997" table:style-name="c10">
            <text:p>2.062</text:p>
          </table:table-cell>
          <table:table-cell office:value-type="string" table:style-name="c10">
            <text:p>2026-05-13 17:15</text:p>
          </table:table-cell>
          <table:table-cell office:value-type="float" office:value="2.062968" table:style-name="c10">
            <text:p>2.063</text:p>
          </table:table-cell>
          <table:table-cell office:value-type="float" office:value="-0.15452598940701723" table:style-name="c11">
            <text:p>-0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7 03:45</text:p>
          </table:table-cell>
          <table:table-cell office:value-type="float" office:value="2.053026" table:style-name="c10">
            <text:p>2.053</text:p>
          </table:table-cell>
          <table:table-cell office:value-type="string" table:style-name="c10">
            <text:p>2026-05-18 03:45</text:p>
          </table:table-cell>
          <table:table-cell office:value-type="float" office:value="2.048975" table:style-name="c10">
            <text:p>2.049</text:p>
          </table:table-cell>
          <table:table-cell office:value-type="float" office:value="-0.3968240550777158" table:style-name="c11">
            <text:p>-0.4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07:45</text:p>
          </table:table-cell>
          <table:table-cell office:value-type="float" office:value="2.0780385" table:style-name="c10">
            <text:p>2.078</text:p>
          </table:table-cell>
          <table:table-cell office:value-type="string" table:style-name="c10">
            <text:p>2026-05-20 03:00</text:p>
          </table:table-cell>
          <table:table-cell office:value-type="float" office:value="2.008995" table:style-name="c10">
            <text:p>2.009</text:p>
          </table:table-cell>
          <table:table-cell office:value-type="float" office:value="-3.515790540213759" table:style-name="c11">
            <text:p>-3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9.64482" table:style-name="c1">
            <text:p>9.6448</text:p>
          </table:table-cell>
          <table:table-cell office:value-type="string" table:style-name="c1">
            <text:p>2026-03-11 15:00</text:p>
          </table:table-cell>
          <table:table-cell office:value-type="float" office:value="9.685155" table:style-name="c1">
            <text:p>9.6852</text:p>
          </table:table-cell>
          <table:table-cell office:value-type="float" office:value="0.21746777187132693" table:style-name="c14">
            <text:p>+0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7:45</text:p>
          </table:table-cell>
          <table:table-cell office:value-type="float" office:value="9.574785" table:style-name="c1">
            <text:p>9.5748</text:p>
          </table:table-cell>
          <table:table-cell office:value-type="string" table:style-name="c1">
            <text:p>2026-03-13 07:45</text:p>
          </table:table-cell>
          <table:table-cell office:value-type="float" office:value="9.83508" table:style-name="c1">
            <text:p>9.8351</text:p>
          </table:table-cell>
          <table:table-cell office:value-type="float" office:value="2.5132123079525837" table:style-name="c14">
            <text:p>+2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00</text:p>
          </table:table-cell>
          <table:table-cell office:value-type="float" office:value="9.954975" table:style-name="c1">
            <text:p>9.955</text:p>
          </table:table-cell>
          <table:table-cell office:value-type="string" table:style-name="c1">
            <text:p>2026-03-14 10:00</text:p>
          </table:table-cell>
          <table:table-cell office:value-type="float" office:value="9.55522" table:style-name="c1">
            <text:p>9.5552</text:p>
          </table:table-cell>
          <table:table-cell office:value-type="float" office:value="-4.207503130645717" table:style-name="c13">
            <text:p>-4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10.30515" table:style-name="c1">
            <text:p>10.305</text:p>
          </table:table-cell>
          <table:table-cell office:value-type="string" table:style-name="c1">
            <text:p>2026-03-17 03:45</text:p>
          </table:table-cell>
          <table:table-cell office:value-type="float" office:value="10.294850000000002" table:style-name="c1">
            <text:p>10.295</text:p>
          </table:table-cell>
          <table:table-cell office:value-type="float" office:value="-0.2996502248875377" table:style-name="c13">
            <text:p>-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45</text:p>
          </table:table-cell>
          <table:table-cell office:value-type="float" office:value="9.544769999999998" table:style-name="c1">
            <text:p>9.5448</text:p>
          </table:table-cell>
          <table:table-cell office:value-type="string" table:style-name="c1">
            <text:p>2026-03-25 20:45</text:p>
          </table:table-cell>
          <table:table-cell office:value-type="float" office:value="9.635180000000002" table:style-name="c1">
            <text:p>9.6352</text:p>
          </table:table-cell>
          <table:table-cell office:value-type="float" office:value="0.7454268167803146" table:style-name="c14">
            <text:p>+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7:00</text:p>
          </table:table-cell>
          <table:table-cell office:value-type="float" office:value="8.874434999999998" table:style-name="c1">
            <text:p>8.8744</text:p>
          </table:table-cell>
          <table:table-cell office:value-type="string" table:style-name="c1">
            <text:p>2026-04-01 17:00</text:p>
          </table:table-cell>
          <table:table-cell office:value-type="float" office:value="9.235380000000001" table:style-name="c1">
            <text:p>9.2354</text:p>
          </table:table-cell>
          <table:table-cell office:value-type="float" office:value="3.8592144218759117" table:style-name="c14">
            <text:p>+3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05:15</text:p>
          </table:table-cell>
          <table:table-cell office:value-type="float" office:value="9.4047" table:style-name="c1">
            <text:p>9.4047</text:p>
          </table:table-cell>
          <table:table-cell office:value-type="string" table:style-name="c1">
            <text:p>2026-04-11 05:15</text:p>
          </table:table-cell>
          <table:table-cell office:value-type="float" office:value="9.27536" table:style-name="c1">
            <text:p>9.2754</text:p>
          </table:table-cell>
          <table:table-cell office:value-type="float" office:value="-1.572420647548578" table:style-name="c13">
            <text:p>-1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9.514755" table:style-name="c1">
            <text:p>9.5148</text:p>
          </table:table-cell>
          <table:table-cell office:value-type="string" table:style-name="c1">
            <text:p>2026-04-14 22:30</text:p>
          </table:table-cell>
          <table:table-cell office:value-type="float" office:value="9.325335" table:style-name="c1">
            <text:p>9.3253</text:p>
          </table:table-cell>
          <table:table-cell office:value-type="float" office:value="-2.186723091293441" table:style-name="c13">
            <text:p>-2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9.574785" table:style-name="c1">
            <text:p>9.5748</text:p>
          </table:table-cell>
          <table:table-cell office:value-type="string" table:style-name="c1">
            <text:p>2026-04-17 15:45</text:p>
          </table:table-cell>
          <table:table-cell office:value-type="float" office:value="9.77511" table:style-name="c1">
            <text:p>9.7751</text:p>
          </table:table-cell>
          <table:table-cell office:value-type="float" office:value="1.8881317450992308" table:style-name="c14">
            <text:p>+1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8:45</text:p>
          </table:table-cell>
          <table:table-cell office:value-type="float" office:value="9.524759999999999" table:style-name="c1">
            <text:p>9.5248</text:p>
          </table:table-cell>
          <table:table-cell office:value-type="string" table:style-name="c1">
            <text:p>2026-04-27 10:00</text:p>
          </table:table-cell>
          <table:table-cell office:value-type="float" office:value="9.245375000000001" table:style-name="c1">
            <text:p>9.2454</text:p>
          </table:table-cell>
          <table:table-cell office:value-type="float" office:value="-3.1272861954001696" table:style-name="c13">
            <text:p>-3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9.4047" table:style-name="c1">
            <text:p>9.4047</text:p>
          </table:table-cell>
          <table:table-cell office:value-type="string" table:style-name="c1">
            <text:p>2026-04-29 17:00</text:p>
          </table:table-cell>
          <table:table-cell office:value-type="float" office:value="9.11544" table:style-name="c1">
            <text:p>9.1154</text:p>
          </table:table-cell>
          <table:table-cell office:value-type="float" office:value="-3.269447877763254" table:style-name="c13">
            <text:p>-3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9.2046" table:style-name="c1">
            <text:p>9.2046</text:p>
          </table:table-cell>
          <table:table-cell office:value-type="string" table:style-name="c1">
            <text:p>2026-05-05 02:00</text:p>
          </table:table-cell>
          <table:table-cell office:value-type="float" office:value="9.235380000000001" table:style-name="c1">
            <text:p>9.2354</text:p>
          </table:table-cell>
          <table:table-cell office:value-type="float" office:value="0.13382955674339225" table:style-name="c14">
            <text:p>+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0:45</text:p>
          </table:table-cell>
          <table:table-cell office:value-type="float" office:value="9.414705" table:style-name="c1">
            <text:p>9.4147</text:p>
          </table:table-cell>
          <table:table-cell office:value-type="string" table:style-name="c1">
            <text:p>2026-05-06 10:45</text:p>
          </table:table-cell>
          <table:table-cell office:value-type="float" office:value="9.735130000000002" table:style-name="c1">
            <text:p>9.7351</text:p>
          </table:table-cell>
          <table:table-cell office:value-type="float" office:value="3.1967488639314867" table:style-name="c14">
            <text:p>+3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15</text:p>
          </table:table-cell>
          <table:table-cell office:value-type="float" office:value="10.06503" table:style-name="c1">
            <text:p>10.065</text:p>
          </table:table-cell>
          <table:table-cell office:value-type="string" table:style-name="c1">
            <text:p>2026-05-10 01:15</text:p>
          </table:table-cell>
          <table:table-cell office:value-type="float" office:value="9.895050000000001" table:style-name="c1">
            <text:p>9.8951</text:p>
          </table:table-cell>
          <table:table-cell office:value-type="float" office:value="-1.885341672603058" table:style-name="c13">
            <text:p>-1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4:45</text:p>
          </table:table-cell>
          <table:table-cell office:value-type="float" office:value="9.2896425" table:style-name="c1">
            <text:p>9.2896</text:p>
          </table:table-cell>
          <table:table-cell office:value-type="string" table:style-name="c1">
            <text:p>2026-05-21 14:45</text:p>
          </table:table-cell>
          <table:table-cell office:value-type="float" office:value="9.31534" table:style-name="c1">
            <text:p>9.3153</text:p>
          </table:table-cell>
          <table:table-cell office:value-type="float" office:value="0.076172310613698" table:style-name="c14">
            <text:p>+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30</text:p>
          </table:table-cell>
          <table:table-cell office:value-type="float" office:value="9.4957455" table:style-name="c1">
            <text:p>9.4957</text:p>
          </table:table-cell>
          <table:table-cell office:value-type="string" table:style-name="c1">
            <text:p>2026-05-26 14:30</text:p>
          </table:table-cell>
          <table:table-cell office:value-type="float" office:value="9.473261" table:style-name="c1">
            <text:p>9.4733</text:p>
          </table:table-cell>
          <table:table-cell office:value-type="float" office:value="-0.4362116564623486" table:style-name="c13">
            <text:p>-0.4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16:00</text:p>
          </table:table-cell>
          <table:table-cell office:value-type="float" office:value="461.73075" table:style-name="c10">
            <text:p>461.73</text:p>
          </table:table-cell>
          <table:table-cell office:value-type="string" table:style-name="c10">
            <text:p>2026-03-15 16:00</text:p>
          </table:table-cell>
          <table:table-cell office:value-type="float" office:value="462.36870000000005" table:style-name="c10">
            <text:p>462.37</text:p>
          </table:table-cell>
          <table:table-cell office:value-type="float" office:value="-0.062011254676008765" table:style-name="c11">
            <text:p>-0.1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473.2365" table:style-name="c10">
            <text:p>473.24</text:p>
          </table:table-cell>
          <table:table-cell office:value-type="string" table:style-name="c10">
            <text:p>2026-03-17 03:45</text:p>
          </table:table-cell>
          <table:table-cell office:value-type="float" office:value="474.1628" table:style-name="c10">
            <text:p>474.16</text:p>
          </table:table-cell>
          <table:table-cell office:value-type="float" office:value="-0.0045540521916631604" table:style-name="c11">
            <text:p>-0.0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08:15</text:p>
          </table:table-cell>
          <table:table-cell office:value-type="float" office:value="468.8343" table:style-name="c10">
            <text:p>468.83</text:p>
          </table:table-cell>
          <table:table-cell office:value-type="string" table:style-name="c10">
            <text:p>2026-03-21 08:15</text:p>
          </table:table-cell>
          <table:table-cell office:value-type="float" office:value="469.3652000000001" table:style-name="c10">
            <text:p>469.37</text:p>
          </table:table-cell>
          <table:table-cell office:value-type="float" office:value="-0.08688806147501005" table:style-name="c11">
            <text:p>-0.1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07:15</text:p>
          </table:table-cell>
          <table:table-cell office:value-type="float" office:value="445.52265" table:style-name="c10">
            <text:p>445.52</text:p>
          </table:table-cell>
          <table:table-cell office:value-type="string" table:style-name="c10">
            <text:p>2026-04-10 07:15</text:p>
          </table:table-cell>
          <table:table-cell office:value-type="float" office:value="438.98040000000003" table:style-name="c10">
            <text:p>438.98</text:p>
          </table:table-cell>
          <table:table-cell office:value-type="float" office:value="-1.6654084409849834" table:style-name="c11">
            <text:p>-1.7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444.02189999999996" table:style-name="c10">
            <text:p>444.02</text:p>
          </table:table-cell>
          <table:table-cell office:value-type="string" table:style-name="c10">
            <text:p>2026-04-17 02:45</text:p>
          </table:table-cell>
          <table:table-cell office:value-type="float" office:value="450.57460000000003" table:style-name="c10">
            <text:p>450.57</text:p>
          </table:table-cell>
          <table:table-cell office:value-type="float" office:value="1.2729104971173744" table:style-name="c12">
            <text:p>+1.3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3:15</text:p>
          </table:table-cell>
          <table:table-cell office:value-type="float" office:value="464.53215" table:style-name="c10">
            <text:p>464.53</text:p>
          </table:table-cell>
          <table:table-cell office:value-type="string" table:style-name="c10">
            <text:p>2026-05-06 23:15</text:p>
          </table:table-cell>
          <table:table-cell office:value-type="float" office:value="464.46765" table:style-name="c10">
            <text:p>464.47</text:p>
          </table:table-cell>
          <table:table-cell office:value-type="float" office:value="-0.21375718179033054" table:style-name="c11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651.2154449999999" table:style-name="c1">
            <text:p>651.22</text:p>
          </table:table-cell>
          <table:table-cell office:value-type="string" table:style-name="c1">
            <text:p>2026-03-11 15:00</text:p>
          </table:table-cell>
          <table:table-cell office:value-type="float" office:value="648.09579" table:style-name="c1">
            <text:p>648.1</text:p>
          </table:table-cell>
          <table:table-cell office:value-type="float" office:value="-0.6779935147591676" table:style-name="c13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8:45</text:p>
          </table:table-cell>
          <table:table-cell office:value-type="float" office:value="667.7136899999999" table:style-name="c1">
            <text:p>667.71</text:p>
          </table:table-cell>
          <table:table-cell office:value-type="string" table:style-name="c1">
            <text:p>2026-03-14 08:45</text:p>
          </table:table-cell>
          <table:table-cell office:value-type="float" office:value="651.544065" table:style-name="c1">
            <text:p>651.54</text:p>
          </table:table-cell>
          <table:table-cell office:value-type="float" office:value="-2.616699619553231" table:style-name="c13">
            <text:p>-2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682.030845" table:style-name="c1">
            <text:p>682.03</text:p>
          </table:table-cell>
          <table:table-cell office:value-type="string" table:style-name="c1">
            <text:p>2026-03-17 03:45</text:p>
          </table:table-cell>
          <table:table-cell office:value-type="float" office:value="675.4920850000001" table:style-name="c1">
            <text:p>675.49</text:p>
          </table:table-cell>
          <table:table-cell office:value-type="float" office:value="-1.1567026236056654" table:style-name="c13">
            <text:p>-1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15:30</text:p>
          </table:table-cell>
          <table:table-cell office:value-type="float" office:value="594.51711" table:style-name="c1">
            <text:p>594.52</text:p>
          </table:table-cell>
          <table:table-cell office:value-type="string" table:style-name="c1">
            <text:p>2026-04-06 15:30</text:p>
          </table:table-cell>
          <table:table-cell office:value-type="float" office:value="607.1962500000001" table:style-name="c1">
            <text:p>607.2</text:p>
          </table:table-cell>
          <table:table-cell office:value-type="float" office:value="1.928515513413931" table:style-name="c14">
            <text:p>+1.9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15</text:p>
          </table:table-cell>
          <table:table-cell office:value-type="float" office:value="612.38604" table:style-name="c1">
            <text:p>612.39</text:p>
          </table:table-cell>
          <table:table-cell office:value-type="string" table:style-name="c1">
            <text:p>2026-04-14 22:15</text:p>
          </table:table-cell>
          <table:table-cell office:value-type="float" office:value="616.081805" table:style-name="c1">
            <text:p>616.08</text:p>
          </table:table-cell>
          <table:table-cell office:value-type="float" office:value="0.40239608855305864" table:style-name="c14">
            <text:p>+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3:45</text:p>
          </table:table-cell>
          <table:table-cell office:value-type="float" office:value="651.035355" table:style-name="c1">
            <text:p>651.04</text:p>
          </table:table-cell>
          <table:table-cell office:value-type="string" table:style-name="c1">
            <text:p>2026-04-23 13:45</text:p>
          </table:table-cell>
          <table:table-cell office:value-type="float" office:value="634.60254" table:style-name="c1">
            <text:p>634.6</text:p>
          </table:table-cell>
          <table:table-cell office:value-type="float" office:value="-2.718959168885693" table:style-name="c13">
            <text:p>-2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623.8317599999999" table:style-name="c1">
            <text:p>623.83</text:p>
          </table:table-cell>
          <table:table-cell office:value-type="string" table:style-name="c1">
            <text:p>2026-05-05 02:15</text:p>
          </table:table-cell>
          <table:table-cell office:value-type="float" office:value="625.14727" table:style-name="c1">
            <text:p>625.15</text:p>
          </table:table-cell>
          <table:table-cell office:value-type="float" office:value="0.010554224951642155" table:style-name="c14">
            <text:p>+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30</text:p>
          </table:table-cell>
          <table:table-cell office:value-type="float" office:value="665.3325" table:style-name="c1">
            <text:p>665.33</text:p>
          </table:table-cell>
          <table:table-cell office:value-type="string" table:style-name="c1">
            <text:p>2026-05-11 22:30</text:p>
          </table:table-cell>
          <table:table-cell office:value-type="float" office:value="663.318175" table:style-name="c1">
            <text:p>663.32</text:p>
          </table:table-cell>
          <table:table-cell office:value-type="float" office:value="-0.5020494311979262" table:style-name="c13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23:00</text:p>
          </table:table-cell>
          <table:table-cell office:value-type="float" office:value="670.405035" table:style-name="c1">
            <text:p>670.41</text:p>
          </table:table-cell>
          <table:table-cell office:value-type="string" table:style-name="c1">
            <text:p>2026-05-12 23:00</text:p>
          </table:table-cell>
          <table:table-cell office:value-type="float" office:value="665.936865" table:style-name="c1">
            <text:p>665.94</text:p>
          </table:table-cell>
          <table:table-cell office:value-type="float" office:value="-0.8650558230271943" table:style-name="c13">
            <text:p>-0.9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15</text:p>
          </table:table-cell>
          <table:table-cell office:value-type="float" office:value="674.87727" table:style-name="c1">
            <text:p>674.88</text:p>
          </table:table-cell>
          <table:table-cell office:value-type="string" table:style-name="c1">
            <text:p>2026-05-14 01:15</text:p>
          </table:table-cell>
          <table:table-cell office:value-type="float" office:value="674.692485" table:style-name="c1">
            <text:p>674.69</text:p>
          </table:table-cell>
          <table:table-cell office:value-type="float" office:value="-0.22722580025771322" table:style-name="c13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2:30</text:p>
          </table:table-cell>
          <table:table-cell office:value-type="float" office:value="668.7342" table:style-name="c1">
            <text:p>668.73</text:p>
          </table:table-cell>
          <table:table-cell office:value-type="string" table:style-name="c1">
            <text:p>2026-05-26 12:30</text:p>
          </table:table-cell>
          <table:table-cell office:value-type="float" office:value="661.139265" table:style-name="c1">
            <text:p>661.14</text:p>
          </table:table-cell>
          <table:table-cell office:value-type="float" office:value="-1.33334774724172" table:style-name="c13">
            <text:p>-1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14:30</text:p>
          </table:table-cell>
          <table:table-cell office:value-type="float" office:value="682.8512549999999" table:style-name="c1">
            <text:p>682.85</text:p>
          </table:table-cell>
          <table:table-cell office:value-type="string" table:style-name="c1">
            <text:p>2026-05-31 14:30</text:p>
          </table:table-cell>
          <table:table-cell office:value-type="float" office:value="722.5985200000001" table:style-name="c1">
            <text:p>722.6</text:p>
          </table:table-cell>
          <table:table-cell office:value-type="float" office:value="5.609243635133998" table:style-name="c14">
            <text:p>+5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9:45</text:p>
          </table:table-cell>
          <table:table-cell office:value-type="float" office:value="717.9187799999999" table:style-name="c1">
            <text:p>717.92</text:p>
          </table:table-cell>
          <table:table-cell office:value-type="string" table:style-name="c1">
            <text:p>2026-06-01 16:00</text:p>
          </table:table-cell>
          <table:table-cell office:value-type="float" office:value="677.251205" table:style-name="c1">
            <text:p>677.25</text:p>
          </table:table-cell>
          <table:table-cell office:value-type="float" office:value="-5.853224811697332" table:style-name="c13">
            <text:p>-5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8:15</text:p>
          </table:table-cell>
          <table:table-cell office:value-type="float" office:value="70934.80967999999" table:style-name="c10">
            <text:p>70935</text:p>
          </table:table-cell>
          <table:table-cell office:value-type="string" table:style-name="c10">
            <text:p>2026-03-11 08:15</text:p>
          </table:table-cell>
          <table:table-cell office:value-type="float" office:value="69594.74522" table:style-name="c10">
            <text:p>69595</text:p>
          </table:table-cell>
          <table:table-cell office:value-type="float" office:value="-2.0852728898091644" table:style-name="c11">
            <text:p>-2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3:45</text:p>
          </table:table-cell>
          <table:table-cell office:value-type="float" office:value="70477.231005" table:style-name="c10">
            <text:p>70477</text:p>
          </table:table-cell>
          <table:table-cell office:value-type="string" table:style-name="c10">
            <text:p>2026-03-12 13:45</text:p>
          </table:table-cell>
          <table:table-cell office:value-type="float" office:value="70044.30033" table:style-name="c10">
            <text:p>70044</text:p>
          </table:table-cell>
          <table:table-cell office:value-type="float" office:value="-0.8129565012550244" table:style-name="c11">
            <text:p>-0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73806.885" table:style-name="c10">
            <text:p>73807</text:p>
          </table:table-cell>
          <table:table-cell office:value-type="string" table:style-name="c10">
            <text:p>2026-03-17 03:45</text:p>
          </table:table-cell>
          <table:table-cell office:value-type="float" office:value="74385.64857" table:style-name="c10">
            <text:p>74386</text:p>
          </table:table-cell>
          <table:table-cell office:value-type="float" office:value="0.5826917888603234" table:style-name="c12">
            <text:p>+0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5:15</text:p>
          </table:table-cell>
          <table:table-cell office:value-type="float" office:value="71280.952665" table:style-name="c10">
            <text:p>71281</text:p>
          </table:table-cell>
          <table:table-cell office:value-type="string" table:style-name="c10">
            <text:p>2026-03-26 05:15</text:p>
          </table:table-cell>
          <table:table-cell office:value-type="float" office:value="70523.79046500001" table:style-name="c10">
            <text:p>70524</text:p>
          </table:table-cell>
          <table:table-cell office:value-type="float" office:value="-1.2599989528205624" table:style-name="c11">
            <text:p>-1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6:45</text:p>
          </table:table-cell>
          <table:table-cell office:value-type="float" office:value="67809.92801999999" table:style-name="c10">
            <text:p>67810</text:p>
          </table:table-cell>
          <table:table-cell office:value-type="string" table:style-name="c10">
            <text:p>2026-04-01 16:45</text:p>
          </table:table-cell>
          <table:table-cell office:value-type="float" office:value="68903.181175" table:style-name="c10">
            <text:p>68903</text:p>
          </table:table-cell>
          <table:table-cell office:value-type="float" office:value="1.4091088484113445" table:style-name="c12">
            <text:p>+1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15:30</text:p>
          </table:table-cell>
          <table:table-cell office:value-type="float" office:value="67533.75" table:style-name="c10">
            <text:p>67534</text:p>
          </table:table-cell>
          <table:table-cell office:value-type="string" table:style-name="c10">
            <text:p>2026-04-06 15:30</text:p>
          </table:table-cell>
          <table:table-cell office:value-type="float" office:value="69708.038545" table:style-name="c10">
            <text:p>69708</text:p>
          </table:table-cell>
          <table:table-cell office:value-type="float" office:value="3.013222538284266" table:style-name="c12">
            <text:p>+3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17:45</text:p>
          </table:table-cell>
          <table:table-cell office:value-type="float" office:value="68728.517085" table:style-name="c10">
            <text:p>68729</text:p>
          </table:table-cell>
          <table:table-cell office:value-type="string" table:style-name="c10">
            <text:p>2026-04-08 17:45</text:p>
          </table:table-cell>
          <table:table-cell office:value-type="float" office:value="71813.05551" table:style-name="c10">
            <text:p>71813</text:p>
          </table:table-cell>
          <table:table-cell office:value-type="float" office:value="4.279132231819083" table:style-name="c12">
            <text:p>+4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72111.77787" table:style-name="c10">
            <text:p>72112</text:p>
          </table:table-cell>
          <table:table-cell office:value-type="string" table:style-name="c10">
            <text:p>2026-04-10 15:45</text:p>
          </table:table-cell>
          <table:table-cell office:value-type="float" office:value="72709.4271" table:style-name="c10">
            <text:p>72709</text:p>
          </table:table-cell>
          <table:table-cell office:value-type="float" office:value="0.6272249812540709" table:style-name="c12">
            <text:p>+0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19:45</text:p>
          </table:table-cell>
          <table:table-cell office:value-type="float" office:value="73052.257875" table:style-name="c10">
            <text:p>73052</text:p>
          </table:table-cell>
          <table:table-cell office:value-type="string" table:style-name="c10">
            <text:p>2026-04-14 19:45</text:p>
          </table:table-cell>
          <table:table-cell office:value-type="float" office:value="74082.130405" table:style-name="c10">
            <text:p>74082</text:p>
          </table:table-cell>
          <table:table-cell office:value-type="float" office:value="1.2070569438513923" table:style-name="c12">
            <text:p>+1.2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6:00</text:p>
          </table:table-cell>
          <table:table-cell office:value-type="float" office:value="74734.5486" table:style-name="c10">
            <text:p>74735</text:p>
          </table:table-cell>
          <table:table-cell office:value-type="string" table:style-name="c10">
            <text:p>2026-04-17 16:00</text:p>
          </table:table-cell>
          <table:table-cell office:value-type="float" office:value="77746.137485" table:style-name="c10">
            <text:p>77746</text:p>
          </table:table-cell>
          <table:table-cell office:value-type="float" office:value="3.8217590253398326" table:style-name="c12">
            <text:p>+3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4:00</text:p>
          </table:table-cell>
          <table:table-cell office:value-type="float" office:value="78880.36047" table:style-name="c10">
            <text:p>78880</text:p>
          </table:table-cell>
          <table:table-cell office:value-type="string" table:style-name="c10">
            <text:p>2026-04-23 14:00</text:p>
          </table:table-cell>
          <table:table-cell office:value-type="float" office:value="77493.463885" table:style-name="c10">
            <text:p>77493</text:p>
          </table:table-cell>
          <table:table-cell office:value-type="float" office:value="-1.9546133031333013" table:style-name="c11">
            <text:p>-2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00</text:p>
          </table:table-cell>
          <table:table-cell office:value-type="float" office:value="79809.31471499999" table:style-name="c10">
            <text:p>79809</text:p>
          </table:table-cell>
          <table:table-cell office:value-type="string" table:style-name="c10">
            <text:p>2026-05-05 02:00</text:p>
          </table:table-cell>
          <table:table-cell office:value-type="float" office:value="80311.81400500001" table:style-name="c10">
            <text:p>80312</text:p>
          </table:table-cell>
          <table:table-cell office:value-type="float" office:value="0.4284662448551968" table:style-name="c12">
            <text:p>+0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22:45</text:p>
          </table:table-cell>
          <table:table-cell office:value-type="float" office:value="81928.82394" table:style-name="c10">
            <text:p>81929</text:p>
          </table:table-cell>
          <table:table-cell office:value-type="string" table:style-name="c10">
            <text:p>2026-05-11 22:45</text:p>
          </table:table-cell>
          <table:table-cell office:value-type="float" office:value="81747.32589000001" table:style-name="c10">
            <text:p>81747</text:p>
          </table:table-cell>
          <table:table-cell office:value-type="float" office:value="-0.4209885335430763" table:style-name="c11">
            <text:p>-0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30</text:p>
          </table:table-cell>
          <table:table-cell office:value-type="float" office:value="78019.53026999999" table:style-name="c10">
            <text:p>78020</text:p>
          </table:table-cell>
          <table:table-cell office:value-type="string" table:style-name="c10">
            <text:p>2026-05-22 17:00</text:p>
          </table:table-cell>
          <table:table-cell office:value-type="float" office:value="76912.194665" table:style-name="c10">
            <text:p>76912</text:p>
          </table:table-cell>
          <table:table-cell office:value-type="float" office:value="-1.6163684628337616" table:style-name="c11">
            <text:p>-1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0:30</text:p>
          </table:table-cell>
          <table:table-cell office:value-type="float" office:value="77268.35487" table:style-name="c10">
            <text:p>77268</text:p>
          </table:table-cell>
          <table:table-cell office:value-type="string" table:style-name="c10">
            <text:p>2026-05-26 19:00</text:p>
          </table:table-cell>
          <table:table-cell office:value-type="float" office:value="75802.629725" table:style-name="c10">
            <text:p>75803</text:p>
          </table:table-cell>
          <table:table-cell office:value-type="float" office:value="-2.0930361524342245" table:style-name="c11">
            <text:p>-2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0.09939967499999999" table:style-name="c1">
            <text:p>0.0994</text:p>
          </table:table-cell>
          <table:table-cell office:value-type="string" table:style-name="c1">
            <text:p>2026-03-11 15:00</text:p>
          </table:table-cell>
          <table:table-cell office:value-type="float" office:value="0.09343326" table:style-name="c1">
            <text:p>0.093433</text:p>
          </table:table-cell>
          <table:table-cell office:value-type="float" office:value="-6.190350307221815" table:style-name="c13">
            <text:p>-6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2:15</text:p>
          </table:table-cell>
          <table:table-cell office:value-type="float" office:value="0.09634815" table:style-name="c1">
            <text:p>0.096348</text:p>
          </table:table-cell>
          <table:table-cell office:value-type="string" table:style-name="c1">
            <text:p>2026-03-16 02:15</text:p>
          </table:table-cell>
          <table:table-cell office:value-type="float" office:value="0.097781085" table:style-name="c1">
            <text:p>0.097781</text:p>
          </table:table-cell>
          <table:table-cell office:value-type="float" office:value="1.2843740238759116" table:style-name="c14">
            <text:p>+1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0.09940968" table:style-name="c1">
            <text:p>0.09941</text:p>
          </table:table-cell>
          <table:table-cell office:value-type="string" table:style-name="c1">
            <text:p>2026-03-17 03:30</text:p>
          </table:table-cell>
          <table:table-cell office:value-type="float" office:value="0.10260867000000001" table:style-name="c1">
            <text:p>0.10261</text:p>
          </table:table-cell>
          <table:table-cell office:value-type="float" office:value="3.011653662570901" table:style-name="c14">
            <text:p>+3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0.094437195" table:style-name="c1">
            <text:p>0.094437</text:p>
          </table:table-cell>
          <table:table-cell office:value-type="string" table:style-name="c1">
            <text:p>2026-03-25 20:30</text:p>
          </table:table-cell>
          <table:table-cell office:value-type="float" office:value="0.095782085" table:style-name="c1">
            <text:p>0.095782</text:p>
          </table:table-cell>
          <table:table-cell office:value-type="float" office:value="1.221363692647781" table:style-name="c14">
            <text:p>+1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45</text:p>
          </table:table-cell>
          <table:table-cell office:value-type="float" office:value="0.09222609" table:style-name="c1">
            <text:p>0.092226</text:p>
          </table:table-cell>
          <table:table-cell office:value-type="string" table:style-name="c1">
            <text:p>2026-03-31 10:00</text:p>
          </table:table-cell>
          <table:table-cell office:value-type="float" office:value="0.08967514" table:style-name="c1">
            <text:p>0.089675</text:p>
          </table:table-cell>
          <table:table-cell office:value-type="float" office:value="-2.960345174407808" table:style-name="c13">
            <text:p>-3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15</text:p>
          </table:table-cell>
          <table:table-cell office:value-type="float" office:value="0.09316656" table:style-name="c1">
            <text:p>0.093167</text:p>
          </table:table-cell>
          <table:table-cell office:value-type="string" table:style-name="c1">
            <text:p>2026-04-07 02:15</text:p>
          </table:table-cell>
          <table:table-cell office:value-type="float" office:value="0.09039478000000001" table:style-name="c1">
            <text:p>0.090395</text:p>
          </table:table-cell>
          <table:table-cell office:value-type="float" office:value="-3.1690331436729946" table:style-name="c13">
            <text:p>-3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9:15</text:p>
          </table:table-cell>
          <table:table-cell office:value-type="float" office:value="0.0952476" table:style-name="c1">
            <text:p>0.095248</text:p>
          </table:table-cell>
          <table:table-cell office:value-type="string" table:style-name="c1">
            <text:p>2026-04-11 19:15</text:p>
          </table:table-cell>
          <table:table-cell office:value-type="float" office:value="0.09421287" table:style-name="c1">
            <text:p>0.094213</text:p>
          </table:table-cell>
          <table:table-cell office:value-type="float" office:value="-1.284086451658617" table:style-name="c13">
            <text:p>-1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3:45</text:p>
          </table:table-cell>
          <table:table-cell office:value-type="float" office:value="0.09549772499999999" table:style-name="c1">
            <text:p>0.095498</text:p>
          </table:table-cell>
          <table:table-cell office:value-type="string" table:style-name="c1">
            <text:p>2026-04-15 13:45</text:p>
          </table:table-cell>
          <table:table-cell office:value-type="float" office:value="0.09313341" table:style-name="c1">
            <text:p>0.093133</text:p>
          </table:table-cell>
          <table:table-cell office:value-type="float" office:value="-2.670732403928988" table:style-name="c13">
            <text:p>-2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45</text:p>
          </table:table-cell>
          <table:table-cell office:value-type="float" office:value="0.09646821" table:style-name="c1">
            <text:p>0.096468</text:p>
          </table:table-cell>
          <table:table-cell office:value-type="string" table:style-name="c1">
            <text:p>2026-04-17 02:45</text:p>
          </table:table-cell>
          <table:table-cell office:value-type="float" office:value="0.09770112500000001" table:style-name="c1">
            <text:p>0.097701</text:p>
          </table:table-cell>
          <table:table-cell office:value-type="float" office:value="1.0755983252151324" table:style-name="c14">
            <text:p>+1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15</text:p>
          </table:table-cell>
          <table:table-cell office:value-type="float" office:value="0.09837916499999999" table:style-name="c1">
            <text:p>0.098379</text:p>
          </table:table-cell>
          <table:table-cell office:value-type="string" table:style-name="c1">
            <text:p>2026-04-25 11:15</text:p>
          </table:table-cell>
          <table:table-cell office:value-type="float" office:value="0.098400775" table:style-name="c1">
            <text:p>0.098401</text:p>
          </table:table-cell>
          <table:table-cell office:value-type="float" office:value="-0.1779778769467999" table:style-name="c13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00</text:p>
          </table:table-cell>
          <table:table-cell office:value-type="float" office:value="0.09999997499999999" table:style-name="c1">
            <text:p>0.1</text:p>
          </table:table-cell>
          <table:table-cell office:value-type="string" table:style-name="c1">
            <text:p>2026-04-27 19:00</text:p>
          </table:table-cell>
          <table:table-cell office:value-type="float" office:value="0.09777109" table:style-name="c1">
            <text:p>0.097771</text:p>
          </table:table-cell>
          <table:table-cell office:value-type="float" office:value="-2.424330014992482" table:style-name="c13">
            <text:p>-2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8 04:15</text:p>
          </table:table-cell>
          <table:table-cell office:value-type="float" office:value="0.100120035" table:style-name="c1">
            <text:p>0.10012</text:p>
          </table:table-cell>
          <table:table-cell office:value-type="string" table:style-name="c1">
            <text:p>2026-04-29 04:15</text:p>
          </table:table-cell>
          <table:table-cell office:value-type="float" office:value="0.101299325" table:style-name="c1">
            <text:p>0.1013</text:p>
          </table:table-cell>
          <table:table-cell office:value-type="float" office:value="0.9756215619830977" table:style-name="c14">
            <text:p>+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30</text:p>
          </table:table-cell>
          <table:table-cell office:value-type="float" office:value="0.10921457999999999" table:style-name="c1">
            <text:p>0.10921</text:p>
          </table:table-cell>
          <table:table-cell office:value-type="string" table:style-name="c1">
            <text:p>2026-05-04 22:30</text:p>
          </table:table-cell>
          <table:table-cell office:value-type="float" office:value="0.110414765" table:style-name="c1">
            <text:p>0.11041</text:p>
          </table:table-cell>
          <table:table-cell office:value-type="float" office:value="0.8968270397276656" table:style-name="c14">
            <text:p>+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2:00</text:p>
          </table:table-cell>
          <table:table-cell office:value-type="float" office:value="0.115487715" table:style-name="c1">
            <text:p>0.11549</text:p>
          </table:table-cell>
          <table:table-cell office:value-type="string" table:style-name="c1">
            <text:p>2026-05-06 22:00</text:p>
          </table:table-cell>
          <table:table-cell office:value-type="float" office:value="0.11294350000000002" table:style-name="c1">
            <text:p>0.11294</text:p>
          </table:table-cell>
          <table:table-cell office:value-type="float" office:value="-2.39851403805158" table:style-name="c13">
            <text:p>-2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00</text:p>
          </table:table-cell>
          <table:table-cell office:value-type="float" office:value="0.11193593999999998" table:style-name="c1">
            <text:p>0.11194</text:p>
          </table:table-cell>
          <table:table-cell office:value-type="string" table:style-name="c1">
            <text:p>2026-05-11 23:00</text:p>
          </table:table-cell>
          <table:table-cell office:value-type="float" office:value="0.11138428" table:style-name="c1">
            <text:p>0.11138</text:p>
          </table:table-cell>
          <table:table-cell office:value-type="float" office:value="-0.6917502776319862" table:style-name="c13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15</text:p>
          </table:table-cell>
          <table:table-cell office:value-type="float" office:value="0.11139566999999999" table:style-name="c1">
            <text:p>0.1114</text:p>
          </table:table-cell>
          <table:table-cell office:value-type="string" table:style-name="c1">
            <text:p>2026-05-14 01:15</text:p>
          </table:table-cell>
          <table:table-cell office:value-type="float" office:value="0.11457268500000001" table:style-name="c1">
            <text:p>0.11457</text:p>
          </table:table-cell>
          <table:table-cell office:value-type="float" office:value="2.646408251492205" table:style-name="c14">
            <text:p>+2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15</text:p>
          </table:table-cell>
          <table:table-cell office:value-type="float" office:value="0.10518256499999999" table:style-name="c1">
            <text:p>0.10518</text:p>
          </table:table-cell>
          <table:table-cell office:value-type="string" table:style-name="c1">
            <text:p>2026-05-22 17:15</text:p>
          </table:table-cell>
          <table:table-cell office:value-type="float" office:value="0.105956995" table:style-name="c1">
            <text:p>0.10596</text:p>
          </table:table-cell>
          <table:table-cell office:value-type="float" office:value="0.534900405780192" table:style-name="c14">
            <text:p>+0.5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9:30</text:p>
          </table:table-cell>
          <table:table-cell office:value-type="float" office:value="1.5397694999999998" table:style-name="c10">
            <text:p>1.5398</text:p>
          </table:table-cell>
          <table:table-cell office:value-type="string" table:style-name="c10">
            <text:p>2026-03-11 09:30</text:p>
          </table:table-cell>
          <table:table-cell office:value-type="float" office:value="1.495252" table:style-name="c10">
            <text:p>1.4953</text:p>
          </table:table-cell>
          <table:table-cell office:value-type="float" office:value="-3.085300023672355" table:style-name="c11">
            <text:p>-3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2:00</text:p>
          </table:table-cell>
          <table:table-cell office:value-type="float" office:value="1.2556275" table:style-name="c10">
            <text:p>1.2556</text:p>
          </table:table-cell>
          <table:table-cell office:value-type="string" table:style-name="c10">
            <text:p>2026-04-05 09:00</text:p>
          </table:table-cell>
          <table:table-cell office:value-type="float" office:value="1.2283855000000001" table:style-name="c10">
            <text:p>1.2284</text:p>
          </table:table-cell>
          <table:table-cell office:value-type="float" office:value="-2.36515547919266" table:style-name="c11">
            <text:p>-2.4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9:45</text:p>
          </table:table-cell>
          <table:table-cell office:value-type="float" office:value="1.2836414999999999" table:style-name="c10">
            <text:p>1.2836</text:p>
          </table:table-cell>
          <table:table-cell office:value-type="string" table:style-name="c10">
            <text:p>2026-04-07 07:00</text:p>
          </table:table-cell>
          <table:table-cell office:value-type="float" office:value="1.231384" table:style-name="c10">
            <text:p>1.2314</text:p>
          </table:table-cell>
          <table:table-cell office:value-type="float" office:value="-4.262797410024522" table:style-name="c11">
            <text:p>-4.3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8 16:30</text:p>
          </table:table-cell>
          <table:table-cell office:value-type="float" office:value="1.302651" table:style-name="c10">
            <text:p>1.3027</text:p>
          </table:table-cell>
          <table:table-cell office:value-type="string" table:style-name="c10">
            <text:p>2026-04-18 23:00</text:p>
          </table:table-cell>
          <table:table-cell office:value-type="float" office:value="1.2803595" table:style-name="c10">
            <text:p>1.2804</text:p>
          </table:table-cell>
          <table:table-cell office:value-type="float" office:value="-1.9077203825506595" table:style-name="c11">
            <text:p>-1.9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00</text:p>
          </table:table-cell>
          <table:table-cell office:value-type="float" office:value="1.2536264999999998" table:style-name="c10">
            <text:p>1.2536</text:p>
          </table:table-cell>
          <table:table-cell office:value-type="string" table:style-name="c10">
            <text:p>2026-04-29 16:00</text:p>
          </table:table-cell>
          <table:table-cell office:value-type="float" office:value="1.205397" table:style-name="c10">
            <text:p>1.2054</text:p>
          </table:table-cell>
          <table:table-cell office:value-type="float" office:value="-4.039407957872598" table:style-name="c11">
            <text:p>-4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12:45</text:p>
          </table:table-cell>
          <table:table-cell office:value-type="float" office:value="1.2736364999999998" table:style-name="c10">
            <text:p>1.2736</text:p>
          </table:table-cell>
          <table:table-cell office:value-type="string" table:style-name="c10">
            <text:p>2026-05-06 12:45</text:p>
          </table:table-cell>
          <table:table-cell office:value-type="float" office:value="1.3223385" table:style-name="c10">
            <text:p>1.3223</text:p>
          </table:table-cell>
          <table:table-cell office:value-type="float" office:value="3.6163100962087746" table:style-name="c12">
            <text:p>+3.6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20:15</text:p>
          </table:table-cell>
          <table:table-cell office:value-type="float" office:value="1.3176584999999998" table:style-name="c10">
            <text:p>1.3177</text:p>
          </table:table-cell>
          <table:table-cell office:value-type="string" table:style-name="c10">
            <text:p>2026-05-07 20:15</text:p>
          </table:table-cell>
          <table:table-cell office:value-type="float" office:value="1.311344" table:style-name="c10">
            <text:p>1.3113</text:p>
          </table:table-cell>
          <table:table-cell office:value-type="float" office:value="-0.678163321983638" table:style-name="c11">
            <text:p>-0.7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5:30</text:p>
          </table:table-cell>
          <table:table-cell office:value-type="float" office:value="1.3716855" table:style-name="c10">
            <text:p>1.3717</text:p>
          </table:table-cell>
          <table:table-cell office:value-type="string" table:style-name="c10">
            <text:p>2026-05-12 11:00</text:p>
          </table:table-cell>
          <table:table-cell office:value-type="float" office:value="1.3383305" table:style-name="c10">
            <text:p>1.3383</text:p>
          </table:table-cell>
          <table:table-cell office:value-type="float" office:value="-2.626718928610061" table:style-name="c11">
            <text:p>-2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45</text:p>
          </table:table-cell>
          <table:table-cell office:value-type="float" office:value="8.254125" table:style-name="c1">
            <text:p>8.2541</text:p>
          </table:table-cell>
          <table:table-cell office:value-type="string" table:style-name="c1">
            <text:p>2026-03-10 19:45</text:p>
          </table:table-cell>
          <table:table-cell office:value-type="float" office:value="8.25587" table:style-name="c1">
            <text:p>8.2559</text:p>
          </table:table-cell>
          <table:table-cell office:value-type="float" office:value="-0.17880131606923255" table:style-name="c13">
            <text:p>-0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9:45</text:p>
          </table:table-cell>
          <table:table-cell office:value-type="float" office:value="8.26413" table:style-name="c1">
            <text:p>8.2641</text:p>
          </table:table-cell>
          <table:table-cell office:value-type="string" table:style-name="c1">
            <text:p>2026-03-12 14:00</text:p>
          </table:table-cell>
          <table:table-cell office:value-type="float" office:value="8.205895000000002" table:style-name="c1">
            <text:p>8.2059</text:p>
          </table:table-cell>
          <table:table-cell office:value-type="float" office:value="-0.9031632380540722" table:style-name="c13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8.66433" table:style-name="c1">
            <text:p>8.6643</text:p>
          </table:table-cell>
          <table:table-cell office:value-type="string" table:style-name="c1">
            <text:p>2026-03-17 03:45</text:p>
          </table:table-cell>
          <table:table-cell office:value-type="float" office:value="8.865565" table:style-name="c1">
            <text:p>8.8656</text:p>
          </table:table-cell>
          <table:table-cell office:value-type="float" office:value="2.11802569344659" table:style-name="c14">
            <text:p>+2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0:45</text:p>
          </table:table-cell>
          <table:table-cell office:value-type="float" office:value="8.58429" table:style-name="c1">
            <text:p>8.5843</text:p>
          </table:table-cell>
          <table:table-cell office:value-type="string" table:style-name="c1">
            <text:p>2026-03-24 20:45</text:p>
          </table:table-cell>
          <table:table-cell office:value-type="float" office:value="8.69565" table:style-name="c1">
            <text:p>8.6957</text:p>
          </table:table-cell>
          <table:table-cell office:value-type="float" office:value="1.0947602614776564" table:style-name="c14">
            <text:p>+1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15</text:p>
          </table:table-cell>
          <table:table-cell office:value-type="float" office:value="8.374184999999999" table:style-name="c1">
            <text:p>8.3742</text:p>
          </table:table-cell>
          <table:table-cell office:value-type="string" table:style-name="c1">
            <text:p>2026-03-31 08:15</text:p>
          </table:table-cell>
          <table:table-cell office:value-type="float" office:value="8.145925" table:style-name="c1">
            <text:p>8.1459</text:p>
          </table:table-cell>
          <table:table-cell office:value-type="float" office:value="-2.920209000338525" table:style-name="c13">
            <text:p>-2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8.254125" table:style-name="c1">
            <text:p>8.2541</text:p>
          </table:table-cell>
          <table:table-cell office:value-type="string" table:style-name="c1">
            <text:p>2026-04-02 04:00</text:p>
          </table:table-cell>
          <table:table-cell office:value-type="float" office:value="7.936030000000001" table:style-name="c1">
            <text:p>7.936</text:p>
          </table:table-cell>
          <table:table-cell office:value-type="float" office:value="-4.045966398255407" table:style-name="c13">
            <text:p>-4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45</text:p>
          </table:table-cell>
          <table:table-cell office:value-type="float" office:value="8.56428" table:style-name="c1">
            <text:p>8.5643</text:p>
          </table:table-cell>
          <table:table-cell office:value-type="string" table:style-name="c1">
            <text:p>2026-04-17 12:45</text:p>
          </table:table-cell>
          <table:table-cell office:value-type="float" office:value="8.645675" table:style-name="c1">
            <text:p>8.6457</text:p>
          </table:table-cell>
          <table:table-cell office:value-type="float" office:value="0.7486011162059159" table:style-name="c14">
            <text:p>+0.7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8.58429" table:style-name="c1">
            <text:p>8.5843</text:p>
          </table:table-cell>
          <table:table-cell office:value-type="string" table:style-name="c1">
            <text:p>2026-04-29 19:00</text:p>
          </table:table-cell>
          <table:table-cell office:value-type="float" office:value="8.265865" table:style-name="c1">
            <text:p>8.2659</text:p>
          </table:table-cell>
          <table:table-cell office:value-type="float" office:value="-3.901877314664337" table:style-name="c13">
            <text:p>-3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8.604299999999999" table:style-name="c1">
            <text:p>8.6043</text:p>
          </table:table-cell>
          <table:table-cell office:value-type="string" table:style-name="c1">
            <text:p>2026-05-05 02:15</text:p>
          </table:table-cell>
          <table:table-cell office:value-type="float" office:value="8.805595" table:style-name="c1">
            <text:p>8.8056</text:p>
          </table:table-cell>
          <table:table-cell office:value-type="float" office:value="2.1348931998535825" table:style-name="c14">
            <text:p>+2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8:15</text:p>
          </table:table-cell>
          <table:table-cell office:value-type="float" office:value="8.894445" table:style-name="c1">
            <text:p>8.8944</text:p>
          </table:table-cell>
          <table:table-cell office:value-type="string" table:style-name="c1">
            <text:p>2026-05-06 08:15</text:p>
          </table:table-cell>
          <table:table-cell office:value-type="float" office:value="9.27536" table:style-name="c1">
            <text:p>9.2754</text:p>
          </table:table-cell>
          <table:table-cell office:value-type="float" office:value="4.074155895730436" table:style-name="c14">
            <text:p>+4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5:45</text:p>
          </table:table-cell>
          <table:table-cell office:value-type="float" office:value="9.414705" table:style-name="c1">
            <text:p>9.4147</text:p>
          </table:table-cell>
          <table:table-cell office:value-type="string" table:style-name="c1">
            <text:p>2026-05-07 15:45</text:p>
          </table:table-cell>
          <table:table-cell office:value-type="float" office:value="9.1954" table:style-name="c1">
            <text:p>9.1954</text:p>
          </table:table-cell>
          <table:table-cell office:value-type="float" office:value="-2.524631463226934" table:style-name="c13">
            <text:p>-2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6:30</text:p>
          </table:table-cell>
          <table:table-cell office:value-type="float" office:value="9.32466" table:style-name="c1">
            <text:p>9.3247</text:p>
          </table:table-cell>
          <table:table-cell office:value-type="string" table:style-name="c1">
            <text:p>2026-05-08 16:30</text:p>
          </table:table-cell>
          <table:table-cell office:value-type="float" office:value="9.735130000000002" table:style-name="c1">
            <text:p>9.7351</text:p>
          </table:table-cell>
          <table:table-cell office:value-type="float" office:value="4.193283992445851" table:style-name="c14">
            <text:p>+4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0:30</text:p>
          </table:table-cell>
          <table:table-cell office:value-type="float" office:value="9.64482" table:style-name="c1">
            <text:p>9.6448</text:p>
          </table:table-cell>
          <table:table-cell office:value-type="string" table:style-name="c1">
            <text:p>2026-05-11 00:30</text:p>
          </table:table-cell>
          <table:table-cell office:value-type="float" office:value="9.865065" table:style-name="c1">
            <text:p>9.8651</text:p>
          </table:table-cell>
          <table:table-cell office:value-type="float" office:value="2.0790925602033106" table:style-name="c14">
            <text:p>+2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9:45</text:p>
          </table:table-cell>
          <table:table-cell office:value-type="float" office:value="2032.65582" table:style-name="c10">
            <text:p>2032.7</text:p>
          </table:table-cell>
          <table:table-cell office:value-type="string" table:style-name="c10">
            <text:p>2026-03-10 19:45</text:p>
          </table:table-cell>
          <table:table-cell office:value-type="float" office:value="2036.7011400000001" table:style-name="c10">
            <text:p>2036.7</text:p>
          </table:table-cell>
          <table:table-cell office:value-type="float" office:value="-0.001281357060234356" table:style-name="c11">
            <text:p>-0.0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18:15</text:p>
          </table:table-cell>
          <table:table-cell office:value-type="float" office:value="2109.8443949999996" table:style-name="c10">
            <text:p>2109.8</text:p>
          </table:table-cell>
          <table:table-cell office:value-type="string" table:style-name="c10">
            <text:p>2026-03-16 18:15</text:p>
          </table:table-cell>
          <table:table-cell office:value-type="float" office:value="2333.682575" table:style-name="c10">
            <text:p>2333.7</text:p>
          </table:table-cell>
          <table:table-cell office:value-type="float" office:value="10.388119097881399" table:style-name="c12">
            <text:p>+10.4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45</text:p>
          </table:table-cell>
          <table:table-cell office:value-type="float" office:value="2150.2946099999995" table:style-name="c10">
            <text:p>2150.3</text:p>
          </table:table-cell>
          <table:table-cell office:value-type="string" table:style-name="c10">
            <text:p>2026-03-25 20:45</text:p>
          </table:table-cell>
          <table:table-cell office:value-type="float" office:value="2164.7570800000003" table:style-name="c10">
            <text:p>2164.8</text:p>
          </table:table-cell>
          <table:table-cell office:value-type="float" office:value="0.4713363717672614" table:style-name="c12">
            <text:p>+0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1:30</text:p>
          </table:table-cell>
          <table:table-cell office:value-type="float" office:value="2062.240605" table:style-name="c10">
            <text:p>2062.2</text:p>
          </table:table-cell>
          <table:table-cell office:value-type="string" table:style-name="c10">
            <text:p>2026-04-01 01:30</text:p>
          </table:table-cell>
          <table:table-cell office:value-type="float" office:value="2098.8300600000002" table:style-name="c10">
            <text:p>2098.8</text:p>
          </table:table-cell>
          <table:table-cell office:value-type="float" office:value="1.5708105849298049" table:style-name="c12">
            <text:p>+1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23:00</text:p>
          </table:table-cell>
          <table:table-cell office:value-type="float" office:value="2086.82289" table:style-name="c10">
            <text:p>2086.8</text:p>
          </table:table-cell>
          <table:table-cell office:value-type="string" table:style-name="c10">
            <text:p>2026-04-06 23:00</text:p>
          </table:table-cell>
          <table:table-cell office:value-type="float" office:value="2104.357295" table:style-name="c10">
            <text:p>2104.4</text:p>
          </table:table-cell>
          <table:table-cell office:value-type="float" office:value="0.6386643941448611" table:style-name="c12">
            <text:p>+0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2214.116505" table:style-name="c10">
            <text:p>2214.1</text:p>
          </table:table-cell>
          <table:table-cell office:value-type="string" table:style-name="c10">
            <text:p>2026-04-10 15:45</text:p>
          </table:table-cell>
          <table:table-cell office:value-type="float" office:value="2231.693595" table:style-name="c10">
            <text:p>2231.7</text:p>
          </table:table-cell>
          <table:table-cell office:value-type="float" office:value="0.5923777937600017" table:style-name="c12">
            <text:p>+0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14:00</text:p>
          </table:table-cell>
          <table:table-cell office:value-type="float" office:value="2392.705755" table:style-name="c10">
            <text:p>2392.7</text:p>
          </table:table-cell>
          <table:table-cell office:value-type="string" table:style-name="c10">
            <text:p>2026-04-15 14:00</text:p>
          </table:table-cell>
          <table:table-cell office:value-type="float" office:value="2325.7665349999997" table:style-name="c10">
            <text:p>2325.8</text:p>
          </table:table-cell>
          <table:table-cell office:value-type="float" office:value="-2.991944460946261" table:style-name="c11">
            <text:p>-3.0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14:30</text:p>
          </table:table-cell>
          <table:table-cell office:value-type="float" office:value="2351.1649949999996" table:style-name="c10">
            <text:p>2351.2</text:p>
          </table:table-cell>
          <table:table-cell office:value-type="string" table:style-name="c10">
            <text:p>2026-04-27 14:30</text:p>
          </table:table-cell>
          <table:table-cell office:value-type="float" office:value="2312.2632900000003" table:style-name="c10">
            <text:p>2312.3</text:p>
          </table:table-cell>
          <table:table-cell office:value-type="float" office:value="-1.8511639722974427" table:style-name="c11">
            <text:p>-1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12:30</text:p>
          </table:table-cell>
          <table:table-cell office:value-type="float" office:value="2305.9524" table:style-name="c10">
            <text:p>2306</text:p>
          </table:table-cell>
          <table:table-cell office:value-type="string" table:style-name="c10">
            <text:p>2026-05-02 12:30</text:p>
          </table:table-cell>
          <table:table-cell office:value-type="float" office:value="2303.897475" table:style-name="c10">
            <text:p>2303.9</text:p>
          </table:table-cell>
          <table:table-cell office:value-type="float" office:value="-0.28883579958218775" table:style-name="c11">
            <text:p>-0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22:15</text:p>
          </table:table-cell>
          <table:table-cell office:value-type="float" office:value="2349.07395" table:style-name="c10">
            <text:p>2349.1</text:p>
          </table:table-cell>
          <table:table-cell office:value-type="string" table:style-name="c10">
            <text:p>2026-05-04 22:15</text:p>
          </table:table-cell>
          <table:table-cell office:value-type="float" office:value="2362.808005" table:style-name="c10">
            <text:p>2362.8</text:p>
          </table:table-cell>
          <table:table-cell office:value-type="float" office:value="0.38358953314368005" table:style-name="c12">
            <text:p>+0.4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23:00</text:p>
          </table:table-cell>
          <table:table-cell office:value-type="float" office:value="2374.96689" table:style-name="c10">
            <text:p>2375</text:p>
          </table:table-cell>
          <table:table-cell office:value-type="string" table:style-name="c10">
            <text:p>2026-05-11 23:00</text:p>
          </table:table-cell>
          <table:table-cell office:value-type="float" office:value="2340.259285" table:style-name="c10">
            <text:p>2340.3</text:p>
          </table:table-cell>
          <table:table-cell office:value-type="float" office:value="-1.6583718904272682" table:style-name="c11">
            <text:p>-1.7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0:30</text:p>
          </table:table-cell>
          <table:table-cell office:value-type="float" office:value="2122.350645" table:style-name="c10">
            <text:p>2122.4</text:p>
          </table:table-cell>
          <table:table-cell office:value-type="string" table:style-name="c10">
            <text:p>2026-05-26 18:00</text:p>
          </table:table-cell>
          <table:table-cell office:value-type="float" office:value="2069.8045800000004" table:style-name="c10">
            <text:p>2069.8</text:p>
          </table:table-cell>
          <table:table-cell office:value-type="float" office:value="-2.6707935603835775" table:style-name="c11">
            <text:p>-2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6:30</text:p>
          </table:table-cell>
          <table:table-cell office:value-type="float" office:value="0.9534765" table:style-name="c1">
            <text:p>0.95348</text:p>
          </table:table-cell>
          <table:table-cell office:value-type="string" table:style-name="c1">
            <text:p>2026-03-17 16:30</text:p>
          </table:table-cell>
          <table:table-cell office:value-type="float" office:value="0.9655170000000001" table:style-name="c1">
            <text:p>0.96552</text:p>
          </table:table-cell>
          <table:table-cell office:value-type="float" office:value="1.0603755328002507" table:style-name="c14">
            <text:p>+1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19:00</text:p>
          </table:table-cell>
          <table:table-cell office:value-type="float" office:value="0.930465" table:style-name="c1">
            <text:p>0.93046</text:p>
          </table:table-cell>
          <table:table-cell office:value-type="string" table:style-name="c1">
            <text:p>2026-03-24 19:00</text:p>
          </table:table-cell>
          <table:table-cell office:value-type="float" office:value="0.9105445000000001" table:style-name="c1">
            <text:p>0.91054</text:p>
          </table:table-cell>
          <table:table-cell office:value-type="float" office:value="-2.336539091260814" table:style-name="c13">
            <text:p>-2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0.8554274999999999" table:style-name="c1">
            <text:p>0.85543</text:p>
          </table:table-cell>
          <table:table-cell office:value-type="string" table:style-name="c1">
            <text:p>2026-04-02 05:00</text:p>
          </table:table-cell>
          <table:table-cell office:value-type="float" office:value="0.8095950000000001" table:style-name="c1">
            <text:p>0.8096</text:p>
          </table:table-cell>
          <table:table-cell office:value-type="float" office:value="-5.547037055156601" table:style-name="c13">
            <text:p>-5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00</text:p>
          </table:table-cell>
          <table:table-cell office:value-type="float" office:value="0.862431" table:style-name="c1">
            <text:p>0.86243</text:p>
          </table:table-cell>
          <table:table-cell office:value-type="string" table:style-name="c1">
            <text:p>2026-04-07 09:00</text:p>
          </table:table-cell>
          <table:table-cell office:value-type="float" office:value="0.8605695" table:style-name="c1">
            <text:p>0.86057</text:p>
          </table:table-cell>
          <table:table-cell office:value-type="float" office:value="-0.4153118835593661" table:style-name="c13">
            <text:p>-0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2:45</text:p>
          </table:table-cell>
          <table:table-cell office:value-type="float" office:value="0.9174585" table:style-name="c1">
            <text:p>0.91746</text:p>
          </table:table-cell>
          <table:table-cell office:value-type="string" table:style-name="c1">
            <text:p>2026-04-10 22:45</text:p>
          </table:table-cell>
          <table:table-cell office:value-type="float" office:value="0.9135430000000001" table:style-name="c1">
            <text:p>0.91354</text:p>
          </table:table-cell>
          <table:table-cell office:value-type="float" office:value="-0.6258236701714215" table:style-name="c13">
            <text:p>-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15</text:p>
          </table:table-cell>
          <table:table-cell office:value-type="float" office:value="0.9214605" table:style-name="c1">
            <text:p>0.92146</text:p>
          </table:table-cell>
          <table:table-cell office:value-type="string" table:style-name="c1">
            <text:p>2026-04-17 02:15</text:p>
          </table:table-cell>
          <table:table-cell office:value-type="float" office:value="0.9845075000000001" table:style-name="c1">
            <text:p>0.98451</text:p>
          </table:table-cell>
          <table:table-cell office:value-type="float" office:value="6.628495687823843" table:style-name="c14">
            <text:p>+6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30</text:p>
          </table:table-cell>
          <table:table-cell office:value-type="float" office:value="0.9984989999999999" table:style-name="c1">
            <text:p>0.9985</text:p>
          </table:table-cell>
          <table:table-cell office:value-type="string" table:style-name="c1">
            <text:p>2026-04-18 07:30</text:p>
          </table:table-cell>
          <table:table-cell office:value-type="float" office:value="0.9885055" table:style-name="c1">
            <text:p>0.98851</text:p>
          </table:table-cell>
          <table:table-cell office:value-type="float" office:value="-1.198751575564927" table:style-name="c13">
            <text:p>-1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6:15</text:p>
          </table:table-cell>
          <table:table-cell office:value-type="float" office:value="0.9474734999999999" table:style-name="c1">
            <text:p>0.94747</text:p>
          </table:table-cell>
          <table:table-cell office:value-type="string" table:style-name="c1">
            <text:p>2026-04-25 16:15</text:p>
          </table:table-cell>
          <table:table-cell office:value-type="float" office:value="0.9405295" table:style-name="c1">
            <text:p>0.94053</text:p>
          </table:table-cell>
          <table:table-cell office:value-type="float" office:value="-0.9313314272641704" table:style-name="c13">
            <text:p>-0.9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0.9554774999999999" table:style-name="c1">
            <text:p>0.95548</text:p>
          </table:table-cell>
          <table:table-cell office:value-type="string" table:style-name="c1">
            <text:p>2026-04-29 20:00</text:p>
          </table:table-cell>
          <table:table-cell office:value-type="float" office:value="0.8945525000000001" table:style-name="c1">
            <text:p>0.89455</text:p>
          </table:table-cell>
          <table:table-cell office:value-type="float" office:value="-6.563546545837018" table:style-name="c13">
            <text:p>-6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0.9484739999999999" table:style-name="c1">
            <text:p>0.94847</text:p>
          </table:table-cell>
          <table:table-cell office:value-type="string" table:style-name="c1">
            <text:p>2026-05-05 02:00</text:p>
          </table:table-cell>
          <table:table-cell office:value-type="float" office:value="0.9385305" table:style-name="c1">
            <text:p>0.93853</text:p>
          </table:table-cell>
          <table:table-cell office:value-type="float" office:value="-1.2461725328790973" table:style-name="c13">
            <text:p>-1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15</text:p>
          </table:table-cell>
          <table:table-cell office:value-type="float" office:value="1.1845919999999999" table:style-name="c1">
            <text:p>1.1846</text:p>
          </table:table-cell>
          <table:table-cell office:value-type="string" table:style-name="c1">
            <text:p>2026-05-10 21:00</text:p>
          </table:table-cell>
          <table:table-cell office:value-type="float" office:value="1.1194400000000002" table:style-name="c1">
            <text:p>1.1194</text:p>
          </table:table-cell>
          <table:table-cell office:value-type="float" office:value="-5.688858320839552" table:style-name="c13">
            <text:p>-5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30</text:p>
          </table:table-cell>
          <table:table-cell office:value-type="float" office:value="0.9854924999999999" table:style-name="c1">
            <text:p>0.98549</text:p>
          </table:table-cell>
          <table:table-cell office:value-type="string" table:style-name="c1">
            <text:p>2026-05-26 14:30</text:p>
          </table:table-cell>
          <table:table-cell office:value-type="float" office:value="1.0484755" table:style-name="c1">
            <text:p>1.0485</text:p>
          </table:table-cell>
          <table:table-cell office:value-type="float" office:value="6.178342044764418" table:style-name="c14">
            <text:p>+6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0.09878936999999999" table:style-name="c10">
            <text:p>0.098789</text:p>
          </table:table-cell>
          <table:table-cell office:value-type="string" table:style-name="c10">
            <text:p>2026-03-11 06:00</text:p>
          </table:table-cell>
          <table:table-cell office:value-type="float" office:value="0.09407294" table:style-name="c10">
            <text:p>0.094073</text:p>
          </table:table-cell>
          <table:table-cell office:value-type="float" office:value="-4.964584557083396" table:style-name="c11">
            <text:p>-5.0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0.097178565" table:style-name="c10">
            <text:p>0.097179</text:p>
          </table:table-cell>
          <table:table-cell office:value-type="string" table:style-name="c10">
            <text:p>2026-03-17 03:45</text:p>
          </table:table-cell>
          <table:table-cell office:value-type="float" office:value="0.099100425" table:style-name="c10">
            <text:p>0.0991</text:p>
          </table:table-cell>
          <table:table-cell office:value-type="float" office:value="1.7738050056872012" table:style-name="c12">
            <text:p>+1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20:30</text:p>
          </table:table-cell>
          <table:table-cell office:value-type="float" office:value="0.093396675" table:style-name="c10">
            <text:p>0.093397</text:p>
          </table:table-cell>
          <table:table-cell office:value-type="string" table:style-name="c10">
            <text:p>2026-03-24 20:30</text:p>
          </table:table-cell>
          <table:table-cell office:value-type="float" office:value="0.09362316500000001" table:style-name="c10">
            <text:p>0.093623</text:p>
          </table:table-cell>
          <table:table-cell office:value-type="float" office:value="0.042118515637756815" table:style-name="c12">
            <text:p>+0.0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45</text:p>
          </table:table-cell>
          <table:table-cell office:value-type="float" office:value="0.09372683999999999" table:style-name="c10">
            <text:p>0.093727</text:p>
          </table:table-cell>
          <table:table-cell office:value-type="string" table:style-name="c10">
            <text:p>2026-03-25 20:45</text:p>
          </table:table-cell>
          <table:table-cell office:value-type="float" office:value="0.09427284000000001" table:style-name="c10">
            <text:p>0.094273</text:p>
          </table:table-cell>
          <table:table-cell office:value-type="float" office:value="0.3814794063685678" table:style-name="c12">
            <text:p>+0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2:45</text:p>
          </table:table-cell>
          <table:table-cell office:value-type="float" office:value="0.09100548" table:style-name="c10">
            <text:p>0.091005</text:p>
          </table:table-cell>
          <table:table-cell office:value-type="string" table:style-name="c10">
            <text:p>2026-04-02 05:00</text:p>
          </table:table-cell>
          <table:table-cell office:value-type="float" office:value="0.08587704" table:style-name="c10">
            <text:p>0.085877</text:p>
          </table:table-cell>
          <table:table-cell office:value-type="float" office:value="-5.823944011899062" table:style-name="c11">
            <text:p>-5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04:00</text:p>
          </table:table-cell>
          <table:table-cell office:value-type="float" office:value="0.089754855" table:style-name="c10">
            <text:p>0.089755</text:p>
          </table:table-cell>
          <table:table-cell office:value-type="string" table:style-name="c10">
            <text:p>2026-04-09 12:00</text:p>
          </table:table-cell>
          <table:table-cell office:value-type="float" office:value="0.08807594" table:style-name="c10">
            <text:p>0.088076</text:p>
          </table:table-cell>
          <table:table-cell office:value-type="float" office:value="-2.0667169525926954" table:style-name="c11">
            <text:p>-2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14:00</text:p>
          </table:table-cell>
          <table:table-cell office:value-type="float" office:value="0.087573765" table:style-name="c10">
            <text:p>0.087574</text:p>
          </table:table-cell>
          <table:table-cell office:value-type="string" table:style-name="c10">
            <text:p>2026-04-14 20:00</text:p>
          </table:table-cell>
          <table:table-cell office:value-type="float" office:value="0.084987485" table:style-name="c10">
            <text:p>0.084987</text:p>
          </table:table-cell>
          <table:table-cell office:value-type="float" office:value="-3.1472553252849145" table:style-name="c11">
            <text:p>-3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7:45</text:p>
          </table:table-cell>
          <table:table-cell office:value-type="float" office:value="0.09098546999999998" table:style-name="c10">
            <text:p>0.090985</text:p>
          </table:table-cell>
          <table:table-cell office:value-type="string" table:style-name="c10">
            <text:p>2026-04-18 07:45</text:p>
          </table:table-cell>
          <table:table-cell office:value-type="float" office:value="0.090184885" table:style-name="c10">
            <text:p>0.090185</text:p>
          </table:table-cell>
          <table:table-cell office:value-type="float" office:value="-1.0780453023048309" table:style-name="c11">
            <text:p>-1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11:00</text:p>
          </table:table-cell>
          <table:table-cell office:value-type="float" office:value="0.091395675" table:style-name="c10">
            <text:p>0.091396</text:p>
          </table:table-cell>
          <table:table-cell office:value-type="string" table:style-name="c10">
            <text:p>2026-04-22 11:00</text:p>
          </table:table-cell>
          <table:table-cell office:value-type="float" office:value="0.09104445500000001" table:style-name="c10">
            <text:p>0.091044</text:p>
          </table:table-cell>
          <table:table-cell office:value-type="float" office:value="-0.5834169565955838" table:style-name="c11">
            <text:p>-0.6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5:45</text:p>
          </table:table-cell>
          <table:table-cell office:value-type="float" office:value="0.09300648" table:style-name="c10">
            <text:p>0.093006</text:p>
          </table:table-cell>
          <table:table-cell office:value-type="string" table:style-name="c10">
            <text:p>2026-04-23 15:45</text:p>
          </table:table-cell>
          <table:table-cell office:value-type="float" office:value="0.09087454" table:style-name="c10">
            <text:p>0.090875</text:p>
          </table:table-cell>
          <table:table-cell office:value-type="float" office:value="-2.4875666786443373" table:style-name="c11">
            <text:p>-2.5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4:30</text:p>
          </table:table-cell>
          <table:table-cell office:value-type="float" office:value="0.091455705" table:style-name="c10">
            <text:p>0.091456</text:p>
          </table:table-cell>
          <table:table-cell office:value-type="string" table:style-name="c10">
            <text:p>2026-05-09 14:30</text:p>
          </table:table-cell>
          <table:table-cell office:value-type="float" office:value="0.09204395500000001" table:style-name="c10">
            <text:p>0.092044</text:p>
          </table:table-cell>
          <table:table-cell office:value-type="float" office:value="0.44202177869059334" table:style-name="c12">
            <text:p>+0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8:45</text:p>
          </table:table-cell>
          <table:table-cell office:value-type="float" office:value="0.09745870499999999" table:style-name="c10">
            <text:p>0.097459</text:p>
          </table:table-cell>
          <table:table-cell office:value-type="string" table:style-name="c10">
            <text:p>2026-05-15 14:00</text:p>
          </table:table-cell>
          <table:table-cell office:value-type="float" office:value="0.091564195" table:style-name="c10">
            <text:p>0.091564</text:p>
          </table:table-cell>
          <table:table-cell office:value-type="float" office:value="-6.236022555199138" table:style-name="c11">
            <text:p>-6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00:15</text:p>
          </table:table-cell>
          <table:table-cell office:value-type="float" office:value="0.092716335" table:style-name="c10">
            <text:p>0.092716</text:p>
          </table:table-cell>
          <table:table-cell office:value-type="string" table:style-name="c10">
            <text:p>2026-05-30 00:15</text:p>
          </table:table-cell>
          <table:table-cell office:value-type="float" office:value="0.102298825" table:style-name="c10">
            <text:p>0.1023</text:p>
          </table:table-cell>
          <table:table-cell office:value-type="float" office:value="10.114716731226503" table:style-name="c12">
            <text:p>+10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03:30</text:p>
          </table:table-cell>
          <table:table-cell office:value-type="float" office:value="0.09792893999999999" table:style-name="c10">
            <text:p>0.097929</text:p>
          </table:table-cell>
          <table:table-cell office:value-type="string" table:style-name="c10">
            <text:p>2026-06-01 12:00</text:p>
          </table:table-cell>
          <table:table-cell office:value-type="float" office:value="0.09422286500000002" table:style-name="c10">
            <text:p>0.094223</text:p>
          </table:table-cell>
          <table:table-cell office:value-type="float" office:value="-3.976788176339874" table:style-name="c11">
            <text:p>-4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3.0265125" table:style-name="c1">
            <text:p>3.0265</text:p>
          </table:table-cell>
          <table:table-cell office:value-type="string" table:style-name="c1">
            <text:p>2026-03-11 15:00</text:p>
          </table:table-cell>
          <table:table-cell office:value-type="float" office:value="2.9895045000000002" table:style-name="c1">
            <text:p>2.9895</text:p>
          </table:table-cell>
          <table:table-cell office:value-type="float" office:value="-1.4202491975665033" table:style-name="c13">
            <text:p>-1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30</text:p>
          </table:table-cell>
          <table:table-cell office:value-type="float" office:value="3.16158" table:style-name="c1">
            <text:p>3.1616</text:p>
          </table:table-cell>
          <table:table-cell office:value-type="string" table:style-name="c1">
            <text:p>2026-03-14 13:30</text:p>
          </table:table-cell>
          <table:table-cell office:value-type="float" office:value="3.0374805000000005" table:style-name="c1">
            <text:p>3.0375</text:p>
          </table:table-cell>
          <table:table-cell office:value-type="float" office:value="-4.11729020045356" table:style-name="c13">
            <text:p>-4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45</text:p>
          </table:table-cell>
          <table:table-cell office:value-type="float" office:value="3.0505245" table:style-name="c1">
            <text:p>3.0505</text:p>
          </table:table-cell>
          <table:table-cell office:value-type="string" table:style-name="c1">
            <text:p>2026-03-25 20:45</text:p>
          </table:table-cell>
          <table:table-cell office:value-type="float" office:value="3.068465" table:style-name="c1">
            <text:p>3.0685</text:p>
          </table:table-cell>
          <table:table-cell office:value-type="float" office:value="0.3870363429305579" table:style-name="c14">
            <text:p>+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2.96148" table:style-name="c1">
            <text:p>2.9615</text:p>
          </table:table-cell>
          <table:table-cell office:value-type="string" table:style-name="c1">
            <text:p>2026-04-02 03:00</text:p>
          </table:table-cell>
          <table:table-cell office:value-type="float" office:value="2.7846070000000003" table:style-name="c1">
            <text:p>2.7846</text:p>
          </table:table-cell>
          <table:table-cell office:value-type="float" office:value="-6.160414029235373" table:style-name="c13">
            <text:p>-6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2.9164575" table:style-name="c1">
            <text:p>2.9165</text:p>
          </table:table-cell>
          <table:table-cell office:value-type="string" table:style-name="c1">
            <text:p>2026-04-07 09:30</text:p>
          </table:table-cell>
          <table:table-cell office:value-type="float" office:value="2.8785600000000002" table:style-name="c1">
            <text:p>2.8786</text:p>
          </table:table-cell>
          <table:table-cell office:value-type="float" office:value="-1.496738472616177" table:style-name="c13">
            <text:p>-1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5:00</text:p>
          </table:table-cell>
          <table:table-cell office:value-type="float" office:value="3.1095539999999997" table:style-name="c1">
            <text:p>3.1096</text:p>
          </table:table-cell>
          <table:table-cell office:value-type="string" table:style-name="c1">
            <text:p>2026-04-16 15:00</text:p>
          </table:table-cell>
          <table:table-cell office:value-type="float" office:value="3.314342" table:style-name="c1">
            <text:p>3.3143</text:p>
          </table:table-cell>
          <table:table-cell office:value-type="float" office:value="6.372702655814955" table:style-name="c14">
            <text:p>+6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4:15</text:p>
          </table:table-cell>
          <table:table-cell office:value-type="float" office:value="3.3536759999999997" table:style-name="c1">
            <text:p>3.3537</text:p>
          </table:table-cell>
          <table:table-cell office:value-type="string" table:style-name="c1">
            <text:p>2026-04-23 11:00</text:p>
          </table:table-cell>
          <table:table-cell office:value-type="float" office:value="3.2573705" table:style-name="c1">
            <text:p>3.2574</text:p>
          </table:table-cell>
          <table:table-cell office:value-type="float" office:value="-3.0657995474070887" table:style-name="c13">
            <text:p>-3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9:30</text:p>
          </table:table-cell>
          <table:table-cell office:value-type="float" office:value="3.645822" table:style-name="c1">
            <text:p>3.6458</text:p>
          </table:table-cell>
          <table:table-cell office:value-type="string" table:style-name="c1">
            <text:p>2026-05-02 19:30</text:p>
          </table:table-cell>
          <table:table-cell office:value-type="float" office:value="3.7911035" table:style-name="c1">
            <text:p>3.7911</text:p>
          </table:table-cell>
          <table:table-cell office:value-type="float" office:value="3.7770106193747432" table:style-name="c14">
            <text:p>+3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7:15</text:p>
          </table:table-cell>
          <table:table-cell office:value-type="float" office:value="3.811905" table:style-name="c1">
            <text:p>3.8119</text:p>
          </table:table-cell>
          <table:table-cell office:value-type="string" table:style-name="c1">
            <text:p>2026-05-04 20:00</text:p>
          </table:table-cell>
          <table:table-cell office:value-type="float" office:value="3.6831575" table:style-name="c1">
            <text:p>3.6832</text:p>
          </table:table-cell>
          <table:table-cell office:value-type="float" office:value="-3.5706590757770718" table:style-name="c13">
            <text:p>-3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3:30</text:p>
          </table:table-cell>
          <table:table-cell office:value-type="float" office:value="3.8769375" table:style-name="c1">
            <text:p>3.8769</text:p>
          </table:table-cell>
          <table:table-cell office:value-type="string" table:style-name="c1">
            <text:p>2026-05-09 03:30</text:p>
          </table:table-cell>
          <table:table-cell office:value-type="float" office:value="4.353822" table:style-name="c1">
            <text:p>4.3538</text:p>
          </table:table-cell>
          <table:table-cell office:value-type="float" office:value="12.076057708487697" table:style-name="c14">
            <text:p>+12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7:15</text:p>
          </table:table-cell>
          <table:table-cell office:value-type="float" office:value="4.4212095" table:style-name="c1">
            <text:p>4.4212</text:p>
          </table:table-cell>
          <table:table-cell office:value-type="string" table:style-name="c1">
            <text:p>2026-05-12 17:15</text:p>
          </table:table-cell>
          <table:table-cell office:value-type="float" office:value="4.7666155" table:style-name="c1">
            <text:p>4.7666</text:p>
          </table:table-cell>
          <table:table-cell office:value-type="float" office:value="7.5969604158206305" table:style-name="c14">
            <text:p>+7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7:45</text:p>
          </table:table-cell>
          <table:table-cell office:value-type="float" office:value="4.853425499999999" table:style-name="c1">
            <text:p>4.8534</text:p>
          </table:table-cell>
          <table:table-cell office:value-type="string" table:style-name="c1">
            <text:p>2026-05-13 17:45</text:p>
          </table:table-cell>
          <table:table-cell office:value-type="float" office:value="5.2703635" table:style-name="c1">
            <text:p>5.2704</text:p>
          </table:table-cell>
          <table:table-cell office:value-type="float" office:value="8.373519761733238" table:style-name="c14">
            <text:p>+8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05:00</text:p>
          </table:table-cell>
          <table:table-cell office:value-type="float" office:value="5.2686329999999995" table:style-name="c1">
            <text:p>5.2686</text:p>
          </table:table-cell>
          <table:table-cell office:value-type="string" table:style-name="c1">
            <text:p>2026-05-15 05:00</text:p>
          </table:table-cell>
          <table:table-cell office:value-type="float" office:value="5.085456000000001" table:style-name="c1">
            <text:p>5.0855</text:p>
          </table:table-cell>
          <table:table-cell office:value-type="float" office:value="-3.6696962294393787" table:style-name="c13">
            <text:p>-3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45</text:p>
          </table:table-cell>
          <table:table-cell office:value-type="float" office:value="5.224611" table:style-name="c1">
            <text:p>5.2246</text:p>
          </table:table-cell>
          <table:table-cell office:value-type="string" table:style-name="c1">
            <text:p>2026-05-22 17:45</text:p>
          </table:table-cell>
          <table:table-cell office:value-type="float" office:value="5.6161905" table:style-name="c1">
            <text:p>5.6162</text:p>
          </table:table-cell>
          <table:table-cell office:value-type="float" office:value="7.280020181224978" table:style-name="c14">
            <text:p>+7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3 20:45</text:p>
          </table:table-cell>
          <table:table-cell office:value-type="float" office:value="5.489743499999999" table:style-name="c1">
            <text:p>5.4897</text:p>
          </table:table-cell>
          <table:table-cell office:value-type="string" table:style-name="c1">
            <text:p>2026-05-24 20:45</text:p>
          </table:table-cell>
          <table:table-cell office:value-type="float" office:value="5.1724125" table:style-name="c1">
            <text:p>5.1724</text:p>
          </table:table-cell>
          <table:table-cell office:value-type="float" office:value="-5.9687789163100025" table:style-name="c13">
            <text:p>-6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5:00</text:p>
          </table:table-cell>
          <table:table-cell office:value-type="float" office:value="6.749373" table:style-name="c1">
            <text:p>6.7494</text:p>
          </table:table-cell>
          <table:table-cell office:value-type="string" table:style-name="c1">
            <text:p>2026-05-31 05:00</text:p>
          </table:table-cell>
          <table:table-cell office:value-type="float" office:value="6.584706000000001" table:style-name="c1">
            <text:p>6.5847</text:p>
          </table:table-cell>
          <table:table-cell office:value-type="float" office:value="-2.634760699904992" table:style-name="c13">
            <text:p>-2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9:15</text:p>
          </table:table-cell>
          <table:table-cell office:value-type="float" office:value="9.294645" table:style-name="c10">
            <text:p>9.2946</text:p>
          </table:table-cell>
          <table:table-cell office:value-type="string" table:style-name="c10">
            <text:p>2026-03-16 09:15</text:p>
          </table:table-cell>
          <table:table-cell office:value-type="float" office:value="9.5952" table:style-name="c10">
            <text:p>9.5952</text:p>
          </table:table-cell>
          <table:table-cell office:value-type="float" office:value="3.027272103453127" table:style-name="c12">
            <text:p>+3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23:00</text:p>
          </table:table-cell>
          <table:table-cell office:value-type="float" office:value="9.38469" table:style-name="c10">
            <text:p>9.3847</text:p>
          </table:table-cell>
          <table:table-cell office:value-type="string" table:style-name="c10">
            <text:p>2026-03-26 11:00</text:p>
          </table:table-cell>
          <table:table-cell office:value-type="float" office:value="8.975510000000002" table:style-name="c10">
            <text:p>8.9755</text:p>
          </table:table-cell>
          <table:table-cell office:value-type="float" office:value="-4.551264287792134" table:style-name="c11">
            <text:p>-4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15</text:p>
          </table:table-cell>
          <table:table-cell office:value-type="float" office:value="8.794394999999998" table:style-name="c10">
            <text:p>8.7944</text:p>
          </table:table-cell>
          <table:table-cell office:value-type="string" table:style-name="c10">
            <text:p>2026-03-31 08:15</text:p>
          </table:table-cell>
          <table:table-cell office:value-type="float" office:value="8.685655" table:style-name="c10">
            <text:p>8.6857</text:p>
          </table:table-cell>
          <table:table-cell office:value-type="float" office:value="-1.4338976626021238" table:style-name="c11">
            <text:p>-1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6:45</text:p>
          </table:table-cell>
          <table:table-cell office:value-type="float" office:value="8.784389999999998" table:style-name="c10">
            <text:p>8.7844</text:p>
          </table:table-cell>
          <table:table-cell office:value-type="string" table:style-name="c10">
            <text:p>2026-04-01 16:45</text:p>
          </table:table-cell>
          <table:table-cell office:value-type="float" office:value="9.065465000000001" table:style-name="c10">
            <text:p>9.0655</text:p>
          </table:table-cell>
          <table:table-cell office:value-type="float" office:value="2.9934137198485367" table:style-name="c12">
            <text:p>+3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9:15</text:p>
          </table:table-cell>
          <table:table-cell office:value-type="float" office:value="8.774384999999999" table:style-name="c10">
            <text:p>8.7744</text:p>
          </table:table-cell>
          <table:table-cell office:value-type="string" table:style-name="c10">
            <text:p>2026-04-05 07:00</text:p>
          </table:table-cell>
          <table:table-cell office:value-type="float" office:value="8.55572" table:style-name="c10">
            <text:p>8.5557</text:p>
          </table:table-cell>
          <table:table-cell office:value-type="float" office:value="-2.68700181585374" table:style-name="c11">
            <text:p>-2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9:30</text:p>
          </table:table-cell>
          <table:table-cell office:value-type="float" office:value="9.10455" table:style-name="c10">
            <text:p>9.1045</text:p>
          </table:table-cell>
          <table:table-cell office:value-type="string" table:style-name="c10">
            <text:p>2026-04-07 09:30</text:p>
          </table:table-cell>
          <table:table-cell office:value-type="float" office:value="8.85557" table:style-name="c10">
            <text:p>8.8556</text:p>
          </table:table-cell>
          <table:table-cell office:value-type="float" office:value="-2.929109999176227" table:style-name="c11">
            <text:p>-2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9.334665" table:style-name="c10">
            <text:p>9.3347</text:p>
          </table:table-cell>
          <table:table-cell office:value-type="string" table:style-name="c10">
            <text:p>2026-04-17 02:45</text:p>
          </table:table-cell>
          <table:table-cell office:value-type="float" office:value="9.445275" table:style-name="c10">
            <text:p>9.4453</text:p>
          </table:table-cell>
          <table:table-cell office:value-type="float" office:value="0.982669386367907" table:style-name="c12">
            <text:p>+1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15</text:p>
          </table:table-cell>
          <table:table-cell office:value-type="float" office:value="9.414705" table:style-name="c10">
            <text:p>9.4147</text:p>
          </table:table-cell>
          <table:table-cell office:value-type="string" table:style-name="c10">
            <text:p>2026-04-29 16:00</text:p>
          </table:table-cell>
          <table:table-cell office:value-type="float" office:value="9.09545" table:style-name="c10">
            <text:p>9.0954</text:p>
          </table:table-cell>
          <table:table-cell office:value-type="float" office:value="-3.584146338626648" table:style-name="c11">
            <text:p>-3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15</text:p>
          </table:table-cell>
          <table:table-cell office:value-type="float" office:value="9.274634999999998" table:style-name="c10">
            <text:p>9.2746</text:p>
          </table:table-cell>
          <table:table-cell office:value-type="string" table:style-name="c10">
            <text:p>2026-05-05 02:15</text:p>
          </table:table-cell>
          <table:table-cell office:value-type="float" office:value="9.425285" table:style-name="c10">
            <text:p>9.4253</text:p>
          </table:table-cell>
          <table:table-cell office:value-type="float" office:value="1.4211756611985704" table:style-name="c12">
            <text:p>+1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10:30</text:p>
          </table:table-cell>
          <table:table-cell office:value-type="float" office:value="9.66483" table:style-name="c10">
            <text:p>9.6648</text:p>
          </table:table-cell>
          <table:table-cell office:value-type="string" table:style-name="c10">
            <text:p>2026-05-06 10:30</text:p>
          </table:table-cell>
          <table:table-cell office:value-type="float" office:value="10.1949" table:style-name="c10">
            <text:p>10.195</text:p>
          </table:table-cell>
          <table:table-cell office:value-type="float" office:value="5.273661253224304" table:style-name="c12">
            <text:p>+5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0:45</text:p>
          </table:table-cell>
          <table:table-cell office:value-type="float" office:value="9.636816" table:style-name="c10">
            <text:p>9.6368</text:p>
          </table:table-cell>
          <table:table-cell office:value-type="string" table:style-name="c10">
            <text:p>2026-05-26 20:00</text:p>
          </table:table-cell>
          <table:table-cell office:value-type="float" office:value="9.398298500000001" table:style-name="c10">
            <text:p>9.3983</text:p>
          </table:table-cell>
          <table:table-cell office:value-type="float" office:value="-2.670017760030896" table:style-name="c11">
            <text:p>-2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56.798385" table:style-name="c1">
            <text:p>56.798</text:p>
          </table:table-cell>
          <table:table-cell office:value-type="string" table:style-name="c1">
            <text:p>2026-03-17 03:45</text:p>
          </table:table-cell>
          <table:table-cell office:value-type="float" office:value="57.971000000000004" table:style-name="c1">
            <text:p>57.971</text:p>
          </table:table-cell>
          <table:table-cell office:value-type="float" office:value="1.8604947499827773" table:style-name="c14">
            <text:p>+1.9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30</text:p>
          </table:table-cell>
          <table:table-cell office:value-type="float" office:value="53.956965" table:style-name="c1">
            <text:p>53.957</text:p>
          </table:table-cell>
          <table:table-cell office:value-type="string" table:style-name="c1">
            <text:p>2026-04-06 23:30</text:p>
          </table:table-cell>
          <table:table-cell office:value-type="float" office:value="53.343315" table:style-name="c1">
            <text:p>53.343</text:p>
          </table:table-cell>
          <table:table-cell office:value-type="float" office:value="-1.3349217968153027" table:style-name="c13">
            <text:p>-1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3:45</text:p>
          </table:table-cell>
          <table:table-cell office:value-type="float" office:value="55.137555" table:style-name="c1">
            <text:p>55.138</text:p>
          </table:table-cell>
          <table:table-cell office:value-type="string" table:style-name="c1">
            <text:p>2026-04-15 13:45</text:p>
          </table:table-cell>
          <table:table-cell office:value-type="float" office:value="54.852560000000004" table:style-name="c1">
            <text:p>54.853</text:p>
          </table:table-cell>
          <table:table-cell office:value-type="float" office:value="-0.7157467672260664" table:style-name="c13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55.897935" table:style-name="c1">
            <text:p>55.898</text:p>
          </table:table-cell>
          <table:table-cell office:value-type="string" table:style-name="c1">
            <text:p>2026-04-17 16:00</text:p>
          </table:table-cell>
          <table:table-cell office:value-type="float" office:value="56.521725" table:style-name="c1">
            <text:p>56.522</text:p>
          </table:table-cell>
          <table:table-cell office:value-type="float" office:value="0.9138138496976866" table:style-name="c14">
            <text:p>+0.9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56.268119999999996" table:style-name="c1">
            <text:p>56.268</text:p>
          </table:table-cell>
          <table:table-cell office:value-type="string" table:style-name="c1">
            <text:p>2026-04-23 05:30</text:p>
          </table:table-cell>
          <table:table-cell office:value-type="float" office:value="55.122425" table:style-name="c1">
            <text:p>55.122</text:p>
          </table:table-cell>
          <table:table-cell office:value-type="float" office:value="-2.2319649698177235" table:style-name="c13">
            <text:p>-2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57.318645" table:style-name="c1">
            <text:p>57.319</text:p>
          </table:table-cell>
          <table:table-cell office:value-type="string" table:style-name="c1">
            <text:p>2026-04-29 23:00</text:p>
          </table:table-cell>
          <table:table-cell office:value-type="float" office:value="55.24236500000001" table:style-name="c1">
            <text:p>55.242</text:p>
          </table:table-cell>
          <table:table-cell office:value-type="float" office:value="-3.8150055494769575" table:style-name="c13">
            <text:p>-3.8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55.957964999999994" table:style-name="c1">
            <text:p>55.958</text:p>
          </table:table-cell>
          <table:table-cell office:value-type="string" table:style-name="c1">
            <text:p>2026-05-05 00:00</text:p>
          </table:table-cell>
          <table:table-cell office:value-type="float" office:value="54.932520000000004" table:style-name="c1">
            <text:p>54.933</text:p>
          </table:table-cell>
          <table:table-cell office:value-type="float" office:value="-2.0287641044129834" table:style-name="c13">
            <text:p>-2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45</text:p>
          </table:table-cell>
          <table:table-cell office:value-type="float" office:value="59.849909999999994" table:style-name="c1">
            <text:p>59.85</text:p>
          </table:table-cell>
          <table:table-cell office:value-type="string" table:style-name="c1">
            <text:p>2026-05-11 22:45</text:p>
          </table:table-cell>
          <table:table-cell office:value-type="float" office:value="58.63067" table:style-name="c1">
            <text:p>58.631</text:p>
          </table:table-cell>
          <table:table-cell office:value-type="float" office:value="-2.2329903408877194" table:style-name="c13">
            <text:p>-2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9:30</text:p>
          </table:table-cell>
          <table:table-cell office:value-type="float" office:value="1.3516754999999998" table:style-name="c10">
            <text:p>1.3517</text:p>
          </table:table-cell>
          <table:table-cell office:value-type="string" table:style-name="c10">
            <text:p>2026-03-16 09:30</text:p>
          </table:table-cell>
          <table:table-cell office:value-type="float" office:value="1.3803095" table:style-name="c10">
            <text:p>1.3803</text:p>
          </table:table-cell>
          <table:table-cell office:value-type="float" office:value="1.9142731602000973" table:style-name="c12">
            <text:p>+1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30</text:p>
          </table:table-cell>
          <table:table-cell office:value-type="float" office:value="1.214607" table:style-name="c10">
            <text:p>1.2146</text:p>
          </table:table-cell>
          <table:table-cell office:value-type="string" table:style-name="c10">
            <text:p>2026-03-30 21:00</text:p>
          </table:table-cell>
          <table:table-cell office:value-type="float" office:value="1.155422" table:style-name="c10">
            <text:p>1.1554</text:p>
          </table:table-cell>
          <table:table-cell office:value-type="float" office:value="-5.0629288797117145" table:style-name="c11">
            <text:p>-5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2:45</text:p>
          </table:table-cell>
          <table:table-cell office:value-type="float" office:value="1.2276135" table:style-name="c10">
            <text:p>1.2276</text:p>
          </table:table-cell>
          <table:table-cell office:value-type="string" table:style-name="c10">
            <text:p>2026-04-02 05:00</text:p>
          </table:table-cell>
          <table:table-cell office:value-type="float" office:value="1.153423" table:style-name="c10">
            <text:p>1.1534</text:p>
          </table:table-cell>
          <table:table-cell office:value-type="float" office:value="-6.231292876544591" table:style-name="c11">
            <text:p>-6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5:15</text:p>
          </table:table-cell>
          <table:table-cell office:value-type="float" office:value="1.2626309999999998" table:style-name="c10">
            <text:p>1.2626</text:p>
          </table:table-cell>
          <table:table-cell office:value-type="string" table:style-name="c10">
            <text:p>2026-04-05 15:15</text:p>
          </table:table-cell>
          <table:table-cell office:value-type="float" office:value="1.2443775000000001" table:style-name="c10">
            <text:p>1.2444</text:p>
          </table:table-cell>
          <table:table-cell office:value-type="float" office:value="-1.6426818779595842" table:style-name="c11">
            <text:p>-1.6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23:30</text:p>
          </table:table-cell>
          <table:table-cell office:value-type="float" office:value="1.2436215" table:style-name="c10">
            <text:p>1.2436</text:p>
          </table:table-cell>
          <table:table-cell office:value-type="string" table:style-name="c10">
            <text:p>2026-04-06 23:30</text:p>
          </table:table-cell>
          <table:table-cell office:value-type="float" office:value="1.241379" table:style-name="c10">
            <text:p>1.2414</text:p>
          </table:table-cell>
          <table:table-cell office:value-type="float" office:value="-0.3798596776430574" table:style-name="c11">
            <text:p>-0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05:30</text:p>
          </table:table-cell>
          <table:table-cell office:value-type="float" office:value="1.3236614999999998" table:style-name="c10">
            <text:p>1.3237</text:p>
          </table:table-cell>
          <table:table-cell office:value-type="string" table:style-name="c10">
            <text:p>2026-04-09 05:30</text:p>
          </table:table-cell>
          <table:table-cell office:value-type="float" office:value="1.3463265" table:style-name="c10">
            <text:p>1.3463</text:p>
          </table:table-cell>
          <table:table-cell office:value-type="float" office:value="1.5089729002845553" table:style-name="c12">
            <text:p>+1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5:15</text:p>
          </table:table-cell>
          <table:table-cell office:value-type="float" office:value="1.368684" table:style-name="c10">
            <text:p>1.3687</text:p>
          </table:table-cell>
          <table:table-cell office:value-type="string" table:style-name="c10">
            <text:p>2026-04-22 05:15</text:p>
          </table:table-cell>
          <table:table-cell office:value-type="float" office:value="1.407296" table:style-name="c10">
            <text:p>1.4073</text:p>
          </table:table-cell>
          <table:table-cell office:value-type="float" office:value="2.6155646808174726" table:style-name="c12">
            <text:p>+2.6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6:00</text:p>
          </table:table-cell>
          <table:table-cell office:value-type="float" office:value="1.3236614999999998" table:style-name="c10">
            <text:p>1.3237</text:p>
          </table:table-cell>
          <table:table-cell office:value-type="string" table:style-name="c10">
            <text:p>2026-05-07 06:00</text:p>
          </table:table-cell>
          <table:table-cell office:value-type="float" office:value="1.501249" table:style-name="c10">
            <text:p>1.5012</text:p>
          </table:table-cell>
          <table:table-cell office:value-type="float" office:value="13.1896639170211" table:style-name="c12">
            <text:p>+13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07:45</text:p>
          </table:table-cell>
          <table:table-cell office:value-type="float" office:value="1.552776" table:style-name="c10">
            <text:p>1.5528</text:p>
          </table:table-cell>
          <table:table-cell office:value-type="string" table:style-name="c10">
            <text:p>2026-05-11 13:00</text:p>
          </table:table-cell>
          <table:table-cell office:value-type="float" office:value="1.53923" table:style-name="c10">
            <text:p>1.5392</text:p>
          </table:table-cell>
          <table:table-cell office:value-type="float" office:value="-1.0705292179940984" table:style-name="c11">
            <text:p>-1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01:15</text:p>
          </table:table-cell>
          <table:table-cell office:value-type="float" office:value="1.6638315" table:style-name="c10">
            <text:p>1.6638</text:p>
          </table:table-cell>
          <table:table-cell office:value-type="string" table:style-name="c10">
            <text:p>2026-05-14 01:15</text:p>
          </table:table-cell>
          <table:table-cell office:value-type="float" office:value="1.5882055000000002" table:style-name="c10">
            <text:p>1.5882</text:p>
          </table:table-cell>
          <table:table-cell office:value-type="float" office:value="-4.736105957514303" table:style-name="c11">
            <text:p>-4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07:15</text:p>
          </table:table-cell>
          <table:table-cell office:value-type="float" office:value="1.6438214999999998" table:style-name="c10">
            <text:p>1.6438</text:p>
          </table:table-cell>
          <table:table-cell office:value-type="string" table:style-name="c10">
            <text:p>2026-05-20 07:15</text:p>
          </table:table-cell>
          <table:table-cell office:value-type="float" office:value="1.6561715000000001" table:style-name="c10">
            <text:p>1.6562</text:p>
          </table:table-cell>
          <table:table-cell office:value-type="float" office:value="0.5498962735005053" table:style-name="c12">
            <text:p>+0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8:45</text:p>
          </table:table-cell>
          <table:table-cell office:value-type="float" office:value="1.7588789999999999" table:style-name="c10">
            <text:p>1.7589</text:p>
          </table:table-cell>
          <table:table-cell office:value-type="string" table:style-name="c10">
            <text:p>2026-05-22 08:45</text:p>
          </table:table-cell>
          <table:table-cell office:value-type="float" office:value="2.2468760000000003" table:style-name="c10">
            <text:p>2.2469</text:p>
          </table:table-cell>
          <table:table-cell office:value-type="float" office:value="27.489411999119937" table:style-name="c12">
            <text:p>+27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09:15</text:p>
          </table:table-cell>
          <table:table-cell office:value-type="float" office:value="0.1296648" table:style-name="c1">
            <text:p>0.12966</text:p>
          </table:table-cell>
          <table:table-cell office:value-type="string" table:style-name="c1">
            <text:p>2026-03-06 09:15</text:p>
          </table:table-cell>
          <table:table-cell office:value-type="float" office:value="0.12593700000000002" table:style-name="c1">
            <text:p>0.12594</text:p>
          </table:table-cell>
          <table:table-cell office:value-type="float" office:value="-3.0691043853073308" table:style-name="c13">
            <text:p>-3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45</text:p>
          </table:table-cell>
          <table:table-cell office:value-type="float" office:value="0.12056025" table:style-name="c1">
            <text:p>0.12056</text:p>
          </table:table-cell>
          <table:table-cell office:value-type="string" table:style-name="c1">
            <text:p>2026-03-10 19:45</text:p>
          </table:table-cell>
          <table:table-cell office:value-type="float" office:value="0.11884055000000002" table:style-name="c1">
            <text:p>0.11884</text:p>
          </table:table-cell>
          <table:table-cell office:value-type="float" office:value="-1.6234722965902781" table:style-name="c13">
            <text:p>-1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45</text:p>
          </table:table-cell>
          <table:table-cell office:value-type="float" office:value="0.1272636" table:style-name="c1">
            <text:p>0.12726</text:p>
          </table:table-cell>
          <table:table-cell office:value-type="string" table:style-name="c1">
            <text:p>2026-03-14 13:45</text:p>
          </table:table-cell>
          <table:table-cell office:value-type="float" office:value="0.12323835000000001" table:style-name="c1">
            <text:p>0.12324</text:p>
          </table:table-cell>
          <table:table-cell office:value-type="float" office:value="-3.356500571765997" table:style-name="c13">
            <text:p>-3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6:45</text:p>
          </table:table-cell>
          <table:table-cell office:value-type="float" office:value="0.13236615" table:style-name="c1">
            <text:p>0.13237</text:p>
          </table:table-cell>
          <table:table-cell office:value-type="string" table:style-name="c1">
            <text:p>2026-03-17 16:45</text:p>
          </table:table-cell>
          <table:table-cell office:value-type="float" office:value="0.1347326" table:style-name="c1">
            <text:p>0.13473</text:p>
          </table:table-cell>
          <table:table-cell office:value-type="float" office:value="1.58433219716676" table:style-name="c14">
            <text:p>+1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2:30</text:p>
          </table:table-cell>
          <table:table-cell office:value-type="float" office:value="0.10885439999999999" table:style-name="c1">
            <text:p>0.10885</text:p>
          </table:table-cell>
          <table:table-cell office:value-type="string" table:style-name="c1">
            <text:p>2026-03-31 12:30</text:p>
          </table:table-cell>
          <table:table-cell office:value-type="float" office:value="0.10964515000000001" table:style-name="c1">
            <text:p>0.10965</text:p>
          </table:table-cell>
          <table:table-cell office:value-type="float" office:value="0.5250769331786476" table:style-name="c14">
            <text:p>+0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0:15</text:p>
          </table:table-cell>
          <table:table-cell office:value-type="float" office:value="0.11075535" table:style-name="c1">
            <text:p>0.11076</text:p>
          </table:table-cell>
          <table:table-cell office:value-type="string" table:style-name="c1">
            <text:p>2026-04-04 20:15</text:p>
          </table:table-cell>
          <table:table-cell office:value-type="float" office:value="0.11004495000000002" table:style-name="c1">
            <text:p>0.11004</text:p>
          </table:table-cell>
          <table:table-cell office:value-type="float" office:value="-0.8400315244816325" table:style-name="c13">
            <text:p>-0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15</text:p>
          </table:table-cell>
          <table:table-cell office:value-type="float" office:value="0.1206603" table:style-name="c1">
            <text:p>0.12066</text:p>
          </table:table-cell>
          <table:table-cell office:value-type="string" table:style-name="c1">
            <text:p>2026-04-17 02:15</text:p>
          </table:table-cell>
          <table:table-cell office:value-type="float" office:value="0.13173410000000002" table:style-name="c1">
            <text:p>0.13173</text:p>
          </table:table-cell>
          <table:table-cell office:value-type="float" office:value="8.959420400993533" table:style-name="c14">
            <text:p>+9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6:00</text:p>
          </table:table-cell>
          <table:table-cell office:value-type="float" office:value="0.12416205" table:style-name="c1">
            <text:p>0.12416</text:p>
          </table:table-cell>
          <table:table-cell office:value-type="string" table:style-name="c1">
            <text:p>2026-04-25 16:00</text:p>
          </table:table-cell>
          <table:table-cell office:value-type="float" office:value="0.12543725" table:style-name="c1">
            <text:p>0.12544</text:p>
          </table:table-cell>
          <table:table-cell office:value-type="float" office:value="0.8250918354279824" table:style-name="c14">
            <text:p>+0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30</text:p>
          </table:table-cell>
          <table:table-cell office:value-type="float" office:value="0.12576285" table:style-name="c1">
            <text:p>0.12576</text:p>
          </table:table-cell>
          <table:table-cell office:value-type="string" table:style-name="c1">
            <text:p>2026-04-27 05:30</text:p>
          </table:table-cell>
          <table:table-cell office:value-type="float" office:value="0.12413790000000001" table:style-name="c1">
            <text:p>0.12414</text:p>
          </table:table-cell>
          <table:table-cell office:value-type="float" office:value="-1.489391868981993" table:style-name="c13">
            <text:p>-1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15</text:p>
          </table:table-cell>
          <table:table-cell office:value-type="float" office:value="0.12576285" table:style-name="c1">
            <text:p>0.12576</text:p>
          </table:table-cell>
          <table:table-cell office:value-type="string" table:style-name="c1">
            <text:p>2026-04-29 16:00</text:p>
          </table:table-cell>
          <table:table-cell office:value-type="float" office:value="0.11844075" table:style-name="c1">
            <text:p>0.11844</text:p>
          </table:table-cell>
          <table:table-cell office:value-type="float" office:value="-6.010410116540776" table:style-name="c13">
            <text:p>-6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00</text:p>
          </table:table-cell>
          <table:table-cell office:value-type="float" office:value="0.12486239999999998" table:style-name="c1">
            <text:p>0.12486</text:p>
          </table:table-cell>
          <table:table-cell office:value-type="string" table:style-name="c1">
            <text:p>2026-05-05 15:00</text:p>
          </table:table-cell>
          <table:table-cell office:value-type="float" office:value="0.12763615" table:style-name="c1">
            <text:p>0.12764</text:p>
          </table:table-cell>
          <table:table-cell office:value-type="float" office:value="2.0171046977713214" table:style-name="c14">
            <text:p>+2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45</text:p>
          </table:table-cell>
          <table:table-cell office:value-type="float" office:value="0.13476734999999998" table:style-name="c1">
            <text:p>0.13477</text:p>
          </table:table-cell>
          <table:table-cell office:value-type="string" table:style-name="c1">
            <text:p>2026-05-07 08:45</text:p>
          </table:table-cell>
          <table:table-cell office:value-type="float" office:value="0.143928" table:style-name="c1">
            <text:p>0.14393</text:p>
          </table:table-cell>
          <table:table-cell office:value-type="float" office:value="6.583892855354079" table:style-name="c14">
            <text:p>+6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00</text:p>
          </table:table-cell>
          <table:table-cell office:value-type="float" office:value="0.13066529999999998" table:style-name="c1">
            <text:p>0.13067</text:p>
          </table:table-cell>
          <table:table-cell office:value-type="string" table:style-name="c1">
            <text:p>2026-05-26 14:00</text:p>
          </table:table-cell>
          <table:table-cell office:value-type="float" office:value="0.13283355" table:style-name="c1">
            <text:p>0.13283</text:p>
          </table:table-cell>
          <table:table-cell office:value-type="float" office:value="1.4561752305700004" table:style-name="c14">
            <text:p>+1.5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0.09874934999999999" table:style-name="c10">
            <text:p>0.098749</text:p>
          </table:table-cell>
          <table:table-cell office:value-type="string" table:style-name="c10">
            <text:p>2026-03-11 15:00</text:p>
          </table:table-cell>
          <table:table-cell office:value-type="float" office:value="0.09755120000000002" table:style-name="c10">
            <text:p>0.097551</text:p>
          </table:table-cell>
          <table:table-cell office:value-type="float" office:value="-1.4107990065757137" table:style-name="c11">
            <text:p>-1.4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0.09914954999999999" table:style-name="c10">
            <text:p>0.09915</text:p>
          </table:table-cell>
          <table:table-cell office:value-type="string" table:style-name="c10">
            <text:p>2026-03-17 03:45</text:p>
          </table:table-cell>
          <table:table-cell office:value-type="float" office:value="0.10004995" table:style-name="c10">
            <text:p>0.10005</text:p>
          </table:table-cell>
          <table:table-cell office:value-type="float" office:value="0.7064077950429626" table:style-name="c12">
            <text:p>+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11:15</text:p>
          </table:table-cell>
          <table:table-cell office:value-type="float" office:value="0.10075034999999999" table:style-name="c10">
            <text:p>0.10075</text:p>
          </table:table-cell>
          <table:table-cell office:value-type="string" table:style-name="c10">
            <text:p>2026-03-18 11:15</text:p>
          </table:table-cell>
          <table:table-cell office:value-type="float" office:value="0.09985005000000001" table:style-name="c10">
            <text:p>0.09985</text:p>
          </table:table-cell>
          <table:table-cell office:value-type="float" office:value="-1.091708614362119" table:style-name="c11">
            <text:p>-1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11:00</text:p>
          </table:table-cell>
          <table:table-cell office:value-type="float" office:value="0.0984492" table:style-name="c10">
            <text:p>0.098449</text:p>
          </table:table-cell>
          <table:table-cell office:value-type="string" table:style-name="c10">
            <text:p>2026-03-21 11:00</text:p>
          </table:table-cell>
          <table:table-cell office:value-type="float" office:value="0.0963518" table:style-name="c10">
            <text:p>0.096352</text:p>
          </table:table-cell>
          <table:table-cell office:value-type="float" office:value="-2.326080098365446" table:style-name="c11">
            <text:p>-2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2:30</text:p>
          </table:table-cell>
          <table:table-cell office:value-type="float" office:value="0.08794395" table:style-name="c10">
            <text:p>0.087944</text:p>
          </table:table-cell>
          <table:table-cell office:value-type="string" table:style-name="c10">
            <text:p>2026-04-17 12:30</text:p>
          </table:table-cell>
          <table:table-cell office:value-type="float" office:value="0.08925535000000001" table:style-name="c10">
            <text:p>0.089255</text:p>
          </table:table-cell>
          <table:table-cell office:value-type="float" office:value="1.2882961879128851" table:style-name="c12">
            <text:p>+1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9 16:00</text:p>
          </table:table-cell>
          <table:table-cell office:value-type="float" office:value="0.09094544999999998" table:style-name="c10">
            <text:p>0.090945</text:p>
          </table:table-cell>
          <table:table-cell office:value-type="string" table:style-name="c10">
            <text:p>2026-04-20 01:00</text:p>
          </table:table-cell>
          <table:table-cell office:value-type="float" office:value="0.0885557" table:style-name="c10">
            <text:p>0.088556</text:p>
          </table:table-cell>
          <table:table-cell office:value-type="float" office:value="-2.8223213413095305" table:style-name="c11">
            <text:p>-2.8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0 13:15</text:p>
          </table:table-cell>
          <table:table-cell office:value-type="float" office:value="0.09174585" table:style-name="c10">
            <text:p>0.091746</text:p>
          </table:table-cell>
          <table:table-cell office:value-type="string" table:style-name="c10">
            <text:p>2026-04-21 13:15</text:p>
          </table:table-cell>
          <table:table-cell office:value-type="float" office:value="0.09315340000000001" table:style-name="c10">
            <text:p>0.093153</text:p>
          </table:table-cell>
          <table:table-cell office:value-type="float" office:value="1.331217001531959" table:style-name="c12">
            <text:p>+1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16:00</text:p>
          </table:table-cell>
          <table:table-cell office:value-type="float" office:value="0.09434714999999999" table:style-name="c10">
            <text:p>0.094347</text:p>
          </table:table-cell>
          <table:table-cell office:value-type="string" table:style-name="c10">
            <text:p>2026-04-22 16:00</text:p>
          </table:table-cell>
          <table:table-cell office:value-type="float" office:value="0.0945527" table:style-name="c10">
            <text:p>0.094553</text:p>
          </table:table-cell>
          <table:table-cell office:value-type="float" office:value="0.017530103135099395" table:style-name="c12">
            <text:p>+0.0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30 18:30</text:p>
          </table:table-cell>
          <table:table-cell office:value-type="float" office:value="0.09674834999999998" table:style-name="c10">
            <text:p>0.096748</text:p>
          </table:table-cell>
          <table:table-cell office:value-type="string" table:style-name="c10">
            <text:p>2026-05-01 18:30</text:p>
          </table:table-cell>
          <table:table-cell office:value-type="float" office:value="0.0945527" table:style-name="c10">
            <text:p>0.094553</text:p>
          </table:table-cell>
          <table:table-cell office:value-type="float" office:value="-2.4648077691247328" table:style-name="c11">
            <text:p>-2.5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8:15</text:p>
          </table:table-cell>
          <table:table-cell office:value-type="float" office:value="0.1014507" table:style-name="c10">
            <text:p>0.10145</text:p>
          </table:table-cell>
          <table:table-cell office:value-type="string" table:style-name="c10">
            <text:p>2026-05-09 18:15</text:p>
          </table:table-cell>
          <table:table-cell office:value-type="float" office:value="0.10124935" table:style-name="c10">
            <text:p>0.10125</text:p>
          </table:table-cell>
          <table:table-cell office:value-type="float" office:value="-0.3979740412338284" table:style-name="c11">
            <text:p>-0.4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7:30</text:p>
          </table:table-cell>
          <table:table-cell office:value-type="float" office:value="0.10275134999999999" table:style-name="c10">
            <text:p>0.10275</text:p>
          </table:table-cell>
          <table:table-cell office:value-type="string" table:style-name="c10">
            <text:p>2026-05-11 07:30</text:p>
          </table:table-cell>
          <table:table-cell office:value-type="float" office:value="0.10384805000000001" table:style-name="c10">
            <text:p>0.10385</text:p>
          </table:table-cell>
          <table:table-cell office:value-type="float" office:value="0.8653003080251631" table:style-name="c12">
            <text:p>+0.9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45</text:p>
          </table:table-cell>
          <table:table-cell office:value-type="float" office:value="0.09130562999999998" table:style-name="c10">
            <text:p>0.091306</text:p>
          </table:table-cell>
          <table:table-cell office:value-type="string" table:style-name="c10">
            <text:p>2026-05-22 17:45</text:p>
          </table:table-cell>
          <table:table-cell office:value-type="float" office:value="0.09213391" table:style-name="c10">
            <text:p>0.092134</text:p>
          </table:table-cell>
          <table:table-cell office:value-type="float" office:value="0.705437675540943" table:style-name="c12">
            <text:p>+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2:15</text:p>
          </table:table-cell>
          <table:table-cell office:value-type="float" office:value="0.09119557499999999" table:style-name="c10">
            <text:p>0.091196</text:p>
          </table:table-cell>
          <table:table-cell office:value-type="string" table:style-name="c10">
            <text:p>2026-06-01 02:15</text:p>
          </table:table-cell>
          <table:table-cell office:value-type="float" office:value="0.09257369" table:style-name="c10">
            <text:p>0.092574</text:p>
          </table:table-cell>
          <table:table-cell office:value-type="float" office:value="1.3082435125717717" table:style-name="c12">
            <text:p>+1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5:45</text:p>
          </table:table-cell>
          <table:table-cell office:value-type="float" office:value="0.09325660499999999" table:style-name="c10">
            <text:p>0.093257</text:p>
          </table:table-cell>
          <table:table-cell office:value-type="string" table:style-name="c10">
            <text:p>2026-06-02 14:00</text:p>
          </table:table-cell>
          <table:table-cell office:value-type="float" office:value="0.09180407500000001" table:style-name="c10">
            <text:p>0.091804</text:p>
          </table:table-cell>
          <table:table-cell office:value-type="float" office:value="-1.7543490307469045" table:style-name="c11">
            <text:p>-1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3:15</text:p>
          </table:table-cell>
          <table:table-cell office:value-type="float" office:value="5.86293e-06" table:style-name="c1">
            <text:p>0.0000058629</text:p>
          </table:table-cell>
          <table:table-cell office:value-type="string" table:style-name="c1">
            <text:p>2026-03-11 13:15</text:p>
          </table:table-cell>
          <table:table-cell office:value-type="float" office:value="5.807095e-06" table:style-name="c1">
            <text:p>0.0000058071</text:p>
          </table:table-cell>
          <table:table-cell office:value-type="float" office:value="-1.1503358031734967" table:style-name="c13">
            <text:p>-1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7:30</text:p>
          </table:table-cell>
          <table:table-cell office:value-type="float" office:value="5.772884999999999e-06" table:style-name="c1">
            <text:p>0.0000057729</text:p>
          </table:table-cell>
          <table:table-cell office:value-type="string" table:style-name="c1">
            <text:p>2026-03-13 07:30</text:p>
          </table:table-cell>
          <table:table-cell office:value-type="float" office:value="5.97701e-06" table:style-name="c1">
            <text:p>0.000005977</text:p>
          </table:table-cell>
          <table:table-cell office:value-type="float" office:value="3.3289586924042602" table:style-name="c14">
            <text:p>+3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6.08304e-06" table:style-name="c1">
            <text:p>0.000006083</text:p>
          </table:table-cell>
          <table:table-cell office:value-type="string" table:style-name="c1">
            <text:p>2026-03-17 03:45</text:p>
          </table:table-cell>
          <table:table-cell office:value-type="float" office:value="6.11694e-06" table:style-name="c1">
            <text:p>0.0000061169</text:p>
          </table:table-cell>
          <table:table-cell office:value-type="float" office:value="0.35627312889607854" table:style-name="c14">
            <text:p>+0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2:15</text:p>
          </table:table-cell>
          <table:table-cell office:value-type="float" office:value="6.153075e-06" table:style-name="c1">
            <text:p>0.0000061531</text:p>
          </table:table-cell>
          <table:table-cell office:value-type="string" table:style-name="c1">
            <text:p>2026-03-18 13:00</text:p>
          </table:table-cell>
          <table:table-cell office:value-type="float" office:value="5.827085e-06" table:style-name="c1">
            <text:p>0.0000058271</text:p>
          </table:table-cell>
          <table:table-cell office:value-type="float" office:value="-5.487310700990955" table:style-name="c13">
            <text:p>-5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0 11:15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3-21 11:15</text:p>
          </table:table-cell>
          <table:table-cell office:value-type="float" office:value="5.997e-06" table:style-name="c1">
            <text:p>0.000005997</text:p>
          </table:table-cell>
          <table:table-cell office:value-type="float" office:value="-1.123620057739716" table:style-name="c13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7:15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4-01 17:15</text:p>
          </table:table-cell>
          <table:table-cell office:value-type="float" office:value="6.09695e-06" table:style-name="c1">
            <text:p>0.000006097</text:p>
          </table:table-cell>
          <table:table-cell office:value-type="float" office:value="1.362022271364327" table:style-name="c14">
            <text:p>+1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01:00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02 06:00</text:p>
          </table:table-cell>
          <table:table-cell office:value-type="float" office:value="5.827085e-06" table:style-name="c1">
            <text:p>0.0000058271</text:p>
          </table:table-cell>
          <table:table-cell office:value-type="float" office:value="-3.925117489437091" table:style-name="c13">
            <text:p>-3.9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4-15 11:00</text:p>
          </table:table-cell>
          <table:table-cell office:value-type="float" office:value="5.837080000000001e-06" table:style-name="c1">
            <text:p>0.0000058371</text:p>
          </table:table-cell>
          <table:table-cell office:value-type="float" office:value="-2.958326218890528" table:style-name="c13">
            <text:p>-3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6.153075e-06" table:style-name="c1">
            <text:p>0.0000061531</text:p>
          </table:table-cell>
          <table:table-cell office:value-type="string" table:style-name="c1">
            <text:p>2026-04-17 16:00</text:p>
          </table:table-cell>
          <table:table-cell office:value-type="float" office:value="6.386805e-06" table:style-name="c1">
            <text:p>0.0000063868</text:p>
          </table:table-cell>
          <table:table-cell office:value-type="float" office:value="3.591095132189981" table:style-name="c14">
            <text:p>+3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6.22311e-06" table:style-name="c1">
            <text:p>0.0000062231</text:p>
          </table:table-cell>
          <table:table-cell office:value-type="string" table:style-name="c1">
            <text:p>2026-04-23 05:30</text:p>
          </table:table-cell>
          <table:table-cell office:value-type="float" office:value="6.07696e-06" table:style-name="c1">
            <text:p>0.000006077</text:p>
          </table:table-cell>
          <table:table-cell office:value-type="float" office:value="-2.5437095445846047" table:style-name="c13">
            <text:p>-2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6:45</text:p>
          </table:table-cell>
          <table:table-cell office:value-type="float" office:value="6.113054999999999e-06" table:style-name="c1">
            <text:p>0.0000061131</text:p>
          </table:table-cell>
          <table:table-cell office:value-type="string" table:style-name="c1">
            <text:p>2026-04-24 06:45</text:p>
          </table:table-cell>
          <table:table-cell office:value-type="float" office:value="6.13693e-06" table:style-name="c1">
            <text:p>0.0000061369</text:p>
          </table:table-cell>
          <table:table-cell office:value-type="float" office:value="0.1898768607513146" table:style-name="c14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8:00</text:p>
          </table:table-cell>
          <table:table-cell office:value-type="float" office:value="6.24312e-06" table:style-name="c1">
            <text:p>0.0000062431</text:p>
          </table:table-cell>
          <table:table-cell office:value-type="string" table:style-name="c1">
            <text:p>2026-04-30 08:00</text:p>
          </table:table-cell>
          <table:table-cell office:value-type="float" office:value="6.266865e-06" table:style-name="c1">
            <text:p>0.0000062669</text:p>
          </table:table-cell>
          <table:table-cell office:value-type="float" office:value="0.1796783798005075" table:style-name="c14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22:00</text:p>
          </table:table-cell>
          <table:table-cell office:value-type="float" office:value="6.293145e-06" table:style-name="c1">
            <text:p>0.0000062931</text:p>
          </table:table-cell>
          <table:table-cell office:value-type="string" table:style-name="c1">
            <text:p>2026-05-03 03:00</text:p>
          </table:table-cell>
          <table:table-cell office:value-type="float" office:value="6.206895e-06" table:style-name="c1">
            <text:p>0.0000062069</text:p>
          </table:table-cell>
          <table:table-cell office:value-type="float" office:value="-1.5676991886409697" table:style-name="c13">
            <text:p>-1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00</text:p>
          </table:table-cell>
          <table:table-cell office:value-type="float" office:value="6.4832399999999994e-06" table:style-name="c1">
            <text:p>0.0000064832</text:p>
          </table:table-cell>
          <table:table-cell office:value-type="string" table:style-name="c1">
            <text:p>2026-05-07 09:00</text:p>
          </table:table-cell>
          <table:table-cell office:value-type="float" office:value="6.37681e-06" table:style-name="c1">
            <text:p>0.0000063768</text:p>
          </table:table-cell>
          <table:table-cell office:value-type="float" office:value="-1.8382358695651968" table:style-name="c13">
            <text:p>-1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2:30</text:p>
          </table:table-cell>
          <table:table-cell office:value-type="float" office:value="6.393195e-06" table:style-name="c1">
            <text:p>0.0000063932</text:p>
          </table:table-cell>
          <table:table-cell office:value-type="string" table:style-name="c1">
            <text:p>2026-05-11 02:30</text:p>
          </table:table-cell>
          <table:table-cell office:value-type="float" office:value="6.516740000000001e-06" table:style-name="c1">
            <text:p>0.0000065167</text:p>
          </table:table-cell>
          <table:table-cell office:value-type="float" office:value="1.7286823996452538" table:style-name="c14">
            <text:p>+1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30</text:p>
          </table:table-cell>
          <table:table-cell office:value-type="float" office:value="5.842919999999999e-06" table:style-name="c1">
            <text:p>0.0000058429</text:p>
          </table:table-cell>
          <table:table-cell office:value-type="string" table:style-name="c1">
            <text:p>2026-05-22 17:30</text:p>
          </table:table-cell>
          <table:table-cell office:value-type="float" office:value="5.847075e-06" table:style-name="c1">
            <text:p>0.0000058471</text:p>
          </table:table-cell>
          <table:table-cell office:value-type="float" office:value="-0.128930447875375" table:style-name="c13">
            <text:p>-0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88.14405" table:style-name="c10">
            <text:p>88.144</text:p>
          </table:table-cell>
          <table:table-cell office:value-type="string" table:style-name="c10">
            <text:p>2026-03-11 15:00</text:p>
          </table:table-cell>
          <table:table-cell office:value-type="float" office:value="86.49673000000001" table:style-name="c10">
            <text:p>86.497</text:p>
          </table:table-cell>
          <table:table-cell office:value-type="float" office:value="-2.0650593696000863" table:style-name="c11">
            <text:p>-2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18:00</text:p>
          </table:table-cell>
          <table:table-cell office:value-type="float" office:value="88.48422" table:style-name="c10">
            <text:p>88.484</text:p>
          </table:table-cell>
          <table:table-cell office:value-type="string" table:style-name="c10">
            <text:p>2026-03-16 18:00</text:p>
          </table:table-cell>
          <table:table-cell office:value-type="float" office:value="94.03296" table:style-name="c10">
            <text:p>94.033</text:p>
          </table:table-cell>
          <table:table-cell office:value-type="float" office:value="6.058445351001573" table:style-name="c12">
            <text:p>+6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1:45</text:p>
          </table:table-cell>
          <table:table-cell office:value-type="float" office:value="83.851905" table:style-name="c10">
            <text:p>83.852</text:p>
          </table:table-cell>
          <table:table-cell office:value-type="string" table:style-name="c10">
            <text:p>2026-03-31 10:00</text:p>
          </table:table-cell>
          <table:table-cell office:value-type="float" office:value="80.509725" table:style-name="c10">
            <text:p>80.51</text:p>
          </table:table-cell>
          <table:table-cell office:value-type="float" office:value="-4.177745204804828" table:style-name="c11">
            <text:p>-4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5:15</text:p>
          </table:table-cell>
          <table:table-cell office:value-type="float" office:value="81.190575" table:style-name="c10">
            <text:p>81.191</text:p>
          </table:table-cell>
          <table:table-cell office:value-type="string" table:style-name="c10">
            <text:p>2026-04-05 12:00</text:p>
          </table:table-cell>
          <table:table-cell office:value-type="float" office:value="79.870045" table:style-name="c10">
            <text:p>79.87</text:p>
          </table:table-cell>
          <table:table-cell office:value-type="float" office:value="-1.8231059700648755" table:style-name="c11">
            <text:p>-1.8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83.411685" table:style-name="c10">
            <text:p>83.412</text:p>
          </table:table-cell>
          <table:table-cell office:value-type="string" table:style-name="c10">
            <text:p>2026-04-10 15:45</text:p>
          </table:table-cell>
          <table:table-cell office:value-type="float" office:value="84.63766000000001" table:style-name="c10">
            <text:p>84.638</text:p>
          </table:table-cell>
          <table:table-cell office:value-type="float" office:value="1.2669499694917041" table:style-name="c12">
            <text:p>+1.3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15</text:p>
          </table:table-cell>
          <table:table-cell office:value-type="float" office:value="86.173065" table:style-name="c10">
            <text:p>86.173</text:p>
          </table:table-cell>
          <table:table-cell office:value-type="string" table:style-name="c10">
            <text:p>2026-04-17 15:15</text:p>
          </table:table-cell>
          <table:table-cell office:value-type="float" office:value="89.82506500000001" table:style-name="c10">
            <text:p>89.825</text:p>
          </table:table-cell>
          <table:table-cell office:value-type="float" office:value="4.029611451170978" table:style-name="c12">
            <text:p>+4.0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00</text:p>
          </table:table-cell>
          <table:table-cell office:value-type="float" office:value="84.81238499999999" table:style-name="c10">
            <text:p>84.812</text:p>
          </table:table-cell>
          <table:table-cell office:value-type="string" table:style-name="c10">
            <text:p>2026-05-05 02:00</text:p>
          </table:table-cell>
          <table:table-cell office:value-type="float" office:value="84.367795" table:style-name="c10">
            <text:p>84.368</text:p>
          </table:table-cell>
          <table:table-cell office:value-type="float" office:value="-0.7230562166185894" table:style-name="c11">
            <text:p>-0.7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3:30</text:p>
          </table:table-cell>
          <table:table-cell office:value-type="float" office:value="87.26361" table:style-name="c10">
            <text:p>87.264</text:p>
          </table:table-cell>
          <table:table-cell office:value-type="string" table:style-name="c10">
            <text:p>2026-05-07 03:30</text:p>
          </table:table-cell>
          <table:table-cell office:value-type="float" office:value="87.846055" table:style-name="c10">
            <text:p>87.846</text:p>
          </table:table-cell>
          <table:table-cell office:value-type="float" office:value="0.4662203821902633" table:style-name="c12">
            <text:p>+0.5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02:00</text:p>
          </table:table-cell>
          <table:table-cell office:value-type="float" office:value="93.56675999999999" table:style-name="c10">
            <text:p>93.567</text:p>
          </table:table-cell>
          <table:table-cell office:value-type="string" table:style-name="c10">
            <text:p>2026-05-10 02:00</text:p>
          </table:table-cell>
          <table:table-cell office:value-type="float" office:value="92.91352" table:style-name="c10">
            <text:p>92.914</text:p>
          </table:table-cell>
          <table:table-cell office:value-type="float" office:value="-0.8966583073732437" table:style-name="c11">
            <text:p>-0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5:30</text:p>
          </table:table-cell>
          <table:table-cell office:value-type="float" office:value="96.26811" table:style-name="c10">
            <text:p>96.268</text:p>
          </table:table-cell>
          <table:table-cell office:value-type="string" table:style-name="c10">
            <text:p>2026-05-12 15:30</text:p>
          </table:table-cell>
          <table:table-cell office:value-type="float" office:value="93.79308" table:style-name="c10">
            <text:p>93.793</text:p>
          </table:table-cell>
          <table:table-cell office:value-type="float" office:value="-2.7657366150846796" table:style-name="c11">
            <text:p>-2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1.0041018" table:style-name="c1">
            <text:p>1.0041</text:p>
          </table:table-cell>
          <table:table-cell office:value-type="string" table:style-name="c1">
            <text:p>2026-03-11 15:00</text:p>
          </table:table-cell>
          <table:table-cell office:value-type="float" office:value="0.9746124500000001" table:style-name="c1">
            <text:p>0.97461</text:p>
          </table:table-cell>
          <table:table-cell office:value-type="float" office:value="-3.1309176308168984" table:style-name="c13">
            <text:p>-3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7:45</text:p>
          </table:table-cell>
          <table:table-cell office:value-type="float" office:value="0.97738845" table:style-name="c1">
            <text:p>0.97739</text:p>
          </table:table-cell>
          <table:table-cell office:value-type="string" table:style-name="c1">
            <text:p>2026-03-13 07:45</text:p>
          </table:table-cell>
          <table:table-cell office:value-type="float" office:value="1.0282856" table:style-name="c1">
            <text:p>1.0283</text:p>
          </table:table-cell>
          <table:table-cell office:value-type="float" office:value="4.997154108543023" table:style-name="c14">
            <text:p>+5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1.0401198" table:style-name="c1">
            <text:p>1.0401</text:p>
          </table:table-cell>
          <table:table-cell office:value-type="string" table:style-name="c1">
            <text:p>2026-03-17 03:45</text:p>
          </table:table-cell>
          <table:table-cell office:value-type="float" office:value="1.03638155" table:style-name="c1">
            <text:p>1.0364</text:p>
          </table:table-cell>
          <table:table-cell office:value-type="float" office:value="-0.5585872625874511" table:style-name="c13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7:15</text:p>
          </table:table-cell>
          <table:table-cell office:value-type="float" office:value="0.95297625" table:style-name="c1">
            <text:p>0.95298</text:p>
          </table:table-cell>
          <table:table-cell office:value-type="string" table:style-name="c1">
            <text:p>2026-03-25 07:15</text:p>
          </table:table-cell>
          <table:table-cell office:value-type="float" office:value="0.9598198500000001" table:style-name="c1">
            <text:p>0.95982</text:p>
          </table:table-cell>
          <table:table-cell office:value-type="float" office:value="0.5167935842944837" table:style-name="c14">
            <text:p>+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1:45</text:p>
          </table:table-cell>
          <table:table-cell office:value-type="float" office:value="0.9704849999999999" table:style-name="c1">
            <text:p>0.97048</text:p>
          </table:table-cell>
          <table:table-cell office:value-type="string" table:style-name="c1">
            <text:p>2026-03-26 11:00</text:p>
          </table:table-cell>
          <table:table-cell office:value-type="float" office:value="0.9248373500000001" table:style-name="c1">
            <text:p>0.92484</text:p>
          </table:table-cell>
          <table:table-cell office:value-type="float" office:value="-4.894089023802506" table:style-name="c13">
            <text:p>-4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0.90045" table:style-name="c1">
            <text:p>0.90045</text:p>
          </table:table-cell>
          <table:table-cell office:value-type="string" table:style-name="c1">
            <text:p>2026-04-07 09:30</text:p>
          </table:table-cell>
          <table:table-cell office:value-type="float" office:value="0.8825585" table:style-name="c1">
            <text:p>0.88256</text:p>
          </table:table-cell>
          <table:table-cell office:value-type="float" office:value="-2.182879053973008" table:style-name="c13">
            <text:p>-2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2:30</text:p>
          </table:table-cell>
          <table:table-cell office:value-type="float" office:value="0.95597775" table:style-name="c1">
            <text:p>0.95598</text:p>
          </table:table-cell>
          <table:table-cell office:value-type="string" table:style-name="c1">
            <text:p>2026-04-10 22:30</text:p>
          </table:table-cell>
          <table:table-cell office:value-type="float" office:value="0.9465265" table:style-name="c1">
            <text:p>0.94653</text:p>
          </table:table-cell>
          <table:table-cell office:value-type="float" office:value="-1.186571180500784" table:style-name="c13">
            <text:p>-1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0.9575785499999999" table:style-name="c1">
            <text:p>0.95758</text:p>
          </table:table-cell>
          <table:table-cell office:value-type="string" table:style-name="c1">
            <text:p>2026-04-14 22:30</text:p>
          </table:table-cell>
          <table:table-cell office:value-type="float" office:value="0.9283356" table:style-name="c1">
            <text:p>0.92834</text:p>
          </table:table-cell>
          <table:table-cell office:value-type="float" office:value="-3.24763883489243" table:style-name="c13">
            <text:p>-3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0:30</text:p>
          </table:table-cell>
          <table:table-cell office:value-type="float" office:value="0.93776865" table:style-name="c1">
            <text:p>0.93777</text:p>
          </table:table-cell>
          <table:table-cell office:value-type="string" table:style-name="c1">
            <text:p>2026-04-16 00:30</text:p>
          </table:table-cell>
          <table:table-cell office:value-type="float" office:value="0.955522" table:style-name="c1">
            <text:p>0.95552</text:p>
          </table:table-cell>
          <table:table-cell office:value-type="float" office:value="1.689463762944099" table:style-name="c14">
            <text:p>+1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45</text:p>
          </table:table-cell>
          <table:table-cell office:value-type="float" office:value="0.9721858499999999" table:style-name="c1">
            <text:p>0.97219</text:p>
          </table:table-cell>
          <table:table-cell office:value-type="string" table:style-name="c1">
            <text:p>2026-04-17 02:45</text:p>
          </table:table-cell>
          <table:table-cell office:value-type="float" office:value="0.9872061500000001" table:style-name="c1">
            <text:p>0.98721</text:p>
          </table:table-cell>
          <table:table-cell office:value-type="float" office:value="1.342014482740117" table:style-name="c14">
            <text:p>+1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0.9308652" table:style-name="c1">
            <text:p>0.93087</text:p>
          </table:table-cell>
          <table:table-cell office:value-type="string" table:style-name="c1">
            <text:p>2026-05-05 02:00</text:p>
          </table:table-cell>
          <table:table-cell office:value-type="float" office:value="0.9335330000000001" table:style-name="c1">
            <text:p>0.93353</text:p>
          </table:table-cell>
          <table:table-cell office:value-type="float" office:value="0.0861206899774869" table:style-name="c14">
            <text:p>+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0:45</text:p>
          </table:table-cell>
          <table:table-cell office:value-type="float" office:value="1.06703325" table:style-name="c1">
            <text:p>1.067</text:p>
          </table:table-cell>
          <table:table-cell office:value-type="string" table:style-name="c1">
            <text:p>2026-05-10 00:45</text:p>
          </table:table-cell>
          <table:table-cell office:value-type="float" office:value="1.08535705" table:style-name="c1">
            <text:p>1.0854</text:p>
          </table:table-cell>
          <table:table-cell office:value-type="float" office:value="1.513933259066702" table:style-name="c14">
            <text:p>+1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7:30</text:p>
          </table:table-cell>
          <table:table-cell office:value-type="float" office:value="1.09064505" table:style-name="c1">
            <text:p>1.0906</text:p>
          </table:table-cell>
          <table:table-cell office:value-type="string" table:style-name="c1">
            <text:p>2026-05-11 07:30</text:p>
          </table:table-cell>
          <table:table-cell office:value-type="float" office:value="1.2567713" table:style-name="c1">
            <text:p>1.2568</text:p>
          </table:table-cell>
          <table:table-cell office:value-type="float" office:value="15.00157766005541" table:style-name="c14">
            <text:p>+15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8 13:00</text:p>
          </table:table-cell>
          <table:table-cell office:value-type="float" office:value="1.3536765" table:style-name="c10">
            <text:p>1.3537</text:p>
          </table:table-cell>
          <table:table-cell office:value-type="string" table:style-name="c10">
            <text:p>2026-03-09 02:00</text:p>
          </table:table-cell>
          <table:table-cell office:value-type="float" office:value="1.3033480000000002" table:style-name="c10">
            <text:p>1.3033</text:p>
          </table:table-cell>
          <table:table-cell office:value-type="float" office:value="-3.910379817629972" table:style-name="c11">
            <text:p>-3.9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2 01:15</text:p>
          </table:table-cell>
          <table:table-cell office:value-type="float" office:value="1.2696344999999998" table:style-name="c10">
            <text:p>1.2696</text:p>
          </table:table-cell>
          <table:table-cell office:value-type="string" table:style-name="c10">
            <text:p>2026-03-23 00:00</text:p>
          </table:table-cell>
          <table:table-cell office:value-type="float" office:value="1.2493750000000001" table:style-name="c10">
            <text:p>1.2494</text:p>
          </table:table-cell>
          <table:table-cell office:value-type="float" office:value="-1.7924056588726645" table:style-name="c11">
            <text:p>-1.8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07:30</text:p>
          </table:table-cell>
          <table:table-cell office:value-type="float" office:value="1.3196595" table:style-name="c10">
            <text:p>1.3197</text:p>
          </table:table-cell>
          <table:table-cell office:value-type="string" table:style-name="c10">
            <text:p>2026-04-12 07:30</text:p>
          </table:table-cell>
          <table:table-cell office:value-type="float" office:value="1.413293" table:style-name="c10">
            <text:p>1.4133</text:p>
          </table:table-cell>
          <table:table-cell office:value-type="float" office:value="6.881193769529181" table:style-name="c12">
            <text:p>+6.9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2 16:15</text:p>
          </table:table-cell>
          <table:table-cell office:value-type="float" office:value="1.4677335" table:style-name="c10">
            <text:p>1.4677</text:p>
          </table:table-cell>
          <table:table-cell office:value-type="string" table:style-name="c10">
            <text:p>2026-04-13 16:15</text:p>
          </table:table-cell>
          <table:table-cell office:value-type="float" office:value="1.425287" table:style-name="c10">
            <text:p>1.4253</text:p>
          </table:table-cell>
          <table:table-cell office:value-type="float" office:value="-3.086094901628922" table:style-name="c11">
            <text:p>-3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0:15</text:p>
          </table:table-cell>
          <table:table-cell office:value-type="float" office:value="1.356678" table:style-name="c10">
            <text:p>1.3567</text:p>
          </table:table-cell>
          <table:table-cell office:value-type="string" table:style-name="c10">
            <text:p>2026-04-22 00:15</text:p>
          </table:table-cell>
          <table:table-cell office:value-type="float" office:value="1.3623185" table:style-name="c10">
            <text:p>1.3623</text:p>
          </table:table-cell>
          <table:table-cell office:value-type="float" office:value="0.21502709696037403" table:style-name="c12">
            <text:p>+0.2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00</text:p>
          </table:table-cell>
          <table:table-cell office:value-type="float" office:value="1.4537265" table:style-name="c10">
            <text:p>1.4537</text:p>
          </table:table-cell>
          <table:table-cell office:value-type="string" table:style-name="c10">
            <text:p>2026-05-05 15:00</text:p>
          </table:table-cell>
          <table:table-cell office:value-type="float" office:value="1.7861065" table:style-name="c10">
            <text:p>1.7861</text:p>
          </table:table-cell>
          <table:table-cell office:value-type="float" office:value="22.618393013163086" table:style-name="c12">
            <text:p>+22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04:15</text:p>
          </table:table-cell>
          <table:table-cell office:value-type="float" office:value="2.0460225" table:style-name="c10">
            <text:p>2.046</text:p>
          </table:table-cell>
          <table:table-cell office:value-type="string" table:style-name="c10">
            <text:p>2026-05-20 04:15</text:p>
          </table:table-cell>
          <table:table-cell office:value-type="float" office:value="1.935032" table:style-name="c10">
            <text:p>1.935</text:p>
          </table:table-cell>
          <table:table-cell office:value-type="float" office:value="-5.613751997741945" table:style-name="c11">
            <text:p>-5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0:45</text:p>
          </table:table-cell>
          <table:table-cell office:value-type="float" office:value="2.0860425" table:style-name="c10">
            <text:p>2.086</text:p>
          </table:table-cell>
          <table:table-cell office:value-type="string" table:style-name="c10">
            <text:p>2026-05-22 00:45</text:p>
          </table:table-cell>
          <table:table-cell office:value-type="float" office:value="2.0559715" table:style-name="c10">
            <text:p>2.056</text:p>
          </table:table-cell>
          <table:table-cell office:value-type="float" office:value="-1.638551804601307" table:style-name="c11">
            <text:p>-1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0:45</text:p>
          </table:table-cell>
          <table:table-cell office:value-type="float" office:value="1.850925" table:style-name="c10">
            <text:p>1.8509</text:p>
          </table:table-cell>
          <table:table-cell office:value-type="string" table:style-name="c10">
            <text:p>2026-06-01 00:45</text:p>
          </table:table-cell>
          <table:table-cell office:value-type="float" office:value="1.925037" table:style-name="c10">
            <text:p>1.925</text:p>
          </table:table-cell>
          <table:table-cell office:value-type="float" office:value="3.7961479280359978" table:style-name="c12">
            <text:p>+3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03:30</text:p>
          </table:table-cell>
          <table:table-cell office:value-type="float" office:value="0.29104545" table:style-name="c1">
            <text:p>0.29105</text:p>
          </table:table-cell>
          <table:table-cell office:value-type="string" table:style-name="c1">
            <text:p>2026-03-09 21:00</text:p>
          </table:table-cell>
          <table:table-cell office:value-type="float" office:value="0.28585699999999997" table:style-name="c1">
            <text:p>0.28586</text:p>
          </table:table-cell>
          <table:table-cell office:value-type="float" office:value="-1.9790304720448404" table:style-name="c13">
            <text:p>-2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0:30</text:p>
          </table:table-cell>
          <table:table-cell office:value-type="float" office:value="0.30885434999999994" table:style-name="c1">
            <text:p>0.30885</text:p>
          </table:table-cell>
          <table:table-cell office:value-type="string" table:style-name="c1">
            <text:p>2026-03-19 00:30</text:p>
          </table:table-cell>
          <table:table-cell office:value-type="float" office:value="0.30404790000000004" table:style-name="c1">
            <text:p>0.30405</text:p>
          </table:table-cell>
          <table:table-cell office:value-type="float" office:value="-1.7530080933294" table:style-name="c13">
            <text:p>-1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04:30</text:p>
          </table:table-cell>
          <table:table-cell office:value-type="float" office:value="0.3097548" table:style-name="c1">
            <text:p>0.30975</text:p>
          </table:table-cell>
          <table:table-cell office:value-type="string" table:style-name="c1">
            <text:p>2026-03-22 04:30</text:p>
          </table:table-cell>
          <table:table-cell office:value-type="float" office:value="0.30814585000000005" table:style-name="c1">
            <text:p>0.30815</text:p>
          </table:table-cell>
          <table:table-cell office:value-type="float" office:value="-0.7182886444858871" table:style-name="c13">
            <text:p>-0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11:30</text:p>
          </table:table-cell>
          <table:table-cell office:value-type="float" office:value="0.3099549" table:style-name="c1">
            <text:p>0.30995</text:p>
          </table:table-cell>
          <table:table-cell office:value-type="string" table:style-name="c1">
            <text:p>2026-03-23 12:00</text:p>
          </table:table-cell>
          <table:table-cell office:value-type="float" office:value="0.30814585000000005" table:style-name="c1">
            <text:p>0.30815</text:p>
          </table:table-cell>
          <table:table-cell office:value-type="float" office:value="-0.7823827125010396" table:style-name="c13">
            <text:p>-0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7 04:45</text:p>
          </table:table-cell>
          <table:table-cell office:value-type="float" office:value="0.31365675" table:style-name="c1">
            <text:p>0.31366</text:p>
          </table:table-cell>
          <table:table-cell office:value-type="string" table:style-name="c1">
            <text:p>2026-03-27 19:00</text:p>
          </table:table-cell>
          <table:table-cell office:value-type="float" office:value="0.30934525" table:style-name="c1">
            <text:p>0.30935</text:p>
          </table:table-cell>
          <table:table-cell office:value-type="float" office:value="-1.5717440019224593" table:style-name="c13">
            <text:p>-1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15</text:p>
          </table:table-cell>
          <table:table-cell office:value-type="float" office:value="0.32646315" table:style-name="c1">
            <text:p>0.32646</text:p>
          </table:table-cell>
          <table:table-cell office:value-type="string" table:style-name="c1">
            <text:p>2026-04-16 12:15</text:p>
          </table:table-cell>
          <table:table-cell office:value-type="float" office:value="0.32733625000000005" table:style-name="c1">
            <text:p>0.32734</text:p>
          </table:table-cell>
          <table:table-cell office:value-type="float" office:value="0.06700751256307758" table:style-name="c14">
            <text:p>+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20:45</text:p>
          </table:table-cell>
          <table:table-cell office:value-type="float" office:value="0.3343671" table:style-name="c1">
            <text:p>0.33437</text:p>
          </table:table-cell>
          <table:table-cell office:value-type="string" table:style-name="c1">
            <text:p>2026-04-22 20:45</text:p>
          </table:table-cell>
          <table:table-cell office:value-type="float" office:value="0.32893545" table:style-name="c1">
            <text:p>0.32894</text:p>
          </table:table-cell>
          <table:table-cell office:value-type="float" office:value="-1.8211097815993171" table:style-name="c13">
            <text:p>-1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5:30</text:p>
          </table:table-cell>
          <table:table-cell office:value-type="float" office:value="0.33726855" table:style-name="c1">
            <text:p>0.33727</text:p>
          </table:table-cell>
          <table:table-cell office:value-type="string" table:style-name="c1">
            <text:p>2026-05-04 05:30</text:p>
          </table:table-cell>
          <table:table-cell office:value-type="float" office:value="0.33853065000000004" table:style-name="c1">
            <text:p>0.33853</text:p>
          </table:table-cell>
          <table:table-cell office:value-type="float" office:value="0.17356413180240615" table:style-name="c14">
            <text:p>+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8 11:15</text:p>
          </table:table-cell>
          <table:table-cell office:value-type="float" office:value="0.35667825" table:style-name="c1">
            <text:p>0.35668</text:p>
          </table:table-cell>
          <table:table-cell office:value-type="string" table:style-name="c1">
            <text:p>2026-05-19 11:15</text:p>
          </table:table-cell>
          <table:table-cell office:value-type="float" office:value="0.35532225" table:style-name="c1">
            <text:p>0.35532</text:p>
          </table:table-cell>
          <table:table-cell office:value-type="float" office:value="-0.579314600133296" table:style-name="c13">
            <text:p>-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2:45</text:p>
          </table:table-cell>
          <table:table-cell office:value-type="float" office:value="0.36948464999999997" table:style-name="c1">
            <text:p>0.36948</text:p>
          </table:table-cell>
          <table:table-cell office:value-type="string" table:style-name="c1">
            <text:p>2026-05-26 12:45</text:p>
          </table:table-cell>
          <table:table-cell office:value-type="float" office:value="0.37621180000000004" table:style-name="c1">
            <text:p>0.37621</text:p>
          </table:table-cell>
          <table:table-cell office:value-type="float" office:value="1.6171450185548997" table:style-name="c14">
            <text:p>+1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7 12:00</text:p>
          </table:table-cell>
          <table:table-cell office:value-type="float" office:value="0.37428704999999995" table:style-name="c1">
            <text:p>0.37429</text:p>
          </table:table-cell>
          <table:table-cell office:value-type="string" table:style-name="c1">
            <text:p>2026-05-27 23:00</text:p>
          </table:table-cell>
          <table:table-cell office:value-type="float" office:value="0.3684157" table:style-name="c1">
            <text:p>0.36842</text:p>
          </table:table-cell>
          <table:table-cell office:value-type="float" office:value="-1.765439916849898" table:style-name="c13">
            <text:p>-1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1:15</text:p>
          </table:table-cell>
          <table:table-cell office:value-type="float" office:value="4.016007" table:style-name="c10">
            <text:p>4.016</text:p>
          </table:table-cell>
          <table:table-cell office:value-type="string" table:style-name="c10">
            <text:p>2026-03-06 01:15</text:p>
          </table:table-cell>
          <table:table-cell office:value-type="float" office:value="3.9630175" table:style-name="c10">
            <text:p>3.963</text:p>
          </table:table-cell>
          <table:table-cell office:value-type="float" office:value="-1.5167197662379506" table:style-name="c11">
            <text:p>-1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3.9729855" table:style-name="c10">
            <text:p>3.973</text:p>
          </table:table-cell>
          <table:table-cell office:value-type="string" table:style-name="c10">
            <text:p>2026-03-11 15:00</text:p>
          </table:table-cell>
          <table:table-cell office:value-type="float" office:value="3.9310335" table:style-name="c10">
            <text:p>3.931</text:p>
          </table:table-cell>
          <table:table-cell office:value-type="float" office:value="-1.2537205576637622" table:style-name="c11">
            <text:p>-1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00</text:p>
          </table:table-cell>
          <table:table-cell office:value-type="float" office:value="3.5367675" table:style-name="c10">
            <text:p>3.5368</text:p>
          </table:table-cell>
          <table:table-cell office:value-type="string" table:style-name="c10">
            <text:p>2026-03-31 08:00</text:p>
          </table:table-cell>
          <table:table-cell office:value-type="float" office:value="3.510244" table:style-name="c10">
            <text:p>3.5102</text:p>
          </table:table-cell>
          <table:table-cell office:value-type="float" office:value="-0.9483370833960447" table:style-name="c11">
            <text:p>-0.9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2:45</text:p>
          </table:table-cell>
          <table:table-cell office:value-type="float" office:value="3.6318149999999996" table:style-name="c10">
            <text:p>3.6318</text:p>
          </table:table-cell>
          <table:table-cell office:value-type="string" table:style-name="c10">
            <text:p>2026-04-02 05:00</text:p>
          </table:table-cell>
          <table:table-cell office:value-type="float" office:value="3.2893545" table:style-name="c10">
            <text:p>3.2894</text:p>
          </table:table-cell>
          <table:table-cell office:value-type="float" office:value="-9.610509336117056" table:style-name="c11">
            <text:p>-9.6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9:30</text:p>
          </table:table-cell>
          <table:table-cell office:value-type="float" office:value="3.1945965" table:style-name="c10">
            <text:p>3.1946</text:p>
          </table:table-cell>
          <table:table-cell office:value-type="string" table:style-name="c10">
            <text:p>2026-04-07 01:00</text:p>
          </table:table-cell>
          <table:table-cell office:value-type="float" office:value="3.086456" table:style-name="c10">
            <text:p>3.0865</text:p>
          </table:table-cell>
          <table:table-cell office:value-type="float" office:value="-3.5782398667249637" table:style-name="c11">
            <text:p>-3.6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15</text:p>
          </table:table-cell>
          <table:table-cell office:value-type="float" office:value="3.16158" table:style-name="c10">
            <text:p>3.1616</text:p>
          </table:table-cell>
          <table:table-cell office:value-type="string" table:style-name="c10">
            <text:p>2026-04-14 22:15</text:p>
          </table:table-cell>
          <table:table-cell office:value-type="float" office:value="3.1264360000000004" table:style-name="c10">
            <text:p>3.1264</text:p>
          </table:table-cell>
          <table:table-cell office:value-type="float" office:value="-1.3092740200785213" table:style-name="c11">
            <text:p>-1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9:45</text:p>
          </table:table-cell>
          <table:table-cell office:value-type="float" office:value="3.2466225" table:style-name="c10">
            <text:p>3.2466</text:p>
          </table:table-cell>
          <table:table-cell office:value-type="string" table:style-name="c10">
            <text:p>2026-04-16 19:45</text:p>
          </table:table-cell>
          <table:table-cell office:value-type="float" office:value="3.45827" table:style-name="c10">
            <text:p>3.4583</text:p>
          </table:table-cell>
          <table:table-cell office:value-type="float" office:value="6.306074028317132" table:style-name="c12">
            <text:p>+6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7 14:45</text:p>
          </table:table-cell>
          <table:table-cell office:value-type="float" office:value="3.2866425" table:style-name="c10">
            <text:p>3.2866</text:p>
          </table:table-cell>
          <table:table-cell office:value-type="string" table:style-name="c10">
            <text:p>2026-04-27 16:00</text:p>
          </table:table-cell>
          <table:table-cell office:value-type="float" office:value="3.1934025" table:style-name="c10">
            <text:p>3.1934</text:p>
          </table:table-cell>
          <table:table-cell office:value-type="float" office:value="-3.031166657082429" table:style-name="c11">
            <text:p>-3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00</text:p>
          </table:table-cell>
          <table:table-cell office:value-type="float" office:value="3.3186585" table:style-name="c10">
            <text:p>3.3187</text:p>
          </table:table-cell>
          <table:table-cell office:value-type="string" table:style-name="c10">
            <text:p>2026-04-29 19:00</text:p>
          </table:table-cell>
          <table:table-cell office:value-type="float" office:value="3.1534225" table:style-name="c10">
            <text:p>3.1534</text:p>
          </table:table-cell>
          <table:table-cell office:value-type="float" office:value="-5.168946777063699" table:style-name="c11">
            <text:p>-5.2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4:30</text:p>
          </table:table-cell>
          <table:table-cell office:value-type="float" office:value="3.5367675" table:style-name="c10">
            <text:p>3.5368</text:p>
          </table:table-cell>
          <table:table-cell office:value-type="string" table:style-name="c10">
            <text:p>2026-05-09 14:30</text:p>
          </table:table-cell>
          <table:table-cell office:value-type="float" office:value="3.6271855000000004" table:style-name="c10">
            <text:p>3.6272</text:p>
          </table:table-cell>
          <table:table-cell office:value-type="float" office:value="2.351504762060297" table:style-name="c12">
            <text:p>+2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7:30</text:p>
          </table:table-cell>
          <table:table-cell office:value-type="float" office:value="3.6948464999999997" table:style-name="c10">
            <text:p>3.6948</text:p>
          </table:table-cell>
          <table:table-cell office:value-type="string" table:style-name="c10">
            <text:p>2026-05-10 17:30</text:p>
          </table:table-cell>
          <table:table-cell office:value-type="float" office:value="4.01799" table:style-name="c10">
            <text:p>4.018</text:p>
          </table:table-cell>
          <table:table-cell office:value-type="float" office:value="8.52840674138966" table:style-name="c12">
            <text:p>+8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7:45</text:p>
          </table:table-cell>
          <table:table-cell office:value-type="float" office:value="3.653826" table:style-name="c10">
            <text:p>3.6538</text:p>
          </table:table-cell>
          <table:table-cell office:value-type="string" table:style-name="c10">
            <text:p>2026-05-22 21:00</text:p>
          </table:table-cell>
          <table:table-cell office:value-type="float" office:value="3.4972505000000003" table:style-name="c10">
            <text:p>3.4973</text:p>
          </table:table-cell>
          <table:table-cell office:value-type="float" office:value="-4.476581636605026" table:style-name="c11">
            <text:p>-4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4:45</text:p>
          </table:table-cell>
          <table:table-cell office:value-type="float" office:value="0.0071465715" table:style-name="c1">
            <text:p>0.0071466</text:p>
          </table:table-cell>
          <table:table-cell office:value-type="string" table:style-name="c1">
            <text:p>2026-03-11 14:45</text:p>
          </table:table-cell>
          <table:table-cell office:value-type="float" office:value="0.0071714125" table:style-name="c1">
            <text:p>0.0071714</text:p>
          </table:table-cell>
          <table:table-cell office:value-type="float" office:value="0.1469984091322818" table:style-name="c14">
            <text:p>+0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0.007453725" table:style-name="c1">
            <text:p>0.0074537</text:p>
          </table:table-cell>
          <table:table-cell office:value-type="string" table:style-name="c1">
            <text:p>2026-03-17 03:30</text:p>
          </table:table-cell>
          <table:table-cell office:value-type="float" office:value="0.0076911525" table:style-name="c1">
            <text:p>0.0076912</text:p>
          </table:table-cell>
          <table:table-cell office:value-type="float" office:value="2.9790861099987076" table:style-name="c14">
            <text:p>+3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45</text:p>
          </table:table-cell>
          <table:table-cell office:value-type="float" office:value="0.006753375" table:style-name="c1">
            <text:p>0.0067534</text:p>
          </table:table-cell>
          <table:table-cell office:value-type="string" table:style-name="c1">
            <text:p>2026-03-31 11:00</text:p>
          </table:table-cell>
          <table:table-cell office:value-type="float" office:value="0.006590703000000001" table:style-name="c1">
            <text:p>0.0065907</text:p>
          </table:table-cell>
          <table:table-cell office:value-type="float" office:value="-2.6038360863568144" table:style-name="c13">
            <text:p>-2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0.0069804885" table:style-name="c1">
            <text:p>0.0069805</text:p>
          </table:table-cell>
          <table:table-cell office:value-type="string" table:style-name="c1">
            <text:p>2026-04-02 12:00</text:p>
          </table:table-cell>
          <table:table-cell office:value-type="float" office:value="0.0066816575" table:style-name="c1">
            <text:p>0.0066817</text:p>
          </table:table-cell>
          <table:table-cell office:value-type="float" office:value="-4.4722892007127975" table:style-name="c13">
            <text:p>-4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0.007017507" table:style-name="c1">
            <text:p>0.0070175</text:p>
          </table:table-cell>
          <table:table-cell office:value-type="string" table:style-name="c1">
            <text:p>2026-04-15 14:00</text:p>
          </table:table-cell>
          <table:table-cell office:value-type="float" office:value="0.0069755105000000005" table:style-name="c1">
            <text:p>0.0069755</text:p>
          </table:table-cell>
          <table:table-cell office:value-type="float" office:value="-0.7971569602923001" table:style-name="c13">
            <text:p>-0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0.007210603499999999" table:style-name="c1">
            <text:p>0.0072106</text:p>
          </table:table-cell>
          <table:table-cell office:value-type="string" table:style-name="c1">
            <text:p>2026-04-17 16:00</text:p>
          </table:table-cell>
          <table:table-cell office:value-type="float" office:value="0.0074192885" table:style-name="c1">
            <text:p>0.0074193</text:p>
          </table:table-cell>
          <table:table-cell office:value-type="float" office:value="2.68845516590257" table:style-name="c14">
            <text:p>+2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0:45</text:p>
          </table:table-cell>
          <table:table-cell office:value-type="float" office:value="0.0073076519999999996" table:style-name="c1">
            <text:p>0.0073077</text:p>
          </table:table-cell>
          <table:table-cell office:value-type="string" table:style-name="c1">
            <text:p>2026-04-24 20:45</text:p>
          </table:table-cell>
          <table:table-cell office:value-type="float" office:value="0.007310343" table:style-name="c1">
            <text:p>0.0073103</text:p>
          </table:table-cell>
          <table:table-cell office:value-type="float" office:value="-0.16314919836083464" table:style-name="c13">
            <text:p>-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6:15</text:p>
          </table:table-cell>
          <table:table-cell office:value-type="float" office:value="0.007417706999999999" table:style-name="c1">
            <text:p>0.0074177</text:p>
          </table:table-cell>
          <table:table-cell office:value-type="string" table:style-name="c1">
            <text:p>2026-05-05 06:15</text:p>
          </table:table-cell>
          <table:table-cell office:value-type="float" office:value="0.007246375000000001" table:style-name="c1">
            <text:p>0.0072464</text:p>
          </table:table-cell>
          <table:table-cell office:value-type="float" office:value="-2.5050531602960002" table:style-name="c13">
            <text:p>-2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4:15</text:p>
          </table:table-cell>
          <table:table-cell office:value-type="float" office:value="0.007672834499999999" table:style-name="c1">
            <text:p>0.0076728</text:p>
          </table:table-cell>
          <table:table-cell office:value-type="string" table:style-name="c1">
            <text:p>2026-05-07 04:15</text:p>
          </table:table-cell>
          <table:table-cell office:value-type="float" office:value="0.0075872045" table:style-name="c1">
            <text:p>0.0075872</text:p>
          </table:table-cell>
          <table:table-cell office:value-type="float" office:value="-1.3136842948391347" table:style-name="c13">
            <text:p>-1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3:00</text:p>
          </table:table-cell>
          <table:table-cell office:value-type="float" office:value="0.007909952999999999" table:style-name="c1">
            <text:p>0.00791</text:p>
          </table:table-cell>
          <table:table-cell office:value-type="string" table:style-name="c1">
            <text:p>2026-05-11 13:00</text:p>
          </table:table-cell>
          <table:table-cell office:value-type="float" office:value="0.0077881040000000006" table:style-name="c1">
            <text:p>0.0077881</text:p>
          </table:table-cell>
          <table:table-cell office:value-type="float" office:value="-1.737272268191714" table:style-name="c13">
            <text:p>-1.7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0.1670835" table:style-name="c10">
            <text:p>0.16708</text:p>
          </table:table-cell>
          <table:table-cell office:value-type="string" table:style-name="c10">
            <text:p>2026-03-11 15:00</text:p>
          </table:table-cell>
          <table:table-cell office:value-type="float" office:value="0.1601199" table:style-name="c10">
            <text:p>0.16012</text:p>
          </table:table-cell>
          <table:table-cell office:value-type="float" office:value="-4.359305185790319" table:style-name="c11">
            <text:p>-4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3:15</text:p>
          </table:table-cell>
          <table:table-cell office:value-type="float" office:value="0.16678334999999997" table:style-name="c10">
            <text:p>0.16678</text:p>
          </table:table-cell>
          <table:table-cell office:value-type="string" table:style-name="c10">
            <text:p>2026-03-14 13:15</text:p>
          </table:table-cell>
          <table:table-cell office:value-type="float" office:value="0.16431779999999999" table:style-name="c10">
            <text:p>0.16432</text:p>
          </table:table-cell>
          <table:table-cell office:value-type="float" office:value="-1.6752399338422985" table:style-name="c11">
            <text:p>-1.7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9:30</text:p>
          </table:table-cell>
          <table:table-cell office:value-type="float" office:value="0.1678839" table:style-name="c10">
            <text:p>0.16788</text:p>
          </table:table-cell>
          <table:table-cell office:value-type="string" table:style-name="c10">
            <text:p>2026-03-16 09:30</text:p>
          </table:table-cell>
          <table:table-cell office:value-type="float" office:value="0.17181405" table:style-name="c10">
            <text:p>0.17181</text:p>
          </table:table-cell>
          <table:table-cell office:value-type="float" office:value="2.136413148640215" table:style-name="c12">
            <text:p>+2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5:15</text:p>
          </table:table-cell>
          <table:table-cell office:value-type="float" office:value="0.1748874" table:style-name="c10">
            <text:p>0.17489</text:p>
          </table:table-cell>
          <table:table-cell office:value-type="string" table:style-name="c10">
            <text:p>2026-03-17 15:15</text:p>
          </table:table-cell>
          <table:table-cell office:value-type="float" office:value="0.17321335000000002" table:style-name="c10">
            <text:p>0.17321</text:p>
          </table:table-cell>
          <table:table-cell office:value-type="float" office:value="-1.1552024254748883" table:style-name="c11">
            <text:p>-1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6 20:15</text:p>
          </table:table-cell>
          <table:table-cell office:value-type="float" office:value="0.17378685" table:style-name="c10">
            <text:p>0.17379</text:p>
          </table:table-cell>
          <table:table-cell office:value-type="string" table:style-name="c10">
            <text:p>2026-03-27 12:00</text:p>
          </table:table-cell>
          <table:table-cell office:value-type="float" office:value="0.16881555" table:style-name="c10">
            <text:p>0.16882</text:p>
          </table:table-cell>
          <table:table-cell office:value-type="float" office:value="-3.054754881885491" table:style-name="c11">
            <text:p>-3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1:45</text:p>
          </table:table-cell>
          <table:table-cell office:value-type="float" office:value="0.16958475" table:style-name="c10">
            <text:p>0.16958</text:p>
          </table:table-cell>
          <table:table-cell office:value-type="string" table:style-name="c10">
            <text:p>2026-03-31 10:00</text:p>
          </table:table-cell>
          <table:table-cell office:value-type="float" office:value="0.16501745" table:style-name="c10">
            <text:p>0.16502</text:p>
          </table:table-cell>
          <table:table-cell office:value-type="float" office:value="-2.887741900465679" table:style-name="c11">
            <text:p>-2.9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2:45</text:p>
          </table:table-cell>
          <table:table-cell office:value-type="float" office:value="0.1746873" table:style-name="c10">
            <text:p>0.17469</text:p>
          </table:table-cell>
          <table:table-cell office:value-type="string" table:style-name="c10">
            <text:p>2026-04-02 05:00</text:p>
          </table:table-cell>
          <table:table-cell office:value-type="float" office:value="0.16301845" table:style-name="c10">
            <text:p>0.16302</text:p>
          </table:table-cell>
          <table:table-cell office:value-type="float" office:value="-6.866397203202535" table:style-name="c11">
            <text:p>-6.9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14:00</text:p>
          </table:table-cell>
          <table:table-cell office:value-type="float" office:value="0.15837915" table:style-name="c10">
            <text:p>0.15838</text:p>
          </table:table-cell>
          <table:table-cell office:value-type="string" table:style-name="c10">
            <text:p>2026-04-15 14:00</text:p>
          </table:table-cell>
          <table:table-cell office:value-type="float" office:value="0.15672160000000002" table:style-name="c10">
            <text:p>0.15672</text:p>
          </table:table-cell>
          <table:table-cell office:value-type="float" office:value="-1.244378744550645" table:style-name="c11">
            <text:p>-1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45</text:p>
          </table:table-cell>
          <table:table-cell office:value-type="float" office:value="0.16288139999999998" table:style-name="c10">
            <text:p>0.16288</text:p>
          </table:table-cell>
          <table:table-cell office:value-type="string" table:style-name="c10">
            <text:p>2026-04-17 15:45</text:p>
          </table:table-cell>
          <table:table-cell office:value-type="float" office:value="0.17431280000000002" table:style-name="c10">
            <text:p>0.17431</text:p>
          </table:table-cell>
          <table:table-cell office:value-type="float" office:value="6.804305901594687" table:style-name="c12">
            <text:p>+6.8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9 19:45</text:p>
          </table:table-cell>
          <table:table-cell office:value-type="float" office:value="0.17138565" table:style-name="c10">
            <text:p>0.17139</text:p>
          </table:table-cell>
          <table:table-cell office:value-type="string" table:style-name="c10">
            <text:p>2026-04-20 01:00</text:p>
          </table:table-cell>
          <table:table-cell office:value-type="float" office:value="0.16811589999999998" table:style-name="c10">
            <text:p>0.16812</text:p>
          </table:table-cell>
          <table:table-cell office:value-type="float" office:value="-2.1039180842153504" table:style-name="c11">
            <text:p>-2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06:30</text:p>
          </table:table-cell>
          <table:table-cell office:value-type="float" office:value="0.17778885" table:style-name="c10">
            <text:p>0.17779</text:p>
          </table:table-cell>
          <table:table-cell office:value-type="string" table:style-name="c10">
            <text:p>2026-04-23 21:00</text:p>
          </table:table-cell>
          <table:table-cell office:value-type="float" office:value="0.1755122" table:style-name="c10">
            <text:p>0.17551</text:p>
          </table:table-cell>
          <table:table-cell office:value-type="float" office:value="-1.4778760804178614" table:style-name="c11">
            <text:p>-1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3:30</text:p>
          </table:table-cell>
          <table:table-cell office:value-type="float" office:value="0.1618809" table:style-name="c10">
            <text:p>0.16188</text:p>
          </table:table-cell>
          <table:table-cell office:value-type="string" table:style-name="c10">
            <text:p>2026-05-07 03:30</text:p>
          </table:table-cell>
          <table:table-cell office:value-type="float" office:value="0.15982005" table:style-name="c10">
            <text:p>0.15982</text:p>
          </table:table-cell>
          <table:table-cell office:value-type="float" office:value="-1.470420710503828" table:style-name="c11">
            <text:p>-1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01:15</text:p>
          </table:table-cell>
          <table:table-cell office:value-type="float" office:value="0.1658829" table:style-name="c10">
            <text:p>0.16588</text:p>
          </table:table-cell>
          <table:table-cell office:value-type="string" table:style-name="c10">
            <text:p>2026-05-10 01:15</text:p>
          </table:table-cell>
          <table:table-cell office:value-type="float" office:value="0.16141925000000001" table:style-name="c10">
            <text:p>0.16142</text:p>
          </table:table-cell>
          <table:table-cell office:value-type="float" office:value="-2.88536496573788" table:style-name="c11">
            <text:p>-2.9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8 00:30</text:p>
          </table:table-cell>
          <table:table-cell office:value-type="float" office:value="0.16958475" table:style-name="c10">
            <text:p>0.16958</text:p>
          </table:table-cell>
          <table:table-cell office:value-type="string" table:style-name="c10">
            <text:p>2026-05-29 00:30</text:p>
          </table:table-cell>
          <table:table-cell office:value-type="float" office:value="0.20299845000000002" table:style-name="c10">
            <text:p>0.203</text:p>
          </table:table-cell>
          <table:table-cell office:value-type="float" office:value="19.46395893407282" table:style-name="c12">
            <text:p>+19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9:15</text:p>
          </table:table-cell>
          <table:table-cell office:value-type="float" office:value="0.2411205" table:style-name="c10">
            <text:p>0.24112</text:p>
          </table:table-cell>
          <table:table-cell office:value-type="string" table:style-name="c10">
            <text:p>2026-06-01 09:15</text:p>
          </table:table-cell>
          <table:table-cell office:value-type="float" office:value="0.25227380000000005" table:style-name="c10">
            <text:p>0.25227</text:p>
          </table:table-cell>
          <table:table-cell office:value-type="float" office:value="4.416465905553468" table:style-name="c12">
            <text:p>+4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4:45</text:p>
          </table:table-cell>
          <table:table-cell office:value-type="float" office:value="1.4191092" table:style-name="c1">
            <text:p>1.4191</text:p>
          </table:table-cell>
          <table:table-cell office:value-type="string" table:style-name="c1">
            <text:p>2026-03-11 14:45</text:p>
          </table:table-cell>
          <table:table-cell office:value-type="float" office:value="1.4002995" table:style-name="c1">
            <text:p>1.4003</text:p>
          </table:table-cell>
          <table:table-cell office:value-type="float" office:value="-1.5227086612150775" table:style-name="c13">
            <text:p>-1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9:00</text:p>
          </table:table-cell>
          <table:table-cell office:value-type="float" office:value="1.4271131999999997" table:style-name="c1">
            <text:p>1.4271</text:p>
          </table:table-cell>
          <table:table-cell office:value-type="string" table:style-name="c1">
            <text:p>2026-03-14 09:00</text:p>
          </table:table-cell>
          <table:table-cell office:value-type="float" office:value="1.3926033500000001" table:style-name="c1">
            <text:p>1.3926</text:p>
          </table:table-cell>
          <table:table-cell office:value-type="float" office:value="-2.6132239612561725" table:style-name="c13">
            <text:p>-2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2:15</text:p>
          </table:table-cell>
          <table:table-cell office:value-type="float" office:value="1.4160076499999998" table:style-name="c1">
            <text:p>1.416</text:p>
          </table:table-cell>
          <table:table-cell office:value-type="string" table:style-name="c1">
            <text:p>2026-03-16 02:15</text:p>
          </table:table-cell>
          <table:table-cell office:value-type="float" office:value="1.44237845" table:style-name="c1">
            <text:p>1.4424</text:p>
          </table:table-cell>
          <table:table-cell office:value-type="float" office:value="1.6587117646186478" table:style-name="c14">
            <text:p>+1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1.4711351999999998" table:style-name="c1">
            <text:p>1.4711</text:p>
          </table:table-cell>
          <table:table-cell office:value-type="string" table:style-name="c1">
            <text:p>2026-03-17 03:45</text:p>
          </table:table-cell>
          <table:table-cell office:value-type="float" office:value="1.54292815" table:style-name="c1">
            <text:p>1.5429</text:p>
          </table:table-cell>
          <table:table-cell office:value-type="float" office:value="4.670450182155261" table:style-name="c14">
            <text:p>+4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1:30</text:p>
          </table:table-cell>
          <table:table-cell office:value-type="float" office:value="1.4343168" table:style-name="c1">
            <text:p>1.4343</text:p>
          </table:table-cell>
          <table:table-cell office:value-type="string" table:style-name="c1">
            <text:p>2026-03-26 06:00</text:p>
          </table:table-cell>
          <table:table-cell office:value-type="float" office:value="1.3881056" table:style-name="c1">
            <text:p>1.3881</text:p>
          </table:table-cell>
          <table:table-cell office:value-type="float" office:value="-3.415286155359809" table:style-name="c13">
            <text:p>-3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45</text:p>
          </table:table-cell>
          <table:table-cell office:value-type="float" office:value="1.35537735" table:style-name="c1">
            <text:p>1.3554</text:p>
          </table:table-cell>
          <table:table-cell office:value-type="string" table:style-name="c1">
            <text:p>2026-04-07 09:45</text:p>
          </table:table-cell>
          <table:table-cell office:value-type="float" office:value="1.32163885" table:style-name="c1">
            <text:p>1.3216</text:p>
          </table:table-cell>
          <table:table-cell office:value-type="float" office:value="-2.684157003298737" table:style-name="c13">
            <text:p>-2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1.39339635" table:style-name="c1">
            <text:p>1.3934</text:p>
          </table:table-cell>
          <table:table-cell office:value-type="string" table:style-name="c1">
            <text:p>2026-04-15 14:00</text:p>
          </table:table-cell>
          <table:table-cell office:value-type="float" office:value="1.3665164" table:style-name="c1">
            <text:p>1.3665</text:p>
          </table:table-cell>
          <table:table-cell office:value-type="float" office:value="-2.1251395041762433" table:style-name="c13">
            <text:p>-2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1.4057024999999999" table:style-name="c1">
            <text:p>1.4057</text:p>
          </table:table-cell>
          <table:table-cell office:value-type="string" table:style-name="c1">
            <text:p>2026-05-05 02:00</text:p>
          </table:table-cell>
          <table:table-cell office:value-type="float" office:value="1.3965014" table:style-name="c1">
            <text:p>1.3965</text:p>
          </table:table-cell>
          <table:table-cell office:value-type="float" office:value="-0.8531468286212651" table:style-name="c13">
            <text:p>-0.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