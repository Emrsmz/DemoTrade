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office:version="1.2">
  <office:automatic-styles>
    <style:style style:name="su0" style:family="table-column" style:display-name="su0">
      <style:table-column-properties style:column-width="3.2cm"/>
    </style:style>
    <style:style style:name="su1" style:family="table-column" style:display-name="su1">
      <style:table-column-properties style:column-width="2.8cm"/>
    </style:style>
    <style:style style:name="su2" style:family="table-column" style:display-name="su2">
      <style:table-column-properties style:column-width="2.8cm"/>
    </style:style>
    <style:style style:name="su3" style:family="table-column" style:display-name="su3">
      <style:table-column-properties style:column-width="2.6cm"/>
    </style:style>
    <style:style style:name="su4" style:family="table-column" style:display-name="su4">
      <style:table-column-properties style:column-width="2cm"/>
    </style:style>
    <style:style style:name="su5" style:family="table-column" style:display-name="su5">
      <style:table-column-properties style:column-width="2.6cm"/>
    </style:style>
    <style:style style:name="su6" style:family="table-column" style:display-name="su6">
      <style:table-column-properties style:column-width="3.2cm"/>
    </style:style>
    <style:style style:name="c0" style:family="table-cell" style:display-name="c0">
      <style:table-cell-properties fo:border="0.5pt solid #d0d0d0" style:vertical-align="middle" fo:background-color="#D9D9D9"/>
      <style:text-properties fo:color="#000000" fo:font-weight="bold"/>
      <style:paragraph-properties fo:text-align="center"/>
    </style:style>
    <style:style style:name="c1" style:family="table-cell" style:display-name="c1">
      <style:table-cell-properties fo:border="0.5pt solid #d0d0d0" style:vertical-align="middle"/>
      <style:paragraph-properties fo:text-align="center"/>
    </style:style>
    <style:style style:name="c2" style:family="table-cell" style:display-name="c2">
      <style:table-cell-properties fo:border="0.5pt solid #d0d0d0" style:vertical-align="middle"/>
      <style:text-properties fo:color="#000000" fo:font-weight="bold"/>
      <style:paragraph-properties fo:text-align="center"/>
    </style:style>
    <style:style style:name="c3" style:family="table-cell" style:display-name="c3">
      <style:table-cell-properties fo:border="0.5pt solid #d0d0d0" style:vertical-align="middle" fo:background-color="#C6EFCE"/>
      <style:text-properties fo:color="#006100" fo:font-weight="bold"/>
      <style:paragraph-properties fo:text-align="center"/>
    </style:style>
    <style:style style:name="c4" style:family="table-cell" style:display-name="c4">
      <style:table-cell-properties fo:border="0.5pt solid #d0d0d0" style:vertical-align="middle"/>
      <style:text-properties fo:color="#C00000" fo:font-weight="normal"/>
      <style:paragraph-properties fo:text-align="center"/>
    </style:style>
    <style:style style:name="c5" style:family="table-cell" style:display-name="c5">
      <style:table-cell-properties fo:border="0.5pt solid #d0d0d0" style:vertical-align="middle"/>
      <style:text-properties fo:color="#107C41" fo:font-weight="normal"/>
      <style:paragraph-properties fo:text-align="center"/>
    </style:style>
    <style:style style:name="c6" style:family="table-cell" style:display-name="c6">
      <style:table-cell-properties fo:border="0.5pt solid #d0d0d0" style:vertical-align="middle" fo:background-color="#FFC7CE"/>
      <style:text-properties fo:color="#9C0006" fo:font-weight="bold"/>
      <style:paragraph-properties fo:text-align="center"/>
    </style:style>
    <style:style style:name="c7" style:family="table-cell" style:display-name="c7">
      <style:table-cell-properties fo:border="0.5pt solid #d0d0d0" style:vertical-align="middle" fo:background-color="#DDEBF7"/>
      <style:text-properties fo:color="#000000" fo:font-weight="bold"/>
      <style:paragraph-properties fo:text-align="center"/>
    </style:style>
    <style:style style:name="c8" style:family="table-cell" style:display-name="c8">
      <style:table-cell-properties fo:border="0.5pt solid #d0d0d0" style:vertical-align="middle" fo:background-color="#DDEBF7"/>
      <style:text-properties fo:color="#C00000" fo:font-weight="bold"/>
      <style:paragraph-properties fo:text-align="center"/>
    </style:style>
    <style:style style:name="tl0" style:family="table-column" style:display-name="tl0">
      <style:table-column-properties style:column-width="3.2cm"/>
    </style:style>
    <style:style style:name="tl1" style:family="table-column" style:display-name="tl1">
      <style:table-column-properties style:column-width="1.8cm"/>
    </style:style>
    <style:style style:name="tl2" style:family="table-column" style:display-name="tl2">
      <style:table-column-properties style:column-width="3.8cm"/>
    </style:style>
    <style:style style:name="tl3" style:family="table-column" style:display-name="tl3">
      <style:table-column-properties style:column-width="3.2cm"/>
    </style:style>
    <style:style style:name="tl4" style:family="table-column" style:display-name="tl4">
      <style:table-column-properties style:column-width="3.8cm"/>
    </style:style>
    <style:style style:name="tl5" style:family="table-column" style:display-name="tl5">
      <style:table-column-properties style:column-width="3.2cm"/>
    </style:style>
    <style:style style:name="tl6" style:family="table-column" style:display-name="tl6">
      <style:table-column-properties style:column-width="2.4cm"/>
    </style:style>
    <style:style style:name="c9" style:family="table-cell" style:display-name="c9">
      <style:table-cell-properties fo:border="0.5pt solid #d0d0d0" style:vertical-align="middle" fo:background-color="#F2F2F2"/>
      <style:text-properties fo:color="#000000" fo:font-weight="bold"/>
      <style:paragraph-properties fo:text-align="center"/>
    </style:style>
    <style:style style:name="c10" style:family="table-cell" style:display-name="c10">
      <style:table-cell-properties fo:border="0.5pt solid #d0d0d0" style:vertical-align="middle" fo:background-color="#F2F2F2"/>
      <style:paragraph-properties fo:text-align="center"/>
    </style:style>
    <style:style style:name="c11" style:family="table-cell" style:display-name="c11">
      <style:table-cell-properties fo:border="0.5pt solid #d0d0d0" style:vertical-align="middle" fo:background-color="#F2F2F2"/>
      <style:text-properties fo:color="#C00000" fo:font-weight="bold"/>
      <style:paragraph-properties fo:text-align="center"/>
    </style:style>
    <style:style style:name="c12" style:family="table-cell" style:display-name="c12">
      <style:table-cell-properties fo:border="0.5pt solid #d0d0d0" style:vertical-align="middle" fo:background-color="#F2F2F2"/>
      <style:text-properties fo:color="#107C41" fo:font-weight="bold"/>
      <style:paragraph-properties fo:text-align="center"/>
    </style:style>
    <style:style style:name="c13" style:family="table-cell" style:display-name="c13">
      <style:table-cell-properties fo:border="0.5pt solid #d0d0d0" style:vertical-align="middle"/>
      <style:text-properties fo:color="#107C41" fo:font-weight="bold"/>
      <style:paragraph-properties fo:text-align="center"/>
    </style:style>
    <style:style style:name="c14" style:family="table-cell" style:display-name="c14">
      <style:table-cell-properties fo:border="0.5pt solid #d0d0d0" style:vertical-align="middle"/>
      <style:text-properties fo:color="#C00000" fo:font-weight="bold"/>
      <style:paragraph-properties fo:text-align="center"/>
    </style:style>
  </office:automatic-styles>
  <office:body>
    <office:spreadsheet>
      <table:table table:name="Summary">
        <table:table-column table:style-name="su0"/>
        <table:table-column table:style-name="su1"/>
        <table:table-column table:style-name="su2"/>
        <table:table-column table:style-name="su3"/>
        <table:table-column table:style-name="su4"/>
        <table:table-column table:style-name="su5"/>
        <table:table-column table:style-name="su6"/>
        <table:table-row>
          <table:table-cell office:value-type="string" table:style-name="c0">
            <text:p>Coin</text:p>
          </table:table-cell>
          <table:table-cell office:value-type="string" table:style-name="c0">
            <text:p>Bot Return %</text:p>
          </table:table-cell>
          <table:table-cell office:value-type="string" table:style-name="c0">
            <text:p>Buy&amp;Hold %</text:p>
          </table:table-cell>
          <table:table-cell office:value-type="string" table:style-name="c0">
            <text:p>Diff %</text:p>
          </table:table-cell>
          <table:table-cell office:value-type="string" table:style-name="c0">
            <text:p>Trades</text:p>
          </table:table-cell>
          <table:table-cell office:value-type="string" table:style-name="c0">
            <text:p>Win Rate %</text:p>
          </table:table-cell>
          <table:table-cell office:value-type="string" table:style-name="c0">
            <text:p>Max Drawdown %</text:p>
          </table:table-cell>
        </table:table-row>
        <table:table-row>
          <table:table-cell office:value-type="string" table:style-name="c2">
            <text:p>TON/USDT</text:p>
          </table:table-cell>
          <table:table-cell office:value-type="float" office:value="14.341959259434384" table:style-name="c3">
            <text:p>+14.3</text:p>
          </table:table-cell>
          <table:table-cell office:value-type="float" office:value="58.14671814671816" table:style-name="c1">
            <text:p>+58.1</text:p>
          </table:table-cell>
          <table:table-cell office:value-type="float" office:value="-43.804758887283775" table:style-name="c4">
            <text:p>-43.8</text:p>
          </table:table-cell>
          <table:table-cell office:value-type="float" office:value="42" table:style-name="c1">
            <text:p>42</text:p>
          </table:table-cell>
          <table:table-cell office:value-type="float" office:value="28.57142857142857" table:style-name="c1">
            <text:p>28.6</text:p>
          </table:table-cell>
          <table:table-cell office:value-type="float" office:value="24.283767837435004" table:style-name="c1">
            <text:p>24.3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float" office:value="14.020395866785112" table:style-name="c3">
            <text:p>+14.0</text:p>
          </table:table-cell>
          <table:table-cell office:value-type="float" office:value="96.8475073313783" table:style-name="c1">
            <text:p>+96.8</text:p>
          </table:table-cell>
          <table:table-cell office:value-type="float" office:value="-82.82711146459319" table:style-name="c4">
            <text:p>-82.8</text:p>
          </table:table-cell>
          <table:table-cell office:value-type="float" office:value="61" table:style-name="c1">
            <text:p>61</text:p>
          </table:table-cell>
          <table:table-cell office:value-type="float" office:value="29.508196721311474" table:style-name="c1">
            <text:p>29.5</text:p>
          </table:table-cell>
          <table:table-cell office:value-type="float" office:value="23.094588677361024" table:style-name="c1">
            <text:p>23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float" office:value="7.644414653176749" table:style-name="c3">
            <text:p>+7.6</text:p>
          </table:table-cell>
          <table:table-cell office:value-type="float" office:value="-10.776545166402533" table:style-name="c1">
            <text:p>-10.8</text:p>
          </table:table-cell>
          <table:table-cell office:value-type="float" office:value="18.42095981957928" table:style-name="c5">
            <text:p>+18.4</text:p>
          </table:table-cell>
          <table:table-cell office:value-type="float" office:value="45" table:style-name="c1">
            <text:p>45</text:p>
          </table:table-cell>
          <table:table-cell office:value-type="float" office:value="35.55555555555556" table:style-name="c1">
            <text:p>35.6</text:p>
          </table:table-cell>
          <table:table-cell office:value-type="float" office:value="16.087319034811056" table:style-name="c1">
            <text:p>16.1</text:p>
          </table:table-cell>
        </table:table-row>
        <table:table-row>
          <table:table-cell office:value-type="string" table:style-name="c2">
            <text:p>XLM/USDT</text:p>
          </table:table-cell>
          <table:table-cell office:value-type="float" office:value="-0.3110717201162515" table:style-name="c6">
            <text:p>-0.3</text:p>
          </table:table-cell>
          <table:table-cell office:value-type="float" office:value="49.291237113402055" table:style-name="c1">
            <text:p>+49.3</text:p>
          </table:table-cell>
          <table:table-cell office:value-type="float" office:value="-49.60230883351831" table:style-name="c4">
            <text:p>-49.6</text:p>
          </table:table-cell>
          <table:table-cell office:value-type="float" office:value="53" table:style-name="c1">
            <text:p>53</text:p>
          </table:table-cell>
          <table:table-cell office:value-type="float" office:value="28.30188679245283" table:style-name="c1">
            <text:p>28.3</text:p>
          </table:table-cell>
          <table:table-cell office:value-type="float" office:value="20.72471359507129" table:style-name="c1">
            <text:p>20.7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float" office:value="-3.83077433657852" table:style-name="c6">
            <text:p>-3.8</text:p>
          </table:table-cell>
          <table:table-cell office:value-type="float" office:value="-5.106100476742569" table:style-name="c1">
            <text:p>-5.1</text:p>
          </table:table-cell>
          <table:table-cell office:value-type="float" office:value="1.2753261401640485" table:style-name="c5">
            <text:p>+1.3</text:p>
          </table:table-cell>
          <table:table-cell office:value-type="float" office:value="46" table:style-name="c1">
            <text:p>46</text:p>
          </table:table-cell>
          <table:table-cell office:value-type="float" office:value="26.08695652173913" table:style-name="c1">
            <text:p>26.1</text:p>
          </table:table-cell>
          <table:table-cell office:value-type="float" office:value="16.49866178702586" table:style-name="c1">
            <text:p>16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float" office:value="-8.264159919392432" table:style-name="c6">
            <text:p>-8.3</text:p>
          </table:table-cell>
          <table:table-cell office:value-type="float" office:value="35.891647855530465" table:style-name="c1">
            <text:p>+35.9</text:p>
          </table:table-cell>
          <table:table-cell office:value-type="float" office:value="-44.1558077749229" table:style-name="c4">
            <text:p>-44.2</text:p>
          </table:table-cell>
          <table:table-cell office:value-type="float" office:value="62" table:style-name="c1">
            <text:p>62</text:p>
          </table:table-cell>
          <table:table-cell office:value-type="float" office:value="32.25806451612903" table:style-name="c1">
            <text:p>32.3</text:p>
          </table:table-cell>
          <table:table-cell office:value-type="float" office:value="31.123432171601173" table:style-name="c1">
            <text:p>31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float" office:value="-9.48851488104433" table:style-name="c6">
            <text:p>-9.5</text:p>
          </table:table-cell>
          <table:table-cell office:value-type="float" office:value="-8.512720156555769" table:style-name="c1">
            <text:p>-8.5</text:p>
          </table:table-cell>
          <table:table-cell office:value-type="float" office:value="-0.9757947244885603" table:style-name="c4">
            <text:p>-1.0</text:p>
          </table:table-cell>
          <table:table-cell office:value-type="float" office:value="59" table:style-name="c1">
            <text:p>59</text:p>
          </table:table-cell>
          <table:table-cell office:value-type="float" office:value="25.423728813559322" table:style-name="c1">
            <text:p>25.4</text:p>
          </table:table-cell>
          <table:table-cell office:value-type="float" office:value="20.139824607299815" table:style-name="c1">
            <text:p>20.1</text:p>
          </table:table-cell>
        </table:table-row>
        <table:table-row>
          <table:table-cell office:value-type="string" table:style-name="c2">
            <text:p>BCH/USDT</text:p>
          </table:table-cell>
          <table:table-cell office:value-type="float" office:value="-10.06666015230951" table:style-name="c6">
            <text:p>-10.1</text:p>
          </table:table-cell>
          <table:table-cell office:value-type="float" office:value="-38.01131418624892" table:style-name="c1">
            <text:p>-38.0</text:p>
          </table:table-cell>
          <table:table-cell office:value-type="float" office:value="27.944654033939408" table:style-name="c5">
            <text:p>+27.9</text:p>
          </table:table-cell>
          <table:table-cell office:value-type="float" office:value="32" table:style-name="c1">
            <text:p>32</text:p>
          </table:table-cell>
          <table:table-cell office:value-type="float" office:value="31.25" table:style-name="c1">
            <text:p>31.2</text:p>
          </table:table-cell>
          <table:table-cell office:value-type="float" office:value="11.346408910841678" table:style-name="c1">
            <text:p>11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float" office:value="-11.063633010714033" table:style-name="c6">
            <text:p>-11.1</text:p>
          </table:table-cell>
          <table:table-cell office:value-type="float" office:value="3.6605580624366927" table:style-name="c1">
            <text:p>+3.7</text:p>
          </table:table-cell>
          <table:table-cell office:value-type="float" office:value="-14.724191073150726" table:style-name="c4">
            <text:p>-14.7</text:p>
          </table:table-cell>
          <table:table-cell office:value-type="float" office:value="44" table:style-name="c1">
            <text:p>44</text:p>
          </table:table-cell>
          <table:table-cell office:value-type="float" office:value="25.0" table:style-name="c1">
            <text:p>25.0</text:p>
          </table:table-cell>
          <table:table-cell office:value-type="float" office:value="14.773650491213278" table:style-name="c1">
            <text:p>14.8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float" office:value="-11.942857749055339" table:style-name="c6">
            <text:p>-11.9</text:p>
          </table:table-cell>
          <table:table-cell office:value-type="float" office:value="-12.086536742356515" table:style-name="c1">
            <text:p>-12.1</text:p>
          </table:table-cell>
          <table:table-cell office:value-type="float" office:value="0.14367899330117595" table:style-name="c5">
            <text:p>+0.1</text:p>
          </table:table-cell>
          <table:table-cell office:value-type="float" office:value="34" table:style-name="c1">
            <text:p>34</text:p>
          </table:table-cell>
          <table:table-cell office:value-type="float" office:value="23.52941176470588" table:style-name="c1">
            <text:p>23.5</text:p>
          </table:table-cell>
          <table:table-cell office:value-type="float" office:value="15.683216334119662" table:style-name="c1">
            <text:p>15.7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float" office:value="-12.769328060802776" table:style-name="c6">
            <text:p>-12.8</text:p>
          </table:table-cell>
          <table:table-cell office:value-type="float" office:value="19.465917076598735" table:style-name="c1">
            <text:p>+19.5</text:p>
          </table:table-cell>
          <table:table-cell office:value-type="float" office:value="-32.23524513740151" table:style-name="c4">
            <text:p>-32.2</text:p>
          </table:table-cell>
          <table:table-cell office:value-type="float" office:value="50" table:style-name="c1">
            <text:p>50</text:p>
          </table:table-cell>
          <table:table-cell office:value-type="float" office:value="28.000000000000004" table:style-name="c1">
            <text:p>28.0</text:p>
          </table:table-cell>
          <table:table-cell office:value-type="float" office:value="14.984658194653106" table:style-name="c1">
            <text:p>15.0</text:p>
          </table:table-cell>
        </table:table-row>
        <table:table-row>
          <table:table-cell office:value-type="string" table:style-name="c2">
            <text:p>BTC/USDT</text:p>
          </table:table-cell>
          <table:table-cell office:value-type="float" office:value="-13.509434331409453" table:style-name="c6">
            <text:p>-13.5</text:p>
          </table:table-cell>
          <table:table-cell office:value-type="float" office:value="-4.198424928646263" table:style-name="c1">
            <text:p>-4.2</text:p>
          </table:table-cell>
          <table:table-cell office:value-type="float" office:value="-9.31100940276319" table:style-name="c4">
            <text:p>-9.3</text:p>
          </table:table-cell>
          <table:table-cell office:value-type="float" office:value="48" table:style-name="c1">
            <text:p>48</text:p>
          </table:table-cell>
          <table:table-cell office:value-type="float" office:value="29.166666666666668" table:style-name="c1">
            <text:p>29.2</text:p>
          </table:table-cell>
          <table:table-cell office:value-type="float" office:value="16.415290180689137" table:style-name="c1">
            <text:p>16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float" office:value="-14.386298638525977" table:style-name="c6">
            <text:p>-14.4</text:p>
          </table:table-cell>
          <table:table-cell office:value-type="float" office:value="-8.120649651972151" table:style-name="c1">
            <text:p>-8.1</text:p>
          </table:table-cell>
          <table:table-cell office:value-type="float" office:value="-6.265648986553826" table:style-name="c4">
            <text:p>-6.3</text:p>
          </table:table-cell>
          <table:table-cell office:value-type="float" office:value="48" table:style-name="c1">
            <text:p>48</text:p>
          </table:table-cell>
          <table:table-cell office:value-type="float" office:value="22.916666666666664" table:style-name="c1">
            <text:p>22.9</text:p>
          </table:table-cell>
          <table:table-cell office:value-type="float" office:value="20.725358506852416" table:style-name="c1">
            <text:p>20.7</text:p>
          </table:table-cell>
        </table:table-row>
        <table:table-row>
          <table:table-cell office:value-type="string" table:style-name="c2">
            <text:p>SOL/USDT</text:p>
          </table:table-cell>
          <table:table-cell office:value-type="float" office:value="-16.16489612624007" table:style-name="c6">
            <text:p>-16.2</text:p>
          </table:table-cell>
          <table:table-cell office:value-type="float" office:value="-12.565154707774202" table:style-name="c1">
            <text:p>-12.6</text:p>
          </table:table-cell>
          <table:table-cell office:value-type="float" office:value="-3.599741418465868" table:style-name="c4">
            <text:p>-3.6</text:p>
          </table:table-cell>
          <table:table-cell office:value-type="float" office:value="45" table:style-name="c1">
            <text:p>45</text:p>
          </table:table-cell>
          <table:table-cell office:value-type="float" office:value="22.22222222222222" table:style-name="c1">
            <text:p>22.2</text:p>
          </table:table-cell>
          <table:table-cell office:value-type="float" office:value="16.76261539135238" table:style-name="c1">
            <text:p>16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float" office:value="-16.299299085659403" table:style-name="c6">
            <text:p>-16.3</text:p>
          </table:table-cell>
          <table:table-cell office:value-type="float" office:value="-10.603264726756564" table:style-name="c1">
            <text:p>-10.6</text:p>
          </table:table-cell>
          <table:table-cell office:value-type="float" office:value="-5.696034358902839" table:style-name="c4">
            <text:p>-5.7</text:p>
          </table:table-cell>
          <table:table-cell office:value-type="float" office:value="38" table:style-name="c1">
            <text:p>38</text:p>
          </table:table-cell>
          <table:table-cell office:value-type="float" office:value="21.052631578947366" table:style-name="c1">
            <text:p>21.1</text:p>
          </table:table-cell>
          <table:table-cell office:value-type="float" office:value="16.554281717843587" table:style-name="c1">
            <text:p>16.6</text:p>
          </table:table-cell>
        </table:table-row>
        <table:table-row>
          <table:table-cell office:value-type="string" table:style-name="c2">
            <text:p>ADA/USDT</text:p>
          </table:table-cell>
          <table:table-cell office:value-type="float" office:value="-17.470020050764493" table:style-name="c6">
            <text:p>-17.5</text:p>
          </table:table-cell>
          <table:table-cell office:value-type="float" office:value="-18.50494686698424" table:style-name="c1">
            <text:p>-18.5</text:p>
          </table:table-cell>
          <table:table-cell office:value-type="float" office:value="1.0349268162197482" table:style-name="c5">
            <text:p>+1.0</text:p>
          </table:table-cell>
          <table:table-cell office:value-type="float" office:value="43" table:style-name="c1">
            <text:p>43</text:p>
          </table:table-cell>
          <table:table-cell office:value-type="float" office:value="25.581395348837212" table:style-name="c1">
            <text:p>25.6</text:p>
          </table:table-cell>
          <table:table-cell office:value-type="float" office:value="21.034493458072944" table:style-name="c1">
            <text:p>21.0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float" office:value="-17.916274129553756" table:style-name="c6">
            <text:p>-17.9</text:p>
          </table:table-cell>
          <table:table-cell office:value-type="float" office:value="-10.129096325719948" table:style-name="c1">
            <text:p>-10.1</text:p>
          </table:table-cell>
          <table:table-cell office:value-type="float" office:value="-7.787177803833808" table:style-name="c4">
            <text:p>-7.8</text:p>
          </table:table-cell>
          <table:table-cell office:value-type="float" office:value="53" table:style-name="c1">
            <text:p>53</text:p>
          </table:table-cell>
          <table:table-cell office:value-type="float" office:value="28.30188679245283" table:style-name="c1">
            <text:p>28.3</text:p>
          </table:table-cell>
          <table:table-cell office:value-type="float" office:value="17.916274129553756" table:style-name="c1">
            <text:p>17.9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float" office:value="-19.401177343072526" table:style-name="c6">
            <text:p>-19.4</text:p>
          </table:table-cell>
          <table:table-cell office:value-type="float" office:value="-21.671195652173914" table:style-name="c1">
            <text:p>-21.7</text:p>
          </table:table-cell>
          <table:table-cell office:value-type="float" office:value="2.2700183091013884" table:style-name="c5">
            <text:p>+2.3</text:p>
          </table:table-cell>
          <table:table-cell office:value-type="float" office:value="49" table:style-name="c1">
            <text:p>49</text:p>
          </table:table-cell>
          <table:table-cell office:value-type="float" office:value="22.448979591836736" table:style-name="c1">
            <text:p>22.4</text:p>
          </table:table-cell>
          <table:table-cell office:value-type="float" office:value="20.26681098889295" table:style-name="c1">
            <text:p>20.3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float" office:value="-20.119114425471686" table:style-name="c6">
            <text:p>-20.1</text:p>
          </table:table-cell>
          <table:table-cell office:value-type="float" office:value="-25.899280575539564" table:style-name="c1">
            <text:p>-25.9</text:p>
          </table:table-cell>
          <table:table-cell office:value-type="float" office:value="5.780166150067878" table:style-name="c5">
            <text:p>+5.8</text:p>
          </table:table-cell>
          <table:table-cell office:value-type="float" office:value="39" table:style-name="c1">
            <text:p>39</text:p>
          </table:table-cell>
          <table:table-cell office:value-type="float" office:value="28.205128205128204" table:style-name="c1">
            <text:p>28.2</text:p>
          </table:table-cell>
          <table:table-cell office:value-type="float" office:value="20.119114425471686" table:style-name="c1">
            <text:p>20.1</text:p>
          </table:table-cell>
        </table:table-row>
        <table:table-row>
          <table:table-cell office:value-type="string" table:style-name="c2">
            <text:p>LINK/USDT</text:p>
          </table:table-cell>
          <table:table-cell office:value-type="float" office:value="-20.470304460379918" table:style-name="c6">
            <text:p>-20.5</text:p>
          </table:table-cell>
          <table:table-cell office:value-type="float" office:value="-4.581976112920745" table:style-name="c1">
            <text:p>-4.6</text:p>
          </table:table-cell>
          <table:table-cell office:value-type="float" office:value="-15.888328347459172" table:style-name="c4">
            <text:p>-15.9</text:p>
          </table:table-cell>
          <table:table-cell office:value-type="float" office:value="54" table:style-name="c1">
            <text:p>54</text:p>
          </table:table-cell>
          <table:table-cell office:value-type="float" office:value="29.629629629629626" table:style-name="c1">
            <text:p>29.6</text:p>
          </table:table-cell>
          <table:table-cell office:value-type="float" office:value="20.940266196178758" table:style-name="c1">
            <text:p>20.9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float" office:value="-20.716548826326957" table:style-name="c6">
            <text:p>-20.7</text:p>
          </table:table-cell>
          <table:table-cell office:value-type="float" office:value="0.21344717182496167" table:style-name="c1">
            <text:p>+0.2</text:p>
          </table:table-cell>
          <table:table-cell office:value-type="float" office:value="-20.929995998151917" table:style-name="c4">
            <text:p>-20.9</text:p>
          </table:table-cell>
          <table:table-cell office:value-type="float" office:value="51" table:style-name="c1">
            <text:p>51</text:p>
          </table:table-cell>
          <table:table-cell office:value-type="float" office:value="29.411764705882355" table:style-name="c1">
            <text:p>29.4</text:p>
          </table:table-cell>
          <table:table-cell office:value-type="float" office:value="23.855495491711814" table:style-name="c1">
            <text:p>23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float" office:value="-21.344851241783864" table:style-name="c6">
            <text:p>-21.3</text:p>
          </table:table-cell>
          <table:table-cell office:value-type="float" office:value="-5.694980694980697" table:style-name="c1">
            <text:p>-5.7</text:p>
          </table:table-cell>
          <table:table-cell office:value-type="float" office:value="-15.649870546803168" table:style-name="c4">
            <text:p>-15.6</text:p>
          </table:table-cell>
          <table:table-cell office:value-type="float" office:value="59" table:style-name="c1">
            <text:p>59</text:p>
          </table:table-cell>
          <table:table-cell office:value-type="float" office:value="22.033898305084744" table:style-name="c1">
            <text:p>22.0</text:p>
          </table:table-cell>
          <table:table-cell office:value-type="float" office:value="28.07216477665364" table:style-name="c1">
            <text:p>28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float" office:value="-22.244258799592966" table:style-name="c6">
            <text:p>-22.2</text:p>
          </table:table-cell>
          <table:table-cell office:value-type="float" office:value="-4.489164086687317" table:style-name="c1">
            <text:p>-4.5</text:p>
          </table:table-cell>
          <table:table-cell office:value-type="float" office:value="-17.75509471290565" table:style-name="c4">
            <text:p>-17.8</text:p>
          </table:table-cell>
          <table:table-cell office:value-type="float" office:value="49" table:style-name="c1">
            <text:p>49</text:p>
          </table:table-cell>
          <table:table-cell office:value-type="float" office:value="24.489795918367346" table:style-name="c1">
            <text:p>24.5</text:p>
          </table:table-cell>
          <table:table-cell office:value-type="float" office:value="23.60937408180276" table:style-name="c1">
            <text:p>23.6</text:p>
          </table:table-cell>
        </table:table-row>
        <table:table-row>
          <table:table-cell office:value-type="string" table:style-name="c2">
            <text:p>HBAR/USDT</text:p>
          </table:table-cell>
          <table:table-cell office:value-type="float" office:value="-23.958657838749094" table:style-name="c6">
            <text:p>-24.0</text:p>
          </table:table-cell>
          <table:table-cell office:value-type="float" office:value="-11.241494921605359" table:style-name="c1">
            <text:p>-11.2</text:p>
          </table:table-cell>
          <table:table-cell office:value-type="float" office:value="-12.717162917143735" table:style-name="c4">
            <text:p>-12.7</text:p>
          </table:table-cell>
          <table:table-cell office:value-type="float" office:value="48" table:style-name="c1">
            <text:p>48</text:p>
          </table:table-cell>
          <table:table-cell office:value-type="float" office:value="18.75" table:style-name="c1">
            <text:p>18.8</text:p>
          </table:table-cell>
          <table:table-cell office:value-type="float" office:value="28.109640361324146" table:style-name="c1">
            <text:p>28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float" office:value="-26.93848577441264" table:style-name="c6">
            <text:p>-26.9</text:p>
          </table:table-cell>
          <table:table-cell office:value-type="float" office:value="131.27425614489002" table:style-name="c1">
            <text:p>+131.3</text:p>
          </table:table-cell>
          <table:table-cell office:value-type="float" office:value="-158.21274191930266" table:style-name="c4">
            <text:p>-158.2</text:p>
          </table:table-cell>
          <table:table-cell office:value-type="float" office:value="76" table:style-name="c1">
            <text:p>76</text:p>
          </table:table-cell>
          <table:table-cell office:value-type="float" office:value="28.947368421052634" table:style-name="c1">
            <text:p>28.9</text:p>
          </table:table-cell>
          <table:table-cell office:value-type="float" office:value="33.200547088611856" table:style-name="c1">
            <text:p>33.2</text:p>
          </table:table-cell>
        </table:table-row>
        <table:table-row>
          <table:table-cell office:value-type="string" table:style-name="c2">
            <text:p>POL/USDT</text:p>
          </table:table-cell>
          <table:table-cell office:value-type="float" office:value="-27.535875596621658" table:style-name="c6">
            <text:p>-27.5</text:p>
          </table:table-cell>
          <table:table-cell office:value-type="float" office:value="-11.084220716360118" table:style-name="c1">
            <text:p>-11.1</text:p>
          </table:table-cell>
          <table:table-cell office:value-type="float" office:value="-16.45165488026154" table:style-name="c4">
            <text:p>-16.5</text:p>
          </table:table-cell>
          <table:table-cell office:value-type="float" office:value="55" table:style-name="c1">
            <text:p>55</text:p>
          </table:table-cell>
          <table:table-cell office:value-type="float" office:value="21.818181818181817" table:style-name="c1">
            <text:p>21.8</text:p>
          </table:table-cell>
          <table:table-cell office:value-type="float" office:value="27.597734713553244" table:style-name="c1">
            <text:p>27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float" office:value="-28.483618929464637" table:style-name="c6">
            <text:p>-28.5</text:p>
          </table:table-cell>
          <table:table-cell office:value-type="float" office:value="3.685711268349358" table:style-name="c1">
            <text:p>+3.7</text:p>
          </table:table-cell>
          <table:table-cell office:value-type="float" office:value="-32.16933019781399" table:style-name="c4">
            <text:p>-32.2</text:p>
          </table:table-cell>
          <table:table-cell office:value-type="float" office:value="62" table:style-name="c1">
            <text:p>62</text:p>
          </table:table-cell>
          <table:table-cell office:value-type="float" office:value="19.35483870967742" table:style-name="c1">
            <text:p>19.4</text:p>
          </table:table-cell>
          <table:table-cell office:value-type="float" office:value="28.61818437889382" table:style-name="c1">
            <text:p>28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float" office:value="-29.01908496085459" table:style-name="c6">
            <text:p>-29.0</text:p>
          </table:table-cell>
          <table:table-cell office:value-type="float" office:value="-7.64643237486688" table:style-name="c1">
            <text:p>-7.6</text:p>
          </table:table-cell>
          <table:table-cell office:value-type="float" office:value="-21.372652585987712" table:style-name="c4">
            <text:p>-21.4</text:p>
          </table:table-cell>
          <table:table-cell office:value-type="float" office:value="50" table:style-name="c1">
            <text:p>50</text:p>
          </table:table-cell>
          <table:table-cell office:value-type="float" office:value="22.0" table:style-name="c1">
            <text:p>22.0</text:p>
          </table:table-cell>
          <table:table-cell office:value-type="float" office:value="30.686311362203135" table:style-name="c1">
            <text:p>30.7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float" office:value="-30.055521341932888" table:style-name="c6">
            <text:p>-30.1</text:p>
          </table:table-cell>
          <table:table-cell office:value-type="float" office:value="-3.214285714285714" table:style-name="c1">
            <text:p>-3.2</text:p>
          </table:table-cell>
          <table:table-cell office:value-type="float" office:value="-26.841235627647173" table:style-name="c4">
            <text:p>-26.8</text:p>
          </table:table-cell>
          <table:table-cell office:value-type="float" office:value="61" table:style-name="c1">
            <text:p>61</text:p>
          </table:table-cell>
          <table:table-cell office:value-type="float" office:value="21.311475409836063" table:style-name="c1">
            <text:p>21.3</text:p>
          </table:table-cell>
          <table:table-cell office:value-type="float" office:value="34.54199956318822" table:style-name="c1">
            <text:p>34.5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float" office:value="-31.833243353314572" table:style-name="c6">
            <text:p>-31.8</text:p>
          </table:table-cell>
          <table:table-cell office:value-type="float" office:value="-27.420973406924244" table:style-name="c1">
            <text:p>-27.4</text:p>
          </table:table-cell>
          <table:table-cell office:value-type="float" office:value="-4.412269946390328" table:style-name="c4">
            <text:p>-4.4</text:p>
          </table:table-cell>
          <table:table-cell office:value-type="float" office:value="53" table:style-name="c1">
            <text:p>53</text:p>
          </table:table-cell>
          <table:table-cell office:value-type="float" office:value="18.867924528301888" table:style-name="c1">
            <text:p>18.9</text:p>
          </table:table-cell>
          <table:table-cell office:value-type="float" office:value="31.833243353314572" table:style-name="c1">
            <text:p>31.8</text:p>
          </table:table-cell>
        </table:table-row>
        <table:table-row>
          <table:table-cell office:value-type="string" table:style-name="c7">
            <text:p>AVERAGE</text:p>
          </table:table-cell>
          <table:table-cell office:value-type="float" office:value="-14.986573176824937" table:style-name="c8">
            <text:p>-15.0</text:p>
          </table:table-cell>
          <table:table-cell office:value-type="float" office:value="4.563941399287484" table:style-name="c7">
            <text:p>+4.6</text:p>
          </table:table-cell>
          <table:table-cell office:value-type="float" office:value="-19.550514576112423" table:style-name="c8">
            <text:p>-19.6</text:p>
          </table:table-cell>
          <table:table-cell office:value-type="float" office:value="1509" table:style-name="c7">
            <text:p>1509</text:p>
          </table:table-cell>
          <table:table-cell office:value-type="float" office:value="25.666522792521786" table:style-name="c7">
            <text:p>25.7</text:p>
          </table:table-cell>
          <table:table-cell office:value-type="float" office:value="22.31998139358659" table:style-name="c7">
            <text:p>22.3</text:p>
          </table:table-cell>
        </table:table-row>
      </table:table>
      <table:table table:name="Trade Log">
        <table:table-column table:style-name="tl0"/>
        <table:table-column table:style-name="tl1"/>
        <table:table-column table:style-name="tl2"/>
        <table:table-column table:style-name="tl3"/>
        <table:table-column table:style-name="tl4"/>
        <table:table-column table:style-name="tl5"/>
        <table:table-column table:style-name="tl6"/>
        <table:table-row>
          <table:table-cell office:value-type="string" table:style-name="c0">
            <text:p>Coin</text:p>
          </table:table-cell>
          <table:table-cell office:value-type="string" table:style-name="c0">
            <text:p>Type</text:p>
          </table:table-cell>
          <table:table-cell office:value-type="string" table:style-name="c0">
            <text:p>Entry Date</text:p>
          </table:table-cell>
          <table:table-cell office:value-type="string" table:style-name="c0">
            <text:p>Entry Price</text:p>
          </table:table-cell>
          <table:table-cell office:value-type="string" table:style-name="c0">
            <text:p>Exit Date</text:p>
          </table:table-cell>
          <table:table-cell office:value-type="string" table:style-name="c0">
            <text:p>Exit Price</text:p>
          </table:table-cell>
          <table:table-cell office:value-type="string" table:style-name="c0">
            <text:p>P/L %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10:45</text:p>
          </table:table-cell>
          <table:table-cell office:value-type="float" office:value="0.27593789999999996" table:style-name="c10">
            <text:p>0.27594</text:p>
          </table:table-cell>
          <table:table-cell office:value-type="string" table:style-name="c10">
            <text:p>2026-03-05 15:15</text:p>
          </table:table-cell>
          <table:table-cell office:value-type="float" office:value="0.27216385" table:style-name="c10">
            <text:p>0.27216</text:p>
          </table:table-cell>
          <table:table-cell office:value-type="float" office:value="-1.564883090053959" table:style-name="c11">
            <text:p>-1.6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6 13:45</text:p>
          </table:table-cell>
          <table:table-cell office:value-type="float" office:value="0.26793389999999995" table:style-name="c10">
            <text:p>0.26793</text:p>
          </table:table-cell>
          <table:table-cell office:value-type="string" table:style-name="c10">
            <text:p>2026-03-06 14:00</text:p>
          </table:table-cell>
          <table:table-cell office:value-type="float" office:value="0.26396795" table:style-name="c10">
            <text:p>0.26397</text:p>
          </table:table-cell>
          <table:table-cell office:value-type="float" office:value="-1.6771382538939394" table:style-name="c11">
            <text:p>-1.7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9:30</text:p>
          </table:table-cell>
          <table:table-cell office:value-type="float" office:value="0.26603295" table:style-name="c10">
            <text:p>0.26603</text:p>
          </table:table-cell>
          <table:table-cell office:value-type="string" table:style-name="c10">
            <text:p>2026-03-10 14:15</text:p>
          </table:table-cell>
          <table:table-cell office:value-type="float" office:value="0.26156915000000003" table:style-name="c10">
            <text:p>0.26157</text:p>
          </table:table-cell>
          <table:table-cell office:value-type="float" office:value="-1.874458307081872" table:style-name="c11">
            <text:p>-1.9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4:45</text:p>
          </table:table-cell>
          <table:table-cell office:value-type="float" office:value="0.2669334" table:style-name="c10">
            <text:p>0.26693</text:p>
          </table:table-cell>
          <table:table-cell office:value-type="string" table:style-name="c10">
            <text:p>2026-03-10 18:45</text:p>
          </table:table-cell>
          <table:table-cell office:value-type="float" office:value="0.26376805000000003" table:style-name="c10">
            <text:p>0.26377</text:p>
          </table:table-cell>
          <table:table-cell office:value-type="float" office:value="-1.3833496789648514" table:style-name="c11">
            <text:p>-1.4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1:15</text:p>
          </table:table-cell>
          <table:table-cell office:value-type="float" office:value="0.25992989999999994" table:style-name="c10">
            <text:p>0.25993</text:p>
          </table:table-cell>
          <table:table-cell office:value-type="string" table:style-name="c10">
            <text:p>2026-03-11 21:45</text:p>
          </table:table-cell>
          <table:table-cell office:value-type="float" office:value="0.26376805000000003" table:style-name="c10">
            <text:p>0.26377</text:p>
          </table:table-cell>
          <table:table-cell office:value-type="float" office:value="1.2737579124410425" table:style-name="c12">
            <text:p>+1.3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08:30</text:p>
          </table:table-cell>
          <table:table-cell office:value-type="float" office:value="0.2615307" table:style-name="c10">
            <text:p>0.26153</text:p>
          </table:table-cell>
          <table:table-cell office:value-type="string" table:style-name="c10">
            <text:p>2026-03-12 14:45</text:p>
          </table:table-cell>
          <table:table-cell office:value-type="float" office:value="0.2590704" table:style-name="c10">
            <text:p>0.25907</text:p>
          </table:table-cell>
          <table:table-cell office:value-type="float" office:value="-1.138750337761496" table:style-name="c11">
            <text:p>-1.1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0:30</text:p>
          </table:table-cell>
          <table:table-cell office:value-type="float" office:value="0.26953469999999996" table:style-name="c10">
            <text:p>0.26953</text:p>
          </table:table-cell>
          <table:table-cell office:value-type="string" table:style-name="c10">
            <text:p>2026-03-13 15:45</text:p>
          </table:table-cell>
          <table:table-cell office:value-type="float" office:value="0.27236375" table:style-name="c10">
            <text:p>0.27236</text:p>
          </table:table-cell>
          <table:table-cell office:value-type="float" office:value="0.8476069551527132" table:style-name="c12">
            <text:p>+0.8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4 04:45</text:p>
          </table:table-cell>
          <table:table-cell office:value-type="float" office:value="0.2665332" table:style-name="c10">
            <text:p>0.26653</text:p>
          </table:table-cell>
          <table:table-cell office:value-type="string" table:style-name="c10">
            <text:p>2026-03-14 05:00</text:p>
          </table:table-cell>
          <table:table-cell office:value-type="float" office:value="0.26516734999999997" table:style-name="c10">
            <text:p>0.26517</text:p>
          </table:table-cell>
          <table:table-cell office:value-type="float" office:value="-0.7113258433283698" table:style-name="c11">
            <text:p>-0.7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2:00</text:p>
          </table:table-cell>
          <table:table-cell office:value-type="float" office:value="0.26683334999999997" table:style-name="c10">
            <text:p>0.26683</text:p>
          </table:table-cell>
          <table:table-cell office:value-type="string" table:style-name="c10">
            <text:p>2026-03-16 13:00</text:p>
          </table:table-cell>
          <table:table-cell office:value-type="float" office:value="0.2848575" table:style-name="c10">
            <text:p>0.28486</text:p>
          </table:table-cell>
          <table:table-cell office:value-type="float" office:value="6.541431143258536" table:style-name="c12">
            <text:p>+6.5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07:30</text:p>
          </table:table-cell>
          <table:table-cell office:value-type="float" office:value="0.2877438" table:style-name="c10">
            <text:p>0.28774</text:p>
          </table:table-cell>
          <table:table-cell office:value-type="string" table:style-name="c10">
            <text:p>2026-03-17 07:45</text:p>
          </table:table-cell>
          <table:table-cell office:value-type="float" office:value="0.28715635" table:style-name="c10">
            <text:p>0.28716</text:p>
          </table:table-cell>
          <table:table-cell office:value-type="float" office:value="-0.40364919892278417" table:style-name="c11">
            <text:p>-0.4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8 05:15</text:p>
          </table:table-cell>
          <table:table-cell office:value-type="float" office:value="0.29444715" table:style-name="c10">
            <text:p>0.29445</text:p>
          </table:table-cell>
          <table:table-cell office:value-type="string" table:style-name="c10">
            <text:p>2026-03-18 07:00</text:p>
          </table:table-cell>
          <table:table-cell office:value-type="float" office:value="0.2882558" table:style-name="c10">
            <text:p>0.28826</text:p>
          </table:table-cell>
          <table:table-cell office:value-type="float" office:value="-2.2984000165055085" table:style-name="c11">
            <text:p>-2.3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21:45</text:p>
          </table:table-cell>
          <table:table-cell office:value-type="float" office:value="0.264132" table:style-name="c10">
            <text:p>0.26413</text:p>
          </table:table-cell>
          <table:table-cell office:value-type="string" table:style-name="c10">
            <text:p>2026-03-23 23:15</text:p>
          </table:table-cell>
          <table:table-cell office:value-type="float" office:value="0.26076955" table:style-name="c10">
            <text:p>0.26077</text:p>
          </table:table-cell>
          <table:table-cell office:value-type="float" office:value="-1.4703740290650025" table:style-name="c11">
            <text:p>-1.5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08:15</text:p>
          </table:table-cell>
          <table:table-cell office:value-type="float" office:value="0.26783385" table:style-name="c10">
            <text:p>0.26783</text:p>
          </table:table-cell>
          <table:table-cell office:value-type="string" table:style-name="c10">
            <text:p>2026-03-24 12:45</text:p>
          </table:table-cell>
          <table:table-cell office:value-type="float" office:value="0.26316835" table:style-name="c10">
            <text:p>0.26317</text:p>
          </table:table-cell>
          <table:table-cell office:value-type="float" office:value="-1.9383560112547493" table:style-name="c11">
            <text:p>-1.9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00:15</text:p>
          </table:table-cell>
          <table:table-cell office:value-type="float" office:value="0.26843415" table:style-name="c10">
            <text:p>0.26843</text:p>
          </table:table-cell>
          <table:table-cell office:value-type="string" table:style-name="c10">
            <text:p>2026-03-25 15:15</text:p>
          </table:table-cell>
          <table:table-cell office:value-type="float" office:value="0.27026479999999997" table:style-name="c10">
            <text:p>0.27026</text:p>
          </table:table-cell>
          <table:table-cell office:value-type="float" office:value="0.48071032124639146" table:style-name="c12">
            <text:p>+0.5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23:00</text:p>
          </table:table-cell>
          <table:table-cell office:value-type="float" office:value="0.27083535" table:style-name="c10">
            <text:p>0.27084</text:p>
          </table:table-cell>
          <table:table-cell office:value-type="string" table:style-name="c10">
            <text:p>2026-03-25 23:15</text:p>
          </table:table-cell>
          <table:table-cell office:value-type="float" office:value="0.27016485" table:style-name="c10">
            <text:p>0.27016</text:p>
          </table:table-cell>
          <table:table-cell office:value-type="float" office:value="-0.44697250013705503" table:style-name="c11">
            <text:p>-0.4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3 15:00</text:p>
          </table:table-cell>
          <table:table-cell office:value-type="float" office:value="0.24772379999999997" table:style-name="c10">
            <text:p>0.24772</text:p>
          </table:table-cell>
          <table:table-cell office:value-type="string" table:style-name="c10">
            <text:p>2026-04-03 19:45</text:p>
          </table:table-cell>
          <table:table-cell office:value-type="float" office:value="0.2466766" table:style-name="c10">
            <text:p>0.24668</text:p>
          </table:table-cell>
          <table:table-cell office:value-type="float" office:value="-0.6217838267457476" table:style-name="c11">
            <text:p>-0.6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5:15</text:p>
          </table:table-cell>
          <table:table-cell office:value-type="float" office:value="0.2465232" table:style-name="c10">
            <text:p>0.24652</text:p>
          </table:table-cell>
          <table:table-cell office:value-type="string" table:style-name="c10">
            <text:p>2026-04-05 01:45</text:p>
          </table:table-cell>
          <table:table-cell office:value-type="float" office:value="0.2468765" table:style-name="c10">
            <text:p>0.24688</text:p>
          </table:table-cell>
          <table:table-cell office:value-type="float" office:value="-0.05687339913647005" table:style-name="c11">
            <text:p>-0.1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0:15</text:p>
          </table:table-cell>
          <table:table-cell office:value-type="float" office:value="0.25482734999999995" table:style-name="c10">
            <text:p>0.25483</text:p>
          </table:table-cell>
          <table:table-cell office:value-type="string" table:style-name="c10">
            <text:p>2026-04-06 09:00</text:p>
          </table:table-cell>
          <table:table-cell office:value-type="float" office:value="0.25477255000000004" table:style-name="c10">
            <text:p>0.25477</text:p>
          </table:table-cell>
          <table:table-cell office:value-type="float" office:value="-0.22136176805586105" table:style-name="c11">
            <text:p>-0.2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10:30</text:p>
          </table:table-cell>
          <table:table-cell office:value-type="float" office:value="0.25842914999999994" table:style-name="c10">
            <text:p>0.25843</text:p>
          </table:table-cell>
          <table:table-cell office:value-type="string" table:style-name="c10">
            <text:p>2026-04-06 12:00</text:p>
          </table:table-cell>
          <table:table-cell office:value-type="float" office:value="0.25557215" table:style-name="c10">
            <text:p>0.25557</text:p>
          </table:table-cell>
          <table:table-cell office:value-type="float" office:value="-1.3032154955622932" table:style-name="c11">
            <text:p>-1.3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3:00</text:p>
          </table:table-cell>
          <table:table-cell office:value-type="float" office:value="0.26283134999999996" table:style-name="c10">
            <text:p>0.26283</text:p>
          </table:table-cell>
          <table:table-cell office:value-type="string" table:style-name="c10">
            <text:p>2026-04-08 08:30</text:p>
          </table:table-cell>
          <table:table-cell office:value-type="float" office:value="0.26056965" table:style-name="c10">
            <text:p>0.26057</text:p>
          </table:table-cell>
          <table:table-cell office:value-type="float" office:value="-1.0586936186836038" table:style-name="c11">
            <text:p>-1.1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22:30</text:p>
          </table:table-cell>
          <table:table-cell office:value-type="float" office:value="0.2583291" table:style-name="c10">
            <text:p>0.25833</text:p>
          </table:table-cell>
          <table:table-cell office:value-type="string" table:style-name="c10">
            <text:p>2026-04-10 00:00</text:p>
          </table:table-cell>
          <table:table-cell office:value-type="float" office:value="0.25397295000000003" table:style-name="c10">
            <text:p>0.25397</text:p>
          </table:table-cell>
          <table:table-cell office:value-type="float" office:value="-1.8828083739113932" table:style-name="c11">
            <text:p>-1.9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4:30</text:p>
          </table:table-cell>
          <table:table-cell office:value-type="float" office:value="0.2549274" table:style-name="c10">
            <text:p>0.25493</text:p>
          </table:table-cell>
          <table:table-cell office:value-type="string" table:style-name="c10">
            <text:p>2026-04-10 22:45</text:p>
          </table:table-cell>
          <table:table-cell office:value-type="float" office:value="0.2544727" table:style-name="c10">
            <text:p>0.25447</text:p>
          </table:table-cell>
          <table:table-cell office:value-type="float" office:value="-0.3779079562652221" table:style-name="c11">
            <text:p>-0.4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7:00</text:p>
          </table:table-cell>
          <table:table-cell office:value-type="float" office:value="0.24532259999999997" table:style-name="c10">
            <text:p>0.24532</text:p>
          </table:table-cell>
          <table:table-cell office:value-type="string" table:style-name="c10">
            <text:p>2026-04-16 00:00</text:p>
          </table:table-cell>
          <table:table-cell office:value-type="float" office:value="0.24597695000000003" table:style-name="c10">
            <text:p>0.24598</text:p>
          </table:table-cell>
          <table:table-cell office:value-type="float" office:value="0.06629722534738924" table:style-name="c12">
            <text:p>+0.1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2:45</text:p>
          </table:table-cell>
          <table:table-cell office:value-type="float" office:value="0.2491245" table:style-name="c10">
            <text:p>0.24912</text:p>
          </table:table-cell>
          <table:table-cell office:value-type="string" table:style-name="c10">
            <text:p>2026-04-16 10:00</text:p>
          </table:table-cell>
          <table:table-cell office:value-type="float" office:value="0.24857565" table:style-name="c10">
            <text:p>0.24858</text:p>
          </table:table-cell>
          <table:table-cell office:value-type="float" office:value="-0.4197711282310612" table:style-name="c11">
            <text:p>-0.4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3:15</text:p>
          </table:table-cell>
          <table:table-cell office:value-type="float" office:value="0.25282635" table:style-name="c10">
            <text:p>0.25283</text:p>
          </table:table-cell>
          <table:table-cell office:value-type="string" table:style-name="c10">
            <text:p>2026-04-16 14:45</text:p>
          </table:table-cell>
          <table:table-cell office:value-type="float" office:value="0.2474762" table:style-name="c10">
            <text:p>0.24748</text:p>
          </table:table-cell>
          <table:table-cell office:value-type="float" office:value="-2.3118060770960014" table:style-name="c11">
            <text:p>-2.3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9:00</text:p>
          </table:table-cell>
          <table:table-cell office:value-type="float" office:value="0.2591295" table:style-name="c10">
            <text:p>0.25913</text:p>
          </table:table-cell>
          <table:table-cell office:value-type="string" table:style-name="c10">
            <text:p>2026-04-17 01:45</text:p>
          </table:table-cell>
          <table:table-cell office:value-type="float" office:value="0.2560719" table:style-name="c10">
            <text:p>0.25607</text:p>
          </table:table-cell>
          <table:table-cell office:value-type="float" office:value="-1.3774918440779604" table:style-name="c11">
            <text:p>-1.4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7:15</text:p>
          </table:table-cell>
          <table:table-cell office:value-type="float" office:value="0.25582784999999997" table:style-name="c10">
            <text:p>0.25583</text:p>
          </table:table-cell>
          <table:table-cell office:value-type="string" table:style-name="c10">
            <text:p>2026-04-17 07:30</text:p>
          </table:table-cell>
          <table:table-cell office:value-type="float" office:value="0.25497245" table:style-name="c10">
            <text:p>0.25497</text:p>
          </table:table-cell>
          <table:table-cell office:value-type="float" office:value="-0.5335970761392583" table:style-name="c11">
            <text:p>-0.5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8:00</text:p>
          </table:table-cell>
          <table:table-cell office:value-type="float" office:value="0.25632809999999995" table:style-name="c10">
            <text:p>0.25633</text:p>
          </table:table-cell>
          <table:table-cell office:value-type="string" table:style-name="c10">
            <text:p>2026-04-17 19:00</text:p>
          </table:table-cell>
          <table:table-cell office:value-type="float" office:value="0.26116934999999997" table:style-name="c10">
            <text:p>0.26117</text:p>
          </table:table-cell>
          <table:table-cell office:value-type="float" office:value="1.6850171593945529" table:style-name="c12">
            <text:p>+1.7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8:45</text:p>
          </table:table-cell>
          <table:table-cell office:value-type="float" office:value="0.2511255" table:style-name="c10">
            <text:p>0.25113</text:p>
          </table:table-cell>
          <table:table-cell office:value-type="string" table:style-name="c10">
            <text:p>2026-04-21 13:00</text:p>
          </table:table-cell>
          <table:table-cell office:value-type="float" office:value="0.24857565" table:style-name="c10">
            <text:p>0.24858</text:p>
          </table:table-cell>
          <table:table-cell office:value-type="float" office:value="-1.213239087368656" table:style-name="c11">
            <text:p>-1.2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2:30</text:p>
          </table:table-cell>
          <table:table-cell office:value-type="float" office:value="0.25382685" table:style-name="c10">
            <text:p>0.25383</text:p>
          </table:table-cell>
          <table:table-cell office:value-type="string" table:style-name="c10">
            <text:p>2026-04-22 13:15</text:p>
          </table:table-cell>
          <table:table-cell office:value-type="float" office:value="0.2548725" table:style-name="c10">
            <text:p>0.25487</text:p>
          </table:table-cell>
          <table:table-cell office:value-type="float" office:value="0.21123055835110538" table:style-name="c12">
            <text:p>+0.2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13:30</text:p>
          </table:table-cell>
          <table:table-cell office:value-type="float" office:value="0.2553276" table:style-name="c10">
            <text:p>0.25533</text:p>
          </table:table-cell>
          <table:table-cell office:value-type="string" table:style-name="c10">
            <text:p>2026-04-22 16:30</text:p>
          </table:table-cell>
          <table:table-cell office:value-type="float" office:value="0.253873" table:style-name="c10">
            <text:p>0.25387</text:p>
          </table:table-cell>
          <table:table-cell office:value-type="float" office:value="-0.768460647027569" table:style-name="c11">
            <text:p>-0.8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06:45</text:p>
          </table:table-cell>
          <table:table-cell office:value-type="float" office:value="0.25192590000000004" table:style-name="c10">
            <text:p>0.25193</text:p>
          </table:table-cell>
          <table:table-cell office:value-type="string" table:style-name="c10">
            <text:p>2026-04-26 16:45</text:p>
          </table:table-cell>
          <table:table-cell office:value-type="float" office:value="0.25157415" table:style-name="c10">
            <text:p>0.25157</text:p>
          </table:table-cell>
          <table:table-cell office:value-type="float" office:value="-0.33924528039794843" table:style-name="c11">
            <text:p>-0.3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00</text:p>
          </table:table-cell>
          <table:table-cell office:value-type="float" office:value="0.25302645" table:style-name="c10">
            <text:p>0.25303</text:p>
          </table:table-cell>
          <table:table-cell office:value-type="string" table:style-name="c10">
            <text:p>2026-04-29 12:45</text:p>
          </table:table-cell>
          <table:table-cell office:value-type="float" office:value="0.24907540000000003" table:style-name="c10">
            <text:p>0.24908</text:p>
          </table:table-cell>
          <table:table-cell office:value-type="float" office:value="-1.7582951207670061" table:style-name="c11">
            <text:p>-1.8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14:00</text:p>
          </table:table-cell>
          <table:table-cell office:value-type="float" office:value="0.25062524999999997" table:style-name="c10">
            <text:p>0.25063</text:p>
          </table:table-cell>
          <table:table-cell office:value-type="string" table:style-name="c10">
            <text:p>2026-05-01 20:45</text:p>
          </table:table-cell>
          <table:table-cell office:value-type="float" office:value="0.24907540000000003" table:style-name="c10">
            <text:p>0.24908</text:p>
          </table:table-cell>
          <table:table-cell office:value-type="float" office:value="-0.8170572297084733" table:style-name="c11">
            <text:p>-0.8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00</text:p>
          </table:table-cell>
          <table:table-cell office:value-type="float" office:value="0.25232609999999994" table:style-name="c10">
            <text:p>0.25233</text:p>
          </table:table-cell>
          <table:table-cell office:value-type="string" table:style-name="c10">
            <text:p>2026-05-04 08:00</text:p>
          </table:table-cell>
          <table:table-cell office:value-type="float" office:value="0.25157415" table:style-name="c10">
            <text:p>0.25157</text:p>
          </table:table-cell>
          <table:table-cell office:value-type="float" office:value="-0.49731150517126066" table:style-name="c11">
            <text:p>-0.5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15:00</text:p>
          </table:table-cell>
          <table:table-cell office:value-type="float" office:value="0.25262625" table:style-name="c10">
            <text:p>0.25263</text:p>
          </table:table-cell>
          <table:table-cell office:value-type="string" table:style-name="c10">
            <text:p>2026-05-04 20:30</text:p>
          </table:table-cell>
          <table:table-cell office:value-type="float" office:value="0.24997495" table:style-name="c10">
            <text:p>0.24997</text:p>
          </table:table-cell>
          <table:table-cell office:value-type="float" office:value="-1.2472971138391298" table:style-name="c11">
            <text:p>-1.2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7:00</text:p>
          </table:table-cell>
          <table:table-cell office:value-type="float" office:value="0.25482734999999995" table:style-name="c10">
            <text:p>0.25483</text:p>
          </table:table-cell>
          <table:table-cell office:value-type="string" table:style-name="c10">
            <text:p>2026-05-05 15:00</text:p>
          </table:table-cell>
          <table:table-cell office:value-type="float" office:value="0.25677155" table:style-name="c10">
            <text:p>0.25677</text:p>
          </table:table-cell>
          <table:table-cell office:value-type="float" office:value="0.561522800260672" table:style-name="c12">
            <text:p>+0.6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21:00</text:p>
          </table:table-cell>
          <table:table-cell office:value-type="float" office:value="0.26133059999999997" table:style-name="c10">
            <text:p>0.26133</text:p>
          </table:table-cell>
          <table:table-cell office:value-type="string" table:style-name="c10">
            <text:p>2026-05-06 14:00</text:p>
          </table:table-cell>
          <table:table-cell office:value-type="float" office:value="0.2650674" table:style-name="c10">
            <text:p>0.26507</text:p>
          </table:table-cell>
          <table:table-cell office:value-type="float" office:value="1.2271545189886046" table:style-name="c12">
            <text:p>+1.2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7:45</text:p>
          </table:table-cell>
          <table:table-cell office:value-type="float" office:value="0.27173579999999997" table:style-name="c10">
            <text:p>0.27174</text:p>
          </table:table-cell>
          <table:table-cell office:value-type="string" table:style-name="c10">
            <text:p>2026-05-09 06:45</text:p>
          </table:table-cell>
          <table:table-cell office:value-type="float" office:value="0.27436275000000004" table:style-name="c10">
            <text:p>0.27436</text:p>
          </table:table-cell>
          <table:table-cell office:value-type="float" office:value="0.7648969560691166" table:style-name="c12">
            <text:p>+0.8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18:30</text:p>
          </table:table-cell>
          <table:table-cell office:value-type="float" office:value="0.27303645" table:style-name="c10">
            <text:p>0.27304</text:p>
          </table:table-cell>
          <table:table-cell office:value-type="string" table:style-name="c10">
            <text:p>2026-05-09 23:15</text:p>
          </table:table-cell>
          <table:table-cell office:value-type="float" office:value="0.2712643" table:style-name="c10">
            <text:p>0.27126</text:p>
          </table:table-cell>
          <table:table-cell office:value-type="float" office:value="-0.8476550789097925" table:style-name="c11">
            <text:p>-0.8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8:30</text:p>
          </table:table-cell>
          <table:table-cell office:value-type="float" office:value="0.27293639999999997" table:style-name="c10">
            <text:p>0.27294</text:p>
          </table:table-cell>
          <table:table-cell office:value-type="string" table:style-name="c10">
            <text:p>2026-05-10 21:15</text:p>
          </table:table-cell>
          <table:table-cell office:value-type="float" office:value="0.27716135000000003" table:style-name="c10">
            <text:p>0.27716</text:p>
          </table:table-cell>
          <table:table-cell office:value-type="float" office:value="1.3449669818133891" table:style-name="c12">
            <text:p>+1.3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10:15</text:p>
          </table:table-cell>
          <table:table-cell office:value-type="float" office:value="0.27983985" table:style-name="c10">
            <text:p>0.27984</text:p>
          </table:table-cell>
          <table:table-cell office:value-type="string" table:style-name="c10">
            <text:p>2026-05-11 19:30</text:p>
          </table:table-cell>
          <table:table-cell office:value-type="float" office:value="0.28005990000000003" table:style-name="c10">
            <text:p>0.28006</text:p>
          </table:table-cell>
          <table:table-cell office:value-type="float" office:value="-0.1214229281855217" table:style-name="c11">
            <text:p>-0.1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6:45</text:p>
          </table:table-cell>
          <table:table-cell office:value-type="float" office:value="0.24732359999999998" table:style-name="c10">
            <text:p>0.24732</text:p>
          </table:table-cell>
          <table:table-cell office:value-type="string" table:style-name="c10">
            <text:p>2026-05-25 20:00</text:p>
          </table:table-cell>
          <table:table-cell office:value-type="float" office:value="0.24527730000000003" table:style-name="c10">
            <text:p>0.24528</text:p>
          </table:table-cell>
          <table:table-cell office:value-type="float" office:value="-1.0256236455800982" table:style-name="c11">
            <text:p>-1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0:45</text:p>
          </table:table-cell>
          <table:table-cell office:value-type="float" office:value="0.08394195" table:style-name="c1">
            <text:p>0.083942</text:p>
          </table:table-cell>
          <table:table-cell office:value-type="string" table:style-name="c1">
            <text:p>2026-03-10 18:15</text:p>
          </table:table-cell>
          <table:table-cell office:value-type="float" office:value="0.08645675" table:style-name="c1">
            <text:p>0.086457</text:p>
          </table:table-cell>
          <table:table-cell office:value-type="float" office:value="2.7899911269037903" table:style-name="c13">
            <text:p>+2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15</text:p>
          </table:table-cell>
          <table:table-cell office:value-type="float" office:value="0.08674335" table:style-name="c1">
            <text:p>0.086743</text:p>
          </table:table-cell>
          <table:table-cell office:value-type="string" table:style-name="c1">
            <text:p>2026-03-11 23:30</text:p>
          </table:table-cell>
          <table:table-cell office:value-type="float" office:value="0.08635680000000001" table:style-name="c1">
            <text:p>0.086357</text:p>
          </table:table-cell>
          <table:table-cell office:value-type="float" office:value="-0.6446341341439843" table:style-name="c14">
            <text:p>-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0:45</text:p>
          </table:table-cell>
          <table:table-cell office:value-type="float" office:value="0.08674335" table:style-name="c1">
            <text:p>0.086743</text:p>
          </table:table-cell>
          <table:table-cell office:value-type="string" table:style-name="c1">
            <text:p>2026-03-12 14:45</text:p>
          </table:table-cell>
          <table:table-cell office:value-type="float" office:value="0.08545725000000001" table:style-name="c1">
            <text:p>0.085457</text:p>
          </table:table-cell>
          <table:table-cell office:value-type="float" office:value="-1.679585861913313" table:style-name="c14">
            <text:p>-1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7:45</text:p>
          </table:table-cell>
          <table:table-cell office:value-type="float" office:value="0.08774385" table:style-name="c1">
            <text:p>0.087744</text:p>
          </table:table-cell>
          <table:table-cell office:value-type="string" table:style-name="c1">
            <text:p>2026-03-13 07:15</text:p>
          </table:table-cell>
          <table:table-cell office:value-type="float" office:value="0.09045475" table:style-name="c1">
            <text:p>0.090455</text:p>
          </table:table-cell>
          <table:table-cell office:value-type="float" office:value="2.8834852297340507" table:style-name="c13">
            <text:p>+2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9:45</text:p>
          </table:table-cell>
          <table:table-cell office:value-type="float" office:value="0.0916458" table:style-name="c1">
            <text:p>0.091646</text:p>
          </table:table-cell>
          <table:table-cell office:value-type="string" table:style-name="c1">
            <text:p>2026-03-13 17:30</text:p>
          </table:table-cell>
          <table:table-cell office:value-type="float" office:value="0.09345325" table:style-name="c1">
            <text:p>0.093453</text:p>
          </table:table-cell>
          <table:table-cell office:value-type="float" office:value="1.76837013070974" table:style-name="c13">
            <text:p>+1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04:45</text:p>
          </table:table-cell>
          <table:table-cell office:value-type="float" office:value="0.09634815" table:style-name="c1">
            <text:p>0.096348</text:p>
          </table:table-cell>
          <table:table-cell office:value-type="string" table:style-name="c1">
            <text:p>2026-03-14 06:45</text:p>
          </table:table-cell>
          <table:table-cell office:value-type="float" office:value="0.09225385" table:style-name="c1">
            <text:p>0.092254</text:p>
          </table:table-cell>
          <table:table-cell office:value-type="float" office:value="-4.440890090935834" table:style-name="c14">
            <text:p>-4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23:45</text:p>
          </table:table-cell>
          <table:table-cell office:value-type="float" office:value="0.09104549999999999" table:style-name="c1">
            <text:p>0.091045</text:p>
          </table:table-cell>
          <table:table-cell office:value-type="string" table:style-name="c1">
            <text:p>2026-03-15 00:45</text:p>
          </table:table-cell>
          <table:table-cell office:value-type="float" office:value="0.09025485000000001" table:style-name="c1">
            <text:p>0.090255</text:p>
          </table:table-cell>
          <table:table-cell office:value-type="float" office:value="-1.0665759923883966" table:style-name="c14">
            <text:p>-1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1:00</text:p>
          </table:table-cell>
          <table:table-cell office:value-type="float" office:value="0.09204599999999999" table:style-name="c1">
            <text:p>0.092046</text:p>
          </table:table-cell>
          <table:table-cell office:value-type="string" table:style-name="c1">
            <text:p>2026-03-15 15:30</text:p>
          </table:table-cell>
          <table:table-cell office:value-type="float" office:value="0.09125435000000001" table:style-name="c1">
            <text:p>0.091254</text:p>
          </table:table-cell>
          <table:table-cell office:value-type="float" office:value="-1.0582398427416373" table:style-name="c14">
            <text:p>-1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1:45</text:p>
          </table:table-cell>
          <table:table-cell office:value-type="float" office:value="0.09234614999999999" table:style-name="c1">
            <text:p>0.092346</text:p>
          </table:table-cell>
          <table:table-cell office:value-type="string" table:style-name="c1">
            <text:p>2026-03-16 02:45</text:p>
          </table:table-cell>
          <table:table-cell office:value-type="float" office:value="0.09195400000000001" table:style-name="c1">
            <text:p>0.091954</text:p>
          </table:table-cell>
          <table:table-cell office:value-type="float" office:value="-0.6237033660850821" table:style-name="c14">
            <text:p>-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4:00</text:p>
          </table:table-cell>
          <table:table-cell office:value-type="float" office:value="0.09354675" table:style-name="c1">
            <text:p>0.093547</text:p>
          </table:table-cell>
          <table:table-cell office:value-type="string" table:style-name="c1">
            <text:p>2026-03-16 11:30</text:p>
          </table:table-cell>
          <table:table-cell office:value-type="float" office:value="0.09395300000000001" table:style-name="c1">
            <text:p>0.093953</text:p>
          </table:table-cell>
          <table:table-cell office:value-type="float" office:value="0.2335067257815071" table:style-name="c13">
            <text:p>+0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1:45</text:p>
          </table:table-cell>
          <table:table-cell office:value-type="float" office:value="0.09714855" table:style-name="c1">
            <text:p>0.097149</text:p>
          </table:table-cell>
          <table:table-cell office:value-type="string" table:style-name="c1">
            <text:p>2026-03-17 03:15</text:p>
          </table:table-cell>
          <table:table-cell office:value-type="float" office:value="0.0961519" table:style-name="c1">
            <text:p>0.096152</text:p>
          </table:table-cell>
          <table:table-cell office:value-type="float" office:value="-1.2237523340286494" table:style-name="c14">
            <text:p>-1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9:45</text:p>
          </table:table-cell>
          <table:table-cell office:value-type="float" office:value="0.0956478" table:style-name="c1">
            <text:p>0.095648</text:p>
          </table:table-cell>
          <table:table-cell office:value-type="string" table:style-name="c1">
            <text:p>2026-03-17 12:30</text:p>
          </table:table-cell>
          <table:table-cell office:value-type="float" office:value="0.0945527" table:style-name="c1">
            <text:p>0.094553</text:p>
          </table:table-cell>
          <table:table-cell office:value-type="float" office:value="-1.3425409129117494" table:style-name="c14">
            <text:p>-1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3:45</text:p>
          </table:table-cell>
          <table:table-cell office:value-type="float" office:value="0.09614805" table:style-name="c1">
            <text:p>0.096148</text:p>
          </table:table-cell>
          <table:table-cell office:value-type="string" table:style-name="c1">
            <text:p>2026-03-18 06:45</text:p>
          </table:table-cell>
          <table:table-cell office:value-type="float" office:value="0.09505245000000001" table:style-name="c1">
            <text:p>0.095052</text:p>
          </table:table-cell>
          <table:table-cell office:value-type="float" office:value="-1.337114842734699" table:style-name="c14">
            <text:p>-1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3:15</text:p>
          </table:table-cell>
          <table:table-cell office:value-type="float" office:value="0.0884442" table:style-name="c1">
            <text:p>0.088444</text:p>
          </table:table-cell>
          <table:table-cell office:value-type="string" table:style-name="c1">
            <text:p>2026-03-25 16:15</text:p>
          </table:table-cell>
          <table:table-cell office:value-type="float" office:value="0.08725635000000001" table:style-name="c1">
            <text:p>0.087256</text:p>
          </table:table-cell>
          <table:table-cell office:value-type="float" office:value="-1.5402654370213043" table:style-name="c14">
            <text:p>-1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0.08374184999999999" table:style-name="c1">
            <text:p>0.083742</text:p>
          </table:table-cell>
          <table:table-cell office:value-type="string" table:style-name="c1">
            <text:p>2026-03-30 14:45</text:p>
          </table:table-cell>
          <table:table-cell office:value-type="float" office:value="0.08285855" table:style-name="c1">
            <text:p>0.082859</text:p>
          </table:table-cell>
          <table:table-cell office:value-type="float" office:value="-1.2525806886879098" table:style-name="c14">
            <text:p>-1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21:45</text:p>
          </table:table-cell>
          <table:table-cell office:value-type="float" office:value="0.0830415" table:style-name="c1">
            <text:p>0.083042</text:p>
          </table:table-cell>
          <table:table-cell office:value-type="string" table:style-name="c1">
            <text:p>2026-03-30 23:15</text:p>
          </table:table-cell>
          <table:table-cell office:value-type="float" office:value="0.08205895" table:style-name="c1">
            <text:p>0.082059</text:p>
          </table:table-cell>
          <table:table-cell office:value-type="float" office:value="-1.3807383549791497" table:style-name="c14">
            <text:p>-1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1:45</text:p>
          </table:table-cell>
          <table:table-cell office:value-type="float" office:value="0.0830415" table:style-name="c1">
            <text:p>0.083042</text:p>
          </table:table-cell>
          <table:table-cell office:value-type="string" table:style-name="c1">
            <text:p>2026-04-01 01:45</text:p>
          </table:table-cell>
          <table:table-cell office:value-type="float" office:value="0.0985507" table:style-name="c1">
            <text:p>0.098551</text:p>
          </table:table-cell>
          <table:table-cell office:value-type="float" office:value="18.43921069669987" table:style-name="c13">
            <text:p>+18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4:15</text:p>
          </table:table-cell>
          <table:table-cell office:value-type="float" office:value="0.09934965" table:style-name="c1">
            <text:p>0.09935</text:p>
          </table:table-cell>
          <table:table-cell office:value-type="string" table:style-name="c1">
            <text:p>2026-04-01 18:15</text:p>
          </table:table-cell>
          <table:table-cell office:value-type="float" office:value="0.10444775" table:style-name="c1">
            <text:p>0.10445</text:p>
          </table:table-cell>
          <table:table-cell office:value-type="float" office:value="4.921314718018643" table:style-name="c13">
            <text:p>+4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2 07:30</text:p>
          </table:table-cell>
          <table:table-cell office:value-type="float" office:value="0.10195095" table:style-name="c1">
            <text:p>0.10195</text:p>
          </table:table-cell>
          <table:table-cell office:value-type="string" table:style-name="c1">
            <text:p>2026-04-02 21:00</text:p>
          </table:table-cell>
          <table:table-cell office:value-type="float" office:value="0.10564715000000001" table:style-name="c1">
            <text:p>0.10565</text:p>
          </table:table-cell>
          <table:table-cell office:value-type="float" office:value="3.418321601858554" table:style-name="c13">
            <text:p>+3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21:15</text:p>
          </table:table-cell>
          <table:table-cell office:value-type="float" office:value="0.12516254999999998" table:style-name="c1">
            <text:p>0.12516</text:p>
          </table:table-cell>
          <table:table-cell office:value-type="string" table:style-name="c1">
            <text:p>2026-04-04 01:15</text:p>
          </table:table-cell>
          <table:table-cell office:value-type="float" office:value="0.12113940000000001" table:style-name="c1">
            <text:p>0.12114</text:p>
          </table:table-cell>
          <table:table-cell office:value-type="float" office:value="-3.4078146063658443" table:style-name="c14">
            <text:p>-3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1:00</text:p>
          </table:table-cell>
          <table:table-cell office:value-type="float" office:value="0.12236115" table:style-name="c1">
            <text:p>0.12236</text:p>
          </table:table-cell>
          <table:table-cell office:value-type="string" table:style-name="c1">
            <text:p>2026-04-06 00:45</text:p>
          </table:table-cell>
          <table:table-cell office:value-type="float" office:value="0.11924035000000001" table:style-name="c1">
            <text:p>0.11924</text:p>
          </table:table-cell>
          <table:table-cell office:value-type="float" office:value="-2.7452843158551565" table:style-name="c14">
            <text:p>-2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4:00</text:p>
          </table:table-cell>
          <table:table-cell office:value-type="float" office:value="0.12176084999999999" table:style-name="c1">
            <text:p>0.12176</text:p>
          </table:table-cell>
          <table:table-cell office:value-type="string" table:style-name="c1">
            <text:p>2026-04-06 13:30</text:p>
          </table:table-cell>
          <table:table-cell office:value-type="float" office:value="0.12303845000000001" table:style-name="c1">
            <text:p>0.12304</text:p>
          </table:table-cell>
          <table:table-cell office:value-type="float" office:value="0.8472724512435637" table:style-name="c13">
            <text:p>+0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06:00</text:p>
          </table:table-cell>
          <table:table-cell office:value-type="float" office:value="0.12356175" table:style-name="c1">
            <text:p>0.12356</text:p>
          </table:table-cell>
          <table:table-cell office:value-type="string" table:style-name="c1">
            <text:p>2026-04-08 12:15</text:p>
          </table:table-cell>
          <table:table-cell office:value-type="float" office:value="0.12003995" table:style-name="c1">
            <text:p>0.12004</text:p>
          </table:table-cell>
          <table:table-cell office:value-type="float" office:value="-3.044437182259052" table:style-name="c14">
            <text:p>-3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21:30</text:p>
          </table:table-cell>
          <table:table-cell office:value-type="float" office:value="0.11735865" table:style-name="c1">
            <text:p>0.11736</text:p>
          </table:table-cell>
          <table:table-cell office:value-type="string" table:style-name="c1">
            <text:p>2026-04-08 21:45</text:p>
          </table:table-cell>
          <table:table-cell office:value-type="float" office:value="0.11744125" table:style-name="c1">
            <text:p>0.11744</text:p>
          </table:table-cell>
          <table:table-cell office:value-type="float" office:value="-0.12965815365973965" table:style-name="c14">
            <text:p>-0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22:00</text:p>
          </table:table-cell>
          <table:table-cell office:value-type="float" office:value="0.11825909999999999" table:style-name="c1">
            <text:p>0.11826</text:p>
          </table:table-cell>
          <table:table-cell office:value-type="string" table:style-name="c1">
            <text:p>2026-04-08 23:15</text:p>
          </table:table-cell>
          <table:table-cell office:value-type="float" office:value="0.1151424" table:style-name="c1">
            <text:p>0.11514</text:p>
          </table:table-cell>
          <table:table-cell office:value-type="float" office:value="-2.830115955220336" table:style-name="c14">
            <text:p>-2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4:30</text:p>
          </table:table-cell>
          <table:table-cell office:value-type="float" office:value="0.11315655" table:style-name="c1">
            <text:p>0.11316</text:p>
          </table:table-cell>
          <table:table-cell office:value-type="string" table:style-name="c1">
            <text:p>2026-04-14 11:30</text:p>
          </table:table-cell>
          <table:table-cell office:value-type="float" office:value="0.1109445" table:style-name="c1">
            <text:p>0.11094</text:p>
          </table:table-cell>
          <table:table-cell office:value-type="float" office:value="-2.1508503533378964" table:style-name="c14">
            <text:p>-2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0:15</text:p>
          </table:table-cell>
          <table:table-cell office:value-type="float" office:value="0.10845419999999999" table:style-name="c1">
            <text:p>0.10845</text:p>
          </table:table-cell>
          <table:table-cell office:value-type="string" table:style-name="c1">
            <text:p>2026-04-15 13:45</text:p>
          </table:table-cell>
          <table:table-cell office:value-type="float" office:value="0.11064465000000001" table:style-name="c1">
            <text:p>0.11064</text:p>
          </table:table-cell>
          <table:table-cell office:value-type="float" office:value="1.815763100599166" table:style-name="c13">
            <text:p>+1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6:00</text:p>
          </table:table-cell>
          <table:table-cell office:value-type="float" office:value="0.11195595" table:style-name="c1">
            <text:p>0.11196</text:p>
          </table:table-cell>
          <table:table-cell office:value-type="string" table:style-name="c1">
            <text:p>2026-04-16 00:15</text:p>
          </table:table-cell>
          <table:table-cell office:value-type="float" office:value="0.11224385" table:style-name="c1">
            <text:p>0.11224</text:p>
          </table:table-cell>
          <table:table-cell office:value-type="float" office:value="0.05674065902705472" table:style-name="c13">
            <text:p>+0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20:15</text:p>
          </table:table-cell>
          <table:table-cell office:value-type="float" office:value="0.11425709999999999" table:style-name="c1">
            <text:p>0.11426</text:p>
          </table:table-cell>
          <table:table-cell office:value-type="string" table:style-name="c1">
            <text:p>2026-04-17 03:15</text:p>
          </table:table-cell>
          <table:table-cell office:value-type="float" office:value="0.1147426" table:style-name="c1">
            <text:p>0.11474</text:p>
          </table:table-cell>
          <table:table-cell office:value-type="float" office:value="0.22416947620762517" table:style-name="c13">
            <text:p>+0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8:45</text:p>
          </table:table-cell>
          <table:table-cell office:value-type="float" office:value="0.11675835" table:style-name="c1">
            <text:p>0.11676</text:p>
          </table:table-cell>
          <table:table-cell office:value-type="string" table:style-name="c1">
            <text:p>2026-04-17 15:45</text:p>
          </table:table-cell>
          <table:table-cell office:value-type="float" office:value="0.11404295" table:style-name="c1">
            <text:p>0.11404</text:p>
          </table:table-cell>
          <table:table-cell office:value-type="float" office:value="-2.5209090887718055" table:style-name="c14">
            <text:p>-2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7:00</text:p>
          </table:table-cell>
          <table:table-cell office:value-type="float" office:value="0.10665329999999999" table:style-name="c1">
            <text:p>0.10665</text:p>
          </table:table-cell>
          <table:table-cell office:value-type="string" table:style-name="c1">
            <text:p>2026-04-22 13:00</text:p>
          </table:table-cell>
          <table:table-cell office:value-type="float" office:value="0.10554720000000001" table:style-name="c1">
            <text:p>0.10555</text:p>
          </table:table-cell>
          <table:table-cell office:value-type="float" office:value="-1.2349255511081125" table:style-name="c14">
            <text:p>-1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1:00</text:p>
          </table:table-cell>
          <table:table-cell office:value-type="float" office:value="0.10695344999999999" table:style-name="c1">
            <text:p>0.10695</text:p>
          </table:table-cell>
          <table:table-cell office:value-type="string" table:style-name="c1">
            <text:p>2026-04-24 05:30</text:p>
          </table:table-cell>
          <table:table-cell office:value-type="float" office:value="0.10474760000000001" table:style-name="c1">
            <text:p>0.10475</text:p>
          </table:table-cell>
          <table:table-cell office:value-type="float" office:value="-2.2582164973640184" table:style-name="c14">
            <text:p>-2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8:30</text:p>
          </table:table-cell>
          <table:table-cell office:value-type="float" office:value="0.1062531" table:style-name="c1">
            <text:p>0.10625</text:p>
          </table:table-cell>
          <table:table-cell office:value-type="string" table:style-name="c1">
            <text:p>2026-04-24 15:00</text:p>
          </table:table-cell>
          <table:table-cell office:value-type="float" office:value="0.10624685000000002" table:style-name="c1">
            <text:p>0.10625</text:p>
          </table:table-cell>
          <table:table-cell office:value-type="float" office:value="-0.20577042283943525" table:style-name="c14">
            <text:p>-0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5:45</text:p>
          </table:table-cell>
          <table:table-cell office:value-type="float" office:value="0.108054" table:style-name="c1">
            <text:p>0.10805</text:p>
          </table:table-cell>
          <table:table-cell office:value-type="string" table:style-name="c1">
            <text:p>2026-04-24 19:30</text:p>
          </table:table-cell>
          <table:table-cell office:value-type="float" office:value="0.1073463" table:style-name="c1">
            <text:p>0.10735</text:p>
          </table:table-cell>
          <table:table-cell office:value-type="float" office:value="-0.8535410569715074" table:style-name="c14">
            <text:p>-0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22:00</text:p>
          </table:table-cell>
          <table:table-cell office:value-type="float" office:value="0.1092546" table:style-name="c1">
            <text:p>0.10925</text:p>
          </table:table-cell>
          <table:table-cell office:value-type="string" table:style-name="c1">
            <text:p>2026-04-25 12:30</text:p>
          </table:table-cell>
          <table:table-cell office:value-type="float" office:value="0.11344325000000001" table:style-name="c1">
            <text:p>0.11344</text:p>
          </table:table-cell>
          <table:table-cell office:value-type="float" office:value="3.6262792992240334" table:style-name="c13">
            <text:p>+3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14:30</text:p>
          </table:table-cell>
          <table:table-cell office:value-type="float" office:value="0.1164582" table:style-name="c1">
            <text:p>0.11646</text:p>
          </table:table-cell>
          <table:table-cell office:value-type="string" table:style-name="c1">
            <text:p>2026-04-25 16:45</text:p>
          </table:table-cell>
          <table:table-cell office:value-type="float" office:value="0.1145427" table:style-name="c1">
            <text:p>0.11454</text:p>
          </table:table-cell>
          <table:table-cell office:value-type="float" office:value="-1.841408211100648" table:style-name="c14">
            <text:p>-1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20:00</text:p>
          </table:table-cell>
          <table:table-cell office:value-type="float" office:value="0.11785889999999999" table:style-name="c1">
            <text:p>0.11786</text:p>
          </table:table-cell>
          <table:table-cell office:value-type="string" table:style-name="c1">
            <text:p>2026-04-25 22:15</text:p>
          </table:table-cell>
          <table:table-cell office:value-type="float" office:value="0.11504245" table:style-name="c1">
            <text:p>0.11504</text:p>
          </table:table-cell>
          <table:table-cell office:value-type="float" office:value="-2.5848025541982733" table:style-name="c14">
            <text:p>-2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16:30</text:p>
          </table:table-cell>
          <table:table-cell office:value-type="float" office:value="0.1196598" table:style-name="c1">
            <text:p>0.11966</text:p>
          </table:table-cell>
          <table:table-cell office:value-type="string" table:style-name="c1">
            <text:p>2026-04-27 20:00</text:p>
          </table:table-cell>
          <table:table-cell office:value-type="float" office:value="0.11624185000000001" table:style-name="c1">
            <text:p>0.11624</text:p>
          </table:table-cell>
          <table:table-cell office:value-type="float" office:value="-3.050579608314563" table:style-name="c14">
            <text:p>-3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0:00</text:p>
          </table:table-cell>
          <table:table-cell office:value-type="float" office:value="0.11315655" table:style-name="c1">
            <text:p>0.11316</text:p>
          </table:table-cell>
          <table:table-cell office:value-type="string" table:style-name="c1">
            <text:p>2026-05-03 02:30</text:p>
          </table:table-cell>
          <table:table-cell office:value-type="float" office:value="0.11104445000000002" table:style-name="c1">
            <text:p>0.11104</text:p>
          </table:table-cell>
          <table:table-cell office:value-type="float" office:value="-2.062697966268834" table:style-name="c14">
            <text:p>-2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3:30</text:p>
          </table:table-cell>
          <table:table-cell office:value-type="float" office:value="0.1128564" table:style-name="c1">
            <text:p>0.11286</text:p>
          </table:table-cell>
          <table:table-cell office:value-type="string" table:style-name="c1">
            <text:p>2026-05-03 13:00</text:p>
          </table:table-cell>
          <table:table-cell office:value-type="float" office:value="0.1151424" table:style-name="c1">
            <text:p>0.11514</text:p>
          </table:table-cell>
          <table:table-cell office:value-type="float" office:value="1.8216338128808074" table:style-name="c13">
            <text:p>+1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00</text:p>
          </table:table-cell>
          <table:table-cell office:value-type="float" office:value="0.11415704999999998" table:style-name="c1">
            <text:p>0.11416</text:p>
          </table:table-cell>
          <table:table-cell office:value-type="string" table:style-name="c1">
            <text:p>2026-05-04 20:00</text:p>
          </table:table-cell>
          <table:table-cell office:value-type="float" office:value="0.11354320000000001" table:style-name="c1">
            <text:p>0.11354</text:p>
          </table:table-cell>
          <table:table-cell office:value-type="float" office:value="-0.7365492160142262" table:style-name="c14">
            <text:p>-0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2:15</text:p>
          </table:table-cell>
          <table:table-cell office:value-type="float" office:value="0.11495745" table:style-name="c1">
            <text:p>0.11496</text:p>
          </table:table-cell>
          <table:table-cell office:value-type="string" table:style-name="c1">
            <text:p>2026-05-05 14:15</text:p>
          </table:table-cell>
          <table:table-cell office:value-type="float" office:value="0.1195402" table:style-name="c1">
            <text:p>0.11954</text:p>
          </table:table-cell>
          <table:table-cell office:value-type="float" office:value="3.7786060322319237" table:style-name="c13">
            <text:p>+3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30</text:p>
          </table:table-cell>
          <table:table-cell office:value-type="float" office:value="0.11905949999999998" table:style-name="c1">
            <text:p>0.11906</text:p>
          </table:table-cell>
          <table:table-cell office:value-type="string" table:style-name="c1">
            <text:p>2026-05-06 00:45</text:p>
          </table:table-cell>
          <table:table-cell office:value-type="float" office:value="0.11834080000000001" table:style-name="c1">
            <text:p>0.11834</text:p>
          </table:table-cell>
          <table:table-cell office:value-type="float" office:value="-0.8023410640897732" table:style-name="c14">
            <text:p>-0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00</text:p>
          </table:table-cell>
          <table:table-cell office:value-type="float" office:value="0.12396194999999999" table:style-name="c1">
            <text:p>0.12396</text:p>
          </table:table-cell>
          <table:table-cell office:value-type="string" table:style-name="c1">
            <text:p>2026-05-06 14:00</text:p>
          </table:table-cell>
          <table:table-cell office:value-type="float" office:value="0.12103945" table:style-name="c1">
            <text:p>0.12104</text:p>
          </table:table-cell>
          <table:table-cell office:value-type="float" office:value="-2.5527654740426176" table:style-name="c14">
            <text:p>-2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3:00</text:p>
          </table:table-cell>
          <table:table-cell office:value-type="float" office:value="0.1212606" table:style-name="c1">
            <text:p>0.12126</text:p>
          </table:table-cell>
          <table:table-cell office:value-type="string" table:style-name="c1">
            <text:p>2026-05-07 13:15</text:p>
          </table:table-cell>
          <table:table-cell office:value-type="float" office:value="0.12623685" table:style-name="c1">
            <text:p>0.12624</text:p>
          </table:table-cell>
          <table:table-cell office:value-type="float" office:value="3.8956615230751" table:style-name="c13">
            <text:p>+3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9:00</text:p>
          </table:table-cell>
          <table:table-cell office:value-type="float" office:value="0.1312656" table:style-name="c1">
            <text:p>0.13127</text:p>
          </table:table-cell>
          <table:table-cell office:value-type="string" table:style-name="c1">
            <text:p>2026-05-09 02:30</text:p>
          </table:table-cell>
          <table:table-cell office:value-type="float" office:value="0.13243375000000002" table:style-name="c1">
            <text:p>0.13243</text:p>
          </table:table-cell>
          <table:table-cell office:value-type="float" office:value="0.6882343384329026" table:style-name="c13">
            <text:p>+0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6:00</text:p>
          </table:table-cell>
          <table:table-cell office:value-type="float" office:value="0.12816404999999997" table:style-name="c1">
            <text:p>0.12816</text:p>
          </table:table-cell>
          <table:table-cell office:value-type="string" table:style-name="c1">
            <text:p>2026-05-10 06:15</text:p>
          </table:table-cell>
          <table:table-cell office:value-type="float" office:value="0.12763615" table:style-name="c1">
            <text:p>0.12764</text:p>
          </table:table-cell>
          <table:table-cell office:value-type="float" office:value="-0.6109705988925684" table:style-name="c14">
            <text:p>-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6:30</text:p>
          </table:table-cell>
          <table:table-cell office:value-type="float" office:value="0.1282641" table:style-name="c1">
            <text:p>0.12826</text:p>
          </table:table-cell>
          <table:table-cell office:value-type="string" table:style-name="c1">
            <text:p>2026-05-10 12:30</text:p>
          </table:table-cell>
          <table:table-cell office:value-type="float" office:value="0.12803595" table:style-name="c1">
            <text:p>0.12804</text:p>
          </table:table-cell>
          <table:table-cell office:value-type="float" office:value="-0.3774196084874837" table:style-name="c14">
            <text:p>-0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13:45</text:p>
          </table:table-cell>
          <table:table-cell office:value-type="float" office:value="0.11325659999999999" table:style-name="c1">
            <text:p>0.11326</text:p>
          </table:table-cell>
          <table:table-cell office:value-type="string" table:style-name="c1">
            <text:p>2026-05-19 16:00</text:p>
          </table:table-cell>
          <table:table-cell office:value-type="float" office:value="0.11024485" table:style-name="c1">
            <text:p>0.11024</text:p>
          </table:table-cell>
          <table:table-cell office:value-type="float" office:value="-2.8538111290202672" table:style-name="c14">
            <text:p>-2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20:00</text:p>
          </table:table-cell>
          <table:table-cell office:value-type="float" office:value="0.11315655" table:style-name="c1">
            <text:p>0.11316</text:p>
          </table:table-cell>
          <table:table-cell office:value-type="string" table:style-name="c1">
            <text:p>2026-05-19 23:00</text:p>
          </table:table-cell>
          <table:table-cell office:value-type="float" office:value="0.1111444" table:style-name="c1">
            <text:p>0.11114</text:p>
          </table:table-cell>
          <table:table-cell office:value-type="float" office:value="-1.9745455791997824" table:style-name="c14">
            <text:p>-2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00:45</text:p>
          </table:table-cell>
          <table:table-cell office:value-type="float" office:value="0.1148574" table:style-name="c1">
            <text:p>0.11486</text:p>
          </table:table-cell>
          <table:table-cell office:value-type="string" table:style-name="c1">
            <text:p>2026-05-20 07:15</text:p>
          </table:table-cell>
          <table:table-cell office:value-type="float" office:value="0.1137431" table:style-name="c1">
            <text:p>0.11374</text:p>
          </table:table-cell>
          <table:table-cell office:value-type="float" office:value="-1.1681201706638" table:style-name="c14">
            <text:p>-1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7:45</text:p>
          </table:table-cell>
          <table:table-cell office:value-type="float" office:value="0.11875935" table:style-name="c1">
            <text:p>0.11876</text:p>
          </table:table-cell>
          <table:table-cell office:value-type="string" table:style-name="c1">
            <text:p>2026-05-20 22:30</text:p>
          </table:table-cell>
          <table:table-cell office:value-type="float" office:value="0.11664165" table:style-name="c1">
            <text:p>0.11664</text:p>
          </table:table-cell>
          <table:table-cell office:value-type="float" office:value="-1.9795213247209675" table:style-name="c14">
            <text:p>-2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5:45</text:p>
          </table:table-cell>
          <table:table-cell office:value-type="float" office:value="0.11595794999999999" table:style-name="c1">
            <text:p>0.11596</text:p>
          </table:table-cell>
          <table:table-cell office:value-type="string" table:style-name="c1">
            <text:p>2026-05-21 20:30</text:p>
          </table:table-cell>
          <table:table-cell office:value-type="float" office:value="0.11504245" table:style-name="c1">
            <text:p>0.11504</text:p>
          </table:table-cell>
          <table:table-cell office:value-type="float" office:value="-0.9878321042670946" table:style-name="c14">
            <text:p>-1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4:15</text:p>
          </table:table-cell>
          <table:table-cell office:value-type="float" office:value="0.11555775" table:style-name="c1">
            <text:p>0.11556</text:p>
          </table:table-cell>
          <table:table-cell office:value-type="string" table:style-name="c1">
            <text:p>2026-05-22 07:00</text:p>
          </table:table-cell>
          <table:table-cell office:value-type="float" office:value="0.11404295" table:style-name="c1">
            <text:p>0.11404</text:p>
          </table:table-cell>
          <table:table-cell office:value-type="float" office:value="-1.5081393130707332" table:style-name="c14">
            <text:p>-1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0:00</text:p>
          </table:table-cell>
          <table:table-cell office:value-type="float" office:value="0.1174587" table:style-name="c1">
            <text:p>0.11746</text:p>
          </table:table-cell>
          <table:table-cell office:value-type="string" table:style-name="c1">
            <text:p>2026-05-22 15:00</text:p>
          </table:table-cell>
          <table:table-cell office:value-type="float" office:value="0.1167416" table:style-name="c1">
            <text:p>0.11674</text:p>
          </table:table-cell>
          <table:table-cell office:value-type="float" office:value="-0.8091920465661429" table:style-name="c14">
            <text:p>-0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08:00</text:p>
          </table:table-cell>
          <table:table-cell office:value-type="float" office:value="0.116058" table:style-name="c1">
            <text:p>0.11606</text:p>
          </table:table-cell>
          <table:table-cell office:value-type="string" table:style-name="c1">
            <text:p>2026-05-25 12:00</text:p>
          </table:table-cell>
          <table:table-cell office:value-type="float" office:value="0.11384305" table:style-name="c1">
            <text:p>0.11384</text:p>
          </table:table-cell>
          <table:table-cell office:value-type="float" office:value="-2.1045703501266444" table:style-name="c14">
            <text:p>-2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8 23:00</text:p>
          </table:table-cell>
          <table:table-cell office:value-type="float" office:value="0.11315655" table:style-name="c1">
            <text:p>0.11316</text:p>
          </table:table-cell>
          <table:table-cell office:value-type="string" table:style-name="c1">
            <text:p>2026-05-29 11:45</text:p>
          </table:table-cell>
          <table:table-cell office:value-type="float" office:value="0.1155422" table:style-name="c1">
            <text:p>0.11554</text:p>
          </table:table-cell>
          <table:table-cell office:value-type="float" office:value="1.9041594518390603" table:style-name="c13">
            <text:p>+1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15:30</text:p>
          </table:table-cell>
          <table:table-cell office:value-type="float" office:value="0.11555775" table:style-name="c1">
            <text:p>0.11556</text:p>
          </table:table-cell>
          <table:table-cell office:value-type="string" table:style-name="c1">
            <text:p>2026-05-29 15:45</text:p>
          </table:table-cell>
          <table:table-cell office:value-type="float" office:value="0.11644175000000001" table:style-name="c1">
            <text:p>0.11644</text:p>
          </table:table-cell>
          <table:table-cell office:value-type="float" office:value="0.5635562666718608" table:style-name="c13">
            <text:p>+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16:00</text:p>
          </table:table-cell>
          <table:table-cell office:value-type="float" office:value="0.11675835" table:style-name="c1">
            <text:p>0.11676</text:p>
          </table:table-cell>
          <table:table-cell office:value-type="string" table:style-name="c1">
            <text:p>2026-05-30 06:30</text:p>
          </table:table-cell>
          <table:table-cell office:value-type="float" office:value="0.12903545" table:style-name="c1">
            <text:p>0.12904</text:p>
          </table:table-cell>
          <table:table-cell office:value-type="float" office:value="10.294045895175818" table:style-name="c13">
            <text:p>+10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3:00</text:p>
          </table:table-cell>
          <table:table-cell office:value-type="float" office:value="0.1274637" table:style-name="c1">
            <text:p>0.12746</text:p>
          </table:table-cell>
          <table:table-cell office:value-type="string" table:style-name="c1">
            <text:p>2026-05-31 15:00</text:p>
          </table:table-cell>
          <table:table-cell office:value-type="float" office:value="0.12793600000000002" table:style-name="c1">
            <text:p>0.12794</text:p>
          </table:table-cell>
          <table:table-cell office:value-type="float" office:value="0.1698961633783025" table:style-name="c13">
            <text:p>+0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21:15</text:p>
          </table:table-cell>
          <table:table-cell office:value-type="float" office:value="0.12856425" table:style-name="c1">
            <text:p>0.12856</text:p>
          </table:table-cell>
          <table:table-cell office:value-type="string" table:style-name="c1">
            <text:p>2026-06-01 00:30</text:p>
          </table:table-cell>
          <table:table-cell office:value-type="float" office:value="0.1267366" table:style-name="c1">
            <text:p>0.12674</text:p>
          </table:table-cell>
          <table:table-cell office:value-type="float" office:value="-1.6186431791108347" table:style-name="c14">
            <text:p>-1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3:30</text:p>
          </table:table-cell>
          <table:table-cell office:value-type="float" office:value="0.1274637" table:style-name="c1">
            <text:p>0.12746</text:p>
          </table:table-cell>
          <table:table-cell office:value-type="string" table:style-name="c1">
            <text:p>2026-06-01 03:45</text:p>
          </table:table-cell>
          <table:table-cell office:value-type="float" office:value="0.12663665000000002" table:style-name="c1">
            <text:p>0.12664</text:p>
          </table:table-cell>
          <table:table-cell office:value-type="float" office:value="-0.8474543445310068" table:style-name="c14">
            <text:p>-0.8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07:15</text:p>
          </table:table-cell>
          <table:table-cell office:value-type="float" office:value="1.0075034999999999" table:style-name="c10">
            <text:p>1.0075</text:p>
          </table:table-cell>
          <table:table-cell office:value-type="string" table:style-name="c10">
            <text:p>2026-03-05 07:30</text:p>
          </table:table-cell>
          <table:table-cell office:value-type="float" office:value="1.0024985" table:style-name="c10">
            <text:p>1.0025</text:p>
          </table:table-cell>
          <table:table-cell office:value-type="float" office:value="-0.6956794196248284" table:style-name="c11">
            <text:p>-0.7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19:15</text:p>
          </table:table-cell>
          <table:table-cell office:value-type="float" office:value="0.9974985" table:style-name="c10">
            <text:p>0.9975</text:p>
          </table:table-cell>
          <table:table-cell office:value-type="string" table:style-name="c10">
            <text:p>2026-03-05 19:30</text:p>
          </table:table-cell>
          <table:table-cell office:value-type="float" office:value="0.993503" table:style-name="c10">
            <text:p>0.9935</text:p>
          </table:table-cell>
          <table:table-cell office:value-type="float" office:value="-0.5996512773703389" table:style-name="c11">
            <text:p>-0.6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6 08:00</text:p>
          </table:table-cell>
          <table:table-cell office:value-type="float" office:value="1.0235115" table:style-name="c10">
            <text:p>1.0235</text:p>
          </table:table-cell>
          <table:table-cell office:value-type="string" table:style-name="c10">
            <text:p>2026-03-06 09:30</text:p>
          </table:table-cell>
          <table:table-cell office:value-type="float" office:value="0.995502" table:style-name="c10">
            <text:p>0.9955</text:p>
          </table:table-cell>
          <table:table-cell office:value-type="float" office:value="-2.9310377556090006" table:style-name="c11">
            <text:p>-2.9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4:30</text:p>
          </table:table-cell>
          <table:table-cell office:value-type="float" office:value="0.9664829999999999" table:style-name="c10">
            <text:p>0.96648</text:p>
          </table:table-cell>
          <table:table-cell office:value-type="string" table:style-name="c10">
            <text:p>2026-03-09 22:45</text:p>
          </table:table-cell>
          <table:table-cell office:value-type="float" office:value="0.9575210000000001" table:style-name="c10">
            <text:p>0.95752</text:p>
          </table:table-cell>
          <table:table-cell office:value-type="float" office:value="-1.1253259994226328" table:style-name="c11">
            <text:p>-1.1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15</text:p>
          </table:table-cell>
          <table:table-cell office:value-type="float" office:value="0.9904949999999999" table:style-name="c10">
            <text:p>0.99049</text:p>
          </table:table-cell>
          <table:table-cell office:value-type="string" table:style-name="c10">
            <text:p>2026-03-10 18:15</text:p>
          </table:table-cell>
          <table:table-cell office:value-type="float" office:value="0.9705145000000001" table:style-name="c10">
            <text:p>0.97051</text:p>
          </table:table-cell>
          <table:table-cell office:value-type="float" office:value="-2.2130912811775705" table:style-name="c11">
            <text:p>-2.2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5:00</text:p>
          </table:table-cell>
          <table:table-cell office:value-type="float" office:value="0.9594794999999999" table:style-name="c10">
            <text:p>0.95948</text:p>
          </table:table-cell>
          <table:table-cell office:value-type="string" table:style-name="c10">
            <text:p>2026-03-13 18:00</text:p>
          </table:table-cell>
          <table:table-cell office:value-type="float" office:value="0.9365315000000001" table:style-name="c10">
            <text:p>0.93653</text:p>
          </table:table-cell>
          <table:table-cell office:value-type="float" office:value="-2.5868323886544586" table:style-name="c11">
            <text:p>-2.6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2:45</text:p>
          </table:table-cell>
          <table:table-cell office:value-type="float" office:value="0.934467" table:style-name="c10">
            <text:p>0.93447</text:p>
          </table:table-cell>
          <table:table-cell office:value-type="string" table:style-name="c10">
            <text:p>2026-03-16 22:45</text:p>
          </table:table-cell>
          <table:table-cell office:value-type="float" office:value="1.0204895" table:style-name="c10">
            <text:p>1.0205</text:p>
          </table:table-cell>
          <table:table-cell office:value-type="float" office:value="8.987213190995513" table:style-name="c12">
            <text:p>+9.0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08:15</text:p>
          </table:table-cell>
          <table:table-cell office:value-type="float" office:value="1.0025009999999999" table:style-name="c10">
            <text:p>1.0025</text:p>
          </table:table-cell>
          <table:table-cell office:value-type="string" table:style-name="c10">
            <text:p>2026-03-17 11:00</text:p>
          </table:table-cell>
          <table:table-cell office:value-type="float" office:value="0.9975010000000001" table:style-name="c10">
            <text:p>0.9975</text:p>
          </table:table-cell>
          <table:table-cell office:value-type="float" office:value="-0.6976556132113343" table:style-name="c11">
            <text:p>-0.7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23:15</text:p>
          </table:table-cell>
          <table:table-cell office:value-type="float" office:value="1.012506" table:style-name="c10">
            <text:p>1.0125</text:p>
          </table:table-cell>
          <table:table-cell office:value-type="string" table:style-name="c10">
            <text:p>2026-03-18 07:00</text:p>
          </table:table-cell>
          <table:table-cell office:value-type="float" office:value="1.0024985" table:style-name="c10">
            <text:p>1.0025</text:p>
          </table:table-cell>
          <table:table-cell office:value-type="float" office:value="-1.186313414587159" table:style-name="c11">
            <text:p>-1.2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0 13:45</text:p>
          </table:table-cell>
          <table:table-cell office:value-type="float" office:value="1.012506" table:style-name="c10">
            <text:p>1.0125</text:p>
          </table:table-cell>
          <table:table-cell office:value-type="string" table:style-name="c10">
            <text:p>2026-03-20 15:15</text:p>
          </table:table-cell>
          <table:table-cell office:value-type="float" office:value="0.9865065000000001" table:style-name="c10">
            <text:p>0.98651</text:p>
          </table:table-cell>
          <table:table-cell office:value-type="float" office:value="-2.762603529608698" table:style-name="c11">
            <text:p>-2.8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0 16:00</text:p>
          </table:table-cell>
          <table:table-cell office:value-type="float" office:value="1.006503" table:style-name="c10">
            <text:p>1.0065</text:p>
          </table:table-cell>
          <table:table-cell office:value-type="string" table:style-name="c10">
            <text:p>2026-03-20 17:15</text:p>
          </table:table-cell>
          <table:table-cell office:value-type="float" office:value="0.9945025000000001" table:style-name="c10">
            <text:p>0.9945</text:p>
          </table:table-cell>
          <table:table-cell office:value-type="float" office:value="-1.3898130951919607" table:style-name="c11">
            <text:p>-1.4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1 09:15</text:p>
          </table:table-cell>
          <table:table-cell office:value-type="float" office:value="1.0245119999999999" table:style-name="c10">
            <text:p>1.0245</text:p>
          </table:table-cell>
          <table:table-cell office:value-type="string" table:style-name="c10">
            <text:p>2026-03-21 11:45</text:p>
          </table:table-cell>
          <table:table-cell office:value-type="float" office:value="0.9995" table:style-name="c10">
            <text:p>0.9995</text:p>
          </table:table-cell>
          <table:table-cell office:value-type="float" office:value="-2.636377172741733" table:style-name="c11">
            <text:p>-2.6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19:00</text:p>
          </table:table-cell>
          <table:table-cell office:value-type="float" office:value="1.012506" table:style-name="c10">
            <text:p>1.0125</text:p>
          </table:table-cell>
          <table:table-cell office:value-type="string" table:style-name="c10">
            <text:p>2026-03-24 11:30</text:p>
          </table:table-cell>
          <table:table-cell office:value-type="float" office:value="1.057471" table:style-name="c10">
            <text:p>1.0575</text:p>
          </table:table-cell>
          <table:table-cell office:value-type="float" office:value="4.2321838557993985" table:style-name="c12">
            <text:p>+4.2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16:30</text:p>
          </table:table-cell>
          <table:table-cell office:value-type="float" office:value="1.048524" table:style-name="c10">
            <text:p>1.0485</text:p>
          </table:table-cell>
          <table:table-cell office:value-type="string" table:style-name="c10">
            <text:p>2026-03-24 16:45</text:p>
          </table:table-cell>
          <table:table-cell office:value-type="float" office:value="1.045477" table:style-name="c10">
            <text:p>1.0455</text:p>
          </table:table-cell>
          <table:table-cell office:value-type="float" office:value="-0.48991806796983006" table:style-name="c11">
            <text:p>-0.5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3:30</text:p>
          </table:table-cell>
          <table:table-cell office:value-type="float" office:value="1.108554" table:style-name="c10">
            <text:p>1.1086</text:p>
          </table:table-cell>
          <table:table-cell office:value-type="string" table:style-name="c10">
            <text:p>2026-03-25 02:30</text:p>
          </table:table-cell>
          <table:table-cell office:value-type="float" office:value="1.0724635" table:style-name="c10">
            <text:p>1.0725</text:p>
          </table:table-cell>
          <table:table-cell office:value-type="float" office:value="-3.4490295047873154" table:style-name="c11">
            <text:p>-3.4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8:15</text:p>
          </table:table-cell>
          <table:table-cell office:value-type="float" office:value="0.8614305" table:style-name="c10">
            <text:p>0.86143</text:p>
          </table:table-cell>
          <table:table-cell office:value-type="string" table:style-name="c10">
            <text:p>2026-04-06 14:15</text:p>
          </table:table-cell>
          <table:table-cell office:value-type="float" office:value="0.863568" table:style-name="c10">
            <text:p>0.86357</text:p>
          </table:table-cell>
          <table:table-cell office:value-type="float" office:value="0.0477377534229495" table:style-name="c12">
            <text:p>+0.0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8 05:45</text:p>
          </table:table-cell>
          <table:table-cell office:value-type="float" office:value="0.8824409999999999" table:style-name="c10">
            <text:p>0.88244</text:p>
          </table:table-cell>
          <table:table-cell office:value-type="string" table:style-name="c10">
            <text:p>2026-04-08 09:15</text:p>
          </table:table-cell>
          <table:table-cell office:value-type="float" office:value="0.8685655" table:style-name="c10">
            <text:p>0.86857</text:p>
          </table:table-cell>
          <table:table-cell office:value-type="float" office:value="-1.7691565140898868" table:style-name="c11">
            <text:p>-1.8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6:45</text:p>
          </table:table-cell>
          <table:table-cell office:value-type="float" office:value="0.8684339999999999" table:style-name="c10">
            <text:p>0.86843</text:p>
          </table:table-cell>
          <table:table-cell office:value-type="string" table:style-name="c10">
            <text:p>2026-04-11 00:15</text:p>
          </table:table-cell>
          <table:table-cell office:value-type="float" office:value="0.863568" table:style-name="c10">
            <text:p>0.86357</text:p>
          </table:table-cell>
          <table:table-cell office:value-type="float" office:value="-0.7590988413627153" table:style-name="c11">
            <text:p>-0.8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2:15</text:p>
          </table:table-cell>
          <table:table-cell office:value-type="float" office:value="0.8544269999999999" table:style-name="c10">
            <text:p>0.85443</text:p>
          </table:table-cell>
          <table:table-cell office:value-type="string" table:style-name="c10">
            <text:p>2026-04-11 13:15</text:p>
          </table:table-cell>
          <table:table-cell office:value-type="float" office:value="0.8465765000000001" table:style-name="c10">
            <text:p>0.84658</text:p>
          </table:table-cell>
          <table:table-cell office:value-type="float" office:value="-1.1168662066507684" table:style-name="c11">
            <text:p>-1.1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6:45</text:p>
          </table:table-cell>
          <table:table-cell office:value-type="float" office:value="0.8674335" table:style-name="c10">
            <text:p>0.86743</text:p>
          </table:table-cell>
          <table:table-cell office:value-type="string" table:style-name="c10">
            <text:p>2026-04-11 23:15</text:p>
          </table:table-cell>
          <table:table-cell office:value-type="float" office:value="0.861569" table:style-name="c10">
            <text:p>0.86157</text:p>
          </table:table-cell>
          <table:table-cell office:value-type="float" office:value="-0.8746234069816339" table:style-name="c11">
            <text:p>-0.9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2:30</text:p>
          </table:table-cell>
          <table:table-cell office:value-type="float" office:value="0.8714354999999999" table:style-name="c10">
            <text:p>0.87144</text:p>
          </table:table-cell>
          <table:table-cell office:value-type="string" table:style-name="c10">
            <text:p>2026-04-14 06:45</text:p>
          </table:table-cell>
          <table:table-cell office:value-type="float" office:value="0.8645675" table:style-name="c10">
            <text:p>0.86457</text:p>
          </table:table-cell>
          <table:table-cell office:value-type="float" office:value="-0.9864494196644369" table:style-name="c11">
            <text:p>-1.0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2:00</text:p>
          </table:table-cell>
          <table:table-cell office:value-type="float" office:value="0.8774384999999999" table:style-name="c10">
            <text:p>0.87744</text:p>
          </table:table-cell>
          <table:table-cell office:value-type="string" table:style-name="c10">
            <text:p>2026-04-15 20:30</text:p>
          </table:table-cell>
          <table:table-cell office:value-type="float" office:value="0.893553" table:style-name="c10">
            <text:p>0.89355</text:p>
          </table:table-cell>
          <table:table-cell office:value-type="float" office:value="1.63296772970416" table:style-name="c12">
            <text:p>+1.6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2:30</text:p>
          </table:table-cell>
          <table:table-cell office:value-type="float" office:value="0.8974485" table:style-name="c10">
            <text:p>0.89745</text:p>
          </table:table-cell>
          <table:table-cell office:value-type="string" table:style-name="c10">
            <text:p>2026-04-16 15:00</text:p>
          </table:table-cell>
          <table:table-cell office:value-type="float" office:value="0.9275360000000001" table:style-name="c10">
            <text:p>0.92754</text:p>
          </table:table-cell>
          <table:table-cell office:value-type="float" office:value="3.145958295768536" table:style-name="c12">
            <text:p>+3.1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15</text:p>
          </table:table-cell>
          <table:table-cell office:value-type="float" office:value="0.942471" table:style-name="c10">
            <text:p>0.94247</text:p>
          </table:table-cell>
          <table:table-cell office:value-type="string" table:style-name="c10">
            <text:p>2026-04-17 01:30</text:p>
          </table:table-cell>
          <table:table-cell office:value-type="float" office:value="0.97951" table:style-name="c10">
            <text:p>0.97951</text:p>
          </table:table-cell>
          <table:table-cell office:value-type="float" office:value="3.7222322501169858" table:style-name="c12">
            <text:p>+3.7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9:45</text:p>
          </table:table-cell>
          <table:table-cell office:value-type="float" office:value="1.0015005" table:style-name="c10">
            <text:p>1.0015</text:p>
          </table:table-cell>
          <table:table-cell office:value-type="string" table:style-name="c10">
            <text:p>2026-04-17 11:15</text:p>
          </table:table-cell>
          <table:table-cell office:value-type="float" office:value="0.9805095" table:style-name="c10">
            <text:p>0.98051</text:p>
          </table:table-cell>
          <table:table-cell office:value-type="float" office:value="-2.291665205409288" table:style-name="c11">
            <text:p>-2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5:30</text:p>
          </table:table-cell>
          <table:table-cell office:value-type="float" office:value="0.9604799999999999" table:style-name="c10">
            <text:p>0.96048</text:p>
          </table:table-cell>
          <table:table-cell office:value-type="string" table:style-name="c10">
            <text:p>2026-04-22 14:00</text:p>
          </table:table-cell>
          <table:table-cell office:value-type="float" office:value="0.967516" table:style-name="c10">
            <text:p>0.96752</text:p>
          </table:table-cell>
          <table:table-cell office:value-type="float" office:value="0.5311860232383836" table:style-name="c12">
            <text:p>+0.5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06:15</text:p>
          </table:table-cell>
          <table:table-cell office:value-type="float" office:value="0.9534765" table:style-name="c10">
            <text:p>0.95348</text:p>
          </table:table-cell>
          <table:table-cell office:value-type="string" table:style-name="c10">
            <text:p>2026-04-23 09:30</text:p>
          </table:table-cell>
          <table:table-cell office:value-type="float" office:value="0.943528" table:style-name="c10">
            <text:p>0.94353</text:p>
          </table:table-cell>
          <table:table-cell office:value-type="float" office:value="-1.2412065186713894" table:style-name="c11">
            <text:p>-1.2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12:45</text:p>
          </table:table-cell>
          <table:table-cell office:value-type="float" office:value="0.9494744999999999" table:style-name="c10">
            <text:p>0.94947</text:p>
          </table:table-cell>
          <table:table-cell office:value-type="string" table:style-name="c10">
            <text:p>2026-04-23 17:30</text:p>
          </table:table-cell>
          <table:table-cell office:value-type="float" office:value="0.941529" table:style-name="c10">
            <text:p>0.94153</text:p>
          </table:table-cell>
          <table:table-cell office:value-type="float" office:value="-1.0350584950938657" table:style-name="c11">
            <text:p>-1.0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4 11:15</text:p>
          </table:table-cell>
          <table:table-cell office:value-type="float" office:value="0.9594794999999999" table:style-name="c10">
            <text:p>0.95948</text:p>
          </table:table-cell>
          <table:table-cell office:value-type="string" table:style-name="c10">
            <text:p>2026-04-25 06:00</text:p>
          </table:table-cell>
          <table:table-cell office:value-type="float" office:value="0.9845075000000001" table:style-name="c10">
            <text:p>0.98451</text:p>
          </table:table-cell>
          <table:table-cell office:value-type="float" office:value="2.4033832413824507" table:style-name="c12">
            <text:p>+2.4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5 22:30</text:p>
          </table:table-cell>
          <table:table-cell office:value-type="float" office:value="0.9674834999999999" table:style-name="c10">
            <text:p>0.96748</text:p>
          </table:table-cell>
          <table:table-cell office:value-type="string" table:style-name="c10">
            <text:p>2026-04-26 01:15</text:p>
          </table:table-cell>
          <table:table-cell office:value-type="float" office:value="0.95952" table:style-name="c10">
            <text:p>0.95952</text:p>
          </table:table-cell>
          <table:table-cell office:value-type="float" office:value="-1.0213694062999545" table:style-name="c11">
            <text:p>-1.0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04:45</text:p>
          </table:table-cell>
          <table:table-cell office:value-type="float" office:value="0.9684839999999999" table:style-name="c10">
            <text:p>0.96848</text:p>
          </table:table-cell>
          <table:table-cell office:value-type="string" table:style-name="c10">
            <text:p>2026-04-26 13:45</text:p>
          </table:table-cell>
          <table:table-cell office:value-type="float" office:value="0.9785105000000001" table:style-name="c10">
            <text:p>0.97851</text:p>
          </table:table-cell>
          <table:table-cell office:value-type="float" office:value="0.8333082952842075" table:style-name="c12">
            <text:p>+0.8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16:00</text:p>
          </table:table-cell>
          <table:table-cell office:value-type="float" office:value="0.9934964999999999" table:style-name="c10">
            <text:p>0.9935</text:p>
          </table:table-cell>
          <table:table-cell office:value-type="string" table:style-name="c10">
            <text:p>2026-04-26 21:45</text:p>
          </table:table-cell>
          <table:table-cell office:value-type="float" office:value="0.9825085" table:style-name="c10">
            <text:p>0.98251</text:p>
          </table:table-cell>
          <table:table-cell office:value-type="float" office:value="-1.303681944677193" table:style-name="c11">
            <text:p>-1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03:45</text:p>
          </table:table-cell>
          <table:table-cell office:value-type="float" office:value="0.9874934999999999" table:style-name="c10">
            <text:p>0.98749</text:p>
          </table:table-cell>
          <table:table-cell office:value-type="string" table:style-name="c10">
            <text:p>2026-04-29 12:15</text:p>
          </table:table-cell>
          <table:table-cell office:value-type="float" office:value="0.9815090000000001" table:style-name="c10">
            <text:p>0.98151</text:p>
          </table:table-cell>
          <table:table-cell office:value-type="float" office:value="-0.8047178529276167" table:style-name="c11">
            <text:p>-0.8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8:00</text:p>
          </table:table-cell>
          <table:table-cell office:value-type="float" office:value="0.9844919999999999" table:style-name="c10">
            <text:p>0.98449</text:p>
          </table:table-cell>
          <table:table-cell office:value-type="string" table:style-name="c10">
            <text:p>2026-04-29 18:15</text:p>
          </table:table-cell>
          <table:table-cell office:value-type="float" office:value="0.955522" table:style-name="c10">
            <text:p>0.95552</text:p>
          </table:table-cell>
          <table:table-cell office:value-type="float" office:value="-3.136652047756605" table:style-name="c11">
            <text:p>-3.1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20:45</text:p>
          </table:table-cell>
          <table:table-cell office:value-type="float" office:value="0.9834915" table:style-name="c10">
            <text:p>0.98349</text:p>
          </table:table-cell>
          <table:table-cell office:value-type="string" table:style-name="c10">
            <text:p>2026-04-30 05:45</text:p>
          </table:table-cell>
          <table:table-cell office:value-type="float" office:value="0.9995" table:style-name="c10">
            <text:p>0.9995</text:p>
          </table:table-cell>
          <table:table-cell office:value-type="float" office:value="1.4245674212741255" table:style-name="c12">
            <text:p>+1.4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02:00</text:p>
          </table:table-cell>
          <table:table-cell office:value-type="float" office:value="1.022511" table:style-name="c10">
            <text:p>1.0225</text:p>
          </table:table-cell>
          <table:table-cell office:value-type="string" table:style-name="c10">
            <text:p>2026-05-01 09:30</text:p>
          </table:table-cell>
          <table:table-cell office:value-type="float" office:value="1.021489" table:style-name="c10">
            <text:p>1.0215</text:p>
          </table:table-cell>
          <table:table-cell office:value-type="float" office:value="-0.2996502248875488" table:style-name="c11">
            <text:p>-0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01:15</text:p>
          </table:table-cell>
          <table:table-cell office:value-type="float" office:value="1.0095044999999998" table:style-name="c10">
            <text:p>1.0095</text:p>
          </table:table-cell>
          <table:table-cell office:value-type="string" table:style-name="c10">
            <text:p>2026-05-02 04:30</text:p>
          </table:table-cell>
          <table:table-cell office:value-type="float" office:value="0.9975010000000001" table:style-name="c10">
            <text:p>0.9975</text:p>
          </table:table-cell>
          <table:table-cell office:value-type="float" office:value="-1.3865717784318665" table:style-name="c11">
            <text:p>-1.4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1:45</text:p>
          </table:table-cell>
          <table:table-cell office:value-type="float" office:value="1.0005" table:style-name="c10">
            <text:p>1.0005</text:p>
          </table:table-cell>
          <table:table-cell office:value-type="string" table:style-name="c10">
            <text:p>2026-05-06 13:30</text:p>
          </table:table-cell>
          <table:table-cell office:value-type="float" office:value="1.021489" table:style-name="c10">
            <text:p>1.0215</text:p>
          </table:table-cell>
          <table:table-cell office:value-type="float" office:value="1.8937574701649362" table:style-name="c12">
            <text:p>+1.9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4:30</text:p>
          </table:table-cell>
          <table:table-cell office:value-type="float" office:value="1.0155074999999998" table:style-name="c10">
            <text:p>1.0155</text:p>
          </table:table-cell>
          <table:table-cell office:value-type="string" table:style-name="c10">
            <text:p>2026-05-07 04:45</text:p>
          </table:table-cell>
          <table:table-cell office:value-type="float" office:value="1.0124935" table:style-name="c10">
            <text:p>1.0125</text:p>
          </table:table-cell>
          <table:table-cell office:value-type="float" office:value="-0.4961041160700286" table:style-name="c11">
            <text:p>-0.5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18:15</text:p>
          </table:table-cell>
          <table:table-cell office:value-type="float" office:value="1.0245119999999999" table:style-name="c10">
            <text:p>1.0245</text:p>
          </table:table-cell>
          <table:table-cell office:value-type="string" table:style-name="c10">
            <text:p>2026-05-07 22:45</text:p>
          </table:table-cell>
          <table:table-cell office:value-type="float" office:value="1.015492" table:style-name="c10">
            <text:p>1.0155</text:p>
          </table:table-cell>
          <table:table-cell office:value-type="float" office:value="-1.0785592075056138" table:style-name="c11">
            <text:p>-1.1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2:00</text:p>
          </table:table-cell>
          <table:table-cell office:value-type="float" office:value="1.062531" table:style-name="c10">
            <text:p>1.0625</text:p>
          </table:table-cell>
          <table:table-cell office:value-type="string" table:style-name="c10">
            <text:p>2026-05-09 05:00</text:p>
          </table:table-cell>
          <table:table-cell office:value-type="float" office:value="1.1174410000000001" table:style-name="c10">
            <text:p>1.1174</text:p>
          </table:table-cell>
          <table:table-cell office:value-type="float" office:value="4.9576186898076635" table:style-name="c12">
            <text:p>+5.0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17:30</text:p>
          </table:table-cell>
          <table:table-cell office:value-type="float" office:value="1.1155575" table:style-name="c10">
            <text:p>1.1156</text:p>
          </table:table-cell>
          <table:table-cell office:value-type="string" table:style-name="c10">
            <text:p>2026-05-09 23:30</text:p>
          </table:table-cell>
          <table:table-cell office:value-type="float" office:value="1.1044475" table:style-name="c10">
            <text:p>1.1044</text:p>
          </table:table-cell>
          <table:table-cell office:value-type="float" office:value="-1.1938237654715134" table:style-name="c11">
            <text:p>-1.2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6:45</text:p>
          </table:table-cell>
          <table:table-cell office:value-type="float" office:value="1.1415705" table:style-name="c10">
            <text:p>1.1416</text:p>
          </table:table-cell>
          <table:table-cell office:value-type="string" table:style-name="c10">
            <text:p>2026-05-10 22:00</text:p>
          </table:table-cell>
          <table:table-cell office:value-type="float" office:value="1.1324335" table:style-name="c10">
            <text:p>1.1324</text:p>
          </table:table-cell>
          <table:table-cell office:value-type="float" office:value="-0.998688610690257" table:style-name="c11">
            <text:p>-1.0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06:30</text:p>
          </table:table-cell>
          <table:table-cell office:value-type="float" office:value="1.1375685" table:style-name="c10">
            <text:p>1.1376</text:p>
          </table:table-cell>
          <table:table-cell office:value-type="string" table:style-name="c10">
            <text:p>2026-05-11 07:15</text:p>
          </table:table-cell>
          <table:table-cell office:value-type="float" office:value="1.1234380000000002" table:style-name="c10">
            <text:p>1.1234</text:p>
          </table:table-cell>
          <table:table-cell office:value-type="float" office:value="-1.4395838634772118" table:style-name="c11">
            <text:p>-1.4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10:15</text:p>
          </table:table-cell>
          <table:table-cell office:value-type="float" office:value="1.1335665" table:style-name="c10">
            <text:p>1.1336</text:p>
          </table:table-cell>
          <table:table-cell office:value-type="string" table:style-name="c10">
            <text:p>2026-05-11 12:15</text:p>
          </table:table-cell>
          <table:table-cell office:value-type="float" office:value="1.1164415" table:style-name="c10">
            <text:p>1.1164</text:p>
          </table:table-cell>
          <table:table-cell office:value-type="float" office:value="-1.7075986771397877" table:style-name="c11">
            <text:p>-1.7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2:30</text:p>
          </table:table-cell>
          <table:table-cell office:value-type="float" office:value="0.9624809999999999" table:style-name="c10">
            <text:p>0.96248</text:p>
          </table:table-cell>
          <table:table-cell office:value-type="string" table:style-name="c10">
            <text:p>2026-05-21 07:00</text:p>
          </table:table-cell>
          <table:table-cell office:value-type="float" office:value="0.9575210000000001" table:style-name="c10">
            <text:p>0.95752</text:p>
          </table:table-cell>
          <table:table-cell office:value-type="float" office:value="-0.7142046938069302" table:style-name="c11">
            <text:p>-0.7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8:15</text:p>
          </table:table-cell>
          <table:table-cell office:value-type="float" office:value="0.9704849999999999" table:style-name="c10">
            <text:p>0.97048</text:p>
          </table:table-cell>
          <table:table-cell office:value-type="string" table:style-name="c10">
            <text:p>2026-05-21 10:15</text:p>
          </table:table-cell>
          <table:table-cell office:value-type="float" office:value="0.9585205" table:style-name="c10">
            <text:p>0.95852</text:p>
          </table:table-cell>
          <table:table-cell office:value-type="float" office:value="-1.4302727481104727" table:style-name="c11">
            <text:p>-1.4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5:30</text:p>
          </table:table-cell>
          <table:table-cell office:value-type="float" office:value="0.9614805" table:style-name="c10">
            <text:p>0.96148</text:p>
          </table:table-cell>
          <table:table-cell office:value-type="string" table:style-name="c10">
            <text:p>2026-05-22 00:15</text:p>
          </table:table-cell>
          <table:table-cell office:value-type="float" office:value="0.969515" table:style-name="c10">
            <text:p>0.96952</text:p>
          </table:table-cell>
          <table:table-cell office:value-type="float" office:value="0.6340679311748865" table:style-name="c12">
            <text:p>+0.6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04:30</text:p>
          </table:table-cell>
          <table:table-cell office:value-type="float" office:value="0.9894944999999999" table:style-name="c10">
            <text:p>0.98949</text:p>
          </table:table-cell>
          <table:table-cell office:value-type="string" table:style-name="c10">
            <text:p>2026-05-22 07:15</text:p>
          </table:table-cell>
          <table:table-cell office:value-type="float" office:value="0.9745125" table:style-name="c10">
            <text:p>0.97451</text:p>
          </table:table-cell>
          <table:table-cell office:value-type="float" office:value="-1.7109797464766041" table:style-name="c11">
            <text:p>-1.7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1:00</text:p>
          </table:table-cell>
          <table:table-cell office:value-type="float" office:value="0.9684839999999999" table:style-name="c10">
            <text:p>0.96848</text:p>
          </table:table-cell>
          <table:table-cell office:value-type="string" table:style-name="c10">
            <text:p>2026-05-25 21:00</text:p>
          </table:table-cell>
          <table:table-cell office:value-type="float" office:value="0.9735130000000001" table:style-name="c10">
            <text:p>0.97351</text:p>
          </table:table-cell>
          <table:table-cell office:value-type="float" office:value="0.31832714975159604" table:style-name="c12">
            <text:p>+0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04:30</text:p>
          </table:table-cell>
          <table:table-cell office:value-type="float" office:value="0.9654824999999999" table:style-name="c10">
            <text:p>0.96548</text:p>
          </table:table-cell>
          <table:table-cell office:value-type="string" table:style-name="c10">
            <text:p>2026-05-26 04:45</text:p>
          </table:table-cell>
          <table:table-cell office:value-type="float" office:value="0.9665165" table:style-name="c10">
            <text:p>0.96652</text:p>
          </table:table-cell>
          <table:table-cell office:value-type="float" office:value="-0.09301737561270285" table:style-name="c11">
            <text:p>-0.1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05:00</text:p>
          </table:table-cell>
          <table:table-cell office:value-type="float" office:value="0.9684839999999999" table:style-name="c10">
            <text:p>0.96848</text:p>
          </table:table-cell>
          <table:table-cell office:value-type="string" table:style-name="c10">
            <text:p>2026-05-26 16:15</text:p>
          </table:table-cell>
          <table:table-cell office:value-type="float" office:value="0.97951" table:style-name="c10">
            <text:p>0.97951</text:p>
          </table:table-cell>
          <table:table-cell office:value-type="float" office:value="0.9363045243907075" table:style-name="c12">
            <text:p>+0.9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03:30</text:p>
          </table:table-cell>
          <table:table-cell office:value-type="float" office:value="0.9594794999999999" table:style-name="c10">
            <text:p>0.95948</text:p>
          </table:table-cell>
          <table:table-cell office:value-type="string" table:style-name="c10">
            <text:p>2026-06-01 05:30</text:p>
          </table:table-cell>
          <table:table-cell office:value-type="float" office:value="0.937531" table:style-name="c10">
            <text:p>0.93753</text:p>
          </table:table-cell>
          <table:table-cell office:value-type="float" office:value="-2.4828695630287" table:style-name="c11">
            <text:p>-2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09:30</text:p>
          </table:table-cell>
          <table:table-cell office:value-type="float" office:value="0.1042521" table:style-name="c1">
            <text:p>0.10425</text:p>
          </table:table-cell>
          <table:table-cell office:value-type="string" table:style-name="c1">
            <text:p>2026-03-05 16:00</text:p>
          </table:table-cell>
          <table:table-cell office:value-type="float" office:value="0.10374810000000001" table:style-name="c1">
            <text:p>0.10375</text:p>
          </table:table-cell>
          <table:table-cell office:value-type="float" office:value="-0.6823770954254127" table:style-name="c14">
            <text:p>-0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9:15</text:p>
          </table:table-cell>
          <table:table-cell office:value-type="float" office:value="0.10355174999999998" table:style-name="c1">
            <text:p>0.10355</text:p>
          </table:table-cell>
          <table:table-cell office:value-type="string" table:style-name="c1">
            <text:p>2026-03-05 19:30</text:p>
          </table:table-cell>
          <table:table-cell office:value-type="float" office:value="0.1029485" table:style-name="c1">
            <text:p>0.10295</text:p>
          </table:table-cell>
          <table:table-cell office:value-type="float" office:value="-0.7812944266996635" table:style-name="c14">
            <text:p>-0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6:30</text:p>
          </table:table-cell>
          <table:table-cell office:value-type="float" office:value="0.09954975" table:style-name="c1">
            <text:p>0.09955</text:p>
          </table:table-cell>
          <table:table-cell office:value-type="string" table:style-name="c1">
            <text:p>2026-03-09 19:15</text:p>
          </table:table-cell>
          <table:table-cell office:value-type="float" office:value="0.09805095000000001" table:style-name="c1">
            <text:p>0.098051</text:p>
          </table:table-cell>
          <table:table-cell office:value-type="float" office:value="-1.702469216698177" table:style-name="c14">
            <text:p>-1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30</text:p>
          </table:table-cell>
          <table:table-cell office:value-type="float" office:value="0.10095045" table:style-name="c1">
            <text:p>0.10095</text:p>
          </table:table-cell>
          <table:table-cell office:value-type="string" table:style-name="c1">
            <text:p>2026-03-09 22:30</text:p>
          </table:table-cell>
          <table:table-cell office:value-type="float" office:value="0.0983508" table:style-name="c1">
            <text:p>0.098351</text:p>
          </table:table-cell>
          <table:table-cell office:value-type="float" office:value="-2.7699264829428527" table:style-name="c14">
            <text:p>-2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2:45</text:p>
          </table:table-cell>
          <table:table-cell office:value-type="float" office:value="0.1004502" table:style-name="c1">
            <text:p>0.10045</text:p>
          </table:table-cell>
          <table:table-cell office:value-type="string" table:style-name="c1">
            <text:p>2026-03-10 12:30</text:p>
          </table:table-cell>
          <table:table-cell office:value-type="float" office:value="0.09945025" table:style-name="c1">
            <text:p>0.09945</text:p>
          </table:table-cell>
          <table:table-cell office:value-type="float" office:value="-1.193378459923422" table:style-name="c14">
            <text:p>-1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07:15</text:p>
          </table:table-cell>
          <table:table-cell office:value-type="float" office:value="0.09864929999999998" table:style-name="c1">
            <text:p>0.098649</text:p>
          </table:table-cell>
          <table:table-cell office:value-type="string" table:style-name="c1">
            <text:p>2026-03-11 20:45</text:p>
          </table:table-cell>
          <table:table-cell office:value-type="float" office:value="0.10044975000000002" table:style-name="c1">
            <text:p>0.10045</text:p>
          </table:table-cell>
          <table:table-cell office:value-type="float" office:value="1.6215532697647417" table:style-name="c13">
            <text:p>+1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0:00</text:p>
          </table:table-cell>
          <table:table-cell office:value-type="float" office:value="0.0994497" table:style-name="c1">
            <text:p>0.09945</text:p>
          </table:table-cell>
          <table:table-cell office:value-type="string" table:style-name="c1">
            <text:p>2026-03-12 12:15</text:p>
          </table:table-cell>
          <table:table-cell office:value-type="float" office:value="0.09875060000000001" table:style-name="c1">
            <text:p>0.098751</text:p>
          </table:table-cell>
          <table:table-cell office:value-type="float" office:value="-0.9014632013973012" table:style-name="c14">
            <text:p>-0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0.1024512" table:style-name="c1">
            <text:p>0.10245</text:p>
          </table:table-cell>
          <table:table-cell office:value-type="string" table:style-name="c1">
            <text:p>2026-03-13 16:30</text:p>
          </table:table-cell>
          <table:table-cell office:value-type="float" office:value="0.103948" table:style-name="c1">
            <text:p>0.10395</text:p>
          </table:table-cell>
          <table:table-cell office:value-type="float" office:value="1.2581677403485703" table:style-name="c13">
            <text:p>+1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0:30</text:p>
          </table:table-cell>
          <table:table-cell office:value-type="float" office:value="0.10235115" table:style-name="c1">
            <text:p>0.10235</text:p>
          </table:table-cell>
          <table:table-cell office:value-type="string" table:style-name="c1">
            <text:p>2026-03-15 13:45</text:p>
          </table:table-cell>
          <table:table-cell office:value-type="float" office:value="0.10164915000000001" table:style-name="c1">
            <text:p>0.10165</text:p>
          </table:table-cell>
          <table:table-cell office:value-type="float" office:value="-0.8844030094923072" table:style-name="c14">
            <text:p>-0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8:15</text:p>
          </table:table-cell>
          <table:table-cell office:value-type="float" office:value="0.1022511" table:style-name="c1">
            <text:p>0.10225</text:p>
          </table:table-cell>
          <table:table-cell office:value-type="string" table:style-name="c1">
            <text:p>2026-03-16 11:30</text:p>
          </table:table-cell>
          <table:table-cell office:value-type="float" office:value="0.1073463" table:style-name="c1">
            <text:p>0.10735</text:p>
          </table:table-cell>
          <table:table-cell office:value-type="float" office:value="4.773166006331464" table:style-name="c13">
            <text:p>+4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1:15</text:p>
          </table:table-cell>
          <table:table-cell office:value-type="float" office:value="0.1102551" table:style-name="c1">
            <text:p>0.11026</text:p>
          </table:table-cell>
          <table:table-cell office:value-type="string" table:style-name="c1">
            <text:p>2026-03-17 03:00</text:p>
          </table:table-cell>
          <table:table-cell office:value-type="float" office:value="0.1097451" table:style-name="c1">
            <text:p>0.10975</text:p>
          </table:table-cell>
          <table:table-cell office:value-type="float" office:value="-0.6615389718026665" table:style-name="c14">
            <text:p>-0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14:45</text:p>
          </table:table-cell>
          <table:table-cell office:value-type="float" office:value="0.10845419999999999" table:style-name="c1">
            <text:p>0.10845</text:p>
          </table:table-cell>
          <table:table-cell office:value-type="string" table:style-name="c1">
            <text:p>2026-03-17 15:00</text:p>
          </table:table-cell>
          <table:table-cell office:value-type="float" office:value="0.1083458" table:style-name="c1">
            <text:p>0.10835</text:p>
          </table:table-cell>
          <table:table-cell office:value-type="float" office:value="-0.2996502248875377" table:style-name="c14">
            <text:p>-0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0.09274635" table:style-name="c1">
            <text:p>0.092746</text:p>
          </table:table-cell>
          <table:table-cell office:value-type="string" table:style-name="c1">
            <text:p>2026-03-30 15:15</text:p>
          </table:table-cell>
          <table:table-cell office:value-type="float" office:value="0.09215390000000001" table:style-name="c1">
            <text:p>0.092154</text:p>
          </table:table-cell>
          <table:table-cell office:value-type="float" office:value="-0.8374083142894562" table:style-name="c14">
            <text:p>-0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21:15</text:p>
          </table:table-cell>
          <table:table-cell office:value-type="float" office:value="0.0912456" table:style-name="c1">
            <text:p>0.091246</text:p>
          </table:table-cell>
          <table:table-cell office:value-type="string" table:style-name="c1">
            <text:p>2026-03-30 21:30</text:p>
          </table:table-cell>
          <table:table-cell office:value-type="float" office:value="0.09145425" table:style-name="c1">
            <text:p>0.091454</text:p>
          </table:table-cell>
          <table:table-cell office:value-type="float" office:value="0.02831145200425933" table:style-name="c13">
            <text:p>+0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21:45</text:p>
          </table:table-cell>
          <table:table-cell office:value-type="float" office:value="0.0916458" table:style-name="c1">
            <text:p>0.091646</text:p>
          </table:table-cell>
          <table:table-cell office:value-type="string" table:style-name="c1">
            <text:p>2026-03-30 22:00</text:p>
          </table:table-cell>
          <table:table-cell office:value-type="float" office:value="0.09145425" table:style-name="c1">
            <text:p>0.091454</text:p>
          </table:table-cell>
          <table:table-cell office:value-type="float" office:value="-0.40849340149794466" table:style-name="c14">
            <text:p>-0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2:00</text:p>
          </table:table-cell>
          <table:table-cell office:value-type="float" office:value="0.09244619999999999" table:style-name="c1">
            <text:p>0.092446</text:p>
          </table:table-cell>
          <table:table-cell office:value-type="string" table:style-name="c1">
            <text:p>2026-03-31 12:15</text:p>
          </table:table-cell>
          <table:table-cell office:value-type="float" office:value="0.09205395000000001" table:style-name="c1">
            <text:p>0.092054</text:p>
          </table:table-cell>
          <table:table-cell office:value-type="float" office:value="-0.6233526592223204" table:style-name="c14">
            <text:p>-0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3:15</text:p>
          </table:table-cell>
          <table:table-cell office:value-type="float" office:value="0.09244619999999999" table:style-name="c1">
            <text:p>0.092446</text:p>
          </table:table-cell>
          <table:table-cell office:value-type="string" table:style-name="c1">
            <text:p>2026-03-31 16:00</text:p>
          </table:table-cell>
          <table:table-cell office:value-type="float" office:value="0.0913543" table:style-name="c1">
            <text:p>0.091354</text:p>
          </table:table-cell>
          <table:table-cell office:value-type="float" office:value="-1.3786583393368135" table:style-name="c14">
            <text:p>-1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30</text:p>
          </table:table-cell>
          <table:table-cell office:value-type="float" office:value="0.09474735000000001" table:style-name="c1">
            <text:p>0.094747</text:p>
          </table:table-cell>
          <table:table-cell office:value-type="string" table:style-name="c1">
            <text:p>2026-04-01 14:00</text:p>
          </table:table-cell>
          <table:table-cell office:value-type="float" office:value="0.09445275" table:style-name="c1">
            <text:p>0.094453</text:p>
          </table:table-cell>
          <table:table-cell office:value-type="float" office:value="-0.5102106256797745" table:style-name="c14">
            <text:p>-0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09:15</text:p>
          </table:table-cell>
          <table:table-cell office:value-type="float" office:value="0.09434714999999999" table:style-name="c1">
            <text:p>0.094347</text:p>
          </table:table-cell>
          <table:table-cell office:value-type="string" table:style-name="c1">
            <text:p>2026-04-03 12:45</text:p>
          </table:table-cell>
          <table:table-cell office:value-type="float" office:value="0.0933533" table:style-name="c1">
            <text:p>0.093353</text:p>
          </table:table-cell>
          <table:table-cell office:value-type="float" office:value="-1.2511912089554378" table:style-name="c14">
            <text:p>-1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9:15</text:p>
          </table:table-cell>
          <table:table-cell office:value-type="float" office:value="0.09374685" table:style-name="c1">
            <text:p>0.093747</text:p>
          </table:table-cell>
          <table:table-cell office:value-type="string" table:style-name="c1">
            <text:p>2026-04-04 22:00</text:p>
          </table:table-cell>
          <table:table-cell office:value-type="float" office:value="0.09265365" table:style-name="c1">
            <text:p>0.092654</text:p>
          </table:table-cell>
          <table:table-cell office:value-type="float" office:value="-1.3636881093604836" table:style-name="c14">
            <text:p>-1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8:15</text:p>
          </table:table-cell>
          <table:table-cell office:value-type="float" office:value="0.09634815" table:style-name="c1">
            <text:p>0.096348</text:p>
          </table:table-cell>
          <table:table-cell office:value-type="string" table:style-name="c1">
            <text:p>2026-04-06 14:30</text:p>
          </table:table-cell>
          <table:table-cell office:value-type="float" office:value="0.09675160000000001" table:style-name="c1">
            <text:p>0.096752</text:p>
          </table:table-cell>
          <table:table-cell office:value-type="float" office:value="0.2180047583685063" table:style-name="c13">
            <text:p>+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06:00</text:p>
          </table:table-cell>
          <table:table-cell office:value-type="float" office:value="0.0942471" table:style-name="c1">
            <text:p>0.094247</text:p>
          </table:table-cell>
          <table:table-cell office:value-type="string" table:style-name="c1">
            <text:p>2026-04-07 11:15</text:p>
          </table:table-cell>
          <table:table-cell office:value-type="float" office:value="0.09425285" table:style-name="c1">
            <text:p>0.094253</text:p>
          </table:table-cell>
          <table:table-cell office:value-type="float" office:value="-0.19381121238742915" table:style-name="c14">
            <text:p>-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18:00</text:p>
          </table:table-cell>
          <table:table-cell office:value-type="float" office:value="0.09484739999999998" table:style-name="c1">
            <text:p>0.094847</text:p>
          </table:table-cell>
          <table:table-cell office:value-type="string" table:style-name="c1">
            <text:p>2026-04-08 10:45</text:p>
          </table:table-cell>
          <table:table-cell office:value-type="float" office:value="0.1023488" table:style-name="c1">
            <text:p>0.10235</text:p>
          </table:table-cell>
          <table:table-cell office:value-type="float" office:value="7.693204820374633" table:style-name="c13">
            <text:p>+7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21:15</text:p>
          </table:table-cell>
          <table:table-cell office:value-type="float" office:value="0.1038519" table:style-name="c1">
            <text:p>0.10385</text:p>
          </table:table-cell>
          <table:table-cell office:value-type="string" table:style-name="c1">
            <text:p>2026-04-09 01:15</text:p>
          </table:table-cell>
          <table:table-cell office:value-type="float" office:value="0.101949" table:style-name="c1">
            <text:p>0.10195</text:p>
          </table:table-cell>
          <table:table-cell office:value-type="float" office:value="-2.028558024455973" table:style-name="c14">
            <text:p>-2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6:00</text:p>
          </table:table-cell>
          <table:table-cell office:value-type="float" office:value="0.10395195" table:style-name="c1">
            <text:p>0.10395</text:p>
          </table:table-cell>
          <table:table-cell office:value-type="string" table:style-name="c1">
            <text:p>2026-04-10 07:30</text:p>
          </table:table-cell>
          <table:table-cell office:value-type="float" office:value="0.10914540000000002" table:style-name="c1">
            <text:p>0.10915</text:p>
          </table:table-cell>
          <table:table-cell office:value-type="float" office:value="4.786123151513766" table:style-name="c13">
            <text:p>+4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21:45</text:p>
          </table:table-cell>
          <table:table-cell office:value-type="float" office:value="0.1136568" table:style-name="c1">
            <text:p>0.11366</text:p>
          </table:table-cell>
          <table:table-cell office:value-type="string" table:style-name="c1">
            <text:p>2026-04-11 05:45</text:p>
          </table:table-cell>
          <table:table-cell office:value-type="float" office:value="0.11504245" table:style-name="c1">
            <text:p>0.11504</text:p>
          </table:table-cell>
          <table:table-cell office:value-type="float" office:value="1.0168156612274881" table:style-name="c13">
            <text:p>+1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30</text:p>
          </table:table-cell>
          <table:table-cell office:value-type="float" office:value="0.11665829999999999" table:style-name="c1">
            <text:p>0.11666</text:p>
          </table:table-cell>
          <table:table-cell office:value-type="string" table:style-name="c1">
            <text:p>2026-04-11 23:15</text:p>
          </table:table-cell>
          <table:table-cell office:value-type="float" office:value="0.1157421" table:style-name="c1">
            <text:p>0.11574</text:p>
          </table:table-cell>
          <table:table-cell office:value-type="float" office:value="-0.983700652161057" table:style-name="c14">
            <text:p>-1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2 13:15</text:p>
          </table:table-cell>
          <table:table-cell office:value-type="float" office:value="0.11195595" table:style-name="c1">
            <text:p>0.11196</text:p>
          </table:table-cell>
          <table:table-cell office:value-type="string" table:style-name="c1">
            <text:p>2026-04-12 15:15</text:p>
          </table:table-cell>
          <table:table-cell office:value-type="float" office:value="0.1107446" table:style-name="c1">
            <text:p>0.11074</text:p>
          </table:table-cell>
          <table:table-cell office:value-type="float" office:value="-1.2797251556527445" table:style-name="c14">
            <text:p>-1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2 18:15</text:p>
          </table:table-cell>
          <table:table-cell office:value-type="float" office:value="0.11295645" table:style-name="c1">
            <text:p>0.11296</text:p>
          </table:table-cell>
          <table:table-cell office:value-type="string" table:style-name="c1">
            <text:p>2026-04-12 22:15</text:p>
          </table:table-cell>
          <table:table-cell office:value-type="float" office:value="0.1109445" table:style-name="c1">
            <text:p>0.11094</text:p>
          </table:table-cell>
          <table:table-cell office:value-type="float" office:value="-1.9775126214572114" table:style-name="c14">
            <text:p>-2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6:45</text:p>
          </table:table-cell>
          <table:table-cell office:value-type="float" office:value="0.11135564999999999" table:style-name="c1">
            <text:p>0.11136</text:p>
          </table:table-cell>
          <table:table-cell office:value-type="string" table:style-name="c1">
            <text:p>2026-04-14 17:00</text:p>
          </table:table-cell>
          <table:table-cell office:value-type="float" office:value="0.11154420000000001" table:style-name="c1">
            <text:p>0.11154</text:p>
          </table:table-cell>
          <table:table-cell office:value-type="float" office:value="-0.030916128458646774" table:style-name="c14">
            <text:p>-0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7:30</text:p>
          </table:table-cell>
          <table:table-cell office:value-type="float" office:value="0.11145569999999999" table:style-name="c1">
            <text:p>0.11146</text:p>
          </table:table-cell>
          <table:table-cell office:value-type="string" table:style-name="c1">
            <text:p>2026-04-14 18:45</text:p>
          </table:table-cell>
          <table:table-cell office:value-type="float" office:value="0.11044475000000001" table:style-name="c1">
            <text:p>0.11044</text:p>
          </table:table-cell>
          <table:table-cell office:value-type="float" office:value="-1.1051288137349569" table:style-name="c14">
            <text:p>-1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1:15</text:p>
          </table:table-cell>
          <table:table-cell office:value-type="float" office:value="0.11335664999999999" table:style-name="c1">
            <text:p>0.11336</text:p>
          </table:table-cell>
          <table:table-cell office:value-type="string" table:style-name="c1">
            <text:p>2026-04-15 23:15</text:p>
          </table:table-cell>
          <table:table-cell office:value-type="float" office:value="0.1147426" table:style-name="c1">
            <text:p>0.11474</text:p>
          </table:table-cell>
          <table:table-cell office:value-type="float" office:value="1.0203014490989482" table:style-name="c13">
            <text:p>+1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5:30</text:p>
          </table:table-cell>
          <table:table-cell office:value-type="float" office:value="0.11785889999999999" table:style-name="c1">
            <text:p>0.11786</text:p>
          </table:table-cell>
          <table:table-cell office:value-type="string" table:style-name="c1">
            <text:p>2026-04-16 11:15</text:p>
          </table:table-cell>
          <table:table-cell office:value-type="float" office:value="0.11764115" table:style-name="c1">
            <text:p>0.11764</text:p>
          </table:table-cell>
          <table:table-cell office:value-type="float" office:value="-0.38428549634351716" table:style-name="c14">
            <text:p>-0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15</text:p>
          </table:table-cell>
          <table:table-cell office:value-type="float" office:value="0.1202601" table:style-name="c1">
            <text:p>0.12026</text:p>
          </table:table-cell>
          <table:table-cell office:value-type="string" table:style-name="c1">
            <text:p>2026-04-17 02:00</text:p>
          </table:table-cell>
          <table:table-cell office:value-type="float" office:value="0.1269365" table:style-name="c1">
            <text:p>0.12694</text:p>
          </table:table-cell>
          <table:table-cell office:value-type="float" office:value="5.340635785684555" table:style-name="c13">
            <text:p>+5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2:00</text:p>
          </table:table-cell>
          <table:table-cell office:value-type="float" office:value="0.13396694999999997" table:style-name="c1">
            <text:p>0.13397</text:p>
          </table:table-cell>
          <table:table-cell office:value-type="string" table:style-name="c1">
            <text:p>2026-04-17 15:45</text:p>
          </table:table-cell>
          <table:table-cell office:value-type="float" office:value="0.1309345" table:style-name="c1">
            <text:p>0.13093</text:p>
          </table:table-cell>
          <table:table-cell office:value-type="float" office:value="-2.4589557838705423" table:style-name="c14">
            <text:p>-2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6:15</text:p>
          </table:table-cell>
          <table:table-cell office:value-type="float" office:value="0.13186589999999998" table:style-name="c1">
            <text:p>0.13187</text:p>
          </table:table-cell>
          <table:table-cell office:value-type="string" table:style-name="c1">
            <text:p>2026-04-18 09:15</text:p>
          </table:table-cell>
          <table:table-cell office:value-type="float" office:value="0.13013490000000003" table:style-name="c1">
            <text:p>0.13013</text:p>
          </table:table-cell>
          <table:table-cell office:value-type="float" office:value="-1.50997313566279" table:style-name="c14">
            <text:p>-1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22:30</text:p>
          </table:table-cell>
          <table:table-cell office:value-type="float" office:value="0.12856425" table:style-name="c1">
            <text:p>0.12856</text:p>
          </table:table-cell>
          <table:table-cell office:value-type="string" table:style-name="c1">
            <text:p>2026-04-19 01:30</text:p>
          </table:table-cell>
          <table:table-cell office:value-type="float" office:value="0.1269365" table:style-name="c1">
            <text:p>0.12694</text:p>
          </table:table-cell>
          <table:table-cell office:value-type="float" office:value="-1.4634675374375017" table:style-name="c14">
            <text:p>-1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6:00</text:p>
          </table:table-cell>
          <table:table-cell office:value-type="float" office:value="0.12916455" table:style-name="c1">
            <text:p>0.12916</text:p>
          </table:table-cell>
          <table:table-cell office:value-type="string" table:style-name="c1">
            <text:p>2026-04-22 10:45</text:p>
          </table:table-cell>
          <table:table-cell office:value-type="float" office:value="0.12813590000000002" table:style-name="c1">
            <text:p>0.12814</text:p>
          </table:table-cell>
          <table:table-cell office:value-type="float" office:value="-0.9946952659224073" table:style-name="c14">
            <text:p>-1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8:00</text:p>
          </table:table-cell>
          <table:table-cell office:value-type="float" office:value="0.13186589999999998" table:style-name="c1">
            <text:p>0.13187</text:p>
          </table:table-cell>
          <table:table-cell office:value-type="string" table:style-name="c1">
            <text:p>2026-04-23 00:00</text:p>
          </table:table-cell>
          <table:table-cell office:value-type="float" office:value="0.1285357" table:style-name="c1">
            <text:p>0.12854</text:p>
          </table:table-cell>
          <table:table-cell office:value-type="float" office:value="-2.7202960464380643" table:style-name="c14">
            <text:p>-2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7:15</text:p>
          </table:table-cell>
          <table:table-cell office:value-type="float" office:value="0.1270635" table:style-name="c1">
            <text:p>0.12706</text:p>
          </table:table-cell>
          <table:table-cell office:value-type="string" table:style-name="c1">
            <text:p>2026-04-23 09:15</text:p>
          </table:table-cell>
          <table:table-cell office:value-type="float" office:value="0.1253373" table:style-name="c1">
            <text:p>0.12534</text:p>
          </table:table-cell>
          <table:table-cell office:value-type="float" office:value="-1.555717623629116" table:style-name="c14">
            <text:p>-1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0:15</text:p>
          </table:table-cell>
          <table:table-cell office:value-type="float" office:value="0.1288644" table:style-name="c1">
            <text:p>0.12886</text:p>
          </table:table-cell>
          <table:table-cell office:value-type="string" table:style-name="c1">
            <text:p>2026-04-24 05:00</text:p>
          </table:table-cell>
          <table:table-cell office:value-type="float" office:value="0.12823585" table:style-name="c1">
            <text:p>0.12824</text:p>
          </table:table-cell>
          <table:table-cell office:value-type="float" office:value="-0.6866857442008545" table:style-name="c14">
            <text:p>-0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2:15</text:p>
          </table:table-cell>
          <table:table-cell office:value-type="float" office:value="0.1308654" table:style-name="c1">
            <text:p>0.13087</text:p>
          </table:table-cell>
          <table:table-cell office:value-type="string" table:style-name="c1">
            <text:p>2026-04-24 18:00</text:p>
          </table:table-cell>
          <table:table-cell office:value-type="float" office:value="0.12993500000000002" table:style-name="c1">
            <text:p>0.12994</text:p>
          </table:table-cell>
          <table:table-cell office:value-type="float" office:value="-0.9094382969065617" table:style-name="c14">
            <text:p>-0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2:15</text:p>
          </table:table-cell>
          <table:table-cell office:value-type="float" office:value="0.132066" table:style-name="c1">
            <text:p>0.13207</text:p>
          </table:table-cell>
          <table:table-cell office:value-type="string" table:style-name="c1">
            <text:p>2026-04-25 09:30</text:p>
          </table:table-cell>
          <table:table-cell office:value-type="float" office:value="0.13103445" table:style-name="c1">
            <text:p>0.13103</text:p>
          </table:table-cell>
          <table:table-cell office:value-type="float" office:value="-0.9794253369905803" table:style-name="c14">
            <text:p>-1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23:15</text:p>
          </table:table-cell>
          <table:table-cell office:value-type="float" office:value="0.12916455" table:style-name="c1">
            <text:p>0.12916</text:p>
          </table:table-cell>
          <table:table-cell office:value-type="string" table:style-name="c1">
            <text:p>2026-04-26 01:30</text:p>
          </table:table-cell>
          <table:table-cell office:value-type="float" office:value="0.12843575000000002" table:style-name="c1">
            <text:p>0.12844</text:p>
          </table:table-cell>
          <table:table-cell office:value-type="float" office:value="-0.7630135855774434" table:style-name="c14">
            <text:p>-0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5:30</text:p>
          </table:table-cell>
          <table:table-cell office:value-type="float" office:value="0.1314657" table:style-name="c1">
            <text:p>0.13147</text:p>
          </table:table-cell>
          <table:table-cell office:value-type="string" table:style-name="c1">
            <text:p>2026-04-26 13:00</text:p>
          </table:table-cell>
          <table:table-cell office:value-type="float" office:value="0.1303348" table:style-name="c1">
            <text:p>0.13033</text:p>
          </table:table-cell>
          <table:table-cell office:value-type="float" office:value="-1.0584047893861137" table:style-name="c14">
            <text:p>-1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1:15</text:p>
          </table:table-cell>
          <table:table-cell office:value-type="float" office:value="0.13096544999999998" table:style-name="c1">
            <text:p>0.13097</text:p>
          </table:table-cell>
          <table:table-cell office:value-type="string" table:style-name="c1">
            <text:p>2026-04-27 05:30</text:p>
          </table:table-cell>
          <table:table-cell office:value-type="float" office:value="0.12763615" table:style-name="c1">
            <text:p>0.12764</text:p>
          </table:table-cell>
          <table:table-cell office:value-type="float" office:value="-2.7369391422317757" table:style-name="c14">
            <text:p>-2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0.1310655" table:style-name="c1">
            <text:p>0.13107</text:p>
          </table:table-cell>
          <table:table-cell office:value-type="string" table:style-name="c1">
            <text:p>2026-04-29 13:00</text:p>
          </table:table-cell>
          <table:table-cell office:value-type="float" office:value="0.12793600000000002" table:style-name="c1">
            <text:p>0.12794</text:p>
          </table:table-cell>
          <table:table-cell office:value-type="float" office:value="-2.5828643418748354" table:style-name="c14">
            <text:p>-2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30 11:15</text:p>
          </table:table-cell>
          <table:table-cell office:value-type="float" office:value="0.12816404999999997" table:style-name="c1">
            <text:p>0.12816</text:p>
          </table:table-cell>
          <table:table-cell office:value-type="string" table:style-name="c1">
            <text:p>2026-04-30 14:30</text:p>
          </table:table-cell>
          <table:table-cell office:value-type="float" office:value="0.12613690000000002" table:style-name="c1">
            <text:p>0.12614</text:p>
          </table:table-cell>
          <table:table-cell office:value-type="float" office:value="-1.7784220014114394" table:style-name="c14">
            <text:p>-1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9:00</text:p>
          </table:table-cell>
          <table:table-cell office:value-type="float" office:value="0.12416205" table:style-name="c1">
            <text:p>0.12416</text:p>
          </table:table-cell>
          <table:table-cell office:value-type="string" table:style-name="c1">
            <text:p>2026-05-06 14:30</text:p>
          </table:table-cell>
          <table:table-cell office:value-type="float" office:value="0.1233383" table:style-name="c1">
            <text:p>0.12334</text:p>
          </table:table-cell>
          <table:table-cell office:value-type="float" office:value="-0.862021255045331" table:style-name="c14">
            <text:p>-0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6:45</text:p>
          </table:table-cell>
          <table:table-cell office:value-type="float" office:value="0.12486239999999998" table:style-name="c1">
            <text:p>0.12486</text:p>
          </table:table-cell>
          <table:table-cell office:value-type="string" table:style-name="c1">
            <text:p>2026-05-06 18:30</text:p>
          </table:table-cell>
          <table:table-cell office:value-type="float" office:value="0.12353820000000001" table:style-name="c1">
            <text:p>0.12354</text:p>
          </table:table-cell>
          <table:table-cell office:value-type="float" office:value="-1.258307434263617" table:style-name="c14">
            <text:p>-1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20:15</text:p>
          </table:table-cell>
          <table:table-cell office:value-type="float" office:value="0.1258629" table:style-name="c1">
            <text:p>0.12586</text:p>
          </table:table-cell>
          <table:table-cell office:value-type="string" table:style-name="c1">
            <text:p>2026-05-07 01:30</text:p>
          </table:table-cell>
          <table:table-cell office:value-type="float" office:value="0.1251374" table:style-name="c1">
            <text:p>0.12514</text:p>
          </table:table-cell>
          <table:table-cell office:value-type="float" office:value="-0.7751685862950941" table:style-name="c14">
            <text:p>-0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9:30</text:p>
          </table:table-cell>
          <table:table-cell office:value-type="float" office:value="0.1346673" table:style-name="c1">
            <text:p>0.13467</text:p>
          </table:table-cell>
          <table:table-cell office:value-type="string" table:style-name="c1">
            <text:p>2026-05-09 01:45</text:p>
          </table:table-cell>
          <table:table-cell office:value-type="float" office:value="0.1427286" table:style-name="c1">
            <text:p>0.14273</text:p>
          </table:table-cell>
          <table:table-cell office:value-type="float" office:value="5.774219523670565" table:style-name="c13">
            <text:p>+5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2:30</text:p>
          </table:table-cell>
          <table:table-cell office:value-type="float" office:value="0.1450725" table:style-name="c1">
            <text:p>0.14507</text:p>
          </table:table-cell>
          <table:table-cell office:value-type="string" table:style-name="c1">
            <text:p>2026-05-09 09:45</text:p>
          </table:table-cell>
          <table:table-cell office:value-type="float" office:value="0.1425287" table:style-name="c1">
            <text:p>0.14253</text:p>
          </table:table-cell>
          <table:table-cell office:value-type="float" office:value="-1.9498629108204435" table:style-name="c14">
            <text:p>-1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7:45</text:p>
          </table:table-cell>
          <table:table-cell office:value-type="float" office:value="0.14117055" table:style-name="c1">
            <text:p>0.14117</text:p>
          </table:table-cell>
          <table:table-cell office:value-type="string" table:style-name="c1">
            <text:p>2026-05-10 15:00</text:p>
          </table:table-cell>
          <table:table-cell office:value-type="float" office:value="0.14152920000000002" table:style-name="c1">
            <text:p>0.14153</text:p>
          </table:table-cell>
          <table:table-cell office:value-type="float" office:value="0.053646549652186515" table:style-name="c13">
            <text:p>+0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6:45</text:p>
          </table:table-cell>
          <table:table-cell office:value-type="float" office:value="0.1438719" table:style-name="c1">
            <text:p>0.14387</text:p>
          </table:table-cell>
          <table:table-cell office:value-type="string" table:style-name="c1">
            <text:p>2026-05-10 21:00</text:p>
          </table:table-cell>
          <table:table-cell office:value-type="float" office:value="0.1407296" table:style-name="c1">
            <text:p>0.14073</text:p>
          </table:table-cell>
          <table:table-cell office:value-type="float" office:value="-2.3796297055922566" table:style-name="c14">
            <text:p>-2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3:00</text:p>
          </table:table-cell>
          <table:table-cell office:value-type="float" office:value="0.1448724" table:style-name="c1">
            <text:p>0.14487</text:p>
          </table:table-cell>
          <table:table-cell office:value-type="string" table:style-name="c1">
            <text:p>2026-05-11 00:45</text:p>
          </table:table-cell>
          <table:table-cell office:value-type="float" office:value="0.14282855" table:style-name="c1">
            <text:p>0.14283</text:p>
          </table:table-cell>
          <table:table-cell office:value-type="float" office:value="-1.6078730465223345" table:style-name="c14">
            <text:p>-1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9:15</text:p>
          </table:table-cell>
          <table:table-cell office:value-type="float" office:value="0.1428714" table:style-name="c1">
            <text:p>0.14287</text:p>
          </table:table-cell>
          <table:table-cell office:value-type="string" table:style-name="c1">
            <text:p>2026-05-11 13:00</text:p>
          </table:table-cell>
          <table:table-cell office:value-type="float" office:value="0.14162915" table:style-name="c1">
            <text:p>0.14163</text:p>
          </table:table-cell>
          <table:table-cell office:value-type="float" office:value="-1.067650118113217" table:style-name="c14">
            <text:p>-1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7:00</text:p>
          </table:table-cell>
          <table:table-cell office:value-type="float" office:value="0.10995495" table:style-name="c1">
            <text:p>0.10995</text:p>
          </table:table-cell>
          <table:table-cell office:value-type="string" table:style-name="c1">
            <text:p>2026-05-25 21:00</text:p>
          </table:table-cell>
          <table:table-cell office:value-type="float" office:value="0.1087456" table:style-name="c1">
            <text:p>0.10875</text:p>
          </table:table-cell>
          <table:table-cell office:value-type="float" office:value="-1.2975609141743893" table:style-name="c14">
            <text:p>-1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5:15</text:p>
          </table:table-cell>
          <table:table-cell office:value-type="float" office:value="0.10845419999999999" table:style-name="c1">
            <text:p>0.10845</text:p>
          </table:table-cell>
          <table:table-cell office:value-type="string" table:style-name="c1">
            <text:p>2026-05-26 15:45</text:p>
          </table:table-cell>
          <table:table-cell office:value-type="float" office:value="0.11014490000000002" table:style-name="c1">
            <text:p>0.11014</text:p>
          </table:table-cell>
          <table:table-cell office:value-type="float" office:value="1.3558906385368497" table:style-name="c13">
            <text:p>+1.4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09:15</text:p>
          </table:table-cell>
          <table:table-cell office:value-type="float" office:value="1.8789389999999997" table:style-name="c10">
            <text:p>1.8789</text:p>
          </table:table-cell>
          <table:table-cell office:value-type="string" table:style-name="c10">
            <text:p>2026-03-05 09:30</text:p>
          </table:table-cell>
          <table:table-cell office:value-type="float" office:value="1.8730630000000001" table:style-name="c10">
            <text:p>1.8731</text:p>
          </table:table-cell>
          <table:table-cell office:value-type="float" office:value="-0.5120045375075821" table:style-name="c11">
            <text:p>-0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9:30</text:p>
          </table:table-cell>
          <table:table-cell office:value-type="float" office:value="1.7858924999999999" table:style-name="c10">
            <text:p>1.7859</text:p>
          </table:table-cell>
          <table:table-cell office:value-type="string" table:style-name="c10">
            <text:p>2026-03-10 19:15</text:p>
          </table:table-cell>
          <table:table-cell office:value-type="float" office:value="1.7931030000000001" table:style-name="c10">
            <text:p>1.7931</text:p>
          </table:table-cell>
          <table:table-cell office:value-type="float" office:value="0.203040614314709" table:style-name="c12">
            <text:p>+0.2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03:45</text:p>
          </table:table-cell>
          <table:table-cell office:value-type="float" office:value="1.812906" table:style-name="c10">
            <text:p>1.8129</text:p>
          </table:table-cell>
          <table:table-cell office:value-type="string" table:style-name="c10">
            <text:p>2026-03-12 01:30</text:p>
          </table:table-cell>
          <table:table-cell office:value-type="float" office:value="1.8310840000000002" table:style-name="c10">
            <text:p>1.8311</text:p>
          </table:table-cell>
          <table:table-cell office:value-type="float" office:value="0.8007951368686594" table:style-name="c12">
            <text:p>+0.8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0:15</text:p>
          </table:table-cell>
          <table:table-cell office:value-type="float" office:value="1.858929" table:style-name="c10">
            <text:p>1.8589</text:p>
          </table:table-cell>
          <table:table-cell office:value-type="string" table:style-name="c10">
            <text:p>2026-03-13 17:45</text:p>
          </table:table-cell>
          <table:table-cell office:value-type="float" office:value="1.8540725" table:style-name="c10">
            <text:p>1.8541</text:p>
          </table:table-cell>
          <table:table-cell office:value-type="float" office:value="-0.4606303375492171" table:style-name="c11">
            <text:p>-0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4 04:00</text:p>
          </table:table-cell>
          <table:table-cell office:value-type="float" office:value="1.884942" table:style-name="c10">
            <text:p>1.8849</text:p>
          </table:table-cell>
          <table:table-cell office:value-type="string" table:style-name="c10">
            <text:p>2026-03-14 06:30</text:p>
          </table:table-cell>
          <table:table-cell office:value-type="float" office:value="1.8580705000000002" table:style-name="c10">
            <text:p>1.8581</text:p>
          </table:table-cell>
          <table:table-cell office:value-type="float" office:value="-1.622637881139033" table:style-name="c11">
            <text:p>-1.6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11:30</text:p>
          </table:table-cell>
          <table:table-cell office:value-type="float" office:value="1.872936" table:style-name="c10">
            <text:p>1.8729</text:p>
          </table:table-cell>
          <table:table-cell office:value-type="string" table:style-name="c10">
            <text:p>2026-03-15 15:00</text:p>
          </table:table-cell>
          <table:table-cell office:value-type="float" office:value="1.8580705000000002" table:style-name="c10">
            <text:p>1.8581</text:p>
          </table:table-cell>
          <table:table-cell office:value-type="float" office:value="-0.9920137649924832" table:style-name="c11">
            <text:p>-1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45</text:p>
          </table:table-cell>
          <table:table-cell office:value-type="float" office:value="1.8919454999999998" table:style-name="c10">
            <text:p>1.8919</text:p>
          </table:table-cell>
          <table:table-cell office:value-type="string" table:style-name="c10">
            <text:p>2026-03-17 02:30</text:p>
          </table:table-cell>
          <table:table-cell office:value-type="float" office:value="1.9720135" table:style-name="c10">
            <text:p>1.972</text:p>
          </table:table-cell>
          <table:table-cell office:value-type="float" office:value="4.023685936698507" table:style-name="c12">
            <text:p>+4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8 01:15</text:p>
          </table:table-cell>
          <table:table-cell office:value-type="float" office:value="1.9709849999999998" table:style-name="c10">
            <text:p>1.971</text:p>
          </table:table-cell>
          <table:table-cell office:value-type="string" table:style-name="c10">
            <text:p>2026-03-18 12:00</text:p>
          </table:table-cell>
          <table:table-cell office:value-type="float" office:value="1.9660165000000003" table:style-name="c10">
            <text:p>1.966</text:p>
          </table:table-cell>
          <table:table-cell office:value-type="float" office:value="-0.4514781687075087" table:style-name="c11">
            <text:p>-0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07:00</text:p>
          </table:table-cell>
          <table:table-cell office:value-type="float" office:value="1.706853" table:style-name="c10">
            <text:p>1.7069</text:p>
          </table:table-cell>
          <table:table-cell office:value-type="string" table:style-name="c10">
            <text:p>2026-03-31 09:45</text:p>
          </table:table-cell>
          <table:table-cell office:value-type="float" office:value="1.685157" table:style-name="c10">
            <text:p>1.6852</text:p>
          </table:table-cell>
          <table:table-cell office:value-type="float" office:value="-1.4684702691444396" table:style-name="c11">
            <text:p>-1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5:15</text:p>
          </table:table-cell>
          <table:table-cell office:value-type="float" office:value="1.6918455" table:style-name="c10">
            <text:p>1.6918</text:p>
          </table:table-cell>
          <table:table-cell office:value-type="string" table:style-name="c10">
            <text:p>2026-04-01 02:15</text:p>
          </table:table-cell>
          <table:table-cell office:value-type="float" office:value="1.6991500000000002" table:style-name="c10">
            <text:p>1.6992</text:p>
          </table:table-cell>
          <table:table-cell office:value-type="float" office:value="0.23098439839810414" table:style-name="c12">
            <text:p>+0.2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05:30</text:p>
          </table:table-cell>
          <table:table-cell office:value-type="float" office:value="1.722861" table:style-name="c10">
            <text:p>1.7229</text:p>
          </table:table-cell>
          <table:table-cell office:value-type="string" table:style-name="c10">
            <text:p>2026-04-01 11:00</text:p>
          </table:table-cell>
          <table:table-cell office:value-type="float" office:value="1.7081455" table:style-name="c10">
            <text:p>1.7081</text:p>
          </table:table-cell>
          <table:table-cell office:value-type="float" office:value="-1.0523241778936265" table:style-name="c11">
            <text:p>-1.1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3 16:30</text:p>
          </table:table-cell>
          <table:table-cell office:value-type="float" office:value="1.7178585" table:style-name="c10">
            <text:p>1.7179</text:p>
          </table:table-cell>
          <table:table-cell office:value-type="string" table:style-name="c10">
            <text:p>2026-04-03 18:45</text:p>
          </table:table-cell>
          <table:table-cell office:value-type="float" office:value="1.701149" table:style-name="c10">
            <text:p>1.7011</text:p>
          </table:table-cell>
          <table:table-cell office:value-type="float" office:value="-1.1706492037033223" table:style-name="c11">
            <text:p>-1.2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7:30</text:p>
          </table:table-cell>
          <table:table-cell office:value-type="float" office:value="1.7298645" table:style-name="c10">
            <text:p>1.7299</text:p>
          </table:table-cell>
          <table:table-cell office:value-type="string" table:style-name="c10">
            <text:p>2026-04-06 14:15</text:p>
          </table:table-cell>
          <table:table-cell office:value-type="float" office:value="1.729135" table:style-name="c10">
            <text:p>1.7291</text:p>
          </table:table-cell>
          <table:table-cell office:value-type="float" office:value="-0.24198663334612514" table:style-name="c11">
            <text:p>-0.2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1:15</text:p>
          </table:table-cell>
          <table:table-cell office:value-type="float" office:value="1.7398695" table:style-name="c10">
            <text:p>1.7399</text:p>
          </table:table-cell>
          <table:table-cell office:value-type="string" table:style-name="c10">
            <text:p>2026-04-08 09:15</text:p>
          </table:table-cell>
          <table:table-cell office:value-type="float" office:value="1.7881055000000001" table:style-name="c10">
            <text:p>1.7881</text:p>
          </table:table-cell>
          <table:table-cell office:value-type="float" office:value="2.566949826150755" table:style-name="c12">
            <text:p>+2.6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8 15:45</text:p>
          </table:table-cell>
          <table:table-cell office:value-type="float" office:value="1.788894" table:style-name="c10">
            <text:p>1.7889</text:p>
          </table:table-cell>
          <table:table-cell office:value-type="string" table:style-name="c10">
            <text:p>2026-04-08 16:00</text:p>
          </table:table-cell>
          <table:table-cell office:value-type="float" office:value="1.7951020000000002" table:style-name="c10">
            <text:p>1.7951</text:p>
          </table:table-cell>
          <table:table-cell office:value-type="float" office:value="0.14643635128746002" table:style-name="c12">
            <text:p>+0.1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45</text:p>
          </table:table-cell>
          <table:table-cell office:value-type="float" office:value="1.8219104999999998" table:style-name="c10">
            <text:p>1.8219</text:p>
          </table:table-cell>
          <table:table-cell office:value-type="string" table:style-name="c10">
            <text:p>2026-04-10 00:15</text:p>
          </table:table-cell>
          <table:table-cell office:value-type="float" office:value="1.7931030000000001" table:style-name="c10">
            <text:p>1.7931</text:p>
          </table:table-cell>
          <table:table-cell office:value-type="float" office:value="-1.7779091177639983" table:style-name="c11">
            <text:p>-1.8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4:30</text:p>
          </table:table-cell>
          <table:table-cell office:value-type="float" office:value="1.8419204999999998" table:style-name="c10">
            <text:p>1.8419</text:p>
          </table:table-cell>
          <table:table-cell office:value-type="string" table:style-name="c10">
            <text:p>2026-04-10 16:45</text:p>
          </table:table-cell>
          <table:table-cell office:value-type="float" office:value="1.8220885" table:style-name="c10">
            <text:p>1.8221</text:p>
          </table:table-cell>
          <table:table-cell office:value-type="float" office:value="-1.274449951097223" table:style-name="c11">
            <text:p>-1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6:00</text:p>
          </table:table-cell>
          <table:table-cell office:value-type="float" office:value="1.7968979999999999" table:style-name="c10">
            <text:p>1.7969</text:p>
          </table:table-cell>
          <table:table-cell office:value-type="string" table:style-name="c10">
            <text:p>2026-04-16 11:00</text:p>
          </table:table-cell>
          <table:table-cell office:value-type="float" office:value="1.7851070000000002" table:style-name="c10">
            <text:p>1.7851</text:p>
          </table:table-cell>
          <table:table-cell office:value-type="float" office:value="-0.854774666842506" table:style-name="c11">
            <text:p>-0.9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3:30</text:p>
          </table:table-cell>
          <table:table-cell office:value-type="float" office:value="1.8179085" table:style-name="c10">
            <text:p>1.8179</text:p>
          </table:table-cell>
          <table:table-cell office:value-type="string" table:style-name="c10">
            <text:p>2026-04-16 15:00</text:p>
          </table:table-cell>
          <table:table-cell office:value-type="float" office:value="1.7851070000000002" table:style-name="c10">
            <text:p>1.7851</text:p>
          </table:table-cell>
          <table:table-cell office:value-type="float" office:value="-2.0006468363506613" table:style-name="c11">
            <text:p>-2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4:00</text:p>
          </table:table-cell>
          <table:table-cell office:value-type="float" office:value="1.864932" table:style-name="c10">
            <text:p>1.8649</text:p>
          </table:table-cell>
          <table:table-cell office:value-type="string" table:style-name="c10">
            <text:p>2026-04-17 23:30</text:p>
          </table:table-cell>
          <table:table-cell office:value-type="float" office:value="1.8320835" table:style-name="c10">
            <text:p>1.8321</text:p>
          </table:table-cell>
          <table:table-cell office:value-type="float" office:value="-1.9577569003320305" table:style-name="c11">
            <text:p>-2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10:30</text:p>
          </table:table-cell>
          <table:table-cell office:value-type="float" office:value="1.8059024999999997" table:style-name="c10">
            <text:p>1.8059</text:p>
          </table:table-cell>
          <table:table-cell office:value-type="string" table:style-name="c10">
            <text:p>2026-04-21 13:45</text:p>
          </table:table-cell>
          <table:table-cell office:value-type="float" office:value="1.7941025" table:style-name="c10">
            <text:p>1.7941</text:p>
          </table:table-cell>
          <table:table-cell office:value-type="float" office:value="-0.8520067333369297" table:style-name="c11">
            <text:p>-0.9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15:30</text:p>
          </table:table-cell>
          <table:table-cell office:value-type="float" office:value="1.8219104999999998" table:style-name="c10">
            <text:p>1.8219</text:p>
          </table:table-cell>
          <table:table-cell office:value-type="string" table:style-name="c10">
            <text:p>2026-04-21 19:45</text:p>
          </table:table-cell>
          <table:table-cell office:value-type="float" office:value="1.8020985" table:style-name="c10">
            <text:p>1.8021</text:p>
          </table:table-cell>
          <table:table-cell office:value-type="float" office:value="-1.2851561534718559" table:style-name="c11">
            <text:p>-1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0:30</text:p>
          </table:table-cell>
          <table:table-cell office:value-type="float" office:value="1.862931" table:style-name="c10">
            <text:p>1.8629</text:p>
          </table:table-cell>
          <table:table-cell office:value-type="string" table:style-name="c10">
            <text:p>2026-04-22 11:45</text:p>
          </table:table-cell>
          <table:table-cell office:value-type="float" office:value="1.8940525000000001" table:style-name="c10">
            <text:p>1.8941</text:p>
          </table:table-cell>
          <table:table-cell office:value-type="float" office:value="1.4673269730602012" table:style-name="c12">
            <text:p>+1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07:15</text:p>
          </table:table-cell>
          <table:table-cell office:value-type="float" office:value="1.8599294999999998" table:style-name="c10">
            <text:p>1.8599</text:p>
          </table:table-cell>
          <table:table-cell office:value-type="string" table:style-name="c10">
            <text:p>2026-04-23 10:15</text:p>
          </table:table-cell>
          <table:table-cell office:value-type="float" office:value="1.845077" table:style-name="c10">
            <text:p>1.8451</text:p>
          </table:table-cell>
          <table:table-cell office:value-type="float" office:value="-0.9968554680701347" table:style-name="c11">
            <text:p>-1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12:45</text:p>
          </table:table-cell>
          <table:table-cell office:value-type="float" office:value="1.8759374999999998" table:style-name="c10">
            <text:p>1.8759</text:p>
          </table:table-cell>
          <table:table-cell office:value-type="string" table:style-name="c10">
            <text:p>2026-04-23 18:30</text:p>
          </table:table-cell>
          <table:table-cell office:value-type="float" office:value="1.8660665" table:style-name="c10">
            <text:p>1.8661</text:p>
          </table:table-cell>
          <table:table-cell office:value-type="float" office:value="-0.7250383839280228" table:style-name="c11">
            <text:p>-0.7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20:30</text:p>
          </table:table-cell>
          <table:table-cell office:value-type="float" office:value="1.8869429999999998" table:style-name="c10">
            <text:p>1.8869</text:p>
          </table:table-cell>
          <table:table-cell office:value-type="string" table:style-name="c10">
            <text:p>2026-04-24 20:30</text:p>
          </table:table-cell>
          <table:table-cell office:value-type="float" office:value="1.983008" table:style-name="c10">
            <text:p>1.983</text:p>
          </table:table-cell>
          <table:table-cell office:value-type="float" office:value="4.880961799482031" table:style-name="c12">
            <text:p>+4.9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5 00:30</text:p>
          </table:table-cell>
          <table:table-cell office:value-type="float" office:value="1.998999" table:style-name="c10">
            <text:p>1.999</text:p>
          </table:table-cell>
          <table:table-cell office:value-type="string" table:style-name="c10">
            <text:p>2026-04-25 07:00</text:p>
          </table:table-cell>
          <table:table-cell office:value-type="float" office:value="2.0039975" table:style-name="c10">
            <text:p>2.004</text:p>
          </table:table-cell>
          <table:table-cell office:value-type="float" office:value="0.049650299850090285" table:style-name="c12">
            <text:p>+0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5 10:30</text:p>
          </table:table-cell>
          <table:table-cell office:value-type="float" office:value="2.0480235" table:style-name="c10">
            <text:p>2.048</text:p>
          </table:table-cell>
          <table:table-cell office:value-type="string" table:style-name="c10">
            <text:p>2026-04-25 16:45</text:p>
          </table:table-cell>
          <table:table-cell office:value-type="float" office:value="2.0259865" table:style-name="c10">
            <text:p>2.026</text:p>
          </table:table-cell>
          <table:table-cell office:value-type="float" office:value="-1.273762093721098" table:style-name="c11">
            <text:p>-1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00</text:p>
          </table:table-cell>
          <table:table-cell office:value-type="float" office:value="1.9129559999999999" table:style-name="c10">
            <text:p>1.913</text:p>
          </table:table-cell>
          <table:table-cell office:value-type="string" table:style-name="c10">
            <text:p>2026-05-04 08:00</text:p>
          </table:table-cell>
          <table:table-cell office:value-type="float" office:value="1.9020485" table:style-name="c10">
            <text:p>1.902</text:p>
          </table:table-cell>
          <table:table-cell office:value-type="float" office:value="-0.7689510344984329" table:style-name="c11">
            <text:p>-0.8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1:15</text:p>
          </table:table-cell>
          <table:table-cell office:value-type="float" office:value="1.9079534999999999" table:style-name="c10">
            <text:p>1.908</text:p>
          </table:table-cell>
          <table:table-cell office:value-type="string" table:style-name="c10">
            <text:p>2026-05-05 09:15</text:p>
          </table:table-cell>
          <table:table-cell office:value-type="float" office:value="1.903048" table:style-name="c10">
            <text:p>1.903</text:p>
          </table:table-cell>
          <table:table-cell office:value-type="float" office:value="-0.4564939843659688" table:style-name="c11">
            <text:p>-0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4:00</text:p>
          </table:table-cell>
          <table:table-cell office:value-type="float" office:value="1.9209599999999998" table:style-name="c10">
            <text:p>1.921</text:p>
          </table:table-cell>
          <table:table-cell office:value-type="string" table:style-name="c10">
            <text:p>2026-05-06 15:30</text:p>
          </table:table-cell>
          <table:table-cell office:value-type="float" office:value="1.9320335000000002" table:style-name="c10">
            <text:p>1.932</text:p>
          </table:table-cell>
          <table:table-cell office:value-type="float" office:value="0.3754042267147817" table:style-name="c12">
            <text:p>+0.4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5:45</text:p>
          </table:table-cell>
          <table:table-cell office:value-type="float" office:value="1.9089539999999998" table:style-name="c10">
            <text:p>1.909</text:p>
          </table:table-cell>
          <table:table-cell office:value-type="string" table:style-name="c10">
            <text:p>2026-05-07 14:00</text:p>
          </table:table-cell>
          <table:table-cell office:value-type="float" office:value="1.9080455" table:style-name="c10">
            <text:p>1.908</text:p>
          </table:table-cell>
          <table:table-cell office:value-type="float" office:value="-0.24739637280414284" table:style-name="c11">
            <text:p>-0.2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22:00</text:p>
          </table:table-cell>
          <table:table-cell office:value-type="float" office:value="1.9499745" table:style-name="c10">
            <text:p>1.95</text:p>
          </table:table-cell>
          <table:table-cell office:value-type="string" table:style-name="c10">
            <text:p>2026-05-09 07:30</text:p>
          </table:table-cell>
          <table:table-cell office:value-type="float" office:value="1.9740125000000002" table:style-name="c10">
            <text:p>1.974</text:p>
          </table:table-cell>
          <table:table-cell office:value-type="float" office:value="1.030369833682454" table:style-name="c12">
            <text:p>+1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5:30</text:p>
          </table:table-cell>
          <table:table-cell office:value-type="float" office:value="1.9329659999999997" table:style-name="c10">
            <text:p>1.933</text:p>
          </table:table-cell>
          <table:table-cell office:value-type="string" table:style-name="c10">
            <text:p>2026-05-10 21:15</text:p>
          </table:table-cell>
          <table:table-cell office:value-type="float" office:value="1.981009" table:style-name="c10">
            <text:p>1.981</text:p>
          </table:table-cell>
          <table:table-cell office:value-type="float" office:value="2.280586570534604" table:style-name="c12">
            <text:p>+2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09:45</text:p>
          </table:table-cell>
          <table:table-cell office:value-type="float" office:value="2.0490239999999997" table:style-name="c10">
            <text:p>2.049</text:p>
          </table:table-cell>
          <table:table-cell office:value-type="string" table:style-name="c10">
            <text:p>2026-05-11 13:00</text:p>
          </table:table-cell>
          <table:table-cell office:value-type="float" office:value="2.0259865" table:style-name="c10">
            <text:p>2.026</text:p>
          </table:table-cell>
          <table:table-cell office:value-type="float" office:value="-1.3219682645737474" table:style-name="c11">
            <text:p>-1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23:30</text:p>
          </table:table-cell>
          <table:table-cell office:value-type="float" office:value="2.0420205" table:style-name="c10">
            <text:p>2.042</text:p>
          </table:table-cell>
          <table:table-cell office:value-type="string" table:style-name="c10">
            <text:p>2026-05-12 02:30</text:p>
          </table:table-cell>
          <table:table-cell office:value-type="float" office:value="2.016991" table:style-name="c10">
            <text:p>2.017</text:p>
          </table:table-cell>
          <table:table-cell office:value-type="float" office:value="-1.4231720498888212" table:style-name="c11">
            <text:p>-1.4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2 06:45</text:p>
          </table:table-cell>
          <table:table-cell office:value-type="float" office:value="2.057028" table:style-name="c10">
            <text:p>2.057</text:p>
          </table:table-cell>
          <table:table-cell office:value-type="string" table:style-name="c10">
            <text:p>2026-05-12 11:30</text:p>
          </table:table-cell>
          <table:table-cell office:value-type="float" office:value="2.030984" table:style-name="c10">
            <text:p>2.031</text:p>
          </table:table-cell>
          <table:table-cell office:value-type="float" office:value="-1.4634675374375017" table:style-name="c11">
            <text:p>-1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2 17:15</text:p>
          </table:table-cell>
          <table:table-cell office:value-type="float" office:value="2.0620304999999997" table:style-name="c10">
            <text:p>2.062</text:p>
          </table:table-cell>
          <table:table-cell office:value-type="string" table:style-name="c10">
            <text:p>2026-05-13 07:00</text:p>
          </table:table-cell>
          <table:table-cell office:value-type="float" office:value="2.112943" table:style-name="c10">
            <text:p>2.1129</text:p>
          </table:table-cell>
          <table:table-cell office:value-type="float" office:value="2.2642112686015237" table:style-name="c12">
            <text:p>+2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20:15</text:p>
          </table:table-cell>
          <table:table-cell office:value-type="float" office:value="2.0840415" table:style-name="c10">
            <text:p>2.084</text:p>
          </table:table-cell>
          <table:table-cell office:value-type="string" table:style-name="c10">
            <text:p>2026-05-13 21:30</text:p>
          </table:table-cell>
          <table:table-cell office:value-type="float" office:value="2.040979" table:style-name="c10">
            <text:p>2.041</text:p>
          </table:table-cell>
          <table:table-cell office:value-type="float" office:value="-2.2620670951610133" table:style-name="c11">
            <text:p>-2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7 03:45</text:p>
          </table:table-cell>
          <table:table-cell office:value-type="float" office:value="2.053026" table:style-name="c10">
            <text:p>2.053</text:p>
          </table:table-cell>
          <table:table-cell office:value-type="string" table:style-name="c10">
            <text:p>2026-05-17 13:15</text:p>
          </table:table-cell>
          <table:table-cell office:value-type="float" office:value="2.05897" table:style-name="c10">
            <text:p>2.059</text:p>
          </table:table-cell>
          <table:table-cell office:value-type="float" office:value="0.08904509587310816" table:style-name="c12">
            <text:p>+0.1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8 03:00</text:p>
          </table:table-cell>
          <table:table-cell office:value-type="float" office:value="2.053026" table:style-name="c10">
            <text:p>2.053</text:p>
          </table:table-cell>
          <table:table-cell office:value-type="string" table:style-name="c10">
            <text:p>2026-05-18 04:30</text:p>
          </table:table-cell>
          <table:table-cell office:value-type="float" office:value="2.0359815" table:style-name="c10">
            <text:p>2.036</text:p>
          </table:table-cell>
          <table:table-cell office:value-type="float" office:value="-1.0284539513138236" table:style-name="c11">
            <text:p>-1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8 06:15</text:p>
          </table:table-cell>
          <table:table-cell office:value-type="float" office:value="2.0700344999999998" table:style-name="c10">
            <text:p>2.07</text:p>
          </table:table-cell>
          <table:table-cell office:value-type="string" table:style-name="c10">
            <text:p>2026-05-18 09:00</text:p>
          </table:table-cell>
          <table:table-cell office:value-type="float" office:value="2.0479755" table:style-name="c10">
            <text:p>2.048</text:p>
          </table:table-cell>
          <table:table-cell office:value-type="float" office:value="-1.263404210147212" table:style-name="c11">
            <text:p>-1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9 00:15</text:p>
          </table:table-cell>
          <table:table-cell office:value-type="float" office:value="2.0870429999999995" table:style-name="c10">
            <text:p>2.087</text:p>
          </table:table-cell>
          <table:table-cell office:value-type="string" table:style-name="c10">
            <text:p>2026-05-19 05:45</text:p>
          </table:table-cell>
          <table:table-cell office:value-type="float" office:value="2.0499745000000003" table:style-name="c10">
            <text:p>2.05</text:p>
          </table:table-cell>
          <table:table-cell office:value-type="float" office:value="-1.9724748855437735" table:style-name="c11">
            <text:p>-2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9 07:45</text:p>
          </table:table-cell>
          <table:table-cell office:value-type="float" office:value="2.0780385" table:style-name="c10">
            <text:p>2.078</text:p>
          </table:table-cell>
          <table:table-cell office:value-type="string" table:style-name="c10">
            <text:p>2026-05-19 10:30</text:p>
          </table:table-cell>
          <table:table-cell office:value-type="float" office:value="2.0549720000000002" table:style-name="c10">
            <text:p>2.055</text:p>
          </table:table-cell>
          <table:table-cell office:value-type="float" office:value="-1.307694204318155" table:style-name="c11">
            <text:p>-1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9 11:00</text:p>
          </table:table-cell>
          <table:table-cell office:value-type="float" office:value="2.08104" table:style-name="c10">
            <text:p>2.081</text:p>
          </table:table-cell>
          <table:table-cell office:value-type="string" table:style-name="c10">
            <text:p>2026-05-19 11:45</text:p>
          </table:table-cell>
          <table:table-cell office:value-type="float" office:value="2.044977" table:style-name="c10">
            <text:p>2.045</text:p>
          </table:table-cell>
          <table:table-cell office:value-type="float" office:value="-1.9293674808268824" table:style-name="c11">
            <text:p>-1.9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9 17:00</text:p>
          </table:table-cell>
          <table:table-cell office:value-type="float" office:value="2.08104" table:style-name="c10">
            <text:p>2.081</text:p>
          </table:table-cell>
          <table:table-cell office:value-type="string" table:style-name="c10">
            <text:p>2026-05-19 22:00</text:p>
          </table:table-cell>
          <table:table-cell office:value-type="float" office:value="2.0469760000000004" table:style-name="c10">
            <text:p>2.047</text:p>
          </table:table-cell>
          <table:table-cell office:value-type="float" office:value="-1.8335017598892556" table:style-name="c11">
            <text:p>-1.8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8:15</text:p>
          </table:table-cell>
          <table:table-cell office:value-type="float" office:value="2.0310149999999996" table:style-name="c10">
            <text:p>2.031</text:p>
          </table:table-cell>
          <table:table-cell office:value-type="string" table:style-name="c10">
            <text:p>2026-05-22 14:30</text:p>
          </table:table-cell>
          <table:table-cell office:value-type="float" office:value="2.1419285" table:style-name="c10">
            <text:p>2.1419</text:p>
          </table:table-cell>
          <table:table-cell office:value-type="float" office:value="5.250172201017755" table:style-name="c12">
            <text:p>+5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3 01:45</text:p>
          </table:table-cell>
          <table:table-cell office:value-type="float" office:value="2.117058" table:style-name="c10">
            <text:p>2.1171</text:p>
          </table:table-cell>
          <table:table-cell office:value-type="string" table:style-name="c10">
            <text:p>2026-05-23 05:30</text:p>
          </table:table-cell>
          <table:table-cell office:value-type="float" office:value="2.0819585000000003" table:style-name="c10">
            <text:p>2.082</text:p>
          </table:table-cell>
          <table:table-cell office:value-type="float" office:value="-1.8545233546506612" table:style-name="c11">
            <text:p>-1.9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3 21:00</text:p>
          </table:table-cell>
          <table:table-cell office:value-type="float" office:value="2.147073" table:style-name="c10">
            <text:p>2.1471</text:p>
          </table:table-cell>
          <table:table-cell office:value-type="string" table:style-name="c10">
            <text:p>2026-05-24 04:00</text:p>
          </table:table-cell>
          <table:table-cell office:value-type="float" office:value="2.1039475000000003" table:style-name="c10">
            <text:p>2.1039</text:p>
          </table:table-cell>
          <table:table-cell office:value-type="float" office:value="-2.204456534663679" table:style-name="c11">
            <text:p>-2.2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07:00</text:p>
          </table:table-cell>
          <table:table-cell office:value-type="float" office:value="2.1820904999999997" table:style-name="c10">
            <text:p>2.1821</text:p>
          </table:table-cell>
          <table:table-cell office:value-type="string" table:style-name="c10">
            <text:p>2026-05-25 12:15</text:p>
          </table:table-cell>
          <table:table-cell office:value-type="float" office:value="2.120939" table:style-name="c10">
            <text:p>2.1209</text:p>
          </table:table-cell>
          <table:table-cell office:value-type="float" office:value="-2.996725253191823" table:style-name="c11">
            <text:p>-3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3:45</text:p>
          </table:table-cell>
          <table:table-cell office:value-type="float" office:value="2.2541265" table:style-name="c10">
            <text:p>2.2541</text:p>
          </table:table-cell>
          <table:table-cell office:value-type="string" table:style-name="c10">
            <text:p>2026-05-26 17:45</text:p>
          </table:table-cell>
          <table:table-cell office:value-type="float" office:value="2.196901" table:style-name="c10">
            <text:p>2.1969</text:p>
          </table:table-cell>
          <table:table-cell office:value-type="float" office:value="-2.7335247200634183" table:style-name="c11">
            <text:p>-2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3:45</text:p>
          </table:table-cell>
          <table:table-cell office:value-type="float" office:value="9.28464" table:style-name="c1">
            <text:p>9.2846</text:p>
          </table:table-cell>
          <table:table-cell office:value-type="string" table:style-name="c1">
            <text:p>2026-03-09 23:00</text:p>
          </table:table-cell>
          <table:table-cell office:value-type="float" office:value="9.245375000000001" table:style-name="c1">
            <text:p>9.2454</text:p>
          </table:table-cell>
          <table:table-cell office:value-type="float" office:value="-0.621957390108796" table:style-name="c14">
            <text:p>-0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2:45</text:p>
          </table:table-cell>
          <table:table-cell office:value-type="float" office:value="9.48474" table:style-name="c1">
            <text:p>9.4847</text:p>
          </table:table-cell>
          <table:table-cell office:value-type="string" table:style-name="c1">
            <text:p>2026-03-10 07:00</text:p>
          </table:table-cell>
          <table:table-cell office:value-type="float" office:value="9.345325" table:style-name="c1">
            <text:p>9.3453</text:p>
          </table:table-cell>
          <table:table-cell office:value-type="float" office:value="-1.6668491142087238" table:style-name="c14">
            <text:p>-1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9:30</text:p>
          </table:table-cell>
          <table:table-cell office:value-type="float" office:value="9.56478" table:style-name="c1">
            <text:p>9.5648</text:p>
          </table:table-cell>
          <table:table-cell office:value-type="string" table:style-name="c1">
            <text:p>2026-03-10 13:00</text:p>
          </table:table-cell>
          <table:table-cell office:value-type="float" office:value="9.43528" table:style-name="c1">
            <text:p>9.4353</text:p>
          </table:table-cell>
          <table:table-cell office:value-type="float" office:value="-1.5511190505165806" table:style-name="c14">
            <text:p>-1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9.64482" table:style-name="c1">
            <text:p>9.6448</text:p>
          </table:table-cell>
          <table:table-cell office:value-type="string" table:style-name="c1">
            <text:p>2026-03-10 19:45</text:p>
          </table:table-cell>
          <table:table-cell office:value-type="float" office:value="9.5952" table:style-name="c1">
            <text:p>9.5952</text:p>
          </table:table-cell>
          <table:table-cell office:value-type="float" office:value="-0.7133446222946649" table:style-name="c14">
            <text:p>-0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4:00</text:p>
          </table:table-cell>
          <table:table-cell office:value-type="float" office:value="9.714855" table:style-name="c1">
            <text:p>9.7149</text:p>
          </table:table-cell>
          <table:table-cell office:value-type="string" table:style-name="c1">
            <text:p>2026-03-11 16:15</text:p>
          </table:table-cell>
          <table:table-cell office:value-type="float" office:value="9.605195" table:style-name="c1">
            <text:p>9.6052</text:p>
          </table:table-cell>
          <table:table-cell office:value-type="float" office:value="-1.3264303461554494" table:style-name="c14">
            <text:p>-1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7:30</text:p>
          </table:table-cell>
          <table:table-cell office:value-type="float" office:value="9.72486" table:style-name="c1">
            <text:p>9.7249</text:p>
          </table:table-cell>
          <table:table-cell office:value-type="string" table:style-name="c1">
            <text:p>2026-03-11 21:15</text:p>
          </table:table-cell>
          <table:table-cell office:value-type="float" office:value="9.625185000000002" table:style-name="c1">
            <text:p>9.6252</text:p>
          </table:table-cell>
          <table:table-cell office:value-type="float" office:value="-1.2228016116941243" table:style-name="c14">
            <text:p>-1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7:45</text:p>
          </table:table-cell>
          <table:table-cell office:value-type="float" office:value="9.574785" table:style-name="c1">
            <text:p>9.5748</text:p>
          </table:table-cell>
          <table:table-cell office:value-type="string" table:style-name="c1">
            <text:p>2026-03-12 14:30</text:p>
          </table:table-cell>
          <table:table-cell office:value-type="float" office:value="9.51524" table:style-name="c1">
            <text:p>9.5152</text:p>
          </table:table-cell>
          <table:table-cell office:value-type="float" office:value="-0.8205506939320428" table:style-name="c14">
            <text:p>-0.8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23:15</text:p>
          </table:table-cell>
          <table:table-cell office:value-type="float" office:value="9.734865" table:style-name="c1">
            <text:p>9.7349</text:p>
          </table:table-cell>
          <table:table-cell office:value-type="string" table:style-name="c1">
            <text:p>2026-03-13 07:45</text:p>
          </table:table-cell>
          <table:table-cell office:value-type="float" office:value="9.83508" table:style-name="c1">
            <text:p>9.8351</text:p>
          </table:table-cell>
          <table:table-cell office:value-type="float" office:value="0.8274863090551365" table:style-name="c13">
            <text:p>+0.8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00</text:p>
          </table:table-cell>
          <table:table-cell office:value-type="float" office:value="9.954975" table:style-name="c1">
            <text:p>9.955</text:p>
          </table:table-cell>
          <table:table-cell office:value-type="string" table:style-name="c1">
            <text:p>2026-03-13 15:45</text:p>
          </table:table-cell>
          <table:table-cell office:value-type="float" office:value="9.925035" table:style-name="c1">
            <text:p>9.925</text:p>
          </table:table-cell>
          <table:table-cell office:value-type="float" office:value="-0.500052938003348" table:style-name="c14">
            <text:p>-0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9:15</text:p>
          </table:table-cell>
          <table:table-cell office:value-type="float" office:value="9.82491" table:style-name="c1">
            <text:p>9.8249</text:p>
          </table:table-cell>
          <table:table-cell office:value-type="string" table:style-name="c1">
            <text:p>2026-03-15 13:45</text:p>
          </table:table-cell>
          <table:table-cell office:value-type="float" office:value="9.725135000000002" table:style-name="c1">
            <text:p>9.7251</text:p>
          </table:table-cell>
          <table:table-cell office:value-type="float" office:value="-1.2134008847409006" table:style-name="c14">
            <text:p>-1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9.94497" table:style-name="c1">
            <text:p>9.945</text:p>
          </table:table-cell>
          <table:table-cell office:value-type="string" table:style-name="c1">
            <text:p>2026-03-16 10:00</text:p>
          </table:table-cell>
          <table:table-cell office:value-type="float" office:value="10.264865" table:style-name="c1">
            <text:p>10.265</text:p>
          </table:table-cell>
          <table:table-cell office:value-type="float" office:value="3.010321145915995" table:style-name="c13">
            <text:p>+3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0:15</text:p>
          </table:table-cell>
          <table:table-cell office:value-type="float" office:value="10.52526" table:style-name="c1">
            <text:p>10.525</text:p>
          </table:table-cell>
          <table:table-cell office:value-type="string" table:style-name="c1">
            <text:p>2026-03-17 03:45</text:p>
          </table:table-cell>
          <table:table-cell office:value-type="float" office:value="10.294850000000002" table:style-name="c1">
            <text:p>10.295</text:p>
          </table:table-cell>
          <table:table-cell office:value-type="float" office:value="-2.3846385281693583" table:style-name="c14">
            <text:p>-2.4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21:30</text:p>
          </table:table-cell>
          <table:table-cell office:value-type="float" office:value="10.295144999999998" table:style-name="c1">
            <text:p>10.295</text:p>
          </table:table-cell>
          <table:table-cell office:value-type="string" table:style-name="c1">
            <text:p>2026-03-17 22:45</text:p>
          </table:table-cell>
          <table:table-cell office:value-type="float" office:value="10.23488" table:style-name="c1">
            <text:p>10.235</text:p>
          </table:table-cell>
          <table:table-cell office:value-type="float" office:value="-0.7841028477014955" table:style-name="c14">
            <text:p>-0.8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2:45</text:p>
          </table:table-cell>
          <table:table-cell office:value-type="float" office:value="10.285139999999998" table:style-name="c1">
            <text:p>10.285</text:p>
          </table:table-cell>
          <table:table-cell office:value-type="string" table:style-name="c1">
            <text:p>2026-03-18 07:15</text:p>
          </table:table-cell>
          <table:table-cell office:value-type="float" office:value="10.244875" table:style-name="c1">
            <text:p>10.245</text:p>
          </table:table-cell>
          <table:table-cell office:value-type="float" office:value="-0.5906045530250315" table:style-name="c14">
            <text:p>-0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9.524759999999999" table:style-name="c1">
            <text:p>9.5248</text:p>
          </table:table-cell>
          <table:table-cell office:value-type="string" table:style-name="c1">
            <text:p>2026-03-25 15:15</text:p>
          </table:table-cell>
          <table:table-cell office:value-type="float" office:value="9.635180000000002" table:style-name="c1">
            <text:p>9.6352</text:p>
          </table:table-cell>
          <table:table-cell office:value-type="float" office:value="0.9570768731181012" table:style-name="c13">
            <text:p>+1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1:45</text:p>
          </table:table-cell>
          <table:table-cell office:value-type="float" office:value="8.98449" table:style-name="c1">
            <text:p>8.9845</text:p>
          </table:table-cell>
          <table:table-cell office:value-type="string" table:style-name="c1">
            <text:p>2026-03-31 06:30</text:p>
          </table:table-cell>
          <table:table-cell office:value-type="float" office:value="8.91554" table:style-name="c1">
            <text:p>8.9155</text:p>
          </table:table-cell>
          <table:table-cell office:value-type="float" office:value="-0.9657995552335152" table:style-name="c14">
            <text:p>-1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4:00</text:p>
          </table:table-cell>
          <table:table-cell office:value-type="float" office:value="8.874434999999998" table:style-name="c1">
            <text:p>8.8744</text:p>
          </table:table-cell>
          <table:table-cell office:value-type="string" table:style-name="c1">
            <text:p>2026-03-31 16:00</text:p>
          </table:table-cell>
          <table:table-cell office:value-type="float" office:value="8.745625" table:style-name="c1">
            <text:p>8.7456</text:p>
          </table:table-cell>
          <table:table-cell office:value-type="float" office:value="-1.6484711914054095" table:style-name="c14">
            <text:p>-1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6:45</text:p>
          </table:table-cell>
          <table:table-cell office:value-type="float" office:value="8.864429999999999" table:style-name="c1">
            <text:p>8.8644</text:p>
          </table:table-cell>
          <table:table-cell office:value-type="string" table:style-name="c1">
            <text:p>2026-04-01 02:45</text:p>
          </table:table-cell>
          <table:table-cell office:value-type="float" office:value="8.885555000000002" table:style-name="c1">
            <text:p>8.8856</text:p>
          </table:table-cell>
          <table:table-cell office:value-type="float" office:value="0.03793560956544262" table:style-name="c13">
            <text:p>+0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30</text:p>
          </table:table-cell>
          <table:table-cell office:value-type="float" office:value="9.084539999999999" table:style-name="c1">
            <text:p>9.0845</text:p>
          </table:table-cell>
          <table:table-cell office:value-type="string" table:style-name="c1">
            <text:p>2026-04-01 11:15</text:p>
          </table:table-cell>
          <table:table-cell office:value-type="float" office:value="9.17541" table:style-name="c1">
            <text:p>9.1754</text:p>
          </table:table-cell>
          <table:table-cell office:value-type="float" office:value="0.7983712484066485" table:style-name="c13">
            <text:p>+0.8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15:00</text:p>
          </table:table-cell>
          <table:table-cell office:value-type="float" office:value="9.034514999999999" table:style-name="c1">
            <text:p>9.0345</text:p>
          </table:table-cell>
          <table:table-cell office:value-type="string" table:style-name="c1">
            <text:p>2026-04-03 19:15</text:p>
          </table:table-cell>
          <table:table-cell office:value-type="float" office:value="8.945525" table:style-name="c1">
            <text:p>8.9455</text:p>
          </table:table-cell>
          <table:table-cell office:value-type="float" office:value="-1.1829312860181185" table:style-name="c14">
            <text:p>-1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0:15</text:p>
          </table:table-cell>
          <table:table-cell office:value-type="float" office:value="9.194595" table:style-name="c1">
            <text:p>9.1946</text:p>
          </table:table-cell>
          <table:table-cell office:value-type="string" table:style-name="c1">
            <text:p>2026-04-06 08:00</text:p>
          </table:table-cell>
          <table:table-cell office:value-type="float" office:value="9.385305" table:style-name="c1">
            <text:p>9.3853</text:p>
          </table:table-cell>
          <table:table-cell office:value-type="float" office:value="1.8701071151584259" table:style-name="c13">
            <text:p>+1.9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6:00</text:p>
          </table:table-cell>
          <table:table-cell office:value-type="float" office:value="9.344669999999999" table:style-name="c1">
            <text:p>9.3447</text:p>
          </table:table-cell>
          <table:table-cell office:value-type="string" table:style-name="c1">
            <text:p>2026-04-10 01:15</text:p>
          </table:table-cell>
          <table:table-cell office:value-type="float" office:value="9.33533" table:style-name="c1">
            <text:p>9.3353</text:p>
          </table:table-cell>
          <table:table-cell office:value-type="float" office:value="-0.2996502248875377" table:style-name="c14">
            <text:p>-0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05:15</text:p>
          </table:table-cell>
          <table:table-cell office:value-type="float" office:value="9.4047" table:style-name="c1">
            <text:p>9.4047</text:p>
          </table:table-cell>
          <table:table-cell office:value-type="string" table:style-name="c1">
            <text:p>2026-04-10 07:00</text:p>
          </table:table-cell>
          <table:table-cell office:value-type="float" office:value="9.305345" table:style-name="c1">
            <text:p>9.3053</text:p>
          </table:table-cell>
          <table:table-cell office:value-type="float" office:value="-1.2542280418833096" table:style-name="c14">
            <text:p>-1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6:45</text:p>
          </table:table-cell>
          <table:table-cell office:value-type="float" office:value="9.454724999999998" table:style-name="c1">
            <text:p>9.4547</text:p>
          </table:table-cell>
          <table:table-cell office:value-type="string" table:style-name="c1">
            <text:p>2026-04-11 23:15</text:p>
          </table:table-cell>
          <table:table-cell office:value-type="float" office:value="9.35532" table:style-name="c1">
            <text:p>9.3553</text:p>
          </table:table-cell>
          <table:table-cell office:value-type="float" office:value="-1.2491773656028826" table:style-name="c14">
            <text:p>-1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0:00</text:p>
          </table:table-cell>
          <table:table-cell office:value-type="float" office:value="9.414705" table:style-name="c1">
            <text:p>9.4147</text:p>
          </table:table-cell>
          <table:table-cell office:value-type="string" table:style-name="c1">
            <text:p>2026-04-14 03:30</text:p>
          </table:table-cell>
          <table:table-cell office:value-type="float" office:value="9.45527" table:style-name="c1">
            <text:p>9.4553</text:p>
          </table:table-cell>
          <table:table-cell office:value-type="float" office:value="0.23010721281231383" table:style-name="c13">
            <text:p>+0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9.534764999999998" table:style-name="c1">
            <text:p>9.5348</text:p>
          </table:table-cell>
          <table:table-cell office:value-type="string" table:style-name="c1">
            <text:p>2026-04-15 23:45</text:p>
          </table:table-cell>
          <table:table-cell office:value-type="float" office:value="9.405295" table:style-name="c1">
            <text:p>9.4053</text:p>
          </table:table-cell>
          <table:table-cell office:value-type="float" office:value="-1.5550586165993363" table:style-name="c14">
            <text:p>-1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30</text:p>
          </table:table-cell>
          <table:table-cell office:value-type="float" office:value="9.514755" table:style-name="c1">
            <text:p>9.5148</text:p>
          </table:table-cell>
          <table:table-cell office:value-type="string" table:style-name="c1">
            <text:p>2026-04-16 14:15</text:p>
          </table:table-cell>
          <table:table-cell office:value-type="float" office:value="9.345325" table:style-name="c1">
            <text:p>9.3453</text:p>
          </table:table-cell>
          <table:table-cell office:value-type="float" office:value="-1.9770483283594653" table:style-name="c14">
            <text:p>-2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45</text:p>
          </table:table-cell>
          <table:table-cell office:value-type="float" office:value="9.574785" table:style-name="c1">
            <text:p>9.5748</text:p>
          </table:table-cell>
          <table:table-cell office:value-type="string" table:style-name="c1">
            <text:p>2026-04-17 01:30</text:p>
          </table:table-cell>
          <table:table-cell office:value-type="float" office:value="9.635180000000002" table:style-name="c1">
            <text:p>9.6352</text:p>
          </table:table-cell>
          <table:table-cell office:value-type="float" office:value="0.42961043177469627" table:style-name="c13">
            <text:p>+0.4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15</text:p>
          </table:table-cell>
          <table:table-cell office:value-type="float" office:value="9.6048" table:style-name="c1">
            <text:p>9.6048</text:p>
          </table:table-cell>
          <table:table-cell office:value-type="string" table:style-name="c1">
            <text:p>2026-04-17 07:30</text:p>
          </table:table-cell>
          <table:table-cell office:value-type="float" office:value="9.61519" table:style-name="c1">
            <text:p>9.6152</text:p>
          </table:table-cell>
          <table:table-cell office:value-type="float" office:value="-0.09194116285605736" table:style-name="c14">
            <text:p>-0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8:00</text:p>
          </table:table-cell>
          <table:table-cell office:value-type="float" office:value="9.634815" table:style-name="c1">
            <text:p>9.6348</text:p>
          </table:table-cell>
          <table:table-cell office:value-type="string" table:style-name="c1">
            <text:p>2026-04-17 11:00</text:p>
          </table:table-cell>
          <table:table-cell office:value-type="float" office:value="9.53523" table:style-name="c1">
            <text:p>9.5352</text:p>
          </table:table-cell>
          <table:table-cell office:value-type="float" office:value="-1.2314291947484124" table:style-name="c14">
            <text:p>-1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9.734865" table:style-name="c1">
            <text:p>9.7349</text:p>
          </table:table-cell>
          <table:table-cell office:value-type="string" table:style-name="c1">
            <text:p>2026-04-17 19:00</text:p>
          </table:table-cell>
          <table:table-cell office:value-type="float" office:value="9.765115" table:style-name="c1">
            <text:p>9.7651</text:p>
          </table:table-cell>
          <table:table-cell office:value-type="float" office:value="0.11021760563707517" table:style-name="c13">
            <text:p>+0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11:45</text:p>
          </table:table-cell>
          <table:table-cell office:value-type="float" office:value="9.474735" table:style-name="c1">
            <text:p>9.4747</text:p>
          </table:table-cell>
          <table:table-cell office:value-type="string" table:style-name="c1">
            <text:p>2026-04-21 13:45</text:p>
          </table:table-cell>
          <table:table-cell office:value-type="float" office:value="9.37531" table:style-name="c1">
            <text:p>9.3753</text:p>
          </table:table-cell>
          <table:table-cell office:value-type="float" office:value="-1.2471720284525034" table:style-name="c14">
            <text:p>-1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45</text:p>
          </table:table-cell>
          <table:table-cell office:value-type="float" office:value="9.594795" table:style-name="c1">
            <text:p>9.5948</text:p>
          </table:table-cell>
          <table:table-cell office:value-type="string" table:style-name="c1">
            <text:p>2026-04-22 12:30</text:p>
          </table:table-cell>
          <table:table-cell office:value-type="float" office:value="9.51524" table:style-name="c1">
            <text:p>9.5152</text:p>
          </table:table-cell>
          <table:table-cell office:value-type="float" office:value="-1.0273900042679251" table:style-name="c14">
            <text:p>-1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1:45</text:p>
          </table:table-cell>
          <table:table-cell office:value-type="float" office:value="9.494745" table:style-name="c1">
            <text:p>9.4947</text:p>
          </table:table-cell>
          <table:table-cell office:value-type="string" table:style-name="c1">
            <text:p>2026-04-26 14:00</text:p>
          </table:table-cell>
          <table:table-cell office:value-type="float" office:value="9.405295" table:style-name="c1">
            <text:p>9.4053</text:p>
          </table:table-cell>
          <table:table-cell office:value-type="float" office:value="-1.1401168194090538" table:style-name="c14">
            <text:p>-1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8:45</text:p>
          </table:table-cell>
          <table:table-cell office:value-type="float" office:value="9.524759999999999" table:style-name="c1">
            <text:p>9.5248</text:p>
          </table:table-cell>
          <table:table-cell office:value-type="string" table:style-name="c1">
            <text:p>2026-04-26 21:45</text:p>
          </table:table-cell>
          <table:table-cell office:value-type="float" office:value="9.405295" table:style-name="c1">
            <text:p>9.4053</text:p>
          </table:table-cell>
          <table:table-cell office:value-type="float" office:value="-1.4516500647260289" table:style-name="c14">
            <text:p>-1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9.4047" table:style-name="c1">
            <text:p>9.4047</text:p>
          </table:table-cell>
          <table:table-cell office:value-type="string" table:style-name="c1">
            <text:p>2026-04-29 12:30</text:p>
          </table:table-cell>
          <table:table-cell office:value-type="float" office:value="9.235380000000001" table:style-name="c1">
            <text:p>9.2354</text:p>
          </table:table-cell>
          <table:table-cell office:value-type="float" office:value="-1.9966774551022248" table:style-name="c14">
            <text:p>-2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9.2046" table:style-name="c1">
            <text:p>9.2046</text:p>
          </table:table-cell>
          <table:table-cell office:value-type="string" table:style-name="c1">
            <text:p>2026-05-04 08:30</text:p>
          </table:table-cell>
          <table:table-cell office:value-type="float" office:value="9.215390000000001" table:style-name="c1">
            <text:p>9.2154</text:p>
          </table:table-cell>
          <table:table-cell office:value-type="float" office:value="-0.08291033407206161" table:style-name="c14">
            <text:p>-0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0:45</text:p>
          </table:table-cell>
          <table:table-cell office:value-type="float" office:value="9.414705" table:style-name="c1">
            <text:p>9.4147</text:p>
          </table:table-cell>
          <table:table-cell office:value-type="string" table:style-name="c1">
            <text:p>2026-05-05 16:45</text:p>
          </table:table-cell>
          <table:table-cell office:value-type="float" office:value="9.33533" table:style-name="c1">
            <text:p>9.3353</text:p>
          </table:table-cell>
          <table:table-cell office:value-type="float" office:value="-1.0413106376673475" table:style-name="c14">
            <text:p>-1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4:00</text:p>
          </table:table-cell>
          <table:table-cell office:value-type="float" office:value="9.574785" table:style-name="c1">
            <text:p>9.5748</text:p>
          </table:table-cell>
          <table:table-cell office:value-type="string" table:style-name="c1">
            <text:p>2026-05-06 14:00</text:p>
          </table:table-cell>
          <table:table-cell office:value-type="float" office:value="9.55522" table:style-name="c1">
            <text:p>9.5552</text:p>
          </table:table-cell>
          <table:table-cell office:value-type="float" office:value="-0.40383031869646313" table:style-name="c14">
            <text:p>-0.4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15</text:p>
          </table:table-cell>
          <table:table-cell office:value-type="float" office:value="9.6048" table:style-name="c1">
            <text:p>9.6048</text:p>
          </table:table-cell>
          <table:table-cell office:value-type="string" table:style-name="c1">
            <text:p>2026-05-07 10:15</text:p>
          </table:table-cell>
          <table:table-cell office:value-type="float" office:value="9.565215" table:style-name="c1">
            <text:p>9.5652</text:p>
          </table:table-cell>
          <table:table-cell office:value-type="float" office:value="-0.6112138179347748" table:style-name="c14">
            <text:p>-0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8:30</text:p>
          </table:table-cell>
          <table:table-cell office:value-type="float" office:value="9.88494" table:style-name="c1">
            <text:p>9.8849</text:p>
          </table:table-cell>
          <table:table-cell office:value-type="string" table:style-name="c1">
            <text:p>2026-05-09 06:45</text:p>
          </table:table-cell>
          <table:table-cell office:value-type="float" office:value="9.93503" table:style-name="c1">
            <text:p>9.935</text:p>
          </table:table-cell>
          <table:table-cell office:value-type="float" office:value="0.30581748629732175" table:style-name="c13">
            <text:p>+0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7:45</text:p>
          </table:table-cell>
          <table:table-cell office:value-type="float" office:value="9.954975" table:style-name="c1">
            <text:p>9.955</text:p>
          </table:table-cell>
          <table:table-cell office:value-type="string" table:style-name="c1">
            <text:p>2026-05-10 01:00</text:p>
          </table:table-cell>
          <table:table-cell office:value-type="float" office:value="9.915040000000001" table:style-name="c1">
            <text:p>9.915</text:p>
          </table:table-cell>
          <table:table-cell office:value-type="float" office:value="-0.6002542945612199" table:style-name="c14">
            <text:p>-0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9:15</text:p>
          </table:table-cell>
          <table:table-cell office:value-type="float" office:value="10.14507" table:style-name="c1">
            <text:p>10.145</text:p>
          </table:table-cell>
          <table:table-cell office:value-type="string" table:style-name="c1">
            <text:p>2026-05-11 13:00</text:p>
          </table:table-cell>
          <table:table-cell office:value-type="float" office:value="10.07496" table:style-name="c1">
            <text:p>10.075</text:p>
          </table:table-cell>
          <table:table-cell office:value-type="float" office:value="-0.8895931229651599" table:style-name="c14">
            <text:p>-0.9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10:00</text:p>
          </table:table-cell>
          <table:table-cell office:value-type="float" office:value="10.155075" table:style-name="c1">
            <text:p>10.155</text:p>
          </table:table-cell>
          <table:table-cell office:value-type="string" table:style-name="c1">
            <text:p>2026-05-13 12:00</text:p>
          </table:table-cell>
          <table:table-cell office:value-type="float" office:value="9.945025" table:style-name="c1">
            <text:p>9.945</text:p>
          </table:table-cell>
          <table:table-cell office:value-type="float" office:value="-2.2641891367124356" table:style-name="c14">
            <text:p>-2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4:45</text:p>
          </table:table-cell>
          <table:table-cell office:value-type="float" office:value="9.2896425" table:style-name="c1">
            <text:p>9.2896</text:p>
          </table:table-cell>
          <table:table-cell office:value-type="string" table:style-name="c1">
            <text:p>2026-05-20 21:30</text:p>
          </table:table-cell>
          <table:table-cell office:value-type="float" office:value="9.2843555" table:style-name="c1">
            <text:p>9.2844</text:p>
          </table:table-cell>
          <table:table-cell office:value-type="float" office:value="-0.25669907797314373" table:style-name="c14">
            <text:p>-0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00</text:p>
          </table:table-cell>
          <table:table-cell office:value-type="float" office:value="9.476735999999999" table:style-name="c1">
            <text:p>9.4767</text:p>
          </table:table-cell>
          <table:table-cell office:value-type="string" table:style-name="c1">
            <text:p>2026-05-21 10:30</text:p>
          </table:table-cell>
          <table:table-cell office:value-type="float" office:value="9.3123415" table:style-name="c1">
            <text:p>9.3123</text:p>
          </table:table-cell>
          <table:table-cell office:value-type="float" office:value="-1.93114876956052" table:style-name="c14">
            <text:p>-1.9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5:30</text:p>
          </table:table-cell>
          <table:table-cell office:value-type="float" office:value="9.403699499999998" table:style-name="c1">
            <text:p>9.4037</text:p>
          </table:table-cell>
          <table:table-cell office:value-type="string" table:style-name="c1">
            <text:p>2026-05-22 00:15</text:p>
          </table:table-cell>
          <table:table-cell office:value-type="float" office:value="9.427284" table:style-name="c1">
            <text:p>9.4273</text:p>
          </table:table-cell>
          <table:table-cell office:value-type="float" office:value="0.05039888061080244" table:style-name="c13">
            <text:p>+0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4:30</text:p>
          </table:table-cell>
          <table:table-cell office:value-type="float" office:value="9.4957455" table:style-name="c1">
            <text:p>9.4957</text:p>
          </table:table-cell>
          <table:table-cell office:value-type="string" table:style-name="c1">
            <text:p>2026-05-25 19:15</text:p>
          </table:table-cell>
          <table:table-cell office:value-type="float" office:value="9.3953" table:style-name="c1">
            <text:p>9.3953</text:p>
          </table:table-cell>
          <table:table-cell office:value-type="float" office:value="-1.255580245911181" table:style-name="c14">
            <text:p>-1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5:45</text:p>
          </table:table-cell>
          <table:table-cell office:value-type="float" office:value="9.319657499999998" table:style-name="c1">
            <text:p>9.3197</text:p>
          </table:table-cell>
          <table:table-cell office:value-type="string" table:style-name="c1">
            <text:p>2026-05-26 15:30</text:p>
          </table:table-cell>
          <table:table-cell office:value-type="float" office:value="9.2963495" table:style-name="c1">
            <text:p>9.2963</text:p>
          </table:table-cell>
          <table:table-cell office:value-type="float" office:value="-0.44949508767352375" table:style-name="c14">
            <text:p>-0.4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0:15</text:p>
          </table:table-cell>
          <table:table-cell office:value-type="float" office:value="9.0195075" table:style-name="c1">
            <text:p>9.0195</text:p>
          </table:table-cell>
          <table:table-cell office:value-type="string" table:style-name="c1">
            <text:p>2026-06-01 05:00</text:p>
          </table:table-cell>
          <table:table-cell office:value-type="float" office:value="8.944525500000001" table:style-name="c1">
            <text:p>8.9445</text:p>
          </table:table-cell>
          <table:table-cell office:value-type="float" office:value="-1.0295695909615765" table:style-name="c14">
            <text:p>-1.0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4:00</text:p>
          </table:table-cell>
          <table:table-cell office:value-type="float" office:value="454.62719999999996" table:style-name="c10">
            <text:p>454.63</text:p>
          </table:table-cell>
          <table:table-cell office:value-type="string" table:style-name="c10">
            <text:p>2026-03-09 15:15</text:p>
          </table:table-cell>
          <table:table-cell office:value-type="float" office:value="446.67655" table:style-name="c10">
            <text:p>446.68</text:p>
          </table:table-cell>
          <table:table-cell office:value-type="float" office:value="-1.9452325825313421" table:style-name="c11">
            <text:p>-1.9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06:45</text:p>
          </table:table-cell>
          <table:table-cell office:value-type="float" office:value="453.02639999999997" table:style-name="c10">
            <text:p>453.03</text:p>
          </table:table-cell>
          <table:table-cell office:value-type="string" table:style-name="c10">
            <text:p>2026-03-11 09:30</text:p>
          </table:table-cell>
          <table:table-cell office:value-type="float" office:value="448.67555" table:style-name="c10">
            <text:p>448.68</text:p>
          </table:table-cell>
          <table:table-cell office:value-type="float" office:value="-1.1583767357597474" table:style-name="c11">
            <text:p>-1.2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1:30</text:p>
          </table:table-cell>
          <table:table-cell office:value-type="float" office:value="469.33455" table:style-name="c10">
            <text:p>469.33</text:p>
          </table:table-cell>
          <table:table-cell office:value-type="string" table:style-name="c10">
            <text:p>2026-03-13 15:00</text:p>
          </table:table-cell>
          <table:table-cell office:value-type="float" office:value="465.86695000000003" table:style-name="c10">
            <text:p>465.87</text:p>
          </table:table-cell>
          <table:table-cell office:value-type="float" office:value="-0.9372563841826498" table:style-name="c11">
            <text:p>-0.9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4 11:30</text:p>
          </table:table-cell>
          <table:table-cell office:value-type="float" office:value="458.62919999999997" table:style-name="c10">
            <text:p>458.63</text:p>
          </table:table-cell>
          <table:table-cell office:value-type="string" table:style-name="c10">
            <text:p>2026-03-14 11:45</text:p>
          </table:table-cell>
          <table:table-cell office:value-type="float" office:value="460.46965" table:style-name="c10">
            <text:p>460.47</text:p>
          </table:table-cell>
          <table:table-cell office:value-type="float" office:value="0.20059149518827368" table:style-name="c12">
            <text:p>+0.2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4 16:00</text:p>
          </table:table-cell>
          <table:table-cell office:value-type="float" office:value="461.73075" table:style-name="c10">
            <text:p>461.73</text:p>
          </table:table-cell>
          <table:table-cell office:value-type="string" table:style-name="c10">
            <text:p>2026-03-15 01:45</text:p>
          </table:table-cell>
          <table:table-cell office:value-type="float" office:value="463.66805" table:style-name="c10">
            <text:p>463.67</text:p>
          </table:table-cell>
          <table:table-cell office:value-type="float" office:value="0.21883480102851127" table:style-name="c12">
            <text:p>+0.2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2:00</text:p>
          </table:table-cell>
          <table:table-cell office:value-type="float" office:value="465.0324" table:style-name="c10">
            <text:p>465.03</text:p>
          </table:table-cell>
          <table:table-cell office:value-type="string" table:style-name="c10">
            <text:p>2026-03-16 22:00</text:p>
          </table:table-cell>
          <table:table-cell office:value-type="float" office:value="480.65955" table:style-name="c10">
            <text:p>480.66</text:p>
          </table:table-cell>
          <table:table-cell office:value-type="float" office:value="3.1538257462383257" table:style-name="c12">
            <text:p>+3.2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0 08:15</text:p>
          </table:table-cell>
          <table:table-cell office:value-type="float" office:value="468.8343" table:style-name="c10">
            <text:p>468.83</text:p>
          </table:table-cell>
          <table:table-cell office:value-type="string" table:style-name="c10">
            <text:p>2026-03-20 10:30</text:p>
          </table:table-cell>
          <table:table-cell office:value-type="float" office:value="461.9689" table:style-name="c10">
            <text:p>461.97</text:p>
          </table:table-cell>
          <table:table-cell office:value-type="float" office:value="-1.6613280707277411" table:style-name="c11">
            <text:p>-1.7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0 11:15</text:p>
          </table:table-cell>
          <table:table-cell office:value-type="float" office:value="467.93384999999995" table:style-name="c10">
            <text:p>467.93</text:p>
          </table:table-cell>
          <table:table-cell office:value-type="string" table:style-name="c10">
            <text:p>2026-03-20 17:45</text:p>
          </table:table-cell>
          <table:table-cell office:value-type="float" office:value="465.66705" table:style-name="c10">
            <text:p>465.67</text:p>
          </table:table-cell>
          <table:table-cell office:value-type="float" office:value="-0.6833590758501318" table:style-name="c11">
            <text:p>-0.7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0 23:45</text:p>
          </table:table-cell>
          <table:table-cell office:value-type="float" office:value="474.83729999999997" table:style-name="c10">
            <text:p>474.84</text:p>
          </table:table-cell>
          <table:table-cell office:value-type="string" table:style-name="c10">
            <text:p>2026-03-21 03:30</text:p>
          </table:table-cell>
          <table:table-cell office:value-type="float" office:value="469.76500000000004" table:style-name="c10">
            <text:p>469.77</text:p>
          </table:table-cell>
          <table:table-cell office:value-type="float" office:value="-1.2659831557040535" table:style-name="c11">
            <text:p>-1.3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2 04:15</text:p>
          </table:table-cell>
          <table:table-cell office:value-type="float" office:value="466.8333" table:style-name="c10">
            <text:p>466.83</text:p>
          </table:table-cell>
          <table:table-cell office:value-type="string" table:style-name="c10">
            <text:p>2026-03-22 18:00</text:p>
          </table:table-cell>
          <table:table-cell office:value-type="float" office:value="467.1663" table:style-name="c10">
            <text:p>467.17</text:p>
          </table:table-cell>
          <table:table-cell office:value-type="float" office:value="-0.12871091965804826" table:style-name="c11">
            <text:p>-0.1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2 22:45</text:p>
          </table:table-cell>
          <table:table-cell office:value-type="float" office:value="468.43409999999994" table:style-name="c10">
            <text:p>468.43</text:p>
          </table:table-cell>
          <table:table-cell office:value-type="string" table:style-name="c10">
            <text:p>2026-03-23 01:00</text:p>
          </table:table-cell>
          <table:table-cell office:value-type="float" office:value="465.86695000000003" table:style-name="c10">
            <text:p>465.87</text:p>
          </table:table-cell>
          <table:table-cell office:value-type="float" office:value="-0.7468324857327846" table:style-name="c11">
            <text:p>-0.7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15:45</text:p>
          </table:table-cell>
          <table:table-cell office:value-type="float" office:value="474.83729999999997" table:style-name="c10">
            <text:p>474.84</text:p>
          </table:table-cell>
          <table:table-cell office:value-type="string" table:style-name="c10">
            <text:p>2026-03-24 16:00</text:p>
          </table:table-cell>
          <table:table-cell office:value-type="float" office:value="473.9629" table:style-name="c10">
            <text:p>473.96</text:p>
          </table:table-cell>
          <table:table-cell office:value-type="float" office:value="-0.3836791753933255" table:style-name="c11">
            <text:p>-0.4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16:15</text:p>
          </table:table-cell>
          <table:table-cell office:value-type="float" office:value="475.0374" table:style-name="c10">
            <text:p>475.04</text:p>
          </table:table-cell>
          <table:table-cell office:value-type="string" table:style-name="c10">
            <text:p>2026-03-24 18:00</text:p>
          </table:table-cell>
          <table:table-cell office:value-type="float" office:value="472.56360000000006" table:style-name="c10">
            <text:p>472.56</text:p>
          </table:table-cell>
          <table:table-cell office:value-type="float" office:value="-0.7196179998458785" table:style-name="c11">
            <text:p>-0.7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6:45</text:p>
          </table:table-cell>
          <table:table-cell office:value-type="float" office:value="473.43659999999994" table:style-name="c10">
            <text:p>473.44</text:p>
          </table:table-cell>
          <table:table-cell office:value-type="string" table:style-name="c10">
            <text:p>2026-03-31 20:00</text:p>
          </table:table-cell>
          <table:table-cell office:value-type="float" office:value="470.56460000000004" table:style-name="c10">
            <text:p>470.56</text:p>
          </table:table-cell>
          <table:table-cell office:value-type="float" office:value="-0.8053155660968869" table:style-name="c11">
            <text:p>-0.8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06:30</text:p>
          </table:table-cell>
          <table:table-cell office:value-type="float" office:value="465.23249999999996" table:style-name="c10">
            <text:p>465.23</text:p>
          </table:table-cell>
          <table:table-cell office:value-type="string" table:style-name="c10">
            <text:p>2026-04-01 08:00</text:p>
          </table:table-cell>
          <table:table-cell office:value-type="float" office:value="460.26975000000004" table:style-name="c10">
            <text:p>460.27</text:p>
          </table:table-cell>
          <table:table-cell office:value-type="float" office:value="-1.2644923194854107" table:style-name="c11">
            <text:p>-1.3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2:45</text:p>
          </table:table-cell>
          <table:table-cell office:value-type="float" office:value="442.52115" table:style-name="c10">
            <text:p>442.52</text:p>
          </table:table-cell>
          <table:table-cell office:value-type="string" table:style-name="c10">
            <text:p>2026-04-08 15:00</text:p>
          </table:table-cell>
          <table:table-cell office:value-type="float" office:value="443.1783" table:style-name="c10">
            <text:p>443.18</text:p>
          </table:table-cell>
          <table:table-cell office:value-type="float" office:value="-0.051695477538193924" table:style-name="c11">
            <text:p>-0.1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07:15</text:p>
          </table:table-cell>
          <table:table-cell office:value-type="float" office:value="445.52265" table:style-name="c10">
            <text:p>445.52</text:p>
          </table:table-cell>
          <table:table-cell office:value-type="string" table:style-name="c10">
            <text:p>2026-04-09 11:15</text:p>
          </table:table-cell>
          <table:table-cell office:value-type="float" office:value="440.47965" table:style-name="c10">
            <text:p>440.48</text:p>
          </table:table-cell>
          <table:table-cell office:value-type="float" office:value="-1.3295662566987443" table:style-name="c11">
            <text:p>-1.3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45</text:p>
          </table:table-cell>
          <table:table-cell office:value-type="float" office:value="440.62019999999995" table:style-name="c10">
            <text:p>440.62</text:p>
          </table:table-cell>
          <table:table-cell office:value-type="string" table:style-name="c10">
            <text:p>2026-04-09 16:00</text:p>
          </table:table-cell>
          <table:table-cell office:value-type="float" office:value="441.07935000000003" table:style-name="c10">
            <text:p>441.08</text:p>
          </table:table-cell>
          <table:table-cell office:value-type="float" office:value="-0.09590291608281287" table:style-name="c11">
            <text:p>-0.1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6:30</text:p>
          </table:table-cell>
          <table:table-cell office:value-type="float" office:value="441.8208" table:style-name="c10">
            <text:p>441.82</text:p>
          </table:table-cell>
          <table:table-cell office:value-type="string" table:style-name="c10">
            <text:p>2026-04-10 00:00</text:p>
          </table:table-cell>
          <table:table-cell office:value-type="float" office:value="442.9784" table:style-name="c10">
            <text:p>442.98</text:p>
          </table:table-cell>
          <table:table-cell office:value-type="float" office:value="0.06158292647153729" table:style-name="c12">
            <text:p>+0.1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1:30</text:p>
          </table:table-cell>
          <table:table-cell office:value-type="float" office:value="442.42109999999997" table:style-name="c10">
            <text:p>442.42</text:p>
          </table:table-cell>
          <table:table-cell office:value-type="string" table:style-name="c10">
            <text:p>2026-04-10 23:15</text:p>
          </table:table-cell>
          <table:table-cell office:value-type="float" office:value="443.87795000000006" table:style-name="c10">
            <text:p>443.88</text:p>
          </table:table-cell>
          <table:table-cell office:value-type="float" office:value="0.12873210114754396" table:style-name="c12">
            <text:p>+0.1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14:00</text:p>
          </table:table-cell>
          <table:table-cell office:value-type="float" office:value="443.2215" table:style-name="c10">
            <text:p>443.22</text:p>
          </table:table-cell>
          <table:table-cell office:value-type="string" table:style-name="c10">
            <text:p>2026-04-14 17:45</text:p>
          </table:table-cell>
          <table:table-cell office:value-type="float" office:value="438.68055" table:style-name="c10">
            <text:p>438.68</text:p>
          </table:table-cell>
          <table:table-cell office:value-type="float" office:value="-1.222384839059032" table:style-name="c11">
            <text:p>-1.2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0:15</text:p>
          </table:table-cell>
          <table:table-cell office:value-type="float" office:value="434.8173" table:style-name="c10">
            <text:p>434.82</text:p>
          </table:table-cell>
          <table:table-cell office:value-type="string" table:style-name="c10">
            <text:p>2026-04-16 08:15</text:p>
          </table:table-cell>
          <table:table-cell office:value-type="float" office:value="439.9799" table:style-name="c10">
            <text:p>439.98</text:p>
          </table:table-cell>
          <table:table-cell office:value-type="float" office:value="0.9850298458456086" table:style-name="c12">
            <text:p>+1.0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3:30</text:p>
          </table:table-cell>
          <table:table-cell office:value-type="float" office:value="442.32105" table:style-name="c10">
            <text:p>442.32</text:p>
          </table:table-cell>
          <table:table-cell office:value-type="string" table:style-name="c10">
            <text:p>2026-04-16 14:00</text:p>
          </table:table-cell>
          <table:table-cell office:value-type="float" office:value="437.1813" table:style-name="c10">
            <text:p>437.18</text:p>
          </table:table-cell>
          <table:table-cell office:value-type="float" office:value="-1.3595725138335624" table:style-name="c11">
            <text:p>-1.4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45</text:p>
          </table:table-cell>
          <table:table-cell office:value-type="float" office:value="441.92085" table:style-name="c10">
            <text:p>441.92</text:p>
          </table:table-cell>
          <table:table-cell office:value-type="string" table:style-name="c10">
            <text:p>2026-04-17 04:00</text:p>
          </table:table-cell>
          <table:table-cell office:value-type="float" office:value="449.27525" table:style-name="c10">
            <text:p>449.28</text:p>
          </table:table-cell>
          <table:table-cell office:value-type="float" office:value="1.4609626984674051" table:style-name="c12">
            <text:p>+1.5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3:00</text:p>
          </table:table-cell>
          <table:table-cell office:value-type="float" office:value="452.32605" table:style-name="c10">
            <text:p>452.33</text:p>
          </table:table-cell>
          <table:table-cell office:value-type="string" table:style-name="c10">
            <text:p>2026-04-17 18:30</text:p>
          </table:table-cell>
          <table:table-cell office:value-type="float" office:value="453.97290000000004" table:style-name="c10">
            <text:p>453.97</text:p>
          </table:table-cell>
          <table:table-cell office:value-type="float" office:value="0.16345690744541397" table:style-name="c12">
            <text:p>+0.2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2:30</text:p>
          </table:table-cell>
          <table:table-cell office:value-type="float" office:value="452.6261999999999" table:style-name="c10">
            <text:p>452.63</text:p>
          </table:table-cell>
          <table:table-cell office:value-type="string" table:style-name="c10">
            <text:p>2026-04-22 12:45</text:p>
          </table:table-cell>
          <table:table-cell office:value-type="float" office:value="465.3672" table:style-name="c10">
            <text:p>465.37</text:p>
          </table:table-cell>
          <table:table-cell office:value-type="float" office:value="2.6093785483916054" table:style-name="c12">
            <text:p>+2.6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15</text:p>
          </table:table-cell>
          <table:table-cell office:value-type="float" office:value="455.0274" table:style-name="c10">
            <text:p>455.03</text:p>
          </table:table-cell>
          <table:table-cell office:value-type="string" table:style-name="c10">
            <text:p>2026-04-29 12:30</text:p>
          </table:table-cell>
          <table:table-cell office:value-type="float" office:value="451.37420000000003" table:style-name="c10">
            <text:p>451.37</text:p>
          </table:table-cell>
          <table:table-cell office:value-type="float" office:value="-1.0011478486350534" table:style-name="c11">
            <text:p>-1.0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8:30</text:p>
          </table:table-cell>
          <table:table-cell office:value-type="float" office:value="451.92584999999997" table:style-name="c10">
            <text:p>451.93</text:p>
          </table:table-cell>
          <table:table-cell office:value-type="string" table:style-name="c10">
            <text:p>2026-05-05 16:00</text:p>
          </table:table-cell>
          <table:table-cell office:value-type="float" office:value="455.3722" table:style-name="c10">
            <text:p>455.37</text:p>
          </table:table-cell>
          <table:table-cell office:value-type="float" office:value="0.5611674951101042" table:style-name="c12">
            <text:p>+0.6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23:15</text:p>
          </table:table-cell>
          <table:table-cell office:value-type="float" office:value="464.53215" table:style-name="c10">
            <text:p>464.53</text:p>
          </table:table-cell>
          <table:table-cell office:value-type="string" table:style-name="c10">
            <text:p>2026-05-06 04:30</text:p>
          </table:table-cell>
          <table:table-cell office:value-type="float" office:value="458.37070000000006" table:style-name="c10">
            <text:p>458.37</text:p>
          </table:table-cell>
          <table:table-cell office:value-type="float" office:value="-1.5236260890231001" table:style-name="c11">
            <text:p>-1.5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4:45</text:p>
          </table:table-cell>
          <table:table-cell office:value-type="float" office:value="474.4371" table:style-name="c10">
            <text:p>474.44</text:p>
          </table:table-cell>
          <table:table-cell office:value-type="string" table:style-name="c10">
            <text:p>2026-05-06 13:15</text:p>
          </table:table-cell>
          <table:table-cell office:value-type="float" office:value="470.7645" table:style-name="c10">
            <text:p>470.76</text:p>
          </table:table-cell>
          <table:table-cell office:value-type="float" office:value="-0.9724488737284598" table:style-name="c11">
            <text:p>-1.0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8:00</text:p>
          </table:table-cell>
          <table:table-cell office:value-type="float" office:value="460.93035" table:style-name="c10">
            <text:p>460.93</text:p>
          </table:table-cell>
          <table:table-cell office:value-type="string" table:style-name="c10">
            <text:p>2026-05-11 01:45</text:p>
          </table:table-cell>
          <table:table-cell office:value-type="float" office:value="459.8699500000001" table:style-name="c10">
            <text:p>459.87</text:p>
          </table:table-cell>
          <table:table-cell office:value-type="float" office:value="-0.42949656711690487" table:style-name="c11">
            <text:p>-0.4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3:15</text:p>
          </table:table-cell>
          <table:table-cell office:value-type="float" office:value="378.88935" table:style-name="c10">
            <text:p>378.89</text:p>
          </table:table-cell>
          <table:table-cell office:value-type="string" table:style-name="c10">
            <text:p>2026-05-22 00:45</text:p>
          </table:table-cell>
          <table:table-cell office:value-type="float" office:value="378.71055" table:style-name="c10">
            <text:p>378.71</text:p>
          </table:table-cell>
          <table:table-cell office:value-type="float" office:value="-0.24699622447820202" table:style-name="c11">
            <text:p>-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3:00</text:p>
          </table:table-cell>
          <table:table-cell office:value-type="float" office:value="644.432055" table:style-name="c1">
            <text:p>644.43</text:p>
          </table:table-cell>
          <table:table-cell office:value-type="string" table:style-name="c1">
            <text:p>2026-03-10 13:45</text:p>
          </table:table-cell>
          <table:table-cell office:value-type="float" office:value="642.728475" table:style-name="c1">
            <text:p>642.73</text:p>
          </table:table-cell>
          <table:table-cell office:value-type="float" office:value="-0.4637252598375219" table:style-name="c14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651.2154449999999" table:style-name="c1">
            <text:p>651.22</text:p>
          </table:table-cell>
          <table:table-cell office:value-type="string" table:style-name="c1">
            <text:p>2026-03-10 18:15</text:p>
          </table:table-cell>
          <table:table-cell office:value-type="float" office:value="642.528575" table:style-name="c1">
            <text:p>642.53</text:p>
          </table:table-cell>
          <table:table-cell office:value-type="float" office:value="-1.5311806097327518" table:style-name="c14">
            <text:p>-1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45</text:p>
          </table:table-cell>
          <table:table-cell office:value-type="float" office:value="649.08438" table:style-name="c1">
            <text:p>649.08</text:p>
          </table:table-cell>
          <table:table-cell office:value-type="string" table:style-name="c1">
            <text:p>2026-03-12 00:45</text:p>
          </table:table-cell>
          <table:table-cell office:value-type="float" office:value="651.33417" table:style-name="c1">
            <text:p>651.33</text:p>
          </table:table-cell>
          <table:table-cell office:value-type="float" office:value="0.14601691603945977" table:style-name="c13">
            <text:p>+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9:45</text:p>
          </table:table-cell>
          <table:table-cell office:value-type="float" office:value="650.70519" table:style-name="c1">
            <text:p>650.71</text:p>
          </table:table-cell>
          <table:table-cell office:value-type="string" table:style-name="c1">
            <text:p>2026-03-12 15:00</text:p>
          </table:table-cell>
          <table:table-cell office:value-type="float" office:value="646.5165800000001" table:style-name="c1">
            <text:p>646.52</text:p>
          </table:table-cell>
          <table:table-cell office:value-type="float" office:value="-0.8423164172733699" table:style-name="c14">
            <text:p>-0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8:45</text:p>
          </table:table-cell>
          <table:table-cell office:value-type="float" office:value="667.7136899999999" table:style-name="c1">
            <text:p>667.71</text:p>
          </table:table-cell>
          <table:table-cell office:value-type="string" table:style-name="c1">
            <text:p>2026-03-13 16:00</text:p>
          </table:table-cell>
          <table:table-cell office:value-type="float" office:value="661.878895" table:style-name="c1">
            <text:p>661.88</text:p>
          </table:table-cell>
          <table:table-cell office:value-type="float" office:value="-1.0720000231094318" table:style-name="c14">
            <text:p>-1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8:00</text:p>
          </table:table-cell>
          <table:table-cell office:value-type="float" office:value="662.280975" table:style-name="c1">
            <text:p>662.28</text:p>
          </table:table-cell>
          <table:table-cell office:value-type="string" table:style-name="c1">
            <text:p>2026-03-15 19:00</text:p>
          </table:table-cell>
          <table:table-cell office:value-type="float" office:value="658.0408150000001" table:style-name="c1">
            <text:p>658.04</text:p>
          </table:table-cell>
          <table:table-cell office:value-type="float" office:value="-0.8388559839250909" table:style-name="c14">
            <text:p>-0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1:45</text:p>
          </table:table-cell>
          <table:table-cell office:value-type="float" office:value="668.29398" table:style-name="c1">
            <text:p>668.29</text:p>
          </table:table-cell>
          <table:table-cell office:value-type="string" table:style-name="c1">
            <text:p>2026-03-16 08:45</text:p>
          </table:table-cell>
          <table:table-cell office:value-type="float" office:value="674.10278" table:style-name="c1">
            <text:p>674.1</text:p>
          </table:table-cell>
          <table:table-cell office:value-type="float" office:value="0.6675607855662458" table:style-name="c13">
            <text:p>+0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7:45</text:p>
          </table:table-cell>
          <table:table-cell office:value-type="float" office:value="635.59764" table:style-name="c1">
            <text:p>635.6</text:p>
          </table:table-cell>
          <table:table-cell office:value-type="string" table:style-name="c1">
            <text:p>2026-03-24 13:45</text:p>
          </table:table-cell>
          <table:table-cell office:value-type="float" office:value="632.453615" table:style-name="c1">
            <text:p>632.45</text:p>
          </table:table-cell>
          <table:table-cell office:value-type="float" office:value="-0.6935676753590525" table:style-name="c14">
            <text:p>-0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2:00</text:p>
          </table:table-cell>
          <table:table-cell office:value-type="float" office:value="616.938315" table:style-name="c1">
            <text:p>616.94</text:p>
          </table:table-cell>
          <table:table-cell office:value-type="string" table:style-name="c1">
            <text:p>2026-03-31 05:00</text:p>
          </table:table-cell>
          <table:table-cell office:value-type="float" office:value="612.0538200000001" table:style-name="c1">
            <text:p>612.05</text:p>
          </table:table-cell>
          <table:table-cell office:value-type="float" office:value="-0.9900488327070245" table:style-name="c14">
            <text:p>-1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45</text:p>
          </table:table-cell>
          <table:table-cell office:value-type="float" office:value="622.000845" table:style-name="c1">
            <text:p>622</text:p>
          </table:table-cell>
          <table:table-cell office:value-type="string" table:style-name="c1">
            <text:p>2026-04-01 08:30</text:p>
          </table:table-cell>
          <table:table-cell office:value-type="float" office:value="616.43163" table:style-name="c1">
            <text:p>616.43</text:p>
          </table:table-cell>
          <table:table-cell office:value-type="float" office:value="-1.0934811235457476" table:style-name="c14">
            <text:p>-1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15:30</text:p>
          </table:table-cell>
          <table:table-cell office:value-type="float" office:value="594.51711" table:style-name="c1">
            <text:p>594.52</text:p>
          </table:table-cell>
          <table:table-cell office:value-type="string" table:style-name="c1">
            <text:p>2026-04-05 21:30</text:p>
          </table:table-cell>
          <table:table-cell office:value-type="float" office:value="590.68451" table:style-name="c1">
            <text:p>590.68</text:p>
          </table:table-cell>
          <table:table-cell office:value-type="float" office:value="-0.8432689742924104" table:style-name="c14">
            <text:p>-0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3:15</text:p>
          </table:table-cell>
          <table:table-cell office:value-type="float" office:value="600.1099049999999" table:style-name="c1">
            <text:p>600.11</text:p>
          </table:table-cell>
          <table:table-cell office:value-type="string" table:style-name="c1">
            <text:p>2026-04-06 17:30</text:p>
          </table:table-cell>
          <table:table-cell office:value-type="float" office:value="604.43763" table:style-name="c1">
            <text:p>604.44</text:p>
          </table:table-cell>
          <table:table-cell office:value-type="float" office:value="0.5198138127098684" table:style-name="c13">
            <text:p>+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16:30</text:p>
          </table:table-cell>
          <table:table-cell office:value-type="float" office:value="600.62016" table:style-name="c1">
            <text:p>600.62</text:p>
          </table:table-cell>
          <table:table-cell office:value-type="string" table:style-name="c1">
            <text:p>2026-04-08 07:00</text:p>
          </table:table-cell>
          <table:table-cell office:value-type="float" office:value="613.693" table:style-name="c1">
            <text:p>613.69</text:p>
          </table:table-cell>
          <table:table-cell office:value-type="float" office:value="1.9723060399770675" table:style-name="c13">
            <text:p>+2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610.775235" table:style-name="c1">
            <text:p>610.78</text:p>
          </table:table-cell>
          <table:table-cell office:value-type="string" table:style-name="c1">
            <text:p>2026-04-11 23:30</text:p>
          </table:table-cell>
          <table:table-cell office:value-type="float" office:value="607.5160900000001" table:style-name="c1">
            <text:p>607.52</text:p>
          </table:table-cell>
          <table:table-cell office:value-type="float" office:value="-0.7324412332975205" table:style-name="c14">
            <text:p>-0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15</text:p>
          </table:table-cell>
          <table:table-cell office:value-type="float" office:value="612.38604" table:style-name="c1">
            <text:p>612.39</text:p>
          </table:table-cell>
          <table:table-cell office:value-type="string" table:style-name="c1">
            <text:p>2026-04-14 06:15</text:p>
          </table:table-cell>
          <table:table-cell office:value-type="float" office:value="612.9433750000001" table:style-name="c1">
            <text:p>612.94</text:p>
          </table:table-cell>
          <table:table-cell office:value-type="float" office:value="-0.10907152727142044" table:style-name="c14">
            <text:p>-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8:45</text:p>
          </table:table-cell>
          <table:table-cell office:value-type="float" office:value="618.5091" table:style-name="c1">
            <text:p>618.51</text:p>
          </table:table-cell>
          <table:table-cell office:value-type="string" table:style-name="c1">
            <text:p>2026-04-14 12:45</text:p>
          </table:table-cell>
          <table:table-cell office:value-type="float" office:value="615.23223" table:style-name="c1">
            <text:p>615.23</text:p>
          </table:table-cell>
          <table:table-cell office:value-type="float" office:value="-0.7286423478280346" table:style-name="c14">
            <text:p>-0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622.55112" table:style-name="c1">
            <text:p>622.55</text:p>
          </table:table-cell>
          <table:table-cell office:value-type="string" table:style-name="c1">
            <text:p>2026-04-14 18:00</text:p>
          </table:table-cell>
          <table:table-cell office:value-type="float" office:value="616.73148" table:style-name="c1">
            <text:p>616.73</text:p>
          </table:table-cell>
          <table:table-cell office:value-type="float" office:value="-1.1328364855435313" table:style-name="c14">
            <text:p>-1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626.93331" table:style-name="c1">
            <text:p>626.93</text:p>
          </table:table-cell>
          <table:table-cell office:value-type="string" table:style-name="c1">
            <text:p>2026-04-16 00:15</text:p>
          </table:table-cell>
          <table:table-cell office:value-type="float" office:value="621.22923" table:style-name="c1">
            <text:p>621.23</text:p>
          </table:table-cell>
          <table:table-cell office:value-type="float" office:value="-1.107919633552401" table:style-name="c14">
            <text:p>-1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45</text:p>
          </table:table-cell>
          <table:table-cell office:value-type="float" office:value="626.262975" table:style-name="c1">
            <text:p>626.26</text:p>
          </table:table-cell>
          <table:table-cell office:value-type="string" table:style-name="c1">
            <text:p>2026-04-16 08:00</text:p>
          </table:table-cell>
          <table:table-cell office:value-type="float" office:value="622.3786550000001" table:style-name="c1">
            <text:p>622.38</text:p>
          </table:table-cell>
          <table:table-cell office:value-type="float" office:value="-0.8188979927074458" table:style-name="c14">
            <text:p>-0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45</text:p>
          </table:table-cell>
          <table:table-cell office:value-type="float" office:value="625.3525199999999" table:style-name="c1">
            <text:p>625.35</text:p>
          </table:table-cell>
          <table:table-cell office:value-type="string" table:style-name="c1">
            <text:p>2026-04-17 01:45</text:p>
          </table:table-cell>
          <table:table-cell office:value-type="float" office:value="630.974355" table:style-name="c1">
            <text:p>630.97</text:p>
          </table:table-cell>
          <table:table-cell office:value-type="float" office:value="0.6972894687231834" table:style-name="c13">
            <text:p>+0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15</text:p>
          </table:table-cell>
          <table:table-cell office:value-type="float" office:value="640.1098949999999" table:style-name="c1">
            <text:p>640.11</text:p>
          </table:table-cell>
          <table:table-cell office:value-type="string" table:style-name="c1">
            <text:p>2026-04-18 03:45</text:p>
          </table:table-cell>
          <table:table-cell office:value-type="float" office:value="641.6590100000001" table:style-name="c1">
            <text:p>641.66</text:p>
          </table:table-cell>
          <table:table-cell office:value-type="float" office:value="0.041623890068143155" table:style-name="c13">
            <text:p>+0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30</text:p>
          </table:table-cell>
          <table:table-cell office:value-type="float" office:value="638.028855" table:style-name="c1">
            <text:p>638.03</text:p>
          </table:table-cell>
          <table:table-cell office:value-type="string" table:style-name="c1">
            <text:p>2026-04-22 17:30</text:p>
          </table:table-cell>
          <table:table-cell office:value-type="float" office:value="644.107785" table:style-name="c1">
            <text:p>644.11</text:p>
          </table:table-cell>
          <table:table-cell office:value-type="float" office:value="0.7509626720228813" table:style-name="c13">
            <text:p>+0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20:45</text:p>
          </table:table-cell>
          <table:table-cell office:value-type="float" office:value="638.509095" table:style-name="c1">
            <text:p>638.51</text:p>
          </table:table-cell>
          <table:table-cell office:value-type="string" table:style-name="c1">
            <text:p>2026-04-24 03:00</text:p>
          </table:table-cell>
          <table:table-cell office:value-type="float" office:value="636.4516150000001" table:style-name="c1">
            <text:p>636.45</text:p>
          </table:table-cell>
          <table:table-cell office:value-type="float" office:value="-0.5214877602307211" table:style-name="c14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15</text:p>
          </table:table-cell>
          <table:table-cell office:value-type="float" office:value="623.8317599999999" table:style-name="c1">
            <text:p>623.83</text:p>
          </table:table-cell>
          <table:table-cell office:value-type="string" table:style-name="c1">
            <text:p>2026-05-04 10:15</text:p>
          </table:table-cell>
          <table:table-cell office:value-type="float" office:value="622.82843" table:style-name="c1">
            <text:p>622.83</text:p>
          </table:table-cell>
          <table:table-cell office:value-type="float" office:value="-0.3604119212477941" table:style-name="c14">
            <text:p>-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15</text:p>
          </table:table-cell>
          <table:table-cell office:value-type="float" office:value="627.743715" table:style-name="c1">
            <text:p>627.74</text:p>
          </table:table-cell>
          <table:table-cell office:value-type="string" table:style-name="c1">
            <text:p>2026-05-04 19:45</text:p>
          </table:table-cell>
          <table:table-cell office:value-type="float" office:value="624.76746" table:style-name="c1">
            <text:p>624.77</text:p>
          </table:table-cell>
          <table:table-cell office:value-type="float" office:value="-0.6730716774344669" table:style-name="c14">
            <text:p>-0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3:15</text:p>
          </table:table-cell>
          <table:table-cell office:value-type="float" office:value="633.3565199999999" table:style-name="c1">
            <text:p>633.36</text:p>
          </table:table-cell>
          <table:table-cell office:value-type="string" table:style-name="c1">
            <text:p>2026-05-05 17:15</text:p>
          </table:table-cell>
          <table:table-cell office:value-type="float" office:value="628.30569" table:style-name="c1">
            <text:p>628.31</text:p>
          </table:table-cell>
          <table:table-cell office:value-type="float" office:value="-0.9957761347921257" table:style-name="c14">
            <text:p>-1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1:45</text:p>
          </table:table-cell>
          <table:table-cell office:value-type="float" office:value="633.67668" table:style-name="c1">
            <text:p>633.68</text:p>
          </table:table-cell>
          <table:table-cell office:value-type="string" table:style-name="c1">
            <text:p>2026-05-06 16:30</text:p>
          </table:table-cell>
          <table:table-cell office:value-type="float" office:value="646.1667550000001" table:style-name="c1">
            <text:p>646.17</text:p>
          </table:table-cell>
          <table:table-cell office:value-type="float" office:value="1.7672084219282125" table:style-name="c13">
            <text:p>+1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1:45</text:p>
          </table:table-cell>
          <table:table-cell office:value-type="float" office:value="655.817745" table:style-name="c1">
            <text:p>655.82</text:p>
          </table:table-cell>
          <table:table-cell office:value-type="string" table:style-name="c1">
            <text:p>2026-05-09 06:00</text:p>
          </table:table-cell>
          <table:table-cell office:value-type="float" office:value="650.83442" table:style-name="c1">
            <text:p>650.83</text:p>
          </table:table-cell>
          <table:table-cell office:value-type="float" office:value="-0.9582453438462424" table:style-name="c14">
            <text:p>-1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2:30</text:p>
          </table:table-cell>
          <table:table-cell office:value-type="float" office:value="665.3325" table:style-name="c1">
            <text:p>665.33</text:p>
          </table:table-cell>
          <table:table-cell office:value-type="string" table:style-name="c1">
            <text:p>2026-05-11 01:45</text:p>
          </table:table-cell>
          <table:table-cell office:value-type="float" office:value="656.1717500000001" table:style-name="c1">
            <text:p>656.17</text:p>
          </table:table-cell>
          <table:table-cell office:value-type="float" office:value="-1.5740155979528936" table:style-name="c14">
            <text:p>-1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23:00</text:p>
          </table:table-cell>
          <table:table-cell office:value-type="float" office:value="670.405035" table:style-name="c1">
            <text:p>670.41</text:p>
          </table:table-cell>
          <table:table-cell office:value-type="string" table:style-name="c1">
            <text:p>2026-05-12 02:15</text:p>
          </table:table-cell>
          <table:table-cell office:value-type="float" office:value="664.22772" table:style-name="c1">
            <text:p>664.23</text:p>
          </table:table-cell>
          <table:table-cell office:value-type="float" office:value="-1.1194883421900226" table:style-name="c14">
            <text:p>-1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8:45</text:p>
          </table:table-cell>
          <table:table-cell office:value-type="float" office:value="660.5100899999999" table:style-name="c1">
            <text:p>660.51</text:p>
          </table:table-cell>
          <table:table-cell office:value-type="string" table:style-name="c1">
            <text:p>2026-05-13 12:00</text:p>
          </table:table-cell>
          <table:table-cell office:value-type="float" office:value="678.08079" table:style-name="c1">
            <text:p>678.08</text:p>
          </table:table-cell>
          <table:table-cell office:value-type="float" office:value="2.4549536405704453" table:style-name="c13">
            <text:p>+2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7:15</text:p>
          </table:table-cell>
          <table:table-cell office:value-type="float" office:value="684.28197" table:style-name="c1">
            <text:p>684.28</text:p>
          </table:table-cell>
          <table:table-cell office:value-type="string" table:style-name="c1">
            <text:p>2026-05-14 21:15</text:p>
          </table:table-cell>
          <table:table-cell office:value-type="float" office:value="679.14026" table:style-name="c1">
            <text:p>679.14</text:p>
          </table:table-cell>
          <table:table-cell office:value-type="float" office:value="-0.9498001795575584" table:style-name="c14">
            <text:p>-0.9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1:15</text:p>
          </table:table-cell>
          <table:table-cell office:value-type="float" office:value="654.34701" table:style-name="c1">
            <text:p>654.35</text:p>
          </table:table-cell>
          <table:table-cell office:value-type="string" table:style-name="c1">
            <text:p>2026-05-21 06:30</text:p>
          </table:table-cell>
          <table:table-cell office:value-type="float" office:value="651.524075" table:style-name="c1">
            <text:p>651.52</text:p>
          </table:table-cell>
          <table:table-cell office:value-type="float" office:value="-0.6304501377525917" table:style-name="c14">
            <text:p>-0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655.58763" table:style-name="c1">
            <text:p>655.59</text:p>
          </table:table-cell>
          <table:table-cell office:value-type="string" table:style-name="c1">
            <text:p>2026-05-21 10:30</text:p>
          </table:table-cell>
          <table:table-cell office:value-type="float" office:value="650.0148300000001" table:style-name="c1">
            <text:p>650.01</text:p>
          </table:table-cell>
          <table:table-cell office:value-type="float" office:value="-1.0482473022210392" table:style-name="c14">
            <text:p>-1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30</text:p>
          </table:table-cell>
          <table:table-cell office:value-type="float" office:value="659.80974" table:style-name="c1">
            <text:p>659.81</text:p>
          </table:table-cell>
          <table:table-cell office:value-type="string" table:style-name="c1">
            <text:p>2026-05-22 05:45</text:p>
          </table:table-cell>
          <table:table-cell office:value-type="float" office:value="656.91138" table:style-name="c1">
            <text:p>656.91</text:p>
          </table:table-cell>
          <table:table-cell office:value-type="float" office:value="-0.6382939798100007" table:style-name="c14">
            <text:p>-0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8:15</text:p>
          </table:table-cell>
          <table:table-cell office:value-type="float" office:value="659.8797749999999" table:style-name="c1">
            <text:p>659.88</text:p>
          </table:table-cell>
          <table:table-cell office:value-type="string" table:style-name="c1">
            <text:p>2026-05-22 09:45</text:p>
          </table:table-cell>
          <table:table-cell office:value-type="float" office:value="656.45161" table:style-name="c1">
            <text:p>656.45</text:p>
          </table:table-cell>
          <table:table-cell office:value-type="float" office:value="-0.7183750658807386" table:style-name="c14">
            <text:p>-0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2:30</text:p>
          </table:table-cell>
          <table:table-cell office:value-type="float" office:value="659.0793749999999" table:style-name="c1">
            <text:p>659.08</text:p>
          </table:table-cell>
          <table:table-cell office:value-type="string" table:style-name="c1">
            <text:p>2026-05-22 15:30</text:p>
          </table:table-cell>
          <table:table-cell office:value-type="float" office:value="658.35066" table:style-name="c1">
            <text:p>658.35</text:p>
          </table:table-cell>
          <table:table-cell office:value-type="float" office:value="-0.31024456945567547" table:style-name="c14">
            <text:p>-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4 23:45</text:p>
          </table:table-cell>
          <table:table-cell office:value-type="float" office:value="657.78873" table:style-name="c1">
            <text:p>657.79</text:p>
          </table:table-cell>
          <table:table-cell office:value-type="string" table:style-name="c1">
            <text:p>2026-05-25 17:15</text:p>
          </table:table-cell>
          <table:table-cell office:value-type="float" office:value="665.4671" table:style-name="c1">
            <text:p>665.47</text:p>
          </table:table-cell>
          <table:table-cell office:value-type="float" office:value="0.9650668942138729" table:style-name="c13">
            <text:p>+1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0:30</text:p>
          </table:table-cell>
          <table:table-cell office:value-type="float" office:value="662.25096" table:style-name="c1">
            <text:p>662.25</text:p>
          </table:table-cell>
          <table:table-cell office:value-type="string" table:style-name="c1">
            <text:p>2026-05-26 16:15</text:p>
          </table:table-cell>
          <table:table-cell office:value-type="float" office:value="658.3706500000001" table:style-name="c1">
            <text:p>658.37</text:p>
          </table:table-cell>
          <table:table-cell office:value-type="float" office:value="-0.7846561565346688" table:style-name="c14">
            <text:p>-0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7 01:15</text:p>
          </table:table-cell>
          <table:table-cell office:value-type="float" office:value="659.179425" table:style-name="c1">
            <text:p>659.18</text:p>
          </table:table-cell>
          <table:table-cell office:value-type="string" table:style-name="c1">
            <text:p>2026-05-27 02:30</text:p>
          </table:table-cell>
          <table:table-cell office:value-type="float" office:value="654.982345" table:style-name="c1">
            <text:p>654.98</text:p>
          </table:table-cell>
          <table:table-cell office:value-type="float" office:value="-0.8353400453381843" table:style-name="c14">
            <text:p>-0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2:00</text:p>
          </table:table-cell>
          <table:table-cell office:value-type="float" office:value="653.5766249999999" table:style-name="c1">
            <text:p>653.58</text:p>
          </table:table-cell>
          <table:table-cell office:value-type="string" table:style-name="c1">
            <text:p>2026-05-31 02:00</text:p>
          </table:table-cell>
          <table:table-cell office:value-type="float" office:value="727.77593" table:style-name="c1">
            <text:p>727.78</text:p>
          </table:table-cell>
          <table:table-cell office:value-type="float" office:value="11.130214596632815" table:style-name="c13">
            <text:p>+11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2:15</text:p>
          </table:table-cell>
          <table:table-cell office:value-type="float" office:value="733.2964649999999" table:style-name="c1">
            <text:p>733.3</text:p>
          </table:table-cell>
          <table:table-cell office:value-type="string" table:style-name="c1">
            <text:p>2026-05-31 07:30</text:p>
          </table:table-cell>
          <table:table-cell office:value-type="float" office:value="723.8379000000001" table:style-name="c1">
            <text:p>723.84</text:p>
          </table:table-cell>
          <table:table-cell office:value-type="float" office:value="-1.4871907178905852" table:style-name="c14">
            <text:p>-1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13:30</text:p>
          </table:table-cell>
          <table:table-cell office:value-type="float" office:value="732.06585" table:style-name="c1">
            <text:p>732.07</text:p>
          </table:table-cell>
          <table:table-cell office:value-type="string" table:style-name="c1">
            <text:p>2026-05-31 14:45</text:p>
          </table:table-cell>
          <table:table-cell office:value-type="float" office:value="720.109765" table:style-name="c1">
            <text:p>720.11</text:p>
          </table:table-cell>
          <table:table-cell office:value-type="float" office:value="-1.8298332616164203" table:style-name="c14">
            <text:p>-1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9:45</text:p>
          </table:table-cell>
          <table:table-cell office:value-type="float" office:value="717.9187799999999" table:style-name="c1">
            <text:p>717.92</text:p>
          </table:table-cell>
          <table:table-cell office:value-type="string" table:style-name="c1">
            <text:p>2026-06-01 12:30</text:p>
          </table:table-cell>
          <table:table-cell office:value-type="float" office:value="693.91287" table:style-name="c1">
            <text:p>693.91</text:p>
          </table:table-cell>
          <table:table-cell office:value-type="float" office:value="-3.537035460631066" table:style-name="c14">
            <text:p>-3.5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6 08:00</text:p>
          </table:table-cell>
          <table:table-cell office:value-type="float" office:value="71091.96822" table:style-name="c10">
            <text:p>71092</text:p>
          </table:table-cell>
          <table:table-cell office:value-type="string" table:style-name="c10">
            <text:p>2026-03-06 09:15</text:p>
          </table:table-cell>
          <table:table-cell office:value-type="float" office:value="70537.95338" table:style-name="c10">
            <text:p>70538</text:p>
          </table:table-cell>
          <table:table-cell office:value-type="float" office:value="-0.9776353450446251" table:style-name="c11">
            <text:p>-1.0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9:30</text:p>
          </table:table-cell>
          <table:table-cell office:value-type="float" office:value="69398.14173" table:style-name="c10">
            <text:p>69398</text:p>
          </table:table-cell>
          <table:table-cell office:value-type="string" table:style-name="c10">
            <text:p>2026-03-09 23:00</text:p>
          </table:table-cell>
          <table:table-cell office:value-type="float" office:value="68601.56206000001" table:style-name="c10">
            <text:p>68602</text:p>
          </table:table-cell>
          <table:table-cell office:value-type="float" office:value="-1.3454455253148478" table:style-name="c11">
            <text:p>-1.3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1:00</text:p>
          </table:table-cell>
          <table:table-cell office:value-type="float" office:value="69191.93867999999" table:style-name="c10">
            <text:p>69192</text:p>
          </table:table-cell>
          <table:table-cell office:value-type="string" table:style-name="c10">
            <text:p>2026-03-10 13:45</text:p>
          </table:table-cell>
          <table:table-cell office:value-type="float" office:value="69881.58172999999" table:style-name="c10">
            <text:p>69882</text:p>
          </table:table-cell>
          <table:table-cell office:value-type="float" office:value="0.7948176891894088" table:style-name="c12">
            <text:p>+0.8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71503.543905" table:style-name="c10">
            <text:p>71504</text:p>
          </table:table-cell>
          <table:table-cell office:value-type="string" table:style-name="c10">
            <text:p>2026-03-10 18:30</text:p>
          </table:table-cell>
          <table:table-cell office:value-type="float" office:value="70282.86099" table:style-name="c10">
            <text:p>70283</text:p>
          </table:table-cell>
          <table:table-cell office:value-type="float" office:value="-1.9036515951257882" table:style-name="c11">
            <text:p>-1.9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3:45</text:p>
          </table:table-cell>
          <table:table-cell office:value-type="float" office:value="70477.231005" table:style-name="c10">
            <text:p>70477</text:p>
          </table:table-cell>
          <table:table-cell office:value-type="string" table:style-name="c10">
            <text:p>2026-03-11 23:00</text:p>
          </table:table-cell>
          <table:table-cell office:value-type="float" office:value="70337.823495" table:style-name="c10">
            <text:p>70338</text:p>
          </table:table-cell>
          <table:table-cell office:value-type="float" office:value="-0.39730962067258124" table:style-name="c11">
            <text:p>-0.4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0:30</text:p>
          </table:table-cell>
          <table:table-cell office:value-type="float" office:value="71518.27126499999" table:style-name="c10">
            <text:p>71518</text:p>
          </table:table-cell>
          <table:table-cell office:value-type="string" table:style-name="c10">
            <text:p>2026-03-13 16:00</text:p>
          </table:table-cell>
          <table:table-cell office:value-type="float" office:value="71795.54427000001" table:style-name="c10">
            <text:p>71796</text:p>
          </table:table-cell>
          <table:table-cell office:value-type="float" office:value="0.18702033709496746" table:style-name="c12">
            <text:p>+0.2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2:30</text:p>
          </table:table-cell>
          <table:table-cell office:value-type="float" office:value="71303.92414499998" table:style-name="c10">
            <text:p>71304</text:p>
          </table:table-cell>
          <table:table-cell office:value-type="string" table:style-name="c10">
            <text:p>2026-03-15 13:15</text:p>
          </table:table-cell>
          <table:table-cell office:value-type="float" office:value="71406.76875500001" table:style-name="c10">
            <text:p>71407</text:p>
          </table:table-cell>
          <table:table-cell office:value-type="float" office:value="-0.055954172536254454" table:style-name="c11">
            <text:p>-0.1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18:00</text:p>
          </table:table-cell>
          <table:table-cell office:value-type="float" office:value="71855.86998" table:style-name="c10">
            <text:p>71856</text:p>
          </table:table-cell>
          <table:table-cell office:value-type="string" table:style-name="c10">
            <text:p>2026-03-15 19:15</text:p>
          </table:table-cell>
          <table:table-cell office:value-type="float" office:value="71453.07559000001" table:style-name="c10">
            <text:p>71453</text:p>
          </table:table-cell>
          <table:table-cell office:value-type="float" office:value="-0.7593382256123049" table:style-name="c11">
            <text:p>-0.8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2:00</text:p>
          </table:table-cell>
          <table:table-cell office:value-type="float" office:value="72145.64479499999" table:style-name="c10">
            <text:p>72146</text:p>
          </table:table-cell>
          <table:table-cell office:value-type="string" table:style-name="c10">
            <text:p>2026-03-16 09:00</text:p>
          </table:table-cell>
          <table:table-cell office:value-type="float" office:value="73098.43250000001" table:style-name="c10">
            <text:p>73098</text:p>
          </table:table-cell>
          <table:table-cell office:value-type="float" office:value="1.1181048290920925" table:style-name="c12">
            <text:p>+1.1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3:45</text:p>
          </table:table-cell>
          <table:table-cell office:value-type="float" office:value="74116.689825" table:style-name="c10">
            <text:p>74117</text:p>
          </table:table-cell>
          <table:table-cell office:value-type="string" table:style-name="c10">
            <text:p>2026-03-16 16:00</text:p>
          </table:table-cell>
          <table:table-cell office:value-type="float" office:value="73238.11262500001" table:style-name="c10">
            <text:p>73238</text:p>
          </table:table-cell>
          <table:table-cell office:value-type="float" office:value="-1.3829276368891863" table:style-name="c11">
            <text:p>-1.4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21:15</text:p>
          </table:table-cell>
          <table:table-cell office:value-type="float" office:value="74405.11396499998" table:style-name="c10">
            <text:p>74405</text:p>
          </table:table-cell>
          <table:table-cell office:value-type="string" table:style-name="c10">
            <text:p>2026-03-17 04:00</text:p>
          </table:table-cell>
          <table:table-cell office:value-type="float" office:value="74426.74801" table:style-name="c10">
            <text:p>74427</text:p>
          </table:table-cell>
          <table:table-cell office:value-type="float" office:value="-0.17088210406047688" table:style-name="c11">
            <text:p>-0.2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1:00</text:p>
          </table:table-cell>
          <table:table-cell office:value-type="float" office:value="70128.236595" table:style-name="c10">
            <text:p>70128</text:p>
          </table:table-cell>
          <table:table-cell office:value-type="string" table:style-name="c10">
            <text:p>2026-03-25 15:00</text:p>
          </table:table-cell>
          <table:table-cell office:value-type="float" office:value="71198.66286" table:style-name="c10">
            <text:p>71199</text:p>
          </table:table-cell>
          <table:table-cell office:value-type="float" office:value="1.3234328752664393" table:style-name="c12">
            <text:p>+1.3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8:15</text:p>
          </table:table-cell>
          <table:table-cell office:value-type="float" office:value="67927.86696" table:style-name="c10">
            <text:p>67928</text:p>
          </table:table-cell>
          <table:table-cell office:value-type="string" table:style-name="c10">
            <text:p>2026-03-30 14:45</text:p>
          </table:table-cell>
          <table:table-cell office:value-type="float" office:value="67090.36803499999" table:style-name="c10">
            <text:p>67090</text:p>
          </table:table-cell>
          <table:table-cell office:value-type="float" office:value="-1.4303593122894864" table:style-name="c11">
            <text:p>-1.4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01:00</text:p>
          </table:table-cell>
          <table:table-cell office:value-type="float" office:value="67242.34437" table:style-name="c10">
            <text:p>67242</text:p>
          </table:table-cell>
          <table:table-cell office:value-type="string" table:style-name="c10">
            <text:p>2026-03-31 07:00</text:p>
          </table:table-cell>
          <table:table-cell office:value-type="float" office:value="67459.11357" table:style-name="c10">
            <text:p>67459</text:p>
          </table:table-cell>
          <table:table-cell office:value-type="float" office:value="0.12182566319045574" table:style-name="c12">
            <text:p>+0.1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4:00</text:p>
          </table:table-cell>
          <table:table-cell office:value-type="float" office:value="67335.93114" table:style-name="c10">
            <text:p>67336</text:p>
          </table:table-cell>
          <table:table-cell office:value-type="string" table:style-name="c10">
            <text:p>2026-04-01 02:00</text:p>
          </table:table-cell>
          <table:table-cell office:value-type="float" office:value="67748.84863000001" table:style-name="c10">
            <text:p>67749</text:p>
          </table:table-cell>
          <table:table-cell office:value-type="float" office:value="0.4120943111512343" table:style-name="c12">
            <text:p>+0.4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5 15:30</text:p>
          </table:table-cell>
          <table:table-cell office:value-type="float" office:value="67533.75" table:style-name="c10">
            <text:p>67534</text:p>
          </table:table-cell>
          <table:table-cell office:value-type="string" table:style-name="c10">
            <text:p>2026-04-06 13:45</text:p>
          </table:table-cell>
          <table:table-cell office:value-type="float" office:value="69290.55739" table:style-name="c10">
            <text:p>69291</text:p>
          </table:table-cell>
          <table:table-cell office:value-type="float" office:value="2.3962767738758606" table:style-name="c12">
            <text:p>+2.4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17:45</text:p>
          </table:table-cell>
          <table:table-cell office:value-type="float" office:value="68728.517085" table:style-name="c10">
            <text:p>68729</text:p>
          </table:table-cell>
          <table:table-cell office:value-type="string" table:style-name="c10">
            <text:p>2026-04-08 11:00</text:p>
          </table:table-cell>
          <table:table-cell office:value-type="float" office:value="71441.231515" table:style-name="c10">
            <text:p>71441</text:p>
          </table:table-cell>
          <table:table-cell office:value-type="float" office:value="3.7392097446583783" table:style-name="c12">
            <text:p>+3.7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8 13:00</text:p>
          </table:table-cell>
          <table:table-cell office:value-type="float" office:value="72107.98597499999" table:style-name="c10">
            <text:p>72108</text:p>
          </table:table-cell>
          <table:table-cell office:value-type="string" table:style-name="c10">
            <text:p>2026-04-08 14:30</text:p>
          </table:table-cell>
          <table:table-cell office:value-type="float" office:value="71419.03262" table:style-name="c10">
            <text:p>71419</text:p>
          </table:table-cell>
          <table:table-cell office:value-type="float" office:value="-1.1534367379165578" table:style-name="c11">
            <text:p>-1.2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45</text:p>
          </table:table-cell>
          <table:table-cell office:value-type="float" office:value="72111.77787" table:style-name="c10">
            <text:p>72112</text:p>
          </table:table-cell>
          <table:table-cell office:value-type="string" table:style-name="c10">
            <text:p>2026-04-09 23:30</text:p>
          </table:table-cell>
          <table:table-cell office:value-type="float" office:value="71758.62274" table:style-name="c10">
            <text:p>71759</text:p>
          </table:table-cell>
          <table:table-cell office:value-type="float" office:value="-0.6886539640618916" table:style-name="c11">
            <text:p>-0.7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2:45</text:p>
          </table:table-cell>
          <table:table-cell office:value-type="float" office:value="72351.507675" table:style-name="c10">
            <text:p>72352</text:p>
          </table:table-cell>
          <table:table-cell office:value-type="string" table:style-name="c10">
            <text:p>2026-04-10 23:15</text:p>
          </table:table-cell>
          <table:table-cell office:value-type="float" office:value="72843.50003000001" table:style-name="c10">
            <text:p>72844</text:p>
          </table:table-cell>
          <table:table-cell office:value-type="float" office:value="0.4787435805704954" table:style-name="c12">
            <text:p>+0.5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6:15</text:p>
          </table:table-cell>
          <table:table-cell office:value-type="float" office:value="72908.97626999998" table:style-name="c10">
            <text:p>72909</text:p>
          </table:table-cell>
          <table:table-cell office:value-type="string" table:style-name="c10">
            <text:p>2026-04-11 23:30</text:p>
          </table:table-cell>
          <table:table-cell office:value-type="float" office:value="73099.432" table:style-name="c10">
            <text:p>73099</text:p>
          </table:table-cell>
          <table:table-cell office:value-type="float" office:value="0.06080179382557116" table:style-name="c12">
            <text:p>+0.1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19:45</text:p>
          </table:table-cell>
          <table:table-cell office:value-type="float" office:value="73052.257875" table:style-name="c10">
            <text:p>73052</text:p>
          </table:table-cell>
          <table:table-cell office:value-type="string" table:style-name="c10">
            <text:p>2026-04-14 11:00</text:p>
          </table:table-cell>
          <table:table-cell office:value-type="float" office:value="74312.834995" table:style-name="c10">
            <text:p>74313</text:p>
          </table:table-cell>
          <table:table-cell office:value-type="float" office:value="1.5222332549225115" table:style-name="c12">
            <text:p>+1.5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13:45</text:p>
          </table:table-cell>
          <table:table-cell office:value-type="float" office:value="75226.09425" table:style-name="c10">
            <text:p>75226</text:p>
          </table:table-cell>
          <table:table-cell office:value-type="string" table:style-name="c10">
            <text:p>2026-04-14 17:45</text:p>
          </table:table-cell>
          <table:table-cell office:value-type="float" office:value="74512.77497500001" table:style-name="c10">
            <text:p>74513</text:p>
          </table:table-cell>
          <table:table-cell office:value-type="float" office:value="-1.1462383110166785" table:style-name="c11">
            <text:p>-1.1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00:30</text:p>
          </table:table-cell>
          <table:table-cell office:value-type="float" office:value="74622.24247499999" table:style-name="c10">
            <text:p>74622</text:p>
          </table:table-cell>
          <table:table-cell office:value-type="string" table:style-name="c10">
            <text:p>2026-04-15 03:15</text:p>
          </table:table-cell>
          <table:table-cell office:value-type="float" office:value="74188.956965" table:style-name="c10">
            <text:p>74189</text:p>
          </table:table-cell>
          <table:table-cell office:value-type="float" office:value="-0.7793778579729405" table:style-name="c11">
            <text:p>-0.8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20:00</text:p>
          </table:table-cell>
          <table:table-cell office:value-type="float" office:value="75040.1013" table:style-name="c10">
            <text:p>75040</text:p>
          </table:table-cell>
          <table:table-cell office:value-type="string" table:style-name="c10">
            <text:p>2026-04-16 02:00</text:p>
          </table:table-cell>
          <table:table-cell office:value-type="float" office:value="74620.341165" table:style-name="c10">
            <text:p>74620</text:p>
          </table:table-cell>
          <table:table-cell office:value-type="float" office:value="-0.7581628850877098" table:style-name="c11">
            <text:p>-0.8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2:45</text:p>
          </table:table-cell>
          <table:table-cell office:value-type="float" office:value="75235.52896499999" table:style-name="c10">
            <text:p>75236</text:p>
          </table:table-cell>
          <table:table-cell office:value-type="string" table:style-name="c10">
            <text:p>2026-04-16 08:00</text:p>
          </table:table-cell>
          <table:table-cell office:value-type="float" office:value="74669.66649" table:style-name="c10">
            <text:p>74670</text:p>
          </table:table-cell>
          <table:table-cell office:value-type="float" office:value="-0.9505178579208073" table:style-name="c11">
            <text:p>-1.0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3:30</text:p>
          </table:table-cell>
          <table:table-cell office:value-type="float" office:value="75012.98775" table:style-name="c10">
            <text:p>75013</text:p>
          </table:table-cell>
          <table:table-cell office:value-type="string" table:style-name="c10">
            <text:p>2026-04-16 14:00</text:p>
          </table:table-cell>
          <table:table-cell office:value-type="float" office:value="73751.135985" table:style-name="c10">
            <text:p>73751</text:p>
          </table:table-cell>
          <table:table-cell office:value-type="float" office:value="-1.8787150440278566" table:style-name="c11">
            <text:p>-1.9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6:00</text:p>
          </table:table-cell>
          <table:table-cell office:value-type="float" office:value="74734.5486" table:style-name="c10">
            <text:p>74735</text:p>
          </table:table-cell>
          <table:table-cell office:value-type="string" table:style-name="c10">
            <text:p>2026-04-16 16:15</text:p>
          </table:table-cell>
          <table:table-cell office:value-type="float" office:value="74621.26070500001" table:style-name="c10">
            <text:p>74621</text:p>
          </table:table-cell>
          <table:table-cell office:value-type="float" office:value="-0.35118402407702254" table:style-name="c11">
            <text:p>-0.4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8:45</text:p>
          </table:table-cell>
          <table:table-cell office:value-type="float" office:value="75376.999665" table:style-name="c10">
            <text:p>75377</text:p>
          </table:table-cell>
          <table:table-cell office:value-type="string" table:style-name="c10">
            <text:p>2026-04-17 23:30</text:p>
          </table:table-cell>
          <table:table-cell office:value-type="float" office:value="77019.021225" table:style-name="c10">
            <text:p>77019</text:p>
          </table:table-cell>
          <table:table-cell office:value-type="float" office:value="1.9741572935837892" table:style-name="c12">
            <text:p>+2.0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2:30</text:p>
          </table:table-cell>
          <table:table-cell office:value-type="float" office:value="77278.18978500001" table:style-name="c10">
            <text:p>77278</text:p>
          </table:table-cell>
          <table:table-cell office:value-type="string" table:style-name="c10">
            <text:p>2026-04-22 20:30</text:p>
          </table:table-cell>
          <table:table-cell office:value-type="float" office:value="78555.832435" table:style-name="c10">
            <text:p>78556</text:p>
          </table:table-cell>
          <table:table-cell office:value-type="float" office:value="1.4500980730528745" table:style-name="c12">
            <text:p>+1.5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15:00</text:p>
          </table:table-cell>
          <table:table-cell office:value-type="float" office:value="78219.87039" table:style-name="c10">
            <text:p>78220</text:p>
          </table:table-cell>
          <table:table-cell office:value-type="string" table:style-name="c10">
            <text:p>2026-04-23 17:45</text:p>
          </table:table-cell>
          <table:table-cell office:value-type="float" office:value="77153.274065" table:style-name="c10">
            <text:p>77153</text:p>
          </table:table-cell>
          <table:table-cell office:value-type="float" office:value="-1.5607616245961076" table:style-name="c11">
            <text:p>-1.6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14:30</text:p>
          </table:table-cell>
          <table:table-cell office:value-type="float" office:value="78105.002985" table:style-name="c10">
            <text:p>78105</text:p>
          </table:table-cell>
          <table:table-cell office:value-type="string" table:style-name="c10">
            <text:p>2026-04-27 05:30</text:p>
          </table:table-cell>
          <table:table-cell office:value-type="float" office:value="77796.70219" table:style-name="c10">
            <text:p>77797</text:p>
          </table:table-cell>
          <table:table-cell office:value-type="float" office:value="-0.5938369950089895" table:style-name="c11">
            <text:p>-0.6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7 14:45</text:p>
          </table:table-cell>
          <table:table-cell office:value-type="float" office:value="78217.46919" table:style-name="c10">
            <text:p>78217</text:p>
          </table:table-cell>
          <table:table-cell office:value-type="string" table:style-name="c10">
            <text:p>2026-04-27 15:15</text:p>
          </table:table-cell>
          <table:table-cell office:value-type="float" office:value="77336.93219" table:style-name="c10">
            <text:p>77337</text:p>
          </table:table-cell>
          <table:table-cell office:value-type="float" office:value="-1.3234045260827054" table:style-name="c11">
            <text:p>-1.3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03:45</text:p>
          </table:table-cell>
          <table:table-cell office:value-type="float" office:value="77196.97919999999" table:style-name="c10">
            <text:p>77197</text:p>
          </table:table-cell>
          <table:table-cell office:value-type="string" table:style-name="c10">
            <text:p>2026-05-01 20:45</text:p>
          </table:table-cell>
          <table:table-cell office:value-type="float" office:value="77946.2074" table:style-name="c10">
            <text:p>77946</text:p>
          </table:table-cell>
          <table:table-cell office:value-type="float" office:value="0.7687007154386194" table:style-name="c12">
            <text:p>+0.8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21:45</text:p>
          </table:table-cell>
          <table:table-cell office:value-type="float" office:value="78846.073335" table:style-name="c10">
            <text:p>78846</text:p>
          </table:table-cell>
          <table:table-cell office:value-type="string" table:style-name="c10">
            <text:p>2026-05-03 01:15</text:p>
          </table:table-cell>
          <table:table-cell office:value-type="float" office:value="78321.849485" table:style-name="c10">
            <text:p>78322</text:p>
          </table:table-cell>
          <table:table-cell office:value-type="float" office:value="-0.863440877046584" table:style-name="c11">
            <text:p>-0.9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07:30</text:p>
          </table:table-cell>
          <table:table-cell office:value-type="float" office:value="78451.96637999998" table:style-name="c10">
            <text:p>78452</text:p>
          </table:table-cell>
          <table:table-cell office:value-type="string" table:style-name="c10">
            <text:p>2026-05-04 00:00</text:p>
          </table:table-cell>
          <table:table-cell office:value-type="float" office:value="78529.29571" table:style-name="c10">
            <text:p>78529</text:p>
          </table:table-cell>
          <table:table-cell office:value-type="float" office:value="-0.10152802510833281" table:style-name="c11">
            <text:p>-0.1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00</text:p>
          </table:table-cell>
          <table:table-cell office:value-type="float" office:value="79809.31471499999" table:style-name="c10">
            <text:p>79809</text:p>
          </table:table-cell>
          <table:table-cell office:value-type="string" table:style-name="c10">
            <text:p>2026-05-04 08:30</text:p>
          </table:table-cell>
          <table:table-cell office:value-type="float" office:value="79700.13" table:style-name="c10">
            <text:p>79700</text:p>
          </table:table-cell>
          <table:table-cell office:value-type="float" office:value="-0.3364335050724532" table:style-name="c11">
            <text:p>-0.3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15:00</text:p>
          </table:table-cell>
          <table:table-cell office:value-type="float" office:value="80256.25807499999" table:style-name="c10">
            <text:p>80256</text:p>
          </table:table-cell>
          <table:table-cell office:value-type="string" table:style-name="c10">
            <text:p>2026-05-04 23:45</text:p>
          </table:table-cell>
          <table:table-cell office:value-type="float" office:value="79732.91360000001" table:style-name="c10">
            <text:p>79733</text:p>
          </table:table-cell>
          <table:table-cell office:value-type="float" office:value="-0.850688264893118" table:style-name="c11">
            <text:p>-0.9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3:45</text:p>
          </table:table-cell>
          <table:table-cell office:value-type="float" office:value="80950.99526999998" table:style-name="c10">
            <text:p>80951</text:p>
          </table:table-cell>
          <table:table-cell office:value-type="string" table:style-name="c10">
            <text:p>2026-05-05 09:30</text:p>
          </table:table-cell>
          <table:table-cell office:value-type="float" office:value="80617.40113500001" table:style-name="c10">
            <text:p>80617</text:p>
          </table:table-cell>
          <table:table-cell office:value-type="float" office:value="-0.6111701508038192" table:style-name="c11">
            <text:p>-0.6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13:15</text:p>
          </table:table-cell>
          <table:table-cell office:value-type="float" office:value="81662.800995" table:style-name="c10">
            <text:p>81663</text:p>
          </table:table-cell>
          <table:table-cell office:value-type="string" table:style-name="c10">
            <text:p>2026-05-05 22:30</text:p>
          </table:table-cell>
          <table:table-cell office:value-type="float" office:value="81398.12058" table:style-name="c10">
            <text:p>81398</text:p>
          </table:table-cell>
          <table:table-cell office:value-type="float" office:value="-0.5233659056901319" table:style-name="c11">
            <text:p>-0.5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11:30</text:p>
          </table:table-cell>
          <table:table-cell office:value-type="float" office:value="82725.34199999999" table:style-name="c10">
            <text:p>82725</text:p>
          </table:table-cell>
          <table:table-cell office:value-type="string" table:style-name="c10">
            <text:p>2026-05-06 14:15</text:p>
          </table:table-cell>
          <table:table-cell office:value-type="float" office:value="81411.04411500001" table:style-name="c10">
            <text:p>81411</text:p>
          </table:table-cell>
          <table:table-cell office:value-type="float" office:value="-1.7854728992064528" table:style-name="c11">
            <text:p>-1.8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7:00</text:p>
          </table:table-cell>
          <table:table-cell office:value-type="float" office:value="81479.33931" table:style-name="c10">
            <text:p>81479</text:p>
          </table:table-cell>
          <table:table-cell office:value-type="string" table:style-name="c10">
            <text:p>2026-05-07 09:45</text:p>
          </table:table-cell>
          <table:table-cell office:value-type="float" office:value="80854.182685" table:style-name="c10">
            <text:p>80854</text:p>
          </table:table-cell>
          <table:table-cell office:value-type="float" office:value="-0.9656240991275933" table:style-name="c11">
            <text:p>-1.0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22:30</text:p>
          </table:table-cell>
          <table:table-cell office:value-type="float" office:value="81544.461855" table:style-name="c10">
            <text:p>81544</text:p>
          </table:table-cell>
          <table:table-cell office:value-type="string" table:style-name="c10">
            <text:p>2026-05-11 02:30</text:p>
          </table:table-cell>
          <table:table-cell office:value-type="float" office:value="81200.95921" table:style-name="c10">
            <text:p>81201</text:p>
          </table:table-cell>
          <table:table-cell office:value-type="float" office:value="-0.6203037593898619" table:style-name="c11">
            <text:p>-0.6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0 15:30</text:p>
          </table:table-cell>
          <table:table-cell office:value-type="float" office:value="77592.246735" table:style-name="c10">
            <text:p>77592</text:p>
          </table:table-cell>
          <table:table-cell office:value-type="string" table:style-name="c10">
            <text:p>2026-05-20 16:30</text:p>
          </table:table-cell>
          <table:table-cell office:value-type="float" office:value="77049.456" table:style-name="c10">
            <text:p>77049</text:p>
          </table:table-cell>
          <table:table-cell office:value-type="float" office:value="-0.8980441047464538" table:style-name="c11">
            <text:p>-0.9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8:30</text:p>
          </table:table-cell>
          <table:table-cell office:value-type="float" office:value="78094.377675" table:style-name="c10">
            <text:p>78094</text:p>
          </table:table-cell>
          <table:table-cell office:value-type="string" table:style-name="c10">
            <text:p>2026-05-21 10:00</text:p>
          </table:table-cell>
          <table:table-cell office:value-type="float" office:value="77594.213485" table:style-name="c10">
            <text:p>77594</text:p>
          </table:table-cell>
          <table:table-cell office:value-type="float" office:value="-0.8390809201188842" table:style-name="c11">
            <text:p>-0.8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7:30</text:p>
          </table:table-cell>
          <table:table-cell office:value-type="float" office:value="78019.53026999999" table:style-name="c10">
            <text:p>78020</text:p>
          </table:table-cell>
          <table:table-cell office:value-type="string" table:style-name="c10">
            <text:p>2026-05-22 00:15</text:p>
          </table:table-cell>
          <table:table-cell office:value-type="float" office:value="77403.77875" table:style-name="c10">
            <text:p>77404</text:p>
          </table:table-cell>
          <table:table-cell office:value-type="float" office:value="-0.9875497469093442" table:style-name="c11">
            <text:p>-1.0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4 22:15</text:p>
          </table:table-cell>
          <table:table-cell office:value-type="float" office:value="77023.19235" table:style-name="c10">
            <text:p>77023</text:p>
          </table:table-cell>
          <table:table-cell office:value-type="string" table:style-name="c10">
            <text:p>2026-05-24 22:30</text:p>
          </table:table-cell>
          <table:table-cell office:value-type="float" office:value="76809.41608" table:style-name="c10">
            <text:p>76809</text:p>
          </table:table-cell>
          <table:table-cell office:value-type="float" office:value="-0.4768931039300428" table:style-name="c11">
            <text:p>-0.5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0:30</text:p>
          </table:table-cell>
          <table:table-cell office:value-type="float" office:value="77268.35487" table:style-name="c10">
            <text:p>77268</text:p>
          </table:table-cell>
          <table:table-cell office:value-type="string" table:style-name="c10">
            <text:p>2026-05-26 15:30</text:p>
          </table:table-cell>
          <table:table-cell office:value-type="float" office:value="76605.687995" table:style-name="c10">
            <text:p>76606</text:p>
          </table:table-cell>
          <table:table-cell office:value-type="float" office:value="-1.0558030472818336" table:style-name="c11">
            <text:p>-1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0:45</text:p>
          </table:table-cell>
          <table:table-cell office:value-type="float" office:value="0.09740868" table:style-name="c1">
            <text:p>0.097409</text:p>
          </table:table-cell>
          <table:table-cell office:value-type="string" table:style-name="c1">
            <text:p>2026-03-05 12:15</text:p>
          </table:table-cell>
          <table:table-cell office:value-type="float" office:value="0.095822065" table:style-name="c1">
            <text:p>0.095822</text:p>
          </table:table-cell>
          <table:table-cell office:value-type="float" office:value="-1.8254669993834294" table:style-name="c14">
            <text:p>-1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21:00</text:p>
          </table:table-cell>
          <table:table-cell office:value-type="float" office:value="0.09438716999999999" table:style-name="c1">
            <text:p>0.094387</text:p>
          </table:table-cell>
          <table:table-cell office:value-type="string" table:style-name="c1">
            <text:p>2026-03-05 22:00</text:p>
          </table:table-cell>
          <table:table-cell office:value-type="float" office:value="0.09387304" table:style-name="c1">
            <text:p>0.093873</text:p>
          </table:table-cell>
          <table:table-cell office:value-type="float" office:value="-0.7435144066296417" table:style-name="c14">
            <text:p>-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4:00</text:p>
          </table:table-cell>
          <table:table-cell office:value-type="float" office:value="0.09196596" table:style-name="c1">
            <text:p>0.091966</text:p>
          </table:table-cell>
          <table:table-cell office:value-type="string" table:style-name="c1">
            <text:p>2026-03-09 19:15</text:p>
          </table:table-cell>
          <table:table-cell office:value-type="float" office:value="0.09065465" table:style-name="c1">
            <text:p>0.090655</text:p>
          </table:table-cell>
          <table:table-cell office:value-type="float" office:value="-1.6229142232082272" table:style-name="c14">
            <text:p>-1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3:30</text:p>
          </table:table-cell>
          <table:table-cell office:value-type="float" office:value="0.09667831499999999" table:style-name="c1">
            <text:p>0.096678</text:p>
          </table:table-cell>
          <table:table-cell office:value-type="string" table:style-name="c1">
            <text:p>2026-03-10 18:45</text:p>
          </table:table-cell>
          <table:table-cell office:value-type="float" office:value="0.09561217" table:style-name="c1">
            <text:p>0.095612</text:p>
          </table:table-cell>
          <table:table-cell office:value-type="float" office:value="-1.3004712875167468" table:style-name="c14">
            <text:p>-1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2:30</text:p>
          </table:table-cell>
          <table:table-cell office:value-type="float" office:value="0.09286641" table:style-name="c1">
            <text:p>0.092866</text:p>
          </table:table-cell>
          <table:table-cell office:value-type="string" table:style-name="c1">
            <text:p>2026-03-11 16:00</text:p>
          </table:table-cell>
          <table:table-cell office:value-type="float" office:value="0.092323815" table:style-name="c1">
            <text:p>0.092324</text:p>
          </table:table-cell>
          <table:table-cell office:value-type="float" office:value="-0.783006801043562" table:style-name="c14">
            <text:p>-0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7:30</text:p>
          </table:table-cell>
          <table:table-cell office:value-type="float" office:value="0.093916935" table:style-name="c1">
            <text:p>0.093917</text:p>
          </table:table-cell>
          <table:table-cell office:value-type="string" table:style-name="c1">
            <text:p>2026-03-11 23:30</text:p>
          </table:table-cell>
          <table:table-cell office:value-type="float" office:value="0.093183385" table:style-name="c1">
            <text:p>0.093183</text:p>
          </table:table-cell>
          <table:table-cell office:value-type="float" office:value="-0.979401198106622" table:style-name="c14">
            <text:p>-1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1:00</text:p>
          </table:table-cell>
          <table:table-cell office:value-type="float" office:value="0.09436715999999999" table:style-name="c1">
            <text:p>0.094367</text:p>
          </table:table-cell>
          <table:table-cell office:value-type="string" table:style-name="c1">
            <text:p>2026-03-12 16:15</text:p>
          </table:table-cell>
          <table:table-cell office:value-type="float" office:value="0.09362316500000001" table:style-name="c1">
            <text:p>0.093623</text:p>
          </table:table-cell>
          <table:table-cell office:value-type="float" office:value="-0.9867285471290788" table:style-name="c14">
            <text:p>-1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1:00</text:p>
          </table:table-cell>
          <table:table-cell office:value-type="float" office:value="0.09686841" table:style-name="c1">
            <text:p>0.096868</text:p>
          </table:table-cell>
          <table:table-cell office:value-type="string" table:style-name="c1">
            <text:p>2026-03-13 15:30</text:p>
          </table:table-cell>
          <table:table-cell office:value-type="float" office:value="0.09833081" table:style-name="c1">
            <text:p>0.098331</text:p>
          </table:table-cell>
          <table:table-cell office:value-type="float" office:value="1.30675904643216" table:style-name="c13">
            <text:p>+1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11:15</text:p>
          </table:table-cell>
          <table:table-cell office:value-type="float" office:value="0.09478737" table:style-name="c1">
            <text:p>0.094787</text:p>
          </table:table-cell>
          <table:table-cell office:value-type="string" table:style-name="c1">
            <text:p>2026-03-14 11:30</text:p>
          </table:table-cell>
          <table:table-cell office:value-type="float" office:value="0.09491252000000001" table:style-name="c1">
            <text:p>0.094913</text:p>
          </table:table-cell>
          <table:table-cell office:value-type="float" office:value="-0.06813157436479367" table:style-name="c14">
            <text:p>-0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12:00</text:p>
          </table:table-cell>
          <table:table-cell office:value-type="float" office:value="0.09531763499999998" table:style-name="c1">
            <text:p>0.095318</text:p>
          </table:table-cell>
          <table:table-cell office:value-type="string" table:style-name="c1">
            <text:p>2026-03-14 15:15</text:p>
          </table:table-cell>
          <table:table-cell office:value-type="float" office:value="0.09463266000000001" table:style-name="c1">
            <text:p>0.094633</text:p>
          </table:table-cell>
          <table:table-cell office:value-type="float" office:value="-0.9170870504078055" table:style-name="c14">
            <text:p>-0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2:15</text:p>
          </table:table-cell>
          <table:table-cell office:value-type="float" office:value="0.09634815" table:style-name="c1">
            <text:p>0.096348</text:p>
          </table:table-cell>
          <table:table-cell office:value-type="string" table:style-name="c1">
            <text:p>2026-03-15 06:45</text:p>
          </table:table-cell>
          <table:table-cell office:value-type="float" office:value="0.09559218000000001" table:style-name="c1">
            <text:p>0.095592</text:p>
          </table:table-cell>
          <table:table-cell office:value-type="float" office:value="-0.9829548027854962" table:style-name="c14">
            <text:p>-1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9:00</text:p>
          </table:table-cell>
          <table:table-cell office:value-type="float" office:value="0.09650823" table:style-name="c1">
            <text:p>0.096508</text:p>
          </table:table-cell>
          <table:table-cell office:value-type="string" table:style-name="c1">
            <text:p>2026-03-15 13:30</text:p>
          </table:table-cell>
          <table:table-cell office:value-type="float" office:value="0.09547224" table:style-name="c1">
            <text:p>0.095472</text:p>
          </table:table-cell>
          <table:table-cell office:value-type="float" office:value="-1.2712273427457843" table:style-name="c14">
            <text:p>-1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0.09692843999999999" table:style-name="c1">
            <text:p>0.096928</text:p>
          </table:table-cell>
          <table:table-cell office:value-type="string" table:style-name="c1">
            <text:p>2026-03-16 11:00</text:p>
          </table:table-cell>
          <table:table-cell office:value-type="float" office:value="0.10063965500000001" table:style-name="c1">
            <text:p>0.10064</text:p>
          </table:table-cell>
          <table:table-cell office:value-type="float" office:value="3.621265677705132" table:style-name="c13">
            <text:p>+3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4:15</text:p>
          </table:table-cell>
          <table:table-cell office:value-type="float" office:value="0.10132063499999999" table:style-name="c1">
            <text:p>0.10132</text:p>
          </table:table-cell>
          <table:table-cell office:value-type="string" table:style-name="c1">
            <text:p>2026-03-16 16:30</text:p>
          </table:table-cell>
          <table:table-cell office:value-type="float" office:value="0.100439755" table:style-name="c1">
            <text:p>0.10044</text:p>
          </table:table-cell>
          <table:table-cell office:value-type="float" office:value="-1.0675604927317894" table:style-name="c14">
            <text:p>-1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2:15</text:p>
          </table:table-cell>
          <table:table-cell office:value-type="float" office:value="0.102981465" table:style-name="c1">
            <text:p>0.10298</text:p>
          </table:table-cell>
          <table:table-cell office:value-type="string" table:style-name="c1">
            <text:p>2026-03-17 03:45</text:p>
          </table:table-cell>
          <table:table-cell office:value-type="float" office:value="0.10116939000000001" table:style-name="c1">
            <text:p>0.10117</text:p>
          </table:table-cell>
          <table:table-cell office:value-type="float" office:value="-1.955995295473767" table:style-name="c14">
            <text:p>-2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9:45</text:p>
          </table:table-cell>
          <table:table-cell office:value-type="float" office:value="0.09532764" table:style-name="c1">
            <text:p>0.095328</text:p>
          </table:table-cell>
          <table:table-cell office:value-type="string" table:style-name="c1">
            <text:p>2026-03-24 11:15</text:p>
          </table:table-cell>
          <table:table-cell office:value-type="float" office:value="0.09385305000000001" table:style-name="c1">
            <text:p>0.093853</text:p>
          </table:table-cell>
          <table:table-cell office:value-type="float" office:value="-1.7436729231417036" table:style-name="c14">
            <text:p>-1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0.094437195" table:style-name="c1">
            <text:p>0.094437</text:p>
          </table:table-cell>
          <table:table-cell office:value-type="string" table:style-name="c1">
            <text:p>2026-03-25 15:15</text:p>
          </table:table-cell>
          <table:table-cell office:value-type="float" office:value="0.09593201" table:style-name="c1">
            <text:p>0.095932</text:p>
          </table:table-cell>
          <table:table-cell office:value-type="float" office:value="1.3798026423910592" table:style-name="c13">
            <text:p>+1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11:30</text:p>
          </table:table-cell>
          <table:table-cell office:value-type="float" office:value="0.09306651" table:style-name="c1">
            <text:p>0.093067</text:p>
          </table:table-cell>
          <table:table-cell office:value-type="string" table:style-name="c1">
            <text:p>2026-03-30 14:45</text:p>
          </table:table-cell>
          <table:table-cell office:value-type="float" office:value="0.09238378500000001" table:style-name="c1">
            <text:p>0.092384</text:p>
          </table:table-cell>
          <table:table-cell office:value-type="float" office:value="-0.9320218263422331" table:style-name="c14">
            <text:p>-0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1:30</text:p>
          </table:table-cell>
          <table:table-cell office:value-type="float" office:value="0.09200598" table:style-name="c1">
            <text:p>0.092006</text:p>
          </table:table-cell>
          <table:table-cell office:value-type="string" table:style-name="c1">
            <text:p>2026-03-31 05:15</text:p>
          </table:table-cell>
          <table:table-cell office:value-type="float" office:value="0.09116439500000001" table:style-name="c1">
            <text:p>0.091164</text:p>
          </table:table-cell>
          <table:table-cell office:value-type="float" office:value="-1.112778349412702" table:style-name="c14">
            <text:p>-1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30</text:p>
          </table:table-cell>
          <table:table-cell office:value-type="float" office:value="0.09308651999999999" table:style-name="c1">
            <text:p>0.093087</text:p>
          </table:table-cell>
          <table:table-cell office:value-type="string" table:style-name="c1">
            <text:p>2026-04-01 09:15</text:p>
          </table:table-cell>
          <table:table-cell office:value-type="float" office:value="0.09223386" table:style-name="c1">
            <text:p>0.092234</text:p>
          </table:table-cell>
          <table:table-cell office:value-type="float" office:value="-1.1140554896025612" table:style-name="c14">
            <text:p>-1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15:15</text:p>
          </table:table-cell>
          <table:table-cell office:value-type="float" office:value="0.09188592" table:style-name="c1">
            <text:p>0.091886</text:p>
          </table:table-cell>
          <table:table-cell office:value-type="string" table:style-name="c1">
            <text:p>2026-04-03 23:00</text:p>
          </table:table-cell>
          <table:table-cell office:value-type="float" office:value="0.09157419" table:style-name="c1">
            <text:p>0.091574</text:p>
          </table:table-cell>
          <table:table-cell office:value-type="float" office:value="-0.5384794599760157" table:style-name="c14">
            <text:p>-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7:30</text:p>
          </table:table-cell>
          <table:table-cell office:value-type="float" office:value="0.09244619999999999" table:style-name="c1">
            <text:p>0.092446</text:p>
          </table:table-cell>
          <table:table-cell office:value-type="string" table:style-name="c1">
            <text:p>2026-04-04 23:30</text:p>
          </table:table-cell>
          <table:table-cell office:value-type="float" office:value="0.09184405500000001" table:style-name="c1">
            <text:p>0.091844</text:p>
          </table:table-cell>
          <table:table-cell office:value-type="float" office:value="-0.8499443632566828" table:style-name="c14">
            <text:p>-0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1:00</text:p>
          </table:table-cell>
          <table:table-cell office:value-type="float" office:value="0.09282639" table:style-name="c1">
            <text:p>0.092826</text:p>
          </table:table-cell>
          <table:table-cell office:value-type="string" table:style-name="c1">
            <text:p>2026-04-06 07:00</text:p>
          </table:table-cell>
          <table:table-cell office:value-type="float" office:value="0.09211392000000002" table:style-name="c1">
            <text:p>0.092114</text:p>
          </table:table-cell>
          <table:table-cell office:value-type="float" office:value="-0.9658952869760373" table:style-name="c14">
            <text:p>-1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45</text:p>
          </table:table-cell>
          <table:table-cell office:value-type="float" office:value="0.09306651" table:style-name="c1">
            <text:p>0.093067</text:p>
          </table:table-cell>
          <table:table-cell office:value-type="string" table:style-name="c1">
            <text:p>2026-04-06 13:30</text:p>
          </table:table-cell>
          <table:table-cell office:value-type="float" office:value="0.09249373" table:style-name="c1">
            <text:p>0.092494</text:p>
          </table:table-cell>
          <table:table-cell office:value-type="float" office:value="-0.8141220362405721" table:style-name="c14">
            <text:p>-0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15</text:p>
          </table:table-cell>
          <table:table-cell office:value-type="float" office:value="0.093436695" table:style-name="c1">
            <text:p>0.093437</text:p>
          </table:table-cell>
          <table:table-cell office:value-type="string" table:style-name="c1">
            <text:p>2026-04-08 08:45</text:p>
          </table:table-cell>
          <table:table-cell office:value-type="float" office:value="0.09439278" table:style-name="c1">
            <text:p>0.094393</text:p>
          </table:table-cell>
          <table:table-cell office:value-type="float" office:value="0.8212981342929471" table:style-name="c13">
            <text:p>+0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4:30</text:p>
          </table:table-cell>
          <table:table-cell office:value-type="float" office:value="0.09388692" table:style-name="c1">
            <text:p>0.093887</text:p>
          </table:table-cell>
          <table:table-cell office:value-type="string" table:style-name="c1">
            <text:p>2026-04-10 23:00</text:p>
          </table:table-cell>
          <table:table-cell office:value-type="float" office:value="0.09385305000000001" table:style-name="c1">
            <text:p>0.093853</text:p>
          </table:table-cell>
          <table:table-cell office:value-type="float" office:value="-0.23590319817714533" table:style-name="c14">
            <text:p>-0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6:45</text:p>
          </table:table-cell>
          <table:table-cell office:value-type="float" office:value="0.09350673" table:style-name="c1">
            <text:p>0.093507</text:p>
          </table:table-cell>
          <table:table-cell office:value-type="string" table:style-name="c1">
            <text:p>2026-04-11 23:15</text:p>
          </table:table-cell>
          <table:table-cell office:value-type="float" office:value="0.09299348" table:style-name="c1">
            <text:p>0.092993</text:p>
          </table:table-cell>
          <table:table-cell office:value-type="float" office:value="-0.7476937398195771" table:style-name="c14">
            <text:p>-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30</text:p>
          </table:table-cell>
          <table:table-cell office:value-type="float" office:value="0.094016985" table:style-name="c1">
            <text:p>0.094017</text:p>
          </table:table-cell>
          <table:table-cell office:value-type="string" table:style-name="c1">
            <text:p>2026-04-14 05:15</text:p>
          </table:table-cell>
          <table:table-cell office:value-type="float" office:value="0.09297349" table:style-name="c1">
            <text:p>0.092973</text:p>
          </table:table-cell>
          <table:table-cell office:value-type="float" office:value="-1.307581823124826" table:style-name="c14">
            <text:p>-1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9:00</text:p>
          </table:table-cell>
          <table:table-cell office:value-type="float" office:value="0.09441718499999999" table:style-name="c1">
            <text:p>0.094417</text:p>
          </table:table-cell>
          <table:table-cell office:value-type="string" table:style-name="c1">
            <text:p>2026-04-14 17:45</text:p>
          </table:table-cell>
          <table:table-cell office:value-type="float" office:value="0.09437279000000001" table:style-name="c1">
            <text:p>0.094373</text:p>
          </table:table-cell>
          <table:table-cell office:value-type="float" office:value="-0.24682604889140203" table:style-name="c14">
            <text:p>-0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4:30</text:p>
          </table:table-cell>
          <table:table-cell office:value-type="float" office:value="0.09409702499999999" table:style-name="c1">
            <text:p>0.094097</text:p>
          </table:table-cell>
          <table:table-cell office:value-type="string" table:style-name="c1">
            <text:p>2026-04-15 23:45</text:p>
          </table:table-cell>
          <table:table-cell office:value-type="float" office:value="0.09465265" table:style-name="c1">
            <text:p>0.094653</text:p>
          </table:table-cell>
          <table:table-cell office:value-type="float" office:value="0.38940057100640413" table:style-name="c13">
            <text:p>+0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45</text:p>
          </table:table-cell>
          <table:table-cell office:value-type="float" office:value="0.09646821" table:style-name="c1">
            <text:p>0.096468</text:p>
          </table:table-cell>
          <table:table-cell office:value-type="string" table:style-name="c1">
            <text:p>2026-04-16 09:00</text:p>
          </table:table-cell>
          <table:table-cell office:value-type="float" office:value="0.09591202000000001" table:style-name="c1">
            <text:p>0.095912</text:p>
          </table:table-cell>
          <table:table-cell office:value-type="float" office:value="-0.775300099359133" table:style-name="c14">
            <text:p>-0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0.09735865499999999" table:style-name="c1">
            <text:p>0.097359</text:p>
          </table:table-cell>
          <table:table-cell office:value-type="string" table:style-name="c1">
            <text:p>2026-04-17 02:00</text:p>
          </table:table-cell>
          <table:table-cell office:value-type="float" office:value="0.098260845" table:style-name="c1">
            <text:p>0.098261</text:p>
          </table:table-cell>
          <table:table-cell office:value-type="float" office:value="0.7249140519093977" table:style-name="c13">
            <text:p>+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15</text:p>
          </table:table-cell>
          <table:table-cell office:value-type="float" office:value="0.098179065" table:style-name="c1">
            <text:p>0.098179</text:p>
          </table:table-cell>
          <table:table-cell office:value-type="string" table:style-name="c1">
            <text:p>2026-04-17 07:30</text:p>
          </table:table-cell>
          <table:table-cell office:value-type="float" office:value="0.098100925" table:style-name="c1">
            <text:p>0.098101</text:p>
          </table:table-cell>
          <table:table-cell office:value-type="float" office:value="-0.279330169904346" table:style-name="c14">
            <text:p>-0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45</text:p>
          </table:table-cell>
          <table:table-cell office:value-type="float" office:value="0.09812904" table:style-name="c1">
            <text:p>0.098129</text:p>
          </table:table-cell>
          <table:table-cell office:value-type="string" table:style-name="c1">
            <text:p>2026-04-17 19:15</text:p>
          </table:table-cell>
          <table:table-cell office:value-type="float" office:value="0.100159895" table:style-name="c1">
            <text:p>0.10016</text:p>
          </table:table-cell>
          <table:table-cell office:value-type="float" office:value="1.8655388556690244" table:style-name="c13">
            <text:p>+1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01:15</text:p>
          </table:table-cell>
          <table:table-cell office:value-type="float" office:value="0.09584789999999999" table:style-name="c1">
            <text:p>0.095848</text:p>
          </table:table-cell>
          <table:table-cell office:value-type="string" table:style-name="c1">
            <text:p>2026-04-21 02:30</text:p>
          </table:table-cell>
          <table:table-cell office:value-type="float" office:value="0.09516239500000001" table:style-name="c1">
            <text:p>0.095162</text:p>
          </table:table-cell>
          <table:table-cell office:value-type="float" office:value="-0.9136711681789311" table:style-name="c14">
            <text:p>-0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3:00</text:p>
          </table:table-cell>
          <table:table-cell office:value-type="float" office:value="0.096598275" table:style-name="c1">
            <text:p>0.096598</text:p>
          </table:table-cell>
          <table:table-cell office:value-type="string" table:style-name="c1">
            <text:p>2026-04-22 16:45</text:p>
          </table:table-cell>
          <table:table-cell office:value-type="float" office:value="0.09728133500000001" table:style-name="c1">
            <text:p>0.097281</text:p>
          </table:table-cell>
          <table:table-cell office:value-type="float" office:value="0.5058005552739164" table:style-name="c13">
            <text:p>+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4:45</text:p>
          </table:table-cell>
          <table:table-cell office:value-type="float" office:value="0.09592794" table:style-name="c1">
            <text:p>0.095928</text:p>
          </table:table-cell>
          <table:table-cell office:value-type="string" table:style-name="c1">
            <text:p>2026-04-23 05:00</text:p>
          </table:table-cell>
          <table:table-cell office:value-type="float" office:value="0.095882035" table:style-name="c1">
            <text:p>0.095882</text:p>
          </table:table-cell>
          <table:table-cell office:value-type="float" office:value="-0.24765796905990012" table:style-name="c14">
            <text:p>-0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15:45</text:p>
          </table:table-cell>
          <table:table-cell office:value-type="float" office:value="0.09760877999999999" table:style-name="c1">
            <text:p>0.097609</text:p>
          </table:table-cell>
          <table:table-cell office:value-type="string" table:style-name="c1">
            <text:p>2026-04-23 17:45</text:p>
          </table:table-cell>
          <table:table-cell office:value-type="float" office:value="0.095542205" table:style-name="c1">
            <text:p>0.095542</text:p>
          </table:table-cell>
          <table:table-cell office:value-type="float" office:value="-2.3128696699159623" table:style-name="c14">
            <text:p>-2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2:00</text:p>
          </table:table-cell>
          <table:table-cell office:value-type="float" office:value="0.097978965" table:style-name="c1">
            <text:p>0.097979</text:p>
          </table:table-cell>
          <table:table-cell office:value-type="string" table:style-name="c1">
            <text:p>2026-04-24 04:30</text:p>
          </table:table-cell>
          <table:table-cell office:value-type="float" office:value="0.09694150500000001" table:style-name="c1">
            <text:p>0.096942</text:p>
          </table:table-cell>
          <table:table-cell office:value-type="float" office:value="-1.2566432687822093" table:style-name="c14">
            <text:p>-1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1:00</text:p>
          </table:table-cell>
          <table:table-cell office:value-type="float" office:value="0.097898925" table:style-name="c1">
            <text:p>0.097899</text:p>
          </table:table-cell>
          <table:table-cell office:value-type="string" table:style-name="c1">
            <text:p>2026-04-24 14:30</text:p>
          </table:table-cell>
          <table:table-cell office:value-type="float" office:value="0.09739128000000001" table:style-name="c1">
            <text:p>0.097391</text:p>
          </table:table-cell>
          <table:table-cell office:value-type="float" office:value="-0.717403351180812" table:style-name="c14">
            <text:p>-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1:00</text:p>
          </table:table-cell>
          <table:table-cell office:value-type="float" office:value="0.09999997499999999" table:style-name="c1">
            <text:p>0.1</text:p>
          </table:table-cell>
          <table:table-cell office:value-type="string" table:style-name="c1">
            <text:p>2026-04-27 05:30</text:p>
          </table:table-cell>
          <table:table-cell office:value-type="float" office:value="0.09833081" table:style-name="c1">
            <text:p>0.098331</text:p>
          </table:table-cell>
          <table:table-cell office:value-type="float" office:value="-1.8657287556221647" table:style-name="c14">
            <text:p>-1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14:45</text:p>
          </table:table-cell>
          <table:table-cell office:value-type="float" office:value="0.099139545" table:style-name="c1">
            <text:p>0.09914</text:p>
          </table:table-cell>
          <table:table-cell office:value-type="string" table:style-name="c1">
            <text:p>2026-04-27 15:30</text:p>
          </table:table-cell>
          <table:table-cell office:value-type="float" office:value="0.097441255" table:style-name="c1">
            <text:p>0.097441</text:p>
          </table:table-cell>
          <table:table-cell office:value-type="float" office:value="-1.9095055043322984" table:style-name="c14">
            <text:p>-1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8 01:15</text:p>
          </table:table-cell>
          <table:table-cell office:value-type="float" office:value="0.0994497" table:style-name="c1">
            <text:p>0.09945</text:p>
          </table:table-cell>
          <table:table-cell office:value-type="string" table:style-name="c1">
            <text:p>2026-04-28 10:00</text:p>
          </table:table-cell>
          <table:table-cell office:value-type="float" office:value="0.09917039000000001" table:style-name="c1">
            <text:p>0.09917</text:p>
          </table:table-cell>
          <table:table-cell office:value-type="float" office:value="-0.48019411784047117" table:style-name="c14">
            <text:p>-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3:45</text:p>
          </table:table-cell>
          <table:table-cell office:value-type="float" office:value="0.10143068999999999" table:style-name="c1">
            <text:p>0.10143</text:p>
          </table:table-cell>
          <table:table-cell office:value-type="string" table:style-name="c1">
            <text:p>2026-04-29 14:15</text:p>
          </table:table-cell>
          <table:table-cell office:value-type="float" office:value="0.10588703000000001" table:style-name="c1">
            <text:p>0.10589</text:p>
          </table:table-cell>
          <table:table-cell office:value-type="float" office:value="4.1848003075104945" table:style-name="c13">
            <text:p>+4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30 00:30</text:p>
          </table:table-cell>
          <table:table-cell office:value-type="float" office:value="0.10570282499999999" table:style-name="c1">
            <text:p>0.1057</text:p>
          </table:table-cell>
          <table:table-cell office:value-type="string" table:style-name="c1">
            <text:p>2026-04-30 05:30</text:p>
          </table:table-cell>
          <table:table-cell office:value-type="float" office:value="0.10492751000000002" table:style-name="c1">
            <text:p>0.10493</text:p>
          </table:table-cell>
          <table:table-cell office:value-type="float" office:value="-0.9319193621267541" table:style-name="c14">
            <text:p>-0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03:30</text:p>
          </table:table-cell>
          <table:table-cell office:value-type="float" office:value="0.10959477" table:style-name="c1">
            <text:p>0.10959</text:p>
          </table:table-cell>
          <table:table-cell office:value-type="string" table:style-name="c1">
            <text:p>2026-05-01 07:45</text:p>
          </table:table-cell>
          <table:table-cell office:value-type="float" office:value="0.10808593000000001" table:style-name="c1">
            <text:p>0.10809</text:p>
          </table:table-cell>
          <table:table-cell office:value-type="float" office:value="-1.5738924166454171" table:style-name="c14">
            <text:p>-1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15</text:p>
          </table:table-cell>
          <table:table-cell office:value-type="float" office:value="0.11030512499999999" table:style-name="c1">
            <text:p>0.11031</text:p>
          </table:table-cell>
          <table:table-cell office:value-type="string" table:style-name="c1">
            <text:p>2026-05-01 17:15</text:p>
          </table:table-cell>
          <table:table-cell office:value-type="float" office:value="0.10904545" table:style-name="c1">
            <text:p>0.10905</text:p>
          </table:table-cell>
          <table:table-cell office:value-type="float" office:value="-1.3396085218615128" table:style-name="c14">
            <text:p>-1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4:45</text:p>
          </table:table-cell>
          <table:table-cell office:value-type="float" office:value="0.10893444" table:style-name="c1">
            <text:p>0.10893</text:p>
          </table:table-cell>
          <table:table-cell office:value-type="string" table:style-name="c1">
            <text:p>2026-05-02 19:15</text:p>
          </table:table-cell>
          <table:table-cell office:value-type="float" office:value="0.10835579500000002" table:style-name="c1">
            <text:p>0.10836</text:p>
          </table:table-cell>
          <table:table-cell office:value-type="float" office:value="-0.7300246223370332" table:style-name="c14">
            <text:p>-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12:15</text:p>
          </table:table-cell>
          <table:table-cell office:value-type="float" office:value="0.109324635" table:style-name="c1">
            <text:p>0.10932</text:p>
          </table:table-cell>
          <table:table-cell office:value-type="string" table:style-name="c1">
            <text:p>2026-05-03 16:30</text:p>
          </table:table-cell>
          <table:table-cell office:value-type="float" office:value="0.10817588500000001" table:style-name="c1">
            <text:p>0.10818</text:p>
          </table:table-cell>
          <table:table-cell office:value-type="float" office:value="-1.2485690842828023" table:style-name="c14">
            <text:p>-1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22:30</text:p>
          </table:table-cell>
          <table:table-cell office:value-type="float" office:value="0.10921457999999999" table:style-name="c1">
            <text:p>0.10921</text:p>
          </table:table-cell>
          <table:table-cell office:value-type="string" table:style-name="c1">
            <text:p>2026-05-04 00:00</text:p>
          </table:table-cell>
          <table:table-cell office:value-type="float" office:value="0.108235855" table:style-name="c1">
            <text:p>0.10824</text:p>
          </table:table-cell>
          <table:table-cell office:value-type="float" office:value="-1.094257263219789" table:style-name="c14">
            <text:p>-1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1:45</text:p>
          </table:table-cell>
          <table:table-cell office:value-type="float" office:value="0.11153574" table:style-name="c1">
            <text:p>0.11154</text:p>
          </table:table-cell>
          <table:table-cell office:value-type="string" table:style-name="c1">
            <text:p>2026-05-04 09:30</text:p>
          </table:table-cell>
          <table:table-cell office:value-type="float" office:value="0.11152421" table:style-name="c1">
            <text:p>0.11152</text:p>
          </table:table-cell>
          <table:table-cell office:value-type="float" office:value="-0.21021682896441574" table:style-name="c14">
            <text:p>-0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3:15</text:p>
          </table:table-cell>
          <table:table-cell office:value-type="float" office:value="0.11093544" table:style-name="c1">
            <text:p>0.11094</text:p>
          </table:table-cell>
          <table:table-cell office:value-type="string" table:style-name="c1">
            <text:p>2026-05-04 13:30</text:p>
          </table:table-cell>
          <table:table-cell office:value-type="float" office:value="0.11096449" table:style-name="c1">
            <text:p>0.11096</text:p>
          </table:table-cell>
          <table:table-cell office:value-type="float" office:value="-0.17376594486846475" table:style-name="c14">
            <text:p>-0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4:45</text:p>
          </table:table-cell>
          <table:table-cell office:value-type="float" office:value="0.11162578499999999" table:style-name="c1">
            <text:p>0.11163</text:p>
          </table:table-cell>
          <table:table-cell office:value-type="string" table:style-name="c1">
            <text:p>2026-05-04 15:30</text:p>
          </table:table-cell>
          <table:table-cell office:value-type="float" office:value="0.1103448" table:style-name="c1">
            <text:p>0.11034</text:p>
          </table:table-cell>
          <table:table-cell office:value-type="float" office:value="-1.3451768829217947" table:style-name="c14">
            <text:p>-1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3:30</text:p>
          </table:table-cell>
          <table:table-cell office:value-type="float" office:value="0.11257625999999998" table:style-name="c1">
            <text:p>0.11258</text:p>
          </table:table-cell>
          <table:table-cell office:value-type="string" table:style-name="c1">
            <text:p>2026-05-06 13:15</text:p>
          </table:table-cell>
          <table:table-cell office:value-type="float" office:value="0.11512241000000001" table:style-name="c1">
            <text:p>0.11512</text:p>
          </table:table-cell>
          <table:table-cell office:value-type="float" office:value="2.0572901448405068" table:style-name="c13">
            <text:p>+2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7:45</text:p>
          </table:table-cell>
          <table:table-cell office:value-type="float" office:value="0.109584765" table:style-name="c1">
            <text:p>0.10958</text:p>
          </table:table-cell>
          <table:table-cell office:value-type="string" table:style-name="c1">
            <text:p>2026-05-09 22:15</text:p>
          </table:table-cell>
          <table:table-cell office:value-type="float" office:value="0.10921536500000001" table:style-name="c1">
            <text:p>0.10922</text:p>
          </table:table-cell>
          <table:table-cell office:value-type="float" office:value="-0.5363168088511228" table:style-name="c14">
            <text:p>-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2:45</text:p>
          </table:table-cell>
          <table:table-cell office:value-type="float" office:value="0.11103548999999999" table:style-name="c1">
            <text:p>0.11104</text:p>
          </table:table-cell>
          <table:table-cell office:value-type="string" table:style-name="c1">
            <text:p>2026-05-11 02:45</text:p>
          </table:table-cell>
          <table:table-cell office:value-type="float" office:value="0.10976509000000001" table:style-name="c1">
            <text:p>0.10977</text:p>
          </table:table-cell>
          <table:table-cell office:value-type="float" office:value="-1.3417515561105375" table:style-name="c14">
            <text:p>-1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1:15</text:p>
          </table:table-cell>
          <table:table-cell office:value-type="float" office:value="0.11139566999999999" table:style-name="c1">
            <text:p>0.1114</text:p>
          </table:table-cell>
          <table:table-cell office:value-type="string" table:style-name="c1">
            <text:p>2026-05-13 12:45</text:p>
          </table:table-cell>
          <table:table-cell office:value-type="float" office:value="0.11162416000000001" table:style-name="c1">
            <text:p>0.11162</text:p>
          </table:table-cell>
          <table:table-cell office:value-type="float" office:value="0.004805666288487664" table:style-name="c13">
            <text:p>+0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17:30</text:p>
          </table:table-cell>
          <table:table-cell office:value-type="float" office:value="0.11281638" table:style-name="c1">
            <text:p>0.11282</text:p>
          </table:table-cell>
          <table:table-cell office:value-type="string" table:style-name="c1">
            <text:p>2026-05-14 03:45</text:p>
          </table:table-cell>
          <table:table-cell office:value-type="float" office:value="0.113133405" table:style-name="c1">
            <text:p>0.11313</text:p>
          </table:table-cell>
          <table:table-cell office:value-type="float" office:value="0.0805479872736603" table:style-name="c13">
            <text:p>+0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0.106283115" table:style-name="c1">
            <text:p>0.10628</text:p>
          </table:table-cell>
          <table:table-cell office:value-type="string" table:style-name="c1">
            <text:p>2026-05-21 10:30</text:p>
          </table:table-cell>
          <table:table-cell office:value-type="float" office:value="0.10436779" table:style-name="c1">
            <text:p>0.10437</text:p>
          </table:table-cell>
          <table:table-cell office:value-type="float" office:value="-1.9983947706180838" table:style-name="c14">
            <text:p>-2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15</text:p>
          </table:table-cell>
          <table:table-cell office:value-type="float" office:value="0.10518256499999999" table:style-name="c1">
            <text:p>0.10518</text:p>
          </table:table-cell>
          <table:table-cell office:value-type="string" table:style-name="c1">
            <text:p>2026-05-21 23:15</text:p>
          </table:table-cell>
          <table:table-cell office:value-type="float" office:value="0.105197375" table:style-name="c1">
            <text:p>0.1052</text:p>
          </table:table-cell>
          <table:table-cell office:value-type="float" office:value="-0.18584786616014926" table:style-name="c14">
            <text:p>-0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2:30</text:p>
          </table:table-cell>
          <table:table-cell office:value-type="float" office:value="0.10129062" table:style-name="c1">
            <text:p>0.10129</text:p>
          </table:table-cell>
          <table:table-cell office:value-type="string" table:style-name="c1">
            <text:p>2026-05-30 09:15</text:p>
          </table:table-cell>
          <table:table-cell office:value-type="float" office:value="0.10092951" table:style-name="c1">
            <text:p>0.10093</text:p>
          </table:table-cell>
          <table:table-cell office:value-type="float" office:value="-0.5556961646497882" table:style-name="c14">
            <text:p>-0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3:15</text:p>
          </table:table-cell>
          <table:table-cell office:value-type="float" office:value="0.101380665" table:style-name="c1">
            <text:p>0.10138</text:p>
          </table:table-cell>
          <table:table-cell office:value-type="string" table:style-name="c1">
            <text:p>2026-05-31 06:15</text:p>
          </table:table-cell>
          <table:table-cell office:value-type="float" office:value="0.100779585" table:style-name="c1">
            <text:p>0.10078</text:p>
          </table:table-cell>
          <table:table-cell office:value-type="float" office:value="-0.7916089230771806" table:style-name="c14">
            <text:p>-0.8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9:30</text:p>
          </table:table-cell>
          <table:table-cell office:value-type="float" office:value="1.5397694999999998" table:style-name="c10">
            <text:p>1.5398</text:p>
          </table:table-cell>
          <table:table-cell office:value-type="string" table:style-name="c10">
            <text:p>2026-03-10 11:45</text:p>
          </table:table-cell>
          <table:table-cell office:value-type="float" office:value="1.5162415" table:style-name="c10">
            <text:p>1.5162</text:p>
          </table:table-cell>
          <table:table-cell office:value-type="float" office:value="-1.7248664010100168" table:style-name="c11">
            <text:p>-1.7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05:00</text:p>
          </table:table-cell>
          <table:table-cell office:value-type="float" office:value="1.4957475" table:style-name="c10">
            <text:p>1.4957</text:p>
          </table:table-cell>
          <table:table-cell office:value-type="string" table:style-name="c10">
            <text:p>2026-03-11 05:45</text:p>
          </table:table-cell>
          <table:table-cell office:value-type="float" office:value="1.4772610000000002" table:style-name="c10">
            <text:p>1.4773</text:p>
          </table:table-cell>
          <table:table-cell office:value-type="float" office:value="-1.4333665768453296" table:style-name="c11">
            <text:p>-1.4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2:45</text:p>
          </table:table-cell>
          <table:table-cell office:value-type="float" office:value="1.534767" table:style-name="c10">
            <text:p>1.5348</text:p>
          </table:table-cell>
          <table:table-cell office:value-type="string" table:style-name="c10">
            <text:p>2026-03-11 23:45</text:p>
          </table:table-cell>
          <table:table-cell office:value-type="float" office:value="1.5222385" table:style-name="c10">
            <text:p>1.5222</text:p>
          </table:table-cell>
          <table:table-cell office:value-type="float" office:value="-1.0145810251002252" table:style-name="c11">
            <text:p>-1.0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08:15</text:p>
          </table:table-cell>
          <table:table-cell office:value-type="float" office:value="1.5107549999999998" table:style-name="c10">
            <text:p>1.5108</text:p>
          </table:table-cell>
          <table:table-cell office:value-type="string" table:style-name="c10">
            <text:p>2026-03-12 12:30</text:p>
          </table:table-cell>
          <table:table-cell office:value-type="float" office:value="1.5062465" table:style-name="c10">
            <text:p>1.5062</text:p>
          </table:table-cell>
          <table:table-cell office:value-type="float" office:value="-0.49773039000367003" table:style-name="c11">
            <text:p>-0.5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0:30</text:p>
          </table:table-cell>
          <table:table-cell office:value-type="float" office:value="1.5377684999999999" table:style-name="c10">
            <text:p>1.5378</text:p>
          </table:table-cell>
          <table:table-cell office:value-type="string" table:style-name="c10">
            <text:p>2026-03-13 05:15</text:p>
          </table:table-cell>
          <table:table-cell office:value-type="float" office:value="1.5182404999999999" table:style-name="c10">
            <text:p>1.5182</text:p>
          </table:table-cell>
          <table:table-cell office:value-type="float" office:value="-1.4672535404061104" table:style-name="c11">
            <text:p>-1.5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0:30</text:p>
          </table:table-cell>
          <table:table-cell office:value-type="float" office:value="1.522761" table:style-name="c10">
            <text:p>1.5228</text:p>
          </table:table-cell>
          <table:table-cell office:value-type="string" table:style-name="c10">
            <text:p>2026-03-13 15:45</text:p>
          </table:table-cell>
          <table:table-cell office:value-type="float" office:value="1.505247" table:style-name="c10">
            <text:p>1.5052</text:p>
          </table:table-cell>
          <table:table-cell office:value-type="float" office:value="-1.347748514244862" table:style-name="c11">
            <text:p>-1.3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5:00</text:p>
          </table:table-cell>
          <table:table-cell office:value-type="float" office:value="1.5257625" table:style-name="c10">
            <text:p>1.5258</text:p>
          </table:table-cell>
          <table:table-cell office:value-type="string" table:style-name="c10">
            <text:p>2026-03-16 14:45</text:p>
          </table:table-cell>
          <table:table-cell office:value-type="float" office:value="1.575212" table:style-name="c10">
            <text:p>1.5752</text:p>
          </table:table-cell>
          <table:table-cell office:value-type="float" office:value="3.0345909807063975" table:style-name="c12">
            <text:p>+3.0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7:15</text:p>
          </table:table-cell>
          <table:table-cell office:value-type="float" office:value="1.5937964999999998" table:style-name="c10">
            <text:p>1.5938</text:p>
          </table:table-cell>
          <table:table-cell office:value-type="string" table:style-name="c10">
            <text:p>2026-03-17 01:45</text:p>
          </table:table-cell>
          <table:table-cell office:value-type="float" office:value="1.6141925000000001" table:style-name="c10">
            <text:p>1.6142</text:p>
          </table:table-cell>
          <table:table-cell office:value-type="float" office:value="1.0772535384850013" table:style-name="c12">
            <text:p>+1.1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8 02:45</text:p>
          </table:table-cell>
          <table:table-cell office:value-type="float" office:value="1.6478234999999999" table:style-name="c10">
            <text:p>1.6478</text:p>
          </table:table-cell>
          <table:table-cell office:value-type="string" table:style-name="c10">
            <text:p>2026-03-18 07:00</text:p>
          </table:table-cell>
          <table:table-cell office:value-type="float" office:value="1.625187" table:style-name="c10">
            <text:p>1.6252</text:p>
          </table:table-cell>
          <table:table-cell office:value-type="float" office:value="-1.5708750854080966" table:style-name="c11">
            <text:p>-1.6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8 10:00</text:p>
          </table:table-cell>
          <table:table-cell office:value-type="float" office:value="1.6348169999999997" table:style-name="c10">
            <text:p>1.6348</text:p>
          </table:table-cell>
          <table:table-cell office:value-type="string" table:style-name="c10">
            <text:p>2026-03-18 11:45</text:p>
          </table:table-cell>
          <table:table-cell office:value-type="float" office:value="1.6031980000000001" table:style-name="c10">
            <text:p>1.6032</text:p>
          </table:table-cell>
          <table:table-cell office:value-type="float" office:value="-2.130134002888373" table:style-name="c11">
            <text:p>-2.1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06:15</text:p>
          </table:table-cell>
          <table:table-cell office:value-type="float" office:value="1.296648" table:style-name="c10">
            <text:p>1.2966</text:p>
          </table:table-cell>
          <table:table-cell office:value-type="string" table:style-name="c10">
            <text:p>2026-04-01 11:30</text:p>
          </table:table-cell>
          <table:table-cell office:value-type="float" office:value="1.2713640000000002" table:style-name="c10">
            <text:p>1.2714</text:p>
          </table:table-cell>
          <table:table-cell office:value-type="float" office:value="-2.145952998500722" table:style-name="c11">
            <text:p>-2.1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2 00:45</text:p>
          </table:table-cell>
          <table:table-cell office:value-type="float" office:value="1.2696344999999998" table:style-name="c10">
            <text:p>1.2696</text:p>
          </table:table-cell>
          <table:table-cell office:value-type="string" table:style-name="c10">
            <text:p>2026-04-02 01:00</text:p>
          </table:table-cell>
          <table:table-cell office:value-type="float" office:value="1.2653670000000001" table:style-name="c10">
            <text:p>1.2654</text:p>
          </table:table-cell>
          <table:table-cell office:value-type="float" office:value="-0.535348451306239" table:style-name="c11">
            <text:p>-0.5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1:45</text:p>
          </table:table-cell>
          <table:table-cell office:value-type="float" office:value="1.2506249999999999" table:style-name="c10">
            <text:p>1.2506</text:p>
          </table:table-cell>
          <table:table-cell office:value-type="string" table:style-name="c10">
            <text:p>2026-04-04 21:00</text:p>
          </table:table-cell>
          <table:table-cell office:value-type="float" office:value="1.2523735" table:style-name="c10">
            <text:p>1.2524</text:p>
          </table:table-cell>
          <table:table-cell office:value-type="float" office:value="-0.060369385427261335" table:style-name="c11">
            <text:p>-0.1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6:15</text:p>
          </table:table-cell>
          <table:table-cell office:value-type="float" office:value="1.270635" table:style-name="c10">
            <text:p>1.2706</text:p>
          </table:table-cell>
          <table:table-cell office:value-type="string" table:style-name="c10">
            <text:p>2026-04-06 14:45</text:p>
          </table:table-cell>
          <table:table-cell office:value-type="float" office:value="1.2763615" table:style-name="c10">
            <text:p>1.2764</text:p>
          </table:table-cell>
          <table:table-cell office:value-type="float" office:value="0.2498792620618806" table:style-name="c12">
            <text:p>+0.2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22:30</text:p>
          </table:table-cell>
          <table:table-cell office:value-type="float" office:value="1.336668" table:style-name="c10">
            <text:p>1.3367</text:p>
          </table:table-cell>
          <table:table-cell office:value-type="string" table:style-name="c10">
            <text:p>2026-04-10 01:15</text:p>
          </table:table-cell>
          <table:table-cell office:value-type="float" office:value="1.2983505" table:style-name="c10">
            <text:p>1.2984</text:p>
          </table:table-cell>
          <table:table-cell office:value-type="float" office:value="-3.0608126063839336" table:style-name="c11">
            <text:p>-3.1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5:00</text:p>
          </table:table-cell>
          <table:table-cell office:value-type="float" office:value="1.3176584999999998" table:style-name="c10">
            <text:p>1.3177</text:p>
          </table:table-cell>
          <table:table-cell office:value-type="string" table:style-name="c10">
            <text:p>2026-04-10 22:15</text:p>
          </table:table-cell>
          <table:table-cell office:value-type="float" office:value="1.3093450000000002" table:style-name="c10">
            <text:p>1.3093</text:p>
          </table:table-cell>
          <table:table-cell office:value-type="float" office:value="-0.8295685608220693" table:style-name="c11">
            <text:p>-0.8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9:00</text:p>
          </table:table-cell>
          <table:table-cell office:value-type="float" office:value="1.302651" table:style-name="c10">
            <text:p>1.3027</text:p>
          </table:table-cell>
          <table:table-cell office:value-type="string" table:style-name="c10">
            <text:p>2026-04-11 23:15</text:p>
          </table:table-cell>
          <table:table-cell office:value-type="float" office:value="1.2823585" table:style-name="c10">
            <text:p>1.2824</text:p>
          </table:table-cell>
          <table:table-cell office:value-type="float" office:value="-1.7545708437255891" table:style-name="c11">
            <text:p>-1.8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4:45</text:p>
          </table:table-cell>
          <table:table-cell office:value-type="float" office:value="1.216608" table:style-name="c10">
            <text:p>1.2166</text:p>
          </table:table-cell>
          <table:table-cell office:value-type="string" table:style-name="c10">
            <text:p>2026-04-17 00:45</text:p>
          </table:table-cell>
          <table:table-cell office:value-type="float" office:value="1.3123435" table:style-name="c10">
            <text:p>1.3123</text:p>
          </table:table-cell>
          <table:table-cell office:value-type="float" office:value="7.653420439739023" table:style-name="c12">
            <text:p>+7.7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6:45</text:p>
          </table:table-cell>
          <table:table-cell office:value-type="float" office:value="1.3196595" table:style-name="c10">
            <text:p>1.3197</text:p>
          </table:table-cell>
          <table:table-cell office:value-type="string" table:style-name="c10">
            <text:p>2026-04-17 10:45</text:p>
          </table:table-cell>
          <table:table-cell office:value-type="float" office:value="1.2983505" table:style-name="c10">
            <text:p>1.2984</text:p>
          </table:table-cell>
          <table:table-cell office:value-type="float" office:value="-1.8114068552910756" table:style-name="c11">
            <text:p>-1.8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8 16:30</text:p>
          </table:table-cell>
          <table:table-cell office:value-type="float" office:value="1.302651" table:style-name="c10">
            <text:p>1.3027</text:p>
          </table:table-cell>
          <table:table-cell office:value-type="string" table:style-name="c10">
            <text:p>2026-04-18 17:00</text:p>
          </table:table-cell>
          <table:table-cell office:value-type="float" office:value="1.289355" table:style-name="c10">
            <text:p>1.2894</text:p>
          </table:table-cell>
          <table:table-cell office:value-type="float" office:value="-1.218547457837904" table:style-name="c11">
            <text:p>-1.2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3:30</text:p>
          </table:table-cell>
          <table:table-cell office:value-type="float" office:value="1.2916454999999998" table:style-name="c10">
            <text:p>1.2916</text:p>
          </table:table-cell>
          <table:table-cell office:value-type="string" table:style-name="c10">
            <text:p>2026-04-22 12:15</text:p>
          </table:table-cell>
          <table:table-cell office:value-type="float" office:value="1.3033480000000002" table:style-name="c10">
            <text:p>1.3033</text:p>
          </table:table-cell>
          <table:table-cell office:value-type="float" office:value="0.7043037232739469" table:style-name="c12">
            <text:p>+0.7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7 01:15</text:p>
          </table:table-cell>
          <table:table-cell office:value-type="float" office:value="1.266633" table:style-name="c10">
            <text:p>1.2666</text:p>
          </table:table-cell>
          <table:table-cell office:value-type="string" table:style-name="c10">
            <text:p>2026-04-27 05:15</text:p>
          </table:table-cell>
          <table:table-cell office:value-type="float" office:value="1.2553720000000002" table:style-name="c10">
            <text:p>1.2554</text:p>
          </table:table-cell>
          <table:table-cell office:value-type="float" office:value="-1.0871727349595073" table:style-name="c11">
            <text:p>-1.1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00</text:p>
          </table:table-cell>
          <table:table-cell office:value-type="float" office:value="1.2536264999999998" table:style-name="c10">
            <text:p>1.2536</text:p>
          </table:table-cell>
          <table:table-cell office:value-type="string" table:style-name="c10">
            <text:p>2026-04-29 12:30</text:p>
          </table:table-cell>
          <table:table-cell office:value-type="float" office:value="1.231384" table:style-name="c10">
            <text:p>1.2314</text:p>
          </table:table-cell>
          <table:table-cell office:value-type="float" office:value="-1.970605807710657" table:style-name="c11">
            <text:p>-2.0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19:15</text:p>
          </table:table-cell>
          <table:table-cell office:value-type="float" office:value="1.22061" table:style-name="c10">
            <text:p>1.2206</text:p>
          </table:table-cell>
          <table:table-cell office:value-type="string" table:style-name="c10">
            <text:p>2026-05-03 01:00</text:p>
          </table:table-cell>
          <table:table-cell office:value-type="float" office:value="1.2203895000000002" table:style-name="c10">
            <text:p>1.2204</text:p>
          </table:table-cell>
          <table:table-cell office:value-type="float" office:value="-0.21792862671120572" table:style-name="c11">
            <text:p>-0.2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07:45</text:p>
          </table:table-cell>
          <table:table-cell office:value-type="float" office:value="1.2156075" table:style-name="c10">
            <text:p>1.2156</text:p>
          </table:table-cell>
          <table:table-cell office:value-type="string" table:style-name="c10">
            <text:p>2026-05-03 13:30</text:p>
          </table:table-cell>
          <table:table-cell office:value-type="float" office:value="1.2063965" table:style-name="c10">
            <text:p>1.2064</text:p>
          </table:table-cell>
          <table:table-cell office:value-type="float" office:value="-0.9561134332833454" table:style-name="c11">
            <text:p>-1.0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7:45</text:p>
          </table:table-cell>
          <table:table-cell office:value-type="float" office:value="1.2576284999999998" table:style-name="c10">
            <text:p>1.2576</text:p>
          </table:table-cell>
          <table:table-cell office:value-type="string" table:style-name="c10">
            <text:p>2026-05-05 17:00</text:p>
          </table:table-cell>
          <table:table-cell office:value-type="float" office:value="1.2613690000000002" table:style-name="c10">
            <text:p>1.2614</text:p>
          </table:table-cell>
          <table:table-cell office:value-type="float" office:value="0.09693032314395111" table:style-name="c12">
            <text:p>+0.1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21:15</text:p>
          </table:table-cell>
          <table:table-cell office:value-type="float" office:value="1.2896444999999999" table:style-name="c10">
            <text:p>1.2896</text:p>
          </table:table-cell>
          <table:table-cell office:value-type="string" table:style-name="c10">
            <text:p>2026-05-06 00:30</text:p>
          </table:table-cell>
          <table:table-cell office:value-type="float" office:value="1.2723635" table:style-name="c10">
            <text:p>1.2724</text:p>
          </table:table-cell>
          <table:table-cell office:value-type="float" office:value="-1.537203053748526" table:style-name="c11">
            <text:p>-1.5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2:00</text:p>
          </table:table-cell>
          <table:table-cell office:value-type="float" office:value="1.296648" table:style-name="c10">
            <text:p>1.2966</text:p>
          </table:table-cell>
          <table:table-cell office:value-type="string" table:style-name="c10">
            <text:p>2026-05-06 13:30</text:p>
          </table:table-cell>
          <table:table-cell office:value-type="float" office:value="1.3073460000000001" table:style-name="c10">
            <text:p>1.3073</text:p>
          </table:table-cell>
          <table:table-cell office:value-type="float" office:value="0.6235011619190489" table:style-name="c12">
            <text:p>+0.6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20:15</text:p>
          </table:table-cell>
          <table:table-cell office:value-type="float" office:value="1.3176584999999998" table:style-name="c10">
            <text:p>1.3177</text:p>
          </table:table-cell>
          <table:table-cell office:value-type="string" table:style-name="c10">
            <text:p>2026-05-06 20:45</text:p>
          </table:table-cell>
          <table:table-cell office:value-type="float" office:value="1.3033480000000002" table:style-name="c10">
            <text:p>1.3033</text:p>
          </table:table-cell>
          <table:table-cell office:value-type="float" office:value="-1.2837842773373964" table:style-name="c11">
            <text:p>-1.3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5:15</text:p>
          </table:table-cell>
          <table:table-cell office:value-type="float" office:value="1.318659" table:style-name="c10">
            <text:p>1.3187</text:p>
          </table:table-cell>
          <table:table-cell office:value-type="string" table:style-name="c10">
            <text:p>2026-05-07 14:30</text:p>
          </table:table-cell>
          <table:table-cell office:value-type="float" office:value="1.3123435" table:style-name="c10">
            <text:p>1.3123</text:p>
          </table:table-cell>
          <table:table-cell office:value-type="float" office:value="-0.6778761345048179" table:style-name="c11">
            <text:p>-0.7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6:00</text:p>
          </table:table-cell>
          <table:table-cell office:value-type="float" office:value="1.3596795" table:style-name="c10">
            <text:p>1.3597</text:p>
          </table:table-cell>
          <table:table-cell office:value-type="string" table:style-name="c10">
            <text:p>2026-05-09 04:45</text:p>
          </table:table-cell>
          <table:table-cell office:value-type="float" office:value="1.3723135" table:style-name="c10">
            <text:p>1.3723</text:p>
          </table:table-cell>
          <table:table-cell office:value-type="float" office:value="0.7274321127515693" table:style-name="c12">
            <text:p>+0.7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7:45</text:p>
          </table:table-cell>
          <table:table-cell office:value-type="float" office:value="1.348674" table:style-name="c10">
            <text:p>1.3487</text:p>
          </table:table-cell>
          <table:table-cell office:value-type="string" table:style-name="c10">
            <text:p>2026-05-10 21:15</text:p>
          </table:table-cell>
          <table:table-cell office:value-type="float" office:value="1.3553220000000001" table:style-name="c10">
            <text:p>1.3553</text:p>
          </table:table-cell>
          <table:table-cell office:value-type="float" office:value="0.29204324558791406" table:style-name="c12">
            <text:p>+0.3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15:30</text:p>
          </table:table-cell>
          <table:table-cell office:value-type="float" office:value="1.3716855" table:style-name="c10">
            <text:p>1.3717</text:p>
          </table:table-cell>
          <table:table-cell office:value-type="string" table:style-name="c10">
            <text:p>2026-05-11 22:30</text:p>
          </table:table-cell>
          <table:table-cell office:value-type="float" office:value="1.3633180000000003" table:style-name="c10">
            <text:p>1.3633</text:p>
          </table:table-cell>
          <table:table-cell office:value-type="float" office:value="-0.8086965038268334" table:style-name="c11">
            <text:p>-0.8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09:45</text:p>
          </table:table-cell>
          <table:table-cell office:value-type="float" office:value="1.4217104999999999" table:style-name="c10">
            <text:p>1.4217</text:p>
          </table:table-cell>
          <table:table-cell office:value-type="string" table:style-name="c10">
            <text:p>2026-05-13 12:00</text:p>
          </table:table-cell>
          <table:table-cell office:value-type="float" office:value="1.385307" table:style-name="c10">
            <text:p>1.3853</text:p>
          </table:table-cell>
          <table:table-cell office:value-type="float" office:value="-2.755323864668646" table:style-name="c11">
            <text:p>-2.8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4 17:00</text:p>
          </table:table-cell>
          <table:table-cell office:value-type="float" office:value="1.3906949999999998" table:style-name="c10">
            <text:p>1.3907</text:p>
          </table:table-cell>
          <table:table-cell office:value-type="string" table:style-name="c10">
            <text:p>2026-05-14 23:00</text:p>
          </table:table-cell>
          <table:table-cell office:value-type="float" office:value="1.3783105" table:style-name="c10">
            <text:p>1.3783</text:p>
          </table:table-cell>
          <table:table-cell office:value-type="float" office:value="-1.088645798647414" table:style-name="c11">
            <text:p>-1.1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2:30</text:p>
          </table:table-cell>
          <table:table-cell office:value-type="float" office:value="1.2656325" table:style-name="c10">
            <text:p>1.2656</text:p>
          </table:table-cell>
          <table:table-cell office:value-type="string" table:style-name="c10">
            <text:p>2026-05-21 10:15</text:p>
          </table:table-cell>
          <table:table-cell office:value-type="float" office:value="1.2653670000000001" table:style-name="c10">
            <text:p>1.2654</text:p>
          </table:table-cell>
          <table:table-cell office:value-type="float" office:value="-0.2208357191364807" table:style-name="c11">
            <text:p>-0.2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7:45</text:p>
          </table:table-cell>
          <table:table-cell office:value-type="float" office:value="1.2786389999999999" table:style-name="c10">
            <text:p>1.2786</text:p>
          </table:table-cell>
          <table:table-cell office:value-type="string" table:style-name="c10">
            <text:p>2026-05-22 01:00</text:p>
          </table:table-cell>
          <table:table-cell office:value-type="float" office:value="1.2863565" table:style-name="c10">
            <text:p>1.2864</text:p>
          </table:table-cell>
          <table:table-cell office:value-type="float" office:value="0.4024649143738124" table:style-name="c12">
            <text:p>+0.4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03:15</text:p>
          </table:table-cell>
          <table:table-cell office:value-type="float" office:value="1.3076534999999998" table:style-name="c10">
            <text:p>1.3077</text:p>
          </table:table-cell>
          <table:table-cell office:value-type="string" table:style-name="c10">
            <text:p>2026-05-22 14:45</text:p>
          </table:table-cell>
          <table:table-cell office:value-type="float" office:value="1.3153420000000002" table:style-name="c10">
            <text:p>1.3153</text:p>
          </table:table-cell>
          <table:table-cell office:value-type="float" office:value="0.38688623110023634" table:style-name="c12">
            <text:p>+0.4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8:15</text:p>
          </table:table-cell>
          <table:table-cell office:value-type="float" office:value="1.2916454999999998" table:style-name="c10">
            <text:p>1.2916</text:p>
          </table:table-cell>
          <table:table-cell office:value-type="string" table:style-name="c10">
            <text:p>2026-05-25 20:45</text:p>
          </table:table-cell>
          <table:table-cell office:value-type="float" office:value="1.2703645" table:style-name="c10">
            <text:p>1.2704</text:p>
          </table:table-cell>
          <table:table-cell office:value-type="float" office:value="-1.8441947605205788" table:style-name="c11">
            <text:p>-1.8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45</text:p>
          </table:table-cell>
          <table:table-cell office:value-type="float" office:value="8.254125" table:style-name="c1">
            <text:p>8.2541</text:p>
          </table:table-cell>
          <table:table-cell office:value-type="string" table:style-name="c1">
            <text:p>2026-03-09 22:45</text:p>
          </table:table-cell>
          <table:table-cell office:value-type="float" office:value="8.165915" table:style-name="c1">
            <text:p>8.1659</text:p>
          </table:table-cell>
          <table:table-cell office:value-type="float" office:value="-1.2664414954340897" table:style-name="c14">
            <text:p>-1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9:15</text:p>
          </table:table-cell>
          <table:table-cell office:value-type="float" office:value="8.334165" table:style-name="c1">
            <text:p>8.3342</text:p>
          </table:table-cell>
          <table:table-cell office:value-type="string" table:style-name="c1">
            <text:p>2026-03-10 18:30</text:p>
          </table:table-cell>
          <table:table-cell office:value-type="float" office:value="8.325835" table:style-name="c1">
            <text:p>8.3258</text:p>
          </table:table-cell>
          <table:table-cell office:value-type="float" office:value="-0.299650224887571" table:style-name="c14">
            <text:p>-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07:00</text:p>
          </table:table-cell>
          <table:table-cell office:value-type="float" office:value="8.234115" table:style-name="c1">
            <text:p>8.2341</text:p>
          </table:table-cell>
          <table:table-cell office:value-type="string" table:style-name="c1">
            <text:p>2026-03-11 07:15</text:p>
          </table:table-cell>
          <table:table-cell office:value-type="float" office:value="8.205895000000002" table:style-name="c1">
            <text:p>8.2059</text:p>
          </table:table-cell>
          <table:table-cell office:value-type="float" office:value="-0.5419354005257171" table:style-name="c14">
            <text:p>-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9:45</text:p>
          </table:table-cell>
          <table:table-cell office:value-type="float" office:value="8.26413" table:style-name="c1">
            <text:p>8.2641</text:p>
          </table:table-cell>
          <table:table-cell office:value-type="string" table:style-name="c1">
            <text:p>2026-03-12 13:30</text:p>
          </table:table-cell>
          <table:table-cell office:value-type="float" office:value="8.1959" table:style-name="c1">
            <text:p>8.1959</text:p>
          </table:table-cell>
          <table:table-cell office:value-type="float" office:value="-1.023865840687388" table:style-name="c14">
            <text:p>-1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9:30</text:p>
          </table:table-cell>
          <table:table-cell office:value-type="float" office:value="8.434215" table:style-name="c1">
            <text:p>8.4342</text:p>
          </table:table-cell>
          <table:table-cell office:value-type="string" table:style-name="c1">
            <text:p>2026-03-13 16:30</text:p>
          </table:table-cell>
          <table:table-cell office:value-type="float" office:value="8.55572" table:style-name="c1">
            <text:p>8.5557</text:p>
          </table:table-cell>
          <table:table-cell office:value-type="float" office:value="1.2378403410394645" table:style-name="c13">
            <text:p>+1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00</text:p>
          </table:table-cell>
          <table:table-cell office:value-type="float" office:value="8.394195" table:style-name="c1">
            <text:p>8.3942</text:p>
          </table:table-cell>
          <table:table-cell office:value-type="string" table:style-name="c1">
            <text:p>2026-03-16 11:15</text:p>
          </table:table-cell>
          <table:table-cell office:value-type="float" office:value="8.865565" table:style-name="c1">
            <text:p>8.8656</text:p>
          </table:table-cell>
          <table:table-cell office:value-type="float" office:value="5.404303039957981" table:style-name="c13">
            <text:p>+5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4:00</text:p>
          </table:table-cell>
          <table:table-cell office:value-type="float" office:value="8.944469999999999" table:style-name="c1">
            <text:p>8.9445</text:p>
          </table:table-cell>
          <table:table-cell office:value-type="string" table:style-name="c1">
            <text:p>2026-03-16 14:45</text:p>
          </table:table-cell>
          <table:table-cell office:value-type="float" office:value="8.85557" table:style-name="c1">
            <text:p>8.8556</text:p>
          </table:table-cell>
          <table:table-cell office:value-type="float" office:value="-1.1918233772375442" table:style-name="c14">
            <text:p>-1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1:15</text:p>
          </table:table-cell>
          <table:table-cell office:value-type="float" office:value="9.034514999999999" table:style-name="c1">
            <text:p>9.0345</text:p>
          </table:table-cell>
          <table:table-cell office:value-type="string" table:style-name="c1">
            <text:p>2026-03-17 02:30</text:p>
          </table:table-cell>
          <table:table-cell office:value-type="float" office:value="8.9955" table:style-name="c1">
            <text:p>8.9955</text:p>
          </table:table-cell>
          <table:table-cell office:value-type="float" office:value="-0.6308806228115249" table:style-name="c14">
            <text:p>-0.6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14:15</text:p>
          </table:table-cell>
          <table:table-cell office:value-type="float" office:value="8.84442" table:style-name="c1">
            <text:p>8.8444</text:p>
          </table:table-cell>
          <table:table-cell office:value-type="string" table:style-name="c1">
            <text:p>2026-03-17 14:30</text:p>
          </table:table-cell>
          <table:table-cell office:value-type="float" office:value="8.85557" table:style-name="c1">
            <text:p>8.8556</text:p>
          </table:table-cell>
          <table:table-cell office:value-type="float" office:value="-0.07408382268141445" table:style-name="c14">
            <text:p>-0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20:45</text:p>
          </table:table-cell>
          <table:table-cell office:value-type="float" office:value="8.58429" table:style-name="c1">
            <text:p>8.5843</text:p>
          </table:table-cell>
          <table:table-cell office:value-type="string" table:style-name="c1">
            <text:p>2026-03-24 01:00</text:p>
          </table:table-cell>
          <table:table-cell office:value-type="float" office:value="8.485755000000001" table:style-name="c1">
            <text:p>8.4858</text:p>
          </table:table-cell>
          <table:table-cell office:value-type="float" office:value="-1.3454580896614443" table:style-name="c14">
            <text:p>-1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45</text:p>
          </table:table-cell>
          <table:table-cell office:value-type="float" office:value="8.704349999999998" table:style-name="c1">
            <text:p>8.7043</text:p>
          </table:table-cell>
          <table:table-cell office:value-type="string" table:style-name="c1">
            <text:p>2026-03-25 04:45</text:p>
          </table:table-cell>
          <table:table-cell office:value-type="float" office:value="8.645675" table:style-name="c1">
            <text:p>8.6457</text:p>
          </table:table-cell>
          <table:table-cell office:value-type="float" office:value="-0.8726407408364611" table:style-name="c14">
            <text:p>-0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3:15</text:p>
          </table:table-cell>
          <table:table-cell office:value-type="float" office:value="8.794394999999998" table:style-name="c1">
            <text:p>8.7944</text:p>
          </table:table-cell>
          <table:table-cell office:value-type="string" table:style-name="c1">
            <text:p>2026-03-25 15:00</text:p>
          </table:table-cell>
          <table:table-cell office:value-type="float" office:value="8.705645" table:style-name="c1">
            <text:p>8.7056</text:p>
          </table:table-cell>
          <table:table-cell office:value-type="float" office:value="-1.2070481750591888" table:style-name="c14">
            <text:p>-1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8.32416" table:style-name="c1">
            <text:p>8.3242</text:p>
          </table:table-cell>
          <table:table-cell office:value-type="string" table:style-name="c1">
            <text:p>2026-03-30 14:00</text:p>
          </table:table-cell>
          <table:table-cell office:value-type="float" office:value="8.205895000000002" table:style-name="c1">
            <text:p>8.2059</text:p>
          </table:table-cell>
          <table:table-cell office:value-type="float" office:value="-1.6178038877796452" table:style-name="c14">
            <text:p>-1.6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30</text:p>
          </table:table-cell>
          <table:table-cell office:value-type="float" office:value="8.254125" table:style-name="c1">
            <text:p>8.2541</text:p>
          </table:table-cell>
          <table:table-cell office:value-type="string" table:style-name="c1">
            <text:p>2026-04-01 14:00</text:p>
          </table:table-cell>
          <table:table-cell office:value-type="float" office:value="8.225885000000002" table:style-name="c1">
            <text:p>8.2259</text:p>
          </table:table-cell>
          <table:table-cell office:value-type="float" office:value="-0.5413480425241812" table:style-name="c14">
            <text:p>-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20:15</text:p>
          </table:table-cell>
          <table:table-cell office:value-type="float" office:value="8.174085" table:style-name="c1">
            <text:p>8.1741</text:p>
          </table:table-cell>
          <table:table-cell office:value-type="string" table:style-name="c1">
            <text:p>2026-04-03 23:15</text:p>
          </table:table-cell>
          <table:table-cell office:value-type="float" office:value="8.065965" table:style-name="c1">
            <text:p>8.066</text:p>
          </table:table-cell>
          <table:table-cell office:value-type="float" office:value="-1.519972743554776" table:style-name="c14">
            <text:p>-1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02:15</text:p>
          </table:table-cell>
          <table:table-cell office:value-type="float" office:value="8.14407" table:style-name="c1">
            <text:p>8.1441</text:p>
          </table:table-cell>
          <table:table-cell office:value-type="string" table:style-name="c1">
            <text:p>2026-04-04 23:15</text:p>
          </table:table-cell>
          <table:table-cell office:value-type="float" office:value="8.665665" table:style-name="c1">
            <text:p>8.6657</text:p>
          </table:table-cell>
          <table:table-cell office:value-type="float" office:value="6.191895890691024" table:style-name="c13">
            <text:p>+6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19:30</text:p>
          </table:table-cell>
          <table:table-cell office:value-type="float" office:value="8.58429" table:style-name="c1">
            <text:p>8.5843</text:p>
          </table:table-cell>
          <table:table-cell office:value-type="string" table:style-name="c1">
            <text:p>2026-04-06 05:30</text:p>
          </table:table-cell>
          <table:table-cell office:value-type="float" office:value="8.67566" table:style-name="c1">
            <text:p>8.6757</text:p>
          </table:table-cell>
          <table:table-cell office:value-type="float" office:value="0.8623585137501388" table:style-name="c13">
            <text:p>+0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0:30</text:p>
          </table:table-cell>
          <table:table-cell office:value-type="float" office:value="8.74437" table:style-name="c1">
            <text:p>8.7444</text:p>
          </table:table-cell>
          <table:table-cell office:value-type="string" table:style-name="c1">
            <text:p>2026-04-06 11:45</text:p>
          </table:table-cell>
          <table:table-cell office:value-type="float" office:value="8.69565" table:style-name="c1">
            <text:p>8.6957</text:p>
          </table:table-cell>
          <table:table-cell office:value-type="float" office:value="-0.7559447318674639" table:style-name="c14">
            <text:p>-0.8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4:45</text:p>
          </table:table-cell>
          <table:table-cell office:value-type="float" office:value="8.614304999999998" table:style-name="c1">
            <text:p>8.6143</text:p>
          </table:table-cell>
          <table:table-cell office:value-type="string" table:style-name="c1">
            <text:p>2026-04-10 16:30</text:p>
          </table:table-cell>
          <table:table-cell office:value-type="float" office:value="8.455770000000001" table:style-name="c1">
            <text:p>8.4558</text:p>
          </table:table-cell>
          <table:table-cell office:value-type="float" office:value="-2.0365901164399958" table:style-name="c14">
            <text:p>-2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00</text:p>
          </table:table-cell>
          <table:table-cell office:value-type="float" office:value="8.514254999999999" table:style-name="c1">
            <text:p>8.5143</text:p>
          </table:table-cell>
          <table:table-cell office:value-type="string" table:style-name="c1">
            <text:p>2026-04-14 06:15</text:p>
          </table:table-cell>
          <table:table-cell office:value-type="float" office:value="8.445775" table:style-name="c1">
            <text:p>8.4458</text:p>
          </table:table-cell>
          <table:table-cell office:value-type="float" office:value="-1.0025904113160622" table:style-name="c14">
            <text:p>-1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9:15</text:p>
          </table:table-cell>
          <table:table-cell office:value-type="float" office:value="8.52426" table:style-name="c1">
            <text:p>8.5243</text:p>
          </table:table-cell>
          <table:table-cell office:value-type="string" table:style-name="c1">
            <text:p>2026-04-14 10:45</text:p>
          </table:table-cell>
          <table:table-cell office:value-type="float" office:value="8.465765000000001" table:style-name="c1">
            <text:p>8.4658</text:p>
          </table:table-cell>
          <table:table-cell office:value-type="float" office:value="-0.8847461742720109" table:style-name="c14">
            <text:p>-0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5:00</text:p>
          </table:table-cell>
          <table:table-cell office:value-type="float" office:value="8.454225" table:style-name="c1">
            <text:p>8.4542</text:p>
          </table:table-cell>
          <table:table-cell office:value-type="string" table:style-name="c1">
            <text:p>2026-04-15 23:45</text:p>
          </table:table-cell>
          <table:table-cell office:value-type="float" office:value="8.425785" table:style-name="c1">
            <text:p>8.4258</text:p>
          </table:table-cell>
          <table:table-cell office:value-type="float" office:value="-0.5356273841185866" table:style-name="c14">
            <text:p>-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3:00</text:p>
          </table:table-cell>
          <table:table-cell office:value-type="float" office:value="8.494245" table:style-name="c1">
            <text:p>8.4942</text:p>
          </table:table-cell>
          <table:table-cell office:value-type="string" table:style-name="c1">
            <text:p>2026-04-16 10:00</text:p>
          </table:table-cell>
          <table:table-cell office:value-type="float" office:value="8.495750000000001" table:style-name="c1">
            <text:p>8.4958</text:p>
          </table:table-cell>
          <table:table-cell office:value-type="float" office:value="-0.1822175396400505" table:style-name="c14">
            <text:p>-0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30</text:p>
          </table:table-cell>
          <table:table-cell office:value-type="float" office:value="8.554275" table:style-name="c1">
            <text:p>8.5543</text:p>
          </table:table-cell>
          <table:table-cell office:value-type="string" table:style-name="c1">
            <text:p>2026-04-16 14:30</text:p>
          </table:table-cell>
          <table:table-cell office:value-type="float" office:value="8.405795000000001" table:style-name="c1">
            <text:p>8.4058</text:p>
          </table:table-cell>
          <table:table-cell office:value-type="float" office:value="-1.9321705720823812" table:style-name="c14">
            <text:p>-1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8.62431" table:style-name="c1">
            <text:p>8.6243</text:p>
          </table:table-cell>
          <table:table-cell office:value-type="string" table:style-name="c1">
            <text:p>2026-04-17 02:00</text:p>
          </table:table-cell>
          <table:table-cell office:value-type="float" office:value="8.645675" table:style-name="c1">
            <text:p>8.6457</text:p>
          </table:table-cell>
          <table:table-cell office:value-type="float" office:value="0.0473347511279254" table:style-name="c13">
            <text:p>+0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45</text:p>
          </table:table-cell>
          <table:table-cell office:value-type="float" office:value="8.674335" table:style-name="c1">
            <text:p>8.6743</text:p>
          </table:table-cell>
          <table:table-cell office:value-type="string" table:style-name="c1">
            <text:p>2026-04-17 11:00</text:p>
          </table:table-cell>
          <table:table-cell office:value-type="float" office:value="8.605695" table:style-name="c1">
            <text:p>8.6057</text:p>
          </table:table-cell>
          <table:table-cell office:value-type="float" office:value="-0.989618043400442" table:style-name="c14">
            <text:p>-1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7:00</text:p>
          </table:table-cell>
          <table:table-cell office:value-type="float" office:value="8.894445" table:style-name="c1">
            <text:p>8.8944</text:p>
          </table:table-cell>
          <table:table-cell office:value-type="string" table:style-name="c1">
            <text:p>2026-04-17 23:30</text:p>
          </table:table-cell>
          <table:table-cell office:value-type="float" office:value="8.765615" table:style-name="c1">
            <text:p>8.7656</text:p>
          </table:table-cell>
          <table:table-cell office:value-type="float" office:value="-1.6454367235392287" table:style-name="c14">
            <text:p>-1.6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15:30</text:p>
          </table:table-cell>
          <table:table-cell office:value-type="float" office:value="8.474235" table:style-name="c1">
            <text:p>8.4742</text:p>
          </table:table-cell>
          <table:table-cell office:value-type="string" table:style-name="c1">
            <text:p>2026-04-21 16:30</text:p>
          </table:table-cell>
          <table:table-cell office:value-type="float" office:value="8.445775" table:style-name="c1">
            <text:p>8.4458</text:p>
          </table:table-cell>
          <table:table-cell office:value-type="float" office:value="-0.5350701771310362" table:style-name="c14">
            <text:p>-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45</text:p>
          </table:table-cell>
          <table:table-cell office:value-type="float" office:value="8.56428" table:style-name="c1">
            <text:p>8.5643</text:p>
          </table:table-cell>
          <table:table-cell office:value-type="string" table:style-name="c1">
            <text:p>2026-04-22 14:45</text:p>
          </table:table-cell>
          <table:table-cell office:value-type="float" office:value="8.65567" table:style-name="c1">
            <text:p>8.6557</text:p>
          </table:table-cell>
          <table:table-cell office:value-type="float" office:value="0.8650734874385169" table:style-name="c13">
            <text:p>+0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6:30</text:p>
          </table:table-cell>
          <table:table-cell office:value-type="float" office:value="8.474235" table:style-name="c1">
            <text:p>8.4742</text:p>
          </table:table-cell>
          <table:table-cell office:value-type="string" table:style-name="c1">
            <text:p>2026-04-23 09:15</text:p>
          </table:table-cell>
          <table:table-cell office:value-type="float" office:value="8.405795000000001" table:style-name="c1">
            <text:p>8.4058</text:p>
          </table:table-cell>
          <table:table-cell office:value-type="float" office:value="-1.0059100816179778" table:style-name="c14">
            <text:p>-1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0:30</text:p>
          </table:table-cell>
          <table:table-cell office:value-type="float" office:value="8.54427" table:style-name="c1">
            <text:p>8.5443</text:p>
          </table:table-cell>
          <table:table-cell office:value-type="string" table:style-name="c1">
            <text:p>2026-04-24 03:30</text:p>
          </table:table-cell>
          <table:table-cell office:value-type="float" office:value="8.43578" table:style-name="c1">
            <text:p>8.4358</text:p>
          </table:table-cell>
          <table:table-cell office:value-type="float" office:value="-1.4671016274064197" table:style-name="c14">
            <text:p>-1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3:45</text:p>
          </table:table-cell>
          <table:table-cell office:value-type="float" office:value="8.474235" table:style-name="c1">
            <text:p>8.4742</text:p>
          </table:table-cell>
          <table:table-cell office:value-type="string" table:style-name="c1">
            <text:p>2026-04-29 12:30</text:p>
          </table:table-cell>
          <table:table-cell office:value-type="float" office:value="8.445775" table:style-name="c1">
            <text:p>8.4458</text:p>
          </table:table-cell>
          <table:table-cell office:value-type="float" office:value="-0.5350701771310473" table:style-name="c14">
            <text:p>-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15</text:p>
          </table:table-cell>
          <table:table-cell office:value-type="float" office:value="8.604299999999999" table:style-name="c1">
            <text:p>8.6043</text:p>
          </table:table-cell>
          <table:table-cell office:value-type="string" table:style-name="c1">
            <text:p>2026-05-04 10:30</text:p>
          </table:table-cell>
          <table:table-cell office:value-type="float" office:value="8.525735" table:style-name="c1">
            <text:p>8.5257</text:p>
          </table:table-cell>
          <table:table-cell office:value-type="float" office:value="-1.111164699801248" table:style-name="c14">
            <text:p>-1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2:45</text:p>
          </table:table-cell>
          <table:table-cell office:value-type="float" office:value="8.654325" table:style-name="c1">
            <text:p>8.6543</text:p>
          </table:table-cell>
          <table:table-cell office:value-type="string" table:style-name="c1">
            <text:p>2026-05-04 16:15</text:p>
          </table:table-cell>
          <table:table-cell office:value-type="float" office:value="8.625685" table:style-name="c1">
            <text:p>8.6257</text:p>
          </table:table-cell>
          <table:table-cell office:value-type="float" office:value="-0.5301712648300039" table:style-name="c14">
            <text:p>-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2:30</text:p>
          </table:table-cell>
          <table:table-cell office:value-type="float" office:value="8.82441" table:style-name="c1">
            <text:p>8.8244</text:p>
          </table:table-cell>
          <table:table-cell office:value-type="string" table:style-name="c1">
            <text:p>2026-05-05 16:45</text:p>
          </table:table-cell>
          <table:table-cell office:value-type="float" office:value="8.89555" table:style-name="c1">
            <text:p>8.8956</text:p>
          </table:table-cell>
          <table:table-cell office:value-type="float" office:value="0.6046613376984977" table:style-name="c13">
            <text:p>+0.6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1:00</text:p>
          </table:table-cell>
          <table:table-cell office:value-type="float" office:value="8.994495" table:style-name="c1">
            <text:p>8.9945</text:p>
          </table:table-cell>
          <table:table-cell office:value-type="string" table:style-name="c1">
            <text:p>2026-05-06 14:15</text:p>
          </table:table-cell>
          <table:table-cell office:value-type="float" office:value="9.215390000000001" table:style-name="c1">
            <text:p>9.2154</text:p>
          </table:table-cell>
          <table:table-cell office:value-type="float" office:value="2.251081749336681" table:style-name="c13">
            <text:p>+2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5:45</text:p>
          </table:table-cell>
          <table:table-cell office:value-type="float" office:value="9.414705" table:style-name="c1">
            <text:p>9.4147</text:p>
          </table:table-cell>
          <table:table-cell office:value-type="string" table:style-name="c1">
            <text:p>2026-05-06 17:45</text:p>
          </table:table-cell>
          <table:table-cell office:value-type="float" office:value="9.285355" table:style-name="c1">
            <text:p>9.2854</text:p>
          </table:table-cell>
          <table:table-cell office:value-type="float" office:value="-1.5710680753672102" table:style-name="c14">
            <text:p>-1.6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6:45</text:p>
          </table:table-cell>
          <table:table-cell office:value-type="float" office:value="9.314655" table:style-name="c1">
            <text:p>9.3147</text:p>
          </table:table-cell>
          <table:table-cell office:value-type="string" table:style-name="c1">
            <text:p>2026-05-07 10:15</text:p>
          </table:table-cell>
          <table:table-cell office:value-type="float" office:value="9.265365000000001" table:style-name="c1">
            <text:p>9.2654</text:p>
          </table:table-cell>
          <table:table-cell office:value-type="float" office:value="-0.7280083334809451" table:style-name="c14">
            <text:p>-0.7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6:30</text:p>
          </table:table-cell>
          <table:table-cell office:value-type="float" office:value="9.32466" table:style-name="c1">
            <text:p>9.3247</text:p>
          </table:table-cell>
          <table:table-cell office:value-type="string" table:style-name="c1">
            <text:p>2026-05-07 16:45</text:p>
          </table:table-cell>
          <table:table-cell office:value-type="float" office:value="9.255370000000001" table:style-name="c1">
            <text:p>9.2554</text:p>
          </table:table-cell>
          <table:table-cell office:value-type="float" office:value="-0.9414979702208837" table:style-name="c14">
            <text:p>-0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8:15</text:p>
          </table:table-cell>
          <table:table-cell office:value-type="float" office:value="9.38469" table:style-name="c1">
            <text:p>9.3847</text:p>
          </table:table-cell>
          <table:table-cell office:value-type="string" table:style-name="c1">
            <text:p>2026-05-08 13:30</text:p>
          </table:table-cell>
          <table:table-cell office:value-type="float" office:value="9.33533" table:style-name="c1">
            <text:p>9.3353</text:p>
          </table:table-cell>
          <table:table-cell office:value-type="float" office:value="-0.7248116311780128" table:style-name="c14">
            <text:p>-0.7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4:45</text:p>
          </table:table-cell>
          <table:table-cell office:value-type="float" office:value="9.474735" table:style-name="c1">
            <text:p>9.4747</text:p>
          </table:table-cell>
          <table:table-cell office:value-type="string" table:style-name="c1">
            <text:p>2026-05-09 01:00</text:p>
          </table:table-cell>
          <table:table-cell office:value-type="float" office:value="9.75512" table:style-name="c1">
            <text:p>9.7551</text:p>
          </table:table-cell>
          <table:table-cell office:value-type="float" office:value="2.7534755865995075" table:style-name="c13">
            <text:p>+2.8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0:15</text:p>
          </table:table-cell>
          <table:table-cell office:value-type="float" office:value="9.64482" table:style-name="c1">
            <text:p>9.6448</text:p>
          </table:table-cell>
          <table:table-cell office:value-type="string" table:style-name="c1">
            <text:p>2026-05-10 10:15</text:p>
          </table:table-cell>
          <table:table-cell office:value-type="float" office:value="9.605195" table:style-name="c1">
            <text:p>9.6052</text:p>
          </table:table-cell>
          <table:table-cell office:value-type="float" office:value="-0.6099210229428831" table:style-name="c14">
            <text:p>-0.6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6:45</text:p>
          </table:table-cell>
          <table:table-cell office:value-type="float" office:value="9.784889999999999" table:style-name="c1">
            <text:p>9.7849</text:p>
          </table:table-cell>
          <table:table-cell office:value-type="string" table:style-name="c1">
            <text:p>2026-05-10 21:45</text:p>
          </table:table-cell>
          <table:table-cell office:value-type="float" office:value="9.805095000000001" table:style-name="c1">
            <text:p>9.8051</text:p>
          </table:table-cell>
          <table:table-cell office:value-type="float" office:value="0.006179068901168705" table:style-name="c13">
            <text:p>+0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2:30</text:p>
          </table:table-cell>
          <table:table-cell office:value-type="float" office:value="9.914954999999999" table:style-name="c1">
            <text:p>9.915</text:p>
          </table:table-cell>
          <table:table-cell office:value-type="string" table:style-name="c1">
            <text:p>2026-05-11 02:30</text:p>
          </table:table-cell>
          <table:table-cell office:value-type="float" office:value="9.815090000000001" table:style-name="c1">
            <text:p>9.8151</text:p>
          </table:table-cell>
          <table:table-cell office:value-type="float" office:value="-1.2051024428249901" table:style-name="c14">
            <text:p>-1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06:30</text:p>
          </table:table-cell>
          <table:table-cell office:value-type="float" office:value="9.014505" table:style-name="c1">
            <text:p>9.0145</text:p>
          </table:table-cell>
          <table:table-cell office:value-type="string" table:style-name="c1">
            <text:p>2026-05-20 12:00</text:p>
          </table:table-cell>
          <table:table-cell office:value-type="float" office:value="8.955520000000002" table:style-name="c1">
            <text:p>8.9555</text:p>
          </table:table-cell>
          <table:table-cell office:value-type="float" office:value="-0.8529263057704961" table:style-name="c14">
            <text:p>-0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5:30</text:p>
          </table:table-cell>
          <table:table-cell office:value-type="float" office:value="9.074535" table:style-name="c1">
            <text:p>9.0745</text:p>
          </table:table-cell>
          <table:table-cell office:value-type="string" table:style-name="c1">
            <text:p>2026-05-20 19:00</text:p>
          </table:table-cell>
          <table:table-cell office:value-type="float" office:value="8.9955" table:style-name="c1">
            <text:p>8.9955</text:p>
          </table:table-cell>
          <table:table-cell office:value-type="float" office:value="-1.0691126818068275" table:style-name="c14">
            <text:p>-1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4:15</text:p>
          </table:table-cell>
          <table:table-cell office:value-type="float" office:value="9.174584999999999" table:style-name="c1">
            <text:p>9.1746</text:p>
          </table:table-cell>
          <table:table-cell office:value-type="string" table:style-name="c1">
            <text:p>2026-05-22 14:45</text:p>
          </table:table-cell>
          <table:table-cell office:value-type="float" office:value="9.165415000000001" table:style-name="c1">
            <text:p>9.1654</text:p>
          </table:table-cell>
          <table:table-cell office:value-type="float" office:value="-0.2996502248875488" table:style-name="c14">
            <text:p>-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07:00</text:p>
          </table:table-cell>
          <table:table-cell office:value-type="float" office:value="9.014505" table:style-name="c1">
            <text:p>9.0145</text:p>
          </table:table-cell>
          <table:table-cell office:value-type="string" table:style-name="c1">
            <text:p>2026-05-25 19:30</text:p>
          </table:table-cell>
          <table:table-cell office:value-type="float" office:value="9.045475000000001" table:style-name="c1">
            <text:p>9.0455</text:p>
          </table:table-cell>
          <table:table-cell office:value-type="float" office:value="0.14297063981885128" table:style-name="c13">
            <text:p>+0.1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21:15</text:p>
          </table:table-cell>
          <table:table-cell office:value-type="float" office:value="2094.2766149999998" table:style-name="c10">
            <text:p>2094.3</text:p>
          </table:table-cell>
          <table:table-cell office:value-type="string" table:style-name="c10">
            <text:p>2026-03-05 22:00</text:p>
          </table:table-cell>
          <table:table-cell office:value-type="float" office:value="2079.569695" table:style-name="c10">
            <text:p>2079.6</text:p>
          </table:table-cell>
          <table:table-cell office:value-type="float" office:value="-0.9007396484874031" table:style-name="c11">
            <text:p>-0.9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3:30</text:p>
          </table:table-cell>
          <table:table-cell office:value-type="float" office:value="2019.2391149999999" table:style-name="c10">
            <text:p>2019.2</text:p>
          </table:table-cell>
          <table:table-cell office:value-type="string" table:style-name="c10">
            <text:p>2026-03-09 19:15</text:p>
          </table:table-cell>
          <table:table-cell office:value-type="float" office:value="2009.284855" table:style-name="c10">
            <text:p>2009.3</text:p>
          </table:table-cell>
          <table:table-cell office:value-type="float" office:value="-0.6918853899650634" table:style-name="c11">
            <text:p>-0.7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9:45</text:p>
          </table:table-cell>
          <table:table-cell office:value-type="float" office:value="2032.65582" table:style-name="c10">
            <text:p>2032.7</text:p>
          </table:table-cell>
          <table:table-cell office:value-type="string" table:style-name="c10">
            <text:p>2026-03-09 22:45</text:p>
          </table:table-cell>
          <table:table-cell office:value-type="float" office:value="2010.084455" table:style-name="c10">
            <text:p>2010.1</text:p>
          </table:table-cell>
          <table:table-cell office:value-type="float" office:value="-1.3081173686130931" table:style-name="c11">
            <text:p>-1.3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2076.227595" table:style-name="c10">
            <text:p>2076.2</text:p>
          </table:table-cell>
          <table:table-cell office:value-type="string" table:style-name="c10">
            <text:p>2026-03-10 18:45</text:p>
          </table:table-cell>
          <table:table-cell office:value-type="float" office:value="2040.4892450000002" table:style-name="c10">
            <text:p>2040.5</text:p>
          </table:table-cell>
          <table:table-cell office:value-type="float" office:value="-1.917770869467439" table:style-name="c11">
            <text:p>-1.9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3:45</text:p>
          </table:table-cell>
          <table:table-cell office:value-type="float" office:value="2064.15156" table:style-name="c10">
            <text:p>2064.2</text:p>
          </table:table-cell>
          <table:table-cell office:value-type="string" table:style-name="c10">
            <text:p>2026-03-11 23:15</text:p>
          </table:table-cell>
          <table:table-cell office:value-type="float" office:value="2060.8690500000002" table:style-name="c10">
            <text:p>2060.9</text:p>
          </table:table-cell>
          <table:table-cell office:value-type="float" office:value="-0.3586067696961903" table:style-name="c11">
            <text:p>-0.4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08:00</text:p>
          </table:table-cell>
          <table:table-cell office:value-type="float" office:value="2041.710345" table:style-name="c10">
            <text:p>2041.7</text:p>
          </table:table-cell>
          <table:table-cell office:value-type="string" table:style-name="c10">
            <text:p>2026-03-12 15:00</text:p>
          </table:table-cell>
          <table:table-cell office:value-type="float" office:value="2044.31733" table:style-name="c10">
            <text:p>2044.3</text:p>
          </table:table-cell>
          <table:table-cell office:value-type="float" office:value="-0.07246891540189093" table:style-name="c11">
            <text:p>-0.1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3:00</text:p>
          </table:table-cell>
          <table:table-cell office:value-type="float" office:value="2147.71332" table:style-name="c10">
            <text:p>2147.7</text:p>
          </table:table-cell>
          <table:table-cell office:value-type="string" table:style-name="c10">
            <text:p>2026-03-13 16:30</text:p>
          </table:table-cell>
          <table:table-cell office:value-type="float" office:value="2118.6701350000003" table:style-name="c10">
            <text:p>2118.7</text:p>
          </table:table-cell>
          <table:table-cell office:value-type="float" office:value="-1.549480849700391" table:style-name="c11">
            <text:p>-1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2:45</text:p>
          </table:table-cell>
          <table:table-cell office:value-type="float" office:value="2104.93194" table:style-name="c10">
            <text:p>2104.9</text:p>
          </table:table-cell>
          <table:table-cell office:value-type="string" table:style-name="c10">
            <text:p>2026-03-15 13:15</text:p>
          </table:table-cell>
          <table:table-cell office:value-type="float" office:value="2097.100925" table:style-name="c10">
            <text:p>2097.1</text:p>
          </table:table-cell>
          <table:table-cell office:value-type="float" office:value="-0.5711880522405122" table:style-name="c11">
            <text:p>-0.6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18:00</text:p>
          </table:table-cell>
          <table:table-cell office:value-type="float" office:value="2111.8253849999996" table:style-name="c10">
            <text:p>2111.8</text:p>
          </table:table-cell>
          <table:table-cell office:value-type="string" table:style-name="c10">
            <text:p>2026-03-16 18:00</text:p>
          </table:table-cell>
          <table:table-cell office:value-type="float" office:value="2313.592625" table:style-name="c10">
            <text:p>2313.6</text:p>
          </table:table-cell>
          <table:table-cell office:value-type="float" office:value="9.335164249037842" table:style-name="c12">
            <text:p>+9.3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21:15</text:p>
          </table:table-cell>
          <table:table-cell office:value-type="float" office:value="2352.285555" table:style-name="c10">
            <text:p>2352.3</text:p>
          </table:table-cell>
          <table:table-cell office:value-type="string" table:style-name="c10">
            <text:p>2026-03-17 03:30</text:p>
          </table:table-cell>
          <table:table-cell office:value-type="float" office:value="2335.321755" table:style-name="c10">
            <text:p>2335.3</text:p>
          </table:table-cell>
          <table:table-cell office:value-type="float" office:value="-0.9196208403467021" table:style-name="c11">
            <text:p>-0.9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07:30</text:p>
          </table:table-cell>
          <table:table-cell office:value-type="float" office:value="2336.58771" table:style-name="c10">
            <text:p>2336.6</text:p>
          </table:table-cell>
          <table:table-cell office:value-type="string" table:style-name="c10">
            <text:p>2026-03-17 07:45</text:p>
          </table:table-cell>
          <table:table-cell office:value-type="float" office:value="2329.85449" table:style-name="c10">
            <text:p>2329.9</text:p>
          </table:table-cell>
          <table:table-cell office:value-type="float" office:value="-0.4874886175580295" table:style-name="c11">
            <text:p>-0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0:30</text:p>
          </table:table-cell>
          <table:table-cell office:value-type="float" office:value="2142.840885" table:style-name="c10">
            <text:p>2142.8</text:p>
          </table:table-cell>
          <table:table-cell office:value-type="string" table:style-name="c10">
            <text:p>2026-03-25 15:00</text:p>
          </table:table-cell>
          <table:table-cell office:value-type="float" office:value="2173.05293" table:style-name="c10">
            <text:p>2173.1</text:p>
          </table:table-cell>
          <table:table-cell office:value-type="float" office:value="1.2071877279366872" table:style-name="c12">
            <text:p>+1.2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8:00</text:p>
          </table:table-cell>
          <table:table-cell office:value-type="float" office:value="2060.60979" table:style-name="c10">
            <text:p>2060.6</text:p>
          </table:table-cell>
          <table:table-cell office:value-type="string" table:style-name="c10">
            <text:p>2026-03-30 17:30</text:p>
          </table:table-cell>
          <table:table-cell office:value-type="float" office:value="2040.169405" table:style-name="c10">
            <text:p>2040.2</text:p>
          </table:table-cell>
          <table:table-cell office:value-type="float" office:value="-1.1898751408239594" table:style-name="c11">
            <text:p>-1.2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01:30</text:p>
          </table:table-cell>
          <table:table-cell office:value-type="float" office:value="2062.240605" table:style-name="c10">
            <text:p>2062.2</text:p>
          </table:table-cell>
          <table:table-cell office:value-type="string" table:style-name="c10">
            <text:p>2026-03-31 07:30</text:p>
          </table:table-cell>
          <table:table-cell office:value-type="float" office:value="2049.4347700000003" table:style-name="c10">
            <text:p>2049.4</text:p>
          </table:table-cell>
          <table:table-cell office:value-type="float" office:value="-0.8196257538644169" table:style-name="c11">
            <text:p>-0.8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2:45</text:p>
          </table:table-cell>
          <table:table-cell office:value-type="float" office:value="2057.2681199999997" table:style-name="c10">
            <text:p>2057.3</text:p>
          </table:table-cell>
          <table:table-cell office:value-type="string" table:style-name="c10">
            <text:p>2026-04-01 02:15</text:p>
          </table:table-cell>
          <table:table-cell office:value-type="float" office:value="2091.5037250000005" table:style-name="c10">
            <text:p>2091.5</text:p>
          </table:table-cell>
          <table:table-cell office:value-type="float" office:value="1.4609028721898287" table:style-name="c12">
            <text:p>+1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05:30</text:p>
          </table:table-cell>
          <table:table-cell office:value-type="float" office:value="2128.56375" table:style-name="c10">
            <text:p>2128.6</text:p>
          </table:table-cell>
          <table:table-cell office:value-type="string" table:style-name="c10">
            <text:p>2026-04-01 13:45</text:p>
          </table:table-cell>
          <table:table-cell office:value-type="float" office:value="2115.271835" table:style-name="c10">
            <text:p>2115.3</text:p>
          </table:table-cell>
          <table:table-cell office:value-type="float" office:value="-0.8231063503813196" table:style-name="c11">
            <text:p>-0.8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5 23:00</text:p>
          </table:table-cell>
          <table:table-cell office:value-type="float" office:value="2086.82289" table:style-name="c10">
            <text:p>2086.8</text:p>
          </table:table-cell>
          <table:table-cell office:value-type="string" table:style-name="c10">
            <text:p>2026-04-06 17:15</text:p>
          </table:table-cell>
          <table:table-cell office:value-type="float" office:value="2126.346295" table:style-name="c10">
            <text:p>2126.3</text:p>
          </table:table-cell>
          <table:table-cell office:value-type="float" office:value="1.6902650879152992" table:style-name="c12">
            <text:p>+1.7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20:45</text:p>
          </table:table-cell>
          <table:table-cell office:value-type="float" office:value="2151.4651949999998" table:style-name="c10">
            <text:p>2151.5</text:p>
          </table:table-cell>
          <table:table-cell office:value-type="string" table:style-name="c10">
            <text:p>2026-04-06 21:45</text:p>
          </table:table-cell>
          <table:table-cell office:value-type="float" office:value="2137.97048" table:style-name="c10">
            <text:p>2138</text:p>
          </table:table-cell>
          <table:table-cell office:value-type="float" office:value="-0.8258798715783944" table:style-name="c11">
            <text:p>-0.8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0:00</text:p>
          </table:table-cell>
          <table:table-cell office:value-type="float" office:value="2114.4466949999996" table:style-name="c10">
            <text:p>2114.4</text:p>
          </table:table-cell>
          <table:table-cell office:value-type="string" table:style-name="c10">
            <text:p>2026-04-08 14:00</text:p>
          </table:table-cell>
          <table:table-cell office:value-type="float" office:value="2234.9319750000004" table:style-name="c10">
            <text:p>2234.9</text:p>
          </table:table-cell>
          <table:table-cell office:value-type="float" office:value="5.486903559986689" table:style-name="c12">
            <text:p>+5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45</text:p>
          </table:table-cell>
          <table:table-cell office:value-type="float" office:value="2214.116505" table:style-name="c10">
            <text:p>2214.1</text:p>
          </table:table-cell>
          <table:table-cell office:value-type="string" table:style-name="c10">
            <text:p>2026-04-09 23:15</text:p>
          </table:table-cell>
          <table:table-cell office:value-type="float" office:value="2189.394755" table:style-name="c10">
            <text:p>2189.4</text:p>
          </table:table-cell>
          <table:table-cell office:value-type="float" office:value="-1.3142194662988382" table:style-name="c11">
            <text:p>-1.3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1:30</text:p>
          </table:table-cell>
          <table:table-cell office:value-type="float" office:value="2218.26858" table:style-name="c10">
            <text:p>2218.3</text:p>
          </table:table-cell>
          <table:table-cell office:value-type="string" table:style-name="c10">
            <text:p>2026-04-10 23:30</text:p>
          </table:table-cell>
          <table:table-cell office:value-type="float" office:value="2242.2383200000004" table:style-name="c10">
            <text:p>2242.2</text:p>
          </table:table-cell>
          <table:table-cell office:value-type="float" office:value="0.8785007268290457" table:style-name="c12">
            <text:p>+0.9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09:45</text:p>
          </table:table-cell>
          <table:table-cell office:value-type="float" office:value="2243.751315" table:style-name="c10">
            <text:p>2243.8</text:p>
          </table:table-cell>
          <table:table-cell office:value-type="string" table:style-name="c10">
            <text:p>2026-04-12 00:15</text:p>
          </table:table-cell>
          <table:table-cell office:value-type="float" office:value="2282.83801" table:style-name="c10">
            <text:p>2282.8</text:p>
          </table:table-cell>
          <table:table-cell office:value-type="float" office:value="1.5386420762057762" table:style-name="c12">
            <text:p>+1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0:00</text:p>
          </table:table-cell>
          <table:table-cell office:value-type="float" office:value="2263.4611649999997" table:style-name="c10">
            <text:p>2263.5</text:p>
          </table:table-cell>
          <table:table-cell office:value-type="string" table:style-name="c10">
            <text:p>2026-04-14 12:00</text:p>
          </table:table-cell>
          <table:table-cell office:value-type="float" office:value="2373.35273" table:style-name="c10">
            <text:p>2373.4</text:p>
          </table:table-cell>
          <table:table-cell office:value-type="float" office:value="4.645418022567682" table:style-name="c12">
            <text:p>+4.6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13:45</text:p>
          </table:table-cell>
          <table:table-cell office:value-type="float" office:value="2391.2050050000003" table:style-name="c10">
            <text:p>2391.2</text:p>
          </table:table-cell>
          <table:table-cell office:value-type="string" table:style-name="c10">
            <text:p>2026-04-14 15:00</text:p>
          </table:table-cell>
          <table:table-cell office:value-type="float" office:value="2351.8734750000003" table:style-name="c10">
            <text:p>2351.9</text:p>
          </table:table-cell>
          <table:table-cell office:value-type="float" office:value="-1.8414533670033317" table:style-name="c11">
            <text:p>-1.8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4:30</text:p>
          </table:table-cell>
          <table:table-cell office:value-type="float" office:value="2341.17" table:style-name="c10">
            <text:p>2341.2</text:p>
          </table:table-cell>
          <table:table-cell office:value-type="string" table:style-name="c10">
            <text:p>2026-04-16 00:30</text:p>
          </table:table-cell>
          <table:table-cell office:value-type="float" office:value="2353.3527350000004" table:style-name="c10">
            <text:p>2353.4</text:p>
          </table:table-cell>
          <table:table-cell office:value-type="float" office:value="0.31942929743398185" table:style-name="c12">
            <text:p>+0.3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45</text:p>
          </table:table-cell>
          <table:table-cell office:value-type="float" office:value="2339.8693499999995" table:style-name="c10">
            <text:p>2339.9</text:p>
          </table:table-cell>
          <table:table-cell office:value-type="string" table:style-name="c10">
            <text:p>2026-04-16 16:00</text:p>
          </table:table-cell>
          <table:table-cell office:value-type="float" office:value="2337.8404950000004" table:style-name="c10">
            <text:p>2337.8</text:p>
          </table:table-cell>
          <table:table-cell office:value-type="float" office:value="-0.2864347169428072" table:style-name="c11">
            <text:p>-0.3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9:30</text:p>
          </table:table-cell>
          <table:table-cell office:value-type="float" office:value="2372.8658399999995" table:style-name="c10">
            <text:p>2372.9</text:p>
          </table:table-cell>
          <table:table-cell office:value-type="string" table:style-name="c10">
            <text:p>2026-04-17 23:45</text:p>
          </table:table-cell>
          <table:table-cell office:value-type="float" office:value="2419.479655" table:style-name="c10">
            <text:p>2419.5</text:p>
          </table:table-cell>
          <table:table-cell office:value-type="float" office:value="1.760625251769632" table:style-name="c12">
            <text:p>+1.8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3:00</text:p>
          </table:table-cell>
          <table:table-cell office:value-type="float" office:value="2371.535175" table:style-name="c10">
            <text:p>2371.5</text:p>
          </table:table-cell>
          <table:table-cell office:value-type="string" table:style-name="c10">
            <text:p>2026-04-22 16:45</text:p>
          </table:table-cell>
          <table:table-cell office:value-type="float" office:value="2389.32474" table:style-name="c10">
            <text:p>2389.3</text:p>
          </table:table-cell>
          <table:table-cell office:value-type="float" office:value="0.5487291515606563" table:style-name="c12">
            <text:p>+0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14:30</text:p>
          </table:table-cell>
          <table:table-cell office:value-type="float" office:value="2351.1649949999996" table:style-name="c10">
            <text:p>2351.2</text:p>
          </table:table-cell>
          <table:table-cell office:value-type="string" table:style-name="c10">
            <text:p>2026-04-27 05:30</text:p>
          </table:table-cell>
          <table:table-cell office:value-type="float" office:value="2333.2128100000004" table:style-name="c10">
            <text:p>2333.2</text:p>
          </table:table-cell>
          <table:table-cell office:value-type="float" office:value="-0.9619179196391991" table:style-name="c11">
            <text:p>-1.0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15</text:p>
          </table:table-cell>
          <table:table-cell office:value-type="float" office:value="2345.172" table:style-name="c10">
            <text:p>2345.2</text:p>
          </table:table-cell>
          <table:table-cell office:value-type="string" table:style-name="c10">
            <text:p>2026-04-29 12:30</text:p>
          </table:table-cell>
          <table:table-cell office:value-type="float" office:value="2313.6326050000002" table:style-name="c10">
            <text:p>2313.6</text:p>
          </table:table-cell>
          <table:table-cell office:value-type="float" office:value="-1.5420765119741553" table:style-name="c11">
            <text:p>-1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12:30</text:p>
          </table:table-cell>
          <table:table-cell office:value-type="float" office:value="2305.9524" table:style-name="c10">
            <text:p>2306</text:p>
          </table:table-cell>
          <table:table-cell office:value-type="string" table:style-name="c10">
            <text:p>2026-05-01 20:30</text:p>
          </table:table-cell>
          <table:table-cell office:value-type="float" office:value="2298.67009" table:style-name="c10">
            <text:p>2298.7</text:p>
          </table:table-cell>
          <table:table-cell office:value-type="float" office:value="-0.515073576970182" table:style-name="c11">
            <text:p>-0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21:45</text:p>
          </table:table-cell>
          <table:table-cell office:value-type="float" office:value="2329.48416" table:style-name="c10">
            <text:p>2329.5</text:p>
          </table:table-cell>
          <table:table-cell office:value-type="string" table:style-name="c10">
            <text:p>2026-05-03 01:15</text:p>
          </table:table-cell>
          <table:table-cell office:value-type="float" office:value="2308.295275" table:style-name="c10">
            <text:p>2308.3</text:p>
          </table:table-cell>
          <table:table-cell office:value-type="float" office:value="-1.1076773003137919" table:style-name="c11">
            <text:p>-1.1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12:15</text:p>
          </table:table-cell>
          <table:table-cell office:value-type="float" office:value="2330.62473" table:style-name="c10">
            <text:p>2330.6</text:p>
          </table:table-cell>
          <table:table-cell office:value-type="string" table:style-name="c10">
            <text:p>2026-05-03 21:45</text:p>
          </table:table-cell>
          <table:table-cell office:value-type="float" office:value="2318.93995" table:style-name="c10">
            <text:p>2318.9</text:p>
          </table:table-cell>
          <table:table-cell office:value-type="float" office:value="-0.7002560622468734" table:style-name="c11">
            <text:p>-0.7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22:15</text:p>
          </table:table-cell>
          <table:table-cell office:value-type="float" office:value="2349.07395" table:style-name="c10">
            <text:p>2349.1</text:p>
          </table:table-cell>
          <table:table-cell office:value-type="string" table:style-name="c10">
            <text:p>2026-05-04 00:00</text:p>
          </table:table-cell>
          <table:table-cell office:value-type="float" office:value="2321.488675" table:style-name="c10">
            <text:p>2321.5</text:p>
          </table:table-cell>
          <table:table-cell office:value-type="float" office:value="-1.3718568060117953" table:style-name="c11">
            <text:p>-1.4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00</text:p>
          </table:table-cell>
          <table:table-cell office:value-type="float" office:value="2352.385605" table:style-name="c10">
            <text:p>2352.4</text:p>
          </table:table-cell>
          <table:table-cell office:value-type="string" table:style-name="c10">
            <text:p>2026-05-04 08:30</text:p>
          </table:table-cell>
          <table:table-cell office:value-type="float" office:value="2359.149835" table:style-name="c10">
            <text:p>2359.1</text:p>
          </table:table-cell>
          <table:table-cell office:value-type="float" office:value="0.08707286235223322" table:style-name="c12">
            <text:p>+0.1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15:00</text:p>
          </table:table-cell>
          <table:table-cell office:value-type="float" office:value="2372.5857" table:style-name="c10">
            <text:p>2372.6</text:p>
          </table:table-cell>
          <table:table-cell office:value-type="string" table:style-name="c10">
            <text:p>2026-05-04 20:45</text:p>
          </table:table-cell>
          <table:table-cell office:value-type="float" office:value="2348.06538" table:style-name="c10">
            <text:p>2348.1</text:p>
          </table:table-cell>
          <table:table-cell office:value-type="float" office:value="-1.2313191761469278" table:style-name="c11">
            <text:p>-1.2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3:45</text:p>
          </table:table-cell>
          <table:table-cell office:value-type="float" office:value="2386.77279" table:style-name="c10">
            <text:p>2386.8</text:p>
          </table:table-cell>
          <table:table-cell office:value-type="string" table:style-name="c10">
            <text:p>2026-05-05 09:30</text:p>
          </table:table-cell>
          <table:table-cell office:value-type="float" office:value="2370.304255" table:style-name="c10">
            <text:p>2370.3</text:p>
          </table:table-cell>
          <table:table-cell office:value-type="float" office:value="-0.8885124421812107" table:style-name="c11">
            <text:p>-0.9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9:45</text:p>
          </table:table-cell>
          <table:table-cell office:value-type="float" office:value="2418.96888" table:style-name="c10">
            <text:p>2419</text:p>
          </table:table-cell>
          <table:table-cell office:value-type="string" table:style-name="c10">
            <text:p>2026-05-06 13:45</text:p>
          </table:table-cell>
          <table:table-cell office:value-type="float" office:value="2376.181315" table:style-name="c10">
            <text:p>2376.2</text:p>
          </table:table-cell>
          <table:table-cell office:value-type="float" office:value="-1.965198967284154" table:style-name="c11">
            <text:p>-2.0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17:30</text:p>
          </table:table-cell>
          <table:table-cell office:value-type="float" office:value="2333.035935" table:style-name="c10">
            <text:p>2333</text:p>
          </table:table-cell>
          <table:table-cell office:value-type="string" table:style-name="c10">
            <text:p>2026-05-10 00:00</text:p>
          </table:table-cell>
          <table:table-cell office:value-type="float" office:value="2325.266785" table:style-name="c10">
            <text:p>2325.3</text:p>
          </table:table-cell>
          <table:table-cell office:value-type="float" office:value="-0.5322403361616046" table:style-name="c11">
            <text:p>-0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6:00</text:p>
          </table:table-cell>
          <table:table-cell office:value-type="float" office:value="2348.73378" table:style-name="c10">
            <text:p>2348.7</text:p>
          </table:table-cell>
          <table:table-cell office:value-type="string" table:style-name="c10">
            <text:p>2026-05-10 21:00</text:p>
          </table:table-cell>
          <table:table-cell office:value-type="float" office:value="2327.5956200000005" table:style-name="c10">
            <text:p>2327.6</text:p>
          </table:table-cell>
          <table:table-cell office:value-type="float" office:value="-1.0980820331361496" table:style-name="c11">
            <text:p>-1.1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22:45</text:p>
          </table:table-cell>
          <table:table-cell office:value-type="float" office:value="2367.693255" table:style-name="c10">
            <text:p>2367.7</text:p>
          </table:table-cell>
          <table:table-cell office:value-type="string" table:style-name="c10">
            <text:p>2026-05-11 02:30</text:p>
          </table:table-cell>
          <table:table-cell office:value-type="float" office:value="2349.00491" table:style-name="c10">
            <text:p>2349</text:p>
          </table:table-cell>
          <table:table-cell office:value-type="float" office:value="-0.9876281805385356" table:style-name="c11">
            <text:p>-1.0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5:30</text:p>
          </table:table-cell>
          <table:table-cell office:value-type="float" office:value="2136.937935" table:style-name="c10">
            <text:p>2136.9</text:p>
          </table:table-cell>
          <table:table-cell office:value-type="string" table:style-name="c10">
            <text:p>2026-05-21 23:00</text:p>
          </table:table-cell>
          <table:table-cell office:value-type="float" office:value="2130.77408" table:style-name="c10">
            <text:p>2130.8</text:p>
          </table:table-cell>
          <table:table-cell office:value-type="float" office:value="-0.4877667345972614" table:style-name="c11">
            <text:p>-0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00:00</text:p>
          </table:table-cell>
          <table:table-cell office:value-type="float" office:value="2100.90993" table:style-name="c10">
            <text:p>2100.9</text:p>
          </table:table-cell>
          <table:table-cell office:value-type="string" table:style-name="c10">
            <text:p>2026-05-25 03:30</text:p>
          </table:table-cell>
          <table:table-cell office:value-type="float" office:value="2094.5522" table:style-name="c10">
            <text:p>2094.6</text:p>
          </table:table-cell>
          <table:table-cell office:value-type="float" office:value="-0.5019129900442731" table:style-name="c11">
            <text:p>-0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4:45</text:p>
          </table:table-cell>
          <table:table-cell office:value-type="float" office:value="2125.612275" table:style-name="c10">
            <text:p>2125.6</text:p>
          </table:table-cell>
          <table:table-cell office:value-type="string" table:style-name="c10">
            <text:p>2026-05-25 19:45</text:p>
          </table:table-cell>
          <table:table-cell office:value-type="float" office:value="2118.910015" table:style-name="c10">
            <text:p>2118.9</text:p>
          </table:table-cell>
          <table:table-cell office:value-type="float" office:value="-0.5145793166811186" table:style-name="c11">
            <text:p>-0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0:30</text:p>
          </table:table-cell>
          <table:table-cell office:value-type="float" office:value="2122.350645" table:style-name="c10">
            <text:p>2122.4</text:p>
          </table:table-cell>
          <table:table-cell office:value-type="string" table:style-name="c10">
            <text:p>2026-05-26 15:30</text:p>
          </table:table-cell>
          <table:table-cell office:value-type="float" office:value="2097.760595" table:style-name="c10">
            <text:p>2097.8</text:p>
          </table:table-cell>
          <table:table-cell office:value-type="float" office:value="-1.3562072552532833" table:style-name="c11">
            <text:p>-1.4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1:30</text:p>
          </table:table-cell>
          <table:table-cell office:value-type="float" office:value="2031.0750299999997" table:style-name="c10">
            <text:p>2031.1</text:p>
          </table:table-cell>
          <table:table-cell office:value-type="string" table:style-name="c10">
            <text:p>2026-05-31 07:00</text:p>
          </table:table-cell>
          <table:table-cell office:value-type="float" office:value="2028.855065" table:style-name="c10">
            <text:p>2028.9</text:p>
          </table:table-cell>
          <table:table-cell office:value-type="float" office:value="-0.30898150891721654" table:style-name="c11">
            <text:p>-0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9:15</text:p>
          </table:table-cell>
          <table:table-cell office:value-type="float" office:value="1.0245119999999999" table:style-name="c1">
            <text:p>1.0245</text:p>
          </table:table-cell>
          <table:table-cell office:value-type="string" table:style-name="c1">
            <text:p>2026-03-05 19:30</text:p>
          </table:table-cell>
          <table:table-cell office:value-type="float" office:value="1.01949" table:style-name="c1">
            <text:p>1.0195</text:p>
          </table:table-cell>
          <table:table-cell office:value-type="float" office:value="-0.6891047161965758" table:style-name="c14">
            <text:p>-0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2:30</text:p>
          </table:table-cell>
          <table:table-cell office:value-type="float" office:value="0.8814405" table:style-name="c1">
            <text:p>0.88144</text:p>
          </table:table-cell>
          <table:table-cell office:value-type="string" table:style-name="c1">
            <text:p>2026-03-15 15:45</text:p>
          </table:table-cell>
          <table:table-cell office:value-type="float" office:value="0.8835580000000001" table:style-name="c1">
            <text:p>0.88356</text:p>
          </table:table-cell>
          <table:table-cell office:value-type="float" office:value="0.039851533711043885" table:style-name="c13">
            <text:p>+0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3:00</text:p>
          </table:table-cell>
          <table:table-cell office:value-type="float" office:value="0.90045" table:style-name="c1">
            <text:p>0.90045</text:p>
          </table:table-cell>
          <table:table-cell office:value-type="string" table:style-name="c1">
            <text:p>2026-03-16 14:30</text:p>
          </table:table-cell>
          <table:table-cell office:value-type="float" office:value="0.9265365000000001" table:style-name="c1">
            <text:p>0.92654</text:p>
          </table:table-cell>
          <table:table-cell office:value-type="float" office:value="2.6913602683658278" table:style-name="c13">
            <text:p>+2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6:30</text:p>
          </table:table-cell>
          <table:table-cell office:value-type="float" office:value="0.9534765" table:style-name="c1">
            <text:p>0.95348</text:p>
          </table:table-cell>
          <table:table-cell office:value-type="string" table:style-name="c1">
            <text:p>2026-03-17 01:45</text:p>
          </table:table-cell>
          <table:table-cell office:value-type="float" office:value="0.9785105000000001" table:style-name="c1">
            <text:p>0.97851</text:p>
          </table:table-cell>
          <table:table-cell office:value-type="float" office:value="2.420401290488039" table:style-name="c13">
            <text:p>+2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7:15</text:p>
          </table:table-cell>
          <table:table-cell office:value-type="float" office:value="0.9704849999999999" table:style-name="c1">
            <text:p>0.97048</text:p>
          </table:table-cell>
          <table:table-cell office:value-type="string" table:style-name="c1">
            <text:p>2026-03-17 07:30</text:p>
          </table:table-cell>
          <table:table-cell office:value-type="float" office:value="0.9705145000000001" table:style-name="c1">
            <text:p>0.97051</text:p>
          </table:table-cell>
          <table:table-cell office:value-type="float" office:value="-0.19686635914002437" table:style-name="c14">
            <text:p>-0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8:30</text:p>
          </table:table-cell>
          <table:table-cell office:value-type="float" office:value="0.9734864999999999" table:style-name="c1">
            <text:p>0.97349</text:p>
          </table:table-cell>
          <table:table-cell office:value-type="string" table:style-name="c1">
            <text:p>2026-03-17 09:15</text:p>
          </table:table-cell>
          <table:table-cell office:value-type="float" office:value="0.9655170000000001" table:style-name="c1">
            <text:p>0.96552</text:p>
          </table:table-cell>
          <table:table-cell office:value-type="float" office:value="-1.0169189283056324" table:style-name="c14">
            <text:p>-1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9:30</text:p>
          </table:table-cell>
          <table:table-cell office:value-type="float" office:value="0.9714854999999999" table:style-name="c1">
            <text:p>0.97149</text:p>
          </table:table-cell>
          <table:table-cell office:value-type="string" table:style-name="c1">
            <text:p>2026-03-17 12:45</text:p>
          </table:table-cell>
          <table:table-cell office:value-type="float" office:value="0.9605195" table:style-name="c1">
            <text:p>0.96052</text:p>
          </table:table-cell>
          <table:table-cell office:value-type="float" office:value="-1.3264303461554494" table:style-name="c14">
            <text:p>-1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15:00</text:p>
          </table:table-cell>
          <table:table-cell office:value-type="float" office:value="0.9254625" table:style-name="c1">
            <text:p>0.92546</text:p>
          </table:table-cell>
          <table:table-cell office:value-type="string" table:style-name="c1">
            <text:p>2026-03-21 20:00</text:p>
          </table:table-cell>
          <table:table-cell office:value-type="float" office:value="0.9315340000000001" table:style-name="c1">
            <text:p>0.93153</text:p>
          </table:table-cell>
          <table:table-cell office:value-type="float" office:value="0.4548389085457405" table:style-name="c13">
            <text:p>+0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19:00</text:p>
          </table:table-cell>
          <table:table-cell office:value-type="float" office:value="0.930465" table:style-name="c1">
            <text:p>0.93046</text:p>
          </table:table-cell>
          <table:table-cell office:value-type="string" table:style-name="c1">
            <text:p>2026-03-24 00:45</text:p>
          </table:table-cell>
          <table:table-cell office:value-type="float" office:value="0.9135430000000001" table:style-name="c1">
            <text:p>0.91354</text:p>
          </table:table-cell>
          <table:table-cell office:value-type="float" office:value="-2.0149250597281676" table:style-name="c14">
            <text:p>-2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0.932466" table:style-name="c1">
            <text:p>0.93247</text:p>
          </table:table-cell>
          <table:table-cell office:value-type="string" table:style-name="c1">
            <text:p>2026-03-25 03:00</text:p>
          </table:table-cell>
          <table:table-cell office:value-type="float" office:value="0.9205395000000001" table:style-name="c1">
            <text:p>0.92054</text:p>
          </table:table-cell>
          <table:table-cell office:value-type="float" office:value="-1.4763710913320072" table:style-name="c14">
            <text:p>-1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0:45</text:p>
          </table:table-cell>
          <table:table-cell office:value-type="float" office:value="0.9314655" table:style-name="c1">
            <text:p>0.93147</text:p>
          </table:table-cell>
          <table:table-cell office:value-type="string" table:style-name="c1">
            <text:p>2026-03-25 19:15</text:p>
          </table:table-cell>
          <table:table-cell office:value-type="float" office:value="0.9295350000000001" table:style-name="c1">
            <text:p>0.92954</text:p>
          </table:table-cell>
          <table:table-cell office:value-type="float" office:value="-0.4067397520358784" table:style-name="c14">
            <text:p>-0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2:00</text:p>
          </table:table-cell>
          <table:table-cell office:value-type="float" office:value="0.8294144999999999" table:style-name="c1">
            <text:p>0.82941</text:p>
          </table:table-cell>
          <table:table-cell office:value-type="string" table:style-name="c1">
            <text:p>2026-03-31 09:30</text:p>
          </table:table-cell>
          <table:table-cell office:value-type="float" office:value="0.8225885" table:style-name="c1">
            <text:p>0.82259</text:p>
          </table:table-cell>
          <table:table-cell office:value-type="float" office:value="-1.0212450362876546" table:style-name="c14">
            <text:p>-1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4:00</text:p>
          </table:table-cell>
          <table:table-cell office:value-type="float" office:value="0.8314154999999999" table:style-name="c1">
            <text:p>0.83142</text:p>
          </table:table-cell>
          <table:table-cell office:value-type="string" table:style-name="c1">
            <text:p>2026-03-31 15:45</text:p>
          </table:table-cell>
          <table:table-cell office:value-type="float" office:value="0.8225885" table:style-name="c1">
            <text:p>0.82259</text:p>
          </table:table-cell>
          <table:table-cell office:value-type="float" office:value="-1.2594610530474726" table:style-name="c14">
            <text:p>-1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15</text:p>
          </table:table-cell>
          <table:table-cell office:value-type="float" office:value="0.8464229999999999" table:style-name="c1">
            <text:p>0.84642</text:p>
          </table:table-cell>
          <table:table-cell office:value-type="string" table:style-name="c1">
            <text:p>2026-04-01 11:15</text:p>
          </table:table-cell>
          <table:table-cell office:value-type="float" office:value="0.83958" table:style-name="c1">
            <text:p>0.83958</text:p>
          </table:table-cell>
          <table:table-cell office:value-type="float" office:value="-1.006744904143675" table:style-name="c14">
            <text:p>-1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0.8554274999999999" table:style-name="c1">
            <text:p>0.85543</text:p>
          </table:table-cell>
          <table:table-cell office:value-type="string" table:style-name="c1">
            <text:p>2026-04-01 18:45</text:p>
          </table:table-cell>
          <table:table-cell office:value-type="float" office:value="0.8445775" table:style-name="c1">
            <text:p>0.84458</text:p>
          </table:table-cell>
          <table:table-cell office:value-type="float" office:value="-1.465736187169564" table:style-name="c14">
            <text:p>-1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12:00</text:p>
          </table:table-cell>
          <table:table-cell office:value-type="float" office:value="0.8504249999999999" table:style-name="c1">
            <text:p>0.85042</text:p>
          </table:table-cell>
          <table:table-cell office:value-type="string" table:style-name="c1">
            <text:p>2026-04-03 13:45</text:p>
          </table:table-cell>
          <table:table-cell office:value-type="float" office:value="0.837581" table:style-name="c1">
            <text:p>0.83758</text:p>
          </table:table-cell>
          <table:table-cell office:value-type="float" office:value="-1.7071845746538417" table:style-name="c14">
            <text:p>-1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2:30</text:p>
          </table:table-cell>
          <table:table-cell office:value-type="float" office:value="0.8414204999999999" table:style-name="c1">
            <text:p>0.84142</text:p>
          </table:table-cell>
          <table:table-cell office:value-type="string" table:style-name="c1">
            <text:p>2026-04-04 21:00</text:p>
          </table:table-cell>
          <table:table-cell office:value-type="float" office:value="0.841579" table:style-name="c1">
            <text:p>0.84158</text:p>
          </table:table-cell>
          <table:table-cell office:value-type="float" office:value="-0.1811004629670765" table:style-name="c14">
            <text:p>-0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2:30</text:p>
          </table:table-cell>
          <table:table-cell office:value-type="float" office:value="0.8514255" table:style-name="c1">
            <text:p>0.85143</text:p>
          </table:table-cell>
          <table:table-cell office:value-type="string" table:style-name="c1">
            <text:p>2026-04-06 16:30</text:p>
          </table:table-cell>
          <table:table-cell office:value-type="float" office:value="0.877561" table:style-name="c1">
            <text:p>0.87756</text:p>
          </table:table-cell>
          <table:table-cell office:value-type="float" office:value="2.8635806140408393" table:style-name="c13">
            <text:p>+2.9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05:15</text:p>
          </table:table-cell>
          <table:table-cell office:value-type="float" office:value="0.8634314999999999" table:style-name="c1">
            <text:p>0.86343</text:p>
          </table:table-cell>
          <table:table-cell office:value-type="string" table:style-name="c1">
            <text:p>2026-04-07 06:15</text:p>
          </table:table-cell>
          <table:table-cell office:value-type="float" office:value="0.8565715" table:style-name="c1">
            <text:p>0.85657</text:p>
          </table:table-cell>
          <table:table-cell office:value-type="float" office:value="-0.9928160402417507" table:style-name="c14">
            <text:p>-1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18:00</text:p>
          </table:table-cell>
          <table:table-cell office:value-type="float" office:value="0.8604299999999999" table:style-name="c1">
            <text:p>0.86043</text:p>
          </table:table-cell>
          <table:table-cell office:value-type="string" table:style-name="c1">
            <text:p>2026-04-07 18:15</text:p>
          </table:table-cell>
          <table:table-cell office:value-type="float" office:value="0.8585705" table:style-name="c1">
            <text:p>0.85857</text:p>
          </table:table-cell>
          <table:table-cell office:value-type="float" office:value="-0.415580864160936" table:style-name="c14">
            <text:p>-0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18:30</text:p>
          </table:table-cell>
          <table:table-cell office:value-type="float" office:value="0.8614305" table:style-name="c1">
            <text:p>0.86143</text:p>
          </table:table-cell>
          <table:table-cell office:value-type="string" table:style-name="c1">
            <text:p>2026-04-08 09:45</text:p>
          </table:table-cell>
          <table:table-cell office:value-type="float" office:value="0.9045475000000001" table:style-name="c1">
            <text:p>0.90455</text:p>
          </table:table-cell>
          <table:table-cell office:value-type="float" office:value="4.795373456999719" table:style-name="c13">
            <text:p>+4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21:30</text:p>
          </table:table-cell>
          <table:table-cell office:value-type="float" office:value="0.8984489999999999" table:style-name="c1">
            <text:p>0.89845</text:p>
          </table:table-cell>
          <table:table-cell office:value-type="string" table:style-name="c1">
            <text:p>2026-04-08 21:45</text:p>
          </table:table-cell>
          <table:table-cell office:value-type="float" office:value="0.8975510000000001" table:style-name="c1">
            <text:p>0.89755</text:p>
          </table:table-cell>
          <table:table-cell office:value-type="float" office:value="-0.2996502248875377" table:style-name="c14">
            <text:p>-0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22:30</text:p>
          </table:table-cell>
          <table:table-cell office:value-type="float" office:value="0.918459" table:style-name="c1">
            <text:p>0.91846</text:p>
          </table:table-cell>
          <table:table-cell office:value-type="string" table:style-name="c1">
            <text:p>2026-04-10 00:45</text:p>
          </table:table-cell>
          <table:table-cell office:value-type="float" office:value="0.9035480000000001" table:style-name="c1">
            <text:p>0.90355</text:p>
          </table:table-cell>
          <table:table-cell office:value-type="float" office:value="-1.82013486198076" table:style-name="c14">
            <text:p>-1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5:30</text:p>
          </table:table-cell>
          <table:table-cell office:value-type="float" office:value="0.8954475" table:style-name="c1">
            <text:p>0.89545</text:p>
          </table:table-cell>
          <table:table-cell office:value-type="string" table:style-name="c1">
            <text:p>2026-04-11 15:45</text:p>
          </table:table-cell>
          <table:table-cell office:value-type="float" office:value="0.8945525000000001" table:style-name="c1">
            <text:p>0.89455</text:p>
          </table:table-cell>
          <table:table-cell office:value-type="float" office:value="-0.2996502248875488" table:style-name="c14">
            <text:p>-0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6:15</text:p>
          </table:table-cell>
          <table:table-cell office:value-type="float" office:value="0.9044519999999999" table:style-name="c1">
            <text:p>0.90445</text:p>
          </table:table-cell>
          <table:table-cell office:value-type="string" table:style-name="c1">
            <text:p>2026-04-11 23:15</text:p>
          </table:table-cell>
          <table:table-cell office:value-type="float" office:value="0.901549" table:style-name="c1">
            <text:p>0.90155</text:p>
          </table:table-cell>
          <table:table-cell office:value-type="float" office:value="-0.5202262199652141" table:style-name="c14">
            <text:p>-0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30</text:p>
          </table:table-cell>
          <table:table-cell office:value-type="float" office:value="0.9214605" table:style-name="c1">
            <text:p>0.92146</text:p>
          </table:table-cell>
          <table:table-cell office:value-type="string" table:style-name="c1">
            <text:p>2026-04-14 03:15</text:p>
          </table:table-cell>
          <table:table-cell office:value-type="float" office:value="0.901549" table:style-name="c1">
            <text:p>0.90155</text:p>
          </table:table-cell>
          <table:table-cell office:value-type="float" office:value="-2.356443542723763" table:style-name="c14">
            <text:p>-2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1:45</text:p>
          </table:table-cell>
          <table:table-cell office:value-type="float" office:value="0.896448" table:style-name="c1">
            <text:p>0.89645</text:p>
          </table:table-cell>
          <table:table-cell office:value-type="string" table:style-name="c1">
            <text:p>2026-04-15 08:00</text:p>
          </table:table-cell>
          <table:table-cell office:value-type="float" office:value="0.8925535000000001" table:style-name="c1">
            <text:p>0.89255</text:p>
          </table:table-cell>
          <table:table-cell office:value-type="float" office:value="-0.6334683602952973" table:style-name="c14">
            <text:p>-0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00</text:p>
          </table:table-cell>
          <table:table-cell office:value-type="float" office:value="0.908454" table:style-name="c1">
            <text:p>0.90845</text:p>
          </table:table-cell>
          <table:table-cell office:value-type="string" table:style-name="c1">
            <text:p>2026-04-15 23:30</text:p>
          </table:table-cell>
          <table:table-cell office:value-type="float" office:value="0.909545" table:style-name="c1">
            <text:p>0.90955</text:p>
          </table:table-cell>
          <table:table-cell office:value-type="float" office:value="-0.08004593022870043" table:style-name="c14">
            <text:p>-0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15</text:p>
          </table:table-cell>
          <table:table-cell office:value-type="float" office:value="0.9214605" table:style-name="c1">
            <text:p>0.92146</text:p>
          </table:table-cell>
          <table:table-cell office:value-type="string" table:style-name="c1">
            <text:p>2026-04-16 21:30</text:p>
          </table:table-cell>
          <table:table-cell office:value-type="float" office:value="0.9865065000000001" table:style-name="c1">
            <text:p>0.98651</text:p>
          </table:table-cell>
          <table:table-cell office:value-type="float" office:value="6.845000247596067" table:style-name="c13">
            <text:p>+6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30</text:p>
          </table:table-cell>
          <table:table-cell office:value-type="float" office:value="0.9984989999999999" table:style-name="c1">
            <text:p>0.9985</text:p>
          </table:table-cell>
          <table:table-cell office:value-type="string" table:style-name="c1">
            <text:p>2026-04-17 18:15</text:p>
          </table:table-cell>
          <table:table-cell office:value-type="float" office:value="0.9895050000000001" table:style-name="c1">
            <text:p>0.98951</text:p>
          </table:table-cell>
          <table:table-cell office:value-type="float" office:value="-1.0988514254896442" table:style-name="c14">
            <text:p>-1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6:15</text:p>
          </table:table-cell>
          <table:table-cell office:value-type="float" office:value="0.9854924999999999" table:style-name="c1">
            <text:p>0.98549</text:p>
          </table:table-cell>
          <table:table-cell office:value-type="string" table:style-name="c1">
            <text:p>2026-04-18 08:45</text:p>
          </table:table-cell>
          <table:table-cell office:value-type="float" office:value="0.9705145000000001" table:style-name="c1">
            <text:p>0.97051</text:p>
          </table:table-cell>
          <table:table-cell office:value-type="float" office:value="-1.7167110338738967" table:style-name="c14">
            <text:p>-1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0.9624809999999999" table:style-name="c1">
            <text:p>0.96248</text:p>
          </table:table-cell>
          <table:table-cell office:value-type="string" table:style-name="c1">
            <text:p>2026-04-22 13:45</text:p>
          </table:table-cell>
          <table:table-cell office:value-type="float" office:value="0.9495250000000001" table:style-name="c1">
            <text:p>0.94953</text:p>
          </table:table-cell>
          <table:table-cell office:value-type="float" office:value="-1.5433136316457041" table:style-name="c14">
            <text:p>-1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1:15</text:p>
          </table:table-cell>
          <table:table-cell office:value-type="float" office:value="0.9394694999999998" table:style-name="c1">
            <text:p>0.93947</text:p>
          </table:table-cell>
          <table:table-cell office:value-type="string" table:style-name="c1">
            <text:p>2026-04-24 22:45</text:p>
          </table:table-cell>
          <table:table-cell office:value-type="float" office:value="0.9405295" table:style-name="c1">
            <text:p>0.94053</text:p>
          </table:table-cell>
          <table:table-cell office:value-type="float" office:value="-0.08729591226749323" table:style-name="c14">
            <text:p>-0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4:15</text:p>
          </table:table-cell>
          <table:table-cell office:value-type="float" office:value="0.9564779999999999" table:style-name="c1">
            <text:p>0.95648</text:p>
          </table:table-cell>
          <table:table-cell office:value-type="string" table:style-name="c1">
            <text:p>2026-04-25 08:00</text:p>
          </table:table-cell>
          <table:table-cell office:value-type="float" office:value="0.9485255" table:style-name="c1">
            <text:p>0.94853</text:p>
          </table:table-cell>
          <table:table-cell office:value-type="float" office:value="-1.0296737065044748" table:style-name="c14">
            <text:p>-1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22:45</text:p>
          </table:table-cell>
          <table:table-cell office:value-type="float" office:value="0.9384689999999999" table:style-name="c1">
            <text:p>0.93847</text:p>
          </table:table-cell>
          <table:table-cell office:value-type="string" table:style-name="c1">
            <text:p>2026-04-26 01:00</text:p>
          </table:table-cell>
          <table:table-cell office:value-type="float" office:value="0.9325335000000001" table:style-name="c1">
            <text:p>0.93253</text:p>
          </table:table-cell>
          <table:table-cell office:value-type="float" office:value="-0.8311019827506039" table:style-name="c14">
            <text:p>-0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5:15</text:p>
          </table:table-cell>
          <table:table-cell office:value-type="float" office:value="0.9494744999999999" table:style-name="c1">
            <text:p>0.94947</text:p>
          </table:table-cell>
          <table:table-cell office:value-type="string" table:style-name="c1">
            <text:p>2026-04-26 13:15</text:p>
          </table:table-cell>
          <table:table-cell office:value-type="float" office:value="0.9465265" table:style-name="c1">
            <text:p>0.94653</text:p>
          </table:table-cell>
          <table:table-cell office:value-type="float" office:value="-0.509766873517925" table:style-name="c14">
            <text:p>-0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5:00</text:p>
          </table:table-cell>
          <table:table-cell office:value-type="float" office:value="0.9474734999999999" table:style-name="c1">
            <text:p>0.94747</text:p>
          </table:table-cell>
          <table:table-cell office:value-type="string" table:style-name="c1">
            <text:p>2026-04-29 14:15</text:p>
          </table:table-cell>
          <table:table-cell office:value-type="float" office:value="0.9425285" table:style-name="c1">
            <text:p>0.94253</text:p>
          </table:table-cell>
          <table:table-cell office:value-type="float" office:value="-0.7207710264719669" table:style-name="c14">
            <text:p>-0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03:30</text:p>
          </table:table-cell>
          <table:table-cell office:value-type="float" office:value="0.9334665" table:style-name="c1">
            <text:p>0.93347</text:p>
          </table:table-cell>
          <table:table-cell office:value-type="string" table:style-name="c1">
            <text:p>2026-05-01 07:00</text:p>
          </table:table-cell>
          <table:table-cell office:value-type="float" office:value="0.9245375000000001" table:style-name="c1">
            <text:p>0.92454</text:p>
          </table:table-cell>
          <table:table-cell office:value-type="float" office:value="-1.1545299657245267" table:style-name="c14">
            <text:p>-1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2:30</text:p>
          </table:table-cell>
          <table:table-cell office:value-type="float" office:value="0.9254625" table:style-name="c1">
            <text:p>0.92546</text:p>
          </table:table-cell>
          <table:table-cell office:value-type="string" table:style-name="c1">
            <text:p>2026-05-01 12:45</text:p>
          </table:table-cell>
          <table:table-cell office:value-type="float" office:value="0.9235380000000001" table:style-name="c1">
            <text:p>0.92354</text:p>
          </table:table-cell>
          <table:table-cell office:value-type="float" office:value="-0.40743438680658217" table:style-name="c14">
            <text:p>-0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15</text:p>
          </table:table-cell>
          <table:table-cell office:value-type="float" office:value="0.9294645" table:style-name="c1">
            <text:p>0.92946</text:p>
          </table:table-cell>
          <table:table-cell office:value-type="string" table:style-name="c1">
            <text:p>2026-05-01 20:00</text:p>
          </table:table-cell>
          <table:table-cell office:value-type="float" office:value="0.925537" table:style-name="c1">
            <text:p>0.92554</text:p>
          </table:table-cell>
          <table:table-cell office:value-type="float" office:value="-0.6216104502108522" table:style-name="c14">
            <text:p>-0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22:15</text:p>
          </table:table-cell>
          <table:table-cell office:value-type="float" office:value="0.934467" table:style-name="c1">
            <text:p>0.93447</text:p>
          </table:table-cell>
          <table:table-cell office:value-type="string" table:style-name="c1">
            <text:p>2026-05-04 00:00</text:p>
          </table:table-cell>
          <table:table-cell office:value-type="float" office:value="0.9225385" table:style-name="c1">
            <text:p>0.92254</text:p>
          </table:table-cell>
          <table:table-cell office:value-type="float" office:value="-1.4738513464359948" table:style-name="c14">
            <text:p>-1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0.9484739999999999" table:style-name="c1">
            <text:p>0.94847</text:p>
          </table:table-cell>
          <table:table-cell office:value-type="string" table:style-name="c1">
            <text:p>2026-05-04 08:15</text:p>
          </table:table-cell>
          <table:table-cell office:value-type="float" office:value="0.9505245" table:style-name="c1">
            <text:p>0.95052</text:p>
          </table:table-cell>
          <table:table-cell office:value-type="float" office:value="0.01585721110963778" table:style-name="c13">
            <text:p>+0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15</text:p>
          </table:table-cell>
          <table:table-cell office:value-type="float" office:value="0.9454724999999999" table:style-name="c1">
            <text:p>0.94547</text:p>
          </table:table-cell>
          <table:table-cell office:value-type="string" table:style-name="c1">
            <text:p>2026-05-04 15:30</text:p>
          </table:table-cell>
          <table:table-cell office:value-type="float" office:value="0.9385305" table:style-name="c1">
            <text:p>0.93853</text:p>
          </table:table-cell>
          <table:table-cell office:value-type="float" office:value="-0.9326683186977824" table:style-name="c14">
            <text:p>-0.9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4:30</text:p>
          </table:table-cell>
          <table:table-cell office:value-type="float" office:value="0.9454724999999999" table:style-name="c1">
            <text:p>0.94547</text:p>
          </table:table-cell>
          <table:table-cell office:value-type="string" table:style-name="c1">
            <text:p>2026-05-05 16:45</text:p>
          </table:table-cell>
          <table:table-cell office:value-type="float" office:value="0.941529" table:style-name="c1">
            <text:p>0.94153</text:p>
          </table:table-cell>
          <table:table-cell office:value-type="float" office:value="-0.6161592717926823" table:style-name="c14">
            <text:p>-0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45</text:p>
          </table:table-cell>
          <table:table-cell office:value-type="float" office:value="0.9734864999999999" table:style-name="c1">
            <text:p>0.97349</text:p>
          </table:table-cell>
          <table:table-cell office:value-type="string" table:style-name="c1">
            <text:p>2026-05-06 13:00</text:p>
          </table:table-cell>
          <table:table-cell office:value-type="float" office:value="1.0884555" table:style-name="c1">
            <text:p>1.0885</text:p>
          </table:table-cell>
          <table:table-cell office:value-type="float" office:value="11.58651686032628" table:style-name="c13">
            <text:p>+11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4:45</text:p>
          </table:table-cell>
          <table:table-cell office:value-type="float" office:value="1.094547" table:style-name="c1">
            <text:p>1.0945</text:p>
          </table:table-cell>
          <table:table-cell office:value-type="string" table:style-name="c1">
            <text:p>2026-05-07 14:00</text:p>
          </table:table-cell>
          <table:table-cell office:value-type="float" office:value="1.0814590000000002" table:style-name="c1">
            <text:p>1.0815</text:p>
          </table:table-cell>
          <table:table-cell office:value-type="float" office:value="-1.3932555240660949" table:style-name="c14">
            <text:p>-1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20:00</text:p>
          </table:table-cell>
          <table:table-cell office:value-type="float" office:value="1.08054" table:style-name="c1">
            <text:p>1.0805</text:p>
          </table:table-cell>
          <table:table-cell office:value-type="string" table:style-name="c1">
            <text:p>2026-05-08 08:30</text:p>
          </table:table-cell>
          <table:table-cell office:value-type="float" office:value="1.089455" table:style-name="c1">
            <text:p>1.0895</text:p>
          </table:table-cell>
          <table:table-cell office:value-type="float" office:value="0.6235011619190489" table:style-name="c13">
            <text:p>+0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5:45</text:p>
          </table:table-cell>
          <table:table-cell office:value-type="float" office:value="1.1935965" table:style-name="c1">
            <text:p>1.1936</text:p>
          </table:table-cell>
          <table:table-cell office:value-type="string" table:style-name="c1">
            <text:p>2026-05-09 05:00</text:p>
          </table:table-cell>
          <table:table-cell office:value-type="float" office:value="1.251374" table:style-name="c1">
            <text:p>1.2514</text:p>
          </table:table-cell>
          <table:table-cell office:value-type="float" office:value="4.631046033898412" table:style-name="c13">
            <text:p>+4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6:30</text:p>
          </table:table-cell>
          <table:table-cell office:value-type="float" office:value="1.2876435" table:style-name="c1">
            <text:p>1.2876</text:p>
          </table:table-cell>
          <table:table-cell office:value-type="string" table:style-name="c1">
            <text:p>2026-05-09 07:30</text:p>
          </table:table-cell>
          <table:table-cell office:value-type="float" office:value="1.2623685" table:style-name="c1">
            <text:p>1.2624</text:p>
          </table:table-cell>
          <table:table-cell office:value-type="float" office:value="-2.1588642067078334" table:style-name="c14">
            <text:p>-2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9:00</text:p>
          </table:table-cell>
          <table:table-cell office:value-type="float" office:value="1.2216105" table:style-name="c1">
            <text:p>1.2216</text:p>
          </table:table-cell>
          <table:table-cell office:value-type="string" table:style-name="c1">
            <text:p>2026-05-09 20:30</text:p>
          </table:table-cell>
          <table:table-cell office:value-type="float" office:value="1.2173910000000001" table:style-name="c1">
            <text:p>1.2174</text:p>
          </table:table-cell>
          <table:table-cell office:value-type="float" office:value="-0.5446142292489853" table:style-name="c14">
            <text:p>-0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6:15</text:p>
          </table:table-cell>
          <table:table-cell office:value-type="float" office:value="1.1845919999999999" table:style-name="c1">
            <text:p>1.1846</text:p>
          </table:table-cell>
          <table:table-cell office:value-type="string" table:style-name="c1">
            <text:p>2026-05-10 20:45</text:p>
          </table:table-cell>
          <table:table-cell office:value-type="float" office:value="1.1374309999999999" table:style-name="c1">
            <text:p>1.1374</text:p>
          </table:table-cell>
          <table:table-cell office:value-type="float" office:value="-4.173143543853087" table:style-name="c14">
            <text:p>-4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5:30</text:p>
          </table:table-cell>
          <table:table-cell office:value-type="float" office:value="0.9694845" table:style-name="c1">
            <text:p>0.96948</text:p>
          </table:table-cell>
          <table:table-cell office:value-type="string" table:style-name="c1">
            <text:p>2026-05-21 10:30</text:p>
          </table:table-cell>
          <table:table-cell office:value-type="float" office:value="0.9735130000000001" table:style-name="c1">
            <text:p>0.97351</text:p>
          </table:table-cell>
          <table:table-cell office:value-type="float" office:value="0.21479946435452035" table:style-name="c13">
            <text:p>+0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4:15</text:p>
          </table:table-cell>
          <table:table-cell office:value-type="float" office:value="0.9854924999999999" table:style-name="c1">
            <text:p>0.98549</text:p>
          </table:table-cell>
          <table:table-cell office:value-type="string" table:style-name="c1">
            <text:p>2026-05-21 14:30</text:p>
          </table:table-cell>
          <table:table-cell office:value-type="float" office:value="0.9825085" table:style-name="c1">
            <text:p>0.98251</text:p>
          </table:table-cell>
          <table:table-cell office:value-type="float" office:value="-0.5020874833141509" table:style-name="c14">
            <text:p>-0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5:15</text:p>
          </table:table-cell>
          <table:table-cell office:value-type="float" office:value="0.988494" table:style-name="c1">
            <text:p>0.98849</text:p>
          </table:table-cell>
          <table:table-cell office:value-type="string" table:style-name="c1">
            <text:p>2026-05-22 00:45</text:p>
          </table:table-cell>
          <table:table-cell office:value-type="float" office:value="0.9995" table:style-name="c1">
            <text:p>0.9995</text:p>
          </table:table-cell>
          <table:table-cell office:value-type="float" office:value="0.9112851974822256" table:style-name="c13">
            <text:p>+0.9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7:30</text:p>
          </table:table-cell>
          <table:table-cell office:value-type="float" office:value="1.022511" table:style-name="c1">
            <text:p>1.0225</text:p>
          </table:table-cell>
          <table:table-cell office:value-type="string" table:style-name="c1">
            <text:p>2026-05-22 15:15</text:p>
          </table:table-cell>
          <table:table-cell office:value-type="float" office:value="1.0164914999999999" table:style-name="c1">
            <text:p>1.0165</text:p>
          </table:table-cell>
          <table:table-cell office:value-type="float" office:value="-0.7874210163509199" table:style-name="c14">
            <text:p>-0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4:30</text:p>
          </table:table-cell>
          <table:table-cell office:value-type="float" office:value="0.9854924999999999" table:style-name="c1">
            <text:p>0.98549</text:p>
          </table:table-cell>
          <table:table-cell office:value-type="string" table:style-name="c1">
            <text:p>2026-05-25 22:15</text:p>
          </table:table-cell>
          <table:table-cell office:value-type="float" office:value="0.9885055" table:style-name="c1">
            <text:p>0.98851</text:p>
          </table:table-cell>
          <table:table-cell office:value-type="float" office:value="0.10522429196568872" table:style-name="c13">
            <text:p>+0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5:00</text:p>
          </table:table-cell>
          <table:table-cell office:value-type="float" office:value="0.986493" table:style-name="c1">
            <text:p>0.98649</text:p>
          </table:table-cell>
          <table:table-cell office:value-type="string" table:style-name="c1">
            <text:p>2026-05-26 17:30</text:p>
          </table:table-cell>
          <table:table-cell office:value-type="float" office:value="1.0004994999999999" table:style-name="c1">
            <text:p>1.0005</text:p>
          </table:table-cell>
          <table:table-cell office:value-type="float" office:value="1.2170893761537016" table:style-name="c13">
            <text:p>+1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7 01:15</text:p>
          </table:table-cell>
          <table:table-cell office:value-type="float" office:value="1.0355174999999999" table:style-name="c1">
            <text:p>1.0355</text:p>
          </table:table-cell>
          <table:table-cell office:value-type="string" table:style-name="c1">
            <text:p>2026-05-27 04:15</text:p>
          </table:table-cell>
          <table:table-cell office:value-type="float" office:value="1.0044975" table:style-name="c1">
            <text:p>1.0045</text:p>
          </table:table-cell>
          <table:table-cell office:value-type="float" office:value="-3.1895154357603706" table:style-name="c14">
            <text:p>-3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3:30</text:p>
          </table:table-cell>
          <table:table-cell office:value-type="float" office:value="0.9784889999999999" table:style-name="c1">
            <text:p>0.97849</text:p>
          </table:table-cell>
          <table:table-cell office:value-type="string" table:style-name="c1">
            <text:p>2026-05-31 06:15</text:p>
          </table:table-cell>
          <table:table-cell office:value-type="float" office:value="0.969515" table:style-name="c1">
            <text:p>0.96952</text:p>
          </table:table-cell>
          <table:table-cell office:value-type="float" office:value="-1.1151950083240547" table:style-name="c14">
            <text:p>-1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0:00</text:p>
          </table:table-cell>
          <table:table-cell office:value-type="float" office:value="0.096938445" table:style-name="c10">
            <text:p>0.096938</text:p>
          </table:table-cell>
          <table:table-cell office:value-type="string" table:style-name="c10">
            <text:p>2026-03-10 18:45</text:p>
          </table:table-cell>
          <table:table-cell office:value-type="float" office:value="0.096201875" table:style-name="c10">
            <text:p>0.096202</text:p>
          </table:table-cell>
          <table:table-cell office:value-type="float" office:value="-0.9582137903336396" table:style-name="c11">
            <text:p>-1.0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9:45</text:p>
          </table:table-cell>
          <table:table-cell office:value-type="float" office:value="0.097438695" table:style-name="c10">
            <text:p>0.097439</text:p>
          </table:table-cell>
          <table:table-cell office:value-type="string" table:style-name="c10">
            <text:p>2026-03-13 16:00</text:p>
          </table:table-cell>
          <table:table-cell office:value-type="float" office:value="0.09737129000000001" table:style-name="c10">
            <text:p>0.097371</text:p>
          </table:table-cell>
          <table:table-cell office:value-type="float" office:value="-0.2689385451129067" table:style-name="c11">
            <text:p>-0.3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9:00</text:p>
          </table:table-cell>
          <table:table-cell office:value-type="float" office:value="0.09600797999999999" table:style-name="c10">
            <text:p>0.096008</text:p>
          </table:table-cell>
          <table:table-cell office:value-type="string" table:style-name="c10">
            <text:p>2026-03-15 13:15</text:p>
          </table:table-cell>
          <table:table-cell office:value-type="float" office:value="0.09513241" table:style-name="c10">
            <text:p>0.095132</text:p>
          </table:table-cell>
          <table:table-cell office:value-type="float" office:value="-1.110053234731112" table:style-name="c11">
            <text:p>-1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3:00</text:p>
          </table:table-cell>
          <table:table-cell office:value-type="float" office:value="0.096618285" table:style-name="c10">
            <text:p>0.096618</text:p>
          </table:table-cell>
          <table:table-cell office:value-type="string" table:style-name="c10">
            <text:p>2026-03-16 02:45</text:p>
          </table:table-cell>
          <table:table-cell office:value-type="float" office:value="0.09570212500000001" table:style-name="c10">
            <text:p>0.095702</text:p>
          </table:table-cell>
          <table:table-cell office:value-type="float" office:value="-1.1462308070102734" table:style-name="c11">
            <text:p>-1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45</text:p>
          </table:table-cell>
          <table:table-cell office:value-type="float" office:value="0.097178565" table:style-name="c10">
            <text:p>0.097179</text:p>
          </table:table-cell>
          <table:table-cell office:value-type="string" table:style-name="c10">
            <text:p>2026-03-16 11:30</text:p>
          </table:table-cell>
          <table:table-cell office:value-type="float" office:value="0.097441255" table:style-name="c10">
            <text:p>0.097441</text:p>
          </table:table-cell>
          <table:table-cell office:value-type="float" office:value="0.06987644986835573" table:style-name="c12">
            <text:p>+0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5:15</text:p>
          </table:table-cell>
          <table:table-cell office:value-type="float" office:value="0.099239595" table:style-name="c10">
            <text:p>0.09924</text:p>
          </table:table-cell>
          <table:table-cell office:value-type="string" table:style-name="c10">
            <text:p>2026-03-17 03:45</text:p>
          </table:table-cell>
          <table:table-cell office:value-type="float" office:value="0.099100425" table:style-name="c10">
            <text:p>0.0991</text:p>
          </table:table-cell>
          <table:table-cell office:value-type="float" office:value="-0.3398560318338628" table:style-name="c11">
            <text:p>-0.3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8 05:15</text:p>
          </table:table-cell>
          <table:table-cell office:value-type="float" office:value="0.10067031" table:style-name="c10">
            <text:p>0.10067</text:p>
          </table:table-cell>
          <table:table-cell office:value-type="string" table:style-name="c10">
            <text:p>2026-03-18 07:30</text:p>
          </table:table-cell>
          <table:table-cell office:value-type="float" office:value="0.09906044500000001" table:style-name="c10">
            <text:p>0.09906</text:p>
          </table:table-cell>
          <table:table-cell office:value-type="float" office:value="-1.7958490736295407" table:style-name="c11">
            <text:p>-1.8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20:30</text:p>
          </table:table-cell>
          <table:table-cell office:value-type="float" office:value="0.093396675" table:style-name="c10">
            <text:p>0.093397</text:p>
          </table:table-cell>
          <table:table-cell office:value-type="string" table:style-name="c10">
            <text:p>2026-03-24 00:30</text:p>
          </table:table-cell>
          <table:table-cell office:value-type="float" office:value="0.09261367000000001" table:style-name="c10">
            <text:p>0.092614</text:p>
          </table:table-cell>
          <table:table-cell office:value-type="float" office:value="-1.0365890716451998" table:style-name="c11">
            <text:p>-1.0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0:30</text:p>
          </table:table-cell>
          <table:table-cell office:value-type="float" office:value="0.093716835" table:style-name="c10">
            <text:p>0.093717</text:p>
          </table:table-cell>
          <table:table-cell office:value-type="string" table:style-name="c10">
            <text:p>2026-03-25 12:45</text:p>
          </table:table-cell>
          <table:table-cell office:value-type="float" office:value="0.09477259" table:style-name="c10">
            <text:p>0.094773</text:p>
          </table:table-cell>
          <table:table-cell office:value-type="float" office:value="0.924385242619441" table:style-name="c12">
            <text:p>+0.9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12:45</text:p>
          </table:table-cell>
          <table:table-cell office:value-type="float" office:value="0.09100548" table:style-name="c10">
            <text:p>0.091005</text:p>
          </table:table-cell>
          <table:table-cell office:value-type="string" table:style-name="c10">
            <text:p>2026-04-01 14:45</text:p>
          </table:table-cell>
          <table:table-cell office:value-type="float" office:value="0.089665145" table:style-name="c10">
            <text:p>0.089665</text:p>
          </table:table-cell>
          <table:table-cell office:value-type="float" office:value="-1.6697627712693675" table:style-name="c11">
            <text:p>-1.7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2:15</text:p>
          </table:table-cell>
          <table:table-cell office:value-type="float" office:value="0.08902449" table:style-name="c10">
            <text:p>0.089024</text:p>
          </table:table-cell>
          <table:table-cell office:value-type="string" table:style-name="c10">
            <text:p>2026-04-06 07:15</text:p>
          </table:table-cell>
          <table:table-cell office:value-type="float" office:value="0.088205875" table:style-name="c10">
            <text:p>0.088206</text:p>
          </table:table-cell>
          <table:table-cell office:value-type="float" office:value="-1.1176009479245463" table:style-name="c11">
            <text:p>-1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10:00</text:p>
          </table:table-cell>
          <table:table-cell office:value-type="float" office:value="0.08962479" table:style-name="c10">
            <text:p>0.089625</text:p>
          </table:table-cell>
          <table:table-cell office:value-type="string" table:style-name="c10">
            <text:p>2026-04-06 13:45</text:p>
          </table:table-cell>
          <table:table-cell office:value-type="float" office:value="0.08867564" table:style-name="c10">
            <text:p>0.088676</text:p>
          </table:table-cell>
          <table:table-cell office:value-type="float" office:value="-1.2568091979462515" table:style-name="c11">
            <text:p>-1.3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04:00</text:p>
          </table:table-cell>
          <table:table-cell office:value-type="float" office:value="0.089754855" table:style-name="c10">
            <text:p>0.089755</text:p>
          </table:table-cell>
          <table:table-cell office:value-type="string" table:style-name="c10">
            <text:p>2026-04-09 08:15</text:p>
          </table:table-cell>
          <table:table-cell office:value-type="float" office:value="0.088745605" table:style-name="c10">
            <text:p>0.088746</text:p>
          </table:table-cell>
          <table:table-cell office:value-type="float" office:value="-1.322103928968521" table:style-name="c11">
            <text:p>-1.3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9:15</text:p>
          </table:table-cell>
          <table:table-cell office:value-type="float" office:value="0.09032514" table:style-name="c10">
            <text:p>0.090325</text:p>
          </table:table-cell>
          <table:table-cell office:value-type="string" table:style-name="c10">
            <text:p>2026-04-10 23:00</text:p>
          </table:table-cell>
          <table:table-cell office:value-type="float" office:value="0.0895552" table:style-name="c10">
            <text:p>0.089555</text:p>
          </table:table-cell>
          <table:table-cell office:value-type="float" office:value="-1.050605451372677" table:style-name="c11">
            <text:p>-1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14:00</text:p>
          </table:table-cell>
          <table:table-cell office:value-type="float" office:value="0.087573765" table:style-name="c10">
            <text:p>0.087574</text:p>
          </table:table-cell>
          <table:table-cell office:value-type="string" table:style-name="c10">
            <text:p>2026-04-14 15:45</text:p>
          </table:table-cell>
          <table:table-cell office:value-type="float" office:value="0.086126915" table:style-name="c10">
            <text:p>0.086127</text:p>
          </table:table-cell>
          <table:table-cell office:value-type="float" office:value="-1.848747399503714" table:style-name="c11">
            <text:p>-1.8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22:15</text:p>
          </table:table-cell>
          <table:table-cell office:value-type="float" office:value="0.08729362499999999" table:style-name="c10">
            <text:p>0.087294</text:p>
          </table:table-cell>
          <table:table-cell office:value-type="string" table:style-name="c10">
            <text:p>2026-04-16 11:15</text:p>
          </table:table-cell>
          <table:table-cell office:value-type="float" office:value="0.08726634500000001" table:style-name="c10">
            <text:p>0.087266</text:p>
          </table:table-cell>
          <table:table-cell office:value-type="float" office:value="-0.23108837976998364" table:style-name="c11">
            <text:p>-0.2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3:15</text:p>
          </table:table-cell>
          <table:table-cell office:value-type="float" office:value="0.08906451" table:style-name="c10">
            <text:p>0.089065</text:p>
          </table:table-cell>
          <table:table-cell office:value-type="string" table:style-name="c10">
            <text:p>2026-04-16 14:45</text:p>
          </table:table-cell>
          <table:table-cell office:value-type="float" office:value="0.087346305" table:style-name="c10">
            <text:p>0.087346</text:p>
          </table:table-cell>
          <table:table-cell office:value-type="float" office:value="-2.125212684261102" table:style-name="c11">
            <text:p>-2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20:15</text:p>
          </table:table-cell>
          <table:table-cell office:value-type="float" office:value="0.09120558" table:style-name="c10">
            <text:p>0.091206</text:p>
          </table:table-cell>
          <table:table-cell office:value-type="string" table:style-name="c10">
            <text:p>2026-04-17 02:00</text:p>
          </table:table-cell>
          <table:table-cell office:value-type="float" office:value="0.089805075" table:style-name="c10">
            <text:p>0.089805</text:p>
          </table:table-cell>
          <table:table-cell office:value-type="float" office:value="-1.7323779366624326" table:style-name="c11">
            <text:p>-1.7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6:45</text:p>
          </table:table-cell>
          <table:table-cell office:value-type="float" office:value="0.08946470999999999" table:style-name="c10">
            <text:p>0.089465</text:p>
          </table:table-cell>
          <table:table-cell office:value-type="string" table:style-name="c10">
            <text:p>2026-04-17 07:00</text:p>
          </table:table-cell>
          <table:table-cell office:value-type="float" office:value="0.08957519000000001" table:style-name="c10">
            <text:p>0.089575</text:p>
          </table:table-cell>
          <table:table-cell office:value-type="float" office:value="-0.07665682346701397" table:style-name="c11">
            <text:p>-0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7:30</text:p>
          </table:table-cell>
          <table:table-cell office:value-type="float" office:value="0.09000498" table:style-name="c10">
            <text:p>0.090005</text:p>
          </table:table-cell>
          <table:table-cell office:value-type="string" table:style-name="c10">
            <text:p>2026-04-17 18:00</text:p>
          </table:table-cell>
          <table:table-cell office:value-type="float" office:value="0.091304325" table:style-name="c10">
            <text:p>0.091304</text:p>
          </table:table-cell>
          <table:table-cell office:value-type="float" office:value="1.2408509554971303" table:style-name="c12">
            <text:p>+1.2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8 14:00</text:p>
          </table:table-cell>
          <table:table-cell office:value-type="float" office:value="0.08939467499999999" table:style-name="c10">
            <text:p>0.089395</text:p>
          </table:table-cell>
          <table:table-cell office:value-type="string" table:style-name="c10">
            <text:p>2026-04-18 14:15</text:p>
          </table:table-cell>
          <table:table-cell office:value-type="float" office:value="0.08917539" table:style-name="c10">
            <text:p>0.089175</text:p>
          </table:table-cell>
          <table:table-cell office:value-type="float" office:value="-0.44470949148814887" table:style-name="c11">
            <text:p>-0.4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8 14:45</text:p>
          </table:table-cell>
          <table:table-cell office:value-type="float" office:value="0.08944469999999999" table:style-name="c10">
            <text:p>0.089445</text:p>
          </table:table-cell>
          <table:table-cell office:value-type="string" table:style-name="c10">
            <text:p>2026-04-18 17:45</text:p>
          </table:table-cell>
          <table:table-cell office:value-type="float" office:value="0.08893551000000001" table:style-name="c10">
            <text:p>0.088936</text:p>
          </table:table-cell>
          <table:table-cell office:value-type="float" office:value="-0.7680411298712775" table:style-name="c11">
            <text:p>-0.8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8:00</text:p>
          </table:table-cell>
          <table:table-cell office:value-type="float" office:value="0.090595275" table:style-name="c10">
            <text:p>0.090595</text:p>
          </table:table-cell>
          <table:table-cell office:value-type="string" table:style-name="c10">
            <text:p>2026-04-21 13:30</text:p>
          </table:table-cell>
          <table:table-cell office:value-type="float" office:value="0.090184885" table:style-name="c10">
            <text:p>0.090185</text:p>
          </table:table-cell>
          <table:table-cell office:value-type="float" office:value="-0.6519871870966809" table:style-name="c11">
            <text:p>-0.7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15:30</text:p>
          </table:table-cell>
          <table:table-cell office:value-type="float" office:value="0.09192594" table:style-name="c10">
            <text:p>0.091926</text:p>
          </table:table-cell>
          <table:table-cell office:value-type="string" table:style-name="c10">
            <text:p>2026-04-22 19:45</text:p>
          </table:table-cell>
          <table:table-cell office:value-type="float" office:value="0.09133431" table:style-name="c10">
            <text:p>0.091334</text:p>
          </table:table-cell>
          <table:table-cell office:value-type="float" office:value="-0.8422076355052655" table:style-name="c11">
            <text:p>-0.8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12:00</text:p>
          </table:table-cell>
          <table:table-cell office:value-type="float" office:value="0.090695325" table:style-name="c10">
            <text:p>0.090695</text:p>
          </table:table-cell>
          <table:table-cell office:value-type="string" table:style-name="c10">
            <text:p>2026-04-23 12:15</text:p>
          </table:table-cell>
          <table:table-cell office:value-type="float" office:value="0.090744605" table:style-name="c10">
            <text:p>0.090745</text:p>
          </table:table-cell>
          <table:table-cell office:value-type="float" office:value="-0.14567285071748204" table:style-name="c11">
            <text:p>-0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12:30</text:p>
          </table:table-cell>
          <table:table-cell office:value-type="float" office:value="0.09096546" table:style-name="c10">
            <text:p>0.090965</text:p>
          </table:table-cell>
          <table:table-cell office:value-type="string" table:style-name="c10">
            <text:p>2026-04-23 17:30</text:p>
          </table:table-cell>
          <table:table-cell office:value-type="float" office:value="0.090404775" table:style-name="c10">
            <text:p>0.090405</text:p>
          </table:table-cell>
          <table:table-cell office:value-type="float" office:value="-0.8150391865494933" table:style-name="c11">
            <text:p>-0.8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21:45</text:p>
          </table:table-cell>
          <table:table-cell office:value-type="float" office:value="0.090895425" table:style-name="c10">
            <text:p>0.090895</text:p>
          </table:table-cell>
          <table:table-cell office:value-type="string" table:style-name="c10">
            <text:p>2026-04-24 03:45</text:p>
          </table:table-cell>
          <table:table-cell office:value-type="float" office:value="0.090304825" table:style-name="c10">
            <text:p>0.090305</text:p>
          </table:table-cell>
          <table:table-cell office:value-type="float" office:value="-0.8483588092304872" table:style-name="c11">
            <text:p>-0.8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4 11:30</text:p>
          </table:table-cell>
          <table:table-cell office:value-type="float" office:value="0.09151573499999999" table:style-name="c10">
            <text:p>0.091516</text:p>
          </table:table-cell>
          <table:table-cell office:value-type="string" table:style-name="c10">
            <text:p>2026-04-24 15:00</text:p>
          </table:table-cell>
          <table:table-cell office:value-type="float" office:value="0.0905547" table:style-name="c10">
            <text:p>0.090555</text:p>
          </table:table-cell>
          <table:table-cell office:value-type="float" office:value="-1.2479316756839554" table:style-name="c11">
            <text:p>-1.2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05:00</text:p>
          </table:table-cell>
          <table:table-cell office:value-type="float" office:value="0.09174585" table:style-name="c10">
            <text:p>0.091746</text:p>
          </table:table-cell>
          <table:table-cell office:value-type="string" table:style-name="c10">
            <text:p>2026-04-26 13:30</text:p>
          </table:table-cell>
          <table:table-cell office:value-type="float" office:value="0.09207393999999999" table:style-name="c10">
            <text:p>0.092074</text:p>
          </table:table-cell>
          <table:table-cell office:value-type="float" office:value="0.15699259850989744" table:style-name="c12">
            <text:p>+0.2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15:15</text:p>
          </table:table-cell>
          <table:table-cell office:value-type="float" office:value="0.08861428499999999" table:style-name="c10">
            <text:p>0.088614</text:p>
          </table:table-cell>
          <table:table-cell office:value-type="string" table:style-name="c10">
            <text:p>2026-05-04 15:30</text:p>
          </table:table-cell>
          <table:table-cell office:value-type="float" office:value="0.08801597" table:style-name="c10">
            <text:p>0.088016</text:p>
          </table:table-cell>
          <table:table-cell office:value-type="float" office:value="-0.8737405306943224" table:style-name="c11">
            <text:p>-0.9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12:45</text:p>
          </table:table-cell>
          <table:table-cell office:value-type="float" office:value="0.08994495" table:style-name="c10">
            <text:p>0.089945</text:p>
          </table:table-cell>
          <table:table-cell office:value-type="string" table:style-name="c10">
            <text:p>2026-05-05 16:45</text:p>
          </table:table-cell>
          <table:table-cell office:value-type="float" office:value="0.08926534500000001" table:style-name="c10">
            <text:p>0.089265</text:p>
          </table:table-cell>
          <table:table-cell office:value-type="float" office:value="-0.9539684269711635" table:style-name="c11">
            <text:p>-1.0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20:15</text:p>
          </table:table-cell>
          <table:table-cell office:value-type="float" office:value="0.09072533999999999" table:style-name="c10">
            <text:p>0.090725</text:p>
          </table:table-cell>
          <table:table-cell office:value-type="string" table:style-name="c10">
            <text:p>2026-05-06 13:45</text:p>
          </table:table-cell>
          <table:table-cell office:value-type="float" office:value="0.091464245" table:style-name="c10">
            <text:p>0.091464</text:p>
          </table:table-cell>
          <table:table-cell office:value-type="float" office:value="0.6129136294722226" table:style-name="c12">
            <text:p>+0.6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6:45</text:p>
          </table:table-cell>
          <table:table-cell office:value-type="float" office:value="0.09090543" table:style-name="c10">
            <text:p>0.090905</text:p>
          </table:table-cell>
          <table:table-cell office:value-type="string" table:style-name="c10">
            <text:p>2026-05-07 14:30</text:p>
          </table:table-cell>
          <table:table-cell office:value-type="float" office:value="0.09057469000000001" table:style-name="c10">
            <text:p>0.090575</text:p>
          </table:table-cell>
          <table:table-cell office:value-type="float" office:value="-0.5630013579056681" table:style-name="c11">
            <text:p>-0.6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1:00</text:p>
          </table:table-cell>
          <table:table-cell office:value-type="float" office:value="0.09104549999999999" table:style-name="c10">
            <text:p>0.091045</text:p>
          </table:table-cell>
          <table:table-cell office:value-type="string" table:style-name="c10">
            <text:p>2026-05-08 13:45</text:p>
          </table:table-cell>
          <table:table-cell office:value-type="float" office:value="0.09026484500000001" table:style-name="c10">
            <text:p>0.090265</text:p>
          </table:table-cell>
          <table:table-cell office:value-type="float" office:value="-1.05561990999552" table:style-name="c11">
            <text:p>-1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4:30</text:p>
          </table:table-cell>
          <table:table-cell office:value-type="float" office:value="0.091455705" table:style-name="c10">
            <text:p>0.091456</text:p>
          </table:table-cell>
          <table:table-cell office:value-type="string" table:style-name="c10">
            <text:p>2026-05-09 06:45</text:p>
          </table:table-cell>
          <table:table-cell office:value-type="float" office:value="0.09319338" table:style-name="c10">
            <text:p>0.093193</text:p>
          </table:table-cell>
          <table:table-cell office:value-type="float" office:value="1.6963200200359463" table:style-name="c12">
            <text:p>+1.7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18:30</text:p>
          </table:table-cell>
          <table:table-cell office:value-type="float" office:value="0.092996475" table:style-name="c10">
            <text:p>0.092996</text:p>
          </table:table-cell>
          <table:table-cell office:value-type="string" table:style-name="c10">
            <text:p>2026-05-10 01:15</text:p>
          </table:table-cell>
          <table:table-cell office:value-type="float" office:value="0.09243376000000002" table:style-name="c10">
            <text:p>0.092434</text:p>
          </table:table-cell>
          <table:table-cell office:value-type="float" office:value="-0.8037832468811068" table:style-name="c11">
            <text:p>-0.8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7:30</text:p>
          </table:table-cell>
          <table:table-cell office:value-type="float" office:value="0.09409702499999999" table:style-name="c10">
            <text:p>0.094097</text:p>
          </table:table-cell>
          <table:table-cell office:value-type="string" table:style-name="c10">
            <text:p>2026-05-10 21:15</text:p>
          </table:table-cell>
          <table:table-cell office:value-type="float" office:value="0.095682135" table:style-name="c10">
            <text:p>0.095682</text:p>
          </table:table-cell>
          <table:table-cell office:value-type="float" office:value="1.4812810629613704" table:style-name="c12">
            <text:p>+1.5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07:00</text:p>
          </table:table-cell>
          <table:table-cell office:value-type="float" office:value="0.096338145" table:style-name="c10">
            <text:p>0.096338</text:p>
          </table:table-cell>
          <table:table-cell office:value-type="string" table:style-name="c10">
            <text:p>2026-05-11 07:30</text:p>
          </table:table-cell>
          <table:table-cell office:value-type="float" office:value="0.09584205500000001" table:style-name="c10">
            <text:p>0.095842</text:p>
          </table:table-cell>
          <table:table-cell office:value-type="float" office:value="-0.7138172194876669" table:style-name="c11">
            <text:p>-0.7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2 06:15</text:p>
          </table:table-cell>
          <table:table-cell office:value-type="float" office:value="0.096278115" table:style-name="c10">
            <text:p>0.096278</text:p>
          </table:table-cell>
          <table:table-cell office:value-type="string" table:style-name="c10">
            <text:p>2026-05-12 07:15</text:p>
          </table:table-cell>
          <table:table-cell office:value-type="float" office:value="0.095762095" table:style-name="c10">
            <text:p>0.095762</text:p>
          </table:table-cell>
          <table:table-cell office:value-type="float" office:value="-0.7347967166837388" table:style-name="c11">
            <text:p>-0.7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4 18:30</text:p>
          </table:table-cell>
          <table:table-cell office:value-type="float" office:value="0.09750873" table:style-name="c10">
            <text:p>0.097509</text:p>
          </table:table-cell>
          <table:table-cell office:value-type="string" table:style-name="c10">
            <text:p>2026-05-14 21:00</text:p>
          </table:table-cell>
          <table:table-cell office:value-type="float" office:value="0.095562195" table:style-name="c10">
            <text:p>0.095562</text:p>
          </table:table-cell>
          <table:table-cell office:value-type="float" office:value="-2.1921768725784996" table:style-name="c11">
            <text:p>-2.2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17:30</text:p>
          </table:table-cell>
          <table:table-cell office:value-type="float" office:value="0.090075015" table:style-name="c10">
            <text:p>0.090075</text:p>
          </table:table-cell>
          <table:table-cell office:value-type="string" table:style-name="c10">
            <text:p>2026-05-22 17:45</text:p>
          </table:table-cell>
          <table:table-cell office:value-type="float" office:value="0.08987504" table:style-name="c10">
            <text:p>0.089875</text:p>
          </table:table-cell>
          <table:table-cell office:value-type="float" office:value="-0.421465602820037" table:style-name="c11">
            <text:p>-0.4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8 22:15</text:p>
          </table:table-cell>
          <table:table-cell office:value-type="float" office:value="0.09120558" table:style-name="c10">
            <text:p>0.091206</text:p>
          </table:table-cell>
          <table:table-cell office:value-type="string" table:style-name="c10">
            <text:p>2026-05-29 01:45</text:p>
          </table:table-cell>
          <table:table-cell office:value-type="float" office:value="0.089865045" table:style-name="c10">
            <text:p>0.089865</text:p>
          </table:table-cell>
          <table:table-cell office:value-type="float" office:value="-1.6667568200925742" table:style-name="c11">
            <text:p>-1.7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9 03:45</text:p>
          </table:table-cell>
          <table:table-cell office:value-type="float" office:value="0.09184590000000001" table:style-name="c10">
            <text:p>0.091846</text:p>
          </table:table-cell>
          <table:table-cell office:value-type="string" table:style-name="c10">
            <text:p>2026-05-29 11:15</text:p>
          </table:table-cell>
          <table:table-cell office:value-type="float" office:value="0.09107444" table:style-name="c10">
            <text:p>0.091074</text:p>
          </table:table-cell>
          <table:table-cell office:value-type="float" office:value="-1.038171334332827" table:style-name="c11">
            <text:p>-1.0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9 15:15</text:p>
          </table:table-cell>
          <table:table-cell office:value-type="float" office:value="0.090955455" table:style-name="c10">
            <text:p>0.090955</text:p>
          </table:table-cell>
          <table:table-cell office:value-type="string" table:style-name="c10">
            <text:p>2026-05-29 15:30</text:p>
          </table:table-cell>
          <table:table-cell office:value-type="float" office:value="0.0917541" table:style-name="c10">
            <text:p>0.091754</text:p>
          </table:table-cell>
          <table:table-cell office:value-type="float" office:value="0.6764064388441682" table:style-name="c12">
            <text:p>+0.7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9 16:00</text:p>
          </table:table-cell>
          <table:table-cell office:value-type="float" office:value="0.092456205" table:style-name="c10">
            <text:p>0.092456</text:p>
          </table:table-cell>
          <table:table-cell office:value-type="string" table:style-name="c10">
            <text:p>2026-05-30 04:45</text:p>
          </table:table-cell>
          <table:table-cell office:value-type="float" office:value="0.09861067" table:style-name="c10">
            <text:p>0.098611</text:p>
          </table:table-cell>
          <table:table-cell office:value-type="float" office:value="6.4434207208375005" table:style-name="c12">
            <text:p>+6.4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5:15</text:p>
          </table:table-cell>
          <table:table-cell office:value-type="float" office:value="0.096037995" table:style-name="c10">
            <text:p>0.096038</text:p>
          </table:table-cell>
          <table:table-cell office:value-type="string" table:style-name="c10">
            <text:p>2026-05-31 14:30</text:p>
          </table:table-cell>
          <table:table-cell office:value-type="float" office:value="0.09585205000000001" table:style-name="c10">
            <text:p>0.095852</text:p>
          </table:table-cell>
          <table:table-cell office:value-type="float" office:value="-0.3931290401783083" table:style-name="c11">
            <text:p>-0.4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20:30</text:p>
          </table:table-cell>
          <table:table-cell office:value-type="float" office:value="0.09649822499999999" table:style-name="c10">
            <text:p>0.096498</text:p>
          </table:table-cell>
          <table:table-cell office:value-type="string" table:style-name="c10">
            <text:p>2026-06-01 01:00</text:p>
          </table:table-cell>
          <table:table-cell office:value-type="float" office:value="0.095602175" table:style-name="c10">
            <text:p>0.095602</text:p>
          </table:table-cell>
          <table:table-cell office:value-type="float" office:value="-1.1266100986054184" table:style-name="c11">
            <text:p>-1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03:30</text:p>
          </table:table-cell>
          <table:table-cell office:value-type="float" office:value="0.09792893999999999" table:style-name="c10">
            <text:p>0.097929</text:p>
          </table:table-cell>
          <table:table-cell office:value-type="string" table:style-name="c10">
            <text:p>2026-06-01 05:30</text:p>
          </table:table-cell>
          <table:table-cell office:value-type="float" office:value="0.09539228" table:style-name="c10">
            <text:p>0.095392</text:p>
          </table:table-cell>
          <table:table-cell office:value-type="float" office:value="-2.785028784871968" table:style-name="c11">
            <text:p>-2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3:30</text:p>
          </table:table-cell>
          <table:table-cell office:value-type="float" office:value="2.923461" table:style-name="c1">
            <text:p>2.9235</text:p>
          </table:table-cell>
          <table:table-cell office:value-type="string" table:style-name="c1">
            <text:p>2026-03-09 23:00</text:p>
          </table:table-cell>
          <table:table-cell office:value-type="float" office:value="2.896551" table:style-name="c1">
            <text:p>2.8966</text:p>
          </table:table-cell>
          <table:table-cell office:value-type="float" office:value="-1.1185442682149604" table:style-name="c14">
            <text:p>-1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8:45</text:p>
          </table:table-cell>
          <table:table-cell office:value-type="float" office:value="2.9824904999999995" table:style-name="c1">
            <text:p>2.9825</text:p>
          </table:table-cell>
          <table:table-cell office:value-type="string" table:style-name="c1">
            <text:p>2026-03-10 14:15</text:p>
          </table:table-cell>
          <table:table-cell office:value-type="float" office:value="2.9395295" table:style-name="c1">
            <text:p>2.9395</text:p>
          </table:table-cell>
          <table:table-cell office:value-type="float" office:value="-1.6374610236143061" table:style-name="c14">
            <text:p>-1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3.0265125" table:style-name="c1">
            <text:p>3.0265</text:p>
          </table:table-cell>
          <table:table-cell office:value-type="string" table:style-name="c1">
            <text:p>2026-03-10 18:45</text:p>
          </table:table-cell>
          <table:table-cell office:value-type="float" office:value="2.9485250000000005" table:style-name="c1">
            <text:p>2.9485</text:p>
          </table:table-cell>
          <table:table-cell office:value-type="float" office:value="-2.7715597234440503" table:style-name="c14">
            <text:p>-2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05:00</text:p>
          </table:table-cell>
          <table:table-cell office:value-type="float" office:value="2.9454719999999996" table:style-name="c1">
            <text:p>2.9455</text:p>
          </table:table-cell>
          <table:table-cell office:value-type="string" table:style-name="c1">
            <text:p>2026-03-11 05:30</text:p>
          </table:table-cell>
          <table:table-cell office:value-type="float" office:value="2.9165410000000005" table:style-name="c1">
            <text:p>2.9165</text:p>
          </table:table-cell>
          <table:table-cell office:value-type="float" office:value="-1.1801560313253412" table:style-name="c14">
            <text:p>-1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9:45</text:p>
          </table:table-cell>
          <table:table-cell office:value-type="float" office:value="3.0105044999999997" table:style-name="c1">
            <text:p>3.0105</text:p>
          </table:table-cell>
          <table:table-cell office:value-type="string" table:style-name="c1">
            <text:p>2026-03-12 01:15</text:p>
          </table:table-cell>
          <table:table-cell office:value-type="float" office:value="2.9885050000000004" table:style-name="c1">
            <text:p>2.9885</text:p>
          </table:table-cell>
          <table:table-cell office:value-type="float" office:value="-0.9291971327396897" table:style-name="c14">
            <text:p>-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3.1005495" table:style-name="c1">
            <text:p>3.1005</text:p>
          </table:table-cell>
          <table:table-cell office:value-type="string" table:style-name="c1">
            <text:p>2026-03-13 16:15</text:p>
          </table:table-cell>
          <table:table-cell office:value-type="float" office:value="3.11844" table:style-name="c1">
            <text:p>3.1184</text:p>
          </table:table-cell>
          <table:table-cell office:value-type="float" office:value="0.37595717920322347" table:style-name="c13">
            <text:p>+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0:45</text:p>
          </table:table-cell>
          <table:table-cell office:value-type="float" office:value="3.10155" table:style-name="c1">
            <text:p>3.1016</text:p>
          </table:table-cell>
          <table:table-cell office:value-type="string" table:style-name="c1">
            <text:p>2026-03-16 11:30</text:p>
          </table:table-cell>
          <table:table-cell office:value-type="float" office:value="3.172413" table:style-name="c1">
            <text:p>3.1724</text:p>
          </table:table-cell>
          <table:table-cell office:value-type="float" office:value="2.0802936084538537" table:style-name="c13">
            <text:p>+2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2:15</text:p>
          </table:table-cell>
          <table:table-cell office:value-type="float" office:value="3.323661" table:style-name="c1">
            <text:p>3.3237</text:p>
          </table:table-cell>
          <table:table-cell office:value-type="string" table:style-name="c1">
            <text:p>2026-03-17 03:15</text:p>
          </table:table-cell>
          <table:table-cell office:value-type="float" office:value="3.282358" table:style-name="c1">
            <text:p>3.2824</text:p>
          </table:table-cell>
          <table:table-cell office:value-type="float" office:value="-1.4401117816167042" table:style-name="c14">
            <text:p>-1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22:30</text:p>
          </table:table-cell>
          <table:table-cell office:value-type="float" office:value="3.249624" table:style-name="c1">
            <text:p>3.2496</text:p>
          </table:table-cell>
          <table:table-cell office:value-type="string" table:style-name="c1">
            <text:p>2026-03-18 00:15</text:p>
          </table:table-cell>
          <table:table-cell office:value-type="float" office:value="3.2213885" table:style-name="c1">
            <text:p>3.2214</text:p>
          </table:table-cell>
          <table:table-cell office:value-type="float" office:value="-1.0670482373191348" table:style-name="c14">
            <text:p>-1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20:15</text:p>
          </table:table-cell>
          <table:table-cell office:value-type="float" office:value="3.0665324999999997" table:style-name="c1">
            <text:p>3.0665</text:p>
          </table:table-cell>
          <table:table-cell office:value-type="string" table:style-name="c1">
            <text:p>2026-03-24 03:45</text:p>
          </table:table-cell>
          <table:table-cell office:value-type="float" office:value="3.0694645000000005" table:style-name="c1">
            <text:p>3.0695</text:p>
          </table:table-cell>
          <table:table-cell office:value-type="float" office:value="-0.10447825142891887" table:style-name="c14">
            <text:p>-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3.0565275" table:style-name="c1">
            <text:p>3.0565</text:p>
          </table:table-cell>
          <table:table-cell office:value-type="string" table:style-name="c1">
            <text:p>2026-03-25 15:00</text:p>
          </table:table-cell>
          <table:table-cell office:value-type="float" office:value="3.088455" table:style-name="c1">
            <text:p>3.0885</text:p>
          </table:table-cell>
          <table:table-cell office:value-type="float" office:value="0.8425796416031028" table:style-name="c13">
            <text:p>+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22:45</text:p>
          </table:table-cell>
          <table:table-cell office:value-type="float" office:value="3.0865424999999997" table:style-name="c1">
            <text:p>3.0865</text:p>
          </table:table-cell>
          <table:table-cell office:value-type="string" table:style-name="c1">
            <text:p>2026-03-25 23:00</text:p>
          </table:table-cell>
          <table:table-cell office:value-type="float" office:value="3.0814585000000005" table:style-name="c1">
            <text:p>3.0815</text:p>
          </table:table-cell>
          <table:table-cell office:value-type="float" office:value="-0.3642857838989433" table:style-name="c14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2.939469" table:style-name="c1">
            <text:p>2.9395</text:p>
          </table:table-cell>
          <table:table-cell office:value-type="string" table:style-name="c1">
            <text:p>2026-03-30 14:45</text:p>
          </table:table-cell>
          <table:table-cell office:value-type="float" office:value="2.9055465000000003" table:style-name="c1">
            <text:p>2.9055</text:p>
          </table:table-cell>
          <table:table-cell office:value-type="float" office:value="-1.3516280475657227" table:style-name="c14">
            <text:p>-1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1:30</text:p>
          </table:table-cell>
          <table:table-cell office:value-type="float" office:value="2.9004494999999997" table:style-name="c1">
            <text:p>2.9004</text:p>
          </table:table-cell>
          <table:table-cell office:value-type="string" table:style-name="c1">
            <text:p>2026-03-31 08:45</text:p>
          </table:table-cell>
          <table:table-cell office:value-type="float" office:value="2.8715635" table:style-name="c1">
            <text:p>2.8716</text:p>
          </table:table-cell>
          <table:table-cell office:value-type="float" office:value="-1.1938237654715134" table:style-name="c14">
            <text:p>-1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4:00</text:p>
          </table:table-cell>
          <table:table-cell office:value-type="float" office:value="2.8824404999999995" table:style-name="c1">
            <text:p>2.8824</text:p>
          </table:table-cell>
          <table:table-cell office:value-type="string" table:style-name="c1">
            <text:p>2026-03-31 16:00</text:p>
          </table:table-cell>
          <table:table-cell office:value-type="float" office:value="2.850574" table:style-name="c1">
            <text:p>2.8506</text:p>
          </table:table-cell>
          <table:table-cell office:value-type="float" office:value="-1.3032288932243175" table:style-name="c14">
            <text:p>-1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2.96148" table:style-name="c1">
            <text:p>2.9615</text:p>
          </table:table-cell>
          <table:table-cell office:value-type="string" table:style-name="c1">
            <text:p>2026-04-01 14:45</text:p>
          </table:table-cell>
          <table:table-cell office:value-type="float" office:value="2.908545" table:style-name="c1">
            <text:p>2.9085</text:p>
          </table:table-cell>
          <table:table-cell office:value-type="float" office:value="-1.9837777548725621" table:style-name="c14">
            <text:p>-2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2:15</text:p>
          </table:table-cell>
          <table:table-cell office:value-type="float" office:value="2.8804395" table:style-name="c1">
            <text:p>2.8804</text:p>
          </table:table-cell>
          <table:table-cell office:value-type="string" table:style-name="c1">
            <text:p>2026-04-06 16:30</text:p>
          </table:table-cell>
          <table:table-cell office:value-type="float" office:value="2.9165410000000005" table:style-name="c1">
            <text:p>2.9165</text:p>
          </table:table-cell>
          <table:table-cell office:value-type="float" office:value="1.050927628960796" table:style-name="c13">
            <text:p>+1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07:15</text:p>
          </table:table-cell>
          <table:table-cell office:value-type="float" office:value="2.8554269999999997" table:style-name="c1">
            <text:p>2.8554</text:p>
          </table:table-cell>
          <table:table-cell office:value-type="string" table:style-name="c1">
            <text:p>2026-04-07 11:30</text:p>
          </table:table-cell>
          <table:table-cell office:value-type="float" office:value="2.8375805" table:style-name="c1">
            <text:p>2.8376</text:p>
          </table:table-cell>
          <table:table-cell office:value-type="float" office:value="-0.8236534647707461" table:style-name="c14">
            <text:p>-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1:15</text:p>
          </table:table-cell>
          <table:table-cell office:value-type="float" office:value="2.905452" table:style-name="c1">
            <text:p>2.9055</text:p>
          </table:table-cell>
          <table:table-cell office:value-type="string" table:style-name="c1">
            <text:p>2026-04-08 09:45</text:p>
          </table:table-cell>
          <table:table-cell office:value-type="float" office:value="3.008495" table:style-name="c1">
            <text:p>3.0085</text:p>
          </table:table-cell>
          <table:table-cell office:value-type="float" office:value="3.339549870209546" table:style-name="c13">
            <text:p>+3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06:15</text:p>
          </table:table-cell>
          <table:table-cell office:value-type="float" office:value="2.9104544999999997" table:style-name="c1">
            <text:p>2.9105</text:p>
          </table:table-cell>
          <table:table-cell office:value-type="string" table:style-name="c1">
            <text:p>2026-04-09 14:00</text:p>
          </table:table-cell>
          <table:table-cell office:value-type="float" office:value="2.908545" table:style-name="c1">
            <text:p>2.9085</text:p>
          </table:table-cell>
          <table:table-cell office:value-type="float" office:value="-0.265377158619029" table:style-name="c14">
            <text:p>-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9:45</text:p>
          </table:table-cell>
          <table:table-cell office:value-type="float" office:value="2.979489" table:style-name="c1">
            <text:p>2.9795</text:p>
          </table:table-cell>
          <table:table-cell office:value-type="string" table:style-name="c1">
            <text:p>2026-04-10 00:00</text:p>
          </table:table-cell>
          <table:table-cell office:value-type="float" office:value="2.9615185000000004" table:style-name="c1">
            <text:p>2.9615</text:p>
          </table:table-cell>
          <table:table-cell office:value-type="float" office:value="-0.8018346596178172" table:style-name="c14">
            <text:p>-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0:00</text:p>
          </table:table-cell>
          <table:table-cell office:value-type="float" office:value="3.0085034999999998" table:style-name="c1">
            <text:p>3.0085</text:p>
          </table:table-cell>
          <table:table-cell office:value-type="string" table:style-name="c1">
            <text:p>2026-04-10 23:00</text:p>
          </table:table-cell>
          <table:table-cell office:value-type="float" office:value="3.0454765000000004" table:style-name="c1">
            <text:p>3.0455</text:p>
          </table:table-cell>
          <table:table-cell office:value-type="float" office:value="1.0265932041129577" table:style-name="c13">
            <text:p>+1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6:45</text:p>
          </table:table-cell>
          <table:table-cell office:value-type="float" office:value="3.0325155" table:style-name="c1">
            <text:p>3.0325</text:p>
          </table:table-cell>
          <table:table-cell office:value-type="string" table:style-name="c1">
            <text:p>2026-04-11 23:00</text:p>
          </table:table-cell>
          <table:table-cell office:value-type="float" office:value="3.0254865000000004" table:style-name="c1">
            <text:p>3.0255</text:p>
          </table:table-cell>
          <table:table-cell office:value-type="float" office:value="-0.4312244245247787" table:style-name="c14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8:45</text:p>
          </table:table-cell>
          <table:table-cell office:value-type="float" office:value="3.025512" table:style-name="c1">
            <text:p>3.0255</text:p>
          </table:table-cell>
          <table:table-cell office:value-type="string" table:style-name="c1">
            <text:p>2026-04-16 00:30</text:p>
          </table:table-cell>
          <table:table-cell office:value-type="float" office:value="3.2433775000000002" table:style-name="c1">
            <text:p>3.2434</text:p>
          </table:table-cell>
          <table:table-cell office:value-type="float" office:value="6.986651792407383" table:style-name="c13">
            <text:p>+7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3:15</text:p>
          </table:table-cell>
          <table:table-cell office:value-type="float" office:value="3.311655" table:style-name="c1">
            <text:p>3.3117</text:p>
          </table:table-cell>
          <table:table-cell office:value-type="string" table:style-name="c1">
            <text:p>2026-04-16 11:00</text:p>
          </table:table-cell>
          <table:table-cell office:value-type="float" office:value="3.306346" table:style-name="c1">
            <text:p>3.3063</text:p>
          </table:table-cell>
          <table:table-cell office:value-type="float" office:value="-0.35989212807492343" table:style-name="c14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15</text:p>
          </table:table-cell>
          <table:table-cell office:value-type="float" office:value="3.3566775" table:style-name="c1">
            <text:p>3.3567</text:p>
          </table:table-cell>
          <table:table-cell office:value-type="string" table:style-name="c1">
            <text:p>2026-04-16 14:45</text:p>
          </table:table-cell>
          <table:table-cell office:value-type="float" office:value="3.3073455000000003" table:style-name="c1">
            <text:p>3.3073</text:p>
          </table:table-cell>
          <table:table-cell office:value-type="float" office:value="-1.6666296852914653" table:style-name="c14">
            <text:p>-1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45</text:p>
          </table:table-cell>
          <table:table-cell office:value-type="float" office:value="3.3966974999999997" table:style-name="c1">
            <text:p>3.3967</text:p>
          </table:table-cell>
          <table:table-cell office:value-type="string" table:style-name="c1">
            <text:p>2026-04-16 17:15</text:p>
          </table:table-cell>
          <table:table-cell office:value-type="float" office:value="3.3223380000000002" table:style-name="c1">
            <text:p>3.3223</text:p>
          </table:table-cell>
          <table:table-cell office:value-type="float" office:value="-2.3846943586233293" table:style-name="c14">
            <text:p>-2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8:15</text:p>
          </table:table-cell>
          <table:table-cell office:value-type="float" office:value="3.405702" table:style-name="c1">
            <text:p>3.4057</text:p>
          </table:table-cell>
          <table:table-cell office:value-type="string" table:style-name="c1">
            <text:p>2026-04-17 08:30</text:p>
          </table:table-cell>
          <table:table-cell office:value-type="float" office:value="3.3923030000000005" table:style-name="c1">
            <text:p>3.3923</text:p>
          </table:table-cell>
          <table:table-cell office:value-type="float" office:value="-0.5925419692327627" table:style-name="c14">
            <text:p>-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6:45</text:p>
          </table:table-cell>
          <table:table-cell office:value-type="float" office:value="3.38169" table:style-name="c1">
            <text:p>3.3817</text:p>
          </table:table-cell>
          <table:table-cell office:value-type="string" table:style-name="c1">
            <text:p>2026-04-18 08:45</text:p>
          </table:table-cell>
          <table:table-cell office:value-type="float" office:value="3.3173405000000002" table:style-name="c1">
            <text:p>3.3173</text:p>
          </table:table-cell>
          <table:table-cell office:value-type="float" office:value="-2.098976064024205" table:style-name="c14">
            <text:p>-2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0 17:15</text:p>
          </table:table-cell>
          <table:table-cell office:value-type="float" office:value="3.3306645" table:style-name="c1">
            <text:p>3.3307</text:p>
          </table:table-cell>
          <table:table-cell office:value-type="string" table:style-name="c1">
            <text:p>2026-04-20 22:45</text:p>
          </table:table-cell>
          <table:table-cell office:value-type="float" office:value="3.300349" table:style-name="c1">
            <text:p>3.3003</text:p>
          </table:table-cell>
          <table:table-cell office:value-type="float" office:value="-1.108274269323728" table:style-name="c14">
            <text:p>-1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3.3566775" table:style-name="c1">
            <text:p>3.3567</text:p>
          </table:table-cell>
          <table:table-cell office:value-type="string" table:style-name="c1">
            <text:p>2026-04-22 11:30</text:p>
          </table:table-cell>
          <table:table-cell office:value-type="float" office:value="3.3113435000000004" table:style-name="c1">
            <text:p>3.3113</text:p>
          </table:table-cell>
          <table:table-cell office:value-type="float" office:value="-1.5477619061259218" table:style-name="c14">
            <text:p>-1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4:15</text:p>
          </table:table-cell>
          <table:table-cell office:value-type="float" office:value="3.3536759999999997" table:style-name="c1">
            <text:p>3.3537</text:p>
          </table:table-cell>
          <table:table-cell office:value-type="string" table:style-name="c1">
            <text:p>2026-04-22 19:45</text:p>
          </table:table-cell>
          <table:table-cell office:value-type="float" office:value="3.3333325" table:style-name="c1">
            <text:p>3.3333</text:p>
          </table:table-cell>
          <table:table-cell office:value-type="float" office:value="-0.8052904236276803" table:style-name="c14">
            <text:p>-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6:30</text:p>
          </table:table-cell>
          <table:table-cell office:value-type="float" office:value="3.3006494999999996" table:style-name="c1">
            <text:p>3.3006</text:p>
          </table:table-cell>
          <table:table-cell office:value-type="string" table:style-name="c1">
            <text:p>2026-04-23 09:15</text:p>
          </table:table-cell>
          <table:table-cell office:value-type="float" office:value="3.266366" table:style-name="c1">
            <text:p>3.2664</text:p>
          </table:table-cell>
          <table:table-cell office:value-type="float" office:value="-1.2365131660904694" table:style-name="c14">
            <text:p>-1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16:00</text:p>
          </table:table-cell>
          <table:table-cell office:value-type="float" office:value="3.3516749999999997" table:style-name="c1">
            <text:p>3.3517</text:p>
          </table:table-cell>
          <table:table-cell office:value-type="string" table:style-name="c1">
            <text:p>2026-04-23 18:15</text:p>
          </table:table-cell>
          <table:table-cell office:value-type="float" office:value="3.290354" table:style-name="c1">
            <text:p>3.2904</text:p>
          </table:table-cell>
          <table:table-cell office:value-type="float" office:value="-2.0258055344268167" table:style-name="c14">
            <text:p>-2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20:15</text:p>
          </table:table-cell>
          <table:table-cell office:value-type="float" office:value="3.3246615" table:style-name="c1">
            <text:p>3.3247</text:p>
          </table:table-cell>
          <table:table-cell office:value-type="string" table:style-name="c1">
            <text:p>2026-04-24 03:45</text:p>
          </table:table-cell>
          <table:table-cell office:value-type="float" office:value="3.3443270000000003" table:style-name="c1">
            <text:p>3.3443</text:p>
          </table:table-cell>
          <table:table-cell office:value-type="float" office:value="0.3904214106308368" table:style-name="c13">
            <text:p>+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8:15</text:p>
          </table:table-cell>
          <table:table-cell office:value-type="float" office:value="3.431715" table:style-name="c1">
            <text:p>3.4317</text:p>
          </table:table-cell>
          <table:table-cell office:value-type="string" table:style-name="c1">
            <text:p>2026-04-24 13:45</text:p>
          </table:table-cell>
          <table:table-cell office:value-type="float" office:value="3.422288" table:style-name="c1">
            <text:p>3.4223</text:p>
          </table:table-cell>
          <table:table-cell office:value-type="float" office:value="-0.4740531691005856" table:style-name="c14">
            <text:p>-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15:15</text:p>
          </table:table-cell>
          <table:table-cell office:value-type="float" office:value="3.6228105" table:style-name="c1">
            <text:p>3.6228</text:p>
          </table:table-cell>
          <table:table-cell office:value-type="string" table:style-name="c1">
            <text:p>2026-04-25 18:00</text:p>
          </table:table-cell>
          <table:table-cell office:value-type="float" office:value="3.5452265000000005" table:style-name="c1">
            <text:p>3.5452</text:p>
          </table:table-cell>
          <table:table-cell office:value-type="float" office:value="-2.337160825096951" table:style-name="c14">
            <text:p>-2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5:15</text:p>
          </table:table-cell>
          <table:table-cell office:value-type="float" office:value="3.6328154999999995" table:style-name="c1">
            <text:p>3.6328</text:p>
          </table:table-cell>
          <table:table-cell office:value-type="string" table:style-name="c1">
            <text:p>2026-04-26 10:45</text:p>
          </table:table-cell>
          <table:table-cell office:value-type="float" office:value="3.6511735" table:style-name="c1">
            <text:p>3.6512</text:p>
          </table:table-cell>
          <table:table-cell office:value-type="float" office:value="0.3044279064956745" table:style-name="c13">
            <text:p>+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9:30</text:p>
          </table:table-cell>
          <table:table-cell office:value-type="float" office:value="3.743871" table:style-name="c1">
            <text:p>3.7439</text:p>
          </table:table-cell>
          <table:table-cell office:value-type="string" table:style-name="c1">
            <text:p>2026-04-27 06:15</text:p>
          </table:table-cell>
          <table:table-cell office:value-type="float" office:value="3.7731125000000003" table:style-name="c1">
            <text:p>3.7731</text:p>
          </table:table-cell>
          <table:table-cell office:value-type="float" office:value="0.579588562546629" table:style-name="c13">
            <text:p>+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15</text:p>
          </table:table-cell>
          <table:table-cell office:value-type="float" office:value="3.6498239999999997" table:style-name="c1">
            <text:p>3.6498</text:p>
          </table:table-cell>
          <table:table-cell office:value-type="string" table:style-name="c1">
            <text:p>2026-05-01 17:15</text:p>
          </table:table-cell>
          <table:table-cell office:value-type="float" office:value="3.5932025000000003" table:style-name="c1">
            <text:p>3.5932</text:p>
          </table:table-cell>
          <table:table-cell office:value-type="float" office:value="-1.7481476311597244" table:style-name="c14">
            <text:p>-1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9:15</text:p>
          </table:table-cell>
          <table:table-cell office:value-type="float" office:value="3.645822" table:style-name="c1">
            <text:p>3.6458</text:p>
          </table:table-cell>
          <table:table-cell office:value-type="string" table:style-name="c1">
            <text:p>2026-05-02 13:00</text:p>
          </table:table-cell>
          <table:table-cell office:value-type="float" office:value="3.782108" table:style-name="c1">
            <text:p>3.7821</text:p>
          </table:table-cell>
          <table:table-cell office:value-type="float" office:value="3.5307693603253254" table:style-name="c13">
            <text:p>+3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4:15</text:p>
          </table:table-cell>
          <table:table-cell office:value-type="float" office:value="3.8008995" table:style-name="c1">
            <text:p>3.8009</text:p>
          </table:table-cell>
          <table:table-cell office:value-type="string" table:style-name="c1">
            <text:p>2026-05-04 09:15</text:p>
          </table:table-cell>
          <table:table-cell office:value-type="float" office:value="3.772113" table:style-name="c1">
            <text:p>3.7721</text:p>
          </table:table-cell>
          <table:table-cell office:value-type="float" office:value="-0.9557462355160973" table:style-name="c14">
            <text:p>-1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30</text:p>
          </table:table-cell>
          <table:table-cell office:value-type="float" office:value="3.8569275" table:style-name="c1">
            <text:p>3.8569</text:p>
          </table:table-cell>
          <table:table-cell office:value-type="string" table:style-name="c1">
            <text:p>2026-05-05 23:45</text:p>
          </table:table-cell>
          <table:table-cell office:value-type="float" office:value="3.7471255" table:style-name="c1">
            <text:p>3.7471</text:p>
          </table:table-cell>
          <table:table-cell office:value-type="float" office:value="-3.041086561116313" table:style-name="c14">
            <text:p>-3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2:45</text:p>
          </table:table-cell>
          <table:table-cell office:value-type="float" office:value="3.8689335" table:style-name="c1">
            <text:p>3.8689</text:p>
          </table:table-cell>
          <table:table-cell office:value-type="string" table:style-name="c1">
            <text:p>2026-05-06 13:45</text:p>
          </table:table-cell>
          <table:table-cell office:value-type="float" office:value="3.8640670000000004" table:style-name="c1">
            <text:p>3.8641</text:p>
          </table:table-cell>
          <table:table-cell office:value-type="float" office:value="-0.32543257548880433" table:style-name="c14">
            <text:p>-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00</text:p>
          </table:table-cell>
          <table:table-cell office:value-type="float" office:value="3.8739359999999996" table:style-name="c1">
            <text:p>3.8739</text:p>
          </table:table-cell>
          <table:table-cell office:value-type="string" table:style-name="c1">
            <text:p>2026-05-07 10:30</text:p>
          </table:table-cell>
          <table:table-cell office:value-type="float" office:value="3.850074" table:style-name="c1">
            <text:p>3.8501</text:p>
          </table:table-cell>
          <table:table-cell office:value-type="float" office:value="-0.8146313704201602" table:style-name="c14">
            <text:p>-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9:45</text:p>
          </table:table-cell>
          <table:table-cell office:value-type="float" office:value="3.8689335" table:style-name="c1">
            <text:p>3.8689</text:p>
          </table:table-cell>
          <table:table-cell office:value-type="string" table:style-name="c1">
            <text:p>2026-05-07 21:15</text:p>
          </table:table-cell>
          <table:table-cell office:value-type="float" office:value="3.828085" table:style-name="c1">
            <text:p>3.8281</text:p>
          </table:table-cell>
          <table:table-cell office:value-type="float" office:value="-1.2535971971345594" table:style-name="c14">
            <text:p>-1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3:30</text:p>
          </table:table-cell>
          <table:table-cell office:value-type="float" office:value="3.8769375" table:style-name="c1">
            <text:p>3.8769</text:p>
          </table:table-cell>
          <table:table-cell office:value-type="string" table:style-name="c1">
            <text:p>2026-05-09 03:30</text:p>
          </table:table-cell>
          <table:table-cell office:value-type="float" office:value="4.353822" table:style-name="c1">
            <text:p>4.3538</text:p>
          </table:table-cell>
          <table:table-cell office:value-type="float" office:value="12.076057708487697" table:style-name="c13">
            <text:p>+12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9:15</text:p>
          </table:table-cell>
          <table:table-cell office:value-type="float" office:value="4.144071" table:style-name="c1">
            <text:p>4.1441</text:p>
          </table:table-cell>
          <table:table-cell office:value-type="string" table:style-name="c1">
            <text:p>2026-05-10 21:15</text:p>
          </table:table-cell>
          <table:table-cell office:value-type="float" office:value="4.199899" table:style-name="c1">
            <text:p>4.1999</text:p>
          </table:table-cell>
          <table:table-cell office:value-type="float" office:value="1.1445846825259398" table:style-name="c13">
            <text:p>+1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5:30</text:p>
          </table:table-cell>
          <table:table-cell office:value-type="float" office:value="4.2691335" table:style-name="c1">
            <text:p>4.2691</text:p>
          </table:table-cell>
          <table:table-cell office:value-type="string" table:style-name="c1">
            <text:p>2026-05-11 05:45</text:p>
          </table:table-cell>
          <table:table-cell office:value-type="float" office:value="4.2608685" table:style-name="c1">
            <text:p>4.2609</text:p>
          </table:table-cell>
          <table:table-cell office:value-type="float" office:value="-0.3931120011004485" table:style-name="c14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6:00</text:p>
          </table:table-cell>
          <table:table-cell office:value-type="float" office:value="4.284141" table:style-name="c1">
            <text:p>4.2841</text:p>
          </table:table-cell>
          <table:table-cell office:value-type="string" table:style-name="c1">
            <text:p>2026-05-11 14:45</text:p>
          </table:table-cell>
          <table:table-cell office:value-type="float" office:value="4.3148415" table:style-name="c1">
            <text:p>4.3148</text:p>
          </table:table-cell>
          <table:table-cell office:value-type="float" office:value="0.5152755672957587" table:style-name="c13">
            <text:p>+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7:15</text:p>
          </table:table-cell>
          <table:table-cell office:value-type="float" office:value="4.4212095" table:style-name="c1">
            <text:p>4.4212</text:p>
          </table:table-cell>
          <table:table-cell office:value-type="string" table:style-name="c1">
            <text:p>2026-05-12 01:15</text:p>
          </table:table-cell>
          <table:table-cell office:value-type="float" office:value="4.5547215" table:style-name="c1">
            <text:p>4.5547</text:p>
          </table:table-cell>
          <table:table-cell office:value-type="float" office:value="2.813870542020247" table:style-name="c13">
            <text:p>+2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05:45</text:p>
          </table:table-cell>
          <table:table-cell office:value-type="float" office:value="4.743370499999999" table:style-name="c1">
            <text:p>4.7434</text:p>
          </table:table-cell>
          <table:table-cell office:value-type="string" table:style-name="c1">
            <text:p>2026-05-12 15:00</text:p>
          </table:table-cell>
          <table:table-cell office:value-type="float" office:value="4.6486745" table:style-name="c1">
            <text:p>4.6487</text:p>
          </table:table-cell>
          <table:table-cell office:value-type="float" office:value="-2.192295548608292" table:style-name="c14">
            <text:p>-2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7:45</text:p>
          </table:table-cell>
          <table:table-cell office:value-type="float" office:value="4.853425499999999" table:style-name="c1">
            <text:p>4.8534</text:p>
          </table:table-cell>
          <table:table-cell office:value-type="string" table:style-name="c1">
            <text:p>2026-05-12 21:15</text:p>
          </table:table-cell>
          <table:table-cell office:value-type="float" office:value="4.73763" table:style-name="c1">
            <text:p>4.7376</text:p>
          </table:table-cell>
          <table:table-cell office:value-type="float" office:value="-2.5809816668660113" table:style-name="c14">
            <text:p>-2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1:30</text:p>
          </table:table-cell>
          <table:table-cell office:value-type="float" office:value="4.969483499999999" table:style-name="c1">
            <text:p>4.9695</text:p>
          </table:table-cell>
          <table:table-cell office:value-type="string" table:style-name="c1">
            <text:p>2026-05-13 15:00</text:p>
          </table:table-cell>
          <table:table-cell office:value-type="float" office:value="5.633182000000001" table:style-name="c1">
            <text:p>5.6332</text:p>
          </table:table-cell>
          <table:table-cell office:value-type="float" office:value="13.12888490689228" table:style-name="c13">
            <text:p>+13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05:00</text:p>
          </table:table-cell>
          <table:table-cell office:value-type="float" office:value="5.2686329999999995" table:style-name="c1">
            <text:p>5.2686</text:p>
          </table:table-cell>
          <table:table-cell office:value-type="string" table:style-name="c1">
            <text:p>2026-05-14 08:00</text:p>
          </table:table-cell>
          <table:table-cell office:value-type="float" office:value="4.9984995" table:style-name="c1">
            <text:p>4.9985</text:p>
          </table:table-cell>
          <table:table-cell office:value-type="float" office:value="-5.316853546270906" table:style-name="c14">
            <text:p>-5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0:15</text:p>
          </table:table-cell>
          <table:table-cell office:value-type="float" office:value="5.2576275" table:style-name="c1">
            <text:p>5.2576</text:p>
          </table:table-cell>
          <table:table-cell office:value-type="string" table:style-name="c1">
            <text:p>2026-05-14 13:30</text:p>
          </table:table-cell>
          <table:table-cell office:value-type="float" office:value="5.11744" table:style-name="c1">
            <text:p>5.1174</text:p>
          </table:table-cell>
          <table:table-cell office:value-type="float" office:value="-2.860934186760089" table:style-name="c14">
            <text:p>-2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00:00</text:p>
          </table:table-cell>
          <table:table-cell office:value-type="float" office:value="5.148573" table:style-name="c1">
            <text:p>5.1486</text:p>
          </table:table-cell>
          <table:table-cell office:value-type="string" table:style-name="c1">
            <text:p>2026-05-19 05:30</text:p>
          </table:table-cell>
          <table:table-cell office:value-type="float" office:value="5.07746" table:style-name="c1">
            <text:p>5.0775</text:p>
          </table:table-cell>
          <table:table-cell office:value-type="float" office:value="-1.5783566153184547" table:style-name="c14">
            <text:p>-1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16:15</text:p>
          </table:table-cell>
          <table:table-cell office:value-type="float" office:value="4.94247" table:style-name="c1">
            <text:p>4.9425</text:p>
          </table:table-cell>
          <table:table-cell office:value-type="string" table:style-name="c1">
            <text:p>2026-05-19 16:30</text:p>
          </table:table-cell>
          <table:table-cell office:value-type="float" office:value="5.0044965" table:style-name="c1">
            <text:p>5.0045</text:p>
          </table:table-cell>
          <table:table-cell office:value-type="float" office:value="1.0525609967587002" table:style-name="c13">
            <text:p>+1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16:45</text:p>
          </table:table-cell>
          <table:table-cell office:value-type="float" office:value="5.0815395" table:style-name="c1">
            <text:p>5.0815</text:p>
          </table:table-cell>
          <table:table-cell office:value-type="string" table:style-name="c1">
            <text:p>2026-05-19 19:15</text:p>
          </table:table-cell>
          <table:table-cell office:value-type="float" office:value="4.926535500000001" table:style-name="c1">
            <text:p>4.9265</text:p>
          </table:table-cell>
          <table:table-cell office:value-type="float" office:value="-3.24413781422932" table:style-name="c14">
            <text:p>-3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5:30</text:p>
          </table:table-cell>
          <table:table-cell office:value-type="float" office:value="5.171584499999999" table:style-name="c1">
            <text:p>5.1716</text:p>
          </table:table-cell>
          <table:table-cell office:value-type="string" table:style-name="c1">
            <text:p>2026-05-20 18:15</text:p>
          </table:table-cell>
          <table:table-cell office:value-type="float" office:value="5.0324825" table:style-name="c1">
            <text:p>5.0325</text:p>
          </table:table-cell>
          <table:table-cell office:value-type="float" office:value="-2.8842597953779747" table:style-name="c14">
            <text:p>-2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3:45</text:p>
          </table:table-cell>
          <table:table-cell office:value-type="float" office:value="4.917457499999999" table:style-name="c1">
            <text:p>4.9175</text:p>
          </table:table-cell>
          <table:table-cell office:value-type="string" table:style-name="c1">
            <text:p>2026-05-21 10:30</text:p>
          </table:table-cell>
          <table:table-cell office:value-type="float" office:value="4.8505735" table:style-name="c1">
            <text:p>4.8506</text:p>
          </table:table-cell>
          <table:table-cell office:value-type="float" office:value="-1.5573148609113407" table:style-name="c14">
            <text:p>-1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45</text:p>
          </table:table-cell>
          <table:table-cell office:value-type="float" office:value="5.224611" table:style-name="c1">
            <text:p>5.2246</text:p>
          </table:table-cell>
          <table:table-cell office:value-type="string" table:style-name="c1">
            <text:p>2026-05-22 01:00</text:p>
          </table:table-cell>
          <table:table-cell office:value-type="float" office:value="5.109444000000001" table:style-name="c1">
            <text:p>5.1094</text:p>
          </table:table-cell>
          <table:table-cell office:value-type="float" office:value="-2.3998107908129174" table:style-name="c14">
            <text:p>-2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9:30</text:p>
          </table:table-cell>
          <table:table-cell office:value-type="float" office:value="5.316657" table:style-name="c1">
            <text:p>5.3167</text:p>
          </table:table-cell>
          <table:table-cell office:value-type="string" table:style-name="c1">
            <text:p>2026-05-22 15:30</text:p>
          </table:table-cell>
          <table:table-cell office:value-type="float" office:value="5.3043465" table:style-name="c1">
            <text:p>5.3043</text:p>
          </table:table-cell>
          <table:table-cell office:value-type="float" office:value="-0.4309830153327421" table:style-name="c14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3 20:45</text:p>
          </table:table-cell>
          <table:table-cell office:value-type="float" office:value="5.489743499999999" table:style-name="c1">
            <text:p>5.4897</text:p>
          </table:table-cell>
          <table:table-cell office:value-type="string" table:style-name="c1">
            <text:p>2026-05-24 00:30</text:p>
          </table:table-cell>
          <table:table-cell office:value-type="float" office:value="5.285356" table:style-name="c1">
            <text:p>5.2854</text:p>
          </table:table-cell>
          <table:table-cell office:value-type="float" office:value="-3.9155367940961083" table:style-name="c14">
            <text:p>-3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4 06:45</text:p>
          </table:table-cell>
          <table:table-cell office:value-type="float" office:value="5.216607" table:style-name="c1">
            <text:p>5.2166</text:p>
          </table:table-cell>
          <table:table-cell office:value-type="string" table:style-name="c1">
            <text:p>2026-05-24 07:00</text:p>
          </table:table-cell>
          <table:table-cell office:value-type="float" office:value="5.247375" table:style-name="c1">
            <text:p>5.2474</text:p>
          </table:table-cell>
          <table:table-cell office:value-type="float" office:value="0.3887296354699421" table:style-name="c13">
            <text:p>+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4 16:15</text:p>
          </table:table-cell>
          <table:table-cell office:value-type="float" office:value="5.1955965" table:style-name="c1">
            <text:p>5.1956</text:p>
          </table:table-cell>
          <table:table-cell office:value-type="string" table:style-name="c1">
            <text:p>2026-05-24 16:30</text:p>
          </table:table-cell>
          <table:table-cell office:value-type="float" office:value="5.2203885" table:style-name="c1">
            <text:p>5.2204</text:p>
          </table:table-cell>
          <table:table-cell office:value-type="float" office:value="0.2763194445238426" table:style-name="c13">
            <text:p>+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0:30</text:p>
          </table:table-cell>
          <table:table-cell office:value-type="float" office:value="5.3276625" table:style-name="c1">
            <text:p>5.3277</text:p>
          </table:table-cell>
          <table:table-cell office:value-type="string" table:style-name="c1">
            <text:p>2026-05-25 21:00</text:p>
          </table:table-cell>
          <table:table-cell office:value-type="float" office:value="5.629184" table:style-name="c1">
            <text:p>5.6292</text:p>
          </table:table-cell>
          <table:table-cell office:value-type="float" office:value="5.4483323818654394" table:style-name="c13">
            <text:p>+5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23:30</text:p>
          </table:table-cell>
          <table:table-cell office:value-type="float" office:value="5.711854499999999" table:style-name="c1">
            <text:p>5.7119</text:p>
          </table:table-cell>
          <table:table-cell office:value-type="string" table:style-name="c1">
            <text:p>2026-05-26 02:00</text:p>
          </table:table-cell>
          <table:table-cell office:value-type="float" office:value="5.613192" table:style-name="c1">
            <text:p>5.6132</text:p>
          </table:table-cell>
          <table:table-cell office:value-type="float" office:value="-1.923775733573041" table:style-name="c14">
            <text:p>-1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3:45</text:p>
          </table:table-cell>
          <table:table-cell office:value-type="float" office:value="5.960979" table:style-name="c1">
            <text:p>5.961</text:p>
          </table:table-cell>
          <table:table-cell office:value-type="string" table:style-name="c1">
            <text:p>2026-05-26 16:45</text:p>
          </table:table-cell>
          <table:table-cell office:value-type="float" office:value="5.7521225000000005" table:style-name="c1">
            <text:p>5.7521</text:p>
          </table:table-cell>
          <table:table-cell office:value-type="float" office:value="-3.6966242101758695" table:style-name="c14">
            <text:p>-3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06:30</text:p>
          </table:table-cell>
          <table:table-cell office:value-type="float" office:value="6.087041999999999" table:style-name="c1">
            <text:p>6.087</text:p>
          </table:table-cell>
          <table:table-cell office:value-type="string" table:style-name="c1">
            <text:p>2026-05-29 13:15</text:p>
          </table:table-cell>
          <table:table-cell office:value-type="float" office:value="5.967015" table:style-name="c1">
            <text:p>5.967</text:p>
          </table:table-cell>
          <table:table-cell office:value-type="float" office:value="-2.167802735466562" table:style-name="c14">
            <text:p>-2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15:15</text:p>
          </table:table-cell>
          <table:table-cell office:value-type="float" office:value="6.353174999999999" table:style-name="c1">
            <text:p>6.3532</text:p>
          </table:table-cell>
          <table:table-cell office:value-type="string" table:style-name="c1">
            <text:p>2026-05-30 00:30</text:p>
          </table:table-cell>
          <table:table-cell office:value-type="float" office:value="6.4177895000000005" table:style-name="c1">
            <text:p>6.4178</text:p>
          </table:table-cell>
          <table:table-cell office:value-type="float" office:value="0.8151095914955997" table:style-name="c13">
            <text:p>+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5:00</text:p>
          </table:table-cell>
          <table:table-cell office:value-type="float" office:value="6.749373" table:style-name="c1">
            <text:p>6.7494</text:p>
          </table:table-cell>
          <table:table-cell office:value-type="string" table:style-name="c1">
            <text:p>2026-05-30 08:30</text:p>
          </table:table-cell>
          <table:table-cell office:value-type="float" office:value="6.514741" table:style-name="c1">
            <text:p>6.5147</text:p>
          </table:table-cell>
          <table:table-cell office:value-type="float" office:value="-3.6693033154190924" table:style-name="c14">
            <text:p>-3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5:00</text:p>
          </table:table-cell>
          <table:table-cell office:value-type="float" office:value="6.5912939999999995" table:style-name="c1">
            <text:p>6.5913</text:p>
          </table:table-cell>
          <table:table-cell office:value-type="string" table:style-name="c1">
            <text:p>2026-05-31 05:15</text:p>
          </table:table-cell>
          <table:table-cell office:value-type="float" office:value="6.5967" table:style-name="c1">
            <text:p>6.5967</text:p>
          </table:table-cell>
          <table:table-cell office:value-type="float" office:value="-0.11804667338460861" table:style-name="c14">
            <text:p>-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5:30</text:p>
          </table:table-cell>
          <table:table-cell office:value-type="float" office:value="6.596296499999999" table:style-name="c1">
            <text:p>6.5963</text:p>
          </table:table-cell>
          <table:table-cell office:value-type="string" table:style-name="c1">
            <text:p>2026-05-31 06:30</text:p>
          </table:table-cell>
          <table:table-cell office:value-type="float" office:value="6.498749" table:style-name="c1">
            <text:p>6.4987</text:p>
          </table:table-cell>
          <table:table-cell office:value-type="float" office:value="-1.6757660795114426" table:style-name="c14">
            <text:p>-1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0:00</text:p>
          </table:table-cell>
          <table:table-cell office:value-type="float" office:value="6.545271" table:style-name="c1">
            <text:p>6.5453</text:p>
          </table:table-cell>
          <table:table-cell office:value-type="string" table:style-name="c1">
            <text:p>2026-06-01 01:30</text:p>
          </table:table-cell>
          <table:table-cell office:value-type="float" office:value="6.442777" table:style-name="c1">
            <text:p>6.4428</text:p>
          </table:table-cell>
          <table:table-cell office:value-type="float" office:value="-1.7626941836785481" table:style-name="c14">
            <text:p>-1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12:30</text:p>
          </table:table-cell>
          <table:table-cell office:value-type="float" office:value="6.78339" table:style-name="c1">
            <text:p>6.7834</text:p>
          </table:table-cell>
          <table:table-cell office:value-type="string" table:style-name="c1">
            <text:p>2026-06-01 21:30</text:p>
          </table:table-cell>
          <table:table-cell office:value-type="float" office:value="6.8975495" table:style-name="c1">
            <text:p>6.8975</text:p>
          </table:table-cell>
          <table:table-cell office:value-type="float" office:value="1.4796628020724123" table:style-name="c13">
            <text:p>+1.5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21:00</text:p>
          </table:table-cell>
          <table:table-cell office:value-type="float" office:value="9.28464" table:style-name="c10">
            <text:p>9.2846</text:p>
          </table:table-cell>
          <table:table-cell office:value-type="string" table:style-name="c10">
            <text:p>2026-03-05 23:45</text:p>
          </table:table-cell>
          <table:table-cell office:value-type="float" office:value="9.1954" table:style-name="c10">
            <text:p>9.1954</text:p>
          </table:table-cell>
          <table:table-cell office:value-type="float" office:value="-1.1591359988109229" table:style-name="c11">
            <text:p>-1.2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4:30</text:p>
          </table:table-cell>
          <table:table-cell office:value-type="float" office:value="8.92446" table:style-name="c10">
            <text:p>8.9245</text:p>
          </table:table-cell>
          <table:table-cell office:value-type="string" table:style-name="c10">
            <text:p>2026-03-09 23:15</text:p>
          </table:table-cell>
          <table:table-cell office:value-type="float" office:value="8.905545" table:style-name="c10">
            <text:p>8.9055</text:p>
          </table:table-cell>
          <table:table-cell office:value-type="float" office:value="-0.4114219174605527" table:style-name="c11">
            <text:p>-0.4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05:00</text:p>
          </table:table-cell>
          <table:table-cell office:value-type="float" office:value="9.02451" table:style-name="c10">
            <text:p>9.0245</text:p>
          </table:table-cell>
          <table:table-cell office:value-type="string" table:style-name="c10">
            <text:p>2026-03-11 05:45</text:p>
          </table:table-cell>
          <table:table-cell office:value-type="float" office:value="8.875560000000002" table:style-name="c10">
            <text:p>8.8756</text:p>
          </table:table-cell>
          <table:table-cell office:value-type="float" office:value="-1.8471057646342826" table:style-name="c11">
            <text:p>-1.8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3:45</text:p>
          </table:table-cell>
          <table:table-cell office:value-type="float" office:value="9.074535" table:style-name="c10">
            <text:p>9.0745</text:p>
          </table:table-cell>
          <table:table-cell office:value-type="string" table:style-name="c10">
            <text:p>2026-03-11 22:45</text:p>
          </table:table-cell>
          <table:table-cell office:value-type="float" office:value="9.03548" table:style-name="c10">
            <text:p>9.0355</text:p>
          </table:table-cell>
          <table:table-cell office:value-type="float" office:value="-0.6294198492815317" table:style-name="c11">
            <text:p>-0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07:45</text:p>
          </table:table-cell>
          <table:table-cell office:value-type="float" office:value="8.944469999999999" table:style-name="c10">
            <text:p>8.9445</text:p>
          </table:table-cell>
          <table:table-cell office:value-type="string" table:style-name="c10">
            <text:p>2026-03-12 14:45</text:p>
          </table:table-cell>
          <table:table-cell office:value-type="float" office:value="8.91554" table:style-name="c10">
            <text:p>8.9155</text:p>
          </table:table-cell>
          <table:table-cell office:value-type="float" office:value="-0.5226935129750476" table:style-name="c11">
            <text:p>-0.5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0:00</text:p>
          </table:table-cell>
          <table:table-cell office:value-type="float" office:value="9.28464" table:style-name="c10">
            <text:p>9.2846</text:p>
          </table:table-cell>
          <table:table-cell office:value-type="string" table:style-name="c10">
            <text:p>2026-03-13 16:15</text:p>
          </table:table-cell>
          <table:table-cell office:value-type="float" office:value="9.255370000000001" table:style-name="c10">
            <text:p>9.2554</text:p>
          </table:table-cell>
          <table:table-cell office:value-type="float" office:value="-0.5145216683683951" table:style-name="c11">
            <text:p>-0.5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9:15</text:p>
          </table:table-cell>
          <table:table-cell office:value-type="float" office:value="9.294645" table:style-name="c10">
            <text:p>9.2946</text:p>
          </table:table-cell>
          <table:table-cell office:value-type="string" table:style-name="c10">
            <text:p>2026-03-15 13:15</text:p>
          </table:table-cell>
          <table:table-cell office:value-type="float" office:value="9.205395000000001" table:style-name="c10">
            <text:p>9.2054</text:p>
          </table:table-cell>
          <table:table-cell office:value-type="float" office:value="-1.1582108257496504" table:style-name="c11">
            <text:p>-1.2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1:45</text:p>
          </table:table-cell>
          <table:table-cell office:value-type="float" office:value="9.314655" table:style-name="c10">
            <text:p>9.3147</text:p>
          </table:table-cell>
          <table:table-cell office:value-type="string" table:style-name="c10">
            <text:p>2026-03-16 09:00</text:p>
          </table:table-cell>
          <table:table-cell office:value-type="float" office:value="9.585205" table:style-name="c10">
            <text:p>9.5852</text:p>
          </table:table-cell>
          <table:table-cell office:value-type="float" office:value="2.698856535266203" table:style-name="c12">
            <text:p>+2.7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1:00</text:p>
          </table:table-cell>
          <table:table-cell office:value-type="float" office:value="9.734865" table:style-name="c10">
            <text:p>9.7349</text:p>
          </table:table-cell>
          <table:table-cell office:value-type="string" table:style-name="c10">
            <text:p>2026-03-17 02:30</text:p>
          </table:table-cell>
          <table:table-cell office:value-type="float" office:value="9.895050000000001" table:style-name="c10">
            <text:p>9.8951</text:p>
          </table:table-cell>
          <table:table-cell office:value-type="float" office:value="1.442288054842078" table:style-name="c12">
            <text:p>+1.4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0:45</text:p>
          </table:table-cell>
          <table:table-cell office:value-type="float" office:value="9.2046" table:style-name="c10">
            <text:p>9.2046</text:p>
          </table:table-cell>
          <table:table-cell office:value-type="string" table:style-name="c10">
            <text:p>2026-03-25 15:45</text:p>
          </table:table-cell>
          <table:table-cell office:value-type="float" office:value="9.345325" table:style-name="c10">
            <text:p>9.3453</text:p>
          </table:table-cell>
          <table:table-cell office:value-type="float" office:value="1.325898956228433" table:style-name="c12">
            <text:p>+1.3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22:45</text:p>
          </table:table-cell>
          <table:table-cell office:value-type="float" office:value="9.38469" table:style-name="c10">
            <text:p>9.3847</text:p>
          </table:table-cell>
          <table:table-cell office:value-type="string" table:style-name="c10">
            <text:p>2026-03-26 02:15</text:p>
          </table:table-cell>
          <table:table-cell office:value-type="float" office:value="9.325335" table:style-name="c10">
            <text:p>9.3253</text:p>
          </table:table-cell>
          <table:table-cell office:value-type="float" office:value="-0.8311019827506261" table:style-name="c11">
            <text:p>-0.8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8:00</text:p>
          </table:table-cell>
          <table:table-cell office:value-type="float" office:value="8.754375" table:style-name="c10">
            <text:p>8.7544</text:p>
          </table:table-cell>
          <table:table-cell office:value-type="string" table:style-name="c10">
            <text:p>2026-03-30 17:00</text:p>
          </table:table-cell>
          <table:table-cell office:value-type="float" office:value="8.81559" table:style-name="c10">
            <text:p>8.8156</text:p>
          </table:table-cell>
          <table:table-cell office:value-type="float" office:value="0.49795257331335385" table:style-name="c12">
            <text:p>+0.5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01:30</text:p>
          </table:table-cell>
          <table:table-cell office:value-type="float" office:value="8.76438" table:style-name="c10">
            <text:p>8.7644</text:p>
          </table:table-cell>
          <table:table-cell office:value-type="string" table:style-name="c10">
            <text:p>2026-03-31 07:15</text:p>
          </table:table-cell>
          <table:table-cell office:value-type="float" office:value="8.69565" table:style-name="c10">
            <text:p>8.6957</text:p>
          </table:table-cell>
          <table:table-cell office:value-type="float" office:value="-0.9825293329362661" table:style-name="c11">
            <text:p>-1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3:15</text:p>
          </table:table-cell>
          <table:table-cell office:value-type="float" office:value="8.684339999999999" table:style-name="c10">
            <text:p>8.6843</text:p>
          </table:table-cell>
          <table:table-cell office:value-type="string" table:style-name="c10">
            <text:p>2026-03-31 22:30</text:p>
          </table:table-cell>
          <table:table-cell office:value-type="float" office:value="8.73563" table:style-name="c10">
            <text:p>8.7356</text:p>
          </table:table-cell>
          <table:table-cell office:value-type="float" office:value="0.3895226998252177" table:style-name="c12">
            <text:p>+0.4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05:30</text:p>
          </table:table-cell>
          <table:table-cell office:value-type="float" office:value="8.92446" table:style-name="c10">
            <text:p>8.9245</text:p>
          </table:table-cell>
          <table:table-cell office:value-type="string" table:style-name="c10">
            <text:p>2026-04-01 13:45</text:p>
          </table:table-cell>
          <table:table-cell office:value-type="float" office:value="8.945525" table:style-name="c10">
            <text:p>8.9455</text:p>
          </table:table-cell>
          <table:table-cell office:value-type="float" office:value="0.03566485283144072" table:style-name="c12">
            <text:p>+0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9:15</text:p>
          </table:table-cell>
          <table:table-cell office:value-type="float" office:value="8.774384999999999" table:style-name="c10">
            <text:p>8.7744</text:p>
          </table:table-cell>
          <table:table-cell office:value-type="string" table:style-name="c10">
            <text:p>2026-04-04 23:30</text:p>
          </table:table-cell>
          <table:table-cell office:value-type="float" office:value="8.67566" table:style-name="c10">
            <text:p>8.6757</text:p>
          </table:table-cell>
          <table:table-cell office:value-type="float" office:value="-1.3228009067302038" table:style-name="c11">
            <text:p>-1.3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0:15</text:p>
          </table:table-cell>
          <table:table-cell office:value-type="float" office:value="8.894445" table:style-name="c10">
            <text:p>8.8944</text:p>
          </table:table-cell>
          <table:table-cell office:value-type="string" table:style-name="c10">
            <text:p>2026-04-06 17:15</text:p>
          </table:table-cell>
          <table:table-cell office:value-type="float" office:value="8.945525" table:style-name="c10">
            <text:p>8.9455</text:p>
          </table:table-cell>
          <table:table-cell office:value-type="float" office:value="0.3732430244382856" table:style-name="c12">
            <text:p>+0.4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08:45</text:p>
          </table:table-cell>
          <table:table-cell office:value-type="float" office:value="8.834415" table:style-name="c10">
            <text:p>8.8344</text:p>
          </table:table-cell>
          <table:table-cell office:value-type="string" table:style-name="c10">
            <text:p>2026-04-07 10:45</text:p>
          </table:table-cell>
          <table:table-cell office:value-type="float" office:value="8.73563" table:style-name="c10">
            <text:p>8.7356</text:p>
          </table:table-cell>
          <table:table-cell office:value-type="float" office:value="-1.3158485804662723" table:style-name="c11">
            <text:p>-1.3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3:00</text:p>
          </table:table-cell>
          <table:table-cell office:value-type="float" office:value="9.2046" table:style-name="c10">
            <text:p>9.2046</text:p>
          </table:table-cell>
          <table:table-cell office:value-type="string" table:style-name="c10">
            <text:p>2026-04-08 10:30</text:p>
          </table:table-cell>
          <table:table-cell office:value-type="float" office:value="9.215390000000001" table:style-name="c10">
            <text:p>9.2154</text:p>
          </table:table-cell>
          <table:table-cell office:value-type="float" office:value="-0.08291033407206161" table:style-name="c11">
            <text:p>-0.1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22:30</text:p>
          </table:table-cell>
          <table:table-cell office:value-type="float" office:value="9.10455" table:style-name="c10">
            <text:p>9.1045</text:p>
          </table:table-cell>
          <table:table-cell office:value-type="string" table:style-name="c10">
            <text:p>2026-04-10 00:00</text:p>
          </table:table-cell>
          <table:table-cell office:value-type="float" office:value="8.945525" table:style-name="c10">
            <text:p>8.9455</text:p>
          </table:table-cell>
          <table:table-cell office:value-type="float" office:value="-1.9430625838179894" table:style-name="c11">
            <text:p>-1.9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4:30</text:p>
          </table:table-cell>
          <table:table-cell office:value-type="float" office:value="9.124559999999999" table:style-name="c10">
            <text:p>9.1246</text:p>
          </table:table-cell>
          <table:table-cell office:value-type="string" table:style-name="c10">
            <text:p>2026-04-10 22:45</text:p>
          </table:table-cell>
          <table:table-cell office:value-type="float" office:value="9.085455" table:style-name="c10">
            <text:p>9.0855</text:p>
          </table:table-cell>
          <table:table-cell office:value-type="float" office:value="-0.6276119017793569" table:style-name="c11">
            <text:p>-0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7:00</text:p>
          </table:table-cell>
          <table:table-cell office:value-type="float" office:value="9.10455" table:style-name="c10">
            <text:p>9.1045</text:p>
          </table:table-cell>
          <table:table-cell office:value-type="string" table:style-name="c10">
            <text:p>2026-04-11 23:15</text:p>
          </table:table-cell>
          <table:table-cell office:value-type="float" office:value="9.065465000000001" table:style-name="c10">
            <text:p>9.0655</text:p>
          </table:table-cell>
          <table:table-cell office:value-type="float" office:value="-0.628332696673628" table:style-name="c11">
            <text:p>-0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2:15</text:p>
          </table:table-cell>
          <table:table-cell office:value-type="float" office:value="9.124559999999999" table:style-name="c10">
            <text:p>9.1246</text:p>
          </table:table-cell>
          <table:table-cell office:value-type="string" table:style-name="c10">
            <text:p>2026-04-14 05:45</text:p>
          </table:table-cell>
          <table:table-cell office:value-type="float" office:value="9.17541" table:style-name="c10">
            <text:p>9.1754</text:p>
          </table:table-cell>
          <table:table-cell office:value-type="float" office:value="0.35627312889607854" table:style-name="c12">
            <text:p>+0.4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00:30</text:p>
          </table:table-cell>
          <table:table-cell office:value-type="float" office:value="9.06453" table:style-name="c10">
            <text:p>9.0645</text:p>
          </table:table-cell>
          <table:table-cell office:value-type="string" table:style-name="c10">
            <text:p>2026-04-15 06:00</text:p>
          </table:table-cell>
          <table:table-cell office:value-type="float" office:value="9.03548" table:style-name="c10">
            <text:p>9.0355</text:p>
          </table:table-cell>
          <table:table-cell office:value-type="float" office:value="-0.5197392972388082" table:style-name="c11">
            <text:p>-0.5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7:30</text:p>
          </table:table-cell>
          <table:table-cell office:value-type="float" office:value="9.24462" table:style-name="c10">
            <text:p>9.2446</text:p>
          </table:table-cell>
          <table:table-cell office:value-type="string" table:style-name="c10">
            <text:p>2026-04-15 23:45</text:p>
          </table:table-cell>
          <table:table-cell office:value-type="float" office:value="9.225385000000001" table:style-name="c10">
            <text:p>9.2254</text:p>
          </table:table-cell>
          <table:table-cell office:value-type="float" office:value="-0.40755103633246526" table:style-name="c11">
            <text:p>-0.4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2:45</text:p>
          </table:table-cell>
          <table:table-cell office:value-type="float" office:value="9.334665" table:style-name="c10">
            <text:p>9.3347</text:p>
          </table:table-cell>
          <table:table-cell office:value-type="string" table:style-name="c10">
            <text:p>2026-04-16 09:15</text:p>
          </table:table-cell>
          <table:table-cell office:value-type="float" office:value="9.285355" table:style-name="c10">
            <text:p>9.2854</text:p>
          </table:table-cell>
          <table:table-cell office:value-type="float" office:value="-0.7270900953060377" table:style-name="c11">
            <text:p>-0.7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3:15</text:p>
          </table:table-cell>
          <table:table-cell office:value-type="float" office:value="9.414705" table:style-name="c10">
            <text:p>9.4147</text:p>
          </table:table-cell>
          <table:table-cell office:value-type="string" table:style-name="c10">
            <text:p>2026-04-16 14:30</text:p>
          </table:table-cell>
          <table:table-cell office:value-type="float" office:value="9.165415000000001" table:style-name="c10">
            <text:p>9.1654</text:p>
          </table:table-cell>
          <table:table-cell office:value-type="float" office:value="-2.842485925846827" table:style-name="c11">
            <text:p>-2.8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45</text:p>
          </table:table-cell>
          <table:table-cell office:value-type="float" office:value="9.42471" table:style-name="c10">
            <text:p>9.4247</text:p>
          </table:table-cell>
          <table:table-cell office:value-type="string" table:style-name="c10">
            <text:p>2026-04-17 01:30</text:p>
          </table:table-cell>
          <table:table-cell office:value-type="float" office:value="9.47526" table:style-name="c10">
            <text:p>9.4753</text:p>
          </table:table-cell>
          <table:table-cell office:value-type="float" office:value="0.33538385011315786" table:style-name="c12">
            <text:p>+0.3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7:15</text:p>
          </table:table-cell>
          <table:table-cell office:value-type="float" office:value="9.454724999999998" table:style-name="c10">
            <text:p>9.4547</text:p>
          </table:table-cell>
          <table:table-cell office:value-type="string" table:style-name="c10">
            <text:p>2026-04-17 07:30</text:p>
          </table:table-cell>
          <table:table-cell office:value-type="float" office:value="9.425285" table:style-name="c10">
            <text:p>9.4253</text:p>
          </table:table-cell>
          <table:table-cell office:value-type="float" office:value="-0.5106562561576045" table:style-name="c11">
            <text:p>-0.5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8:00</text:p>
          </table:table-cell>
          <table:table-cell office:value-type="float" office:value="9.474735" table:style-name="c10">
            <text:p>9.4747</text:p>
          </table:table-cell>
          <table:table-cell office:value-type="string" table:style-name="c10">
            <text:p>2026-04-17 18:45</text:p>
          </table:table-cell>
          <table:table-cell office:value-type="float" office:value="9.67516" table:style-name="c10">
            <text:p>9.6752</text:p>
          </table:table-cell>
          <table:table-cell office:value-type="float" office:value="1.911233983430649" table:style-name="c12">
            <text:p>+1.9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05:30</text:p>
          </table:table-cell>
          <table:table-cell office:value-type="float" office:value="9.414705" table:style-name="c10">
            <text:p>9.4147</text:p>
          </table:table-cell>
          <table:table-cell office:value-type="string" table:style-name="c10">
            <text:p>2026-04-26 21:15</text:p>
          </table:table-cell>
          <table:table-cell office:value-type="float" office:value="9.47526" table:style-name="c10">
            <text:p>9.4753</text:p>
          </table:table-cell>
          <table:table-cell office:value-type="float" office:value="0.44201018789225" table:style-name="c12">
            <text:p>+0.4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22:15</text:p>
          </table:table-cell>
          <table:table-cell office:value-type="float" office:value="9.494745" table:style-name="c10">
            <text:p>9.4947</text:p>
          </table:table-cell>
          <table:table-cell office:value-type="string" table:style-name="c10">
            <text:p>2026-04-26 22:30</text:p>
          </table:table-cell>
          <table:table-cell office:value-type="float" office:value="9.465265" table:style-name="c10">
            <text:p>9.4653</text:p>
          </table:table-cell>
          <table:table-cell office:value-type="float" office:value="-0.5097668735179139" table:style-name="c11">
            <text:p>-0.5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00</text:p>
          </table:table-cell>
          <table:table-cell office:value-type="float" office:value="9.394695" table:style-name="c10">
            <text:p>9.3947</text:p>
          </table:table-cell>
          <table:table-cell office:value-type="string" table:style-name="c10">
            <text:p>2026-04-29 12:30</text:p>
          </table:table-cell>
          <table:table-cell office:value-type="float" office:value="9.27536" table:style-name="c10">
            <text:p>9.2754</text:p>
          </table:table-cell>
          <table:table-cell office:value-type="float" office:value="-1.467598944297832" table:style-name="c11">
            <text:p>-1.5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14:00</text:p>
          </table:table-cell>
          <table:table-cell office:value-type="float" office:value="9.264629999999999" table:style-name="c10">
            <text:p>9.2646</text:p>
          </table:table-cell>
          <table:table-cell office:value-type="string" table:style-name="c10">
            <text:p>2026-05-01 18:45</text:p>
          </table:table-cell>
          <table:table-cell office:value-type="float" office:value="9.185405" table:style-name="c10">
            <text:p>9.1854</text:p>
          </table:table-cell>
          <table:table-cell office:value-type="float" office:value="-1.0533245752393672" table:style-name="c11">
            <text:p>-1.1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21:45</text:p>
          </table:table-cell>
          <table:table-cell office:value-type="float" office:value="9.214605" table:style-name="c10">
            <text:p>9.2146</text:p>
          </table:table-cell>
          <table:table-cell office:value-type="string" table:style-name="c10">
            <text:p>2026-05-03 00:45</text:p>
          </table:table-cell>
          <table:table-cell office:value-type="float" office:value="9.135430000000001" table:style-name="c10">
            <text:p>9.1354</text:p>
          </table:table-cell>
          <table:table-cell office:value-type="float" office:value="-1.057416184090365" table:style-name="c11">
            <text:p>-1.1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11:45</text:p>
          </table:table-cell>
          <table:table-cell office:value-type="float" office:value="9.18459" table:style-name="c10">
            <text:p>9.1846</text:p>
          </table:table-cell>
          <table:table-cell office:value-type="string" table:style-name="c10">
            <text:p>2026-05-03 18:00</text:p>
          </table:table-cell>
          <table:table-cell office:value-type="float" office:value="9.155420000000001" table:style-name="c10">
            <text:p>9.1554</text:p>
          </table:table-cell>
          <table:table-cell office:value-type="float" office:value="-0.5168623159008678" table:style-name="c11">
            <text:p>-0.5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22:15</text:p>
          </table:table-cell>
          <table:table-cell office:value-type="float" office:value="9.194595" table:style-name="c10">
            <text:p>9.1946</text:p>
          </table:table-cell>
          <table:table-cell office:value-type="string" table:style-name="c10">
            <text:p>2026-05-04 00:00</text:p>
          </table:table-cell>
          <table:table-cell office:value-type="float" office:value="9.125435000000001" table:style-name="c10">
            <text:p>9.1254</text:p>
          </table:table-cell>
          <table:table-cell office:value-type="float" office:value="-0.9505774269013334" table:style-name="c11">
            <text:p>-1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15</text:p>
          </table:table-cell>
          <table:table-cell office:value-type="float" office:value="9.274634999999998" table:style-name="c10">
            <text:p>9.2746</text:p>
          </table:table-cell>
          <table:table-cell office:value-type="string" table:style-name="c10">
            <text:p>2026-05-04 16:45</text:p>
          </table:table-cell>
          <table:table-cell office:value-type="float" office:value="9.405295" table:style-name="c10">
            <text:p>9.4053</text:p>
          </table:table-cell>
          <table:table-cell office:value-type="float" office:value="1.2060724254378208" table:style-name="c12">
            <text:p>+1.2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2:45</text:p>
          </table:table-cell>
          <table:table-cell office:value-type="float" office:value="9.50475" table:style-name="c10">
            <text:p>9.5047</text:p>
          </table:table-cell>
          <table:table-cell office:value-type="string" table:style-name="c10">
            <text:p>2026-05-06 02:45</text:p>
          </table:table-cell>
          <table:table-cell office:value-type="float" office:value="9.77511" table:style-name="c10">
            <text:p>9.7751</text:p>
          </table:table-cell>
          <table:table-cell office:value-type="float" office:value="2.638886400063134" table:style-name="c12">
            <text:p>+2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5:15</text:p>
          </table:table-cell>
          <table:table-cell office:value-type="float" office:value="10.025009999999998" table:style-name="c10">
            <text:p>10.025</text:p>
          </table:table-cell>
          <table:table-cell office:value-type="string" table:style-name="c10">
            <text:p>2026-05-07 10:30</text:p>
          </table:table-cell>
          <table:table-cell office:value-type="float" office:value="9.955020000000001" table:style-name="c10">
            <text:p>9.955</text:p>
          </table:table-cell>
          <table:table-cell office:value-type="float" office:value="-0.8966583073732326" table:style-name="c11">
            <text:p>-0.9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04:30</text:p>
          </table:table-cell>
          <table:table-cell office:value-type="float" office:value="9.894945" table:style-name="c10">
            <text:p>9.8949</text:p>
          </table:table-cell>
          <table:table-cell office:value-type="string" table:style-name="c10">
            <text:p>2026-05-08 06:00</text:p>
          </table:table-cell>
          <table:table-cell office:value-type="float" office:value="9.825085000000001" table:style-name="c10">
            <text:p>9.8251</text:p>
          </table:table-cell>
          <table:table-cell office:value-type="float" office:value="-0.9045057341399931" table:style-name="c11">
            <text:p>-0.9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7:45</text:p>
          </table:table-cell>
          <table:table-cell office:value-type="float" office:value="10.26513" table:style-name="c10">
            <text:p>10.265</text:p>
          </table:table-cell>
          <table:table-cell office:value-type="string" table:style-name="c10">
            <text:p>2026-05-09 07:15</text:p>
          </table:table-cell>
          <table:table-cell office:value-type="float" office:value="10.454770000000002" table:style-name="c10">
            <text:p>10.455</text:p>
          </table:table-cell>
          <table:table-cell office:value-type="float" office:value="1.6438263789158247" table:style-name="c12">
            <text:p>+1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18:15</text:p>
          </table:table-cell>
          <table:table-cell office:value-type="float" office:value="10.42521" table:style-name="c10">
            <text:p>10.425</text:p>
          </table:table-cell>
          <table:table-cell office:value-type="string" table:style-name="c10">
            <text:p>2026-05-09 22:30</text:p>
          </table:table-cell>
          <table:table-cell office:value-type="float" office:value="10.3948" table:style-name="c10">
            <text:p>10.395</text:p>
          </table:table-cell>
          <table:table-cell office:value-type="float" office:value="-0.49101366015648074" table:style-name="c11">
            <text:p>-0.5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7:45</text:p>
          </table:table-cell>
          <table:table-cell office:value-type="float" office:value="10.46523" table:style-name="c10">
            <text:p>10.465</text:p>
          </table:table-cell>
          <table:table-cell office:value-type="string" table:style-name="c10">
            <text:p>2026-05-10 21:15</text:p>
          </table:table-cell>
          <table:table-cell office:value-type="float" office:value="10.49475" table:style-name="c10">
            <text:p>10.495</text:p>
          </table:table-cell>
          <table:table-cell office:value-type="float" office:value="0.08161306297136406" table:style-name="c12">
            <text:p>+0.1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23:15</text:p>
          </table:table-cell>
          <table:table-cell office:value-type="float" office:value="10.74537" table:style-name="c10">
            <text:p>10.745</text:p>
          </table:table-cell>
          <table:table-cell office:value-type="string" table:style-name="c10">
            <text:p>2026-05-11 01:00</text:p>
          </table:table-cell>
          <table:table-cell office:value-type="float" office:value="10.654670000000001" table:style-name="c10">
            <text:p>10.655</text:p>
          </table:table-cell>
          <table:table-cell office:value-type="float" office:value="-1.0422971505867018" table:style-name="c11">
            <text:p>-1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01:30</text:p>
          </table:table-cell>
          <table:table-cell office:value-type="float" office:value="10.715355" table:style-name="c10">
            <text:p>10.715</text:p>
          </table:table-cell>
          <table:table-cell office:value-type="string" table:style-name="c10">
            <text:p>2026-05-11 01:45</text:p>
          </table:table-cell>
          <table:table-cell office:value-type="float" office:value="10.654670000000001" table:style-name="c10">
            <text:p>10.655</text:p>
          </table:table-cell>
          <table:table-cell office:value-type="float" office:value="-0.7651047056303817" table:style-name="c11">
            <text:p>-0.8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16:15</text:p>
          </table:table-cell>
          <table:table-cell office:value-type="float" office:value="10.64532" table:style-name="c10">
            <text:p>10.645</text:p>
          </table:table-cell>
          <table:table-cell office:value-type="string" table:style-name="c10">
            <text:p>2026-05-11 22:15</text:p>
          </table:table-cell>
          <table:table-cell office:value-type="float" office:value="10.584705" table:style-name="c10">
            <text:p>10.585</text:p>
          </table:table-cell>
          <table:table-cell office:value-type="float" office:value="-0.7681669061615826" table:style-name="c11">
            <text:p>-0.8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09:15</text:p>
          </table:table-cell>
          <table:table-cell office:value-type="float" office:value="10.72536" table:style-name="c10">
            <text:p>10.725</text:p>
          </table:table-cell>
          <table:table-cell office:value-type="string" table:style-name="c10">
            <text:p>2026-05-13 12:00</text:p>
          </table:table-cell>
          <table:table-cell office:value-type="float" office:value="10.484755000000002" table:style-name="c10">
            <text:p>10.485</text:p>
          </table:table-cell>
          <table:table-cell office:value-type="float" office:value="-2.4387435502864263" table:style-name="c11">
            <text:p>-2.4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8:30</text:p>
          </table:table-cell>
          <table:table-cell office:value-type="float" office:value="9.741868499999999" table:style-name="c10">
            <text:p>9.7419</text:p>
          </table:table-cell>
          <table:table-cell office:value-type="string" table:style-name="c10">
            <text:p>2026-05-21 09:15</text:p>
          </table:table-cell>
          <table:table-cell office:value-type="float" office:value="9.6821565" table:style-name="c10">
            <text:p>9.6822</text:p>
          </table:table-cell>
          <table:table-cell office:value-type="float" office:value="-0.8116166918440637" table:style-name="c11">
            <text:p>-0.8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5:30</text:p>
          </table:table-cell>
          <table:table-cell office:value-type="float" office:value="9.6838395" table:style-name="c10">
            <text:p>9.6838</text:p>
          </table:table-cell>
          <table:table-cell office:value-type="string" table:style-name="c10">
            <text:p>2026-05-21 23:30</text:p>
          </table:table-cell>
          <table:table-cell office:value-type="float" office:value="9.7061445" table:style-name="c10">
            <text:p>9.7061</text:p>
          </table:table-cell>
          <table:table-cell office:value-type="float" office:value="0.029971760111280332" table:style-name="c12">
            <text:p>+0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13:15</text:p>
          </table:table-cell>
          <table:table-cell office:value-type="float" office:value="10.0140045" table:style-name="c10">
            <text:p>10.014</text:p>
          </table:table-cell>
          <table:table-cell office:value-type="string" table:style-name="c10">
            <text:p>2026-05-22 15:00</text:p>
          </table:table-cell>
          <table:table-cell office:value-type="float" office:value="9.77511" table:style-name="c10">
            <text:p>9.7751</text:p>
          </table:table-cell>
          <table:table-cell office:value-type="float" office:value="-2.580735258207656" table:style-name="c11">
            <text:p>-2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4:30</text:p>
          </table:table-cell>
          <table:table-cell office:value-type="float" office:value="9.64482" table:style-name="c10">
            <text:p>9.6448</text:p>
          </table:table-cell>
          <table:table-cell office:value-type="string" table:style-name="c10">
            <text:p>2026-05-25 19:15</text:p>
          </table:table-cell>
          <table:table-cell office:value-type="float" office:value="9.564215500000001" table:style-name="c10">
            <text:p>9.5642</text:p>
          </table:table-cell>
          <table:table-cell office:value-type="float" office:value="-1.0339577802851552" table:style-name="c11">
            <text:p>-1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06:00</text:p>
          </table:table-cell>
          <table:table-cell office:value-type="float" office:value="9.530762999999999" table:style-name="c10">
            <text:p>9.5308</text:p>
          </table:table-cell>
          <table:table-cell office:value-type="string" table:style-name="c10">
            <text:p>2026-05-26 15:30</text:p>
          </table:table-cell>
          <table:table-cell office:value-type="float" office:value="9.500247500000002" table:style-name="c10">
            <text:p>9.5002</text:p>
          </table:table-cell>
          <table:table-cell office:value-type="float" office:value="-0.5194389447360725" table:style-name="c11">
            <text:p>-0.5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03:15</text:p>
          </table:table-cell>
          <table:table-cell office:value-type="float" office:value="9.186591" table:style-name="c10">
            <text:p>9.1866</text:p>
          </table:table-cell>
          <table:table-cell office:value-type="string" table:style-name="c10">
            <text:p>2026-06-01 05:15</text:p>
          </table:table-cell>
          <table:table-cell office:value-type="float" office:value="9.101447" table:style-name="c10">
            <text:p>9.1014</text:p>
          </table:table-cell>
          <table:table-cell office:value-type="float" office:value="-1.124876382904172" table:style-name="c11">
            <text:p>-1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30</text:p>
          </table:table-cell>
          <table:table-cell office:value-type="float" office:value="54.617295" table:style-name="c1">
            <text:p>54.617</text:p>
          </table:table-cell>
          <table:table-cell office:value-type="string" table:style-name="c1">
            <text:p>2026-03-11 23:45</text:p>
          </table:table-cell>
          <table:table-cell office:value-type="float" office:value="54.722625" table:style-name="c1">
            <text:p>54.723</text:p>
          </table:table-cell>
          <table:table-cell office:value-type="float" office:value="-0.007434508382364591" table:style-name="c14">
            <text:p>-0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9:45</text:p>
          </table:table-cell>
          <table:table-cell office:value-type="float" office:value="54.64731" table:style-name="c1">
            <text:p>54.647</text:p>
          </table:table-cell>
          <table:table-cell office:value-type="string" table:style-name="c1">
            <text:p>2026-03-12 14:30</text:p>
          </table:table-cell>
          <table:table-cell office:value-type="float" office:value="54.112930000000006" table:style-name="c1">
            <text:p>54.113</text:p>
          </table:table-cell>
          <table:table-cell office:value-type="float" office:value="-1.1758158765179605" table:style-name="c14">
            <text:p>-1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55.237604999999995" table:style-name="c1">
            <text:p>55.238</text:p>
          </table:table-cell>
          <table:table-cell office:value-type="string" table:style-name="c1">
            <text:p>2026-03-13 15:45</text:p>
          </table:table-cell>
          <table:table-cell office:value-type="float" office:value="55.402285000000006" table:style-name="c1">
            <text:p>55.402</text:p>
          </table:table-cell>
          <table:table-cell office:value-type="float" office:value="0.09763426977871248" table:style-name="c13">
            <text:p>+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00</text:p>
          </table:table-cell>
          <table:table-cell office:value-type="float" office:value="55.757864999999995" table:style-name="c1">
            <text:p>55.758</text:p>
          </table:table-cell>
          <table:table-cell office:value-type="string" table:style-name="c1">
            <text:p>2026-03-16 22:00</text:p>
          </table:table-cell>
          <table:table-cell office:value-type="float" office:value="58.660655" table:style-name="c1">
            <text:p>58.661</text:p>
          </table:table-cell>
          <table:table-cell office:value-type="float" office:value="4.995756832968756" table:style-name="c13">
            <text:p>+5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19:15</text:p>
          </table:table-cell>
          <table:table-cell office:value-type="float" office:value="56.108039999999995" table:style-name="c1">
            <text:p>56.108</text:p>
          </table:table-cell>
          <table:table-cell office:value-type="string" table:style-name="c1">
            <text:p>2026-03-21 22:30</text:p>
          </table:table-cell>
          <table:table-cell office:value-type="float" office:value="55.722125000000005" table:style-name="c1">
            <text:p>55.722</text:p>
          </table:table-cell>
          <table:table-cell office:value-type="float" office:value="-0.8863320263459484" table:style-name="c14">
            <text:p>-0.9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15:45</text:p>
          </table:table-cell>
          <table:table-cell office:value-type="float" office:value="55.837905" table:style-name="c1">
            <text:p>55.838</text:p>
          </table:table-cell>
          <table:table-cell office:value-type="string" table:style-name="c1">
            <text:p>2026-03-24 17:45</text:p>
          </table:table-cell>
          <table:table-cell office:value-type="float" office:value="55.362305000000006" table:style-name="c1">
            <text:p>55.362</text:p>
          </table:table-cell>
          <table:table-cell office:value-type="float" office:value="-1.0499485030733058" table:style-name="c14">
            <text:p>-1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8:45</text:p>
          </table:table-cell>
          <table:table-cell office:value-type="float" office:value="56.71834499999999" table:style-name="c1">
            <text:p>56.718</text:p>
          </table:table-cell>
          <table:table-cell office:value-type="string" table:style-name="c1">
            <text:p>2026-03-25 12:30</text:p>
          </table:table-cell>
          <table:table-cell office:value-type="float" office:value="56.31183000000001" table:style-name="c1">
            <text:p>56.312</text:p>
          </table:table-cell>
          <table:table-cell office:value-type="float" office:value="-0.9151930441023581" table:style-name="c14">
            <text:p>-0.9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15</text:p>
          </table:table-cell>
          <table:table-cell office:value-type="float" office:value="54.687329999999996" table:style-name="c1">
            <text:p>54.687</text:p>
          </table:table-cell>
          <table:table-cell office:value-type="string" table:style-name="c1">
            <text:p>2026-04-01 09:30</text:p>
          </table:table-cell>
          <table:table-cell office:value-type="float" office:value="54.05296" table:style-name="c1">
            <text:p>54.053</text:p>
          </table:table-cell>
          <table:table-cell office:value-type="float" office:value="-1.3575756341368317" table:style-name="c14">
            <text:p>-1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21:15</text:p>
          </table:table-cell>
          <table:table-cell office:value-type="float" office:value="53.446709999999996" table:style-name="c1">
            <text:p>53.447</text:p>
          </table:table-cell>
          <table:table-cell office:value-type="string" table:style-name="c1">
            <text:p>2026-04-04 00:30</text:p>
          </table:table-cell>
          <table:table-cell office:value-type="float" office:value="53.15341" table:style-name="c1">
            <text:p>53.153</text:p>
          </table:table-cell>
          <table:table-cell office:value-type="float" office:value="-0.7475739228663514" table:style-name="c14">
            <text:p>-0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3:15</text:p>
          </table:table-cell>
          <table:table-cell office:value-type="float" office:value="53.916945" table:style-name="c1">
            <text:p>53.917</text:p>
          </table:table-cell>
          <table:table-cell office:value-type="string" table:style-name="c1">
            <text:p>2026-04-06 07:30</text:p>
          </table:table-cell>
          <table:table-cell office:value-type="float" office:value="54.082945" table:style-name="c1">
            <text:p>54.083</text:p>
          </table:table-cell>
          <table:table-cell office:value-type="float" office:value="0.10736549139609419" table:style-name="c13">
            <text:p>+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45</text:p>
          </table:table-cell>
          <table:table-cell office:value-type="float" office:value="54.657315" table:style-name="c1">
            <text:p>54.657</text:p>
          </table:table-cell>
          <table:table-cell office:value-type="string" table:style-name="c1">
            <text:p>2026-04-08 11:45</text:p>
          </table:table-cell>
          <table:table-cell office:value-type="float" office:value="54.932520000000004" table:style-name="c1">
            <text:p>54.933</text:p>
          </table:table-cell>
          <table:table-cell office:value-type="float" office:value="0.3026033981362142" table:style-name="c13">
            <text:p>+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13:15</text:p>
          </table:table-cell>
          <table:table-cell office:value-type="float" office:value="55.32764999999999" table:style-name="c1">
            <text:p>55.328</text:p>
          </table:table-cell>
          <table:table-cell office:value-type="string" table:style-name="c1">
            <text:p>2026-04-08 14:30</text:p>
          </table:table-cell>
          <table:table-cell office:value-type="float" office:value="54.812580000000004" table:style-name="c1">
            <text:p>54.813</text:p>
          </table:table-cell>
          <table:table-cell office:value-type="float" office:value="-1.1289840566515719" table:style-name="c14">
            <text:p>-1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6:00</text:p>
          </table:table-cell>
          <table:table-cell office:value-type="float" office:value="54.737355" table:style-name="c1">
            <text:p>54.737</text:p>
          </table:table-cell>
          <table:table-cell office:value-type="string" table:style-name="c1">
            <text:p>2026-04-09 23:45</text:p>
          </table:table-cell>
          <table:table-cell office:value-type="float" office:value="54.46275500000001" table:style-name="c1">
            <text:p>54.463</text:p>
          </table:table-cell>
          <table:table-cell office:value-type="float" office:value="-0.7005655411098877" table:style-name="c14">
            <text:p>-0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2:45</text:p>
          </table:table-cell>
          <table:table-cell office:value-type="float" office:value="54.94746" table:style-name="c1">
            <text:p>54.947</text:p>
          </table:table-cell>
          <table:table-cell office:value-type="string" table:style-name="c1">
            <text:p>2026-04-10 23:00</text:p>
          </table:table-cell>
          <table:table-cell office:value-type="float" office:value="54.992490000000004" table:style-name="c1">
            <text:p>54.992</text:p>
          </table:table-cell>
          <table:table-cell office:value-type="float" office:value="-0.11811280723440509" table:style-name="c14">
            <text:p>-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7:00</text:p>
          </table:table-cell>
          <table:table-cell office:value-type="float" office:value="54.94746" table:style-name="c1">
            <text:p>54.947</text:p>
          </table:table-cell>
          <table:table-cell office:value-type="string" table:style-name="c1">
            <text:p>2026-04-11 23:45</text:p>
          </table:table-cell>
          <table:table-cell office:value-type="float" office:value="55.012480000000004" table:style-name="c1">
            <text:p>55.012</text:p>
          </table:table-cell>
          <table:table-cell office:value-type="float" office:value="-0.08180532370375415" table:style-name="c14">
            <text:p>-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3:45</text:p>
          </table:table-cell>
          <table:table-cell office:value-type="float" office:value="55.137555" table:style-name="c1">
            <text:p>55.138</text:p>
          </table:table-cell>
          <table:table-cell office:value-type="string" table:style-name="c1">
            <text:p>2026-04-14 18:45</text:p>
          </table:table-cell>
          <table:table-cell office:value-type="float" office:value="54.41278" table:style-name="c1">
            <text:p>54.413</text:p>
          </table:table-cell>
          <table:table-cell office:value-type="float" office:value="-1.511757543873693" table:style-name="c14">
            <text:p>-1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3:15</text:p>
          </table:table-cell>
          <table:table-cell office:value-type="float" office:value="54.74735999999999" table:style-name="c1">
            <text:p>54.747</text:p>
          </table:table-cell>
          <table:table-cell office:value-type="string" table:style-name="c1">
            <text:p>2026-04-15 23:45</text:p>
          </table:table-cell>
          <table:table-cell office:value-type="float" office:value="55.012480000000004" table:style-name="c1">
            <text:p>55.012</text:p>
          </table:table-cell>
          <table:table-cell office:value-type="float" office:value="0.2833927562534866" table:style-name="c13">
            <text:p>+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55.897935" table:style-name="c1">
            <text:p>55.898</text:p>
          </table:table-cell>
          <table:table-cell office:value-type="string" table:style-name="c1">
            <text:p>2026-04-17 01:45</text:p>
          </table:table-cell>
          <table:table-cell office:value-type="float" office:value="55.89204" table:style-name="c1">
            <text:p>55.892</text:p>
          </table:table-cell>
          <table:table-cell office:value-type="float" office:value="-0.21042492528569046" table:style-name="c14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45</text:p>
          </table:table-cell>
          <table:table-cell office:value-type="float" office:value="56.04801" table:style-name="c1">
            <text:p>56.048</text:p>
          </table:table-cell>
          <table:table-cell office:value-type="string" table:style-name="c1">
            <text:p>2026-04-17 18:15</text:p>
          </table:table-cell>
          <table:table-cell office:value-type="float" office:value="56.341815000000004" table:style-name="c1">
            <text:p>56.342</text:p>
          </table:table-cell>
          <table:table-cell office:value-type="float" office:value="0.3232544952354255" table:style-name="c13">
            <text:p>+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30</text:p>
          </table:table-cell>
          <table:table-cell office:value-type="float" office:value="56.058015" table:style-name="c1">
            <text:p>56.058</text:p>
          </table:table-cell>
          <table:table-cell office:value-type="string" table:style-name="c1">
            <text:p>2026-04-22 10:15</text:p>
          </table:table-cell>
          <table:table-cell office:value-type="float" office:value="55.782095000000005" table:style-name="c1">
            <text:p>55.782</text:p>
          </table:table-cell>
          <table:table-cell office:value-type="float" office:value="-0.6911204542383365" table:style-name="c14">
            <text:p>-0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1:15</text:p>
          </table:table-cell>
          <table:table-cell office:value-type="float" office:value="56.498234999999994" table:style-name="c1">
            <text:p>56.498</text:p>
          </table:table-cell>
          <table:table-cell office:value-type="string" table:style-name="c1">
            <text:p>2026-04-24 23:15</text:p>
          </table:table-cell>
          <table:table-cell office:value-type="float" office:value="56.441765000000004" table:style-name="c1">
            <text:p>56.442</text:p>
          </table:table-cell>
          <table:table-cell office:value-type="float" office:value="-0.2996502248875488" table:style-name="c14">
            <text:p>-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5:15</text:p>
          </table:table-cell>
          <table:table-cell office:value-type="float" office:value="56.158065" table:style-name="c1">
            <text:p>56.158</text:p>
          </table:table-cell>
          <table:table-cell office:value-type="string" table:style-name="c1">
            <text:p>2026-04-26 13:15</text:p>
          </table:table-cell>
          <table:table-cell office:value-type="float" office:value="56.09194" table:style-name="c1">
            <text:p>56.092</text:p>
          </table:table-cell>
          <table:table-cell office:value-type="float" office:value="-0.3174126246337061" table:style-name="c14">
            <text:p>-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57.318645" table:style-name="c1">
            <text:p>57.319</text:p>
          </table:table-cell>
          <table:table-cell office:value-type="string" table:style-name="c1">
            <text:p>2026-04-29 14:00</text:p>
          </table:table-cell>
          <table:table-cell office:value-type="float" office:value="56.19189" table:style-name="c1">
            <text:p>56.192</text:p>
          </table:table-cell>
          <table:table-cell office:value-type="float" office:value="-2.1617443819720306" table:style-name="c14">
            <text:p>-2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55.757864999999995" table:style-name="c1">
            <text:p>55.758</text:p>
          </table:table-cell>
          <table:table-cell office:value-type="string" table:style-name="c1">
            <text:p>2026-05-04 08:30</text:p>
          </table:table-cell>
          <table:table-cell office:value-type="float" office:value="55.762105000000005" table:style-name="c1">
            <text:p>55.762</text:p>
          </table:table-cell>
          <table:table-cell office:value-type="float" office:value="-0.19231089263369583" table:style-name="c14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15</text:p>
          </table:table-cell>
          <table:table-cell office:value-type="float" office:value="56.20809" table:style-name="c1">
            <text:p>56.208</text:p>
          </table:table-cell>
          <table:table-cell office:value-type="string" table:style-name="c1">
            <text:p>2026-05-06 14:00</text:p>
          </table:table-cell>
          <table:table-cell office:value-type="float" office:value="56.91153" table:style-name="c1">
            <text:p>56.912</text:p>
          </table:table-cell>
          <table:table-cell office:value-type="float" office:value="1.0490907119064197" table:style-name="c13">
            <text:p>+1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30</text:p>
          </table:table-cell>
          <table:table-cell office:value-type="float" office:value="56.76837" table:style-name="c1">
            <text:p>56.768</text:p>
          </table:table-cell>
          <table:table-cell office:value-type="string" table:style-name="c1">
            <text:p>2026-05-07 14:45</text:p>
          </table:table-cell>
          <table:table-cell office:value-type="float" office:value="56.3718" table:style-name="c1">
            <text:p>56.372</text:p>
          </table:table-cell>
          <table:table-cell office:value-type="float" office:value="-0.8970791801843347" table:style-name="c14">
            <text:p>-0.9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8:15</text:p>
          </table:table-cell>
          <table:table-cell office:value-type="float" office:value="56.72835" table:style-name="c1">
            <text:p>56.728</text:p>
          </table:table-cell>
          <table:table-cell office:value-type="string" table:style-name="c1">
            <text:p>2026-05-07 18:30</text:p>
          </table:table-cell>
          <table:table-cell office:value-type="float" office:value="56.601685" table:style-name="c1">
            <text:p>56.602</text:p>
          </table:table-cell>
          <table:table-cell office:value-type="float" office:value="-0.4227370764617655" table:style-name="c14">
            <text:p>-0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4:45</text:p>
          </table:table-cell>
          <table:table-cell office:value-type="float" office:value="57.348659999999995" table:style-name="c1">
            <text:p>57.349</text:p>
          </table:table-cell>
          <table:table-cell office:value-type="string" table:style-name="c1">
            <text:p>2026-05-09 07:00</text:p>
          </table:table-cell>
          <table:table-cell office:value-type="float" office:value="58.51073" table:style-name="c1">
            <text:p>58.511</text:p>
          </table:table-cell>
          <table:table-cell office:value-type="float" office:value="1.8223739678137285" table:style-name="c13">
            <text:p>+1.8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8:15</text:p>
          </table:table-cell>
          <table:table-cell office:value-type="float" office:value="58.749359999999996" table:style-name="c1">
            <text:p>58.749</text:p>
          </table:table-cell>
          <table:table-cell office:value-type="string" table:style-name="c1">
            <text:p>2026-05-10 21:00</text:p>
          </table:table-cell>
          <table:table-cell office:value-type="float" office:value="58.360805000000006" table:style-name="c1">
            <text:p>58.361</text:p>
          </table:table-cell>
          <table:table-cell office:value-type="float" office:value="-0.8599553241005364" table:style-name="c14">
            <text:p>-0.9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2:30</text:p>
          </table:table-cell>
          <table:table-cell office:value-type="float" office:value="59.68982999999999" table:style-name="c1">
            <text:p>59.69</text:p>
          </table:table-cell>
          <table:table-cell office:value-type="string" table:style-name="c1">
            <text:p>2026-05-11 02:15</text:p>
          </table:table-cell>
          <table:table-cell office:value-type="float" office:value="59.17040000000001" table:style-name="c1">
            <text:p>59.17</text:p>
          </table:table-cell>
          <table:table-cell office:value-type="float" office:value="-1.0683756840989211" table:style-name="c14">
            <text:p>-1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9:45</text:p>
          </table:table-cell>
          <table:table-cell office:value-type="float" office:value="58.90944" table:style-name="c1">
            <text:p>58.909</text:p>
          </table:table-cell>
          <table:table-cell office:value-type="string" table:style-name="c1">
            <text:p>2026-05-13 11:45</text:p>
          </table:table-cell>
          <table:table-cell office:value-type="float" office:value="58.320825000000006" table:style-name="c1">
            <text:p>58.321</text:p>
          </table:table-cell>
          <table:table-cell office:value-type="float" office:value="-1.1970888352953013" table:style-name="c14">
            <text:p>-1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8:15</text:p>
          </table:table-cell>
          <table:table-cell office:value-type="float" office:value="58.81939499999999" table:style-name="c1">
            <text:p>58.819</text:p>
          </table:table-cell>
          <table:table-cell office:value-type="string" table:style-name="c1">
            <text:p>2026-05-14 23:30</text:p>
          </table:table-cell>
          <table:table-cell office:value-type="float" office:value="58.1709" table:style-name="c1">
            <text:p>58.171</text:p>
          </table:table-cell>
          <table:table-cell office:value-type="float" office:value="-1.30021505508513" table:style-name="c14">
            <text:p>-1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5 07:15</text:p>
          </table:table-cell>
          <table:table-cell office:value-type="float" office:value="58.18907999999999" table:style-name="c1">
            <text:p>58.189</text:p>
          </table:table-cell>
          <table:table-cell office:value-type="string" table:style-name="c1">
            <text:p>2026-05-15 12:15</text:p>
          </table:table-cell>
          <table:table-cell office:value-type="float" office:value="57.92102500000001" table:style-name="c1">
            <text:p>57.921</text:p>
          </table:table-cell>
          <table:table-cell office:value-type="float" office:value="-0.6596411714620332" table:style-name="c14">
            <text:p>-0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7:45</text:p>
          </table:table-cell>
          <table:table-cell office:value-type="float" office:value="54.417195" table:style-name="c1">
            <text:p>54.417</text:p>
          </table:table-cell>
          <table:table-cell office:value-type="string" table:style-name="c1">
            <text:p>2026-05-22 18:45</text:p>
          </table:table-cell>
          <table:table-cell office:value-type="float" office:value="53.723125" table:style-name="c1">
            <text:p>53.723</text:p>
          </table:table-cell>
          <table:table-cell office:value-type="float" office:value="-1.4728111709451541" table:style-name="c14">
            <text:p>-1.5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06:45</text:p>
          </table:table-cell>
          <table:table-cell office:value-type="float" office:value="1.2876435" table:style-name="c10">
            <text:p>1.2876</text:p>
          </table:table-cell>
          <table:table-cell office:value-type="string" table:style-name="c10">
            <text:p>2026-03-05 12:00</text:p>
          </table:table-cell>
          <table:table-cell office:value-type="float" office:value="1.2903545" table:style-name="c10">
            <text:p>1.2904</text:p>
          </table:table-cell>
          <table:table-cell office:value-type="float" office:value="0.01021877208249311" table:style-name="c12">
            <text:p>+0.0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19:15</text:p>
          </table:table-cell>
          <table:table-cell office:value-type="float" office:value="1.282641" table:style-name="c10">
            <text:p>1.2826</text:p>
          </table:table-cell>
          <table:table-cell office:value-type="string" table:style-name="c10">
            <text:p>2026-03-05 19:30</text:p>
          </table:table-cell>
          <table:table-cell office:value-type="float" office:value="1.2683655" table:style-name="c10">
            <text:p>1.2684</text:p>
          </table:table-cell>
          <table:table-cell office:value-type="float" office:value="-1.3106522116866581" table:style-name="c11">
            <text:p>-1.3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6 13:45</text:p>
          </table:table-cell>
          <table:table-cell office:value-type="float" office:value="1.26063" table:style-name="c10">
            <text:p>1.2606</text:p>
          </table:table-cell>
          <table:table-cell office:value-type="string" table:style-name="c10">
            <text:p>2026-03-06 14:00</text:p>
          </table:table-cell>
          <table:table-cell office:value-type="float" office:value="1.2403795000000002" table:style-name="c10">
            <text:p>1.2404</text:p>
          </table:table-cell>
          <table:table-cell office:value-type="float" office:value="-1.8030681976868523" table:style-name="c11">
            <text:p>-1.8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1.328664" table:style-name="c10">
            <text:p>1.3287</text:p>
          </table:table-cell>
          <table:table-cell office:value-type="string" table:style-name="c10">
            <text:p>2026-03-10 18:15</text:p>
          </table:table-cell>
          <table:table-cell office:value-type="float" office:value="1.2913540000000001" table:style-name="c10">
            <text:p>1.2914</text:p>
          </table:table-cell>
          <table:table-cell office:value-type="float" office:value="-3.0023705501165177" table:style-name="c11">
            <text:p>-3.0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01:15</text:p>
          </table:table-cell>
          <table:table-cell office:value-type="float" office:value="1.298649" table:style-name="c10">
            <text:p>1.2986</text:p>
          </table:table-cell>
          <table:table-cell office:value-type="string" table:style-name="c10">
            <text:p>2026-03-11 02:00</text:p>
          </table:table-cell>
          <table:table-cell office:value-type="float" office:value="1.2803595" table:style-name="c10">
            <text:p>1.2804</text:p>
          </table:table-cell>
          <table:table-cell office:value-type="float" office:value="-1.6054329261024125" table:style-name="c11">
            <text:p>-1.6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17:45</text:p>
          </table:table-cell>
          <table:table-cell office:value-type="float" office:value="1.338669" table:style-name="c10">
            <text:p>1.3387</text:p>
          </table:table-cell>
          <table:table-cell office:value-type="string" table:style-name="c10">
            <text:p>2026-03-13 05:00</text:p>
          </table:table-cell>
          <table:table-cell office:value-type="float" office:value="1.3693150000000003" table:style-name="c10">
            <text:p>1.3693</text:p>
          </table:table-cell>
          <table:table-cell office:value-type="float" office:value="2.0848125500030568" table:style-name="c12">
            <text:p>+2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0:30</text:p>
          </table:table-cell>
          <table:table-cell office:value-type="float" office:value="1.352676" table:style-name="c10">
            <text:p>1.3527</text:p>
          </table:table-cell>
          <table:table-cell office:value-type="string" table:style-name="c10">
            <text:p>2026-03-13 10:45</text:p>
          </table:table-cell>
          <table:table-cell office:value-type="float" office:value="1.3533230000000003" table:style-name="c10">
            <text:p>1.3533</text:p>
          </table:table-cell>
          <table:table-cell office:value-type="float" office:value="-0.152164500368146" table:style-name="c11">
            <text:p>-0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9:30</text:p>
          </table:table-cell>
          <table:table-cell office:value-type="float" office:value="1.3516754999999998" table:style-name="c10">
            <text:p>1.3517</text:p>
          </table:table-cell>
          <table:table-cell office:value-type="string" table:style-name="c10">
            <text:p>2026-03-15 14:30</text:p>
          </table:table-cell>
          <table:table-cell office:value-type="float" office:value="1.3323335" table:style-name="c10">
            <text:p>1.3323</text:p>
          </table:table-cell>
          <table:table-cell office:value-type="float" office:value="-1.6280042559400965" table:style-name="c11">
            <text:p>-1.6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30</text:p>
          </table:table-cell>
          <table:table-cell office:value-type="float" office:value="1.3816905" table:style-name="c10">
            <text:p>1.3817</text:p>
          </table:table-cell>
          <table:table-cell office:value-type="string" table:style-name="c10">
            <text:p>2026-03-16 09:00</text:p>
          </table:table-cell>
          <table:table-cell office:value-type="float" office:value="1.3733130000000002" table:style-name="c10">
            <text:p>1.3733</text:p>
          </table:table-cell>
          <table:table-cell office:value-type="float" office:value="-0.805010433740383" table:style-name="c11">
            <text:p>-0.8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3:30</text:p>
          </table:table-cell>
          <table:table-cell office:value-type="float" office:value="1.4127059999999998" table:style-name="c10">
            <text:p>1.4127</text:p>
          </table:table-cell>
          <table:table-cell office:value-type="string" table:style-name="c10">
            <text:p>2026-03-17 02:30</text:p>
          </table:table-cell>
          <table:table-cell office:value-type="float" office:value="1.4582705000000002" table:style-name="c10">
            <text:p>1.4583</text:p>
          </table:table-cell>
          <table:table-cell office:value-type="float" office:value="3.0189874800914174" table:style-name="c12">
            <text:p>+3.0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07:15</text:p>
          </table:table-cell>
          <table:table-cell office:value-type="float" office:value="1.4627309999999998" table:style-name="c10">
            <text:p>1.4627</text:p>
          </table:table-cell>
          <table:table-cell office:value-type="string" table:style-name="c10">
            <text:p>2026-03-17 07:30</text:p>
          </table:table-cell>
          <table:table-cell office:value-type="float" office:value="1.4612690000000002" table:style-name="c10">
            <text:p>1.4613</text:p>
          </table:table-cell>
          <table:table-cell office:value-type="float" office:value="-0.2996502248875488" table:style-name="c11">
            <text:p>-0.3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08:00</text:p>
          </table:table-cell>
          <table:table-cell office:value-type="float" office:value="1.4627309999999998" table:style-name="c10">
            <text:p>1.4627</text:p>
          </table:table-cell>
          <table:table-cell office:value-type="string" table:style-name="c10">
            <text:p>2026-03-17 10:15</text:p>
          </table:table-cell>
          <table:table-cell office:value-type="float" office:value="1.4482755" table:style-name="c10">
            <text:p>1.4483</text:p>
          </table:table-cell>
          <table:table-cell office:value-type="float" office:value="-1.1861786428604804" table:style-name="c11">
            <text:p>-1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21:00</text:p>
          </table:table-cell>
          <table:table-cell office:value-type="float" office:value="1.322661" table:style-name="c10">
            <text:p>1.3227</text:p>
          </table:table-cell>
          <table:table-cell office:value-type="string" table:style-name="c10">
            <text:p>2026-03-24 00:30</text:p>
          </table:table-cell>
          <table:table-cell office:value-type="float" office:value="1.3063465" table:style-name="c10">
            <text:p>1.3063</text:p>
          </table:table-cell>
          <table:table-cell office:value-type="float" office:value="-1.4308947382209003" table:style-name="c11">
            <text:p>-1.4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8:30</text:p>
          </table:table-cell>
          <table:table-cell office:value-type="float" office:value="1.214607" table:style-name="c10">
            <text:p>1.2146</text:p>
          </table:table-cell>
          <table:table-cell office:value-type="string" table:style-name="c10">
            <text:p>2026-03-30 14:00</text:p>
          </table:table-cell>
          <table:table-cell office:value-type="float" office:value="1.1924035000000002" table:style-name="c10">
            <text:p>1.1924</text:p>
          </table:table-cell>
          <table:table-cell office:value-type="float" office:value="-2.0242855999100806" table:style-name="c11">
            <text:p>-2.0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4:30</text:p>
          </table:table-cell>
          <table:table-cell office:value-type="float" office:value="1.1965979999999998" table:style-name="c10">
            <text:p>1.1966</text:p>
          </table:table-cell>
          <table:table-cell office:value-type="string" table:style-name="c10">
            <text:p>2026-03-31 21:15</text:p>
          </table:table-cell>
          <table:table-cell office:value-type="float" office:value="1.1784105" table:style-name="c10">
            <text:p>1.1784</text:p>
          </table:table-cell>
          <table:table-cell office:value-type="float" office:value="-1.7167956648347804" table:style-name="c11">
            <text:p>-1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05:30</text:p>
          </table:table-cell>
          <table:table-cell office:value-type="float" office:value="1.2086039999999998" table:style-name="c10">
            <text:p>1.2086</text:p>
          </table:table-cell>
          <table:table-cell office:value-type="string" table:style-name="c10">
            <text:p>2026-04-01 10:45</text:p>
          </table:table-cell>
          <table:table-cell office:value-type="float" office:value="1.203398" table:style-name="c10">
            <text:p>1.2034</text:p>
          </table:table-cell>
          <table:table-cell office:value-type="float" office:value="-0.629783833414399" table:style-name="c11">
            <text:p>-0.6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12:45</text:p>
          </table:table-cell>
          <table:table-cell office:value-type="float" office:value="1.2276135" table:style-name="c10">
            <text:p>1.2276</text:p>
          </table:table-cell>
          <table:table-cell office:value-type="string" table:style-name="c10">
            <text:p>2026-04-01 15:45</text:p>
          </table:table-cell>
          <table:table-cell office:value-type="float" office:value="1.2043975000000002" table:style-name="c10">
            <text:p>1.2044</text:p>
          </table:table-cell>
          <table:table-cell office:value-type="float" office:value="-2.087268558263633" table:style-name="c11">
            <text:p>-2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2 00:45</text:p>
          </table:table-cell>
          <table:table-cell office:value-type="float" office:value="1.2056025" table:style-name="c10">
            <text:p>1.2056</text:p>
          </table:table-cell>
          <table:table-cell office:value-type="string" table:style-name="c10">
            <text:p>2026-04-02 01:00</text:p>
          </table:table-cell>
          <table:table-cell office:value-type="float" office:value="1.2003995" table:style-name="c10">
            <text:p>1.2004</text:p>
          </table:table-cell>
          <table:table-cell office:value-type="float" office:value="-0.6306057428132172" table:style-name="c11">
            <text:p>-0.6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1:15</text:p>
          </table:table-cell>
          <table:table-cell office:value-type="float" office:value="1.236618" table:style-name="c10">
            <text:p>1.2366</text:p>
          </table:table-cell>
          <table:table-cell office:value-type="string" table:style-name="c10">
            <text:p>2026-04-04 22:00</text:p>
          </table:table-cell>
          <table:table-cell office:value-type="float" office:value="1.2613690000000002" table:style-name="c10">
            <text:p>1.2614</text:p>
          </table:table-cell>
          <table:table-cell office:value-type="float" office:value="1.7976063237798767" table:style-name="c12">
            <text:p>+1.8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5 22:45</text:p>
          </table:table-cell>
          <table:table-cell office:value-type="float" office:value="1.238619" table:style-name="c10">
            <text:p>1.2386</text:p>
          </table:table-cell>
          <table:table-cell office:value-type="string" table:style-name="c10">
            <text:p>2026-04-05 23:00</text:p>
          </table:table-cell>
          <table:table-cell office:value-type="float" office:value="1.2423785000000003" table:style-name="c10">
            <text:p>1.2424</text:p>
          </table:table-cell>
          <table:table-cell office:value-type="float" office:value="0.10301677743522752" table:style-name="c12">
            <text:p>+0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5 23:15</text:p>
          </table:table-cell>
          <table:table-cell office:value-type="float" office:value="1.2436215" table:style-name="c10">
            <text:p>1.2436</text:p>
          </table:table-cell>
          <table:table-cell office:value-type="string" table:style-name="c10">
            <text:p>2026-04-06 14:30</text:p>
          </table:table-cell>
          <table:table-cell office:value-type="float" office:value="1.27936" table:style-name="c10">
            <text:p>1.2794</text:p>
          </table:table-cell>
          <table:table-cell office:value-type="float" office:value="2.668099527066703" table:style-name="c12">
            <text:p>+2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2:00</text:p>
          </table:table-cell>
          <table:table-cell office:value-type="float" office:value="1.3076534999999998" table:style-name="c10">
            <text:p>1.3077</text:p>
          </table:table-cell>
          <table:table-cell office:value-type="string" table:style-name="c10">
            <text:p>2026-04-08 15:15</text:p>
          </table:table-cell>
          <table:table-cell office:value-type="float" office:value="1.349325" table:style-name="c10">
            <text:p>1.3493</text:p>
          </table:table-cell>
          <table:table-cell office:value-type="float" office:value="2.980468398165126" table:style-name="c12">
            <text:p>+3.0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30</text:p>
          </table:table-cell>
          <table:table-cell office:value-type="float" office:value="1.362681" table:style-name="c10">
            <text:p>1.3627</text:p>
          </table:table-cell>
          <table:table-cell office:value-type="string" table:style-name="c10">
            <text:p>2026-04-10 03:00</text:p>
          </table:table-cell>
          <table:table-cell office:value-type="float" office:value="1.35932" table:style-name="c10">
            <text:p>1.3593</text:p>
          </table:table-cell>
          <table:table-cell office:value-type="float" office:value="-0.44605308799343657" table:style-name="c11">
            <text:p>-0.4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5:30</text:p>
          </table:table-cell>
          <table:table-cell office:value-type="float" office:value="1.3656825" table:style-name="c10">
            <text:p>1.3657</text:p>
          </table:table-cell>
          <table:table-cell office:value-type="string" table:style-name="c10">
            <text:p>2026-04-12 00:30</text:p>
          </table:table-cell>
          <table:table-cell office:value-type="float" office:value="1.3883055000000002" table:style-name="c10">
            <text:p>1.3883</text:p>
          </table:table-cell>
          <table:table-cell office:value-type="float" office:value="1.4533229579716034" table:style-name="c12">
            <text:p>+1.5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01:15</text:p>
          </table:table-cell>
          <table:table-cell office:value-type="float" office:value="1.4197095" table:style-name="c10">
            <text:p>1.4197</text:p>
          </table:table-cell>
          <table:table-cell office:value-type="string" table:style-name="c10">
            <text:p>2026-04-14 05:30</text:p>
          </table:table-cell>
          <table:table-cell office:value-type="float" office:value="1.405297" table:style-name="c10">
            <text:p>1.4053</text:p>
          </table:table-cell>
          <table:table-cell office:value-type="float" office:value="-1.2130431403748365" table:style-name="c11">
            <text:p>-1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4:00</text:p>
          </table:table-cell>
          <table:table-cell office:value-type="float" office:value="1.4297145" table:style-name="c10">
            <text:p>1.4297</text:p>
          </table:table-cell>
          <table:table-cell office:value-type="string" table:style-name="c10">
            <text:p>2026-04-16 09:00</text:p>
          </table:table-cell>
          <table:table-cell office:value-type="float" office:value="1.4182905000000001" table:style-name="c10">
            <text:p>1.4183</text:p>
          </table:table-cell>
          <table:table-cell office:value-type="float" office:value="-0.997343365371195" table:style-name="c11">
            <text:p>-1.0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45</text:p>
          </table:table-cell>
          <table:table-cell office:value-type="float" office:value="1.4137065" table:style-name="c10">
            <text:p>1.4137</text:p>
          </table:table-cell>
          <table:table-cell office:value-type="string" table:style-name="c10">
            <text:p>2026-04-16 16:00</text:p>
          </table:table-cell>
          <table:table-cell office:value-type="float" office:value="1.415292" table:style-name="c10">
            <text:p>1.4153</text:p>
          </table:table-cell>
          <table:table-cell office:value-type="float" office:value="-0.08797219988732063" table:style-name="c11">
            <text:p>-0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6:15</text:p>
          </table:table-cell>
          <table:table-cell office:value-type="float" office:value="1.4097045" table:style-name="c10">
            <text:p>1.4097</text:p>
          </table:table-cell>
          <table:table-cell office:value-type="string" table:style-name="c10">
            <text:p>2026-04-16 16:45</text:p>
          </table:table-cell>
          <table:table-cell office:value-type="float" office:value="1.395302" table:style-name="c10">
            <text:p>1.3953</text:p>
          </table:table-cell>
          <table:table-cell office:value-type="float" office:value="-1.2195257018758232" table:style-name="c11">
            <text:p>-1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6:45</text:p>
          </table:table-cell>
          <table:table-cell office:value-type="float" office:value="1.4197095" table:style-name="c10">
            <text:p>1.4197</text:p>
          </table:table-cell>
          <table:table-cell office:value-type="string" table:style-name="c10">
            <text:p>2026-04-17 07:00</text:p>
          </table:table-cell>
          <table:table-cell office:value-type="float" office:value="1.417291" table:style-name="c10">
            <text:p>1.4173</text:p>
          </table:table-cell>
          <table:table-cell office:value-type="float" office:value="-0.36991121838656493" table:style-name="c11">
            <text:p>-0.4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7:30</text:p>
          </table:table-cell>
          <table:table-cell office:value-type="float" office:value="1.4197095" table:style-name="c10">
            <text:p>1.4197</text:p>
          </table:table-cell>
          <table:table-cell office:value-type="string" table:style-name="c10">
            <text:p>2026-04-17 10:45</text:p>
          </table:table-cell>
          <table:table-cell office:value-type="float" office:value="1.3763115000000001" table:style-name="c10">
            <text:p>1.3763</text:p>
          </table:table-cell>
          <table:table-cell office:value-type="float" office:value="-3.2506119518464716" table:style-name="c11">
            <text:p>-3.3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3:15</text:p>
          </table:table-cell>
          <table:table-cell office:value-type="float" office:value="1.4127059999999998" table:style-name="c10">
            <text:p>1.4127</text:p>
          </table:table-cell>
          <table:table-cell office:value-type="string" table:style-name="c10">
            <text:p>2026-04-17 13:30</text:p>
          </table:table-cell>
          <table:table-cell office:value-type="float" office:value="1.4142925000000002" table:style-name="c10">
            <text:p>1.4143</text:p>
          </table:table-cell>
          <table:table-cell office:value-type="float" office:value="-0.08782228627184363" table:style-name="c11">
            <text:p>-0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3:45</text:p>
          </table:table-cell>
          <table:table-cell office:value-type="float" office:value="1.4227109999999998" table:style-name="c10">
            <text:p>1.4227</text:p>
          </table:table-cell>
          <table:table-cell office:value-type="string" table:style-name="c10">
            <text:p>2026-04-17 22:15</text:p>
          </table:table-cell>
          <table:table-cell office:value-type="float" office:value="1.4162915" table:style-name="c10">
            <text:p>1.4163</text:p>
          </table:table-cell>
          <table:table-cell office:value-type="float" office:value="-0.6502140426622116" table:style-name="c11">
            <text:p>-0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5:15</text:p>
          </table:table-cell>
          <table:table-cell office:value-type="float" office:value="1.368684" table:style-name="c10">
            <text:p>1.3687</text:p>
          </table:table-cell>
          <table:table-cell office:value-type="string" table:style-name="c10">
            <text:p>2026-04-21 13:15</text:p>
          </table:table-cell>
          <table:table-cell office:value-type="float" office:value="1.3693150000000003" table:style-name="c10">
            <text:p>1.3693</text:p>
          </table:table-cell>
          <table:table-cell office:value-type="float" office:value="-0.15388947960227606" table:style-name="c11">
            <text:p>-0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2:30</text:p>
          </table:table-cell>
          <table:table-cell office:value-type="float" office:value="1.4006999999999998" table:style-name="c10">
            <text:p>1.4007</text:p>
          </table:table-cell>
          <table:table-cell office:value-type="string" table:style-name="c10">
            <text:p>2026-04-22 17:00</text:p>
          </table:table-cell>
          <table:table-cell office:value-type="float" office:value="1.417291" table:style-name="c10">
            <text:p>1.4173</text:p>
          </table:table-cell>
          <table:table-cell office:value-type="float" office:value="0.9822114150781935" table:style-name="c12">
            <text:p>+1.0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12:15</text:p>
          </table:table-cell>
          <table:table-cell office:value-type="float" office:value="1.3946969999999999" table:style-name="c10">
            <text:p>1.3947</text:p>
          </table:table-cell>
          <table:table-cell office:value-type="string" table:style-name="c10">
            <text:p>2026-04-23 18:00</text:p>
          </table:table-cell>
          <table:table-cell office:value-type="float" office:value="1.3903045" table:style-name="c10">
            <text:p>1.3903</text:p>
          </table:table-cell>
          <table:table-cell office:value-type="float" office:value="-0.5142133879616595" table:style-name="c11">
            <text:p>-0.5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21:15</text:p>
          </table:table-cell>
          <table:table-cell office:value-type="float" office:value="1.4006999999999998" table:style-name="c10">
            <text:p>1.4007</text:p>
          </table:table-cell>
          <table:table-cell office:value-type="string" table:style-name="c10">
            <text:p>2026-04-24 15:15</text:p>
          </table:table-cell>
          <table:table-cell office:value-type="float" office:value="1.409295" table:style-name="c10">
            <text:p>1.4093</text:p>
          </table:table-cell>
          <table:table-cell office:value-type="float" office:value="0.41249513064898213" table:style-name="c12">
            <text:p>+0.4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20:15</text:p>
          </table:table-cell>
          <table:table-cell office:value-type="float" office:value="1.2946469999999999" table:style-name="c10">
            <text:p>1.2946</text:p>
          </table:table-cell>
          <table:table-cell office:value-type="string" table:style-name="c10">
            <text:p>2026-05-06 20:15</text:p>
          </table:table-cell>
          <table:table-cell office:value-type="float" office:value="1.5222385" table:style-name="c10">
            <text:p>1.5222</text:p>
          </table:table-cell>
          <table:table-cell office:value-type="float" office:value="17.344383854324796" table:style-name="c12">
            <text:p>+17.3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08:00</text:p>
          </table:table-cell>
          <table:table-cell office:value-type="float" office:value="1.5357674999999997" table:style-name="c10">
            <text:p>1.5358</text:p>
          </table:table-cell>
          <table:table-cell office:value-type="string" table:style-name="c10">
            <text:p>2026-05-08 13:45</text:p>
          </table:table-cell>
          <table:table-cell office:value-type="float" office:value="1.5262365" table:style-name="c10">
            <text:p>1.5262</text:p>
          </table:table-cell>
          <table:table-cell office:value-type="float" office:value="-0.8192611683408901" table:style-name="c11">
            <text:p>-0.8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5:00</text:p>
          </table:table-cell>
          <table:table-cell office:value-type="float" office:value="1.5757875" table:style-name="c10">
            <text:p>1.5758</text:p>
          </table:table-cell>
          <table:table-cell office:value-type="string" table:style-name="c10">
            <text:p>2026-05-08 18:00</text:p>
          </table:table-cell>
          <table:table-cell office:value-type="float" office:value="1.5442275" table:style-name="c10">
            <text:p>1.5442</text:p>
          </table:table-cell>
          <table:table-cell office:value-type="float" office:value="-2.198704506318272" table:style-name="c11">
            <text:p>-2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23:00</text:p>
          </table:table-cell>
          <table:table-cell office:value-type="float" office:value="1.5937964999999998" table:style-name="c10">
            <text:p>1.5938</text:p>
          </table:table-cell>
          <table:table-cell office:value-type="string" table:style-name="c10">
            <text:p>2026-05-09 04:30</text:p>
          </table:table-cell>
          <table:table-cell office:value-type="float" office:value="1.5802095" table:style-name="c10">
            <text:p>1.5802</text:p>
          </table:table-cell>
          <table:table-cell office:value-type="float" office:value="-1.0506886412725902" table:style-name="c11">
            <text:p>-1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18:30</text:p>
          </table:table-cell>
          <table:table-cell office:value-type="float" office:value="1.574787" table:style-name="c10">
            <text:p>1.5748</text:p>
          </table:table-cell>
          <table:table-cell office:value-type="string" table:style-name="c10">
            <text:p>2026-05-09 19:00</text:p>
          </table:table-cell>
          <table:table-cell office:value-type="float" office:value="1.5582205" table:style-name="c10">
            <text:p>1.5582</text:p>
          </table:table-cell>
          <table:table-cell office:value-type="float" office:value="-1.2497806229985309" table:style-name="c11">
            <text:p>-1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8:45</text:p>
          </table:table-cell>
          <table:table-cell office:value-type="float" office:value="1.604802" table:style-name="c10">
            <text:p>1.6048</text:p>
          </table:table-cell>
          <table:table-cell office:value-type="string" table:style-name="c10">
            <text:p>2026-05-10 21:00</text:p>
          </table:table-cell>
          <table:table-cell office:value-type="float" office:value="1.5472260000000002" table:style-name="c10">
            <text:p>1.5472</text:p>
          </table:table-cell>
          <table:table-cell office:value-type="float" office:value="-3.78046044147502" table:style-name="c11">
            <text:p>-3.8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07:45</text:p>
          </table:table-cell>
          <table:table-cell office:value-type="float" office:value="1.552776" table:style-name="c10">
            <text:p>1.5528</text:p>
          </table:table-cell>
          <table:table-cell office:value-type="string" table:style-name="c10">
            <text:p>2026-05-11 12:15</text:p>
          </table:table-cell>
          <table:table-cell office:value-type="float" office:value="1.5382305" table:style-name="c10">
            <text:p>1.5382</text:p>
          </table:table-cell>
          <table:table-cell office:value-type="float" office:value="-1.1347691340862998" table:style-name="c11">
            <text:p>-1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2 15:15</text:p>
          </table:table-cell>
          <table:table-cell office:value-type="float" office:value="1.576788" table:style-name="c10">
            <text:p>1.5768</text:p>
          </table:table-cell>
          <table:table-cell office:value-type="string" table:style-name="c10">
            <text:p>2026-05-12 15:30</text:p>
          </table:table-cell>
          <table:table-cell office:value-type="float" office:value="1.549225" table:style-name="c10">
            <text:p>1.5492</text:p>
          </table:table-cell>
          <table:table-cell office:value-type="float" office:value="-1.9444529496038698" table:style-name="c11">
            <text:p>-1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2 19:00</text:p>
          </table:table-cell>
          <table:table-cell office:value-type="float" office:value="1.6238115" table:style-name="c10">
            <text:p>1.6238</text:p>
          </table:table-cell>
          <table:table-cell office:value-type="string" table:style-name="c10">
            <text:p>2026-05-13 06:00</text:p>
          </table:table-cell>
          <table:table-cell office:value-type="float" office:value="1.63918" table:style-name="c10">
            <text:p>1.6392</text:p>
          </table:table-cell>
          <table:table-cell office:value-type="float" office:value="0.7446541165646581" table:style-name="c12">
            <text:p>+0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18:15</text:p>
          </table:table-cell>
          <table:table-cell office:value-type="float" office:value="1.5937964999999998" table:style-name="c10">
            <text:p>1.5938</text:p>
          </table:table-cell>
          <table:table-cell office:value-type="string" table:style-name="c10">
            <text:p>2026-05-13 21:00</text:p>
          </table:table-cell>
          <table:table-cell office:value-type="float" office:value="1.581209" table:style-name="c10">
            <text:p>1.5812</text:p>
          </table:table-cell>
          <table:table-cell office:value-type="float" office:value="-0.9881021065738183" table:style-name="c11">
            <text:p>-1.0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4 02:15</text:p>
          </table:table-cell>
          <table:table-cell office:value-type="float" office:value="1.610805" table:style-name="c10">
            <text:p>1.6108</text:p>
          </table:table-cell>
          <table:table-cell office:value-type="string" table:style-name="c10">
            <text:p>2026-05-14 03:15</text:p>
          </table:table-cell>
          <table:table-cell office:value-type="float" office:value="1.55922" table:style-name="c10">
            <text:p>1.5592</text:p>
          </table:table-cell>
          <table:table-cell office:value-type="float" office:value="-3.395934379394139" table:style-name="c11">
            <text:p>-3.4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4 16:15</text:p>
          </table:table-cell>
          <table:table-cell office:value-type="float" office:value="1.6278134999999998" table:style-name="c10">
            <text:p>1.6278</text:p>
          </table:table-cell>
          <table:table-cell office:value-type="string" table:style-name="c10">
            <text:p>2026-05-14 19:30</text:p>
          </table:table-cell>
          <table:table-cell office:value-type="float" office:value="1.5842075" table:style-name="c10">
            <text:p>1.5842</text:p>
          </table:table-cell>
          <table:table-cell office:value-type="float" office:value="-2.8733531692973324" table:style-name="c11">
            <text:p>-2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7 21:15</text:p>
          </table:table-cell>
          <table:table-cell office:value-type="float" office:value="1.538769" table:style-name="c10">
            <text:p>1.5388</text:p>
          </table:table-cell>
          <table:table-cell office:value-type="string" table:style-name="c10">
            <text:p>2026-05-17 22:30</text:p>
          </table:table-cell>
          <table:table-cell office:value-type="float" office:value="1.511244" table:style-name="c10">
            <text:p>1.5112</text:p>
          </table:table-cell>
          <table:table-cell office:value-type="float" office:value="-1.9850917685500513" table:style-name="c11">
            <text:p>-2.0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9 07:15</text:p>
          </table:table-cell>
          <table:table-cell office:value-type="float" office:value="1.6438214999999998" table:style-name="c10">
            <text:p>1.6438</text:p>
          </table:table-cell>
          <table:table-cell office:value-type="string" table:style-name="c10">
            <text:p>2026-05-19 10:45</text:p>
          </table:table-cell>
          <table:table-cell office:value-type="float" office:value="1.6101945" table:style-name="c10">
            <text:p>1.6102</text:p>
          </table:table-cell>
          <table:table-cell office:value-type="float" office:value="-2.2414707926316613" table:style-name="c11">
            <text:p>-2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0 05:30</text:p>
          </table:table-cell>
          <table:table-cell office:value-type="float" office:value="1.622811" table:style-name="c10">
            <text:p>1.6228</text:p>
          </table:table-cell>
          <table:table-cell office:value-type="string" table:style-name="c10">
            <text:p>2026-05-20 12:45</text:p>
          </table:table-cell>
          <table:table-cell office:value-type="float" office:value="1.631184" table:style-name="c10">
            <text:p>1.6312</text:p>
          </table:table-cell>
          <table:table-cell office:value-type="float" office:value="0.31502517446577727" table:style-name="c12">
            <text:p>+0.3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0 13:30</text:p>
          </table:table-cell>
          <table:table-cell office:value-type="float" office:value="1.6538264999999999" table:style-name="c10">
            <text:p>1.6538</text:p>
          </table:table-cell>
          <table:table-cell office:value-type="string" table:style-name="c10">
            <text:p>2026-05-21 07:15</text:p>
          </table:table-cell>
          <table:table-cell office:value-type="float" office:value="1.7091450000000001" table:style-name="c10">
            <text:p>1.7091</text:p>
          </table:table-cell>
          <table:table-cell office:value-type="float" office:value="3.138292870806003" table:style-name="c12">
            <text:p>+3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8:30</text:p>
          </table:table-cell>
          <table:table-cell office:value-type="float" office:value="1.7648819999999998" table:style-name="c10">
            <text:p>1.7649</text:p>
          </table:table-cell>
          <table:table-cell office:value-type="string" table:style-name="c10">
            <text:p>2026-05-21 12:00</text:p>
          </table:table-cell>
          <table:table-cell office:value-type="float" office:value="1.73913" table:style-name="c10">
            <text:p>1.7391</text:p>
          </table:table-cell>
          <table:table-cell office:value-type="float" office:value="-1.656117568766624" table:style-name="c11">
            <text:p>-1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5:45</text:p>
          </table:table-cell>
          <table:table-cell office:value-type="float" office:value="1.8079034999999999" table:style-name="c10">
            <text:p>1.8079</text:p>
          </table:table-cell>
          <table:table-cell office:value-type="string" table:style-name="c10">
            <text:p>2026-05-22 15:30</text:p>
          </table:table-cell>
          <table:table-cell office:value-type="float" office:value="2.2158915" table:style-name="c10">
            <text:p>2.2159</text:p>
          </table:table-cell>
          <table:table-cell office:value-type="float" office:value="22.321901190605598" table:style-name="c12">
            <text:p>+22.3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3 15:15</text:p>
          </table:table-cell>
          <table:table-cell office:value-type="float" office:value="2.2121055" table:style-name="c10">
            <text:p>2.2121</text:p>
          </table:table-cell>
          <table:table-cell office:value-type="string" table:style-name="c10">
            <text:p>2026-05-24 02:00</text:p>
          </table:table-cell>
          <table:table-cell office:value-type="float" office:value="2.3878055" table:style-name="c10">
            <text:p>2.3878</text:p>
          </table:table-cell>
          <table:table-cell office:value-type="float" office:value="7.726881778717143" table:style-name="c12">
            <text:p>+7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4 15:15</text:p>
          </table:table-cell>
          <table:table-cell office:value-type="float" office:value="2.4682334999999997" table:style-name="c10">
            <text:p>2.4682</text:p>
          </table:table-cell>
          <table:table-cell office:value-type="string" table:style-name="c10">
            <text:p>2026-05-24 22:00</text:p>
          </table:table-cell>
          <table:table-cell office:value-type="float" office:value="2.3928030000000002" table:style-name="c10">
            <text:p>2.3928</text:p>
          </table:table-cell>
          <table:table-cell office:value-type="float" office:value="-3.2498429827242825" table:style-name="c11">
            <text:p>-3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05:15</text:p>
          </table:table-cell>
          <table:table-cell office:value-type="float" office:value="2.3881935" table:style-name="c10">
            <text:p>2.3882</text:p>
          </table:table-cell>
          <table:table-cell office:value-type="string" table:style-name="c10">
            <text:p>2026-05-25 05:30</text:p>
          </table:table-cell>
          <table:table-cell office:value-type="float" office:value="2.380809" table:style-name="c10">
            <text:p>2.3808</text:p>
          </table:table-cell>
          <table:table-cell office:value-type="float" office:value="-0.5084905051035316" table:style-name="c11">
            <text:p>-0.5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2:15</text:p>
          </table:table-cell>
          <table:table-cell office:value-type="float" office:value="2.5072529999999995" table:style-name="c10">
            <text:p>2.5073</text:p>
          </table:table-cell>
          <table:table-cell office:value-type="string" table:style-name="c10">
            <text:p>2026-05-26 01:15</text:p>
          </table:table-cell>
          <table:table-cell office:value-type="float" office:value="2.71864" table:style-name="c10">
            <text:p>2.7186</text:p>
          </table:table-cell>
          <table:table-cell office:value-type="float" office:value="8.214266316163577" table:style-name="c12">
            <text:p>+8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7 08:30</text:p>
          </table:table-cell>
          <table:table-cell office:value-type="float" office:value="2.5512749999999995" table:style-name="c10">
            <text:p>2.5513</text:p>
          </table:table-cell>
          <table:table-cell office:value-type="string" table:style-name="c10">
            <text:p>2026-05-27 09:15</text:p>
          </table:table-cell>
          <table:table-cell office:value-type="float" office:value="2.508745" table:style-name="c10">
            <text:p>2.5087</text:p>
          </table:table-cell>
          <table:table-cell office:value-type="float" office:value="-1.8635772801834483" table:style-name="c11">
            <text:p>-1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15:45</text:p>
          </table:table-cell>
          <table:table-cell office:value-type="float" office:value="2.4302144999999995" table:style-name="c10">
            <text:p>2.4302</text:p>
          </table:table-cell>
          <table:table-cell office:value-type="string" table:style-name="c10">
            <text:p>2026-06-02 01:15</text:p>
          </table:table-cell>
          <table:table-cell office:value-type="float" office:value="2.584707" table:style-name="c10">
            <text:p>2.5847</text:p>
          </table:table-cell>
          <table:table-cell office:value-type="float" office:value="6.14454694048614" table:style-name="c12">
            <text:p>+6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2 03:00</text:p>
          </table:table-cell>
          <table:table-cell office:value-type="float" office:value="2.6673329999999997" table:style-name="c10">
            <text:p>2.6673</text:p>
          </table:table-cell>
          <table:table-cell office:value-type="string" table:style-name="c10">
            <text:p>2026-06-02 05:45</text:p>
          </table:table-cell>
          <table:table-cell office:value-type="float" office:value="2.5957015" table:style-name="c10">
            <text:p>2.5957</text:p>
          </table:table-cell>
          <table:table-cell office:value-type="float" office:value="-2.880041873230643" table:style-name="c11">
            <text:p>-2.9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09:15</text:p>
          </table:table-cell>
          <table:table-cell office:value-type="float" office:value="0.1296648" table:style-name="c1">
            <text:p>0.12966</text:p>
          </table:table-cell>
          <table:table-cell office:value-type="string" table:style-name="c1">
            <text:p>2026-03-05 12:00</text:p>
          </table:table-cell>
          <table:table-cell office:value-type="float" office:value="0.1273363" table:style-name="c1">
            <text:p>0.12734</text:p>
          </table:table-cell>
          <table:table-cell office:value-type="float" office:value="-1.992094434032965" table:style-name="c14">
            <text:p>-2.0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45</text:p>
          </table:table-cell>
          <table:table-cell office:value-type="float" office:value="0.12056025" table:style-name="c1">
            <text:p>0.12056</text:p>
          </table:table-cell>
          <table:table-cell office:value-type="string" table:style-name="c1">
            <text:p>2026-03-09 22:45</text:p>
          </table:table-cell>
          <table:table-cell office:value-type="float" office:value="0.11864065" table:style-name="c1">
            <text:p>0.11864</text:p>
          </table:table-cell>
          <table:table-cell office:value-type="float" office:value="-1.788950055553129" table:style-name="c14">
            <text:p>-1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4:00</text:p>
          </table:table-cell>
          <table:table-cell office:value-type="float" office:value="0.12116054999999999" table:style-name="c1">
            <text:p>0.12116</text:p>
          </table:table-cell>
          <table:table-cell office:value-type="string" table:style-name="c1">
            <text:p>2026-03-11 19:15</text:p>
          </table:table-cell>
          <table:table-cell office:value-type="float" office:value="0.1203398" table:style-name="c1">
            <text:p>0.12034</text:p>
          </table:table-cell>
          <table:table-cell office:value-type="float" office:value="-0.8759528247436754" table:style-name="c14">
            <text:p>-0.9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0:30</text:p>
          </table:table-cell>
          <table:table-cell office:value-type="float" office:value="0.11995995" table:style-name="c1">
            <text:p>0.11996</text:p>
          </table:table-cell>
          <table:table-cell office:value-type="string" table:style-name="c1">
            <text:p>2026-03-12 12:15</text:p>
          </table:table-cell>
          <table:table-cell office:value-type="float" office:value="0.11804095" table:style-name="c1">
            <text:p>0.11804</text:p>
          </table:table-cell>
          <table:table-cell office:value-type="float" office:value="-1.7964027652979109" table:style-name="c14">
            <text:p>-1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30</text:p>
          </table:table-cell>
          <table:table-cell office:value-type="float" office:value="0.12556275" table:style-name="c1">
            <text:p>0.12556</text:p>
          </table:table-cell>
          <table:table-cell office:value-type="string" table:style-name="c1">
            <text:p>2026-03-13 17:30</text:p>
          </table:table-cell>
          <table:table-cell office:value-type="float" office:value="0.12483755" table:style-name="c1">
            <text:p>0.12484</text:p>
          </table:table-cell>
          <table:table-cell office:value-type="float" office:value="-0.7763052835733419" table:style-name="c14">
            <text:p>-0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04:15</text:p>
          </table:table-cell>
          <table:table-cell office:value-type="float" office:value="0.1258629" table:style-name="c1">
            <text:p>0.12586</text:p>
          </table:table-cell>
          <table:table-cell office:value-type="string" table:style-name="c1">
            <text:p>2026-03-14 06:00</text:p>
          </table:table-cell>
          <table:table-cell office:value-type="float" office:value="0.12343825" table:style-name="c1">
            <text:p>0.12344</text:p>
          </table:table-cell>
          <table:table-cell office:value-type="float" office:value="-2.1224706102831004" table:style-name="c14">
            <text:p>-2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4:15</text:p>
          </table:table-cell>
          <table:table-cell office:value-type="float" office:value="0.1268634" table:style-name="c1">
            <text:p>0.12686</text:p>
          </table:table-cell>
          <table:table-cell office:value-type="string" table:style-name="c1">
            <text:p>2026-03-15 13:30</text:p>
          </table:table-cell>
          <table:table-cell office:value-type="float" office:value="0.1257371" table:style-name="c1">
            <text:p>0.12574</text:p>
          </table:table-cell>
          <table:table-cell office:value-type="float" office:value="-1.085930585890016" table:style-name="c14">
            <text:p>-1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0.1288644" table:style-name="c1">
            <text:p>0.12886</text:p>
          </table:table-cell>
          <table:table-cell office:value-type="string" table:style-name="c1">
            <text:p>2026-03-16 14:45</text:p>
          </table:table-cell>
          <table:table-cell office:value-type="float" office:value="0.13043475000000002" table:style-name="c1">
            <text:p>0.13043</text:p>
          </table:table-cell>
          <table:table-cell office:value-type="float" office:value="1.016270540777775" table:style-name="c13">
            <text:p>+1.0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5:00</text:p>
          </table:table-cell>
          <table:table-cell office:value-type="float" office:value="0.1312656" table:style-name="c1">
            <text:p>0.13127</text:p>
          </table:table-cell>
          <table:table-cell office:value-type="string" table:style-name="c1">
            <text:p>2026-03-16 15:15</text:p>
          </table:table-cell>
          <table:table-cell office:value-type="float" office:value="0.13083455" table:style-name="c1">
            <text:p>0.13083</text:p>
          </table:table-cell>
          <table:table-cell office:value-type="float" office:value="-0.5276235856538358" table:style-name="c14">
            <text:p>-0.5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6:45</text:p>
          </table:table-cell>
          <table:table-cell office:value-type="float" office:value="0.13236615" table:style-name="c1">
            <text:p>0.13237</text:p>
          </table:table-cell>
          <table:table-cell office:value-type="string" table:style-name="c1">
            <text:p>2026-03-17 03:15</text:p>
          </table:table-cell>
          <table:table-cell office:value-type="float" office:value="0.13553220000000002" table:style-name="c1">
            <text:p>0.13553</text:p>
          </table:table-cell>
          <table:table-cell office:value-type="float" office:value="2.1872065722241096" table:style-name="c13">
            <text:p>+2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7:30</text:p>
          </table:table-cell>
          <table:table-cell office:value-type="float" office:value="0.13596794999999998" table:style-name="c1">
            <text:p>0.13597</text:p>
          </table:table-cell>
          <table:table-cell office:value-type="string" table:style-name="c1">
            <text:p>2026-03-17 07:45</text:p>
          </table:table-cell>
          <table:table-cell office:value-type="float" office:value="0.13563215" table:style-name="c1">
            <text:p>0.13563</text:p>
          </table:table-cell>
          <table:table-cell office:value-type="float" office:value="-0.4463762731216847" table:style-name="c14">
            <text:p>-0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8:15</text:p>
          </table:table-cell>
          <table:table-cell office:value-type="float" office:value="0.13556775000000001" table:style-name="c1">
            <text:p>0.13557</text:p>
          </table:table-cell>
          <table:table-cell office:value-type="string" table:style-name="c1">
            <text:p>2026-03-17 10:45</text:p>
          </table:table-cell>
          <table:table-cell office:value-type="float" office:value="0.13503245" table:style-name="c1">
            <text:p>0.13503</text:p>
          </table:table-cell>
          <table:table-cell office:value-type="float" office:value="-0.5939686006074529" table:style-name="c14">
            <text:p>-0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0.1086543" table:style-name="c1">
            <text:p>0.10865</text:p>
          </table:table-cell>
          <table:table-cell office:value-type="string" table:style-name="c1">
            <text:p>2026-03-30 14:45</text:p>
          </table:table-cell>
          <table:table-cell office:value-type="float" office:value="0.10684655" table:style-name="c1">
            <text:p>0.10685</text:p>
          </table:table-cell>
          <table:table-cell office:value-type="float" office:value="-1.8603370998202307" table:style-name="c14">
            <text:p>-1.9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7:00</text:p>
          </table:table-cell>
          <table:table-cell office:value-type="float" office:value="0.1090545" table:style-name="c1">
            <text:p>0.10905</text:p>
          </table:table-cell>
          <table:table-cell office:value-type="string" table:style-name="c1">
            <text:p>2026-03-31 09:15</text:p>
          </table:table-cell>
          <table:table-cell office:value-type="float" office:value="0.10754620000000001" table:style-name="c1">
            <text:p>0.10755</text:p>
          </table:table-cell>
          <table:table-cell office:value-type="float" office:value="-1.5802051761275138" table:style-name="c14">
            <text:p>-1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45</text:p>
          </table:table-cell>
          <table:table-cell office:value-type="float" office:value="0.112056" table:style-name="c1">
            <text:p>0.11206</text:p>
          </table:table-cell>
          <table:table-cell office:value-type="string" table:style-name="c1">
            <text:p>2026-04-01 11:15</text:p>
          </table:table-cell>
          <table:table-cell office:value-type="float" office:value="0.1111444" table:style-name="c1">
            <text:p>0.11114</text:p>
          </table:table-cell>
          <table:table-cell office:value-type="float" office:value="-1.0117955804240797" table:style-name="c14">
            <text:p>-1.0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0.11315655" table:style-name="c1">
            <text:p>0.11316</text:p>
          </table:table-cell>
          <table:table-cell office:value-type="string" table:style-name="c1">
            <text:p>2026-04-01 14:00</text:p>
          </table:table-cell>
          <table:table-cell office:value-type="float" office:value="0.11084455" table:style-name="c1">
            <text:p>0.11084</text:p>
          </table:table-cell>
          <table:table-cell office:value-type="float" office:value="-2.23900274040697" table:style-name="c14">
            <text:p>-2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20:15</text:p>
          </table:table-cell>
          <table:table-cell office:value-type="float" office:value="0.11075535" table:style-name="c1">
            <text:p>0.11076</text:p>
          </table:table-cell>
          <table:table-cell office:value-type="string" table:style-name="c1">
            <text:p>2026-04-03 23:30</text:p>
          </table:table-cell>
          <table:table-cell office:value-type="float" office:value="0.1097451" table:style-name="c1">
            <text:p>0.10975</text:p>
          </table:table-cell>
          <table:table-cell office:value-type="float" office:value="-1.1102221742787188" table:style-name="c14">
            <text:p>-1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0:00</text:p>
          </table:table-cell>
          <table:table-cell office:value-type="float" office:value="0.11335664999999999" table:style-name="c1">
            <text:p>0.11336</text:p>
          </table:table-cell>
          <table:table-cell office:value-type="string" table:style-name="c1">
            <text:p>2026-04-06 14:45</text:p>
          </table:table-cell>
          <table:table-cell office:value-type="float" office:value="0.11224385" table:style-name="c1">
            <text:p>0.11224</text:p>
          </table:table-cell>
          <table:table-cell office:value-type="float" office:value="-1.1796180075452023" table:style-name="c14">
            <text:p>-1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08:15</text:p>
          </table:table-cell>
          <table:table-cell office:value-type="float" office:value="0.1102551" table:style-name="c1">
            <text:p>0.11026</text:p>
          </table:table-cell>
          <table:table-cell office:value-type="string" table:style-name="c1">
            <text:p>2026-04-07 10:45</text:p>
          </table:table-cell>
          <table:table-cell office:value-type="float" office:value="0.10924535" table:style-name="c1">
            <text:p>0.10925</text:p>
          </table:table-cell>
          <table:table-cell office:value-type="float" office:value="-1.1138999054465581" table:style-name="c14">
            <text:p>-1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45</text:p>
          </table:table-cell>
          <table:table-cell office:value-type="float" office:value="0.11635815" table:style-name="c1">
            <text:p>0.11636</text:p>
          </table:table-cell>
          <table:table-cell office:value-type="string" table:style-name="c1">
            <text:p>2026-04-08 09:00</text:p>
          </table:table-cell>
          <table:table-cell office:value-type="float" office:value="0.11874060000000002" table:style-name="c1">
            <text:p>0.11874</text:p>
          </table:table-cell>
          <table:table-cell office:value-type="float" office:value="1.8435215243625125" table:style-name="c13">
            <text:p>+1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17:15</text:p>
          </table:table-cell>
          <table:table-cell office:value-type="float" office:value="0.1176588" table:style-name="c1">
            <text:p>0.11766</text:p>
          </table:table-cell>
          <table:table-cell office:value-type="string" table:style-name="c1">
            <text:p>2026-04-08 17:30</text:p>
          </table:table-cell>
          <table:table-cell office:value-type="float" office:value="0.1165417" table:style-name="c1">
            <text:p>0.11654</text:p>
          </table:table-cell>
          <table:table-cell office:value-type="float" office:value="-1.147442314811975" table:style-name="c14">
            <text:p>-1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00</text:p>
          </table:table-cell>
          <table:table-cell office:value-type="float" office:value="0.1164582" table:style-name="c1">
            <text:p>0.11646</text:p>
          </table:table-cell>
          <table:table-cell office:value-type="string" table:style-name="c1">
            <text:p>2026-04-14 06:00</text:p>
          </table:table-cell>
          <table:table-cell office:value-type="float" office:value="0.11364315" table:style-name="c1">
            <text:p>0.11364</text:p>
          </table:table-cell>
          <table:table-cell office:value-type="float" office:value="-2.6122872042071865" table:style-name="c14">
            <text:p>-2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45</text:p>
          </table:table-cell>
          <table:table-cell office:value-type="float" office:value="0.11535764999999999" table:style-name="c1">
            <text:p>0.11536</text:p>
          </table:table-cell>
          <table:table-cell office:value-type="string" table:style-name="c1">
            <text:p>2026-04-14 16:15</text:p>
          </table:table-cell>
          <table:table-cell office:value-type="float" office:value="0.11344325000000001" table:style-name="c1">
            <text:p>0.11344</text:p>
          </table:table-cell>
          <table:table-cell office:value-type="float" office:value="-1.8561170904140223" table:style-name="c14">
            <text:p>-1.9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0:15</text:p>
          </table:table-cell>
          <table:table-cell office:value-type="float" office:value="0.11395695" table:style-name="c1">
            <text:p>0.11396</text:p>
          </table:table-cell>
          <table:table-cell office:value-type="string" table:style-name="c1">
            <text:p>2026-04-15 23:45</text:p>
          </table:table-cell>
          <table:table-cell office:value-type="float" office:value="0.11934030000000001" table:style-name="c1">
            <text:p>0.11934</text:p>
          </table:table-cell>
          <table:table-cell office:value-type="float" office:value="4.5146774639897025" table:style-name="c13">
            <text:p>+4.5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15</text:p>
          </table:table-cell>
          <table:table-cell office:value-type="float" office:value="0.1206603" table:style-name="c1">
            <text:p>0.12066</text:p>
          </table:table-cell>
          <table:table-cell office:value-type="string" table:style-name="c1">
            <text:p>2026-04-16 10:15</text:p>
          </table:table-cell>
          <table:table-cell office:value-type="float" office:value="0.12113940000000001" table:style-name="c1">
            <text:p>0.12114</text:p>
          </table:table-cell>
          <table:table-cell office:value-type="float" office:value="0.19637141578465744" table:style-name="c13">
            <text:p>+0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00</text:p>
          </table:table-cell>
          <table:table-cell office:value-type="float" office:value="0.1232616" table:style-name="c1">
            <text:p>0.12326</text:p>
          </table:table-cell>
          <table:table-cell office:value-type="string" table:style-name="c1">
            <text:p>2026-04-17 03:30</text:p>
          </table:table-cell>
          <table:table-cell office:value-type="float" office:value="0.1311344" table:style-name="c1">
            <text:p>0.13113</text:p>
          </table:table-cell>
          <table:table-cell office:value-type="float" office:value="6.174398461808073" table:style-name="c13">
            <text:p>+6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0.1282641" table:style-name="c1">
            <text:p>0.12826</text:p>
          </table:table-cell>
          <table:table-cell office:value-type="string" table:style-name="c1">
            <text:p>2026-04-22 12:45</text:p>
          </table:table-cell>
          <table:table-cell office:value-type="float" office:value="0.12603695" table:style-name="c1">
            <text:p>0.12604</text:p>
          </table:table-cell>
          <table:table-cell office:value-type="float" office:value="-1.932807280486104" table:style-name="c14">
            <text:p>-1.9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6:00</text:p>
          </table:table-cell>
          <table:table-cell office:value-type="float" office:value="0.12416205" table:style-name="c1">
            <text:p>0.12416</text:p>
          </table:table-cell>
          <table:table-cell office:value-type="string" table:style-name="c1">
            <text:p>2026-04-25 12:15</text:p>
          </table:table-cell>
          <table:table-cell office:value-type="float" office:value="0.12763615" table:style-name="c1">
            <text:p>0.12764</text:p>
          </table:table-cell>
          <table:table-cell office:value-type="float" office:value="2.5925436444952377" table:style-name="c13">
            <text:p>+2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23:15</text:p>
          </table:table-cell>
          <table:table-cell office:value-type="float" office:value="0.1252626" table:style-name="c1">
            <text:p>0.12526</text:p>
          </table:table-cell>
          <table:table-cell office:value-type="string" table:style-name="c1">
            <text:p>2026-04-26 00:30</text:p>
          </table:table-cell>
          <table:table-cell office:value-type="float" office:value="0.12443775" table:style-name="c1">
            <text:p>0.12444</text:p>
          </table:table-cell>
          <table:table-cell office:value-type="float" office:value="-0.857080295515178" table:style-name="c14">
            <text:p>-0.9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5:15</text:p>
          </table:table-cell>
          <table:table-cell office:value-type="float" office:value="0.1256628" table:style-name="c1">
            <text:p>0.12566</text:p>
          </table:table-cell>
          <table:table-cell office:value-type="string" table:style-name="c1">
            <text:p>2026-04-26 13:15</text:p>
          </table:table-cell>
          <table:table-cell office:value-type="float" office:value="0.1255372" table:style-name="c1">
            <text:p>0.12554</text:p>
          </table:table-cell>
          <table:table-cell office:value-type="float" office:value="-0.2996502248875599" table:style-name="c14">
            <text:p>-0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5:45</text:p>
          </table:table-cell>
          <table:table-cell office:value-type="float" office:value="0.1264632" table:style-name="c1">
            <text:p>0.12646</text:p>
          </table:table-cell>
          <table:table-cell office:value-type="string" table:style-name="c1">
            <text:p>2026-04-26 21:45</text:p>
          </table:table-cell>
          <table:table-cell office:value-type="float" office:value="0.1255372" table:style-name="c1">
            <text:p>0.12554</text:p>
          </table:table-cell>
          <table:table-cell office:value-type="float" office:value="-0.9306650968819441" table:style-name="c14">
            <text:p>-0.9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1:15</text:p>
          </table:table-cell>
          <table:table-cell office:value-type="float" office:value="0.1268634" table:style-name="c1">
            <text:p>0.12686</text:p>
          </table:table-cell>
          <table:table-cell office:value-type="string" table:style-name="c1">
            <text:p>2026-04-27 05:30</text:p>
          </table:table-cell>
          <table:table-cell office:value-type="float" office:value="0.12413790000000001" table:style-name="c1">
            <text:p>0.12414</text:p>
          </table:table-cell>
          <table:table-cell office:value-type="float" office:value="-2.3439791634939477" table:style-name="c14">
            <text:p>-2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0.1252626" table:style-name="c1">
            <text:p>0.12526</text:p>
          </table:table-cell>
          <table:table-cell office:value-type="string" table:style-name="c1">
            <text:p>2026-04-29 12:15</text:p>
          </table:table-cell>
          <table:table-cell office:value-type="float" office:value="0.12223885000000001" table:style-name="c1">
            <text:p>0.12224</text:p>
          </table:table-cell>
          <table:table-cell office:value-type="float" office:value="-2.6090033746305585" table:style-name="c14">
            <text:p>-2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6:00</text:p>
          </table:table-cell>
          <table:table-cell office:value-type="float" office:value="0.1234617" table:style-name="c1">
            <text:p>0.12346</text:p>
          </table:table-cell>
          <table:table-cell office:value-type="string" table:style-name="c1">
            <text:p>2026-05-03 01:00</text:p>
          </table:table-cell>
          <table:table-cell office:value-type="float" office:value="0.12463765000000002" table:style-name="c1">
            <text:p>0.12464</text:p>
          </table:table-cell>
          <table:table-cell office:value-type="float" office:value="0.7506776090480116" table:style-name="c13">
            <text:p>+0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4:15</text:p>
          </table:table-cell>
          <table:table-cell office:value-type="float" office:value="0.1270635" table:style-name="c1">
            <text:p>0.12706</text:p>
          </table:table-cell>
          <table:table-cell office:value-type="string" table:style-name="c1">
            <text:p>2026-05-04 08:00</text:p>
          </table:table-cell>
          <table:table-cell office:value-type="float" office:value="0.1251374" table:style-name="c1">
            <text:p>0.12514</text:p>
          </table:table-cell>
          <table:table-cell office:value-type="float" office:value="-1.7127260484718243" table:style-name="c14">
            <text:p>-1.7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00</text:p>
          </table:table-cell>
          <table:table-cell office:value-type="float" office:value="0.12486239999999998" table:style-name="c1">
            <text:p>0.12486</text:p>
          </table:table-cell>
          <table:table-cell office:value-type="string" table:style-name="c1">
            <text:p>2026-05-04 23:30</text:p>
          </table:table-cell>
          <table:table-cell office:value-type="float" office:value="0.12403795000000001" table:style-name="c1">
            <text:p>0.12404</text:p>
          </table:table-cell>
          <table:table-cell office:value-type="float" office:value="-0.8588669303569163" table:style-name="c14">
            <text:p>-0.9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2:15</text:p>
          </table:table-cell>
          <table:table-cell office:value-type="float" office:value="0.1274637" table:style-name="c1">
            <text:p>0.12746</text:p>
          </table:table-cell>
          <table:table-cell office:value-type="string" table:style-name="c1">
            <text:p>2026-05-05 14:15</text:p>
          </table:table-cell>
          <table:table-cell office:value-type="float" office:value="0.12793600000000002" table:style-name="c1">
            <text:p>0.12794</text:p>
          </table:table-cell>
          <table:table-cell office:value-type="float" office:value="0.1698961633783025" table:style-name="c13">
            <text:p>+0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15</text:p>
          </table:table-cell>
          <table:table-cell office:value-type="float" office:value="0.12936465" table:style-name="c1">
            <text:p>0.12936</text:p>
          </table:table-cell>
          <table:table-cell office:value-type="string" table:style-name="c1">
            <text:p>2026-05-05 23:45</text:p>
          </table:table-cell>
          <table:table-cell office:value-type="float" office:value="0.12813590000000002" table:style-name="c1">
            <text:p>0.12814</text:p>
          </table:table-cell>
          <table:table-cell office:value-type="float" office:value="-1.1478357218142499" table:style-name="c14">
            <text:p>-1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30</text:p>
          </table:table-cell>
          <table:table-cell office:value-type="float" office:value="0.134067" table:style-name="c1">
            <text:p>0.13407</text:p>
          </table:table-cell>
          <table:table-cell office:value-type="string" table:style-name="c1">
            <text:p>2026-05-06 14:30</text:p>
          </table:table-cell>
          <table:table-cell office:value-type="float" office:value="0.13383305" table:style-name="c1">
            <text:p>0.13383</text:p>
          </table:table-cell>
          <table:table-cell office:value-type="float" office:value="-0.37405347098837805" table:style-name="c14">
            <text:p>-0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6:00</text:p>
          </table:table-cell>
          <table:table-cell office:value-type="float" office:value="0.13626809999999998" table:style-name="c1">
            <text:p>0.13627</text:p>
          </table:table-cell>
          <table:table-cell office:value-type="string" table:style-name="c1">
            <text:p>2026-05-07 02:00</text:p>
          </table:table-cell>
          <table:table-cell office:value-type="float" office:value="0.13883055" table:style-name="c1">
            <text:p>0.13883</text:p>
          </table:table-cell>
          <table:table-cell office:value-type="float" office:value="1.6767884270419975" table:style-name="c13">
            <text:p>+1.7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6:00</text:p>
          </table:table-cell>
          <table:table-cell office:value-type="float" office:value="0.1496748" table:style-name="c1">
            <text:p>0.14967</text:p>
          </table:table-cell>
          <table:table-cell office:value-type="string" table:style-name="c1">
            <text:p>2026-05-07 14:45</text:p>
          </table:table-cell>
          <table:table-cell office:value-type="float" office:value="0.14362815" table:style-name="c1">
            <text:p>0.14363</text:p>
          </table:table-cell>
          <table:table-cell office:value-type="float" office:value="-4.231682736071796" table:style-name="c14">
            <text:p>-4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7:45</text:p>
          </table:table-cell>
          <table:table-cell office:value-type="float" office:value="0.15897945" table:style-name="c1">
            <text:p>0.15898</text:p>
          </table:table-cell>
          <table:table-cell office:value-type="string" table:style-name="c1">
            <text:p>2026-05-09 03:45</text:p>
          </table:table-cell>
          <table:table-cell office:value-type="float" office:value="0.16761615" table:style-name="c1">
            <text:p>0.16762</text:p>
          </table:table-cell>
          <table:table-cell office:value-type="float" office:value="5.221829183677529" table:style-name="c13">
            <text:p>+5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3:45</text:p>
          </table:table-cell>
          <table:table-cell office:value-type="float" office:value="0.16398195" table:style-name="c1">
            <text:p>0.16398</text:p>
          </table:table-cell>
          <table:table-cell office:value-type="string" table:style-name="c1">
            <text:p>2026-05-11 00:15</text:p>
          </table:table-cell>
          <table:table-cell office:value-type="float" office:value="0.16251870000000002" table:style-name="c1">
            <text:p>0.16252</text:p>
          </table:table-cell>
          <table:table-cell office:value-type="float" office:value="-1.0904400644704992" table:style-name="c14">
            <text:p>-1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0:15</text:p>
          </table:table-cell>
          <table:table-cell office:value-type="float" office:value="0.16038015" table:style-name="c1">
            <text:p>0.16038</text:p>
          </table:table-cell>
          <table:table-cell office:value-type="string" table:style-name="c1">
            <text:p>2026-05-11 11:00</text:p>
          </table:table-cell>
          <table:table-cell office:value-type="float" office:value="0.15842075" table:style-name="c1">
            <text:p>0.15842</text:p>
          </table:table-cell>
          <table:table-cell office:value-type="float" office:value="-1.4191800414515177" table:style-name="c14">
            <text:p>-1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2:45</text:p>
          </table:table-cell>
          <table:table-cell office:value-type="float" office:value="0.13096544999999998" table:style-name="c1">
            <text:p>0.13097</text:p>
          </table:table-cell>
          <table:table-cell office:value-type="string" table:style-name="c1">
            <text:p>2026-05-21 06:15</text:p>
          </table:table-cell>
          <table:table-cell office:value-type="float" office:value="0.12943525" table:style-name="c1">
            <text:p>0.12944</text:p>
          </table:table-cell>
          <table:table-cell office:value-type="float" office:value="-1.3659641262256272" table:style-name="c14">
            <text:p>-1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0.13066529999999998" table:style-name="c1">
            <text:p>0.13067</text:p>
          </table:table-cell>
          <table:table-cell office:value-type="string" table:style-name="c1">
            <text:p>2026-05-21 10:00</text:p>
          </table:table-cell>
          <table:table-cell office:value-type="float" office:value="0.12943525" table:style-name="c1">
            <text:p>0.12944</text:p>
          </table:table-cell>
          <table:table-cell office:value-type="float" office:value="-1.1393928340194148" table:style-name="c14">
            <text:p>-1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8:30</text:p>
          </table:table-cell>
          <table:table-cell office:value-type="float" office:value="0.1348674" table:style-name="c1">
            <text:p>0.13487</text:p>
          </table:table-cell>
          <table:table-cell office:value-type="string" table:style-name="c1">
            <text:p>2026-05-22 15:00</text:p>
          </table:table-cell>
          <table:table-cell office:value-type="float" office:value="0.13343325" table:style-name="c1">
            <text:p>0.13343</text:p>
          </table:table-cell>
          <table:table-cell office:value-type="float" office:value="-1.2611521144101467" table:style-name="c14">
            <text:p>-1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4:00</text:p>
          </table:table-cell>
          <table:table-cell office:value-type="float" office:value="0.13066529999999998" table:style-name="c1">
            <text:p>0.13067</text:p>
          </table:table-cell>
          <table:table-cell office:value-type="string" table:style-name="c1">
            <text:p>2026-05-25 21:30</text:p>
          </table:table-cell>
          <table:table-cell office:value-type="float" office:value="0.13063465000000002" table:style-name="c1">
            <text:p>0.13063</text:p>
          </table:table-cell>
          <table:table-cell office:value-type="float" office:value="-0.22330998769372057" table:style-name="c14">
            <text:p>-0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5:30</text:p>
          </table:table-cell>
          <table:table-cell office:value-type="float" office:value="0.12996494999999997" table:style-name="c1">
            <text:p>0.12996</text:p>
          </table:table-cell>
          <table:table-cell office:value-type="string" table:style-name="c1">
            <text:p>2026-05-26 16:00</text:p>
          </table:table-cell>
          <table:table-cell office:value-type="float" office:value="0.1315342" table:style-name="c1">
            <text:p>0.13153</text:p>
          </table:table-cell>
          <table:table-cell office:value-type="float" office:value="1.005127254848337" table:style-name="c13">
            <text:p>+1.0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10:45</text:p>
          </table:table-cell>
          <table:table-cell office:value-type="float" office:value="0.1038519" table:style-name="c10">
            <text:p>0.10385</text:p>
          </table:table-cell>
          <table:table-cell office:value-type="string" table:style-name="c10">
            <text:p>2026-03-05 14:45</text:p>
          </table:table-cell>
          <table:table-cell office:value-type="float" office:value="0.10284855000000001" table:style-name="c10">
            <text:p>0.10285</text:p>
          </table:table-cell>
          <table:table-cell office:value-type="float" office:value="-1.164104124671761" table:style-name="c11">
            <text:p>-1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1:30</text:p>
          </table:table-cell>
          <table:table-cell office:value-type="float" office:value="0.09834915" table:style-name="c10">
            <text:p>0.098349</text:p>
          </table:table-cell>
          <table:table-cell office:value-type="string" table:style-name="c10">
            <text:p>2026-03-10 13:15</text:p>
          </table:table-cell>
          <table:table-cell office:value-type="float" office:value="0.09705145000000001" table:style-name="c10">
            <text:p>0.097051</text:p>
          </table:table-cell>
          <table:table-cell office:value-type="float" office:value="-1.5167450339428235" table:style-name="c11">
            <text:p>-1.5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0.09874934999999999" table:style-name="c10">
            <text:p>0.098749</text:p>
          </table:table-cell>
          <table:table-cell office:value-type="string" table:style-name="c10">
            <text:p>2026-03-10 18:45</text:p>
          </table:table-cell>
          <table:table-cell office:value-type="float" office:value="0.09645175" table:style-name="c10">
            <text:p>0.096452</text:p>
          </table:table-cell>
          <table:table-cell office:value-type="float" office:value="-2.521947788263912" table:style-name="c11">
            <text:p>-2.5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04:00</text:p>
          </table:table-cell>
          <table:table-cell office:value-type="float" office:value="0.0966483" table:style-name="c10">
            <text:p>0.096648</text:p>
          </table:table-cell>
          <table:table-cell office:value-type="string" table:style-name="c10">
            <text:p>2026-03-11 06:00</text:p>
          </table:table-cell>
          <table:table-cell office:value-type="float" office:value="0.09585205000000001" table:style-name="c10">
            <text:p>0.095852</text:p>
          </table:table-cell>
          <table:table-cell office:value-type="float" office:value="-1.0221165276057542" table:style-name="c11">
            <text:p>-1.0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11:00</text:p>
          </table:table-cell>
          <table:table-cell office:value-type="float" office:value="0.09914954999999999" table:style-name="c10">
            <text:p>0.09915</text:p>
          </table:table-cell>
          <table:table-cell office:value-type="string" table:style-name="c10">
            <text:p>2026-03-12 13:30</text:p>
          </table:table-cell>
          <table:table-cell office:value-type="float" office:value="0.09805095000000001" table:style-name="c10">
            <text:p>0.098051</text:p>
          </table:table-cell>
          <table:table-cell office:value-type="float" office:value="-1.305708244818038" table:style-name="c11">
            <text:p>-1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30</text:p>
          </table:table-cell>
          <table:table-cell office:value-type="float" office:value="0.09854925" table:style-name="c10">
            <text:p>0.098549</text:p>
          </table:table-cell>
          <table:table-cell office:value-type="string" table:style-name="c10">
            <text:p>2026-03-16 14:45</text:p>
          </table:table-cell>
          <table:table-cell office:value-type="float" office:value="0.0995502" table:style-name="c10">
            <text:p>0.09955</text:p>
          </table:table-cell>
          <table:table-cell office:value-type="float" office:value="0.8137546964588793" table:style-name="c12">
            <text:p>+0.8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7:00</text:p>
          </table:table-cell>
          <table:table-cell office:value-type="float" office:value="0.10085039999999999" table:style-name="c10">
            <text:p>0.10085</text:p>
          </table:table-cell>
          <table:table-cell office:value-type="string" table:style-name="c10">
            <text:p>2026-03-17 01:45</text:p>
          </table:table-cell>
          <table:table-cell office:value-type="float" office:value="0.1015492" table:style-name="c10">
            <text:p>0.10155</text:p>
          </table:table-cell>
          <table:table-cell office:value-type="float" office:value="0.491622392375235" table:style-name="c12">
            <text:p>+0.5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11:15</text:p>
          </table:table-cell>
          <table:table-cell office:value-type="float" office:value="0.10075034999999999" table:style-name="c10">
            <text:p>0.10075</text:p>
          </table:table-cell>
          <table:table-cell office:value-type="string" table:style-name="c10">
            <text:p>2026-03-17 13:00</text:p>
          </table:table-cell>
          <table:table-cell office:value-type="float" office:value="0.09975010000000001" table:style-name="c10">
            <text:p>0.09975</text:p>
          </table:table-cell>
          <table:table-cell office:value-type="float" office:value="-1.1907159130464473" table:style-name="c11">
            <text:p>-1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0 11:00</text:p>
          </table:table-cell>
          <table:table-cell office:value-type="float" office:value="0.0984492" table:style-name="c10">
            <text:p>0.098449</text:p>
          </table:table-cell>
          <table:table-cell office:value-type="string" table:style-name="c10">
            <text:p>2026-03-20 14:00</text:p>
          </table:table-cell>
          <table:table-cell office:value-type="float" office:value="0.0973513" table:style-name="c10">
            <text:p>0.097351</text:p>
          </table:table-cell>
          <table:table-cell office:value-type="float" office:value="-1.3128651616265086" table:style-name="c11">
            <text:p>-1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0 16:45</text:p>
          </table:table-cell>
          <table:table-cell office:value-type="float" office:value="0.09974984999999999" table:style-name="c10">
            <text:p>0.09975</text:p>
          </table:table-cell>
          <table:table-cell office:value-type="string" table:style-name="c10">
            <text:p>2026-03-20 19:00</text:p>
          </table:table-cell>
          <table:table-cell office:value-type="float" office:value="0.09675160000000001" table:style-name="c10">
            <text:p>0.096752</text:p>
          </table:table-cell>
          <table:table-cell office:value-type="float" office:value="-3.1996603988877936" table:style-name="c11">
            <text:p>-3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19:15</text:p>
          </table:table-cell>
          <table:table-cell office:value-type="float" office:value="0.0966483" table:style-name="c10">
            <text:p>0.096648</text:p>
          </table:table-cell>
          <table:table-cell office:value-type="string" table:style-name="c10">
            <text:p>2026-03-24 01:15</text:p>
          </table:table-cell>
          <table:table-cell office:value-type="float" office:value="0.09565215" table:style-name="c10">
            <text:p>0.095652</text:p>
          </table:table-cell>
          <table:table-cell office:value-type="float" office:value="-1.2285354712395224" table:style-name="c11">
            <text:p>-1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0:45</text:p>
          </table:table-cell>
          <table:table-cell office:value-type="float" office:value="0.09534764999999999" table:style-name="c10">
            <text:p>0.095348</text:p>
          </table:table-cell>
          <table:table-cell office:value-type="string" table:style-name="c10">
            <text:p>2026-03-25 20:15</text:p>
          </table:table-cell>
          <table:table-cell office:value-type="float" office:value="0.09725135" table:style-name="c10">
            <text:p>0.097251</text:p>
          </table:table-cell>
          <table:table-cell office:value-type="float" office:value="1.792697094632123" table:style-name="c12">
            <text:p>+1.8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8:00</text:p>
          </table:table-cell>
          <table:table-cell office:value-type="float" office:value="0.0944472" table:style-name="c10">
            <text:p>0.094447</text:p>
          </table:table-cell>
          <table:table-cell office:value-type="string" table:style-name="c10">
            <text:p>2026-03-30 13:30</text:p>
          </table:table-cell>
          <table:table-cell office:value-type="float" office:value="0.09345325" table:style-name="c10">
            <text:p>0.093453</text:p>
          </table:table-cell>
          <table:table-cell office:value-type="float" office:value="-1.2501832206248453" table:style-name="c11">
            <text:p>-1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06:15</text:p>
          </table:table-cell>
          <table:table-cell office:value-type="float" office:value="0.09474735000000001" table:style-name="c10">
            <text:p>0.094747</text:p>
          </table:table-cell>
          <table:table-cell office:value-type="string" table:style-name="c10">
            <text:p>2026-04-01 15:15</text:p>
          </table:table-cell>
          <table:table-cell office:value-type="float" office:value="0.09395300000000001" table:style-name="c10">
            <text:p>0.093953</text:p>
          </table:table-cell>
          <table:table-cell office:value-type="float" office:value="-1.0366116276603" table:style-name="c11">
            <text:p>-1.0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2 07:30</text:p>
          </table:table-cell>
          <table:table-cell office:value-type="float" office:value="0.0916458" table:style-name="c10">
            <text:p>0.091646</text:p>
          </table:table-cell>
          <table:table-cell office:value-type="string" table:style-name="c10">
            <text:p>2026-04-02 08:45</text:p>
          </table:table-cell>
          <table:table-cell office:value-type="float" office:value="0.09085455" table:style-name="c10">
            <text:p>0.090855</text:p>
          </table:table-cell>
          <table:table-cell office:value-type="float" office:value="-1.0615524611602312" table:style-name="c11">
            <text:p>-1.1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3 16:45</text:p>
          </table:table-cell>
          <table:table-cell office:value-type="float" office:value="0.09294644999999999" table:style-name="c10">
            <text:p>0.092946</text:p>
          </table:table-cell>
          <table:table-cell office:value-type="string" table:style-name="c10">
            <text:p>2026-04-03 21:00</text:p>
          </table:table-cell>
          <table:table-cell office:value-type="float" office:value="0.0925537" table:style-name="c10">
            <text:p>0.092554</text:p>
          </table:table-cell>
          <table:table-cell office:value-type="float" office:value="-0.621610450210841" table:style-name="c11">
            <text:p>-0.6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7:30</text:p>
          </table:table-cell>
          <table:table-cell office:value-type="float" office:value="0.09304649999999999" table:style-name="c10">
            <text:p>0.093046</text:p>
          </table:table-cell>
          <table:table-cell office:value-type="string" table:style-name="c10">
            <text:p>2026-04-04 23:30</text:p>
          </table:table-cell>
          <table:table-cell office:value-type="float" office:value="0.0925537" table:style-name="c10">
            <text:p>0.092554</text:p>
          </table:table-cell>
          <table:table-cell office:value-type="float" office:value="-0.7284689335977035" table:style-name="c11">
            <text:p>-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8 13:15</text:p>
          </table:table-cell>
          <table:table-cell office:value-type="float" office:value="0.0922461" table:style-name="c10">
            <text:p>0.092246</text:p>
          </table:table-cell>
          <table:table-cell office:value-type="string" table:style-name="c10">
            <text:p>2026-04-08 13:30</text:p>
          </table:table-cell>
          <table:table-cell office:value-type="float" office:value="0.0917541" table:style-name="c10">
            <text:p>0.091754</text:p>
          </table:table-cell>
          <table:table-cell office:value-type="float" office:value="-0.732189703304531" table:style-name="c11">
            <text:p>-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9:45</text:p>
          </table:table-cell>
          <table:table-cell office:value-type="float" office:value="0.086043" table:style-name="c10">
            <text:p>0.086043</text:p>
          </table:table-cell>
          <table:table-cell office:value-type="string" table:style-name="c10">
            <text:p>2026-04-15 23:30</text:p>
          </table:table-cell>
          <table:table-cell office:value-type="float" office:value="0.0849575" table:style-name="c10">
            <text:p>0.084958</text:p>
          </table:table-cell>
          <table:table-cell office:value-type="float" office:value="-1.4589566176213986" table:style-name="c11">
            <text:p>-1.5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4:15</text:p>
          </table:table-cell>
          <table:table-cell office:value-type="float" office:value="0.08714354999999999" table:style-name="c10">
            <text:p>0.087144</text:p>
          </table:table-cell>
          <table:table-cell office:value-type="string" table:style-name="c10">
            <text:p>2026-04-16 14:45</text:p>
          </table:table-cell>
          <table:table-cell office:value-type="float" office:value="0.0867566" table:style-name="c10">
            <text:p>0.086757</text:p>
          </table:table-cell>
          <table:table-cell office:value-type="float" office:value="-0.6430498222759984" table:style-name="c11">
            <text:p>-0.6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45</text:p>
          </table:table-cell>
          <table:table-cell office:value-type="float" office:value="0.0886443" table:style-name="c10">
            <text:p>0.088644</text:p>
          </table:table-cell>
          <table:table-cell office:value-type="string" table:style-name="c10">
            <text:p>2026-04-17 02:45</text:p>
          </table:table-cell>
          <table:table-cell office:value-type="float" office:value="0.0897551" table:style-name="c10">
            <text:p>0.089755</text:p>
          </table:table-cell>
          <table:table-cell office:value-type="float" office:value="1.0506931129243613" table:style-name="c12">
            <text:p>+1.1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8:00</text:p>
          </table:table-cell>
          <table:table-cell office:value-type="float" office:value="0.08994495" table:style-name="c10">
            <text:p>0.089945</text:p>
          </table:table-cell>
          <table:table-cell office:value-type="string" table:style-name="c10">
            <text:p>2026-04-17 12:45</text:p>
          </table:table-cell>
          <table:table-cell office:value-type="float" office:value="0.08945525" table:style-name="c10">
            <text:p>0.089455</text:p>
          </table:table-cell>
          <table:table-cell office:value-type="float" office:value="-0.7432557856221989" table:style-name="c11">
            <text:p>-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8 14:45</text:p>
          </table:table-cell>
          <table:table-cell office:value-type="float" office:value="0.0902451" table:style-name="c10">
            <text:p>0.090245</text:p>
          </table:table-cell>
          <table:table-cell office:value-type="string" table:style-name="c10">
            <text:p>2026-04-18 15:00</text:p>
          </table:table-cell>
          <table:table-cell office:value-type="float" office:value="0.0897551" table:style-name="c10">
            <text:p>0.089755</text:p>
          </table:table-cell>
          <table:table-cell office:value-type="float" office:value="-0.7417803791009092" table:style-name="c11">
            <text:p>-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8 15:30</text:p>
          </table:table-cell>
          <table:table-cell office:value-type="float" office:value="0.09014504999999999" table:style-name="c10">
            <text:p>0.090145</text:p>
          </table:table-cell>
          <table:table-cell office:value-type="string" table:style-name="c10">
            <text:p>2026-04-18 17:00</text:p>
          </table:table-cell>
          <table:table-cell office:value-type="float" office:value="0.08915540000000001" table:style-name="c10">
            <text:p>0.089155</text:p>
          </table:table-cell>
          <table:table-cell office:value-type="float" office:value="-1.2955471704768962" table:style-name="c11">
            <text:p>-1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9 11:15</text:p>
          </table:table-cell>
          <table:table-cell office:value-type="float" office:value="0.0898449" table:style-name="c10">
            <text:p>0.089845</text:p>
          </table:table-cell>
          <table:table-cell office:value-type="string" table:style-name="c10">
            <text:p>2026-04-19 18:00</text:p>
          </table:table-cell>
          <table:table-cell office:value-type="float" office:value="0.0895552" table:style-name="c10">
            <text:p>0.089555</text:p>
          </table:table-cell>
          <table:table-cell office:value-type="float" office:value="-0.521700001669545" table:style-name="c11">
            <text:p>-0.5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0 08:15</text:p>
          </table:table-cell>
          <table:table-cell office:value-type="float" office:value="0.09014504999999999" table:style-name="c10">
            <text:p>0.090145</text:p>
          </table:table-cell>
          <table:table-cell office:value-type="string" table:style-name="c10">
            <text:p>2026-04-20 22:30</text:p>
          </table:table-cell>
          <table:table-cell office:value-type="float" office:value="0.09325335" table:style-name="c10">
            <text:p>0.093253</text:p>
          </table:table-cell>
          <table:table-cell office:value-type="float" office:value="3.2413166927635073" table:style-name="c12">
            <text:p>+3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7:30</text:p>
          </table:table-cell>
          <table:table-cell office:value-type="float" office:value="0.09274635" table:style-name="c10">
            <text:p>0.092746</text:p>
          </table:table-cell>
          <table:table-cell office:value-type="string" table:style-name="c10">
            <text:p>2026-04-21 15:00</text:p>
          </table:table-cell>
          <table:table-cell office:value-type="float" office:value="0.0927536" table:style-name="c10">
            <text:p>0.092754</text:p>
          </table:table-cell>
          <table:table-cell office:value-type="float" office:value="-0.19209860700717396" table:style-name="c11">
            <text:p>-0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16:00</text:p>
          </table:table-cell>
          <table:table-cell office:value-type="float" office:value="0.09434714999999999" table:style-name="c10">
            <text:p>0.094347</text:p>
          </table:table-cell>
          <table:table-cell office:value-type="string" table:style-name="c10">
            <text:p>2026-04-21 19:45</text:p>
          </table:table-cell>
          <table:table-cell office:value-type="float" office:value="0.09225385" table:style-name="c10">
            <text:p>0.092254</text:p>
          </table:table-cell>
          <table:table-cell office:value-type="float" office:value="-2.4141857450383775" table:style-name="c11">
            <text:p>-2.4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3:00</text:p>
          </table:table-cell>
          <table:table-cell office:value-type="float" office:value="0.09484739999999998" table:style-name="c10">
            <text:p>0.094847</text:p>
          </table:table-cell>
          <table:table-cell office:value-type="string" table:style-name="c10">
            <text:p>2026-04-22 10:30</text:p>
          </table:table-cell>
          <table:table-cell office:value-type="float" office:value="0.0943528" table:style-name="c10">
            <text:p>0.094353</text:p>
          </table:table-cell>
          <table:table-cell office:value-type="float" office:value="-0.7203268062171309" table:style-name="c11">
            <text:p>-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15:45</text:p>
          </table:table-cell>
          <table:table-cell office:value-type="float" office:value="0.09474735000000001" table:style-name="c10">
            <text:p>0.094747</text:p>
          </table:table-cell>
          <table:table-cell office:value-type="string" table:style-name="c10">
            <text:p>2026-04-22 19:45</text:p>
          </table:table-cell>
          <table:table-cell office:value-type="float" office:value="0.0937531" table:style-name="c10">
            <text:p>0.093753</text:p>
          </table:table-cell>
          <table:table-cell office:value-type="float" office:value="-1.2471720284525145" table:style-name="c11">
            <text:p>-1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06:30</text:p>
          </table:table-cell>
          <table:table-cell office:value-type="float" office:value="0.0932466" table:style-name="c10">
            <text:p>0.093247</text:p>
          </table:table-cell>
          <table:table-cell office:value-type="string" table:style-name="c10">
            <text:p>2026-04-23 18:15</text:p>
          </table:table-cell>
          <table:table-cell office:value-type="float" office:value="0.09385305000000001" table:style-name="c10">
            <text:p>0.093853</text:p>
          </table:table-cell>
          <table:table-cell office:value-type="float" office:value="0.4491721446680197" table:style-name="c12">
            <text:p>+0.4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22:30</text:p>
          </table:table-cell>
          <table:table-cell office:value-type="float" office:value="0.09454725" table:style-name="c10">
            <text:p>0.094547</text:p>
          </table:table-cell>
          <table:table-cell office:value-type="string" table:style-name="c10">
            <text:p>2026-04-23 22:45</text:p>
          </table:table-cell>
          <table:table-cell office:value-type="float" office:value="0.09445275" table:style-name="c10">
            <text:p>0.094453</text:p>
          </table:table-cell>
          <table:table-cell office:value-type="float" office:value="-0.2996502248875599" table:style-name="c11">
            <text:p>-0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4 14:15</text:p>
          </table:table-cell>
          <table:table-cell office:value-type="float" office:value="0.09594794999999999" table:style-name="c10">
            <text:p>0.095948</text:p>
          </table:table-cell>
          <table:table-cell office:value-type="string" table:style-name="c10">
            <text:p>2026-04-24 16:30</text:p>
          </table:table-cell>
          <table:table-cell office:value-type="float" office:value="0.0943528" table:style-name="c10">
            <text:p>0.094353</text:p>
          </table:table-cell>
          <table:table-cell office:value-type="float" office:value="-1.8590926092740712" table:style-name="c11">
            <text:p>-1.9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01:00</text:p>
          </table:table-cell>
          <table:table-cell office:value-type="float" office:value="0.0934467" table:style-name="c10">
            <text:p>0.093447</text:p>
          </table:table-cell>
          <table:table-cell office:value-type="string" table:style-name="c10">
            <text:p>2026-04-29 07:45</text:p>
          </table:table-cell>
          <table:table-cell office:value-type="float" office:value="0.0927536" table:style-name="c10">
            <text:p>0.092754</text:p>
          </table:table-cell>
          <table:table-cell office:value-type="float" office:value="-0.9401235639139749" table:style-name="c11">
            <text:p>-0.9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30 01:15</text:p>
          </table:table-cell>
          <table:table-cell office:value-type="float" office:value="0.09484739999999998" table:style-name="c10">
            <text:p>0.094847</text:p>
          </table:table-cell>
          <table:table-cell office:value-type="string" table:style-name="c10">
            <text:p>2026-04-30 05:30</text:p>
          </table:table-cell>
          <table:table-cell office:value-type="float" office:value="0.09315340000000001" table:style-name="c10">
            <text:p>0.093153</text:p>
          </table:table-cell>
          <table:table-cell office:value-type="float" office:value="-1.9823565502058882" table:style-name="c11">
            <text:p>-2.0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30 07:15</text:p>
          </table:table-cell>
          <table:table-cell office:value-type="float" office:value="0.09394694999999999" table:style-name="c10">
            <text:p>0.093947</text:p>
          </table:table-cell>
          <table:table-cell office:value-type="string" table:style-name="c10">
            <text:p>2026-04-30 21:15</text:p>
          </table:table-cell>
          <table:table-cell office:value-type="float" office:value="0.09545225" table:style-name="c10">
            <text:p>0.095452</text:p>
          </table:table-cell>
          <table:table-cell office:value-type="float" office:value="1.3991842760728401" table:style-name="c12">
            <text:p>+1.4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00:30</text:p>
          </table:table-cell>
          <table:table-cell office:value-type="float" office:value="0.09694844999999999" table:style-name="c10">
            <text:p>0.096948</text:p>
          </table:table-cell>
          <table:table-cell office:value-type="string" table:style-name="c10">
            <text:p>2026-05-02 05:15</text:p>
          </table:table-cell>
          <table:table-cell office:value-type="float" office:value="0.09585205000000001" table:style-name="c10">
            <text:p>0.095852</text:p>
          </table:table-cell>
          <table:table-cell office:value-type="float" office:value="-1.3285496033716648" table:style-name="c11">
            <text:p>-1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14:45</text:p>
          </table:table-cell>
          <table:table-cell office:value-type="float" office:value="0.09774884999999998" table:style-name="c10">
            <text:p>0.097749</text:p>
          </table:table-cell>
          <table:table-cell office:value-type="string" table:style-name="c10">
            <text:p>2026-05-02 18:00</text:p>
          </table:table-cell>
          <table:table-cell office:value-type="float" office:value="0.09695150000000001" table:style-name="c10">
            <text:p>0.096952</text:p>
          </table:table-cell>
          <table:table-cell office:value-type="float" office:value="-1.0139823113008317" table:style-name="c11">
            <text:p>-1.0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15</text:p>
          </table:table-cell>
          <table:table-cell office:value-type="float" office:value="0.096048" table:style-name="c10">
            <text:p>0.096048</text:p>
          </table:table-cell>
          <table:table-cell office:value-type="string" table:style-name="c10">
            <text:p>2026-05-04 02:30</text:p>
          </table:table-cell>
          <table:table-cell office:value-type="float" office:value="0.09605195000000001" table:style-name="c10">
            <text:p>0.096052</text:p>
          </table:table-cell>
          <table:table-cell office:value-type="float" office:value="-0.19579569387179196" table:style-name="c11">
            <text:p>-0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45</text:p>
          </table:table-cell>
          <table:table-cell office:value-type="float" office:value="0.09624809999999999" table:style-name="c10">
            <text:p>0.096248</text:p>
          </table:table-cell>
          <table:table-cell office:value-type="string" table:style-name="c10">
            <text:p>2026-05-04 08:45</text:p>
          </table:table-cell>
          <table:table-cell office:value-type="float" office:value="0.0961519" table:style-name="c10">
            <text:p>0.096152</text:p>
          </table:table-cell>
          <table:table-cell office:value-type="float" office:value="-0.2996502248875377" table:style-name="c11">
            <text:p>-0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21:30</text:p>
          </table:table-cell>
          <table:table-cell office:value-type="float" office:value="0.09814905" table:style-name="c10">
            <text:p>0.098149</text:p>
          </table:table-cell>
          <table:table-cell office:value-type="string" table:style-name="c10">
            <text:p>2026-05-05 04:30</text:p>
          </table:table-cell>
          <table:table-cell office:value-type="float" office:value="0.09765115" table:style-name="c10">
            <text:p>0.097651</text:p>
          </table:table-cell>
          <table:table-cell office:value-type="float" office:value="-0.7061756062335833" table:style-name="c11">
            <text:p>-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00:15</text:p>
          </table:table-cell>
          <table:table-cell office:value-type="float" office:value="0.09894945" table:style-name="c10">
            <text:p>0.098949</text:p>
          </table:table-cell>
          <table:table-cell office:value-type="string" table:style-name="c10">
            <text:p>2026-05-08 13:45</text:p>
          </table:table-cell>
          <table:table-cell office:value-type="float" office:value="0.09905045" table:style-name="c10">
            <text:p>0.09905</text:p>
          </table:table-cell>
          <table:table-cell office:value-type="float" office:value="-0.09803172180340436" table:style-name="c11">
            <text:p>-0.1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8:15</text:p>
          </table:table-cell>
          <table:table-cell office:value-type="float" office:value="0.1014507" table:style-name="c10">
            <text:p>0.10145</text:p>
          </table:table-cell>
          <table:table-cell office:value-type="string" table:style-name="c10">
            <text:p>2026-05-09 07:15</text:p>
          </table:table-cell>
          <table:table-cell office:value-type="float" office:value="0.1021489" table:style-name="c10">
            <text:p>0.10215</text:p>
          </table:table-cell>
          <table:table-cell office:value-type="float" office:value="0.4869403058825439" table:style-name="c12">
            <text:p>+0.5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2:30</text:p>
          </table:table-cell>
          <table:table-cell office:value-type="float" office:value="0.1014507" table:style-name="c10">
            <text:p>0.10145</text:p>
          </table:table-cell>
          <table:table-cell office:value-type="string" table:style-name="c10">
            <text:p>2026-05-10 21:15</text:p>
          </table:table-cell>
          <table:table-cell office:value-type="float" office:value="0.1029485" table:style-name="c10">
            <text:p>0.10295</text:p>
          </table:table-cell>
          <table:table-cell office:value-type="float" office:value="1.2735308366526699" table:style-name="c12">
            <text:p>+1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22:45</text:p>
          </table:table-cell>
          <table:table-cell office:value-type="float" office:value="0.1042521" table:style-name="c10">
            <text:p>0.10425</text:p>
          </table:table-cell>
          <table:table-cell office:value-type="string" table:style-name="c10">
            <text:p>2026-05-11 03:00</text:p>
          </table:table-cell>
          <table:table-cell office:value-type="float" office:value="0.10344825" table:style-name="c10">
            <text:p>0.10345</text:p>
          </table:table-cell>
          <table:table-cell office:value-type="float" office:value="-0.9694222483288106" table:style-name="c11">
            <text:p>-1.0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7 19:45</text:p>
          </table:table-cell>
          <table:table-cell office:value-type="float" office:value="0.09244619999999999" table:style-name="c10">
            <text:p>0.092446</text:p>
          </table:table-cell>
          <table:table-cell office:value-type="string" table:style-name="c10">
            <text:p>2026-05-17 23:00</text:p>
          </table:table-cell>
          <table:table-cell office:value-type="float" office:value="0.09165415" table:style-name="c10">
            <text:p>0.091654</text:p>
          </table:table-cell>
          <table:table-cell office:value-type="float" office:value="-1.0549559050020418" table:style-name="c11">
            <text:p>-1.1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7:30</text:p>
          </table:table-cell>
          <table:table-cell office:value-type="float" office:value="0.09126561" table:style-name="c10">
            <text:p>0.091266</text:p>
          </table:table-cell>
          <table:table-cell office:value-type="string" table:style-name="c10">
            <text:p>2026-05-22 10:00</text:p>
          </table:table-cell>
          <table:table-cell office:value-type="float" office:value="0.09213391" table:style-name="c10">
            <text:p>0.092134</text:p>
          </table:table-cell>
          <table:table-cell office:value-type="float" office:value="0.7495970430811738" table:style-name="c12">
            <text:p>+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20:45</text:p>
          </table:table-cell>
          <table:table-cell office:value-type="float" office:value="0.09174585" table:style-name="c10">
            <text:p>0.091746</text:p>
          </table:table-cell>
          <table:table-cell office:value-type="string" table:style-name="c10">
            <text:p>2026-05-22 21:00</text:p>
          </table:table-cell>
          <table:table-cell office:value-type="float" office:value="0.091704125" table:style-name="c10">
            <text:p>0.091704</text:p>
          </table:table-cell>
          <table:table-cell office:value-type="float" office:value="-0.24528798400689222" table:style-name="c11">
            <text:p>-0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4 10:15</text:p>
          </table:table-cell>
          <table:table-cell office:value-type="float" office:value="0.09198596999999999" table:style-name="c10">
            <text:p>0.091986</text:p>
          </table:table-cell>
          <table:table-cell office:value-type="string" table:style-name="c10">
            <text:p>2026-05-24 12:15</text:p>
          </table:table-cell>
          <table:table-cell office:value-type="float" office:value="0.09123436" table:style-name="c10">
            <text:p>0.091234</text:p>
          </table:table-cell>
          <table:table-cell office:value-type="float" office:value="-1.0153586309303297" table:style-name="c11">
            <text:p>-1.0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07:15</text:p>
          </table:table-cell>
          <table:table-cell office:value-type="float" office:value="0.09219607499999999" table:style-name="c10">
            <text:p>0.092196</text:p>
          </table:table-cell>
          <table:table-cell office:value-type="string" table:style-name="c10">
            <text:p>2026-05-25 22:00</text:p>
          </table:table-cell>
          <table:table-cell office:value-type="float" office:value="0.09289353" table:style-name="c10">
            <text:p>0.092894</text:p>
          </table:table-cell>
          <table:table-cell office:value-type="float" office:value="0.5550787639604371" table:style-name="c12">
            <text:p>+0.6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0 01:00</text:p>
          </table:table-cell>
          <table:table-cell office:value-type="float" office:value="0.09088542" table:style-name="c10">
            <text:p>0.090885</text:p>
          </table:table-cell>
          <table:table-cell office:value-type="string" table:style-name="c10">
            <text:p>2026-05-30 11:15</text:p>
          </table:table-cell>
          <table:table-cell office:value-type="float" office:value="0.09093451000000001" table:style-name="c10">
            <text:p>0.090935</text:p>
          </table:table-cell>
          <table:table-cell office:value-type="float" office:value="-0.14599490819316996" table:style-name="c11">
            <text:p>-0.1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2:15</text:p>
          </table:table-cell>
          <table:table-cell office:value-type="float" office:value="0.09119557499999999" table:style-name="c10">
            <text:p>0.091196</text:p>
          </table:table-cell>
          <table:table-cell office:value-type="string" table:style-name="c10">
            <text:p>2026-05-31 08:15</text:p>
          </table:table-cell>
          <table:table-cell office:value-type="float" office:value="0.09065465" table:style-name="c10">
            <text:p>0.090655</text:p>
          </table:table-cell>
          <table:table-cell office:value-type="float" office:value="-0.7918625934975387" table:style-name="c11">
            <text:p>-0.8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20:15</text:p>
          </table:table-cell>
          <table:table-cell office:value-type="float" office:value="0.091995975" table:style-name="c10">
            <text:p>0.091996</text:p>
          </table:table-cell>
          <table:table-cell office:value-type="string" table:style-name="c10">
            <text:p>2026-06-01 06:30</text:p>
          </table:table-cell>
          <table:table-cell office:value-type="float" office:value="0.09229383000000001" table:style-name="c10">
            <text:p>0.092294</text:p>
          </table:table-cell>
          <table:table-cell office:value-type="float" office:value="0.12322238427280308" table:style-name="c12">
            <text:p>+0.1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11:00</text:p>
          </table:table-cell>
          <table:table-cell office:value-type="float" office:value="0.09294644999999999" table:style-name="c10">
            <text:p>0.092946</text:p>
          </table:table-cell>
          <table:table-cell office:value-type="string" table:style-name="c10">
            <text:p>2026-06-01 13:30</text:p>
          </table:table-cell>
          <table:table-cell office:value-type="float" office:value="0.09197399" table:style-name="c10">
            <text:p>0.091974</text:p>
          </table:table-cell>
          <table:table-cell office:value-type="float" office:value="-1.2440668858358483" table:style-name="c11">
            <text:p>-1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15:45</text:p>
          </table:table-cell>
          <table:table-cell office:value-type="float" office:value="0.09325660499999999" table:style-name="c10">
            <text:p>0.093257</text:p>
          </table:table-cell>
          <table:table-cell office:value-type="string" table:style-name="c10">
            <text:p>2026-06-01 22:45</text:p>
          </table:table-cell>
          <table:table-cell office:value-type="float" office:value="0.093303325" table:style-name="c10">
            <text:p>0.093303</text:p>
          </table:table-cell>
          <table:table-cell office:value-type="float" office:value="-0.14990181840200956" table:style-name="c11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20:30</text:p>
          </table:table-cell>
          <table:table-cell office:value-type="float" office:value="5.612804999999999e-06" table:style-name="c1">
            <text:p>0.0000056128</text:p>
          </table:table-cell>
          <table:table-cell office:value-type="string" table:style-name="c1">
            <text:p>2026-03-05 23:15</text:p>
          </table:table-cell>
          <table:table-cell office:value-type="float" office:value="5.547225000000001e-06" table:style-name="c1">
            <text:p>0.0000055472</text:p>
          </table:table-cell>
          <table:table-cell office:value-type="float" office:value="-1.3659641262256272" table:style-name="c14">
            <text:p>-1.4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30</text:p>
          </table:table-cell>
          <table:table-cell office:value-type="float" office:value="5.56278e-06" table:style-name="c1">
            <text:p>0.0000055628</text:p>
          </table:table-cell>
          <table:table-cell office:value-type="string" table:style-name="c1">
            <text:p>2026-03-09 23:00</text:p>
          </table:table-cell>
          <table:table-cell office:value-type="float" office:value="5.427285e-06" table:style-name="c1">
            <text:p>0.0000054273</text:p>
          </table:table-cell>
          <table:table-cell office:value-type="float" office:value="-2.630773510996287" table:style-name="c14">
            <text:p>-2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8:15</text:p>
          </table:table-cell>
          <table:table-cell office:value-type="float" office:value="5.632815e-06" table:style-name="c1">
            <text:p>0.0000056328</text:p>
          </table:table-cell>
          <table:table-cell office:value-type="string" table:style-name="c1">
            <text:p>2026-03-10 18:45</text:p>
          </table:table-cell>
          <table:table-cell office:value-type="float" office:value="5.73713e-06" table:style-name="c1">
            <text:p>0.0000057371</text:p>
          </table:table-cell>
          <table:table-cell office:value-type="float" office:value="1.6483139803100233" table:style-name="c13">
            <text:p>+1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2:30</text:p>
          </table:table-cell>
          <table:table-cell office:value-type="float" office:value="5.772884999999999e-06" table:style-name="c1">
            <text:p>0.0000057729</text:p>
          </table:table-cell>
          <table:table-cell office:value-type="string" table:style-name="c1">
            <text:p>2026-03-11 20:30</text:p>
          </table:table-cell>
          <table:table-cell office:value-type="float" office:value="5.77711e-06" table:style-name="c1">
            <text:p>0.0000057771</text:p>
          </table:table-cell>
          <table:table-cell office:value-type="float" office:value="-0.12685932406412137" table:style-name="c14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7:15</text:p>
          </table:table-cell>
          <table:table-cell office:value-type="float" office:value="5.74287e-06" table:style-name="c1">
            <text:p>0.0000057429</text:p>
          </table:table-cell>
          <table:table-cell office:value-type="string" table:style-name="c1">
            <text:p>2026-03-12 15:45</text:p>
          </table:table-cell>
          <table:table-cell office:value-type="float" office:value="5.907045e-06" table:style-name="c1">
            <text:p>0.000005907</text:p>
          </table:table-cell>
          <table:table-cell office:value-type="float" office:value="2.653147590751659" table:style-name="c13">
            <text:p>+2.7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45</text:p>
          </table:table-cell>
          <table:table-cell office:value-type="float" office:value="5.972984999999999e-06" table:style-name="c1">
            <text:p>0.000005973</text:p>
          </table:table-cell>
          <table:table-cell office:value-type="string" table:style-name="c1">
            <text:p>2026-03-13 05:45</text:p>
          </table:table-cell>
          <table:table-cell office:value-type="float" office:value="5.9370300000000005e-06" table:style-name="c1">
            <text:p>0.000005937</text:p>
          </table:table-cell>
          <table:table-cell office:value-type="float" office:value="-0.8006570076770414" table:style-name="c14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7:45</text:p>
          </table:table-cell>
          <table:table-cell office:value-type="float" office:value="5.972984999999999e-06" table:style-name="c1">
            <text:p>0.000005973</text:p>
          </table:table-cell>
          <table:table-cell office:value-type="string" table:style-name="c1">
            <text:p>2026-03-13 15:30</text:p>
          </table:table-cell>
          <table:table-cell office:value-type="float" office:value="6.0869550000000006e-06" table:style-name="c1">
            <text:p>0.000006087</text:p>
          </table:table-cell>
          <table:table-cell office:value-type="float" office:value="1.7043769062704994" table:style-name="c13">
            <text:p>+1.7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1:00</text:p>
          </table:table-cell>
          <table:table-cell office:value-type="float" office:value="6.02301e-06" table:style-name="c1">
            <text:p>0.000006023</text:p>
          </table:table-cell>
          <table:table-cell office:value-type="string" table:style-name="c1">
            <text:p>2026-03-16 11:15</text:p>
          </table:table-cell>
          <table:table-cell office:value-type="float" office:value="6.156920000000001e-06" table:style-name="c1">
            <text:p>0.0000061569</text:p>
          </table:table-cell>
          <table:table-cell office:value-type="float" office:value="2.018962560580184" table:style-name="c13">
            <text:p>+2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19:15</text:p>
          </table:table-cell>
          <table:table-cell office:value-type="float" office:value="6.093045e-06" table:style-name="c1">
            <text:p>0.000006093</text:p>
          </table:table-cell>
          <table:table-cell office:value-type="string" table:style-name="c1">
            <text:p>2026-03-18 00:15</text:p>
          </table:table-cell>
          <table:table-cell office:value-type="float" office:value="6.05697e-06" table:style-name="c1">
            <text:p>0.000006057</text:p>
          </table:table-cell>
          <table:table-cell office:value-type="float" office:value="-0.7907849528437483" table:style-name="c14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2:15</text:p>
          </table:table-cell>
          <table:table-cell office:value-type="float" office:value="6.153075e-06" table:style-name="c1">
            <text:p>0.0000061531</text:p>
          </table:table-cell>
          <table:table-cell office:value-type="string" table:style-name="c1">
            <text:p>2026-03-18 06:30</text:p>
          </table:table-cell>
          <table:table-cell office:value-type="float" office:value="6.1069450000000005e-06" table:style-name="c1">
            <text:p>0.0000061069</text:p>
          </table:table-cell>
          <table:table-cell office:value-type="float" office:value="-0.948107784400487" table:style-name="c14">
            <text:p>-0.9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0 11:15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3-20 13:00</text:p>
          </table:table-cell>
          <table:table-cell office:value-type="float" office:value="5.967015e-06" table:style-name="c1">
            <text:p>0.000005967</text:p>
          </table:table-cell>
          <table:table-cell office:value-type="float" office:value="-1.6180019574510207" table:style-name="c14">
            <text:p>-1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05:30</text:p>
          </table:table-cell>
          <table:table-cell office:value-type="float" office:value="6.043019999999999e-06" table:style-name="c1">
            <text:p>0.000006043</text:p>
          </table:table-cell>
          <table:table-cell office:value-type="string" table:style-name="c1">
            <text:p>2026-03-21 10:15</text:p>
          </table:table-cell>
          <table:table-cell office:value-type="float" office:value="5.987005000000001e-06" table:style-name="c1">
            <text:p>0.000005987</text:p>
          </table:table-cell>
          <table:table-cell office:value-type="float" office:value="-1.1249842462046855" table:style-name="c14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20:15</text:p>
          </table:table-cell>
          <table:table-cell office:value-type="float" office:value="6.143069999999999e-06" table:style-name="c1">
            <text:p>0.0000061431</text:p>
          </table:table-cell>
          <table:table-cell office:value-type="string" table:style-name="c1">
            <text:p>2026-03-24 00:15</text:p>
          </table:table-cell>
          <table:table-cell office:value-type="float" office:value="6.07696e-06" table:style-name="c1">
            <text:p>0.000006077</text:p>
          </table:table-cell>
          <table:table-cell office:value-type="float" office:value="-1.2739207438625666" table:style-name="c14">
            <text:p>-1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9:45</text:p>
          </table:table-cell>
          <table:table-cell office:value-type="float" office:value="6.173085e-06" table:style-name="c1">
            <text:p>0.0000061731</text:p>
          </table:table-cell>
          <table:table-cell office:value-type="string" table:style-name="c1">
            <text:p>2026-03-24 12:30</text:p>
          </table:table-cell>
          <table:table-cell office:value-type="float" office:value="6.1069450000000005e-06" table:style-name="c1">
            <text:p>0.0000061069</text:p>
          </table:table-cell>
          <table:table-cell office:value-type="float" office:value="-1.2691836100588216" table:style-name="c14">
            <text:p>-1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45</text:p>
          </table:table-cell>
          <table:table-cell office:value-type="float" office:value="6.22311e-06" table:style-name="c1">
            <text:p>0.0000062231</text:p>
          </table:table-cell>
          <table:table-cell office:value-type="string" table:style-name="c1">
            <text:p>2026-03-25 03:00</text:p>
          </table:table-cell>
          <table:table-cell office:value-type="float" office:value="6.156920000000001e-06" table:style-name="c1">
            <text:p>0.0000061569</text:p>
          </table:table-cell>
          <table:table-cell office:value-type="float" office:value="-1.261389933329149" table:style-name="c14">
            <text:p>-1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6:00</text:p>
          </table:table-cell>
          <table:table-cell office:value-type="float" office:value="6.033015e-06" table:style-name="c1">
            <text:p>0.000006033</text:p>
          </table:table-cell>
          <table:table-cell office:value-type="string" table:style-name="c1">
            <text:p>2026-03-30 12:45</text:p>
          </table:table-cell>
          <table:table-cell office:value-type="float" office:value="6.01699e-06" table:style-name="c1">
            <text:p>0.000006017</text:p>
          </table:table-cell>
          <table:table-cell office:value-type="float" office:value="-0.4649907717782731" table:style-name="c14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15:45</text:p>
          </table:table-cell>
          <table:table-cell office:value-type="float" office:value="6.093045e-06" table:style-name="c1">
            <text:p>0.000006093</text:p>
          </table:table-cell>
          <table:table-cell office:value-type="string" table:style-name="c1">
            <text:p>2026-03-30 18:15</text:p>
          </table:table-cell>
          <table:table-cell office:value-type="float" office:value="6.006995000000001e-06" table:style-name="c1">
            <text:p>0.000006007</text:p>
          </table:table-cell>
          <table:table-cell office:value-type="float" office:value="-1.6093428327708104" table:style-name="c14">
            <text:p>-1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1:45</text:p>
          </table:table-cell>
          <table:table-cell office:value-type="float" office:value="5.932965e-06" table:style-name="c1">
            <text:p>0.000005933</text:p>
          </table:table-cell>
          <table:table-cell office:value-type="string" table:style-name="c1">
            <text:p>2026-03-31 12:00</text:p>
          </table:table-cell>
          <table:table-cell office:value-type="float" office:value="5.907045e-06" table:style-name="c1">
            <text:p>0.000005907</text:p>
          </table:table-cell>
          <table:table-cell office:value-type="float" office:value="-0.6359077283449088" table:style-name="c14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2:30</text:p>
          </table:table-cell>
          <table:table-cell office:value-type="float" office:value="5.92296e-06" table:style-name="c1">
            <text:p>0.000005923</text:p>
          </table:table-cell>
          <table:table-cell office:value-type="string" table:style-name="c1">
            <text:p>2026-03-31 13:15</text:p>
          </table:table-cell>
          <table:table-cell office:value-type="float" office:value="5.8970500000000006e-06" table:style-name="c1">
            <text:p>0.0000058971</text:p>
          </table:table-cell>
          <table:table-cell office:value-type="float" office:value="-0.6364757308845226" table:style-name="c14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4:15</text:p>
          </table:table-cell>
          <table:table-cell office:value-type="float" office:value="5.942969999999999e-06" table:style-name="c1">
            <text:p>0.000005943</text:p>
          </table:table-cell>
          <table:table-cell office:value-type="string" table:style-name="c1">
            <text:p>2026-03-31 15:45</text:p>
          </table:table-cell>
          <table:table-cell office:value-type="float" office:value="5.87706e-06" table:style-name="c1">
            <text:p>0.0000058771</text:p>
          </table:table-cell>
          <table:table-cell office:value-type="float" office:value="-1.3067244650401988" table:style-name="c14">
            <text:p>-1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7:15</text:p>
          </table:table-cell>
          <table:table-cell office:value-type="float" office:value="6.003e-06" table:style-name="c1">
            <text:p>0.000006003</text:p>
          </table:table-cell>
          <table:table-cell office:value-type="string" table:style-name="c1">
            <text:p>2026-03-31 23:00</text:p>
          </table:table-cell>
          <table:table-cell office:value-type="float" office:value="5.927035e-06" table:style-name="c1">
            <text:p>0.000005927</text:p>
          </table:table-cell>
          <table:table-cell office:value-type="float" office:value="-1.4628209722638563" table:style-name="c14">
            <text:p>-1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6.063029999999999e-06" table:style-name="c1">
            <text:p>0.000006063</text:p>
          </table:table-cell>
          <table:table-cell office:value-type="string" table:style-name="c1">
            <text:p>2026-04-01 19:00</text:p>
          </table:table-cell>
          <table:table-cell office:value-type="float" office:value="6.01699e-06" table:style-name="c1">
            <text:p>0.000006017</text:p>
          </table:table-cell>
          <table:table-cell office:value-type="float" office:value="-0.9577383422150088" table:style-name="c14">
            <text:p>-1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2 00:45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4-02 01:15</text:p>
          </table:table-cell>
          <table:table-cell office:value-type="float" office:value="5.997e-06" table:style-name="c1">
            <text:p>0.000005997</text:p>
          </table:table-cell>
          <table:table-cell office:value-type="float" office:value="-1.123620057739727" table:style-name="c14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9:15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4-05 01:15</text:p>
          </table:table-cell>
          <table:table-cell office:value-type="float" office:value="5.9570200000000004e-06" table:style-name="c1">
            <text:p>0.000005957</text:p>
          </table:table-cell>
          <table:table-cell office:value-type="float" office:value="-1.7827959240214408" table:style-name="c14">
            <text:p>-1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00</text:p>
          </table:table-cell>
          <table:table-cell office:value-type="float" office:value="6.153075e-06" table:style-name="c1">
            <text:p>0.0000061531</text:p>
          </table:table-cell>
          <table:table-cell office:value-type="string" table:style-name="c1">
            <text:p>2026-04-08 08:30</text:p>
          </table:table-cell>
          <table:table-cell office:value-type="float" office:value="6.1069450000000005e-06" table:style-name="c1">
            <text:p>0.0000061069</text:p>
          </table:table-cell>
          <table:table-cell office:value-type="float" office:value="-0.948107784400487" table:style-name="c14">
            <text:p>-0.9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6.02301e-06" table:style-name="c1">
            <text:p>0.000006023</text:p>
          </table:table-cell>
          <table:table-cell office:value-type="string" table:style-name="c1">
            <text:p>2026-04-11 23:15</text:p>
          </table:table-cell>
          <table:table-cell office:value-type="float" office:value="5.9370300000000005e-06" table:style-name="c1">
            <text:p>0.000005937</text:p>
          </table:table-cell>
          <table:table-cell office:value-type="float" office:value="-1.6245718165833756" table:style-name="c14">
            <text:p>-1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0:00</text:p>
          </table:table-cell>
          <table:table-cell office:value-type="float" office:value="6.013004999999999e-06" table:style-name="c1">
            <text:p>0.000006013</text:p>
          </table:table-cell>
          <table:table-cell office:value-type="string" table:style-name="c1">
            <text:p>2026-04-14 05:15</text:p>
          </table:table-cell>
          <table:table-cell office:value-type="float" office:value="5.887055000000001e-06" table:style-name="c1">
            <text:p>0.0000058871</text:p>
          </table:table-cell>
          <table:table-cell office:value-type="float" office:value="-2.2903394050894366" table:style-name="c14">
            <text:p>-2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1:15</text:p>
          </table:table-cell>
          <table:table-cell office:value-type="float" office:value="5.962979999999999e-06" table:style-name="c1">
            <text:p>0.000005963</text:p>
          </table:table-cell>
          <table:table-cell office:value-type="string" table:style-name="c1">
            <text:p>2026-04-14 13:00</text:p>
          </table:table-cell>
          <table:table-cell office:value-type="float" office:value="5.907045e-06" table:style-name="c1">
            <text:p>0.000005907</text:p>
          </table:table-cell>
          <table:table-cell office:value-type="float" office:value="-1.1360625552156445" table:style-name="c14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6.003e-06" table:style-name="c1">
            <text:p>0.000006003</text:p>
          </table:table-cell>
          <table:table-cell office:value-type="string" table:style-name="c1">
            <text:p>2026-04-14 17:30</text:p>
          </table:table-cell>
          <table:table-cell office:value-type="float" office:value="5.9170400000000005e-06" table:style-name="c1">
            <text:p>0.000005917</text:p>
          </table:table-cell>
          <table:table-cell office:value-type="float" office:value="-1.6289882218890384" table:style-name="c14">
            <text:p>-1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15</text:p>
          </table:table-cell>
          <table:table-cell office:value-type="float" office:value="5.892945e-06" table:style-name="c1">
            <text:p>0.0000058929</text:p>
          </table:table-cell>
          <table:table-cell office:value-type="string" table:style-name="c1">
            <text:p>2026-04-16 10:00</text:p>
          </table:table-cell>
          <table:table-cell office:value-type="float" office:value="6.046975e-06" table:style-name="c1">
            <text:p>0.000006047</text:p>
          </table:table-cell>
          <table:table-cell office:value-type="float" office:value="2.4086784617029178" table:style-name="c13">
            <text:p>+2.4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30</text:p>
          </table:table-cell>
          <table:table-cell office:value-type="float" office:value="6.10305e-06" table:style-name="c1">
            <text:p>0.000006103</text:p>
          </table:table-cell>
          <table:table-cell office:value-type="string" table:style-name="c1">
            <text:p>2026-04-16 14:30</text:p>
          </table:table-cell>
          <table:table-cell office:value-type="float" office:value="5.997e-06" table:style-name="c1">
            <text:p>0.000005997</text:p>
          </table:table-cell>
          <table:table-cell office:value-type="float" office:value="-1.934082188413977" table:style-name="c14">
            <text:p>-1.9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45</text:p>
          </table:table-cell>
          <table:table-cell office:value-type="float" office:value="6.133064999999999e-06" table:style-name="c1">
            <text:p>0.0000061331</text:p>
          </table:table-cell>
          <table:table-cell office:value-type="string" table:style-name="c1">
            <text:p>2026-04-17 00:30</text:p>
          </table:table-cell>
          <table:table-cell office:value-type="float" office:value="6.226885e-06" table:style-name="c1">
            <text:p>0.0000062269</text:p>
          </table:table-cell>
          <table:table-cell office:value-type="float" office:value="1.3267828872676413" table:style-name="c13">
            <text:p>+1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6.333165e-06" table:style-name="c1">
            <text:p>0.0000063332</text:p>
          </table:table-cell>
          <table:table-cell office:value-type="string" table:style-name="c1">
            <text:p>2026-04-17 20:00</text:p>
          </table:table-cell>
          <table:table-cell office:value-type="float" office:value="6.366815e-06" table:style-name="c1">
            <text:p>0.0000063668</text:p>
          </table:table-cell>
          <table:table-cell office:value-type="float" office:value="0.330367783170038" table:style-name="c13">
            <text:p>+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6:45</text:p>
          </table:table-cell>
          <table:table-cell office:value-type="float" office:value="6.303149999999999e-06" table:style-name="c1">
            <text:p>0.0000063031</text:p>
          </table:table-cell>
          <table:table-cell office:value-type="string" table:style-name="c1">
            <text:p>2026-04-18 08:30</text:p>
          </table:table-cell>
          <table:table-cell office:value-type="float" office:value="6.21689e-06" table:style-name="c1">
            <text:p>0.0000062169</text:p>
          </table:table-cell>
          <table:table-cell office:value-type="float" office:value="-1.5656864125080272" table:style-name="c14">
            <text:p>-1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20:30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4-21 20:45</text:p>
          </table:table-cell>
          <table:table-cell office:value-type="float" office:value="6.046975e-06" table:style-name="c1">
            <text:p>0.000006047</text:p>
          </table:table-cell>
          <table:table-cell office:value-type="float" office:value="-0.2996502248875488" table:style-name="c14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15</text:p>
          </table:table-cell>
          <table:table-cell office:value-type="float" office:value="6.12306e-06" table:style-name="c1">
            <text:p>0.0000061231</text:p>
          </table:table-cell>
          <table:table-cell office:value-type="string" table:style-name="c1">
            <text:p>2026-04-22 17:30</text:p>
          </table:table-cell>
          <table:table-cell office:value-type="float" office:value="6.21689e-06" table:style-name="c1">
            <text:p>0.0000062169</text:p>
          </table:table-cell>
          <table:table-cell office:value-type="float" office:value="1.3294404577123276" table:style-name="c13">
            <text:p>+1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6:30</text:p>
          </table:table-cell>
          <table:table-cell office:value-type="float" office:value="6.12306e-06" table:style-name="c1">
            <text:p>0.0000061231</text:p>
          </table:table-cell>
          <table:table-cell office:value-type="string" table:style-name="c1">
            <text:p>2026-04-23 09:15</text:p>
          </table:table-cell>
          <table:table-cell office:value-type="float" office:value="6.05697e-06" table:style-name="c1">
            <text:p>0.000006057</text:p>
          </table:table-cell>
          <table:table-cell office:value-type="float" office:value="-1.277104634447468" table:style-name="c14">
            <text:p>-1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15:30</text:p>
          </table:table-cell>
          <table:table-cell office:value-type="float" office:value="6.1830899999999994e-06" table:style-name="c1">
            <text:p>0.0000061831</text:p>
          </table:table-cell>
          <table:table-cell office:value-type="string" table:style-name="c1">
            <text:p>2026-04-23 17:45</text:p>
          </table:table-cell>
          <table:table-cell office:value-type="float" office:value="6.066965000000001e-06" table:style-name="c1">
            <text:p>0.000006067</text:p>
          </table:table-cell>
          <table:table-cell office:value-type="float" office:value="-2.0742519199138054" table:style-name="c14">
            <text:p>-2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0:45</text:p>
          </table:table-cell>
          <table:table-cell office:value-type="float" office:value="6.16308e-06" table:style-name="c1">
            <text:p>0.0000061631</text:p>
          </table:table-cell>
          <table:table-cell office:value-type="string" table:style-name="c1">
            <text:p>2026-04-24 03:30</text:p>
          </table:table-cell>
          <table:table-cell office:value-type="float" office:value="6.1069450000000005e-06" table:style-name="c1">
            <text:p>0.0000061069</text:p>
          </table:table-cell>
          <table:table-cell office:value-type="float" office:value="-1.1089063107245" table:style-name="c14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1:15</text:p>
          </table:table-cell>
          <table:table-cell office:value-type="float" office:value="6.213104999999999e-06" table:style-name="c1">
            <text:p>0.0000062131</text:p>
          </table:table-cell>
          <table:table-cell office:value-type="string" table:style-name="c1">
            <text:p>2026-04-24 22:45</text:p>
          </table:table-cell>
          <table:table-cell office:value-type="float" office:value="6.206895e-06" table:style-name="c1">
            <text:p>0.0000062069</text:p>
          </table:table-cell>
          <table:table-cell office:value-type="float" office:value="-0.2996502248875488" table:style-name="c14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8:45</text:p>
          </table:table-cell>
          <table:table-cell office:value-type="float" office:value="6.2031e-06" table:style-name="c1">
            <text:p>0.0000062031</text:p>
          </table:table-cell>
          <table:table-cell office:value-type="string" table:style-name="c1">
            <text:p>2026-04-27 05:30</text:p>
          </table:table-cell>
          <table:table-cell office:value-type="float" office:value="6.1469250000000004e-06" table:style-name="c1">
            <text:p>0.0000061469</text:p>
          </table:table-cell>
          <table:table-cell office:value-type="float" office:value="-1.1036853037191041" table:style-name="c14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4:45</text:p>
          </table:table-cell>
          <table:table-cell office:value-type="float" office:value="6.22311e-06" table:style-name="c1">
            <text:p>0.0000062231</text:p>
          </table:table-cell>
          <table:table-cell office:value-type="string" table:style-name="c1">
            <text:p>2026-04-29 13:30</text:p>
          </table:table-cell>
          <table:table-cell office:value-type="float" office:value="6.276860000000001e-06" table:style-name="c1">
            <text:p>0.0000062769</text:p>
          </table:table-cell>
          <table:table-cell office:value-type="float" office:value="0.6620894835540625" table:style-name="c13">
            <text:p>+0.7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21:45</text:p>
          </table:table-cell>
          <table:table-cell office:value-type="float" office:value="6.16308e-06" table:style-name="c1">
            <text:p>0.0000061631</text:p>
          </table:table-cell>
          <table:table-cell office:value-type="string" table:style-name="c1">
            <text:p>2026-04-30 05:00</text:p>
          </table:table-cell>
          <table:table-cell office:value-type="float" office:value="6.176910000000001e-06" table:style-name="c1">
            <text:p>0.0000061769</text:p>
          </table:table-cell>
          <table:table-cell office:value-type="float" office:value="0.024052209447233963" table:style-name="c13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01:45</text:p>
          </table:table-cell>
          <table:table-cell office:value-type="float" office:value="6.293145e-06" table:style-name="c1">
            <text:p>0.0000062931</text:p>
          </table:table-cell>
          <table:table-cell office:value-type="string" table:style-name="c1">
            <text:p>2026-05-01 09:15</text:p>
          </table:table-cell>
          <table:table-cell office:value-type="float" office:value="6.3368300000000004e-06" table:style-name="c1">
            <text:p>0.0000063368</text:p>
          </table:table-cell>
          <table:table-cell office:value-type="float" office:value="0.4928803774583379" table:style-name="c13">
            <text:p>+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2:45</text:p>
          </table:table-cell>
          <table:table-cell office:value-type="float" office:value="6.34317e-06" table:style-name="c1">
            <text:p>0.0000063432</text:p>
          </table:table-cell>
          <table:table-cell office:value-type="string" table:style-name="c1">
            <text:p>2026-05-01 17:15</text:p>
          </table:table-cell>
          <table:table-cell office:value-type="float" office:value="6.346825000000001e-06" table:style-name="c1">
            <text:p>0.0000063468</text:p>
          </table:table-cell>
          <table:table-cell office:value-type="float" office:value="-0.14239415268705313" table:style-name="c14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4:30</text:p>
          </table:table-cell>
          <table:table-cell office:value-type="float" office:value="6.303149999999999e-06" table:style-name="c1">
            <text:p>0.0000063031</text:p>
          </table:table-cell>
          <table:table-cell office:value-type="string" table:style-name="c1">
            <text:p>2026-05-02 18:15</text:p>
          </table:table-cell>
          <table:table-cell office:value-type="float" office:value="6.246875e-06" table:style-name="c1">
            <text:p>0.0000062469</text:p>
          </table:table-cell>
          <table:table-cell office:value-type="float" office:value="-1.0909228421503325" table:style-name="c14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22:00</text:p>
          </table:table-cell>
          <table:table-cell office:value-type="float" office:value="6.293145e-06" table:style-name="c1">
            <text:p>0.0000062931</text:p>
          </table:table-cell>
          <table:table-cell office:value-type="string" table:style-name="c1">
            <text:p>2026-05-02 23:15</text:p>
          </table:table-cell>
          <table:table-cell office:value-type="float" office:value="6.266865e-06" table:style-name="c1">
            <text:p>0.0000062669</text:p>
          </table:table-cell>
          <table:table-cell office:value-type="float" office:value="-0.6166624658258901" table:style-name="c14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2:00</text:p>
          </table:table-cell>
          <table:table-cell office:value-type="float" office:value="6.403199999999999e-06" table:style-name="c1">
            <text:p>0.0000064032</text:p>
          </table:table-cell>
          <table:table-cell office:value-type="string" table:style-name="c1">
            <text:p>2026-05-06 13:30</text:p>
          </table:table-cell>
          <table:table-cell office:value-type="float" office:value="6.3968e-06" table:style-name="c1">
            <text:p>0.0000063968</text:p>
          </table:table-cell>
          <table:table-cell office:value-type="float" office:value="-0.2996502248875377" table:style-name="c14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21:45</text:p>
          </table:table-cell>
          <table:table-cell office:value-type="float" office:value="6.44322e-06" table:style-name="c1">
            <text:p>0.0000064432</text:p>
          </table:table-cell>
          <table:table-cell office:value-type="string" table:style-name="c1">
            <text:p>2026-05-06 23:15</text:p>
          </table:table-cell>
          <table:table-cell office:value-type="float" office:value="6.37681e-06" table:style-name="c1">
            <text:p>0.0000063768</text:p>
          </table:table-cell>
          <table:table-cell office:value-type="float" office:value="-1.2285354712395447" table:style-name="c14">
            <text:p>-1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7:00</text:p>
          </table:table-cell>
          <table:table-cell office:value-type="float" office:value="6.373185e-06" table:style-name="c1">
            <text:p>0.0000063732</text:p>
          </table:table-cell>
          <table:table-cell office:value-type="string" table:style-name="c1">
            <text:p>2026-05-07 10:30</text:p>
          </table:table-cell>
          <table:table-cell office:value-type="float" office:value="6.31684e-06" table:style-name="c1">
            <text:p>0.0000063168</text:p>
          </table:table-cell>
          <table:table-cell office:value-type="float" office:value="-1.0822275386639602" table:style-name="c14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7:45</text:p>
          </table:table-cell>
          <table:table-cell office:value-type="float" office:value="6.42321e-06" table:style-name="c1">
            <text:p>0.0000064232</text:p>
          </table:table-cell>
          <table:table-cell office:value-type="string" table:style-name="c1">
            <text:p>2026-05-09 05:30</text:p>
          </table:table-cell>
          <table:table-cell office:value-type="float" office:value="6.45677e-06" table:style-name="c1">
            <text:p>0.0000064568</text:p>
          </table:table-cell>
          <table:table-cell office:value-type="float" office:value="0.32153575501969733" table:style-name="c13">
            <text:p>+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7:30</text:p>
          </table:table-cell>
          <table:table-cell office:value-type="float" office:value="6.42321e-06" table:style-name="c1">
            <text:p>0.0000064232</text:p>
          </table:table-cell>
          <table:table-cell office:value-type="string" table:style-name="c1">
            <text:p>2026-05-09 22:00</text:p>
          </table:table-cell>
          <table:table-cell office:value-type="float" office:value="6.386805e-06" table:style-name="c1">
            <text:p>0.0000063868</text:p>
          </table:table-cell>
          <table:table-cell office:value-type="float" office:value="-0.7655397098179639" table:style-name="c14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2:30</text:p>
          </table:table-cell>
          <table:table-cell office:value-type="float" office:value="6.393195e-06" table:style-name="c1">
            <text:p>0.0000063932</text:p>
          </table:table-cell>
          <table:table-cell office:value-type="string" table:style-name="c1">
            <text:p>2026-05-10 02:45</text:p>
          </table:table-cell>
          <table:table-cell office:value-type="float" office:value="6.366815e-06" table:style-name="c1">
            <text:p>0.0000063668</text:p>
          </table:table-cell>
          <table:table-cell office:value-type="float" office:value="-0.6117013978925834" table:style-name="c14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6:00</text:p>
          </table:table-cell>
          <table:table-cell office:value-type="float" office:value="6.413204999999999e-06" table:style-name="c1">
            <text:p>0.0000064132</text:p>
          </table:table-cell>
          <table:table-cell office:value-type="string" table:style-name="c1">
            <text:p>2026-05-10 20:45</text:p>
          </table:table-cell>
          <table:table-cell office:value-type="float" office:value="6.5067450000000005e-06" table:style-name="c1">
            <text:p>0.0000065067</text:p>
          </table:table-cell>
          <table:table-cell office:value-type="float" office:value="1.2557374471110938" table:style-name="c13">
            <text:p>+1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3:15</text:p>
          </table:table-cell>
          <table:table-cell office:value-type="float" office:value="6.6033e-06" table:style-name="c1">
            <text:p>0.0000066033</text:p>
          </table:table-cell>
          <table:table-cell office:value-type="string" table:style-name="c1">
            <text:p>2026-05-11 01:00</text:p>
          </table:table-cell>
          <table:table-cell office:value-type="float" office:value="6.53673e-06" table:style-name="c1">
            <text:p>0.0000065367</text:p>
          </table:table-cell>
          <table:table-cell office:value-type="float" office:value="-1.2060170410249316" table:style-name="c14">
            <text:p>-1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0:45</text:p>
          </table:table-cell>
          <table:table-cell office:value-type="float" office:value="5.812905e-06" table:style-name="c1">
            <text:p>0.0000058129</text:p>
          </table:table-cell>
          <table:table-cell office:value-type="string" table:style-name="c1">
            <text:p>2026-05-21 06:45</text:p>
          </table:table-cell>
          <table:table-cell office:value-type="float" office:value="5.807095e-06" table:style-name="c1">
            <text:p>0.0000058071</text:p>
          </table:table-cell>
          <table:table-cell office:value-type="float" office:value="-0.2996502248875488" table:style-name="c14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5.842919999999999e-06" table:style-name="c1">
            <text:p>0.0000058429</text:p>
          </table:table-cell>
          <table:table-cell office:value-type="string" table:style-name="c1">
            <text:p>2026-05-21 10:00</text:p>
          </table:table-cell>
          <table:table-cell office:value-type="float" office:value="5.797100000000001e-06" table:style-name="c1">
            <text:p>0.0000057971</text:p>
          </table:table-cell>
          <table:table-cell office:value-type="float" office:value="-0.9825293329362439" table:style-name="c14">
            <text:p>-1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30</text:p>
          </table:table-cell>
          <table:table-cell office:value-type="float" office:value="5.842919999999999e-06" table:style-name="c1">
            <text:p>0.0000058429</text:p>
          </table:table-cell>
          <table:table-cell office:value-type="string" table:style-name="c1">
            <text:p>2026-05-21 23:15</text:p>
          </table:table-cell>
          <table:table-cell office:value-type="float" office:value="5.817090000000001e-06" table:style-name="c1">
            <text:p>0.0000058171</text:p>
          </table:table-cell>
          <table:table-cell office:value-type="float" office:value="-0.6410897789118852" table:style-name="c14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1:45</text:p>
          </table:table-cell>
          <table:table-cell office:value-type="float" office:value="5.492745e-06" table:style-name="c1">
            <text:p>0.0000054927</text:p>
          </table:table-cell>
          <table:table-cell office:value-type="string" table:style-name="c1">
            <text:p>2026-05-30 11:15</text:p>
          </table:table-cell>
          <table:table-cell office:value-type="float" office:value="5.487255e-06" table:style-name="c1">
            <text:p>0.0000054873</text:p>
          </table:table-cell>
          <table:table-cell office:value-type="float" office:value="-0.2996502248875599" table:style-name="c14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22:15</text:p>
          </table:table-cell>
          <table:table-cell office:value-type="float" office:value="5.512754999999999e-06" table:style-name="c1">
            <text:p>0.0000055128</text:p>
          </table:table-cell>
          <table:table-cell office:value-type="string" table:style-name="c1">
            <text:p>2026-06-01 05:00</text:p>
          </table:table-cell>
          <table:table-cell office:value-type="float" office:value="5.49725e-06" table:style-name="c1">
            <text:p>0.0000054972</text:p>
          </table:table-cell>
          <table:table-cell office:value-type="float" office:value="-0.48059459834510765" table:style-name="c14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18:00</text:p>
          </table:table-cell>
          <table:table-cell office:value-type="float" office:value="5.54277e-06" table:style-name="c1">
            <text:p>0.0000055428</text:p>
          </table:table-cell>
          <table:table-cell office:value-type="string" table:style-name="c1">
            <text:p>2026-06-02 01:45</text:p>
          </table:table-cell>
          <table:table-cell office:value-type="float" office:value="5.487255e-06" table:style-name="c1">
            <text:p>0.0000054873</text:p>
          </table:table-cell>
          <table:table-cell office:value-type="float" office:value="-1.1994728762874884" table:style-name="c14">
            <text:p>-1.2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21:30</text:p>
          </table:table-cell>
          <table:table-cell office:value-type="float" office:value="89.80488" table:style-name="c10">
            <text:p>89.805</text:p>
          </table:table-cell>
          <table:table-cell office:value-type="string" table:style-name="c10">
            <text:p>2026-03-05 22:00</text:p>
          </table:table-cell>
          <table:table-cell office:value-type="float" office:value="89.07544000000001" table:style-name="c10">
            <text:p>89.075</text:p>
          </table:table-cell>
          <table:table-cell office:value-type="float" office:value="-1.0105261591129344" table:style-name="c11">
            <text:p>-1.0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6 08:00</text:p>
          </table:table-cell>
          <table:table-cell office:value-type="float" office:value="88.74435" table:style-name="c10">
            <text:p>88.744</text:p>
          </table:table-cell>
          <table:table-cell office:value-type="string" table:style-name="c10">
            <text:p>2026-03-06 09:15</text:p>
          </table:table-cell>
          <table:table-cell office:value-type="float" office:value="87.74610500000001" table:style-name="c10">
            <text:p>87.746</text:p>
          </table:table-cell>
          <table:table-cell office:value-type="float" office:value="-1.322506124496925" table:style-name="c11">
            <text:p>-1.3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88.14405" table:style-name="c10">
            <text:p>88.144</text:p>
          </table:table-cell>
          <table:table-cell office:value-type="string" table:style-name="c10">
            <text:p>2026-03-10 18:45</text:p>
          </table:table-cell>
          <table:table-cell office:value-type="float" office:value="86.19688" table:style-name="c10">
            <text:p>86.197</text:p>
          </table:table-cell>
          <table:table-cell office:value-type="float" office:value="-2.404561128198679" table:style-name="c11">
            <text:p>-2.4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3:30</text:p>
          </table:table-cell>
          <table:table-cell office:value-type="float" office:value="86.28312" table:style-name="c10">
            <text:p>86.283</text:p>
          </table:table-cell>
          <table:table-cell office:value-type="string" table:style-name="c10">
            <text:p>2026-03-11 23:45</text:p>
          </table:table-cell>
          <table:table-cell office:value-type="float" office:value="86.646655" table:style-name="c10">
            <text:p>86.647</text:p>
          </table:table-cell>
          <table:table-cell office:value-type="float" office:value="0.22058583029331835" table:style-name="c12">
            <text:p>+0.2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08:45</text:p>
          </table:table-cell>
          <table:table-cell office:value-type="float" office:value="85.94295" table:style-name="c10">
            <text:p>85.943</text:p>
          </table:table-cell>
          <table:table-cell office:value-type="string" table:style-name="c10">
            <text:p>2026-03-12 15:00</text:p>
          </table:table-cell>
          <table:table-cell office:value-type="float" office:value="85.49723000000002" table:style-name="c10">
            <text:p>85.497</text:p>
          </table:table-cell>
          <table:table-cell office:value-type="float" office:value="-0.7174863822686839" table:style-name="c11">
            <text:p>-0.7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0:45</text:p>
          </table:table-cell>
          <table:table-cell office:value-type="float" office:value="90.02499" table:style-name="c10">
            <text:p>90.025</text:p>
          </table:table-cell>
          <table:table-cell office:value-type="string" table:style-name="c10">
            <text:p>2026-03-13 06:45</text:p>
          </table:table-cell>
          <table:table-cell office:value-type="float" office:value="88.445755" table:style-name="c10">
            <text:p>88.446</text:p>
          </table:table-cell>
          <table:table-cell office:value-type="float" office:value="-1.9506117848444249" table:style-name="c11">
            <text:p>-2.0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1:15</text:p>
          </table:table-cell>
          <table:table-cell office:value-type="float" office:value="90.20508" table:style-name="c10">
            <text:p>90.205</text:p>
          </table:table-cell>
          <table:table-cell office:value-type="string" table:style-name="c10">
            <text:p>2026-03-13 16:00</text:p>
          </table:table-cell>
          <table:table-cell office:value-type="float" office:value="89.445255" table:style-name="c10">
            <text:p>89.445</text:p>
          </table:table-cell>
          <table:table-cell office:value-type="float" office:value="-1.040546790430208" table:style-name="c11">
            <text:p>-1.0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18:00</text:p>
          </table:table-cell>
          <table:table-cell office:value-type="float" office:value="88.48422" table:style-name="c10">
            <text:p>88.484</text:p>
          </table:table-cell>
          <table:table-cell office:value-type="string" table:style-name="c10">
            <text:p>2026-03-16 14:45</text:p>
          </table:table-cell>
          <table:table-cell office:value-type="float" office:value="92.61367" table:style-name="c10">
            <text:p>92.614</text:p>
          </table:table-cell>
          <table:table-cell office:value-type="float" office:value="4.457648237923095" table:style-name="c12">
            <text:p>+4.5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16:30</text:p>
          </table:table-cell>
          <table:table-cell office:value-type="float" office:value="94.56725999999999" table:style-name="c10">
            <text:p>94.567</text:p>
          </table:table-cell>
          <table:table-cell office:value-type="string" table:style-name="c10">
            <text:p>2026-03-18 00:15</text:p>
          </table:table-cell>
          <table:table-cell office:value-type="float" office:value="94.63266000000002" table:style-name="c10">
            <text:p>94.633</text:p>
          </table:table-cell>
          <table:table-cell office:value-type="float" office:value="-0.13088111820092063" table:style-name="c11">
            <text:p>-0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07:30</text:p>
          </table:table-cell>
          <table:table-cell office:value-type="float" office:value="91.23559499999999" table:style-name="c10">
            <text:p>91.236</text:p>
          </table:table-cell>
          <table:table-cell office:value-type="string" table:style-name="c10">
            <text:p>2026-03-24 13:45</text:p>
          </table:table-cell>
          <table:table-cell office:value-type="float" office:value="90.14490500000001" table:style-name="c10">
            <text:p>90.145</text:p>
          </table:table-cell>
          <table:table-cell office:value-type="float" office:value="-1.392975696705867" table:style-name="c11">
            <text:p>-1.4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0:45</text:p>
          </table:table-cell>
          <table:table-cell office:value-type="float" office:value="90.00497999999999" table:style-name="c10">
            <text:p>90.005</text:p>
          </table:table-cell>
          <table:table-cell office:value-type="string" table:style-name="c10">
            <text:p>2026-03-24 21:00</text:p>
          </table:table-cell>
          <table:table-cell office:value-type="float" office:value="89.99498000000001" table:style-name="c10">
            <text:p>89.995</text:p>
          </table:table-cell>
          <table:table-cell office:value-type="float" office:value="-0.21098828644811052" table:style-name="c11">
            <text:p>-0.2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1:15</text:p>
          </table:table-cell>
          <table:table-cell office:value-type="float" office:value="90.034995" table:style-name="c10">
            <text:p>90.035</text:p>
          </table:table-cell>
          <table:table-cell office:value-type="string" table:style-name="c10">
            <text:p>2026-03-25 14:45</text:p>
          </table:table-cell>
          <table:table-cell office:value-type="float" office:value="92.11392000000001" table:style-name="c10">
            <text:p>92.114</text:p>
          </table:table-cell>
          <table:table-cell office:value-type="float" office:value="2.1045031145056514" table:style-name="c12">
            <text:p>+2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22:45</text:p>
          </table:table-cell>
          <table:table-cell office:value-type="float" office:value="91.80588" table:style-name="c10">
            <text:p>91.806</text:p>
          </table:table-cell>
          <table:table-cell office:value-type="string" table:style-name="c10">
            <text:p>2026-03-25 23:00</text:p>
          </table:table-cell>
          <table:table-cell office:value-type="float" office:value="91.69413" table:style-name="c10">
            <text:p>91.694</text:p>
          </table:table-cell>
          <table:table-cell office:value-type="float" office:value="-0.32138090269381303" table:style-name="c11">
            <text:p>-0.3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01:30</text:p>
          </table:table-cell>
          <table:table-cell office:value-type="float" office:value="83.79187499999999" table:style-name="c10">
            <text:p>83.792</text:p>
          </table:table-cell>
          <table:table-cell office:value-type="string" table:style-name="c10">
            <text:p>2026-03-31 05:30</text:p>
          </table:table-cell>
          <table:table-cell office:value-type="float" office:value="83.1584" table:style-name="c10">
            <text:p>83.158</text:p>
          </table:table-cell>
          <table:table-cell office:value-type="float" office:value="-0.9543987905748619" table:style-name="c11">
            <text:p>-1.0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16:00</text:p>
          </table:table-cell>
          <table:table-cell office:value-type="float" office:value="83.66181" table:style-name="c10">
            <text:p>83.662</text:p>
          </table:table-cell>
          <table:table-cell office:value-type="string" table:style-name="c10">
            <text:p>2026-04-01 20:15</text:p>
          </table:table-cell>
          <table:table-cell office:value-type="float" office:value="82.968495" table:style-name="c10">
            <text:p>82.968</text:p>
          </table:table-cell>
          <table:table-cell office:value-type="float" office:value="-1.0269548573058507" table:style-name="c11">
            <text:p>-1.0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5:15</text:p>
          </table:table-cell>
          <table:table-cell office:value-type="float" office:value="81.190575" table:style-name="c10">
            <text:p>81.191</text:p>
          </table:table-cell>
          <table:table-cell office:value-type="string" table:style-name="c10">
            <text:p>2026-04-05 00:15</text:p>
          </table:table-cell>
          <table:table-cell office:value-type="float" office:value="80.65965000000001" table:style-name="c10">
            <text:p>80.66</text:p>
          </table:table-cell>
          <table:table-cell office:value-type="float" office:value="-0.8525172291857563" table:style-name="c11">
            <text:p>-0.9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0:00</text:p>
          </table:table-cell>
          <table:table-cell office:value-type="float" office:value="81.930945" table:style-name="c10">
            <text:p>81.931</text:p>
          </table:table-cell>
          <table:table-cell office:value-type="string" table:style-name="c10">
            <text:p>2026-04-06 06:45</text:p>
          </table:table-cell>
          <table:table-cell office:value-type="float" office:value="81.269345" table:style-name="c10">
            <text:p>81.269</text:p>
          </table:table-cell>
          <table:table-cell office:value-type="float" office:value="-1.0057950883576305" table:style-name="c11">
            <text:p>-1.0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9:15</text:p>
          </table:table-cell>
          <table:table-cell office:value-type="float" office:value="82.48122" table:style-name="c10">
            <text:p>82.481</text:p>
          </table:table-cell>
          <table:table-cell office:value-type="string" table:style-name="c10">
            <text:p>2026-04-06 14:45</text:p>
          </table:table-cell>
          <table:table-cell office:value-type="float" office:value="81.91902" table:style-name="c10">
            <text:p>81.919</text:p>
          </table:table-cell>
          <table:table-cell office:value-type="float" office:value="-0.8801471668095862" table:style-name="c11">
            <text:p>-0.9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3:00</text:p>
          </table:table-cell>
          <table:table-cell office:value-type="float" office:value="85.28262" table:style-name="c10">
            <text:p>85.283</text:p>
          </table:table-cell>
          <table:table-cell office:value-type="string" table:style-name="c10">
            <text:p>2026-04-08 11:45</text:p>
          </table:table-cell>
          <table:table-cell office:value-type="float" office:value="84.19788" table:style-name="c10">
            <text:p>84.198</text:p>
          </table:table-cell>
          <table:table-cell office:value-type="float" office:value="-1.4692929955951062" table:style-name="c11">
            <text:p>-1.5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45</text:p>
          </table:table-cell>
          <table:table-cell office:value-type="float" office:value="83.411685" table:style-name="c10">
            <text:p>83.412</text:p>
          </table:table-cell>
          <table:table-cell office:value-type="string" table:style-name="c10">
            <text:p>2026-04-09 23:45</text:p>
          </table:table-cell>
          <table:table-cell office:value-type="float" office:value="83.27834" table:style-name="c10">
            <text:p>83.278</text:p>
          </table:table-cell>
          <table:table-cell office:value-type="float" office:value="-0.35944412543639226" table:style-name="c11">
            <text:p>-0.4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9:15</text:p>
          </table:table-cell>
          <table:table-cell office:value-type="float" office:value="85.50272999999999" table:style-name="c10">
            <text:p>85.503</text:p>
          </table:table-cell>
          <table:table-cell office:value-type="string" table:style-name="c10">
            <text:p>2026-04-10 23:15</text:p>
          </table:table-cell>
          <table:table-cell office:value-type="float" office:value="84.7576" table:style-name="c10">
            <text:p>84.758</text:p>
          </table:table-cell>
          <table:table-cell office:value-type="float" office:value="-1.0696271831320492" table:style-name="c11">
            <text:p>-1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8:45</text:p>
          </table:table-cell>
          <table:table-cell office:value-type="float" office:value="85.50272999999999" table:style-name="c10">
            <text:p>85.503</text:p>
          </table:table-cell>
          <table:table-cell office:value-type="string" table:style-name="c10">
            <text:p>2026-04-11 23:15</text:p>
          </table:table-cell>
          <table:table-cell office:value-type="float" office:value="84.7576" table:style-name="c10">
            <text:p>84.758</text:p>
          </table:table-cell>
          <table:table-cell office:value-type="float" office:value="-1.069627183132038" table:style-name="c11">
            <text:p>-1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0:00</text:p>
          </table:table-cell>
          <table:table-cell office:value-type="float" office:value="84.132045" table:style-name="c10">
            <text:p>84.132</text:p>
          </table:table-cell>
          <table:table-cell office:value-type="string" table:style-name="c10">
            <text:p>2026-04-14 06:00</text:p>
          </table:table-cell>
          <table:table-cell office:value-type="float" office:value="85.45725" table:style-name="c10">
            <text:p>85.457</text:p>
          </table:table-cell>
          <table:table-cell office:value-type="float" office:value="1.3721001994543292" table:style-name="c12">
            <text:p>+1.4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15</text:p>
          </table:table-cell>
          <table:table-cell office:value-type="float" office:value="86.173065" table:style-name="c10">
            <text:p>86.173</text:p>
          </table:table-cell>
          <table:table-cell office:value-type="string" table:style-name="c10">
            <text:p>2026-04-17 01:45</text:p>
          </table:table-cell>
          <table:table-cell office:value-type="float" office:value="88.16589499999999" table:style-name="c10">
            <text:p>88.166</text:p>
          </table:table-cell>
          <table:table-cell office:value-type="float" office:value="2.108067498695765" table:style-name="c12">
            <text:p>+2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9:00</text:p>
          </table:table-cell>
          <table:table-cell office:value-type="float" office:value="88.98446999999999" table:style-name="c10">
            <text:p>88.984</text:p>
          </table:table-cell>
          <table:table-cell office:value-type="string" table:style-name="c10">
            <text:p>2026-04-17 10:45</text:p>
          </table:table-cell>
          <table:table-cell office:value-type="float" office:value="87.40627500000001" table:style-name="c10">
            <text:p>87.406</text:p>
          </table:table-cell>
          <table:table-cell office:value-type="float" office:value="-1.9699169346347523" table:style-name="c11">
            <text:p>-2.0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3:45</text:p>
          </table:table-cell>
          <table:table-cell office:value-type="float" office:value="89.854905" table:style-name="c10">
            <text:p>89.855</text:p>
          </table:table-cell>
          <table:table-cell office:value-type="string" table:style-name="c10">
            <text:p>2026-04-17 18:30</text:p>
          </table:table-cell>
          <table:table-cell office:value-type="float" office:value="88.98548500000001" table:style-name="c10">
            <text:p>88.985</text:p>
          </table:table-cell>
          <table:table-cell office:value-type="float" office:value="-1.1655479292031923" table:style-name="c11">
            <text:p>-1.2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2:30</text:p>
          </table:table-cell>
          <table:table-cell office:value-type="float" office:value="87.29362499999999" table:style-name="c10">
            <text:p>87.294</text:p>
          </table:table-cell>
          <table:table-cell office:value-type="string" table:style-name="c10">
            <text:p>2026-04-22 16:00</text:p>
          </table:table-cell>
          <table:table-cell office:value-type="float" office:value="88.145905" table:style-name="c10">
            <text:p>88.146</text:p>
          </table:table-cell>
          <table:table-cell office:value-type="float" office:value="0.7744853486208347" table:style-name="c12">
            <text:p>+0.8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21:45</text:p>
          </table:table-cell>
          <table:table-cell office:value-type="float" office:value="84.68231999999999" table:style-name="c10">
            <text:p>84.682</text:p>
          </table:table-cell>
          <table:table-cell office:value-type="string" table:style-name="c10">
            <text:p>2026-05-03 00:30</text:p>
          </table:table-cell>
          <table:table-cell office:value-type="float" office:value="84.087935" table:style-name="c10">
            <text:p>84.088</text:p>
          </table:table-cell>
          <table:table-cell office:value-type="float" office:value="-0.9003966613869152" table:style-name="c11">
            <text:p>-0.9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07:45</text:p>
          </table:table-cell>
          <table:table-cell office:value-type="float" office:value="83.98196999999999" table:style-name="c10">
            <text:p>83.982</text:p>
          </table:table-cell>
          <table:table-cell office:value-type="string" table:style-name="c10">
            <text:p>2026-05-03 22:00</text:p>
          </table:table-cell>
          <table:table-cell office:value-type="float" office:value="84.09793" table:style-name="c10">
            <text:p>84.098</text:p>
          </table:table-cell>
          <table:table-cell office:value-type="float" office:value="-0.06209876009100057" table:style-name="c11">
            <text:p>-0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22:15</text:p>
          </table:table-cell>
          <table:table-cell office:value-type="float" office:value="84.79237499999999" table:style-name="c10">
            <text:p>84.792</text:p>
          </table:table-cell>
          <table:table-cell office:value-type="string" table:style-name="c10">
            <text:p>2026-05-03 23:45</text:p>
          </table:table-cell>
          <table:table-cell office:value-type="float" office:value="83.96799500000002" table:style-name="c10">
            <text:p>83.968</text:p>
          </table:table-cell>
          <table:table-cell office:value-type="float" office:value="-1.1701901521274483" table:style-name="c11">
            <text:p>-1.2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00</text:p>
          </table:table-cell>
          <table:table-cell office:value-type="float" office:value="84.81238499999999" table:style-name="c10">
            <text:p>84.812</text:p>
          </table:table-cell>
          <table:table-cell office:value-type="string" table:style-name="c10">
            <text:p>2026-05-04 07:30</text:p>
          </table:table-cell>
          <table:table-cell office:value-type="float" office:value="84.81757" table:style-name="c10">
            <text:p>84.818</text:p>
          </table:table-cell>
          <table:table-cell office:value-type="float" office:value="-0.19379872695478584" table:style-name="c11">
            <text:p>-0.2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15:00</text:p>
          </table:table-cell>
          <table:table-cell office:value-type="float" office:value="85.032495" table:style-name="c10">
            <text:p>85.032</text:p>
          </table:table-cell>
          <table:table-cell office:value-type="string" table:style-name="c10">
            <text:p>2026-05-04 20:00</text:p>
          </table:table-cell>
          <table:table-cell office:value-type="float" office:value="84.407775" table:style-name="c10">
            <text:p>84.408</text:p>
          </table:table-cell>
          <table:table-cell office:value-type="float" office:value="-0.9331152075744531" table:style-name="c11">
            <text:p>-0.9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13:15</text:p>
          </table:table-cell>
          <table:table-cell office:value-type="float" office:value="85.94295" table:style-name="c10">
            <text:p>85.943</text:p>
          </table:table-cell>
          <table:table-cell office:value-type="string" table:style-name="c10">
            <text:p>2026-05-06 13:15</text:p>
          </table:table-cell>
          <table:table-cell office:value-type="float" office:value="88.87554" table:style-name="c10">
            <text:p>88.876</text:p>
          </table:table-cell>
          <table:table-cell office:value-type="float" office:value="3.2055308731431698" table:style-name="c12">
            <text:p>+3.2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16:45</text:p>
          </table:table-cell>
          <table:table-cell office:value-type="float" office:value="89.28461999999999" table:style-name="c10">
            <text:p>89.285</text:p>
          </table:table-cell>
          <table:table-cell office:value-type="string" table:style-name="c10">
            <text:p>2026-05-07 00:15</text:p>
          </table:table-cell>
          <table:table-cell office:value-type="float" office:value="88.965495" table:style-name="c10">
            <text:p>88.965</text:p>
          </table:table-cell>
          <table:table-cell office:value-type="float" office:value="-0.5566098892563875" table:style-name="c11">
            <text:p>-0.6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7:45</text:p>
          </table:table-cell>
          <table:table-cell office:value-type="float" office:value="90.23509499999999" table:style-name="c10">
            <text:p>90.235</text:p>
          </table:table-cell>
          <table:table-cell office:value-type="string" table:style-name="c10">
            <text:p>2026-05-07 14:00</text:p>
          </table:table-cell>
          <table:table-cell office:value-type="float" office:value="88.62566500000001" table:style-name="c10">
            <text:p>88.626</text:p>
          </table:table-cell>
          <table:table-cell office:value-type="float" office:value="-1.9799310948084736" table:style-name="c11">
            <text:p>-2.0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7:30</text:p>
          </table:table-cell>
          <table:table-cell office:value-type="float" office:value="90.36515999999999" table:style-name="c10">
            <text:p>90.365</text:p>
          </table:table-cell>
          <table:table-cell office:value-type="string" table:style-name="c10">
            <text:p>2026-05-09 10:00</text:p>
          </table:table-cell>
          <table:table-cell office:value-type="float" office:value="93.24335500000001" table:style-name="c10">
            <text:p>93.243</text:p>
          </table:table-cell>
          <table:table-cell office:value-type="float" office:value="2.9788045894623805" table:style-name="c12">
            <text:p>+3.0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9:15</text:p>
          </table:table-cell>
          <table:table-cell office:value-type="float" office:value="94.517235" table:style-name="c10">
            <text:p>94.517</text:p>
          </table:table-cell>
          <table:table-cell office:value-type="string" table:style-name="c10">
            <text:p>2026-05-10 11:45</text:p>
          </table:table-cell>
          <table:table-cell office:value-type="float" office:value="93.303325" table:style-name="c10">
            <text:p>93.303</text:p>
          </table:table-cell>
          <table:table-cell office:value-type="float" office:value="-1.481659240957478" table:style-name="c11">
            <text:p>-1.5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7:15</text:p>
          </table:table-cell>
          <table:table-cell office:value-type="float" office:value="95.26760999999999" table:style-name="c10">
            <text:p>95.268</text:p>
          </table:table-cell>
          <table:table-cell office:value-type="string" table:style-name="c10">
            <text:p>2026-05-10 21:15</text:p>
          </table:table-cell>
          <table:table-cell office:value-type="float" office:value="94.61267000000001" table:style-name="c10">
            <text:p>94.613</text:p>
          </table:table-cell>
          <table:table-cell office:value-type="float" office:value="-0.8859996879631793" table:style-name="c11">
            <text:p>-0.9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23:00</text:p>
          </table:table-cell>
          <table:table-cell office:value-type="float" office:value="96.28811999999999" table:style-name="c10">
            <text:p>96.288</text:p>
          </table:table-cell>
          <table:table-cell office:value-type="string" table:style-name="c10">
            <text:p>2026-05-11 02:45</text:p>
          </table:table-cell>
          <table:table-cell office:value-type="float" office:value="95.34230500000001" table:style-name="c10">
            <text:p>95.342</text:p>
          </table:table-cell>
          <table:table-cell office:value-type="float" office:value="-1.1802123332504633" table:style-name="c11">
            <text:p>-1.2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15:30</text:p>
          </table:table-cell>
          <table:table-cell office:value-type="float" office:value="96.26811" table:style-name="c10">
            <text:p>96.268</text:p>
          </table:table-cell>
          <table:table-cell office:value-type="string" table:style-name="c10">
            <text:p>2026-05-12 00:15</text:p>
          </table:table-cell>
          <table:table-cell office:value-type="float" office:value="97.21137000000002" table:style-name="c10">
            <text:p>97.211</text:p>
          </table:table-cell>
          <table:table-cell office:value-type="float" office:value="0.7779673573834911" table:style-name="c12">
            <text:p>+0.8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2 20:00</text:p>
          </table:table-cell>
          <table:table-cell office:value-type="float" office:value="94.96746" table:style-name="c10">
            <text:p>94.967</text:p>
          </table:table-cell>
          <table:table-cell office:value-type="string" table:style-name="c10">
            <text:p>2026-05-12 23:45</text:p>
          </table:table-cell>
          <table:table-cell office:value-type="float" office:value="94.362795" table:style-name="c10">
            <text:p>94.363</text:p>
          </table:table-cell>
          <table:table-cell office:value-type="float" office:value="-0.8353347843619296" table:style-name="c11">
            <text:p>-0.8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0 17:00</text:p>
          </table:table-cell>
          <table:table-cell office:value-type="float" office:value="86.533245" table:style-name="c10">
            <text:p>86.533</text:p>
          </table:table-cell>
          <table:table-cell office:value-type="string" table:style-name="c10">
            <text:p>2026-05-20 23:30</text:p>
          </table:table-cell>
          <table:table-cell office:value-type="float" office:value="85.91702" table:style-name="c10">
            <text:p>85.917</text:p>
          </table:table-cell>
          <table:table-cell office:value-type="float" office:value="-0.9106016109531212" table:style-name="c11">
            <text:p>-0.9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8:30</text:p>
          </table:table-cell>
          <table:table-cell office:value-type="float" office:value="87.09352499999999" table:style-name="c10">
            <text:p>87.094</text:p>
          </table:table-cell>
          <table:table-cell office:value-type="string" table:style-name="c10">
            <text:p>2026-05-21 10:30</text:p>
          </table:table-cell>
          <table:table-cell office:value-type="float" office:value="85.93701000000001" table:style-name="c10">
            <text:p>85.937</text:p>
          </table:table-cell>
          <table:table-cell office:value-type="float" office:value="-1.525145621319135" table:style-name="c11">
            <text:p>-1.5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5:30</text:p>
          </table:table-cell>
          <table:table-cell office:value-type="float" office:value="86.86340999999999" table:style-name="c10">
            <text:p>86.863</text:p>
          </table:table-cell>
          <table:table-cell office:value-type="string" table:style-name="c10">
            <text:p>2026-05-21 23:30</text:p>
          </table:table-cell>
          <table:table-cell office:value-type="float" office:value="87.10642500000002" table:style-name="c10">
            <text:p>87.106</text:p>
          </table:table-cell>
          <table:table-cell office:value-type="float" office:value="0.07930756624110469" table:style-name="c12">
            <text:p>+0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4 06:00</text:p>
          </table:table-cell>
          <table:table-cell office:value-type="float" office:value="86.20307999999999" table:style-name="c10">
            <text:p>86.203</text:p>
          </table:table-cell>
          <table:table-cell office:value-type="string" table:style-name="c10">
            <text:p>2026-05-24 13:30</text:p>
          </table:table-cell>
          <table:table-cell office:value-type="float" office:value="86.12691500000001" table:style-name="c10">
            <text:p>86.127</text:p>
          </table:table-cell>
          <table:table-cell office:value-type="float" office:value="-0.28807868939829673" table:style-name="c11">
            <text:p>-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3:45</text:p>
          </table:table-cell>
          <table:table-cell office:value-type="float" office:value="0.9312653999999999" table:style-name="c1">
            <text:p>0.93127</text:p>
          </table:table-cell>
          <table:table-cell office:value-type="string" table:style-name="c1">
            <text:p>2026-03-10 00:00</text:p>
          </table:table-cell>
          <table:table-cell office:value-type="float" office:value="0.9419288000000001" table:style-name="c1">
            <text:p>0.94193</text:p>
          </table:table-cell>
          <table:table-cell office:value-type="float" office:value="0.9428552084937536" table:style-name="c13">
            <text:p>+0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2:45</text:p>
          </table:table-cell>
          <table:table-cell office:value-type="float" office:value="0.9598797" table:style-name="c1">
            <text:p>0.95988</text:p>
          </table:table-cell>
          <table:table-cell office:value-type="string" table:style-name="c1">
            <text:p>2026-03-10 03:00</text:p>
          </table:table-cell>
          <table:table-cell office:value-type="float" office:value="0.95142405" table:style-name="c1">
            <text:p>0.95142</text:p>
          </table:table-cell>
          <table:table-cell office:value-type="float" office:value="-1.0790463300713538" table:style-name="c14">
            <text:p>-1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1.0041018" table:style-name="c1">
            <text:p>1.0041</text:p>
          </table:table-cell>
          <table:table-cell office:value-type="string" table:style-name="c1">
            <text:p>2026-03-10 18:30</text:p>
          </table:table-cell>
          <table:table-cell office:value-type="float" office:value="0.9682156500000001" table:style-name="c1">
            <text:p>0.96822</text:p>
          </table:table-cell>
          <table:table-cell office:value-type="float" office:value="-3.7667110132010517" table:style-name="c14">
            <text:p>-3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0:45</text:p>
          </table:table-cell>
          <table:table-cell office:value-type="float" office:value="0.9578787" table:style-name="c1">
            <text:p>0.95788</text:p>
          </table:table-cell>
          <table:table-cell office:value-type="string" table:style-name="c1">
            <text:p>2026-03-12 00:00</text:p>
          </table:table-cell>
          <table:table-cell office:value-type="float" office:value="0.9779108000000001" table:style-name="c1">
            <text:p>0.97791</text:p>
          </table:table-cell>
          <table:table-cell office:value-type="float" office:value="1.8872176937225982" table:style-name="c13">
            <text:p>+1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7:45</text:p>
          </table:table-cell>
          <table:table-cell office:value-type="float" office:value="0.97738845" table:style-name="c1">
            <text:p>0.97739</text:p>
          </table:table-cell>
          <table:table-cell office:value-type="string" table:style-name="c1">
            <text:p>2026-03-12 14:30</text:p>
          </table:table-cell>
          <table:table-cell office:value-type="float" office:value="0.9667164" table:style-name="c1">
            <text:p>0.96672</text:p>
          </table:table-cell>
          <table:table-cell office:value-type="float" office:value="-1.2896117284381559" table:style-name="c14">
            <text:p>-1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15</text:p>
          </table:table-cell>
          <table:table-cell office:value-type="float" office:value="0.9990993" table:style-name="c1">
            <text:p>0.9991</text:p>
          </table:table-cell>
          <table:table-cell office:value-type="string" table:style-name="c1">
            <text:p>2026-03-13 15:00</text:p>
          </table:table-cell>
          <table:table-cell office:value-type="float" office:value="1.0248873" table:style-name="c1">
            <text:p>1.0249</text:p>
          </table:table-cell>
          <table:table-cell office:value-type="float" office:value="2.376065150611173" table:style-name="c13">
            <text:p>+2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1.02461205" table:style-name="c1">
            <text:p>1.0246</text:p>
          </table:table-cell>
          <table:table-cell office:value-type="string" table:style-name="c1">
            <text:p>2026-03-16 11:30</text:p>
          </table:table-cell>
          <table:table-cell office:value-type="float" office:value="1.0468763" table:style-name="c1">
            <text:p>1.0469</text:p>
          </table:table-cell>
          <table:table-cell office:value-type="float" office:value="1.9687006683456465" table:style-name="c13">
            <text:p>+2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0:15</text:p>
          </table:table-cell>
          <table:table-cell office:value-type="float" office:value="1.0811403" table:style-name="c1">
            <text:p>1.0811</text:p>
          </table:table-cell>
          <table:table-cell office:value-type="string" table:style-name="c1">
            <text:p>2026-03-17 01:15</text:p>
          </table:table-cell>
          <table:table-cell office:value-type="float" office:value="1.06016965" table:style-name="c1">
            <text:p>1.0602</text:p>
          </table:table-cell>
          <table:table-cell office:value-type="float" office:value="-2.1357014561708687" table:style-name="c14">
            <text:p>-2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5:15</text:p>
          </table:table-cell>
          <table:table-cell office:value-type="float" office:value="1.0479237000000001" table:style-name="c1">
            <text:p>1.0479</text:p>
          </table:table-cell>
          <table:table-cell office:value-type="string" table:style-name="c1">
            <text:p>2026-03-18 07:00</text:p>
          </table:table-cell>
          <table:table-cell office:value-type="float" office:value="1.03278335" table:style-name="c1">
            <text:p>1.0328</text:p>
          </table:table-cell>
          <table:table-cell office:value-type="float" office:value="-1.641806928944356" table:style-name="c14">
            <text:p>-1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7:15</text:p>
          </table:table-cell>
          <table:table-cell office:value-type="float" office:value="0.95297625" table:style-name="c1">
            <text:p>0.95298</text:p>
          </table:table-cell>
          <table:table-cell office:value-type="string" table:style-name="c1">
            <text:p>2026-03-24 13:00</text:p>
          </table:table-cell>
          <table:table-cell office:value-type="float" office:value="0.94722615" table:style-name="c1">
            <text:p>0.94723</text:p>
          </table:table-cell>
          <table:table-cell office:value-type="float" office:value="-0.8020771843841867" table:style-name="c14">
            <text:p>-0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0.9486741" table:style-name="c1">
            <text:p>0.94867</text:p>
          </table:table-cell>
          <table:table-cell office:value-type="string" table:style-name="c1">
            <text:p>2026-03-25 03:30</text:p>
          </table:table-cell>
          <table:table-cell office:value-type="float" office:value="0.9469263000000001" table:style-name="c1">
            <text:p>0.94693</text:p>
          </table:table-cell>
          <table:table-cell office:value-type="float" office:value="-0.3837677948306806" table:style-name="c14">
            <text:p>-0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6:45</text:p>
          </table:table-cell>
          <table:table-cell office:value-type="float" office:value="0.96178065" table:style-name="c1">
            <text:p>0.96178</text:p>
          </table:table-cell>
          <table:table-cell office:value-type="string" table:style-name="c1">
            <text:p>2026-03-25 15:15</text:p>
          </table:table-cell>
          <table:table-cell office:value-type="float" office:value="0.955522" table:style-name="c1">
            <text:p>0.95552</text:p>
          </table:table-cell>
          <table:table-cell office:value-type="float" office:value="-0.8493348746411278" table:style-name="c14">
            <text:p>-0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45</text:p>
          </table:table-cell>
          <table:table-cell office:value-type="float" office:value="0.8886440999999999" table:style-name="c1">
            <text:p>0.88864</text:p>
          </table:table-cell>
          <table:table-cell office:value-type="string" table:style-name="c1">
            <text:p>2026-04-01 10:45</text:p>
          </table:table-cell>
          <table:table-cell office:value-type="float" office:value="0.88865545" table:style-name="c1">
            <text:p>0.88866</text:p>
          </table:table-cell>
          <table:table-cell office:value-type="float" office:value="-0.19862532644395747" table:style-name="c14">
            <text:p>-0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2 00:45</text:p>
          </table:table-cell>
          <table:table-cell office:value-type="float" office:value="0.8940467999999999" table:style-name="c1">
            <text:p>0.89405</text:p>
          </table:table-cell>
          <table:table-cell office:value-type="string" table:style-name="c1">
            <text:p>2026-04-02 01:00</text:p>
          </table:table-cell>
          <table:table-cell office:value-type="float" office:value="0.8917539" table:style-name="c1">
            <text:p>0.89175</text:p>
          </table:table-cell>
          <table:table-cell office:value-type="float" office:value="-0.455850414776926" table:style-name="c14">
            <text:p>-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30</text:p>
          </table:table-cell>
          <table:table-cell office:value-type="float" office:value="0.90045" table:style-name="c1">
            <text:p>0.90045</text:p>
          </table:table-cell>
          <table:table-cell office:value-type="string" table:style-name="c1">
            <text:p>2026-04-06 15:30</text:p>
          </table:table-cell>
          <table:table-cell office:value-type="float" office:value="0.8991502" table:style-name="c1">
            <text:p>0.89915</text:p>
          </table:table-cell>
          <table:table-cell office:value-type="float" office:value="-0.3439614914542699" table:style-name="c14">
            <text:p>-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0:00</text:p>
          </table:table-cell>
          <table:table-cell office:value-type="float" office:value="0.89174565" table:style-name="c1">
            <text:p>0.89175</text:p>
          </table:table-cell>
          <table:table-cell office:value-type="string" table:style-name="c1">
            <text:p>2026-04-08 07:00</text:p>
          </table:table-cell>
          <table:table-cell office:value-type="float" office:value="0.95122415" table:style-name="c1">
            <text:p>0.95122</text:p>
          </table:table-cell>
          <table:table-cell office:value-type="float" office:value="6.456662045298467" table:style-name="c13">
            <text:p>+6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5:45</text:p>
          </table:table-cell>
          <table:table-cell office:value-type="float" office:value="0.9348672" table:style-name="c1">
            <text:p>0.93487</text:p>
          </table:table-cell>
          <table:table-cell office:value-type="string" table:style-name="c1">
            <text:p>2026-04-09 23:45</text:p>
          </table:table-cell>
          <table:table-cell office:value-type="float" office:value="0.92923515" table:style-name="c1">
            <text:p>0.92924</text:p>
          </table:table-cell>
          <table:table-cell office:value-type="float" office:value="-0.8011395698608426" table:style-name="c14">
            <text:p>-0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06:15</text:p>
          </table:table-cell>
          <table:table-cell office:value-type="float" office:value="0.9447721499999999" table:style-name="c1">
            <text:p>0.94477</text:p>
          </table:table-cell>
          <table:table-cell office:value-type="string" table:style-name="c1">
            <text:p>2026-04-10 07:30</text:p>
          </table:table-cell>
          <table:table-cell office:value-type="float" office:value="0.9315340000000001" table:style-name="c1">
            <text:p>0.93153</text:p>
          </table:table-cell>
          <table:table-cell office:value-type="float" office:value="-1.5982992794611683" table:style-name="c14">
            <text:p>-1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09:45</text:p>
          </table:table-cell>
          <table:table-cell office:value-type="float" office:value="0.9376686" table:style-name="c1">
            <text:p>0.93767</text:p>
          </table:table-cell>
          <table:table-cell office:value-type="string" table:style-name="c1">
            <text:p>2026-04-10 22:15</text:p>
          </table:table-cell>
          <table:table-cell office:value-type="float" office:value="0.9488253500000001" table:style-name="c1">
            <text:p>0.94883</text:p>
          </table:table-cell>
          <table:table-cell office:value-type="float" office:value="0.9875608637582856" table:style-name="c13">
            <text:p>+1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7:00</text:p>
          </table:table-cell>
          <table:table-cell office:value-type="float" office:value="0.94697325" table:style-name="c1">
            <text:p>0.94697</text:p>
          </table:table-cell>
          <table:table-cell office:value-type="string" table:style-name="c1">
            <text:p>2026-04-11 23:15</text:p>
          </table:table-cell>
          <table:table-cell office:value-type="float" office:value="0.9405295" table:style-name="c1">
            <text:p>0.94053</text:p>
          </table:table-cell>
          <table:table-cell office:value-type="float" office:value="-0.8789972124872536" table:style-name="c14">
            <text:p>-0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15</text:p>
          </table:table-cell>
          <table:table-cell office:value-type="float" office:value="0.9390692999999999" table:style-name="c1">
            <text:p>0.93907</text:p>
          </table:table-cell>
          <table:table-cell office:value-type="string" table:style-name="c1">
            <text:p>2026-04-14 05:15</text:p>
          </table:table-cell>
          <table:table-cell office:value-type="float" office:value="0.9449273" table:style-name="c1">
            <text:p>0.94493</text:p>
          </table:table-cell>
          <table:table-cell office:value-type="float" office:value="0.4226621323154989" table:style-name="c13">
            <text:p>+0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0.9610803" table:style-name="c1">
            <text:p>0.96108</text:p>
          </table:table-cell>
          <table:table-cell office:value-type="string" table:style-name="c1">
            <text:p>2026-04-14 15:30</text:p>
          </table:table-cell>
          <table:table-cell office:value-type="float" office:value="0.93962995" table:style-name="c1">
            <text:p>0.93963</text:p>
          </table:table-cell>
          <table:table-cell office:value-type="float" office:value="-2.4273383056597875" table:style-name="c14">
            <text:p>-2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0:15</text:p>
          </table:table-cell>
          <table:table-cell office:value-type="float" office:value="0.9393694499999999" table:style-name="c1">
            <text:p>0.93937</text:p>
          </table:table-cell>
          <table:table-cell office:value-type="string" table:style-name="c1">
            <text:p>2026-04-15 06:00</text:p>
          </table:table-cell>
          <table:table-cell office:value-type="float" office:value="0.93443255" table:style-name="c1">
            <text:p>0.93443</text:p>
          </table:table-cell>
          <table:table-cell office:value-type="float" office:value="-0.72440408483051" table:style-name="c14">
            <text:p>-0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00</text:p>
          </table:table-cell>
          <table:table-cell office:value-type="float" office:value="0.94577265" table:style-name="c1">
            <text:p>0.94577</text:p>
          </table:table-cell>
          <table:table-cell office:value-type="string" table:style-name="c1">
            <text:p>2026-04-16 00:15</text:p>
          </table:table-cell>
          <table:table-cell office:value-type="float" office:value="0.9560217500000001" table:style-name="c1">
            <text:p>0.95602</text:p>
          </table:table-cell>
          <table:table-cell office:value-type="float" office:value="0.8816085474400381" table:style-name="c13">
            <text:p>+0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45</text:p>
          </table:table-cell>
          <table:table-cell office:value-type="float" office:value="0.9721858499999999" table:style-name="c1">
            <text:p>0.97219</text:p>
          </table:table-cell>
          <table:table-cell office:value-type="string" table:style-name="c1">
            <text:p>2026-04-16 10:30</text:p>
          </table:table-cell>
          <table:table-cell office:value-type="float" office:value="0.9665165" table:style-name="c1">
            <text:p>0.96652</text:p>
          </table:table-cell>
          <table:table-cell office:value-type="float" office:value="-0.7818892327531635" table:style-name="c14">
            <text:p>-0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3:30</text:p>
          </table:table-cell>
          <table:table-cell office:value-type="float" office:value="0.9904949999999999" table:style-name="c1">
            <text:p>0.99049</text:p>
          </table:table-cell>
          <table:table-cell office:value-type="string" table:style-name="c1">
            <text:p>2026-04-16 14:30</text:p>
          </table:table-cell>
          <table:table-cell office:value-type="float" office:value="0.9585205" table:style-name="c1">
            <text:p>0.95852</text:p>
          </table:table-cell>
          <table:table-cell office:value-type="float" office:value="-3.421580369360766" table:style-name="c14">
            <text:p>-3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15</text:p>
          </table:table-cell>
          <table:table-cell office:value-type="float" office:value="0.9862928999999999" table:style-name="c1">
            <text:p>0.98629</text:p>
          </table:table-cell>
          <table:table-cell office:value-type="string" table:style-name="c1">
            <text:p>2026-04-17 07:30</text:p>
          </table:table-cell>
          <table:table-cell office:value-type="float" office:value="0.98580685" table:style-name="c1">
            <text:p>0.98581</text:p>
          </table:table-cell>
          <table:table-cell office:value-type="float" office:value="-0.24908198093587242" table:style-name="c14">
            <text:p>-0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8:00</text:p>
          </table:table-cell>
          <table:table-cell office:value-type="float" office:value="0.99319635" table:style-name="c1">
            <text:p>0.9932</text:p>
          </table:table-cell>
          <table:table-cell office:value-type="string" table:style-name="c1">
            <text:p>2026-04-17 18:30</text:p>
          </table:table-cell>
          <table:table-cell office:value-type="float" office:value="1.0120937" table:style-name="c1">
            <text:p>1.0121</text:p>
          </table:table-cell>
          <table:table-cell office:value-type="float" office:value="1.6989767122784993" table:style-name="c13">
            <text:p>+1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0.9742869" table:style-name="c1">
            <text:p>0.97429</text:p>
          </table:table-cell>
          <table:table-cell office:value-type="string" table:style-name="c1">
            <text:p>2026-04-22 16:30</text:p>
          </table:table-cell>
          <table:table-cell office:value-type="float" office:value="0.9665165" table:style-name="c1">
            <text:p>0.96652</text:p>
          </table:table-cell>
          <table:table-cell office:value-type="float" office:value="-0.9958531191890052" table:style-name="c14">
            <text:p>-1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15</text:p>
          </table:table-cell>
          <table:table-cell office:value-type="float" office:value="0.92176065" table:style-name="c1">
            <text:p>0.92176</text:p>
          </table:table-cell>
          <table:table-cell office:value-type="string" table:style-name="c1">
            <text:p>2026-05-01 21:00</text:p>
          </table:table-cell>
          <table:table-cell office:value-type="float" office:value="0.9199398000000001" table:style-name="c1">
            <text:p>0.91994</text:p>
          </table:table-cell>
          <table:table-cell office:value-type="float" office:value="-0.39704555192281443" table:style-name="c14">
            <text:p>-0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6:00</text:p>
          </table:table-cell>
          <table:table-cell office:value-type="float" office:value="0.9273634499999999" table:style-name="c1">
            <text:p>0.92736</text:p>
          </table:table-cell>
          <table:table-cell office:value-type="string" table:style-name="c1">
            <text:p>2026-05-03 00:45</text:p>
          </table:table-cell>
          <table:table-cell office:value-type="float" office:value="0.9237379000000001" table:style-name="c1">
            <text:p>0.92374</text:p>
          </table:table-cell>
          <table:table-cell office:value-type="float" office:value="-0.5900709222581235" table:style-name="c14">
            <text:p>-0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22:15</text:p>
          </table:table-cell>
          <table:table-cell office:value-type="float" office:value="0.928464" table:style-name="c1">
            <text:p>0.92846</text:p>
          </table:table-cell>
          <table:table-cell office:value-type="string" table:style-name="c1">
            <text:p>2026-05-03 23:45</text:p>
          </table:table-cell>
          <table:table-cell office:value-type="float" office:value="0.9207394000000001" table:style-name="c1">
            <text:p>0.92074</text:p>
          </table:table-cell>
          <table:table-cell office:value-type="float" office:value="-1.0302131327224129" table:style-name="c14">
            <text:p>-1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0.9308652" table:style-name="c1">
            <text:p>0.93087</text:p>
          </table:table-cell>
          <table:table-cell office:value-type="string" table:style-name="c1">
            <text:p>2026-05-04 10:15</text:p>
          </table:table-cell>
          <table:table-cell office:value-type="float" office:value="0.9265365000000001" table:style-name="c1">
            <text:p>0.92654</text:p>
          </table:table-cell>
          <table:table-cell office:value-type="float" office:value="-0.6639894222600584" table:style-name="c14">
            <text:p>-0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0:45</text:p>
          </table:table-cell>
          <table:table-cell office:value-type="float" office:value="0.9546771" table:style-name="c1">
            <text:p>0.95468</text:p>
          </table:table-cell>
          <table:table-cell office:value-type="string" table:style-name="c1">
            <text:p>2026-05-05 17:15</text:p>
          </table:table-cell>
          <table:table-cell office:value-type="float" office:value="0.9585205" table:style-name="c1">
            <text:p>0.95852</text:p>
          </table:table-cell>
          <table:table-cell office:value-type="float" office:value="0.20188161217025158" table:style-name="c13">
            <text:p>+0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7:15</text:p>
          </table:table-cell>
          <table:table-cell office:value-type="float" office:value="0.99339645" table:style-name="c1">
            <text:p>0.9934</text:p>
          </table:table-cell>
          <table:table-cell office:value-type="string" table:style-name="c1">
            <text:p>2026-05-06 13:45</text:p>
          </table:table-cell>
          <table:table-cell office:value-type="float" office:value="0.9993001" table:style-name="c1">
            <text:p>0.9993</text:p>
          </table:table-cell>
          <table:table-cell office:value-type="float" office:value="0.39320143534840035" table:style-name="c13">
            <text:p>+0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21:45</text:p>
          </table:table-cell>
          <table:table-cell office:value-type="float" office:value="1.0014004499999998" table:style-name="c1">
            <text:p>1.0014</text:p>
          </table:table-cell>
          <table:table-cell office:value-type="string" table:style-name="c1">
            <text:p>2026-05-06 23:15</text:p>
          </table:table-cell>
          <table:table-cell office:value-type="float" office:value="0.98820565" table:style-name="c1">
            <text:p>0.98821</text:p>
          </table:table-cell>
          <table:table-cell office:value-type="float" office:value="-1.514900766656302" table:style-name="c14">
            <text:p>-1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45</text:p>
          </table:table-cell>
          <table:table-cell office:value-type="float" office:value="0.9852924" table:style-name="c1">
            <text:p>0.98529</text:p>
          </table:table-cell>
          <table:table-cell office:value-type="string" table:style-name="c1">
            <text:p>2026-05-07 10:45</text:p>
          </table:table-cell>
          <table:table-cell office:value-type="float" office:value="0.9900047500000001" table:style-name="c1">
            <text:p>0.99</text:p>
          </table:table-cell>
          <table:table-cell office:value-type="float" office:value="0.27741313185305483" table:style-name="c13">
            <text:p>+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5:00</text:p>
          </table:table-cell>
          <table:table-cell office:value-type="float" office:value="1.00980465" table:style-name="c1">
            <text:p>1.0098</text:p>
          </table:table-cell>
          <table:table-cell office:value-type="string" table:style-name="c1">
            <text:p>2026-05-09 08:00</text:p>
          </table:table-cell>
          <table:table-cell office:value-type="float" office:value="1.0714640000000002" table:style-name="c1">
            <text:p>1.0715</text:p>
          </table:table-cell>
          <table:table-cell office:value-type="float" office:value="5.893961120499913" table:style-name="c13">
            <text:p>+5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7:30</text:p>
          </table:table-cell>
          <table:table-cell office:value-type="float" office:value="1.06503225" table:style-name="c1">
            <text:p>1.065</text:p>
          </table:table-cell>
          <table:table-cell office:value-type="string" table:style-name="c1">
            <text:p>2026-05-10 05:30</text:p>
          </table:table-cell>
          <table:table-cell office:value-type="float" office:value="1.0732631000000001" table:style-name="c1">
            <text:p>1.0733</text:p>
          </table:table-cell>
          <table:table-cell office:value-type="float" office:value="0.5713814828706143" table:style-name="c13">
            <text:p>+0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7:30</text:p>
          </table:table-cell>
          <table:table-cell office:value-type="float" office:value="1.09064505" table:style-name="c1">
            <text:p>1.0906</text:p>
          </table:table-cell>
          <table:table-cell office:value-type="string" table:style-name="c1">
            <text:p>2026-05-11 00:30</text:p>
          </table:table-cell>
          <table:table-cell office:value-type="float" office:value="1.3092450500000001" table:style-name="c1">
            <text:p>1.3092</text:p>
          </table:table-cell>
          <table:table-cell office:value-type="float" office:value="19.803218209723706" table:style-name="c13">
            <text:p>+19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6:30</text:p>
          </table:table-cell>
          <table:table-cell office:value-type="float" office:value="1.3128560999999999" table:style-name="c1">
            <text:p>1.3129</text:p>
          </table:table-cell>
          <table:table-cell office:value-type="string" table:style-name="c1">
            <text:p>2026-05-11 06:45</text:p>
          </table:table-cell>
          <table:table-cell office:value-type="float" office:value="1.2876558500000002" table:style-name="c1">
            <text:p>1.2877</text:p>
          </table:table-cell>
          <table:table-cell office:value-type="float" office:value="-2.11556118329721" table:style-name="c14">
            <text:p>-2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3:00</text:p>
          </table:table-cell>
          <table:table-cell office:value-type="float" office:value="1.26853395" table:style-name="c1">
            <text:p>1.2685</text:p>
          </table:table-cell>
          <table:table-cell office:value-type="string" table:style-name="c1">
            <text:p>2026-05-12 13:15</text:p>
          </table:table-cell>
          <table:table-cell office:value-type="float" office:value="1.27066435" table:style-name="c1">
            <text:p>1.2707</text:p>
          </table:table-cell>
          <table:table-cell office:value-type="float" office:value="-0.03229381725650127" table:style-name="c14">
            <text:p>-0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1:00</text:p>
          </table:table-cell>
          <table:table-cell office:value-type="float" office:value="1.1229612" table:style-name="c1">
            <text:p>1.123</text:p>
          </table:table-cell>
          <table:table-cell office:value-type="string" table:style-name="c1">
            <text:p>2026-05-21 07:00</text:p>
          </table:table-cell>
          <table:table-cell office:value-type="float" office:value="1.1039477500000001" table:style-name="c1">
            <text:p>1.1039</text:p>
          </table:table-cell>
          <table:table-cell office:value-type="float" office:value="-1.8896682763616557" table:style-name="c14">
            <text:p>-1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1.1331663" table:style-name="c1">
            <text:p>1.1332</text:p>
          </table:table-cell>
          <table:table-cell office:value-type="string" table:style-name="c1">
            <text:p>2026-05-21 10:00</text:p>
          </table:table-cell>
          <table:table-cell office:value-type="float" office:value="1.1042476" table:style-name="c1">
            <text:p>1.1042</text:p>
          </table:table-cell>
          <table:table-cell office:value-type="float" office:value="-2.746824623393751" table:style-name="c14">
            <text:p>-2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5:15</text:p>
          </table:table-cell>
          <table:table-cell office:value-type="float" office:value="1.11105525" table:style-name="c1">
            <text:p>1.1111</text:p>
          </table:table-cell>
          <table:table-cell office:value-type="string" table:style-name="c1">
            <text:p>2026-05-21 22:15</text:p>
          </table:table-cell>
          <table:table-cell office:value-type="float" office:value="1.1240377000000001" table:style-name="c1">
            <text:p>1.124</text:p>
          </table:table-cell>
          <table:table-cell office:value-type="float" office:value="0.9662434552827337" table:style-name="c13">
            <text:p>+1.0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02:15</text:p>
          </table:table-cell>
          <table:table-cell office:value-type="float" office:value="1.3336664999999999" table:style-name="c10">
            <text:p>1.3337</text:p>
          </table:table-cell>
          <table:table-cell office:value-type="string" table:style-name="c10">
            <text:p>2026-03-05 05:45</text:p>
          </table:table-cell>
          <table:table-cell office:value-type="float" office:value="1.3083455" table:style-name="c10">
            <text:p>1.3083</text:p>
          </table:table-cell>
          <table:table-cell office:value-type="float" office:value="-2.0947052846045033" table:style-name="c11">
            <text:p>-2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08:45</text:p>
          </table:table-cell>
          <table:table-cell office:value-type="float" office:value="1.34067" table:style-name="c10">
            <text:p>1.3407</text:p>
          </table:table-cell>
          <table:table-cell office:value-type="string" table:style-name="c10">
            <text:p>2026-03-05 16:30</text:p>
          </table:table-cell>
          <table:table-cell office:value-type="float" office:value="1.3483255" table:style-name="c10">
            <text:p>1.3483</text:p>
          </table:table-cell>
          <table:table-cell office:value-type="float" office:value="0.36997899001993684" table:style-name="c12">
            <text:p>+0.4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6 18:00</text:p>
          </table:table-cell>
          <table:table-cell office:value-type="float" office:value="1.3236614999999998" table:style-name="c10">
            <text:p>1.3237</text:p>
          </table:table-cell>
          <table:table-cell office:value-type="string" table:style-name="c10">
            <text:p>2026-03-06 20:30</text:p>
          </table:table-cell>
          <table:table-cell office:value-type="float" office:value="1.3183405" table:style-name="c10">
            <text:p>1.3183</text:p>
          </table:table-cell>
          <table:table-cell office:value-type="float" office:value="-0.6010874124162235" table:style-name="c11">
            <text:p>-0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8 13:00</text:p>
          </table:table-cell>
          <table:table-cell office:value-type="float" office:value="1.3536765" table:style-name="c10">
            <text:p>1.3537</text:p>
          </table:table-cell>
          <table:table-cell office:value-type="string" table:style-name="c10">
            <text:p>2026-03-08 15:45</text:p>
          </table:table-cell>
          <table:table-cell office:value-type="float" office:value="1.317341" table:style-name="c10">
            <text:p>1.3173</text:p>
          </table:table-cell>
          <table:table-cell office:value-type="float" office:value="-2.8787427911321273" table:style-name="c11">
            <text:p>-2.9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1:30</text:p>
          </table:table-cell>
          <table:table-cell office:value-type="float" office:value="1.318659" table:style-name="c10">
            <text:p>1.3187</text:p>
          </table:table-cell>
          <table:table-cell office:value-type="string" table:style-name="c10">
            <text:p>2026-03-17 00:30</text:p>
          </table:table-cell>
          <table:table-cell office:value-type="float" office:value="1.3323335" table:style-name="c10">
            <text:p>1.3323</text:p>
          </table:table-cell>
          <table:table-cell office:value-type="float" office:value="0.8350275039642474" table:style-name="c12">
            <text:p>+0.8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2 01:15</text:p>
          </table:table-cell>
          <table:table-cell office:value-type="float" office:value="1.2696344999999998" table:style-name="c10">
            <text:p>1.2696</text:p>
          </table:table-cell>
          <table:table-cell office:value-type="string" table:style-name="c10">
            <text:p>2026-03-22 01:45</text:p>
          </table:table-cell>
          <table:table-cell office:value-type="float" office:value="1.2483755" table:style-name="c10">
            <text:p>1.2484</text:p>
          </table:table-cell>
          <table:table-cell office:value-type="float" office:value="-1.8709717343455723" table:style-name="c11">
            <text:p>-1.9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2 23:15</text:p>
          </table:table-cell>
          <table:table-cell office:value-type="float" office:value="1.2566279999999999" table:style-name="c10">
            <text:p>1.2566</text:p>
          </table:table-cell>
          <table:table-cell office:value-type="string" table:style-name="c10">
            <text:p>2026-03-23 00:15</text:p>
          </table:table-cell>
          <table:table-cell office:value-type="float" office:value="1.2483755" table:style-name="c10">
            <text:p>1.2484</text:p>
          </table:table-cell>
          <table:table-cell office:value-type="float" office:value="-0.8553050405131768" table:style-name="c11">
            <text:p>-0.9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11:15</text:p>
          </table:table-cell>
          <table:table-cell office:value-type="float" office:value="1.2956474999999998" table:style-name="c10">
            <text:p>1.2956</text:p>
          </table:table-cell>
          <table:table-cell office:value-type="string" table:style-name="c10">
            <text:p>2026-03-24 10:00</text:p>
          </table:table-cell>
          <table:table-cell office:value-type="float" office:value="1.3183405" table:style-name="c10">
            <text:p>1.3183</text:p>
          </table:table-cell>
          <table:table-cell office:value-type="float" office:value="1.5480782651531522" table:style-name="c12">
            <text:p>+1.5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2 01:00</text:p>
          </table:table-cell>
          <table:table-cell office:value-type="float" office:value="1.2416205" table:style-name="c10">
            <text:p>1.2416</text:p>
          </table:table-cell>
          <table:table-cell office:value-type="string" table:style-name="c10">
            <text:p>2026-04-02 01:45</text:p>
          </table:table-cell>
          <table:table-cell office:value-type="float" office:value="1.2243875000000002" table:style-name="c10">
            <text:p>1.2244</text:p>
          </table:table-cell>
          <table:table-cell office:value-type="float" office:value="-1.5850697223910082" table:style-name="c11">
            <text:p>-1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3 05:15</text:p>
          </table:table-cell>
          <table:table-cell office:value-type="float" office:value="1.252626" table:style-name="c10">
            <text:p>1.2526</text:p>
          </table:table-cell>
          <table:table-cell office:value-type="string" table:style-name="c10">
            <text:p>2026-04-03 12:30</text:p>
          </table:table-cell>
          <table:table-cell office:value-type="float" office:value="1.247376" table:style-name="c10">
            <text:p>1.2474</text:p>
          </table:table-cell>
          <table:table-cell office:value-type="float" office:value="-0.618181693817621" table:style-name="c11">
            <text:p>-0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3:00</text:p>
          </table:table-cell>
          <table:table-cell office:value-type="float" office:value="1.2346169999999999" table:style-name="c10">
            <text:p>1.2346</text:p>
          </table:table-cell>
          <table:table-cell office:value-type="string" table:style-name="c10">
            <text:p>2026-04-04 17:15</text:p>
          </table:table-cell>
          <table:table-cell office:value-type="float" office:value="1.231384" table:style-name="c10">
            <text:p>1.2314</text:p>
          </table:table-cell>
          <table:table-cell office:value-type="float" office:value="-0.46123912241610165" table:style-name="c11">
            <text:p>-0.5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5 03:15</text:p>
          </table:table-cell>
          <table:table-cell office:value-type="float" office:value="1.242621" table:style-name="c10">
            <text:p>1.2426</text:p>
          </table:table-cell>
          <table:table-cell office:value-type="string" table:style-name="c10">
            <text:p>2026-04-05 13:00</text:p>
          </table:table-cell>
          <table:table-cell office:value-type="float" office:value="1.243378" table:style-name="c10">
            <text:p>1.2434</text:p>
          </table:table-cell>
          <table:table-cell office:value-type="float" office:value="-0.13910215761684386" table:style-name="c11">
            <text:p>-0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07:45</text:p>
          </table:table-cell>
          <table:table-cell office:value-type="float" office:value="1.284642" table:style-name="c10">
            <text:p>1.2846</text:p>
          </table:table-cell>
          <table:table-cell office:value-type="string" table:style-name="c10">
            <text:p>2026-04-10 15:00</text:p>
          </table:table-cell>
          <table:table-cell office:value-type="float" office:value="1.2763615" table:style-name="c10">
            <text:p>1.2764</text:p>
          </table:table-cell>
          <table:table-cell office:value-type="float" office:value="-0.8431879573064016" table:style-name="c11">
            <text:p>-0.8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20:45</text:p>
          </table:table-cell>
          <table:table-cell office:value-type="float" office:value="1.30065" table:style-name="c10">
            <text:p>1.3007</text:p>
          </table:table-cell>
          <table:table-cell office:value-type="string" table:style-name="c10">
            <text:p>2026-04-11 06:30</text:p>
          </table:table-cell>
          <table:table-cell office:value-type="float" office:value="1.301349" table:style-name="c10">
            <text:p>1.3013</text:p>
          </table:table-cell>
          <table:table-cell office:value-type="float" office:value="-0.14626507138737477" table:style-name="c11">
            <text:p>-0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07:30</text:p>
          </table:table-cell>
          <table:table-cell office:value-type="float" office:value="1.3196595" table:style-name="c10">
            <text:p>1.3197</text:p>
          </table:table-cell>
          <table:table-cell office:value-type="string" table:style-name="c10">
            <text:p>2026-04-12 01:45</text:p>
          </table:table-cell>
          <table:table-cell office:value-type="float" office:value="1.441279" table:style-name="c10">
            <text:p>1.4413</text:p>
          </table:table-cell>
          <table:table-cell office:value-type="float" office:value="8.997653052094101" table:style-name="c12">
            <text:p>+9.0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2 16:15</text:p>
          </table:table-cell>
          <table:table-cell office:value-type="float" office:value="1.4677335" table:style-name="c10">
            <text:p>1.4677</text:p>
          </table:table-cell>
          <table:table-cell office:value-type="string" table:style-name="c10">
            <text:p>2026-04-12 17:15</text:p>
          </table:table-cell>
          <table:table-cell office:value-type="float" office:value="1.435282" table:style-name="c10">
            <text:p>1.4353</text:p>
          </table:table-cell>
          <table:table-cell office:value-type="float" office:value="-2.406474248765178" table:style-name="c11">
            <text:p>-2.4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2 18:30</text:p>
          </table:table-cell>
          <table:table-cell office:value-type="float" office:value="1.4607299999999999" table:style-name="c10">
            <text:p>1.4607</text:p>
          </table:table-cell>
          <table:table-cell office:value-type="string" table:style-name="c10">
            <text:p>2026-04-12 22:30</text:p>
          </table:table-cell>
          <table:table-cell office:value-type="float" office:value="1.445277" table:style-name="c10">
            <text:p>1.4453</text:p>
          </table:table-cell>
          <table:table-cell office:value-type="float" office:value="-1.2556809761557486" table:style-name="c11">
            <text:p>-1.3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13:45</text:p>
          </table:table-cell>
          <table:table-cell office:value-type="float" office:value="1.4287139999999998" table:style-name="c10">
            <text:p>1.4287</text:p>
          </table:table-cell>
          <table:table-cell office:value-type="string" table:style-name="c10">
            <text:p>2026-04-13 18:00</text:p>
          </table:table-cell>
          <table:table-cell office:value-type="float" office:value="1.4222885" table:style-name="c10">
            <text:p>1.4223</text:p>
          </table:table-cell>
          <table:table-cell office:value-type="float" office:value="-0.6487410854446596" table:style-name="c11">
            <text:p>-0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2:45</text:p>
          </table:table-cell>
          <table:table-cell office:value-type="float" office:value="1.4417205" table:style-name="c10">
            <text:p>1.4417</text:p>
          </table:table-cell>
          <table:table-cell office:value-type="string" table:style-name="c10">
            <text:p>2026-04-14 09:45</text:p>
          </table:table-cell>
          <table:table-cell office:value-type="float" office:value="1.4302845000000002" table:style-name="c10">
            <text:p>1.4303</text:p>
          </table:table-cell>
          <table:table-cell office:value-type="float" office:value="-0.9915332906412666" table:style-name="c11">
            <text:p>-1.0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0:15</text:p>
          </table:table-cell>
          <table:table-cell office:value-type="float" office:value="1.356678" table:style-name="c10">
            <text:p>1.3567</text:p>
          </table:table-cell>
          <table:table-cell office:value-type="string" table:style-name="c10">
            <text:p>2026-04-21 12:15</text:p>
          </table:table-cell>
          <table:table-cell office:value-type="float" office:value="1.3693150000000003" table:style-name="c10">
            <text:p>1.3693</text:p>
          </table:table-cell>
          <table:table-cell office:value-type="float" office:value="0.7297044188083079" table:style-name="c12">
            <text:p>+0.7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0:30</text:p>
          </table:table-cell>
          <table:table-cell office:value-type="float" office:value="1.3656825" table:style-name="c10">
            <text:p>1.3657</text:p>
          </table:table-cell>
          <table:table-cell office:value-type="string" table:style-name="c10">
            <text:p>2026-04-22 11:45</text:p>
          </table:table-cell>
          <table:table-cell office:value-type="float" office:value="1.3713140000000001" table:style-name="c10">
            <text:p>1.3713</text:p>
          </table:table-cell>
          <table:table-cell office:value-type="float" office:value="0.21163362011304976" table:style-name="c12">
            <text:p>+0.2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5 07:00</text:p>
          </table:table-cell>
          <table:table-cell office:value-type="float" office:value="1.350675" table:style-name="c10">
            <text:p>1.3507</text:p>
          </table:table-cell>
          <table:table-cell office:value-type="string" table:style-name="c10">
            <text:p>2026-04-25 10:30</text:p>
          </table:table-cell>
          <table:table-cell office:value-type="float" office:value="1.3423285" table:style-name="c10">
            <text:p>1.3423</text:p>
          </table:table-cell>
          <table:table-cell office:value-type="float" office:value="-0.8166150014992546" table:style-name="c11">
            <text:p>-0.8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30</text:p>
          </table:table-cell>
          <table:table-cell office:value-type="float" office:value="1.332666" table:style-name="c10">
            <text:p>1.3327</text:p>
          </table:table-cell>
          <table:table-cell office:value-type="string" table:style-name="c10">
            <text:p>2026-04-29 14:45</text:p>
          </table:table-cell>
          <table:table-cell office:value-type="float" office:value="1.321339" table:style-name="c10">
            <text:p>1.3213</text:p>
          </table:table-cell>
          <table:table-cell office:value-type="float" office:value="-1.0481513493253436" table:style-name="c11">
            <text:p>-1.0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21:45</text:p>
          </table:table-cell>
          <table:table-cell office:value-type="float" office:value="1.3236614999999998" table:style-name="c10">
            <text:p>1.3237</text:p>
          </table:table-cell>
          <table:table-cell office:value-type="string" table:style-name="c10">
            <text:p>2026-04-30 02:45</text:p>
          </table:table-cell>
          <table:table-cell office:value-type="float" office:value="1.3063465" table:style-name="c10">
            <text:p>1.3063</text:p>
          </table:table-cell>
          <table:table-cell office:value-type="float" office:value="-1.50539897500227" table:style-name="c11">
            <text:p>-1.5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00:15</text:p>
          </table:table-cell>
          <table:table-cell office:value-type="float" office:value="1.3476735" table:style-name="c10">
            <text:p>1.3477</text:p>
          </table:table-cell>
          <table:table-cell office:value-type="string" table:style-name="c10">
            <text:p>2026-05-01 05:45</text:p>
          </table:table-cell>
          <table:table-cell office:value-type="float" office:value="1.333333" table:style-name="c10">
            <text:p>1.3333</text:p>
          </table:table-cell>
          <table:table-cell office:value-type="float" office:value="-1.261865924276162" table:style-name="c11">
            <text:p>-1.3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08:30</text:p>
          </table:table-cell>
          <table:table-cell office:value-type="float" office:value="1.3336664999999999" table:style-name="c10">
            <text:p>1.3337</text:p>
          </table:table-cell>
          <table:table-cell office:value-type="string" table:style-name="c10">
            <text:p>2026-05-02 14:30</text:p>
          </table:table-cell>
          <table:table-cell office:value-type="float" office:value="1.3293350000000002" table:style-name="c10">
            <text:p>1.3293</text:p>
          </table:table-cell>
          <table:table-cell office:value-type="float" office:value="-0.524032107352157" table:style-name="c11">
            <text:p>-0.5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0:45</text:p>
          </table:table-cell>
          <table:table-cell office:value-type="float" office:value="1.3656825" table:style-name="c10">
            <text:p>1.3657</text:p>
          </table:table-cell>
          <table:table-cell office:value-type="string" table:style-name="c10">
            <text:p>2026-05-04 10:30</text:p>
          </table:table-cell>
          <table:table-cell office:value-type="float" office:value="1.3673160000000002" table:style-name="c10">
            <text:p>1.3673</text:p>
          </table:table-cell>
          <table:table-cell office:value-type="float" office:value="-0.08052857703014782" table:style-name="c11">
            <text:p>-0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15:00</text:p>
          </table:table-cell>
          <table:table-cell office:value-type="float" office:value="1.4537265" table:style-name="c10">
            <text:p>1.4537</text:p>
          </table:table-cell>
          <table:table-cell office:value-type="string" table:style-name="c10">
            <text:p>2026-05-05 14:30</text:p>
          </table:table-cell>
          <table:table-cell office:value-type="float" office:value="1.8020985" table:style-name="c10">
            <text:p>1.8021</text:p>
          </table:table-cell>
          <table:table-cell office:value-type="float" office:value="23.716263347919984" table:style-name="c12">
            <text:p>+23.7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20:45</text:p>
          </table:table-cell>
          <table:table-cell office:value-type="float" office:value="1.950975" table:style-name="c10">
            <text:p>1.951</text:p>
          </table:table-cell>
          <table:table-cell office:value-type="string" table:style-name="c10">
            <text:p>2026-05-06 15:30</text:p>
          </table:table-cell>
          <table:table-cell office:value-type="float" office:value="2.2338825" table:style-name="c10">
            <text:p>2.2339</text:p>
          </table:table-cell>
          <table:table-cell office:value-type="float" office:value="14.271939357628893" table:style-name="c12">
            <text:p>+14.3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17:00</text:p>
          </table:table-cell>
          <table:table-cell office:value-type="float" office:value="2.4282135" table:style-name="c10">
            <text:p>2.4282</text:p>
          </table:table-cell>
          <table:table-cell office:value-type="string" table:style-name="c10">
            <text:p>2026-05-07 09:15</text:p>
          </table:table-cell>
          <table:table-cell office:value-type="float" office:value="2.6466760000000003" table:style-name="c10">
            <text:p>2.6467</text:p>
          </table:table-cell>
          <table:table-cell office:value-type="float" office:value="8.778955996908833" table:style-name="c12">
            <text:p>+8.8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17:45</text:p>
          </table:table-cell>
          <table:table-cell office:value-type="float" office:value="2.5392689999999996" table:style-name="c10">
            <text:p>2.5393</text:p>
          </table:table-cell>
          <table:table-cell office:value-type="string" table:style-name="c10">
            <text:p>2026-05-08 09:45</text:p>
          </table:table-cell>
          <table:table-cell office:value-type="float" office:value="2.6216885000000003" table:style-name="c10">
            <text:p>2.6217</text:p>
          </table:table-cell>
          <table:table-cell office:value-type="float" office:value="3.0394079827108067" table:style-name="c12">
            <text:p>+3.0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22:45</text:p>
          </table:table-cell>
          <table:table-cell office:value-type="float" office:value="2.5602795" table:style-name="c10">
            <text:p>2.5603</text:p>
          </table:table-cell>
          <table:table-cell office:value-type="string" table:style-name="c10">
            <text:p>2026-05-08 23:00</text:p>
          </table:table-cell>
          <table:table-cell office:value-type="float" office:value="2.5397295" table:style-name="c10">
            <text:p>2.5397</text:p>
          </table:table-cell>
          <table:table-cell office:value-type="float" office:value="-1.0009422514416944" table:style-name="c11">
            <text:p>-1.0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8 13:00</text:p>
          </table:table-cell>
          <table:table-cell office:value-type="float" office:value="2.0510249999999997" table:style-name="c10">
            <text:p>2.051</text:p>
          </table:table-cell>
          <table:table-cell office:value-type="string" table:style-name="c10">
            <text:p>2026-05-18 15:15</text:p>
          </table:table-cell>
          <table:table-cell office:value-type="float" office:value="1.9220385000000002" table:style-name="c10">
            <text:p>1.922</text:p>
          </table:table-cell>
          <table:table-cell office:value-type="float" office:value="-6.476208479248147" table:style-name="c11">
            <text:p>-6.5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9 04:15</text:p>
          </table:table-cell>
          <table:table-cell office:value-type="float" office:value="2.0460225" table:style-name="c10">
            <text:p>2.046</text:p>
          </table:table-cell>
          <table:table-cell office:value-type="string" table:style-name="c10">
            <text:p>2026-05-19 10:00</text:p>
          </table:table-cell>
          <table:table-cell office:value-type="float" office:value="2.0149920000000003" table:style-name="c10">
            <text:p>2.015</text:p>
          </table:table-cell>
          <table:table-cell office:value-type="float" office:value="-1.7134938158304247" table:style-name="c11">
            <text:p>-1.7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9 17:00</text:p>
          </table:table-cell>
          <table:table-cell office:value-type="float" office:value="2.0500244999999997" table:style-name="c10">
            <text:p>2.05</text:p>
          </table:table-cell>
          <table:table-cell office:value-type="string" table:style-name="c10">
            <text:p>2026-05-19 22:00</text:p>
          </table:table-cell>
          <table:table-cell office:value-type="float" office:value="1.987006" table:style-name="c10">
            <text:p>1.987</text:p>
          </table:table-cell>
          <table:table-cell office:value-type="float" office:value="-3.2677914334194202" table:style-name="c11">
            <text:p>-3.3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0:45</text:p>
          </table:table-cell>
          <table:table-cell office:value-type="float" office:value="2.0860425" table:style-name="c10">
            <text:p>2.086</text:p>
          </table:table-cell>
          <table:table-cell office:value-type="string" table:style-name="c10">
            <text:p>2026-05-21 03:15</text:p>
          </table:table-cell>
          <table:table-cell office:value-type="float" office:value="2.040979" table:style-name="c10">
            <text:p>2.041</text:p>
          </table:table-cell>
          <table:table-cell office:value-type="float" office:value="-2.3558205080193795" table:style-name="c11">
            <text:p>-2.4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7:15</text:p>
          </table:table-cell>
          <table:table-cell office:value-type="float" office:value="2.0340165" table:style-name="c10">
            <text:p>2.034</text:p>
          </table:table-cell>
          <table:table-cell office:value-type="string" table:style-name="c10">
            <text:p>2026-05-22 01:15</text:p>
          </table:table-cell>
          <table:table-cell office:value-type="float" office:value="2.0419785000000004" table:style-name="c10">
            <text:p>2.042</text:p>
          </table:table-cell>
          <table:table-cell office:value-type="float" office:value="0.19075975924975896" table:style-name="c12">
            <text:p>+0.2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6:00</text:p>
          </table:table-cell>
          <table:table-cell office:value-type="float" office:value="1.976988" table:style-name="c10">
            <text:p>1.977</text:p>
          </table:table-cell>
          <table:table-cell office:value-type="string" table:style-name="c10">
            <text:p>2026-05-25 21:30</text:p>
          </table:table-cell>
          <table:table-cell office:value-type="float" office:value="1.9700145000000002" table:style-name="c10">
            <text:p>1.97</text:p>
          </table:table-cell>
          <table:table-cell office:value-type="float" office:value="-0.5519284378812661" table:style-name="c11">
            <text:p>-0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0:45</text:p>
          </table:table-cell>
          <table:table-cell office:value-type="float" office:value="1.850925" table:style-name="c10">
            <text:p>1.8509</text:p>
          </table:table-cell>
          <table:table-cell office:value-type="string" table:style-name="c10">
            <text:p>2026-05-31 14:30</text:p>
          </table:table-cell>
          <table:table-cell office:value-type="float" office:value="1.8620685000000001" table:style-name="c10">
            <text:p>1.8621</text:p>
          </table:table-cell>
          <table:table-cell office:value-type="float" office:value="0.4009468275862238" table:style-name="c12">
            <text:p>+0.4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15:15</text:p>
          </table:table-cell>
          <table:table-cell office:value-type="float" office:value="1.9049519999999998" table:style-name="c10">
            <text:p>1.905</text:p>
          </table:table-cell>
          <table:table-cell office:value-type="string" table:style-name="c10">
            <text:p>2026-05-31 16:45</text:p>
          </table:table-cell>
          <table:table-cell office:value-type="float" office:value="1.8570710000000001" table:style-name="c10">
            <text:p>1.8571</text:p>
          </table:table-cell>
          <table:table-cell office:value-type="float" office:value="-2.7083771627316344" table:style-name="c11">
            <text:p>-2.7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01:00</text:p>
          </table:table-cell>
          <table:table-cell office:value-type="float" office:value="1.9379685" table:style-name="c10">
            <text:p>1.938</text:p>
          </table:table-cell>
          <table:table-cell office:value-type="string" table:style-name="c10">
            <text:p>2026-06-01 07:45</text:p>
          </table:table-cell>
          <table:table-cell office:value-type="float" office:value="1.9320335000000002" table:style-name="c10">
            <text:p>1.932</text:p>
          </table:table-cell>
          <table:table-cell office:value-type="float" office:value="-0.505536336968293" table:style-name="c11">
            <text:p>-0.5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16:30</text:p>
          </table:table-cell>
          <table:table-cell office:value-type="float" office:value="2.1800895" table:style-name="c10">
            <text:p>2.1801</text:p>
          </table:table-cell>
          <table:table-cell office:value-type="string" table:style-name="c10">
            <text:p>2026-06-01 22:15</text:p>
          </table:table-cell>
          <table:table-cell office:value-type="float" office:value="2.1039475000000003" table:style-name="c10">
            <text:p>2.1039</text:p>
          </table:table-cell>
          <table:table-cell office:value-type="float" office:value="-3.6855271791593758" table:style-name="c11">
            <text:p>-3.7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21:30</text:p>
          </table:table-cell>
          <table:table-cell office:value-type="float" office:value="0.28454219999999997" table:style-name="c1">
            <text:p>0.28454</text:p>
          </table:table-cell>
          <table:table-cell office:value-type="string" table:style-name="c1">
            <text:p>2026-03-06 14:15</text:p>
          </table:table-cell>
          <table:table-cell office:value-type="float" office:value="0.28555715000000004" table:style-name="c1">
            <text:p>0.28556</text:p>
          </table:table-cell>
          <table:table-cell office:value-type="float" office:value="0.15608273821952068" table:style-name="c13">
            <text:p>+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8 16:15</text:p>
          </table:table-cell>
          <table:table-cell office:value-type="float" office:value="0.2893446" table:style-name="c1">
            <text:p>0.28934</text:p>
          </table:table-cell>
          <table:table-cell office:value-type="string" table:style-name="c1">
            <text:p>2026-03-08 23:30</text:p>
          </table:table-cell>
          <table:table-cell office:value-type="float" office:value="0.28915535000000003" table:style-name="c1">
            <text:p>0.28916</text:p>
          </table:table-cell>
          <table:table-cell office:value-type="float" office:value="-0.2651756917702808" table:style-name="c14">
            <text:p>-0.3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03:15</text:p>
          </table:table-cell>
          <table:table-cell office:value-type="float" office:value="0.29044515" table:style-name="c1">
            <text:p>0.29045</text:p>
          </table:table-cell>
          <table:table-cell office:value-type="string" table:style-name="c1">
            <text:p>2026-03-09 05:00</text:p>
          </table:table-cell>
          <table:table-cell office:value-type="float" office:value="0.28875555" table:style-name="c1">
            <text:p>0.28876</text:p>
          </table:table-cell>
          <table:table-cell office:value-type="float" office:value="-0.7804648638305545" table:style-name="c14">
            <text:p>-0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7:15</text:p>
          </table:table-cell>
          <table:table-cell office:value-type="float" office:value="0.29164575" table:style-name="c1">
            <text:p>0.29165</text:p>
          </table:table-cell>
          <table:table-cell office:value-type="string" table:style-name="c1">
            <text:p>2026-03-12 02:00</text:p>
          </table:table-cell>
          <table:table-cell office:value-type="float" office:value="0.29015485" table:style-name="c1">
            <text:p>0.29015</text:p>
          </table:table-cell>
          <table:table-cell office:value-type="float" office:value="-0.7100804812516515" table:style-name="c14">
            <text:p>-0.7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0.290145" table:style-name="c1">
            <text:p>0.29014</text:p>
          </table:table-cell>
          <table:table-cell office:value-type="string" table:style-name="c1">
            <text:p>2026-03-13 06:30</text:p>
          </table:table-cell>
          <table:table-cell office:value-type="float" office:value="0.28935525" table:style-name="c1">
            <text:p>0.28936</text:p>
          </table:table-cell>
          <table:table-cell office:value-type="float" office:value="-0.4715473796722214" table:style-name="c14">
            <text:p>-0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4:30</text:p>
          </table:table-cell>
          <table:table-cell office:value-type="float" office:value="0.2903451" table:style-name="c1">
            <text:p>0.29035</text:p>
          </table:table-cell>
          <table:table-cell office:value-type="string" table:style-name="c1">
            <text:p>2026-03-14 08:30</text:p>
          </table:table-cell>
          <table:table-cell office:value-type="float" office:value="0.2934532" table:style-name="c1">
            <text:p>0.29345</text:p>
          </table:table-cell>
          <table:table-cell office:value-type="float" office:value="0.8684448448415427" table:style-name="c13">
            <text:p>+0.9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13:00</text:p>
          </table:table-cell>
          <table:table-cell office:value-type="float" office:value="0.29724854999999994" table:style-name="c1">
            <text:p>0.29725</text:p>
          </table:table-cell>
          <table:table-cell office:value-type="string" table:style-name="c1">
            <text:p>2026-03-14 19:30</text:p>
          </table:table-cell>
          <table:table-cell office:value-type="float" office:value="0.2964517" table:style-name="c1">
            <text:p>0.29645</text:p>
          </table:table-cell>
          <table:table-cell office:value-type="float" office:value="-0.4674394368954671" table:style-name="c14">
            <text:p>-0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9:30</text:p>
          </table:table-cell>
          <table:table-cell office:value-type="float" office:value="0.2973486" table:style-name="c1">
            <text:p>0.29735</text:p>
          </table:table-cell>
          <table:table-cell office:value-type="string" table:style-name="c1">
            <text:p>2026-03-16 00:45</text:p>
          </table:table-cell>
          <table:table-cell office:value-type="float" office:value="0.29805090000000006" table:style-name="c1">
            <text:p>0.29805</text:p>
          </table:table-cell>
          <table:table-cell office:value-type="float" office:value="0.03581528579588156" table:style-name="c13">
            <text:p>+0.0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2:45</text:p>
          </table:table-cell>
          <table:table-cell office:value-type="float" office:value="0.2965482" table:style-name="c1">
            <text:p>0.29655</text:p>
          </table:table-cell>
          <table:table-cell office:value-type="string" table:style-name="c1">
            <text:p>2026-03-18 02:45</text:p>
          </table:table-cell>
          <table:table-cell office:value-type="float" office:value="0.30814585000000005" table:style-name="c1">
            <text:p>0.30815</text:p>
          </table:table-cell>
          <table:table-cell office:value-type="float" office:value="3.7031640879459315" table:style-name="c13">
            <text:p>+3.7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9 22:45</text:p>
          </table:table-cell>
          <table:table-cell office:value-type="float" office:value="0.30425204999999994" table:style-name="c1">
            <text:p>0.30425</text:p>
          </table:table-cell>
          <table:table-cell office:value-type="string" table:style-name="c1">
            <text:p>2026-03-20 05:30</text:p>
          </table:table-cell>
          <table:table-cell office:value-type="float" office:value="0.3032483" table:style-name="c1">
            <text:p>0.30325</text:p>
          </table:table-cell>
          <table:table-cell office:value-type="float" office:value="-0.5291479060535065" table:style-name="c14">
            <text:p>-0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0 10:30</text:p>
          </table:table-cell>
          <table:table-cell office:value-type="float" office:value="0.3069534" table:style-name="c1">
            <text:p>0.30695</text:p>
          </table:table-cell>
          <table:table-cell office:value-type="string" table:style-name="c1">
            <text:p>2026-03-21 00:45</text:p>
          </table:table-cell>
          <table:table-cell office:value-type="float" office:value="0.3082458" table:style-name="c1">
            <text:p>0.30825</text:p>
          </table:table-cell>
          <table:table-cell office:value-type="float" office:value="0.2202994479943987" table:style-name="c13">
            <text:p>+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04:15</text:p>
          </table:table-cell>
          <table:table-cell office:value-type="float" office:value="0.30965475" table:style-name="c1">
            <text:p>0.30965</text:p>
          </table:table-cell>
          <table:table-cell office:value-type="string" table:style-name="c1">
            <text:p>2026-03-21 09:00</text:p>
          </table:table-cell>
          <table:table-cell office:value-type="float" office:value="0.30874555000000004" table:style-name="c1">
            <text:p>0.30875</text:p>
          </table:table-cell>
          <table:table-cell office:value-type="float" office:value="-0.49293038600245476" table:style-name="c14">
            <text:p>-0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23:45</text:p>
          </table:table-cell>
          <table:table-cell office:value-type="float" office:value="0.3133566" table:style-name="c1">
            <text:p>0.31336</text:p>
          </table:table-cell>
          <table:table-cell office:value-type="string" table:style-name="c1">
            <text:p>2026-03-22 01:45</text:p>
          </table:table-cell>
          <table:table-cell office:value-type="float" office:value="0.3104447" table:style-name="c1">
            <text:p>0.31044</text:p>
          </table:table-cell>
          <table:table-cell office:value-type="float" office:value="-1.1273031923693222" table:style-name="c14">
            <text:p>-1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11:15</text:p>
          </table:table-cell>
          <table:table-cell office:value-type="float" office:value="0.3099549" table:style-name="c1">
            <text:p>0.30995</text:p>
          </table:table-cell>
          <table:table-cell office:value-type="string" table:style-name="c1">
            <text:p>2026-03-23 15:15</text:p>
          </table:table-cell>
          <table:table-cell office:value-type="float" office:value="0.30624680000000004" table:style-name="c1">
            <text:p>0.30625</text:p>
          </table:table-cell>
          <table:table-cell office:value-type="float" office:value="-1.3938438634781836" table:style-name="c14">
            <text:p>-1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11:30</text:p>
          </table:table-cell>
          <table:table-cell office:value-type="float" office:value="0.31125555" table:style-name="c1">
            <text:p>0.31126</text:p>
          </table:table-cell>
          <table:table-cell office:value-type="string" table:style-name="c1">
            <text:p>2026-03-24 14:45</text:p>
          </table:table-cell>
          <table:table-cell office:value-type="float" office:value="0.3088455" table:style-name="c1">
            <text:p>0.30885</text:p>
          </table:table-cell>
          <table:table-cell office:value-type="float" office:value="-0.9726516216337244" table:style-name="c14">
            <text:p>-1.0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6:15</text:p>
          </table:table-cell>
          <table:table-cell office:value-type="float" office:value="0.312156" table:style-name="c1">
            <text:p>0.31216</text:p>
          </table:table-cell>
          <table:table-cell office:value-type="string" table:style-name="c1">
            <text:p>2026-03-26 00:45</text:p>
          </table:table-cell>
          <table:table-cell office:value-type="float" office:value="0.31354315" table:style-name="c1">
            <text:p>0.31354</text:p>
          </table:table-cell>
          <table:table-cell office:value-type="float" office:value="0.24358886042556982" table:style-name="c13">
            <text:p>+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6 04:30</text:p>
          </table:table-cell>
          <table:table-cell office:value-type="float" office:value="0.31545765000000003" table:style-name="c1">
            <text:p>0.31546</text:p>
          </table:table-cell>
          <table:table-cell office:value-type="string" table:style-name="c1">
            <text:p>2026-03-26 08:15</text:p>
          </table:table-cell>
          <table:table-cell office:value-type="float" office:value="0.31464260000000005" table:style-name="c1">
            <text:p>0.31464</text:p>
          </table:table-cell>
          <table:table-cell office:value-type="float" office:value="-0.4577541731512924" table:style-name="c14">
            <text:p>-0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6 21:30</text:p>
          </table:table-cell>
          <table:table-cell office:value-type="float" office:value="0.31125555" table:style-name="c1">
            <text:p>0.31126</text:p>
          </table:table-cell>
          <table:table-cell office:value-type="string" table:style-name="c1">
            <text:p>2026-03-26 21:45</text:p>
          </table:table-cell>
          <table:table-cell office:value-type="float" office:value="0.31064460000000005" table:style-name="c1">
            <text:p>0.31064</text:p>
          </table:table-cell>
          <table:table-cell office:value-type="float" office:value="-0.3957932815655485" table:style-name="c14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7 04:45</text:p>
          </table:table-cell>
          <table:table-cell office:value-type="float" office:value="0.31365675" table:style-name="c1">
            <text:p>0.31366</text:p>
          </table:table-cell>
          <table:table-cell office:value-type="string" table:style-name="c1">
            <text:p>2026-03-27 11:00</text:p>
          </table:table-cell>
          <table:table-cell office:value-type="float" office:value="0.3120439" table:style-name="c1">
            <text:p>0.31204</text:p>
          </table:table-cell>
          <table:table-cell office:value-type="float" office:value="-0.7130807024238961" table:style-name="c14">
            <text:p>-0.7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8 11:45</text:p>
          </table:table-cell>
          <table:table-cell office:value-type="float" office:value="0.31405695" table:style-name="c1">
            <text:p>0.31406</text:p>
          </table:table-cell>
          <table:table-cell office:value-type="string" table:style-name="c1">
            <text:p>2026-03-28 22:30</text:p>
          </table:table-cell>
          <table:table-cell office:value-type="float" office:value="0.31654165" table:style-name="c1">
            <text:p>0.31654</text:p>
          </table:table-cell>
          <table:table-cell office:value-type="float" office:value="0.5896807065247422" table:style-name="c13">
            <text:p>+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9 09:00</text:p>
          </table:table-cell>
          <table:table-cell office:value-type="float" office:value="0.31965974999999996" table:style-name="c1">
            <text:p>0.31966</text:p>
          </table:table-cell>
          <table:table-cell office:value-type="string" table:style-name="c1">
            <text:p>2026-03-29 15:45</text:p>
          </table:table-cell>
          <table:table-cell office:value-type="float" office:value="0.31824080000000005" table:style-name="c1">
            <text:p>0.31824</text:p>
          </table:table-cell>
          <table:table-cell office:value-type="float" office:value="-0.6429065151930757" table:style-name="c14">
            <text:p>-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9 20:15</text:p>
          </table:table-cell>
          <table:table-cell office:value-type="float" office:value="0.32306145000000003" table:style-name="c1">
            <text:p>0.32306</text:p>
          </table:table-cell>
          <table:table-cell office:value-type="string" table:style-name="c1">
            <text:p>2026-03-30 01:00</text:p>
          </table:table-cell>
          <table:table-cell office:value-type="float" office:value="0.32033975000000003" table:style-name="c1">
            <text:p>0.32034</text:p>
          </table:table-cell>
          <table:table-cell office:value-type="float" office:value="-1.0406872006084367" table:style-name="c14">
            <text:p>-1.0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18:45</text:p>
          </table:table-cell>
          <table:table-cell office:value-type="float" office:value="0.3211605" table:style-name="c1">
            <text:p>0.32116</text:p>
          </table:table-cell>
          <table:table-cell office:value-type="string" table:style-name="c1">
            <text:p>2026-03-30 23:45</text:p>
          </table:table-cell>
          <table:table-cell office:value-type="float" office:value="0.31924030000000003" table:style-name="c1">
            <text:p>0.31924</text:p>
          </table:table-cell>
          <table:table-cell office:value-type="float" office:value="-0.796599008813359" table:style-name="c14">
            <text:p>-0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1:30</text:p>
          </table:table-cell>
          <table:table-cell office:value-type="float" office:value="0.31825905" table:style-name="c1">
            <text:p>0.31826</text:p>
          </table:table-cell>
          <table:table-cell office:value-type="string" table:style-name="c1">
            <text:p>2026-04-06 15:15</text:p>
          </table:table-cell>
          <table:table-cell office:value-type="float" office:value="0.31764110000000007" table:style-name="c1">
            <text:p>0.31764</text:p>
          </table:table-cell>
          <table:table-cell office:value-type="float" office:value="-0.3936775902837364" table:style-name="c14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2 02:45</text:p>
          </table:table-cell>
          <table:table-cell office:value-type="float" office:value="0.32005995" table:style-name="c1">
            <text:p>0.32006</text:p>
          </table:table-cell>
          <table:table-cell office:value-type="string" table:style-name="c1">
            <text:p>2026-04-12 23:15</text:p>
          </table:table-cell>
          <table:table-cell office:value-type="float" office:value="0.3220389" table:style-name="c1">
            <text:p>0.32204</text:p>
          </table:table-cell>
          <table:table-cell office:value-type="float" office:value="0.4171700454555616" table:style-name="c13">
            <text:p>+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08:00</text:p>
          </table:table-cell>
          <table:table-cell office:value-type="float" office:value="0.32176079999999996" table:style-name="c1">
            <text:p>0.32176</text:p>
          </table:table-cell>
          <table:table-cell office:value-type="string" table:style-name="c1">
            <text:p>2026-04-13 13:00</text:p>
          </table:table-cell>
          <table:table-cell office:value-type="float" office:value="0.32063959999999997" table:style-name="c1">
            <text:p>0.32064</text:p>
          </table:table-cell>
          <table:table-cell office:value-type="float" office:value="-0.5476610452236463" table:style-name="c14">
            <text:p>-0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15</text:p>
          </table:table-cell>
          <table:table-cell office:value-type="float" office:value="0.32646315" table:style-name="c1">
            <text:p>0.32646</text:p>
          </table:table-cell>
          <table:table-cell office:value-type="string" table:style-name="c1">
            <text:p>2026-04-15 23:30</text:p>
          </table:table-cell>
          <table:table-cell office:value-type="float" office:value="0.3266366" table:style-name="c1">
            <text:p>0.32664</text:p>
          </table:table-cell>
          <table:table-cell office:value-type="float" office:value="-0.14687616761646094" table:style-name="c14">
            <text:p>-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7:00</text:p>
          </table:table-cell>
          <table:table-cell office:value-type="float" office:value="0.3275637" table:style-name="c1">
            <text:p>0.32756</text:p>
          </table:table-cell>
          <table:table-cell office:value-type="string" table:style-name="c1">
            <text:p>2026-04-18 20:45</text:p>
          </table:table-cell>
          <table:table-cell office:value-type="float" office:value="0.32883550000000006" table:style-name="c1">
            <text:p>0.32884</text:p>
          </table:table-cell>
          <table:table-cell office:value-type="float" office:value="0.18758422728160085" table:style-name="c13">
            <text:p>+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9 06:15</text:p>
          </table:table-cell>
          <table:table-cell office:value-type="float" office:value="0.32916449999999997" table:style-name="c1">
            <text:p>0.32916</text:p>
          </table:table-cell>
          <table:table-cell office:value-type="string" table:style-name="c1">
            <text:p>2026-04-19 12:00</text:p>
          </table:table-cell>
          <table:table-cell office:value-type="float" office:value="0.32973505000000003" table:style-name="c1">
            <text:p>0.32974</text:p>
          </table:table-cell>
          <table:table-cell office:value-type="float" office:value="-0.02691370574590124" table:style-name="c14">
            <text:p>-0.0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9 15:00</text:p>
          </table:table-cell>
          <table:table-cell office:value-type="float" office:value="0.332166" table:style-name="c1">
            <text:p>0.33217</text:p>
          </table:table-cell>
          <table:table-cell office:value-type="string" table:style-name="c1">
            <text:p>2026-04-19 19:45</text:p>
          </table:table-cell>
          <table:table-cell office:value-type="float" office:value="0.33233375000000004" table:style-name="c1">
            <text:p>0.33233</text:p>
          </table:table-cell>
          <table:table-cell office:value-type="float" office:value="-0.1494990957081721" table:style-name="c14">
            <text:p>-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0 02:15</text:p>
          </table:table-cell>
          <table:table-cell office:value-type="float" office:value="0.33186584999999996" table:style-name="c1">
            <text:p>0.33187</text:p>
          </table:table-cell>
          <table:table-cell office:value-type="string" table:style-name="c1">
            <text:p>2026-04-20 07:45</text:p>
          </table:table-cell>
          <table:table-cell office:value-type="float" office:value="0.33053465" table:style-name="c1">
            <text:p>0.33053</text:p>
          </table:table-cell>
          <table:table-cell office:value-type="float" office:value="-0.6002240861329944" table:style-name="c14">
            <text:p>-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20:45</text:p>
          </table:table-cell>
          <table:table-cell office:value-type="float" office:value="0.3343671" table:style-name="c1">
            <text:p>0.33437</text:p>
          </table:table-cell>
          <table:table-cell office:value-type="string" table:style-name="c1">
            <text:p>2026-04-22 01:00</text:p>
          </table:table-cell>
          <table:table-cell office:value-type="float" office:value="0.3324337" table:style-name="c1">
            <text:p>0.33243</text:p>
          </table:table-cell>
          <table:table-cell office:value-type="float" office:value="-0.7769708701304556" table:style-name="c14">
            <text:p>-0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2:45</text:p>
          </table:table-cell>
          <table:table-cell office:value-type="float" office:value="0.32696339999999996" table:style-name="c1">
            <text:p>0.32696</text:p>
          </table:table-cell>
          <table:table-cell office:value-type="string" table:style-name="c1">
            <text:p>2026-05-01 15:45</text:p>
          </table:table-cell>
          <table:table-cell office:value-type="float" office:value="0.32583700000000004" table:style-name="c1">
            <text:p>0.32584</text:p>
          </table:table-cell>
          <table:table-cell office:value-type="float" office:value="-0.5437147286209698" table:style-name="c14">
            <text:p>-0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5:30</text:p>
          </table:table-cell>
          <table:table-cell office:value-type="float" office:value="0.33726855" table:style-name="c1">
            <text:p>0.33727</text:p>
          </table:table-cell>
          <table:table-cell office:value-type="string" table:style-name="c1">
            <text:p>2026-05-03 12:30</text:p>
          </table:table-cell>
          <table:table-cell office:value-type="float" office:value="0.33633175000000004" table:style-name="c1">
            <text:p>0.33633</text:p>
          </table:table-cell>
          <table:table-cell office:value-type="float" office:value="-0.4771056086462777" table:style-name="c14">
            <text:p>-0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7:30</text:p>
          </table:table-cell>
          <table:table-cell office:value-type="float" office:value="0.34077029999999997" table:style-name="c1">
            <text:p>0.34077</text:p>
          </table:table-cell>
          <table:table-cell office:value-type="string" table:style-name="c1">
            <text:p>2026-05-05 12:15</text:p>
          </table:table-cell>
          <table:table-cell office:value-type="float" office:value="0.3390304" table:style-name="c1">
            <text:p>0.33903</text:p>
          </table:table-cell>
          <table:table-cell office:value-type="float" office:value="-0.7094578869109025" table:style-name="c14">
            <text:p>-0.7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4:30</text:p>
          </table:table-cell>
          <table:table-cell office:value-type="float" office:value="0.34097039999999995" table:style-name="c1">
            <text:p>0.34097</text:p>
          </table:table-cell>
          <table:table-cell office:value-type="string" table:style-name="c1">
            <text:p>2026-05-06 02:00</text:p>
          </table:table-cell>
          <table:table-cell office:value-type="float" office:value="0.3436281" table:style-name="c1">
            <text:p>0.34363</text:p>
          </table:table-cell>
          <table:table-cell office:value-type="float" office:value="0.577993699189161" table:style-name="c13">
            <text:p>+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7:15</text:p>
          </table:table-cell>
          <table:table-cell office:value-type="float" office:value="0.3505752" table:style-name="c1">
            <text:p>0.35058</text:p>
          </table:table-cell>
          <table:table-cell office:value-type="string" table:style-name="c1">
            <text:p>2026-05-08 10:45</text:p>
          </table:table-cell>
          <table:table-cell office:value-type="float" office:value="0.34822580000000003" table:style-name="c1">
            <text:p>0.34823</text:p>
          </table:table-cell>
          <table:table-cell office:value-type="float" office:value="-0.8687161482614725" table:style-name="c14">
            <text:p>-0.9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5:30</text:p>
          </table:table-cell>
          <table:table-cell office:value-type="float" office:value="0.3533766" table:style-name="c1">
            <text:p>0.35338</text:p>
          </table:table-cell>
          <table:table-cell office:value-type="string" table:style-name="c1">
            <text:p>2026-05-09 08:30</text:p>
          </table:table-cell>
          <table:table-cell office:value-type="float" office:value="0.35072455" table:style-name="c1">
            <text:p>0.35072</text:p>
          </table:table-cell>
          <table:table-cell office:value-type="float" office:value="-0.9488880631739471" table:style-name="c14">
            <text:p>-0.9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1:30</text:p>
          </table:table-cell>
          <table:table-cell office:value-type="float" office:value="0.35007495" table:style-name="c1">
            <text:p>0.35007</text:p>
          </table:table-cell>
          <table:table-cell office:value-type="string" table:style-name="c1">
            <text:p>2026-05-10 22:00</text:p>
          </table:table-cell>
          <table:table-cell office:value-type="float" office:value="0.35072455" table:style-name="c1">
            <text:p>0.35072</text:p>
          </table:table-cell>
          <table:table-cell office:value-type="float" office:value="-0.01471067137192028" table:style-name="c14">
            <text:p>-0.0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02:45</text:p>
          </table:table-cell>
          <table:table-cell office:value-type="float" office:value="0.35067524999999994" table:style-name="c1">
            <text:p>0.35068</text:p>
          </table:table-cell>
          <table:table-cell office:value-type="string" table:style-name="c1">
            <text:p>2026-05-14 21:30</text:p>
          </table:table-cell>
          <table:table-cell office:value-type="float" office:value="0.353823" table:style-name="c1">
            <text:p>0.35382</text:p>
          </table:table-cell>
          <table:table-cell office:value-type="float" office:value="0.6959310139509789" table:style-name="c13">
            <text:p>+0.7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6 17:00</text:p>
          </table:table-cell>
          <table:table-cell office:value-type="float" office:value="0.35467724999999994" table:style-name="c1">
            <text:p>0.35468</text:p>
          </table:table-cell>
          <table:table-cell office:value-type="string" table:style-name="c1">
            <text:p>2026-05-17 01:30</text:p>
          </table:table-cell>
          <table:table-cell office:value-type="float" office:value="0.3536231" table:style-name="c1">
            <text:p>0.35362</text:p>
          </table:table-cell>
          <table:table-cell office:value-type="float" office:value="-0.49651974489481887" table:style-name="c14">
            <text:p>-0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8 11:00</text:p>
          </table:table-cell>
          <table:table-cell office:value-type="float" office:value="0.35727855" table:style-name="c1">
            <text:p>0.35728</text:p>
          </table:table-cell>
          <table:table-cell office:value-type="string" table:style-name="c1">
            <text:p>2026-05-18 15:30</text:p>
          </table:table-cell>
          <table:table-cell office:value-type="float" office:value="0.3542228" table:style-name="c1">
            <text:p>0.35422</text:p>
          </table:table-cell>
          <table:table-cell office:value-type="float" office:value="-1.0534753281998044" table:style-name="c14">
            <text:p>-1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2:30</text:p>
          </table:table-cell>
          <table:table-cell office:value-type="float" office:value="0.36368174999999997" table:style-name="c1">
            <text:p>0.36368</text:p>
          </table:table-cell>
          <table:table-cell office:value-type="string" table:style-name="c1">
            <text:p>2026-05-22 04:30</text:p>
          </table:table-cell>
          <table:table-cell office:value-type="float" office:value="0.3644177" table:style-name="c1">
            <text:p>0.36442</text:p>
          </table:table-cell>
          <table:table-cell office:value-type="float" office:value="0.0020564731939565206" table:style-name="c13">
            <text:p>+0.0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3 10:30</text:p>
          </table:table-cell>
          <table:table-cell office:value-type="float" office:value="0.3619809" table:style-name="c1">
            <text:p>0.36198</text:p>
          </table:table-cell>
          <table:table-cell office:value-type="string" table:style-name="c1">
            <text:p>2026-05-23 10:45</text:p>
          </table:table-cell>
          <table:table-cell office:value-type="float" office:value="0.3590204" table:style-name="c1">
            <text:p>0.35902</text:p>
          </table:table-cell>
          <table:table-cell office:value-type="float" office:value="-1.0161259280807244" table:style-name="c14">
            <text:p>-1.0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4 09:15</text:p>
          </table:table-cell>
          <table:table-cell office:value-type="float" office:value="0.36348165" table:style-name="c1">
            <text:p>0.36348</text:p>
          </table:table-cell>
          <table:table-cell office:value-type="string" table:style-name="c1">
            <text:p>2026-05-24 21:00</text:p>
          </table:table-cell>
          <table:table-cell office:value-type="float" office:value="0.36491745" table:style-name="c1">
            <text:p>0.36492</text:p>
          </table:table-cell>
          <table:table-cell office:value-type="float" office:value="0.1943234321320153" table:style-name="c13">
            <text:p>+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05:45</text:p>
          </table:table-cell>
          <table:table-cell office:value-type="float" office:value="0.36608294999999996" table:style-name="c1">
            <text:p>0.36608</text:p>
          </table:table-cell>
          <table:table-cell office:value-type="string" table:style-name="c1">
            <text:p>2026-05-25 11:30</text:p>
          </table:table-cell>
          <table:table-cell office:value-type="float" office:value="0.36611685000000005" table:style-name="c1">
            <text:p>0.36612</text:p>
          </table:table-cell>
          <table:table-cell office:value-type="float" office:value="-0.19065831477534934" table:style-name="c14">
            <text:p>-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2:30</text:p>
          </table:table-cell>
          <table:table-cell office:value-type="float" office:value="0.36828405" table:style-name="c1">
            <text:p>0.36828</text:p>
          </table:table-cell>
          <table:table-cell office:value-type="string" table:style-name="c1">
            <text:p>2026-05-25 20:45</text:p>
          </table:table-cell>
          <table:table-cell office:value-type="float" office:value="0.37131425" table:style-name="c1">
            <text:p>0.37131</text:p>
          </table:table-cell>
          <table:table-cell office:value-type="float" office:value="0.6212440680637643" table:style-name="c13">
            <text:p>+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2:00</text:p>
          </table:table-cell>
          <table:table-cell office:value-type="float" office:value="0.37608795" table:style-name="c1">
            <text:p>0.37609</text:p>
          </table:table-cell>
          <table:table-cell office:value-type="string" table:style-name="c1">
            <text:p>2026-05-26 18:00</text:p>
          </table:table-cell>
          <table:table-cell office:value-type="float" office:value="0.37451265" table:style-name="c1">
            <text:p>0.37451</text:p>
          </table:table-cell>
          <table:table-cell office:value-type="float" office:value="-0.6179274787586397" table:style-name="c14">
            <text:p>-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7 12:00</text:p>
          </table:table-cell>
          <table:table-cell office:value-type="float" office:value="0.37428704999999995" table:style-name="c1">
            <text:p>0.37429</text:p>
          </table:table-cell>
          <table:table-cell office:value-type="string" table:style-name="c1">
            <text:p>2026-05-27 13:45</text:p>
          </table:table-cell>
          <table:table-cell office:value-type="float" office:value="0.37261360000000004" table:style-name="c1">
            <text:p>0.37261</text:p>
          </table:table-cell>
          <table:table-cell office:value-type="float" office:value="-0.6461096066240901" table:style-name="c14">
            <text:p>-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5:15</text:p>
          </table:table-cell>
          <table:table-cell office:value-type="float" office:value="0.35167574999999995" table:style-name="c1">
            <text:p>0.35168</text:p>
          </table:table-cell>
          <table:table-cell office:value-type="string" table:style-name="c1">
            <text:p>2026-06-01 08:00</text:p>
          </table:table-cell>
          <table:table-cell office:value-type="float" office:value="0.35052465000000005" table:style-name="c1">
            <text:p>0.35052</text:p>
          </table:table-cell>
          <table:table-cell office:value-type="float" office:value="-0.5265642499802436" table:style-name="c14">
            <text:p>-0.5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01:15</text:p>
          </table:table-cell>
          <table:table-cell office:value-type="float" office:value="4.016007" table:style-name="c10">
            <text:p>4.016</text:p>
          </table:table-cell>
          <table:table-cell office:value-type="string" table:style-name="c10">
            <text:p>2026-03-05 01:30</text:p>
          </table:table-cell>
          <table:table-cell office:value-type="float" office:value="3.998" table:style-name="c10">
            <text:p>3.998</text:p>
          </table:table-cell>
          <table:table-cell office:value-type="float" office:value="-0.6473843795590906" table:style-name="c11">
            <text:p>-0.6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19:15</text:p>
          </table:table-cell>
          <table:table-cell office:value-type="float" office:value="4.020009" table:style-name="c10">
            <text:p>4.02</text:p>
          </table:table-cell>
          <table:table-cell office:value-type="string" table:style-name="c10">
            <text:p>2026-03-05 19:30</text:p>
          </table:table-cell>
          <table:table-cell office:value-type="float" office:value="3.994002" table:style-name="c10">
            <text:p>3.994</text:p>
          </table:table-cell>
          <table:table-cell office:value-type="float" office:value="-0.8455456193754762" table:style-name="c11">
            <text:p>-0.8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6 08:00</text:p>
          </table:table-cell>
          <table:table-cell office:value-type="float" office:value="4.014005999999999" table:style-name="c10">
            <text:p>4.014</text:p>
          </table:table-cell>
          <table:table-cell office:value-type="string" table:style-name="c10">
            <text:p>2026-03-06 09:30</text:p>
          </table:table-cell>
          <table:table-cell office:value-type="float" office:value="3.9490245" table:style-name="c10">
            <text:p>3.949</text:p>
          </table:table-cell>
          <table:table-cell office:value-type="float" office:value="-1.815532910899964" table:style-name="c11">
            <text:p>-1.8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3:45</text:p>
          </table:table-cell>
          <table:table-cell office:value-type="float" office:value="3.9149564999999997" table:style-name="c10">
            <text:p>3.915</text:p>
          </table:table-cell>
          <table:table-cell office:value-type="string" table:style-name="c10">
            <text:p>2026-03-09 19:15</text:p>
          </table:table-cell>
          <table:table-cell office:value-type="float" office:value="3.8840570000000003" table:style-name="c10">
            <text:p>3.8841</text:p>
          </table:table-cell>
          <table:table-cell office:value-type="float" office:value="-0.9875902821142479" table:style-name="c11">
            <text:p>-1.0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9:30</text:p>
          </table:table-cell>
          <table:table-cell office:value-type="float" office:value="3.9769875" table:style-name="c10">
            <text:p>3.977</text:p>
          </table:table-cell>
          <table:table-cell office:value-type="string" table:style-name="c10">
            <text:p>2026-03-09 22:30</text:p>
          </table:table-cell>
          <table:table-cell office:value-type="float" office:value="3.9000490000000005" table:style-name="c10">
            <text:p>3.9</text:p>
          </table:table-cell>
          <table:table-cell office:value-type="float" office:value="-2.1306252018896132" table:style-name="c11">
            <text:p>-2.1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3.9729855" table:style-name="c10">
            <text:p>3.973</text:p>
          </table:table-cell>
          <table:table-cell office:value-type="string" table:style-name="c10">
            <text:p>2026-03-10 15:15</text:p>
          </table:table-cell>
          <table:table-cell office:value-type="float" office:value="3.9470255" table:style-name="c10">
            <text:p>3.947</text:p>
          </table:table-cell>
          <table:table-cell office:value-type="float" office:value="-0.8520067333369186" table:style-name="c11">
            <text:p>-0.9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6:00</text:p>
          </table:table-cell>
          <table:table-cell office:value-type="float" office:value="3.943971" table:style-name="c10">
            <text:p>3.944</text:p>
          </table:table-cell>
          <table:table-cell office:value-type="string" table:style-name="c10">
            <text:p>2026-03-10 17:15</text:p>
          </table:table-cell>
          <table:table-cell office:value-type="float" office:value="3.9060460000000004" table:style-name="c10">
            <text:p>3.906</text:p>
          </table:table-cell>
          <table:table-cell office:value-type="float" office:value="-1.159572064652592" table:style-name="c11">
            <text:p>-1.2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3:45</text:p>
          </table:table-cell>
          <table:table-cell office:value-type="float" office:value="3.9259619999999997" table:style-name="c10">
            <text:p>3.926</text:p>
          </table:table-cell>
          <table:table-cell office:value-type="string" table:style-name="c10">
            <text:p>2026-03-11 21:45</text:p>
          </table:table-cell>
          <table:table-cell office:value-type="float" office:value="3.9060460000000004" table:style-name="c10">
            <text:p>3.906</text:p>
          </table:table-cell>
          <table:table-cell office:value-type="float" office:value="-0.7061756062335611" table:style-name="c11">
            <text:p>-0.7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07:45</text:p>
          </table:table-cell>
          <table:table-cell office:value-type="float" office:value="3.887943" table:style-name="c10">
            <text:p>3.8879</text:p>
          </table:table-cell>
          <table:table-cell office:value-type="string" table:style-name="c10">
            <text:p>2026-03-12 14:30</text:p>
          </table:table-cell>
          <table:table-cell office:value-type="float" office:value="3.870064" table:style-name="c10">
            <text:p>3.8701</text:p>
          </table:table-cell>
          <table:table-cell office:value-type="float" office:value="-0.6588383095122441" table:style-name="c11">
            <text:p>-0.7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0:15</text:p>
          </table:table-cell>
          <table:table-cell office:value-type="float" office:value="4.100048999999999" table:style-name="c10">
            <text:p>4.1</text:p>
          </table:table-cell>
          <table:table-cell office:value-type="string" table:style-name="c10">
            <text:p>2026-03-13 16:15</text:p>
          </table:table-cell>
          <table:table-cell office:value-type="float" office:value="4.059969000000001" table:style-name="c10">
            <text:p>4.06</text:p>
          </table:table-cell>
          <table:table-cell office:value-type="float" office:value="-1.175495171667429" table:style-name="c11">
            <text:p>-1.2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4 13:45</text:p>
          </table:table-cell>
          <table:table-cell office:value-type="float" office:value="3.9489734999999997" table:style-name="c10">
            <text:p>3.949</text:p>
          </table:table-cell>
          <table:table-cell office:value-type="string" table:style-name="c10">
            <text:p>2026-03-14 15:00</text:p>
          </table:table-cell>
          <table:table-cell office:value-type="float" office:value="3.924037" table:style-name="c10">
            <text:p>3.924</text:p>
          </table:table-cell>
          <table:table-cell office:value-type="float" office:value="-0.8301055948589986" table:style-name="c11">
            <text:p>-0.8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11:00</text:p>
          </table:table-cell>
          <table:table-cell office:value-type="float" office:value="3.987993" table:style-name="c10">
            <text:p>3.988</text:p>
          </table:table-cell>
          <table:table-cell office:value-type="string" table:style-name="c10">
            <text:p>2026-03-15 13:45</text:p>
          </table:table-cell>
          <table:table-cell office:value-type="float" office:value="3.9470255" table:style-name="c10">
            <text:p>3.947</text:p>
          </table:table-cell>
          <table:table-cell office:value-type="float" office:value="-1.2251175961066174" table:style-name="c11">
            <text:p>-1.2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2:45</text:p>
          </table:table-cell>
          <table:table-cell office:value-type="float" office:value="4.068033" table:style-name="c10">
            <text:p>4.068</text:p>
          </table:table-cell>
          <table:table-cell office:value-type="string" table:style-name="c10">
            <text:p>2026-03-16 05:00</text:p>
          </table:table-cell>
          <table:table-cell office:value-type="float" office:value="4.011993" table:style-name="c10">
            <text:p>4.012</text:p>
          </table:table-cell>
          <table:table-cell office:value-type="float" office:value="-1.574716183644509" table:style-name="c11">
            <text:p>-1.6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3:30</text:p>
          </table:table-cell>
          <table:table-cell office:value-type="float" office:value="3.6178079999999997" table:style-name="c10">
            <text:p>3.6178</text:p>
          </table:table-cell>
          <table:table-cell office:value-type="string" table:style-name="c10">
            <text:p>2026-03-25 16:15</text:p>
          </table:table-cell>
          <table:table-cell office:value-type="float" office:value="3.680159" table:style-name="c10">
            <text:p>3.6802</text:p>
          </table:table-cell>
          <table:table-cell office:value-type="float" office:value="1.520101734503343" table:style-name="c12">
            <text:p>+1.5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17:15</text:p>
          </table:table-cell>
          <table:table-cell office:value-type="float" office:value="3.7348665" table:style-name="c10">
            <text:p>3.7349</text:p>
          </table:table-cell>
          <table:table-cell office:value-type="string" table:style-name="c10">
            <text:p>2026-03-25 18:45</text:p>
          </table:table-cell>
          <table:table-cell office:value-type="float" office:value="3.6941520000000003" table:style-name="c10">
            <text:p>3.6942</text:p>
          </table:table-cell>
          <table:table-cell office:value-type="float" office:value="-1.2878401369366133" table:style-name="c11">
            <text:p>-1.3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8:00</text:p>
          </table:table-cell>
          <table:table-cell office:value-type="float" office:value="3.5367675" table:style-name="c10">
            <text:p>3.5368</text:p>
          </table:table-cell>
          <table:table-cell office:value-type="string" table:style-name="c10">
            <text:p>2026-03-30 17:00</text:p>
          </table:table-cell>
          <table:table-cell office:value-type="float" office:value="3.51824" table:style-name="c10">
            <text:p>3.5182</text:p>
          </table:table-cell>
          <table:table-cell office:value-type="float" office:value="-0.7227068717409302" table:style-name="c11">
            <text:p>-0.7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4:30</text:p>
          </table:table-cell>
          <table:table-cell office:value-type="float" office:value="3.547773" table:style-name="c10">
            <text:p>3.5478</text:p>
          </table:table-cell>
          <table:table-cell office:value-type="string" table:style-name="c10">
            <text:p>2026-03-31 23:00</text:p>
          </table:table-cell>
          <table:table-cell office:value-type="float" office:value="3.530234" table:style-name="c10">
            <text:p>3.5302</text:p>
          </table:table-cell>
          <table:table-cell office:value-type="float" office:value="-0.6932782273837645" table:style-name="c11">
            <text:p>-0.7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06:30</text:p>
          </table:table-cell>
          <table:table-cell office:value-type="float" office:value="3.6278129999999997" table:style-name="c10">
            <text:p>3.6278</text:p>
          </table:table-cell>
          <table:table-cell office:value-type="string" table:style-name="c10">
            <text:p>2026-04-01 10:00</text:p>
          </table:table-cell>
          <table:table-cell office:value-type="float" office:value="3.5902040000000004" table:style-name="c10">
            <text:p>3.5902</text:p>
          </table:table-cell>
          <table:table-cell office:value-type="float" office:value="-1.234512853777181" table:style-name="c11">
            <text:p>-1.2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12:45</text:p>
          </table:table-cell>
          <table:table-cell office:value-type="float" office:value="3.6318149999999996" table:style-name="c10">
            <text:p>3.6318</text:p>
          </table:table-cell>
          <table:table-cell office:value-type="string" table:style-name="c10">
            <text:p>2026-04-01 13:45</text:p>
          </table:table-cell>
          <table:table-cell office:value-type="float" office:value="3.5862060000000002" table:style-name="c10">
            <text:p>3.5862</text:p>
          </table:table-cell>
          <table:table-cell office:value-type="float" office:value="-1.4532079908805784" table:style-name="c11">
            <text:p>-1.5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9:15</text:p>
          </table:table-cell>
          <table:table-cell office:value-type="float" office:value="3.1785885" table:style-name="c10">
            <text:p>3.1786</text:p>
          </table:table-cell>
          <table:table-cell office:value-type="string" table:style-name="c10">
            <text:p>2026-04-06 14:00</text:p>
          </table:table-cell>
          <table:table-cell office:value-type="float" office:value="3.1734125" table:style-name="c10">
            <text:p>3.1734</text:p>
          </table:table-cell>
          <table:table-cell office:value-type="float" office:value="-0.36241405855146347" table:style-name="c11">
            <text:p>-0.4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8 08:15</text:p>
          </table:table-cell>
          <table:table-cell office:value-type="float" office:value="3.2546265" table:style-name="c10">
            <text:p>3.2546</text:p>
          </table:table-cell>
          <table:table-cell office:value-type="string" table:style-name="c10">
            <text:p>2026-04-08 12:00</text:p>
          </table:table-cell>
          <table:table-cell office:value-type="float" office:value="3.2273855000000005" table:style-name="c10">
            <text:p>3.2274</text:p>
          </table:table-cell>
          <table:table-cell office:value-type="float" office:value="-1.0352199742274415" table:style-name="c11">
            <text:p>-1.0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7:00</text:p>
          </table:table-cell>
          <table:table-cell office:value-type="float" office:value="3.1685834999999996" table:style-name="c10">
            <text:p>3.1686</text:p>
          </table:table-cell>
          <table:table-cell office:value-type="string" table:style-name="c10">
            <text:p>2026-04-11 23:15</text:p>
          </table:table-cell>
          <table:table-cell office:value-type="float" office:value="3.148425" table:style-name="c10">
            <text:p>3.1484</text:p>
          </table:table-cell>
          <table:table-cell office:value-type="float" office:value="-0.8348273471410539" table:style-name="c11">
            <text:p>-0.8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2:15</text:p>
          </table:table-cell>
          <table:table-cell office:value-type="float" office:value="3.16158" table:style-name="c10">
            <text:p>3.1616</text:p>
          </table:table-cell>
          <table:table-cell office:value-type="string" table:style-name="c10">
            <text:p>2026-04-14 05:15</text:p>
          </table:table-cell>
          <table:table-cell office:value-type="float" office:value="3.1774105" table:style-name="c10">
            <text:p>3.1774</text:p>
          </table:table-cell>
          <table:table-cell office:value-type="float" office:value="0.299813903507129" table:style-name="c12">
            <text:p>+0.3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00:30</text:p>
          </table:table-cell>
          <table:table-cell office:value-type="float" office:value="3.145572" table:style-name="c10">
            <text:p>3.1456</text:p>
          </table:table-cell>
          <table:table-cell office:value-type="string" table:style-name="c10">
            <text:p>2026-04-15 06:30</text:p>
          </table:table-cell>
          <table:table-cell office:value-type="float" office:value="3.1354315" table:style-name="c10">
            <text:p>3.1354</text:p>
          </table:table-cell>
          <table:table-cell office:value-type="float" office:value="-0.5216293751502232" table:style-name="c11">
            <text:p>-0.5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2:15</text:p>
          </table:table-cell>
          <table:table-cell office:value-type="float" office:value="3.1865924999999997" table:style-name="c10">
            <text:p>3.1866</text:p>
          </table:table-cell>
          <table:table-cell office:value-type="string" table:style-name="c10">
            <text:p>2026-04-16 00:15</text:p>
          </table:table-cell>
          <table:table-cell office:value-type="float" office:value="3.2113935000000002" table:style-name="c10">
            <text:p>3.2114</text:p>
          </table:table-cell>
          <table:table-cell office:value-type="float" office:value="0.5768363665420218" table:style-name="c12">
            <text:p>+0.6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2:45</text:p>
          </table:table-cell>
          <table:table-cell office:value-type="float" office:value="3.249624" table:style-name="c10">
            <text:p>3.2496</text:p>
          </table:table-cell>
          <table:table-cell office:value-type="string" table:style-name="c10">
            <text:p>2026-04-16 11:15</text:p>
          </table:table-cell>
          <table:table-cell office:value-type="float" office:value="3.2403790000000003" table:style-name="c10">
            <text:p>3.2404</text:p>
          </table:table-cell>
          <table:table-cell office:value-type="float" office:value="-0.4838257478711028" table:style-name="c11">
            <text:p>-0.5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2:15</text:p>
          </table:table-cell>
          <table:table-cell office:value-type="float" office:value="3.2896439999999996" table:style-name="c10">
            <text:p>3.2896</text:p>
          </table:table-cell>
          <table:table-cell office:value-type="string" table:style-name="c10">
            <text:p>2026-04-17 01:45</text:p>
          </table:table-cell>
          <table:table-cell office:value-type="float" office:value="3.3893045" table:style-name="c10">
            <text:p>3.3893</text:p>
          </table:table-cell>
          <table:table-cell office:value-type="float" office:value="2.8235663282865975" table:style-name="c12">
            <text:p>+2.8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7:45</text:p>
          </table:table-cell>
          <table:table-cell office:value-type="float" office:value="3.3976979999999997" table:style-name="c10">
            <text:p>3.3977</text:p>
          </table:table-cell>
          <table:table-cell office:value-type="string" table:style-name="c10">
            <text:p>2026-04-17 20:45</text:p>
          </table:table-cell>
          <table:table-cell office:value-type="float" office:value="3.4832575" table:style-name="c10">
            <text:p>3.4833</text:p>
          </table:table-cell>
          <table:table-cell office:value-type="float" office:value="2.3132270218689577" table:style-name="c12">
            <text:p>+2.3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5:30</text:p>
          </table:table-cell>
          <table:table-cell office:value-type="float" office:value="3.383691" table:style-name="c10">
            <text:p>3.3837</text:p>
          </table:table-cell>
          <table:table-cell office:value-type="string" table:style-name="c10">
            <text:p>2026-04-22 19:30</text:p>
          </table:table-cell>
          <table:table-cell office:value-type="float" office:value="3.3933025000000003" table:style-name="c10">
            <text:p>3.3933</text:p>
          </table:table-cell>
          <table:table-cell office:value-type="float" office:value="0.08358589192987154" table:style-name="c12">
            <text:p>+0.1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7 03:45</text:p>
          </table:table-cell>
          <table:table-cell office:value-type="float" office:value="3.3586785" table:style-name="c10">
            <text:p>3.3587</text:p>
          </table:table-cell>
          <table:table-cell office:value-type="string" table:style-name="c10">
            <text:p>2026-04-27 05:45</text:p>
          </table:table-cell>
          <table:table-cell office:value-type="float" office:value="3.2573705" table:style-name="c10">
            <text:p>3.2574</text:p>
          </table:table-cell>
          <table:table-cell office:value-type="float" office:value="-3.210175776856883" table:style-name="c11">
            <text:p>-3.2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7 14:45</text:p>
          </table:table-cell>
          <table:table-cell office:value-type="float" office:value="3.2866425" table:style-name="c10">
            <text:p>3.2866</text:p>
          </table:table-cell>
          <table:table-cell office:value-type="string" table:style-name="c10">
            <text:p>2026-04-27 15:30</text:p>
          </table:table-cell>
          <table:table-cell office:value-type="float" office:value="3.200399" table:style-name="c10">
            <text:p>3.2004</text:p>
          </table:table-cell>
          <table:table-cell office:value-type="float" office:value="-2.818715379022818" table:style-name="c11">
            <text:p>-2.8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04:45</text:p>
          </table:table-cell>
          <table:table-cell office:value-type="float" office:value="3.2966474999999997" table:style-name="c10">
            <text:p>3.2966</text:p>
          </table:table-cell>
          <table:table-cell office:value-type="string" table:style-name="c10">
            <text:p>2026-04-29 09:15</text:p>
          </table:table-cell>
          <table:table-cell office:value-type="float" office:value="3.268365" table:style-name="c10">
            <text:p>3.2684</text:p>
          </table:table-cell>
          <table:table-cell office:value-type="float" office:value="-1.056102044122087" table:style-name="c11">
            <text:p>-1.1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00</text:p>
          </table:table-cell>
          <table:table-cell office:value-type="float" office:value="3.3186585" table:style-name="c10">
            <text:p>3.3187</text:p>
          </table:table-cell>
          <table:table-cell office:value-type="string" table:style-name="c10">
            <text:p>2026-04-29 12:30</text:p>
          </table:table-cell>
          <table:table-cell office:value-type="float" office:value="3.2573705" table:style-name="c10">
            <text:p>3.2574</text:p>
          </table:table-cell>
          <table:table-cell office:value-type="float" office:value="-2.042978620111102" table:style-name="c11">
            <text:p>-2.0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14:00</text:p>
          </table:table-cell>
          <table:table-cell office:value-type="float" office:value="3.2686334999999995" table:style-name="c10">
            <text:p>3.2686</text:p>
          </table:table-cell>
          <table:table-cell office:value-type="string" table:style-name="c10">
            <text:p>2026-05-01 19:45</text:p>
          </table:table-cell>
          <table:table-cell office:value-type="float" office:value="3.2313835" table:style-name="c10">
            <text:p>3.2314</text:p>
          </table:table-cell>
          <table:table-cell office:value-type="float" office:value="-1.337241866256944" table:style-name="c11">
            <text:p>-1.3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07:45</text:p>
          </table:table-cell>
          <table:table-cell office:value-type="float" office:value="3.2306144999999997" table:style-name="c10">
            <text:p>3.2306</text:p>
          </table:table-cell>
          <table:table-cell office:value-type="string" table:style-name="c10">
            <text:p>2026-05-03 19:30</text:p>
          </table:table-cell>
          <table:table-cell office:value-type="float" office:value="3.2373805" table:style-name="c10">
            <text:p>3.2374</text:p>
          </table:table-cell>
          <table:table-cell office:value-type="float" office:value="0.009115181662799898" table:style-name="c12">
            <text:p>+0.0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5:00</text:p>
          </table:table-cell>
          <table:table-cell office:value-type="float" office:value="3.4467224999999995" table:style-name="c10">
            <text:p>3.4467</text:p>
          </table:table-cell>
          <table:table-cell office:value-type="string" table:style-name="c10">
            <text:p>2026-05-04 10:15</text:p>
          </table:table-cell>
          <table:table-cell office:value-type="float" office:value="3.306346" table:style-name="c10">
            <text:p>3.3063</text:p>
          </table:table-cell>
          <table:table-cell office:value-type="float" office:value="-4.264511739891996" table:style-name="c11">
            <text:p>-4.3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15:00</text:p>
          </table:table-cell>
          <table:table-cell office:value-type="float" office:value="3.335667" table:style-name="c10">
            <text:p>3.3357</text:p>
          </table:table-cell>
          <table:table-cell office:value-type="string" table:style-name="c10">
            <text:p>2026-05-04 15:15</text:p>
          </table:table-cell>
          <table:table-cell office:value-type="float" office:value="3.31834" table:style-name="c10">
            <text:p>3.3183</text:p>
          </table:table-cell>
          <table:table-cell office:value-type="float" office:value="-0.7183079623955257" table:style-name="c11">
            <text:p>-0.7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7:45</text:p>
          </table:table-cell>
          <table:table-cell office:value-type="float" office:value="3.3526754999999997" table:style-name="c10">
            <text:p>3.3527</text:p>
          </table:table-cell>
          <table:table-cell office:value-type="string" table:style-name="c10">
            <text:p>2026-05-05 16:45</text:p>
          </table:table-cell>
          <table:table-cell office:value-type="float" office:value="3.33833" table:style-name="c10">
            <text:p>3.3383</text:p>
          </table:table-cell>
          <table:table-cell office:value-type="float" office:value="-0.6269268132272243" table:style-name="c11">
            <text:p>-0.6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9:00</text:p>
          </table:table-cell>
          <table:table-cell office:value-type="float" office:value="3.475737" table:style-name="c10">
            <text:p>3.4757</text:p>
          </table:table-cell>
          <table:table-cell office:value-type="string" table:style-name="c10">
            <text:p>2026-05-06 14:00</text:p>
          </table:table-cell>
          <table:table-cell office:value-type="float" office:value="3.448275" table:style-name="c10">
            <text:p>3.4483</text:p>
          </table:table-cell>
          <table:table-cell office:value-type="float" office:value="-0.9884263891370426" table:style-name="c11">
            <text:p>-1.0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5:45</text:p>
          </table:table-cell>
          <table:table-cell office:value-type="float" office:value="3.4567275" table:style-name="c10">
            <text:p>3.4567</text:p>
          </table:table-cell>
          <table:table-cell office:value-type="string" table:style-name="c10">
            <text:p>2026-05-07 14:15</text:p>
          </table:table-cell>
          <table:table-cell office:value-type="float" office:value="3.4562710000000005" table:style-name="c10">
            <text:p>3.4563</text:p>
          </table:table-cell>
          <table:table-cell office:value-type="float" office:value="-0.21307973304228733" table:style-name="c11">
            <text:p>-0.2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00:15</text:p>
          </table:table-cell>
          <table:table-cell office:value-type="float" office:value="3.4447215" table:style-name="c10">
            <text:p>3.4447</text:p>
          </table:table-cell>
          <table:table-cell office:value-type="string" table:style-name="c10">
            <text:p>2026-05-08 02:15</text:p>
          </table:table-cell>
          <table:table-cell office:value-type="float" office:value="3.4072955" table:style-name="c10">
            <text:p>3.4073</text:p>
          </table:table-cell>
          <table:table-cell office:value-type="float" office:value="-1.2842020379441488" table:style-name="c11">
            <text:p>-1.3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4:30</text:p>
          </table:table-cell>
          <table:table-cell office:value-type="float" office:value="3.5367675" table:style-name="c10">
            <text:p>3.5368</text:p>
          </table:table-cell>
          <table:table-cell office:value-type="string" table:style-name="c10">
            <text:p>2026-05-09 05:30</text:p>
          </table:table-cell>
          <table:table-cell office:value-type="float" office:value="3.7231375000000004" table:style-name="c10">
            <text:p>3.7231</text:p>
          </table:table-cell>
          <table:table-cell office:value-type="float" office:value="5.0590673019218935" table:style-name="c12">
            <text:p>+5.1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17:15</text:p>
          </table:table-cell>
          <table:table-cell office:value-type="float" office:value="3.679839" table:style-name="c10">
            <text:p>3.6798</text:p>
          </table:table-cell>
          <table:table-cell office:value-type="string" table:style-name="c10">
            <text:p>2026-05-10 02:00</text:p>
          </table:table-cell>
          <table:table-cell office:value-type="float" office:value="3.7171405" table:style-name="c10">
            <text:p>3.7171</text:p>
          </table:table-cell>
          <table:table-cell office:value-type="float" office:value="0.8117457350851565" table:style-name="c12">
            <text:p>+0.8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5:15</text:p>
          </table:table-cell>
          <table:table-cell office:value-type="float" office:value="3.7768874999999995" table:style-name="c10">
            <text:p>3.7769</text:p>
          </table:table-cell>
          <table:table-cell office:value-type="string" table:style-name="c10">
            <text:p>2026-05-10 11:30</text:p>
          </table:table-cell>
          <table:table-cell office:value-type="float" office:value="3.8970505" table:style-name="c10">
            <text:p>3.8971</text:p>
          </table:table-cell>
          <table:table-cell office:value-type="float" office:value="2.9752751716989545" table:style-name="c12">
            <text:p>+3.0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3:15</text:p>
          </table:table-cell>
          <table:table-cell office:value-type="float" office:value="4.0930455" table:style-name="c10">
            <text:p>4.093</text:p>
          </table:table-cell>
          <table:table-cell office:value-type="string" table:style-name="c10">
            <text:p>2026-05-10 20:45</text:p>
          </table:table-cell>
          <table:table-cell office:value-type="float" office:value="3.9610185" table:style-name="c10">
            <text:p>3.961</text:p>
          </table:table-cell>
          <table:table-cell office:value-type="float" office:value="-3.4190940702100603" table:style-name="c11">
            <text:p>-3.4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16:15</text:p>
          </table:table-cell>
          <table:table-cell office:value-type="float" office:value="3.9259619999999997" table:style-name="c10">
            <text:p>3.926</text:p>
          </table:table-cell>
          <table:table-cell office:value-type="string" table:style-name="c10">
            <text:p>2026-05-11 16:30</text:p>
          </table:table-cell>
          <table:table-cell office:value-type="float" office:value="3.8930525" table:style-name="c10">
            <text:p>3.8931</text:p>
          </table:table-cell>
          <table:table-cell office:value-type="float" office:value="-1.0364774785772135" table:style-name="c11">
            <text:p>-1.0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5 08:45</text:p>
          </table:table-cell>
          <table:table-cell office:value-type="float" office:value="3.72186" table:style-name="c10">
            <text:p>3.7219</text:p>
          </table:table-cell>
          <table:table-cell office:value-type="string" table:style-name="c10">
            <text:p>2026-05-15 10:00</text:p>
          </table:table-cell>
          <table:table-cell office:value-type="float" office:value="3.6871555000000003" table:style-name="c10">
            <text:p>3.6872</text:p>
          </table:table-cell>
          <table:table-cell office:value-type="float" office:value="-1.1304864730135034" table:style-name="c11">
            <text:p>-1.1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0 07:00</text:p>
          </table:table-cell>
          <table:table-cell office:value-type="float" office:value="3.5797889999999994" table:style-name="c10">
            <text:p>3.5798</text:p>
          </table:table-cell>
          <table:table-cell office:value-type="string" table:style-name="c10">
            <text:p>2026-05-20 14:00</text:p>
          </table:table-cell>
          <table:table-cell office:value-type="float" office:value="3.5712135000000003" table:style-name="c10">
            <text:p>3.5712</text:p>
          </table:table-cell>
          <table:table-cell office:value-type="float" office:value="-0.43897435816745434" table:style-name="c11">
            <text:p>-0.4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0 16:00</text:p>
          </table:table-cell>
          <table:table-cell office:value-type="float" office:value="3.6408194999999997" table:style-name="c10">
            <text:p>3.6408</text:p>
          </table:table-cell>
          <table:table-cell office:value-type="string" table:style-name="c10">
            <text:p>2026-05-20 19:15</text:p>
          </table:table-cell>
          <table:table-cell office:value-type="float" office:value="3.596201" table:style-name="c10">
            <text:p>3.5962</text:p>
          </table:table-cell>
          <table:table-cell office:value-type="float" office:value="-1.42295727099353" table:style-name="c11">
            <text:p>-1.4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8:15</text:p>
          </table:table-cell>
          <table:table-cell office:value-type="float" office:value="3.6868425" table:style-name="c10">
            <text:p>3.6868</text:p>
          </table:table-cell>
          <table:table-cell office:value-type="string" table:style-name="c10">
            <text:p>2026-05-21 09:30</text:p>
          </table:table-cell>
          <table:table-cell office:value-type="float" office:value="3.6431775" table:style-name="c10">
            <text:p>3.6432</text:p>
          </table:table-cell>
          <table:table-cell office:value-type="float" office:value="-1.3818792590814422" table:style-name="c11">
            <text:p>-1.4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7:45</text:p>
          </table:table-cell>
          <table:table-cell office:value-type="float" office:value="3.6178079999999997" table:style-name="c10">
            <text:p>3.6178</text:p>
          </table:table-cell>
          <table:table-cell office:value-type="string" table:style-name="c10">
            <text:p>2026-05-21 23:30</text:p>
          </table:table-cell>
          <table:table-cell office:value-type="float" office:value="3.5972005000000005" table:style-name="c10">
            <text:p>3.5972</text:p>
          </table:table-cell>
          <table:table-cell office:value-type="float" office:value="-0.7683742144276029" table:style-name="c11">
            <text:p>-0.8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11:45</text:p>
          </table:table-cell>
          <table:table-cell office:value-type="float" office:value="3.6248115" table:style-name="c10">
            <text:p>3.6248</text:p>
          </table:table-cell>
          <table:table-cell office:value-type="string" table:style-name="c10">
            <text:p>2026-05-22 15:00</text:p>
          </table:table-cell>
          <table:table-cell office:value-type="float" office:value="3.600199" table:style-name="c10">
            <text:p>3.6002</text:p>
          </table:table-cell>
          <table:table-cell office:value-type="float" office:value="-0.8775435026345368" table:style-name="c11">
            <text:p>-0.9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17:45</text:p>
          </table:table-cell>
          <table:table-cell office:value-type="float" office:value="3.653826" table:style-name="c10">
            <text:p>3.6538</text:p>
          </table:table-cell>
          <table:table-cell office:value-type="string" table:style-name="c10">
            <text:p>2026-05-22 18:15</text:p>
          </table:table-cell>
          <table:table-cell office:value-type="float" office:value="3.596201" table:style-name="c10">
            <text:p>3.5962</text:p>
          </table:table-cell>
          <table:table-cell office:value-type="float" office:value="-1.7738613113760793" table:style-name="c11">
            <text:p>-1.8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9:15</text:p>
          </table:table-cell>
          <table:table-cell office:value-type="float" office:value="0.0073216589999999995" table:style-name="c1">
            <text:p>0.0073217</text:p>
          </table:table-cell>
          <table:table-cell office:value-type="string" table:style-name="c1">
            <text:p>2026-03-05 19:30</text:p>
          </table:table-cell>
          <table:table-cell office:value-type="float" office:value="0.007300348" table:style-name="c1">
            <text:p>0.0073003</text:p>
          </table:table-cell>
          <table:table-cell office:value-type="float" office:value="-0.49038606758387004" table:style-name="c14">
            <text:p>-0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20:45</text:p>
          </table:table-cell>
          <table:table-cell office:value-type="float" office:value="0.00734367" table:style-name="c1">
            <text:p>0.0073437</text:p>
          </table:table-cell>
          <table:table-cell office:value-type="string" table:style-name="c1">
            <text:p>2026-03-06 00:30</text:p>
          </table:table-cell>
          <table:table-cell office:value-type="float" office:value="0.00729635" table:style-name="c1">
            <text:p>0.0072964</text:p>
          </table:table-cell>
          <table:table-cell office:value-type="float" office:value="-0.8429763817001446" table:style-name="c14">
            <text:p>-0.8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4:45</text:p>
          </table:table-cell>
          <table:table-cell office:value-type="float" office:value="0.0071465715" table:style-name="c1">
            <text:p>0.0071466</text:p>
          </table:table-cell>
          <table:table-cell office:value-type="string" table:style-name="c1">
            <text:p>2026-03-10 18:45</text:p>
          </table:table-cell>
          <table:table-cell office:value-type="float" office:value="0.0070954505" table:style-name="c1">
            <text:p>0.0070955</text:p>
          </table:table-cell>
          <table:table-cell office:value-type="float" office:value="-0.9137920966648116" table:style-name="c14">
            <text:p>-0.9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45</text:p>
          </table:table-cell>
          <table:table-cell office:value-type="float" office:value="0.0071525745" table:style-name="c1">
            <text:p>0.0071526</text:p>
          </table:table-cell>
          <table:table-cell office:value-type="string" table:style-name="c1">
            <text:p>2026-03-11 23:30</text:p>
          </table:table-cell>
          <table:table-cell office:value-type="float" office:value="0.007112442" table:style-name="c1">
            <text:p>0.0071124</text:p>
          </table:table-cell>
          <table:table-cell office:value-type="float" office:value="-0.7598700517974177" table:style-name="c14">
            <text:p>-0.8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45</text:p>
          </table:table-cell>
          <table:table-cell office:value-type="float" office:value="0.0073046505" table:style-name="c1">
            <text:p>0.0073047</text:p>
          </table:table-cell>
          <table:table-cell office:value-type="string" table:style-name="c1">
            <text:p>2026-03-13 16:00</text:p>
          </table:table-cell>
          <table:table-cell office:value-type="float" office:value="0.0073873045000000005" table:style-name="c1">
            <text:p>0.0073873</text:p>
          </table:table-cell>
          <table:table-cell office:value-type="float" office:value="0.9293638115129621" table:style-name="c13">
            <text:p>+0.9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1:00</text:p>
          </table:table-cell>
          <table:table-cell office:value-type="float" office:value="0.0073586775" table:style-name="c1">
            <text:p>0.0073587</text:p>
          </table:table-cell>
          <table:table-cell office:value-type="string" table:style-name="c1">
            <text:p>2026-03-15 16:00</text:p>
          </table:table-cell>
          <table:table-cell office:value-type="float" office:value="0.0072773595" table:style-name="c1">
            <text:p>0.0072774</text:p>
          </table:table-cell>
          <table:table-cell office:value-type="float" office:value="-1.302753676057955" table:style-name="c14">
            <text:p>-1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0.007453725" table:style-name="c1">
            <text:p>0.0074537</text:p>
          </table:table-cell>
          <table:table-cell office:value-type="string" table:style-name="c1">
            <text:p>2026-03-16 11:15</text:p>
          </table:table-cell>
          <table:table-cell office:value-type="float" office:value="0.0075772095" table:style-name="c1">
            <text:p>0.0075772</text:p>
          </table:table-cell>
          <table:table-cell office:value-type="float" office:value="1.4534700194801964" table:style-name="c13">
            <text:p>+1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0:15</text:p>
          </table:table-cell>
          <table:table-cell office:value-type="float" office:value="0.007831913999999999" table:style-name="c1">
            <text:p>0.0078319</text:p>
          </table:table-cell>
          <table:table-cell office:value-type="string" table:style-name="c1">
            <text:p>2026-03-17 03:15</text:p>
          </table:table-cell>
          <table:table-cell office:value-type="float" office:value="0.007710143000000001" table:style-name="c1">
            <text:p>0.0077101</text:p>
          </table:table-cell>
          <table:table-cell office:value-type="float" office:value="-1.7515970662726699" table:style-name="c14">
            <text:p>-1.8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9:45</text:p>
          </table:table-cell>
          <table:table-cell office:value-type="float" office:value="0.0076588275" table:style-name="c1">
            <text:p>0.0076588</text:p>
          </table:table-cell>
          <table:table-cell office:value-type="string" table:style-name="c1">
            <text:p>2026-03-17 10:00</text:p>
          </table:table-cell>
          <table:table-cell office:value-type="float" office:value="0.0076391785" table:style-name="c1">
            <text:p>0.0076392</text:p>
          </table:table-cell>
          <table:table-cell office:value-type="float" office:value="-0.45594077972770375" table:style-name="c14">
            <text:p>-0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12:30</text:p>
          </table:table-cell>
          <table:table-cell office:value-type="float" office:value="0.007110553499999999" table:style-name="c1">
            <text:p>0.0071106</text:p>
          </table:table-cell>
          <table:table-cell office:value-type="string" table:style-name="c1">
            <text:p>2026-03-24 17:30</text:p>
          </table:table-cell>
          <table:table-cell office:value-type="float" office:value="0.007040478" table:style-name="c1">
            <text:p>0.0070405</text:p>
          </table:table-cell>
          <table:table-cell office:value-type="float" office:value="-1.183443954426311" table:style-name="c14">
            <text:p>-1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0.007159578" table:style-name="c1">
            <text:p>0.0071596</text:p>
          </table:table-cell>
          <table:table-cell office:value-type="string" table:style-name="c1">
            <text:p>2026-03-25 04:45</text:p>
          </table:table-cell>
          <table:table-cell office:value-type="float" office:value="0.0071654155" table:style-name="c1">
            <text:p>0.0071654</text:p>
          </table:table-cell>
          <table:table-cell office:value-type="float" office:value="-0.1185288516236449" table:style-name="c14">
            <text:p>-0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22:00</text:p>
          </table:table-cell>
          <table:table-cell office:value-type="float" office:value="0.00676338" table:style-name="c1">
            <text:p>0.0067634</text:p>
          </table:table-cell>
          <table:table-cell office:value-type="string" table:style-name="c1">
            <text:p>2026-03-30 23:00</text:p>
          </table:table-cell>
          <table:table-cell office:value-type="float" office:value="0.0067116425" table:style-name="c1">
            <text:p>0.0067116</text:p>
          </table:table-cell>
          <table:table-cell office:value-type="float" office:value="-0.9633359852248446" table:style-name="c14">
            <text:p>-1.0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1:30</text:p>
          </table:table-cell>
          <table:table-cell office:value-type="float" office:value="0.006747372" table:style-name="c1">
            <text:p>0.0067474</text:p>
          </table:table-cell>
          <table:table-cell office:value-type="string" table:style-name="c1">
            <text:p>2026-03-31 04:15</text:p>
          </table:table-cell>
          <table:table-cell office:value-type="float" office:value="0.00669665" table:style-name="c1">
            <text:p>0.0066967</text:p>
          </table:table-cell>
          <table:table-cell office:value-type="float" office:value="-0.9501270027797437" table:style-name="c14">
            <text:p>-1.0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30</text:p>
          </table:table-cell>
          <table:table-cell office:value-type="float" office:value="0.0068464215" table:style-name="c1">
            <text:p>0.0068464</text:p>
          </table:table-cell>
          <table:table-cell office:value-type="string" table:style-name="c1">
            <text:p>2026-04-01 19:00</text:p>
          </table:table-cell>
          <table:table-cell office:value-type="float" office:value="0.006898549" table:style-name="c1">
            <text:p>0.0068985</text:p>
          </table:table-cell>
          <table:table-cell office:value-type="float" office:value="0.559961149762711" table:style-name="c13">
            <text:p>+0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05:45</text:p>
          </table:table-cell>
          <table:table-cell office:value-type="float" office:value="0.0070145055" table:style-name="c1">
            <text:p>0.0070145</text:p>
          </table:table-cell>
          <table:table-cell office:value-type="string" table:style-name="c1">
            <text:p>2026-04-03 14:00</text:p>
          </table:table-cell>
          <table:table-cell office:value-type="float" office:value="0.006954521" table:style-name="c1">
            <text:p>0.0069545</text:p>
          </table:table-cell>
          <table:table-cell office:value-type="float" office:value="-1.0533399322161574" table:style-name="c14">
            <text:p>-1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18:15</text:p>
          </table:table-cell>
          <table:table-cell office:value-type="float" office:value="0.0069684824999999995" table:style-name="c1">
            <text:p>0.0069685</text:p>
          </table:table-cell>
          <table:table-cell office:value-type="string" table:style-name="c1">
            <text:p>2026-04-03 18:30</text:p>
          </table:table-cell>
          <table:table-cell office:value-type="float" office:value="0.0069555205" table:style-name="c1">
            <text:p>0.0069555</text:p>
          </table:table-cell>
          <table:table-cell office:value-type="float" office:value="-0.3855371019371723" table:style-name="c14">
            <text:p>-0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01:00</text:p>
          </table:table-cell>
          <table:table-cell office:value-type="float" office:value="0.007039517999999999" table:style-name="c1">
            <text:p>0.0070395</text:p>
          </table:table-cell>
          <table:table-cell office:value-type="string" table:style-name="c1">
            <text:p>2026-04-04 13:15</text:p>
          </table:table-cell>
          <table:table-cell office:value-type="float" office:value="0.007428284" table:style-name="c1">
            <text:p>0.0074283</text:p>
          </table:table-cell>
          <table:table-cell office:value-type="float" office:value="5.311682707310372" table:style-name="c13">
            <text:p>+5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3:15</text:p>
          </table:table-cell>
          <table:table-cell office:value-type="float" office:value="0.0074037" table:style-name="c1">
            <text:p>0.0074037</text:p>
          </table:table-cell>
          <table:table-cell office:value-type="string" table:style-name="c1">
            <text:p>2026-04-06 06:30</text:p>
          </table:table-cell>
          <table:table-cell office:value-type="float" office:value="0.007430283" table:style-name="c1">
            <text:p>0.0074303</text:p>
          </table:table-cell>
          <table:table-cell office:value-type="float" office:value="0.15843246326836535" table:style-name="c13">
            <text:p>+0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0:00</text:p>
          </table:table-cell>
          <table:table-cell office:value-type="float" office:value="0.007099548" table:style-name="c1">
            <text:p>0.0070995</text:p>
          </table:table-cell>
          <table:table-cell office:value-type="string" table:style-name="c1">
            <text:p>2026-04-14 05:00</text:p>
          </table:table-cell>
          <table:table-cell office:value-type="float" office:value="0.006982507000000001" table:style-name="c1">
            <text:p>0.0069825</text:p>
          </table:table-cell>
          <table:table-cell office:value-type="float" office:value="-1.8451742490225964" table:style-name="c14">
            <text:p>-1.8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0.007017507" table:style-name="c1">
            <text:p>0.0070175</text:p>
          </table:table-cell>
          <table:table-cell office:value-type="string" table:style-name="c1">
            <text:p>2026-04-14 18:00</text:p>
          </table:table-cell>
          <table:table-cell office:value-type="float" office:value="0.006946525" table:style-name="c1">
            <text:p>0.0069465</text:p>
          </table:table-cell>
          <table:table-cell office:value-type="float" office:value="-1.2093768267705363" table:style-name="c14">
            <text:p>-1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0.0070555259999999995" table:style-name="c1">
            <text:p>0.0070555</text:p>
          </table:table-cell>
          <table:table-cell office:value-type="string" table:style-name="c1">
            <text:p>2026-04-16 10:15</text:p>
          </table:table-cell>
          <table:table-cell office:value-type="float" office:value="0.0071004480000000005" table:style-name="c1">
            <text:p>0.0071004</text:p>
          </table:table-cell>
          <table:table-cell office:value-type="float" office:value="0.4355196826998142" table:style-name="c13">
            <text:p>+0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45</text:p>
          </table:table-cell>
          <table:table-cell office:value-type="float" office:value="0.0071605785" table:style-name="c1">
            <text:p>0.0071606</text:p>
          </table:table-cell>
          <table:table-cell office:value-type="string" table:style-name="c1">
            <text:p>2026-04-16 14:30</text:p>
          </table:table-cell>
          <table:table-cell office:value-type="float" office:value="0.007081457500000001" table:style-name="c1">
            <text:p>0.0070815</text:p>
          </table:table-cell>
          <table:table-cell office:value-type="float" office:value="-1.3026438232958237" table:style-name="c14">
            <text:p>-1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0.007210603499999999" table:style-name="c1">
            <text:p>0.0072106</text:p>
          </table:table-cell>
          <table:table-cell office:value-type="string" table:style-name="c1">
            <text:p>2026-04-17 01:45</text:p>
          </table:table-cell>
          <table:table-cell office:value-type="float" office:value="0.0073453255" table:style-name="c1">
            <text:p>0.0073453</text:p>
          </table:table-cell>
          <table:table-cell office:value-type="float" office:value="1.664752393131863" table:style-name="c13">
            <text:p>+1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8:15</text:p>
          </table:table-cell>
          <table:table-cell office:value-type="float" office:value="0.007315655999999999" table:style-name="c1">
            <text:p>0.0073157</text:p>
          </table:table-cell>
          <table:table-cell office:value-type="string" table:style-name="c1">
            <text:p>2026-04-17 10:45</text:p>
          </table:table-cell>
          <table:table-cell office:value-type="float" office:value="0.0072373795" table:style-name="c1">
            <text:p>0.0072374</text:p>
          </table:table-cell>
          <table:table-cell office:value-type="float" office:value="-1.2677471660846207" table:style-name="c14">
            <text:p>-1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30</text:p>
          </table:table-cell>
          <table:table-cell office:value-type="float" office:value="0.007429713" table:style-name="c1">
            <text:p>0.0074297</text:p>
          </table:table-cell>
          <table:table-cell office:value-type="string" table:style-name="c1">
            <text:p>2026-04-17 18:30</text:p>
          </table:table-cell>
          <table:table-cell office:value-type="float" office:value="0.007380308" table:style-name="c1">
            <text:p>0.0073803</text:p>
          </table:table-cell>
          <table:table-cell office:value-type="float" office:value="-0.8635358551803973" table:style-name="c14">
            <text:p>-0.9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6:45</text:p>
          </table:table-cell>
          <table:table-cell office:value-type="float" office:value="0.00734367" table:style-name="c1">
            <text:p>0.0073437</text:p>
          </table:table-cell>
          <table:table-cell office:value-type="string" table:style-name="c1">
            <text:p>2026-04-18 09:15</text:p>
          </table:table-cell>
          <table:table-cell office:value-type="float" office:value="0.007240378" table:style-name="c1">
            <text:p>0.0072404</text:p>
          </table:table-cell>
          <table:table-cell office:value-type="float" office:value="-1.6036330012378142" table:style-name="c14">
            <text:p>-1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45</text:p>
          </table:table-cell>
          <table:table-cell office:value-type="float" office:value="0.007235615999999999" table:style-name="c1">
            <text:p>0.0072356</text:p>
          </table:table-cell>
          <table:table-cell office:value-type="string" table:style-name="c1">
            <text:p>2026-04-22 12:45</text:p>
          </table:table-cell>
          <table:table-cell office:value-type="float" office:value="0.007253371500000001" table:style-name="c1">
            <text:p>0.0072534</text:p>
          </table:table-cell>
          <table:table-cell office:value-type="float" office:value="0.04499976742133871" table:style-name="c13">
            <text:p>+0.0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20:45</text:p>
          </table:table-cell>
          <table:table-cell office:value-type="float" office:value="0.0073076519999999996" table:style-name="c1">
            <text:p>0.0073077</text:p>
          </table:table-cell>
          <table:table-cell office:value-type="string" table:style-name="c1">
            <text:p>2026-04-23 21:15</text:p>
          </table:table-cell>
          <table:table-cell office:value-type="float" office:value="0.0071954005" table:style-name="c1">
            <text:p>0.0071954</text:p>
          </table:table-cell>
          <table:table-cell office:value-type="float" office:value="-1.7329110034180473" table:style-name="c14">
            <text:p>-1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8:30</text:p>
          </table:table-cell>
          <table:table-cell office:value-type="float" office:value="0.0072866415" table:style-name="c1">
            <text:p>0.0072866</text:p>
          </table:table-cell>
          <table:table-cell office:value-type="string" table:style-name="c1">
            <text:p>2026-04-24 14:30</text:p>
          </table:table-cell>
          <table:table-cell office:value-type="float" office:value="0.007278359000000001" table:style-name="c1">
            <text:p>0.0072784</text:p>
          </table:table-cell>
          <table:table-cell office:value-type="float" office:value="-0.31333968661692024" table:style-name="c14">
            <text:p>-0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4:00</text:p>
          </table:table-cell>
          <table:table-cell office:value-type="float" office:value="0.0074067015" table:style-name="c1">
            <text:p>0.0074067</text:p>
          </table:table-cell>
          <table:table-cell office:value-type="string" table:style-name="c1">
            <text:p>2026-04-25 12:00</text:p>
          </table:table-cell>
          <table:table-cell office:value-type="float" office:value="0.007374311000000001" table:style-name="c1">
            <text:p>0.0073743</text:p>
          </table:table-cell>
          <table:table-cell office:value-type="float" office:value="-0.6363392353397668" table:style-name="c14">
            <text:p>-0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23:45</text:p>
          </table:table-cell>
          <table:table-cell office:value-type="float" office:value="0.007389693" table:style-name="c1">
            <text:p>0.0073897</text:p>
          </table:table-cell>
          <table:table-cell office:value-type="string" table:style-name="c1">
            <text:p>2026-04-26 01:00</text:p>
          </table:table-cell>
          <table:table-cell office:value-type="float" office:value="0.0072953505000000005" table:style-name="c1">
            <text:p>0.0072954</text:p>
          </table:table-cell>
          <table:table-cell office:value-type="float" office:value="-1.4740247754473579" table:style-name="c14">
            <text:p>-1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5:30</text:p>
          </table:table-cell>
          <table:table-cell office:value-type="float" office:value="0.007409703" table:style-name="c1">
            <text:p>0.0074097</text:p>
          </table:table-cell>
          <table:table-cell office:value-type="string" table:style-name="c1">
            <text:p>2026-04-26 16:30</text:p>
          </table:table-cell>
          <table:table-cell office:value-type="float" office:value="0.007374311000000001" table:style-name="c1">
            <text:p>0.0073743</text:p>
          </table:table-cell>
          <table:table-cell office:value-type="float" office:value="-0.6765891654361811" table:style-name="c14">
            <text:p>-0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1:00</text:p>
          </table:table-cell>
          <table:table-cell office:value-type="float" office:value="0.0074207084999999996" table:style-name="c1">
            <text:p>0.0074207</text:p>
          </table:table-cell>
          <table:table-cell office:value-type="string" table:style-name="c1">
            <text:p>2026-04-27 05:15</text:p>
          </table:table-cell>
          <table:table-cell office:value-type="float" office:value="0.0073533215" table:style-name="c1">
            <text:p>0.0073533</text:p>
          </table:table-cell>
          <table:table-cell office:value-type="float" office:value="-1.1061786038152555" table:style-name="c14">
            <text:p>-1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6:00</text:p>
          </table:table-cell>
          <table:table-cell office:value-type="float" office:value="0.0072386175" table:style-name="c1">
            <text:p>0.0072386</text:p>
          </table:table-cell>
          <table:table-cell office:value-type="string" table:style-name="c1">
            <text:p>2026-05-01 23:00</text:p>
          </table:table-cell>
          <table:table-cell office:value-type="float" office:value="0.0071754105" table:style-name="c1">
            <text:p>0.0071754</text:p>
          </table:table-cell>
          <table:table-cell office:value-type="float" office:value="-1.071346090458558" table:style-name="c14">
            <text:p>-1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4:45</text:p>
          </table:table-cell>
          <table:table-cell office:value-type="float" office:value="0.007181589" table:style-name="c1">
            <text:p>0.0071816</text:p>
          </table:table-cell>
          <table:table-cell office:value-type="string" table:style-name="c1">
            <text:p>2026-05-03 05:00</text:p>
          </table:table-cell>
          <table:table-cell office:value-type="float" office:value="0.007167414500000001" table:style-name="c1">
            <text:p>0.0071674</text:p>
          </table:table-cell>
          <table:table-cell office:value-type="float" office:value="-0.39687820600008417" table:style-name="c14">
            <text:p>-0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45</text:p>
          </table:table-cell>
          <table:table-cell office:value-type="float" office:value="0.0073346654999999995" table:style-name="c1">
            <text:p>0.0073347</text:p>
          </table:table-cell>
          <table:table-cell office:value-type="string" table:style-name="c1">
            <text:p>2026-05-04 09:00</text:p>
          </table:table-cell>
          <table:table-cell office:value-type="float" office:value="0.0073073445" table:style-name="c1">
            <text:p>0.0073073</text:p>
          </table:table-cell>
          <table:table-cell office:value-type="float" office:value="-0.5716468140980702" table:style-name="c14">
            <text:p>-0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7:45</text:p>
          </table:table-cell>
          <table:table-cell office:value-type="float" office:value="0.007219608" table:style-name="c1">
            <text:p>0.0072196</text:p>
          </table:table-cell>
          <table:table-cell office:value-type="string" table:style-name="c1">
            <text:p>2026-05-04 20:30</text:p>
          </table:table-cell>
          <table:table-cell office:value-type="float" office:value="0.007179408500000001" table:style-name="c1">
            <text:p>0.0071794</text:p>
          </table:table-cell>
          <table:table-cell office:value-type="float" office:value="-0.7555969464200674" table:style-name="c14">
            <text:p>-0.8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3:45</text:p>
          </table:table-cell>
          <table:table-cell office:value-type="float" office:value="0.007247622" table:style-name="c1">
            <text:p>0.0072476</text:p>
          </table:table-cell>
          <table:table-cell office:value-type="string" table:style-name="c1">
            <text:p>2026-05-06 03:45</text:p>
          </table:table-cell>
          <table:table-cell office:value-type="float" office:value="0.007624186000000001" table:style-name="c1">
            <text:p>0.0076242</text:p>
          </table:table-cell>
          <table:table-cell office:value-type="float" office:value="4.985404208249289" table:style-name="c13">
            <text:p>+5.0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4:00</text:p>
          </table:table-cell>
          <table:table-cell office:value-type="float" office:value="0.00766383" table:style-name="c1">
            <text:p>0.0076638</text:p>
          </table:table-cell>
          <table:table-cell office:value-type="string" table:style-name="c1">
            <text:p>2026-05-06 13:45</text:p>
          </table:table-cell>
          <table:table-cell office:value-type="float" office:value="0.007638179000000001" table:style-name="c1">
            <text:p>0.0076382</text:p>
          </table:table-cell>
          <table:table-cell office:value-type="float" office:value="-0.5339330311475821" table:style-name="c14">
            <text:p>-0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7:30</text:p>
          </table:table-cell>
          <table:table-cell office:value-type="float" office:value="0.007679838" table:style-name="c1">
            <text:p>0.0076798</text:p>
          </table:table-cell>
          <table:table-cell office:value-type="string" table:style-name="c1">
            <text:p>2026-05-06 18:15</text:p>
          </table:table-cell>
          <table:table-cell office:value-type="float" office:value="0.0076411775000000005" table:style-name="c1">
            <text:p>0.0076412</text:p>
          </table:table-cell>
          <table:table-cell office:value-type="float" office:value="-0.7022962440418556" table:style-name="c14">
            <text:p>-0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4:30</text:p>
          </table:table-cell>
          <table:table-cell office:value-type="float" office:value="0.007651824" table:style-name="c1">
            <text:p>0.0076518</text:p>
          </table:table-cell>
          <table:table-cell office:value-type="string" table:style-name="c1">
            <text:p>2026-05-07 04:45</text:p>
          </table:table-cell>
          <table:table-cell office:value-type="float" office:value="0.007622187000000001" table:style-name="c1">
            <text:p>0.0076222</text:p>
          </table:table-cell>
          <table:table-cell office:value-type="float" office:value="-0.5864451640941959" table:style-name="c14">
            <text:p>-0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15</text:p>
          </table:table-cell>
          <table:table-cell office:value-type="float" office:value="0.007687841999999999" table:style-name="c1">
            <text:p>0.0076878</text:p>
          </table:table-cell>
          <table:table-cell office:value-type="string" table:style-name="c1">
            <text:p>2026-05-07 16:00</text:p>
          </table:table-cell>
          <table:table-cell office:value-type="float" office:value="0.007716140000000001" table:style-name="c1">
            <text:p>0.0077161</text:p>
          </table:table-cell>
          <table:table-cell office:value-type="float" office:value="0.16745188233577846" table:style-name="c13">
            <text:p>+0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20:15</text:p>
          </table:table-cell>
          <table:table-cell office:value-type="float" office:value="0.007791894" table:style-name="c1">
            <text:p>0.0077919</text:p>
          </table:table-cell>
          <table:table-cell office:value-type="string" table:style-name="c1">
            <text:p>2026-05-09 05:30</text:p>
          </table:table-cell>
          <table:table-cell office:value-type="float" office:value="0.0079730115" table:style-name="c1">
            <text:p>0.007973</text:p>
          </table:table-cell>
          <table:table-cell office:value-type="float" office:value="2.119888309716478" table:style-name="c13">
            <text:p>+2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3:00</text:p>
          </table:table-cell>
          <table:table-cell office:value-type="float" office:value="0.007909952999999999" table:style-name="c1">
            <text:p>0.00791</text:p>
          </table:table-cell>
          <table:table-cell office:value-type="string" table:style-name="c1">
            <text:p>2026-05-10 21:00</text:p>
          </table:table-cell>
          <table:table-cell office:value-type="float" office:value="0.0077881040000000006" table:style-name="c1">
            <text:p>0.0077881</text:p>
          </table:table-cell>
          <table:table-cell office:value-type="float" office:value="-1.737272268191714" table:style-name="c14">
            <text:p>-1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3:15</text:p>
          </table:table-cell>
          <table:table-cell office:value-type="float" office:value="0.0079489725" table:style-name="c1">
            <text:p>0.007949</text:p>
          </table:table-cell>
          <table:table-cell office:value-type="string" table:style-name="c1">
            <text:p>2026-05-11 00:30</text:p>
          </table:table-cell>
          <table:table-cell office:value-type="float" office:value="0.00783608" table:style-name="c1">
            <text:p>0.0078361</text:p>
          </table:table-cell>
          <table:table-cell office:value-type="float" office:value="-1.6172759928405722" table:style-name="c14">
            <text:p>-1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0:15</text:p>
          </table:table-cell>
          <table:table-cell office:value-type="float" office:value="0.0078489225" table:style-name="c1">
            <text:p>0.0078489</text:p>
          </table:table-cell>
          <table:table-cell office:value-type="string" table:style-name="c1">
            <text:p>2026-05-11 13:30</text:p>
          </table:table-cell>
          <table:table-cell office:value-type="float" office:value="0.0077151405" table:style-name="c1">
            <text:p>0.0077151</text:p>
          </table:table-cell>
          <table:table-cell office:value-type="float" office:value="-1.900956033895096" table:style-name="c14">
            <text:p>-1.9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00:45</text:p>
          </table:table-cell>
          <table:table-cell office:value-type="float" office:value="0.006661329" table:style-name="c1">
            <text:p>0.0066613</text:p>
          </table:table-cell>
          <table:table-cell office:value-type="string" table:style-name="c1">
            <text:p>2026-05-25 03:30</text:p>
          </table:table-cell>
          <table:table-cell office:value-type="float" office:value="0.006614691" table:style-name="c1">
            <text:p>0.0066147</text:p>
          </table:table-cell>
          <table:table-cell office:value-type="float" office:value="-0.8986309985439811" table:style-name="c14">
            <text:p>-0.9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4:15</text:p>
          </table:table-cell>
          <table:table-cell office:value-type="float" office:value="0.0066763364999999995" table:style-name="c1">
            <text:p>0.0066763</text:p>
          </table:table-cell>
          <table:table-cell office:value-type="string" table:style-name="c1">
            <text:p>2026-05-26 06:15</text:p>
          </table:table-cell>
          <table:table-cell office:value-type="float" office:value="0.0065677145" table:style-name="c1">
            <text:p>0.0065677</text:p>
          </table:table-cell>
          <table:table-cell office:value-type="float" office:value="-1.8236178072435272" table:style-name="c14">
            <text:p>-1.8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7:00</text:p>
          </table:table-cell>
          <table:table-cell office:value-type="float" office:value="0.0062831399999999996" table:style-name="c1">
            <text:p>0.0062831</text:p>
          </table:table-cell>
          <table:table-cell office:value-type="string" table:style-name="c1">
            <text:p>2026-05-30 12:45</text:p>
          </table:table-cell>
          <table:table-cell office:value-type="float" office:value="0.0062298835" table:style-name="c1">
            <text:p>0.0062299</text:p>
          </table:table-cell>
          <table:table-cell office:value-type="float" office:value="-1.0458152630133943" table:style-name="c14">
            <text:p>-1.0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20:30</text:p>
          </table:table-cell>
          <table:table-cell office:value-type="float" office:value="0.1582791" table:style-name="c10">
            <text:p>0.15828</text:p>
          </table:table-cell>
          <table:table-cell office:value-type="string" table:style-name="c10">
            <text:p>2026-03-06 00:30</text:p>
          </table:table-cell>
          <table:table-cell office:value-type="float" office:value="0.15692150000000002" table:style-name="c10">
            <text:p>0.15692</text:p>
          </table:table-cell>
          <table:table-cell office:value-type="float" office:value="-1.055910779439606" table:style-name="c11">
            <text:p>-1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3:00</text:p>
          </table:table-cell>
          <table:table-cell office:value-type="float" office:value="0.15417704999999998" table:style-name="c10">
            <text:p>0.15418</text:p>
          </table:table-cell>
          <table:table-cell office:value-type="string" table:style-name="c10">
            <text:p>2026-03-10 18:30</text:p>
          </table:table-cell>
          <table:table-cell office:value-type="float" office:value="0.16111940000000002" table:style-name="c10">
            <text:p>0.16112</text:p>
          </table:table-cell>
          <table:table-cell office:value-type="float" office:value="4.293941490902875" table:style-name="c12">
            <text:p>+4.3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08:00</text:p>
          </table:table-cell>
          <table:table-cell office:value-type="float" office:value="0.15857925" table:style-name="c10">
            <text:p>0.15858</text:p>
          </table:table-cell>
          <table:table-cell office:value-type="string" table:style-name="c10">
            <text:p>2026-03-12 14:45</text:p>
          </table:table-cell>
          <table:table-cell office:value-type="float" office:value="0.15782105000000002" table:style-name="c10">
            <text:p>0.15782</text:p>
          </table:table-cell>
          <table:table-cell office:value-type="float" office:value="-0.677064798168725" table:style-name="c11">
            <text:p>-0.7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6:00</text:p>
          </table:table-cell>
          <table:table-cell office:value-type="float" office:value="0.16378185" table:style-name="c10">
            <text:p>0.16378</text:p>
          </table:table-cell>
          <table:table-cell office:value-type="string" table:style-name="c10">
            <text:p>2026-03-13 15:30</text:p>
          </table:table-cell>
          <table:table-cell office:value-type="float" office:value="0.163918" table:style-name="c10">
            <text:p>0.16392</text:p>
          </table:table-cell>
          <table:table-cell office:value-type="float" office:value="-0.11693730532413849" table:style-name="c11">
            <text:p>-0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21:15</text:p>
          </table:table-cell>
          <table:table-cell office:value-type="float" office:value="0.16478235" table:style-name="c10">
            <text:p>0.16478</text:p>
          </table:table-cell>
          <table:table-cell office:value-type="string" table:style-name="c10">
            <text:p>2026-03-14 05:30</text:p>
          </table:table-cell>
          <table:table-cell office:value-type="float" office:value="0.1637181" table:style-name="c10">
            <text:p>0.16372</text:p>
          </table:table-cell>
          <table:table-cell office:value-type="float" office:value="-0.8444608793963582" table:style-name="c11">
            <text:p>-0.8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2:15</text:p>
          </table:table-cell>
          <table:table-cell office:value-type="float" office:value="0.1676838" table:style-name="c10">
            <text:p>0.16768</text:p>
          </table:table-cell>
          <table:table-cell office:value-type="string" table:style-name="c10">
            <text:p>2026-03-15 06:45</text:p>
          </table:table-cell>
          <table:table-cell office:value-type="float" office:value="0.16561715" table:style-name="c10">
            <text:p>0.16562</text:p>
          </table:table-cell>
          <table:table-cell office:value-type="float" office:value="-1.4299047867772585" table:style-name="c11">
            <text:p>-1.4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9:30</text:p>
          </table:table-cell>
          <table:table-cell office:value-type="float" office:value="0.1678839" table:style-name="c10">
            <text:p>0.16788</text:p>
          </table:table-cell>
          <table:table-cell office:value-type="string" table:style-name="c10">
            <text:p>2026-03-15 16:30</text:p>
          </table:table-cell>
          <table:table-cell office:value-type="float" office:value="0.16691650000000002" table:style-name="c10">
            <text:p>0.16692</text:p>
          </table:table-cell>
          <table:table-cell office:value-type="float" office:value="-0.7749796636246753" table:style-name="c11">
            <text:p>-0.8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2:00</text:p>
          </table:table-cell>
          <table:table-cell office:value-type="float" office:value="0.1688844" table:style-name="c10">
            <text:p>0.16888</text:p>
          </table:table-cell>
          <table:table-cell office:value-type="string" table:style-name="c10">
            <text:p>2026-03-16 02:00</text:p>
          </table:table-cell>
          <table:table-cell office:value-type="float" office:value="0.16781605" table:style-name="c10">
            <text:p>0.16782</text:p>
          </table:table-cell>
          <table:table-cell office:value-type="float" office:value="-0.8312279191861394" table:style-name="c11">
            <text:p>-0.8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2:45</text:p>
          </table:table-cell>
          <table:table-cell office:value-type="float" office:value="0.17278634999999998" table:style-name="c10">
            <text:p>0.17279</text:p>
          </table:table-cell>
          <table:table-cell office:value-type="string" table:style-name="c10">
            <text:p>2026-03-17 04:30</text:p>
          </table:table-cell>
          <table:table-cell office:value-type="float" office:value="0.17471260000000002" table:style-name="c10">
            <text:p>0.17471</text:p>
          </table:table-cell>
          <table:table-cell office:value-type="float" office:value="0.9126875546592972" table:style-name="c12">
            <text:p>+0.9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8 03:30</text:p>
          </table:table-cell>
          <table:table-cell office:value-type="float" office:value="0.17738865" table:style-name="c10">
            <text:p>0.17739</text:p>
          </table:table-cell>
          <table:table-cell office:value-type="string" table:style-name="c10">
            <text:p>2026-03-18 07:30</text:p>
          </table:table-cell>
          <table:table-cell office:value-type="float" office:value="0.17461265" table:style-name="c10">
            <text:p>0.17461</text:p>
          </table:table-cell>
          <table:table-cell office:value-type="float" office:value="-1.7616970913020502" table:style-name="c11">
            <text:p>-1.8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21:00</text:p>
          </table:table-cell>
          <table:table-cell office:value-type="float" office:value="0.16678334999999997" table:style-name="c10">
            <text:p>0.16678</text:p>
          </table:table-cell>
          <table:table-cell office:value-type="string" table:style-name="c10">
            <text:p>2026-03-24 01:15</text:p>
          </table:table-cell>
          <table:table-cell office:value-type="float" office:value="0.16491750000000002" table:style-name="c10">
            <text:p>0.16492</text:p>
          </table:table-cell>
          <table:table-cell office:value-type="float" office:value="-1.316390444549742" table:style-name="c11">
            <text:p>-1.3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19:30</text:p>
          </table:table-cell>
          <table:table-cell office:value-type="float" office:value="0.16758375" table:style-name="c10">
            <text:p>0.16758</text:p>
          </table:table-cell>
          <table:table-cell office:value-type="string" table:style-name="c10">
            <text:p>2026-03-25 12:00</text:p>
          </table:table-cell>
          <table:table-cell office:value-type="float" office:value="0.17801095000000003" table:style-name="c10">
            <text:p>0.17801</text:p>
          </table:table-cell>
          <table:table-cell office:value-type="float" office:value="6.009745044462855" table:style-name="c12">
            <text:p>+6.0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6 14:15</text:p>
          </table:table-cell>
          <table:table-cell office:value-type="float" office:value="0.1754877" table:style-name="c10">
            <text:p>0.17549</text:p>
          </table:table-cell>
          <table:table-cell office:value-type="string" table:style-name="c10">
            <text:p>2026-03-26 15:45</text:p>
          </table:table-cell>
          <table:table-cell office:value-type="float" office:value="0.17271360000000002" table:style-name="c10">
            <text:p>0.17271</text:p>
          </table:table-cell>
          <table:table-cell office:value-type="float" office:value="-1.7775345431047085" table:style-name="c11">
            <text:p>-1.8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6 20:15</text:p>
          </table:table-cell>
          <table:table-cell office:value-type="float" office:value="0.17378685" table:style-name="c10">
            <text:p>0.17379</text:p>
          </table:table-cell>
          <table:table-cell office:value-type="string" table:style-name="c10">
            <text:p>2026-03-26 20:30</text:p>
          </table:table-cell>
          <table:table-cell office:value-type="float" office:value="0.17361315" table:style-name="c10">
            <text:p>0.17361</text:p>
          </table:table-cell>
          <table:table-cell office:value-type="float" office:value="-0.2996502248875599" table:style-name="c11">
            <text:p>-0.3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6 20:45</text:p>
          </table:table-cell>
          <table:table-cell office:value-type="float" office:value="0.17378685" table:style-name="c10">
            <text:p>0.17379</text:p>
          </table:table-cell>
          <table:table-cell office:value-type="string" table:style-name="c10">
            <text:p>2026-03-27 08:30</text:p>
          </table:table-cell>
          <table:table-cell office:value-type="float" office:value="0.1735132" table:style-name="c10">
            <text:p>0.17351</text:p>
          </table:table-cell>
          <table:table-cell office:value-type="float" office:value="-0.35704823857499735" table:style-name="c11">
            <text:p>-0.4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01:45</text:p>
          </table:table-cell>
          <table:table-cell office:value-type="float" office:value="0.16958475" table:style-name="c10">
            <text:p>0.16958</text:p>
          </table:table-cell>
          <table:table-cell office:value-type="string" table:style-name="c10">
            <text:p>2026-03-31 04:45</text:p>
          </table:table-cell>
          <table:table-cell office:value-type="float" office:value="0.167916" table:style-name="c10">
            <text:p>0.16792</text:p>
          </table:table-cell>
          <table:table-cell office:value-type="float" office:value="-1.1819542051982768" table:style-name="c11">
            <text:p>-1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06:15</text:p>
          </table:table-cell>
          <table:table-cell office:value-type="float" office:value="0.172086" table:style-name="c10">
            <text:p>0.17209</text:p>
          </table:table-cell>
          <table:table-cell office:value-type="string" table:style-name="c10">
            <text:p>2026-04-01 15:15</text:p>
          </table:table-cell>
          <table:table-cell office:value-type="float" office:value="0.17181405" table:style-name="c10">
            <text:p>0.17181</text:p>
          </table:table-cell>
          <table:table-cell office:value-type="float" office:value="-0.35761554452423683" table:style-name="c11">
            <text:p>-0.4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2:30</text:p>
          </table:table-cell>
          <table:table-cell office:value-type="float" office:value="0.1554777" table:style-name="c10">
            <text:p>0.15548</text:p>
          </table:table-cell>
          <table:table-cell office:value-type="string" table:style-name="c10">
            <text:p>2026-04-14 05:15</text:p>
          </table:table-cell>
          <table:table-cell office:value-type="float" office:value="0.15442275" table:style-name="c10">
            <text:p>0.15442</text:p>
          </table:table-cell>
          <table:table-cell office:value-type="float" office:value="-0.8770653780252768" table:style-name="c11">
            <text:p>-0.9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08:45</text:p>
          </table:table-cell>
          <table:table-cell office:value-type="float" office:value="0.1564782" table:style-name="c10">
            <text:p>0.15648</text:p>
          </table:table-cell>
          <table:table-cell office:value-type="string" table:style-name="c10">
            <text:p>2026-04-14 12:45</text:p>
          </table:table-cell>
          <table:table-cell office:value-type="float" office:value="0.1555222" table:style-name="c10">
            <text:p>0.15552</text:p>
          </table:table-cell>
          <table:table-cell office:value-type="float" office:value="-0.8096264385710095" table:style-name="c11">
            <text:p>-0.8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13:45</text:p>
          </table:table-cell>
          <table:table-cell office:value-type="float" office:value="0.15707849999999998" table:style-name="c10">
            <text:p>0.15708</text:p>
          </table:table-cell>
          <table:table-cell office:value-type="string" table:style-name="c10">
            <text:p>2026-04-14 16:00</text:p>
          </table:table-cell>
          <table:table-cell office:value-type="float" office:value="0.15582205000000002" table:style-name="c10">
            <text:p>0.15582</text:p>
          </table:table-cell>
          <table:table-cell office:value-type="float" office:value="-0.9981877073883316" table:style-name="c11">
            <text:p>-1.0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02:15</text:p>
          </table:table-cell>
          <table:table-cell office:value-type="float" office:value="0.1572786" table:style-name="c10">
            <text:p>0.15728</text:p>
          </table:table-cell>
          <table:table-cell office:value-type="string" table:style-name="c10">
            <text:p>2026-04-15 06:30</text:p>
          </table:table-cell>
          <table:table-cell office:value-type="float" office:value="0.15502245" table:style-name="c10">
            <text:p>0.15502</text:p>
          </table:table-cell>
          <table:table-cell office:value-type="float" office:value="-1.6315251264634623" table:style-name="c11">
            <text:p>-1.6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22:15</text:p>
          </table:table-cell>
          <table:table-cell office:value-type="float" office:value="0.1586793" table:style-name="c10">
            <text:p>0.15868</text:p>
          </table:table-cell>
          <table:table-cell office:value-type="string" table:style-name="c10">
            <text:p>2026-04-16 11:15</text:p>
          </table:table-cell>
          <table:table-cell office:value-type="float" office:value="0.16021985" table:style-name="c10">
            <text:p>0.16022</text:p>
          </table:table-cell>
          <table:table-cell office:value-type="float" office:value="0.7690168281874188" table:style-name="c12">
            <text:p>+0.8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2:30</text:p>
          </table:table-cell>
          <table:table-cell office:value-type="float" office:value="0.16158075" table:style-name="c10">
            <text:p>0.16158</text:p>
          </table:table-cell>
          <table:table-cell office:value-type="string" table:style-name="c10">
            <text:p>2026-04-16 14:30</text:p>
          </table:table-cell>
          <table:table-cell office:value-type="float" office:value="0.1595202" table:style-name="c10">
            <text:p>0.15952</text:p>
          </table:table-cell>
          <table:table-cell office:value-type="float" office:value="-1.472595516359465" table:style-name="c11">
            <text:p>-1.5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45</text:p>
          </table:table-cell>
          <table:table-cell office:value-type="float" office:value="0.16288139999999998" table:style-name="c10">
            <text:p>0.16288</text:p>
          </table:table-cell>
          <table:table-cell office:value-type="string" table:style-name="c10">
            <text:p>2026-04-17 02:15</text:p>
          </table:table-cell>
          <table:table-cell office:value-type="float" office:value="0.16681655" table:style-name="c10">
            <text:p>0.16682</text:p>
          </table:table-cell>
          <table:table-cell office:value-type="float" office:value="2.211230819817378" table:style-name="c12">
            <text:p>+2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8:00</text:p>
          </table:table-cell>
          <table:table-cell office:value-type="float" office:value="0.16728359999999998" table:style-name="c10">
            <text:p>0.16728</text:p>
          </table:table-cell>
          <table:table-cell office:value-type="string" table:style-name="c10">
            <text:p>2026-04-18 00:15</text:p>
          </table:table-cell>
          <table:table-cell office:value-type="float" office:value="0.17321335000000002" table:style-name="c10">
            <text:p>0.17321</text:p>
          </table:table-cell>
          <table:table-cell office:value-type="float" office:value="3.337742918821718" table:style-name="c12">
            <text:p>+3.3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9 11:45</text:p>
          </table:table-cell>
          <table:table-cell office:value-type="float" office:value="0.17028509999999997" table:style-name="c10">
            <text:p>0.17029</text:p>
          </table:table-cell>
          <table:table-cell office:value-type="string" table:style-name="c10">
            <text:p>2026-04-19 17:45</text:p>
          </table:table-cell>
          <table:table-cell office:value-type="float" office:value="0.16961515" table:style-name="c10">
            <text:p>0.16962</text:p>
          </table:table-cell>
          <table:table-cell office:value-type="float" office:value="-0.5925419692327627" table:style-name="c11">
            <text:p>-0.6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9 19:45</text:p>
          </table:table-cell>
          <table:table-cell office:value-type="float" office:value="0.17138565" table:style-name="c10">
            <text:p>0.17139</text:p>
          </table:table-cell>
          <table:table-cell office:value-type="string" table:style-name="c10">
            <text:p>2026-04-19 20:30</text:p>
          </table:table-cell>
          <table:table-cell office:value-type="float" office:value="0.16961515" table:style-name="c10">
            <text:p>0.16962</text:p>
          </table:table-cell>
          <table:table-cell office:value-type="float" office:value="-1.2308852490567346" table:style-name="c11">
            <text:p>-1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0 18:00</text:p>
          </table:table-cell>
          <table:table-cell office:value-type="float" office:value="0.1726863" table:style-name="c10">
            <text:p>0.17269</text:p>
          </table:table-cell>
          <table:table-cell office:value-type="string" table:style-name="c10">
            <text:p>2026-04-21 03:15</text:p>
          </table:table-cell>
          <table:table-cell office:value-type="float" office:value="0.1729135" table:style-name="c10">
            <text:p>0.17291</text:p>
          </table:table-cell>
          <table:table-cell office:value-type="float" office:value="-0.06859495310282959" table:style-name="c11">
            <text:p>-0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5:00</text:p>
          </table:table-cell>
          <table:table-cell office:value-type="float" office:value="0.1758879" table:style-name="c10">
            <text:p>0.17589</text:p>
          </table:table-cell>
          <table:table-cell office:value-type="string" table:style-name="c10">
            <text:p>2026-04-21 13:30</text:p>
          </table:table-cell>
          <table:table-cell office:value-type="float" office:value="0.1787106" table:style-name="c10">
            <text:p>0.17871</text:p>
          </table:table-cell>
          <table:table-cell office:value-type="float" office:value="1.4017209316843138" table:style-name="c12">
            <text:p>+1.4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5:30</text:p>
          </table:table-cell>
          <table:table-cell office:value-type="float" office:value="0.1812906" table:style-name="c10">
            <text:p>0.18129</text:p>
          </table:table-cell>
          <table:table-cell office:value-type="string" table:style-name="c10">
            <text:p>2026-04-22 08:45</text:p>
          </table:table-cell>
          <table:table-cell office:value-type="float" office:value="0.17941025" table:style-name="c10">
            <text:p>0.17941</text:p>
          </table:table-cell>
          <table:table-cell office:value-type="float" office:value="-1.235028782380343" table:style-name="c11">
            <text:p>-1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06:30</text:p>
          </table:table-cell>
          <table:table-cell office:value-type="float" office:value="0.17778885" table:style-name="c10">
            <text:p>0.17779</text:p>
          </table:table-cell>
          <table:table-cell office:value-type="string" table:style-name="c10">
            <text:p>2026-04-23 09:15</text:p>
          </table:table-cell>
          <table:table-cell office:value-type="float" office:value="0.17561215" table:style-name="c10">
            <text:p>0.17561</text:p>
          </table:table-cell>
          <table:table-cell office:value-type="float" office:value="-1.4217700872973804" table:style-name="c11">
            <text:p>-1.4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12:30</text:p>
          </table:table-cell>
          <table:table-cell office:value-type="float" office:value="0.17758875" table:style-name="c10">
            <text:p>0.17759</text:p>
          </table:table-cell>
          <table:table-cell office:value-type="string" table:style-name="c10">
            <text:p>2026-04-23 17:45</text:p>
          </table:table-cell>
          <table:table-cell office:value-type="float" office:value="0.175912" table:style-name="c10">
            <text:p>0.17591</text:p>
          </table:table-cell>
          <table:table-cell office:value-type="float" office:value="-1.1421883920011866" table:style-name="c11">
            <text:p>-1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12:45</text:p>
          </table:table-cell>
          <table:table-cell office:value-type="float" office:value="0.1604802" table:style-name="c10">
            <text:p>0.16048</text:p>
          </table:table-cell>
          <table:table-cell office:value-type="string" table:style-name="c10">
            <text:p>2026-05-05 16:00</text:p>
          </table:table-cell>
          <table:table-cell office:value-type="float" office:value="0.15872060000000002" table:style-name="c10">
            <text:p>0.15872</text:p>
          </table:table-cell>
          <table:table-cell office:value-type="float" office:value="-1.2941674296268135" table:style-name="c11">
            <text:p>-1.3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1:30</text:p>
          </table:table-cell>
          <table:table-cell office:value-type="float" office:value="0.16148069999999998" table:style-name="c10">
            <text:p>0.16148</text:p>
          </table:table-cell>
          <table:table-cell office:value-type="string" table:style-name="c10">
            <text:p>2026-05-06 13:45</text:p>
          </table:table-cell>
          <table:table-cell office:value-type="float" office:value="0.16271860000000002" table:style-name="c10">
            <text:p>0.16272</text:p>
          </table:table-cell>
          <table:table-cell office:value-type="float" office:value="0.56516073970454" table:style-name="c12">
            <text:p>+0.6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21:45</text:p>
          </table:table-cell>
          <table:table-cell office:value-type="float" office:value="0.1624812" table:style-name="c10">
            <text:p>0.16248</text:p>
          </table:table-cell>
          <table:table-cell office:value-type="string" table:style-name="c10">
            <text:p>2026-05-06 23:15</text:p>
          </table:table-cell>
          <table:table-cell office:value-type="float" office:value="0.16081955" table:style-name="c10">
            <text:p>0.16082</text:p>
          </table:table-cell>
          <table:table-cell office:value-type="float" office:value="-1.220527839805463" table:style-name="c11">
            <text:p>-1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5:15</text:p>
          </table:table-cell>
          <table:table-cell office:value-type="float" office:value="0.16168079999999999" table:style-name="c10">
            <text:p>0.16168</text:p>
          </table:table-cell>
          <table:table-cell office:value-type="string" table:style-name="c10">
            <text:p>2026-05-07 10:15</text:p>
          </table:table-cell>
          <table:table-cell office:value-type="float" office:value="0.16091950000000002" table:style-name="c10">
            <text:p>0.16092</text:p>
          </table:table-cell>
          <table:table-cell office:value-type="float" office:value="-0.6698247908842325" table:style-name="c11">
            <text:p>-0.7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8:00</text:p>
          </table:table-cell>
          <table:table-cell office:value-type="float" office:value="0.1638819" table:style-name="c10">
            <text:p>0.16388</text:p>
          </table:table-cell>
          <table:table-cell office:value-type="string" table:style-name="c10">
            <text:p>2026-05-08 23:45</text:p>
          </table:table-cell>
          <table:table-cell office:value-type="float" office:value="0.16281855" table:style-name="c10">
            <text:p>0.16282</text:p>
          </table:table-cell>
          <table:table-cell office:value-type="float" office:value="-0.847454344531029" table:style-name="c11">
            <text:p>-0.8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01:00</text:p>
          </table:table-cell>
          <table:table-cell office:value-type="float" office:value="0.16488239999999998" table:style-name="c10">
            <text:p>0.16488</text:p>
          </table:table-cell>
          <table:table-cell office:value-type="string" table:style-name="c10">
            <text:p>2026-05-09 07:30</text:p>
          </table:table-cell>
          <table:table-cell office:value-type="float" office:value="0.1653173" table:style-name="c10">
            <text:p>0.16532</text:p>
          </table:table-cell>
          <table:table-cell office:value-type="float" office:value="0.0633364854587315" table:style-name="c12">
            <text:p>+0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6:00</text:p>
          </table:table-cell>
          <table:table-cell office:value-type="float" office:value="0.16778384999999998" table:style-name="c10">
            <text:p>0.16778</text:p>
          </table:table-cell>
          <table:table-cell office:value-type="string" table:style-name="c10">
            <text:p>2026-05-10 21:15</text:p>
          </table:table-cell>
          <table:table-cell office:value-type="float" office:value="0.16651670000000002" table:style-name="c10">
            <text:p>0.16652</text:p>
          </table:table-cell>
          <table:table-cell office:value-type="float" office:value="-0.9536179336092077" table:style-name="c11">
            <text:p>-1.0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08:15</text:p>
          </table:table-cell>
          <table:table-cell office:value-type="float" office:value="0.16748369999999999" table:style-name="c10">
            <text:p>0.16748</text:p>
          </table:table-cell>
          <table:table-cell office:value-type="string" table:style-name="c10">
            <text:p>2026-05-11 20:45</text:p>
          </table:table-cell>
          <table:table-cell office:value-type="float" office:value="0.16901545" table:style-name="c10">
            <text:p>0.16902</text:p>
          </table:table-cell>
          <table:table-cell office:value-type="float" office:value="0.7128383929003501" table:style-name="c12">
            <text:p>+0.7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8:15</text:p>
          </table:table-cell>
          <table:table-cell office:value-type="float" office:value="0.1482741" table:style-name="c10">
            <text:p>0.14827</text:p>
          </table:table-cell>
          <table:table-cell office:value-type="string" table:style-name="c10">
            <text:p>2026-05-21 23:15</text:p>
          </table:table-cell>
          <table:table-cell office:value-type="float" office:value="0.1463268" table:style-name="c10">
            <text:p>0.14633</text:p>
          </table:table-cell>
          <table:table-cell office:value-type="float" office:value="-1.5105856472573342" table:style-name="c11">
            <text:p>-1.5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13:00</text:p>
          </table:table-cell>
          <table:table-cell office:value-type="float" office:value="0.15057525" table:style-name="c10">
            <text:p>0.15058</text:p>
          </table:table-cell>
          <table:table-cell office:value-type="string" table:style-name="c10">
            <text:p>2026-05-22 14:45</text:p>
          </table:table-cell>
          <table:table-cell office:value-type="float" office:value="0.1469265" table:style-name="c10">
            <text:p>0.14693</text:p>
          </table:table-cell>
          <table:table-cell office:value-type="float" office:value="-2.618263010355293" table:style-name="c11">
            <text:p>-2.6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07:00</text:p>
          </table:table-cell>
          <table:table-cell office:value-type="float" office:value="0.1506753" table:style-name="c10">
            <text:p>0.15068</text:p>
          </table:table-cell>
          <table:table-cell office:value-type="string" table:style-name="c10">
            <text:p>2026-05-25 12:30</text:p>
          </table:table-cell>
          <table:table-cell office:value-type="float" office:value="0.1501249" table:style-name="c10">
            <text:p>0.15012</text:p>
          </table:table-cell>
          <table:table-cell office:value-type="float" office:value="-0.564458590824124" table:style-name="c11">
            <text:p>-0.6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07:00</text:p>
          </table:table-cell>
          <table:table-cell office:value-type="float" office:value="0.14937464999999997" table:style-name="c10">
            <text:p>0.14937</text:p>
          </table:table-cell>
          <table:table-cell office:value-type="string" table:style-name="c10">
            <text:p>2026-05-26 07:45</text:p>
          </table:table-cell>
          <table:table-cell office:value-type="float" office:value="0.14822585" table:style-name="c10">
            <text:p>0.14823</text:p>
          </table:table-cell>
          <table:table-cell office:value-type="float" office:value="-0.9674355549284641" table:style-name="c11">
            <text:p>-1.0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1:00</text:p>
          </table:table-cell>
          <table:table-cell office:value-type="float" office:value="0.1504752" table:style-name="c10">
            <text:p>0.15048</text:p>
          </table:table-cell>
          <table:table-cell office:value-type="string" table:style-name="c10">
            <text:p>2026-05-26 16:45</text:p>
          </table:table-cell>
          <table:table-cell office:value-type="float" office:value="0.1489255" table:style-name="c10">
            <text:p>0.14893</text:p>
          </table:table-cell>
          <table:table-cell office:value-type="float" office:value="-1.2277119914112289" table:style-name="c11">
            <text:p>-1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7 14:00</text:p>
          </table:table-cell>
          <table:table-cell office:value-type="float" office:value="0.15157574999999998" table:style-name="c10">
            <text:p>0.15158</text:p>
          </table:table-cell>
          <table:table-cell office:value-type="string" table:style-name="c10">
            <text:p>2026-05-27 23:00</text:p>
          </table:table-cell>
          <table:table-cell office:value-type="float" office:value="0.16181905" table:style-name="c10">
            <text:p>0.16182</text:p>
          </table:table-cell>
          <table:table-cell office:value-type="float" office:value="6.544466195318188" table:style-name="c12">
            <text:p>+6.5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8 00:15</text:p>
          </table:table-cell>
          <table:table-cell office:value-type="float" office:value="0.1676838" table:style-name="c10">
            <text:p>0.16768</text:p>
          </table:table-cell>
          <table:table-cell office:value-type="string" table:style-name="c10">
            <text:p>2026-05-28 06:00</text:p>
          </table:table-cell>
          <table:table-cell office:value-type="float" office:value="0.16881555" table:style-name="c10">
            <text:p>0.16882</text:p>
          </table:table-cell>
          <table:table-cell office:value-type="float" office:value="0.47368184377383216" table:style-name="c12">
            <text:p>+0.5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8 12:30</text:p>
          </table:table-cell>
          <table:table-cell office:value-type="float" office:value="0.18259124999999998" table:style-name="c10">
            <text:p>0.18259</text:p>
          </table:table-cell>
          <table:table-cell office:value-type="string" table:style-name="c10">
            <text:p>2026-05-29 00:30</text:p>
          </table:table-cell>
          <table:table-cell office:value-type="float" office:value="0.20299845000000002" table:style-name="c10">
            <text:p>0.203</text:p>
          </table:table-cell>
          <table:table-cell office:value-type="float" office:value="10.9541974757553" table:style-name="c12">
            <text:p>+11.0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9 08:30</text:p>
          </table:table-cell>
          <table:table-cell office:value-type="float" office:value="0.21460724999999997" table:style-name="c10">
            <text:p>0.21461</text:p>
          </table:table-cell>
          <table:table-cell office:value-type="string" table:style-name="c10">
            <text:p>2026-05-29 11:30</text:p>
          </table:table-cell>
          <table:table-cell office:value-type="float" office:value="0.2070964" table:style-name="c10">
            <text:p>0.2071</text:p>
          </table:table-cell>
          <table:table-cell office:value-type="float" office:value="-3.6927157417095513" table:style-name="c11">
            <text:p>-3.7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9 19:45</text:p>
          </table:table-cell>
          <table:table-cell office:value-type="float" office:value="0.23581784999999997" table:style-name="c10">
            <text:p>0.23582</text:p>
          </table:table-cell>
          <table:table-cell office:value-type="string" table:style-name="c10">
            <text:p>2026-05-30 05:45</text:p>
          </table:table-cell>
          <table:table-cell office:value-type="float" office:value="0.25857065" table:style-name="c10">
            <text:p>0.25857</text:p>
          </table:table-cell>
          <table:table-cell office:value-type="float" office:value="9.429276566913858" table:style-name="c12">
            <text:p>+9.4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2:45</text:p>
          </table:table-cell>
          <table:table-cell office:value-type="float" office:value="0.24192089999999997" table:style-name="c10">
            <text:p>0.24192</text:p>
          </table:table-cell>
          <table:table-cell office:value-type="string" table:style-name="c10">
            <text:p>2026-05-31 07:00</text:p>
          </table:table-cell>
          <table:table-cell office:value-type="float" office:value="0.2320839" table:style-name="c10">
            <text:p>0.23208</text:p>
          </table:table-cell>
          <table:table-cell office:value-type="float" office:value="-4.257976766827487" table:style-name="c11">
            <text:p>-4.3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9:15</text:p>
          </table:table-cell>
          <table:table-cell office:value-type="float" office:value="0.2411205" table:style-name="c10">
            <text:p>0.24112</text:p>
          </table:table-cell>
          <table:table-cell office:value-type="string" table:style-name="c10">
            <text:p>2026-05-31 16:00</text:p>
          </table:table-cell>
          <table:table-cell office:value-type="float" office:value="0.24477755" table:style-name="c10">
            <text:p>0.24478</text:p>
          </table:table-cell>
          <table:table-cell office:value-type="float" office:value="1.3137579250001474" table:style-name="c12">
            <text:p>+1.3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11:30</text:p>
          </table:table-cell>
          <table:table-cell office:value-type="float" office:value="0.26383185" table:style-name="c10">
            <text:p>0.26383</text:p>
          </table:table-cell>
          <table:table-cell office:value-type="string" table:style-name="c10">
            <text:p>2026-06-01 14:15</text:p>
          </table:table-cell>
          <table:table-cell office:value-type="float" office:value="0.25587200000000004" table:style-name="c10">
            <text:p>0.25587</text:p>
          </table:table-cell>
          <table:table-cell office:value-type="float" office:value="-3.21088531502165" table:style-name="c11">
            <text:p>-3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1:00</text:p>
          </table:table-cell>
          <table:table-cell office:value-type="float" office:value="1.44862395" table:style-name="c1">
            <text:p>1.4486</text:p>
          </table:table-cell>
          <table:table-cell office:value-type="string" table:style-name="c1">
            <text:p>2026-03-05 14:15</text:p>
          </table:table-cell>
          <table:table-cell office:value-type="float" office:value="1.42858535" table:style-name="c1">
            <text:p>1.4286</text:p>
          </table:table-cell>
          <table:table-cell office:value-type="float" office:value="-1.5804199643841277" table:style-name="c14">
            <text:p>-1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6 08:00</text:p>
          </table:table-cell>
          <table:table-cell office:value-type="float" office:value="1.4084038499999998" table:style-name="c1">
            <text:p>1.4084</text:p>
          </table:table-cell>
          <table:table-cell office:value-type="string" table:style-name="c1">
            <text:p>2026-03-06 09:30</text:p>
          </table:table-cell>
          <table:table-cell office:value-type="float" office:value="1.39520205" table:style-name="c1">
            <text:p>1.3952</text:p>
          </table:table-cell>
          <table:table-cell office:value-type="float" office:value="-1.1353852020462685" table:style-name="c14">
            <text:p>-1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8:45</text:p>
          </table:table-cell>
          <table:table-cell office:value-type="float" office:value="1.40800365" table:style-name="c1">
            <text:p>1.408</text:p>
          </table:table-cell>
          <table:table-cell office:value-type="string" table:style-name="c1">
            <text:p>2026-03-10 12:15</text:p>
          </table:table-cell>
          <table:table-cell office:value-type="float" office:value="1.3857068000000001" table:style-name="c1">
            <text:p>1.3857</text:p>
          </table:table-cell>
          <table:table-cell office:value-type="float" office:value="-1.780313417028423" table:style-name="c14">
            <text:p>-1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4:45</text:p>
          </table:table-cell>
          <table:table-cell office:value-type="float" office:value="1.4191092" table:style-name="c1">
            <text:p>1.4191</text:p>
          </table:table-cell>
          <table:table-cell office:value-type="string" table:style-name="c1">
            <text:p>2026-03-10 18:30</text:p>
          </table:table-cell>
          <table:table-cell office:value-type="float" office:value="1.39540195" table:style-name="c1">
            <text:p>1.3954</text:p>
          </table:table-cell>
          <table:table-cell office:value-type="float" office:value="-1.8671331633992816" table:style-name="c14">
            <text:p>-1.9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45</text:p>
          </table:table-cell>
          <table:table-cell office:value-type="float" office:value="1.3992993" table:style-name="c1">
            <text:p>1.3993</text:p>
          </table:table-cell>
          <table:table-cell office:value-type="string" table:style-name="c1">
            <text:p>2026-03-11 21:15</text:p>
          </table:table-cell>
          <table:table-cell office:value-type="float" office:value="1.3896048500000002" table:style-name="c1">
            <text:p>1.3896</text:p>
          </table:table-cell>
          <table:table-cell office:value-type="float" office:value="-0.8913225423002546" table:style-name="c14">
            <text:p>-0.9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6:00</text:p>
          </table:table-cell>
          <table:table-cell office:value-type="float" office:value="1.4241116999999999" table:style-name="c1">
            <text:p>1.4241</text:p>
          </table:table-cell>
          <table:table-cell office:value-type="string" table:style-name="c1">
            <text:p>2026-03-13 15:30</text:p>
          </table:table-cell>
          <table:table-cell office:value-type="float" office:value="1.41919005" table:style-name="c1">
            <text:p>1.4192</text:p>
          </table:table-cell>
          <table:table-cell office:value-type="float" office:value="-0.5448035368257886" table:style-name="c14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2:15</text:p>
          </table:table-cell>
          <table:table-cell office:value-type="float" office:value="1.4160076499999998" table:style-name="c1">
            <text:p>1.416</text:p>
          </table:table-cell>
          <table:table-cell office:value-type="string" table:style-name="c1">
            <text:p>2026-03-15 07:30</text:p>
          </table:table-cell>
          <table:table-cell office:value-type="float" office:value="1.40839545" table:style-name="c1">
            <text:p>1.4084</text:p>
          </table:table-cell>
          <table:table-cell office:value-type="float" office:value="-0.7364072153529522" table:style-name="c14">
            <text:p>-0.7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3:00</text:p>
          </table:table-cell>
          <table:table-cell office:value-type="float" office:value="1.4245119" table:style-name="c1">
            <text:p>1.4245</text:p>
          </table:table-cell>
          <table:table-cell office:value-type="string" table:style-name="c1">
            <text:p>2026-03-15 16:15</text:p>
          </table:table-cell>
          <table:table-cell office:value-type="float" office:value="1.4148922000000002" table:style-name="c1">
            <text:p>1.4149</text:p>
          </table:table-cell>
          <table:table-cell office:value-type="float" office:value="-0.8738480533437176" table:style-name="c14">
            <text:p>-0.9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00</text:p>
          </table:table-cell>
          <table:table-cell office:value-type="float" office:value="1.42801365" table:style-name="c1">
            <text:p>1.428</text:p>
          </table:table-cell>
          <table:table-cell office:value-type="string" table:style-name="c1">
            <text:p>2026-03-16 10:45</text:p>
          </table:table-cell>
          <table:table-cell office:value-type="float" office:value="1.46736595" table:style-name="c1">
            <text:p>1.4674</text:p>
          </table:table-cell>
          <table:table-cell office:value-type="float" office:value="2.5503282455283216" table:style-name="c13">
            <text:p>+2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3:45</text:p>
          </table:table-cell>
          <table:table-cell office:value-type="float" office:value="1.4852422499999998" table:style-name="c1">
            <text:p>1.4852</text:p>
          </table:table-cell>
          <table:table-cell office:value-type="string" table:style-name="c1">
            <text:p>2026-03-17 04:45</text:p>
          </table:table-cell>
          <table:table-cell office:value-type="float" office:value="1.5271360500000002" table:style-name="c1">
            <text:p>1.5271</text:p>
          </table:table-cell>
          <table:table-cell office:value-type="float" office:value="2.615132651663399" table:style-name="c13">
            <text:p>+2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7:30</text:p>
          </table:table-cell>
          <table:table-cell office:value-type="float" office:value="1.4230111499999998" table:style-name="c1">
            <text:p>1.423</text:p>
          </table:table-cell>
          <table:table-cell office:value-type="string" table:style-name="c1">
            <text:p>2026-03-24 13:00</text:p>
          </table:table-cell>
          <table:table-cell office:value-type="float" office:value="1.4157917500000001" table:style-name="c1">
            <text:p>1.4158</text:p>
          </table:table-cell>
          <table:table-cell office:value-type="float" office:value="-0.7062184796127524" table:style-name="c14">
            <text:p>-0.7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5:30</text:p>
          </table:table-cell>
          <table:table-cell office:value-type="float" office:value="1.4221107" table:style-name="c1">
            <text:p>1.4221</text:p>
          </table:table-cell>
          <table:table-cell office:value-type="string" table:style-name="c1">
            <text:p>2026-03-25 14:15</text:p>
          </table:table-cell>
          <table:table-cell office:value-type="float" office:value="1.4177907500000002" table:style-name="c1">
            <text:p>1.4178</text:p>
          </table:table-cell>
          <table:table-cell office:value-type="float" office:value="-0.5030630674004333" table:style-name="c14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2:15</text:p>
          </table:table-cell>
          <table:table-cell office:value-type="float" office:value="1.3448721" table:style-name="c1">
            <text:p>1.3449</text:p>
          </table:table-cell>
          <table:table-cell office:value-type="string" table:style-name="c1">
            <text:p>2026-04-06 13:15</text:p>
          </table:table-cell>
          <table:table-cell office:value-type="float" office:value="1.3441276" table:style-name="c1">
            <text:p>1.3441</text:p>
          </table:table-cell>
          <table:table-cell office:value-type="float" office:value="-0.2551477625567511" table:style-name="c14">
            <text:p>-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09:00</text:p>
          </table:table-cell>
          <table:table-cell office:value-type="float" office:value="1.3202598" table:style-name="c1">
            <text:p>1.3203</text:p>
          </table:table-cell>
          <table:table-cell office:value-type="string" table:style-name="c1">
            <text:p>2026-04-07 10:45</text:p>
          </table:table-cell>
          <table:table-cell office:value-type="float" office:value="1.3091451" table:style-name="c1">
            <text:p>1.3091</text:p>
          </table:table-cell>
          <table:table-cell office:value-type="float" office:value="-1.0400741622898835" table:style-name="c14">
            <text:p>-1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00</text:p>
          </table:table-cell>
          <table:table-cell office:value-type="float" office:value="1.3742868" table:style-name="c1">
            <text:p>1.3743</text:p>
          </table:table-cell>
          <table:table-cell office:value-type="string" table:style-name="c1">
            <text:p>2026-04-08 12:00</text:p>
          </table:table-cell>
          <table:table-cell office:value-type="float" office:value="1.3775109" table:style-name="c1">
            <text:p>1.3775</text:p>
          </table:table-cell>
          <table:table-cell office:value-type="float" office:value="0.03423271699185548" table:style-name="c13">
            <text:p>+0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1.364682" table:style-name="c1">
            <text:p>1.3647</text:p>
          </table:table-cell>
          <table:table-cell office:value-type="string" table:style-name="c1">
            <text:p>2026-04-11 23:30</text:p>
          </table:table-cell>
          <table:table-cell office:value-type="float" office:value="1.3545224" table:style-name="c1">
            <text:p>1.3545</text:p>
          </table:table-cell>
          <table:table-cell office:value-type="float" office:value="-0.9428782879527753" table:style-name="c14">
            <text:p>-0.9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30</text:p>
          </table:table-cell>
          <table:table-cell office:value-type="float" office:value="1.3722857999999998" table:style-name="c1">
            <text:p>1.3723</text:p>
          </table:table-cell>
          <table:table-cell office:value-type="string" table:style-name="c1">
            <text:p>2026-04-14 05:30</text:p>
          </table:table-cell>
          <table:table-cell office:value-type="float" office:value="1.3638177500000002" table:style-name="c1">
            <text:p>1.3638</text:p>
          </table:table-cell>
          <table:table-cell office:value-type="float" office:value="-0.8157427324723243" table:style-name="c14">
            <text:p>-0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1.39339635" table:style-name="c1">
            <text:p>1.3934</text:p>
          </table:table-cell>
          <table:table-cell office:value-type="string" table:style-name="c1">
            <text:p>2026-04-14 17:00</text:p>
          </table:table-cell>
          <table:table-cell office:value-type="float" office:value="1.3677158" table:style-name="c1">
            <text:p>1.3677</text:p>
          </table:table-cell>
          <table:table-cell office:value-type="float" office:value="-2.0392341263273828" table:style-name="c14">
            <text:p>-2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00</text:p>
          </table:table-cell>
          <table:table-cell office:value-type="float" office:value="1.3641817499999997" table:style-name="c1">
            <text:p>1.3642</text:p>
          </table:table-cell>
          <table:table-cell office:value-type="string" table:style-name="c1">
            <text:p>2026-04-16 12:00</text:p>
          </table:table-cell>
          <table:table-cell office:value-type="float" office:value="1.40879525" table:style-name="c1">
            <text:p>1.4088</text:p>
          </table:table-cell>
          <table:table-cell office:value-type="float" office:value="3.063911263675112" table:style-name="c13">
            <text:p>+3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15</text:p>
          </table:table-cell>
          <table:table-cell office:value-type="float" office:value="1.4235114" table:style-name="c1">
            <text:p>1.4235</text:p>
          </table:table-cell>
          <table:table-cell office:value-type="string" table:style-name="c1">
            <text:p>2026-04-17 01:15</text:p>
          </table:table-cell>
          <table:table-cell office:value-type="float" office:value="1.43718105" table:style-name="c1">
            <text:p>1.4372</text:p>
          </table:table-cell>
          <table:table-cell office:value-type="float" office:value="0.758457226338316" table:style-name="c13">
            <text:p>+0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1.45962945" table:style-name="c1">
            <text:p>1.4596</text:p>
          </table:table-cell>
          <table:table-cell office:value-type="string" table:style-name="c1">
            <text:p>2026-04-17 22:00</text:p>
          </table:table-cell>
          <table:table-cell office:value-type="float" office:value="1.4784604000000001" table:style-name="c1">
            <text:p>1.4785</text:p>
          </table:table-cell>
          <table:table-cell office:value-type="float" office:value="1.0876395827995822" table:style-name="c13">
            <text:p>+1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07:00</text:p>
          </table:table-cell>
          <table:table-cell office:value-type="float" office:value="1.4377185" table:style-name="c1">
            <text:p>1.4377</text:p>
          </table:table-cell>
          <table:table-cell office:value-type="string" table:style-name="c1">
            <text:p>2026-04-21 12:45</text:p>
          </table:table-cell>
          <table:table-cell office:value-type="float" office:value="1.4278857000000003" table:style-name="c1">
            <text:p>1.4279</text:p>
          </table:table-cell>
          <table:table-cell office:value-type="float" office:value="-0.8824497642827556" table:style-name="c14">
            <text:p>-0.9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3:00</text:p>
          </table:table-cell>
          <table:table-cell office:value-type="float" office:value="1.44942435" table:style-name="c1">
            <text:p>1.4494</text:p>
          </table:table-cell>
          <table:table-cell office:value-type="string" table:style-name="c1">
            <text:p>2026-04-22 16:30</text:p>
          </table:table-cell>
          <table:table-cell office:value-type="float" office:value="1.44717605" table:style-name="c1">
            <text:p>1.4472</text:p>
          </table:table-cell>
          <table:table-cell office:value-type="float" office:value="-0.35470667537427225" table:style-name="c14">
            <text:p>-0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22:15</text:p>
          </table:table-cell>
          <table:table-cell office:value-type="float" office:value="1.43161545" table:style-name="c1">
            <text:p>1.4316</text:p>
          </table:table-cell>
          <table:table-cell office:value-type="string" table:style-name="c1">
            <text:p>2026-04-26 23:15</text:p>
          </table:table-cell>
          <table:table-cell office:value-type="float" office:value="1.4264864000000002" table:style-name="c1">
            <text:p>1.4265</text:p>
          </table:table-cell>
          <table:table-cell office:value-type="float" office:value="-0.5574539107970455" table:style-name="c14">
            <text:p>-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15</text:p>
          </table:table-cell>
          <table:table-cell office:value-type="float" office:value="1.3898945999999999" table:style-name="c1">
            <text:p>1.3899</text:p>
          </table:table-cell>
          <table:table-cell office:value-type="string" table:style-name="c1">
            <text:p>2026-05-01 20:45</text:p>
          </table:table-cell>
          <table:table-cell office:value-type="float" office:value="1.3859067" table:style-name="c1">
            <text:p>1.3859</text:p>
          </table:table-cell>
          <table:table-cell office:value-type="float" office:value="-0.4862474818809859" table:style-name="c14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22:15</text:p>
          </table:table-cell>
          <table:table-cell office:value-type="float" office:value="1.4023008" table:style-name="c1">
            <text:p>1.4023</text:p>
          </table:table-cell>
          <table:table-cell office:value-type="string" table:style-name="c1">
            <text:p>2026-05-03 23:45</text:p>
          </table:table-cell>
          <table:table-cell office:value-type="float" office:value="1.3883055000000002" table:style-name="c1">
            <text:p>1.3883</text:p>
          </table:table-cell>
          <table:table-cell office:value-type="float" office:value="-1.1959290542014722" table:style-name="c14">
            <text:p>-1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1.4057024999999999" table:style-name="c1">
            <text:p>1.4057</text:p>
          </table:table-cell>
          <table:table-cell office:value-type="string" table:style-name="c1">
            <text:p>2026-05-04 10:15</text:p>
          </table:table-cell>
          <table:table-cell office:value-type="float" office:value="1.3937028000000002" table:style-name="c1">
            <text:p>1.3937</text:p>
          </table:table-cell>
          <table:table-cell office:value-type="float" office:value="-1.051837917141052" table:style-name="c14">
            <text:p>-1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15</text:p>
          </table:table-cell>
          <table:table-cell office:value-type="float" office:value="1.40740335" table:style-name="c1">
            <text:p>1.4074</text:p>
          </table:table-cell>
          <table:table-cell office:value-type="string" table:style-name="c1">
            <text:p>2026-05-04 16:15</text:p>
          </table:table-cell>
          <table:table-cell office:value-type="float" office:value="1.3945024000000001" table:style-name="c1">
            <text:p>1.3945</text:p>
          </table:table-cell>
          <table:table-cell office:value-type="float" office:value="-1.1147167084403886" table:style-name="c14">
            <text:p>-1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3:15</text:p>
          </table:table-cell>
          <table:table-cell office:value-type="float" office:value="1.4187089999999998" table:style-name="c1">
            <text:p>1.4187</text:p>
          </table:table-cell>
          <table:table-cell office:value-type="string" table:style-name="c1">
            <text:p>2026-05-05 17:00</text:p>
          </table:table-cell>
          <table:table-cell office:value-type="float" office:value="1.40739595" table:style-name="c1">
            <text:p>1.4074</text:p>
          </table:table-cell>
          <table:table-cell office:value-type="float" office:value="-0.995724599198966" table:style-name="c14">
            <text:p>-1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9:00</text:p>
          </table:table-cell>
          <table:table-cell office:value-type="float" office:value="1.44362145" table:style-name="c1">
            <text:p>1.4436</text:p>
          </table:table-cell>
          <table:table-cell office:value-type="string" table:style-name="c1">
            <text:p>2026-05-06 13:30</text:p>
          </table:table-cell>
          <table:table-cell office:value-type="float" office:value="1.425287" table:style-name="c1">
            <text:p>1.4253</text:p>
          </table:table-cell>
          <table:table-cell office:value-type="float" office:value="-1.4673929036590705" table:style-name="c14">
            <text:p>-1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7:15</text:p>
          </table:table-cell>
          <table:table-cell office:value-type="float" office:value="1.4195094" table:style-name="c1">
            <text:p>1.4195</text:p>
          </table:table-cell>
          <table:table-cell office:value-type="string" table:style-name="c1">
            <text:p>2026-05-07 10:00</text:p>
          </table:table-cell>
          <table:table-cell office:value-type="float" office:value="1.4108942" table:style-name="c1">
            <text:p>1.4109</text:p>
          </table:table-cell>
          <table:table-cell office:value-type="float" office:value="-0.8056006889281431" table:style-name="c14">
            <text:p>-0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1:15</text:p>
          </table:table-cell>
          <table:table-cell office:value-type="float" office:value="1.4293143" table:style-name="c1">
            <text:p>1.4293</text:p>
          </table:table-cell>
          <table:table-cell office:value-type="string" table:style-name="c1">
            <text:p>2026-05-09 07:00</text:p>
          </table:table-cell>
          <table:table-cell office:value-type="float" office:value="1.42498715" table:style-name="c1">
            <text:p>1.425</text:p>
          </table:table-cell>
          <table:table-cell office:value-type="float" office:value="-0.5020378871777864" table:style-name="c14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5:45</text:p>
          </table:table-cell>
          <table:table-cell office:value-type="float" office:value="1.44362145" table:style-name="c1">
            <text:p>1.4436</text:p>
          </table:table-cell>
          <table:table-cell office:value-type="string" table:style-name="c1">
            <text:p>2026-05-10 21:15</text:p>
          </table:table-cell>
          <table:table-cell office:value-type="float" office:value="1.4466763" table:style-name="c1">
            <text:p>1.4467</text:p>
          </table:table-cell>
          <table:table-cell office:value-type="float" office:value="0.01128717478533492" table:style-name="c13">
            <text:p>+0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5:00</text:p>
          </table:table-cell>
          <table:table-cell office:value-type="float" office:value="1.4717355" table:style-name="c1">
            <text:p>1.4717</text:p>
          </table:table-cell>
          <table:table-cell office:value-type="string" table:style-name="c1">
            <text:p>2026-05-14 23:45</text:p>
          </table:table-cell>
          <table:table-cell office:value-type="float" office:value="1.4908542" table:style-name="c1">
            <text:p>1.4909</text:p>
          </table:table-cell>
          <table:table-cell office:value-type="float" office:value="1.0965613355252923" table:style-name="c13">
            <text:p>+1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1.3839916499999998" table:style-name="c1">
            <text:p>1.384</text:p>
          </table:table-cell>
          <table:table-cell office:value-type="string" table:style-name="c1">
            <text:p>2026-05-21 10:15</text:p>
          </table:table-cell>
          <table:table-cell office:value-type="float" office:value="1.3713140000000001" table:style-name="c1">
            <text:p>1.3713</text:p>
          </table:table-cell>
          <table:table-cell office:value-type="float" office:value="-1.1140895746010848" table:style-name="c14">
            <text:p>-1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4 23:45</text:p>
          </table:table-cell>
          <table:table-cell office:value-type="float" office:value="1.3543768499999997" table:style-name="c1">
            <text:p>1.3544</text:p>
          </table:table-cell>
          <table:table-cell office:value-type="string" table:style-name="c1">
            <text:p>2026-05-25 03:15</text:p>
          </table:table-cell>
          <table:table-cell office:value-type="float" office:value="1.3459267000000001" table:style-name="c1">
            <text:p>1.3459</text:p>
          </table:table-cell>
          <table:table-cell office:value-type="float" office:value="-0.8225670331931334" table:style-name="c14">
            <text:p>-0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1:15</text:p>
          </table:table-cell>
          <table:table-cell office:value-type="float" office:value="1.3560777" table:style-name="c1">
            <text:p>1.3561</text:p>
          </table:table-cell>
          <table:table-cell office:value-type="string" table:style-name="c1">
            <text:p>2026-05-30 07:15</text:p>
          </table:table-cell>
          <table:table-cell office:value-type="float" office:value="1.34282825" table:style-name="c1">
            <text:p>1.3428</text:p>
          </table:table-cell>
          <table:table-cell office:value-type="float" office:value="-1.1749889900667165" table:style-name="c14">
            <text:p>-1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9:45</text:p>
          </table:table-cell>
          <table:table-cell office:value-type="float" office:value="1.3421707499999997" table:style-name="c1">
            <text:p>1.3422</text:p>
          </table:table-cell>
          <table:table-cell office:value-type="string" table:style-name="c1">
            <text:p>2026-05-31 10:00</text:p>
          </table:table-cell>
          <table:table-cell office:value-type="float" office:value="1.33843045" table:style-name="c1">
            <text:p>1.3384</text:p>
          </table:table-cell>
          <table:table-cell office:value-type="float" office:value="-0.4780183497181567" table:style-name="c14">
            <text:p>-0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