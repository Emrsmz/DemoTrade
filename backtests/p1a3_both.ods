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manifest="urn:oasis:names:tc:opendocument:xmlns:manifest:1.0" office:version="1.2">
  <office:automatic-styles>
    <style:style style:name="su0" style:family="table-column" style:display-name="su0">
      <style:table-column-properties style:column-width="3.2cm"/>
    </style:style>
    <style:style style:name="su1" style:family="table-column" style:display-name="su1">
      <style:table-column-properties style:column-width="2.8cm"/>
    </style:style>
    <style:style style:name="su2" style:family="table-column" style:display-name="su2">
      <style:table-column-properties style:column-width="2.8cm"/>
    </style:style>
    <style:style style:name="su3" style:family="table-column" style:display-name="su3">
      <style:table-column-properties style:column-width="2.6cm"/>
    </style:style>
    <style:style style:name="su4" style:family="table-column" style:display-name="su4">
      <style:table-column-properties style:column-width="2cm"/>
    </style:style>
    <style:style style:name="su5" style:family="table-column" style:display-name="su5">
      <style:table-column-properties style:column-width="2.6cm"/>
    </style:style>
    <style:style style:name="su6" style:family="table-column" style:display-name="su6">
      <style:table-column-properties style:column-width="3.2cm"/>
    </style:style>
    <style:style style:name="c0" style:family="table-cell" style:display-name="c0">
      <style:table-cell-properties fo:border="0.5pt solid #d0d0d0" style:vertical-align="middle" fo:background-color="#D9D9D9"/>
      <style:text-properties fo:color="#000000" fo:font-weight="bold"/>
      <style:paragraph-properties fo:text-align="center"/>
    </style:style>
    <style:style style:name="c1" style:family="table-cell" style:display-name="c1">
      <style:table-cell-properties fo:border="0.5pt solid #d0d0d0" style:vertical-align="middle"/>
      <style:paragraph-properties fo:text-align="center"/>
    </style:style>
    <style:style style:name="c2" style:family="table-cell" style:display-name="c2">
      <style:table-cell-properties fo:border="0.5pt solid #d0d0d0" style:vertical-align="middle"/>
      <style:text-properties fo:color="#000000" fo:font-weight="bold"/>
      <style:paragraph-properties fo:text-align="center"/>
    </style:style>
    <style:style style:name="c3" style:family="table-cell" style:display-name="c3">
      <style:table-cell-properties fo:border="0.5pt solid #d0d0d0" style:vertical-align="middle" fo:background-color="#C6EFCE"/>
      <style:text-properties fo:color="#006100" fo:font-weight="bold"/>
      <style:paragraph-properties fo:text-align="center"/>
    </style:style>
    <style:style style:name="c4" style:family="table-cell" style:display-name="c4">
      <style:table-cell-properties fo:border="0.5pt solid #d0d0d0" style:vertical-align="middle"/>
      <style:text-properties fo:color="#C00000" fo:font-weight="normal"/>
      <style:paragraph-properties fo:text-align="center"/>
    </style:style>
    <style:style style:name="c5" style:family="table-cell" style:display-name="c5">
      <style:table-cell-properties fo:border="0.5pt solid #d0d0d0" style:vertical-align="middle"/>
      <style:text-properties fo:color="#107C41" fo:font-weight="normal"/>
      <style:paragraph-properties fo:text-align="center"/>
    </style:style>
    <style:style style:name="c6" style:family="table-cell" style:display-name="c6">
      <style:table-cell-properties fo:border="0.5pt solid #d0d0d0" style:vertical-align="middle" fo:background-color="#FFC7CE"/>
      <style:text-properties fo:color="#9C0006" fo:font-weight="bold"/>
      <style:paragraph-properties fo:text-align="center"/>
    </style:style>
    <style:style style:name="c7" style:family="table-cell" style:display-name="c7">
      <style:table-cell-properties fo:border="0.5pt solid #d0d0d0" style:vertical-align="middle" fo:background-color="#DDEBF7"/>
      <style:text-properties fo:color="#000000" fo:font-weight="bold"/>
      <style:paragraph-properties fo:text-align="center"/>
    </style:style>
    <style:style style:name="c8" style:family="table-cell" style:display-name="c8">
      <style:table-cell-properties fo:border="0.5pt solid #d0d0d0" style:vertical-align="middle" fo:background-color="#DDEBF7"/>
      <style:text-properties fo:color="#107C41" fo:font-weight="bold"/>
      <style:paragraph-properties fo:text-align="center"/>
    </style:style>
    <style:style style:name="c9" style:family="table-cell" style:display-name="c9">
      <style:table-cell-properties fo:border="0.5pt solid #d0d0d0" style:vertical-align="middle" fo:background-color="#DDEBF7"/>
      <style:text-properties fo:color="#C00000" fo:font-weight="bold"/>
      <style:paragraph-properties fo:text-align="center"/>
    </style:style>
    <style:style style:name="tl0" style:family="table-column" style:display-name="tl0">
      <style:table-column-properties style:column-width="3.2cm"/>
    </style:style>
    <style:style style:name="tl1" style:family="table-column" style:display-name="tl1">
      <style:table-column-properties style:column-width="1.8cm"/>
    </style:style>
    <style:style style:name="tl2" style:family="table-column" style:display-name="tl2">
      <style:table-column-properties style:column-width="3.8cm"/>
    </style:style>
    <style:style style:name="tl3" style:family="table-column" style:display-name="tl3">
      <style:table-column-properties style:column-width="3.2cm"/>
    </style:style>
    <style:style style:name="tl4" style:family="table-column" style:display-name="tl4">
      <style:table-column-properties style:column-width="3.8cm"/>
    </style:style>
    <style:style style:name="tl5" style:family="table-column" style:display-name="tl5">
      <style:table-column-properties style:column-width="3.2cm"/>
    </style:style>
    <style:style style:name="tl6" style:family="table-column" style:display-name="tl6">
      <style:table-column-properties style:column-width="2.4cm"/>
    </style:style>
    <style:style style:name="c10" style:family="table-cell" style:display-name="c10">
      <style:table-cell-properties fo:border="0.5pt solid #d0d0d0" style:vertical-align="middle" fo:background-color="#F2F2F2"/>
      <style:text-properties fo:color="#000000" fo:font-weight="bold"/>
      <style:paragraph-properties fo:text-align="center"/>
    </style:style>
    <style:style style:name="c11" style:family="table-cell" style:display-name="c11">
      <style:table-cell-properties fo:border="0.5pt solid #d0d0d0" style:vertical-align="middle" fo:background-color="#F2F2F2"/>
      <style:paragraph-properties fo:text-align="center"/>
    </style:style>
    <style:style style:name="c12" style:family="table-cell" style:display-name="c12">
      <style:table-cell-properties fo:border="0.5pt solid #d0d0d0" style:vertical-align="middle" fo:background-color="#F2F2F2"/>
      <style:text-properties fo:color="#C00000" fo:font-weight="bold"/>
      <style:paragraph-properties fo:text-align="center"/>
    </style:style>
    <style:style style:name="c13" style:family="table-cell" style:display-name="c13">
      <style:table-cell-properties fo:border="0.5pt solid #d0d0d0" style:vertical-align="middle" fo:background-color="#F2F2F2"/>
      <style:text-properties fo:color="#107C41" fo:font-weight="bold"/>
      <style:paragraph-properties fo:text-align="center"/>
    </style:style>
    <style:style style:name="c14" style:family="table-cell" style:display-name="c14">
      <style:table-cell-properties fo:border="0.5pt solid #d0d0d0" style:vertical-align="middle"/>
      <style:text-properties fo:color="#107C41" fo:font-weight="bold"/>
      <style:paragraph-properties fo:text-align="center"/>
    </style:style>
    <style:style style:name="c15" style:family="table-cell" style:display-name="c15">
      <style:table-cell-properties fo:border="0.5pt solid #d0d0d0" style:vertical-align="middle"/>
      <style:text-properties fo:color="#C00000" fo:font-weight="bold"/>
      <style:paragraph-properties fo:text-align="center"/>
    </style:style>
  </office:automatic-styles>
  <office:body>
    <office:spreadsheet>
      <table:table table:name="Summary">
        <table:table-column table:style-name="su0"/>
        <table:table-column table:style-name="su1"/>
        <table:table-column table:style-name="su2"/>
        <table:table-column table:style-name="su3"/>
        <table:table-column table:style-name="su4"/>
        <table:table-column table:style-name="su5"/>
        <table:table-column table:style-name="su6"/>
        <table:table-row>
          <table:table-cell office:value-type="string" table:style-name="c0">
            <text:p>Coin</text:p>
          </table:table-cell>
          <table:table-cell office:value-type="string" table:style-name="c0">
            <text:p>Bot Return %</text:p>
          </table:table-cell>
          <table:table-cell office:value-type="string" table:style-name="c0">
            <text:p>Buy&amp;Hold %</text:p>
          </table:table-cell>
          <table:table-cell office:value-type="string" table:style-name="c0">
            <text:p>Diff %</text:p>
          </table:table-cell>
          <table:table-cell office:value-type="string" table:style-name="c0">
            <text:p>Trades</text:p>
          </table:table-cell>
          <table:table-cell office:value-type="string" table:style-name="c0">
            <text:p>Win Rate %</text:p>
          </table:table-cell>
          <table:table-cell office:value-type="string" table:style-name="c0">
            <text:p>Max Drawdown %</text:p>
          </table:table-cell>
        </table:table-row>
        <table:table-row>
          <table:table-cell office:value-type="string" table:style-name="c2">
            <text:p>XLM/USDT</text:p>
          </table:table-cell>
          <table:table-cell office:value-type="float" office:value="26.46924103725437" table:style-name="c3">
            <text:p>+26.5</text:p>
          </table:table-cell>
          <table:table-cell office:value-type="float" office:value="49.291237113402055" table:style-name="c1">
            <text:p>+49.3</text:p>
          </table:table-cell>
          <table:table-cell office:value-type="float" office:value="-22.821996076147684" table:style-name="c4">
            <text:p>-22.8</text:p>
          </table:table-cell>
          <table:table-cell office:value-type="float" office:value="4" table:style-name="c1">
            <text:p>4</text:p>
          </table:table-cell>
          <table:table-cell office:value-type="float" office:value="75.0" table:style-name="c1">
            <text:p>75.0</text:p>
          </table:table-cell>
          <table:table-cell office:value-type="float" office:value="8.150943396226408" table:style-name="c1">
            <text:p>8.2</text:p>
          </table:table-cell>
        </table:table-row>
        <table:table-row>
          <table:table-cell office:value-type="string" table:style-name="c2">
            <text:p>TON/USDT</text:p>
          </table:table-cell>
          <table:table-cell office:value-type="float" office:value="20.73099549258759" table:style-name="c3">
            <text:p>+20.7</text:p>
          </table:table-cell>
          <table:table-cell office:value-type="float" office:value="58.14671814671816" table:style-name="c1">
            <text:p>+58.1</text:p>
          </table:table-cell>
          <table:table-cell office:value-type="float" office:value="-37.41572265413057" table:style-name="c4">
            <text:p>-37.4</text:p>
          </table:table-cell>
          <table:table-cell office:value-type="float" office:value="3" table:style-name="c1">
            <text:p>3</text:p>
          </table:table-cell>
          <table:table-cell office:value-type="float" office:value="66.66666666666666" table:style-name="c1">
            <text:p>66.7</text:p>
          </table:table-cell>
          <table:table-cell office:value-type="float" office:value="11.938330020662425" table:style-name="c1">
            <text:p>11.9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float" office:value="8.849508392317967" table:style-name="c3">
            <text:p>+8.8</text:p>
          </table:table-cell>
          <table:table-cell office:value-type="float" office:value="131.27425614489002" table:style-name="c1">
            <text:p>+131.3</text:p>
          </table:table-cell>
          <table:table-cell office:value-type="float" office:value="-122.42474775257205" table:style-name="c4">
            <text:p>-122.4</text:p>
          </table:table-cell>
          <table:table-cell office:value-type="float" office:value="4" table:style-name="c1">
            <text:p>4</text:p>
          </table:table-cell>
          <table:table-cell office:value-type="float" office:value="50.0" table:style-name="c1">
            <text:p>50.0</text:p>
          </table:table-cell>
          <table:table-cell office:value-type="float" office:value="17.06938102005207" table:style-name="c1">
            <text:p>17.1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float" office:value="5.1834120908839845" table:style-name="c3">
            <text:p>+5.2</text:p>
          </table:table-cell>
          <table:table-cell office:value-type="float" office:value="35.891647855530465" table:style-name="c1">
            <text:p>+35.9</text:p>
          </table:table-cell>
          <table:table-cell office:value-type="float" office:value="-30.70823576464648" table:style-name="c4">
            <text:p>-30.7</text:p>
          </table:table-cell>
          <table:table-cell office:value-type="float" office:value="1" table:style-name="c1">
            <text:p>1</text:p>
          </table:table-cell>
          <table:table-cell office:value-type="float" office:value="100.0" table:style-name="c1">
            <text:p>100.0</text:p>
          </table:table-cell>
          <table:table-cell office:value-type="float" office:value="3.3219761499148293" table:style-name="c1">
            <text:p>3.3</text:p>
          </table:table-cell>
        </table:table-row>
        <table:table-row>
          <table:table-cell office:value-type="string" table:style-name="c2">
            <text:p>LINK/USDT</text:p>
          </table:table-cell>
          <table:table-cell office:value-type="float" office:value="3.291665596531175" table:style-name="c3">
            <text:p>+3.3</text:p>
          </table:table-cell>
          <table:table-cell office:value-type="float" office:value="-4.581976112920745" table:style-name="c1">
            <text:p>-4.6</text:p>
          </table:table-cell>
          <table:table-cell office:value-type="float" office:value="7.87364170945192" table:style-name="c5">
            <text:p>+7.9</text:p>
          </table:table-cell>
          <table:table-cell office:value-type="float" office:value="2" table:style-name="c1">
            <text:p>2</text:p>
          </table:table-cell>
          <table:table-cell office:value-type="float" office:value="100.0" table:style-name="c1">
            <text:p>100.0</text:p>
          </table:table-cell>
          <table:table-cell office:value-type="float" office:value="4.108410681622825" table:style-name="c1">
            <text:p>4.1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float" office:value="3.1749853567584982" table:style-name="c3">
            <text:p>+3.2</text:p>
          </table:table-cell>
          <table:table-cell office:value-type="float" office:value="-5.106100476742569" table:style-name="c1">
            <text:p>-5.1</text:p>
          </table:table-cell>
          <table:table-cell office:value-type="float" office:value="8.281085833501066" table:style-name="c5">
            <text:p>+8.3</text:p>
          </table:table-cell>
          <table:table-cell office:value-type="float" office:value="1" table:style-name="c1">
            <text:p>1</text:p>
          </table:table-cell>
          <table:table-cell office:value-type="float" office:value="100.0" table:style-name="c1">
            <text:p>100.0</text:p>
          </table:table-cell>
          <table:table-cell office:value-type="float" office:value="2.682447302551028" table:style-name="c1">
            <text:p>2.7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float" office:value="2.1348931998535816" table:style-name="c3">
            <text:p>+2.1</text:p>
          </table:table-cell>
          <table:table-cell office:value-type="float" office:value="-8.120649651972151" table:style-name="c1">
            <text:p>-8.1</text:p>
          </table:table-cell>
          <table:table-cell office:value-type="float" office:value="10.255542851825734" table:style-name="c5">
            <text:p>+10.3</text:p>
          </table:table-cell>
          <table:table-cell office:value-type="float" office:value="1" table:style-name="c1">
            <text:p>1</text:p>
          </table:table-cell>
          <table:table-cell office:value-type="float" office:value="100.0" table:style-name="c1">
            <text:p>100.0</text:p>
          </table:table-cell>
          <table:table-cell office:value-type="float" office:value="2.7088036117381535" table:style-name="c1">
            <text:p>2.7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float" office:value="0.158576942427851" table:style-name="c3">
            <text:p>+0.2</text:p>
          </table:table-cell>
          <table:table-cell office:value-type="float" office:value="-7.64643237486688" table:style-name="c1">
            <text:p>-7.6</text:p>
          </table:table-cell>
          <table:table-cell office:value-type="float" office:value="7.805009317294731" table:style-name="c5">
            <text:p>+7.8</text:p>
          </table:table-cell>
          <table:table-cell office:value-type="float" office:value="3" table:style-name="c1">
            <text:p>3</text:p>
          </table:table-cell>
          <table:table-cell office:value-type="float" office:value="66.66666666666666" table:style-name="c1">
            <text:p>66.7</text:p>
          </table:table-cell>
          <table:table-cell office:value-type="float" office:value="4.498856483729899" table:style-name="c1">
            <text:p>4.5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float" office:value="0.0" table:style-name="c3">
            <text:p>+0.0</text:p>
          </table:table-cell>
          <table:table-cell office:value-type="float" office:value="-25.899280575539564" table:style-name="c1">
            <text:p>-25.9</text:p>
          </table:table-cell>
          <table:table-cell office:value-type="float" office:value="25.899280575539564" table:style-name="c5">
            <text:p>+25.9</text:p>
          </table:table-cell>
          <table:table-cell office:value-type="float" office:value="0" table:style-name="c1">
            <text:p>0</text:p>
          </table:table-cell>
          <table:table-cell office:value-type="float" office:value="0.0" table:style-name="c1">
            <text:p>0.0</text:p>
          </table:table-cell>
          <table:table-cell office:value-type="float" office:value="0.0" table:style-name="c1">
            <text:p>0.0</text:p>
          </table:table-cell>
        </table:table-row>
        <table:table-row>
          <table:table-cell office:value-type="string" table:style-name="c2">
            <text:p>POL/USDT</text:p>
          </table:table-cell>
          <table:table-cell office:value-type="float" office:value="0.0" table:style-name="c3">
            <text:p>+0.0</text:p>
          </table:table-cell>
          <table:table-cell office:value-type="float" office:value="-11.084220716360118" table:style-name="c1">
            <text:p>-11.1</text:p>
          </table:table-cell>
          <table:table-cell office:value-type="float" office:value="11.084220716360118" table:style-name="c5">
            <text:p>+11.1</text:p>
          </table:table-cell>
          <table:table-cell office:value-type="float" office:value="0" table:style-name="c1">
            <text:p>0</text:p>
          </table:table-cell>
          <table:table-cell office:value-type="float" office:value="0.0" table:style-name="c1">
            <text:p>0.0</text:p>
          </table:table-cell>
          <table:table-cell office:value-type="float" office:value="0.0" table:style-name="c1">
            <text:p>0.0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float" office:value="0.0" table:style-name="c3">
            <text:p>+0.0</text:p>
          </table:table-cell>
          <table:table-cell office:value-type="float" office:value="0.21344717182496167" table:style-name="c1">
            <text:p>+0.2</text:p>
          </table:table-cell>
          <table:table-cell office:value-type="float" office:value="-0.21344717182496167" table:style-name="c4">
            <text:p>-0.2</text:p>
          </table:table-cell>
          <table:table-cell office:value-type="float" office:value="0" table:style-name="c1">
            <text:p>0</text:p>
          </table:table-cell>
          <table:table-cell office:value-type="float" office:value="0.0" table:style-name="c1">
            <text:p>0.0</text:p>
          </table:table-cell>
          <table:table-cell office:value-type="float" office:value="0.0" table:style-name="c1">
            <text:p>0.0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float" office:value="0.0" table:style-name="c3">
            <text:p>+0.0</text:p>
          </table:table-cell>
          <table:table-cell office:value-type="float" office:value="-5.694980694980697" table:style-name="c1">
            <text:p>-5.7</text:p>
          </table:table-cell>
          <table:table-cell office:value-type="float" office:value="5.694980694980697" table:style-name="c5">
            <text:p>+5.7</text:p>
          </table:table-cell>
          <table:table-cell office:value-type="float" office:value="0" table:style-name="c1">
            <text:p>0</text:p>
          </table:table-cell>
          <table:table-cell office:value-type="float" office:value="0.0" table:style-name="c1">
            <text:p>0.0</text:p>
          </table:table-cell>
          <table:table-cell office:value-type="float" office:value="0.0" table:style-name="c1">
            <text:p>0.0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float" office:value="-0.12660617839641192" table:style-name="c6">
            <text:p>-0.1</text:p>
          </table:table-cell>
          <table:table-cell office:value-type="float" office:value="19.465917076598735" table:style-name="c1">
            <text:p>+19.5</text:p>
          </table:table-cell>
          <table:table-cell office:value-type="float" office:value="-19.592523254995147" table:style-name="c4">
            <text:p>-19.6</text:p>
          </table:table-cell>
          <table:table-cell office:value-type="float" office:value="2" table:style-name="c1">
            <text:p>2</text:p>
          </table:table-cell>
          <table:table-cell office:value-type="float" office:value="50.0" table:style-name="c1">
            <text:p>50.0</text:p>
          </table:table-cell>
          <table:table-cell office:value-type="float" office:value="2.123945301134718" table:style-name="c1">
            <text:p>2.1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float" office:value="-0.8871742899928108" table:style-name="c6">
            <text:p>-0.9</text:p>
          </table:table-cell>
          <table:table-cell office:value-type="float" office:value="-27.420973406924244" table:style-name="c1">
            <text:p>-27.4</text:p>
          </table:table-cell>
          <table:table-cell office:value-type="float" office:value="26.533799116931434" table:style-name="c5">
            <text:p>+26.5</text:p>
          </table:table-cell>
          <table:table-cell office:value-type="float" office:value="2" table:style-name="c1">
            <text:p>2</text:p>
          </table:table-cell>
          <table:table-cell office:value-type="float" office:value="50.0" table:style-name="c1">
            <text:p>50.0</text:p>
          </table:table-cell>
          <table:table-cell office:value-type="float" office:value="5.7943022694350566" table:style-name="c1">
            <text:p>5.8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float" office:value="-1.1503358031734934" table:style-name="c6">
            <text:p>-1.2</text:p>
          </table:table-cell>
          <table:table-cell office:value-type="float" office:value="-3.214285714285714" table:style-name="c1">
            <text:p>-3.2</text:p>
          </table:table-cell>
          <table:table-cell office:value-type="float" office:value="2.0639499111122204" table:style-name="c5">
            <text:p>+2.1</text:p>
          </table:table-cell>
          <table:table-cell office:value-type="float" office:value="1" table:style-name="c1">
            <text:p>1</text:p>
          </table:table-cell>
          <table:table-cell office:value-type="float" office:value="0.0" table:style-name="c1">
            <text:p>0.0</text:p>
          </table:table-cell>
          <table:table-cell office:value-type="float" office:value="7.590759075907585" table:style-name="c1">
            <text:p>7.6</text:p>
          </table:table-cell>
        </table:table-row>
        <table:table-row>
          <table:table-cell office:value-type="string" table:style-name="c2">
            <text:p>ADA/USDT</text:p>
          </table:table-cell>
          <table:table-cell office:value-type="float" office:value="-1.1710322420249781" table:style-name="c6">
            <text:p>-1.2</text:p>
          </table:table-cell>
          <table:table-cell office:value-type="float" office:value="-18.50494686698424" table:style-name="c1">
            <text:p>-18.5</text:p>
          </table:table-cell>
          <table:table-cell office:value-type="float" office:value="17.333914624959263" table:style-name="c5">
            <text:p>+17.3</text:p>
          </table:table-cell>
          <table:table-cell office:value-type="float" office:value="2" table:style-name="c1">
            <text:p>2</text:p>
          </table:table-cell>
          <table:table-cell office:value-type="float" office:value="50.0" table:style-name="c1">
            <text:p>50.0</text:p>
          </table:table-cell>
          <table:table-cell office:value-type="float" office:value="5.65433931325407" table:style-name="c1">
            <text:p>5.7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float" office:value="-1.7372722681917137" table:style-name="c6">
            <text:p>-1.7</text:p>
          </table:table-cell>
          <table:table-cell office:value-type="float" office:value="-21.671195652173914" table:style-name="c1">
            <text:p>-21.7</text:p>
          </table:table-cell>
          <table:table-cell office:value-type="float" office:value="19.9339233839822" table:style-name="c5">
            <text:p>+19.9</text:p>
          </table:table-cell>
          <table:table-cell office:value-type="float" office:value="1" table:style-name="c1">
            <text:p>1</text:p>
          </table:table-cell>
          <table:table-cell office:value-type="float" office:value="0.0" table:style-name="c1">
            <text:p>0.0</text:p>
          </table:table-cell>
          <table:table-cell office:value-type="float" office:value="3.982576228998153" table:style-name="c1">
            <text:p>4.0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float" office:value="-1.7828726602815665" table:style-name="c6">
            <text:p>-1.8</text:p>
          </table:table-cell>
          <table:table-cell office:value-type="float" office:value="-10.776545166402533" table:style-name="c1">
            <text:p>-10.8</text:p>
          </table:table-cell>
          <table:table-cell office:value-type="float" office:value="8.993672506120966" table:style-name="c5">
            <text:p>+9.0</text:p>
          </table:table-cell>
          <table:table-cell office:value-type="float" office:value="2" table:style-name="c1">
            <text:p>2</text:p>
          </table:table-cell>
          <table:table-cell office:value-type="float" office:value="50.0" table:style-name="c1">
            <text:p>50.0</text:p>
          </table:table-cell>
          <table:table-cell office:value-type="float" office:value="5.524650454497768" table:style-name="c1">
            <text:p>5.5</text:p>
          </table:table-cell>
        </table:table-row>
        <table:table-row>
          <table:table-cell office:value-type="string" table:style-name="c2">
            <text:p>BTC/USDT</text:p>
          </table:table-cell>
          <table:table-cell office:value-type="float" office:value="-1.88400508610805" table:style-name="c6">
            <text:p>-1.9</text:p>
          </table:table-cell>
          <table:table-cell office:value-type="float" office:value="-4.198424928646263" table:style-name="c1">
            <text:p>-4.2</text:p>
          </table:table-cell>
          <table:table-cell office:value-type="float" office:value="2.3144198425382134" table:style-name="c5">
            <text:p>+2.3</text:p>
          </table:table-cell>
          <table:table-cell office:value-type="float" office:value="2" table:style-name="c1">
            <text:p>2</text:p>
          </table:table-cell>
          <table:table-cell office:value-type="float" office:value="50.0" table:style-name="c1">
            <text:p>50.0</text:p>
          </table:table-cell>
          <table:table-cell office:value-type="float" office:value="4.388550509487742" table:style-name="c1">
            <text:p>4.4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float" office:value="-2.028764104412994" table:style-name="c6">
            <text:p>-2.0</text:p>
          </table:table-cell>
          <table:table-cell office:value-type="float" office:value="-12.086536742356515" table:style-name="c1">
            <text:p>-12.1</text:p>
          </table:table-cell>
          <table:table-cell office:value-type="float" office:value="10.05777263794352" table:style-name="c5">
            <text:p>+10.1</text:p>
          </table:table-cell>
          <table:table-cell office:value-type="float" office:value="1" table:style-name="c1">
            <text:p>1</text:p>
          </table:table-cell>
          <table:table-cell office:value-type="float" office:value="0.0" table:style-name="c1">
            <text:p>0.0</text:p>
          </table:table-cell>
          <table:table-cell office:value-type="float" office:value="2.5264876021314153" table:style-name="c1">
            <text:p>2.5</text:p>
          </table:table-cell>
        </table:table-row>
        <table:table-row>
          <table:table-cell office:value-type="string" table:style-name="c2">
            <text:p>SOL/USDT</text:p>
          </table:table-cell>
          <table:table-cell office:value-type="float" office:value="-2.612348110327628" table:style-name="c6">
            <text:p>-2.6</text:p>
          </table:table-cell>
          <table:table-cell office:value-type="float" office:value="-12.565154707774202" table:style-name="c1">
            <text:p>-12.6</text:p>
          </table:table-cell>
          <table:table-cell office:value-type="float" office:value="9.952806597446575" table:style-name="c5">
            <text:p>+10.0</text:p>
          </table:table-cell>
          <table:table-cell office:value-type="float" office:value="2" table:style-name="c1">
            <text:p>2</text:p>
          </table:table-cell>
          <table:table-cell office:value-type="float" office:value="0.0" table:style-name="c1">
            <text:p>0.0</text:p>
          </table:table-cell>
          <table:table-cell office:value-type="float" office:value="3.6652361104218585" table:style-name="c1">
            <text:p>3.7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float" office:value="-2.6640853974198535" table:style-name="c6">
            <text:p>-2.7</text:p>
          </table:table-cell>
          <table:table-cell office:value-type="float" office:value="-10.129096325719948" table:style-name="c1">
            <text:p>-10.1</text:p>
          </table:table-cell>
          <table:table-cell office:value-type="float" office:value="7.465010928300094" table:style-name="c5">
            <text:p>+7.5</text:p>
          </table:table-cell>
          <table:table-cell office:value-type="float" office:value="1" table:style-name="c1">
            <text:p>1</text:p>
          </table:table-cell>
          <table:table-cell office:value-type="float" office:value="0.0" table:style-name="c1">
            <text:p>0.0</text:p>
          </table:table-cell>
          <table:table-cell office:value-type="float" office:value="3.9024390243902363" table:style-name="c1">
            <text:p>3.9</text:p>
          </table:table-cell>
        </table:table-row>
        <table:table-row>
          <table:table-cell office:value-type="string" table:style-name="c2">
            <text:p>BCH/USDT</text:p>
          </table:table-cell>
          <table:table-cell office:value-type="float" office:value="-3.2431443135665408" table:style-name="c6">
            <text:p>-3.2</text:p>
          </table:table-cell>
          <table:table-cell office:value-type="float" office:value="-38.01131418624892" table:style-name="c1">
            <text:p>-38.0</text:p>
          </table:table-cell>
          <table:table-cell office:value-type="float" office:value="34.76816987268238" table:style-name="c5">
            <text:p>+34.8</text:p>
          </table:table-cell>
          <table:table-cell office:value-type="float" office:value="1" table:style-name="c1">
            <text:p>1</text:p>
          </table:table-cell>
          <table:table-cell office:value-type="float" office:value="0.0" table:style-name="c1">
            <text:p>0.0</text:p>
          </table:table-cell>
          <table:table-cell office:value-type="float" office:value="5.099147026022301" table:style-name="c1">
            <text:p>5.1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float" office:value="-3.8763835944421654" table:style-name="c6">
            <text:p>-3.9</text:p>
          </table:table-cell>
          <table:table-cell office:value-type="float" office:value="96.8475073313783" table:style-name="c1">
            <text:p>+96.8</text:p>
          </table:table-cell>
          <table:table-cell office:value-type="float" office:value="-100.72389092582046" table:style-name="c4">
            <text:p>-100.7</text:p>
          </table:table-cell>
          <table:table-cell office:value-type="float" office:value="2" table:style-name="c1">
            <text:p>2</text:p>
          </table:table-cell>
          <table:table-cell office:value-type="float" office:value="50.0" table:style-name="c1">
            <text:p>50.0</text:p>
          </table:table-cell>
          <table:table-cell office:value-type="float" office:value="9.977793123876094" table:style-name="c1">
            <text:p>10.0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float" office:value="-4.5084543077106565" table:style-name="c6">
            <text:p>-4.5</text:p>
          </table:table-cell>
          <table:table-cell office:value-type="float" office:value="-8.512720156555769" table:style-name="c1">
            <text:p>-8.5</text:p>
          </table:table-cell>
          <table:table-cell office:value-type="float" office:value="4.004265848845113" table:style-name="c5">
            <text:p>+4.0</text:p>
          </table:table-cell>
          <table:table-cell office:value-type="float" office:value="4" table:style-name="c1">
            <text:p>4</text:p>
          </table:table-cell>
          <table:table-cell office:value-type="float" office:value="50.0" table:style-name="c1">
            <text:p>50.0</text:p>
          </table:table-cell>
          <table:table-cell office:value-type="float" office:value="17.124956088903136" table:style-name="c1">
            <text:p>17.1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float" office:value="-5.194304858862085" table:style-name="c6">
            <text:p>-5.2</text:p>
          </table:table-cell>
          <table:table-cell office:value-type="float" office:value="-4.489164086687317" table:style-name="c1">
            <text:p>-4.5</text:p>
          </table:table-cell>
          <table:table-cell office:value-type="float" office:value="-0.7051407721747687" table:style-name="c4">
            <text:p>-0.7</text:p>
          </table:table-cell>
          <table:table-cell office:value-type="float" office:value="1" table:style-name="c1">
            <text:p>1</text:p>
          </table:table-cell>
          <table:table-cell office:value-type="float" office:value="0.0" table:style-name="c1">
            <text:p>0.0</text:p>
          </table:table-cell>
          <table:table-cell office:value-type="float" office:value="6.786485911122964" table:style-name="c1">
            <text:p>6.8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float" office:value="-5.84328834925925" table:style-name="c6">
            <text:p>-5.8</text:p>
          </table:table-cell>
          <table:table-cell office:value-type="float" office:value="3.6605580624366927" table:style-name="c1">
            <text:p>+3.7</text:p>
          </table:table-cell>
          <table:table-cell office:value-type="float" office:value="-9.503846411695942" table:style-name="c4">
            <text:p>-9.5</text:p>
          </table:table-cell>
          <table:table-cell office:value-type="float" office:value="2" table:style-name="c1">
            <text:p>2</text:p>
          </table:table-cell>
          <table:table-cell office:value-type="float" office:value="50.0" table:style-name="c1">
            <text:p>50.0</text:p>
          </table:table-cell>
          <table:table-cell office:value-type="float" office:value="7.768722440730658" table:style-name="c1">
            <text:p>7.8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float" office:value="-6.546721514600564" table:style-name="c6">
            <text:p>-6.5</text:p>
          </table:table-cell>
          <table:table-cell office:value-type="float" office:value="3.685711268349358" table:style-name="c1">
            <text:p>+3.7</text:p>
          </table:table-cell>
          <table:table-cell office:value-type="float" office:value="-10.232432782949921" table:style-name="c4">
            <text:p>-10.2</text:p>
          </table:table-cell>
          <table:table-cell office:value-type="float" office:value="4" table:style-name="c1">
            <text:p>4</text:p>
          </table:table-cell>
          <table:table-cell office:value-type="float" office:value="25.0" table:style-name="c1">
            <text:p>25.0</text:p>
          </table:table-cell>
          <table:table-cell office:value-type="float" office:value="8.835124640700707" table:style-name="c1">
            <text:p>8.8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float" office:value="-7.704366528014248" table:style-name="c6">
            <text:p>-7.7</text:p>
          </table:table-cell>
          <table:table-cell office:value-type="float" office:value="-10.603264726756564" table:style-name="c1">
            <text:p>-10.6</text:p>
          </table:table-cell>
          <table:table-cell office:value-type="float" office:value="2.898898198742316" table:style-name="c5">
            <text:p>+2.9</text:p>
          </table:table-cell>
          <table:table-cell office:value-type="float" office:value="3" table:style-name="c1">
            <text:p>3</text:p>
          </table:table-cell>
          <table:table-cell office:value-type="float" office:value="0.0" table:style-name="c1">
            <text:p>0.0</text:p>
          </table:table-cell>
          <table:table-cell office:value-type="float" office:value="8.160618839852987" table:style-name="c1">
            <text:p>8.2</text:p>
          </table:table-cell>
        </table:table-row>
        <table:table-row>
          <table:table-cell office:value-type="string" table:style-name="c2">
            <text:p>HBAR/USDT</text:p>
          </table:table-cell>
          <table:table-cell office:value-type="float" office:value="-10.93282232795608" table:style-name="c6">
            <text:p>-10.9</text:p>
          </table:table-cell>
          <table:table-cell office:value-type="float" office:value="-11.241494921605359" table:style-name="c1">
            <text:p>-11.2</text:p>
          </table:table-cell>
          <table:table-cell office:value-type="float" office:value="0.3086725936492787" table:style-name="c5">
            <text:p>+0.3</text:p>
          </table:table-cell>
          <table:table-cell office:value-type="float" office:value="4" table:style-name="c1">
            <text:p>4</text:p>
          </table:table-cell>
          <table:table-cell office:value-type="float" office:value="0.0" table:style-name="c1">
            <text:p>0.0</text:p>
          </table:table-cell>
          <table:table-cell office:value-type="float" office:value="16.215070903342067" table:style-name="c1">
            <text:p>16.2</text:p>
          </table:table-cell>
        </table:table-row>
        <table:table-row>
          <table:table-cell office:value-type="string" table:style-name="c7">
            <text:p>AVERAGE</text:p>
          </table:table-cell>
          <table:table-cell office:value-type="float" office:value="0.20330987246246426" table:style-name="c8">
            <text:p>+0.2</text:p>
          </table:table-cell>
          <table:table-cell office:value-type="float" office:value="4.563941399287484" table:style-name="c7">
            <text:p>+4.6</text:p>
          </table:table-cell>
          <table:table-cell office:value-type="float" office:value="-4.360631526825019" table:style-name="c9">
            <text:p>-4.4</text:p>
          </table:table-cell>
          <table:table-cell office:value-type="float" office:value="56" table:style-name="c7">
            <text:p>56</text:p>
          </table:table-cell>
          <table:table-cell office:value-type="float" office:value="36.11111111111111" table:style-name="c7">
            <text:p>36.1</text:p>
          </table:table-cell>
          <table:table-cell office:value-type="float" office:value="5.986678451023573" table:style-name="c7">
            <text:p>6.0</text:p>
          </table:table-cell>
        </table:table-row>
      </table:table>
      <table:table table:name="Trade Log">
        <table:table-column table:style-name="tl0"/>
        <table:table-column table:style-name="tl1"/>
        <table:table-column table:style-name="tl2"/>
        <table:table-column table:style-name="tl3"/>
        <table:table-column table:style-name="tl4"/>
        <table:table-column table:style-name="tl5"/>
        <table:table-column table:style-name="tl6"/>
        <table:table-row>
          <table:table-cell office:value-type="string" table:style-name="c0">
            <text:p>Coin</text:p>
          </table:table-cell>
          <table:table-cell office:value-type="string" table:style-name="c0">
            <text:p>Type</text:p>
          </table:table-cell>
          <table:table-cell office:value-type="string" table:style-name="c0">
            <text:p>Entry Date</text:p>
          </table:table-cell>
          <table:table-cell office:value-type="string" table:style-name="c0">
            <text:p>Entry Price</text:p>
          </table:table-cell>
          <table:table-cell office:value-type="string" table:style-name="c0">
            <text:p>Exit Date</text:p>
          </table:table-cell>
          <table:table-cell office:value-type="string" table:style-name="c0">
            <text:p>Exit Price</text:p>
          </table:table-cell>
          <table:table-cell office:value-type="string" table:style-name="c0">
            <text:p>P/L %</text:p>
          </table:table-cell>
        </table:table-row>
        <table:table-row>
          <table:table-cell office:value-type="string" table:style-name="c10">
            <text:p>ADA/USDT</text:p>
          </table:table-cell>
          <table:table-cell office:value-type="string" table:style-name="c11">
            <text:p>LONG</text:p>
          </table:table-cell>
          <table:table-cell office:value-type="string" table:style-name="c11">
            <text:p>2026-03-10 15:00</text:p>
          </table:table-cell>
          <table:table-cell office:value-type="float" office:value="0.27223605" table:style-name="c11">
            <text:p>0.27224</text:p>
          </table:table-cell>
          <table:table-cell office:value-type="string" table:style-name="c11">
            <text:p>2026-03-11 15:00</text:p>
          </table:table-cell>
          <table:table-cell office:value-type="float" office:value="0.2636681" table:style-name="c11">
            <text:p>0.26367</text:p>
          </table:table-cell>
          <table:table-cell office:value-type="float" office:value="-3.340858983187567" table:style-name="c12">
            <text:p>-3.3</text:p>
          </table:table-cell>
        </table:table-row>
        <table:table-row>
          <table:table-cell office:value-type="string" table:style-name="c10">
            <text:p>ADA/USDT</text:p>
          </table:table-cell>
          <table:table-cell office:value-type="string" table:style-name="c11">
            <text:p>LONG</text:p>
          </table:table-cell>
          <table:table-cell office:value-type="string" table:style-name="c11">
            <text:p>2026-03-16 03:45</text:p>
          </table:table-cell>
          <table:table-cell office:value-type="float" office:value="0.2783391" table:style-name="c11">
            <text:p>0.27834</text:p>
          </table:table-cell>
          <table:table-cell office:value-type="string" table:style-name="c11">
            <text:p>2026-03-17 03:45</text:p>
          </table:table-cell>
          <table:table-cell office:value-type="float" office:value="0.28515735000000003" table:style-name="c11">
            <text:p>0.28516</text:p>
          </table:table-cell>
          <table:table-cell office:value-type="float" office:value="2.244823115886363" table:style-name="c13">
            <text:p>+2.2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4 16:00</text:p>
          </table:table-cell>
          <table:table-cell office:value-type="float" office:value="0.10915455" table:style-name="c1">
            <text:p>0.10915</text:p>
          </table:table-cell>
          <table:table-cell office:value-type="string" table:style-name="c1">
            <text:p>2026-04-25 16:00</text:p>
          </table:table-cell>
          <table:table-cell office:value-type="float" office:value="0.11504245" table:style-name="c1">
            <text:p>0.11504</text:p>
          </table:table-cell>
          <table:table-cell office:value-type="float" office:value="5.1834120908839765" table:style-name="c14">
            <text:p>+5.2</text:p>
          </table:table-cell>
        </table:table-row>
        <table:table-row>
          <table:table-cell office:value-type="string" table:style-name="c10">
            <text:p>APT/USDT</text:p>
          </table:table-cell>
          <table:table-cell office:value-type="string" table:style-name="c11">
            <text:p>LONG</text:p>
          </table:table-cell>
          <table:table-cell office:value-type="string" table:style-name="c11">
            <text:p>2026-03-16 14:00</text:p>
          </table:table-cell>
          <table:table-cell office:value-type="float" office:value="1.012506" table:style-name="c11">
            <text:p>1.0125</text:p>
          </table:table-cell>
          <table:table-cell office:value-type="string" table:style-name="c11">
            <text:p>2026-03-17 14:00</text:p>
          </table:table-cell>
          <table:table-cell office:value-type="float" office:value="0.987506" table:style-name="c11">
            <text:p>0.98751</text:p>
          </table:table-cell>
          <table:table-cell office:value-type="float" office:value="-2.6640853974198575" table:style-name="c12">
            <text:p>-2.7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15:00</text:p>
          </table:table-cell>
          <table:table-cell office:value-type="float" office:value="9.64482" table:style-name="c1">
            <text:p>9.6448</text:p>
          </table:table-cell>
          <table:table-cell office:value-type="string" table:style-name="c1">
            <text:p>2026-03-11 15:00</text:p>
          </table:table-cell>
          <table:table-cell office:value-type="float" office:value="9.685155" table:style-name="c1">
            <text:p>9.6852</text:p>
          </table:table-cell>
          <table:table-cell office:value-type="float" office:value="0.21746777187132693" table:style-name="c14">
            <text:p>+0.2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3:45</text:p>
          </table:table-cell>
          <table:table-cell office:value-type="float" office:value="10.30515" table:style-name="c1">
            <text:p>10.305</text:p>
          </table:table-cell>
          <table:table-cell office:value-type="string" table:style-name="c1">
            <text:p>2026-03-17 03:45</text:p>
          </table:table-cell>
          <table:table-cell office:value-type="float" office:value="10.294850000000002" table:style-name="c1">
            <text:p>10.295</text:p>
          </table:table-cell>
          <table:table-cell office:value-type="float" office:value="-0.2996502248875266" table:style-name="c15">
            <text:p>-0.3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2:15</text:p>
          </table:table-cell>
          <table:table-cell office:value-type="float" office:value="9.214605" table:style-name="c1">
            <text:p>9.2146</text:p>
          </table:table-cell>
          <table:table-cell office:value-type="string" table:style-name="c1">
            <text:p>2026-05-05 02:15</text:p>
          </table:table-cell>
          <table:table-cell office:value-type="float" office:value="9.255370000000001" table:style-name="c1">
            <text:p>9.2554</text:p>
          </table:table-cell>
          <table:table-cell office:value-type="float" office:value="0.2416111745430216" table:style-name="c14">
            <text:p>+0.2</text:p>
          </table:table-cell>
        </table:table-row>
        <table:table-row>
          <table:table-cell office:value-type="string" table:style-name="c10">
            <text:p>BCH/USDT</text:p>
          </table:table-cell>
          <table:table-cell office:value-type="string" table:style-name="c11">
            <text:p>LONG</text:p>
          </table:table-cell>
          <table:table-cell office:value-type="string" table:style-name="c11">
            <text:p>2026-05-06 04:45</text:p>
          </table:table-cell>
          <table:table-cell office:value-type="float" office:value="474.4371" table:style-name="c11">
            <text:p>474.44</text:p>
          </table:table-cell>
          <table:table-cell office:value-type="string" table:style-name="c11">
            <text:p>2026-05-07 04:45</text:p>
          </table:table-cell>
          <table:table-cell office:value-type="float" office:value="459.9699" table:style-name="c11">
            <text:p>459.97</text:p>
          </table:table-cell>
          <table:table-cell office:value-type="float" office:value="-3.243144313566537" table:style-name="c12">
            <text:p>-3.2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2:15</text:p>
          </table:table-cell>
          <table:table-cell office:value-type="float" office:value="623.8317599999999" table:style-name="c1">
            <text:p>623.83</text:p>
          </table:table-cell>
          <table:table-cell office:value-type="string" table:style-name="c1">
            <text:p>2026-05-05 02:15</text:p>
          </table:table-cell>
          <table:table-cell office:value-type="float" office:value="625.14727" table:style-name="c1">
            <text:p>625.15</text:p>
          </table:table-cell>
          <table:table-cell office:value-type="float" office:value="0.010554224951642155" table:style-name="c14">
            <text:p>+0.0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6-01 09:45</text:p>
          </table:table-cell>
          <table:table-cell office:value-type="float" office:value="717.9187799999999" table:style-name="c1">
            <text:p>717.92</text:p>
          </table:table-cell>
          <table:table-cell office:value-type="string" table:style-name="c1">
            <text:p>2026-06-01 16:00</text:p>
          </table:table-cell>
          <table:table-cell office:value-type="float" office:value="677.251205" table:style-name="c1">
            <text:p>677.25</text:p>
          </table:table-cell>
          <table:table-cell office:value-type="float" office:value="-5.853224811697332" table:style-name="c15">
            <text:p>-5.9</text:p>
          </table:table-cell>
        </table:table-row>
        <table:table-row>
          <table:table-cell office:value-type="string" table:style-name="c10">
            <text:p>BTC/USDT</text:p>
          </table:table-cell>
          <table:table-cell office:value-type="string" table:style-name="c11">
            <text:p>LONG</text:p>
          </table:table-cell>
          <table:table-cell office:value-type="string" table:style-name="c11">
            <text:p>2026-04-14 14:00</text:p>
          </table:table-cell>
          <table:table-cell office:value-type="float" office:value="75563.70297" table:style-name="c11">
            <text:p>75564</text:p>
          </table:table-cell>
          <table:table-cell office:value-type="string" table:style-name="c11">
            <text:p>2026-04-15 14:00</text:p>
          </table:table-cell>
          <table:table-cell office:value-type="float" office:value="74026.878045" table:style-name="c11">
            <text:p>74027</text:p>
          </table:table-cell>
          <table:table-cell office:value-type="float" office:value="-2.229648082335034" table:style-name="c12">
            <text:p>-2.2</text:p>
          </table:table-cell>
        </table:table-row>
        <table:table-row>
          <table:table-cell office:value-type="string" table:style-name="c10">
            <text:p>BTC/USDT</text:p>
          </table:table-cell>
          <table:table-cell office:value-type="string" table:style-name="c11">
            <text:p>LONG</text:p>
          </table:table-cell>
          <table:table-cell office:value-type="string" table:style-name="c11">
            <text:p>2026-05-04 02:15</text:p>
          </table:table-cell>
          <table:table-cell office:value-type="float" office:value="79972.656345" table:style-name="c11">
            <text:p>79973</text:p>
          </table:table-cell>
          <table:table-cell office:value-type="string" table:style-name="c11">
            <text:p>2026-05-05 02:15</text:p>
          </table:table-cell>
          <table:table-cell office:value-type="float" office:value="80416.13182000001" table:style-name="c11">
            <text:p>80416</text:p>
          </table:table-cell>
          <table:table-cell office:value-type="float" office:value="0.35352536781094734" table:style-name="c13">
            <text:p>+0.4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6 09:45</text:p>
          </table:table-cell>
          <table:table-cell office:value-type="float" office:value="0.09306651" table:style-name="c1">
            <text:p>0.093067</text:p>
          </table:table-cell>
          <table:table-cell office:value-type="string" table:style-name="c1">
            <text:p>2026-04-07 04:00</text:p>
          </table:table-cell>
          <table:table-cell office:value-type="float" office:value="0.09047474000000001" table:style-name="c1">
            <text:p>0.090475</text:p>
          </table:table-cell>
          <table:table-cell office:value-type="float" office:value="-2.979190909017637" table:style-name="c15">
            <text:p>-3.0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14:00</text:p>
          </table:table-cell>
          <table:table-cell office:value-type="float" office:value="0.09711853499999999" table:style-name="c1">
            <text:p>0.097119</text:p>
          </table:table-cell>
          <table:table-cell office:value-type="string" table:style-name="c1">
            <text:p>2026-04-15 14:00</text:p>
          </table:table-cell>
          <table:table-cell office:value-type="float" office:value="0.09338328500000001" table:style-name="c1">
            <text:p>0.093383</text:p>
          </table:table-cell>
          <table:table-cell office:value-type="float" office:value="-4.038284954272619" table:style-name="c15">
            <text:p>-4.0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02:45</text:p>
          </table:table-cell>
          <table:table-cell office:value-type="float" office:value="0.09646821" table:style-name="c1">
            <text:p>0.096468</text:p>
          </table:table-cell>
          <table:table-cell office:value-type="string" table:style-name="c1">
            <text:p>2026-04-17 02:45</text:p>
          </table:table-cell>
          <table:table-cell office:value-type="float" office:value="0.09770112500000001" table:style-name="c1">
            <text:p>0.097701</text:p>
          </table:table-cell>
          <table:table-cell office:value-type="float" office:value="1.0755983252151102" table:style-name="c14">
            <text:p>+1.1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23:00</text:p>
          </table:table-cell>
          <table:table-cell office:value-type="float" office:value="0.11193593999999998" table:style-name="c1">
            <text:p>0.11194</text:p>
          </table:table-cell>
          <table:table-cell office:value-type="string" table:style-name="c1">
            <text:p>2026-05-11 23:00</text:p>
          </table:table-cell>
          <table:table-cell office:value-type="float" office:value="0.11138428" table:style-name="c1">
            <text:p>0.11138</text:p>
          </table:table-cell>
          <table:table-cell office:value-type="float" office:value="-0.6917502776319862" table:style-name="c15">
            <text:p>-0.7</text:p>
          </table:table-cell>
        </table:table-row>
        <table:table-row>
          <table:table-cell office:value-type="string" table:style-name="c10">
            <text:p>ETC/USDT</text:p>
          </table:table-cell>
          <table:table-cell office:value-type="string" table:style-name="c11">
            <text:p>LONG</text:p>
          </table:table-cell>
          <table:table-cell office:value-type="string" table:style-name="c11">
            <text:p>2026-05-04 02:15</text:p>
          </table:table-cell>
          <table:table-cell office:value-type="float" office:value="8.604299999999999" table:style-name="c11">
            <text:p>8.6043</text:p>
          </table:table-cell>
          <table:table-cell office:value-type="string" table:style-name="c11">
            <text:p>2026-05-05 02:15</text:p>
          </table:table-cell>
          <table:table-cell office:value-type="float" office:value="8.805595" table:style-name="c11">
            <text:p>8.8056</text:p>
          </table:table-cell>
          <table:table-cell office:value-type="float" office:value="2.1348931998535825" table:style-name="c13">
            <text:p>+2.1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3:45</text:p>
          </table:table-cell>
          <table:table-cell office:value-type="float" office:value="2239.5192" table:style-name="c1">
            <text:p>2239.5</text:p>
          </table:table-cell>
          <table:table-cell office:value-type="string" table:style-name="c1">
            <text:p>2026-03-17 03:45</text:p>
          </table:table-cell>
          <table:table-cell office:value-type="float" office:value="2315.251795" table:style-name="c1">
            <text:p>2315.3</text:p>
          </table:table-cell>
          <table:table-cell office:value-type="float" office:value="3.1749853567585085" table:style-name="c14">
            <text:p>+3.2</text:p>
          </table:table-cell>
        </table:table-row>
        <table:table-row>
          <table:table-cell office:value-type="string" table:style-name="c10">
            <text:p>FIL/USDT</text:p>
          </table:table-cell>
          <table:table-cell office:value-type="string" table:style-name="c11">
            <text:p>LONG</text:p>
          </table:table-cell>
          <table:table-cell office:value-type="string" table:style-name="c11">
            <text:p>2026-03-16 16:30</text:p>
          </table:table-cell>
          <table:table-cell office:value-type="float" office:value="0.9534765" table:style-name="c11">
            <text:p>0.95348</text:p>
          </table:table-cell>
          <table:table-cell office:value-type="string" table:style-name="c11">
            <text:p>2026-03-17 16:30</text:p>
          </table:table-cell>
          <table:table-cell office:value-type="float" office:value="0.9655170000000001" table:style-name="c11">
            <text:p>0.96552</text:p>
          </table:table-cell>
          <table:table-cell office:value-type="float" office:value="1.0603755328002507" table:style-name="c13">
            <text:p>+1.1</text:p>
          </table:table-cell>
        </table:table-row>
        <table:table-row>
          <table:table-cell office:value-type="string" table:style-name="c10">
            <text:p>FIL/USDT</text:p>
          </table:table-cell>
          <table:table-cell office:value-type="string" table:style-name="c11">
            <text:p>LONG</text:p>
          </table:table-cell>
          <table:table-cell office:value-type="string" table:style-name="c11">
            <text:p>2026-04-29 10:15</text:p>
          </table:table-cell>
          <table:table-cell office:value-type="float" office:value="0.9634814999999999" table:style-name="c11">
            <text:p>0.96348</text:p>
          </table:table-cell>
          <table:table-cell office:value-type="string" table:style-name="c11">
            <text:p>2026-04-29 20:00</text:p>
          </table:table-cell>
          <table:table-cell office:value-type="float" office:value="0.8945525000000001" table:style-name="c11">
            <text:p>0.89455</text:p>
          </table:table-cell>
          <table:table-cell office:value-type="float" office:value="-7.339757997169627" table:style-name="c12">
            <text:p>-7.3</text:p>
          </table:table-cell>
        </table:table-row>
        <table:table-row>
          <table:table-cell office:value-type="string" table:style-name="c10">
            <text:p>FIL/USDT</text:p>
          </table:table-cell>
          <table:table-cell office:value-type="string" table:style-name="c11">
            <text:p>LONG</text:p>
          </table:table-cell>
          <table:table-cell office:value-type="string" table:style-name="c11">
            <text:p>2026-05-04 02:00</text:p>
          </table:table-cell>
          <table:table-cell office:value-type="float" office:value="0.9484739999999999" table:style-name="c11">
            <text:p>0.94847</text:p>
          </table:table-cell>
          <table:table-cell office:value-type="string" table:style-name="c11">
            <text:p>2026-05-05 02:00</text:p>
          </table:table-cell>
          <table:table-cell office:value-type="float" office:value="0.9385305" table:style-name="c11">
            <text:p>0.93853</text:p>
          </table:table-cell>
          <table:table-cell office:value-type="float" office:value="-1.2461725328791085" table:style-name="c12">
            <text:p>-1.2</text:p>
          </table:table-cell>
        </table:table-row>
        <table:table-row>
          <table:table-cell office:value-type="string" table:style-name="c10">
            <text:p>FIL/USDT</text:p>
          </table:table-cell>
          <table:table-cell office:value-type="string" table:style-name="c11">
            <text:p>LONG</text:p>
          </table:table-cell>
          <table:table-cell office:value-type="string" table:style-name="c11">
            <text:p>2026-05-26 14:00</text:p>
          </table:table-cell>
          <table:table-cell office:value-type="float" office:value="1.036518" table:style-name="c11">
            <text:p>1.0365</text:p>
          </table:table-cell>
          <table:table-cell office:value-type="string" table:style-name="c11">
            <text:p>2026-05-27 14:00</text:p>
          </table:table-cell>
          <table:table-cell office:value-type="float" office:value="1.0724635" table:style-name="c11">
            <text:p>1.0725</text:p>
          </table:table-cell>
          <table:table-cell office:value-type="float" office:value="3.261076552795017" table:style-name="c13">
            <text:p>+3.3</text:p>
          </table:table-cell>
        </table:table-row>
        <table:table-row>
          <table:table-cell office:value-type="string" table:style-name="c2">
            <text:p>HB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15:00</text:p>
          </table:table-cell>
          <table:table-cell office:value-type="float" office:value="0.09878936999999999" table:style-name="c1">
            <text:p>0.098789</text:p>
          </table:table-cell>
          <table:table-cell office:value-type="string" table:style-name="c1">
            <text:p>2026-03-11 06:00</text:p>
          </table:table-cell>
          <table:table-cell office:value-type="float" office:value="0.09407294" table:style-name="c1">
            <text:p>0.094073</text:p>
          </table:table-cell>
          <table:table-cell office:value-type="float" office:value="-4.964584557083396" table:style-name="c15">
            <text:p>-5.0</text:p>
          </table:table-cell>
        </table:table-row>
        <table:table-row>
          <table:table-cell office:value-type="string" table:style-name="c2">
            <text:p>HB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7 07:45</text:p>
          </table:table-cell>
          <table:table-cell office:value-type="float" office:value="0.09098546999999998" table:style-name="c1">
            <text:p>0.090985</text:p>
          </table:table-cell>
          <table:table-cell office:value-type="string" table:style-name="c1">
            <text:p>2026-04-18 07:45</text:p>
          </table:table-cell>
          <table:table-cell office:value-type="float" office:value="0.090184885" table:style-name="c1">
            <text:p>0.090185</text:p>
          </table:table-cell>
          <table:table-cell office:value-type="float" office:value="-1.0780453023048309" table:style-name="c15">
            <text:p>-1.1</text:p>
          </table:table-cell>
        </table:table-row>
        <table:table-row>
          <table:table-cell office:value-type="string" table:style-name="c2">
            <text:p>HB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9 23:15</text:p>
          </table:table-cell>
          <table:table-cell office:value-type="float" office:value="0.09634815" table:style-name="c1">
            <text:p>0.096348</text:p>
          </table:table-cell>
          <table:table-cell office:value-type="string" table:style-name="c1">
            <text:p>2026-05-30 23:15</text:p>
          </table:table-cell>
          <table:table-cell office:value-type="float" office:value="0.09525235" table:style-name="c1">
            <text:p>0.095252</text:p>
          </table:table-cell>
          <table:table-cell office:value-type="float" office:value="-1.3349601913996145" table:style-name="c15">
            <text:p>-1.3</text:p>
          </table:table-cell>
        </table:table-row>
        <table:table-row>
          <table:table-cell office:value-type="string" table:style-name="c2">
            <text:p>HB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6-01 03:30</text:p>
          </table:table-cell>
          <table:table-cell office:value-type="float" office:value="0.09792893999999999" table:style-name="c1">
            <text:p>0.097929</text:p>
          </table:table-cell>
          <table:table-cell office:value-type="string" table:style-name="c1">
            <text:p>2026-06-01 12:00</text:p>
          </table:table-cell>
          <table:table-cell office:value-type="float" office:value="0.09422286500000002" table:style-name="c1">
            <text:p>0.094223</text:p>
          </table:table-cell>
          <table:table-cell office:value-type="float" office:value="-3.976788176339874" table:style-name="c15">
            <text:p>-4.0</text:p>
          </table:table-cell>
        </table:table-row>
        <table:table-row>
          <table:table-cell office:value-type="string" table:style-name="c10">
            <text:p>INJ/USDT</text:p>
          </table:table-cell>
          <table:table-cell office:value-type="string" table:style-name="c11">
            <text:p>LONG</text:p>
          </table:table-cell>
          <table:table-cell office:value-type="string" table:style-name="c11">
            <text:p>2026-03-10 15:00</text:p>
          </table:table-cell>
          <table:table-cell office:value-type="float" office:value="3.0265125" table:style-name="c11">
            <text:p>3.0265</text:p>
          </table:table-cell>
          <table:table-cell office:value-type="string" table:style-name="c11">
            <text:p>2026-03-11 15:00</text:p>
          </table:table-cell>
          <table:table-cell office:value-type="float" office:value="2.9895045000000002" table:style-name="c11">
            <text:p>2.9895</text:p>
          </table:table-cell>
          <table:table-cell office:value-type="float" office:value="-1.4202491975665033" table:style-name="c12">
            <text:p>-1.4</text:p>
          </table:table-cell>
        </table:table-row>
        <table:table-row>
          <table:table-cell office:value-type="string" table:style-name="c10">
            <text:p>INJ/USDT</text:p>
          </table:table-cell>
          <table:table-cell office:value-type="string" table:style-name="c11">
            <text:p>LONG</text:p>
          </table:table-cell>
          <table:table-cell office:value-type="string" table:style-name="c11">
            <text:p>2026-05-08 08:00</text:p>
          </table:table-cell>
          <table:table-cell office:value-type="float" office:value="4.036016999999999" table:style-name="c11">
            <text:p>4.036</text:p>
          </table:table-cell>
          <table:table-cell office:value-type="string" table:style-name="c11">
            <text:p>2026-05-09 08:00</text:p>
          </table:table-cell>
          <table:table-cell office:value-type="float" office:value="4.231883" table:style-name="c11">
            <text:p>4.2319</text:p>
          </table:table-cell>
          <table:table-cell office:value-type="float" office:value="4.64335174710615" table:style-name="c13">
            <text:p>+4.6</text:p>
          </table:table-cell>
        </table:table-row>
        <table:table-row>
          <table:table-cell office:value-type="string" table:style-name="c10">
            <text:p>INJ/USDT</text:p>
          </table:table-cell>
          <table:table-cell office:value-type="string" table:style-name="c11">
            <text:p>LONG</text:p>
          </table:table-cell>
          <table:table-cell office:value-type="string" table:style-name="c11">
            <text:p>2026-05-12 17:45</text:p>
          </table:table-cell>
          <table:table-cell office:value-type="float" office:value="4.853425499999999" table:style-name="c11">
            <text:p>4.8534</text:p>
          </table:table-cell>
          <table:table-cell office:value-type="string" table:style-name="c11">
            <text:p>2026-05-13 17:45</text:p>
          </table:table-cell>
          <table:table-cell office:value-type="float" office:value="5.2703635" table:style-name="c11">
            <text:p>5.2704</text:p>
          </table:table-cell>
          <table:table-cell office:value-type="float" office:value="8.373519761733261" table:style-name="c13">
            <text:p>+8.4</text:p>
          </table:table-cell>
        </table:table-row>
        <table:table-row>
          <table:table-cell office:value-type="string" table:style-name="c10">
            <text:p>INJ/USDT</text:p>
          </table:table-cell>
          <table:table-cell office:value-type="string" table:style-name="c11">
            <text:p>LONG</text:p>
          </table:table-cell>
          <table:table-cell office:value-type="string" table:style-name="c11">
            <text:p>2026-05-30 05:00</text:p>
          </table:table-cell>
          <table:table-cell office:value-type="float" office:value="6.749373" table:style-name="c11">
            <text:p>6.7494</text:p>
          </table:table-cell>
          <table:table-cell office:value-type="string" table:style-name="c11">
            <text:p>2026-05-31 05:00</text:p>
          </table:table-cell>
          <table:table-cell office:value-type="float" office:value="6.584706000000001" table:style-name="c11">
            <text:p>6.5847</text:p>
          </table:table-cell>
          <table:table-cell office:value-type="float" office:value="-2.634760699904981" table:style-name="c12">
            <text:p>-2.6</text:p>
          </table:table-cell>
        </table:table-row>
        <table:table-row>
          <table:table-cell office:value-type="string" table:style-name="c2">
            <text:p>LINK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03:45</text:p>
          </table:table-cell>
          <table:table-cell office:value-type="float" office:value="9.734865" table:style-name="c1">
            <text:p>9.7349</text:p>
          </table:table-cell>
          <table:table-cell office:value-type="string" table:style-name="c1">
            <text:p>2026-03-17 03:45</text:p>
          </table:table-cell>
          <table:table-cell office:value-type="float" office:value="9.795100000000001" table:style-name="c1">
            <text:p>9.7951</text:p>
          </table:table-cell>
          <table:table-cell office:value-type="float" office:value="0.4176184785305459" table:style-name="c14">
            <text:p>+0.4</text:p>
          </table:table-cell>
        </table:table-row>
        <table:table-row>
          <table:table-cell office:value-type="string" table:style-name="c2">
            <text:p>LINK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6:00</text:p>
          </table:table-cell>
          <table:table-cell office:value-type="float" office:value="9.464730000000001" table:style-name="c1">
            <text:p>9.4647</text:p>
          </table:table-cell>
          <table:table-cell office:value-type="string" table:style-name="c1">
            <text:p>2026-04-17 16:00</text:p>
          </table:table-cell>
          <table:table-cell office:value-type="float" office:value="9.75512" table:style-name="c1">
            <text:p>9.7551</text:p>
          </table:table-cell>
          <table:table-cell office:value-type="float" office:value="2.8620944825684225" table:style-name="c14">
            <text:p>+2.9</text:p>
          </table:table-cell>
        </table:table-row>
        <table:table-row>
          <table:table-cell office:value-type="string" table:style-name="c10">
            <text:p>LTC/USDT</text:p>
          </table:table-cell>
          <table:table-cell office:value-type="string" table:style-name="c11">
            <text:p>LONG</text:p>
          </table:table-cell>
          <table:table-cell office:value-type="string" table:style-name="c11">
            <text:p>2026-05-04 02:15</text:p>
          </table:table-cell>
          <table:table-cell office:value-type="float" office:value="55.957964999999994" table:style-name="c11">
            <text:p>55.958</text:p>
          </table:table-cell>
          <table:table-cell office:value-type="string" table:style-name="c11">
            <text:p>2026-05-05 00:00</text:p>
          </table:table-cell>
          <table:table-cell office:value-type="float" office:value="54.932520000000004" table:style-name="c11">
            <text:p>54.933</text:p>
          </table:table-cell>
          <table:table-cell office:value-type="float" office:value="-2.0287641044129945" table:style-name="c12">
            <text:p>-2.0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8 05:45</text:p>
          </table:table-cell>
          <table:table-cell office:value-type="float" office:value="1.3276634999999999" table:style-name="c1">
            <text:p>1.3277</text:p>
          </table:table-cell>
          <table:table-cell office:value-type="string" table:style-name="c1">
            <text:p>2026-04-09 05:45</text:p>
          </table:table-cell>
          <table:table-cell office:value-type="float" office:value="1.3423285" table:style-name="c1">
            <text:p>1.3423</text:p>
          </table:table-cell>
          <table:table-cell office:value-type="float" office:value="0.9024640150535168" table:style-name="c14">
            <text:p>+0.9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3 01:15</text:p>
          </table:table-cell>
          <table:table-cell office:value-type="float" office:value="1.6638315" table:style-name="c1">
            <text:p>1.6638</text:p>
          </table:table-cell>
          <table:table-cell office:value-type="string" table:style-name="c1">
            <text:p>2026-05-14 01:15</text:p>
          </table:table-cell>
          <table:table-cell office:value-type="float" office:value="1.5882055000000002" table:style-name="c1">
            <text:p>1.5882</text:p>
          </table:table-cell>
          <table:table-cell office:value-type="float" office:value="-4.736105957514313" table:style-name="c15">
            <text:p>-4.7</text:p>
          </table:table-cell>
        </table:table-row>
        <table:table-row>
          <table:table-cell office:value-type="string" table:style-name="c10">
            <text:p>OP/USDT</text:p>
          </table:table-cell>
          <table:table-cell office:value-type="string" table:style-name="c11">
            <text:p>LONG</text:p>
          </table:table-cell>
          <table:table-cell office:value-type="string" table:style-name="c11">
            <text:p>2026-04-25 09:00</text:p>
          </table:table-cell>
          <table:table-cell office:value-type="float" office:value="0.13246619999999998" table:style-name="c11">
            <text:p>0.13247</text:p>
          </table:table-cell>
          <table:table-cell office:value-type="string" table:style-name="c11">
            <text:p>2026-04-26 09:00</text:p>
          </table:table-cell>
          <table:table-cell office:value-type="float" office:value="0.12583705" table:style-name="c11">
            <text:p>0.12584</text:p>
          </table:table-cell>
          <table:table-cell office:value-type="float" office:value="-5.194304858862086" table:style-name="c12">
            <text:p>-5.2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13:15</text:p>
          </table:table-cell>
          <table:table-cell office:value-type="float" office:value="5.86293e-06" table:style-name="c1">
            <text:p>0.0000058629</text:p>
          </table:table-cell>
          <table:table-cell office:value-type="string" table:style-name="c1">
            <text:p>2026-03-11 13:15</text:p>
          </table:table-cell>
          <table:table-cell office:value-type="float" office:value="5.807095e-06" table:style-name="c1">
            <text:p>0.0000058071</text:p>
          </table:table-cell>
          <table:table-cell office:value-type="float" office:value="-1.1503358031734967" table:style-name="c15">
            <text:p>-1.2</text:p>
          </table:table-cell>
        </table:table-row>
        <table:table-row>
          <table:table-cell office:value-type="string" table:style-name="c10">
            <text:p>SOL/USDT</text:p>
          </table:table-cell>
          <table:table-cell office:value-type="string" table:style-name="c11">
            <text:p>LONG</text:p>
          </table:table-cell>
          <table:table-cell office:value-type="string" table:style-name="c11">
            <text:p>2026-04-04 15:15</text:p>
          </table:table-cell>
          <table:table-cell office:value-type="float" office:value="81.190575" table:style-name="c11">
            <text:p>81.191</text:p>
          </table:table-cell>
          <table:table-cell office:value-type="string" table:style-name="c11">
            <text:p>2026-04-05 12:00</text:p>
          </table:table-cell>
          <table:table-cell office:value-type="float" office:value="79.870045" table:style-name="c11">
            <text:p>79.87</text:p>
          </table:table-cell>
          <table:table-cell office:value-type="float" office:value="-1.8231059700648644" table:style-name="c12">
            <text:p>-1.8</text:p>
          </table:table-cell>
        </table:table-row>
        <table:table-row>
          <table:table-cell office:value-type="string" table:style-name="c10">
            <text:p>SOL/USDT</text:p>
          </table:table-cell>
          <table:table-cell office:value-type="string" table:style-name="c11">
            <text:p>LONG</text:p>
          </table:table-cell>
          <table:table-cell office:value-type="string" table:style-name="c11">
            <text:p>2026-05-04 02:15</text:p>
          </table:table-cell>
          <table:table-cell office:value-type="float" office:value="85.06250999999999" table:style-name="c11">
            <text:p>85.063</text:p>
          </table:table-cell>
          <table:table-cell office:value-type="string" table:style-name="c11">
            <text:p>2026-05-05 02:15</text:p>
          </table:table-cell>
          <table:table-cell office:value-type="float" office:value="84.54770500000001" table:style-name="c11">
            <text:p>84.548</text:p>
          </table:table-cell>
          <table:table-cell office:value-type="float" office:value="-0.8038980536725027" table:style-name="c12">
            <text:p>-0.8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3 22:30</text:p>
          </table:table-cell>
          <table:table-cell office:value-type="float" office:value="0.9575785499999999" table:style-name="c1">
            <text:p>0.95758</text:p>
          </table:table-cell>
          <table:table-cell office:value-type="string" table:style-name="c1">
            <text:p>2026-04-14 22:30</text:p>
          </table:table-cell>
          <table:table-cell office:value-type="float" office:value="0.9283356" table:style-name="c1">
            <text:p>0.92834</text:p>
          </table:table-cell>
          <table:table-cell office:value-type="float" office:value="-3.247638834892441" table:style-name="c15">
            <text:p>-3.2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9 00:45</text:p>
          </table:table-cell>
          <table:table-cell office:value-type="float" office:value="1.06703325" table:style-name="c1">
            <text:p>1.067</text:p>
          </table:table-cell>
          <table:table-cell office:value-type="string" table:style-name="c1">
            <text:p>2026-05-10 00:45</text:p>
          </table:table-cell>
          <table:table-cell office:value-type="float" office:value="1.08535705" table:style-name="c1">
            <text:p>1.0854</text:p>
          </table:table-cell>
          <table:table-cell office:value-type="float" office:value="1.5139332590666799" table:style-name="c14">
            <text:p>+1.5</text:p>
          </table:table-cell>
        </table:table-row>
        <table:table-row>
          <table:table-cell office:value-type="string" table:style-name="c10">
            <text:p>TON/USDT</text:p>
          </table:table-cell>
          <table:table-cell office:value-type="string" table:style-name="c11">
            <text:p>LONG</text:p>
          </table:table-cell>
          <table:table-cell office:value-type="string" table:style-name="c11">
            <text:p>2026-05-04 15:00</text:p>
          </table:table-cell>
          <table:table-cell office:value-type="float" office:value="1.4537265" table:style-name="c11">
            <text:p>1.4537</text:p>
          </table:table-cell>
          <table:table-cell office:value-type="string" table:style-name="c11">
            <text:p>2026-05-05 15:00</text:p>
          </table:table-cell>
          <table:table-cell office:value-type="float" office:value="1.7861065" table:style-name="c11">
            <text:p>1.7861</text:p>
          </table:table-cell>
          <table:table-cell office:value-type="float" office:value="22.618393013163086" table:style-name="c13">
            <text:p>+22.6</text:p>
          </table:table-cell>
        </table:table-row>
        <table:table-row>
          <table:table-cell office:value-type="string" table:style-name="c10">
            <text:p>TON/USDT</text:p>
          </table:table-cell>
          <table:table-cell office:value-type="string" table:style-name="c11">
            <text:p>LONG</text:p>
          </table:table-cell>
          <table:table-cell office:value-type="string" table:style-name="c11">
            <text:p>2026-05-21 17:30</text:p>
          </table:table-cell>
          <table:table-cell office:value-type="float" office:value="2.0640315" table:style-name="c11">
            <text:p>2.064</text:p>
          </table:table-cell>
          <table:table-cell office:value-type="string" table:style-name="c11">
            <text:p>2026-05-22 12:00</text:p>
          </table:table-cell>
          <table:table-cell office:value-type="float" office:value="1.9950020000000002" table:style-name="c11">
            <text:p>1.995</text:p>
          </table:table-cell>
          <table:table-cell office:value-type="float" office:value="-3.5376160198136497" table:style-name="c12">
            <text:p>-3.5</text:p>
          </table:table-cell>
        </table:table-row>
        <table:table-row>
          <table:table-cell office:value-type="string" table:style-name="c10">
            <text:p>TON/USDT</text:p>
          </table:table-cell>
          <table:table-cell office:value-type="string" table:style-name="c11">
            <text:p>LONG</text:p>
          </table:table-cell>
          <table:table-cell office:value-type="string" table:style-name="c11">
            <text:p>2026-05-31 01:00</text:p>
          </table:table-cell>
          <table:table-cell office:value-type="float" office:value="1.8929459999999998" table:style-name="c11">
            <text:p>1.8929</text:p>
          </table:table-cell>
          <table:table-cell office:value-type="string" table:style-name="c11">
            <text:p>2026-06-01 01:00</text:p>
          </table:table-cell>
          <table:table-cell office:value-type="float" office:value="1.9360315000000001" table:style-name="c11">
            <text:p>1.936</text:p>
          </table:table-cell>
          <table:table-cell office:value-type="float" office:value="2.0716583057044824" table:style-name="c13">
            <text:p>+2.1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5 12:30</text:p>
          </table:table-cell>
          <table:table-cell office:value-type="float" office:value="0.32696339999999996" table:style-name="c1">
            <text:p>0.32696</text:p>
          </table:table-cell>
          <table:table-cell office:value-type="string" table:style-name="c1">
            <text:p>2026-04-16 12:30</text:p>
          </table:table-cell>
          <table:table-cell office:value-type="float" office:value="0.3266366" table:style-name="c1">
            <text:p>0.32664</text:p>
          </table:table-cell>
          <table:table-cell office:value-type="float" office:value="-0.2996502248875488" table:style-name="c15">
            <text:p>-0.3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3 05:30</text:p>
          </table:table-cell>
          <table:table-cell office:value-type="float" office:value="0.33726855" table:style-name="c1">
            <text:p>0.33727</text:p>
          </table:table-cell>
          <table:table-cell office:value-type="string" table:style-name="c1">
            <text:p>2026-05-04 05:30</text:p>
          </table:table-cell>
          <table:table-cell office:value-type="float" office:value="0.33853065000000004" table:style-name="c1">
            <text:p>0.33853</text:p>
          </table:table-cell>
          <table:table-cell office:value-type="float" office:value="0.17356413180240615" table:style-name="c14">
            <text:p>+0.2</text:p>
          </table:table-cell>
        </table:table-row>
        <table:table-row>
          <table:table-cell office:value-type="string" table:style-name="c10">
            <text:p>UNI/USDT</text:p>
          </table:table-cell>
          <table:table-cell office:value-type="string" table:style-name="c11">
            <text:p>LONG</text:p>
          </table:table-cell>
          <table:table-cell office:value-type="string" table:style-name="c11">
            <text:p>2026-04-13 22:30</text:p>
          </table:table-cell>
          <table:table-cell office:value-type="float" office:value="3.2116049999999996" table:style-name="c11">
            <text:p>3.2116</text:p>
          </table:table-cell>
          <table:table-cell office:value-type="string" table:style-name="c11">
            <text:p>2026-04-14 22:30</text:p>
          </table:table-cell>
          <table:table-cell office:value-type="float" office:value="3.1134425000000006" table:style-name="c11">
            <text:p>3.1134</text:p>
          </table:table-cell>
          <table:table-cell office:value-type="float" office:value="-3.2502836294469373" table:style-name="c12">
            <text:p>-3.3</text:p>
          </table:table-cell>
        </table:table-row>
        <table:table-row>
          <table:table-cell office:value-type="string" table:style-name="c10">
            <text:p>UNI/USDT</text:p>
          </table:table-cell>
          <table:table-cell office:value-type="string" table:style-name="c11">
            <text:p>LONG</text:p>
          </table:table-cell>
          <table:table-cell office:value-type="string" table:style-name="c11">
            <text:p>2026-05-10 05:30</text:p>
          </table:table-cell>
          <table:table-cell office:value-type="float" office:value="3.855927" table:style-name="c11">
            <text:p>3.8559</text:p>
          </table:table-cell>
          <table:table-cell office:value-type="string" table:style-name="c11">
            <text:p>2026-05-11 05:30</text:p>
          </table:table-cell>
          <table:table-cell office:value-type="float" office:value="3.9580200000000003" table:style-name="c11">
            <text:p>3.958</text:p>
          </table:table-cell>
          <table:table-cell office:value-type="float" office:value="2.4424974336910488" table:style-name="c13">
            <text:p>+2.4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13:00</text:p>
          </table:table-cell>
          <table:table-cell office:value-type="float" office:value="0.007909952999999999" table:style-name="c1">
            <text:p>0.00791</text:p>
          </table:table-cell>
          <table:table-cell office:value-type="string" table:style-name="c1">
            <text:p>2026-05-11 13:00</text:p>
          </table:table-cell>
          <table:table-cell office:value-type="float" office:value="0.0077881040000000006" table:style-name="c1">
            <text:p>0.0077881</text:p>
          </table:table-cell>
          <table:table-cell office:value-type="float" office:value="-1.737272268191714" table:style-name="c15">
            <text:p>-1.7</text:p>
          </table:table-cell>
        </table:table-row>
        <table:table-row>
          <table:table-cell office:value-type="string" table:style-name="c10">
            <text:p>XLM/USDT</text:p>
          </table:table-cell>
          <table:table-cell office:value-type="string" table:style-name="c11">
            <text:p>LONG</text:p>
          </table:table-cell>
          <table:table-cell office:value-type="string" table:style-name="c11">
            <text:p>2026-03-10 15:00</text:p>
          </table:table-cell>
          <table:table-cell office:value-type="float" office:value="0.1670835" table:style-name="c11">
            <text:p>0.16708</text:p>
          </table:table-cell>
          <table:table-cell office:value-type="string" table:style-name="c11">
            <text:p>2026-03-11 15:00</text:p>
          </table:table-cell>
          <table:table-cell office:value-type="float" office:value="0.1601199" table:style-name="c11">
            <text:p>0.16012</text:p>
          </table:table-cell>
          <table:table-cell office:value-type="float" office:value="-4.359305185790319" table:style-name="c12">
            <text:p>-4.4</text:p>
          </table:table-cell>
        </table:table-row>
        <table:table-row>
          <table:table-cell office:value-type="string" table:style-name="c10">
            <text:p>XLM/USDT</text:p>
          </table:table-cell>
          <table:table-cell office:value-type="string" table:style-name="c11">
            <text:p>LONG</text:p>
          </table:table-cell>
          <table:table-cell office:value-type="string" table:style-name="c11">
            <text:p>2026-04-16 16:00</text:p>
          </table:table-cell>
          <table:table-cell office:value-type="float" office:value="0.1644822" table:style-name="c11">
            <text:p>0.16448</text:p>
          </table:table-cell>
          <table:table-cell office:value-type="string" table:style-name="c11">
            <text:p>2026-04-17 16:00</text:p>
          </table:table-cell>
          <table:table-cell office:value-type="float" office:value="0.17471260000000002" table:style-name="c11">
            <text:p>0.17471</text:p>
          </table:table-cell>
          <table:table-cell office:value-type="float" office:value="6.007427863075776" table:style-name="c13">
            <text:p>+6.0</text:p>
          </table:table-cell>
        </table:table-row>
        <table:table-row>
          <table:table-cell office:value-type="string" table:style-name="c10">
            <text:p>XLM/USDT</text:p>
          </table:table-cell>
          <table:table-cell office:value-type="string" table:style-name="c11">
            <text:p>LONG</text:p>
          </table:table-cell>
          <table:table-cell office:value-type="string" table:style-name="c11">
            <text:p>2026-05-28 00:30</text:p>
          </table:table-cell>
          <table:table-cell office:value-type="float" office:value="0.16958475" table:style-name="c11">
            <text:p>0.16958</text:p>
          </table:table-cell>
          <table:table-cell office:value-type="string" table:style-name="c11">
            <text:p>2026-05-29 00:30</text:p>
          </table:table-cell>
          <table:table-cell office:value-type="float" office:value="0.20299845000000002" table:style-name="c11">
            <text:p>0.203</text:p>
          </table:table-cell>
          <table:table-cell office:value-type="float" office:value="19.463958934072778" table:style-name="c13">
            <text:p>+19.5</text:p>
          </table:table-cell>
        </table:table-row>
        <table:table-row>
          <table:table-cell office:value-type="string" table:style-name="c10">
            <text:p>XLM/USDT</text:p>
          </table:table-cell>
          <table:table-cell office:value-type="string" table:style-name="c11">
            <text:p>LONG</text:p>
          </table:table-cell>
          <table:table-cell office:value-type="string" table:style-name="c11">
            <text:p>2026-05-31 09:15</text:p>
          </table:table-cell>
          <table:table-cell office:value-type="float" office:value="0.2411205" table:style-name="c11">
            <text:p>0.24112</text:p>
          </table:table-cell>
          <table:table-cell office:value-type="string" table:style-name="c11">
            <text:p>2026-06-01 09:15</text:p>
          </table:table-cell>
          <table:table-cell office:value-type="float" office:value="0.25227380000000005" table:style-name="c11">
            <text:p>0.25227</text:p>
          </table:table-cell>
          <table:table-cell office:value-type="float" office:value="4.416465905553446" table:style-name="c13">
            <text:p>+4.4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0 15:00</text:p>
          </table:table-cell>
          <table:table-cell office:value-type="float" office:value="1.4350171499999997" table:style-name="c1">
            <text:p>1.435</text:p>
          </table:table-cell>
          <table:table-cell office:value-type="string" table:style-name="c1">
            <text:p>2026-03-11 15:00</text:p>
          </table:table-cell>
          <table:table-cell office:value-type="float" office:value="1.3915039000000002" table:style-name="c1">
            <text:p>1.3915</text:p>
          </table:table-cell>
          <table:table-cell office:value-type="float" office:value="-3.2260845311918085" table:style-name="c15">
            <text:p>-3.2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7 01:30</text:p>
          </table:table-cell>
          <table:table-cell office:value-type="float" office:value="1.5751872" table:style-name="c1">
            <text:p>1.5752</text:p>
          </table:table-cell>
          <table:table-cell office:value-type="string" table:style-name="c1">
            <text:p>2026-03-18 01:30</text:p>
          </table:table-cell>
          <table:table-cell office:value-type="float" office:value="1.51814055" table:style-name="c1">
            <text:p>1.5181</text:p>
          </table:table-cell>
          <table:table-cell office:value-type="float" office:value="-3.8142395367007698" table:style-name="c15">
            <text:p>-3.8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2:15</text:p>
          </table:table-cell>
          <table:table-cell office:value-type="float" office:value="1.4069030999999999" table:style-name="c1">
            <text:p>1.4069</text:p>
          </table:table-cell>
          <table:table-cell office:value-type="string" table:style-name="c1">
            <text:p>2026-05-05 02:15</text:p>
          </table:table-cell>
          <table:table-cell office:value-type="float" office:value="1.3978007500000003" table:style-name="c1">
            <text:p>1.3978</text:p>
          </table:table-cell>
          <table:table-cell office:value-type="float" office:value="-0.845584439983782" table:style-name="c15">
            <text:p>-0.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