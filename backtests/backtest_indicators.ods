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ov0" style:family="table-column" style:display-name="ov0">
      <style:table-column-properties style:column-width="3cm"/>
    </style:style>
    <style:style style:name="ov1" style:family="table-column" style:display-name="ov1">
      <style:table-column-properties style:column-width="2cm"/>
    </style:style>
    <style:style style:name="ov2" style:family="table-column" style:display-name="ov2">
      <style:table-column-properties style:column-width="2cm"/>
    </style:style>
    <style:style style:name="ov3" style:family="table-column" style:display-name="ov3">
      <style:table-column-properties style:column-width="2.2cm"/>
    </style:style>
    <style:style style:name="ov4" style:family="table-column" style:display-name="ov4">
      <style:table-column-properties style:column-width="3.4cm"/>
    </style:style>
    <style:style style:name="ov5" style:family="table-column" style:display-name="ov5">
      <style:table-column-properties style:column-width="2.6cm"/>
    </style:style>
    <style:style style:name="ov6" style:family="table-column" style:display-name="ov6">
      <style:table-column-properties style:column-width="2.2cm"/>
    </style:style>
    <style:style style:name="ov7" style:family="table-column" style:display-name="ov7">
      <style:table-column-properties style:column-width="7cm"/>
    </style:style>
    <style:style style:name="c0" style:family="table-cell" style:display-name="c0">
      <style:table-cell-properties fo:border="0.5pt solid #cfcfcf" style:vertical-align="middle"/>
      <style:text-properties fo:color="#000000" fo:font-weight="bold"/>
      <style:paragraph-properties fo:text-align="left"/>
    </style:style>
    <style:style style:name="c1" style:family="table-cell" style:display-name="c1">
      <style:table-cell-properties fo:border="0.5pt solid #cfcfcf" style:vertical-align="middle"/>
      <style:paragraph-properties fo:text-align="left"/>
    </style:style>
    <style:style style:name="c2" style:family="table-cell" style:display-name="c2">
      <style:table-cell-properties fo:border="0.5pt solid #cfcfcf" style:vertical-align="middle" fo:background-color="#2E5496"/>
      <style:text-properties fo:color="#FFFFFF" fo:font-weight="bold"/>
      <style:paragraph-properties fo:text-align="left"/>
    </style:style>
    <style:style style:name="c3" style:family="table-cell" style:display-name="c3">
      <style:table-cell-properties fo:border="0.5pt solid #cfcfcf" style:vertical-align="middle" fo:background-color="#1F3864"/>
      <style:text-properties fo:color="#FFFFFF" fo:font-weight="bold"/>
      <style:paragraph-properties fo:text-align="center"/>
    </style:style>
    <style:style style:name="c4" style:family="table-cell" style:display-name="c4">
      <style:table-cell-properties fo:border="0.5pt solid #cfcfcf" style:vertical-align="middle"/>
      <style:paragraph-properties fo:text-align="center"/>
    </style:style>
    <style:style style:name="c5" style:family="table-cell" style:display-name="c5">
      <style:table-cell-properties fo:border="0.5pt solid #cfcfcf" style:vertical-align="middle"/>
      <style:text-properties fo:color="#C00000" fo:font-weight="bold"/>
      <style:paragraph-properties fo:text-align="center"/>
    </style:style>
    <style:style style:name="c6" style:family="table-cell" style:display-name="c6">
      <style:table-cell-properties fo:border="0.5pt solid #cfcfcf" style:vertical-align="middle"/>
      <style:text-properties fo:color="#C00000" fo:font-weight="normal"/>
      <style:paragraph-properties fo:text-align="center"/>
    </style:style>
    <style:style style:name="c7" style:family="table-cell" style:display-name="c7">
      <style:table-cell-properties fo:border="0.5pt solid #cfcfcf" style:vertical-align="middle"/>
      <style:text-properties fo:color="#000000" fo:font-weight="bold"/>
      <style:paragraph-properties fo:text-align="center"/>
    </style:style>
    <style:style style:name="bv0" style:family="table-column" style:display-name="bv0">
      <style:table-column-properties style:column-width="4.5cm"/>
    </style:style>
    <style:style style:name="bv1" style:family="table-column" style:display-name="bv1">
      <style:table-column-properties style:column-width="2.2cm"/>
    </style:style>
    <style:style style:name="bv2" style:family="table-column" style:display-name="bv2">
      <style:table-column-properties style:column-width="2cm"/>
    </style:style>
    <style:style style:name="bv3" style:family="table-column" style:display-name="bv3">
      <style:table-column-properties style:column-width="2.4cm"/>
    </style:style>
    <style:style style:name="bv4" style:family="table-column" style:display-name="bv4">
      <style:table-column-properties style:column-width="2.6cm"/>
    </style:style>
    <style:style style:name="c8" style:family="table-cell" style:display-name="c8">
      <style:table-cell-properties fo:border="0.5pt solid #cfcfcf" style:vertical-align="middle" fo:background-color="#DDEBF7"/>
      <style:text-properties fo:color="#000000" fo:font-weight="bold"/>
      <style:paragraph-properties fo:text-align="left"/>
    </style:style>
    <style:style style:name="c9" style:family="table-cell" style:display-name="c9">
      <style:table-cell-properties fo:border="0.5pt solid #cfcfcf" style:vertical-align="middle" fo:background-color="#DDEBF7"/>
      <style:paragraph-properties fo:text-align="center"/>
    </style:style>
    <style:style style:name="c10" style:family="table-cell" style:display-name="c10">
      <style:table-cell-properties fo:border="0.5pt solid #cfcfcf" style:vertical-align="middle" fo:background-color="#DDEBF7"/>
      <style:text-properties fo:color="#C00000" fo:font-weight="bold"/>
      <style:paragraph-properties fo:text-align="center"/>
    </style:style>
    <style:style style:name="c11" style:family="table-cell" style:display-name="c11">
      <style:table-cell-properties fo:border="0.5pt solid #cfcfcf" style:vertical-align="middle" fo:background-color="#DDEBF7"/>
      <style:text-properties fo:color="#C00000" fo:font-weight="normal"/>
      <style:paragraph-properties fo:text-align="center"/>
    </style:style>
  </office:automatic-styles>
  <office:body>
    <office:spreadsheet>
      <table:table table:name="Overview">
        <table:table-column table:style-name="ov0"/>
        <table:table-column table:style-name="ov1"/>
        <table:table-column table:style-name="ov2"/>
        <table:table-column table:style-name="ov3"/>
        <table:table-column table:style-name="ov4"/>
        <table:table-column table:style-name="ov5"/>
        <table:table-column table:style-name="ov6"/>
        <table:table-column table:style-name="ov7"/>
        <table:table-row>
          <table:table-cell office:value-type="string" table:number-columns-spanned="8" table:number-rows-spanned="1" table:style-name="c2">
            <text:p>Backtest run (long-only)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0">
            <text:p>Timeframe</text:p>
          </table:table-cell>
          <table:table-cell office:value-type="string" table:number-columns-spanned="7" table:number-rows-spanned="1" table:style-name="c1">
            <text:p>15m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0">
            <text:p>History (days)</text:p>
          </table:table-cell>
          <table:table-cell office:value-type="string" table:number-columns-spanned="7" table:number-rows-spanned="1" table:style-name="c1">
            <text:p>90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0">
            <text:p>Higher-timeframe filter</text:p>
          </table:table-cell>
          <table:table-cell office:value-type="string" table:number-columns-spanned="7" table:number-rows-spanned="1" table:style-name="c1">
            <text:p>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0">
            <text:p>Skipped coins</text:p>
          </table:table-cell>
          <table:table-cell office:value-type="string" table:number-columns-spanned="7" table:number-rows-spanned="1" table:style-name="c1">
            <text:p>MATIC/USDT, FTM/USDT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0">
            <text:p>Total long trades</text:p>
          </table:table-cell>
          <table:table-cell office:value-type="string" table:number-columns-spanned="7" table:number-rows-spanned="1" table:style-name="c1">
            <text:p>2800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0">
            <text:p>Overall win rate %</text:p>
          </table:table-cell>
          <table:table-cell office:value-type="string" table:number-columns-spanned="7" table:number-rows-spanned="1" table:style-name="c1">
            <text:p>27.2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0">
            <text:p>Overall avg P/L %</text:p>
          </table:table-cell>
          <table:table-cell office:value-type="string" table:number-columns-spanned="7" table:number-rows-spanned="1" table:style-name="c1">
            <text:p>-0.31</text:p>
          </table:table-cell>
          <table:table-cell/>
          <table:table-cell/>
          <table:table-cell/>
          <table:table-cell/>
          <table:table-cell/>
          <table:table-cell/>
        </table:table-row>
        <table:table-row/>
        <table:table-row>
          <table:table-cell office:value-type="string" table:number-columns-spanned="8" table:number-rows-spanned="1" table:style-name="c2">
            <text:p>Which indicator's VALUE matters most? (biggest win-rate spread across its value range = most decisive)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c3">
            <text:p>Indicator</text:p>
          </table:table-cell>
          <table:table-cell office:value-type="string" table:style-name="c3">
            <text:p>Trades</text:p>
          </table:table-cell>
          <table:table-cell office:value-type="string" table:style-name="c3">
            <text:p>Win %</text:p>
          </table:table-cell>
          <table:table-cell office:value-type="string" table:style-name="c3">
            <text:p>Avg P/L %</text:p>
          </table:table-cell>
          <table:table-cell office:value-type="string" table:style-name="c3">
            <text:p>Best value range</text:p>
          </table:table-cell>
          <table:table-cell office:value-type="string" table:style-name="c3">
            <text:p>its Win %</text:p>
          </table:table-cell>
          <table:table-cell office:value-type="string" table:style-name="c3">
            <text:p>Spread</text:p>
          </table:table-cell>
          <table:table-cell office:value-type="string" table:style-name="c3">
            <text:p>What the value means</text:p>
          </table:table-cell>
        </table:table-row>
        <table:table-row>
          <table:table-cell office:value-type="string" table:style-name="c0">
            <text:p>VWAP</text:p>
          </table:table-cell>
          <table:table-cell office:value-type="float" office:value="2647" table:style-name="c4">
            <text:p>2647</text:p>
          </table:table-cell>
          <table:table-cell office:value-type="float" office:value="27.653947865508123" table:style-name="c5">
            <text:p>27.7</text:p>
          </table:table-cell>
          <table:table-cell office:value-type="float" office:value="-0.3097551922302012" table:style-name="c6">
            <text:p>-0.31</text:p>
          </table:table-cell>
          <table:table-cell office:value-type="string" table:style-name="c4">
            <text:p>1.68 - 6.61</text:p>
          </table:table-cell>
          <table:table-cell office:value-type="float" office:value="36.79245283018868" table:style-name="c5">
            <text:p>36.8</text:p>
          </table:table-cell>
          <table:table-cell office:value-type="float" office:value="15.431394229054462" table:style-name="c7">
            <text:p>15</text:p>
          </table:table-cell>
          <table:table-cell office:value-type="string" table:style-name="c1">
            <text:p>distance from VWAP, % of price</text:p>
          </table:table-cell>
        </table:table-row>
        <table:table-row>
          <table:table-cell office:value-type="string" table:style-name="c0">
            <text:p>EMA</text:p>
          </table:table-cell>
          <table:table-cell office:value-type="float" office:value="574" table:style-name="c4">
            <text:p>574</text:p>
          </table:table-cell>
          <table:table-cell office:value-type="float" office:value="20.557491289198605" table:style-name="c5">
            <text:p>20.6</text:p>
          </table:table-cell>
          <table:table-cell office:value-type="float" office:value="-0.35273089000965563" table:style-name="c6">
            <text:p>-0.35</text:p>
          </table:table-cell>
          <table:table-cell office:value-type="string" table:style-name="c4">
            <text:p>0.11 - 0.56</text:p>
          </table:table-cell>
          <table:table-cell office:value-type="float" office:value="27.82608695652174" table:style-name="c5">
            <text:p>27.8</text:p>
          </table:table-cell>
          <table:table-cell office:value-type="float" office:value="11.304347826086957" table:style-name="c7">
            <text:p>11</text:p>
          </table:table-cell>
          <table:table-cell office:value-type="string" table:style-name="c1">
            <text:p>fast-slow EMA gap, % of price</text:p>
          </table:table-cell>
        </table:table-row>
        <table:table-row>
          <table:table-cell office:value-type="string" table:style-name="c0">
            <text:p>VOL</text:p>
          </table:table-cell>
          <table:table-cell office:value-type="float" office:value="1934" table:style-name="c4">
            <text:p>1934</text:p>
          </table:table-cell>
          <table:table-cell office:value-type="float" office:value="27.45604963805584" table:style-name="c5">
            <text:p>27.5</text:p>
          </table:table-cell>
          <table:table-cell office:value-type="float" office:value="-0.2996640429411385" table:style-name="c6">
            <text:p>-0.30</text:p>
          </table:table-cell>
          <table:table-cell office:value-type="string" table:style-name="c4">
            <text:p>3.8 - 4.9</text:p>
          </table:table-cell>
          <table:table-cell office:value-type="float" office:value="32.81653746770026" table:style-name="c5">
            <text:p>32.8</text:p>
          </table:table-cell>
          <table:table-cell office:value-type="float" office:value="11.054879436612175" table:style-name="c7">
            <text:p>11</text:p>
          </table:table-cell>
          <table:table-cell office:value-type="string" table:style-name="c1">
            <text:p>volume multiple (x its average)</text:p>
          </table:table-cell>
        </table:table-row>
        <table:table-row>
          <table:table-cell office:value-type="string" table:style-name="c0">
            <text:p>MACD</text:p>
          </table:table-cell>
          <table:table-cell office:value-type="float" office:value="841" table:style-name="c4">
            <text:p>841</text:p>
          </table:table-cell>
          <table:table-cell office:value-type="float" office:value="30.79667063020214" table:style-name="c5">
            <text:p>30.8</text:p>
          </table:table-cell>
          <table:table-cell office:value-type="float" office:value="-0.28195362796012413" table:style-name="c6">
            <text:p>-0.28</text:p>
          </table:table-cell>
          <table:table-cell office:value-type="string" table:style-name="c4">
            <text:p>0.08 - 0.43</text:p>
          </table:table-cell>
          <table:table-cell office:value-type="float" office:value="34.319526627218934" table:style-name="c5">
            <text:p>34.3</text:p>
          </table:table-cell>
          <table:table-cell office:value-type="float" office:value="7.53381234150465" table:style-name="c7">
            <text:p>8</text:p>
          </table:table-cell>
          <table:table-cell office:value-type="string" table:style-name="c1">
            <text:p>histogram, % of price</text:p>
          </table:table-cell>
        </table:table-row>
      </table:table>
      <table:table table:name="Indicator Values">
        <table:table-column table:style-name="bv0"/>
        <table:table-column table:style-name="bv1"/>
        <table:table-column table:style-name="bv2"/>
        <table:table-column table:style-name="bv3"/>
        <table:table-column table:style-name="bv4"/>
        <table:table-row>
          <table:table-cell office:value-type="string" table:number-columns-spanned="5" table:number-rows-spanned="1" table:style-name="c2">
            <text:p>MACD  -  histogram, % of price</text:p>
          </table:table-cell>
          <table:table-cell/>
          <table:table-cell/>
          <table:table-cell/>
          <table:table-cell/>
        </table:table-row>
        <table:table-row>
          <table:table-cell office:value-type="string" table:style-name="c3">
            <text:p>Value range</text:p>
          </table:table-cell>
          <table:table-cell office:value-type="string" table:style-name="c3">
            <text:p>Trades</text:p>
          </table:table-cell>
          <table:table-cell office:value-type="string" table:style-name="c3">
            <text:p>Win %</text:p>
          </table:table-cell>
          <table:table-cell office:value-type="string" table:style-name="c3">
            <text:p>Avg P/L %</text:p>
          </table:table-cell>
          <table:table-cell office:value-type="string" table:style-name="c3">
            <text:p>Total P/L %</text:p>
          </table:table-cell>
        </table:table-row>
        <table:table-row>
          <table:table-cell office:value-type="string" table:style-name="c0">
            <text:p>0.02 - 0.03</text:p>
          </table:table-cell>
          <table:table-cell office:value-type="float" office:value="168" table:style-name="c4">
            <text:p>168</text:p>
          </table:table-cell>
          <table:table-cell office:value-type="float" office:value="29.166666666666668" table:style-name="c5">
            <text:p>29.2</text:p>
          </table:table-cell>
          <table:table-cell office:value-type="float" office:value="-0.2821376371231222" table:style-name="c5">
            <text:p>-0.28</text:p>
          </table:table-cell>
          <table:table-cell office:value-type="float" office:value="-47.39912303668453" table:style-name="c6">
            <text:p>-47.4</text:p>
          </table:table-cell>
        </table:table-row>
        <table:table-row>
          <table:table-cell office:value-type="string" table:style-name="c0">
            <text:p>0.03 - 0.04</text:p>
          </table:table-cell>
          <table:table-cell office:value-type="float" office:value="168" table:style-name="c4">
            <text:p>168</text:p>
          </table:table-cell>
          <table:table-cell office:value-type="float" office:value="26.785714285714285" table:style-name="c5">
            <text:p>26.8</text:p>
          </table:table-cell>
          <table:table-cell office:value-type="float" office:value="-0.2827496653992401" table:style-name="c5">
            <text:p>-0.28</text:p>
          </table:table-cell>
          <table:table-cell office:value-type="float" office:value="-47.50194378707234" table:style-name="c6">
            <text:p>-47.5</text:p>
          </table:table-cell>
        </table:table-row>
        <table:table-row>
          <table:table-cell office:value-type="string" table:style-name="c0">
            <text:p>0.04 - 0.05</text:p>
          </table:table-cell>
          <table:table-cell office:value-type="float" office:value="168" table:style-name="c4">
            <text:p>168</text:p>
          </table:table-cell>
          <table:table-cell office:value-type="float" office:value="30.952380952380953" table:style-name="c5">
            <text:p>31.0</text:p>
          </table:table-cell>
          <table:table-cell office:value-type="float" office:value="-0.32817692436606294" table:style-name="c5">
            <text:p>-0.33</text:p>
          </table:table-cell>
          <table:table-cell office:value-type="float" office:value="-55.13372329349857" table:style-name="c6">
            <text:p>-55.1</text:p>
          </table:table-cell>
        </table:table-row>
        <table:table-row>
          <table:table-cell office:value-type="string" table:style-name="c0">
            <text:p>0.05 - 0.08</text:p>
          </table:table-cell>
          <table:table-cell office:value-type="float" office:value="168" table:style-name="c4">
            <text:p>168</text:p>
          </table:table-cell>
          <table:table-cell office:value-type="float" office:value="32.73809523809524" table:style-name="c5">
            <text:p>32.7</text:p>
          </table:table-cell>
          <table:table-cell office:value-type="float" office:value="-0.2525588109510658" table:style-name="c5">
            <text:p>-0.25</text:p>
          </table:table-cell>
          <table:table-cell office:value-type="float" office:value="-42.42988023977906" table:style-name="c6">
            <text:p>-42.4</text:p>
          </table:table-cell>
        </table:table-row>
        <table:table-row>
          <table:table-cell office:value-type="string" table:style-name="c0">
            <text:p>0.08 - 0.43</text:p>
          </table:table-cell>
          <table:table-cell office:value-type="float" office:value="169" table:style-name="c4">
            <text:p>169</text:p>
          </table:table-cell>
          <table:table-cell office:value-type="float" office:value="34.319526627218934" table:style-name="c5">
            <text:p>34.3</text:p>
          </table:table-cell>
          <table:table-cell office:value-type="float" office:value="-0.2642504778546149" table:style-name="c5">
            <text:p>-0.26</text:p>
          </table:table-cell>
          <table:table-cell office:value-type="float" office:value="-44.65833075742992" table:style-name="c6">
            <text:p>-44.7</text:p>
          </table:table-cell>
        </table:table-row>
        <table:table-row>
          <table:table-cell office:value-type="string" table:style-name="c8">
            <text:p>ALL (this indicator)</text:p>
          </table:table-cell>
          <table:table-cell office:value-type="float" office:value="841" table:style-name="c9">
            <text:p>841</text:p>
          </table:table-cell>
          <table:table-cell office:value-type="float" office:value="30.79667063020214" table:style-name="c10">
            <text:p>30.8</text:p>
          </table:table-cell>
          <table:table-cell office:value-type="float" office:value="-0.28195362796012413" table:style-name="c10">
            <text:p>-0.28</text:p>
          </table:table-cell>
          <table:table-cell office:value-type="float" office:value="-237.12300111446442" table:style-name="c11">
            <text:p>-237.1</text:p>
          </table:table-cell>
        </table:table-row>
        <table:table-row/>
        <table:table-row>
          <table:table-cell office:value-type="string" table:number-columns-spanned="5" table:number-rows-spanned="1" table:style-name="c2">
            <text:p>EMA  -  fast-slow EMA gap, % of price</text:p>
          </table:table-cell>
          <table:table-cell/>
          <table:table-cell/>
          <table:table-cell/>
          <table:table-cell/>
        </table:table-row>
        <table:table-row>
          <table:table-cell office:value-type="string" table:style-name="c3">
            <text:p>Value range</text:p>
          </table:table-cell>
          <table:table-cell office:value-type="string" table:style-name="c3">
            <text:p>Trades</text:p>
          </table:table-cell>
          <table:table-cell office:value-type="string" table:style-name="c3">
            <text:p>Win %</text:p>
          </table:table-cell>
          <table:table-cell office:value-type="string" table:style-name="c3">
            <text:p>Avg P/L %</text:p>
          </table:table-cell>
          <table:table-cell office:value-type="string" table:style-name="c3">
            <text:p>Total P/L %</text:p>
          </table:table-cell>
        </table:table-row>
        <table:table-row>
          <table:table-cell office:value-type="string" table:style-name="c0">
            <text:p>0 - 0.02</text:p>
          </table:table-cell>
          <table:table-cell office:value-type="float" office:value="114" table:style-name="c4">
            <text:p>114</text:p>
          </table:table-cell>
          <table:table-cell office:value-type="float" office:value="19.298245614035086" table:style-name="c5">
            <text:p>19.3</text:p>
          </table:table-cell>
          <table:table-cell office:value-type="float" office:value="-0.2955632838061868" table:style-name="c5">
            <text:p>-0.30</text:p>
          </table:table-cell>
          <table:table-cell office:value-type="float" office:value="-33.694214353905295" table:style-name="c6">
            <text:p>-33.7</text:p>
          </table:table-cell>
        </table:table-row>
        <table:table-row>
          <table:table-cell office:value-type="string" table:style-name="c0">
            <text:p>0.02 - 0.04</text:p>
          </table:table-cell>
          <table:table-cell office:value-type="float" office:value="115" table:style-name="c4">
            <text:p>115</text:p>
          </table:table-cell>
          <table:table-cell office:value-type="float" office:value="16.52173913043478" table:style-name="c5">
            <text:p>16.5</text:p>
          </table:table-cell>
          <table:table-cell office:value-type="float" office:value="-0.3641665213555923" table:style-name="c5">
            <text:p>-0.36</text:p>
          </table:table-cell>
          <table:table-cell office:value-type="float" office:value="-41.87914995589311" table:style-name="c6">
            <text:p>-41.9</text:p>
          </table:table-cell>
        </table:table-row>
        <table:table-row>
          <table:table-cell office:value-type="string" table:style-name="c0">
            <text:p>0.04 - 0.07</text:p>
          </table:table-cell>
          <table:table-cell office:value-type="float" office:value="115" table:style-name="c4">
            <text:p>115</text:p>
          </table:table-cell>
          <table:table-cell office:value-type="float" office:value="17.391304347826086" table:style-name="c5">
            <text:p>17.4</text:p>
          </table:table-cell>
          <table:table-cell office:value-type="float" office:value="-0.39763347721509934" table:style-name="c5">
            <text:p>-0.40</text:p>
          </table:table-cell>
          <table:table-cell office:value-type="float" office:value="-45.727849879736425" table:style-name="c6">
            <text:p>-45.7</text:p>
          </table:table-cell>
        </table:table-row>
        <table:table-row>
          <table:table-cell office:value-type="string" table:style-name="c0">
            <text:p>0.07 - 0.11</text:p>
          </table:table-cell>
          <table:table-cell office:value-type="float" office:value="115" table:style-name="c4">
            <text:p>115</text:p>
          </table:table-cell>
          <table:table-cell office:value-type="float" office:value="21.73913043478261" table:style-name="c5">
            <text:p>21.7</text:p>
          </table:table-cell>
          <table:table-cell office:value-type="float" office:value="-0.3502365708444372" table:style-name="c5">
            <text:p>-0.35</text:p>
          </table:table-cell>
          <table:table-cell office:value-type="float" office:value="-40.27720564711028" table:style-name="c6">
            <text:p>-40.3</text:p>
          </table:table-cell>
        </table:table-row>
        <table:table-row>
          <table:table-cell office:value-type="string" table:style-name="c0">
            <text:p>0.11 - 0.56</text:p>
          </table:table-cell>
          <table:table-cell office:value-type="float" office:value="115" table:style-name="c4">
            <text:p>115</text:p>
          </table:table-cell>
          <table:table-cell office:value-type="float" office:value="27.82608695652174" table:style-name="c5">
            <text:p>27.8</text:p>
          </table:table-cell>
          <table:table-cell office:value-type="float" office:value="-0.3555574872078019" table:style-name="c5">
            <text:p>-0.36</text:p>
          </table:table-cell>
          <table:table-cell office:value-type="float" office:value="-40.88911102889722" table:style-name="c6">
            <text:p>-40.9</text:p>
          </table:table-cell>
        </table:table-row>
        <table:table-row>
          <table:table-cell office:value-type="string" table:style-name="c8">
            <text:p>ALL (this indicator)</text:p>
          </table:table-cell>
          <table:table-cell office:value-type="float" office:value="574" table:style-name="c9">
            <text:p>574</text:p>
          </table:table-cell>
          <table:table-cell office:value-type="float" office:value="20.557491289198605" table:style-name="c10">
            <text:p>20.6</text:p>
          </table:table-cell>
          <table:table-cell office:value-type="float" office:value="-0.35273089000965563" table:style-name="c10">
            <text:p>-0.35</text:p>
          </table:table-cell>
          <table:table-cell office:value-type="float" office:value="-202.46753086554233" table:style-name="c11">
            <text:p>-202.5</text:p>
          </table:table-cell>
        </table:table-row>
        <table:table-row/>
        <table:table-row>
          <table:table-cell office:value-type="string" table:number-columns-spanned="5" table:number-rows-spanned="1" table:style-name="c2">
            <text:p>VOL  -  volume multiple (x its average)</text:p>
          </table:table-cell>
          <table:table-cell/>
          <table:table-cell/>
          <table:table-cell/>
          <table:table-cell/>
        </table:table-row>
        <table:table-row>
          <table:table-cell office:value-type="string" table:style-name="c3">
            <text:p>Value range</text:p>
          </table:table-cell>
          <table:table-cell office:value-type="string" table:style-name="c3">
            <text:p>Trades</text:p>
          </table:table-cell>
          <table:table-cell office:value-type="string" table:style-name="c3">
            <text:p>Win %</text:p>
          </table:table-cell>
          <table:table-cell office:value-type="string" table:style-name="c3">
            <text:p>Avg P/L %</text:p>
          </table:table-cell>
          <table:table-cell office:value-type="string" table:style-name="c3">
            <text:p>Total P/L %</text:p>
          </table:table-cell>
        </table:table-row>
        <table:table-row>
          <table:table-cell office:value-type="string" table:style-name="c0">
            <text:p>2.5 - 2.8</text:p>
          </table:table-cell>
          <table:table-cell office:value-type="float" office:value="386" table:style-name="c4">
            <text:p>386</text:p>
          </table:table-cell>
          <table:table-cell office:value-type="float" office:value="21.761658031088082" table:style-name="c5">
            <text:p>21.8</text:p>
          </table:table-cell>
          <table:table-cell office:value-type="float" office:value="-0.352354811806732" table:style-name="c5">
            <text:p>-0.35</text:p>
          </table:table-cell>
          <table:table-cell office:value-type="float" office:value="-136.00895735739854" table:style-name="c6">
            <text:p>-136.0</text:p>
          </table:table-cell>
        </table:table-row>
        <table:table-row>
          <table:table-cell office:value-type="string" table:style-name="c0">
            <text:p>2.8 - 3.2</text:p>
          </table:table-cell>
          <table:table-cell office:value-type="float" office:value="387" table:style-name="c4">
            <text:p>387</text:p>
          </table:table-cell>
          <table:table-cell office:value-type="float" office:value="28.165374677002585" table:style-name="c5">
            <text:p>28.2</text:p>
          </table:table-cell>
          <table:table-cell office:value-type="float" office:value="-0.2744337589635767" table:style-name="c5">
            <text:p>-0.27</text:p>
          </table:table-cell>
          <table:table-cell office:value-type="float" office:value="-106.20586471890418" table:style-name="c6">
            <text:p>-106.2</text:p>
          </table:table-cell>
        </table:table-row>
        <table:table-row>
          <table:table-cell office:value-type="string" table:style-name="c0">
            <text:p>3.2 - 3.8</text:p>
          </table:table-cell>
          <table:table-cell office:value-type="float" office:value="387" table:style-name="c4">
            <text:p>387</text:p>
          </table:table-cell>
          <table:table-cell office:value-type="float" office:value="24.8062015503876" table:style-name="c5">
            <text:p>24.8</text:p>
          </table:table-cell>
          <table:table-cell office:value-type="float" office:value="-0.34135349873553134" table:style-name="c5">
            <text:p>-0.34</text:p>
          </table:table-cell>
          <table:table-cell office:value-type="float" office:value="-132.10380401065063" table:style-name="c6">
            <text:p>-132.1</text:p>
          </table:table-cell>
        </table:table-row>
        <table:table-row>
          <table:table-cell office:value-type="string" table:style-name="c0">
            <text:p>3.8 - 4.9</text:p>
          </table:table-cell>
          <table:table-cell office:value-type="float" office:value="387" table:style-name="c4">
            <text:p>387</text:p>
          </table:table-cell>
          <table:table-cell office:value-type="float" office:value="32.81653746770026" table:style-name="c5">
            <text:p>32.8</text:p>
          </table:table-cell>
          <table:table-cell office:value-type="float" office:value="-0.2619998190310965" table:style-name="c5">
            <text:p>-0.26</text:p>
          </table:table-cell>
          <table:table-cell office:value-type="float" office:value="-101.39392996503433" table:style-name="c6">
            <text:p>-101.4</text:p>
          </table:table-cell>
        </table:table-row>
        <table:table-row>
          <table:table-cell office:value-type="string" table:style-name="c0">
            <text:p>5 - 49.9</text:p>
          </table:table-cell>
          <table:table-cell office:value-type="float" office:value="387" table:style-name="c4">
            <text:p>387</text:p>
          </table:table-cell>
          <table:table-cell office:value-type="float" office:value="29.71576227390181" table:style-name="c5">
            <text:p>29.7</text:p>
          </table:table-cell>
          <table:table-cell office:value-type="float" office:value="-0.26831447802628994" table:style-name="c5">
            <text:p>-0.27</text:p>
          </table:table-cell>
          <table:table-cell office:value-type="float" office:value="-103.83770299617422" table:style-name="c6">
            <text:p>-103.8</text:p>
          </table:table-cell>
        </table:table-row>
        <table:table-row>
          <table:table-cell office:value-type="string" table:style-name="c8">
            <text:p>ALL (this indicator)</text:p>
          </table:table-cell>
          <table:table-cell office:value-type="float" office:value="1934" table:style-name="c9">
            <text:p>1934</text:p>
          </table:table-cell>
          <table:table-cell office:value-type="float" office:value="27.45604963805584" table:style-name="c10">
            <text:p>27.5</text:p>
          </table:table-cell>
          <table:table-cell office:value-type="float" office:value="-0.2996640429411385" table:style-name="c10">
            <text:p>-0.30</text:p>
          </table:table-cell>
          <table:table-cell office:value-type="float" office:value="-579.5502590481619" table:style-name="c11">
            <text:p>-579.6</text:p>
          </table:table-cell>
        </table:table-row>
        <table:table-row/>
        <table:table-row>
          <table:table-cell office:value-type="string" table:number-columns-spanned="5" table:number-rows-spanned="1" table:style-name="c2">
            <text:p>VWAP  -  distance from VWAP, % of price</text:p>
          </table:table-cell>
          <table:table-cell/>
          <table:table-cell/>
          <table:table-cell/>
          <table:table-cell/>
        </table:table-row>
        <table:table-row>
          <table:table-cell office:value-type="string" table:style-name="c3">
            <text:p>Value range</text:p>
          </table:table-cell>
          <table:table-cell office:value-type="string" table:style-name="c3">
            <text:p>Trades</text:p>
          </table:table-cell>
          <table:table-cell office:value-type="string" table:style-name="c3">
            <text:p>Win %</text:p>
          </table:table-cell>
          <table:table-cell office:value-type="string" table:style-name="c3">
            <text:p>Avg P/L %</text:p>
          </table:table-cell>
          <table:table-cell office:value-type="string" table:style-name="c3">
            <text:p>Total P/L %</text:p>
          </table:table-cell>
        </table:table-row>
        <table:table-row>
          <table:table-cell office:value-type="string" table:style-name="c0">
            <text:p>0.5 - 0.68</text:p>
          </table:table-cell>
          <table:table-cell office:value-type="float" office:value="529" table:style-name="c4">
            <text:p>529</text:p>
          </table:table-cell>
          <table:table-cell office:value-type="float" office:value="21.361058601134218" table:style-name="c5">
            <text:p>21.4</text:p>
          </table:table-cell>
          <table:table-cell office:value-type="float" office:value="-0.3299098055444322" table:style-name="c5">
            <text:p>-0.33</text:p>
          </table:table-cell>
          <table:table-cell office:value-type="float" office:value="-174.52228713300465" table:style-name="c6">
            <text:p>-174.5</text:p>
          </table:table-cell>
        </table:table-row>
        <table:table-row>
          <table:table-cell office:value-type="string" table:style-name="c0">
            <text:p>0.68 - 0.91</text:p>
          </table:table-cell>
          <table:table-cell office:value-type="float" office:value="529" table:style-name="c4">
            <text:p>529</text:p>
          </table:table-cell>
          <table:table-cell office:value-type="float" office:value="23.440453686200378" table:style-name="c5">
            <text:p>23.4</text:p>
          </table:table-cell>
          <table:table-cell office:value-type="float" office:value="-0.3169703166255378" table:style-name="c5">
            <text:p>-0.32</text:p>
          </table:table-cell>
          <table:table-cell office:value-type="float" office:value="-167.6772974949095" table:style-name="c6">
            <text:p>-167.7</text:p>
          </table:table-cell>
        </table:table-row>
        <table:table-row>
          <table:table-cell office:value-type="string" table:style-name="c0">
            <text:p>0.91 - 1.18</text:p>
          </table:table-cell>
          <table:table-cell office:value-type="float" office:value="530" table:style-name="c4">
            <text:p>530</text:p>
          </table:table-cell>
          <table:table-cell office:value-type="float" office:value="27.735849056603772" table:style-name="c5">
            <text:p>27.7</text:p>
          </table:table-cell>
          <table:table-cell office:value-type="float" office:value="-0.28171384574397085" table:style-name="c5">
            <text:p>-0.28</text:p>
          </table:table-cell>
          <table:table-cell office:value-type="float" office:value="-149.30833824430454" table:style-name="c6">
            <text:p>-149.3</text:p>
          </table:table-cell>
        </table:table-row>
        <table:table-row>
          <table:table-cell office:value-type="string" table:style-name="c0">
            <text:p>1.19 - 1.68</text:p>
          </table:table-cell>
          <table:table-cell office:value-type="float" office:value="529" table:style-name="c4">
            <text:p>529</text:p>
          </table:table-cell>
          <table:table-cell office:value-type="float" office:value="28.92249527410208" table:style-name="c5">
            <text:p>28.9</text:p>
          </table:table-cell>
          <table:table-cell office:value-type="float" office:value="-0.31234596501596895" table:style-name="c5">
            <text:p>-0.31</text:p>
          </table:table-cell>
          <table:table-cell office:value-type="float" office:value="-165.2310154934476" table:style-name="c6">
            <text:p>-165.2</text:p>
          </table:table-cell>
        </table:table-row>
        <table:table-row>
          <table:table-cell office:value-type="string" table:style-name="c0">
            <text:p>1.68 - 6.61</text:p>
          </table:table-cell>
          <table:table-cell office:value-type="float" office:value="530" table:style-name="c4">
            <text:p>530</text:p>
          </table:table-cell>
          <table:table-cell office:value-type="float" office:value="36.79245283018868" table:style-name="c5">
            <text:p>36.8</text:p>
          </table:table-cell>
          <table:table-cell office:value-type="float" office:value="-0.3078925574861818" table:style-name="c5">
            <text:p>-0.31</text:p>
          </table:table-cell>
          <table:table-cell office:value-type="float" office:value="-163.18305546767635" table:style-name="c6">
            <text:p>-163.2</text:p>
          </table:table-cell>
        </table:table-row>
        <table:table-row>
          <table:table-cell office:value-type="string" table:style-name="c8">
            <text:p>ALL (this indicator)</text:p>
          </table:table-cell>
          <table:table-cell office:value-type="float" office:value="2647" table:style-name="c9">
            <text:p>2647</text:p>
          </table:table-cell>
          <table:table-cell office:value-type="float" office:value="27.653947865508123" table:style-name="c10">
            <text:p>27.7</text:p>
          </table:table-cell>
          <table:table-cell office:value-type="float" office:value="-0.3097551922302012" table:style-name="c10">
            <text:p>-0.31</text:p>
          </table:table-cell>
          <table:table-cell office:value-type="float" office:value="-819.9219938333426" table:style-name="c11">
            <text:p>-819.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