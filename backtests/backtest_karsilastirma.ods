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su0" style:family="table-column" style:display-name="su0">
      <style:table-column-properties style:column-width="6.5cm"/>
    </style:style>
    <style:style style:name="su1" style:family="table-column" style:display-name="su1">
      <style:table-column-properties style:column-width="3.2cm"/>
    </style:style>
    <style:style style:name="su2" style:family="table-column" style:display-name="su2">
      <style:table-column-properties style:column-width="3.2cm"/>
    </style:style>
    <style:style style:name="su3" style:family="table-column" style:display-name="su3">
      <style:table-column-properties style:column-width="3.2cm"/>
    </style:style>
    <style:style style:name="c0" style:family="table-cell" style:display-name="c0">
      <style:table-cell-properties fo:border="0.5pt solid #cfcfcf" style:vertical-align="middle" fo:background-color="#1F3864"/>
      <style:text-properties fo:color="#FFFFFF" fo:font-weight="bold"/>
      <style:paragraph-properties fo:text-align="center"/>
    </style:style>
    <style:style style:name="c1" style:family="table-cell" style:display-name="c1">
      <style:table-cell-properties fo:border="0.5pt solid #cfcfcf" style:vertical-align="middle"/>
      <style:text-properties fo:color="#000000" fo:font-weight="bold"/>
      <style:paragraph-properties fo:text-align="left"/>
    </style:style>
    <style:style style:name="c2" style:family="table-cell" style:display-name="c2">
      <style:table-cell-properties fo:border="0.5pt solid #cfcfcf" style:vertical-align="middle"/>
      <style:paragraph-properties fo:text-align="center"/>
    </style:style>
    <style:style style:name="c3" style:family="table-cell" style:display-name="c3">
      <style:table-cell-properties fo:border="0.5pt solid #cfcfcf" style:vertical-align="middle"/>
      <style:text-properties fo:color="#000000" fo:font-weight="bold"/>
      <style:paragraph-properties fo:text-align="center"/>
    </style:style>
    <style:style style:name="c4" style:family="table-cell" style:display-name="c4">
      <style:table-cell-properties fo:border="0.5pt solid #cfcfcf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cfcfcf" style:vertical-align="middle"/>
      <style:text-properties fo:color="#C00000" fo:font-weight="bold"/>
      <style:paragraph-properties fo:text-align="center"/>
    </style:style>
    <style:style style:name="c6" style:family="table-cell" style:display-name="c6">
      <style:table-cell-properties fo:border="0.5pt solid #cfcfcf" style:vertical-align="middle"/>
      <style:text-properties fo:color="#107C41" fo:font-weight="bold"/>
      <style:paragraph-properties fo:text-align="center"/>
    </style:style>
    <style:style style:name="c7" style:family="table-cell" style:display-name="c7">
      <style:table-cell-properties fo:border="0.5pt solid #cfcfcf" style:vertical-align="middle"/>
      <style:text-properties fo:color="#107C41" fo:font-weight="normal"/>
      <style:paragraph-properties fo:text-align="center"/>
    </style:style>
    <style:style style:name="pc0" style:family="table-column" style:display-name="pc0">
      <style:table-column-properties style:column-width="3cm"/>
    </style:style>
    <style:style style:name="pc1" style:family="table-column" style:display-name="pc1">
      <style:table-column-properties style:column-width="2.6cm"/>
    </style:style>
    <style:style style:name="pc2" style:family="table-column" style:display-name="pc2">
      <style:table-column-properties style:column-width="2.6cm"/>
    </style:style>
    <style:style style:name="pc3" style:family="table-column" style:display-name="pc3">
      <style:table-column-properties style:column-width="2.6cm"/>
    </style:style>
    <style:style style:name="pc4" style:family="table-column" style:display-name="pc4">
      <style:table-column-properties style:column-width="2.4cm"/>
    </style:style>
    <style:style style:name="pc5" style:family="table-column" style:display-name="pc5">
      <style:table-column-properties style:column-width="2.4cm"/>
    </style:style>
    <style:style style:name="pc6" style:family="table-column" style:display-name="pc6">
      <style:table-column-properties style:column-width="2.4cm"/>
    </style:style>
    <style:style style:name="pc7" style:family="table-column" style:display-name="pc7">
      <style:table-column-properties style:column-width="2.4cm"/>
    </style:style>
    <style:style style:name="pc8" style:family="table-column" style:display-name="pc8">
      <style:table-column-properties style:column-width="2.4cm"/>
    </style:style>
    <style:style style:name="c8" style:family="table-cell" style:display-name="c8">
      <style:table-cell-properties fo:border="0.5pt solid #cfcfcf" style:vertical-align="middle" fo:background-color="#DDEBF7"/>
      <style:text-properties fo:color="#000000" fo:font-weight="bold"/>
      <style:paragraph-properties fo:text-align="left"/>
    </style:style>
    <style:style style:name="c9" style:family="table-cell" style:display-name="c9">
      <style:table-cell-properties fo:border="0.5pt solid #cfcfcf" style:vertical-align="middle" fo:background-color="#DDEBF7"/>
      <style:text-properties fo:color="#107C41" fo:font-weight="bold"/>
      <style:paragraph-properties fo:text-align="center"/>
    </style:style>
    <style:style style:name="c10" style:family="table-cell" style:display-name="c10">
      <style:table-cell-properties fo:border="0.5pt solid #cfcfcf" style:vertical-align="middle" fo:background-color="#DDEBF7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cfcfcf" style:vertical-align="middle" fo:background-color="#DDEBF7"/>
      <style:text-properties fo:color="#0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row>
          <table:table-cell office:value-type="string" table:style-name="c0">
            <text:p>Metric</text:p>
          </table:table-cell>
          <table:table-cell office:value-type="string" table:style-name="c0">
            <text:p>Baseline</text:p>
          </table:table-cell>
          <table:table-cell office:value-type="string" table:style-name="c0">
            <text:p>Tuned</text:p>
          </table:table-cell>
          <table:table-cell office:value-type="string" table:style-name="c0">
            <text:p>Change</text:p>
          </table:table-cell>
        </table:table-row>
        <table:table-row>
          <table:table-cell office:value-type="string" table:style-name="c1">
            <text:p>Coins tested</text:p>
          </table:table-cell>
          <table:table-cell office:value-type="float" office:value="28" table:style-name="c2">
            <text:p>28</text:p>
          </table:table-cell>
          <table:table-cell office:value-type="float" office:value="28" table:style-name="c3">
            <text:p>28</text:p>
          </table:table-cell>
          <table:table-cell office:value-type="float" office:value="0" table:style-name="c3">
            <text:p>0</text:p>
          </table:table-cell>
        </table:table-row>
        <table:table-row>
          <table:table-cell office:value-type="string" table:style-name="c1">
            <text:p>Coins that beat buy &amp; hold</text:p>
          </table:table-cell>
          <table:table-cell office:value-type="float" office:value="0" table:style-name="c2">
            <text:p>0</text:p>
          </table:table-cell>
          <table:table-cell office:value-type="float" office:value="0" table:style-name="c3">
            <text:p>0</text:p>
          </table:table-cell>
          <table:table-cell office:value-type="float" office:value="0" table:style-name="c3">
            <text:p>0</text:p>
          </table:table-cell>
        </table:table-row>
        <table:table-row>
          <table:table-cell office:value-type="string" table:style-name="c1">
            <text:p>Avg bot return / coin %</text:p>
          </table:table-cell>
          <table:table-cell office:value-type="float" office:value="-42.64488185650614" table:style-name="c4">
            <text:p>-42.64</text:p>
          </table:table-cell>
          <table:table-cell office:value-type="float" office:value="-26.55846771629709" table:style-name="c5">
            <text:p>-26.56</text:p>
          </table:table-cell>
          <table:table-cell office:value-type="float" office:value="16.086414140209047" table:style-name="c6">
            <text:p>+16.1</text:p>
          </table:table-cell>
        </table:table-row>
        <table:table-row>
          <table:table-cell office:value-type="string" table:style-name="c1">
            <text:p>Median bot return / coin %</text:p>
          </table:table-cell>
          <table:table-cell office:value-type="float" office:value="-42.99933025210888" table:style-name="c4">
            <text:p>-43.00</text:p>
          </table:table-cell>
          <table:table-cell office:value-type="float" office:value="-26.90827186983238" table:style-name="c5">
            <text:p>-26.91</text:p>
          </table:table-cell>
          <table:table-cell office:value-type="float" office:value="16.091058382276497" table:style-name="c6">
            <text:p>+16.1</text:p>
          </table:table-cell>
        </table:table-row>
        <table:table-row>
          <table:table-cell office:value-type="string" table:style-name="c1">
            <text:p>Avg buy &amp; hold / coin %</text:p>
          </table:table-cell>
          <table:table-cell office:value-type="float" office:value="2.72670343736804" table:style-name="c7">
            <text:p>+2.73</text:p>
          </table:table-cell>
          <table:table-cell office:value-type="float" office:value="2.7131234717593693" table:style-name="c6">
            <text:p>+2.71</text:p>
          </table:table-cell>
          <table:table-cell office:value-type="float" office:value="-0.013579965608670808" table:style-name="c3">
            <text:p>-0.0</text:p>
          </table:table-cell>
        </table:table-row>
        <table:table-row>
          <table:table-cell office:value-type="string" table:style-name="c1">
            <text:p>Win rate %</text:p>
          </table:table-cell>
          <table:table-cell office:value-type="float" office:value="24.709910595396614" table:style-name="c2">
            <text:p>24.7</text:p>
          </table:table-cell>
          <table:table-cell office:value-type="float" office:value="27.17857142857143" table:style-name="c3">
            <text:p>27.2</text:p>
          </table:table-cell>
          <table:table-cell office:value-type="float" office:value="2.468660833174816" table:style-name="c6">
            <text:p>+2.5</text:p>
          </table:table-cell>
        </table:table-row>
        <table:table-row>
          <table:table-cell office:value-type="string" table:style-name="c1">
            <text:p>Avg P/L per trade %</text:p>
          </table:table-cell>
          <table:table-cell office:value-type="float" office:value="-0.2955074813563323" table:style-name="c4">
            <text:p>-0.30</text:p>
          </table:table-cell>
          <table:table-cell office:value-type="float" office:value="-0.30904635070755065" table:style-name="c5">
            <text:p>-0.31</text:p>
          </table:table-cell>
          <table:table-cell office:value-type="float" office:value="-0.013538869351218341" table:style-name="c5">
            <text:p>-0.0</text:p>
          </table:table-cell>
        </table:table-row>
        <table:table-row>
          <table:table-cell office:value-type="string" table:style-name="c1">
            <text:p>Total P/L % (sum, equal-size)</text:p>
          </table:table-cell>
          <table:table-cell office:value-type="float" office:value="-1553.482829490239" table:style-name="c4">
            <text:p>-1553.48</text:p>
          </table:table-cell>
          <table:table-cell office:value-type="float" office:value="-865.3297819811419" table:style-name="c5">
            <text:p>-865.33</text:p>
          </table:table-cell>
          <table:table-cell office:value-type="float" office:value="688.1530475090972" table:style-name="c6">
            <text:p>+688.2</text:p>
          </table:table-cell>
        </table:table-row>
        <table:table-row>
          <table:table-cell office:value-type="string" table:style-name="c1">
            <text:p>Total trades</text:p>
          </table:table-cell>
          <table:table-cell office:value-type="float" office:value="5257" table:style-name="c2">
            <text:p>5257</text:p>
          </table:table-cell>
          <table:table-cell office:value-type="float" office:value="2800" table:style-name="c3">
            <text:p>2800</text:p>
          </table:table-cell>
          <table:table-cell office:value-type="float" office:value="-2457" table:style-name="c3">
            <text:p>-2457.0</text:p>
          </table:table-cell>
        </table:table-row>
        <table:table-row>
          <table:table-cell office:value-type="string" table:style-name="c1">
            <text:p>Avg trades / coin</text:p>
          </table:table-cell>
          <table:table-cell office:value-type="float" office:value="187.75" table:style-name="c2">
            <text:p>187.8</text:p>
          </table:table-cell>
          <table:table-cell office:value-type="float" office:value="100.0" table:style-name="c3">
            <text:p>100.0</text:p>
          </table:table-cell>
          <table:table-cell office:value-type="float" office:value="-87.75" table:style-name="c3">
            <text:p>-87.8</text:p>
          </table:table-cell>
        </table:table-row>
      </table:table>
      <table:table table:name="Per Coin">
        <table:table-column table:style-name="pc0"/>
        <table:table-column table:style-name="pc1"/>
        <table:table-column table:style-name="pc2"/>
        <table:table-column table:style-name="pc3"/>
        <table:table-column table:style-name="pc4"/>
        <table:table-column table:style-name="pc5"/>
        <table:table-column table:style-name="pc6"/>
        <table:table-column table:style-name="pc7"/>
        <table:table-column table:style-name="pc8"/>
        <table:table-row>
          <table:table-cell office:value-type="string" table:style-name="c0">
            <text:p>Coin</text:p>
          </table:table-cell>
          <table:table-cell office:value-type="string" table:style-name="c0">
            <text:p>Buy &amp; Hold %</text:p>
          </table:table-cell>
          <table:table-cell office:value-type="string" table:style-name="c0">
            <text:p>Base Ret %</text:p>
          </table:table-cell>
          <table:table-cell office:value-type="string" table:style-name="c0">
            <text:p>Tuned Ret %</text:p>
          </table:table-cell>
          <table:table-cell office:value-type="string" table:style-name="c0">
            <text:p>Δ Tuned-Base</text:p>
          </table:table-cell>
          <table:table-cell office:value-type="string" table:style-name="c0">
            <text:p>Base Trades</text:p>
          </table:table-cell>
          <table:table-cell office:value-type="string" table:style-name="c0">
            <text:p>Tuned Trades</text:p>
          </table:table-cell>
          <table:table-cell office:value-type="string" table:style-name="c0">
            <text:p>Base Win %</text:p>
          </table:table-cell>
          <table:table-cell office:value-type="string" table:style-name="c0">
            <text:p>Tuned Win %</text:p>
          </table:table-cell>
        </table:table-row>
        <table:table-row>
          <table:table-cell office:value-type="string" table:style-name="c1">
            <text:p>SOL</text:p>
          </table:table-cell>
          <table:table-cell office:value-type="float" office:value="-5.276645311589984" table:style-name="c4">
            <text:p>-5.28</text:p>
          </table:table-cell>
          <table:table-cell office:value-type="float" office:value="-38.34281223978642" table:style-name="c4">
            <text:p>-38.34</text:p>
          </table:table-cell>
          <table:table-cell office:value-type="float" office:value="-16.09280750808382" table:style-name="c5">
            <text:p>-16.09</text:p>
          </table:table-cell>
          <table:table-cell office:value-type="float" office:value="22.2500047317026" table:style-name="c6">
            <text:p>+22.25</text:p>
          </table:table-cell>
          <table:table-cell office:value-type="float" office:value="197" table:style-name="c2">
            <text:p>197</text:p>
          </table:table-cell>
          <table:table-cell office:value-type="float" office:value="87" table:style-name="c2">
            <text:p>87</text:p>
          </table:table-cell>
          <table:table-cell office:value-type="float" office:value="23.85786802030457" table:style-name="c2">
            <text:p>23.9</text:p>
          </table:table-cell>
          <table:table-cell office:value-type="float" office:value="29.88505747126437" table:style-name="c3">
            <text:p>29.9</text:p>
          </table:table-cell>
        </table:table-row>
        <table:table-row>
          <table:table-cell office:value-type="string" table:style-name="c1">
            <text:p>XRP</text:p>
          </table:table-cell>
          <table:table-cell office:value-type="float" office:value="-3.753213367609249" table:style-name="c4">
            <text:p>-3.75</text:p>
          </table:table-cell>
          <table:table-cell office:value-type="float" office:value="-43.814278022537536" table:style-name="c4">
            <text:p>-43.81</text:p>
          </table:table-cell>
          <table:table-cell office:value-type="float" office:value="-16.532946157164453" table:style-name="c5">
            <text:p>-16.53</text:p>
          </table:table-cell>
          <table:table-cell office:value-type="float" office:value="27.281331865373083" table:style-name="c6">
            <text:p>+27.28</text:p>
          </table:table-cell>
          <table:table-cell office:value-type="float" office:value="162" table:style-name="c2">
            <text:p>162</text:p>
          </table:table-cell>
          <table:table-cell office:value-type="float" office:value="66" table:style-name="c2">
            <text:p>66</text:p>
          </table:table-cell>
          <table:table-cell office:value-type="float" office:value="8.024691358024691" table:style-name="c2">
            <text:p>8.0</text:p>
          </table:table-cell>
          <table:table-cell office:value-type="float" office:value="15.151515151515152" table:style-name="c3">
            <text:p>15.2</text:p>
          </table:table-cell>
        </table:table-row>
        <table:table-row>
          <table:table-cell office:value-type="string" table:style-name="c1">
            <text:p>LTC</text:p>
          </table:table-cell>
          <table:table-cell office:value-type="float" office:value="-5.198889916743747" table:style-name="c4">
            <text:p>-5.20</text:p>
          </table:table-cell>
          <table:table-cell office:value-type="float" office:value="-41.43453742196336" table:style-name="c4">
            <text:p>-41.43</text:p>
          </table:table-cell>
          <table:table-cell office:value-type="float" office:value="-17.289054300523365" table:style-name="c5">
            <text:p>-17.29</text:p>
          </table:table-cell>
          <table:table-cell office:value-type="float" office:value="24.145483121439998" table:style-name="c6">
            <text:p>+24.15</text:p>
          </table:table-cell>
          <table:table-cell office:value-type="float" office:value="168" table:style-name="c2">
            <text:p>168</text:p>
          </table:table-cell>
          <table:table-cell office:value-type="float" office:value="60" table:style-name="c2">
            <text:p>60</text:p>
          </table:table-cell>
          <table:table-cell office:value-type="float" office:value="12.5" table:style-name="c2">
            <text:p>12.5</text:p>
          </table:table-cell>
          <table:table-cell office:value-type="float" office:value="15.0" table:style-name="c3">
            <text:p>15.0</text:p>
          </table:table-cell>
        </table:table-row>
        <table:table-row>
          <table:table-cell office:value-type="string" table:style-name="c1">
            <text:p>BNB</text:p>
          </table:table-cell>
          <table:table-cell office:value-type="float" office:value="9.49268154042916" table:style-name="c7">
            <text:p>+9.49</text:p>
          </table:table-cell>
          <table:table-cell office:value-type="float" office:value="-46.15823753145109" table:style-name="c4">
            <text:p>-46.16</text:p>
          </table:table-cell>
          <table:table-cell office:value-type="float" office:value="-19.282200161460924" table:style-name="c5">
            <text:p>-19.28</text:p>
          </table:table-cell>
          <table:table-cell office:value-type="float" office:value="26.87603736999017" table:style-name="c6">
            <text:p>+26.88</text:p>
          </table:table-cell>
          <table:table-cell office:value-type="float" office:value="221" table:style-name="c2">
            <text:p>221</text:p>
          </table:table-cell>
          <table:table-cell office:value-type="float" office:value="82" table:style-name="c2">
            <text:p>82</text:p>
          </table:table-cell>
          <table:table-cell office:value-type="float" office:value="13.122171945701359" table:style-name="c2">
            <text:p>13.1</text:p>
          </table:table-cell>
          <table:table-cell office:value-type="float" office:value="24.390243902439025" table:style-name="c3">
            <text:p>24.4</text:p>
          </table:table-cell>
        </table:table-row>
        <table:table-row>
          <table:table-cell office:value-type="string" table:style-name="c1">
            <text:p>ETH</text:p>
          </table:table-cell>
          <table:table-cell office:value-type="float" office:value="-0.7117597923241992" table:style-name="c4">
            <text:p>-0.71</text:p>
          </table:table-cell>
          <table:table-cell office:value-type="float" office:value="-42.44963477994619" table:style-name="c4">
            <text:p>-42.45</text:p>
          </table:table-cell>
          <table:table-cell office:value-type="float" office:value="-20.64299122795123" table:style-name="c5">
            <text:p>-20.64</text:p>
          </table:table-cell>
          <table:table-cell office:value-type="float" office:value="21.806643551994956" table:style-name="c6">
            <text:p>+21.81</text:p>
          </table:table-cell>
          <table:table-cell office:value-type="float" office:value="199" table:style-name="c2">
            <text:p>199</text:p>
          </table:table-cell>
          <table:table-cell office:value-type="float" office:value="100" table:style-name="c2">
            <text:p>100</text:p>
          </table:table-cell>
          <table:table-cell office:value-type="float" office:value="21.608040201005025" table:style-name="c2">
            <text:p>21.6</text:p>
          </table:table-cell>
          <table:table-cell office:value-type="float" office:value="25.0" table:style-name="c3">
            <text:p>25.0</text:p>
          </table:table-cell>
        </table:table-row>
        <table:table-row>
          <table:table-cell office:value-type="string" table:style-name="c1">
            <text:p>AVAX</text:p>
          </table:table-cell>
          <table:table-cell office:value-type="float" office:value="-3.098901098901099" table:style-name="c4">
            <text:p>-3.10</text:p>
          </table:table-cell>
          <table:table-cell office:value-type="float" office:value="-37.60621430220096" table:style-name="c4">
            <text:p>-37.61</text:p>
          </table:table-cell>
          <table:table-cell office:value-type="float" office:value="-21.59321816336317" table:style-name="c5">
            <text:p>-21.59</text:p>
          </table:table-cell>
          <table:table-cell office:value-type="float" office:value="16.012996138837792" table:style-name="c6">
            <text:p>+16.01</text:p>
          </table:table-cell>
          <table:table-cell office:value-type="float" office:value="178" table:style-name="c2">
            <text:p>178</text:p>
          </table:table-cell>
          <table:table-cell office:value-type="float" office:value="89" table:style-name="c2">
            <text:p>89</text:p>
          </table:table-cell>
          <table:table-cell office:value-type="float" office:value="22.47191011235955" table:style-name="c2">
            <text:p>22.5</text:p>
          </table:table-cell>
          <table:table-cell office:value-type="float" office:value="25.842696629213485" table:style-name="c3">
            <text:p>25.8</text:p>
          </table:table-cell>
        </table:table-row>
        <table:table-row>
          <table:table-cell office:value-type="string" table:style-name="c1">
            <text:p>FIL</text:p>
          </table:table-cell>
          <table:table-cell office:value-type="float" office:value="-6.673407482305353" table:style-name="c4">
            <text:p>-6.67</text:p>
          </table:table-cell>
          <table:table-cell office:value-type="float" office:value="-40.322641147290085" table:style-name="c4">
            <text:p>-40.32</text:p>
          </table:table-cell>
          <table:table-cell office:value-type="float" office:value="-21.661307226421048" table:style-name="c5">
            <text:p>-21.66</text:p>
          </table:table-cell>
          <table:table-cell office:value-type="float" office:value="18.661333920869037" table:style-name="c6">
            <text:p>+18.66</text:p>
          </table:table-cell>
          <table:table-cell office:value-type="float" office:value="193" table:style-name="c2">
            <text:p>193</text:p>
          </table:table-cell>
          <table:table-cell office:value-type="float" office:value="116" table:style-name="c2">
            <text:p>116</text:p>
          </table:table-cell>
          <table:table-cell office:value-type="float" office:value="29.015544041450774" table:style-name="c2">
            <text:p>29.0</text:p>
          </table:table-cell>
          <table:table-cell office:value-type="float" office:value="33.62068965517241" table:style-name="c3">
            <text:p>33.6</text:p>
          </table:table-cell>
        </table:table-row>
        <table:table-row>
          <table:table-cell office:value-type="string" table:style-name="c1">
            <text:p>ADA</text:p>
          </table:table-cell>
          <table:table-cell office:value-type="float" office:value="-13.702190865206088" table:style-name="c4">
            <text:p>-13.70</text:p>
          </table:table-cell>
          <table:table-cell office:value-type="float" office:value="-40.24852201058104" table:style-name="c4">
            <text:p>-40.25</text:p>
          </table:table-cell>
          <table:table-cell office:value-type="float" office:value="-21.760205490809085" table:style-name="c5">
            <text:p>-21.76</text:p>
          </table:table-cell>
          <table:table-cell office:value-type="float" office:value="18.488316519771956" table:style-name="c6">
            <text:p>+18.49</text:p>
          </table:table-cell>
          <table:table-cell office:value-type="float" office:value="171" table:style-name="c2">
            <text:p>171</text:p>
          </table:table-cell>
          <table:table-cell office:value-type="float" office:value="80" table:style-name="c2">
            <text:p>80</text:p>
          </table:table-cell>
          <table:table-cell office:value-type="float" office:value="19.298245614035086" table:style-name="c2">
            <text:p>19.3</text:p>
          </table:table-cell>
          <table:table-cell office:value-type="float" office:value="23.75" table:style-name="c3">
            <text:p>23.8</text:p>
          </table:table-cell>
        </table:table-row>
        <table:table-row>
          <table:table-cell office:value-type="string" table:style-name="c1">
            <text:p>SUI</text:p>
          </table:table-cell>
          <table:table-cell office:value-type="float" office:value="-3.915761763738067" table:style-name="c4">
            <text:p>-3.92</text:p>
          </table:table-cell>
          <table:table-cell office:value-type="float" office:value="-30.539361047031445" table:style-name="c4">
            <text:p>-30.54</text:p>
          </table:table-cell>
          <table:table-cell office:value-type="float" office:value="-23.812171994983792" table:style-name="c5">
            <text:p>-23.81</text:p>
          </table:table-cell>
          <table:table-cell office:value-type="float" office:value="6.7271890520476525" table:style-name="c6">
            <text:p>+6.73</text:p>
          </table:table-cell>
          <table:table-cell office:value-type="float" office:value="176" table:style-name="c2">
            <text:p>176</text:p>
          </table:table-cell>
          <table:table-cell office:value-type="float" office:value="103" table:style-name="c2">
            <text:p>103</text:p>
          </table:table-cell>
          <table:table-cell office:value-type="float" office:value="26.704545454545453" table:style-name="c2">
            <text:p>26.7</text:p>
          </table:table-cell>
          <table:table-cell office:value-type="float" office:value="24.271844660194176" table:style-name="c3">
            <text:p>24.3</text:p>
          </table:table-cell>
        </table:table-row>
        <table:table-row>
          <table:table-cell office:value-type="string" table:style-name="c1">
            <text:p>ATOM</text:p>
          </table:table-cell>
          <table:table-cell office:value-type="float" office:value="6.185002736726874" table:style-name="c7">
            <text:p>+6.19</text:p>
          </table:table-cell>
          <table:table-cell office:value-type="float" office:value="-41.340411845744356" table:style-name="c4">
            <text:p>-41.34</text:p>
          </table:table-cell>
          <table:table-cell office:value-type="float" office:value="-23.97219030407937" table:style-name="c5">
            <text:p>-23.97</text:p>
          </table:table-cell>
          <table:table-cell office:value-type="float" office:value="17.368221541664987" table:style-name="c6">
            <text:p>+17.37</text:p>
          </table:table-cell>
          <table:table-cell office:value-type="float" office:value="198" table:style-name="c2">
            <text:p>198</text:p>
          </table:table-cell>
          <table:table-cell office:value-type="float" office:value="100" table:style-name="c2">
            <text:p>100</text:p>
          </table:table-cell>
          <table:table-cell office:value-type="float" office:value="27.77777777777778" table:style-name="c2">
            <text:p>27.8</text:p>
          </table:table-cell>
          <table:table-cell office:value-type="float" office:value="30.0" table:style-name="c3">
            <text:p>30.0</text:p>
          </table:table-cell>
        </table:table-row>
        <table:table-row>
          <table:table-cell office:value-type="string" table:style-name="c1">
            <text:p>BTC</text:p>
          </table:table-cell>
          <table:table-cell office:value-type="float" office:value="7.331551522147663" table:style-name="c7">
            <text:p>+7.33</text:p>
          </table:table-cell>
          <table:table-cell office:value-type="float" office:value="-46.12594138296047" table:style-name="c4">
            <text:p>-46.13</text:p>
          </table:table-cell>
          <table:table-cell office:value-type="float" office:value="-25.532065871690314" table:style-name="c5">
            <text:p>-25.53</text:p>
          </table:table-cell>
          <table:table-cell office:value-type="float" office:value="20.593875511270156" table:style-name="c6">
            <text:p>+20.59</text:p>
          </table:table-cell>
          <table:table-cell office:value-type="float" office:value="223" table:style-name="c2">
            <text:p>223</text:p>
          </table:table-cell>
          <table:table-cell office:value-type="float" office:value="94" table:style-name="c2">
            <text:p>94</text:p>
          </table:table-cell>
          <table:table-cell office:value-type="float" office:value="17.040358744394617" table:style-name="c2">
            <text:p>17.0</text:p>
          </table:table-cell>
          <table:table-cell office:value-type="float" office:value="22.340425531914892" table:style-name="c3">
            <text:p>22.3</text:p>
          </table:table-cell>
        </table:table-row>
        <table:table-row>
          <table:table-cell office:value-type="string" table:style-name="c1">
            <text:p>DOT</text:p>
          </table:table-cell>
          <table:table-cell office:value-type="float" office:value="-21.977287909151645" table:style-name="c4">
            <text:p>-21.98</text:p>
          </table:table-cell>
          <table:table-cell office:value-type="float" office:value="-36.93025619830379" table:style-name="c4">
            <text:p>-36.93</text:p>
          </table:table-cell>
          <table:table-cell office:value-type="float" office:value="-25.68933051652001" table:style-name="c5">
            <text:p>-25.69</text:p>
          </table:table-cell>
          <table:table-cell office:value-type="float" office:value="11.240925681783779" table:style-name="c6">
            <text:p>+11.24</text:p>
          </table:table-cell>
          <table:table-cell office:value-type="float" office:value="134" table:style-name="c2">
            <text:p>134</text:p>
          </table:table-cell>
          <table:table-cell office:value-type="float" office:value="78" table:style-name="c2">
            <text:p>78</text:p>
          </table:table-cell>
          <table:table-cell office:value-type="float" office:value="25.37313432835821" table:style-name="c2">
            <text:p>25.4</text:p>
          </table:table-cell>
          <table:table-cell office:value-type="float" office:value="25.64102564102564" table:style-name="c3">
            <text:p>25.6</text:p>
          </table:table-cell>
        </table:table-row>
        <table:table-row>
          <table:table-cell office:value-type="string" table:style-name="c1">
            <text:p>SHIB</text:p>
          </table:table-cell>
          <table:table-cell office:value-type="float" office:value="-0.18382352941176297" table:style-name="c4">
            <text:p>-0.18</text:p>
          </table:table-cell>
          <table:table-cell office:value-type="float" office:value="-44.934239358502246" table:style-name="c4">
            <text:p>-44.93</text:p>
          </table:table-cell>
          <table:table-cell office:value-type="float" office:value="-25.897500771283628" table:style-name="c5">
            <text:p>-25.90</text:p>
          </table:table-cell>
          <table:table-cell office:value-type="float" office:value="19.03673858721862" table:style-name="c6">
            <text:p>+19.04</text:p>
          </table:table-cell>
          <table:table-cell office:value-type="float" office:value="201" table:style-name="c2">
            <text:p>201</text:p>
          </table:table-cell>
          <table:table-cell office:value-type="float" office:value="113" table:style-name="c2">
            <text:p>113</text:p>
          </table:table-cell>
          <table:table-cell office:value-type="float" office:value="24.875621890547265" table:style-name="c2">
            <text:p>24.9</text:p>
          </table:table-cell>
          <table:table-cell office:value-type="float" office:value="29.20353982300885" table:style-name="c3">
            <text:p>29.2</text:p>
          </table:table-cell>
        </table:table-row>
        <table:table-row>
          <table:table-cell office:value-type="string" table:style-name="c1">
            <text:p>OP</text:p>
          </table:table-cell>
          <table:table-cell office:value-type="float" office:value="-7.5697211155378445" table:style-name="c4">
            <text:p>-7.57</text:p>
          </table:table-cell>
          <table:table-cell office:value-type="float" office:value="-34.323941004191624" table:style-name="c4">
            <text:p>-34.32</text:p>
          </table:table-cell>
          <table:table-cell office:value-type="float" office:value="-26.831202458065796" table:style-name="c5">
            <text:p>-26.83</text:p>
          </table:table-cell>
          <table:table-cell office:value-type="float" office:value="7.492738546125828" table:style-name="c6">
            <text:p>+7.49</text:p>
          </table:table-cell>
          <table:table-cell office:value-type="float" office:value="157" table:style-name="c2">
            <text:p>157</text:p>
          </table:table-cell>
          <table:table-cell office:value-type="float" office:value="92" table:style-name="c2">
            <text:p>92</text:p>
          </table:table-cell>
          <table:table-cell office:value-type="float" office:value="29.936305732484076" table:style-name="c2">
            <text:p>29.9</text:p>
          </table:table-cell>
          <table:table-cell office:value-type="float" office:value="28.26086956521739" table:style-name="c3">
            <text:p>28.3</text:p>
          </table:table-cell>
        </table:table-row>
        <table:table-row>
          <table:table-cell office:value-type="string" table:style-name="c1">
            <text:p>TIA</text:p>
          </table:table-cell>
          <table:table-cell office:value-type="float" office:value="19.08752327746741" table:style-name="c7">
            <text:p>+19.09</text:p>
          </table:table-cell>
          <table:table-cell office:value-type="float" office:value="-38.845252399053415" table:style-name="c4">
            <text:p>-38.85</text:p>
          </table:table-cell>
          <table:table-cell office:value-type="float" office:value="-26.985341281598963" table:style-name="c5">
            <text:p>-26.99</text:p>
          </table:table-cell>
          <table:table-cell office:value-type="float" office:value="11.859911117454452" table:style-name="c6">
            <text:p>+11.86</text:p>
          </table:table-cell>
          <table:table-cell office:value-type="float" office:value="180" table:style-name="c2">
            <text:p>180</text:p>
          </table:table-cell>
          <table:table-cell office:value-type="float" office:value="109" table:style-name="c2">
            <text:p>109</text:p>
          </table:table-cell>
          <table:table-cell office:value-type="float" office:value="31.11111111111111" table:style-name="c2">
            <text:p>31.1</text:p>
          </table:table-cell>
          <table:table-cell office:value-type="float" office:value="33.02752293577982" table:style-name="c3">
            <text:p>33.0</text:p>
          </table:table-cell>
        </table:table-row>
        <table:table-row>
          <table:table-cell office:value-type="string" table:style-name="c1">
            <text:p>DOGE</text:p>
          </table:table-cell>
          <table:table-cell office:value-type="float" office:value="8.912403185338711" table:style-name="c7">
            <text:p>+8.91</text:p>
          </table:table-cell>
          <table:table-cell office:value-type="float" office:value="-44.153877333165454" table:style-name="c4">
            <text:p>-44.15</text:p>
          </table:table-cell>
          <table:table-cell office:value-type="float" office:value="-27.10816792638931" table:style-name="c5">
            <text:p>-27.11</text:p>
          </table:table-cell>
          <table:table-cell office:value-type="float" office:value="17.045709406776144" table:style-name="c6">
            <text:p>+17.05</text:p>
          </table:table-cell>
          <table:table-cell office:value-type="float" office:value="197" table:style-name="c2">
            <text:p>197</text:p>
          </table:table-cell>
          <table:table-cell office:value-type="float" office:value="113" table:style-name="c2">
            <text:p>113</text:p>
          </table:table-cell>
          <table:table-cell office:value-type="float" office:value="23.3502538071066" table:style-name="c2">
            <text:p>23.4</text:p>
          </table:table-cell>
          <table:table-cell office:value-type="float" office:value="26.548672566371685" table:style-name="c3">
            <text:p>26.5</text:p>
          </table:table-cell>
        </table:table-row>
        <table:table-row>
          <table:table-cell office:value-type="string" table:style-name="c1">
            <text:p>UNI</text:p>
          </table:table-cell>
          <table:table-cell office:value-type="float" office:value="-23.347107438016526" table:style-name="c4">
            <text:p>-23.35</text:p>
          </table:table-cell>
          <table:table-cell office:value-type="float" office:value="-39.73500169934256" table:style-name="c4">
            <text:p>-39.74</text:p>
          </table:table-cell>
          <table:table-cell office:value-type="float" office:value="-27.219160122980053" table:style-name="c5">
            <text:p>-27.22</text:p>
          </table:table-cell>
          <table:table-cell office:value-type="float" office:value="12.515841576362508" table:style-name="c6">
            <text:p>+12.52</text:p>
          </table:table-cell>
          <table:table-cell office:value-type="float" office:value="154" table:style-name="c2">
            <text:p>154</text:p>
          </table:table-cell>
          <table:table-cell office:value-type="float" office:value="91" table:style-name="c2">
            <text:p>91</text:p>
          </table:table-cell>
          <table:table-cell office:value-type="float" office:value="24.675324675324674" table:style-name="c2">
            <text:p>24.7</text:p>
          </table:table-cell>
          <table:table-cell office:value-type="float" office:value="28.57142857142857" table:style-name="c3">
            <text:p>28.6</text:p>
          </table:table-cell>
        </table:table-row>
        <table:table-row>
          <table:table-cell office:value-type="string" table:style-name="c1">
            <text:p>LINK</text:p>
          </table:table-cell>
          <table:table-cell office:value-type="float" office:value="1.8842224744608442" table:style-name="c7">
            <text:p>+1.88</text:p>
          </table:table-cell>
          <table:table-cell office:value-type="float" office:value="-48.10786136259595" table:style-name="c4">
            <text:p>-48.11</text:p>
          </table:table-cell>
          <table:table-cell office:value-type="float" office:value="-27.282101777813978" table:style-name="c5">
            <text:p>-27.28</text:p>
          </table:table-cell>
          <table:table-cell office:value-type="float" office:value="20.82575958478197" table:style-name="c6">
            <text:p>+20.83</text:p>
          </table:table-cell>
          <table:table-cell office:value-type="float" office:value="194" table:style-name="c2">
            <text:p>194</text:p>
          </table:table-cell>
          <table:table-cell office:value-type="float" office:value="104" table:style-name="c2">
            <text:p>104</text:p>
          </table:table-cell>
          <table:table-cell office:value-type="float" office:value="19.072164948453608" table:style-name="c2">
            <text:p>19.1</text:p>
          </table:table-cell>
          <table:table-cell office:value-type="float" office:value="20.192307692307693" table:style-name="c3">
            <text:p>20.2</text:p>
          </table:table-cell>
        </table:table-row>
        <table:table-row>
          <table:table-cell office:value-type="string" table:style-name="c1">
            <text:p>SAND</text:p>
          </table:table-cell>
          <table:table-cell office:value-type="float" office:value="-18.42603550295858" table:style-name="c4">
            <text:p>-18.43</text:p>
          </table:table-cell>
          <table:table-cell office:value-type="float" office:value="-43.367495923343206" table:style-name="c4">
            <text:p>-43.37</text:p>
          </table:table-cell>
          <table:table-cell office:value-type="float" office:value="-27.465921757166562" table:style-name="c5">
            <text:p>-27.47</text:p>
          </table:table-cell>
          <table:table-cell office:value-type="float" office:value="15.901574166176644" table:style-name="c6">
            <text:p>+15.90</text:p>
          </table:table-cell>
          <table:table-cell office:value-type="float" office:value="188" table:style-name="c2">
            <text:p>188</text:p>
          </table:table-cell>
          <table:table-cell office:value-type="float" office:value="86" table:style-name="c2">
            <text:p>86</text:p>
          </table:table-cell>
          <table:table-cell office:value-type="float" office:value="22.340425531914892" table:style-name="c2">
            <text:p>22.3</text:p>
          </table:table-cell>
          <table:table-cell office:value-type="float" office:value="20.930232558139537" table:style-name="c3">
            <text:p>20.9</text:p>
          </table:table-cell>
        </table:table-row>
        <table:table-row>
          <table:table-cell office:value-type="string" table:style-name="c1">
            <text:p>CHZ</text:p>
          </table:table-cell>
          <table:table-cell office:value-type="float" office:value="-7.890318970341363" table:style-name="c4">
            <text:p>-7.89</text:p>
          </table:table-cell>
          <table:table-cell office:value-type="float" office:value="-42.63116458087454" table:style-name="c4">
            <text:p>-42.63</text:p>
          </table:table-cell>
          <table:table-cell office:value-type="float" office:value="-28.33153774918566" table:style-name="c5">
            <text:p>-28.33</text:p>
          </table:table-cell>
          <table:table-cell office:value-type="float" office:value="14.29962683168888" table:style-name="c6">
            <text:p>+14.30</text:p>
          </table:table-cell>
          <table:table-cell office:value-type="float" office:value="151" table:style-name="c2">
            <text:p>151</text:p>
          </table:table-cell>
          <table:table-cell office:value-type="float" office:value="87" table:style-name="c2">
            <text:p>87</text:p>
          </table:table-cell>
          <table:table-cell office:value-type="float" office:value="29.80132450331126" table:style-name="c2">
            <text:p>29.8</text:p>
          </table:table-cell>
          <table:table-cell office:value-type="float" office:value="29.88505747126437" table:style-name="c3">
            <text:p>29.9</text:p>
          </table:table-cell>
        </table:table-row>
        <table:table-row>
          <table:table-cell office:value-type="string" table:style-name="c1">
            <text:p>MANA</text:p>
          </table:table-cell>
          <table:table-cell office:value-type="float" office:value="-13.4297520661157" table:style-name="c4">
            <text:p>-13.43</text:p>
          </table:table-cell>
          <table:table-cell office:value-type="float" office:value="-44.35478559809796" table:style-name="c4">
            <text:p>-44.35</text:p>
          </table:table-cell>
          <table:table-cell office:value-type="float" office:value="-28.919899447316865" table:style-name="c5">
            <text:p>-28.92</text:p>
          </table:table-cell>
          <table:table-cell office:value-type="float" office:value="15.434886150781097" table:style-name="c6">
            <text:p>+15.43</text:p>
          </table:table-cell>
          <table:table-cell office:value-type="float" office:value="172" table:style-name="c2">
            <text:p>172</text:p>
          </table:table-cell>
          <table:table-cell office:value-type="float" office:value="98" table:style-name="c2">
            <text:p>98</text:p>
          </table:table-cell>
          <table:table-cell office:value-type="float" office:value="22.674418604651162" table:style-name="c2">
            <text:p>22.7</text:p>
          </table:table-cell>
          <table:table-cell office:value-type="float" office:value="21.428571428571427" table:style-name="c3">
            <text:p>21.4</text:p>
          </table:table-cell>
        </table:table-row>
        <table:table-row>
          <table:table-cell office:value-type="string" table:style-name="c1">
            <text:p>ETC</text:p>
          </table:table-cell>
          <table:table-cell office:value-type="float" office:value="-5.633802816901413" table:style-name="c4">
            <text:p>-5.63</text:p>
          </table:table-cell>
          <table:table-cell office:value-type="float" office:value="-50.606661113844396" table:style-name="c4">
            <text:p>-50.61</text:p>
          </table:table-cell>
          <table:table-cell office:value-type="float" office:value="-30.380647384263614" table:style-name="c5">
            <text:p>-30.38</text:p>
          </table:table-cell>
          <table:table-cell office:value-type="float" office:value="20.22601372958078" table:style-name="c6">
            <text:p>+20.23</text:p>
          </table:table-cell>
          <table:table-cell office:value-type="float" office:value="203" table:style-name="c2">
            <text:p>203</text:p>
          </table:table-cell>
          <table:table-cell office:value-type="float" office:value="100" table:style-name="c2">
            <text:p>100</text:p>
          </table:table-cell>
          <table:table-cell office:value-type="float" office:value="20.19704433497537" table:style-name="c2">
            <text:p>20.2</text:p>
          </table:table-cell>
          <table:table-cell office:value-type="float" office:value="24.0" table:style-name="c3">
            <text:p>24.0</text:p>
          </table:table-cell>
        </table:table-row>
        <table:table-row>
          <table:table-cell office:value-type="string" table:style-name="c1">
            <text:p>ARB</text:p>
          </table:table-cell>
          <table:table-cell office:value-type="float" office:value="0.0" table:style-name="c7">
            <text:p>+0.00</text:p>
          </table:table-cell>
          <table:table-cell office:value-type="float" office:value="-44.59776898987659" table:style-name="c4">
            <text:p>-44.60</text:p>
          </table:table-cell>
          <table:table-cell office:value-type="float" office:value="-30.387181416167326" table:style-name="c5">
            <text:p>-30.39</text:p>
          </table:table-cell>
          <table:table-cell office:value-type="float" office:value="14.210587573709265" table:style-name="c6">
            <text:p>+14.21</text:p>
          </table:table-cell>
          <table:table-cell office:value-type="float" office:value="176" table:style-name="c2">
            <text:p>176</text:p>
          </table:table-cell>
          <table:table-cell office:value-type="float" office:value="114" table:style-name="c2">
            <text:p>114</text:p>
          </table:table-cell>
          <table:table-cell office:value-type="float" office:value="31.818181818181817" table:style-name="c2">
            <text:p>31.8</text:p>
          </table:table-cell>
          <table:table-cell office:value-type="float" office:value="33.33333333333333" table:style-name="c3">
            <text:p>33.3</text:p>
          </table:table-cell>
        </table:table-row>
        <table:table-row>
          <table:table-cell office:value-type="string" table:style-name="c1">
            <text:p>NEAR</text:p>
          </table:table-cell>
          <table:table-cell office:value-type="float" office:value="68.94775570272257" table:style-name="c7">
            <text:p>+68.95</text:p>
          </table:table-cell>
          <table:table-cell office:value-type="float" office:value="-32.31470020813503" table:style-name="c4">
            <text:p>-32.31</text:p>
          </table:table-cell>
          <table:table-cell office:value-type="float" office:value="-31.220894171559564" table:style-name="c5">
            <text:p>-31.22</text:p>
          </table:table-cell>
          <table:table-cell office:value-type="float" office:value="1.0938060365754652" table:style-name="c6">
            <text:p>+1.09</text:p>
          </table:table-cell>
          <table:table-cell office:value-type="float" office:value="183" table:style-name="c2">
            <text:p>183</text:p>
          </table:table-cell>
          <table:table-cell office:value-type="float" office:value="102" table:style-name="c2">
            <text:p>102</text:p>
          </table:table-cell>
          <table:table-cell office:value-type="float" office:value="34.42622950819672" table:style-name="c2">
            <text:p>34.4</text:p>
          </table:table-cell>
          <table:table-cell office:value-type="float" office:value="31.372549019607842" table:style-name="c3">
            <text:p>31.4</text:p>
          </table:table-cell>
        </table:table-row>
        <table:table-row>
          <table:table-cell office:value-type="string" table:style-name="c1">
            <text:p>PEPE</text:p>
          </table:table-cell>
          <table:table-cell office:value-type="float" office:value="-4.011461318051574" table:style-name="c4">
            <text:p>-4.01</text:p>
          </table:table-cell>
          <table:table-cell office:value-type="float" office:value="-47.14096690818689" table:style-name="c4">
            <text:p>-47.14</text:p>
          </table:table-cell>
          <table:table-cell office:value-type="float" office:value="-32.53237744811963" table:style-name="c5">
            <text:p>-32.53</text:p>
          </table:table-cell>
          <table:table-cell office:value-type="float" office:value="14.608589460067257" table:style-name="c6">
            <text:p>+14.61</text:p>
          </table:table-cell>
          <table:table-cell office:value-type="float" office:value="195" table:style-name="c2">
            <text:p>195</text:p>
          </table:table-cell>
          <table:table-cell office:value-type="float" office:value="116" table:style-name="c2">
            <text:p>116</text:p>
          </table:table-cell>
          <table:table-cell office:value-type="float" office:value="26.153846153846157" table:style-name="c2">
            <text:p>26.2</text:p>
          </table:table-cell>
          <table:table-cell office:value-type="float" office:value="26.72413793103448" table:style-name="c3">
            <text:p>26.7</text:p>
          </table:table-cell>
        </table:table-row>
        <table:table-row>
          <table:table-cell office:value-type="string" table:style-name="c1">
            <text:p>INJ</text:p>
          </table:table-cell>
          <table:table-cell office:value-type="float" office:value="112.10336931632318" table:style-name="c7">
            <text:p>+112.10</text:p>
          </table:table-cell>
          <table:table-cell office:value-type="float" office:value="-51.59833847493215" table:style-name="c4">
            <text:p>-51.60</text:p>
          </table:table-cell>
          <table:table-cell office:value-type="float" office:value="-35.90961301153824" table:style-name="c5">
            <text:p>-35.91</text:p>
          </table:table-cell>
          <table:table-cell office:value-type="float" office:value="15.688725463393908" table:style-name="c6">
            <text:p>+15.69</text:p>
          </table:table-cell>
          <table:table-cell office:value-type="float" office:value="248" table:style-name="c2">
            <text:p>248</text:p>
          </table:table-cell>
          <table:table-cell office:value-type="float" office:value="152" table:style-name="c2">
            <text:p>152</text:p>
          </table:table-cell>
          <table:table-cell office:value-type="float" office:value="32.66129032258064" table:style-name="c2">
            <text:p>32.7</text:p>
          </table:table-cell>
          <table:table-cell office:value-type="float" office:value="34.21052631578947" table:style-name="c3">
            <text:p>34.2</text:p>
          </table:table-cell>
        </table:table-row>
        <table:table-row>
          <table:table-cell office:value-type="string" table:style-name="c1">
            <text:p>APT</text:p>
          </table:table-cell>
          <table:table-cell office:value-type="float" office:value="-5.714285714285708" table:style-name="c4">
            <text:p>-5.71</text:p>
          </table:table-cell>
          <table:table-cell office:value-type="float" office:value="-50.60740628570739" table:style-name="c4">
            <text:p>-50.61</text:p>
          </table:table-cell>
          <table:table-cell office:value-type="float" office:value="-41.324761228973955" table:style-name="c5">
            <text:p>-41.32</text:p>
          </table:table-cell>
          <table:table-cell office:value-type="float" office:value="9.282645056733436" table:style-name="c6">
            <text:p>+9.28</text:p>
          </table:table-cell>
          <table:table-cell office:value-type="float" office:value="180" table:style-name="c2">
            <text:p>180</text:p>
          </table:table-cell>
          <table:table-cell office:value-type="float" office:value="108" table:style-name="c2">
            <text:p>108</text:p>
          </table:table-cell>
          <table:table-cell office:value-type="float" office:value="31.11111111111111" table:style-name="c2">
            <text:p>31.1</text:p>
          </table:table-cell>
          <table:table-cell office:value-type="float" office:value="25.0" table:style-name="c3">
            <text:p>25.0</text:p>
          </table:table-cell>
        </table:table-row>
        <table:table-row>
          <table:table-cell office:value-type="string" table:style-name="c1">
            <text:p>WIF</text:p>
          </table:table-cell>
          <table:table-cell office:value-type="float" office:value="-7.4626865671641855" table:style-name="c4">
            <text:p>-7.46</text:p>
          </table:table-cell>
          <table:table-cell office:value-type="float" office:value="-51.42438281252575" table:style-name="c4">
            <text:p>-51.42</text:p>
          </table:table-cell>
          <table:table-cell office:value-type="float" office:value="-41.980299180844796" table:style-name="c5">
            <text:p>-41.98</text:p>
          </table:table-cell>
          <table:table-cell office:value-type="float" office:value="9.444083631680954" table:style-name="c6">
            <text:p>+9.44</text:p>
          </table:table-cell>
          <table:table-cell office:value-type="float" office:value="258" table:style-name="c2">
            <text:p>258</text:p>
          </table:table-cell>
          <table:table-cell office:value-type="float" office:value="160" table:style-name="c2">
            <text:p>160</text:p>
          </table:table-cell>
          <table:table-cell office:value-type="float" office:value="36.82170542635659" table:style-name="c2">
            <text:p>36.8</text:p>
          </table:table-cell>
          <table:table-cell office:value-type="float" office:value="33.125" table:style-name="c3">
            <text:p>33.1</text:p>
          </table:table-cell>
        </table:table-row>
        <table:table-row>
          <table:table-cell office:value-type="string" table:style-name="c8">
            <text:p>AVERAGE</text:p>
          </table:table-cell>
          <table:table-cell office:value-type="float" office:value="2.7131234717593693" table:style-name="c9">
            <text:p>+2.71</text:p>
          </table:table-cell>
          <table:table-cell office:value-type="float" office:value="-42.64488185650614" table:style-name="c10">
            <text:p>-42.64</text:p>
          </table:table-cell>
          <table:table-cell office:value-type="float" office:value="-26.55846771629709" table:style-name="c10">
            <text:p>-26.56</text:p>
          </table:table-cell>
          <table:table-cell office:value-type="float" office:value="16.086414140209047" table:style-name="c9">
            <text:p>+16.09</text:p>
          </table:table-cell>
          <table:table-cell office:value-type="float" office:value="187.75" table:style-name="c11">
            <text:p>187.8</text:p>
          </table:table-cell>
          <table:table-cell office:value-type="float" office:value="100.0" table:style-name="c11">
            <text:p>100.0</text:p>
          </table:table-cell>
          <table:table-cell office:value-type="float" office:value="24.565023109932504" table:style-name="c11">
            <text:p>24.6</text:p>
          </table:table-cell>
          <table:table-cell office:value-type="float" office:value="26.453830280521203" table:style-name="c11">
            <text:p>26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