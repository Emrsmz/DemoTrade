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C6EFCE"/>
      <style:text-properties fo:color="#006100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9" style:family="table-cell" style:display-name="c9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10" style:family="table-cell" style:display-name="c10">
      <style:table-cell-properties fo:border="0.5pt solid #d0d0d0" style:vertical-align="middle" fo:background-color="#F2F2F2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2" style:family="table-cell" style:display-name="c12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/>
      <style:text-properties fo:color="#107C41" fo:font-weight="bold"/>
      <style:paragraph-properties fo:text-align="center"/>
    </style:style>
    <style:style style:name="c14" style:family="table-cell" style:display-name="c14">
      <style:table-cell-properties fo:border="0.5pt solid #d0d0d0" style:vertical-align="middle"/>
      <style:text-properties fo:color="#C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48.63723281936984" table:style-name="c3">
            <text:p>+48.6</text:p>
          </table:table-cell>
          <table:table-cell office:value-type="float" office:value="96.75471698113209" table:style-name="c1">
            <text:p>+96.8</text:p>
          </table:table-cell>
          <table:table-cell office:value-type="float" office:value="-48.11748416176225" table:style-name="c4">
            <text:p>-48.1</text:p>
          </table:table-cell>
          <table:table-cell office:value-type="float" office:value="28" table:style-name="c1">
            <text:p>28</text:p>
          </table:table-cell>
          <table:table-cell office:value-type="float" office:value="50.0" table:style-name="c1">
            <text:p>50.0</text:p>
          </table:table-cell>
          <table:table-cell office:value-type="float" office:value="21.21181410487662" table:style-name="c1">
            <text:p>21.2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30.95617023624266" table:style-name="c3">
            <text:p>+31.0</text:p>
          </table:table-cell>
          <table:table-cell office:value-type="float" office:value="50.19069412662092" table:style-name="c1">
            <text:p>+50.2</text:p>
          </table:table-cell>
          <table:table-cell office:value-type="float" office:value="-19.23452389037826" table:style-name="c4">
            <text:p>-19.2</text:p>
          </table:table-cell>
          <table:table-cell office:value-type="float" office:value="17" table:style-name="c1">
            <text:p>17</text:p>
          </table:table-cell>
          <table:table-cell office:value-type="float" office:value="41.17647058823529" table:style-name="c1">
            <text:p>41.2</text:p>
          </table:table-cell>
          <table:table-cell office:value-type="float" office:value="19.615320175405426" table:style-name="c1">
            <text:p>19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14.068806700529034" table:style-name="c3">
            <text:p>+14.1</text:p>
          </table:table-cell>
          <table:table-cell office:value-type="float" office:value="114.53562340966921" table:style-name="c1">
            <text:p>+114.5</text:p>
          </table:table-cell>
          <table:table-cell office:value-type="float" office:value="-100.46681670914018" table:style-name="c4">
            <text:p>-100.5</text:p>
          </table:table-cell>
          <table:table-cell office:value-type="float" office:value="28" table:style-name="c1">
            <text:p>28</text:p>
          </table:table-cell>
          <table:table-cell office:value-type="float" office:value="53.57142857142857" table:style-name="c1">
            <text:p>53.6</text:p>
          </table:table-cell>
          <table:table-cell office:value-type="float" office:value="21.99284450318323" table:style-name="c1">
            <text:p>22.0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13.515903324657552" table:style-name="c3">
            <text:p>+13.5</text:p>
          </table:table-cell>
          <table:table-cell office:value-type="float" office:value="34.4954128440367" table:style-name="c1">
            <text:p>+34.5</text:p>
          </table:table-cell>
          <table:table-cell office:value-type="float" office:value="-20.97950951937915" table:style-name="c4">
            <text:p>-21.0</text:p>
          </table:table-cell>
          <table:table-cell office:value-type="float" office:value="18" table:style-name="c1">
            <text:p>18</text:p>
          </table:table-cell>
          <table:table-cell office:value-type="float" office:value="44.44444444444444" table:style-name="c1">
            <text:p>44.4</text:p>
          </table:table-cell>
          <table:table-cell office:value-type="float" office:value="22.958035589653818" table:style-name="c1">
            <text:p>23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11.074943219913804" table:style-name="c3">
            <text:p>+11.1</text:p>
          </table:table-cell>
          <table:table-cell office:value-type="float" office:value="-7.350689127105664" table:style-name="c1">
            <text:p>-7.4</text:p>
          </table:table-cell>
          <table:table-cell office:value-type="float" office:value="18.425632347019466" table:style-name="c5">
            <text:p>+18.4</text:p>
          </table:table-cell>
          <table:table-cell office:value-type="float" office:value="15" table:style-name="c1">
            <text:p>15</text:p>
          </table:table-cell>
          <table:table-cell office:value-type="float" office:value="53.333333333333336" table:style-name="c1">
            <text:p>53.3</text:p>
          </table:table-cell>
          <table:table-cell office:value-type="float" office:value="11.945870283236506" table:style-name="c1">
            <text:p>11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6.129822749304275" table:style-name="c3">
            <text:p>+6.1</text:p>
          </table:table-cell>
          <table:table-cell office:value-type="float" office:value="-15.444999490264042" table:style-name="c1">
            <text:p>-15.4</text:p>
          </table:table-cell>
          <table:table-cell office:value-type="float" office:value="21.574822239568316" table:style-name="c5">
            <text:p>+21.6</text:p>
          </table:table-cell>
          <table:table-cell office:value-type="float" office:value="15" table:style-name="c1">
            <text:p>15</text:p>
          </table:table-cell>
          <table:table-cell office:value-type="float" office:value="46.666666666666664" table:style-name="c1">
            <text:p>46.7</text:p>
          </table:table-cell>
          <table:table-cell office:value-type="float" office:value="17.611133956478902" table:style-name="c1">
            <text:p>17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3.671294811658686" table:style-name="c3">
            <text:p>+3.7</text:p>
          </table:table-cell>
          <table:table-cell office:value-type="float" office:value="17.55300660410149" table:style-name="c1">
            <text:p>+17.6</text:p>
          </table:table-cell>
          <table:table-cell office:value-type="float" office:value="-13.881711792442804" table:style-name="c4">
            <text:p>-13.9</text:p>
          </table:table-cell>
          <table:table-cell office:value-type="float" office:value="28" table:style-name="c1">
            <text:p>28</text:p>
          </table:table-cell>
          <table:table-cell office:value-type="float" office:value="50.0" table:style-name="c1">
            <text:p>50.0</text:p>
          </table:table-cell>
          <table:table-cell office:value-type="float" office:value="6.403305531621359" table:style-name="c1">
            <text:p>6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0.9565788454987227" table:style-name="c3">
            <text:p>+1.0</text:p>
          </table:table-cell>
          <table:table-cell office:value-type="float" office:value="-10.402999062792876" table:style-name="c1">
            <text:p>-10.4</text:p>
          </table:table-cell>
          <table:table-cell office:value-type="float" office:value="11.359577908291598" table:style-name="c5">
            <text:p>+11.4</text:p>
          </table:table-cell>
          <table:table-cell office:value-type="float" office:value="19" table:style-name="c1">
            <text:p>19</text:p>
          </table:table-cell>
          <table:table-cell office:value-type="float" office:value="47.368421052631575" table:style-name="c1">
            <text:p>47.4</text:p>
          </table:table-cell>
          <table:table-cell office:value-type="float" office:value="21.13923875299326" table:style-name="c1">
            <text:p>2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0.00304327175662138" table:style-name="c6">
            <text:p>-0.0</text:p>
          </table:table-cell>
          <table:table-cell office:value-type="float" office:value="-15.502917953999315" table:style-name="c1">
            <text:p>-15.5</text:p>
          </table:table-cell>
          <table:table-cell office:value-type="float" office:value="15.499874682242694" table:style-name="c5">
            <text:p>+15.5</text:p>
          </table:table-cell>
          <table:table-cell office:value-type="float" office:value="12" table:style-name="c1">
            <text:p>12</text:p>
          </table:table-cell>
          <table:table-cell office:value-type="float" office:value="50.0" table:style-name="c1">
            <text:p>50.0</text:p>
          </table:table-cell>
          <table:table-cell office:value-type="float" office:value="6.769951829188912" table:style-name="c1">
            <text:p>6.8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1.338522959791942" table:style-name="c6">
            <text:p>-1.3</text:p>
          </table:table-cell>
          <table:table-cell office:value-type="float" office:value="-17.780877776585463" table:style-name="c1">
            <text:p>-17.8</text:p>
          </table:table-cell>
          <table:table-cell office:value-type="float" office:value="16.44235481679352" table:style-name="c5">
            <text:p>+16.4</text:p>
          </table:table-cell>
          <table:table-cell office:value-type="float" office:value="14" table:style-name="c1">
            <text:p>14</text:p>
          </table:table-cell>
          <table:table-cell office:value-type="float" office:value="50.0" table:style-name="c1">
            <text:p>50.0</text:p>
          </table:table-cell>
          <table:table-cell office:value-type="float" office:value="10.2222876635704" table:style-name="c1">
            <text:p>10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-2.599121394648284" table:style-name="c6">
            <text:p>-2.6</text:p>
          </table:table-cell>
          <table:table-cell office:value-type="float" office:value="-3.1562335612835377" table:style-name="c1">
            <text:p>-3.2</text:p>
          </table:table-cell>
          <table:table-cell office:value-type="float" office:value="0.5571121666352536" table:style-name="c5">
            <text:p>+0.6</text:p>
          </table:table-cell>
          <table:table-cell office:value-type="float" office:value="25" table:style-name="c1">
            <text:p>25</text:p>
          </table:table-cell>
          <table:table-cell office:value-type="float" office:value="40.0" table:style-name="c1">
            <text:p>40.0</text:p>
          </table:table-cell>
          <table:table-cell office:value-type="float" office:value="13.09039066177431" table:style-name="c1">
            <text:p>13.1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-3.6315821949639484" table:style-name="c6">
            <text:p>-3.6</text:p>
          </table:table-cell>
          <table:table-cell office:value-type="float" office:value="-39.830328738069994" table:style-name="c1">
            <text:p>-39.8</text:p>
          </table:table-cell>
          <table:table-cell office:value-type="float" office:value="36.19874654310605" table:style-name="c5">
            <text:p>+36.2</text:p>
          </table:table-cell>
          <table:table-cell office:value-type="float" office:value="8" table:style-name="c1">
            <text:p>8</text:p>
          </table:table-cell>
          <table:table-cell office:value-type="float" office:value="37.5" table:style-name="c1">
            <text:p>37.5</text:p>
          </table:table-cell>
          <table:table-cell office:value-type="float" office:value="7.253825287893193" table:style-name="c1">
            <text:p>7.3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-4.719912154723806" table:style-name="c6">
            <text:p>-4.7</text:p>
          </table:table-cell>
          <table:table-cell office:value-type="float" office:value="-11.793286827615034" table:style-name="c1">
            <text:p>-11.8</text:p>
          </table:table-cell>
          <table:table-cell office:value-type="float" office:value="7.073374672891228" table:style-name="c5">
            <text:p>+7.1</text:p>
          </table:table-cell>
          <table:table-cell office:value-type="float" office:value="16" table:style-name="c1">
            <text:p>16</text:p>
          </table:table-cell>
          <table:table-cell office:value-type="float" office:value="31.25" table:style-name="c1">
            <text:p>31.2</text:p>
          </table:table-cell>
          <table:table-cell office:value-type="float" office:value="14.689210587573982" table:style-name="c1">
            <text:p>14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4.935242463894201" table:style-name="c6">
            <text:p>-4.9</text:p>
          </table:table-cell>
          <table:table-cell office:value-type="float" office:value="0.5221380496785737" table:style-name="c1">
            <text:p>+0.5</text:p>
          </table:table-cell>
          <table:table-cell office:value-type="float" office:value="-5.457380513572774" table:style-name="c4">
            <text:p>-5.5</text:p>
          </table:table-cell>
          <table:table-cell office:value-type="float" office:value="15" table:style-name="c1">
            <text:p>15</text:p>
          </table:table-cell>
          <table:table-cell office:value-type="float" office:value="53.333333333333336" table:style-name="c1">
            <text:p>53.3</text:p>
          </table:table-cell>
          <table:table-cell office:value-type="float" office:value="9.57374597916417" table:style-name="c1">
            <text:p>9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-7.510855036913313" table:style-name="c6">
            <text:p>-7.5</text:p>
          </table:table-cell>
          <table:table-cell office:value-type="float" office:value="29.568106312292358" table:style-name="c1">
            <text:p>+29.6</text:p>
          </table:table-cell>
          <table:table-cell office:value-type="float" office:value="-37.07896134920567" table:style-name="c4">
            <text:p>-37.1</text:p>
          </table:table-cell>
          <table:table-cell office:value-type="float" office:value="20" table:style-name="c1">
            <text:p>20</text:p>
          </table:table-cell>
          <table:table-cell office:value-type="float" office:value="40.0" table:style-name="c1">
            <text:p>40.0</text:p>
          </table:table-cell>
          <table:table-cell office:value-type="float" office:value="24.08657887703378" table:style-name="c1">
            <text:p>24.1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10.327061352004057" table:style-name="c6">
            <text:p>-10.3</text:p>
          </table:table-cell>
          <table:table-cell office:value-type="float" office:value="-13.951219512195115" table:style-name="c1">
            <text:p>-14.0</text:p>
          </table:table-cell>
          <table:table-cell office:value-type="float" office:value="3.624158160191058" table:style-name="c5">
            <text:p>+3.6</text:p>
          </table:table-cell>
          <table:table-cell office:value-type="float" office:value="8" table:style-name="c1">
            <text:p>8</text:p>
          </table:table-cell>
          <table:table-cell office:value-type="float" office:value="25.0" table:style-name="c1">
            <text:p>25.0</text:p>
          </table:table-cell>
          <table:table-cell office:value-type="float" office:value="15.401850556955168" table:style-name="c1">
            <text:p>15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10.736147167092112" table:style-name="c6">
            <text:p>-10.7</text:p>
          </table:table-cell>
          <table:table-cell office:value-type="float" office:value="-26.171052631578952" table:style-name="c1">
            <text:p>-26.2</text:p>
          </table:table-cell>
          <table:table-cell office:value-type="float" office:value="15.43490546448684" table:style-name="c5">
            <text:p>+15.4</text:p>
          </table:table-cell>
          <table:table-cell office:value-type="float" office:value="20" table:style-name="c1">
            <text:p>20</text:p>
          </table:table-cell>
          <table:table-cell office:value-type="float" office:value="35.0" table:style-name="c1">
            <text:p>35.0</text:p>
          </table:table-cell>
          <table:table-cell office:value-type="float" office:value="17.223838658725953" table:style-name="c1">
            <text:p>17.2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-10.78631124181296" table:style-name="c6">
            <text:p>-10.8</text:p>
          </table:table-cell>
          <table:table-cell office:value-type="float" office:value="-13.396764985727874" table:style-name="c1">
            <text:p>-13.4</text:p>
          </table:table-cell>
          <table:table-cell office:value-type="float" office:value="2.6104537439149134" table:style-name="c5">
            <text:p>+2.6</text:p>
          </table:table-cell>
          <table:table-cell office:value-type="float" office:value="12" table:style-name="c1">
            <text:p>12</text:p>
          </table:table-cell>
          <table:table-cell office:value-type="float" office:value="33.33333333333333" table:style-name="c1">
            <text:p>33.3</text:p>
          </table:table-cell>
          <table:table-cell office:value-type="float" office:value="13.964198088854573" table:style-name="c1">
            <text:p>14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-12.05498205590061" table:style-name="c6">
            <text:p>-12.1</text:p>
          </table:table-cell>
          <table:table-cell office:value-type="float" office:value="-13.266443701226313" table:style-name="c1">
            <text:p>-13.3</text:p>
          </table:table-cell>
          <table:table-cell office:value-type="float" office:value="1.2114616453257039" table:style-name="c5">
            <text:p>+1.2</text:p>
          </table:table-cell>
          <table:table-cell office:value-type="float" office:value="21" table:style-name="c1">
            <text:p>21</text:p>
          </table:table-cell>
          <table:table-cell office:value-type="float" office:value="38.095238095238095" table:style-name="c1">
            <text:p>38.1</text:p>
          </table:table-cell>
          <table:table-cell office:value-type="float" office:value="14.84229570984222" table:style-name="c1">
            <text:p>14.8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12.740302643247926" table:style-name="c6">
            <text:p>-12.7</text:p>
          </table:table-cell>
          <table:table-cell office:value-type="float" office:value="-8.25658086891788" table:style-name="c1">
            <text:p>-8.3</text:p>
          </table:table-cell>
          <table:table-cell office:value-type="float" office:value="-4.483721774330046" table:style-name="c4">
            <text:p>-4.5</text:p>
          </table:table-cell>
          <table:table-cell office:value-type="float" office:value="24" table:style-name="c1">
            <text:p>24</text:p>
          </table:table-cell>
          <table:table-cell office:value-type="float" office:value="37.5" table:style-name="c1">
            <text:p>37.5</text:p>
          </table:table-cell>
          <table:table-cell office:value-type="float" office:value="16.793827121316095" table:style-name="c1">
            <text:p>16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12.927217295288177" table:style-name="c6">
            <text:p>-12.9</text:p>
          </table:table-cell>
          <table:table-cell office:value-type="float" office:value="-8.777969018932877" table:style-name="c1">
            <text:p>-8.8</text:p>
          </table:table-cell>
          <table:table-cell office:value-type="float" office:value="-4.1492482763553" table:style-name="c4">
            <text:p>-4.1</text:p>
          </table:table-cell>
          <table:table-cell office:value-type="float" office:value="15" table:style-name="c1">
            <text:p>15</text:p>
          </table:table-cell>
          <table:table-cell office:value-type="float" office:value="40.0" table:style-name="c1">
            <text:p>40.0</text:p>
          </table:table-cell>
          <table:table-cell office:value-type="float" office:value="22.139051944597824" table:style-name="c1">
            <text:p>22.1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-13.173627963865089" table:style-name="c6">
            <text:p>-13.2</text:p>
          </table:table-cell>
          <table:table-cell office:value-type="float" office:value="-9.737670514165783" table:style-name="c1">
            <text:p>-9.7</text:p>
          </table:table-cell>
          <table:table-cell office:value-type="float" office:value="-3.4359574496993055" table:style-name="c4">
            <text:p>-3.4</text:p>
          </table:table-cell>
          <table:table-cell office:value-type="float" office:value="19" table:style-name="c1">
            <text:p>19</text:p>
          </table:table-cell>
          <table:table-cell office:value-type="float" office:value="52.63157894736842" table:style-name="c1">
            <text:p>52.6</text:p>
          </table:table-cell>
          <table:table-cell office:value-type="float" office:value="16.468428595940924" table:style-name="c1">
            <text:p>16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13.790972166250947" table:style-name="c6">
            <text:p>-13.8</text:p>
          </table:table-cell>
          <table:table-cell office:value-type="float" office:value="-7.182481751824815" table:style-name="c1">
            <text:p>-7.2</text:p>
          </table:table-cell>
          <table:table-cell office:value-type="float" office:value="-6.608490414426132" table:style-name="c4">
            <text:p>-6.6</text:p>
          </table:table-cell>
          <table:table-cell office:value-type="float" office:value="19" table:style-name="c1">
            <text:p>19</text:p>
          </table:table-cell>
          <table:table-cell office:value-type="float" office:value="36.84210526315789" table:style-name="c1">
            <text:p>36.8</text:p>
          </table:table-cell>
          <table:table-cell office:value-type="float" office:value="21.70378467540867" table:style-name="c1">
            <text:p>21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14.526407732185193" table:style-name="c6">
            <text:p>-14.5</text:p>
          </table:table-cell>
          <table:table-cell office:value-type="float" office:value="-15.702622893868332" table:style-name="c1">
            <text:p>-15.7</text:p>
          </table:table-cell>
          <table:table-cell office:value-type="float" office:value="1.1762151616831389" table:style-name="c5">
            <text:p>+1.2</text:p>
          </table:table-cell>
          <table:table-cell office:value-type="float" office:value="15" table:style-name="c1">
            <text:p>15</text:p>
          </table:table-cell>
          <table:table-cell office:value-type="float" office:value="40.0" table:style-name="c1">
            <text:p>40.0</text:p>
          </table:table-cell>
          <table:table-cell office:value-type="float" office:value="16.89410602066784" table:style-name="c1">
            <text:p>16.9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21.159761447729057" table:style-name="c6">
            <text:p>-21.2</text:p>
          </table:table-cell>
          <table:table-cell office:value-type="float" office:value="-22.828784119106704" table:style-name="c1">
            <text:p>-22.8</text:p>
          </table:table-cell>
          <table:table-cell office:value-type="float" office:value="1.6690226713776468" table:style-name="c5">
            <text:p>+1.7</text:p>
          </table:table-cell>
          <table:table-cell office:value-type="float" office:value="15" table:style-name="c1">
            <text:p>15</text:p>
          </table:table-cell>
          <table:table-cell office:value-type="float" office:value="26.666666666666668" table:style-name="c1">
            <text:p>26.7</text:p>
          </table:table-cell>
          <table:table-cell office:value-type="float" office:value="24.764523931381753" table:style-name="c1">
            <text:p>24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24.202878032055047" table:style-name="c6">
            <text:p>-24.2</text:p>
          </table:table-cell>
          <table:table-cell office:value-type="float" office:value="-12.936918304033087" table:style-name="c1">
            <text:p>-12.9</text:p>
          </table:table-cell>
          <table:table-cell office:value-type="float" office:value="-11.26595972802196" table:style-name="c4">
            <text:p>-11.3</text:p>
          </table:table-cell>
          <table:table-cell office:value-type="float" office:value="18" table:style-name="c1">
            <text:p>18</text:p>
          </table:table-cell>
          <table:table-cell office:value-type="float" office:value="38.88888888888889" table:style-name="c1">
            <text:p>38.9</text:p>
          </table:table-cell>
          <table:table-cell office:value-type="float" office:value="30.171338586907865" table:style-name="c1">
            <text:p>3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24.605957172895707" table:style-name="c6">
            <text:p>-24.6</text:p>
          </table:table-cell>
          <table:table-cell office:value-type="float" office:value="-30.022129333661173" table:style-name="c1">
            <text:p>-30.0</text:p>
          </table:table-cell>
          <table:table-cell office:value-type="float" office:value="5.416172160765466" table:style-name="c5">
            <text:p>+5.4</text:p>
          </table:table-cell>
          <table:table-cell office:value-type="float" office:value="16" table:style-name="c1">
            <text:p>16</text:p>
          </table:table-cell>
          <table:table-cell office:value-type="float" office:value="31.25" table:style-name="c1">
            <text:p>31.2</text:p>
          </table:table-cell>
          <table:table-cell office:value-type="float" office:value="29.330435469039816" table:style-name="c1">
            <text:p>29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-24.92021046339736" table:style-name="c6">
            <text:p>-24.9</text:p>
          </table:table-cell>
          <table:table-cell office:value-type="float" office:value="-28.717948717948715" table:style-name="c1">
            <text:p>-28.7</text:p>
          </table:table-cell>
          <table:table-cell office:value-type="float" office:value="3.797738254551355" table:style-name="c5">
            <text:p>+3.8</text:p>
          </table:table-cell>
          <table:table-cell office:value-type="float" office:value="13" table:style-name="c1">
            <text:p>13</text:p>
          </table:table-cell>
          <table:table-cell office:value-type="float" office:value="7.6923076923076925" table:style-name="c1">
            <text:p>7.7</text:p>
          </table:table-cell>
          <table:table-cell office:value-type="float" office:value="27.00588580018306" table:style-name="c1">
            <text:p>27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-32.7041281635043" table:style-name="c6">
            <text:p>-32.7</text:p>
          </table:table-cell>
          <table:table-cell office:value-type="float" office:value="-15.27913809990205" table:style-name="c1">
            <text:p>-15.3</text:p>
          </table:table-cell>
          <table:table-cell office:value-type="float" office:value="-17.42499006360225" table:style-name="c4">
            <text:p>-17.4</text:p>
          </table:table-cell>
          <table:table-cell office:value-type="float" office:value="17" table:style-name="c1">
            <text:p>17</text:p>
          </table:table-cell>
          <table:table-cell office:value-type="float" office:value="17.647058823529413" table:style-name="c1">
            <text:p>17.6</text:p>
          </table:table-cell>
          <table:table-cell office:value-type="float" office:value="34.12694943429618" table:style-name="c1">
            <text:p>34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39.48144835855179" table:style-name="c6">
            <text:p>-39.5</text:p>
          </table:table-cell>
          <table:table-cell office:value-type="float" office:value="-13.953488372093027" table:style-name="c1">
            <text:p>-14.0</text:p>
          </table:table-cell>
          <table:table-cell office:value-type="float" office:value="-25.52795998645876" table:style-name="c4">
            <text:p>-25.5</text:p>
          </table:table-cell>
          <table:table-cell office:value-type="float" office:value="20" table:style-name="c1">
            <text:p>20</text:p>
          </table:table-cell>
          <table:table-cell office:value-type="float" office:value="15.0" table:style-name="c1">
            <text:p>15.0</text:p>
          </table:table-cell>
          <table:table-cell office:value-type="float" office:value="39.48144835855179" table:style-name="c1">
            <text:p>39.5</text:p>
          </table:table-cell>
        </table:table-row>
        <table:table-row>
          <table:table-cell office:value-type="string" table:style-name="c7">
            <text:p>AVERAGE</text:p>
          </table:table-cell>
          <table:table-cell office:value-type="float" office:value="-5.795498000843263" table:style-name="c8">
            <text:p>-5.8</text:p>
          </table:table-cell>
          <table:table-cell office:value-type="float" office:value="-0.5941282345122426" table:style-name="c7">
            <text:p>-0.6</text:p>
          </table:table-cell>
          <table:table-cell office:value-type="float" office:value="-5.201369766331019" table:style-name="c8">
            <text:p>-5.2</text:p>
          </table:table-cell>
          <table:table-cell office:value-type="float" office:value="530" table:style-name="c7">
            <text:p>530</text:p>
          </table:table-cell>
          <table:table-cell office:value-type="float" office:value="38.806375856685456" table:style-name="c7">
            <text:p>38.8</text:p>
          </table:table-cell>
          <table:table-cell office:value-type="float" office:value="18.962517224543923" table:style-name="c7">
            <text:p>19.0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06:00</text:p>
          </table:table-cell>
          <table:table-cell office:value-type="float" office:value="0.25792889999999996" table:style-name="c10">
            <text:p>0.25793</text:p>
          </table:table-cell>
          <table:table-cell office:value-type="string" table:style-name="c10">
            <text:p>2026-03-10 06:00</text:p>
          </table:table-cell>
          <table:table-cell office:value-type="float" office:value="0.25977005000000003" table:style-name="c10">
            <text:p>0.25977</text:p>
          </table:table-cell>
          <table:table-cell office:value-type="float" office:value="0.5124938190524952" table:style-name="c11">
            <text:p>+0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27223605" table:style-name="c10">
            <text:p>0.27224</text:p>
          </table:table-cell>
          <table:table-cell office:value-type="string" table:style-name="c10">
            <text:p>2026-03-11 15:00</text:p>
          </table:table-cell>
          <table:table-cell office:value-type="float" office:value="0.2636681" table:style-name="c10">
            <text:p>0.26367</text:p>
          </table:table-cell>
          <table:table-cell office:value-type="float" office:value="-3.340858983187567" table:style-name="c12">
            <text:p>-3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1:00</text:p>
          </table:table-cell>
          <table:table-cell office:value-type="float" office:value="0.27083535" table:style-name="c10">
            <text:p>0.27084</text:p>
          </table:table-cell>
          <table:table-cell office:value-type="string" table:style-name="c10">
            <text:p>2026-03-17 01:00</text:p>
          </table:table-cell>
          <table:table-cell office:value-type="float" office:value="0.29025480000000003" table:style-name="c10">
            <text:p>0.29025</text:p>
          </table:table-cell>
          <table:table-cell office:value-type="float" office:value="6.955971831151309" table:style-name="c11">
            <text:p>+7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22:00</text:p>
          </table:table-cell>
          <table:table-cell office:value-type="float" office:value="0.29084535" table:style-name="c10">
            <text:p>0.29085</text:p>
          </table:table-cell>
          <table:table-cell office:value-type="string" table:style-name="c10">
            <text:p>2026-03-18 22:00</text:p>
          </table:table-cell>
          <table:table-cell office:value-type="float" office:value="0.2740629" table:style-name="c10">
            <text:p>0.27406</text:p>
          </table:table-cell>
          <table:table-cell office:value-type="float" office:value="-5.9585968065502755" table:style-name="c12">
            <text:p>-6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0:00</text:p>
          </table:table-cell>
          <table:table-cell office:value-type="float" office:value="0.26283134999999996" table:style-name="c10">
            <text:p>0.26283</text:p>
          </table:table-cell>
          <table:table-cell office:value-type="string" table:style-name="c10">
            <text:p>2026-04-09 00:00</text:p>
          </table:table-cell>
          <table:table-cell office:value-type="float" office:value="0.25057465" table:style-name="c10">
            <text:p>0.25057</text:p>
          </table:table-cell>
          <table:table-cell office:value-type="float" office:value="-4.853910587663901" table:style-name="c12">
            <text:p>-4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20:00</text:p>
          </table:table-cell>
          <table:table-cell office:value-type="float" office:value="0.25462724999999997" table:style-name="c10">
            <text:p>0.25463</text:p>
          </table:table-cell>
          <table:table-cell office:value-type="string" table:style-name="c10">
            <text:p>2026-04-12 12:00</text:p>
          </table:table-cell>
          <table:table-cell office:value-type="float" office:value="0.24047970000000002" table:style-name="c10">
            <text:p>0.24048</text:p>
          </table:table-cell>
          <table:table-cell office:value-type="float" office:value="-5.744973847182477" table:style-name="c12">
            <text:p>-5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20:00</text:p>
          </table:table-cell>
          <table:table-cell office:value-type="float" office:value="0.26043014999999997" table:style-name="c10">
            <text:p>0.26043</text:p>
          </table:table-cell>
          <table:table-cell office:value-type="string" table:style-name="c10">
            <text:p>2026-04-17 20:00</text:p>
          </table:table-cell>
          <table:table-cell office:value-type="float" office:value="0.2610694" table:style-name="c10">
            <text:p>0.26107</text:p>
          </table:table-cell>
          <table:table-cell office:value-type="float" office:value="0.045068617976862235" table:style-name="c11">
            <text:p>+0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00:00</text:p>
          </table:table-cell>
          <table:table-cell office:value-type="float" office:value="0.25002495" table:style-name="c10">
            <text:p>0.25002</text:p>
          </table:table-cell>
          <table:table-cell office:value-type="string" table:style-name="c10">
            <text:p>2026-04-25 00:00</text:p>
          </table:table-cell>
          <table:table-cell office:value-type="float" office:value="0.25017485000000006" table:style-name="c10">
            <text:p>0.25017</text:p>
          </table:table-cell>
          <table:table-cell office:value-type="float" office:value="-0.1400658314900105" table:style-name="c12">
            <text:p>-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4:00</text:p>
          </table:table-cell>
          <table:table-cell office:value-type="float" office:value="0.25382685" table:style-name="c10">
            <text:p>0.25383</text:p>
          </table:table-cell>
          <table:table-cell office:value-type="string" table:style-name="c10">
            <text:p>2026-05-05 04:00</text:p>
          </table:table-cell>
          <table:table-cell office:value-type="float" office:value="0.2524737" table:style-name="c10">
            <text:p>0.25247</text:p>
          </table:table-cell>
          <table:table-cell office:value-type="float" office:value="-0.7319339645510237" table:style-name="c12">
            <text:p>-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8:00</text:p>
          </table:table-cell>
          <table:table-cell office:value-type="float" office:value="0.25682835" table:style-name="c10">
            <text:p>0.25683</text:p>
          </table:table-cell>
          <table:table-cell office:value-type="string" table:style-name="c10">
            <text:p>2026-05-06 08:00</text:p>
          </table:table-cell>
          <table:table-cell office:value-type="float" office:value="0.26486750000000003" table:style-name="c10">
            <text:p>0.26487</text:p>
          </table:table-cell>
          <table:table-cell office:value-type="float" office:value="2.9240073642571307" table:style-name="c11">
            <text:p>+2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0.272136" table:style-name="c10">
            <text:p>0.27214</text:p>
          </table:table-cell>
          <table:table-cell office:value-type="string" table:style-name="c10">
            <text:p>2026-05-07 09:00</text:p>
          </table:table-cell>
          <table:table-cell office:value-type="float" office:value="0.26786600000000005" table:style-name="c10">
            <text:p>0.26787</text:p>
          </table:table-cell>
          <table:table-cell office:value-type="float" office:value="-1.7658318392274053" table:style-name="c12">
            <text:p>-1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8:00</text:p>
          </table:table-cell>
          <table:table-cell office:value-type="float" office:value="0.27113550000000003" table:style-name="c10">
            <text:p>0.27114</text:p>
          </table:table-cell>
          <table:table-cell office:value-type="string" table:style-name="c10">
            <text:p>2026-05-09 18:00</text:p>
          </table:table-cell>
          <table:table-cell office:value-type="float" office:value="0.2716641" table:style-name="c10">
            <text:p>0.27166</text:p>
          </table:table-cell>
          <table:table-cell office:value-type="float" office:value="-0.005331849167677927" table:style-name="c12">
            <text:p>-0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7:00</text:p>
          </table:table-cell>
          <table:table-cell office:value-type="float" office:value="0.2847423" table:style-name="c10">
            <text:p>0.28474</text:p>
          </table:table-cell>
          <table:table-cell office:value-type="string" table:style-name="c10">
            <text:p>2026-05-11 17:00</text:p>
          </table:table-cell>
          <table:table-cell office:value-type="float" office:value="0.2814592" table:style-name="c10">
            <text:p>0.28146</text:p>
          </table:table-cell>
          <table:table-cell office:value-type="float" office:value="-1.3506026118353165" table:style-name="c12">
            <text:p>-1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10:00</text:p>
          </table:table-cell>
          <table:table-cell office:value-type="float" office:value="0.2773386" table:style-name="c10">
            <text:p>0.27734</text:p>
          </table:table-cell>
          <table:table-cell office:value-type="string" table:style-name="c10">
            <text:p>2026-05-14 10:00</text:p>
          </table:table-cell>
          <table:table-cell office:value-type="float" office:value="0.26446770000000003" table:style-name="c10">
            <text:p>0.26447</text:p>
          </table:table-cell>
          <table:table-cell office:value-type="float" office:value="-4.8314843055744845" table:style-name="c12">
            <text:p>-4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5:00</text:p>
          </table:table-cell>
          <table:table-cell office:value-type="float" office:value="0.2705352" table:style-name="c10">
            <text:p>0.27054</text:p>
          </table:table-cell>
          <table:table-cell office:value-type="string" table:style-name="c10">
            <text:p>2026-05-15 15:00</text:p>
          </table:table-cell>
          <table:table-cell office:value-type="float" office:value="0.2590704" table:style-name="c10">
            <text:p>0.25907</text:p>
          </table:table-cell>
          <table:table-cell office:value-type="float" office:value="-4.429250511430672" table:style-name="c12">
            <text:p>-4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4:00</text:p>
          </table:table-cell>
          <table:table-cell office:value-type="float" office:value="0.0830415" table:style-name="c1">
            <text:p>0.083042</text:p>
          </table:table-cell>
          <table:table-cell office:value-type="string" table:style-name="c1">
            <text:p>2026-03-10 04:00</text:p>
          </table:table-cell>
          <table:table-cell office:value-type="float" office:value="0.08435780000000001" table:style-name="c1">
            <text:p>0.084358</text:p>
          </table:table-cell>
          <table:table-cell office:value-type="float" office:value="1.38204242192157" table:style-name="c13">
            <text:p>+1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5:00</text:p>
          </table:table-cell>
          <table:table-cell office:value-type="float" office:value="0.0868434" table:style-name="c1">
            <text:p>0.086843</text:p>
          </table:table-cell>
          <table:table-cell office:value-type="string" table:style-name="c1">
            <text:p>2026-03-12 15:00</text:p>
          </table:table-cell>
          <table:table-cell office:value-type="float" office:value="0.0857571" table:style-name="c1">
            <text:p>0.085757</text:p>
          </table:table-cell>
          <table:table-cell office:value-type="float" office:value="-1.4482717660754818" table:style-name="c14">
            <text:p>-1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1:00</text:p>
          </table:table-cell>
          <table:table-cell office:value-type="float" office:value="0.09094544999999998" table:style-name="c1">
            <text:p>0.090945</text:p>
          </table:table-cell>
          <table:table-cell office:value-type="string" table:style-name="c1">
            <text:p>2026-03-14 01:00</text:p>
          </table:table-cell>
          <table:table-cell office:value-type="float" office:value="0.09285355" table:style-name="c1">
            <text:p>0.092854</text:p>
          </table:table-cell>
          <table:table-cell office:value-type="float" office:value="1.8939768328707363" table:style-name="c13">
            <text:p>+1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0.0952476" table:style-name="c1">
            <text:p>0.095248</text:p>
          </table:table-cell>
          <table:table-cell office:value-type="string" table:style-name="c1">
            <text:p>2026-03-17 15:00</text:p>
          </table:table-cell>
          <table:table-cell office:value-type="float" office:value="0.09465265" table:style-name="c1">
            <text:p>0.094653</text:p>
          </table:table-cell>
          <table:table-cell office:value-type="float" office:value="-0.8232865157232094" table:style-name="c14">
            <text:p>-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00</text:p>
          </table:table-cell>
          <table:table-cell office:value-type="float" office:value="0.10135065" table:style-name="c1">
            <text:p>0.10135</text:p>
          </table:table-cell>
          <table:table-cell office:value-type="string" table:style-name="c1">
            <text:p>2026-04-02 05:00</text:p>
          </table:table-cell>
          <table:table-cell office:value-type="float" office:value="0.0981509" table:style-name="c1">
            <text:p>0.098151</text:p>
          </table:table-cell>
          <table:table-cell office:value-type="float" office:value="-3.3506974539383894" table:style-name="c14">
            <text:p>-3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10:00</text:p>
          </table:table-cell>
          <table:table-cell office:value-type="float" office:value="0.10375184999999999" table:style-name="c1">
            <text:p>0.10375</text:p>
          </table:table-cell>
          <table:table-cell office:value-type="string" table:style-name="c1">
            <text:p>2026-04-03 10:00</text:p>
          </table:table-cell>
          <table:table-cell office:value-type="float" office:value="0.12063965000000001" table:style-name="c1">
            <text:p>0.12064</text:p>
          </table:table-cell>
          <table:table-cell office:value-type="float" office:value="16.044669410376812" table:style-name="c13">
            <text:p>+16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5:00</text:p>
          </table:table-cell>
          <table:table-cell office:value-type="float" office:value="0.11575785" table:style-name="c1">
            <text:p>0.11576</text:p>
          </table:table-cell>
          <table:table-cell office:value-type="string" table:style-name="c1">
            <text:p>2026-04-08 15:00</text:p>
          </table:table-cell>
          <table:table-cell office:value-type="float" office:value="0.1165417" table:style-name="c1">
            <text:p>0.11654</text:p>
          </table:table-cell>
          <table:table-cell office:value-type="float" office:value="0.47589268606835766" table:style-name="c13">
            <text:p>+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4:00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10 14:00</text:p>
          </table:table-cell>
          <table:table-cell office:value-type="float" office:value="0.10984505" table:style-name="c1">
            <text:p>0.10985</text:p>
          </table:table-cell>
          <table:table-cell office:value-type="float" office:value="-3.2915406859235663" table:style-name="c14">
            <text:p>-3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00</text:p>
          </table:table-cell>
          <table:table-cell office:value-type="float" office:value="0.10995495" table:style-name="c1">
            <text:p>0.10995</text:p>
          </table:table-cell>
          <table:table-cell office:value-type="string" table:style-name="c1">
            <text:p>2026-04-12 00:00</text:p>
          </table:table-cell>
          <table:table-cell office:value-type="float" office:value="0.10814590000000002" table:style-name="c1">
            <text:p>0.10815</text:p>
          </table:table-cell>
          <table:table-cell office:value-type="float" office:value="-1.8418758356035458" table:style-name="c14">
            <text:p>-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1:00</text:p>
          </table:table-cell>
          <table:table-cell office:value-type="float" office:value="0.1138569" table:style-name="c1">
            <text:p>0.11386</text:p>
          </table:table-cell>
          <table:table-cell office:value-type="string" table:style-name="c1">
            <text:p>2026-04-17 21:00</text:p>
          </table:table-cell>
          <table:table-cell office:value-type="float" office:value="0.11204395000000002" table:style-name="c1">
            <text:p>0.11204</text:p>
          </table:table-cell>
          <table:table-cell office:value-type="float" office:value="-1.789022761071124" table:style-name="c14">
            <text:p>-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0:00</text:p>
          </table:table-cell>
          <table:table-cell office:value-type="float" office:value="0.11905949999999998" table:style-name="c1">
            <text:p>0.11906</text:p>
          </table:table-cell>
          <table:table-cell office:value-type="string" table:style-name="c1">
            <text:p>2026-04-27 10:00</text:p>
          </table:table-cell>
          <table:table-cell office:value-type="float" office:value="0.11664165" table:style-name="c1">
            <text:p>0.11664</text:p>
          </table:table-cell>
          <table:table-cell office:value-type="float" office:value="-2.226631775162813" table:style-name="c14">
            <text:p>-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9:00</text:p>
          </table:table-cell>
          <table:table-cell office:value-type="float" office:value="0.1184592" table:style-name="c1">
            <text:p>0.11846</text:p>
          </table:table-cell>
          <table:table-cell office:value-type="string" table:style-name="c1">
            <text:p>2026-04-28 19:00</text:p>
          </table:table-cell>
          <table:table-cell office:value-type="float" office:value="0.11184405" table:style-name="c1">
            <text:p>0.11184</text:p>
          </table:table-cell>
          <table:table-cell office:value-type="float" office:value="-5.773064697338814" table:style-name="c14">
            <text:p>-5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1:00</text:p>
          </table:table-cell>
          <table:table-cell office:value-type="float" office:value="0.1118559" table:style-name="c1">
            <text:p>0.11186</text:p>
          </table:table-cell>
          <table:table-cell office:value-type="string" table:style-name="c1">
            <text:p>2026-05-01 01:00</text:p>
          </table:table-cell>
          <table:table-cell office:value-type="float" office:value="0.10984505" table:style-name="c1">
            <text:p>0.10985</text:p>
          </table:table-cell>
          <table:table-cell office:value-type="float" office:value="-1.9940211065754943" table:style-name="c14">
            <text:p>-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6:00</text:p>
          </table:table-cell>
          <table:table-cell office:value-type="float" office:value="0.11595794999999999" table:style-name="c1">
            <text:p>0.11596</text:p>
          </table:table-cell>
          <table:table-cell office:value-type="string" table:style-name="c1">
            <text:p>2026-05-05 06:00</text:p>
          </table:table-cell>
          <table:table-cell office:value-type="float" office:value="0.11914040000000001" table:style-name="c1">
            <text:p>0.11914</text:p>
          </table:table-cell>
          <table:table-cell office:value-type="float" office:value="2.5391000275530873" table:style-name="c13">
            <text:p>+2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7:00</text:p>
          </table:table-cell>
          <table:table-cell office:value-type="float" office:value="0.1192596" table:style-name="c1">
            <text:p>0.11926</text:p>
          </table:table-cell>
          <table:table-cell office:value-type="string" table:style-name="c1">
            <text:p>2026-05-06 07:00</text:p>
          </table:table-cell>
          <table:table-cell office:value-type="float" office:value="0.12103945" table:style-name="c1">
            <text:p>0.12104</text:p>
          </table:table-cell>
          <table:table-cell office:value-type="float" office:value="1.289533202735904" table:style-name="c13">
            <text:p>+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00</text:p>
          </table:table-cell>
          <table:table-cell office:value-type="float" office:value="0.12396194999999999" table:style-name="c1">
            <text:p>0.12396</text:p>
          </table:table-cell>
          <table:table-cell office:value-type="string" table:style-name="c1">
            <text:p>2026-05-07 08:00</text:p>
          </table:table-cell>
          <table:table-cell office:value-type="float" office:value="0.12883555" table:style-name="c1">
            <text:p>0.12884</text:p>
          </table:table-cell>
          <table:table-cell office:value-type="float" office:value="3.723769862889381" table:style-name="c13">
            <text:p>+3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0:00</text:p>
          </table:table-cell>
          <table:table-cell office:value-type="float" office:value="0.13176585000000002" table:style-name="c1">
            <text:p>0.13177</text:p>
          </table:table-cell>
          <table:table-cell office:value-type="string" table:style-name="c1">
            <text:p>2026-05-09 20:00</text:p>
          </table:table-cell>
          <table:table-cell office:value-type="float" office:value="0.13043475000000002" table:style-name="c1">
            <text:p>0.13043</text:p>
          </table:table-cell>
          <table:table-cell office:value-type="float" office:value="-1.2080816579181919" table:style-name="c14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7:00</text:p>
          </table:table-cell>
          <table:table-cell office:value-type="float" office:value="0.12606299999999998" table:style-name="c1">
            <text:p>0.12606</text:p>
          </table:table-cell>
          <table:table-cell office:value-type="string" table:style-name="c1">
            <text:p>2026-05-13 07:00</text:p>
          </table:table-cell>
          <table:table-cell office:value-type="float" office:value="0.12313840000000001" table:style-name="c1">
            <text:p>0.12314</text:p>
          </table:table-cell>
          <table:table-cell office:value-type="float" office:value="-2.515213553223372" table:style-name="c14">
            <text:p>-2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23:00</text:p>
          </table:table-cell>
          <table:table-cell office:value-type="float" office:value="0.12076034999999999" table:style-name="c1">
            <text:p>0.12076</text:p>
          </table:table-cell>
          <table:table-cell office:value-type="string" table:style-name="c1">
            <text:p>2026-05-30 23:00</text:p>
          </table:table-cell>
          <table:table-cell office:value-type="float" office:value="0.1247376" table:style-name="c1">
            <text:p>0.12474</text:p>
          </table:table-cell>
          <table:table-cell office:value-type="float" office:value="3.0870227997848776" table:style-name="c13">
            <text:p>+3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12:00</text:p>
          </table:table-cell>
          <table:table-cell office:value-type="float" office:value="0.13246619999999998" table:style-name="c1">
            <text:p>0.13247</text:p>
          </table:table-cell>
          <table:table-cell office:value-type="string" table:style-name="c1">
            <text:p>2026-06-01 12:00</text:p>
          </table:table-cell>
          <table:table-cell office:value-type="float" office:value="0.11984005000000002" table:style-name="c1">
            <text:p>0.11984</text:p>
          </table:table-cell>
          <table:table-cell office:value-type="float" office:value="-9.712447597915508" table:style-name="c14">
            <text:p>-9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3:00</text:p>
          </table:table-cell>
          <table:table-cell office:value-type="float" office:value="0.9534765" table:style-name="c10">
            <text:p>0.95348</text:p>
          </table:table-cell>
          <table:table-cell office:value-type="string" table:style-name="c10">
            <text:p>2026-03-09 13:00</text:p>
          </table:table-cell>
          <table:table-cell office:value-type="float" office:value="0.9525235" table:style-name="c10">
            <text:p>0.95252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0:00</text:p>
          </table:table-cell>
          <table:table-cell office:value-type="float" office:value="0.9824909999999999" table:style-name="c10">
            <text:p>0.98249</text:p>
          </table:table-cell>
          <table:table-cell office:value-type="string" table:style-name="c10">
            <text:p>2026-03-11 10:00</text:p>
          </table:table-cell>
          <table:table-cell office:value-type="float" office:value="0.9405295" table:style-name="c10">
            <text:p>0.94053</text:p>
          </table:table-cell>
          <table:table-cell office:value-type="float" office:value="-4.462292119775135" table:style-name="c12">
            <text:p>-4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4:00</text:p>
          </table:table-cell>
          <table:table-cell office:value-type="float" office:value="0.9614805" table:style-name="c10">
            <text:p>0.96148</text:p>
          </table:table-cell>
          <table:table-cell office:value-type="string" table:style-name="c10">
            <text:p>2026-03-12 14:00</text:p>
          </table:table-cell>
          <table:table-cell office:value-type="float" office:value="0.917541" table:style-name="c10">
            <text:p>0.91754</text:p>
          </table:table-cell>
          <table:table-cell office:value-type="float" office:value="-4.760748081630362" table:style-name="c12">
            <text:p>-4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23:00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18 23:00</text:p>
          </table:table-cell>
          <table:table-cell office:value-type="float" office:value="0.9845075000000001" table:style-name="c10">
            <text:p>0.98451</text:p>
          </table:table-cell>
          <table:table-cell office:value-type="float" office:value="-2.9596397939863905" table:style-name="c12">
            <text:p>-3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9 00:00</text:p>
          </table:table-cell>
          <table:table-cell office:value-type="float" office:value="0.9904949999999999" table:style-name="c10">
            <text:p>0.99049</text:p>
          </table:table-cell>
          <table:table-cell office:value-type="string" table:style-name="c10">
            <text:p>2026-03-20 00:00</text:p>
          </table:table-cell>
          <table:table-cell office:value-type="float" office:value="0.9495250000000001" table:style-name="c10">
            <text:p>0.94953</text:p>
          </table:table-cell>
          <table:table-cell office:value-type="float" office:value="-4.32794718549816" table:style-name="c12">
            <text:p>-4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05:00</text:p>
          </table:table-cell>
          <table:table-cell office:value-type="float" office:value="0.9774884999999999" table:style-name="c10">
            <text:p>0.97749</text:p>
          </table:table-cell>
          <table:table-cell office:value-type="string" table:style-name="c10">
            <text:p>2026-03-21 05:00</text:p>
          </table:table-cell>
          <table:table-cell office:value-type="float" office:value="0.9815090000000001" table:style-name="c10">
            <text:p>0.98151</text:p>
          </table:table-cell>
          <table:table-cell office:value-type="float" office:value="0.21058697969338347" table:style-name="c11">
            <text:p>+0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1 08:00</text:p>
          </table:table-cell>
          <table:table-cell office:value-type="float" office:value="1.0075034999999999" table:style-name="c10">
            <text:p>1.0075</text:p>
          </table:table-cell>
          <table:table-cell office:value-type="string" table:style-name="c10">
            <text:p>2026-03-22 08:00</text:p>
          </table:table-cell>
          <table:table-cell office:value-type="float" office:value="0.9625185" table:style-name="c10">
            <text:p>0.96252</text:p>
          </table:table-cell>
          <table:table-cell office:value-type="float" office:value="-4.655971366997724" table:style-name="c12">
            <text:p>-4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3:00</text:p>
          </table:table-cell>
          <table:table-cell office:value-type="float" office:value="1.0915454999999998" table:style-name="c10">
            <text:p>1.0915</text:p>
          </table:table-cell>
          <table:table-cell office:value-type="string" table:style-name="c10">
            <text:p>2026-03-25 23:00</text:p>
          </table:table-cell>
          <table:table-cell office:value-type="float" office:value="1.0614690000000002" table:style-name="c10">
            <text:p>1.0615</text:p>
          </table:table-cell>
          <table:table-cell office:value-type="float" office:value="-2.9497970108437466" table:style-name="c12">
            <text:p>-2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3:00</text:p>
          </table:table-cell>
          <table:table-cell office:value-type="float" office:value="0.884442" table:style-name="c10">
            <text:p>0.88444</text:p>
          </table:table-cell>
          <table:table-cell office:value-type="string" table:style-name="c10">
            <text:p>2026-04-16 13:00</text:p>
          </table:table-cell>
          <table:table-cell office:value-type="float" office:value="0.93953" table:style-name="c10">
            <text:p>0.93953</text:p>
          </table:table-cell>
          <table:table-cell office:value-type="float" office:value="6.016209036884268" table:style-name="c11">
            <text:p>+6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0.988494" table:style-name="c10">
            <text:p>0.98849</text:p>
          </table:table-cell>
          <table:table-cell office:value-type="string" table:style-name="c10">
            <text:p>2026-04-17 16:00</text:p>
          </table:table-cell>
          <table:table-cell office:value-type="float" office:value="0.9965015" table:style-name="c10">
            <text:p>0.9965</text:p>
          </table:table-cell>
          <table:table-cell office:value-type="float" office:value="0.6085513418897959" table:style-name="c11">
            <text:p>+0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2:00</text:p>
          </table:table-cell>
          <table:table-cell office:value-type="float" office:value="0.9914955" table:style-name="c10">
            <text:p>0.9915</text:p>
          </table:table-cell>
          <table:table-cell office:value-type="string" table:style-name="c10">
            <text:p>2026-04-27 12:00</text:p>
          </table:table-cell>
          <table:table-cell office:value-type="float" office:value="0.9585205" table:style-name="c10">
            <text:p>0.95852</text:p>
          </table:table-cell>
          <table:table-cell office:value-type="float" office:value="-3.5190358886651563" table:style-name="c12">
            <text:p>-3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8 00:00</text:p>
          </table:table-cell>
          <table:table-cell office:value-type="float" office:value="0.9664829999999999" table:style-name="c10">
            <text:p>0.96648</text:p>
          </table:table-cell>
          <table:table-cell office:value-type="string" table:style-name="c10">
            <text:p>2026-04-29 00:00</text:p>
          </table:table-cell>
          <table:table-cell office:value-type="float" office:value="0.9655170000000001" table:style-name="c10">
            <text:p>0.96552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5:00</text:p>
          </table:table-cell>
          <table:table-cell office:value-type="float" office:value="0.9974985" table:style-name="c10">
            <text:p>0.9975</text:p>
          </table:table-cell>
          <table:table-cell office:value-type="string" table:style-name="c10">
            <text:p>2026-04-30 05:00</text:p>
          </table:table-cell>
          <table:table-cell office:value-type="float" office:value="0.9985005" table:style-name="c10">
            <text:p>0.9985</text:p>
          </table:table-cell>
          <table:table-cell office:value-type="float" office:value="-0.0996495232323702" table:style-name="c12">
            <text:p>-0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7:00</text:p>
          </table:table-cell>
          <table:table-cell office:value-type="float" office:value="1.0335165" table:style-name="c10">
            <text:p>1.0335</text:p>
          </table:table-cell>
          <table:table-cell office:value-type="string" table:style-name="c10">
            <text:p>2026-05-08 07:00</text:p>
          </table:table-cell>
          <table:table-cell office:value-type="float" office:value="1.0344825" table:style-name="c10">
            <text:p>1.0345</text:p>
          </table:table-cell>
          <table:table-cell office:value-type="float" office:value="-0.10661953800445989" table:style-name="c12">
            <text:p>-0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9:00</text:p>
          </table:table-cell>
          <table:table-cell office:value-type="float" office:value="1.1975985" table:style-name="c10">
            <text:p>1.1976</text:p>
          </table:table-cell>
          <table:table-cell office:value-type="string" table:style-name="c10">
            <text:p>2026-05-11 19:00</text:p>
          </table:table-cell>
          <table:table-cell office:value-type="float" office:value="1.133433" table:style-name="c10">
            <text:p>1.1334</text:p>
          </table:table-cell>
          <table:table-cell office:value-type="float" office:value="-5.547037055156634" table:style-name="c12">
            <text:p>-5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5:00</text:p>
          </table:table-cell>
          <table:table-cell office:value-type="float" office:value="1.110555" table:style-name="c10">
            <text:p>1.1106</text:p>
          </table:table-cell>
          <table:table-cell office:value-type="string" table:style-name="c10">
            <text:p>2026-05-14 05:00</text:p>
          </table:table-cell>
          <table:table-cell office:value-type="float" office:value="1.031484" table:style-name="c10">
            <text:p>1.0315</text:p>
          </table:table-cell>
          <table:table-cell office:value-type="float" office:value="-7.305620749625175" table:style-name="c12">
            <text:p>-7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5:00</text:p>
          </table:table-cell>
          <table:table-cell office:value-type="float" office:value="1.06053" table:style-name="c10">
            <text:p>1.0605</text:p>
          </table:table-cell>
          <table:table-cell office:value-type="string" table:style-name="c10">
            <text:p>2026-05-15 08:00</text:p>
          </table:table-cell>
          <table:table-cell office:value-type="float" office:value="1.021489" table:style-name="c10">
            <text:p>1.0215</text:p>
          </table:table-cell>
          <table:table-cell office:value-type="float" office:value="-3.8738137073915824" table:style-name="c12">
            <text:p>-3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6:00</text:p>
          </table:table-cell>
          <table:table-cell office:value-type="float" office:value="0.09884939999999999" table:style-name="c1">
            <text:p>0.098849</text:p>
          </table:table-cell>
          <table:table-cell office:value-type="string" table:style-name="c1">
            <text:p>2026-03-10 06:00</text:p>
          </table:table-cell>
          <table:table-cell office:value-type="float" office:value="0.0993503" table:style-name="c1">
            <text:p>0.09935</text:p>
          </table:table-cell>
          <table:table-cell office:value-type="float" office:value="0.30581748629734395" table:style-name="c13">
            <text:p>+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0.10195095" table:style-name="c1">
            <text:p>0.10195</text:p>
          </table:table-cell>
          <table:table-cell office:value-type="string" table:style-name="c1">
            <text:p>2026-03-11 15:00</text:p>
          </table:table-cell>
          <table:table-cell office:value-type="float" office:value="0.1015492" table:style-name="c1">
            <text:p>0.10155</text:p>
          </table:table-cell>
          <table:table-cell office:value-type="float" office:value="-0.5931743164727554" table:style-name="c14">
            <text:p>-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0.1050525" table:style-name="c1">
            <text:p>0.10505</text:p>
          </table:table-cell>
          <table:table-cell office:value-type="string" table:style-name="c1">
            <text:p>2026-03-14 13:00</text:p>
          </table:table-cell>
          <table:table-cell office:value-type="float" office:value="0.10004995" table:style-name="c1">
            <text:p>0.10005</text:p>
          </table:table-cell>
          <table:table-cell office:value-type="float" office:value="-4.952333214392812" table:style-name="c14">
            <text:p>-5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1024512" table:style-name="c1">
            <text:p>0.10245</text:p>
          </table:table-cell>
          <table:table-cell office:value-type="string" table:style-name="c1">
            <text:p>2026-03-16 11:00</text:p>
          </table:table-cell>
          <table:table-cell office:value-type="float" office:value="0.10784605" table:style-name="c1">
            <text:p>0.10785</text:p>
          </table:table-cell>
          <table:table-cell office:value-type="float" office:value="5.055349030611622" table:style-name="c13">
            <text:p>+5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00</text:p>
          </table:table-cell>
          <table:table-cell office:value-type="float" office:value="0.11045519999999999" table:style-name="c1">
            <text:p>0.11046</text:p>
          </table:table-cell>
          <table:table-cell office:value-type="string" table:style-name="c1">
            <text:p>2026-03-17 22:00</text:p>
          </table:table-cell>
          <table:table-cell office:value-type="float" office:value="0.10884555" table:style-name="c1">
            <text:p>0.10885</text:p>
          </table:table-cell>
          <table:table-cell office:value-type="float" office:value="-1.654274542484191" table:style-name="c14">
            <text:p>-1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0:00</text:p>
          </table:table-cell>
          <table:table-cell office:value-type="float" office:value="0.0956478" table:style-name="c1">
            <text:p>0.095648</text:p>
          </table:table-cell>
          <table:table-cell office:value-type="string" table:style-name="c1">
            <text:p>2026-04-08 10:00</text:p>
          </table:table-cell>
          <table:table-cell office:value-type="float" office:value="0.10274860000000001" table:style-name="c1">
            <text:p>0.10275</text:p>
          </table:table-cell>
          <table:table-cell office:value-type="float" office:value="7.209162728886587" table:style-name="c13">
            <text:p>+7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2:00</text:p>
          </table:table-cell>
          <table:table-cell office:value-type="float" office:value="0.1052526" table:style-name="c1">
            <text:p>0.10525</text:p>
          </table:table-cell>
          <table:table-cell office:value-type="string" table:style-name="c1">
            <text:p>2026-04-09 22:00</text:p>
          </table:table-cell>
          <table:table-cell office:value-type="float" office:value="0.10704645" table:style-name="c1">
            <text:p>0.10705</text:p>
          </table:table-cell>
          <table:table-cell office:value-type="float" office:value="1.5010214915830877" table:style-name="c13">
            <text:p>+1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3:00</text:p>
          </table:table-cell>
          <table:table-cell office:value-type="float" office:value="0.10795394999999999" table:style-name="c1">
            <text:p>0.10795</text:p>
          </table:table-cell>
          <table:table-cell office:value-type="string" table:style-name="c1">
            <text:p>2026-04-10 23:00</text:p>
          </table:table-cell>
          <table:table-cell office:value-type="float" office:value="0.11544225000000001" table:style-name="c1">
            <text:p>0.11544</text:p>
          </table:table-cell>
          <table:table-cell office:value-type="float" office:value="6.722802585963739" table:style-name="c13">
            <text:p>+6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00:00</text:p>
          </table:table-cell>
          <table:table-cell office:value-type="float" office:value="0.11655825" table:style-name="c1">
            <text:p>0.11656</text:p>
          </table:table-cell>
          <table:table-cell office:value-type="string" table:style-name="c1">
            <text:p>2026-04-12 00:00</text:p>
          </table:table-cell>
          <table:table-cell office:value-type="float" office:value="0.11564215" table:style-name="c1">
            <text:p>0.11564</text:p>
          </table:table-cell>
          <table:table-cell office:value-type="float" office:value="-0.9842878199097904" table:style-name="c14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0.1136568" table:style-name="c1">
            <text:p>0.11366</text:p>
          </table:table-cell>
          <table:table-cell office:value-type="string" table:style-name="c1">
            <text:p>2026-04-15 00:00</text:p>
          </table:table-cell>
          <table:table-cell office:value-type="float" office:value="0.11014490000000002" table:style-name="c1">
            <text:p>0.11014</text:p>
          </table:table-cell>
          <table:table-cell office:value-type="float" office:value="-3.2836395667483087" table:style-name="c14">
            <text:p>-3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2:00</text:p>
          </table:table-cell>
          <table:table-cell office:value-type="float" office:value="0.11195595" table:style-name="c1">
            <text:p>0.11196</text:p>
          </table:table-cell>
          <table:table-cell office:value-type="string" table:style-name="c1">
            <text:p>2026-04-16 02:00</text:p>
          </table:table-cell>
          <table:table-cell office:value-type="float" office:value="0.1157421" table:style-name="c1">
            <text:p>0.11574</text:p>
          </table:table-cell>
          <table:table-cell office:value-type="float" office:value="3.1751608932798936" table:style-name="c13">
            <text:p>+3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5:00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4-17 05:00</text:p>
          </table:table-cell>
          <table:table-cell office:value-type="float" office:value="0.12863565000000002" table:style-name="c1">
            <text:p>0.12864</text:p>
          </table:table-cell>
          <table:table-cell office:value-type="float" office:value="9.296720750059384" table:style-name="c13">
            <text:p>+9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0.136068" table:style-name="c1">
            <text:p>0.13607</text:p>
          </table:table-cell>
          <table:table-cell office:value-type="string" table:style-name="c1">
            <text:p>2026-04-18 13:00</text:p>
          </table:table-cell>
          <table:table-cell office:value-type="float" office:value="0.1293353" table:style-name="c1">
            <text:p>0.12934</text:p>
          </table:table-cell>
          <table:table-cell office:value-type="float" office:value="-5.138049552209212" table:style-name="c14">
            <text:p>-5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8:00</text:p>
          </table:table-cell>
          <table:table-cell office:value-type="float" office:value="0.13186589999999998" table:style-name="c1">
            <text:p>0.13187</text:p>
          </table:table-cell>
          <table:table-cell office:value-type="string" table:style-name="c1">
            <text:p>2026-04-23 18:00</text:p>
          </table:table-cell>
          <table:table-cell office:value-type="float" office:value="0.12483755" table:style-name="c1">
            <text:p>0.12484</text:p>
          </table:table-cell>
          <table:table-cell office:value-type="float" office:value="-5.519167777605882" table:style-name="c14">
            <text:p>-5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5:00</text:p>
          </table:table-cell>
          <table:table-cell office:value-type="float" office:value="0.12736365" table:style-name="c1">
            <text:p>0.12736</text:p>
          </table:table-cell>
          <table:table-cell office:value-type="string" table:style-name="c1">
            <text:p>2026-04-29 20:00</text:p>
          </table:table-cell>
          <table:table-cell office:value-type="float" office:value="0.12313840000000001" table:style-name="c1">
            <text:p>0.12314</text:p>
          </table:table-cell>
          <table:table-cell office:value-type="float" office:value="-3.510737688186527" table:style-name="c14">
            <text:p>-3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8:00</text:p>
          </table:table-cell>
          <table:table-cell office:value-type="float" office:value="0.12836414999999998" table:style-name="c1">
            <text:p>0.12836</text:p>
          </table:table-cell>
          <table:table-cell office:value-type="string" table:style-name="c1">
            <text:p>2026-05-08 08:00</text:p>
          </table:table-cell>
          <table:table-cell office:value-type="float" office:value="0.1291354" table:style-name="c1">
            <text:p>0.12914</text:p>
          </table:table-cell>
          <table:table-cell office:value-type="float" office:value="0.3997286901366248" table:style-name="c13">
            <text:p>+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0:00</text:p>
          </table:table-cell>
          <table:table-cell office:value-type="float" office:value="0.132066" table:style-name="c1">
            <text:p>0.13207</text:p>
          </table:table-cell>
          <table:table-cell office:value-type="string" table:style-name="c1">
            <text:p>2026-05-09 10:00</text:p>
          </table:table-cell>
          <table:table-cell office:value-type="float" office:value="0.1427286" table:style-name="c1">
            <text:p>0.14273</text:p>
          </table:table-cell>
          <table:table-cell office:value-type="float" office:value="7.857651120348952" table:style-name="c13">
            <text:p>+7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4:00</text:p>
          </table:table-cell>
          <table:table-cell office:value-type="float" office:value="0.1406703" table:style-name="c1">
            <text:p>0.14067</text:p>
          </table:table-cell>
          <table:table-cell office:value-type="string" table:style-name="c1">
            <text:p>2026-05-14 04:00</text:p>
          </table:table-cell>
          <table:table-cell office:value-type="float" office:value="0.12883555" table:style-name="c1">
            <text:p>0.12884</text:p>
          </table:table-cell>
          <table:table-cell office:value-type="float" office:value="-8.596194267340017" table:style-name="c14">
            <text:p>-8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0.1336668" table:style-name="c1">
            <text:p>0.13367</text:p>
          </table:table-cell>
          <table:table-cell office:value-type="string" table:style-name="c1">
            <text:p>2026-05-15 08:00</text:p>
          </table:table-cell>
          <table:table-cell office:value-type="float" office:value="0.12863565000000002" table:style-name="c1">
            <text:p>0.12864</text:p>
          </table:table-cell>
          <table:table-cell office:value-type="float" office:value="-3.9563247301124815" table:style-name="c14">
            <text:p>-4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00</text:p>
          </table:table-cell>
          <table:table-cell office:value-type="float" office:value="1.7558774999999998" table:style-name="c10">
            <text:p>1.7559</text:p>
          </table:table-cell>
          <table:table-cell office:value-type="string" table:style-name="c10">
            <text:p>2026-03-10 14:00</text:p>
          </table:table-cell>
          <table:table-cell office:value-type="float" office:value="1.7931030000000001" table:style-name="c10">
            <text:p>1.7931</text:p>
          </table:table-cell>
          <table:table-cell office:value-type="float" office:value="1.9159131034482968" table:style-name="c11">
            <text:p>+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1.826913" table:style-name="c10">
            <text:p>1.8269</text:p>
          </table:table-cell>
          <table:table-cell office:value-type="string" table:style-name="c10">
            <text:p>2026-03-11 15:00</text:p>
          </table:table-cell>
          <table:table-cell office:value-type="float" office:value="1.8280855" table:style-name="c10">
            <text:p>1.8281</text:p>
          </table:table-cell>
          <table:table-cell office:value-type="float" office:value="-0.13584899305548737" table:style-name="c12">
            <text:p>-0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23:00</text:p>
          </table:table-cell>
          <table:table-cell office:value-type="float" office:value="1.8379184999999998" table:style-name="c10">
            <text:p>1.8379</text:p>
          </table:table-cell>
          <table:table-cell office:value-type="string" table:style-name="c10">
            <text:p>2026-03-13 00:00</text:p>
          </table:table-cell>
          <table:table-cell office:value-type="float" office:value="1.8370810000000002" table:style-name="c10">
            <text:p>1.8371</text:p>
          </table:table-cell>
          <table:table-cell office:value-type="float" office:value="-0.2453767628433967" table:style-name="c12">
            <text:p>-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4:00</text:p>
          </table:table-cell>
          <table:table-cell office:value-type="float" office:value="1.8739365" table:style-name="c10">
            <text:p>1.8739</text:p>
          </table:table-cell>
          <table:table-cell office:value-type="string" table:style-name="c10">
            <text:p>2026-03-14 14:00</text:p>
          </table:table-cell>
          <table:table-cell office:value-type="float" office:value="1.8760615" table:style-name="c10">
            <text:p>1.8761</text:p>
          </table:table-cell>
          <table:table-cell office:value-type="float" office:value="-0.08672902942549188" table:style-name="c12">
            <text:p>-0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8:00</text:p>
          </table:table-cell>
          <table:table-cell office:value-type="float" office:value="1.884942" table:style-name="c10">
            <text:p>1.8849</text:p>
          </table:table-cell>
          <table:table-cell office:value-type="string" table:style-name="c10">
            <text:p>2026-03-15 18:00</text:p>
          </table:table-cell>
          <table:table-cell office:value-type="float" office:value="1.8540725" table:style-name="c10">
            <text:p>1.8541</text:p>
          </table:table-cell>
          <table:table-cell office:value-type="float" office:value="-1.8343159061392944" table:style-name="c12">
            <text:p>-1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6:00</text:p>
          </table:table-cell>
          <table:table-cell office:value-type="float" office:value="1.9019504999999999" table:style-name="c10">
            <text:p>1.902</text:p>
          </table:table-cell>
          <table:table-cell office:value-type="string" table:style-name="c10">
            <text:p>2026-03-17 06:00</text:p>
          </table:table-cell>
          <table:table-cell office:value-type="float" office:value="1.9300345" table:style-name="c10">
            <text:p>1.93</text:p>
          </table:table-cell>
          <table:table-cell office:value-type="float" office:value="1.2737377252720394" table:style-name="c11">
            <text:p>+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0:00</text:p>
          </table:table-cell>
          <table:table-cell office:value-type="float" office:value="1.9619805" table:style-name="c10">
            <text:p>1.962</text:p>
          </table:table-cell>
          <table:table-cell office:value-type="string" table:style-name="c10">
            <text:p>2026-03-19 00:00</text:p>
          </table:table-cell>
          <table:table-cell office:value-type="float" office:value="1.9080455" table:style-name="c10">
            <text:p>1.908</text:p>
          </table:table-cell>
          <table:table-cell office:value-type="float" office:value="-2.9434126870526933" table:style-name="c12">
            <text:p>-2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8:00</text:p>
          </table:table-cell>
          <table:table-cell office:value-type="float" office:value="1.7338665" table:style-name="c10">
            <text:p>1.7339</text:p>
          </table:table-cell>
          <table:table-cell office:value-type="string" table:style-name="c10">
            <text:p>2026-04-07 08:00</text:p>
          </table:table-cell>
          <table:table-cell office:value-type="float" office:value="1.6861565" table:style-name="c10">
            <text:p>1.6862</text:p>
          </table:table-cell>
          <table:table-cell office:value-type="float" office:value="-2.9460530463850665" table:style-name="c12">
            <text:p>-2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16:00</text:p>
          </table:table-cell>
          <table:table-cell office:value-type="float" office:value="1.7058525" table:style-name="c10">
            <text:p>1.7059</text:p>
          </table:table-cell>
          <table:table-cell office:value-type="string" table:style-name="c10">
            <text:p>2026-04-08 16:00</text:p>
          </table:table-cell>
          <table:table-cell office:value-type="float" office:value="1.7951020000000002" table:style-name="c10">
            <text:p>1.7951</text:p>
          </table:table-cell>
          <table:table-cell office:value-type="float" office:value="5.021600115015823" table:style-name="c11">
            <text:p>+5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7:00</text:p>
          </table:table-cell>
          <table:table-cell office:value-type="float" office:value="1.806903" table:style-name="c10">
            <text:p>1.8069</text:p>
          </table:table-cell>
          <table:table-cell office:value-type="string" table:style-name="c10">
            <text:p>2026-04-10 17:00</text:p>
          </table:table-cell>
          <table:table-cell office:value-type="float" office:value="1.8220885" table:style-name="c10">
            <text:p>1.8221</text:p>
          </table:table-cell>
          <table:table-cell office:value-type="float" office:value="0.6388359025636614" table:style-name="c11">
            <text:p>+0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14:00</text:p>
          </table:table-cell>
          <table:table-cell office:value-type="float" office:value="1.7548769999999998" table:style-name="c10">
            <text:p>1.7549</text:p>
          </table:table-cell>
          <table:table-cell office:value-type="string" table:style-name="c10">
            <text:p>2026-04-14 14:00</text:p>
          </table:table-cell>
          <table:table-cell office:value-type="float" office:value="1.7791100000000002" table:style-name="c10">
            <text:p>1.7791</text:p>
          </table:table-cell>
          <table:table-cell office:value-type="float" office:value="1.178234093329622" table:style-name="c11">
            <text:p>+1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4:00</text:p>
          </table:table-cell>
          <table:table-cell office:value-type="float" office:value="1.8059024999999997" table:style-name="c10">
            <text:p>1.8059</text:p>
          </table:table-cell>
          <table:table-cell office:value-type="string" table:style-name="c10">
            <text:p>2026-04-17 14:00</text:p>
          </table:table-cell>
          <table:table-cell office:value-type="float" office:value="1.8630680000000002" table:style-name="c10">
            <text:p>1.8631</text:p>
          </table:table-cell>
          <table:table-cell office:value-type="float" office:value="2.959253174963772" table:style-name="c11">
            <text:p>+3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20:00</text:p>
          </table:table-cell>
          <table:table-cell office:value-type="float" office:value="1.7938964999999998" table:style-name="c10">
            <text:p>1.7939</text:p>
          </table:table-cell>
          <table:table-cell office:value-type="string" table:style-name="c10">
            <text:p>2026-04-20 20:00</text:p>
          </table:table-cell>
          <table:table-cell office:value-type="float" office:value="1.8010990000000002" table:style-name="c10">
            <text:p>1.8011</text:p>
          </table:table-cell>
          <table:table-cell office:value-type="float" office:value="0.2007977104030445" table:style-name="c11">
            <text:p>+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09:00</text:p>
          </table:table-cell>
          <table:table-cell office:value-type="float" office:value="1.944972" table:style-name="c10">
            <text:p>1.945</text:p>
          </table:table-cell>
          <table:table-cell office:value-type="string" table:style-name="c10">
            <text:p>2026-04-25 09:00</text:p>
          </table:table-cell>
          <table:table-cell office:value-type="float" office:value="2.0229880000000002" table:style-name="c10">
            <text:p>2.023</text:p>
          </table:table-cell>
          <table:table-cell office:value-type="float" office:value="3.8032448275862496" table:style-name="c11">
            <text:p>+3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11:00</text:p>
          </table:table-cell>
          <table:table-cell office:value-type="float" office:value="2.0560275" table:style-name="c10">
            <text:p>2.056</text:p>
          </table:table-cell>
          <table:table-cell office:value-type="string" table:style-name="c10">
            <text:p>2026-04-26 11:00</text:p>
          </table:table-cell>
          <table:table-cell office:value-type="float" office:value="2.0199895" table:style-name="c10">
            <text:p>2.02</text:p>
          </table:table-cell>
          <table:table-cell office:value-type="float" office:value="-1.9491937248164115" table:style-name="c12">
            <text:p>-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4:00</text:p>
          </table:table-cell>
          <table:table-cell office:value-type="float" office:value="1.9879935" table:style-name="c10">
            <text:p>1.988</text:p>
          </table:table-cell>
          <table:table-cell office:value-type="string" table:style-name="c10">
            <text:p>2026-04-30 04:00</text:p>
          </table:table-cell>
          <table:table-cell office:value-type="float" office:value="1.9150420000000001" table:style-name="c10">
            <text:p>1.915</text:p>
          </table:table-cell>
          <table:table-cell office:value-type="float" office:value="-3.8621690140334786" table:style-name="c12">
            <text:p>-3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8:00</text:p>
          </table:table-cell>
          <table:table-cell office:value-type="float" office:value="1.9419705" table:style-name="c10">
            <text:p>1.942</text:p>
          </table:table-cell>
          <table:table-cell office:value-type="string" table:style-name="c10">
            <text:p>2026-05-07 20:00</text:p>
          </table:table-cell>
          <table:table-cell office:value-type="float" office:value="1.885057" table:style-name="c10">
            <text:p>1.8851</text:p>
          </table:table-cell>
          <table:table-cell office:value-type="float" office:value="-3.1247502957949314" table:style-name="c12">
            <text:p>-3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0:00</text:p>
          </table:table-cell>
          <table:table-cell office:value-type="float" office:value="1.9379685" table:style-name="c10">
            <text:p>1.938</text:p>
          </table:table-cell>
          <table:table-cell office:value-type="string" table:style-name="c10">
            <text:p>2026-05-11 10:00</text:p>
          </table:table-cell>
          <table:table-cell office:value-type="float" office:value="2.0619685000000003" table:style-name="c10">
            <text:p>2.062</text:p>
          </table:table-cell>
          <table:table-cell office:value-type="float" office:value="6.1857623056566835" table:style-name="c11">
            <text:p>+6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1:00</text:p>
          </table:table-cell>
          <table:table-cell office:value-type="float" office:value="2.0550269999999995" table:style-name="c10">
            <text:p>2.055</text:p>
          </table:table-cell>
          <table:table-cell office:value-type="string" table:style-name="c10">
            <text:p>2026-05-12 11:00</text:p>
          </table:table-cell>
          <table:table-cell office:value-type="float" office:value="2.0359815" table:style-name="c10">
            <text:p>2.036</text:p>
          </table:table-cell>
          <table:table-cell office:value-type="float" office:value="-1.1248235190340128" table:style-name="c12">
            <text:p>-1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8:00</text:p>
          </table:table-cell>
          <table:table-cell office:value-type="float" office:value="2.0760375" table:style-name="c10">
            <text:p>2.076</text:p>
          </table:table-cell>
          <table:table-cell office:value-type="string" table:style-name="c10">
            <text:p>2026-05-13 18:00</text:p>
          </table:table-cell>
          <table:table-cell office:value-type="float" office:value="2.0519735" table:style-name="c10">
            <text:p>2.052</text:p>
          </table:table-cell>
          <table:table-cell office:value-type="float" office:value="-1.3567141743104472" table:style-name="c12">
            <text:p>-1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6 13:00</text:p>
          </table:table-cell>
          <table:table-cell office:value-type="float" office:value="1.9909949999999998" table:style-name="c10">
            <text:p>1.991</text:p>
          </table:table-cell>
          <table:table-cell office:value-type="string" table:style-name="c10">
            <text:p>2026-05-17 13:00</text:p>
          </table:table-cell>
          <table:table-cell office:value-type="float" office:value="2.068965" table:style-name="c10">
            <text:p>2.069</text:p>
          </table:table-cell>
          <table:table-cell office:value-type="float" office:value="3.7084040374285365" table:style-name="c11">
            <text:p>+3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4:00</text:p>
          </table:table-cell>
          <table:table-cell office:value-type="float" office:value="2.1510749999999996" table:style-name="c10">
            <text:p>2.1511</text:p>
          </table:table-cell>
          <table:table-cell office:value-type="string" table:style-name="c10">
            <text:p>2026-05-23 04:00</text:p>
          </table:table-cell>
          <table:table-cell office:value-type="float" office:value="2.1119435" table:style-name="c10">
            <text:p>2.1119</text:p>
          </table:table-cell>
          <table:table-cell office:value-type="float" office:value="-2.015423686133644" table:style-name="c12">
            <text:p>-2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21:00</text:p>
          </table:table-cell>
          <table:table-cell office:value-type="float" office:value="2.147073" table:style-name="c10">
            <text:p>2.1471</text:p>
          </table:table-cell>
          <table:table-cell office:value-type="string" table:style-name="c10">
            <text:p>2026-05-24 21:00</text:p>
          </table:table-cell>
          <table:table-cell office:value-type="float" office:value="2.0319835" table:style-name="c10">
            <text:p>2.032</text:p>
          </table:table-cell>
          <table:table-cell office:value-type="float" office:value="-5.549482249392545" table:style-name="c12">
            <text:p>-5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6:00</text:p>
          </table:table-cell>
          <table:table-cell office:value-type="float" office:value="2.147073" table:style-name="c10">
            <text:p>2.1471</text:p>
          </table:table-cell>
          <table:table-cell office:value-type="string" table:style-name="c10">
            <text:p>2026-05-26 06:00</text:p>
          </table:table-cell>
          <table:table-cell office:value-type="float" office:value="2.1379305" table:style-name="c10">
            <text:p>2.1379</text:p>
          </table:table-cell>
          <table:table-cell office:value-type="float" office:value="-0.6248610582639591" table:style-name="c12">
            <text:p>-0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1:00</text:p>
          </table:table-cell>
          <table:table-cell office:value-type="float" office:value="2.235117" table:style-name="c10">
            <text:p>2.2351</text:p>
          </table:table-cell>
          <table:table-cell office:value-type="string" table:style-name="c10">
            <text:p>2026-05-27 11:00</text:p>
          </table:table-cell>
          <table:table-cell office:value-type="float" office:value="2.222888" table:style-name="c10">
            <text:p>2.2229</text:p>
          </table:table-cell>
          <table:table-cell office:value-type="float" office:value="-0.745936481714371" table:style-name="c12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4:00</text:p>
          </table:table-cell>
          <table:table-cell office:value-type="float" office:value="8.98449" table:style-name="c1">
            <text:p>8.9845</text:p>
          </table:table-cell>
          <table:table-cell office:value-type="string" table:style-name="c1">
            <text:p>2026-03-10 04:00</text:p>
          </table:table-cell>
          <table:table-cell office:value-type="float" office:value="9.325335" table:style-name="c1">
            <text:p>9.3253</text:p>
          </table:table-cell>
          <table:table-cell office:value-type="float" office:value="3.586220868797252" table:style-name="c13">
            <text:p>+3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5:00</text:p>
          </table:table-cell>
          <table:table-cell office:value-type="float" office:value="9.434714999999999" table:style-name="c1">
            <text:p>9.4347</text:p>
          </table:table-cell>
          <table:table-cell office:value-type="string" table:style-name="c1">
            <text:p>2026-03-11 05:00</text:p>
          </table:table-cell>
          <table:table-cell office:value-type="float" office:value="9.685155" table:style-name="c1">
            <text:p>9.6852</text:p>
          </table:table-cell>
          <table:table-cell office:value-type="float" office:value="2.449245951308554" table:style-name="c13">
            <text:p>+2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5:00</text:p>
          </table:table-cell>
          <table:table-cell office:value-type="float" office:value="9.694844999999999" table:style-name="c1">
            <text:p>9.6948</text:p>
          </table:table-cell>
          <table:table-cell office:value-type="string" table:style-name="c1">
            <text:p>2026-03-12 15:00</text:p>
          </table:table-cell>
          <table:table-cell office:value-type="float" office:value="9.49525" table:style-name="c1">
            <text:p>9.4953</text:p>
          </table:table-cell>
          <table:table-cell office:value-type="float" office:value="-2.254559044007365" table:style-name="c14">
            <text:p>-2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10.095044999999999" table:style-name="c1">
            <text:p>10.095</text:p>
          </table:table-cell>
          <table:table-cell office:value-type="string" table:style-name="c1">
            <text:p>2026-03-14 13:00</text:p>
          </table:table-cell>
          <table:table-cell office:value-type="float" office:value="9.565215" table:style-name="c1">
            <text:p>9.5652</text:p>
          </table:table-cell>
          <table:table-cell office:value-type="float" office:value="-5.437824841642591" table:style-name="c14">
            <text:p>-5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9.854925" table:style-name="c1">
            <text:p>9.8549</text:p>
          </table:table-cell>
          <table:table-cell office:value-type="string" table:style-name="c1">
            <text:p>2026-03-16 22:00</text:p>
          </table:table-cell>
          <table:table-cell office:value-type="float" office:value="10.374810000000002" table:style-name="c1">
            <text:p>10.375</text:p>
          </table:table-cell>
          <table:table-cell office:value-type="float" office:value="5.064937123418023" table:style-name="c13">
            <text:p>+5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3:00</text:p>
          </table:table-cell>
          <table:table-cell office:value-type="float" office:value="10.50525" table:style-name="c1">
            <text:p>10.505</text:p>
          </table:table-cell>
          <table:table-cell office:value-type="string" table:style-name="c1">
            <text:p>2026-03-17 23:00</text:p>
          </table:table-cell>
          <table:table-cell office:value-type="float" office:value="10.25487" table:style-name="c1">
            <text:p>10.255</text:p>
          </table:table-cell>
          <table:table-cell office:value-type="float" office:value="-2.5785153626044166" table:style-name="c14">
            <text:p>-2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4:00</text:p>
          </table:table-cell>
          <table:table-cell office:value-type="float" office:value="9.454724999999998" table:style-name="c1">
            <text:p>9.4547</text:p>
          </table:table-cell>
          <table:table-cell office:value-type="string" table:style-name="c1">
            <text:p>2026-04-07 04:00</text:p>
          </table:table-cell>
          <table:table-cell office:value-type="float" office:value="8.67566" table:style-name="c1">
            <text:p>8.6757</text:p>
          </table:table-cell>
          <table:table-cell office:value-type="float" office:value="-8.423382428785587" table:style-name="c14">
            <text:p>-8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3:00</text:p>
          </table:table-cell>
          <table:table-cell office:value-type="float" office:value="9.48474" table:style-name="c1">
            <text:p>9.4847</text:p>
          </table:table-cell>
          <table:table-cell office:value-type="string" table:style-name="c1">
            <text:p>2026-04-10 23:00</text:p>
          </table:table-cell>
          <table:table-cell office:value-type="float" office:value="9.41529" table:style-name="c1">
            <text:p>9.4153</text:p>
          </table:table-cell>
          <table:table-cell office:value-type="float" office:value="-0.930665096881933" table:style-name="c14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4-14 23:00</text:p>
          </table:table-cell>
          <table:table-cell office:value-type="float" office:value="9.305345" table:style-name="c1">
            <text:p>9.3053</text:p>
          </table:table-cell>
          <table:table-cell office:value-type="float" office:value="-3.3114316243440522" table:style-name="c14">
            <text:p>-3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0:00</text:p>
          </table:table-cell>
          <table:table-cell office:value-type="float" office:value="9.854925" table:style-name="c1">
            <text:p>9.8549</text:p>
          </table:table-cell>
          <table:table-cell office:value-type="string" table:style-name="c1">
            <text:p>2026-04-17 20:00</text:p>
          </table:table-cell>
          <table:table-cell office:value-type="float" office:value="9.785105" table:style-name="c1">
            <text:p>9.7851</text:p>
          </table:table-cell>
          <table:table-cell office:value-type="float" office:value="-0.9069620001674328" table:style-name="c14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6:00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24 16:00</text:p>
          </table:table-cell>
          <table:table-cell office:value-type="float" office:value="9.45527" table:style-name="c1">
            <text:p>9.4553</text:p>
          </table:table-cell>
          <table:table-cell office:value-type="float" office:value="0.33673498644295474" table:style-name="c13">
            <text:p>+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27 20:00</text:p>
          </table:table-cell>
          <table:table-cell office:value-type="float" office:value="9.165415000000001" table:style-name="c1">
            <text:p>9.1654</text:p>
          </table:table-cell>
          <table:table-cell office:value-type="float" office:value="-3.8641211947653797" table:style-name="c14">
            <text:p>-3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4:00</text:p>
          </table:table-cell>
          <table:table-cell office:value-type="float" office:value="9.48474" table:style-name="c1">
            <text:p>9.4847</text:p>
          </table:table-cell>
          <table:table-cell office:value-type="string" table:style-name="c1">
            <text:p>2026-05-06 14:00</text:p>
          </table:table-cell>
          <table:table-cell office:value-type="float" office:value="9.55522" table:style-name="c1">
            <text:p>9.5552</text:p>
          </table:table-cell>
          <table:table-cell office:value-type="float" office:value="0.5417029377716043" table:style-name="c13">
            <text:p>+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9:0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5-08 09:00</text:p>
          </table:table-cell>
          <table:table-cell office:value-type="float" office:value="9.53523" table:style-name="c1">
            <text:p>9.5352</text:p>
          </table:table-cell>
          <table:table-cell office:value-type="float" office:value="-1.3338862184053113" table:style-name="c14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00</text:p>
          </table:table-cell>
          <table:table-cell office:value-type="float" office:value="9.90495" table:style-name="c1">
            <text:p>9.9049</text:p>
          </table:table-cell>
          <table:table-cell office:value-type="string" table:style-name="c1">
            <text:p>2026-05-09 19:00</text:p>
          </table:table-cell>
          <table:table-cell office:value-type="float" office:value="9.955020000000001" table:style-name="c1">
            <text:p>9.955</text:p>
          </table:table-cell>
          <table:table-cell office:value-type="float" office:value="0.30459431920404345" table:style-name="c13">
            <text:p>+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9:00</text:p>
          </table:table-cell>
          <table:table-cell office:value-type="float" office:value="10.04502" table:style-name="c1">
            <text:p>10.045</text:p>
          </table:table-cell>
          <table:table-cell office:value-type="string" table:style-name="c1">
            <text:p>2026-05-11 09:00</text:p>
          </table:table-cell>
          <table:table-cell office:value-type="float" office:value="10.07496" table:style-name="c1">
            <text:p>10.075</text:p>
          </table:table-cell>
          <table:table-cell office:value-type="float" office:value="0.09756232401729736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4:00</text:p>
          </table:table-cell>
          <table:table-cell office:value-type="float" office:value="10.04502" table:style-name="c1">
            <text:p>10.045</text:p>
          </table:table-cell>
          <table:table-cell office:value-type="string" table:style-name="c1">
            <text:p>2026-05-14 04:00</text:p>
          </table:table-cell>
          <table:table-cell office:value-type="float" office:value="9.65517" table:style-name="c1">
            <text:p>9.6552</text:p>
          </table:table-cell>
          <table:table-cell office:value-type="float" office:value="-4.073169439483426" table:style-name="c14">
            <text:p>-4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10.04502" table:style-name="c1">
            <text:p>10.045</text:p>
          </table:table-cell>
          <table:table-cell office:value-type="string" table:style-name="c1">
            <text:p>2026-05-15 15:00</text:p>
          </table:table-cell>
          <table:table-cell office:value-type="float" office:value="9.485255" table:style-name="c1">
            <text:p>9.4853</text:p>
          </table:table-cell>
          <table:table-cell office:value-type="float" office:value="-5.761322772328981" table:style-name="c14">
            <text:p>-5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9 08:00</text:p>
          </table:table-cell>
          <table:table-cell office:value-type="float" office:value="456.52815" table:style-name="c10">
            <text:p>456.53</text:p>
          </table:table-cell>
          <table:table-cell office:value-type="string" table:style-name="c10">
            <text:p>2026-03-19 16:00</text:p>
          </table:table-cell>
          <table:table-cell office:value-type="float" office:value="453.37320000000005" table:style-name="c10">
            <text:p>453.37</text:p>
          </table:table-cell>
          <table:table-cell office:value-type="float" office:value="-0.8895931229651377" table:style-name="c12">
            <text:p>-0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7 06:00</text:p>
          </table:table-cell>
          <table:table-cell office:value-type="float" office:value="472.53614999999996" table:style-name="c10">
            <text:p>472.54</text:p>
          </table:table-cell>
          <table:table-cell office:value-type="string" table:style-name="c10">
            <text:p>2026-03-27 08:00</text:p>
          </table:table-cell>
          <table:table-cell office:value-type="float" office:value="458.5706" table:style-name="c10">
            <text:p>458.57</text:p>
          </table:table-cell>
          <table:table-cell office:value-type="float" office:value="-3.149437906369701" table:style-name="c12">
            <text:p>-3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20:00</text:p>
          </table:table-cell>
          <table:table-cell office:value-type="float" office:value="447.2235" table:style-name="c10">
            <text:p>447.22</text:p>
          </table:table-cell>
          <table:table-cell office:value-type="string" table:style-name="c10">
            <text:p>2026-04-17 20:00</text:p>
          </table:table-cell>
          <table:table-cell office:value-type="float" office:value="454.67255" table:style-name="c10">
            <text:p>454.67</text:p>
          </table:table-cell>
          <table:table-cell office:value-type="float" office:value="1.4623917510036888" table:style-name="c11">
            <text:p>+1.5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14:00</text:p>
          </table:table-cell>
          <table:table-cell office:value-type="float" office:value="442.72125" table:style-name="c10">
            <text:p>442.72</text:p>
          </table:table-cell>
          <table:table-cell office:value-type="string" table:style-name="c10">
            <text:p>2026-04-21 14:00</text:p>
          </table:table-cell>
          <table:table-cell office:value-type="float" office:value="444.37770000000006" table:style-name="c10">
            <text:p>444.38</text:p>
          </table:table-cell>
          <table:table-cell office:value-type="float" office:value="0.17350397743500778" table:style-name="c11">
            <text:p>+0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0:00</text:p>
          </table:table-cell>
          <table:table-cell office:value-type="float" office:value="448.8243" table:style-name="c10">
            <text:p>448.82</text:p>
          </table:table-cell>
          <table:table-cell office:value-type="string" table:style-name="c10">
            <text:p>2026-04-23 00:00</text:p>
          </table:table-cell>
          <table:table-cell office:value-type="float" office:value="460.06985000000003" table:style-name="c10">
            <text:p>460.07</text:p>
          </table:table-cell>
          <table:table-cell office:value-type="float" office:value="2.3006486881057997" table:style-name="c11">
            <text:p>+2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3:00</text:p>
          </table:table-cell>
          <table:table-cell office:value-type="float" office:value="464.63219999999995" table:style-name="c10">
            <text:p>464.63</text:p>
          </table:table-cell>
          <table:table-cell office:value-type="string" table:style-name="c10">
            <text:p>2026-05-06 23:00</text:p>
          </table:table-cell>
          <table:table-cell office:value-type="float" office:value="464.26775000000004" table:style-name="c10">
            <text:p>464.27</text:p>
          </table:table-cell>
          <table:table-cell office:value-type="float" office:value="-0.2781815879850713" table:style-name="c12">
            <text:p>-0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2:00</text:p>
          </table:table-cell>
          <table:table-cell office:value-type="float" office:value="453.62669999999997" table:style-name="c10">
            <text:p>453.63</text:p>
          </table:table-cell>
          <table:table-cell office:value-type="string" table:style-name="c10">
            <text:p>2026-05-10 02:00</text:p>
          </table:table-cell>
          <table:table-cell office:value-type="float" office:value="449.77500000000003" table:style-name="c10">
            <text:p>449.78</text:p>
          </table:table-cell>
          <table:table-cell office:value-type="float" office:value="-1.0472929007485643" table:style-name="c12">
            <text:p>-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7:00</text:p>
          </table:table-cell>
          <table:table-cell office:value-type="float" office:value="458.12895" table:style-name="c10">
            <text:p>458.13</text:p>
          </table:table-cell>
          <table:table-cell office:value-type="string" table:style-name="c10">
            <text:p>2026-05-11 17:00</text:p>
          </table:table-cell>
          <table:table-cell office:value-type="float" office:value="449.1753" table:style-name="c10">
            <text:p>449.18</text:p>
          </table:table-cell>
          <table:table-cell office:value-type="float" office:value="-2.150388318550911" table:style-name="c12">
            <text:p>-2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5:00</text:p>
          </table:table-cell>
          <table:table-cell office:value-type="float" office:value="623.07138" table:style-name="c1">
            <text:p>623.07</text:p>
          </table:table-cell>
          <table:table-cell office:value-type="string" table:style-name="c1">
            <text:p>2026-03-10 05:00</text:p>
          </table:table-cell>
          <table:table-cell office:value-type="float" office:value="643.727975" table:style-name="c1">
            <text:p>643.73</text:p>
          </table:table-cell>
          <table:table-cell office:value-type="float" office:value="3.108758225738928" table:style-name="c13">
            <text:p>+3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4:00</text:p>
          </table:table-cell>
          <table:table-cell office:value-type="float" office:value="674.8872749999999" table:style-name="c1">
            <text:p>674.89</text:p>
          </table:table-cell>
          <table:table-cell office:value-type="string" table:style-name="c1">
            <text:p>2026-03-14 14:00</text:p>
          </table:table-cell>
          <table:table-cell office:value-type="float" office:value="653.7429650000001" table:style-name="c1">
            <text:p>653.74</text:p>
          </table:table-cell>
          <table:table-cell office:value-type="float" office:value="-3.326650689485122" table:style-name="c14">
            <text:p>-3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667.743705" table:style-name="c1">
            <text:p>667.74</text:p>
          </table:table-cell>
          <table:table-cell office:value-type="string" table:style-name="c1">
            <text:p>2026-03-16 22:00</text:p>
          </table:table-cell>
          <table:table-cell office:value-type="float" office:value="679.2202199999999" table:style-name="c1">
            <text:p>679.22</text:p>
          </table:table-cell>
          <table:table-cell office:value-type="float" office:value="1.515364907890815" table:style-name="c13">
            <text:p>+1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6:00</text:p>
          </table:table-cell>
          <table:table-cell office:value-type="float" office:value="623.761725" table:style-name="c1">
            <text:p>623.76</text:p>
          </table:table-cell>
          <table:table-cell office:value-type="string" table:style-name="c1">
            <text:p>2026-04-15 16:00</text:p>
          </table:table-cell>
          <table:table-cell office:value-type="float" office:value="618.740475" table:style-name="c1">
            <text:p>618.74</text:p>
          </table:table-cell>
          <table:table-cell office:value-type="float" office:value="-1.0032857032908016" table:style-name="c14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8:00</text:p>
          </table:table-cell>
          <table:table-cell office:value-type="float" office:value="627.75372" table:style-name="c1">
            <text:p>627.75</text:p>
          </table:table-cell>
          <table:table-cell office:value-type="string" table:style-name="c1">
            <text:p>2026-04-17 18:00</text:p>
          </table:table-cell>
          <table:table-cell office:value-type="float" office:value="641.51908" table:style-name="c1">
            <text:p>641.52</text:p>
          </table:table-cell>
          <table:table-cell office:value-type="float" office:value="1.9885128453049905" table:style-name="c13">
            <text:p>+2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0:00</text:p>
          </table:table-cell>
          <table:table-cell office:value-type="float" office:value="627.03336" table:style-name="c1">
            <text:p>627.03</text:p>
          </table:table-cell>
          <table:table-cell office:value-type="string" table:style-name="c1">
            <text:p>2026-04-21 10:00</text:p>
          </table:table-cell>
          <table:table-cell office:value-type="float" office:value="636.4416200000001" table:style-name="c1">
            <text:p>636.44</text:p>
          </table:table-cell>
          <table:table-cell office:value-type="float" office:value="1.2975407244073978" table:style-name="c13">
            <text:p>+1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1:00</text:p>
          </table:table-cell>
          <table:table-cell office:value-type="float" office:value="638.8792799999999" table:style-name="c1">
            <text:p>638.88</text:p>
          </table:table-cell>
          <table:table-cell office:value-type="string" table:style-name="c1">
            <text:p>2026-04-22 11:00</text:p>
          </table:table-cell>
          <table:table-cell office:value-type="float" office:value="641.7489650000001" table:style-name="c1">
            <text:p>641.75</text:p>
          </table:table-cell>
          <table:table-cell office:value-type="float" office:value="0.24837694203594385" table:style-name="c13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4:00</text:p>
          </table:table-cell>
          <table:table-cell office:value-type="float" office:value="650.9253" table:style-name="c1">
            <text:p>650.93</text:p>
          </table:table-cell>
          <table:table-cell office:value-type="string" table:style-name="c1">
            <text:p>2026-04-23 14:00</text:p>
          </table:table-cell>
          <table:table-cell office:value-type="float" office:value="635.682" table:style-name="c1">
            <text:p>635.68</text:p>
          </table:table-cell>
          <table:table-cell office:value-type="float" office:value="-2.5370082124630877" table:style-name="c14">
            <text:p>-2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4:00</text:p>
          </table:table-cell>
          <table:table-cell office:value-type="float" office:value="631.3655249999999" table:style-name="c1">
            <text:p>631.37</text:p>
          </table:table-cell>
          <table:table-cell office:value-type="string" table:style-name="c1">
            <text:p>2026-05-06 14:00</text:p>
          </table:table-cell>
          <table:table-cell office:value-type="float" office:value="647.086295" table:style-name="c1">
            <text:p>647.09</text:p>
          </table:table-cell>
          <table:table-cell office:value-type="float" office:value="2.2850858852793587" table:style-name="c13">
            <text:p>+2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00</text:p>
          </table:table-cell>
          <table:table-cell office:value-type="float" office:value="666.122895" table:style-name="c1">
            <text:p>666.12</text:p>
          </table:table-cell>
          <table:table-cell office:value-type="string" table:style-name="c1">
            <text:p>2026-05-11 23:00</text:p>
          </table:table-cell>
          <table:table-cell office:value-type="float" office:value="669.7349650000001" table:style-name="c1">
            <text:p>669.73</text:p>
          </table:table-cell>
          <table:table-cell office:value-type="float" office:value="0.34126882922485" table:style-name="c13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3:00</text:p>
          </table:table-cell>
          <table:table-cell office:value-type="float" office:value="680.78022" table:style-name="c1">
            <text:p>680.78</text:p>
          </table:table-cell>
          <table:table-cell office:value-type="string" table:style-name="c1">
            <text:p>2026-05-14 03:00</text:p>
          </table:table-cell>
          <table:table-cell office:value-type="float" office:value="669.60503" table:style-name="c1">
            <text:p>669.61</text:p>
          </table:table-cell>
          <table:table-cell office:value-type="float" office:value="-1.838145423051507" table:style-name="c14">
            <text:p>-1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9:00</text:p>
          </table:table-cell>
          <table:table-cell office:value-type="float" office:value="686.16291" table:style-name="c1">
            <text:p>686.16</text:p>
          </table:table-cell>
          <table:table-cell office:value-type="string" table:style-name="c1">
            <text:p>2026-05-16 09:00</text:p>
          </table:table-cell>
          <table:table-cell office:value-type="float" office:value="661.40913" table:style-name="c1">
            <text:p>661.41</text:p>
          </table:table-cell>
          <table:table-cell office:value-type="float" office:value="-3.8002544979981456" table:style-name="c14">
            <text:p>-3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3:00</text:p>
          </table:table-cell>
          <table:table-cell office:value-type="float" office:value="669.944805" table:style-name="c1">
            <text:p>669.94</text:p>
          </table:table-cell>
          <table:table-cell office:value-type="string" table:style-name="c1">
            <text:p>2026-05-26 13:00</text:p>
          </table:table-cell>
          <table:table-cell office:value-type="float" office:value="662.138765" table:style-name="c1">
            <text:p>662.14</text:p>
          </table:table-cell>
          <table:table-cell office:value-type="float" office:value="-1.3627473969642812" table:style-name="c14">
            <text:p>-1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6:00</text:p>
          </table:table-cell>
          <table:table-cell office:value-type="float" office:value="694.877265" table:style-name="c1">
            <text:p>694.88</text:p>
          </table:table-cell>
          <table:table-cell office:value-type="string" table:style-name="c1">
            <text:p>2026-05-31 16:00</text:p>
          </table:table-cell>
          <table:table-cell office:value-type="float" office:value="720.47958" table:style-name="c1">
            <text:p>720.48</text:p>
          </table:table-cell>
          <table:table-cell office:value-type="float" office:value="3.477171802358514" table:style-name="c13">
            <text:p>+3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0:00</text:p>
          </table:table-cell>
          <table:table-cell office:value-type="float" office:value="711.365505" table:style-name="c1">
            <text:p>711.37</text:p>
          </table:table-cell>
          <table:table-cell office:value-type="string" table:style-name="c1">
            <text:p>2026-06-02 10:00</text:p>
          </table:table-cell>
          <table:table-cell office:value-type="float" office:value="677.431115" table:style-name="c1">
            <text:p>677.43</text:p>
          </table:table-cell>
          <table:table-cell office:value-type="float" office:value="-4.960681190028316" table:style-name="c14">
            <text:p>-5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07:00</text:p>
          </table:table-cell>
          <table:table-cell office:value-type="float" office:value="67300.81358999999" table:style-name="c10">
            <text:p>67301</text:p>
          </table:table-cell>
          <table:table-cell office:value-type="string" table:style-name="c10">
            <text:p>2026-03-10 07:00</text:p>
          </table:table-cell>
          <table:table-cell office:value-type="float" office:value="69875.954545" table:style-name="c10">
            <text:p>69876</text:p>
          </table:table-cell>
          <table:table-cell office:value-type="float" office:value="3.618765943457225" table:style-name="c11">
            <text:p>+3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71503.543905" table:style-name="c10">
            <text:p>71504</text:p>
          </table:table-cell>
          <table:table-cell office:value-type="string" table:style-name="c10">
            <text:p>2026-03-11 15:00</text:p>
          </table:table-cell>
          <table:table-cell office:value-type="float" office:value="70543.41065" table:style-name="c10">
            <text:p>70543</text:p>
          </table:table-cell>
          <table:table-cell office:value-type="float" office:value="-1.5399929468563611" table:style-name="c12">
            <text:p>-1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4:00</text:p>
          </table:table-cell>
          <table:table-cell office:value-type="float" office:value="73415.86958999999" table:style-name="c10">
            <text:p>73416</text:p>
          </table:table-cell>
          <table:table-cell office:value-type="string" table:style-name="c10">
            <text:p>2026-03-14 14:00</text:p>
          </table:table-cell>
          <table:table-cell office:value-type="float" office:value="70811.91633000001" table:style-name="c10">
            <text:p>70812</text:p>
          </table:table-cell>
          <table:table-cell office:value-type="float" office:value="-3.7396632309557365" table:style-name="c12">
            <text:p>-3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3:00</text:p>
          </table:table-cell>
          <table:table-cell office:value-type="float" office:value="72785.824725" table:style-name="c10">
            <text:p>72786</text:p>
          </table:table-cell>
          <table:table-cell office:value-type="string" table:style-name="c10">
            <text:p>2026-03-16 23:00</text:p>
          </table:table-cell>
          <table:table-cell office:value-type="float" office:value="74736.17322" table:style-name="c10">
            <text:p>74736</text:p>
          </table:table-cell>
          <table:table-cell office:value-type="float" office:value="2.474315419984041" table:style-name="c11">
            <text:p>+2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0:00</text:p>
          </table:table-cell>
          <table:table-cell office:value-type="float" office:value="74922.112335" table:style-name="c10">
            <text:p>74922</text:p>
          </table:table-cell>
          <table:table-cell office:value-type="string" table:style-name="c10">
            <text:p>2026-03-18 00:00</text:p>
          </table:table-cell>
          <table:table-cell office:value-type="float" office:value="73872.415315" table:style-name="c10">
            <text:p>73872</text:p>
          </table:table-cell>
          <table:table-cell office:value-type="float" office:value="-1.5981503202430636" table:style-name="c12">
            <text:p>-1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10:00</text:p>
          </table:table-cell>
          <table:table-cell office:value-type="float" office:value="69762.87400499999" table:style-name="c10">
            <text:p>69763</text:p>
          </table:table-cell>
          <table:table-cell office:value-type="string" table:style-name="c10">
            <text:p>2026-04-07 10:00</text:p>
          </table:table-cell>
          <table:table-cell office:value-type="float" office:value="69115.48497" table:style-name="c10">
            <text:p>69115</text:p>
          </table:table-cell>
          <table:table-cell office:value-type="float" office:value="-1.1260299989916067" table:style-name="c12">
            <text:p>-1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71549.85705" table:style-name="c10">
            <text:p>71550</text:p>
          </table:table-cell>
          <table:table-cell office:value-type="string" table:style-name="c10">
            <text:p>2026-04-08 23:00</text:p>
          </table:table-cell>
          <table:table-cell office:value-type="float" office:value="71029.30758" table:style-name="c10">
            <text:p>71029</text:p>
          </table:table-cell>
          <table:table-cell office:value-type="float" office:value="-0.9259795660939596" table:style-name="c12">
            <text:p>-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0:00</text:p>
          </table:table-cell>
          <table:table-cell office:value-type="float" office:value="71570.457345" table:style-name="c10">
            <text:p>71570</text:p>
          </table:table-cell>
          <table:table-cell office:value-type="string" table:style-name="c10">
            <text:p>2026-04-10 10:00</text:p>
          </table:table-cell>
          <table:table-cell office:value-type="float" office:value="71751.51629500001" table:style-name="c10">
            <text:p>71752</text:p>
          </table:table-cell>
          <table:table-cell office:value-type="float" office:value="0.052574302753050084" table:style-name="c11">
            <text:p>+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5:00</text:p>
          </table:table-cell>
          <table:table-cell office:value-type="float" office:value="72945.45449999999" table:style-name="c10">
            <text:p>72945</text:p>
          </table:table-cell>
          <table:table-cell office:value-type="string" table:style-name="c10">
            <text:p>2026-04-11 15:00</text:p>
          </table:table-cell>
          <table:table-cell office:value-type="float" office:value="72668.30767000001" table:style-name="c10">
            <text:p>72668</text:p>
          </table:table-cell>
          <table:table-cell office:value-type="float" office:value="-0.57907758602328" table:style-name="c12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9:00</text:p>
          </table:table-cell>
          <table:table-cell office:value-type="float" office:value="73584.67395" table:style-name="c10">
            <text:p>73585</text:p>
          </table:table-cell>
          <table:table-cell office:value-type="string" table:style-name="c10">
            <text:p>2026-04-12 19:00</text:p>
          </table:table-cell>
          <table:table-cell office:value-type="float" office:value="71102.081175" table:style-name="c10">
            <text:p>71102</text:p>
          </table:table-cell>
          <table:table-cell office:value-type="float" office:value="-3.5669463413703473" table:style-name="c12">
            <text:p>-3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14:00</text:p>
          </table:table-cell>
          <table:table-cell office:value-type="float" office:value="71698.48132499999" table:style-name="c10">
            <text:p>71698</text:p>
          </table:table-cell>
          <table:table-cell office:value-type="string" table:style-name="c10">
            <text:p>2026-04-14 14:00</text:p>
          </table:table-cell>
          <table:table-cell office:value-type="float" office:value="75488.17703" table:style-name="c10">
            <text:p>75488</text:p>
          </table:table-cell>
          <table:table-cell office:value-type="float" office:value="5.075135165866151" table:style-name="c11">
            <text:p>+5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4:00</text:p>
          </table:table-cell>
          <table:table-cell office:value-type="float" office:value="77378.780055" table:style-name="c10">
            <text:p>77379</text:p>
          </table:table-cell>
          <table:table-cell office:value-type="string" table:style-name="c10">
            <text:p>2026-04-18 14:00</text:p>
          </table:table-cell>
          <table:table-cell office:value-type="float" office:value="76084.81856000001" table:style-name="c10">
            <text:p>76085</text:p>
          </table:table-cell>
          <table:table-cell office:value-type="float" office:value="-1.868800524218106" table:style-name="c12">
            <text:p>-1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13:00</text:p>
          </table:table-cell>
          <table:table-cell office:value-type="float" office:value="75327.554955" table:style-name="c10">
            <text:p>75328</text:p>
          </table:table-cell>
          <table:table-cell office:value-type="string" table:style-name="c10">
            <text:p>2026-04-21 13:00</text:p>
          </table:table-cell>
          <table:table-cell office:value-type="float" office:value="75971.45527" table:style-name="c10">
            <text:p>75971</text:p>
          </table:table-cell>
          <table:table-cell office:value-type="float" office:value="0.6531917519547958" table:style-name="c11">
            <text:p>+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6:00</text:p>
          </table:table-cell>
          <table:table-cell office:value-type="float" office:value="78033.91746" table:style-name="c10">
            <text:p>78034</text:p>
          </table:table-cell>
          <table:table-cell office:value-type="string" table:style-name="c10">
            <text:p>2026-04-23 06:00</text:p>
          </table:table-cell>
          <table:table-cell office:value-type="float" office:value="77994.98300000001" table:style-name="c10">
            <text:p>77995</text:p>
          </table:table-cell>
          <table:table-cell office:value-type="float" office:value="-0.2496945397068684" table:style-name="c12">
            <text:p>-0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00:00</text:p>
          </table:table-cell>
          <table:table-cell office:value-type="float" office:value="78296.60874" table:style-name="c10">
            <text:p>78297</text:p>
          </table:table-cell>
          <table:table-cell office:value-type="string" table:style-name="c10">
            <text:p>2026-04-25 00:00</text:p>
          </table:table-cell>
          <table:table-cell office:value-type="float" office:value="77398.411435" table:style-name="c10">
            <text:p>77398</text:p>
          </table:table-cell>
          <table:table-cell office:value-type="float" office:value="-1.344779482027092" table:style-name="c12">
            <text:p>-1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1:00</text:p>
          </table:table-cell>
          <table:table-cell office:value-type="float" office:value="79348.65449999999" table:style-name="c10">
            <text:p>79349</text:p>
          </table:table-cell>
          <table:table-cell office:value-type="string" table:style-name="c10">
            <text:p>2026-04-28 01:00</text:p>
          </table:table-cell>
          <table:table-cell office:value-type="float" office:value="77340.93019" table:style-name="c10">
            <text:p>77341</text:p>
          </table:table-cell>
          <table:table-cell office:value-type="float" office:value="-2.7250982931913414" table:style-name="c12">
            <text:p>-2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5:00</text:p>
          </table:table-cell>
          <table:table-cell office:value-type="float" office:value="77308.39487999999" table:style-name="c10">
            <text:p>77308</text:p>
          </table:table-cell>
          <table:table-cell office:value-type="string" table:style-name="c10">
            <text:p>2026-04-30 00:00</text:p>
          </table:table-cell>
          <table:table-cell office:value-type="float" office:value="75742.11" table:style-name="c10">
            <text:p>75742</text:p>
          </table:table-cell>
          <table:table-cell office:value-type="float" office:value="-2.2218717133582366" table:style-name="c12">
            <text:p>-2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3:00</text:p>
          </table:table-cell>
          <table:table-cell office:value-type="float" office:value="77934.958005" table:style-name="c10">
            <text:p>77935</text:p>
          </table:table-cell>
          <table:table-cell office:value-type="string" table:style-name="c10">
            <text:p>2026-05-02 13:00</text:p>
          </table:table-cell>
          <table:table-cell office:value-type="float" office:value="78172.13438" table:style-name="c10">
            <text:p>78172</text:p>
          </table:table-cell>
          <table:table-cell office:value-type="float" office:value="0.10381769676348629" table:style-name="c11">
            <text:p>+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3:00</text:p>
          </table:table-cell>
          <table:table-cell office:value-type="float" office:value="78872.39648999998" table:style-name="c10">
            <text:p>78872</text:p>
          </table:table-cell>
          <table:table-cell office:value-type="string" table:style-name="c10">
            <text:p>2026-05-03 23:00</text:p>
          </table:table-cell>
          <table:table-cell office:value-type="float" office:value="79137.701355" table:style-name="c10">
            <text:p>79138</text:p>
          </table:table-cell>
          <table:table-cell office:value-type="float" office:value="0.1357998549022854" table:style-name="c11">
            <text:p>+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79809.31471499999" table:style-name="c10">
            <text:p>79809</text:p>
          </table:table-cell>
          <table:table-cell office:value-type="string" table:style-name="c10">
            <text:p>2026-05-05 02:00</text:p>
          </table:table-cell>
          <table:table-cell office:value-type="float" office:value="80311.81400500001" table:style-name="c10">
            <text:p>80312</text:p>
          </table:table-cell>
          <table:table-cell office:value-type="float" office:value="0.4284662448551968" table:style-name="c11">
            <text:p>+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3:00</text:p>
          </table:table-cell>
          <table:table-cell office:value-type="float" office:value="80594.967345" table:style-name="c10">
            <text:p>80595</text:p>
          </table:table-cell>
          <table:table-cell office:value-type="string" table:style-name="c10">
            <text:p>2026-05-06 03:00</text:p>
          </table:table-cell>
          <table:table-cell office:value-type="float" office:value="81322.85823" table:style-name="c10">
            <text:p>81323</text:p>
          </table:table-cell>
          <table:table-cell office:value-type="float" office:value="0.7014414299322924" table:style-name="c11">
            <text:p>+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1:00</text:p>
          </table:table-cell>
          <table:table-cell office:value-type="float" office:value="82331.175015" table:style-name="c10">
            <text:p>82331</text:p>
          </table:table-cell>
          <table:table-cell office:value-type="string" table:style-name="c10">
            <text:p>2026-05-07 11:00</text:p>
          </table:table-cell>
          <table:table-cell office:value-type="float" office:value="80810.33462" table:style-name="c10">
            <text:p>80810</text:p>
          </table:table-cell>
          <table:table-cell office:value-type="float" office:value="-2.0434303938925535" table:style-name="c12">
            <text:p>-2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81458.71900499999" table:style-name="c10">
            <text:p>81459</text:p>
          </table:table-cell>
          <table:table-cell office:value-type="string" table:style-name="c10">
            <text:p>2026-05-11 16:00</text:p>
          </table:table-cell>
          <table:table-cell office:value-type="float" office:value="81405.167055" table:style-name="c10">
            <text:p>81405</text:p>
          </table:table-cell>
          <table:table-cell office:value-type="float" office:value="-0.2655097963542241" table:style-name="c12">
            <text:p>-0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5:00</text:p>
          </table:table-cell>
          <table:table-cell office:value-type="float" office:value="81005.32242" table:style-name="c10">
            <text:p>81005</text:p>
          </table:table-cell>
          <table:table-cell office:value-type="string" table:style-name="c10">
            <text:p>2026-05-15 15:00</text:p>
          </table:table-cell>
          <table:table-cell office:value-type="float" office:value="79110.78482" table:style-name="c10">
            <text:p>79111</text:p>
          </table:table-cell>
          <table:table-cell office:value-type="float" office:value="-2.5340064054215627" table:style-name="c12">
            <text:p>-2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8 21:00</text:p>
          </table:table-cell>
          <table:table-cell office:value-type="float" office:value="0.089754855" table:style-name="c1">
            <text:p>0.089755</text:p>
          </table:table-cell>
          <table:table-cell office:value-type="string" table:style-name="c1">
            <text:p>2026-03-09 21:00</text:p>
          </table:table-cell>
          <table:table-cell office:value-type="float" office:value="0.091204375" table:style-name="c1">
            <text:p>0.091204</text:p>
          </table:table-cell>
          <table:table-cell office:value-type="float" office:value="1.4118483667262538" table:style-name="c13">
            <text:p>+1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6:00</text:p>
          </table:table-cell>
          <table:table-cell office:value-type="float" office:value="0.09184590000000001" table:style-name="c1">
            <text:p>0.091846</text:p>
          </table:table-cell>
          <table:table-cell office:value-type="string" table:style-name="c1">
            <text:p>2026-03-11 06:00</text:p>
          </table:table-cell>
          <table:table-cell office:value-type="float" office:value="0.09162416500000001" table:style-name="c1">
            <text:p>0.091624</text:p>
          </table:table-cell>
          <table:table-cell office:value-type="float" office:value="-0.4408380840462134" table:style-name="c14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2:00</text:p>
          </table:table-cell>
          <table:table-cell office:value-type="float" office:value="0.100080015" table:style-name="c1">
            <text:p>0.10008</text:p>
          </table:table-cell>
          <table:table-cell office:value-type="string" table:style-name="c1">
            <text:p>2026-03-14 12:00</text:p>
          </table:table-cell>
          <table:table-cell office:value-type="float" office:value="0.095222365" table:style-name="c1">
            <text:p>0.095222</text:p>
          </table:table-cell>
          <table:table-cell office:value-type="float" office:value="-5.043963580176314" table:style-name="c14">
            <text:p>-5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3:00</text:p>
          </table:table-cell>
          <table:table-cell office:value-type="float" office:value="0.09740868" table:style-name="c1">
            <text:p>0.097409</text:p>
          </table:table-cell>
          <table:table-cell office:value-type="string" table:style-name="c1">
            <text:p>2026-03-16 23:00</text:p>
          </table:table-cell>
          <table:table-cell office:value-type="float" office:value="0.103198375" table:style-name="c1">
            <text:p>0.1032</text:p>
          </table:table-cell>
          <table:table-cell office:value-type="float" office:value="5.731934205837685" table:style-name="c13">
            <text:p>+5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00</text:p>
          </table:table-cell>
          <table:table-cell office:value-type="float" office:value="0.10309152" table:style-name="c1">
            <text:p>0.10309</text:p>
          </table:table-cell>
          <table:table-cell office:value-type="string" table:style-name="c1">
            <text:p>2026-03-18 00:00</text:p>
          </table:table-cell>
          <table:table-cell office:value-type="float" office:value="0.100099925" table:style-name="c1">
            <text:p>0.1001</text:p>
          </table:table-cell>
          <table:table-cell office:value-type="float" office:value="-3.0959818519263327" table:style-name="c14">
            <text:p>-3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3:00</text:p>
          </table:table-cell>
          <table:table-cell office:value-type="float" office:value="0.10095045" table:style-name="c1">
            <text:p>0.10095</text:p>
          </table:table-cell>
          <table:table-cell office:value-type="string" table:style-name="c1">
            <text:p>2026-03-19 03:00</text:p>
          </table:table-cell>
          <table:table-cell office:value-type="float" office:value="0.09452271500000001" table:style-name="c1">
            <text:p>0.094523</text:p>
          </table:table-cell>
          <table:table-cell office:value-type="float" office:value="-6.554389710283603" table:style-name="c14">
            <text:p>-6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20:00</text:p>
          </table:table-cell>
          <table:table-cell office:value-type="float" office:value="0.09508752" table:style-name="c1">
            <text:p>0.095088</text:p>
          </table:table-cell>
          <table:table-cell office:value-type="string" table:style-name="c1">
            <text:p>2026-04-11 20:00</text:p>
          </table:table-cell>
          <table:table-cell office:value-type="float" office:value="0.09465265" table:style-name="c1">
            <text:p>0.094653</text:p>
          </table:table-cell>
          <table:table-cell office:value-type="float" office:value="-0.6563223516082739" table:style-name="c14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0.09415705499999999" table:style-name="c1">
            <text:p>0.094157</text:p>
          </table:table-cell>
          <table:table-cell office:value-type="string" table:style-name="c1">
            <text:p>2026-04-15 00:00</text:p>
          </table:table-cell>
          <table:table-cell office:value-type="float" office:value="0.092923515" table:style-name="c1">
            <text:p>0.092924</text:p>
          </table:table-cell>
          <table:table-cell office:value-type="float" office:value="-1.5073688386759598" table:style-name="c14">
            <text:p>-1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0:00</text:p>
          </table:table-cell>
          <table:table-cell office:value-type="float" office:value="0.09611803499999999" table:style-name="c1">
            <text:p>0.096118</text:p>
          </table:table-cell>
          <table:table-cell office:value-type="string" table:style-name="c1">
            <text:p>2026-04-16 20:00</text:p>
          </table:table-cell>
          <table:table-cell office:value-type="float" office:value="0.09938028500000001" table:style-name="c1">
            <text:p>0.09938</text:p>
          </table:table-cell>
          <table:table-cell office:value-type="float" office:value="3.1873194351975886" table:style-name="c13">
            <text:p>+3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0.10017005999999999" table:style-name="c1">
            <text:p>0.10017</text:p>
          </table:table-cell>
          <table:table-cell office:value-type="string" table:style-name="c1">
            <text:p>2026-04-18 13:00</text:p>
          </table:table-cell>
          <table:table-cell office:value-type="float" office:value="0.09606194500000001" table:style-name="c1">
            <text:p>0.096062</text:p>
          </table:table-cell>
          <table:table-cell office:value-type="float" office:value="-4.29284242023511" table:style-name="c14">
            <text:p>-4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14:00</text:p>
          </table:table-cell>
          <table:table-cell office:value-type="float" office:value="0.095397675" table:style-name="c1">
            <text:p>0.095398</text:p>
          </table:table-cell>
          <table:table-cell office:value-type="string" table:style-name="c1">
            <text:p>2026-04-20 14:00</text:p>
          </table:table-cell>
          <table:table-cell office:value-type="float" office:value="0.09483256000000001" table:style-name="c1">
            <text:p>0.094833</text:p>
          </table:table-cell>
          <table:table-cell office:value-type="float" office:value="-0.7910940045865789" table:style-name="c14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0.096598275" table:style-name="c1">
            <text:p>0.096598</text:p>
          </table:table-cell>
          <table:table-cell office:value-type="string" table:style-name="c1">
            <text:p>2026-04-23 03:00</text:p>
          </table:table-cell>
          <table:table-cell office:value-type="float" office:value="0.09583206000000001" table:style-name="c1">
            <text:p>0.095832</text:p>
          </table:table-cell>
          <table:table-cell office:value-type="float" office:value="-0.9915117924621186" table:style-name="c14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7:00</text:p>
          </table:table-cell>
          <table:table-cell office:value-type="float" office:value="0.10222108499999999" table:style-name="c1">
            <text:p>0.10222</text:p>
          </table:table-cell>
          <table:table-cell office:value-type="string" table:style-name="c1">
            <text:p>2026-04-30 07:00</text:p>
          </table:table-cell>
          <table:table-cell office:value-type="float" office:value="0.10620687" table:style-name="c1">
            <text:p>0.10621</text:p>
          </table:table-cell>
          <table:table-cell office:value-type="float" office:value="3.6914864158113847" table:style-name="c13">
            <text:p>+3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8:00</text:p>
          </table:table-cell>
          <table:table-cell office:value-type="float" office:value="0.10706350499999999" table:style-name="c1">
            <text:p>0.10706</text:p>
          </table:table-cell>
          <table:table-cell office:value-type="string" table:style-name="c1">
            <text:p>2026-05-01 08:00</text:p>
          </table:table-cell>
          <table:table-cell office:value-type="float" office:value="0.10819587500000001" table:style-name="c1">
            <text:p>0.1082</text:p>
          </table:table-cell>
          <table:table-cell office:value-type="float" office:value="0.8556477259688222" table:style-name="c13">
            <text:p>+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00</text:p>
          </table:table-cell>
          <table:table-cell office:value-type="float" office:value="0.10981487999999999" table:style-name="c1">
            <text:p>0.10981</text:p>
          </table:table-cell>
          <table:table-cell office:value-type="string" table:style-name="c1">
            <text:p>2026-05-02 14:00</text:p>
          </table:table-cell>
          <table:table-cell office:value-type="float" office:value="0.10854570000000001" table:style-name="c1">
            <text:p>0.10855</text:p>
          </table:table-cell>
          <table:table-cell office:value-type="float" office:value="-1.3533346795079004" table:style-name="c14">
            <text:p>-1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00</text:p>
          </table:table-cell>
          <table:table-cell office:value-type="float" office:value="0.10855424999999999" table:style-name="c1">
            <text:p>0.10855</text:p>
          </table:table-cell>
          <table:table-cell office:value-type="string" table:style-name="c1">
            <text:p>2026-05-09 19:00</text:p>
          </table:table-cell>
          <table:table-cell office:value-type="float" office:value="0.109575185" table:style-name="c1">
            <text:p>0.10958</text:p>
          </table:table-cell>
          <table:table-cell office:value-type="float" office:value="0.7387036483463616" table:style-name="c13">
            <text:p>+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21:00</text:p>
          </table:table-cell>
          <table:table-cell office:value-type="float" office:value="0.11024509499999999" table:style-name="c1">
            <text:p>0.11025</text:p>
          </table:table-cell>
          <table:table-cell office:value-type="string" table:style-name="c1">
            <text:p>2026-05-13 21:00</text:p>
          </table:table-cell>
          <table:table-cell office:value-type="float" office:value="0.113373285" table:style-name="c1">
            <text:p>0.11337</text:p>
          </table:table-cell>
          <table:table-cell office:value-type="float" office:value="2.631914647345557" table:style-name="c13">
            <text:p>+2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0.11504749499999999" table:style-name="c1">
            <text:p>0.11505</text:p>
          </table:table-cell>
          <table:table-cell office:value-type="string" table:style-name="c1">
            <text:p>2026-05-15 15:00</text:p>
          </table:table-cell>
          <table:table-cell office:value-type="float" office:value="0.11178408000000001" table:style-name="c1">
            <text:p>0.11178</text:p>
          </table:table-cell>
          <table:table-cell office:value-type="float" office:value="-3.0308103413463794" table:style-name="c14">
            <text:p>-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7 10:00</text:p>
          </table:table-cell>
          <table:table-cell office:value-type="float" office:value="0.11113553999999999" table:style-name="c1">
            <text:p>0.11114</text:p>
          </table:table-cell>
          <table:table-cell office:value-type="string" table:style-name="c1">
            <text:p>2026-05-18 04:00</text:p>
          </table:table-cell>
          <table:table-cell office:value-type="float" office:value="0.10653670500000001" table:style-name="c1">
            <text:p>0.10654</text:p>
          </table:table-cell>
          <table:table-cell office:value-type="float" office:value="-4.329669764770994" table:style-name="c14">
            <text:p>-4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3:00</text:p>
          </table:table-cell>
          <table:table-cell office:value-type="float" office:value="1.4797395" table:style-name="c10">
            <text:p>1.4797</text:p>
          </table:table-cell>
          <table:table-cell office:value-type="string" table:style-name="c10">
            <text:p>2026-03-09 13:00</text:p>
          </table:table-cell>
          <table:table-cell office:value-type="float" office:value="1.481259" table:style-name="c10">
            <text:p>1.4813</text:p>
          </table:table-cell>
          <table:table-cell office:value-type="float" office:value="-0.09741827808205095" table:style-name="c12">
            <text:p>-0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3:00</text:p>
          </table:table-cell>
          <table:table-cell office:value-type="float" office:value="1.5197595" table:style-name="c10">
            <text:p>1.5198</text:p>
          </table:table-cell>
          <table:table-cell office:value-type="string" table:style-name="c10">
            <text:p>2026-03-11 03:00</text:p>
          </table:table-cell>
          <table:table-cell office:value-type="float" office:value="1.4872560000000001" table:style-name="c10">
            <text:p>1.4873</text:p>
          </table:table-cell>
          <table:table-cell office:value-type="float" office:value="-2.3343512407061784" table:style-name="c12">
            <text:p>-2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00</text:p>
          </table:table-cell>
          <table:table-cell office:value-type="float" office:value="1.5267629999999999" table:style-name="c10">
            <text:p>1.5268</text:p>
          </table:table-cell>
          <table:table-cell office:value-type="string" table:style-name="c10">
            <text:p>2026-03-12 13:00</text:p>
          </table:table-cell>
          <table:table-cell office:value-type="float" office:value="1.5062465" table:style-name="c10">
            <text:p>1.5062</text:p>
          </table:table-cell>
          <table:table-cell office:value-type="float" office:value="-1.5410045143548712" table:style-name="c12">
            <text:p>-1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1:00</text:p>
          </table:table-cell>
          <table:table-cell office:value-type="float" office:value="1.630815" table:style-name="c10">
            <text:p>1.6308</text:p>
          </table:table-cell>
          <table:table-cell office:value-type="string" table:style-name="c10">
            <text:p>2026-03-19 01:00</text:p>
          </table:table-cell>
          <table:table-cell office:value-type="float" office:value="1.5622185" table:style-name="c10">
            <text:p>1.5622</text:p>
          </table:table-cell>
          <table:table-cell office:value-type="float" office:value="-4.397762761655988" table:style-name="c12">
            <text:p>-4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07:00</text:p>
          </table:table-cell>
          <table:table-cell office:value-type="float" office:value="1.5417705" table:style-name="c10">
            <text:p>1.5418</text:p>
          </table:table-cell>
          <table:table-cell office:value-type="string" table:style-name="c10">
            <text:p>2026-03-21 07:00</text:p>
          </table:table-cell>
          <table:table-cell office:value-type="float" office:value="1.5092450000000002" table:style-name="c10">
            <text:p>1.5092</text:p>
          </table:table-cell>
          <table:table-cell office:value-type="float" office:value="-2.3053029458664387" table:style-name="c12">
            <text:p>-2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6:00</text:p>
          </table:table-cell>
          <table:table-cell office:value-type="float" office:value="1.282641" table:style-name="c10">
            <text:p>1.2826</text:p>
          </table:table-cell>
          <table:table-cell office:value-type="string" table:style-name="c10">
            <text:p>2026-04-10 16:00</text:p>
          </table:table-cell>
          <table:table-cell office:value-type="float" office:value="1.3103445" table:style-name="c10">
            <text:p>1.3103</text:p>
          </table:table-cell>
          <table:table-cell office:value-type="float" office:value="1.9556618995104635" table:style-name="c11">
            <text:p>+2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4:00</text:p>
          </table:table-cell>
          <table:table-cell office:value-type="float" office:value="1.3456724999999998" table:style-name="c10">
            <text:p>1.3457</text:p>
          </table:table-cell>
          <table:table-cell office:value-type="string" table:style-name="c10">
            <text:p>2026-04-18 14:00</text:p>
          </table:table-cell>
          <table:table-cell office:value-type="float" office:value="1.289355" table:style-name="c10">
            <text:p>1.2894</text:p>
          </table:table-cell>
          <table:table-cell office:value-type="float" office:value="-4.376616200821514" table:style-name="c12">
            <text:p>-4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7:00</text:p>
          </table:table-cell>
          <table:table-cell office:value-type="float" office:value="1.310655" table:style-name="c10">
            <text:p>1.3107</text:p>
          </table:table-cell>
          <table:table-cell office:value-type="string" table:style-name="c10">
            <text:p>2026-04-23 07:00</text:p>
          </table:table-cell>
          <table:table-cell office:value-type="float" office:value="1.2603695" table:style-name="c10">
            <text:p>1.2604</text:p>
          </table:table-cell>
          <table:table-cell office:value-type="float" office:value="-4.028899949300158" table:style-name="c12">
            <text:p>-4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2:00</text:p>
          </table:table-cell>
          <table:table-cell office:value-type="float" office:value="1.296648" table:style-name="c10">
            <text:p>1.2966</text:p>
          </table:table-cell>
          <table:table-cell office:value-type="string" table:style-name="c10">
            <text:p>2026-05-07 02:00</text:p>
          </table:table-cell>
          <table:table-cell office:value-type="float" office:value="1.2963515" table:style-name="c10">
            <text:p>1.2964</text:p>
          </table:table-cell>
          <table:table-cell office:value-type="float" office:value="-0.2227209426536536" table:style-name="c12">
            <text:p>-0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6:00</text:p>
          </table:table-cell>
          <table:table-cell office:value-type="float" office:value="1.3176584999999998" table:style-name="c10">
            <text:p>1.3177</text:p>
          </table:table-cell>
          <table:table-cell office:value-type="string" table:style-name="c10">
            <text:p>2026-05-08 06:00</text:p>
          </table:table-cell>
          <table:table-cell office:value-type="float" office:value="1.3123435" table:style-name="c10">
            <text:p>1.3123</text:p>
          </table:table-cell>
          <table:table-cell office:value-type="float" office:value="-0.6024607025644113" table:style-name="c12">
            <text:p>-0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9:00</text:p>
          </table:table-cell>
          <table:table-cell office:value-type="float" office:value="1.4097045" table:style-name="c10">
            <text:p>1.4097</text:p>
          </table:table-cell>
          <table:table-cell office:value-type="string" table:style-name="c10">
            <text:p>2026-05-11 19:00</text:p>
          </table:table-cell>
          <table:table-cell office:value-type="float" office:value="1.3693150000000003" table:style-name="c10">
            <text:p>1.3693</text:p>
          </table:table-cell>
          <table:table-cell office:value-type="float" office:value="-3.0592766558523166" table:style-name="c12">
            <text:p>-3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2:00</text:p>
          </table:table-cell>
          <table:table-cell office:value-type="float" office:value="1.3606800000000001" table:style-name="c10">
            <text:p>1.3607</text:p>
          </table:table-cell>
          <table:table-cell office:value-type="string" table:style-name="c10">
            <text:p>2026-05-14 02:00</text:p>
          </table:table-cell>
          <table:table-cell office:value-type="float" office:value="1.333333" table:style-name="c10">
            <text:p>1.3333</text:p>
          </table:table-cell>
          <table:table-cell office:value-type="float" office:value="-2.205686323529421" table:style-name="c12">
            <text:p>-2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5:00</text:p>
          </table:table-cell>
          <table:table-cell office:value-type="float" office:value="1.3716855" table:style-name="c10">
            <text:p>1.3717</text:p>
          </table:table-cell>
          <table:table-cell office:value-type="string" table:style-name="c10">
            <text:p>2026-05-15 15:00</text:p>
          </table:table-cell>
          <table:table-cell office:value-type="float" office:value="1.3073460000000001" table:style-name="c10">
            <text:p>1.3073</text:p>
          </table:table-cell>
          <table:table-cell office:value-type="float" office:value="-4.881066735341289" table:style-name="c12">
            <text:p>-4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4:00</text:p>
          </table:table-cell>
          <table:table-cell office:value-type="float" office:value="8.114054999999999" table:style-name="c1">
            <text:p>8.1141</text:p>
          </table:table-cell>
          <table:table-cell office:value-type="string" table:style-name="c1">
            <text:p>2026-03-10 04:00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0.9297005738191588" table:style-name="c13">
            <text:p>+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00</text:p>
          </table:table-cell>
          <table:table-cell office:value-type="float" office:value="8.314155" table:style-name="c1">
            <text:p>8.3142</text:p>
          </table:table-cell>
          <table:table-cell office:value-type="string" table:style-name="c1">
            <text:p>2026-03-11 09:00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1.4994137600874424" table:style-name="c14">
            <text:p>-1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8.36418" table:style-name="c1">
            <text:p>8.3642</text:p>
          </table:table-cell>
          <table:table-cell office:value-type="string" table:style-name="c1">
            <text:p>2026-03-12 14:00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2.088532098842899" table:style-name="c14">
            <text:p>-2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00</text:p>
          </table:table-cell>
          <table:table-cell office:value-type="float" office:value="8.66433" table:style-name="c1">
            <text:p>8.6643</text:p>
          </table:table-cell>
          <table:table-cell office:value-type="string" table:style-name="c1">
            <text:p>2026-03-17 04:00</text:p>
          </table:table-cell>
          <table:table-cell office:value-type="float" office:value="8.925535" table:style-name="c1">
            <text:p>8.9255</text:p>
          </table:table-cell>
          <table:table-cell office:value-type="float" office:value="2.8087902415420585" table:style-name="c13">
            <text:p>+2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9 04:00</text:p>
          </table:table-cell>
          <table:table-cell office:value-type="float" office:value="8.56428" table:style-name="c1">
            <text:p>8.5643</text:p>
          </table:table-cell>
          <table:table-cell office:value-type="string" table:style-name="c1">
            <text:p>2026-03-20 04:00</text:p>
          </table:table-cell>
          <table:table-cell office:value-type="float" office:value="8.415790000000001" table:style-name="c1">
            <text:p>8.4158</text:p>
          </table:table-cell>
          <table:table-cell office:value-type="float" office:value="-1.9302634221440629" table:style-name="c14">
            <text:p>-1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1:00</text:p>
          </table:table-cell>
          <table:table-cell office:value-type="float" office:value="8.734365" table:style-name="c1">
            <text:p>8.7344</text:p>
          </table:table-cell>
          <table:table-cell office:value-type="string" table:style-name="c1">
            <text:p>2026-03-26 01:00</text:p>
          </table:table-cell>
          <table:table-cell office:value-type="float" office:value="8.665665" table:style-name="c1">
            <text:p>8.6657</text:p>
          </table:table-cell>
          <table:table-cell office:value-type="float" office:value="-0.9848759965378151" table:style-name="c14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1:00</text:p>
          </table:table-cell>
          <table:table-cell office:value-type="float" office:value="8.654325" table:style-name="c1">
            <text:p>8.6543</text:p>
          </table:table-cell>
          <table:table-cell office:value-type="string" table:style-name="c1">
            <text:p>2026-04-06 21:00</text:p>
          </table:table-cell>
          <table:table-cell office:value-type="float" office:value="8.53573" table:style-name="c1">
            <text:p>8.5357</text:p>
          </table:table-cell>
          <table:table-cell office:value-type="float" office:value="-1.567515944571074" table:style-name="c14">
            <text:p>-1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7:00</text:p>
          </table:table-cell>
          <table:table-cell office:value-type="float" office:value="8.38419" table:style-name="c1">
            <text:p>8.3842</text:p>
          </table:table-cell>
          <table:table-cell office:value-type="string" table:style-name="c1">
            <text:p>2026-04-08 17:00</text:p>
          </table:table-cell>
          <table:table-cell office:value-type="float" office:value="8.55572" table:style-name="c1">
            <text:p>8.5557</text:p>
          </table:table-cell>
          <table:table-cell office:value-type="float" office:value="1.841884734482413" table:style-name="c13">
            <text:p>+1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3:00</text:p>
          </table:table-cell>
          <table:table-cell office:value-type="float" office:value="8.514254999999999" table:style-name="c1">
            <text:p>8.5143</text:p>
          </table:table-cell>
          <table:table-cell office:value-type="string" table:style-name="c1">
            <text:p>2026-04-10 23:00</text:p>
          </table:table-cell>
          <table:table-cell office:value-type="float" office:value="8.505745000000001" table:style-name="c1">
            <text:p>8.5057</text:p>
          </table:table-cell>
          <table:table-cell office:value-type="float" office:value="-0.2996502248875266" table:style-name="c14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00</text:p>
          </table:table-cell>
          <table:table-cell office:value-type="float" office:value="8.514254999999999" table:style-name="c1">
            <text:p>8.5143</text:p>
          </table:table-cell>
          <table:table-cell office:value-type="string" table:style-name="c1">
            <text:p>2026-04-12 12:00</text:p>
          </table:table-cell>
          <table:table-cell office:value-type="float" office:value="8.185905" table:style-name="c1">
            <text:p>8.1859</text:p>
          </table:table-cell>
          <table:table-cell office:value-type="float" office:value="-4.0486645525063425" table:style-name="c14">
            <text:p>-4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00</text:p>
          </table:table-cell>
          <table:table-cell office:value-type="float" office:value="8.574285" table:style-name="c1">
            <text:p>8.5743</text:p>
          </table:table-cell>
          <table:table-cell office:value-type="string" table:style-name="c1">
            <text:p>2026-04-17 13:00</text:p>
          </table:table-cell>
          <table:table-cell office:value-type="float" office:value="8.705645" table:style-name="c1">
            <text:p>8.7056</text:p>
          </table:table-cell>
          <table:table-cell office:value-type="float" office:value="1.3290602731889534" table:style-name="c13">
            <text:p>+1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4:00</text:p>
          </table:table-cell>
          <table:table-cell office:value-type="float" office:value="8.88444" table:style-name="c1">
            <text:p>8.8844</text:p>
          </table:table-cell>
          <table:table-cell office:value-type="string" table:style-name="c1">
            <text:p>2026-04-18 14:00</text:p>
          </table:table-cell>
          <table:table-cell office:value-type="float" office:value="8.57571" table:style-name="c1">
            <text:p>8.5757</text:p>
          </table:table-cell>
          <table:table-cell office:value-type="float" office:value="-3.6679052848575644" table:style-name="c14">
            <text:p>-3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00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4-25 00:00</text:p>
          </table:table-cell>
          <table:table-cell office:value-type="float" office:value="8.525735" table:style-name="c1">
            <text:p>8.5257</text:p>
          </table:table-cell>
          <table:table-cell office:value-type="float" office:value="-0.1826310350106719" table:style-name="c14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6:00</text:p>
          </table:table-cell>
          <table:table-cell office:value-type="float" office:value="8.46423" table:style-name="c1">
            <text:p>8.4642</text:p>
          </table:table-cell>
          <table:table-cell office:value-type="string" table:style-name="c1">
            <text:p>2026-04-27 06:00</text:p>
          </table:table-cell>
          <table:table-cell office:value-type="float" office:value="8.405795000000001" table:style-name="c1">
            <text:p>8.4058</text:p>
          </table:table-cell>
          <table:table-cell office:value-type="float" office:value="-0.8888957909343076" table:style-name="c14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8.76438" table:style-name="c1">
            <text:p>8.7644</text:p>
          </table:table-cell>
          <table:table-cell office:value-type="string" table:style-name="c1">
            <text:p>2026-05-05 15:00</text:p>
          </table:table-cell>
          <table:table-cell office:value-type="float" office:value="8.905545" table:style-name="c1">
            <text:p>8.9055</text:p>
          </table:table-cell>
          <table:table-cell office:value-type="float" office:value="1.4075475452342445" table:style-name="c13">
            <text:p>+1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9.02451" table:style-name="c1">
            <text:p>9.0245</text:p>
          </table:table-cell>
          <table:table-cell office:value-type="string" table:style-name="c1">
            <text:p>2026-05-06 22:00</text:p>
          </table:table-cell>
          <table:table-cell office:value-type="float" office:value="9.365314999999999" table:style-name="c1">
            <text:p>9.3653</text:p>
          </table:table-cell>
          <table:table-cell office:value-type="float" office:value="3.568988624479341" table:style-name="c13">
            <text:p>+3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0:00</text:p>
          </table:table-cell>
          <table:table-cell office:value-type="float" office:value="9.50475" table:style-name="c1">
            <text:p>9.5047</text:p>
          </table:table-cell>
          <table:table-cell office:value-type="string" table:style-name="c1">
            <text:p>2026-05-09 10:00</text:p>
          </table:table-cell>
          <table:table-cell office:value-type="float" office:value="9.61519" table:style-name="c1">
            <text:p>9.6152</text:p>
          </table:table-cell>
          <table:table-cell office:value-type="float" office:value="0.9597226143770232" table:style-name="c13">
            <text:p>+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3:0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5-11 03:00</text:p>
          </table:table-cell>
          <table:table-cell office:value-type="float" office:value="9.805095000000001" table:style-name="c1">
            <text:p>9.8051</text:p>
          </table:table-cell>
          <table:table-cell office:value-type="float" office:value="1.4585509640926642" table:style-name="c13">
            <text:p>+1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0:00</text:p>
          </table:table-cell>
          <table:table-cell office:value-type="float" office:value="9.58479" table:style-name="c1">
            <text:p>9.5848</text:p>
          </table:table-cell>
          <table:table-cell office:value-type="string" table:style-name="c1">
            <text:p>2026-05-14 10:00</text:p>
          </table:table-cell>
          <table:table-cell office:value-type="float" office:value="9.215390000000001" table:style-name="c1">
            <text:p>9.2154</text:p>
          </table:table-cell>
          <table:table-cell office:value-type="float" office:value="-4.046218692428305" table:style-name="c14">
            <text:p>-4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9.434714999999999" table:style-name="c1">
            <text:p>9.4347</text:p>
          </table:table-cell>
          <table:table-cell office:value-type="string" table:style-name="c1">
            <text:p>2026-05-15 15:00</text:p>
          </table:table-cell>
          <table:table-cell office:value-type="float" office:value="9.01549" table:style-name="c1">
            <text:p>9.0155</text:p>
          </table:table-cell>
          <table:table-cell office:value-type="float" office:value="-4.634448041196782" table:style-name="c14">
            <text:p>-4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23:00</text:p>
          </table:table-cell>
          <table:table-cell office:value-type="float" office:value="9.264629999999999" table:style-name="c1">
            <text:p>9.2646</text:p>
          </table:table-cell>
          <table:table-cell office:value-type="string" table:style-name="c1">
            <text:p>2026-05-16 04:00</text:p>
          </table:table-cell>
          <table:table-cell office:value-type="float" office:value="9.215390000000001" table:style-name="c1">
            <text:p>9.2154</text:p>
          </table:table-cell>
          <table:table-cell office:value-type="float" office:value="-0.7303212822314276" table:style-name="c14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20:00</text:p>
          </table:table-cell>
          <table:table-cell office:value-type="float" office:value="1965.892455" table:style-name="c10">
            <text:p>1965.9</text:p>
          </table:table-cell>
          <table:table-cell office:value-type="string" table:style-name="c10">
            <text:p>2026-03-09 20:00</text:p>
          </table:table-cell>
          <table:table-cell office:value-type="float" office:value="2032.8930450000003" table:style-name="c10">
            <text:p>2032.9</text:p>
          </table:table-cell>
          <table:table-cell office:value-type="float" office:value="3.2014384430325116" table:style-name="c11">
            <text:p>+3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5:00</text:p>
          </table:table-cell>
          <table:table-cell office:value-type="float" office:value="2046.712845" table:style-name="c10">
            <text:p>2046.7</text:p>
          </table:table-cell>
          <table:table-cell office:value-type="string" table:style-name="c10">
            <text:p>2026-03-11 05:00</text:p>
          </table:table-cell>
          <table:table-cell office:value-type="float" office:value="2038.0604600000001" table:style-name="c10">
            <text:p>2038.1</text:p>
          </table:table-cell>
          <table:table-cell office:value-type="float" office:value="-0.6218003610340306" table:style-name="c12">
            <text:p>-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4:00</text:p>
          </table:table-cell>
          <table:table-cell office:value-type="float" office:value="2186.622765" table:style-name="c10">
            <text:p>2186.6</text:p>
          </table:table-cell>
          <table:table-cell office:value-type="string" table:style-name="c10">
            <text:p>2026-03-14 14:00</text:p>
          </table:table-cell>
          <table:table-cell office:value-type="float" office:value="2077.46075" table:style-name="c10">
            <text:p>2077.5</text:p>
          </table:table-cell>
          <table:table-cell office:value-type="float" office:value="-5.182186010912126" table:style-name="c12">
            <text:p>-5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1:00</text:p>
          </table:table-cell>
          <table:table-cell office:value-type="float" office:value="2130.12453" table:style-name="c10">
            <text:p>2130.1</text:p>
          </table:table-cell>
          <table:table-cell office:value-type="string" table:style-name="c10">
            <text:p>2026-03-16 21:00</text:p>
          </table:table-cell>
          <table:table-cell office:value-type="float" office:value="2344.137345" table:style-name="c10">
            <text:p>2344.1</text:p>
          </table:table-cell>
          <table:table-cell office:value-type="float" office:value="9.826978728203507" table:style-name="c11">
            <text:p>+9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10:00</text:p>
          </table:table-cell>
          <table:table-cell office:value-type="float" office:value="2152.0454849999996" table:style-name="c10">
            <text:p>2152</text:p>
          </table:table-cell>
          <table:table-cell office:value-type="string" table:style-name="c10">
            <text:p>2026-04-07 10:00</text:p>
          </table:table-cell>
          <table:table-cell office:value-type="float" office:value="2127.1958700000005" table:style-name="c10">
            <text:p>2127.2</text:p>
          </table:table-cell>
          <table:table-cell office:value-type="float" office:value="-1.3522892404910891" table:style-name="c12">
            <text:p>-1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00</text:p>
          </table:table-cell>
          <table:table-cell office:value-type="float" office:value="2146.122525" table:style-name="c10">
            <text:p>2146.1</text:p>
          </table:table-cell>
          <table:table-cell office:value-type="string" table:style-name="c10">
            <text:p>2026-04-08 22:00</text:p>
          </table:table-cell>
          <table:table-cell office:value-type="float" office:value="2213.43273" table:style-name="c10">
            <text:p>2213.4</text:p>
          </table:table-cell>
          <table:table-cell office:value-type="float" office:value="2.9301939772860885" table:style-name="c11">
            <text:p>+2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5:00</text:p>
          </table:table-cell>
          <table:table-cell office:value-type="float" office:value="2243.8813800000003" table:style-name="c10">
            <text:p>2243.9</text:p>
          </table:table-cell>
          <table:table-cell office:value-type="string" table:style-name="c10">
            <text:p>2026-04-11 15:00</text:p>
          </table:table-cell>
          <table:table-cell office:value-type="float" office:value="2240.97895" table:style-name="c10">
            <text:p>2241</text:p>
          </table:table-cell>
          <table:table-cell office:value-type="float" office:value="-0.3289900699229298" table:style-name="c12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8:00</text:p>
          </table:table-cell>
          <table:table-cell office:value-type="float" office:value="2261.140005" table:style-name="c10">
            <text:p>2261.1</text:p>
          </table:table-cell>
          <table:table-cell office:value-type="string" table:style-name="c10">
            <text:p>2026-04-12 18:00</text:p>
          </table:table-cell>
          <table:table-cell office:value-type="float" office:value="2202.07841" table:style-name="c10">
            <text:p>2202.1</text:p>
          </table:table-cell>
          <table:table-cell office:value-type="float" office:value="-2.806705891773842" table:style-name="c12">
            <text:p>-2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0:00</text:p>
          </table:table-cell>
          <table:table-cell office:value-type="float" office:value="2263.4611649999997" table:style-name="c10">
            <text:p>2263.5</text:p>
          </table:table-cell>
          <table:table-cell office:value-type="string" table:style-name="c10">
            <text:p>2026-04-14 20:00</text:p>
          </table:table-cell>
          <table:table-cell office:value-type="float" office:value="2312.1633400000005" table:style-name="c10">
            <text:p>2312.2</text:p>
          </table:table-cell>
          <table:table-cell office:value-type="float" office:value="1.9474670546574702" table:style-name="c11">
            <text:p>+1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5:00</text:p>
          </table:table-cell>
          <table:table-cell office:value-type="float" office:value="2448.473625" table:style-name="c10">
            <text:p>2448.5</text:p>
          </table:table-cell>
          <table:table-cell office:value-type="string" table:style-name="c10">
            <text:p>2026-04-18 15:00</text:p>
          </table:table-cell>
          <table:table-cell office:value-type="float" office:value="2364.0473850000003" table:style-name="c10">
            <text:p>2364</text:p>
          </table:table-cell>
          <table:table-cell office:value-type="float" office:value="-3.6411244055208014" table:style-name="c12">
            <text:p>-3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13:00</text:p>
          </table:table-cell>
          <table:table-cell office:value-type="float" office:value="2320.03944" table:style-name="c10">
            <text:p>2320</text:p>
          </table:table-cell>
          <table:table-cell office:value-type="string" table:style-name="c10">
            <text:p>2026-04-21 13:00</text:p>
          </table:table-cell>
          <table:table-cell office:value-type="float" office:value="2307.38573" table:style-name="c10">
            <text:p>2307.4</text:p>
          </table:table-cell>
          <table:table-cell office:value-type="float" office:value="-0.7442189894095064" table:style-name="c12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7:00</text:p>
          </table:table-cell>
          <table:table-cell office:value-type="float" office:value="2394.57669" table:style-name="c10">
            <text:p>2394.6</text:p>
          </table:table-cell>
          <table:table-cell office:value-type="string" table:style-name="c10">
            <text:p>2026-04-23 07:00</text:p>
          </table:table-cell>
          <table:table-cell office:value-type="float" office:value="2353.26278" table:style-name="c10">
            <text:p>2353.3</text:p>
          </table:table-cell>
          <table:table-cell office:value-type="float" office:value="-1.9217627269736748" table:style-name="c12">
            <text:p>-1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9:00</text:p>
          </table:table-cell>
          <table:table-cell office:value-type="float" office:value="2363.1709949999995" table:style-name="c10">
            <text:p>2363.2</text:p>
          </table:table-cell>
          <table:table-cell office:value-type="string" table:style-name="c10">
            <text:p>2026-04-27 19:00</text:p>
          </table:table-cell>
          <table:table-cell office:value-type="float" office:value="2287.605625" table:style-name="c10">
            <text:p>2287.6</text:p>
          </table:table-cell>
          <table:table-cell office:value-type="float" office:value="-3.3911339388444928" table:style-name="c12">
            <text:p>-3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3:00</text:p>
          </table:table-cell>
          <table:table-cell office:value-type="float" office:value="2345.061945" table:style-name="c10">
            <text:p>2345.1</text:p>
          </table:table-cell>
          <table:table-cell office:value-type="string" table:style-name="c10">
            <text:p>2026-05-04 23:00</text:p>
          </table:table-cell>
          <table:table-cell office:value-type="float" office:value="2353.40271" table:style-name="c10">
            <text:p>2353.4</text:p>
          </table:table-cell>
          <table:table-cell office:value-type="float" office:value="0.1550625556166363" table:style-name="c11">
            <text:p>+0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4:00</text:p>
          </table:table-cell>
          <table:table-cell office:value-type="float" office:value="2383.6212149999997" table:style-name="c10">
            <text:p>2383.6</text:p>
          </table:table-cell>
          <table:table-cell office:value-type="string" table:style-name="c10">
            <text:p>2026-05-06 04:00</text:p>
          </table:table-cell>
          <table:table-cell office:value-type="float" office:value="2375.621595" table:style-name="c10">
            <text:p>2375.6</text:p>
          </table:table-cell>
          <table:table-cell office:value-type="float" office:value="-0.534836973600461" table:style-name="c12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8:00</text:p>
          </table:table-cell>
          <table:table-cell office:value-type="float" office:value="2365.292055" table:style-name="c10">
            <text:p>2365.3</text:p>
          </table:table-cell>
          <table:table-cell office:value-type="string" table:style-name="c10">
            <text:p>2026-05-11 18:00</text:p>
          </table:table-cell>
          <table:table-cell office:value-type="float" office:value="2335.5416450000002" table:style-name="c10">
            <text:p>2335.5</text:p>
          </table:table-cell>
          <table:table-cell office:value-type="float" office:value="-1.4551758069620169" table:style-name="c12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6:00</text:p>
          </table:table-cell>
          <table:table-cell office:value-type="float" office:value="0.9694845" table:style-name="c1">
            <text:p>0.96948</text:p>
          </table:table-cell>
          <table:table-cell office:value-type="string" table:style-name="c1">
            <text:p>2026-03-10 06:00</text:p>
          </table:table-cell>
          <table:table-cell office:value-type="float" office:value="0.9365315000000001" table:style-name="c1">
            <text:p>0.93653</text:p>
          </table:table-cell>
          <table:table-cell office:value-type="float" office:value="-3.5921282360367623" table:style-name="c14">
            <text:p>-3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5:00</text:p>
          </table:table-cell>
          <table:table-cell office:value-type="float" office:value="0.8984489999999999" table:style-name="c1">
            <text:p>0.89845</text:p>
          </table:table-cell>
          <table:table-cell office:value-type="string" table:style-name="c1">
            <text:p>2026-03-12 15:00</text:p>
          </table:table-cell>
          <table:table-cell office:value-type="float" office:value="0.8595700000000001" table:style-name="c1">
            <text:p>0.85957</text:p>
          </table:table-cell>
          <table:table-cell office:value-type="float" office:value="-4.518595983745321" table:style-name="c14">
            <text:p>-4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9:00</text:p>
          </table:table-cell>
          <table:table-cell office:value-type="float" office:value="0.9844919999999999" table:style-name="c1">
            <text:p>0.98449</text:p>
          </table:table-cell>
          <table:table-cell office:value-type="string" table:style-name="c1">
            <text:p>2026-03-19 09:00</text:p>
          </table:table-cell>
          <table:table-cell office:value-type="float" office:value="0.9085455000000001" table:style-name="c1">
            <text:p>0.90855</text:p>
          </table:table-cell>
          <table:table-cell office:value-type="float" office:value="-7.898762250429647" table:style-name="c14">
            <text:p>-7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2:00</text:p>
          </table:table-cell>
          <table:table-cell office:value-type="float" office:value="0.936468" table:style-name="c1">
            <text:p>0.93647</text:p>
          </table:table-cell>
          <table:table-cell office:value-type="string" table:style-name="c1">
            <text:p>2026-03-26 12:00</text:p>
          </table:table-cell>
          <table:table-cell office:value-type="float" office:value="0.885557" table:style-name="c1">
            <text:p>0.88556</text:p>
          </table:table-cell>
          <table:table-cell office:value-type="float" office:value="-5.625523610310212" table:style-name="c14">
            <text:p>-5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2:00</text:p>
          </table:table-cell>
          <table:table-cell office:value-type="float" office:value="0.894447" table:style-name="c1">
            <text:p>0.89445</text:p>
          </table:table-cell>
          <table:table-cell office:value-type="string" table:style-name="c1">
            <text:p>2026-04-07 12:00</text:p>
          </table:table-cell>
          <table:table-cell office:value-type="float" office:value="0.863568" table:style-name="c1">
            <text:p>0.86357</text:p>
          </table:table-cell>
          <table:table-cell office:value-type="float" office:value="-3.645299546200076" table:style-name="c14">
            <text:p>-3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0.908454" table:style-name="c1">
            <text:p>0.90845</text:p>
          </table:table-cell>
          <table:table-cell office:value-type="string" table:style-name="c1">
            <text:p>2026-04-12 17:00</text:p>
          </table:table-cell>
          <table:table-cell office:value-type="float" office:value="0.8655670000000001" table:style-name="c1">
            <text:p>0.86557</text:p>
          </table:table-cell>
          <table:table-cell office:value-type="float" office:value="-4.911340412723142" table:style-name="c14">
            <text:p>-4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8:00</text:p>
          </table:table-cell>
          <table:table-cell office:value-type="float" office:value="0.88044" table:style-name="c1">
            <text:p>0.88044</text:p>
          </table:table-cell>
          <table:table-cell office:value-type="string" table:style-name="c1">
            <text:p>2026-04-13 18:00</text:p>
          </table:table-cell>
          <table:table-cell office:value-type="float" office:value="0.8745625" table:style-name="c1">
            <text:p>0.87456</text:p>
          </table:table-cell>
          <table:table-cell office:value-type="float" office:value="-0.8661294849734213" table:style-name="c14">
            <text:p>-0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0:00</text:p>
          </table:table-cell>
          <table:table-cell office:value-type="float" office:value="0.9034515" table:style-name="c1">
            <text:p>0.90345</text:p>
          </table:table-cell>
          <table:table-cell office:value-type="string" table:style-name="c1">
            <text:p>2026-04-14 20:00</text:p>
          </table:table-cell>
          <table:table-cell office:value-type="float" office:value="0.8865565000000001" table:style-name="c1">
            <text:p>0.88656</text:p>
          </table:table-cell>
          <table:table-cell office:value-type="float" office:value="-2.066212347148677" table:style-name="c14">
            <text:p>-2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5:00</text:p>
          </table:table-cell>
          <table:table-cell office:value-type="float" office:value="0.9054525" table:style-name="c1">
            <text:p>0.90545</text:p>
          </table:table-cell>
          <table:table-cell office:value-type="string" table:style-name="c1">
            <text:p>2026-04-16 05:00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6.4204838483520765" table:style-name="c13">
            <text:p>+6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6:00</text:p>
          </table:table-cell>
          <table:table-cell office:value-type="float" office:value="0.9794894999999999" table:style-name="c1">
            <text:p>0.97949</text:p>
          </table:table-cell>
          <table:table-cell office:value-type="string" table:style-name="c1">
            <text:p>2026-04-17 06:00</text:p>
          </table:table-cell>
          <table:table-cell office:value-type="float" office:value="0.9735130000000001" table:style-name="c1">
            <text:p>0.97351</text:p>
          </table:table-cell>
          <table:table-cell office:value-type="float" office:value="-0.8088450654141655" table:style-name="c14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4:00</text:p>
          </table:table-cell>
          <table:table-cell office:value-type="float" office:value="0.9294645" table:style-name="c1">
            <text:p>0.92946</text:p>
          </table:table-cell>
          <table:table-cell office:value-type="string" table:style-name="c1">
            <text:p>2026-04-21 14:00</text:p>
          </table:table-cell>
          <table:table-cell office:value-type="float" office:value="0.925537" table:style-name="c1">
            <text:p>0.92554</text:p>
          </table:table-cell>
          <table:table-cell office:value-type="float" office:value="-0.6216104502108522" table:style-name="c14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6:00</text:p>
          </table:table-cell>
          <table:table-cell office:value-type="float" office:value="0.9544769999999999" table:style-name="c1">
            <text:p>0.95448</text:p>
          </table:table-cell>
          <table:table-cell office:value-type="string" table:style-name="c1">
            <text:p>2026-04-23 06:00</text:p>
          </table:table-cell>
          <table:table-cell office:value-type="float" office:value="0.9235380000000001" table:style-name="c1">
            <text:p>0.92354</text:p>
          </table:table-cell>
          <table:table-cell office:value-type="float" office:value="-3.4348813498910613" table:style-name="c14">
            <text:p>-3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6:00</text:p>
          </table:table-cell>
          <table:table-cell office:value-type="float" office:value="0.934467" table:style-name="c1">
            <text:p>0.93447</text:p>
          </table:table-cell>
          <table:table-cell office:value-type="string" table:style-name="c1">
            <text:p>2026-04-24 16:00</text:p>
          </table:table-cell>
          <table:table-cell office:value-type="float" office:value="0.945527" table:style-name="c1">
            <text:p>0.94553</text:p>
          </table:table-cell>
          <table:table-cell office:value-type="float" office:value="0.9812964531652923" table:style-name="c13">
            <text:p>+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00</text:p>
          </table:table-cell>
          <table:table-cell office:value-type="float" office:value="0.9534765" table:style-name="c1">
            <text:p>0.95348</text:p>
          </table:table-cell>
          <table:table-cell office:value-type="string" table:style-name="c1">
            <text:p>2026-04-26 04:00</text:p>
          </table:table-cell>
          <table:table-cell office:value-type="float" office:value="0.937531" table:style-name="c1">
            <text:p>0.93753</text:p>
          </table:table-cell>
          <table:table-cell office:value-type="float" office:value="-1.8689107145273165" table:style-name="c14">
            <text:p>-1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6:00</text:p>
          </table:table-cell>
          <table:table-cell office:value-type="float" office:value="0.9474734999999999" table:style-name="c1">
            <text:p>0.94747</text:p>
          </table:table-cell>
          <table:table-cell office:value-type="string" table:style-name="c1">
            <text:p>2026-04-27 06:00</text:p>
          </table:table-cell>
          <table:table-cell office:value-type="float" office:value="0.9305345000000002" table:style-name="c1">
            <text:p>0.93053</text:p>
          </table:table-cell>
          <table:table-cell office:value-type="float" office:value="-1.9841334312252323" table:style-name="c14">
            <text:p>-2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2:00</text:p>
          </table:table-cell>
          <table:table-cell office:value-type="float" office:value="0.9764879999999999" table:style-name="c1">
            <text:p>0.97649</text:p>
          </table:table-cell>
          <table:table-cell office:value-type="string" table:style-name="c1">
            <text:p>2026-04-29 16:00</text:p>
          </table:table-cell>
          <table:table-cell office:value-type="float" office:value="0.9075460000000001" table:style-name="c1">
            <text:p>0.90755</text:p>
          </table:table-cell>
          <table:table-cell office:value-type="float" office:value="-7.245986069874865" table:style-name="c14">
            <text:p>-7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5:00</text:p>
          </table:table-cell>
          <table:table-cell office:value-type="float" office:value="0.9634814999999999" table:style-name="c1">
            <text:p>0.96348</text:p>
          </table:table-cell>
          <table:table-cell office:value-type="string" table:style-name="c1">
            <text:p>2026-05-05 05:00</text:p>
          </table:table-cell>
          <table:table-cell office:value-type="float" office:value="0.9445275" table:style-name="c1">
            <text:p>0.94453</text:p>
          </table:table-cell>
          <table:table-cell office:value-type="float" office:value="-2.163208164609265" table:style-name="c14">
            <text:p>-2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00</text:p>
          </table:table-cell>
          <table:table-cell office:value-type="float" office:value="0.9894944999999999" table:style-name="c1">
            <text:p>0.98949</text:p>
          </table:table-cell>
          <table:table-cell office:value-type="string" table:style-name="c1">
            <text:p>2026-05-06 21:00</text:p>
          </table:table-cell>
          <table:table-cell office:value-type="float" office:value="1.0754620000000001" table:style-name="c1">
            <text:p>1.0755</text:p>
          </table:table-cell>
          <table:table-cell office:value-type="float" office:value="8.470754659273027" table:style-name="c13">
            <text:p>+8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6:00</text:p>
          </table:table-cell>
          <table:table-cell office:value-type="float" office:value="1.248624" table:style-name="c1">
            <text:p>1.2486</text:p>
          </table:table-cell>
          <table:table-cell office:value-type="string" table:style-name="c1">
            <text:p>2026-05-09 16:00</text:p>
          </table:table-cell>
          <table:table-cell office:value-type="float" office:value="1.2043975000000002" table:style-name="c1">
            <text:p>1.2044</text:p>
          </table:table-cell>
          <table:table-cell office:value-type="float" office:value="-3.734838558485154" table:style-name="c14">
            <text:p>-3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7:00</text:p>
          </table:table-cell>
          <table:table-cell office:value-type="float" office:value="1.056528" table:style-name="c1">
            <text:p>1.0565</text:p>
          </table:table-cell>
          <table:table-cell office:value-type="string" table:style-name="c1">
            <text:p>2026-05-28 07:00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-8.796839126175527" table:style-name="c14">
            <text:p>-8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04:00</text:p>
          </table:table-cell>
          <table:table-cell office:value-type="float" office:value="0.0954477" table:style-name="c10">
            <text:p>0.095448</text:p>
          </table:table-cell>
          <table:table-cell office:value-type="string" table:style-name="c10">
            <text:p>2026-03-10 04:00</text:p>
          </table:table-cell>
          <table:table-cell office:value-type="float" office:value="0.095082435" table:style-name="c10">
            <text:p>0.095082</text:p>
          </table:table-cell>
          <table:table-cell office:value-type="float" office:value="-0.5818210261378631" table:style-name="c12">
            <text:p>-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09878936999999999" table:style-name="c10">
            <text:p>0.098789</text:p>
          </table:table-cell>
          <table:table-cell office:value-type="string" table:style-name="c10">
            <text:p>2026-03-11 15:00</text:p>
          </table:table-cell>
          <table:table-cell office:value-type="float" office:value="0.095002475" table:style-name="c10">
            <text:p>0.095002</text:p>
          </table:table-cell>
          <table:table-cell office:value-type="float" office:value="-4.025539334368644" table:style-name="c12">
            <text:p>-4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8:00</text:p>
          </table:table-cell>
          <table:table-cell office:value-type="float" office:value="0.09020507999999999" table:style-name="c10">
            <text:p>0.090205</text:p>
          </table:table-cell>
          <table:table-cell office:value-type="string" table:style-name="c10">
            <text:p>2026-04-10 18:00</text:p>
          </table:table-cell>
          <table:table-cell office:value-type="float" office:value="0.08931532" table:style-name="c10">
            <text:p>0.089315</text:p>
          </table:table-cell>
          <table:table-cell office:value-type="float" office:value="-1.184302840460849" table:style-name="c12">
            <text:p>-1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0:00</text:p>
          </table:table-cell>
          <table:table-cell office:value-type="float" office:value="0.091355655" table:style-name="c10">
            <text:p>0.091356</text:p>
          </table:table-cell>
          <table:table-cell office:value-type="string" table:style-name="c10">
            <text:p>2026-04-18 10:00</text:p>
          </table:table-cell>
          <table:table-cell office:value-type="float" office:value="0.08889553000000001" table:style-name="c10">
            <text:p>0.088896</text:p>
          </table:table-cell>
          <table:table-cell office:value-type="float" office:value="-2.8874262512484705" table:style-name="c12">
            <text:p>-2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9:00</text:p>
          </table:table-cell>
          <table:table-cell office:value-type="float" office:value="0.090815385" table:style-name="c10">
            <text:p>0.090815</text:p>
          </table:table-cell>
          <table:table-cell office:value-type="string" table:style-name="c10">
            <text:p>2026-04-22 09:00</text:p>
          </table:table-cell>
          <table:table-cell office:value-type="float" office:value="0.090784585" table:style-name="c10">
            <text:p>0.090785</text:p>
          </table:table-cell>
          <table:table-cell office:value-type="float" office:value="-0.23374716235029513" table:style-name="c12">
            <text:p>-0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3:00</text:p>
          </table:table-cell>
          <table:table-cell office:value-type="float" office:value="0.09572784" table:style-name="c10">
            <text:p>0.095728</text:p>
          </table:table-cell>
          <table:table-cell office:value-type="string" table:style-name="c10">
            <text:p>2026-05-11 13:00</text:p>
          </table:table-cell>
          <table:table-cell office:value-type="float" office:value="0.09607194000000001" table:style-name="c10">
            <text:p>0.096072</text:p>
          </table:table-cell>
          <table:table-cell office:value-type="float" office:value="0.15883800568361472" table:style-name="c11">
            <text:p>+0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9:00</text:p>
          </table:table-cell>
          <table:table-cell office:value-type="float" office:value="0.09810902999999999" table:style-name="c10">
            <text:p>0.098109</text:p>
          </table:table-cell>
          <table:table-cell office:value-type="string" table:style-name="c10">
            <text:p>2026-05-15 19:00</text:p>
          </table:table-cell>
          <table:table-cell office:value-type="float" office:value="0.093283335" table:style-name="c10">
            <text:p>0.093283</text:p>
          </table:table-cell>
          <table:table-cell office:value-type="float" office:value="-5.108773765946928" table:style-name="c12">
            <text:p>-5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22:00</text:p>
          </table:table-cell>
          <table:table-cell office:value-type="float" office:value="0.09320658" table:style-name="c10">
            <text:p>0.093207</text:p>
          </table:table-cell>
          <table:table-cell office:value-type="string" table:style-name="c10">
            <text:p>2026-05-30 22:00</text:p>
          </table:table-cell>
          <table:table-cell office:value-type="float" office:value="0.096461745" table:style-name="c10">
            <text:p>0.096462</text:p>
          </table:table-cell>
          <table:table-cell office:value-type="float" office:value="3.285538394118759" table:style-name="c11">
            <text:p>+3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8 20:00</text:p>
          </table:table-cell>
          <table:table-cell office:value-type="float" office:value="2.839419" table:style-name="c1">
            <text:p>2.8394</text:p>
          </table:table-cell>
          <table:table-cell office:value-type="string" table:style-name="c1">
            <text:p>2026-03-09 20:00</text:p>
          </table:table-cell>
          <table:table-cell office:value-type="float" office:value="2.9315335" table:style-name="c1">
            <text:p>2.9315</text:p>
          </table:table-cell>
          <table:table-cell office:value-type="float" office:value="3.0377469663160017" table:style-name="c13">
            <text:p>+3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00</text:p>
          </table:table-cell>
          <table:table-cell office:value-type="float" office:value="2.975487" table:style-name="c1">
            <text:p>2.9755</text:p>
          </table:table-cell>
          <table:table-cell office:value-type="string" table:style-name="c1">
            <text:p>2026-03-11 09:00</text:p>
          </table:table-cell>
          <table:table-cell office:value-type="float" office:value="2.9195395" table:style-name="c1">
            <text:p>2.9195</text:p>
          </table:table-cell>
          <table:table-cell office:value-type="float" office:value="-2.0764217575307775" table:style-name="c14">
            <text:p>-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5:00</text:p>
          </table:table-cell>
          <table:table-cell office:value-type="float" office:value="2.9924955" table:style-name="c1">
            <text:p>2.9925</text:p>
          </table:table-cell>
          <table:table-cell office:value-type="string" table:style-name="c1">
            <text:p>2026-03-12 15:00</text:p>
          </table:table-cell>
          <table:table-cell office:value-type="float" office:value="2.9815085000000003" table:style-name="c1">
            <text:p>2.9815</text:p>
          </table:table-cell>
          <table:table-cell office:value-type="float" office:value="-0.5663178270944647" table:style-name="c14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1:00</text:p>
          </table:table-cell>
          <table:table-cell office:value-type="float" office:value="3.025512" table:style-name="c1">
            <text:p>3.0255</text:p>
          </table:table-cell>
          <table:table-cell office:value-type="string" table:style-name="c1">
            <text:p>2026-03-13 21:00</text:p>
          </table:table-cell>
          <table:table-cell office:value-type="float" office:value="3.1064460000000005" table:style-name="c1">
            <text:p>3.1064</text:p>
          </table:table-cell>
          <table:table-cell office:value-type="float" office:value="2.4698039355322443" table:style-name="c13">
            <text:p>+2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4:00</text:p>
          </table:table-cell>
          <table:table-cell office:value-type="float" office:value="3.0685335" table:style-name="c1">
            <text:p>3.0685</text:p>
          </table:table-cell>
          <table:table-cell office:value-type="string" table:style-name="c1">
            <text:p>2026-03-16 04:00</text:p>
          </table:table-cell>
          <table:table-cell office:value-type="float" office:value="3.142428" table:style-name="c1">
            <text:p>3.1424</text:p>
          </table:table-cell>
          <table:table-cell office:value-type="float" office:value="2.2034234408065068" table:style-name="c13">
            <text:p>+2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8:00</text:p>
          </table:table-cell>
          <table:table-cell office:value-type="float" office:value="3.2506245" table:style-name="c1">
            <text:p>3.2506</text:p>
          </table:table-cell>
          <table:table-cell office:value-type="string" table:style-name="c1">
            <text:p>2026-03-17 18:00</text:p>
          </table:table-cell>
          <table:table-cell office:value-type="float" office:value="3.2293845" table:style-name="c1">
            <text:p>3.2294</text:p>
          </table:table-cell>
          <table:table-cell office:value-type="float" office:value="-0.8520067333369186" table:style-name="c14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01:00</text:p>
          </table:table-cell>
          <table:table-cell office:value-type="float" office:value="3.0765375" table:style-name="c1">
            <text:p>3.0765</text:p>
          </table:table-cell>
          <table:table-cell office:value-type="string" table:style-name="c1">
            <text:p>2026-03-21 01:00</text:p>
          </table:table-cell>
          <table:table-cell office:value-type="float" office:value="3.0904540000000003" table:style-name="c1">
            <text:p>3.0905</text:p>
          </table:table-cell>
          <table:table-cell office:value-type="float" office:value="0.2515387006984282" table:style-name="c13">
            <text:p>+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0:00</text:p>
          </table:table-cell>
          <table:table-cell office:value-type="float" office:value="3.017508" table:style-name="c1">
            <text:p>3.0175</text:p>
          </table:table-cell>
          <table:table-cell office:value-type="string" table:style-name="c1">
            <text:p>2026-04-09 00:00</text:p>
          </table:table-cell>
          <table:table-cell office:value-type="float" office:value="2.902548" table:style-name="c1">
            <text:p>2.9025</text:p>
          </table:table-cell>
          <table:table-cell office:value-type="float" office:value="-4.002050481788288" table:style-name="c14">
            <text:p>-4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00</text:p>
          </table:table-cell>
          <table:table-cell office:value-type="float" office:value="3.0085034999999998" table:style-name="c1">
            <text:p>3.0085</text:p>
          </table:table-cell>
          <table:table-cell office:value-type="string" table:style-name="c1">
            <text:p>2026-04-11 14:00</text:p>
          </table:table-cell>
          <table:table-cell office:value-type="float" office:value="2.9955015" table:style-name="c1">
            <text:p>2.9955</text:p>
          </table:table-cell>
          <table:table-cell office:value-type="float" office:value="-0.6312110821376837" table:style-name="c14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3.0445215" table:style-name="c1">
            <text:p>3.0445</text:p>
          </table:table-cell>
          <table:table-cell office:value-type="string" table:style-name="c1">
            <text:p>2026-04-14 23:00</text:p>
          </table:table-cell>
          <table:table-cell office:value-type="float" office:value="2.9735125000000004" table:style-name="c1">
            <text:p>2.9735</text:p>
          </table:table-cell>
          <table:table-cell office:value-type="float" office:value="-2.527591001985019" table:style-name="c14">
            <text:p>-2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6:00</text:p>
          </table:table-cell>
          <table:table-cell office:value-type="float" office:value="3.005502" table:style-name="c1">
            <text:p>3.0055</text:p>
          </table:table-cell>
          <table:table-cell office:value-type="string" table:style-name="c1">
            <text:p>2026-04-16 06:00</text:p>
          </table:table-cell>
          <table:table-cell office:value-type="float" office:value="3.2973505000000003" table:style-name="c1">
            <text:p>3.2974</text:p>
          </table:table-cell>
          <table:table-cell office:value-type="float" office:value="9.491163085251664" table:style-name="c13">
            <text:p>+9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4:00</text:p>
          </table:table-cell>
          <table:table-cell office:value-type="float" office:value="3.469734" table:style-name="c1">
            <text:p>3.4697</text:p>
          </table:table-cell>
          <table:table-cell office:value-type="string" table:style-name="c1">
            <text:p>2026-04-18 14:00</text:p>
          </table:table-cell>
          <table:table-cell office:value-type="float" office:value="3.2833575" table:style-name="c1">
            <text:p>3.2834</text:p>
          </table:table-cell>
          <table:table-cell office:value-type="float" office:value="-5.560654841048329" table:style-name="c14">
            <text:p>-5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12:00</text:p>
          </table:table-cell>
          <table:table-cell office:value-type="float" office:value="3.2766374999999996" table:style-name="c1">
            <text:p>3.2766</text:p>
          </table:table-cell>
          <table:table-cell office:value-type="string" table:style-name="c1">
            <text:p>2026-04-20 12:00</text:p>
          </table:table-cell>
          <table:table-cell office:value-type="float" office:value="3.2723630000000004" table:style-name="c1">
            <text:p>3.2724</text:p>
          </table:table-cell>
          <table:table-cell office:value-type="float" office:value="-0.33009307978069113" table:style-name="c14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1:00</text:p>
          </table:table-cell>
          <table:table-cell office:value-type="float" office:value="3.3216599999999996" table:style-name="c1">
            <text:p>3.3217</text:p>
          </table:table-cell>
          <table:table-cell office:value-type="string" table:style-name="c1">
            <text:p>2026-04-22 11:00</text:p>
          </table:table-cell>
          <table:table-cell office:value-type="float" office:value="3.3363310000000004" table:style-name="c1">
            <text:p>3.3363</text:p>
          </table:table-cell>
          <table:table-cell office:value-type="float" office:value="0.24089384015826276" table:style-name="c13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00</text:p>
          </table:table-cell>
          <table:table-cell office:value-type="float" office:value="3.3196589999999997" table:style-name="c1">
            <text:p>3.3197</text:p>
          </table:table-cell>
          <table:table-cell office:value-type="string" table:style-name="c1">
            <text:p>2026-04-24 15:00</text:p>
          </table:table-cell>
          <table:table-cell office:value-type="float" office:value="3.4122930000000005" table:style-name="c1">
            <text:p>3.4123</text:p>
          </table:table-cell>
          <table:table-cell office:value-type="float" office:value="2.5849891899439426" table:style-name="c13">
            <text:p>+2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9:00</text:p>
          </table:table-cell>
          <table:table-cell office:value-type="float" office:value="3.5197589999999996" table:style-name="c1">
            <text:p>3.5198</text:p>
          </table:table-cell>
          <table:table-cell office:value-type="string" table:style-name="c1">
            <text:p>2026-04-26 09:00</text:p>
          </table:table-cell>
          <table:table-cell office:value-type="float" office:value="3.7381300000000004" table:style-name="c1">
            <text:p>3.7381</text:p>
          </table:table-cell>
          <table:table-cell office:value-type="float" office:value="5.9918442748495115" table:style-name="c13">
            <text:p>+6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9:00</text:p>
          </table:table-cell>
          <table:table-cell office:value-type="float" office:value="3.5797889999999994" table:style-name="c1">
            <text:p>3.5798</text:p>
          </table:table-cell>
          <table:table-cell office:value-type="string" table:style-name="c1">
            <text:p>2026-05-02 09:00</text:p>
          </table:table-cell>
          <table:table-cell office:value-type="float" office:value="3.7751115000000004" table:style-name="c1">
            <text:p>3.7751</text:p>
          </table:table-cell>
          <table:table-cell office:value-type="float" office:value="5.245450279653396" table:style-name="c13">
            <text:p>+5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4:00</text:p>
          </table:table-cell>
          <table:table-cell office:value-type="float" office:value="4.208103" table:style-name="c1">
            <text:p>4.2081</text:p>
          </table:table-cell>
          <table:table-cell office:value-type="string" table:style-name="c1">
            <text:p>2026-05-11 14:00</text:p>
          </table:table-cell>
          <table:table-cell office:value-type="float" office:value="4.370813500000001" table:style-name="c1">
            <text:p>4.3708</text:p>
          </table:table-cell>
          <table:table-cell office:value-type="float" office:value="3.658970415256002" table:style-name="c13">
            <text:p>+3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6:00</text:p>
          </table:table-cell>
          <table:table-cell office:value-type="float" office:value="4.6673325" table:style-name="c1">
            <text:p>4.6673</text:p>
          </table:table-cell>
          <table:table-cell office:value-type="string" table:style-name="c1">
            <text:p>2026-05-13 06:00</text:p>
          </table:table-cell>
          <table:table-cell office:value-type="float" office:value="5.2543714999999995" table:style-name="c1">
            <text:p>5.2544</text:p>
          </table:table-cell>
          <table:table-cell office:value-type="float" office:value="12.352569939499691" table:style-name="c13">
            <text:p>+12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8:00</text:p>
          </table:table-cell>
          <table:table-cell office:value-type="float" office:value="5.5197585" table:style-name="c1">
            <text:p>5.5198</text:p>
          </table:table-cell>
          <table:table-cell office:value-type="string" table:style-name="c1">
            <text:p>2026-05-14 08:00</text:p>
          </table:table-cell>
          <table:table-cell office:value-type="float" office:value="4.9984995" table:style-name="c1">
            <text:p>4.9985</text:p>
          </table:table-cell>
          <table:table-cell office:value-type="float" office:value="-9.624533401243907" table:style-name="c14">
            <text:p>-9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21:00</text:p>
          </table:table-cell>
          <table:table-cell office:value-type="float" office:value="5.174586" table:style-name="c1">
            <text:p>5.1746</text:p>
          </table:table-cell>
          <table:table-cell office:value-type="string" table:style-name="c1">
            <text:p>2026-05-15 21:00</text:p>
          </table:table-cell>
          <table:table-cell office:value-type="float" office:value="4.891553" table:style-name="c1">
            <text:p>4.8916</text:p>
          </table:table-cell>
          <table:table-cell office:value-type="float" office:value="-5.658640410015392" table:style-name="c14">
            <text:p>-5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22:00</text:p>
          </table:table-cell>
          <table:table-cell office:value-type="float" office:value="4.916456999999999" table:style-name="c1">
            <text:p>4.9165</text:p>
          </table:table-cell>
          <table:table-cell office:value-type="string" table:style-name="c1">
            <text:p>2026-05-19 22:00</text:p>
          </table:table-cell>
          <table:table-cell office:value-type="float" office:value="4.963517" table:style-name="c1">
            <text:p>4.9635</text:p>
          </table:table-cell>
          <table:table-cell office:value-type="float" office:value="0.7553799314628629" table:style-name="c13">
            <text:p>+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8:00</text:p>
          </table:table-cell>
          <table:table-cell office:value-type="float" office:value="5.2446209999999995" table:style-name="c1">
            <text:p>5.2446</text:p>
          </table:table-cell>
          <table:table-cell office:value-type="string" table:style-name="c1">
            <text:p>2026-05-22 18:00</text:p>
          </table:table-cell>
          <table:table-cell office:value-type="float" office:value="5.5062455" table:style-name="c1">
            <text:p>5.5062</text:p>
          </table:table-cell>
          <table:table-cell office:value-type="float" office:value="4.7785629361111415" table:style-name="c13">
            <text:p>+4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3:00</text:p>
          </table:table-cell>
          <table:table-cell office:value-type="float" office:value="5.540769" table:style-name="c1">
            <text:p>5.5408</text:p>
          </table:table-cell>
          <table:table-cell office:value-type="string" table:style-name="c1">
            <text:p>2026-05-26 13:00</text:p>
          </table:table-cell>
          <table:table-cell office:value-type="float" office:value="5.871063" table:style-name="c1">
            <text:p>5.8711</text:p>
          </table:table-cell>
          <table:table-cell office:value-type="float" office:value="5.749341744133374" table:style-name="c13">
            <text:p>+5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00</text:p>
          </table:table-cell>
          <table:table-cell office:value-type="float" office:value="6.011004" table:style-name="c1">
            <text:p>6.011</text:p>
          </table:table-cell>
          <table:table-cell office:value-type="string" table:style-name="c1">
            <text:p>2026-05-27 14:00</text:p>
          </table:table-cell>
          <table:table-cell office:value-type="float" office:value="5.6221875" table:style-name="c1">
            <text:p>5.6222</text:p>
          </table:table-cell>
          <table:table-cell office:value-type="float" office:value="-6.6553815770626805" table:style-name="c14">
            <text:p>-6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7:00</text:p>
          </table:table-cell>
          <table:table-cell office:value-type="float" office:value="6.1820895" table:style-name="c1">
            <text:p>6.1821</text:p>
          </table:table-cell>
          <table:table-cell office:value-type="string" table:style-name="c1">
            <text:p>2026-05-30 07:00</text:p>
          </table:table-cell>
          <table:table-cell office:value-type="float" office:value="6.821587500000001" table:style-name="c1">
            <text:p>6.8216</text:p>
          </table:table-cell>
          <table:table-cell office:value-type="float" office:value="10.123788188241246" table:style-name="c13">
            <text:p>+1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6:00</text:p>
          </table:table-cell>
          <table:table-cell office:value-type="float" office:value="6.9454709999999995" table:style-name="c1">
            <text:p>6.9455</text:p>
          </table:table-cell>
          <table:table-cell office:value-type="string" table:style-name="c1">
            <text:p>2026-05-31 16:00</text:p>
          </table:table-cell>
          <table:table-cell office:value-type="float" office:value="6.367814500000001" table:style-name="c1">
            <text:p>6.3678</text:p>
          </table:table-cell>
          <table:table-cell office:value-type="float" office:value="-8.500298412958585" table:style-name="c14">
            <text:p>-8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7:00</text:p>
          </table:table-cell>
          <table:table-cell office:value-type="float" office:value="7.0865415" table:style-name="c1">
            <text:p>7.0865</text:p>
          </table:table-cell>
          <table:table-cell office:value-type="string" table:style-name="c1">
            <text:p>2026-06-02 17:00</text:p>
          </table:table-cell>
          <table:table-cell office:value-type="float" office:value="6.766615" table:style-name="c1">
            <text:p>6.7666</text:p>
          </table:table-cell>
          <table:table-cell office:value-type="float" office:value="-4.705440070942924" table:style-name="c14">
            <text:p>-4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05:00</text:p>
          </table:table-cell>
          <table:table-cell office:value-type="float" office:value="8.704349999999998" table:style-name="c10">
            <text:p>8.7043</text:p>
          </table:table-cell>
          <table:table-cell office:value-type="string" table:style-name="c10">
            <text:p>2026-03-10 05:00</text:p>
          </table:table-cell>
          <table:table-cell office:value-type="float" office:value="9.005495" table:style-name="c10">
            <text:p>9.0055</text:p>
          </table:table-cell>
          <table:table-cell office:value-type="float" office:value="3.25289097399577" table:style-name="c11">
            <text:p>+3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8:00</text:p>
          </table:table-cell>
          <table:table-cell office:value-type="float" office:value="9.084539999999999" table:style-name="c10">
            <text:p>9.0845</text:p>
          </table:table-cell>
          <table:table-cell office:value-type="string" table:style-name="c10">
            <text:p>2026-03-11 08:00</text:p>
          </table:table-cell>
          <table:table-cell office:value-type="float" office:value="8.885555000000002" table:style-name="c10">
            <text:p>8.8856</text:p>
          </table:table-cell>
          <table:table-cell office:value-type="float" office:value="-2.3858910241464915" table:style-name="c12">
            <text:p>-2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4:00</text:p>
          </table:table-cell>
          <table:table-cell office:value-type="float" office:value="9.054525" table:style-name="c10">
            <text:p>9.0545</text:p>
          </table:table-cell>
          <table:table-cell office:value-type="string" table:style-name="c10">
            <text:p>2026-03-12 14:00</text:p>
          </table:table-cell>
          <table:table-cell office:value-type="float" office:value="9.01549" table:style-name="c10">
            <text:p>9.0155</text:p>
          </table:table-cell>
          <table:table-cell office:value-type="float" office:value="-0.6301486219321251" table:style-name="c12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4:00</text:p>
          </table:table-cell>
          <table:table-cell office:value-type="float" office:value="9.524759999999999" table:style-name="c10">
            <text:p>9.5248</text:p>
          </table:table-cell>
          <table:table-cell office:value-type="string" table:style-name="c10">
            <text:p>2026-03-14 14:00</text:p>
          </table:table-cell>
          <table:table-cell office:value-type="float" office:value="9.005495" table:style-name="c10">
            <text:p>9.0055</text:p>
          </table:table-cell>
          <table:table-cell office:value-type="float" office:value="-5.640740391411425" table:style-name="c12">
            <text:p>-5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3:00</text:p>
          </table:table-cell>
          <table:table-cell office:value-type="float" office:value="9.494745" table:style-name="c10">
            <text:p>9.4947</text:p>
          </table:table-cell>
          <table:table-cell office:value-type="string" table:style-name="c10">
            <text:p>2026-03-16 23:00</text:p>
          </table:table-cell>
          <table:table-cell office:value-type="float" office:value="9.965015000000001" table:style-name="c10">
            <text:p>9.965</text:p>
          </table:table-cell>
          <table:table-cell office:value-type="float" office:value="4.743149342241426" table:style-name="c11">
            <text:p>+4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00</text:p>
          </table:table-cell>
          <table:table-cell office:value-type="float" office:value="8.894445" table:style-name="c10">
            <text:p>8.8944</text:p>
          </table:table-cell>
          <table:table-cell office:value-type="string" table:style-name="c10">
            <text:p>2026-04-08 22:00</text:p>
          </table:table-cell>
          <table:table-cell office:value-type="float" office:value="9.005495" table:style-name="c10">
            <text:p>9.0055</text:p>
          </table:table-cell>
          <table:table-cell office:value-type="float" office:value="1.046136273764131" table:style-name="c11">
            <text:p>+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8:00</text:p>
          </table:table-cell>
          <table:table-cell office:value-type="float" office:value="9.02451" table:style-name="c10">
            <text:p>9.0245</text:p>
          </table:table-cell>
          <table:table-cell office:value-type="string" table:style-name="c10">
            <text:p>2026-04-10 18:00</text:p>
          </table:table-cell>
          <table:table-cell office:value-type="float" office:value="9.105445" table:style-name="c10">
            <text:p>9.1054</text:p>
          </table:table-cell>
          <table:table-cell office:value-type="float" office:value="0.695142622092515" table:style-name="c11">
            <text:p>+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9:00</text:p>
          </table:table-cell>
          <table:table-cell office:value-type="float" office:value="9.214605" table:style-name="c10">
            <text:p>9.2146</text:p>
          </table:table-cell>
          <table:table-cell office:value-type="string" table:style-name="c10">
            <text:p>2026-04-12 19:00</text:p>
          </table:table-cell>
          <table:table-cell office:value-type="float" office:value="8.765615" table:style-name="c10">
            <text:p>8.7656</text:p>
          </table:table-cell>
          <table:table-cell office:value-type="float" office:value="-5.062750539876659" table:style-name="c12">
            <text:p>-5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3:00</text:p>
          </table:table-cell>
          <table:table-cell office:value-type="float" office:value="9.334665" table:style-name="c10">
            <text:p>9.3347</text:p>
          </table:table-cell>
          <table:table-cell office:value-type="string" table:style-name="c10">
            <text:p>2026-04-14 23:00</text:p>
          </table:table-cell>
          <table:table-cell office:value-type="float" office:value="8.9955" table:style-name="c10">
            <text:p>8.9955</text:p>
          </table:table-cell>
          <table:table-cell office:value-type="float" office:value="-3.826029155840094" table:style-name="c12">
            <text:p>-3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9.464730000000001" table:style-name="c10">
            <text:p>9.4647</text:p>
          </table:table-cell>
          <table:table-cell office:value-type="string" table:style-name="c10">
            <text:p>2026-04-17 16:00</text:p>
          </table:table-cell>
          <table:table-cell office:value-type="float" office:value="9.75512" table:style-name="c10">
            <text:p>9.7551</text:p>
          </table:table-cell>
          <table:table-cell office:value-type="float" office:value="2.8620944825684225" table:style-name="c11">
            <text:p>+2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7:00</text:p>
          </table:table-cell>
          <table:table-cell office:value-type="float" office:value="9.344669999999999" table:style-name="c10">
            <text:p>9.3447</text:p>
          </table:table-cell>
          <table:table-cell office:value-type="string" table:style-name="c10">
            <text:p>2026-04-22 07:00</text:p>
          </table:table-cell>
          <table:table-cell office:value-type="float" office:value="9.51524" table:style-name="c10">
            <text:p>9.5152</text:p>
          </table:table-cell>
          <table:table-cell office:value-type="float" office:value="1.6217697921917074" table:style-name="c11">
            <text:p>+1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00:00</text:p>
          </table:table-cell>
          <table:table-cell office:value-type="float" office:value="9.354674999999999" table:style-name="c10">
            <text:p>9.3547</text:p>
          </table:table-cell>
          <table:table-cell office:value-type="string" table:style-name="c10">
            <text:p>2026-04-25 00:00</text:p>
          </table:table-cell>
          <table:table-cell office:value-type="float" office:value="9.37531" table:style-name="c10">
            <text:p>9.3753</text:p>
          </table:table-cell>
          <table:table-cell office:value-type="float" office:value="0.020243945513898076" table:style-name="c11">
            <text:p>+0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1:00</text:p>
          </table:table-cell>
          <table:table-cell office:value-type="float" office:value="9.554775" table:style-name="c10">
            <text:p>9.5548</text:p>
          </table:table-cell>
          <table:table-cell office:value-type="string" table:style-name="c10">
            <text:p>2026-04-28 01:00</text:p>
          </table:table-cell>
          <table:table-cell office:value-type="float" office:value="9.31534" table:style-name="c10">
            <text:p>9.3153</text:p>
          </table:table-cell>
          <table:table-cell office:value-type="float" office:value="-2.7008104812515032" table:style-name="c12">
            <text:p>-2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5:00</text:p>
          </table:table-cell>
          <table:table-cell office:value-type="float" office:value="9.544769999999998" table:style-name="c10">
            <text:p>9.5448</text:p>
          </table:table-cell>
          <table:table-cell office:value-type="string" table:style-name="c10">
            <text:p>2026-05-06 05:00</text:p>
          </table:table-cell>
          <table:table-cell office:value-type="float" office:value="9.825085000000001" table:style-name="c10">
            <text:p>9.8251</text:p>
          </table:table-cell>
          <table:table-cell office:value-type="float" office:value="2.7310731959492296" table:style-name="c11">
            <text:p>+2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10.095044999999999" table:style-name="c10">
            <text:p>10.095</text:p>
          </table:table-cell>
          <table:table-cell office:value-type="string" table:style-name="c10">
            <text:p>2026-05-07 09:00</text:p>
          </table:table-cell>
          <table:table-cell office:value-type="float" office:value="10.05497" table:style-name="c10">
            <text:p>10.055</text:p>
          </table:table-cell>
          <table:table-cell office:value-type="float" office:value="-0.5960833758541728" table:style-name="c12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9:00</text:p>
          </table:table-cell>
          <table:table-cell office:value-type="float" office:value="10.38519" table:style-name="c10">
            <text:p>10.385</text:p>
          </table:table-cell>
          <table:table-cell office:value-type="string" table:style-name="c10">
            <text:p>2026-05-09 19:00</text:p>
          </table:table-cell>
          <table:table-cell office:value-type="float" office:value="10.424785" table:style-name="c10">
            <text:p>10.425</text:p>
          </table:table-cell>
          <table:table-cell office:value-type="float" office:value="0.18060194165923082" table:style-name="c11">
            <text:p>+0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0:00</text:p>
          </table:table-cell>
          <table:table-cell office:value-type="float" office:value="10.535264999999999" table:style-name="c10">
            <text:p>10.535</text:p>
          </table:table-cell>
          <table:table-cell office:value-type="string" table:style-name="c10">
            <text:p>2026-05-11 10:00</text:p>
          </table:table-cell>
          <table:table-cell office:value-type="float" office:value="10.584705" table:style-name="c10">
            <text:p>10.585</text:p>
          </table:table-cell>
          <table:table-cell office:value-type="float" office:value="0.26844293622418913" table:style-name="c11">
            <text:p>+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4:00</text:p>
          </table:table-cell>
          <table:table-cell office:value-type="float" office:value="10.475235" table:style-name="c10">
            <text:p>10.475</text:p>
          </table:table-cell>
          <table:table-cell office:value-type="string" table:style-name="c10">
            <text:p>2026-05-14 04:00</text:p>
          </table:table-cell>
          <table:table-cell office:value-type="float" office:value="10.104945" table:style-name="c10">
            <text:p>10.105</text:p>
          </table:table-cell>
          <table:table-cell office:value-type="float" office:value="-3.727742480765317" table:style-name="c12">
            <text:p>-3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6:00</text:p>
          </table:table-cell>
          <table:table-cell office:value-type="float" office:value="10.64532" table:style-name="c10">
            <text:p>10.645</text:p>
          </table:table-cell>
          <table:table-cell office:value-type="string" table:style-name="c10">
            <text:p>2026-05-15 16:00</text:p>
          </table:table-cell>
          <table:table-cell office:value-type="float" office:value="10.024985" table:style-name="c10">
            <text:p>10.025</text:p>
          </table:table-cell>
          <table:table-cell office:value-type="float" office:value="-6.015553736430645" table:style-name="c12">
            <text:p>-6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3:00</text:p>
          </table:table-cell>
          <table:table-cell office:value-type="float" office:value="54.477225" table:style-name="c1">
            <text:p>54.477</text:p>
          </table:table-cell>
          <table:table-cell office:value-type="string" table:style-name="c1">
            <text:p>2026-03-11 03:00</text:p>
          </table:table-cell>
          <table:table-cell office:value-type="float" office:value="53.87305" table:style-name="c1">
            <text:p>53.873</text:p>
          </table:table-cell>
          <table:table-cell office:value-type="float" office:value="-1.30672446504021" table:style-name="c14">
            <text:p>-1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00</text:p>
          </table:table-cell>
          <table:table-cell office:value-type="float" office:value="56.678324999999994" table:style-name="c1">
            <text:p>56.678</text:p>
          </table:table-cell>
          <table:table-cell office:value-type="string" table:style-name="c1">
            <text:p>2026-03-17 04:00</text:p>
          </table:table-cell>
          <table:table-cell office:value-type="float" office:value="58.03097" table:style-name="c1">
            <text:p>58.031</text:p>
          </table:table-cell>
          <table:table-cell office:value-type="float" office:value="2.1818589222070583" table:style-name="c13">
            <text:p>+2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8:00</text:p>
          </table:table-cell>
          <table:table-cell office:value-type="float" office:value="58.54926" table:style-name="c1">
            <text:p>58.549</text:p>
          </table:table-cell>
          <table:table-cell office:value-type="string" table:style-name="c1">
            <text:p>2026-03-18 18:00</text:p>
          </table:table-cell>
          <table:table-cell office:value-type="float" office:value="55.882045" table:style-name="c1">
            <text:p>55.882</text:p>
          </table:table-cell>
          <table:table-cell office:value-type="float" office:value="-4.746299454433755" table:style-name="c14">
            <text:p>-4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02:00</text:p>
          </table:table-cell>
          <table:table-cell office:value-type="float" office:value="55.857915" table:style-name="c1">
            <text:p>55.858</text:p>
          </table:table-cell>
          <table:table-cell office:value-type="string" table:style-name="c1">
            <text:p>2026-03-21 02:00</text:p>
          </table:table-cell>
          <table:table-cell office:value-type="float" office:value="56.13192" table:style-name="c1">
            <text:p>56.132</text:p>
          </table:table-cell>
          <table:table-cell office:value-type="float" office:value="0.2896586668514223" table:style-name="c13">
            <text:p>+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00</text:p>
          </table:table-cell>
          <table:table-cell office:value-type="float" office:value="53.776875" table:style-name="c1">
            <text:p>53.777</text:p>
          </table:table-cell>
          <table:table-cell office:value-type="string" table:style-name="c1">
            <text:p>2026-04-08 21:00</text:p>
          </table:table-cell>
          <table:table-cell office:value-type="float" office:value="54.282845" table:style-name="c1">
            <text:p>54.283</text:p>
          </table:table-cell>
          <table:table-cell office:value-type="float" office:value="0.7390883030020001" table:style-name="c13">
            <text:p>+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54.737355" table:style-name="c1">
            <text:p>54.737</text:p>
          </table:table-cell>
          <table:table-cell office:value-type="string" table:style-name="c1">
            <text:p>2026-04-10 16:00</text:p>
          </table:table-cell>
          <table:table-cell office:value-type="float" office:value="54.882545" table:style-name="c1">
            <text:p>54.883</text:p>
          </table:table-cell>
          <table:table-cell office:value-type="float" office:value="0.06481824440549566" table:style-name="c13">
            <text:p>+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55.137555" table:style-name="c1">
            <text:p>55.138</text:p>
          </table:table-cell>
          <table:table-cell office:value-type="string" table:style-name="c1">
            <text:p>2026-04-16 15:00</text:p>
          </table:table-cell>
          <table:table-cell office:value-type="float" office:value="54.992490000000004" table:style-name="c1">
            <text:p>54.992</text:p>
          </table:table-cell>
          <table:table-cell office:value-type="float" office:value="-0.4624706110200161" table:style-name="c14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00</text:p>
          </table:table-cell>
          <table:table-cell office:value-type="float" office:value="56.488229999999994" table:style-name="c1">
            <text:p>56.488</text:p>
          </table:table-cell>
          <table:table-cell office:value-type="string" table:style-name="c1">
            <text:p>2026-04-17 19:00</text:p>
          </table:table-cell>
          <table:table-cell office:value-type="float" office:value="56.61168000000001" table:style-name="c1">
            <text:p>56.612</text:p>
          </table:table-cell>
          <table:table-cell office:value-type="float" office:value="0.018204237732399875" table:style-name="c13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3:00</text:p>
          </table:table-cell>
          <table:table-cell office:value-type="float" office:value="55.077524999999994" table:style-name="c1">
            <text:p>55.078</text:p>
          </table:table-cell>
          <table:table-cell office:value-type="string" table:style-name="c1">
            <text:p>2026-04-21 13:00</text:p>
          </table:table-cell>
          <table:table-cell office:value-type="float" office:value="55.362305000000006" table:style-name="c1">
            <text:p>55.362</text:p>
          </table:table-cell>
          <table:table-cell office:value-type="float" office:value="0.3161194195000716" table:style-name="c13">
            <text:p>+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6:00</text:p>
          </table:table-cell>
          <table:table-cell office:value-type="float" office:value="56.498234999999994" table:style-name="c1">
            <text:p>56.498</text:p>
          </table:table-cell>
          <table:table-cell office:value-type="string" table:style-name="c1">
            <text:p>2026-04-23 16:00</text:p>
          </table:table-cell>
          <table:table-cell office:value-type="float" office:value="55.842065" table:style-name="c1">
            <text:p>55.842</text:p>
          </table:table-cell>
          <table:table-cell office:value-type="float" office:value="-1.358977475906975" table:style-name="c14">
            <text:p>-1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30 00:00</text:p>
          </table:table-cell>
          <table:table-cell office:value-type="float" office:value="55.29234" table:style-name="c1">
            <text:p>55.292</text:p>
          </table:table-cell>
          <table:table-cell office:value-type="float" office:value="-3.7279918038187865" table:style-name="c14">
            <text:p>-3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8:00</text:p>
          </table:table-cell>
          <table:table-cell office:value-type="float" office:value="58.26912" table:style-name="c1">
            <text:p>58.269</text:p>
          </table:table-cell>
          <table:table-cell office:value-type="string" table:style-name="c1">
            <text:p>2026-05-09 18:00</text:p>
          </table:table-cell>
          <table:table-cell office:value-type="float" office:value="58.04096500000001" table:style-name="c1">
            <text:p>58.041</text:p>
          </table:table-cell>
          <table:table-cell office:value-type="float" office:value="-0.5906711634481532" table:style-name="c14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00</text:p>
          </table:table-cell>
          <table:table-cell office:value-type="float" office:value="59.449709999999996" table:style-name="c1">
            <text:p>59.45</text:p>
          </table:table-cell>
          <table:table-cell office:value-type="string" table:style-name="c1">
            <text:p>2026-05-11 17:00</text:p>
          </table:table-cell>
          <table:table-cell office:value-type="float" office:value="58.860555000000005" table:style-name="c1">
            <text:p>58.861</text:p>
          </table:table-cell>
          <table:table-cell office:value-type="float" office:value="-1.1889330485295724" table:style-name="c14">
            <text:p>-1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22:00</text:p>
          </table:table-cell>
          <table:table-cell office:value-type="float" office:value="58.2291" table:style-name="c1">
            <text:p>58.229</text:p>
          </table:table-cell>
          <table:table-cell office:value-type="string" table:style-name="c1">
            <text:p>2026-05-13 22:00</text:p>
          </table:table-cell>
          <table:table-cell office:value-type="float" office:value="56.601685" table:style-name="c1">
            <text:p>56.602</text:p>
          </table:table-cell>
          <table:table-cell office:value-type="float" office:value="-2.989161378614802" table:style-name="c14">
            <text:p>-3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58.239104999999995" table:style-name="c1">
            <text:p>58.239</text:p>
          </table:table-cell>
          <table:table-cell office:value-type="string" table:style-name="c1">
            <text:p>2026-05-15 15:00</text:p>
          </table:table-cell>
          <table:table-cell office:value-type="float" office:value="56.83157" table:style-name="c1">
            <text:p>56.832</text:p>
          </table:table-cell>
          <table:table-cell office:value-type="float" office:value="-2.611889912164689" table:style-name="c14">
            <text:p>-2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3:00</text:p>
          </table:table-cell>
          <table:table-cell office:value-type="float" office:value="1.246623" table:style-name="c10">
            <text:p>1.2466</text:p>
          </table:table-cell>
          <table:table-cell office:value-type="string" table:style-name="c10">
            <text:p>2026-03-09 13:00</text:p>
          </table:table-cell>
          <table:table-cell office:value-type="float" office:value="1.2443775000000001" table:style-name="c10">
            <text:p>1.2444</text:p>
          </table:table-cell>
          <table:table-cell office:value-type="float" office:value="-0.37966655697030394" table:style-name="c12">
            <text:p>-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1.328664" table:style-name="c10">
            <text:p>1.3287</text:p>
          </table:table-cell>
          <table:table-cell office:value-type="string" table:style-name="c10">
            <text:p>2026-03-11 15:00</text:p>
          </table:table-cell>
          <table:table-cell office:value-type="float" office:value="1.3073460000000001" table:style-name="c10">
            <text:p>1.3073</text:p>
          </table:table-cell>
          <table:table-cell office:value-type="float" office:value="-1.8011615166814154" table:style-name="c12">
            <text:p>-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00</text:p>
          </table:table-cell>
          <table:table-cell office:value-type="float" office:value="1.3256625" table:style-name="c10">
            <text:p>1.3257</text:p>
          </table:table-cell>
          <table:table-cell office:value-type="string" table:style-name="c10">
            <text:p>2026-03-13 08:00</text:p>
          </table:table-cell>
          <table:table-cell office:value-type="float" office:value="1.3443275000000001" table:style-name="c10">
            <text:p>1.3443</text:p>
          </table:table-cell>
          <table:table-cell office:value-type="float" office:value="1.2052607151141537" table:style-name="c11">
            <text:p>+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00</text:p>
          </table:table-cell>
          <table:table-cell office:value-type="float" office:value="1.346673" table:style-name="c10">
            <text:p>1.3467</text:p>
          </table:table-cell>
          <table:table-cell office:value-type="string" table:style-name="c10">
            <text:p>2026-03-16 02:00</text:p>
          </table:table-cell>
          <table:table-cell office:value-type="float" office:value="1.3663165000000002" table:style-name="c10">
            <text:p>1.3663</text:p>
          </table:table-cell>
          <table:table-cell office:value-type="float" office:value="1.255853003401719" table:style-name="c11">
            <text:p>+1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4:00</text:p>
          </table:table-cell>
          <table:table-cell office:value-type="float" office:value="1.3906949999999998" table:style-name="c10">
            <text:p>1.3907</text:p>
          </table:table-cell>
          <table:table-cell office:value-type="string" table:style-name="c10">
            <text:p>2026-03-17 04:00</text:p>
          </table:table-cell>
          <table:table-cell office:value-type="float" office:value="1.4552720000000001" table:style-name="c10">
            <text:p>1.4553</text:p>
          </table:table-cell>
          <table:table-cell office:value-type="float" office:value="4.434323217671765" table:style-name="c11">
            <text:p>+4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6:00</text:p>
          </table:table-cell>
          <table:table-cell office:value-type="float" office:value="1.2656325" table:style-name="c10">
            <text:p>1.2656</text:p>
          </table:table-cell>
          <table:table-cell office:value-type="string" table:style-name="c10">
            <text:p>2026-04-05 16:00</text:p>
          </table:table-cell>
          <table:table-cell office:value-type="float" office:value="1.2463765000000002" table:style-name="c10">
            <text:p>1.2464</text:p>
          </table:table-cell>
          <table:table-cell office:value-type="float" office:value="-1.7183113284069185" table:style-name="c12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1:00</text:p>
          </table:table-cell>
          <table:table-cell office:value-type="float" office:value="1.2616304999999999" table:style-name="c10">
            <text:p>1.2616</text:p>
          </table:table-cell>
          <table:table-cell office:value-type="string" table:style-name="c10">
            <text:p>2026-04-07 01:00</text:p>
          </table:table-cell>
          <table:table-cell office:value-type="float" office:value="1.2403795000000002" table:style-name="c10">
            <text:p>1.2404</text:p>
          </table:table-cell>
          <table:table-cell office:value-type="float" office:value="-1.8809404671573549" table:style-name="c12">
            <text:p>-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1:00</text:p>
          </table:table-cell>
          <table:table-cell office:value-type="float" office:value="1.268634" table:style-name="c10">
            <text:p>1.2686</text:p>
          </table:table-cell>
          <table:table-cell office:value-type="string" table:style-name="c10">
            <text:p>2026-04-08 21:00</text:p>
          </table:table-cell>
          <table:table-cell office:value-type="float" office:value="1.343328" table:style-name="c10">
            <text:p>1.3433</text:p>
          </table:table-cell>
          <table:table-cell office:value-type="float" office:value="5.676080518731164" table:style-name="c11">
            <text:p>+5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6:00</text:p>
          </table:table-cell>
          <table:table-cell office:value-type="float" office:value="1.3816905" table:style-name="c10">
            <text:p>1.3817</text:p>
          </table:table-cell>
          <table:table-cell office:value-type="string" table:style-name="c10">
            <text:p>2026-04-10 16:00</text:p>
          </table:table-cell>
          <table:table-cell office:value-type="float" office:value="1.3753119999999999" table:style-name="c10">
            <text:p>1.3753</text:p>
          </table:table-cell>
          <table:table-cell office:value-type="float" office:value="-0.6606218026395938" table:style-name="c12">
            <text:p>-0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9:00</text:p>
          </table:table-cell>
          <table:table-cell office:value-type="float" office:value="1.4037015" table:style-name="c10">
            <text:p>1.4037</text:p>
          </table:table-cell>
          <table:table-cell office:value-type="string" table:style-name="c10">
            <text:p>2026-04-12 19:00</text:p>
          </table:table-cell>
          <table:table-cell office:value-type="float" office:value="1.3533230000000003" table:style-name="c10">
            <text:p>1.3533</text:p>
          </table:table-cell>
          <table:table-cell office:value-type="float" office:value="-3.781700929791676" table:style-name="c12">
            <text:p>-3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2 21:00</text:p>
          </table:table-cell>
          <table:table-cell office:value-type="float" office:value="1.362681" table:style-name="c10">
            <text:p>1.3627</text:p>
          </table:table-cell>
          <table:table-cell office:value-type="string" table:style-name="c10">
            <text:p>2026-04-13 21:00</text:p>
          </table:table-cell>
          <table:table-cell office:value-type="float" office:value="1.3903045" table:style-name="c10">
            <text:p>1.3903</text:p>
          </table:table-cell>
          <table:table-cell office:value-type="float" office:value="1.8231912901478964" table:style-name="c11">
            <text:p>+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07:00</text:p>
          </table:table-cell>
          <table:table-cell office:value-type="float" office:value="1.426713" table:style-name="c10">
            <text:p>1.4267</text:p>
          </table:table-cell>
          <table:table-cell office:value-type="string" table:style-name="c10">
            <text:p>2026-04-15 07:00</text:p>
          </table:table-cell>
          <table:table-cell office:value-type="float" office:value="1.3483255" table:style-name="c10">
            <text:p>1.3483</text:p>
          </table:table-cell>
          <table:table-cell office:value-type="float" office:value="-5.683189448368353" table:style-name="c12">
            <text:p>-5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2:00</text:p>
          </table:table-cell>
          <table:table-cell office:value-type="float" office:value="1.3816905" table:style-name="c10">
            <text:p>1.3817</text:p>
          </table:table-cell>
          <table:table-cell office:value-type="string" table:style-name="c10">
            <text:p>2026-04-16 12:00</text:p>
          </table:table-cell>
          <table:table-cell office:value-type="float" office:value="1.4042975000000002" table:style-name="c10">
            <text:p>1.4043</text:p>
          </table:table-cell>
          <table:table-cell office:value-type="float" office:value="1.433013348322243" table:style-name="c11">
            <text:p>+1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20:00</text:p>
          </table:table-cell>
          <table:table-cell office:value-type="float" office:value="1.4327159999999999" table:style-name="c10">
            <text:p>1.4327</text:p>
          </table:table-cell>
          <table:table-cell office:value-type="string" table:style-name="c10">
            <text:p>2026-04-17 20:00</text:p>
          </table:table-cell>
          <table:table-cell office:value-type="float" office:value="1.423288" table:style-name="c10">
            <text:p>1.4233</text:p>
          </table:table-cell>
          <table:table-cell office:value-type="float" office:value="-0.8566354191619108" table:style-name="c12">
            <text:p>-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4:00</text:p>
          </table:table-cell>
          <table:table-cell office:value-type="float" office:value="1.3786889999999998" table:style-name="c10">
            <text:p>1.3787</text:p>
          </table:table-cell>
          <table:table-cell office:value-type="string" table:style-name="c10">
            <text:p>2026-04-20 08:00</text:p>
          </table:table-cell>
          <table:table-cell office:value-type="float" office:value="1.3483255" table:style-name="c10">
            <text:p>1.3483</text:p>
          </table:table-cell>
          <table:table-cell office:value-type="float" office:value="-2.3978433623899065" table:style-name="c12">
            <text:p>-2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6:00</text:p>
          </table:table-cell>
          <table:table-cell office:value-type="float" office:value="1.4107049999999999" table:style-name="c10">
            <text:p>1.4107</text:p>
          </table:table-cell>
          <table:table-cell office:value-type="string" table:style-name="c10">
            <text:p>2026-04-24 16:00</text:p>
          </table:table-cell>
          <table:table-cell office:value-type="float" office:value="1.4262865000000002" table:style-name="c10">
            <text:p>1.4263</text:p>
          </table:table-cell>
          <table:table-cell office:value-type="float" office:value="0.902410729847869" table:style-name="c11">
            <text:p>+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0:00</text:p>
          </table:table-cell>
          <table:table-cell office:value-type="float" office:value="1.5597794999999999" table:style-name="c10">
            <text:p>1.5598</text:p>
          </table:table-cell>
          <table:table-cell office:value-type="string" table:style-name="c10">
            <text:p>2026-05-09 10:00</text:p>
          </table:table-cell>
          <table:table-cell office:value-type="float" office:value="1.5692150000000002" table:style-name="c10">
            <text:p>1.5692</text:p>
          </table:table-cell>
          <table:table-cell office:value-type="float" office:value="0.4038160018772219" table:style-name="c11">
            <text:p>+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0:00</text:p>
          </table:table-cell>
          <table:table-cell office:value-type="float" office:value="1.6238115" table:style-name="c10">
            <text:p>1.6238</text:p>
          </table:table-cell>
          <table:table-cell office:value-type="string" table:style-name="c10">
            <text:p>2026-05-11 20:00</text:p>
          </table:table-cell>
          <table:table-cell office:value-type="float" office:value="1.5512240000000002" table:style-name="c10">
            <text:p>1.5512</text:p>
          </table:table-cell>
          <table:table-cell office:value-type="float" office:value="-4.661156592129068" table:style-name="c12">
            <text:p>-4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2:00</text:p>
          </table:table-cell>
          <table:table-cell office:value-type="float" office:value="1.668834" table:style-name="c10">
            <text:p>1.6688</text:p>
          </table:table-cell>
          <table:table-cell office:value-type="string" table:style-name="c10">
            <text:p>2026-05-14 02:00</text:p>
          </table:table-cell>
          <table:table-cell office:value-type="float" office:value="1.6071960000000003" table:style-name="c10">
            <text:p>1.6072</text:p>
          </table:table-cell>
          <table:table-cell office:value-type="float" office:value="-3.885993741977911" table:style-name="c12">
            <text:p>-3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07:00</text:p>
          </table:table-cell>
          <table:table-cell office:value-type="float" office:value="1.5317655" table:style-name="c10">
            <text:p>1.5318</text:p>
          </table:table-cell>
          <table:table-cell office:value-type="string" table:style-name="c10">
            <text:p>2026-05-18 07:00</text:p>
          </table:table-cell>
          <table:table-cell office:value-type="float" office:value="1.4982505000000002" table:style-name="c10">
            <text:p>1.4983</text:p>
          </table:table-cell>
          <table:table-cell office:value-type="float" office:value="-2.383524289422878" table:style-name="c12">
            <text:p>-2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8 21:00</text:p>
          </table:table-cell>
          <table:table-cell office:value-type="float" office:value="1.5877934999999999" table:style-name="c10">
            <text:p>1.5878</text:p>
          </table:table-cell>
          <table:table-cell office:value-type="string" table:style-name="c10">
            <text:p>2026-05-19 21:00</text:p>
          </table:table-cell>
          <table:table-cell office:value-type="float" office:value="1.633183" table:style-name="c10">
            <text:p>1.6332</text:p>
          </table:table-cell>
          <table:table-cell office:value-type="float" office:value="2.6530381427433802" table:style-name="c11">
            <text:p>+2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08:00</text:p>
          </table:table-cell>
          <table:table-cell office:value-type="float" office:value="1.6508249999999998" table:style-name="c10">
            <text:p>1.6508</text:p>
          </table:table-cell>
          <table:table-cell office:value-type="string" table:style-name="c10">
            <text:p>2026-05-21 08:00</text:p>
          </table:table-cell>
          <table:table-cell office:value-type="float" office:value="1.7241375" table:style-name="c10">
            <text:p>1.7241</text:p>
          </table:table-cell>
          <table:table-cell office:value-type="float" office:value="4.2321838557993985" table:style-name="c11">
            <text:p>+4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9:00</text:p>
          </table:table-cell>
          <table:table-cell office:value-type="float" office:value="1.7698844999999999" table:style-name="c10">
            <text:p>1.7699</text:p>
          </table:table-cell>
          <table:table-cell office:value-type="string" table:style-name="c10">
            <text:p>2026-05-22 09:00</text:p>
          </table:table-cell>
          <table:table-cell office:value-type="float" office:value="2.2638675000000004" table:style-name="c10">
            <text:p>2.2639</text:p>
          </table:table-cell>
          <table:table-cell office:value-type="float" office:value="27.654772323702502" table:style-name="c11">
            <text:p>+27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15:00</text:p>
          </table:table-cell>
          <table:table-cell office:value-type="float" office:value="2.1880935" table:style-name="c10">
            <text:p>2.1881</text:p>
          </table:table-cell>
          <table:table-cell office:value-type="string" table:style-name="c10">
            <text:p>2026-05-24 15:00</text:p>
          </table:table-cell>
          <table:table-cell office:value-type="float" office:value="2.4937525000000003" table:style-name="c10">
            <text:p>2.4938</text:p>
          </table:table-cell>
          <table:table-cell office:value-type="float" office:value="13.74136839913378" table:style-name="c11">
            <text:p>+13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1:00</text:p>
          </table:table-cell>
          <table:table-cell office:value-type="float" office:value="2.46123" table:style-name="c10">
            <text:p>2.4612</text:p>
          </table:table-cell>
          <table:table-cell office:value-type="string" table:style-name="c10">
            <text:p>2026-05-26 11:00</text:p>
          </table:table-cell>
          <table:table-cell office:value-type="float" office:value="2.894552" table:style-name="c10">
            <text:p>2.8946</text:p>
          </table:table-cell>
          <table:table-cell office:value-type="float" office:value="17.37081827183968" table:style-name="c11">
            <text:p>+17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20:00</text:p>
          </table:table-cell>
          <table:table-cell office:value-type="float" office:value="2.673336" table:style-name="c10">
            <text:p>2.6733</text:p>
          </table:table-cell>
          <table:table-cell office:value-type="string" table:style-name="c10">
            <text:p>2026-05-28 20:00</text:p>
          </table:table-cell>
          <table:table-cell office:value-type="float" office:value="2.3898045000000003" table:style-name="c10">
            <text:p>2.3898</text:p>
          </table:table-cell>
          <table:table-cell office:value-type="float" office:value="-10.784604673542697" table:style-name="c12">
            <text:p>-10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02:00</text:p>
          </table:table-cell>
          <table:table-cell office:value-type="float" office:value="2.553276" table:style-name="c10">
            <text:p>2.5533</text:p>
          </table:table-cell>
          <table:table-cell office:value-type="string" table:style-name="c10">
            <text:p>2026-05-30 02:00</text:p>
          </table:table-cell>
          <table:table-cell office:value-type="float" office:value="2.3798095" table:style-name="c10">
            <text:p>2.3798</text:p>
          </table:table-cell>
          <table:table-cell office:value-type="float" office:value="-6.9801987403829475" table:style-name="c12">
            <text:p>-7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22:00</text:p>
          </table:table-cell>
          <table:table-cell office:value-type="float" office:value="2.3221605" table:style-name="c10">
            <text:p>2.3222</text:p>
          </table:table-cell>
          <table:table-cell office:value-type="string" table:style-name="c10">
            <text:p>2026-06-01 22:00</text:p>
          </table:table-cell>
          <table:table-cell office:value-type="float" office:value="2.6236875" table:style-name="c10">
            <text:p>2.6237</text:p>
          </table:table-cell>
          <table:table-cell office:value-type="float" office:value="12.75890485121507" table:style-name="c11">
            <text:p>+12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8 22:00</text:p>
          </table:table-cell>
          <table:table-cell office:value-type="float" office:value="0.11655825" table:style-name="c1">
            <text:p>0.11656</text:p>
          </table:table-cell>
          <table:table-cell office:value-type="string" table:style-name="c1">
            <text:p>2026-03-09 22:00</text:p>
          </table:table-cell>
          <table:table-cell office:value-type="float" office:value="0.12003995" table:style-name="c1">
            <text:p>0.12004</text:p>
          </table:table-cell>
          <table:table-cell office:value-type="float" office:value="2.781218952712483" table:style-name="c13">
            <text:p>+2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5:00</text:p>
          </table:table-cell>
          <table:table-cell office:value-type="float" office:value="0.12086039999999999" table:style-name="c1">
            <text:p>0.12086</text:p>
          </table:table-cell>
          <table:table-cell office:value-type="string" table:style-name="c1">
            <text:p>2026-03-11 05:00</text:p>
          </table:table-cell>
          <table:table-cell office:value-type="float" office:value="0.1189405" table:style-name="c1">
            <text:p>0.11894</text:p>
          </table:table-cell>
          <table:table-cell office:value-type="float" office:value="-1.7852514632584304" table:style-name="c14">
            <text:p>-1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0.12116054999999999" table:style-name="c1">
            <text:p>0.12116</text:p>
          </table:table-cell>
          <table:table-cell office:value-type="string" table:style-name="c1">
            <text:p>2026-03-12 14:00</text:p>
          </table:table-cell>
          <table:table-cell office:value-type="float" office:value="0.11764115" table:style-name="c1">
            <text:p>0.11764</text:p>
          </table:table-cell>
          <table:table-cell office:value-type="float" office:value="-3.0988342813316527" table:style-name="c14">
            <text:p>-3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1:00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3-16 21:00</text:p>
          </table:table-cell>
          <table:table-cell office:value-type="float" office:value="0.13573210000000002" table:style-name="c1">
            <text:p>0.13573</text:p>
          </table:table-cell>
          <table:table-cell office:value-type="float" office:value="5.693266974709421" table:style-name="c13">
            <text:p>+5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0.11175584999999999" table:style-name="c1">
            <text:p>0.11176</text:p>
          </table:table-cell>
          <table:table-cell office:value-type="string" table:style-name="c1">
            <text:p>2026-04-08 20:00</text:p>
          </table:table-cell>
          <table:table-cell office:value-type="float" office:value="0.1157421" table:style-name="c1">
            <text:p>0.11574</text:p>
          </table:table-cell>
          <table:table-cell office:value-type="float" office:value="3.359897081092411" table:style-name="c13">
            <text:p>+3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00</text:p>
          </table:table-cell>
          <table:table-cell office:value-type="float" office:value="0.1150575" table:style-name="c1">
            <text:p>0.11506</text:p>
          </table:table-cell>
          <table:table-cell office:value-type="string" table:style-name="c1">
            <text:p>2026-04-12 19:00</text:p>
          </table:table-cell>
          <table:table-cell office:value-type="float" office:value="0.10884555" table:style-name="c1">
            <text:p>0.10885</text:p>
          </table:table-cell>
          <table:table-cell office:value-type="float" office:value="-5.5881035607848295" table:style-name="c14">
            <text:p>-5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0:00</text:p>
          </table:table-cell>
          <table:table-cell office:value-type="float" office:value="0.11355675" table:style-name="c1">
            <text:p>0.11356</text:p>
          </table:table-cell>
          <table:table-cell office:value-type="string" table:style-name="c1">
            <text:p>2026-04-16 10:00</text:p>
          </table:table-cell>
          <table:table-cell office:value-type="float" office:value="0.12123935000000001" table:style-name="c1">
            <text:p>0.12124</text:p>
          </table:table-cell>
          <table:table-cell office:value-type="float" office:value="6.552003768468184" table:style-name="c13">
            <text:p>+6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00</text:p>
          </table:table-cell>
          <table:table-cell office:value-type="float" office:value="0.12606299999999998" table:style-name="c1">
            <text:p>0.12606</text:p>
          </table:table-cell>
          <table:table-cell office:value-type="string" table:style-name="c1">
            <text:p>2026-04-17 13:00</text:p>
          </table:table-cell>
          <table:table-cell office:value-type="float" office:value="0.1323338" table:style-name="c1">
            <text:p>0.13233</text:p>
          </table:table-cell>
          <table:table-cell office:value-type="float" office:value="4.764494525594354" table:style-name="c13">
            <text:p>+4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4:00</text:p>
          </table:table-cell>
          <table:table-cell office:value-type="float" office:value="0.1352676" table:style-name="c1">
            <text:p>0.13527</text:p>
          </table:table-cell>
          <table:table-cell office:value-type="string" table:style-name="c1">
            <text:p>2026-04-18 14:00</text:p>
          </table:table-cell>
          <table:table-cell office:value-type="float" office:value="0.1283358" table:style-name="c1">
            <text:p>0.12834</text:p>
          </table:table-cell>
          <table:table-cell office:value-type="float" office:value="-5.314164858547055" table:style-name="c14">
            <text:p>-5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1:00</text:p>
          </table:table-cell>
          <table:table-cell office:value-type="float" office:value="0.12246119999999999" table:style-name="c1">
            <text:p>0.12246</text:p>
          </table:table-cell>
          <table:table-cell office:value-type="string" table:style-name="c1">
            <text:p>2026-04-25 01:00</text:p>
          </table:table-cell>
          <table:table-cell office:value-type="float" office:value="0.12583705" table:style-name="c1">
            <text:p>0.12584</text:p>
          </table:table-cell>
          <table:table-cell office:value-type="float" office:value="2.551258469662243" table:style-name="c13">
            <text:p>+2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6:00</text:p>
          </table:table-cell>
          <table:table-cell office:value-type="float" office:value="0.12956475" table:style-name="c1">
            <text:p>0.12956</text:p>
          </table:table-cell>
          <table:table-cell office:value-type="string" table:style-name="c1">
            <text:p>2026-04-26 06:00</text:p>
          </table:table-cell>
          <table:table-cell office:value-type="float" office:value="0.1255372" table:style-name="c1">
            <text:p>0.12554</text:p>
          </table:table-cell>
          <table:table-cell office:value-type="float" office:value="-3.302209021203717" table:style-name="c14">
            <text:p>-3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00</text:p>
          </table:table-cell>
          <table:table-cell office:value-type="float" office:value="0.13156575" table:style-name="c1">
            <text:p>0.13157</text:p>
          </table:table-cell>
          <table:table-cell office:value-type="string" table:style-name="c1">
            <text:p>2026-05-07 02:00</text:p>
          </table:table-cell>
          <table:table-cell office:value-type="float" office:value="0.13883055" table:style-name="c1">
            <text:p>0.13883</text:p>
          </table:table-cell>
          <table:table-cell office:value-type="float" office:value="5.310863754852613" table:style-name="c13">
            <text:p>+5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00</text:p>
          </table:table-cell>
          <table:table-cell office:value-type="float" office:value="0.1496748" table:style-name="c1">
            <text:p>0.14967</text:p>
          </table:table-cell>
          <table:table-cell office:value-type="string" table:style-name="c1">
            <text:p>2026-05-08 06:00</text:p>
          </table:table-cell>
          <table:table-cell office:value-type="float" office:value="0.14702645" table:style-name="c1">
            <text:p>0.14703</text:p>
          </table:table-cell>
          <table:table-cell office:value-type="float" office:value="-1.9657656957283165" table:style-name="c14">
            <text:p>-2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00</text:p>
          </table:table-cell>
          <table:table-cell office:value-type="float" office:value="0.15357674999999998" table:style-name="c1">
            <text:p>0.15358</text:p>
          </table:table-cell>
          <table:table-cell office:value-type="string" table:style-name="c1">
            <text:p>2026-05-09 17:00</text:p>
          </table:table-cell>
          <table:table-cell office:value-type="float" office:value="0.16561715" table:style-name="c1">
            <text:p>0.16562</text:p>
          </table:table-cell>
          <table:table-cell office:value-type="float" office:value="7.62441666277609" table:style-name="c13">
            <text:p>+7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7:00</text:p>
          </table:table-cell>
          <table:table-cell office:value-type="float" office:value="0.1544772" table:style-name="c1">
            <text:p>0.15448</text:p>
          </table:table-cell>
          <table:table-cell office:value-type="string" table:style-name="c1">
            <text:p>2026-05-14 07:00</text:p>
          </table:table-cell>
          <table:table-cell office:value-type="float" office:value="0.1463268" table:style-name="c1">
            <text:p>0.14633</text:p>
          </table:table-cell>
          <table:table-cell office:value-type="float" office:value="-5.465471456758664" table:style-name="c14">
            <text:p>-5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9:00</text:p>
          </table:table-cell>
          <table:table-cell office:value-type="float" office:value="0.09574784999999998" table:style-name="c10">
            <text:p>0.095748</text:p>
          </table:table-cell>
          <table:table-cell office:value-type="string" table:style-name="c10">
            <text:p>2026-03-09 19:00</text:p>
          </table:table-cell>
          <table:table-cell office:value-type="float" office:value="0.0955522" table:style-name="c10">
            <text:p>0.095552</text:p>
          </table:table-cell>
          <table:table-cell office:value-type="float" office:value="-0.4038303186964187" table:style-name="c12">
            <text:p>-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6:00</text:p>
          </table:table-cell>
          <table:table-cell office:value-type="float" office:value="0.09654825" table:style-name="c10">
            <text:p>0.096548</text:p>
          </table:table-cell>
          <table:table-cell office:value-type="string" table:style-name="c10">
            <text:p>2026-03-11 06:00</text:p>
          </table:table-cell>
          <table:table-cell office:value-type="float" office:value="0.09585205000000001" table:style-name="c10">
            <text:p>0.095852</text:p>
          </table:table-cell>
          <table:table-cell office:value-type="float" office:value="-0.9195487727120866" table:style-name="c12">
            <text:p>-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10:00</text:p>
          </table:table-cell>
          <table:table-cell office:value-type="float" office:value="0.09894945" table:style-name="c10">
            <text:p>0.098949</text:p>
          </table:table-cell>
          <table:table-cell office:value-type="string" table:style-name="c10">
            <text:p>2026-03-13 00:00</text:p>
          </table:table-cell>
          <table:table-cell office:value-type="float" office:value="0.09885055000000001" table:style-name="c10">
            <text:p>0.098851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4:00</text:p>
          </table:table-cell>
          <table:table-cell office:value-type="float" office:value="0.0908454" table:style-name="c10">
            <text:p>0.090845</text:p>
          </table:table-cell>
          <table:table-cell office:value-type="string" table:style-name="c10">
            <text:p>2026-04-18 14:00</text:p>
          </table:table-cell>
          <table:table-cell office:value-type="float" office:value="0.08945525" table:style-name="c10">
            <text:p>0.089455</text:p>
          </table:table-cell>
          <table:table-cell office:value-type="float" office:value="-1.727078140170013" table:style-name="c12">
            <text:p>-1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17:00</text:p>
          </table:table-cell>
          <table:table-cell office:value-type="float" office:value="0.09404699999999999" table:style-name="c10">
            <text:p>0.094047</text:p>
          </table:table-cell>
          <table:table-cell office:value-type="string" table:style-name="c10">
            <text:p>2026-04-21 17:00</text:p>
          </table:table-cell>
          <table:table-cell office:value-type="float" office:value="0.09315340000000001" table:style-name="c10">
            <text:p>0.093153</text:p>
          </table:table-cell>
          <table:table-cell office:value-type="float" office:value="-1.1481638399948757" table:style-name="c12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9:00</text:p>
          </table:table-cell>
          <table:table-cell office:value-type="float" office:value="0.0936468" table:style-name="c10">
            <text:p>0.093647</text:p>
          </table:table-cell>
          <table:table-cell office:value-type="string" table:style-name="c10">
            <text:p>2026-04-22 19:00</text:p>
          </table:table-cell>
          <table:table-cell office:value-type="float" office:value="0.09445275" table:style-name="c10">
            <text:p>0.094453</text:p>
          </table:table-cell>
          <table:table-cell office:value-type="float" office:value="0.6590069844885083" table:style-name="c11">
            <text:p>+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0.09314655" table:style-name="c10">
            <text:p>0.093147</text:p>
          </table:table-cell>
          <table:table-cell office:value-type="string" table:style-name="c10">
            <text:p>2026-04-30 10:00</text:p>
          </table:table-cell>
          <table:table-cell office:value-type="float" office:value="0.0945527" table:style-name="c10">
            <text:p>0.094553</text:p>
          </table:table-cell>
          <table:table-cell office:value-type="float" office:value="1.3066926823376734" table:style-name="c11">
            <text:p>+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9:00</text:p>
          </table:table-cell>
          <table:table-cell office:value-type="float" office:value="0.09494744999999999" table:style-name="c10">
            <text:p>0.094947</text:p>
          </table:table-cell>
          <table:table-cell office:value-type="string" table:style-name="c10">
            <text:p>2026-05-02 19:00</text:p>
          </table:table-cell>
          <table:table-cell office:value-type="float" office:value="0.09725135" table:style-name="c10">
            <text:p>0.097251</text:p>
          </table:table-cell>
          <table:table-cell office:value-type="float" office:value="2.2217495586769553" table:style-name="c11">
            <text:p>+2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5:00</text:p>
          </table:table-cell>
          <table:table-cell office:value-type="float" office:value="0.0970485" table:style-name="c10">
            <text:p>0.097048</text:p>
          </table:table-cell>
          <table:table-cell office:value-type="string" table:style-name="c10">
            <text:p>2026-05-05 05:00</text:p>
          </table:table-cell>
          <table:table-cell office:value-type="float" office:value="0.09745125" table:style-name="c10">
            <text:p>0.097451</text:p>
          </table:table-cell>
          <table:table-cell office:value-type="float" office:value="0.21426910385013986" table:style-name="c11">
            <text:p>+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0:00</text:p>
          </table:table-cell>
          <table:table-cell office:value-type="float" office:value="0.1024512" table:style-name="c10">
            <text:p>0.10245</text:p>
          </table:table-cell>
          <table:table-cell office:value-type="string" table:style-name="c10">
            <text:p>2026-05-09 10:00</text:p>
          </table:table-cell>
          <table:table-cell office:value-type="float" office:value="0.10204895" table:style-name="c10">
            <text:p>0.10205</text:p>
          </table:table-cell>
          <table:table-cell office:value-type="float" office:value="-0.5917410933693357" table:style-name="c12">
            <text:p>-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10:00</text:p>
          </table:table-cell>
          <table:table-cell office:value-type="float" office:value="0.10115054999999999" table:style-name="c10">
            <text:p>0.10115</text:p>
          </table:table-cell>
          <table:table-cell office:value-type="string" table:style-name="c10">
            <text:p>2026-05-14 04:00</text:p>
          </table:table-cell>
          <table:table-cell office:value-type="float" office:value="0.0943528" table:style-name="c10">
            <text:p>0.094353</text:p>
          </table:table-cell>
          <table:table-cell office:value-type="float" office:value="-6.906893978530027" table:style-name="c12">
            <text:p>-6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8:00</text:p>
          </table:table-cell>
          <table:table-cell office:value-type="float" office:value="0.09423709499999999" table:style-name="c10">
            <text:p>0.094237</text:p>
          </table:table-cell>
          <table:table-cell office:value-type="string" table:style-name="c10">
            <text:p>2026-06-02 18:00</text:p>
          </table:table-cell>
          <table:table-cell office:value-type="float" office:value="0.09117439" table:style-name="c10">
            <text:p>0.091174</text:p>
          </table:table-cell>
          <table:table-cell office:value-type="float" office:value="-3.4434026278186924" table:style-name="c12">
            <text:p>-3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5:00</text:p>
          </table:table-cell>
          <table:table-cell office:value-type="float" office:value="5.342669999999999e-06" table:style-name="c1">
            <text:p>0.0000053427</text:p>
          </table:table-cell>
          <table:table-cell office:value-type="string" table:style-name="c1">
            <text:p>2026-03-10 05:00</text:p>
          </table:table-cell>
          <table:table-cell office:value-type="float" office:value="5.5572200000000005e-06" table:style-name="c1">
            <text:p>0.0000055572</text:p>
          </table:table-cell>
          <table:table-cell office:value-type="float" office:value="3.8078548220272124" table:style-name="c13">
            <text:p>+3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00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3-11 14:00</text:p>
          </table:table-cell>
          <table:table-cell office:value-type="float" office:value="5.797100000000001e-06" table:style-name="c1">
            <text:p>0.0000057971</text:p>
          </table:table-cell>
          <table:table-cell office:value-type="float" office:value="-0.47125151537826815" table:style-name="c14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5:00</text:p>
          </table:table-cell>
          <table:table-cell office:value-type="float" office:value="5.82291e-06" table:style-name="c1">
            <text:p>0.0000058229</text:p>
          </table:table-cell>
          <table:table-cell office:value-type="string" table:style-name="c1">
            <text:p>2026-03-12 15:00</text:p>
          </table:table-cell>
          <table:table-cell office:value-type="float" office:value="5.8970500000000006e-06" table:style-name="c1">
            <text:p>0.0000058971</text:p>
          </table:table-cell>
          <table:table-cell office:value-type="float" office:value="1.070801318412995" table:style-name="c13">
            <text:p>+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2:00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3-14 02:00</text:p>
          </table:table-cell>
          <table:table-cell office:value-type="float" office:value="5.9170400000000005e-06" table:style-name="c1">
            <text:p>0.000005917</text:p>
          </table:table-cell>
          <table:table-cell office:value-type="float" office:value="-1.6289882218890384" table:style-name="c14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00</text:p>
          </table:table-cell>
          <table:table-cell office:value-type="float" office:value="6.173085e-06" table:style-name="c1">
            <text:p>0.0000061731</text:p>
          </table:table-cell>
          <table:table-cell office:value-type="string" table:style-name="c1">
            <text:p>2026-03-17 05:00</text:p>
          </table:table-cell>
          <table:table-cell office:value-type="float" office:value="6.0869550000000006e-06" table:style-name="c1">
            <text:p>0.000006087</text:p>
          </table:table-cell>
          <table:table-cell office:value-type="float" office:value="-1.5923614051159274" table:style-name="c14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01:00</text:p>
          </table:table-cell>
          <table:table-cell office:value-type="float" office:value="5.86293e-06" table:style-name="c1">
            <text:p>0.0000058629</text:p>
          </table:table-cell>
          <table:table-cell office:value-type="string" table:style-name="c1">
            <text:p>2026-03-21 01:00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1.5718580473415233" table:style-name="c13">
            <text:p>+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6:0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3-22 16:00</text:p>
          </table:table-cell>
          <table:table-cell office:value-type="float" office:value="5.77711e-06" table:style-name="c1">
            <text:p>0.0000057771</text:p>
          </table:table-cell>
          <table:table-cell office:value-type="float" office:value="-4.749087322289247" table:style-name="c14">
            <text:p>-4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3:00</text:p>
          </table:table-cell>
          <table:table-cell office:value-type="float" office:value="6.193095e-06" table:style-name="c1">
            <text:p>0.0000061931</text:p>
          </table:table-cell>
          <table:table-cell office:value-type="string" table:style-name="c1">
            <text:p>2026-03-25 23:00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-1.1049842295330459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21:00</text:p>
          </table:table-cell>
          <table:table-cell office:value-type="float" office:value="5.962979999999999e-06" table:style-name="c1">
            <text:p>0.000005963</text:p>
          </table:table-cell>
          <table:table-cell office:value-type="string" table:style-name="c1">
            <text:p>2026-04-05 16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2.3070398176750273" table:style-name="c14">
            <text:p>-2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00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17 04:00</text:p>
          </table:table-cell>
          <table:table-cell office:value-type="float" office:value="6.166915e-06" table:style-name="c1">
            <text:p>0.0000061669</text:p>
          </table:table-cell>
          <table:table-cell office:value-type="float" office:value="0.8444521495809543" table:style-name="c13">
            <text:p>+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6.333165e-06" table:style-name="c1">
            <text:p>0.0000063332</text:p>
          </table:table-cell>
          <table:table-cell office:value-type="string" table:style-name="c1">
            <text:p>2026-04-18 13:00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-3.4497402651754605" table:style-name="c14">
            <text:p>-3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00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24 15:00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0.18590342661461978" table:style-name="c13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4:00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4-28 04:00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-2.6772420319251977" table:style-name="c14">
            <text:p>-2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2:00</text:p>
          </table:table-cell>
          <table:table-cell office:value-type="float" office:value="6.46323e-06" table:style-name="c1">
            <text:p>0.0000064632</text:p>
          </table:table-cell>
          <table:table-cell office:value-type="string" table:style-name="c1">
            <text:p>2026-04-30 12:00</text:p>
          </table:table-cell>
          <table:table-cell office:value-type="float" office:value="6.276860000000001e-06" table:style-name="c1">
            <text:p>0.0000062769</text:p>
          </table:table-cell>
          <table:table-cell office:value-type="float" office:value="-3.0776785467947154" table:style-name="c14">
            <text:p>-3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8:00</text:p>
          </table:table-cell>
          <table:table-cell office:value-type="float" office:value="6.6533249999999995e-06" table:style-name="c1">
            <text:p>0.0000066533</text:p>
          </table:table-cell>
          <table:table-cell office:value-type="string" table:style-name="c1">
            <text:p>2026-05-11 18:00</text:p>
          </table:table-cell>
          <table:table-cell office:value-type="float" office:value="6.6766600000000005e-06" table:style-name="c1">
            <text:p>0.0000066767</text:p>
          </table:table-cell>
          <table:table-cell office:value-type="float" office:value="0.15012578913553565" table:style-name="c13">
            <text:p>+0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05:00</text:p>
          </table:table-cell>
          <table:table-cell office:value-type="float" office:value="83.2416" table:style-name="c10">
            <text:p>83.242</text:p>
          </table:table-cell>
          <table:table-cell office:value-type="string" table:style-name="c10">
            <text:p>2026-03-10 05:00</text:p>
          </table:table-cell>
          <table:table-cell office:value-type="float" office:value="86.49673000000001" table:style-name="c10">
            <text:p>86.497</text:p>
          </table:table-cell>
          <table:table-cell office:value-type="float" office:value="3.7027436242575984" table:style-name="c11">
            <text:p>+3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88.14405" table:style-name="c10">
            <text:p>88.144</text:p>
          </table:table-cell>
          <table:table-cell office:value-type="string" table:style-name="c10">
            <text:p>2026-03-11 15:00</text:p>
          </table:table-cell>
          <table:table-cell office:value-type="float" office:value="86.49673000000001" table:style-name="c10">
            <text:p>86.497</text:p>
          </table:table-cell>
          <table:table-cell office:value-type="float" office:value="-2.0650593696000863" table:style-name="c12">
            <text:p>-2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1:00</text:p>
          </table:table-cell>
          <table:table-cell office:value-type="float" office:value="88.80438" table:style-name="c10">
            <text:p>88.804</text:p>
          </table:table-cell>
          <table:table-cell office:value-type="string" table:style-name="c10">
            <text:p>2026-03-16 21:00</text:p>
          </table:table-cell>
          <table:table-cell office:value-type="float" office:value="95.722115" table:style-name="c10">
            <text:p>95.722</text:p>
          </table:table-cell>
          <table:table-cell office:value-type="float" office:value="7.57438596172284" table:style-name="c11">
            <text:p>+7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22:00</text:p>
          </table:table-cell>
          <table:table-cell office:value-type="float" office:value="96.218085" table:style-name="c10">
            <text:p>96.218</text:p>
          </table:table-cell>
          <table:table-cell office:value-type="string" table:style-name="c10">
            <text:p>2026-03-17 22:00</text:p>
          </table:table-cell>
          <table:table-cell office:value-type="float" office:value="95.222365" table:style-name="c10">
            <text:p>95.222</text:p>
          </table:table-cell>
          <table:table-cell office:value-type="float" office:value="-1.232688748310673" table:style-name="c12">
            <text:p>-1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00</text:p>
          </table:table-cell>
          <table:table-cell office:value-type="float" office:value="84.312135" table:style-name="c10">
            <text:p>84.312</text:p>
          </table:table-cell>
          <table:table-cell office:value-type="string" table:style-name="c10">
            <text:p>2026-04-11 14:00</text:p>
          </table:table-cell>
          <table:table-cell office:value-type="float" office:value="84.06794500000001" table:style-name="c10">
            <text:p>84.068</text:p>
          </table:table-cell>
          <table:table-cell office:value-type="float" office:value="-0.48894719847267787" table:style-name="c12">
            <text:p>-0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7:00</text:p>
          </table:table-cell>
          <table:table-cell office:value-type="float" office:value="85.02249" table:style-name="c10">
            <text:p>85.022</text:p>
          </table:table-cell>
          <table:table-cell office:value-type="string" table:style-name="c10">
            <text:p>2026-04-12 17:00</text:p>
          </table:table-cell>
          <table:table-cell office:value-type="float" office:value="81.83906" table:style-name="c10">
            <text:p>81.839</text:p>
          </table:table-cell>
          <table:table-cell office:value-type="float" office:value="-3.9366363899010715" table:style-name="c12">
            <text:p>-3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3:00</text:p>
          </table:table-cell>
          <table:table-cell office:value-type="float" office:value="86.26311" table:style-name="c10">
            <text:p>86.263</text:p>
          </table:table-cell>
          <table:table-cell office:value-type="string" table:style-name="c10">
            <text:p>2026-04-14 23:00</text:p>
          </table:table-cell>
          <table:table-cell office:value-type="float" office:value="83.46824500000001" table:style-name="c10">
            <text:p>83.468</text:p>
          </table:table-cell>
          <table:table-cell office:value-type="float" office:value="-3.433354097429364" table:style-name="c12">
            <text:p>-3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86.66331" table:style-name="c10">
            <text:p>86.663</text:p>
          </table:table-cell>
          <table:table-cell office:value-type="string" table:style-name="c10">
            <text:p>2026-04-17 16:00</text:p>
          </table:table-cell>
          <table:table-cell office:value-type="float" office:value="89.90502500000001" table:style-name="c10">
            <text:p>89.905</text:p>
          </table:table-cell>
          <table:table-cell office:value-type="float" office:value="3.533207830424434" table:style-name="c11">
            <text:p>+3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6:00</text:p>
          </table:table-cell>
          <table:table-cell office:value-type="float" office:value="88.06401" table:style-name="c10">
            <text:p>88.064</text:p>
          </table:table-cell>
          <table:table-cell office:value-type="string" table:style-name="c10">
            <text:p>2026-04-23 06:00</text:p>
          </table:table-cell>
          <table:table-cell office:value-type="float" office:value="85.827065" table:style-name="c10">
            <text:p>85.827</text:p>
          </table:table-cell>
          <table:table-cell office:value-type="float" office:value="-2.7349575643159985" table:style-name="c12">
            <text:p>-2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7:00</text:p>
          </table:table-cell>
          <table:table-cell office:value-type="float" office:value="85.86290999999999" table:style-name="c10">
            <text:p>85.863</text:p>
          </table:table-cell>
          <table:table-cell office:value-type="string" table:style-name="c10">
            <text:p>2026-04-24 17:00</text:p>
          </table:table-cell>
          <table:table-cell office:value-type="float" office:value="86.29683000000001" table:style-name="c10">
            <text:p>86.297</text:p>
          </table:table-cell>
          <table:table-cell office:value-type="float" office:value="0.30445350248440306" table:style-name="c11">
            <text:p>+0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89.06450999999998" table:style-name="c10">
            <text:p>89.065</text:p>
          </table:table-cell>
          <table:table-cell office:value-type="string" table:style-name="c10">
            <text:p>2026-05-07 09:00</text:p>
          </table:table-cell>
          <table:table-cell office:value-type="float" office:value="89.54520500000001" table:style-name="c10">
            <text:p>89.545</text:p>
          </table:table-cell>
          <table:table-cell office:value-type="float" office:value="0.33873664740873277" table:style-name="c11">
            <text:p>+0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9:00</text:p>
          </table:table-cell>
          <table:table-cell office:value-type="float" office:value="92.36616" table:style-name="c10">
            <text:p>92.366</text:p>
          </table:table-cell>
          <table:table-cell office:value-type="string" table:style-name="c10">
            <text:p>2026-05-09 19:00</text:p>
          </table:table-cell>
          <table:table-cell office:value-type="float" office:value="93.32331500000001" table:style-name="c10">
            <text:p>93.323</text:p>
          </table:table-cell>
          <table:table-cell office:value-type="float" office:value="0.8342900617661408" table:style-name="c11">
            <text:p>+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0:00</text:p>
          </table:table-cell>
          <table:table-cell office:value-type="float" office:value="94.35715499999999" table:style-name="c10">
            <text:p>94.357</text:p>
          </table:table-cell>
          <table:table-cell office:value-type="string" table:style-name="c10">
            <text:p>2026-05-11 10:00</text:p>
          </table:table-cell>
          <table:table-cell office:value-type="float" office:value="95.25235" table:style-name="c10">
            <text:p>95.252</text:p>
          </table:table-cell>
          <table:table-cell office:value-type="float" office:value="0.7469338730592412" table:style-name="c11">
            <text:p>+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5:00</text:p>
          </table:table-cell>
          <table:table-cell office:value-type="float" office:value="92.336145" table:style-name="c10">
            <text:p>92.336</text:p>
          </table:table-cell>
          <table:table-cell office:value-type="string" table:style-name="c10">
            <text:p>2026-05-15 15:00</text:p>
          </table:table-cell>
          <table:table-cell office:value-type="float" office:value="89.005475" table:style-name="c10">
            <text:p>89.005</text:p>
          </table:table-cell>
          <table:table-cell office:value-type="float" office:value="-3.7998033646791107" table:style-name="c12">
            <text:p>-3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4:00</text:p>
          </table:table-cell>
          <table:table-cell office:value-type="float" office:value="0.8959477499999999" table:style-name="c1">
            <text:p>0.89595</text:p>
          </table:table-cell>
          <table:table-cell office:value-type="string" table:style-name="c1">
            <text:p>2026-03-10 04:00</text:p>
          </table:table-cell>
          <table:table-cell office:value-type="float" office:value="0.94142905" table:style-name="c1">
            <text:p>0.94143</text:p>
          </table:table-cell>
          <table:table-cell office:value-type="float" office:value="4.866286379875384" table:style-name="c13">
            <text:p>+4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1:00</text:p>
          </table:table-cell>
          <table:table-cell office:value-type="float" office:value="0.9776885999999999" table:style-name="c1">
            <text:p>0.97769</text:p>
          </table:table-cell>
          <table:table-cell office:value-type="string" table:style-name="c1">
            <text:p>2026-03-11 11:00</text:p>
          </table:table-cell>
          <table:table-cell office:value-type="float" office:value="0.9529233" table:style-name="c1">
            <text:p>0.95292</text:p>
          </table:table-cell>
          <table:table-cell office:value-type="float" office:value="-2.7278822394676383" table:style-name="c14">
            <text:p>-2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5:00</text:p>
          </table:table-cell>
          <table:table-cell office:value-type="float" office:value="0.9755875499999999" table:style-name="c1">
            <text:p>0.97559</text:p>
          </table:table-cell>
          <table:table-cell office:value-type="string" table:style-name="c1">
            <text:p>2026-03-12 15:00</text:p>
          </table:table-cell>
          <table:table-cell office:value-type="float" office:value="0.9667164" table:style-name="c1">
            <text:p>0.96672</text:p>
          </table:table-cell>
          <table:table-cell office:value-type="float" office:value="-1.1073958542828666" table:style-name="c14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3:00</text:p>
          </table:table-cell>
          <table:table-cell office:value-type="float" office:value="1.02981465" table:style-name="c1">
            <text:p>1.0298</text:p>
          </table:table-cell>
          <table:table-cell office:value-type="string" table:style-name="c1">
            <text:p>2026-03-16 23:00</text:p>
          </table:table-cell>
          <table:table-cell office:value-type="float" office:value="1.0779607500000001" table:style-name="c1">
            <text:p>1.078</text:p>
          </table:table-cell>
          <table:table-cell office:value-type="float" office:value="4.465974188729027" table:style-name="c13">
            <text:p>+4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00</text:p>
          </table:table-cell>
          <table:table-cell office:value-type="float" office:value="1.0740367499999999" table:style-name="c1">
            <text:p>1.074</text:p>
          </table:table-cell>
          <table:table-cell office:value-type="string" table:style-name="c1">
            <text:p>2026-03-18 00:00</text:p>
          </table:table-cell>
          <table:table-cell office:value-type="float" office:value="1.0287853500000002" table:style-name="c1">
            <text:p>1.0288</text:p>
          </table:table-cell>
          <table:table-cell office:value-type="float" office:value="-4.404685585912194" table:style-name="c14">
            <text:p>-4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0:00</text:p>
          </table:table-cell>
          <table:table-cell office:value-type="float" office:value="0.9602799" table:style-name="c1">
            <text:p>0.96028</text:p>
          </table:table-cell>
          <table:table-cell office:value-type="string" table:style-name="c1">
            <text:p>2026-04-09 00:00</text:p>
          </table:table-cell>
          <table:table-cell office:value-type="float" office:value="0.9131432" table:style-name="c1">
            <text:p>0.91314</text:p>
          </table:table-cell>
          <table:table-cell office:value-type="float" office:value="-5.098729365969246" table:style-name="c14">
            <text:p>-5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0.9328662" table:style-name="c1">
            <text:p>0.93287</text:p>
          </table:table-cell>
          <table:table-cell office:value-type="string" table:style-name="c1">
            <text:p>2026-04-10 16:00</text:p>
          </table:table-cell>
          <table:table-cell office:value-type="float" office:value="0.9449273" table:style-name="c1">
            <text:p>0.94493</text:p>
          </table:table-cell>
          <table:table-cell office:value-type="float" office:value="1.0904232919254797" table:style-name="c13">
            <text:p>+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0.94697325" table:style-name="c1">
            <text:p>0.94697</text:p>
          </table:table-cell>
          <table:table-cell office:value-type="string" table:style-name="c1">
            <text:p>2026-04-12 17:00</text:p>
          </table:table-cell>
          <table:table-cell office:value-type="float" office:value="0.9025485000000001" table:style-name="c1">
            <text:p>0.90255</text:p>
          </table:table-cell>
          <table:table-cell office:value-type="float" office:value="-4.881758217721554" table:style-name="c14">
            <text:p>-4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0:00</text:p>
          </table:table-cell>
          <table:table-cell office:value-type="float" office:value="0.9362678999999999" table:style-name="c1">
            <text:p>0.93627</text:p>
          </table:table-cell>
          <table:table-cell office:value-type="string" table:style-name="c1">
            <text:p>2026-04-14 20:00</text:p>
          </table:table-cell>
          <table:table-cell office:value-type="float" office:value="0.9313341" table:style-name="c1">
            <text:p>0.93133</text:p>
          </table:table-cell>
          <table:table-cell office:value-type="float" office:value="-0.725811155749323" table:style-name="c14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00</text:p>
          </table:table-cell>
          <table:table-cell office:value-type="float" office:value="0.9961978499999999" table:style-name="c1">
            <text:p>0.9962</text:p>
          </table:table-cell>
          <table:table-cell office:value-type="string" table:style-name="c1">
            <text:p>2026-04-17 19:00</text:p>
          </table:table-cell>
          <table:table-cell office:value-type="float" office:value="1.0132931" table:style-name="c1">
            <text:p>1.0133</text:p>
          </table:table-cell>
          <table:table-cell office:value-type="float" office:value="1.5127192949774049" table:style-name="c13">
            <text:p>+1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00</text:p>
          </table:table-cell>
          <table:table-cell office:value-type="float" office:value="0.9715855499999999" table:style-name="c1">
            <text:p>0.97159</text:p>
          </table:table-cell>
          <table:table-cell office:value-type="string" table:style-name="c1">
            <text:p>2026-05-06 13:00</text:p>
          </table:table-cell>
          <table:table-cell office:value-type="float" office:value="1.0236879" table:style-name="c1">
            <text:p>1.0237</text:p>
          </table:table-cell>
          <table:table-cell office:value-type="float" office:value="5.151990773010184" table:style-name="c13">
            <text:p>+5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8:00</text:p>
          </table:table-cell>
          <table:table-cell office:value-type="float" office:value="1.0043019" table:style-name="c1">
            <text:p>1.0043</text:p>
          </table:table-cell>
          <table:table-cell office:value-type="string" table:style-name="c1">
            <text:p>2026-05-08 08:00</text:p>
          </table:table-cell>
          <table:table-cell office:value-type="float" office:value="0.9677159" table:style-name="c1">
            <text:p>0.96772</text:p>
          </table:table-cell>
          <table:table-cell office:value-type="float" office:value="-3.835546271902901" table:style-name="c14">
            <text:p>-3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6:00</text:p>
          </table:table-cell>
          <table:table-cell office:value-type="float" office:value="1.01240595" table:style-name="c1">
            <text:p>1.0124</text:p>
          </table:table-cell>
          <table:table-cell office:value-type="string" table:style-name="c1">
            <text:p>2026-05-09 16:00</text:p>
          </table:table-cell>
          <table:table-cell office:value-type="float" office:value="1.04857545" table:style-name="c1">
            <text:p>1.0486</text:p>
          </table:table-cell>
          <table:table-cell office:value-type="float" office:value="3.3655864700765425" table:style-name="c13">
            <text:p>+3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1:00</text:p>
          </table:table-cell>
          <table:table-cell office:value-type="float" office:value="1.0812403499999999" table:style-name="c1">
            <text:p>1.0812</text:p>
          </table:table-cell>
          <table:table-cell office:value-type="string" table:style-name="c1">
            <text:p>2026-05-11 01:00</text:p>
          </table:table-cell>
          <table:table-cell office:value-type="float" office:value="1.33603165" table:style-name="c1">
            <text:p>1.336</text:p>
          </table:table-cell>
          <table:table-cell office:value-type="float" office:value="23.317717724061083" table:style-name="c13">
            <text:p>+23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1.2205099499999998" table:style-name="c1">
            <text:p>1.2205</text:p>
          </table:table-cell>
          <table:table-cell office:value-type="string" table:style-name="c1">
            <text:p>2026-05-15 15:00</text:p>
          </table:table-cell>
          <table:table-cell office:value-type="float" office:value="1.08695625" table:style-name="c1">
            <text:p>1.087</text:p>
          </table:table-cell>
          <table:table-cell office:value-type="float" office:value="-11.120476776428557" table:style-name="c14">
            <text:p>-11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08:00</text:p>
          </table:table-cell>
          <table:table-cell office:value-type="float" office:value="1.318659" table:style-name="c10">
            <text:p>1.3187</text:p>
          </table:table-cell>
          <table:table-cell office:value-type="string" table:style-name="c10">
            <text:p>2026-03-09 08:00</text:p>
          </table:table-cell>
          <table:table-cell office:value-type="float" office:value="1.3243375" table:style-name="c10">
            <text:p>1.3243</text:p>
          </table:table-cell>
          <table:table-cell office:value-type="float" office:value="0.2298660485766213" table:style-name="c11">
            <text:p>+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1.348674" table:style-name="c10">
            <text:p>1.3487</text:p>
          </table:table-cell>
          <table:table-cell office:value-type="string" table:style-name="c10">
            <text:p>2026-03-11 15:00</text:p>
          </table:table-cell>
          <table:table-cell office:value-type="float" office:value="1.3143425" table:style-name="c10">
            <text:p>1.3143</text:p>
          </table:table-cell>
          <table:table-cell office:value-type="float" office:value="-2.740385790598765" table:style-name="c12">
            <text:p>-2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16:00</text:p>
          </table:table-cell>
          <table:table-cell office:value-type="float" office:value="1.3536765" table:style-name="c10">
            <text:p>1.3537</text:p>
          </table:table-cell>
          <table:table-cell office:value-type="string" table:style-name="c10">
            <text:p>2026-03-18 16:00</text:p>
          </table:table-cell>
          <table:table-cell office:value-type="float" office:value="1.3063465" table:style-name="c10">
            <text:p>1.3063</text:p>
          </table:table-cell>
          <table:table-cell office:value-type="float" office:value="-3.6893147405232973" table:style-name="c12">
            <text:p>-3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6:00</text:p>
          </table:table-cell>
          <table:table-cell office:value-type="float" office:value="1.34067" table:style-name="c10">
            <text:p>1.3407</text:p>
          </table:table-cell>
          <table:table-cell office:value-type="string" table:style-name="c10">
            <text:p>2026-03-25 16:00</text:p>
          </table:table-cell>
          <table:table-cell office:value-type="float" office:value="1.3303345" table:style-name="c10">
            <text:p>1.3303</text:p>
          </table:table-cell>
          <table:table-cell office:value-type="float" office:value="-0.9692794397950455" table:style-name="c12">
            <text:p>-1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00</text:p>
          </table:table-cell>
          <table:table-cell office:value-type="float" office:value="1.2596294999999997" table:style-name="c10">
            <text:p>1.2596</text:p>
          </table:table-cell>
          <table:table-cell office:value-type="string" table:style-name="c10">
            <text:p>2026-04-07 09:00</text:p>
          </table:table-cell>
          <table:table-cell office:value-type="float" office:value="1.2303845000000002" table:style-name="c10">
            <text:p>1.2304</text:p>
          </table:table-cell>
          <table:table-cell office:value-type="float" office:value="-2.516973333468253" table:style-name="c12">
            <text:p>-2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6:00</text:p>
          </table:table-cell>
          <table:table-cell office:value-type="float" office:value="1.30065" table:style-name="c10">
            <text:p>1.3007</text:p>
          </table:table-cell>
          <table:table-cell office:value-type="string" table:style-name="c10">
            <text:p>2026-04-10 16:00</text:p>
          </table:table-cell>
          <table:table-cell office:value-type="float" office:value="1.2763615" table:style-name="c10">
            <text:p>1.2764</text:p>
          </table:table-cell>
          <table:table-cell office:value-type="float" office:value="-2.0635794901395443" table:style-name="c12">
            <text:p>-2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21:00</text:p>
          </table:table-cell>
          <table:table-cell office:value-type="float" office:value="1.3056524999999999" table:style-name="c10">
            <text:p>1.3057</text:p>
          </table:table-cell>
          <table:table-cell office:value-type="string" table:style-name="c10">
            <text:p>2026-04-11 21:00</text:p>
          </table:table-cell>
          <table:table-cell office:value-type="float" office:value="1.4362815000000002" table:style-name="c10">
            <text:p>1.4363</text:p>
          </table:table-cell>
          <table:table-cell office:value-type="float" office:value="9.784982855813507" table:style-name="c11">
            <text:p>+9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2 20:00</text:p>
          </table:table-cell>
          <table:table-cell office:value-type="float" office:value="1.4737365" table:style-name="c10">
            <text:p>1.4737</text:p>
          </table:table-cell>
          <table:table-cell office:value-type="string" table:style-name="c10">
            <text:p>2026-04-13 20:00</text:p>
          </table:table-cell>
          <table:table-cell office:value-type="float" office:value="1.4322835" table:style-name="c10">
            <text:p>1.4323</text:p>
          </table:table-cell>
          <table:table-cell office:value-type="float" office:value="-3.007059587416061" table:style-name="c12">
            <text:p>-3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21:00</text:p>
          </table:table-cell>
          <table:table-cell office:value-type="float" office:value="1.4067029999999998" table:style-name="c10">
            <text:p>1.4067</text:p>
          </table:table-cell>
          <table:table-cell office:value-type="string" table:style-name="c10">
            <text:p>2026-04-16 21:00</text:p>
          </table:table-cell>
          <table:table-cell office:value-type="float" office:value="1.4182905000000001" table:style-name="c10">
            <text:p>1.4183</text:p>
          </table:table-cell>
          <table:table-cell office:value-type="float" office:value="0.6221880020516268" table:style-name="c11">
            <text:p>+0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00</text:p>
          </table:table-cell>
          <table:table-cell office:value-type="float" office:value="1.4517255" table:style-name="c10">
            <text:p>1.4517</text:p>
          </table:table-cell>
          <table:table-cell office:value-type="string" table:style-name="c10">
            <text:p>2026-04-18 08:00</text:p>
          </table:table-cell>
          <table:table-cell office:value-type="float" office:value="1.393303" table:style-name="c10">
            <text:p>1.3933</text:p>
          </table:table-cell>
          <table:table-cell office:value-type="float" office:value="-4.21620428221452" table:style-name="c12">
            <text:p>-4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16:00</text:p>
          </table:table-cell>
          <table:table-cell office:value-type="float" office:value="1.350675" table:style-name="c10">
            <text:p>1.3507</text:p>
          </table:table-cell>
          <table:table-cell office:value-type="string" table:style-name="c10">
            <text:p>2026-05-04 16:00</text:p>
          </table:table-cell>
          <table:table-cell office:value-type="float" office:value="1.443278" table:style-name="c10">
            <text:p>1.4433</text:p>
          </table:table-cell>
          <table:table-cell office:value-type="float" office:value="6.642448203898033" table:style-name="c11">
            <text:p>+6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22:00</text:p>
          </table:table-cell>
          <table:table-cell office:value-type="float" office:value="1.5857925" table:style-name="c10">
            <text:p>1.5858</text:p>
          </table:table-cell>
          <table:table-cell office:value-type="string" table:style-name="c10">
            <text:p>2026-05-05 22:00</text:p>
          </table:table-cell>
          <table:table-cell office:value-type="float" office:value="1.977011" table:style-name="c10">
            <text:p>1.977</text:p>
          </table:table-cell>
          <table:table-cell office:value-type="float" office:value="24.421004325029916" table:style-name="c11">
            <text:p>+24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3:00</text:p>
          </table:table-cell>
          <table:table-cell office:value-type="float" office:value="1.9899944999999999" table:style-name="c10">
            <text:p>1.99</text:p>
          </table:table-cell>
          <table:table-cell office:value-type="string" table:style-name="c10">
            <text:p>2026-05-06 23:00</text:p>
          </table:table-cell>
          <table:table-cell office:value-type="float" office:value="2.4567710000000003" table:style-name="c10">
            <text:p>2.4568</text:p>
          </table:table-cell>
          <table:table-cell office:value-type="float" office:value="23.209381471707612" table:style-name="c11">
            <text:p>+23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3:00</text:p>
          </table:table-cell>
          <table:table-cell office:value-type="float" office:value="2.6563274999999997" table:style-name="c10">
            <text:p>2.6563</text:p>
          </table:table-cell>
          <table:table-cell office:value-type="string" table:style-name="c10">
            <text:p>2026-05-08 03:00</text:p>
          </table:table-cell>
          <table:table-cell office:value-type="float" office:value="2.6886550000000002" table:style-name="c10">
            <text:p>2.6887</text:p>
          </table:table-cell>
          <table:table-cell office:value-type="float" office:value="1.0146670037862515" table:style-name="c11">
            <text:p>+1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7:00</text:p>
          </table:table-cell>
          <table:table-cell office:value-type="float" office:value="2.747373" table:style-name="c10">
            <text:p>2.7474</text:p>
          </table:table-cell>
          <table:table-cell office:value-type="string" table:style-name="c10">
            <text:p>2026-05-09 07:00</text:p>
          </table:table-cell>
          <table:table-cell office:value-type="float" office:value="2.588705" table:style-name="c10">
            <text:p>2.5887</text:p>
          </table:table-cell>
          <table:table-cell office:value-type="float" office:value="-5.963617655665976" table:style-name="c12">
            <text:p>-6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5:00</text:p>
          </table:table-cell>
          <table:table-cell office:value-type="float" office:value="2.1420705" table:style-name="c10">
            <text:p>2.1421</text:p>
          </table:table-cell>
          <table:table-cell office:value-type="string" table:style-name="c10">
            <text:p>2026-05-15 04:00</text:p>
          </table:table-cell>
          <table:table-cell office:value-type="float" office:value="2.100949" table:style-name="c10">
            <text:p>2.1009</text:p>
          </table:table-cell>
          <table:table-cell office:value-type="float" office:value="-2.1157705617532274" table:style-name="c12">
            <text:p>-2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6:00</text:p>
          </table:table-cell>
          <table:table-cell office:value-type="float" office:value="2.0800395000000003" table:style-name="c10">
            <text:p>2.08</text:p>
          </table:table-cell>
          <table:table-cell office:value-type="string" table:style-name="c10">
            <text:p>2026-06-02 16:00</text:p>
          </table:table-cell>
          <table:table-cell office:value-type="float" office:value="1.971014" table:style-name="c10">
            <text:p>1.971</text:p>
          </table:table-cell>
          <table:table-cell office:value-type="float" office:value="-5.4309332580463" table:style-name="c12">
            <text:p>-5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7 19:00</text:p>
          </table:table-cell>
          <table:table-cell office:value-type="float" office:value="0.286143" table:style-name="c1">
            <text:p>0.28614</text:p>
          </table:table-cell>
          <table:table-cell office:value-type="string" table:style-name="c1">
            <text:p>2026-03-08 19:00</text:p>
          </table:table-cell>
          <table:table-cell office:value-type="float" office:value="0.2894552" table:style-name="c1">
            <text:p>0.28946</text:p>
          </table:table-cell>
          <table:table-cell office:value-type="float" office:value="0.9553192128411547" table:style-name="c13">
            <text:p>+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9:00</text:p>
          </table:table-cell>
          <table:table-cell office:value-type="float" office:value="0.2873436" table:style-name="c1">
            <text:p>0.28734</text:p>
          </table:table-cell>
          <table:table-cell office:value-type="string" table:style-name="c1">
            <text:p>2026-03-12 09:00</text:p>
          </table:table-cell>
          <table:table-cell office:value-type="float" office:value="0.28975505" table:style-name="c1">
            <text:p>0.28976</text:p>
          </table:table-cell>
          <table:table-cell office:value-type="float" office:value="0.6376441497392138" table:style-name="c13">
            <text:p>+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1:00</text:p>
          </table:table-cell>
          <table:table-cell office:value-type="float" office:value="0.2903451" table:style-name="c1">
            <text:p>0.29035</text:p>
          </table:table-cell>
          <table:table-cell office:value-type="string" table:style-name="c1">
            <text:p>2026-03-14 01:00</text:p>
          </table:table-cell>
          <table:table-cell office:value-type="float" office:value="0.2930534" table:style-name="c1">
            <text:p>0.29305</text:p>
          </table:table-cell>
          <table:table-cell office:value-type="float" office:value="0.7310218954616587" table:style-name="c13">
            <text:p>+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3:00</text:p>
          </table:table-cell>
          <table:table-cell office:value-type="float" office:value="0.29724854999999994" table:style-name="c1">
            <text:p>0.29725</text:p>
          </table:table-cell>
          <table:table-cell office:value-type="string" table:style-name="c1">
            <text:p>2026-03-15 13:00</text:p>
          </table:table-cell>
          <table:table-cell office:value-type="float" office:value="0.2976511" table:style-name="c1">
            <text:p>0.29765</text:p>
          </table:table-cell>
          <table:table-cell office:value-type="float" office:value="-0.06474532807643207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00</text:p>
          </table:table-cell>
          <table:table-cell office:value-type="float" office:value="0.2999499" table:style-name="c1">
            <text:p>0.29995</text:p>
          </table:table-cell>
          <table:table-cell office:value-type="string" table:style-name="c1">
            <text:p>2026-03-18 09:00</text:p>
          </table:table-cell>
          <table:table-cell office:value-type="float" office:value="0.30264860000000005" table:style-name="c1">
            <text:p>0.30265</text:p>
          </table:table-cell>
          <table:table-cell office:value-type="float" office:value="0.6980183852703492" table:style-name="c13">
            <text:p>+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23:00</text:p>
          </table:table-cell>
          <table:table-cell office:value-type="float" office:value="0.30425204999999994" table:style-name="c1">
            <text:p>0.30425</text:p>
          </table:table-cell>
          <table:table-cell office:value-type="string" table:style-name="c1">
            <text:p>2026-03-19 23:00</text:p>
          </table:table-cell>
          <table:table-cell office:value-type="float" office:value="0.30414785000000005" table:style-name="c1">
            <text:p>0.30415</text:p>
          </table:table-cell>
          <table:table-cell office:value-type="float" office:value="-0.2340794588400974" table:style-name="c14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1:00</text:p>
          </table:table-cell>
          <table:table-cell office:value-type="float" office:value="0.30735359999999995" table:style-name="c1">
            <text:p>0.30735</text:p>
          </table:table-cell>
          <table:table-cell office:value-type="string" table:style-name="c1">
            <text:p>2026-03-21 11:00</text:p>
          </table:table-cell>
          <table:table-cell office:value-type="float" office:value="0.31024480000000004" table:style-name="c1">
            <text:p>0.31024</text:p>
          </table:table-cell>
          <table:table-cell office:value-type="float" office:value="0.7388950852698972" table:style-name="c13">
            <text:p>+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23:00</text:p>
          </table:table-cell>
          <table:table-cell office:value-type="float" office:value="0.31225604999999995" table:style-name="c1">
            <text:p>0.31226</text:p>
          </table:table-cell>
          <table:table-cell office:value-type="string" table:style-name="c1">
            <text:p>2026-03-22 23:00</text:p>
          </table:table-cell>
          <table:table-cell office:value-type="float" office:value="0.31154415" table:style-name="c1">
            <text:p>0.31154</text:p>
          </table:table-cell>
          <table:table-cell office:value-type="float" office:value="-0.42743023100749733" table:style-name="c14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4:00</text:p>
          </table:table-cell>
          <table:table-cell office:value-type="float" office:value="0.31025505" table:style-name="c1">
            <text:p>0.31026</text:p>
          </table:table-cell>
          <table:table-cell office:value-type="string" table:style-name="c1">
            <text:p>2026-03-25 04:00</text:p>
          </table:table-cell>
          <table:table-cell office:value-type="float" office:value="0.30734625" table:style-name="c1">
            <text:p>0.30735</text:p>
          </table:table-cell>
          <table:table-cell office:value-type="float" office:value="-1.1355770530568243" table:style-name="c14">
            <text:p>-1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7 06:00</text:p>
          </table:table-cell>
          <table:table-cell office:value-type="float" office:value="0.31485735" table:style-name="c1">
            <text:p>0.31486</text:p>
          </table:table-cell>
          <table:table-cell office:value-type="string" table:style-name="c1">
            <text:p>2026-03-28 06:00</text:p>
          </table:table-cell>
          <table:table-cell office:value-type="float" office:value="0.31034475" table:style-name="c1">
            <text:p>0.31034</text:p>
          </table:table-cell>
          <table:table-cell office:value-type="float" office:value="-1.6302554649748502" table:style-name="c14">
            <text:p>-1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10:00</text:p>
          </table:table-cell>
          <table:table-cell office:value-type="float" office:value="0.32016" table:style-name="c1">
            <text:p>0.32016</text:p>
          </table:table-cell>
          <table:table-cell office:value-type="string" table:style-name="c1">
            <text:p>2026-03-30 10:00</text:p>
          </table:table-cell>
          <table:table-cell office:value-type="float" office:value="0.32273855" table:style-name="c1">
            <text:p>0.32274</text:p>
          </table:table-cell>
          <table:table-cell office:value-type="float" office:value="0.6038841949494111" table:style-name="c13">
            <text:p>+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9:00</text:p>
          </table:table-cell>
          <table:table-cell office:value-type="float" office:value="0.31745865" table:style-name="c1">
            <text:p>0.31746</text:p>
          </table:table-cell>
          <table:table-cell office:value-type="string" table:style-name="c1">
            <text:p>2026-04-05 09:00</text:p>
          </table:table-cell>
          <table:table-cell office:value-type="float" office:value="0.31784100000000004" table:style-name="c1">
            <text:p>0.31784</text:p>
          </table:table-cell>
          <table:table-cell office:value-type="float" office:value="-0.07969987870861672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2:00</text:p>
          </table:table-cell>
          <table:table-cell office:value-type="float" office:value="0.3179589" table:style-name="c1">
            <text:p>0.31796</text:p>
          </table:table-cell>
          <table:table-cell office:value-type="string" table:style-name="c1">
            <text:p>2026-04-09 12:00</text:p>
          </table:table-cell>
          <table:table-cell office:value-type="float" office:value="0.31764110000000007" table:style-name="c1">
            <text:p>0.31764</text:p>
          </table:table-cell>
          <table:table-cell office:value-type="float" office:value="-0.2996502248875266" table:style-name="c14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2:00</text:p>
          </table:table-cell>
          <table:table-cell office:value-type="float" office:value="0.32176079999999996" table:style-name="c1">
            <text:p>0.32176</text:p>
          </table:table-cell>
          <table:table-cell office:value-type="string" table:style-name="c1">
            <text:p>2026-04-13 12:00</text:p>
          </table:table-cell>
          <table:table-cell office:value-type="float" office:value="0.32153915" table:style-name="c1">
            <text:p>0.32154</text:p>
          </table:table-cell>
          <table:table-cell office:value-type="float" office:value="-0.2686488723455338" table:style-name="c14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3:00</text:p>
          </table:table-cell>
          <table:table-cell office:value-type="float" office:value="0.32706345000000003" table:style-name="c1">
            <text:p>0.32706</text:p>
          </table:table-cell>
          <table:table-cell office:value-type="string" table:style-name="c1">
            <text:p>2026-04-16 13:00</text:p>
          </table:table-cell>
          <table:table-cell office:value-type="float" office:value="0.3264367" table:style-name="c1">
            <text:p>0.32644</text:p>
          </table:table-cell>
          <table:table-cell office:value-type="float" office:value="-0.39114641617703505" table:style-name="c14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9:00</text:p>
          </table:table-cell>
          <table:table-cell office:value-type="float" office:value="0.3271635" table:style-name="c1">
            <text:p>0.32716</text:p>
          </table:table-cell>
          <table:table-cell office:value-type="string" table:style-name="c1">
            <text:p>2026-04-18 19:00</text:p>
          </table:table-cell>
          <table:table-cell office:value-type="float" office:value="0.32923530000000006" table:style-name="c1">
            <text:p>0.32924</text:p>
          </table:table-cell>
          <table:table-cell office:value-type="float" office:value="0.432095461535309" table:style-name="c13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09:00</text:p>
          </table:table-cell>
          <table:table-cell office:value-type="float" office:value="0.33386685" table:style-name="c1">
            <text:p>0.33387</text:p>
          </table:table-cell>
          <table:table-cell office:value-type="string" table:style-name="c1">
            <text:p>2026-04-20 09:00</text:p>
          </table:table-cell>
          <table:table-cell office:value-type="float" office:value="0.32953515" table:style-name="c1">
            <text:p>0.32954</text:p>
          </table:table-cell>
          <table:table-cell office:value-type="float" office:value="-1.4947398236302867" table:style-name="c14">
            <text:p>-1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6:00</text:p>
          </table:table-cell>
          <table:table-cell office:value-type="float" office:value="0.32906445" table:style-name="c1">
            <text:p>0.32906</text:p>
          </table:table-cell>
          <table:table-cell office:value-type="string" table:style-name="c1">
            <text:p>2026-05-03 06:00</text:p>
          </table:table-cell>
          <table:table-cell office:value-type="float" office:value="0.34032975000000004" table:style-name="c1">
            <text:p>0.34033</text:p>
          </table:table-cell>
          <table:table-cell office:value-type="float" office:value="3.2166892624681864" table:style-name="c13">
            <text:p>+3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7:00</text:p>
          </table:table-cell>
          <table:table-cell office:value-type="float" office:value="0.33726855" table:style-name="c1">
            <text:p>0.33727</text:p>
          </table:table-cell>
          <table:table-cell office:value-type="string" table:style-name="c1">
            <text:p>2026-05-04 07:00</text:p>
          </table:table-cell>
          <table:table-cell office:value-type="float" office:value="0.33983" table:style-name="c1">
            <text:p>0.33983</text:p>
          </table:table-cell>
          <table:table-cell office:value-type="float" office:value="0.5580507966129522" table:style-name="c13">
            <text:p>+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1:00</text:p>
          </table:table-cell>
          <table:table-cell office:value-type="float" office:value="0.34087035" table:style-name="c1">
            <text:p>0.34087</text:p>
          </table:table-cell>
          <table:table-cell office:value-type="string" table:style-name="c1">
            <text:p>2026-05-05 11:00</text:p>
          </table:table-cell>
          <table:table-cell office:value-type="float" office:value="0.34112935" table:style-name="c1">
            <text:p>0.34113</text:p>
          </table:table-cell>
          <table:table-cell office:value-type="float" office:value="-0.1240699200296902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6:00</text:p>
          </table:table-cell>
          <table:table-cell office:value-type="float" office:value="0.34327155" table:style-name="c1">
            <text:p>0.34327</text:p>
          </table:table-cell>
          <table:table-cell office:value-type="string" table:style-name="c1">
            <text:p>2026-05-06 16:00</text:p>
          </table:table-cell>
          <table:table-cell office:value-type="float" office:value="0.34462760000000003" table:style-name="c1">
            <text:p>0.34463</text:p>
          </table:table-cell>
          <table:table-cell office:value-type="float" office:value="0.1943474277434465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7:00</text:p>
          </table:table-cell>
          <table:table-cell office:value-type="float" office:value="0.34687334999999997" table:style-name="c1">
            <text:p>0.34687</text:p>
          </table:table-cell>
          <table:table-cell office:value-type="string" table:style-name="c1">
            <text:p>2026-05-07 17:00</text:p>
          </table:table-cell>
          <table:table-cell office:value-type="float" office:value="0.3492253" table:style-name="c1">
            <text:p>0.34923</text:p>
          </table:table-cell>
          <table:table-cell office:value-type="float" office:value="0.4767874572376707" table:style-name="c13">
            <text:p>+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00</text:p>
          </table:table-cell>
          <table:table-cell office:value-type="float" office:value="0.35167574999999995" table:style-name="c1">
            <text:p>0.35168</text:p>
          </table:table-cell>
          <table:table-cell office:value-type="string" table:style-name="c1">
            <text:p>2026-05-09 08:00</text:p>
          </table:table-cell>
          <table:table-cell office:value-type="float" office:value="0.35092445000000005" table:style-name="c1">
            <text:p>0.35092</text:p>
          </table:table-cell>
          <table:table-cell office:value-type="float" office:value="-0.4131072374339073" table:style-name="c14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1:00</text:p>
          </table:table-cell>
          <table:table-cell office:value-type="float" office:value="0.35487735" table:style-name="c1">
            <text:p>0.35488</text:p>
          </table:table-cell>
          <table:table-cell office:value-type="string" table:style-name="c1">
            <text:p>2026-05-15 11:00</text:p>
          </table:table-cell>
          <table:table-cell office:value-type="float" office:value="0.35172405" table:style-name="c1">
            <text:p>0.35172</text:p>
          </table:table-cell>
          <table:table-cell office:value-type="float" office:value="-1.0866842800618337" table:style-name="c14">
            <text:p>-1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17:00</text:p>
          </table:table-cell>
          <table:table-cell office:value-type="float" office:value="0.35467724999999994" table:style-name="c1">
            <text:p>0.35468</text:p>
          </table:table-cell>
          <table:table-cell office:value-type="string" table:style-name="c1">
            <text:p>2026-05-17 17:00</text:p>
          </table:table-cell>
          <table:table-cell office:value-type="float" office:value="0.35672155" table:style-name="c1">
            <text:p>0.35672</text:p>
          </table:table-cell>
          <table:table-cell office:value-type="float" office:value="0.3753309865659693" table:style-name="c13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3:00</text:p>
          </table:table-cell>
          <table:table-cell office:value-type="float" office:value="0.3633816" table:style-name="c1">
            <text:p>0.36338</text:p>
          </table:table-cell>
          <table:table-cell office:value-type="string" table:style-name="c1">
            <text:p>2026-05-22 13:00</text:p>
          </table:table-cell>
          <table:table-cell office:value-type="float" office:value="0.36371805" table:style-name="c1">
            <text:p>0.36372</text:p>
          </table:table-cell>
          <table:table-cell office:value-type="float" office:value="-0.10749646706106342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3:00</text:p>
          </table:table-cell>
          <table:table-cell office:value-type="float" office:value="0.3627813" table:style-name="c1">
            <text:p>0.36278</text:p>
          </table:table-cell>
          <table:table-cell office:value-type="string" table:style-name="c1">
            <text:p>2026-05-24 23:00</text:p>
          </table:table-cell>
          <table:table-cell office:value-type="float" office:value="0.36511735" table:style-name="c1">
            <text:p>0.36512</text:p>
          </table:table-cell>
          <table:table-cell office:value-type="float" office:value="0.44274068628951113" table:style-name="c13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3:00</text:p>
          </table:table-cell>
          <table:table-cell office:value-type="float" office:value="0.37008494999999997" table:style-name="c1">
            <text:p>0.37008</text:p>
          </table:table-cell>
          <table:table-cell office:value-type="string" table:style-name="c1">
            <text:p>2026-05-26 13:00</text:p>
          </table:table-cell>
          <table:table-cell office:value-type="float" office:value="0.37611185" table:style-name="c1">
            <text:p>0.37611</text:p>
          </table:table-cell>
          <table:table-cell office:value-type="float" office:value="1.4253625854955931" table:style-name="c13">
            <text:p>+1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04:00</text:p>
          </table:table-cell>
          <table:table-cell office:value-type="float" office:value="3.7408694999999996" table:style-name="c10">
            <text:p>3.7409</text:p>
          </table:table-cell>
          <table:table-cell office:value-type="string" table:style-name="c10">
            <text:p>2026-03-10 04:00</text:p>
          </table:table-cell>
          <table:table-cell office:value-type="float" office:value="3.89805" table:style-name="c10">
            <text:p>3.8981</text:p>
          </table:table-cell>
          <table:table-cell office:value-type="float" office:value="3.9934111053593346" table:style-name="c11">
            <text:p>+4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3.9729855" table:style-name="c10">
            <text:p>3.973</text:p>
          </table:table-cell>
          <table:table-cell office:value-type="string" table:style-name="c10">
            <text:p>2026-03-11 15:00</text:p>
          </table:table-cell>
          <table:table-cell office:value-type="float" office:value="3.9310335" table:style-name="c10">
            <text:p>3.931</text:p>
          </table:table-cell>
          <table:table-cell office:value-type="float" office:value="-1.2537205576637511" table:style-name="c12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1:00</text:p>
          </table:table-cell>
          <table:table-cell office:value-type="float" office:value="4.0970474999999995" table:style-name="c10">
            <text:p>4.097</text:p>
          </table:table-cell>
          <table:table-cell office:value-type="string" table:style-name="c10">
            <text:p>2026-03-14 11:00</text:p>
          </table:table-cell>
          <table:table-cell office:value-type="float" office:value="3.9070455" table:style-name="c10">
            <text:p>3.907</text:p>
          </table:table-cell>
          <table:table-cell office:value-type="float" office:value="-4.82816428060694" table:style-name="c12">
            <text:p>-4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6:00</text:p>
          </table:table-cell>
          <table:table-cell office:value-type="float" office:value="3.9609794999999997" table:style-name="c10">
            <text:p>3.961</text:p>
          </table:table-cell>
          <table:table-cell office:value-type="string" table:style-name="c10">
            <text:p>2026-03-16 06:00</text:p>
          </table:table-cell>
          <table:table-cell office:value-type="float" office:value="4.0669655" table:style-name="c10">
            <text:p>4.067</text:p>
          </table:table-cell>
          <table:table-cell office:value-type="float" office:value="2.470503469293406" table:style-name="c11">
            <text:p>+2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5:00</text:p>
          </table:table-cell>
          <table:table-cell office:value-type="float" office:value="4.1230605" table:style-name="c10">
            <text:p>4.1231</text:p>
          </table:table-cell>
          <table:table-cell office:value-type="string" table:style-name="c10">
            <text:p>2026-03-17 15:00</text:p>
          </table:table-cell>
          <table:table-cell office:value-type="float" office:value="3.9750115" table:style-name="c10">
            <text:p>3.975</text:p>
          </table:table-cell>
          <table:table-cell office:value-type="float" office:value="-3.7834770551754104" table:style-name="c12">
            <text:p>-3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7:00</text:p>
          </table:table-cell>
          <table:table-cell office:value-type="float" office:value="3.6428205" table:style-name="c10">
            <text:p>3.6428</text:p>
          </table:table-cell>
          <table:table-cell office:value-type="string" table:style-name="c10">
            <text:p>2026-04-02 08:00</text:p>
          </table:table-cell>
          <table:table-cell office:value-type="float" office:value="3.334332" table:style-name="c10">
            <text:p>3.3343</text:p>
          </table:table-cell>
          <table:table-cell office:value-type="float" office:value="-8.651368621319676" table:style-name="c12">
            <text:p>-8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00</text:p>
          </table:table-cell>
          <table:table-cell office:value-type="float" office:value="3.299649" table:style-name="c10">
            <text:p>3.2996</text:p>
          </table:table-cell>
          <table:table-cell office:value-type="string" table:style-name="c10">
            <text:p>2026-04-17 13:00</text:p>
          </table:table-cell>
          <table:table-cell office:value-type="float" office:value="3.4722630000000003" table:style-name="c10">
            <text:p>3.4723</text:p>
          </table:table-cell>
          <table:table-cell office:value-type="float" office:value="5.020926354985034" table:style-name="c11">
            <text:p>+5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4:00</text:p>
          </table:table-cell>
          <table:table-cell office:value-type="float" office:value="3.5277629999999998" table:style-name="c10">
            <text:p>3.5278</text:p>
          </table:table-cell>
          <table:table-cell office:value-type="string" table:style-name="c10">
            <text:p>2026-04-18 14:00</text:p>
          </table:table-cell>
          <table:table-cell office:value-type="float" office:value="3.3713135000000003" table:style-name="c10">
            <text:p>3.3713</text:p>
          </table:table-cell>
          <table:table-cell office:value-type="float" office:value="-4.625842373382216" table:style-name="c12">
            <text:p>-4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6:00</text:p>
          </table:table-cell>
          <table:table-cell office:value-type="float" office:value="3.299649" table:style-name="c10">
            <text:p>3.2996</text:p>
          </table:table-cell>
          <table:table-cell office:value-type="string" table:style-name="c10">
            <text:p>2026-04-24 16:00</text:p>
          </table:table-cell>
          <table:table-cell office:value-type="float" office:value="3.262368" table:style-name="c10">
            <text:p>3.2624</text:p>
          </table:table-cell>
          <table:table-cell office:value-type="float" office:value="-1.3274888823629372" table:style-name="c12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20:00</text:p>
          </table:table-cell>
          <table:table-cell office:value-type="float" office:value="3.2976479999999997" table:style-name="c10">
            <text:p>3.2976</text:p>
          </table:table-cell>
          <table:table-cell office:value-type="string" table:style-name="c10">
            <text:p>2026-04-27 16:00</text:p>
          </table:table-cell>
          <table:table-cell office:value-type="float" office:value="3.1934025" table:style-name="c10">
            <text:p>3.1934</text:p>
          </table:table-cell>
          <table:table-cell office:value-type="float" office:value="-3.3547883703020975" table:style-name="c12">
            <text:p>-3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5:00</text:p>
          </table:table-cell>
          <table:table-cell office:value-type="float" office:value="3.4467224999999995" table:style-name="c10">
            <text:p>3.4467</text:p>
          </table:table-cell>
          <table:table-cell office:value-type="string" table:style-name="c10">
            <text:p>2026-05-05 05:00</text:p>
          </table:table-cell>
          <table:table-cell office:value-type="float" office:value="3.3233375000000005" table:style-name="c10">
            <text:p>3.3233</text:p>
          </table:table-cell>
          <table:table-cell office:value-type="float" office:value="-3.772521624891434" table:style-name="c12">
            <text:p>-3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6:00</text:p>
          </table:table-cell>
          <table:table-cell office:value-type="float" office:value="3.4006995" table:style-name="c10">
            <text:p>3.4007</text:p>
          </table:table-cell>
          <table:table-cell office:value-type="string" table:style-name="c10">
            <text:p>2026-05-07 06:00</text:p>
          </table:table-cell>
          <table:table-cell office:value-type="float" office:value="3.4512735" table:style-name="c10">
            <text:p>3.4513</text:p>
          </table:table-cell>
          <table:table-cell office:value-type="float" office:value="1.2842917838962187" table:style-name="c11">
            <text:p>+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00</text:p>
          </table:table-cell>
          <table:table-cell office:value-type="float" office:value="3.6808395" table:style-name="c10">
            <text:p>3.6808</text:p>
          </table:table-cell>
          <table:table-cell office:value-type="string" table:style-name="c10">
            <text:p>2026-05-09 17:00</text:p>
          </table:table-cell>
          <table:table-cell office:value-type="float" office:value="3.6371805" table:style-name="c10">
            <text:p>3.6372</text:p>
          </table:table-cell>
          <table:table-cell office:value-type="float" office:value="-1.3836442425566253" table:style-name="c12">
            <text:p>-1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22:00</text:p>
          </table:table-cell>
          <table:table-cell office:value-type="float" office:value="3.7278629999999997" table:style-name="c10">
            <text:p>3.7279</text:p>
          </table:table-cell>
          <table:table-cell office:value-type="string" table:style-name="c10">
            <text:p>2026-05-10 22:00</text:p>
          </table:table-cell>
          <table:table-cell office:value-type="float" office:value="3.9190395000000002" table:style-name="c10">
            <text:p>3.919</text:p>
          </table:table-cell>
          <table:table-cell office:value-type="float" office:value="4.9181619614106165" table:style-name="c11">
            <text:p>+4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4:00</text:p>
          </table:table-cell>
          <table:table-cell office:value-type="float" office:value="3.8349165" table:style-name="c10">
            <text:p>3.8349</text:p>
          </table:table-cell>
          <table:table-cell office:value-type="string" table:style-name="c10">
            <text:p>2026-05-14 04:00</text:p>
          </table:table-cell>
          <table:table-cell office:value-type="float" office:value="3.5712135000000003" table:style-name="c10">
            <text:p>3.5712</text:p>
          </table:table-cell>
          <table:table-cell office:value-type="float" office:value="-7.06252289421424" table:style-name="c12">
            <text:p>-7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5:00</text:p>
          </table:table-cell>
          <table:table-cell office:value-type="float" office:value="3.7248615" table:style-name="c10">
            <text:p>3.7249</text:p>
          </table:table-cell>
          <table:table-cell office:value-type="string" table:style-name="c10">
            <text:p>2026-05-15 15:00</text:p>
          </table:table-cell>
          <table:table-cell office:value-type="float" office:value="3.5712135000000003" table:style-name="c10">
            <text:p>3.5712</text:p>
          </table:table-cell>
          <table:table-cell office:value-type="float" office:value="-4.316586154585867" table:style-name="c12">
            <text:p>-4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5:00</text:p>
          </table:table-cell>
          <table:table-cell office:value-type="float" office:value="0.006941469" table:style-name="c1">
            <text:p>0.0069415</text:p>
          </table:table-cell>
          <table:table-cell office:value-type="string" table:style-name="c1">
            <text:p>2026-03-10 05:00</text:p>
          </table:table-cell>
          <table:table-cell office:value-type="float" office:value="0.007038479" table:style-name="c1">
            <text:p>0.0070385</text:p>
          </table:table-cell>
          <table:table-cell office:value-type="float" office:value="1.194849108726137" table:style-name="c13">
            <text:p>+1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0:00</text:p>
          </table:table-cell>
          <table:table-cell office:value-type="float" office:value="0.007139568" table:style-name="c1">
            <text:p>0.0071396</text:p>
          </table:table-cell>
          <table:table-cell office:value-type="string" table:style-name="c1">
            <text:p>2026-03-11 10:00</text:p>
          </table:table-cell>
          <table:table-cell office:value-type="float" office:value="0.0070394785" table:style-name="c1">
            <text:p>0.0070395</text:p>
          </table:table-cell>
          <table:table-cell office:value-type="float" office:value="-1.5989961510486261" table:style-name="c14">
            <text:p>-1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0.007129563" table:style-name="c1">
            <text:p>0.0071296</text:p>
          </table:table-cell>
          <table:table-cell office:value-type="string" table:style-name="c1">
            <text:p>2026-03-12 14:00</text:p>
          </table:table-cell>
          <table:table-cell office:value-type="float" office:value="0.0070694635" table:style-name="c1">
            <text:p>0.0070695</text:p>
          </table:table-cell>
          <table:table-cell office:value-type="float" office:value="-1.0411768229904084" table:style-name="c14">
            <text:p>-1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5:00</text:p>
          </table:table-cell>
          <table:table-cell office:value-type="float" office:value="0.007175586" table:style-name="c1">
            <text:p>0.0071756</text:p>
          </table:table-cell>
          <table:table-cell office:value-type="string" table:style-name="c1">
            <text:p>2026-03-16 05:00</text:p>
          </table:table-cell>
          <table:table-cell office:value-type="float" office:value="0.007570213" table:style-name="c1">
            <text:p>0.0075702</text:p>
          </table:table-cell>
          <table:table-cell office:value-type="float" office:value="5.2886850525239115" table:style-name="c13">
            <text:p>+5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3:00</text:p>
          </table:table-cell>
          <table:table-cell office:value-type="float" office:value="0.007821909" table:style-name="c1">
            <text:p>0.0078219</text:p>
          </table:table-cell>
          <table:table-cell office:value-type="string" table:style-name="c1">
            <text:p>2026-03-17 23:00</text:p>
          </table:table-cell>
          <table:table-cell office:value-type="float" office:value="0.007624186000000001" table:style-name="c1">
            <text:p>0.0076242</text:p>
          </table:table-cell>
          <table:table-cell office:value-type="float" office:value="-2.7226569346945673" table:style-name="c14">
            <text:p>-2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02:00</text:p>
          </table:table-cell>
          <table:table-cell office:value-type="float" office:value="0.007332664499999999" table:style-name="c1">
            <text:p>0.0073327</text:p>
          </table:table-cell>
          <table:table-cell office:value-type="string" table:style-name="c1">
            <text:p>2026-03-21 02:00</text:p>
          </table:table-cell>
          <table:table-cell office:value-type="float" office:value="0.007226385000000001" table:style-name="c1">
            <text:p>0.0072264</text:p>
          </table:table-cell>
          <table:table-cell office:value-type="float" office:value="-1.64640075398238" table:style-name="c14">
            <text:p>-1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2:00</text:p>
          </table:table-cell>
          <table:table-cell office:value-type="float" office:value="0.007062529499999999" table:style-name="c1">
            <text:p>0.0070625</text:p>
          </table:table-cell>
          <table:table-cell office:value-type="string" table:style-name="c1">
            <text:p>2026-04-05 02:00</text:p>
          </table:table-cell>
          <table:table-cell office:value-type="float" office:value="0.0074352805000000004" table:style-name="c1">
            <text:p>0.0074353</text:p>
          </table:table-cell>
          <table:table-cell office:value-type="float" office:value="5.06741776130637" table:style-name="c13">
            <text:p>+5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0.0074077019999999995" table:style-name="c1">
            <text:p>0.0074077</text:p>
          </table:table-cell>
          <table:table-cell office:value-type="string" table:style-name="c1">
            <text:p>2026-04-08 23:00</text:p>
          </table:table-cell>
          <table:table-cell office:value-type="float" office:value="0.0072373795" table:style-name="c1">
            <text:p>0.0072374</text:p>
          </table:table-cell>
          <table:table-cell office:value-type="float" office:value="-2.4945660829836402" table:style-name="c14">
            <text:p>-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0.0072086024999999995" table:style-name="c1">
            <text:p>0.0072086</text:p>
          </table:table-cell>
          <table:table-cell office:value-type="string" table:style-name="c1">
            <text:p>2026-04-10 16:00</text:p>
          </table:table-cell>
          <table:table-cell office:value-type="float" office:value="0.0071954005" table:style-name="c1">
            <text:p>0.0071954</text:p>
          </table:table-cell>
          <table:table-cell office:value-type="float" office:value="-0.3826761927780087" table:style-name="c14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7:00</text:p>
          </table:table-cell>
          <table:table-cell office:value-type="float" office:value="0.007215605999999999" table:style-name="c1">
            <text:p>0.0072156</text:p>
          </table:table-cell>
          <table:table-cell office:value-type="string" table:style-name="c1">
            <text:p>2026-04-11 08:00</text:p>
          </table:table-cell>
          <table:table-cell office:value-type="float" office:value="0.007002497000000001" table:style-name="c1">
            <text:p>0.0070025</text:p>
          </table:table-cell>
          <table:table-cell office:value-type="float" office:value="-3.1474416910097225" table:style-name="c14">
            <text:p>-3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00</text:p>
          </table:table-cell>
          <table:table-cell office:value-type="float" office:value="0.007331664" table:style-name="c1">
            <text:p>0.0073317</text:p>
          </table:table-cell>
          <table:table-cell office:value-type="string" table:style-name="c1">
            <text:p>2026-04-17 19:00</text:p>
          </table:table-cell>
          <table:table-cell office:value-type="float" office:value="0.007386305" table:style-name="c1">
            <text:p>0.0073863</text:p>
          </table:table-cell>
          <table:table-cell office:value-type="float" office:value="0.5438843938429416" table:style-name="c13">
            <text:p>+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12:00</text:p>
          </table:table-cell>
          <table:table-cell office:value-type="float" office:value="0.007165581" table:style-name="c1">
            <text:p>0.0071656</text:p>
          </table:table-cell>
          <table:table-cell office:value-type="string" table:style-name="c1">
            <text:p>2026-04-20 12:00</text:p>
          </table:table-cell>
          <table:table-cell office:value-type="float" office:value="0.0070534715" table:style-name="c1">
            <text:p>0.0070535</text:p>
          </table:table-cell>
          <table:table-cell office:value-type="float" office:value="-1.7613280699569134" table:style-name="c14">
            <text:p>-1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1:00</text:p>
          </table:table-cell>
          <table:table-cell office:value-type="float" office:value="0.007164580499999999" table:style-name="c1">
            <text:p>0.0071646</text:p>
          </table:table-cell>
          <table:table-cell office:value-type="string" table:style-name="c1">
            <text:p>2026-04-23 01:00</text:p>
          </table:table-cell>
          <table:table-cell office:value-type="float" office:value="0.00713643" table:style-name="c1">
            <text:p>0.0071364</text:p>
          </table:table-cell>
          <table:table-cell office:value-type="float" office:value="-0.5920266171899224" table:style-name="c14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2:00</text:p>
          </table:table-cell>
          <table:table-cell office:value-type="float" office:value="0.0072086024999999995" table:style-name="c1">
            <text:p>0.0072086</text:p>
          </table:table-cell>
          <table:table-cell office:value-type="string" table:style-name="c1">
            <text:p>2026-04-24 12:00</text:p>
          </table:table-cell>
          <table:table-cell office:value-type="float" office:value="0.0073653155000000005" table:style-name="c1">
            <text:p>0.0073653</text:p>
          </table:table-cell>
          <table:table-cell office:value-type="float" office:value="1.9697262307846852" table:style-name="c13">
            <text:p>+2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5:00</text:p>
          </table:table-cell>
          <table:table-cell office:value-type="float" office:value="0.007223609999999999" table:style-name="c1">
            <text:p>0.0072236</text:p>
          </table:table-cell>
          <table:table-cell office:value-type="string" table:style-name="c1">
            <text:p>2026-04-29 08:00</text:p>
          </table:table-cell>
          <table:table-cell office:value-type="float" office:value="0.0071694135" table:style-name="c1">
            <text:p>0.0071694</text:p>
          </table:table-cell>
          <table:table-cell office:value-type="float" office:value="-0.9486691223155708" table:style-name="c14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7:00</text:p>
          </table:table-cell>
          <table:table-cell office:value-type="float" office:value="0.007411703999999999" table:style-name="c1">
            <text:p>0.0074117</text:p>
          </table:table-cell>
          <table:table-cell office:value-type="string" table:style-name="c1">
            <text:p>2026-05-05 07:00</text:p>
          </table:table-cell>
          <table:table-cell office:value-type="float" office:value="0.007239378500000001" table:style-name="c1">
            <text:p>0.0072394</text:p>
          </table:table-cell>
          <table:table-cell office:value-type="float" office:value="-2.5202978643169893" table:style-name="c14">
            <text:p>-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00</text:p>
          </table:table-cell>
          <table:table-cell office:value-type="float" office:value="0.007483739999999999" table:style-name="c1">
            <text:p>0.0074837</text:p>
          </table:table-cell>
          <table:table-cell office:value-type="string" table:style-name="c1">
            <text:p>2026-05-06 21:00</text:p>
          </table:table-cell>
          <table:table-cell office:value-type="float" office:value="0.007684156000000001" table:style-name="c1">
            <text:p>0.0076842</text:p>
          </table:table-cell>
          <table:table-cell office:value-type="float" office:value="2.472765918591535" table:style-name="c13">
            <text:p>+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3:00</text:p>
          </table:table-cell>
          <table:table-cell office:value-type="float" office:value="0.007821909" table:style-name="c1">
            <text:p>0.0078219</text:p>
          </table:table-cell>
          <table:table-cell office:value-type="string" table:style-name="c1">
            <text:p>2026-05-08 13:00</text:p>
          </table:table-cell>
          <table:table-cell office:value-type="float" office:value="0.007506245000000001" table:style-name="c1">
            <text:p>0.0075062</text:p>
          </table:table-cell>
          <table:table-cell office:value-type="float" office:value="-4.2274716281536895" table:style-name="c14">
            <text:p>-4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00</text:p>
          </table:table-cell>
          <table:table-cell office:value-type="float" office:value="0.007741868999999999" table:style-name="c1">
            <text:p>0.0077419</text:p>
          </table:table-cell>
          <table:table-cell office:value-type="string" table:style-name="c1">
            <text:p>2026-05-11 06:00</text:p>
          </table:table-cell>
          <table:table-cell office:value-type="float" office:value="0.00777611" table:style-name="c1">
            <text:p>0.0077761</text:p>
          </table:table-cell>
          <table:table-cell office:value-type="float" office:value="0.24149925696237418" table:style-name="c13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6:00</text:p>
          </table:table-cell>
          <table:table-cell office:value-type="float" office:value="0.007605801" table:style-name="c1">
            <text:p>0.0076058</text:p>
          </table:table-cell>
          <table:table-cell office:value-type="string" table:style-name="c1">
            <text:p>2026-05-14 00:00</text:p>
          </table:table-cell>
          <table:table-cell office:value-type="float" office:value="0.007290353" table:style-name="c1">
            <text:p>0.0072904</text:p>
          </table:table-cell>
          <table:table-cell office:value-type="float" office:value="-4.339075077654531" table:style-name="c14">
            <text:p>-4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4:00</text:p>
          </table:table-cell>
          <table:table-cell office:value-type="float" office:value="0.15357674999999998" table:style-name="c10">
            <text:p>0.15358</text:p>
          </table:table-cell>
          <table:table-cell office:value-type="string" table:style-name="c10">
            <text:p>2026-03-11 04:00</text:p>
          </table:table-cell>
          <table:table-cell office:value-type="float" office:value="0.15672160000000002" table:style-name="c10">
            <text:p>0.15672</text:p>
          </table:table-cell>
          <table:table-cell office:value-type="float" office:value="1.8437449168575704" table:style-name="c11">
            <text:p>+1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5:00</text:p>
          </table:table-cell>
          <table:table-cell office:value-type="float" office:value="0.1602801" table:style-name="c10">
            <text:p>0.16028</text:p>
          </table:table-cell>
          <table:table-cell office:value-type="string" table:style-name="c10">
            <text:p>2026-03-12 15:00</text:p>
          </table:table-cell>
          <table:table-cell office:value-type="float" office:value="0.15782105000000002" table:style-name="c10">
            <text:p>0.15782</text:p>
          </table:table-cell>
          <table:table-cell office:value-type="float" office:value="-1.731053498812385" table:style-name="c12">
            <text:p>-1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4:00</text:p>
          </table:table-cell>
          <table:table-cell office:value-type="float" office:value="0.16728359999999998" table:style-name="c10">
            <text:p>0.16728</text:p>
          </table:table-cell>
          <table:table-cell office:value-type="string" table:style-name="c10">
            <text:p>2026-03-14 14:00</text:p>
          </table:table-cell>
          <table:table-cell office:value-type="float" office:value="0.16471760000000002" table:style-name="c10">
            <text:p>0.16472</text:p>
          </table:table-cell>
          <table:table-cell office:value-type="float" office:value="-1.7307557240518134" table:style-name="c12">
            <text:p>-1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0:00</text:p>
          </table:table-cell>
          <table:table-cell office:value-type="float" office:value="0.16668329999999998" table:style-name="c10">
            <text:p>0.16668</text:p>
          </table:table-cell>
          <table:table-cell office:value-type="string" table:style-name="c10">
            <text:p>2026-03-16 00:00</text:p>
          </table:table-cell>
          <table:table-cell office:value-type="float" office:value="0.1693153" table:style-name="c10">
            <text:p>0.16932</text:p>
          </table:table-cell>
          <table:table-cell office:value-type="float" office:value="1.3759859057866253" table:style-name="c11">
            <text:p>+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4:00</text:p>
          </table:table-cell>
          <table:table-cell office:value-type="float" office:value="0.17008500000000001" table:style-name="c10">
            <text:p>0.17009</text:p>
          </table:table-cell>
          <table:table-cell office:value-type="string" table:style-name="c10">
            <text:p>2026-03-17 04:00</text:p>
          </table:table-cell>
          <table:table-cell office:value-type="float" office:value="0.17611190000000002" table:style-name="c10">
            <text:p>0.17611</text:p>
          </table:table-cell>
          <table:table-cell office:value-type="float" office:value="3.336480178675383" table:style-name="c11">
            <text:p>+3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4:00</text:p>
          </table:table-cell>
          <table:table-cell office:value-type="float" office:value="0.1766883" table:style-name="c10">
            <text:p>0.17669</text:p>
          </table:table-cell>
          <table:table-cell office:value-type="string" table:style-name="c10">
            <text:p>2026-03-19 04:00</text:p>
          </table:table-cell>
          <table:table-cell office:value-type="float" office:value="0.1697151" table:style-name="c10">
            <text:p>0.16972</text:p>
          </table:table-cell>
          <table:table-cell office:value-type="float" office:value="-4.13862179040716" table:style-name="c12">
            <text:p>-4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2:00</text:p>
          </table:table-cell>
          <table:table-cell office:value-type="float" office:value="0.17828909999999998" table:style-name="c10">
            <text:p>0.17829</text:p>
          </table:table-cell>
          <table:table-cell office:value-type="string" table:style-name="c10">
            <text:p>2026-03-26 02:00</text:p>
          </table:table-cell>
          <table:table-cell office:value-type="float" office:value="0.17681155" table:style-name="c10">
            <text:p>0.17681</text:p>
          </table:table-cell>
          <table:table-cell office:value-type="float" office:value="-1.0269816205533355" table:style-name="c12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8 16:00</text:p>
          </table:table-cell>
          <table:table-cell office:value-type="float" office:value="0.16998495" table:style-name="c10">
            <text:p>0.16998</text:p>
          </table:table-cell>
          <table:table-cell office:value-type="string" table:style-name="c10">
            <text:p>2026-03-29 16:00</text:p>
          </table:table-cell>
          <table:table-cell office:value-type="float" office:value="0.16541725000000002" table:style-name="c10">
            <text:p>0.16542</text:p>
          </table:table-cell>
          <table:table-cell office:value-type="float" office:value="-2.881648688751559" table:style-name="c12">
            <text:p>-2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9:00</text:p>
          </table:table-cell>
          <table:table-cell office:value-type="float" office:value="0.17298644999999999" table:style-name="c10">
            <text:p>0.17299</text:p>
          </table:table-cell>
          <table:table-cell office:value-type="string" table:style-name="c10">
            <text:p>2026-03-31 09:00</text:p>
          </table:table-cell>
          <table:table-cell office:value-type="float" office:value="0.1657171" table:style-name="c10">
            <text:p>0.16572</text:p>
          </table:table-cell>
          <table:table-cell office:value-type="float" office:value="-4.393765224328261" table:style-name="c12">
            <text:p>-4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3:00</text:p>
          </table:table-cell>
          <table:table-cell office:value-type="float" office:value="0.17318655" table:style-name="c10">
            <text:p>0.17319</text:p>
          </table:table-cell>
          <table:table-cell office:value-type="string" table:style-name="c10">
            <text:p>2026-04-02 12:00</text:p>
          </table:table-cell>
          <table:table-cell office:value-type="float" office:value="0.16161915000000002" table:style-name="c10">
            <text:p>0.16162</text:p>
          </table:table-cell>
          <table:table-cell office:value-type="float" office:value="-6.865704456177446" table:style-name="c12">
            <text:p>-6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0.1644822" table:style-name="c10">
            <text:p>0.16448</text:p>
          </table:table-cell>
          <table:table-cell office:value-type="string" table:style-name="c10">
            <text:p>2026-04-17 16:00</text:p>
          </table:table-cell>
          <table:table-cell office:value-type="float" office:value="0.17471260000000002" table:style-name="c10">
            <text:p>0.17471</text:p>
          </table:table-cell>
          <table:table-cell office:value-type="float" office:value="6.007427863075776" table:style-name="c11">
            <text:p>+6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9:00</text:p>
          </table:table-cell>
          <table:table-cell office:value-type="float" office:value="0.18239114999999997" table:style-name="c10">
            <text:p>0.18239</text:p>
          </table:table-cell>
          <table:table-cell office:value-type="string" table:style-name="c10">
            <text:p>2026-04-22 09:00</text:p>
          </table:table-cell>
          <table:table-cell office:value-type="float" office:value="0.17941025" table:style-name="c10">
            <text:p>0.17941</text:p>
          </table:table-cell>
          <table:table-cell office:value-type="float" office:value="-1.8309775938964101" table:style-name="c12">
            <text:p>-1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00</text:p>
          </table:table-cell>
          <table:table-cell office:value-type="float" office:value="0.18119055" table:style-name="c10">
            <text:p>0.18119</text:p>
          </table:table-cell>
          <table:table-cell office:value-type="string" table:style-name="c10">
            <text:p>2026-04-23 15:00</text:p>
          </table:table-cell>
          <table:table-cell office:value-type="float" office:value="0.1787106" table:style-name="c10">
            <text:p>0.17871</text:p>
          </table:table-cell>
          <table:table-cell office:value-type="float" office:value="-1.565861182826589" table:style-name="c12">
            <text:p>-1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3:00</text:p>
          </table:table-cell>
          <table:table-cell office:value-type="float" office:value="0.17228609999999997" table:style-name="c10">
            <text:p>0.17229</text:p>
          </table:table-cell>
          <table:table-cell office:value-type="string" table:style-name="c10">
            <text:p>2026-04-27 13:00</text:p>
          </table:table-cell>
          <table:table-cell office:value-type="float" office:value="0.1675162" table:style-name="c10">
            <text:p>0.16752</text:p>
          </table:table-cell>
          <table:table-cell office:value-type="float" office:value="-2.9629580586013504" table:style-name="c12">
            <text:p>-3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9:00</text:p>
          </table:table-cell>
          <table:table-cell office:value-type="float" office:value="0.16318154999999998" table:style-name="c10">
            <text:p>0.16318</text:p>
          </table:table-cell>
          <table:table-cell office:value-type="string" table:style-name="c10">
            <text:p>2026-05-11 09:00</text:p>
          </table:table-cell>
          <table:table-cell office:value-type="float" office:value="0.16691650000000002" table:style-name="c10">
            <text:p>0.16692</text:p>
          </table:table-cell>
          <table:table-cell office:value-type="float" office:value="2.084355686350592" table:style-name="c11">
            <text:p>+2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16:00</text:p>
          </table:table-cell>
          <table:table-cell office:value-type="float" office:value="0.1618809" table:style-name="c10">
            <text:p>0.16188</text:p>
          </table:table-cell>
          <table:table-cell office:value-type="string" table:style-name="c10">
            <text:p>2026-05-28 16:00</text:p>
          </table:table-cell>
          <table:table-cell office:value-type="float" office:value="0.19610190000000002" table:style-name="c10">
            <text:p>0.1961</text:p>
          </table:table-cell>
          <table:table-cell office:value-type="float" office:value="20.897457514691386" table:style-name="c11">
            <text:p>+20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20:00</text:p>
          </table:table-cell>
          <table:table-cell office:value-type="float" office:value="0.24001994999999998" table:style-name="c10">
            <text:p>0.24002</text:p>
          </table:table-cell>
          <table:table-cell office:value-type="string" table:style-name="c10">
            <text:p>2026-05-30 20:00</text:p>
          </table:table-cell>
          <table:table-cell office:value-type="float" office:value="0.245877" table:style-name="c10">
            <text:p>0.24588</text:p>
          </table:table-cell>
          <table:table-cell office:value-type="float" office:value="2.235456626417931" table:style-name="c11">
            <text:p>+2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11:00</text:p>
          </table:table-cell>
          <table:table-cell office:value-type="float" office:value="0.2463231" table:style-name="c10">
            <text:p>0.24632</text:p>
          </table:table-cell>
          <table:table-cell office:value-type="string" table:style-name="c10">
            <text:p>2026-06-01 11:00</text:p>
          </table:table-cell>
          <table:table-cell office:value-type="float" office:value="0.26426780000000005" table:style-name="c10">
            <text:p>0.26427</text:p>
          </table:table-cell>
          <table:table-cell office:value-type="float" office:value="7.070562471729236" table:style-name="c11">
            <text:p>+7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8 11:00</text:p>
          </table:table-cell>
          <table:table-cell office:value-type="float" office:value="1.36878405" table:style-name="c1">
            <text:p>1.3688</text:p>
          </table:table-cell>
          <table:table-cell office:value-type="string" table:style-name="c1">
            <text:p>2026-03-09 11:00</text:p>
          </table:table-cell>
          <table:table-cell office:value-type="float" office:value="1.3467263" table:style-name="c1">
            <text:p>1.3467</text:p>
          </table:table-cell>
          <table:table-cell office:value-type="float" office:value="-1.8081636671394508" table:style-name="c14">
            <text:p>-1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20:00</text:p>
          </table:table-cell>
          <table:table-cell office:value-type="float" office:value="1.37358645" table:style-name="c1">
            <text:p>1.3736</text:p>
          </table:table-cell>
          <table:table-cell office:value-type="string" table:style-name="c1">
            <text:p>2026-03-10 20:00</text:p>
          </table:table-cell>
          <table:table-cell office:value-type="float" office:value="1.3842075500000002" table:style-name="c1">
            <text:p>1.3842</text:p>
          </table:table-cell>
          <table:table-cell office:value-type="float" office:value="0.5717928498457647" table:style-name="c13">
            <text:p>+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3:00</text:p>
          </table:table-cell>
          <table:table-cell office:value-type="float" office:value="1.45582755" table:style-name="c1">
            <text:p>1.4558</text:p>
          </table:table-cell>
          <table:table-cell office:value-type="string" table:style-name="c1">
            <text:p>2026-03-16 23:00</text:p>
          </table:table-cell>
          <table:table-cell office:value-type="float" office:value="1.5506243" table:style-name="c1">
            <text:p>1.5506</text:p>
          </table:table-cell>
          <table:table-cell office:value-type="float" office:value="6.2986204667098145" table:style-name="c13">
            <text:p>+6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1.35297615" table:style-name="c1">
            <text:p>1.353</text:p>
          </table:table-cell>
          <table:table-cell office:value-type="string" table:style-name="c1">
            <text:p>2026-04-10 16:00</text:p>
          </table:table-cell>
          <table:table-cell office:value-type="float" office:value="1.3472260500000002" table:style-name="c1">
            <text:p>1.3472</text:p>
          </table:table-cell>
          <table:table-cell office:value-type="float" office:value="-0.6240468373333696" table:style-name="c14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21:00</text:p>
          </table:table-cell>
          <table:table-cell office:value-type="float" office:value="1.3621807499999998" table:style-name="c1">
            <text:p>1.3622</text:p>
          </table:table-cell>
          <table:table-cell office:value-type="string" table:style-name="c1">
            <text:p>2026-04-12 21:00</text:p>
          </table:table-cell>
          <table:table-cell office:value-type="float" office:value="1.3361316" table:style-name="c1">
            <text:p>1.3361</text:p>
          </table:table-cell>
          <table:table-cell office:value-type="float" office:value="-2.108389585478987" table:style-name="c14">
            <text:p>-2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1.37538735" table:style-name="c1">
            <text:p>1.3754</text:p>
          </table:table-cell>
          <table:table-cell office:value-type="string" table:style-name="c1">
            <text:p>2026-04-14 23:00</text:p>
          </table:table-cell>
          <table:table-cell office:value-type="float" office:value="1.3577208" table:style-name="c1">
            <text:p>1.3577</text:p>
          </table:table-cell>
          <table:table-cell office:value-type="float" office:value="-1.4818104790043196" table:style-name="c14">
            <text:p>-1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1.37718825" table:style-name="c1">
            <text:p>1.3772</text:p>
          </table:table-cell>
          <table:table-cell office:value-type="string" table:style-name="c1">
            <text:p>2026-04-16 15:00</text:p>
          </table:table-cell>
          <table:table-cell office:value-type="float" office:value="1.4096948000000002" table:style-name="c1">
            <text:p>1.4097</text:p>
          </table:table-cell>
          <table:table-cell office:value-type="float" office:value="2.155737975167904" table:style-name="c13">
            <text:p>+2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4:00</text:p>
          </table:table-cell>
          <table:table-cell office:value-type="float" office:value="1.4881437" table:style-name="c1">
            <text:p>1.4881</text:p>
          </table:table-cell>
          <table:table-cell office:value-type="string" table:style-name="c1">
            <text:p>2026-04-18 14:00</text:p>
          </table:table-cell>
          <table:table-cell office:value-type="float" office:value="1.4364814000000001" table:style-name="c1">
            <text:p>1.4365</text:p>
          </table:table-cell>
          <table:table-cell office:value-type="float" office:value="-3.6645537872854406" table:style-name="c14">
            <text:p>-3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6:00</text:p>
          </table:table-cell>
          <table:table-cell office:value-type="float" office:value="1.4323157999999998" table:style-name="c1">
            <text:p>1.4323</text:p>
          </table:table-cell>
          <table:table-cell office:value-type="string" table:style-name="c1">
            <text:p>2026-04-24 16:00</text:p>
          </table:table-cell>
          <table:table-cell office:value-type="float" office:value="1.447276" table:style-name="c1">
            <text:p>1.4473</text:p>
          </table:table-cell>
          <table:table-cell office:value-type="float" office:value="0.842488456526147" table:style-name="c13">
            <text:p>+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8:00</text:p>
          </table:table-cell>
          <table:table-cell office:value-type="float" office:value="1.4095043999999999" table:style-name="c1">
            <text:p>1.4095</text:p>
          </table:table-cell>
          <table:table-cell office:value-type="string" table:style-name="c1">
            <text:p>2026-05-09 18:00</text:p>
          </table:table-cell>
          <table:table-cell office:value-type="float" office:value="1.4202895000000002" table:style-name="c1">
            <text:p>1.4203</text:p>
          </table:table-cell>
          <table:table-cell office:value-type="float" office:value="0.5637400840678763" table:style-name="c13">
            <text:p>+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00</text:p>
          </table:table-cell>
          <table:table-cell office:value-type="float" office:value="1.4450221499999998" table:style-name="c1">
            <text:p>1.445</text:p>
          </table:table-cell>
          <table:table-cell office:value-type="string" table:style-name="c1">
            <text:p>2026-05-11 16:00</text:p>
          </table:table-cell>
          <table:table-cell office:value-type="float" office:value="1.4841575500000002" table:style-name="c1">
            <text:p>1.4842</text:p>
          </table:table-cell>
          <table:table-cell office:value-type="float" office:value="2.502976792262346" table:style-name="c13">
            <text:p>+2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6:00</text:p>
          </table:table-cell>
          <table:table-cell office:value-type="float" office:value="1.4733363" table:style-name="c1">
            <text:p>1.4733</text:p>
          </table:table-cell>
          <table:table-cell office:value-type="string" table:style-name="c1">
            <text:p>2026-05-15 16:00</text:p>
          </table:table-cell>
          <table:table-cell office:value-type="float" office:value="1.4343824500000002" table:style-name="c1">
            <text:p>1.4344</text:p>
          </table:table-cell>
          <table:table-cell office:value-type="float" office:value="-2.838535948483034" table:style-name="c14">
            <text:p>-2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