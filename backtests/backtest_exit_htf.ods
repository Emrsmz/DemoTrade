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automatic-styles>
    <style:style style:name="su0" style:family="table-column" style:display-name="su0">
      <style:table-column-properties style:column-width="3.2cm"/>
    </style:style>
    <style:style style:name="su1" style:family="table-column" style:display-name="su1">
      <style:table-column-properties style:column-width="2.8cm"/>
    </style:style>
    <style:style style:name="su2" style:family="table-column" style:display-name="su2">
      <style:table-column-properties style:column-width="2.8cm"/>
    </style:style>
    <style:style style:name="su3" style:family="table-column" style:display-name="su3">
      <style:table-column-properties style:column-width="2.6cm"/>
    </style:style>
    <style:style style:name="su4" style:family="table-column" style:display-name="su4">
      <style:table-column-properties style:column-width="2cm"/>
    </style:style>
    <style:style style:name="su5" style:family="table-column" style:display-name="su5">
      <style:table-column-properties style:column-width="2.6cm"/>
    </style:style>
    <style:style style:name="su6" style:family="table-column" style:display-name="su6">
      <style:table-column-properties style:column-width="3.2cm"/>
    </style:style>
    <style:style style:name="c0" style:family="table-cell" style:display-name="c0">
      <style:table-cell-properties fo:border="0.5pt solid #d0d0d0" style:vertical-align="middle" fo:background-color="#D9D9D9"/>
      <style:text-properties fo:color="#000000" fo:font-weight="bold"/>
      <style:paragraph-properties fo:text-align="center"/>
    </style:style>
    <style:style style:name="c1" style:family="table-cell" style:display-name="c1">
      <style:table-cell-properties fo:border="0.5pt solid #d0d0d0" style:vertical-align="middle"/>
      <style:paragraph-properties fo:text-align="center"/>
    </style:style>
    <style:style style:name="c2" style:family="table-cell" style:display-name="c2">
      <style:table-cell-properties fo:border="0.5pt solid #d0d0d0" style:vertical-align="middle"/>
      <style:text-properties fo:color="#000000" fo:font-weight="bold"/>
      <style:paragraph-properties fo:text-align="center"/>
    </style:style>
    <style:style style:name="c3" style:family="table-cell" style:display-name="c3">
      <style:table-cell-properties fo:border="0.5pt solid #d0d0d0" style:vertical-align="middle" fo:background-color="#C6EFCE"/>
      <style:text-properties fo:color="#006100" fo:font-weight="bold"/>
      <style:paragraph-properties fo:text-align="center"/>
    </style:style>
    <style:style style:name="c4" style:family="table-cell" style:display-name="c4">
      <style:table-cell-properties fo:border="0.5pt solid #d0d0d0" style:vertical-align="middle"/>
      <style:text-properties fo:color="#C00000" fo:font-weight="normal"/>
      <style:paragraph-properties fo:text-align="center"/>
    </style:style>
    <style:style style:name="c5" style:family="table-cell" style:display-name="c5">
      <style:table-cell-properties fo:border="0.5pt solid #d0d0d0" style:vertical-align="middle" fo:background-color="#FFC7CE"/>
      <style:text-properties fo:color="#9C0006" fo:font-weight="bold"/>
      <style:paragraph-properties fo:text-align="center"/>
    </style:style>
    <style:style style:name="c6" style:family="table-cell" style:display-name="c6">
      <style:table-cell-properties fo:border="0.5pt solid #d0d0d0" style:vertical-align="middle"/>
      <style:text-properties fo:color="#107C41" fo:font-weight="normal"/>
      <style:paragraph-properties fo:text-align="center"/>
    </style:style>
    <style:style style:name="c7" style:family="table-cell" style:display-name="c7">
      <style:table-cell-properties fo:border="0.5pt solid #d0d0d0" style:vertical-align="middle" fo:background-color="#DDEBF7"/>
      <style:text-properties fo:color="#000000" fo:font-weight="bold"/>
      <style:paragraph-properties fo:text-align="center"/>
    </style:style>
    <style:style style:name="c8" style:family="table-cell" style:display-name="c8">
      <style:table-cell-properties fo:border="0.5pt solid #d0d0d0" style:vertical-align="middle" fo:background-color="#DDEBF7"/>
      <style:text-properties fo:color="#C00000" fo:font-weight="bold"/>
      <style:paragraph-properties fo:text-align="center"/>
    </style:style>
    <style:style style:name="tl0" style:family="table-column" style:display-name="tl0">
      <style:table-column-properties style:column-width="3.2cm"/>
    </style:style>
    <style:style style:name="tl1" style:family="table-column" style:display-name="tl1">
      <style:table-column-properties style:column-width="1.8cm"/>
    </style:style>
    <style:style style:name="tl2" style:family="table-column" style:display-name="tl2">
      <style:table-column-properties style:column-width="3.8cm"/>
    </style:style>
    <style:style style:name="tl3" style:family="table-column" style:display-name="tl3">
      <style:table-column-properties style:column-width="3.2cm"/>
    </style:style>
    <style:style style:name="tl4" style:family="table-column" style:display-name="tl4">
      <style:table-column-properties style:column-width="3.8cm"/>
    </style:style>
    <style:style style:name="tl5" style:family="table-column" style:display-name="tl5">
      <style:table-column-properties style:column-width="3.2cm"/>
    </style:style>
    <style:style style:name="tl6" style:family="table-column" style:display-name="tl6">
      <style:table-column-properties style:column-width="2.4cm"/>
    </style:style>
    <style:style style:name="c9" style:family="table-cell" style:display-name="c9">
      <style:table-cell-properties fo:border="0.5pt solid #d0d0d0" style:vertical-align="middle" fo:background-color="#F2F2F2"/>
      <style:text-properties fo:color="#000000" fo:font-weight="bold"/>
      <style:paragraph-properties fo:text-align="center"/>
    </style:style>
    <style:style style:name="c10" style:family="table-cell" style:display-name="c10">
      <style:table-cell-properties fo:border="0.5pt solid #d0d0d0" style:vertical-align="middle" fo:background-color="#F2F2F2"/>
      <style:paragraph-properties fo:text-align="center"/>
    </style:style>
    <style:style style:name="c11" style:family="table-cell" style:display-name="c11">
      <style:table-cell-properties fo:border="0.5pt solid #d0d0d0" style:vertical-align="middle" fo:background-color="#F2F2F2"/>
      <style:text-properties fo:color="#C00000" fo:font-weight="bold"/>
      <style:paragraph-properties fo:text-align="center"/>
    </style:style>
    <style:style style:name="c12" style:family="table-cell" style:display-name="c12">
      <style:table-cell-properties fo:border="0.5pt solid #d0d0d0" style:vertical-align="middle" fo:background-color="#F2F2F2"/>
      <style:text-properties fo:color="#107C41" fo:font-weight="bold"/>
      <style:paragraph-properties fo:text-align="center"/>
    </style:style>
    <style:style style:name="c13" style:family="table-cell" style:display-name="c13">
      <style:table-cell-properties fo:border="0.5pt solid #d0d0d0" style:vertical-align="middle"/>
      <style:text-properties fo:color="#107C41" fo:font-weight="bold"/>
      <style:paragraph-properties fo:text-align="center"/>
    </style:style>
    <style:style style:name="c14" style:family="table-cell" style:display-name="c14">
      <style:table-cell-properties fo:border="0.5pt solid #d0d0d0" style:vertical-align="middle"/>
      <style:text-properties fo:color="#C00000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column table:style-name="su4"/>
        <table:table-column table:style-name="su5"/>
        <table:table-column table:style-name="su6"/>
        <table:table-row>
          <table:table-cell office:value-type="string" table:style-name="c0">
            <text:p>Coin</text:p>
          </table:table-cell>
          <table:table-cell office:value-type="string" table:style-name="c0">
            <text:p>Bot Return %</text:p>
          </table:table-cell>
          <table:table-cell office:value-type="string" table:style-name="c0">
            <text:p>Buy&amp;Hold %</text:p>
          </table:table-cell>
          <table:table-cell office:value-type="string" table:style-name="c0">
            <text:p>Diff %</text:p>
          </table:table-cell>
          <table:table-cell office:value-type="string" table:style-name="c0">
            <text:p>Trades</text:p>
          </table:table-cell>
          <table:table-cell office:value-type="string" table:style-name="c0">
            <text:p>Win Rate %</text:p>
          </table:table-cell>
          <table:table-cell office:value-type="string" table:style-name="c0">
            <text:p>Max Drawdown %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float" office:value="58.23394144412366" table:style-name="c3">
            <text:p>+58.2</text:p>
          </table:table-cell>
          <table:table-cell office:value-type="float" office:value="96.8475073313783" table:style-name="c1">
            <text:p>+96.8</text:p>
          </table:table-cell>
          <table:table-cell office:value-type="float" office:value="-38.61356588725464" table:style-name="c4">
            <text:p>-38.6</text:p>
          </table:table-cell>
          <table:table-cell office:value-type="float" office:value="36" table:style-name="c1">
            <text:p>36</text:p>
          </table:table-cell>
          <table:table-cell office:value-type="float" office:value="52.77777777777778" table:style-name="c1">
            <text:p>52.8</text:p>
          </table:table-cell>
          <table:table-cell office:value-type="float" office:value="21.215767549201864" table:style-name="c1">
            <text:p>21.2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float" office:value="38.70517834315069" table:style-name="c3">
            <text:p>+38.7</text:p>
          </table:table-cell>
          <table:table-cell office:value-type="float" office:value="58.14671814671816" table:style-name="c1">
            <text:p>+58.1</text:p>
          </table:table-cell>
          <table:table-cell office:value-type="float" office:value="-19.441539803567466" table:style-name="c4">
            <text:p>-19.4</text:p>
          </table:table-cell>
          <table:table-cell office:value-type="float" office:value="30" table:style-name="c1">
            <text:p>30</text:p>
          </table:table-cell>
          <table:table-cell office:value-type="float" office:value="43.333333333333336" table:style-name="c1">
            <text:p>43.3</text:p>
          </table:table-cell>
          <table:table-cell office:value-type="float" office:value="26.475549235472567" table:style-name="c1">
            <text:p>26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float" office:value="28.102253319239185" table:style-name="c3">
            <text:p>+28.1</text:p>
          </table:table-cell>
          <table:table-cell office:value-type="float" office:value="131.27425614489002" table:style-name="c1">
            <text:p>+131.3</text:p>
          </table:table-cell>
          <table:table-cell office:value-type="float" office:value="-103.17200282565084" table:style-name="c4">
            <text:p>-103.2</text:p>
          </table:table-cell>
          <table:table-cell office:value-type="float" office:value="45" table:style-name="c1">
            <text:p>45</text:p>
          </table:table-cell>
          <table:table-cell office:value-type="float" office:value="46.666666666666664" table:style-name="c1">
            <text:p>46.7</text:p>
          </table:table-cell>
          <table:table-cell office:value-type="float" office:value="23.731316857005318" table:style-name="c1">
            <text:p>23.7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float" office:value="10.580151622487596" table:style-name="c3">
            <text:p>+10.6</text:p>
          </table:table-cell>
          <table:table-cell office:value-type="float" office:value="49.291237113402055" table:style-name="c1">
            <text:p>+49.3</text:p>
          </table:table-cell>
          <table:table-cell office:value-type="float" office:value="-38.711085490914456" table:style-name="c4">
            <text:p>-38.7</text:p>
          </table:table-cell>
          <table:table-cell office:value-type="float" office:value="32" table:style-name="c1">
            <text:p>32</text:p>
          </table:table-cell>
          <table:table-cell office:value-type="float" office:value="40.625" table:style-name="c1">
            <text:p>40.6</text:p>
          </table:table-cell>
          <table:table-cell office:value-type="float" office:value="22.704230376809683" table:style-name="c1">
            <text:p>22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float" office:value="-0.6720838875032882" table:style-name="c5">
            <text:p>-0.7</text:p>
          </table:table-cell>
          <table:table-cell office:value-type="float" office:value="35.891647855530465" table:style-name="c1">
            <text:p>+35.9</text:p>
          </table:table-cell>
          <table:table-cell office:value-type="float" office:value="-36.563731743033756" table:style-name="c4">
            <text:p>-36.6</text:p>
          </table:table-cell>
          <table:table-cell office:value-type="float" office:value="36" table:style-name="c1">
            <text:p>36</text:p>
          </table:table-cell>
          <table:table-cell office:value-type="float" office:value="41.66666666666667" table:style-name="c1">
            <text:p>41.7</text:p>
          </table:table-cell>
          <table:table-cell office:value-type="float" office:value="22.874337949791045" table:style-name="c1">
            <text:p>22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float" office:value="-1.601273562391168" table:style-name="c5">
            <text:p>-1.6</text:p>
          </table:table-cell>
          <table:table-cell office:value-type="float" office:value="-10.776545166402533" table:style-name="c1">
            <text:p>-10.8</text:p>
          </table:table-cell>
          <table:table-cell office:value-type="float" office:value="9.175271604011366" table:style-name="c6">
            <text:p>+9.2</text:p>
          </table:table-cell>
          <table:table-cell office:value-type="float" office:value="30" table:style-name="c1">
            <text:p>30</text:p>
          </table:table-cell>
          <table:table-cell office:value-type="float" office:value="40.0" table:style-name="c1">
            <text:p>40.0</text:p>
          </table:table-cell>
          <table:table-cell office:value-type="float" office:value="23.74284715081526" table:style-name="c1">
            <text:p>23.7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float" office:value="-2.4398719977756285" table:style-name="c5">
            <text:p>-2.4</text:p>
          </table:table-cell>
          <table:table-cell office:value-type="float" office:value="-4.198424928646263" table:style-name="c1">
            <text:p>-4.2</text:p>
          </table:table-cell>
          <table:table-cell office:value-type="float" office:value="1.7585529308706347" table:style-name="c6">
            <text:p>+1.8</text:p>
          </table:table-cell>
          <table:table-cell office:value-type="float" office:value="31" table:style-name="c1">
            <text:p>31</text:p>
          </table:table-cell>
          <table:table-cell office:value-type="float" office:value="48.38709677419355" table:style-name="c1">
            <text:p>48.4</text:p>
          </table:table-cell>
          <table:table-cell office:value-type="float" office:value="8.90929980708764" table:style-name="c1">
            <text:p>8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float" office:value="-3.6299993153211974" table:style-name="c5">
            <text:p>-3.6</text:p>
          </table:table-cell>
          <table:table-cell office:value-type="float" office:value="-8.512720156555769" table:style-name="c1">
            <text:p>-8.5</text:p>
          </table:table-cell>
          <table:table-cell office:value-type="float" office:value="4.882720841234572" table:style-name="c6">
            <text:p>+4.9</text:p>
          </table:table-cell>
          <table:table-cell office:value-type="float" office:value="35" table:style-name="c1">
            <text:p>35</text:p>
          </table:table-cell>
          <table:table-cell office:value-type="float" office:value="45.714285714285715" table:style-name="c1">
            <text:p>45.7</text:p>
          </table:table-cell>
          <table:table-cell office:value-type="float" office:value="26.844264160650805" table:style-name="c1">
            <text:p>26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float" office:value="-4.600472705295499" table:style-name="c5">
            <text:p>-4.6</text:p>
          </table:table-cell>
          <table:table-cell office:value-type="float" office:value="-5.694980694980697" table:style-name="c1">
            <text:p>-5.7</text:p>
          </table:table-cell>
          <table:table-cell office:value-type="float" office:value="1.094507989685198" table:style-name="c6">
            <text:p>+1.1</text:p>
          </table:table-cell>
          <table:table-cell office:value-type="float" office:value="35" table:style-name="c1">
            <text:p>35</text:p>
          </table:table-cell>
          <table:table-cell office:value-type="float" office:value="31.428571428571427" table:style-name="c1">
            <text:p>31.4</text:p>
          </table:table-cell>
          <table:table-cell office:value-type="float" office:value="26.057904317208525" table:style-name="c1">
            <text:p>26.1</text:p>
          </table:table-cell>
        </table:table-row>
        <table:table-row>
          <table:table-cell office:value-type="string" table:style-name="c2">
            <text:p>BCH/USDT</text:p>
          </table:table-cell>
          <table:table-cell office:value-type="float" office:value="-4.6961222658494535" table:style-name="c5">
            <text:p>-4.7</text:p>
          </table:table-cell>
          <table:table-cell office:value-type="float" office:value="-38.01131418624892" table:style-name="c1">
            <text:p>-38.0</text:p>
          </table:table-cell>
          <table:table-cell office:value-type="float" office:value="33.315191920399464" table:style-name="c6">
            <text:p>+33.3</text:p>
          </table:table-cell>
          <table:table-cell office:value-type="float" office:value="20" table:style-name="c1">
            <text:p>20</text:p>
          </table:table-cell>
          <table:table-cell office:value-type="float" office:value="35.0" table:style-name="c1">
            <text:p>35.0</text:p>
          </table:table-cell>
          <table:table-cell office:value-type="float" office:value="10.56257175640943" table:style-name="c1">
            <text:p>10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float" office:value="-5.105681012775608" table:style-name="c5">
            <text:p>-5.1</text:p>
          </table:table-cell>
          <table:table-cell office:value-type="float" office:value="19.465917076598735" table:style-name="c1">
            <text:p>+19.5</text:p>
          </table:table-cell>
          <table:table-cell office:value-type="float" office:value="-24.571598089374344" table:style-name="c4">
            <text:p>-24.6</text:p>
          </table:table-cell>
          <table:table-cell office:value-type="float" office:value="35" table:style-name="c1">
            <text:p>35</text:p>
          </table:table-cell>
          <table:table-cell office:value-type="float" office:value="45.714285714285715" table:style-name="c1">
            <text:p>45.7</text:p>
          </table:table-cell>
          <table:table-cell office:value-type="float" office:value="9.115827512790142" table:style-name="c1">
            <text:p>9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float" office:value="-8.973764797392732" table:style-name="c5">
            <text:p>-9.0</text:p>
          </table:table-cell>
          <table:table-cell office:value-type="float" office:value="-5.106100476742569" table:style-name="c1">
            <text:p>-5.1</text:p>
          </table:table-cell>
          <table:table-cell office:value-type="float" office:value="-3.8676643206501637" table:style-name="c4">
            <text:p>-3.9</text:p>
          </table:table-cell>
          <table:table-cell office:value-type="float" office:value="32" table:style-name="c1">
            <text:p>32</text:p>
          </table:table-cell>
          <table:table-cell office:value-type="float" office:value="40.625" table:style-name="c1">
            <text:p>40.6</text:p>
          </table:table-cell>
          <table:table-cell office:value-type="float" office:value="17.191770020366548" table:style-name="c1">
            <text:p>17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float" office:value="-13.232913202757516" table:style-name="c5">
            <text:p>-13.2</text:p>
          </table:table-cell>
          <table:table-cell office:value-type="float" office:value="3.6605580624366927" table:style-name="c1">
            <text:p>+3.7</text:p>
          </table:table-cell>
          <table:table-cell office:value-type="float" office:value="-16.893471265194208" table:style-name="c4">
            <text:p>-16.9</text:p>
          </table:table-cell>
          <table:table-cell office:value-type="float" office:value="29" table:style-name="c1">
            <text:p>29</text:p>
          </table:table-cell>
          <table:table-cell office:value-type="float" office:value="37.93103448275862" table:style-name="c1">
            <text:p>37.9</text:p>
          </table:table-cell>
          <table:table-cell office:value-type="float" office:value="14.209119009155355" table:style-name="c1">
            <text:p>14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float" office:value="-13.798085649587028" table:style-name="c5">
            <text:p>-13.8</text:p>
          </table:table-cell>
          <table:table-cell office:value-type="float" office:value="-4.489164086687317" table:style-name="c1">
            <text:p>-4.5</text:p>
          </table:table-cell>
          <table:table-cell office:value-type="float" office:value="-9.308921562899712" table:style-name="c4">
            <text:p>-9.3</text:p>
          </table:table-cell>
          <table:table-cell office:value-type="float" office:value="30" table:style-name="c1">
            <text:p>30</text:p>
          </table:table-cell>
          <table:table-cell office:value-type="float" office:value="46.666666666666664" table:style-name="c1">
            <text:p>46.7</text:p>
          </table:table-cell>
          <table:table-cell office:value-type="float" office:value="25.776613056747983" table:style-name="c1">
            <text:p>25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float" office:value="-17.330901655938156" table:style-name="c5">
            <text:p>-17.3</text:p>
          </table:table-cell>
          <table:table-cell office:value-type="float" office:value="-10.603264726756564" table:style-name="c1">
            <text:p>-10.6</text:p>
          </table:table-cell>
          <table:table-cell office:value-type="float" office:value="-6.7276369291815925" table:style-name="c4">
            <text:p>-6.7</text:p>
          </table:table-cell>
          <table:table-cell office:value-type="float" office:value="28" table:style-name="c1">
            <text:p>28</text:p>
          </table:table-cell>
          <table:table-cell office:value-type="float" office:value="25.0" table:style-name="c1">
            <text:p>25.0</text:p>
          </table:table-cell>
          <table:table-cell office:value-type="float" office:value="17.63585858223336" table:style-name="c1">
            <text:p>17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float" office:value="-19.088399875885898" table:style-name="c5">
            <text:p>-19.1</text:p>
          </table:table-cell>
          <table:table-cell office:value-type="float" office:value="-21.671195652173914" table:style-name="c1">
            <text:p>-21.7</text:p>
          </table:table-cell>
          <table:table-cell office:value-type="float" office:value="2.582795776288016" table:style-name="c6">
            <text:p>+2.6</text:p>
          </table:table-cell>
          <table:table-cell office:value-type="float" office:value="28" table:style-name="c1">
            <text:p>28</text:p>
          </table:table-cell>
          <table:table-cell office:value-type="float" office:value="28.57142857142857" table:style-name="c1">
            <text:p>28.6</text:p>
          </table:table-cell>
          <table:table-cell office:value-type="float" office:value="20.405827114768037" table:style-name="c1">
            <text:p>20.4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float" office:value="-19.435821835240848" table:style-name="c5">
            <text:p>-19.4</text:p>
          </table:table-cell>
          <table:table-cell office:value-type="float" office:value="0.21344717182496167" table:style-name="c1">
            <text:p>+0.2</text:p>
          </table:table-cell>
          <table:table-cell office:value-type="float" office:value="-19.649269007065808" table:style-name="c4">
            <text:p>-19.6</text:p>
          </table:table-cell>
          <table:table-cell office:value-type="float" office:value="35" table:style-name="c1">
            <text:p>35</text:p>
          </table:table-cell>
          <table:table-cell office:value-type="float" office:value="40.0" table:style-name="c1">
            <text:p>40.0</text:p>
          </table:table-cell>
          <table:table-cell office:value-type="float" office:value="21.420936469638423" table:style-name="c1">
            <text:p>21.4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float" office:value="-19.48624900305074" table:style-name="c5">
            <text:p>-19.5</text:p>
          </table:table-cell>
          <table:table-cell office:value-type="float" office:value="-10.129096325719948" table:style-name="c1">
            <text:p>-10.1</text:p>
          </table:table-cell>
          <table:table-cell office:value-type="float" office:value="-9.357152677330793" table:style-name="c4">
            <text:p>-9.4</text:p>
          </table:table-cell>
          <table:table-cell office:value-type="float" office:value="34" table:style-name="c1">
            <text:p>34</text:p>
          </table:table-cell>
          <table:table-cell office:value-type="float" office:value="47.05882352941176" table:style-name="c1">
            <text:p>47.1</text:p>
          </table:table-cell>
          <table:table-cell office:value-type="float" office:value="24.99261238705832" table:style-name="c1">
            <text:p>25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float" office:value="-19.636086612923283" table:style-name="c5">
            <text:p>-19.6</text:p>
          </table:table-cell>
          <table:table-cell office:value-type="float" office:value="-8.120649651972151" table:style-name="c1">
            <text:p>-8.1</text:p>
          </table:table-cell>
          <table:table-cell office:value-type="float" office:value="-11.515436960951131" table:style-name="c4">
            <text:p>-11.5</text:p>
          </table:table-cell>
          <table:table-cell office:value-type="float" office:value="31" table:style-name="c1">
            <text:p>31</text:p>
          </table:table-cell>
          <table:table-cell office:value-type="float" office:value="25.806451612903224" table:style-name="c1">
            <text:p>25.8</text:p>
          </table:table-cell>
          <table:table-cell office:value-type="float" office:value="25.44773132328669" table:style-name="c1">
            <text:p>25.4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float" office:value="-19.85045049048597" table:style-name="c5">
            <text:p>-19.9</text:p>
          </table:table-cell>
          <table:table-cell office:value-type="float" office:value="-27.420973406924244" table:style-name="c1">
            <text:p>-27.4</text:p>
          </table:table-cell>
          <table:table-cell office:value-type="float" office:value="7.570522916438275" table:style-name="c6">
            <text:p>+7.6</text:p>
          </table:table-cell>
          <table:table-cell office:value-type="float" office:value="33" table:style-name="c1">
            <text:p>33</text:p>
          </table:table-cell>
          <table:table-cell office:value-type="float" office:value="39.39393939393939" table:style-name="c1">
            <text:p>39.4</text:p>
          </table:table-cell>
          <table:table-cell office:value-type="float" office:value="26.6151842161212" table:style-name="c1">
            <text:p>26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float" office:value="-19.978040217141256" table:style-name="c5">
            <text:p>-20.0</text:p>
          </table:table-cell>
          <table:table-cell office:value-type="float" office:value="-12.086536742356515" table:style-name="c1">
            <text:p>-12.1</text:p>
          </table:table-cell>
          <table:table-cell office:value-type="float" office:value="-7.8915034747847415" table:style-name="c4">
            <text:p>-7.9</text:p>
          </table:table-cell>
          <table:table-cell office:value-type="float" office:value="26" table:style-name="c1">
            <text:p>26</text:p>
          </table:table-cell>
          <table:table-cell office:value-type="float" office:value="26.923076923076923" table:style-name="c1">
            <text:p>26.9</text:p>
          </table:table-cell>
          <table:table-cell office:value-type="float" office:value="23.75437003007332" table:style-name="c1">
            <text:p>23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float" office:value="-22.478685013841346" table:style-name="c5">
            <text:p>-22.5</text:p>
          </table:table-cell>
          <table:table-cell office:value-type="float" office:value="3.685711268349358" table:style-name="c1">
            <text:p>+3.7</text:p>
          </table:table-cell>
          <table:table-cell office:value-type="float" office:value="-26.164396282190705" table:style-name="c4">
            <text:p>-26.2</text:p>
          </table:table-cell>
          <table:table-cell office:value-type="float" office:value="38" table:style-name="c1">
            <text:p>38</text:p>
          </table:table-cell>
          <table:table-cell office:value-type="float" office:value="36.84210526315789" table:style-name="c1">
            <text:p>36.8</text:p>
          </table:table-cell>
          <table:table-cell office:value-type="float" office:value="27.276258433021557" table:style-name="c1">
            <text:p>27.3</text:p>
          </table:table-cell>
        </table:table-row>
        <table:table-row>
          <table:table-cell office:value-type="string" table:style-name="c2">
            <text:p>POL/USDT</text:p>
          </table:table-cell>
          <table:table-cell office:value-type="float" office:value="-22.805742950144655" table:style-name="c5">
            <text:p>-22.8</text:p>
          </table:table-cell>
          <table:table-cell office:value-type="float" office:value="-11.084220716360118" table:style-name="c1">
            <text:p>-11.1</text:p>
          </table:table-cell>
          <table:table-cell office:value-type="float" office:value="-11.721522233784537" table:style-name="c4">
            <text:p>-11.7</text:p>
          </table:table-cell>
          <table:table-cell office:value-type="float" office:value="37" table:style-name="c1">
            <text:p>37</text:p>
          </table:table-cell>
          <table:table-cell office:value-type="float" office:value="35.13513513513514" table:style-name="c1">
            <text:p>35.1</text:p>
          </table:table-cell>
          <table:table-cell office:value-type="float" office:value="23.654326524562812" table:style-name="c1">
            <text:p>23.7</text:p>
          </table:table-cell>
        </table:table-row>
        <table:table-row>
          <table:table-cell office:value-type="string" table:style-name="c2">
            <text:p>ADA/USDT</text:p>
          </table:table-cell>
          <table:table-cell office:value-type="float" office:value="-24.492589287711564" table:style-name="c5">
            <text:p>-24.5</text:p>
          </table:table-cell>
          <table:table-cell office:value-type="float" office:value="-18.50494686698424" table:style-name="c1">
            <text:p>-18.5</text:p>
          </table:table-cell>
          <table:table-cell office:value-type="float" office:value="-5.9876424207273224" table:style-name="c4">
            <text:p>-6.0</text:p>
          </table:table-cell>
          <table:table-cell office:value-type="float" office:value="30" table:style-name="c1">
            <text:p>30</text:p>
          </table:table-cell>
          <table:table-cell office:value-type="float" office:value="33.33333333333333" table:style-name="c1">
            <text:p>33.3</text:p>
          </table:table-cell>
          <table:table-cell office:value-type="float" office:value="28.503700043940906" table:style-name="c1">
            <text:p>28.5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float" office:value="-24.844067627409174" table:style-name="c5">
            <text:p>-24.8</text:p>
          </table:table-cell>
          <table:table-cell office:value-type="float" office:value="-11.241494921605359" table:style-name="c1">
            <text:p>-11.2</text:p>
          </table:table-cell>
          <table:table-cell office:value-type="float" office:value="-13.602572705803816" table:style-name="c4">
            <text:p>-13.6</text:p>
          </table:table-cell>
          <table:table-cell office:value-type="float" office:value="30" table:style-name="c1">
            <text:p>30</text:p>
          </table:table-cell>
          <table:table-cell office:value-type="float" office:value="36.666666666666664" table:style-name="c1">
            <text:p>36.7</text:p>
          </table:table-cell>
          <table:table-cell office:value-type="float" office:value="27.80566185369858" table:style-name="c1">
            <text:p>27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float" office:value="-25.04820618726063" table:style-name="c5">
            <text:p>-25.0</text:p>
          </table:table-cell>
          <table:table-cell office:value-type="float" office:value="-7.64643237486688" table:style-name="c1">
            <text:p>-7.6</text:p>
          </table:table-cell>
          <table:table-cell office:value-type="float" office:value="-17.40177381239375" table:style-name="c4">
            <text:p>-17.4</text:p>
          </table:table-cell>
          <table:table-cell office:value-type="float" office:value="30" table:style-name="c1">
            <text:p>30</text:p>
          </table:table-cell>
          <table:table-cell office:value-type="float" office:value="43.333333333333336" table:style-name="c1">
            <text:p>43.3</text:p>
          </table:table-cell>
          <table:table-cell office:value-type="float" office:value="28.916162407616675" table:style-name="c1">
            <text:p>28.9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float" office:value="-25.27820882575098" table:style-name="c5">
            <text:p>-25.3</text:p>
          </table:table-cell>
          <table:table-cell office:value-type="float" office:value="-12.565154707774202" table:style-name="c1">
            <text:p>-12.6</text:p>
          </table:table-cell>
          <table:table-cell office:value-type="float" office:value="-12.713054117976778" table:style-name="c4">
            <text:p>-12.7</text:p>
          </table:table-cell>
          <table:table-cell office:value-type="float" office:value="29" table:style-name="c1">
            <text:p>29</text:p>
          </table:table-cell>
          <table:table-cell office:value-type="float" office:value="27.586206896551722" table:style-name="c1">
            <text:p>27.6</text:p>
          </table:table-cell>
          <table:table-cell office:value-type="float" office:value="27.028360280330606" table:style-name="c1">
            <text:p>27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float" office:value="-26.776378977346404" table:style-name="c5">
            <text:p>-26.8</text:p>
          </table:table-cell>
          <table:table-cell office:value-type="float" office:value="-3.214285714285714" table:style-name="c1">
            <text:p>-3.2</text:p>
          </table:table-cell>
          <table:table-cell office:value-type="float" office:value="-23.56209326306069" table:style-name="c4">
            <text:p>-23.6</text:p>
          </table:table-cell>
          <table:table-cell office:value-type="float" office:value="34" table:style-name="c1">
            <text:p>34</text:p>
          </table:table-cell>
          <table:table-cell office:value-type="float" office:value="32.35294117647059" table:style-name="c1">
            <text:p>32.4</text:p>
          </table:table-cell>
          <table:table-cell office:value-type="float" office:value="30.156154549754945" table:style-name="c1">
            <text:p>30.2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float" office:value="-31.31910537792338" table:style-name="c5">
            <text:p>-31.3</text:p>
          </table:table-cell>
          <table:table-cell office:value-type="float" office:value="-4.581976112920745" table:style-name="c1">
            <text:p>-4.6</text:p>
          </table:table-cell>
          <table:table-cell office:value-type="float" office:value="-26.737129265002633" table:style-name="c4">
            <text:p>-26.7</text:p>
          </table:table-cell>
          <table:table-cell office:value-type="float" office:value="38" table:style-name="c1">
            <text:p>38</text:p>
          </table:table-cell>
          <table:table-cell office:value-type="float" office:value="34.21052631578947" table:style-name="c1">
            <text:p>34.2</text:p>
          </table:table-cell>
          <table:table-cell office:value-type="float" office:value="31.363903533219528" table:style-name="c1">
            <text:p>31.4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float" office:value="-39.970237508470724" table:style-name="c5">
            <text:p>-40.0</text:p>
          </table:table-cell>
          <table:table-cell office:value-type="float" office:value="-25.899280575539564" table:style-name="c1">
            <text:p>-25.9</text:p>
          </table:table-cell>
          <table:table-cell office:value-type="float" office:value="-14.07095693293116" table:style-name="c4">
            <text:p>-14.1</text:p>
          </table:table-cell>
          <table:table-cell office:value-type="float" office:value="27" table:style-name="c1">
            <text:p>27</text:p>
          </table:table-cell>
          <table:table-cell office:value-type="float" office:value="22.22222222222222" table:style-name="c1">
            <text:p>22.2</text:p>
          </table:table-cell>
          <table:table-cell office:value-type="float" office:value="40.02542189570615" table:style-name="c1">
            <text:p>40.0</text:p>
          </table:table-cell>
        </table:table-row>
        <table:table-row>
          <table:table-cell office:value-type="string" table:style-name="c7">
            <text:p>AVERAGE</text:p>
          </table:table-cell>
          <table:table-cell office:value-type="float" office:value="-10.031597170472432" table:style-name="c8">
            <text:p>-10.0</text:p>
          </table:table-cell>
          <table:table-cell office:value-type="float" office:value="4.563941399287484" table:style-name="c7">
            <text:p>+4.6</text:p>
          </table:table-cell>
          <table:table-cell office:value-type="float" office:value="-14.595538569759917" table:style-name="c8">
            <text:p>-14.6</text:p>
          </table:table-cell>
          <table:table-cell office:value-type="float" office:value="964" table:style-name="c7">
            <text:p>964</text:p>
          </table:table-cell>
          <table:table-cell office:value-type="float" office:value="37.69908585328755" table:style-name="c7">
            <text:p>37.7</text:p>
          </table:table-cell>
          <table:table-cell office:value-type="float" office:value="23.48046294681811" table:style-name="c7">
            <text:p>23.5</text:p>
          </table:table-cell>
        </table:table-row>
      </table:table>
      <table:table table:name="Trade Log">
        <table:table-column table:style-name="tl0"/>
        <table:table-column table:style-name="tl1"/>
        <table:table-column table:style-name="tl2"/>
        <table:table-column table:style-name="tl3"/>
        <table:table-column table:style-name="tl4"/>
        <table:table-column table:style-name="tl5"/>
        <table:table-column table:style-name="tl6"/>
        <table:table-row>
          <table:table-cell office:value-type="string" table:style-name="c0">
            <text:p>Coin</text:p>
          </table:table-cell>
          <table:table-cell office:value-type="string" table:style-name="c0">
            <text:p>Type</text:p>
          </table:table-cell>
          <table:table-cell office:value-type="string" table:style-name="c0">
            <text:p>Entry Date</text:p>
          </table:table-cell>
          <table:table-cell office:value-type="string" table:style-name="c0">
            <text:p>Entry Price</text:p>
          </table:table-cell>
          <table:table-cell office:value-type="string" table:style-name="c0">
            <text:p>Exit Date</text:p>
          </table:table-cell>
          <table:table-cell office:value-type="string" table:style-name="c0">
            <text:p>Exit Price</text:p>
          </table:table-cell>
          <table:table-cell office:value-type="string" table:style-name="c0">
            <text:p>P/L %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0:45</text:p>
          </table:table-cell>
          <table:table-cell office:value-type="float" office:value="0.27593789999999996" table:style-name="c10">
            <text:p>0.27594</text:p>
          </table:table-cell>
          <table:table-cell office:value-type="string" table:style-name="c10">
            <text:p>2026-03-06 10:45</text:p>
          </table:table-cell>
          <table:table-cell office:value-type="float" office:value="0.26816585" table:style-name="c10">
            <text:p>0.26817</text:p>
          </table:table-cell>
          <table:table-cell office:value-type="float" office:value="-3.010863507386974" table:style-name="c11">
            <text:p>-3.0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13:45</text:p>
          </table:table-cell>
          <table:table-cell office:value-type="float" office:value="0.26793389999999995" table:style-name="c10">
            <text:p>0.26793</text:p>
          </table:table-cell>
          <table:table-cell office:value-type="string" table:style-name="c10">
            <text:p>2026-03-06 16:00</text:p>
          </table:table-cell>
          <table:table-cell office:value-type="float" office:value="0.2566716" table:style-name="c10">
            <text:p>0.25667</text:p>
          </table:table-cell>
          <table:table-cell office:value-type="float" office:value="-4.3948849057174" table:style-name="c11">
            <text:p>-4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30</text:p>
          </table:table-cell>
          <table:table-cell office:value-type="float" office:value="0.26603295" table:style-name="c10">
            <text:p>0.26603</text:p>
          </table:table-cell>
          <table:table-cell office:value-type="string" table:style-name="c10">
            <text:p>2026-03-11 09:30</text:p>
          </table:table-cell>
          <table:table-cell office:value-type="float" office:value="0.25797095000000003" table:style-name="c10">
            <text:p>0.25797</text:p>
          </table:table-cell>
          <table:table-cell office:value-type="float" office:value="-3.2242938061055826" table:style-name="c11">
            <text:p>-3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1:15</text:p>
          </table:table-cell>
          <table:table-cell office:value-type="float" office:value="0.25992989999999994" table:style-name="c10">
            <text:p>0.25993</text:p>
          </table:table-cell>
          <table:table-cell office:value-type="string" table:style-name="c10">
            <text:p>2026-03-12 11:15</text:p>
          </table:table-cell>
          <table:table-cell office:value-type="float" office:value="0.26236875000000004" table:style-name="c10">
            <text:p>0.26237</text:p>
          </table:table-cell>
          <table:table-cell office:value-type="float" office:value="0.7364965972556758" table:style-name="c12">
            <text:p>+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30</text:p>
          </table:table-cell>
          <table:table-cell office:value-type="float" office:value="0.26953469999999996" table:style-name="c10">
            <text:p>0.26953</text:p>
          </table:table-cell>
          <table:table-cell office:value-type="string" table:style-name="c10">
            <text:p>2026-03-14 00:30</text:p>
          </table:table-cell>
          <table:table-cell office:value-type="float" office:value="0.26426780000000005" table:style-name="c10">
            <text:p>0.26427</text:p>
          </table:table-cell>
          <table:table-cell office:value-type="float" office:value="-2.1500650314040803" table:style-name="c11">
            <text:p>-2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04:45</text:p>
          </table:table-cell>
          <table:table-cell office:value-type="float" office:value="0.2665332" table:style-name="c10">
            <text:p>0.26653</text:p>
          </table:table-cell>
          <table:table-cell office:value-type="string" table:style-name="c10">
            <text:p>2026-03-14 09:00</text:p>
          </table:table-cell>
          <table:table-cell office:value-type="float" office:value="0.2610694" table:style-name="c10">
            <text:p>0.26107</text:p>
          </table:table-cell>
          <table:table-cell office:value-type="float" office:value="-2.2457531484257998" table:style-name="c11">
            <text:p>-2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00</text:p>
          </table:table-cell>
          <table:table-cell office:value-type="float" office:value="0.26683334999999997" table:style-name="c10">
            <text:p>0.26683</text:p>
          </table:table-cell>
          <table:table-cell office:value-type="string" table:style-name="c10">
            <text:p>2026-03-16 22:00</text:p>
          </table:table-cell>
          <table:table-cell office:value-type="float" office:value="0.28735625" table:style-name="c10">
            <text:p>0.28736</text:p>
          </table:table-cell>
          <table:table-cell office:value-type="float" office:value="7.476005100655514" table:style-name="c12">
            <text:p>+7.5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7:30</text:p>
          </table:table-cell>
          <table:table-cell office:value-type="float" office:value="0.2877438" table:style-name="c10">
            <text:p>0.28774</text:p>
          </table:table-cell>
          <table:table-cell office:value-type="string" table:style-name="c10">
            <text:p>2026-03-18 07:30</text:p>
          </table:table-cell>
          <table:table-cell office:value-type="float" office:value="0.28755615" table:style-name="c10">
            <text:p>0.28756</text:p>
          </table:table-cell>
          <table:table-cell office:value-type="float" office:value="-0.2649839002091259" table:style-name="c11">
            <text:p>-0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1:45</text:p>
          </table:table-cell>
          <table:table-cell office:value-type="float" office:value="0.264132" table:style-name="c10">
            <text:p>0.26413</text:p>
          </table:table-cell>
          <table:table-cell office:value-type="string" table:style-name="c10">
            <text:p>2026-03-24 21:45</text:p>
          </table:table-cell>
          <table:table-cell office:value-type="float" office:value="0.26526730000000004" table:style-name="c10">
            <text:p>0.26527</text:p>
          </table:table-cell>
          <table:table-cell office:value-type="float" office:value="0.22906375119260414" table:style-name="c12">
            <text:p>+0.2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00:15</text:p>
          </table:table-cell>
          <table:table-cell office:value-type="float" office:value="0.26843415" table:style-name="c10">
            <text:p>0.26843</text:p>
          </table:table-cell>
          <table:table-cell office:value-type="string" table:style-name="c10">
            <text:p>2026-03-26 00:15</text:p>
          </table:table-cell>
          <table:table-cell office:value-type="float" office:value="0.269865" table:style-name="c10">
            <text:p>0.26987</text:p>
          </table:table-cell>
          <table:table-cell office:value-type="float" office:value="0.33207021722088115" table:style-name="c12">
            <text:p>+0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5:00</text:p>
          </table:table-cell>
          <table:table-cell office:value-type="float" office:value="0.24772379999999997" table:style-name="c10">
            <text:p>0.24772</text:p>
          </table:table-cell>
          <table:table-cell office:value-type="string" table:style-name="c10">
            <text:p>2026-04-04 15:00</text:p>
          </table:table-cell>
          <table:table-cell office:value-type="float" office:value="0.24497745" table:style-name="c10">
            <text:p>0.24498</text:p>
          </table:table-cell>
          <table:table-cell office:value-type="float" office:value="-1.3063177306944063" table:style-name="c11">
            <text:p>-1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15</text:p>
          </table:table-cell>
          <table:table-cell office:value-type="float" office:value="0.2465232" table:style-name="c10">
            <text:p>0.24652</text:p>
          </table:table-cell>
          <table:table-cell office:value-type="string" table:style-name="c10">
            <text:p>2026-04-05 11:00</text:p>
          </table:table-cell>
          <table:table-cell office:value-type="float" office:value="0.24047970000000002" table:style-name="c10">
            <text:p>0.24048</text:p>
          </table:table-cell>
          <table:table-cell office:value-type="float" office:value="-2.6464928738147098" table:style-name="c11">
            <text:p>-2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15</text:p>
          </table:table-cell>
          <table:table-cell office:value-type="float" office:value="0.25482734999999995" table:style-name="c10">
            <text:p>0.25483</text:p>
          </table:table-cell>
          <table:table-cell office:value-type="string" table:style-name="c10">
            <text:p>2026-04-07 00:15</text:p>
          </table:table-cell>
          <table:table-cell office:value-type="float" office:value="0.24537725000000002" table:style-name="c10">
            <text:p>0.24538</text:p>
          </table:table-cell>
          <table:table-cell office:value-type="float" office:value="-3.900919239143652" table:style-name="c11">
            <text:p>-3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0.26283134999999996" table:style-name="c10">
            <text:p>0.26283</text:p>
          </table:table-cell>
          <table:table-cell office:value-type="string" table:style-name="c10">
            <text:p>2026-04-08 23:00</text:p>
          </table:table-cell>
          <table:table-cell office:value-type="float" office:value="0.2516741" table:style-name="c10">
            <text:p>0.25167</text:p>
          </table:table-cell>
          <table:table-cell office:value-type="float" office:value="-4.436436721076065" table:style-name="c11">
            <text:p>-4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0.2583291" table:style-name="c10">
            <text:p>0.25833</text:p>
          </table:table-cell>
          <table:table-cell office:value-type="string" table:style-name="c10">
            <text:p>2026-04-10 11:00</text:p>
          </table:table-cell>
          <table:table-cell office:value-type="float" office:value="0.24997495" table:style-name="c10">
            <text:p>0.24997</text:p>
          </table:table-cell>
          <table:table-cell office:value-type="float" office:value="-3.4273529095444455" table:style-name="c11">
            <text:p>-3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4:30</text:p>
          </table:table-cell>
          <table:table-cell office:value-type="float" office:value="0.2549274" table:style-name="c10">
            <text:p>0.25493</text:p>
          </table:table-cell>
          <table:table-cell office:value-type="string" table:style-name="c10">
            <text:p>2026-04-11 10:00</text:p>
          </table:table-cell>
          <table:table-cell office:value-type="float" office:value="0.2502748" table:style-name="c10">
            <text:p>0.25027</text:p>
          </table:table-cell>
          <table:table-cell office:value-type="float" office:value="-2.0213203151956183" table:style-name="c11">
            <text:p>-2.0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7:00</text:p>
          </table:table-cell>
          <table:table-cell office:value-type="float" office:value="0.24532259999999997" table:style-name="c10">
            <text:p>0.24532</text:p>
          </table:table-cell>
          <table:table-cell office:value-type="string" table:style-name="c10">
            <text:p>2026-04-16 17:00</text:p>
          </table:table-cell>
          <table:table-cell office:value-type="float" office:value="0.25157415" table:style-name="c10">
            <text:p>0.25157</text:p>
          </table:table-cell>
          <table:table-cell office:value-type="float" office:value="2.3433035823646087" table:style-name="c12">
            <text:p>+2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9:00</text:p>
          </table:table-cell>
          <table:table-cell office:value-type="float" office:value="0.2591295" table:style-name="c10">
            <text:p>0.25913</text:p>
          </table:table-cell>
          <table:table-cell office:value-type="string" table:style-name="c10">
            <text:p>2026-04-17 19:00</text:p>
          </table:table-cell>
          <table:table-cell office:value-type="float" office:value="0.26116934999999997" table:style-name="c10">
            <text:p>0.26117</text:p>
          </table:table-cell>
          <table:table-cell office:value-type="float" office:value="0.5857196765902462" table:style-name="c12">
            <text:p>+0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8:45</text:p>
          </table:table-cell>
          <table:table-cell office:value-type="float" office:value="0.2511255" table:style-name="c10">
            <text:p>0.25113</text:p>
          </table:table-cell>
          <table:table-cell office:value-type="string" table:style-name="c10">
            <text:p>2026-04-22 08:45</text:p>
          </table:table-cell>
          <table:table-cell office:value-type="float" office:value="0.25437275000000004" table:style-name="c10">
            <text:p>0.25437</text:p>
          </table:table-cell>
          <table:table-cell office:value-type="float" office:value="1.0905936962793517" table:style-name="c12">
            <text:p>+1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3:30</text:p>
          </table:table-cell>
          <table:table-cell office:value-type="float" office:value="0.2553276" table:style-name="c10">
            <text:p>0.25533</text:p>
          </table:table-cell>
          <table:table-cell office:value-type="string" table:style-name="c10">
            <text:p>2026-04-23 05:00</text:p>
          </table:table-cell>
          <table:table-cell office:value-type="float" office:value="0.2466766" table:style-name="c10">
            <text:p>0.24668</text:p>
          </table:table-cell>
          <table:table-cell office:value-type="float" office:value="-3.5813231798677347" table:style-name="c11">
            <text:p>-3.6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6:45</text:p>
          </table:table-cell>
          <table:table-cell office:value-type="float" office:value="0.25192590000000004" table:style-name="c10">
            <text:p>0.25193</text:p>
          </table:table-cell>
          <table:table-cell office:value-type="string" table:style-name="c10">
            <text:p>2026-04-27 06:45</text:p>
          </table:table-cell>
          <table:table-cell office:value-type="float" office:value="0.24737625000000002" table:style-name="c10">
            <text:p>0.24738</text:p>
          </table:table-cell>
          <table:table-cell office:value-type="float" office:value="-2.0022376118334906" table:style-name="c11">
            <text:p>-2.0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0.25302645" table:style-name="c10">
            <text:p>0.25303</text:p>
          </table:table-cell>
          <table:table-cell office:value-type="string" table:style-name="c10">
            <text:p>2026-04-29 18:00</text:p>
          </table:table-cell>
          <table:table-cell office:value-type="float" office:value="0.2448775" table:style-name="c10">
            <text:p>0.24488</text:p>
          </table:table-cell>
          <table:table-cell office:value-type="float" office:value="-3.4140541917653477" table:style-name="c11">
            <text:p>-3.4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4:00</text:p>
          </table:table-cell>
          <table:table-cell office:value-type="float" office:value="0.25062524999999997" table:style-name="c10">
            <text:p>0.25063</text:p>
          </table:table-cell>
          <table:table-cell office:value-type="string" table:style-name="c10">
            <text:p>2026-05-02 14:00</text:p>
          </table:table-cell>
          <table:table-cell office:value-type="float" office:value="0.24877555" table:style-name="c10">
            <text:p>0.24878</text:p>
          </table:table-cell>
          <table:table-cell office:value-type="float" office:value="-0.9364588462056345" table:style-name="c11">
            <text:p>-0.9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0.25232609999999994" table:style-name="c10">
            <text:p>0.25233</text:p>
          </table:table-cell>
          <table:table-cell office:value-type="string" table:style-name="c10">
            <text:p>2026-05-05 02:00</text:p>
          </table:table-cell>
          <table:table-cell office:value-type="float" office:value="0.25077455000000004" table:style-name="c10">
            <text:p>0.25077</text:p>
          </table:table-cell>
          <table:table-cell office:value-type="float" office:value="-0.8135695536252152" table:style-name="c11">
            <text:p>-0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00</text:p>
          </table:table-cell>
          <table:table-cell office:value-type="float" office:value="0.25482734999999995" table:style-name="c10">
            <text:p>0.25483</text:p>
          </table:table-cell>
          <table:table-cell office:value-type="string" table:style-name="c10">
            <text:p>2026-05-06 07:00</text:p>
          </table:table-cell>
          <table:table-cell office:value-type="float" office:value="0.2636681" table:style-name="c10">
            <text:p>0.26367</text:p>
          </table:table-cell>
          <table:table-cell office:value-type="float" office:value="3.262474560952766" table:style-name="c12">
            <text:p>+3.3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8:15</text:p>
          </table:table-cell>
          <table:table-cell office:value-type="float" office:value="0.26583284999999995" table:style-name="c10">
            <text:p>0.26583</text:p>
          </table:table-cell>
          <table:table-cell office:value-type="string" table:style-name="c10">
            <text:p>2026-05-07 08:15</text:p>
          </table:table-cell>
          <table:table-cell office:value-type="float" office:value="0.26826580000000005" table:style-name="c10">
            <text:p>0.26827</text:p>
          </table:table-cell>
          <table:table-cell office:value-type="float" office:value="0.7134884442611567" table:style-name="c12">
            <text:p>+0.7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45</text:p>
          </table:table-cell>
          <table:table-cell office:value-type="float" office:value="0.27173579999999997" table:style-name="c10">
            <text:p>0.27174</text:p>
          </table:table-cell>
          <table:table-cell office:value-type="string" table:style-name="c10">
            <text:p>2026-05-09 17:45</text:p>
          </table:table-cell>
          <table:table-cell office:value-type="float" office:value="0.2720639" table:style-name="c10">
            <text:p>0.27206</text:p>
          </table:table-cell>
          <table:table-cell office:value-type="float" office:value="-0.07939908399994255" table:style-name="c11">
            <text:p>-0.1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30</text:p>
          </table:table-cell>
          <table:table-cell office:value-type="float" office:value="0.27303645" table:style-name="c10">
            <text:p>0.27304</text:p>
          </table:table-cell>
          <table:table-cell office:value-type="string" table:style-name="c10">
            <text:p>2026-05-10 18:30</text:p>
          </table:table-cell>
          <table:table-cell office:value-type="float" office:value="0.28715635" table:style-name="c10">
            <text:p>0.28716</text:p>
          </table:table-cell>
          <table:table-cell office:value-type="float" office:value="4.961196373725918" table:style-name="c12">
            <text:p>+5.0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0:15</text:p>
          </table:table-cell>
          <table:table-cell office:value-type="float" office:value="0.27983985" table:style-name="c10">
            <text:p>0.27984</text:p>
          </table:table-cell>
          <table:table-cell office:value-type="string" table:style-name="c10">
            <text:p>2026-05-12 10:15</text:p>
          </table:table-cell>
          <table:table-cell office:value-type="float" office:value="0.27546220000000005" table:style-name="c10">
            <text:p>0.27546</text:p>
          </table:table-cell>
          <table:table-cell office:value-type="float" office:value="-1.7611140578441487" table:style-name="c11">
            <text:p>-1.8</text:p>
          </table:table-cell>
        </table:table-row>
        <table:table-row>
          <table:table-cell office:value-type="string" table:style-name="c9">
            <text:p>ADA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6:45</text:p>
          </table:table-cell>
          <table:table-cell office:value-type="float" office:value="0.24732359999999998" table:style-name="c10">
            <text:p>0.24732</text:p>
          </table:table-cell>
          <table:table-cell office:value-type="string" table:style-name="c10">
            <text:p>2026-05-26 03:00</text:p>
          </table:table-cell>
          <table:table-cell office:value-type="float" office:value="0.24047970000000002" table:style-name="c10">
            <text:p>0.24048</text:p>
          </table:table-cell>
          <table:table-cell office:value-type="float" office:value="-2.961552767426945" table:style-name="c11">
            <text:p>-3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0:45</text:p>
          </table:table-cell>
          <table:table-cell office:value-type="float" office:value="0.08394195" table:style-name="c1">
            <text:p>0.083942</text:p>
          </table:table-cell>
          <table:table-cell office:value-type="string" table:style-name="c1">
            <text:p>2026-03-11 00:45</text:p>
          </table:table-cell>
          <table:table-cell office:value-type="float" office:value="0.08515740000000001" table:style-name="c1">
            <text:p>0.085157</text:p>
          </table:table-cell>
          <table:table-cell office:value-type="float" office:value="1.2451704510081152" table:style-name="c13">
            <text:p>+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15</text:p>
          </table:table-cell>
          <table:table-cell office:value-type="float" office:value="0.08674335" table:style-name="c1">
            <text:p>0.086743</text:p>
          </table:table-cell>
          <table:table-cell office:value-type="string" table:style-name="c1">
            <text:p>2026-03-12 13:15</text:p>
          </table:table-cell>
          <table:table-cell office:value-type="float" office:value="0.08685655" table:style-name="c1">
            <text:p>0.086857</text:p>
          </table:table-cell>
          <table:table-cell office:value-type="float" office:value="-0.0696609520499214" table:style-name="c14">
            <text:p>-0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7:45</text:p>
          </table:table-cell>
          <table:table-cell office:value-type="float" office:value="0.08774385" table:style-name="c1">
            <text:p>0.087744</text:p>
          </table:table-cell>
          <table:table-cell office:value-type="string" table:style-name="c1">
            <text:p>2026-03-13 17:45</text:p>
          </table:table-cell>
          <table:table-cell office:value-type="float" office:value="0.09295350000000001" table:style-name="c1">
            <text:p>0.092954</text:p>
          </table:table-cell>
          <table:table-cell office:value-type="float" office:value="5.725570457074802" table:style-name="c13">
            <text:p>+5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04:4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3-15 04:45</text:p>
          </table:table-cell>
          <table:table-cell office:value-type="float" office:value="0.08945525" table:style-name="c1">
            <text:p>0.089455</text:p>
          </table:table-cell>
          <table:table-cell office:value-type="float" office:value="-7.339757997169627" table:style-name="c14">
            <text:p>-7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09204599999999999" table:style-name="c1">
            <text:p>0.092046</text:p>
          </table:table-cell>
          <table:table-cell office:value-type="string" table:style-name="c1">
            <text:p>2026-03-16 11:00</text:p>
          </table:table-cell>
          <table:table-cell office:value-type="float" office:value="0.0943528" table:style-name="c1">
            <text:p>0.094353</text:p>
          </table:table-cell>
          <table:table-cell office:value-type="float" office:value="2.3012284648979975" table:style-name="c13">
            <text:p>+2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45</text:p>
          </table:table-cell>
          <table:table-cell office:value-type="float" office:value="0.09714855" table:style-name="c1">
            <text:p>0.097149</text:p>
          </table:table-cell>
          <table:table-cell office:value-type="string" table:style-name="c1">
            <text:p>2026-03-17 21:45</text:p>
          </table:table-cell>
          <table:table-cell office:value-type="float" office:value="0.0961519" table:style-name="c1">
            <text:p>0.096152</text:p>
          </table:table-cell>
          <table:table-cell office:value-type="float" office:value="-1.2237523340286605" table:style-name="c14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3:45</text:p>
          </table:table-cell>
          <table:table-cell office:value-type="float" office:value="0.09614805" table:style-name="c1">
            <text:p>0.096148</text:p>
          </table:table-cell>
          <table:table-cell office:value-type="string" table:style-name="c1">
            <text:p>2026-03-18 13:00</text:p>
          </table:table-cell>
          <table:table-cell office:value-type="float" office:value="0.09065465" table:style-name="c1">
            <text:p>0.090655</text:p>
          </table:table-cell>
          <table:table-cell office:value-type="float" office:value="-5.9019591612622495" table:style-name="c14">
            <text:p>-5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3:15</text:p>
          </table:table-cell>
          <table:table-cell office:value-type="float" office:value="0.0884442" table:style-name="c1">
            <text:p>0.088444</text:p>
          </table:table-cell>
          <table:table-cell office:value-type="string" table:style-name="c1">
            <text:p>2026-03-26 09:00</text:p>
          </table:table-cell>
          <table:table-cell office:value-type="float" office:value="0.08535730000000001" table:style-name="c1">
            <text:p>0.085357</text:p>
          </table:table-cell>
          <table:table-cell office:value-type="float" office:value="-3.683146257979597" table:style-name="c14">
            <text:p>-3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08374184999999999" table:style-name="c1">
            <text:p>0.083742</text:p>
          </table:table-cell>
          <table:table-cell office:value-type="string" table:style-name="c1">
            <text:p>2026-03-31 08:00</text:p>
          </table:table-cell>
          <table:table-cell office:value-type="float" office:value="0.0857571" table:style-name="c1">
            <text:p>0.085757</text:p>
          </table:table-cell>
          <table:table-cell office:value-type="float" office:value="2.2017922425884073" table:style-name="c13">
            <text:p>+2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8:15</text:p>
          </table:table-cell>
          <table:table-cell office:value-type="float" office:value="0.086043" table:style-name="c1">
            <text:p>0.086043</text:p>
          </table:table-cell>
          <table:table-cell office:value-type="string" table:style-name="c1">
            <text:p>2026-04-01 08:15</text:p>
          </table:table-cell>
          <table:table-cell office:value-type="float" office:value="0.10074960000000001" table:style-name="c1">
            <text:p>0.10075</text:p>
          </table:table-cell>
          <table:table-cell office:value-type="float" office:value="16.85808438757368" table:style-name="c13">
            <text:p>+16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0:45</text:p>
          </table:table-cell>
          <table:table-cell office:value-type="float" office:value="0.10515255" table:style-name="c1">
            <text:p>0.10515</text:p>
          </table:table-cell>
          <table:table-cell office:value-type="string" table:style-name="c1">
            <text:p>2026-04-02 10:45</text:p>
          </table:table-cell>
          <table:table-cell office:value-type="float" office:value="0.103948" table:style-name="c1">
            <text:p>0.10395</text:p>
          </table:table-cell>
          <table:table-cell office:value-type="float" office:value="-1.3431362834282035" table:style-name="c14">
            <text:p>-1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2 14:00</text:p>
          </table:table-cell>
          <table:table-cell office:value-type="float" office:value="0.10435215" table:style-name="c1">
            <text:p>0.10435</text:p>
          </table:table-cell>
          <table:table-cell office:value-type="string" table:style-name="c1">
            <text:p>2026-04-03 14:00</text:p>
          </table:table-cell>
          <table:table-cell office:value-type="float" office:value="0.12023985000000001" table:style-name="c1">
            <text:p>0.12024</text:p>
          </table:table-cell>
          <table:table-cell office:value-type="float" office:value="14.994746672541016" table:style-name="c13">
            <text:p>+15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1:15</text:p>
          </table:table-cell>
          <table:table-cell office:value-type="float" office:value="0.12516254999999998" table:style-name="c1">
            <text:p>0.12516</text:p>
          </table:table-cell>
          <table:table-cell office:value-type="string" table:style-name="c1">
            <text:p>2026-04-04 21:15</text:p>
          </table:table-cell>
          <table:table-cell office:value-type="float" office:value="0.11914040000000001" table:style-name="c1">
            <text:p>0.11914</text:p>
          </table:table-cell>
          <table:table-cell office:value-type="float" office:value="-5.001745058406037" table:style-name="c14">
            <text:p>-5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1:00</text:p>
          </table:table-cell>
          <table:table-cell office:value-type="float" office:value="0.12236115" table:style-name="c1">
            <text:p>0.12236</text:p>
          </table:table-cell>
          <table:table-cell office:value-type="string" table:style-name="c1">
            <text:p>2026-04-06 21:00</text:p>
          </table:table-cell>
          <table:table-cell office:value-type="float" office:value="0.12113940000000001" table:style-name="c1">
            <text:p>0.12114</text:p>
          </table:table-cell>
          <table:table-cell office:value-type="float" office:value="-1.1963827249090064" table:style-name="c14">
            <text:p>-1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6:00</text:p>
          </table:table-cell>
          <table:table-cell office:value-type="float" office:value="0.12356175" table:style-name="c1">
            <text:p>0.12356</text:p>
          </table:table-cell>
          <table:table-cell office:value-type="string" table:style-name="c1">
            <text:p>2026-04-09 00:00</text:p>
          </table:table-cell>
          <table:table-cell office:value-type="float" office:value="0.11394300000000002" table:style-name="c1">
            <text:p>0.11394</text:p>
          </table:table-cell>
          <table:table-cell office:value-type="float" office:value="-7.968907899896194" table:style-name="c14">
            <text:p>-8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4:3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4-15 04:30</text:p>
          </table:table-cell>
          <table:table-cell office:value-type="float" office:value="0.1093453" table:style-name="c1">
            <text:p>0.10935</text:p>
          </table:table-cell>
          <table:table-cell office:value-type="float" office:value="-3.5612885464429422" table:style-name="c14">
            <text:p>-3.6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5:45</text:p>
          </table:table-cell>
          <table:table-cell office:value-type="float" office:value="0.1102551" table:style-name="c1">
            <text:p>0.11026</text:p>
          </table:table-cell>
          <table:table-cell office:value-type="string" table:style-name="c1">
            <text:p>2026-04-16 05:45</text:p>
          </table:table-cell>
          <table:table-cell office:value-type="float" office:value="0.11354320000000001" table:style-name="c1">
            <text:p>0.11354</text:p>
          </table:table-cell>
          <table:table-cell office:value-type="float" office:value="2.7764041238908854" table:style-name="c13">
            <text:p>+2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20:15</text:p>
          </table:table-cell>
          <table:table-cell office:value-type="float" office:value="0.11425709999999999" table:style-name="c1">
            <text:p>0.11426</text:p>
          </table:table-cell>
          <table:table-cell office:value-type="string" table:style-name="c1">
            <text:p>2026-04-17 20:15</text:p>
          </table:table-cell>
          <table:table-cell office:value-type="float" office:value="0.11224385" table:style-name="c1">
            <text:p>0.11224</text:p>
          </table:table-cell>
          <table:table-cell office:value-type="float" office:value="-1.9584126116888756" table:style-name="c14">
            <text:p>-2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7:00</text:p>
          </table:table-cell>
          <table:table-cell office:value-type="float" office:value="0.10665329999999999" table:style-name="c1">
            <text:p>0.10665</text:p>
          </table:table-cell>
          <table:table-cell office:value-type="string" table:style-name="c1">
            <text:p>2026-04-23 02:00</text:p>
          </table:table-cell>
          <table:table-cell office:value-type="float" office:value="0.1025487" table:style-name="c1">
            <text:p>0.10255</text:p>
          </table:table-cell>
          <table:table-cell office:value-type="float" office:value="-4.040751529769793" table:style-name="c14">
            <text:p>-4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1:00</text:p>
          </table:table-cell>
          <table:table-cell office:value-type="float" office:value="0.10695344999999999" table:style-name="c1">
            <text:p>0.10695</text:p>
          </table:table-cell>
          <table:table-cell office:value-type="string" table:style-name="c1">
            <text:p>2026-04-25 01:00</text:p>
          </table:table-cell>
          <table:table-cell office:value-type="float" office:value="0.10984505" table:style-name="c1">
            <text:p>0.10985</text:p>
          </table:table-cell>
          <table:table-cell office:value-type="float" office:value="2.498301592936003" table:style-name="c13">
            <text:p>+2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5:30</text:p>
          </table:table-cell>
          <table:table-cell office:value-type="float" office:value="0.11305649999999999" table:style-name="c1">
            <text:p>0.11306</text:p>
          </table:table-cell>
          <table:table-cell office:value-type="string" table:style-name="c1">
            <text:p>2026-04-26 05:30</text:p>
          </table:table-cell>
          <table:table-cell office:value-type="float" office:value="0.11564215" table:style-name="c1">
            <text:p>0.11564</text:p>
          </table:table-cell>
          <table:table-cell office:value-type="float" office:value="2.0825705219514212" table:style-name="c13">
            <text:p>+2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16:30</text:p>
          </table:table-cell>
          <table:table-cell office:value-type="float" office:value="0.1196598" table:style-name="c1">
            <text:p>0.11966</text:p>
          </table:table-cell>
          <table:table-cell office:value-type="string" table:style-name="c1">
            <text:p>2026-04-28 08:00</text:p>
          </table:table-cell>
          <table:table-cell office:value-type="float" office:value="0.1141429" table:style-name="c1">
            <text:p>0.11414</text:p>
          </table:table-cell>
          <table:table-cell office:value-type="float" office:value="-4.801171034131757" table:style-name="c14">
            <text:p>-4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0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04 00:00</text:p>
          </table:table-cell>
          <table:table-cell office:value-type="float" office:value="0.11324335" table:style-name="c1">
            <text:p>0.11324</text:p>
          </table:table-cell>
          <table:table-cell office:value-type="float" office:value="-0.1233454507494014" table:style-name="c14">
            <text:p>-0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0.11415704999999998" table:style-name="c1">
            <text:p>0.11416</text:p>
          </table:table-cell>
          <table:table-cell office:value-type="string" table:style-name="c1">
            <text:p>2026-05-05 15:00</text:p>
          </table:table-cell>
          <table:table-cell office:value-type="float" office:value="0.11944025" table:style-name="c1">
            <text:p>0.11944</text:p>
          </table:table-cell>
          <table:table-cell office:value-type="float" office:value="4.418858879280796" table:style-name="c13">
            <text:p>+4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0.11905949999999998" table:style-name="c1">
            <text:p>0.11906</text:p>
          </table:table-cell>
          <table:table-cell office:value-type="string" table:style-name="c1">
            <text:p>2026-05-06 20:30</text:p>
          </table:table-cell>
          <table:table-cell office:value-type="float" office:value="0.12023985000000001" table:style-name="c1">
            <text:p>0.12024</text:p>
          </table:table-cell>
          <table:table-cell office:value-type="float" office:value="0.789513260050656" table:style-name="c13">
            <text:p>+0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3:00</text:p>
          </table:table-cell>
          <table:table-cell office:value-type="float" office:value="0.1212606" table:style-name="c1">
            <text:p>0.12126</text:p>
          </table:table-cell>
          <table:table-cell office:value-type="string" table:style-name="c1">
            <text:p>2026-05-08 03:00</text:p>
          </table:table-cell>
          <table:table-cell office:value-type="float" office:value="0.12613690000000002" table:style-name="c1">
            <text:p>0.12614</text:p>
          </table:table-cell>
          <table:table-cell office:value-type="float" office:value="3.8134005084091926" table:style-name="c13">
            <text:p>+3.8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9:00</text:p>
          </table:table-cell>
          <table:table-cell office:value-type="float" office:value="0.1312656" table:style-name="c1">
            <text:p>0.13127</text:p>
          </table:table-cell>
          <table:table-cell office:value-type="string" table:style-name="c1">
            <text:p>2026-05-09 19:00</text:p>
          </table:table-cell>
          <table:table-cell office:value-type="float" office:value="0.13063465000000002" table:style-name="c1">
            <text:p>0.13063</text:p>
          </table:table-cell>
          <table:table-cell office:value-type="float" office:value="-0.6796058261646643" table:style-name="c14">
            <text:p>-0.7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6:00</text:p>
          </table:table-cell>
          <table:table-cell office:value-type="float" office:value="0.12816404999999997" table:style-name="c1">
            <text:p>0.12816</text:p>
          </table:table-cell>
          <table:table-cell office:value-type="string" table:style-name="c1">
            <text:p>2026-05-10 15:00</text:p>
          </table:table-cell>
          <table:table-cell office:value-type="float" office:value="0.12783605000000003" table:style-name="c1">
            <text:p>0.12784</text:p>
          </table:table-cell>
          <table:table-cell office:value-type="float" office:value="-0.45531041189000865" table:style-name="c14">
            <text:p>-0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13:45</text:p>
          </table:table-cell>
          <table:table-cell office:value-type="float" office:value="0.11325659999999999" table:style-name="c1">
            <text:p>0.11326</text:p>
          </table:table-cell>
          <table:table-cell office:value-type="string" table:style-name="c1">
            <text:p>2026-05-20 13:45</text:p>
          </table:table-cell>
          <table:table-cell office:value-type="float" office:value="0.11384305" table:style-name="c1">
            <text:p>0.11384</text:p>
          </table:table-cell>
          <table:table-cell office:value-type="float" office:value="0.31687137266174226" table:style-name="c13">
            <text:p>+0.3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7:45</text:p>
          </table:table-cell>
          <table:table-cell office:value-type="float" office:value="0.11875935" table:style-name="c1">
            <text:p>0.11876</text:p>
          </table:table-cell>
          <table:table-cell office:value-type="string" table:style-name="c1">
            <text:p>2026-05-21 17:45</text:p>
          </table:table-cell>
          <table:table-cell office:value-type="float" office:value="0.1165417" table:style-name="c1">
            <text:p>0.11654</text:p>
          </table:table-cell>
          <table:table-cell office:value-type="float" office:value="-2.0635148797126357" table:style-name="c14">
            <text:p>-2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8:00</text:p>
          </table:table-cell>
          <table:table-cell office:value-type="float" office:value="0.1170585" table:style-name="c1">
            <text:p>0.11706</text:p>
          </table:table-cell>
          <table:table-cell office:value-type="string" table:style-name="c1">
            <text:p>2026-05-22 18:00</text:p>
          </table:table-cell>
          <table:table-cell office:value-type="float" office:value="0.1161419" table:style-name="c1">
            <text:p>0.11614</text:p>
          </table:table-cell>
          <table:table-cell office:value-type="float" office:value="-0.981362018221632" table:style-name="c14">
            <text:p>-1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8:00</text:p>
          </table:table-cell>
          <table:table-cell office:value-type="float" office:value="0.116058" table:style-name="c1">
            <text:p>0.11606</text:p>
          </table:table-cell>
          <table:table-cell office:value-type="string" table:style-name="c1">
            <text:p>2026-05-26 02:00</text:p>
          </table:table-cell>
          <table:table-cell office:value-type="float" office:value="0.11104445000000002" table:style-name="c1">
            <text:p>0.11104</text:p>
          </table:table-cell>
          <table:table-cell office:value-type="float" office:value="-4.511130517112127" table:style-name="c14">
            <text:p>-4.5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8 23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5-29 23:00</text:p>
          </table:table-cell>
          <table:table-cell office:value-type="float" office:value="0.12063965000000001" table:style-name="c1">
            <text:p>0.12064</text:p>
          </table:table-cell>
          <table:table-cell office:value-type="float" office:value="6.399931192361397" table:style-name="c13">
            <text:p>+6.4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23:15</text:p>
          </table:table-cell>
          <table:table-cell office:value-type="float" office:value="0.12136065" table:style-name="c1">
            <text:p>0.12136</text:p>
          </table:table-cell>
          <table:table-cell office:value-type="string" table:style-name="c1">
            <text:p>2026-05-30 23:15</text:p>
          </table:table-cell>
          <table:table-cell office:value-type="float" office:value="0.12423785" table:style-name="c1">
            <text:p>0.12424</text:p>
          </table:table-cell>
          <table:table-cell office:value-type="float" office:value="2.1661457299791964" table:style-name="c13">
            <text:p>+2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00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6-01 03:00</text:p>
          </table:table-cell>
          <table:table-cell office:value-type="float" office:value="0.1253373" table:style-name="c1">
            <text:p>0.12534</text:p>
          </table:table-cell>
          <table:table-cell office:value-type="float" office:value="-1.8648048524403382" table:style-name="c14">
            <text:p>-1.9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3:30</text:p>
          </table:table-cell>
          <table:table-cell office:value-type="float" office:value="0.1274637" table:style-name="c1">
            <text:p>0.12746</text:p>
          </table:table-cell>
          <table:table-cell office:value-type="string" table:style-name="c1">
            <text:p>2026-06-01 09:00</text:p>
          </table:table-cell>
          <table:table-cell office:value-type="float" office:value="0.12023985000000001" table:style-name="c1">
            <text:p>0.12024</text:p>
          </table:table-cell>
          <table:table-cell office:value-type="float" office:value="-5.855949152699946" table:style-name="c14">
            <text:p>-5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7:15</text:p>
          </table:table-cell>
          <table:table-cell office:value-type="float" office:value="1.0075034999999999" table:style-name="c10">
            <text:p>1.0075</text:p>
          </table:table-cell>
          <table:table-cell office:value-type="string" table:style-name="c10">
            <text:p>2026-03-06 07:15</text:p>
          </table:table-cell>
          <table:table-cell office:value-type="float" office:value="1.0114940000000001" table:style-name="c10">
            <text:p>1.0115</text:p>
          </table:table-cell>
          <table:table-cell office:value-type="float" office:value="0.19538626853408125" table:style-name="c12">
            <text:p>+0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1.0235115" table:style-name="c10">
            <text:p>1.0235</text:p>
          </table:table-cell>
          <table:table-cell office:value-type="string" table:style-name="c10">
            <text:p>2026-03-06 16:00</text:p>
          </table:table-cell>
          <table:table-cell office:value-type="float" office:value="0.953523" table:style-name="c10">
            <text:p>0.95352</text:p>
          </table:table-cell>
          <table:table-cell office:value-type="float" office:value="-7.024307247842354" table:style-name="c11">
            <text:p>-7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4:30</text:p>
          </table:table-cell>
          <table:table-cell office:value-type="float" office:value="0.9664829999999999" table:style-name="c10">
            <text:p>0.96648</text:p>
          </table:table-cell>
          <table:table-cell office:value-type="string" table:style-name="c10">
            <text:p>2026-03-10 14:30</text:p>
          </table:table-cell>
          <table:table-cell office:value-type="float" office:value="0.9725135" table:style-name="c10">
            <text:p>0.97251</text:p>
          </table:table-cell>
          <table:table-cell office:value-type="float" office:value="0.42281607783067887" table:style-name="c12">
            <text:p>+0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15</text:p>
          </table:table-cell>
          <table:table-cell office:value-type="float" office:value="0.9904949999999999" table:style-name="c10">
            <text:p>0.99049</text:p>
          </table:table-cell>
          <table:table-cell office:value-type="string" table:style-name="c10">
            <text:p>2026-03-11 06:00</text:p>
          </table:table-cell>
          <table:table-cell office:value-type="float" office:value="0.937531" table:style-name="c10">
            <text:p>0.93753</text:p>
          </table:table-cell>
          <table:table-cell office:value-type="float" office:value="-5.536436273681334" table:style-name="c11">
            <text:p>-5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5:00</text:p>
          </table:table-cell>
          <table:table-cell office:value-type="float" office:value="0.9594794999999999" table:style-name="c10">
            <text:p>0.95948</text:p>
          </table:table-cell>
          <table:table-cell office:value-type="string" table:style-name="c10">
            <text:p>2026-03-14 05:00</text:p>
          </table:table-cell>
          <table:table-cell office:value-type="float" office:value="0.9225385" table:style-name="c10">
            <text:p>0.92254</text:p>
          </table:table-cell>
          <table:table-cell office:value-type="float" office:value="-4.042311947415234" table:style-name="c11">
            <text:p>-4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45</text:p>
          </table:table-cell>
          <table:table-cell office:value-type="float" office:value="0.934467" table:style-name="c10">
            <text:p>0.93447</text:p>
          </table:table-cell>
          <table:table-cell office:value-type="string" table:style-name="c10">
            <text:p>2026-03-16 22:45</text:p>
          </table:table-cell>
          <table:table-cell office:value-type="float" office:value="1.0204895" table:style-name="c10">
            <text:p>1.0205</text:p>
          </table:table-cell>
          <table:table-cell office:value-type="float" office:value="8.987213190995513" table:style-name="c12">
            <text:p>+9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8:15</text:p>
          </table:table-cell>
          <table:table-cell office:value-type="float" office:value="1.0025009999999999" table:style-name="c10">
            <text:p>1.0025</text:p>
          </table:table-cell>
          <table:table-cell office:value-type="string" table:style-name="c10">
            <text:p>2026-03-18 08:15</text:p>
          </table:table-cell>
          <table:table-cell office:value-type="float" office:value="1.0064965" table:style-name="c10">
            <text:p>1.0065</text:p>
          </table:table-cell>
          <table:table-cell office:value-type="float" office:value="0.19785651051720254" table:style-name="c12">
            <text:p>+0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3:45</text:p>
          </table:table-cell>
          <table:table-cell office:value-type="float" office:value="1.012506" table:style-name="c10">
            <text:p>1.0125</text:p>
          </table:table-cell>
          <table:table-cell office:value-type="string" table:style-name="c10">
            <text:p>2026-03-21 13:45</text:p>
          </table:table-cell>
          <table:table-cell office:value-type="float" office:value="0.9975010000000001" table:style-name="c10">
            <text:p>0.9975</text:p>
          </table:table-cell>
          <table:table-cell office:value-type="float" office:value="-1.6789040755313955" table:style-name="c11">
            <text:p>-1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9:00</text:p>
          </table:table-cell>
          <table:table-cell office:value-type="float" office:value="1.012506" table:style-name="c10">
            <text:p>1.0125</text:p>
          </table:table-cell>
          <table:table-cell office:value-type="string" table:style-name="c10">
            <text:p>2026-03-24 19:00</text:p>
          </table:table-cell>
          <table:table-cell office:value-type="float" office:value="1.0434780000000001" table:style-name="c10">
            <text:p>1.0435</text:p>
          </table:table-cell>
          <table:table-cell office:value-type="float" office:value="2.8529300051555406" table:style-name="c12">
            <text:p>+2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3:30</text:p>
          </table:table-cell>
          <table:table-cell office:value-type="float" office:value="1.108554" table:style-name="c10">
            <text:p>1.1086</text:p>
          </table:table-cell>
          <table:table-cell office:value-type="string" table:style-name="c10">
            <text:p>2026-03-25 23:30</text:p>
          </table:table-cell>
          <table:table-cell office:value-type="float" office:value="1.057471" table:style-name="c10">
            <text:p>1.0575</text:p>
          </table:table-cell>
          <table:table-cell office:value-type="float" office:value="-4.7987634818872245" table:style-name="c11">
            <text:p>-4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8:15</text:p>
          </table:table-cell>
          <table:table-cell office:value-type="float" office:value="0.8614305" table:style-name="c10">
            <text:p>0.86143</text:p>
          </table:table-cell>
          <table:table-cell office:value-type="string" table:style-name="c10">
            <text:p>2026-04-07 03:00</text:p>
          </table:table-cell>
          <table:table-cell office:value-type="float" office:value="0.835582" table:style-name="c10">
            <text:p>0.83558</text:p>
          </table:table-cell>
          <table:table-cell office:value-type="float" office:value="-3.1945500441416863" table:style-name="c11">
            <text:p>-3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05:45</text:p>
          </table:table-cell>
          <table:table-cell office:value-type="float" office:value="0.8824409999999999" table:style-name="c10">
            <text:p>0.88244</text:p>
          </table:table-cell>
          <table:table-cell office:value-type="string" table:style-name="c10">
            <text:p>2026-04-08 23:00</text:p>
          </table:table-cell>
          <table:table-cell office:value-type="float" office:value="0.8345825" table:style-name="c10">
            <text:p>0.83458</text:p>
          </table:table-cell>
          <table:table-cell office:value-type="float" office:value="-5.61248065508061" table:style-name="c11">
            <text:p>-5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6:45</text:p>
          </table:table-cell>
          <table:table-cell office:value-type="float" office:value="0.8684339999999999" table:style-name="c10">
            <text:p>0.86843</text:p>
          </table:table-cell>
          <table:table-cell office:value-type="string" table:style-name="c10">
            <text:p>2026-04-11 16:45</text:p>
          </table:table-cell>
          <table:table-cell office:value-type="float" office:value="0.8665665" table:style-name="c10">
            <text:p>0.86657</text:p>
          </table:table-cell>
          <table:table-cell office:value-type="float" office:value="-0.41451237900634874" table:style-name="c11">
            <text:p>-0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8:15</text:p>
          </table:table-cell>
          <table:table-cell office:value-type="float" office:value="0.8664329999999999" table:style-name="c10">
            <text:p>0.86643</text:p>
          </table:table-cell>
          <table:table-cell office:value-type="string" table:style-name="c10">
            <text:p>2026-04-12 06:00</text:p>
          </table:table-cell>
          <table:table-cell office:value-type="float" office:value="0.829585" table:style-name="c10">
            <text:p>0.82959</text:p>
          </table:table-cell>
          <table:table-cell office:value-type="float" office:value="-4.444237513460337" table:style-name="c11">
            <text:p>-4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0.8714354999999999" table:style-name="c10">
            <text:p>0.87144</text:p>
          </table:table-cell>
          <table:table-cell office:value-type="string" table:style-name="c10">
            <text:p>2026-04-14 22:30</text:p>
          </table:table-cell>
          <table:table-cell office:value-type="float" office:value="0.8565715" table:style-name="c10">
            <text:p>0.85657</text:p>
          </table:table-cell>
          <table:table-cell office:value-type="float" office:value="-1.9021816793669544" table:style-name="c11">
            <text:p>-1.9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2:00</text:p>
          </table:table-cell>
          <table:table-cell office:value-type="float" office:value="0.8774384999999999" table:style-name="c10">
            <text:p>0.87744</text:p>
          </table:table-cell>
          <table:table-cell office:value-type="string" table:style-name="c10">
            <text:p>2026-04-16 12:00</text:p>
          </table:table-cell>
          <table:table-cell office:value-type="float" office:value="0.9275360000000001" table:style-name="c10">
            <text:p>0.92754</text:p>
          </table:table-cell>
          <table:table-cell office:value-type="float" office:value="5.498203638887533" table:style-name="c12">
            <text:p>+5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2:15</text:p>
          </table:table-cell>
          <table:table-cell office:value-type="float" office:value="0.9384689999999999" table:style-name="c10">
            <text:p>0.93847</text:p>
          </table:table-cell>
          <table:table-cell office:value-type="string" table:style-name="c10">
            <text:p>2026-04-17 12:15</text:p>
          </table:table-cell>
          <table:table-cell office:value-type="float" office:value="0.977511" table:style-name="c10">
            <text:p>0.97751</text:p>
          </table:table-cell>
          <table:table-cell office:value-type="float" office:value="3.9519638380170363" table:style-name="c12">
            <text:p>+4.0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0.9604799999999999" table:style-name="c10">
            <text:p>0.96048</text:p>
          </table:table-cell>
          <table:table-cell office:value-type="string" table:style-name="c10">
            <text:p>2026-04-23 05:30</text:p>
          </table:table-cell>
          <table:table-cell office:value-type="float" office:value="0.9425285" table:style-name="c10">
            <text:p>0.94253</text:p>
          </table:table-cell>
          <table:table-cell office:value-type="float" office:value="-2.0651772521551703" table:style-name="c11">
            <text:p>-2.1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6:15</text:p>
          </table:table-cell>
          <table:table-cell office:value-type="float" office:value="0.9534765" table:style-name="c10">
            <text:p>0.95348</text:p>
          </table:table-cell>
          <table:table-cell office:value-type="string" table:style-name="c10">
            <text:p>2026-04-23 19:00</text:p>
          </table:table-cell>
          <table:table-cell office:value-type="float" office:value="0.9285355000000001" table:style-name="c10">
            <text:p>0.92854</text:p>
          </table:table-cell>
          <table:table-cell office:value-type="float" office:value="-2.810467008311146" table:style-name="c11">
            <text:p>-2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11:15</text:p>
          </table:table-cell>
          <table:table-cell office:value-type="float" office:value="0.9594794999999999" table:style-name="c10">
            <text:p>0.95948</text:p>
          </table:table-cell>
          <table:table-cell office:value-type="string" table:style-name="c10">
            <text:p>2026-04-25 11:15</text:p>
          </table:table-cell>
          <table:table-cell office:value-type="float" office:value="0.9725135" table:style-name="c10">
            <text:p>0.97251</text:p>
          </table:table-cell>
          <table:table-cell office:value-type="float" office:value="1.155829333873215" table:style-name="c12">
            <text:p>+1.2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22:30</text:p>
          </table:table-cell>
          <table:table-cell office:value-type="float" office:value="0.9674834999999999" table:style-name="c10">
            <text:p>0.96748</text:p>
          </table:table-cell>
          <table:table-cell office:value-type="string" table:style-name="c10">
            <text:p>2026-04-26 22:30</text:p>
          </table:table-cell>
          <table:table-cell office:value-type="float" office:value="0.985507" table:style-name="c10">
            <text:p>0.98551</text:p>
          </table:table-cell>
          <table:table-cell office:value-type="float" office:value="1.6593018389461145" table:style-name="c12">
            <text:p>+1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3:45</text:p>
          </table:table-cell>
          <table:table-cell office:value-type="float" office:value="0.9874934999999999" table:style-name="c10">
            <text:p>0.98749</text:p>
          </table:table-cell>
          <table:table-cell office:value-type="string" table:style-name="c10">
            <text:p>2026-04-30 03:45</text:p>
          </table:table-cell>
          <table:table-cell office:value-type="float" office:value="1.0264865" table:style-name="c10">
            <text:p>1.0265</text:p>
          </table:table-cell>
          <table:table-cell office:value-type="float" office:value="3.7408907994331164" table:style-name="c12">
            <text:p>+3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02:00</text:p>
          </table:table-cell>
          <table:table-cell office:value-type="float" office:value="1.022511" table:style-name="c10">
            <text:p>1.0225</text:p>
          </table:table-cell>
          <table:table-cell office:value-type="string" table:style-name="c10">
            <text:p>2026-05-02 02:00</text:p>
          </table:table-cell>
          <table:table-cell office:value-type="float" office:value="1.009495" table:style-name="c10">
            <text:p>1.0095</text:p>
          </table:table-cell>
          <table:table-cell office:value-type="float" office:value="-1.4703001243996483" table:style-name="c11">
            <text:p>-1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02:15</text:p>
          </table:table-cell>
          <table:table-cell office:value-type="float" office:value="1.0135064999999999" table:style-name="c10">
            <text:p>1.0135</text:p>
          </table:table-cell>
          <table:table-cell office:value-type="string" table:style-name="c10">
            <text:p>2026-05-02 12:00</text:p>
          </table:table-cell>
          <table:table-cell office:value-type="float" office:value="0.9925035000000001" table:style-name="c10">
            <text:p>0.9925</text:p>
          </table:table-cell>
          <table:table-cell office:value-type="float" office:value="-2.2680677920171144" table:style-name="c11">
            <text:p>-2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1:45</text:p>
          </table:table-cell>
          <table:table-cell office:value-type="float" office:value="1.0005" table:style-name="c10">
            <text:p>1.0005</text:p>
          </table:table-cell>
          <table:table-cell office:value-type="string" table:style-name="c10">
            <text:p>2026-05-07 01:45</text:p>
          </table:table-cell>
          <table:table-cell office:value-type="float" office:value="1.0064965" table:style-name="c10">
            <text:p>1.0065</text:p>
          </table:table-cell>
          <table:table-cell office:value-type="float" office:value="0.3982522235382202" table:style-name="c12">
            <text:p>+0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4:30</text:p>
          </table:table-cell>
          <table:table-cell office:value-type="float" office:value="1.0155074999999998" table:style-name="c10">
            <text:p>1.0155</text:p>
          </table:table-cell>
          <table:table-cell office:value-type="string" table:style-name="c10">
            <text:p>2026-05-08 04:30</text:p>
          </table:table-cell>
          <table:table-cell office:value-type="float" office:value="1.053473" table:style-name="c10">
            <text:p>1.0535</text:p>
          </table:table-cell>
          <table:table-cell office:value-type="float" office:value="3.531200653170985" table:style-name="c12">
            <text:p>+3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2:00</text:p>
          </table:table-cell>
          <table:table-cell office:value-type="float" office:value="1.062531" table:style-name="c10">
            <text:p>1.0625</text:p>
          </table:table-cell>
          <table:table-cell office:value-type="string" table:style-name="c10">
            <text:p>2026-05-09 12:00</text:p>
          </table:table-cell>
          <table:table-cell office:value-type="float" office:value="1.1014490000000001" table:style-name="c10">
            <text:p>1.1014</text:p>
          </table:table-cell>
          <table:table-cell office:value-type="float" office:value="3.455541857037603" table:style-name="c12">
            <text:p>+3.5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7:30</text:p>
          </table:table-cell>
          <table:table-cell office:value-type="float" office:value="1.1155575" table:style-name="c10">
            <text:p>1.1156</text:p>
          </table:table-cell>
          <table:table-cell office:value-type="string" table:style-name="c10">
            <text:p>2026-05-10 17:30</text:p>
          </table:table-cell>
          <table:table-cell office:value-type="float" office:value="1.1994" table:style-name="c10">
            <text:p>1.1994</text:p>
          </table:table-cell>
          <table:table-cell office:value-type="float" office:value="7.300824870076172" table:style-name="c12">
            <text:p>+7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9:45</text:p>
          </table:table-cell>
          <table:table-cell office:value-type="float" office:value="1.2126059999999999" table:style-name="c10">
            <text:p>1.2126</text:p>
          </table:table-cell>
          <table:table-cell office:value-type="string" table:style-name="c10">
            <text:p>2026-05-11 19:45</text:p>
          </table:table-cell>
          <table:table-cell office:value-type="float" office:value="1.1384305000000001" table:style-name="c10">
            <text:p>1.1384</text:p>
          </table:table-cell>
          <table:table-cell office:value-type="float" office:value="-6.304704295500752" table:style-name="c11">
            <text:p>-6.3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2:30</text:p>
          </table:table-cell>
          <table:table-cell office:value-type="float" office:value="0.9624809999999999" table:style-name="c10">
            <text:p>0.96248</text:p>
          </table:table-cell>
          <table:table-cell office:value-type="string" table:style-name="c10">
            <text:p>2026-05-22 02:30</text:p>
          </table:table-cell>
          <table:table-cell office:value-type="float" office:value="0.971514" table:style-name="c10">
            <text:p>0.97151</text:p>
          </table:table-cell>
          <table:table-cell office:value-type="float" office:value="0.7367359474109048" table:style-name="c12">
            <text:p>+0.7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04:30</text:p>
          </table:table-cell>
          <table:table-cell office:value-type="float" office:value="0.9894944999999999" table:style-name="c10">
            <text:p>0.98949</text:p>
          </table:table-cell>
          <table:table-cell office:value-type="string" table:style-name="c10">
            <text:p>2026-05-23 02:00</text:p>
          </table:table-cell>
          <table:table-cell office:value-type="float" office:value="0.943528" table:style-name="c10">
            <text:p>0.94353</text:p>
          </table:table-cell>
          <table:table-cell office:value-type="float" office:value="-4.836066544280926" table:style-name="c11">
            <text:p>-4.8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1:00</text:p>
          </table:table-cell>
          <table:table-cell office:value-type="float" office:value="0.9684839999999999" table:style-name="c10">
            <text:p>0.96848</text:p>
          </table:table-cell>
          <table:table-cell office:value-type="string" table:style-name="c10">
            <text:p>2026-05-26 11:00</text:p>
          </table:table-cell>
          <table:table-cell office:value-type="float" office:value="0.993503" table:style-name="c10">
            <text:p>0.9935</text:p>
          </table:table-cell>
          <table:table-cell office:value-type="float" office:value="2.3782517318819973" table:style-name="c12">
            <text:p>+2.4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1:15</text:p>
          </table:table-cell>
          <table:table-cell office:value-type="float" office:value="0.996498" table:style-name="c10">
            <text:p>0.9965</text:p>
          </table:table-cell>
          <table:table-cell office:value-type="string" table:style-name="c10">
            <text:p>2026-05-27 11:15</text:p>
          </table:table-cell>
          <table:table-cell office:value-type="float" office:value="0.9725135" table:style-name="c10">
            <text:p>0.97251</text:p>
          </table:table-cell>
          <table:table-cell office:value-type="float" office:value="-2.6019675389714836" table:style-name="c11">
            <text:p>-2.6</text:p>
          </table:table-cell>
        </table:table-row>
        <table:table-row>
          <table:table-cell office:value-type="string" table:style-name="c9">
            <text:p>AP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3:30</text:p>
          </table:table-cell>
          <table:table-cell office:value-type="float" office:value="0.9594794999999999" table:style-name="c10">
            <text:p>0.95948</text:p>
          </table:table-cell>
          <table:table-cell office:value-type="string" table:style-name="c10">
            <text:p>2026-06-01 08:00</text:p>
          </table:table-cell>
          <table:table-cell office:value-type="float" office:value="0.9185405000000001" table:style-name="c10">
            <text:p>0.91854</text:p>
          </table:table-cell>
          <table:table-cell office:value-type="float" office:value="-4.458163249918301" table:style-name="c11">
            <text:p>-4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9:30</text:p>
          </table:table-cell>
          <table:table-cell office:value-type="float" office:value="0.1042521" table:style-name="c1">
            <text:p>0.10425</text:p>
          </table:table-cell>
          <table:table-cell office:value-type="string" table:style-name="c1">
            <text:p>2026-03-06 09:30</text:p>
          </table:table-cell>
          <table:table-cell office:value-type="float" office:value="0.10274860000000001" table:style-name="c1">
            <text:p>0.10275</text:p>
          </table:table-cell>
          <table:table-cell office:value-type="float" office:value="-1.6391942717700503" table:style-name="c14">
            <text:p>-1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6:30</text:p>
          </table:table-cell>
          <table:table-cell office:value-type="float" office:value="0.09954975" table:style-name="c1">
            <text:p>0.09955</text:p>
          </table:table-cell>
          <table:table-cell office:value-type="string" table:style-name="c1">
            <text:p>2026-03-10 16:30</text:p>
          </table:table-cell>
          <table:table-cell office:value-type="float" office:value="0.1011494" table:style-name="c1">
            <text:p>0.10115</text:p>
          </table:table-cell>
          <table:table-cell office:value-type="float" office:value="1.4037728365967839" table:style-name="c13">
            <text:p>+1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7:15</text:p>
          </table:table-cell>
          <table:table-cell office:value-type="float" office:value="0.09864929999999998" table:style-name="c1">
            <text:p>0.098649</text:p>
          </table:table-cell>
          <table:table-cell office:value-type="string" table:style-name="c1">
            <text:p>2026-03-12 07:15</text:p>
          </table:table-cell>
          <table:table-cell office:value-type="float" office:value="0.09865065" table:style-name="c1">
            <text:p>0.098651</text:p>
          </table:table-cell>
          <table:table-cell office:value-type="float" office:value="-0.1985342514847832" table:style-name="c14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0:00</text:p>
          </table:table-cell>
          <table:table-cell office:value-type="float" office:value="0.0994497" table:style-name="c1">
            <text:p>0.09945</text:p>
          </table:table-cell>
          <table:table-cell office:value-type="string" table:style-name="c1">
            <text:p>2026-03-13 10:00</text:p>
          </table:table-cell>
          <table:table-cell office:value-type="float" office:value="0.10454770000000001" table:style-name="c1">
            <text:p>0.10455</text:p>
          </table:table-cell>
          <table:table-cell office:value-type="float" office:value="4.916062238196783" table:style-name="c13">
            <text:p>+4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15</text:p>
          </table:table-cell>
          <table:table-cell office:value-type="float" office:value="0.10515255" table:style-name="c1">
            <text:p>0.10515</text:p>
          </table:table-cell>
          <table:table-cell office:value-type="string" table:style-name="c1">
            <text:p>2026-03-14 10:15</text:p>
          </table:table-cell>
          <table:table-cell office:value-type="float" office:value="0.09975010000000001" table:style-name="c1">
            <text:p>0.09975</text:p>
          </table:table-cell>
          <table:table-cell office:value-type="float" office:value="-5.327355779674392" table:style-name="c14">
            <text:p>-5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0:30</text:p>
          </table:table-cell>
          <table:table-cell office:value-type="float" office:value="0.10235115" table:style-name="c1">
            <text:p>0.10235</text:p>
          </table:table-cell>
          <table:table-cell office:value-type="string" table:style-name="c1">
            <text:p>2026-03-16 10:30</text:p>
          </table:table-cell>
          <table:table-cell office:value-type="float" office:value="0.10774610000000001" table:style-name="c1">
            <text:p>0.10775</text:p>
          </table:table-cell>
          <table:table-cell office:value-type="float" office:value="5.060583633989446" table:style-name="c13">
            <text:p>+5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1:15</text:p>
          </table:table-cell>
          <table:table-cell office:value-type="float" office:value="0.1102551" table:style-name="c1">
            <text:p>0.11026</text:p>
          </table:table-cell>
          <table:table-cell office:value-type="string" table:style-name="c1">
            <text:p>2026-03-17 21:15</text:p>
          </table:table-cell>
          <table:table-cell office:value-type="float" office:value="0.1089455" table:style-name="c1">
            <text:p>0.10895</text:p>
          </table:table-cell>
          <table:table-cell office:value-type="float" office:value="-1.3853164656328798" table:style-name="c14">
            <text:p>-1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09274635" table:style-name="c1">
            <text:p>0.092746</text:p>
          </table:table-cell>
          <table:table-cell office:value-type="string" table:style-name="c1">
            <text:p>2026-03-31 08:00</text:p>
          </table:table-cell>
          <table:table-cell office:value-type="float" office:value="0.0927536" table:style-name="c1">
            <text:p>0.092754</text:p>
          </table:table-cell>
          <table:table-cell office:value-type="float" office:value="-0.19209860700718506" table:style-name="c14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2:00</text:p>
          </table:table-cell>
          <table:table-cell office:value-type="float" office:value="0.09244619999999999" table:style-name="c1">
            <text:p>0.092446</text:p>
          </table:table-cell>
          <table:table-cell office:value-type="string" table:style-name="c1">
            <text:p>2026-04-01 12:00</text:p>
          </table:table-cell>
          <table:table-cell office:value-type="float" office:value="0.0953523" table:style-name="c1">
            <text:p>0.095352</text:p>
          </table:table-cell>
          <table:table-cell office:value-type="float" office:value="2.9373741184602675" table:style-name="c13">
            <text:p>+2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0.09674834999999998" table:style-name="c1">
            <text:p>0.096748</text:p>
          </table:table-cell>
          <table:table-cell office:value-type="string" table:style-name="c1">
            <text:p>2026-04-02 08:00</text:p>
          </table:table-cell>
          <table:table-cell office:value-type="float" office:value="0.0913543" table:style-name="c1">
            <text:p>0.091354</text:p>
          </table:table-cell>
          <table:table-cell office:value-type="float" office:value="-5.764095455581398" table:style-name="c14">
            <text:p>-5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09:15</text:p>
          </table:table-cell>
          <table:table-cell office:value-type="float" office:value="0.09434714999999999" table:style-name="c1">
            <text:p>0.094347</text:p>
          </table:table-cell>
          <table:table-cell office:value-type="string" table:style-name="c1">
            <text:p>2026-04-04 04:00</text:p>
          </table:table-cell>
          <table:table-cell office:value-type="float" office:value="0.09165415" table:style-name="c1">
            <text:p>0.091654</text:p>
          </table:table-cell>
          <table:table-cell office:value-type="float" office:value="-3.0485464010836627" table:style-name="c14">
            <text:p>-3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0.09374685" table:style-name="c1">
            <text:p>0.093747</text:p>
          </table:table-cell>
          <table:table-cell office:value-type="string" table:style-name="c1">
            <text:p>2026-04-05 06:00</text:p>
          </table:table-cell>
          <table:table-cell office:value-type="float" office:value="0.09125435000000001" table:style-name="c1">
            <text:p>0.091254</text:p>
          </table:table-cell>
          <table:table-cell office:value-type="float" office:value="-2.8533411476225568" table:style-name="c14">
            <text:p>-2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8:1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4-07 08:15</text:p>
          </table:table-cell>
          <table:table-cell office:value-type="float" office:value="0.09515240000000001" table:style-name="c1">
            <text:p>0.095152</text:p>
          </table:table-cell>
          <table:table-cell office:value-type="float" office:value="-1.4384911880508167" table:style-name="c14">
            <text:p>-1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8:00</text:p>
          </table:table-cell>
          <table:table-cell office:value-type="float" office:value="0.09484739999999998" table:style-name="c1">
            <text:p>0.094847</text:p>
          </table:table-cell>
          <table:table-cell office:value-type="string" table:style-name="c1">
            <text:p>2026-04-08 18:00</text:p>
          </table:table-cell>
          <table:table-cell office:value-type="float" office:value="0.10124935" table:style-name="c1">
            <text:p>0.10125</text:p>
          </table:table-cell>
          <table:table-cell office:value-type="float" office:value="6.536344221718271" table:style-name="c13">
            <text:p>+6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15</text:p>
          </table:table-cell>
          <table:table-cell office:value-type="float" office:value="0.1038519" table:style-name="c1">
            <text:p>0.10385</text:p>
          </table:table-cell>
          <table:table-cell office:value-type="string" table:style-name="c1">
            <text:p>2026-04-09 21:15</text:p>
          </table:table-cell>
          <table:table-cell office:value-type="float" office:value="0.103948" table:style-name="c1">
            <text:p>0.10395</text:p>
          </table:table-cell>
          <table:table-cell office:value-type="float" office:value="-0.1075493582688436" table:style-name="c14">
            <text:p>-0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1:45</text:p>
          </table:table-cell>
          <table:table-cell office:value-type="float" office:value="0.1070535" table:style-name="c1">
            <text:p>0.10705</text:p>
          </table:table-cell>
          <table:table-cell office:value-type="string" table:style-name="c1">
            <text:p>2026-04-10 21:45</text:p>
          </table:table-cell>
          <table:table-cell office:value-type="float" office:value="0.11354320000000001" table:style-name="c1">
            <text:p>0.11354</text:p>
          </table:table-cell>
          <table:table-cell office:value-type="float" office:value="5.8500909761941555" table:style-name="c13">
            <text:p>+5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22:00</text:p>
          </table:table-cell>
          <table:table-cell office:value-type="float" office:value="0.11315655" table:style-name="c1">
            <text:p>0.11316</text:p>
          </table:table-cell>
          <table:table-cell office:value-type="string" table:style-name="c1">
            <text:p>2026-04-11 22:00</text:p>
          </table:table-cell>
          <table:table-cell office:value-type="float" office:value="0.11694150000000002" table:style-name="c1">
            <text:p>0.11694</text:p>
          </table:table-cell>
          <table:table-cell office:value-type="float" office:value="3.138292870806003" table:style-name="c13">
            <text:p>+3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13:15</text:p>
          </table:table-cell>
          <table:table-cell office:value-type="float" office:value="0.11195595" table:style-name="c1">
            <text:p>0.11196</text:p>
          </table:table-cell>
          <table:table-cell office:value-type="string" table:style-name="c1">
            <text:p>2026-04-12 23:00</text:p>
          </table:table-cell>
          <table:table-cell office:value-type="float" office:value="0.1107446" table:style-name="c1">
            <text:p>0.11074</text:p>
          </table:table-cell>
          <table:table-cell office:value-type="float" office:value="-1.2797251556527223" table:style-name="c14">
            <text:p>-1.3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6:45</text:p>
          </table:table-cell>
          <table:table-cell office:value-type="float" office:value="0.11135564999999999" table:style-name="c1">
            <text:p>0.11136</text:p>
          </table:table-cell>
          <table:table-cell office:value-type="string" table:style-name="c1">
            <text:p>2026-04-14 19:00</text:p>
          </table:table-cell>
          <table:table-cell office:value-type="float" office:value="0.10984505" table:style-name="c1">
            <text:p>0.10985</text:p>
          </table:table-cell>
          <table:table-cell office:value-type="float" office:value="-1.5537426748889582" table:style-name="c14">
            <text:p>-1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1:15</text:p>
          </table:table-cell>
          <table:table-cell office:value-type="float" office:value="0.11335664999999999" table:style-name="c1">
            <text:p>0.11336</text:p>
          </table:table-cell>
          <table:table-cell office:value-type="string" table:style-name="c1">
            <text:p>2026-04-16 11:15</text:p>
          </table:table-cell>
          <table:table-cell office:value-type="float" office:value="0.11764115" table:style-name="c1">
            <text:p>0.11764</text:p>
          </table:table-cell>
          <table:table-cell office:value-type="float" office:value="3.5722080188061334" table:style-name="c13">
            <text:p>+3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0.1202601" table:style-name="c1">
            <text:p>0.12026</text:p>
          </table:table-cell>
          <table:table-cell office:value-type="string" table:style-name="c1">
            <text:p>2026-04-17 12:15</text:p>
          </table:table-cell>
          <table:table-cell office:value-type="float" office:value="0.13573210000000002" table:style-name="c1">
            <text:p>0.13573</text:p>
          </table:table-cell>
          <table:table-cell office:value-type="float" office:value="12.6398294464249" table:style-name="c13">
            <text:p>+12.6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2:30</text:p>
          </table:table-cell>
          <table:table-cell office:value-type="float" office:value="0.13436715" table:style-name="c1">
            <text:p>0.13437</text:p>
          </table:table-cell>
          <table:table-cell office:value-type="string" table:style-name="c1">
            <text:p>2026-04-18 12:30</text:p>
          </table:table-cell>
          <table:table-cell office:value-type="float" office:value="0.1289355" table:style-name="c1">
            <text:p>0.12894</text:p>
          </table:table-cell>
          <table:table-cell office:value-type="float" office:value="-4.234213544381937" table:style-name="c14">
            <text:p>-4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22:30</text:p>
          </table:table-cell>
          <table:table-cell office:value-type="float" office:value="0.12856425" table:style-name="c1">
            <text:p>0.12856</text:p>
          </table:table-cell>
          <table:table-cell office:value-type="string" table:style-name="c1">
            <text:p>2026-04-19 08:00</text:p>
          </table:table-cell>
          <table:table-cell office:value-type="float" office:value="0.1249375" table:style-name="c1">
            <text:p>0.12494</text:p>
          </table:table-cell>
          <table:table-cell office:value-type="float" office:value="-3.015223954170787" table:style-name="c14">
            <text:p>-3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6:00</text:p>
          </table:table-cell>
          <table:table-cell office:value-type="float" office:value="0.12916455" table:style-name="c1">
            <text:p>0.12916</text:p>
          </table:table-cell>
          <table:table-cell office:value-type="string" table:style-name="c1">
            <text:p>2026-04-23 06:00</text:p>
          </table:table-cell>
          <table:table-cell office:value-type="float" office:value="0.12563715" table:style-name="c1">
            <text:p>0.12564</text:p>
          </table:table-cell>
          <table:table-cell office:value-type="float" office:value="-2.9253759354637143" table:style-name="c14">
            <text:p>-2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7:1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4-23 10:00</text:p>
          </table:table-cell>
          <table:table-cell office:value-type="float" office:value="0.12503745" table:style-name="c1">
            <text:p>0.12504</text:p>
          </table:table-cell>
          <table:table-cell office:value-type="float" office:value="-1.791230260893173" table:style-name="c14">
            <text:p>-1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15</text:p>
          </table:table-cell>
          <table:table-cell office:value-type="float" office:value="0.1288644" table:style-name="c1">
            <text:p>0.12886</text:p>
          </table:table-cell>
          <table:table-cell office:value-type="string" table:style-name="c1">
            <text:p>2026-04-25 00:15</text:p>
          </table:table-cell>
          <table:table-cell office:value-type="float" office:value="0.12883555" table:style-name="c1">
            <text:p>0.12884</text:p>
          </table:table-cell>
          <table:table-cell office:value-type="float" office:value="-0.22224312102486765" table:style-name="c14">
            <text:p>-0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2:15</text:p>
          </table:table-cell>
          <table:table-cell office:value-type="float" office:value="0.132066" table:style-name="c1">
            <text:p>0.13207</text:p>
          </table:table-cell>
          <table:table-cell office:value-type="string" table:style-name="c1">
            <text:p>2026-04-26 02:15</text:p>
          </table:table-cell>
          <table:table-cell office:value-type="float" office:value="0.12863565000000002" table:style-name="c1">
            <text:p>0.12864</text:p>
          </table:table-cell>
          <table:table-cell office:value-type="float" office:value="-2.792158969265357" table:style-name="c14">
            <text:p>-2.8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30</text:p>
          </table:table-cell>
          <table:table-cell office:value-type="float" office:value="0.1314657" table:style-name="c1">
            <text:p>0.13147</text:p>
          </table:table-cell>
          <table:table-cell office:value-type="string" table:style-name="c1">
            <text:p>2026-04-27 05:30</text:p>
          </table:table-cell>
          <table:table-cell office:value-type="float" office:value="0.12763615" table:style-name="c1">
            <text:p>0.12764</text:p>
          </table:table-cell>
          <table:table-cell office:value-type="float" office:value="-3.1070421135322546" table:style-name="c14">
            <text:p>-3.1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1310655" table:style-name="c1">
            <text:p>0.13107</text:p>
          </table:table-cell>
          <table:table-cell office:value-type="string" table:style-name="c1">
            <text:p>2026-04-29 20:00</text:p>
          </table:table-cell>
          <table:table-cell office:value-type="float" office:value="0.12313840000000001" table:style-name="c1">
            <text:p>0.12314</text:p>
          </table:table-cell>
          <table:table-cell office:value-type="float" office:value="-6.236006929054561" table:style-name="c14">
            <text:p>-6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30 11:15</text:p>
          </table:table-cell>
          <table:table-cell office:value-type="float" office:value="0.12816404999999997" table:style-name="c1">
            <text:p>0.12816</text:p>
          </table:table-cell>
          <table:table-cell office:value-type="string" table:style-name="c1">
            <text:p>2026-04-30 20:00</text:p>
          </table:table-cell>
          <table:table-cell office:value-type="float" office:value="0.12463765000000002" table:style-name="c1">
            <text:p>0.12464</text:p>
          </table:table-cell>
          <table:table-cell office:value-type="float" office:value="-2.9458734039303214" table:style-name="c14">
            <text:p>-2.9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9:00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5-07 09:00</text:p>
          </table:table-cell>
          <table:table-cell office:value-type="float" office:value="0.1275362" table:style-name="c1">
            <text:p>0.12754</text:p>
          </table:table-cell>
          <table:table-cell office:value-type="float" office:value="2.5122049259012735" table:style-name="c13">
            <text:p>+2.5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9:30</text:p>
          </table:table-cell>
          <table:table-cell office:value-type="float" office:value="0.1346673" table:style-name="c1">
            <text:p>0.13467</text:p>
          </table:table-cell>
          <table:table-cell office:value-type="string" table:style-name="c1">
            <text:p>2026-05-09 09:30</text:p>
          </table:table-cell>
          <table:table-cell office:value-type="float" office:value="0.14302845" table:style-name="c1">
            <text:p>0.14303</text:p>
          </table:table-cell>
          <table:table-cell office:value-type="float" office:value="5.996434270569018" table:style-name="c13">
            <text:p>+6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7:45</text:p>
          </table:table-cell>
          <table:table-cell office:value-type="float" office:value="0.14117055" table:style-name="c1">
            <text:p>0.14117</text:p>
          </table:table-cell>
          <table:table-cell office:value-type="string" table:style-name="c1">
            <text:p>2026-05-11 07:45</text:p>
          </table:table-cell>
          <table:table-cell office:value-type="float" office:value="0.14082955" table:style-name="c1">
            <text:p>0.14083</text:p>
          </table:table-cell>
          <table:table-cell office:value-type="float" office:value="-0.4409689347034562" table:style-name="c14">
            <text:p>-0.4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9:15</text:p>
          </table:table-cell>
          <table:table-cell office:value-type="float" office:value="0.1428714" table:style-name="c1">
            <text:p>0.14287</text:p>
          </table:table-cell>
          <table:table-cell office:value-type="string" table:style-name="c1">
            <text:p>2026-05-12 04:00</text:p>
          </table:table-cell>
          <table:table-cell office:value-type="float" office:value="0.13863065" table:style-name="c1">
            <text:p>0.13863</text:p>
          </table:table-cell>
          <table:table-cell office:value-type="float" office:value="-3.162195281455926" table:style-name="c14">
            <text:p>-3.2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7:00</text:p>
          </table:table-cell>
          <table:table-cell office:value-type="float" office:value="0.10995495" table:style-name="c1">
            <text:p>0.10995</text:p>
          </table:table-cell>
          <table:table-cell office:value-type="string" table:style-name="c1">
            <text:p>2026-05-26 17:00</text:p>
          </table:table-cell>
          <table:table-cell office:value-type="float" office:value="0.10924535" table:style-name="c1">
            <text:p>0.10925</text:p>
          </table:table-cell>
          <table:table-cell office:value-type="float" office:value="-0.8439651463167386" table:style-name="c14">
            <text:p>-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9:15</text:p>
          </table:table-cell>
          <table:table-cell office:value-type="float" office:value="1.8789389999999997" table:style-name="c10">
            <text:p>1.8789</text:p>
          </table:table-cell>
          <table:table-cell office:value-type="string" table:style-name="c10">
            <text:p>2026-03-06 09:15</text:p>
          </table:table-cell>
          <table:table-cell office:value-type="float" office:value="1.8330830000000002" table:style-name="c10">
            <text:p>1.8331</text:p>
          </table:table-cell>
          <table:table-cell office:value-type="float" office:value="-2.635547663708049" table:style-name="c11">
            <text:p>-2.6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30</text:p>
          </table:table-cell>
          <table:table-cell office:value-type="float" office:value="1.7858924999999999" table:style-name="c10">
            <text:p>1.7859</text:p>
          </table:table-cell>
          <table:table-cell office:value-type="string" table:style-name="c10">
            <text:p>2026-03-11 09:30</text:p>
          </table:table-cell>
          <table:table-cell office:value-type="float" office:value="1.8180905" table:style-name="c10">
            <text:p>1.8181</text:p>
          </table:table-cell>
          <table:table-cell office:value-type="float" office:value="1.5994040565431522" table:style-name="c12">
            <text:p>+1.6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9:00</text:p>
          </table:table-cell>
          <table:table-cell office:value-type="float" office:value="1.846923" table:style-name="c10">
            <text:p>1.8469</text:p>
          </table:table-cell>
          <table:table-cell office:value-type="string" table:style-name="c10">
            <text:p>2026-03-12 19:00</text:p>
          </table:table-cell>
          <table:table-cell office:value-type="float" office:value="1.8230880000000003" table:style-name="c10">
            <text:p>1.8231</text:p>
          </table:table-cell>
          <table:table-cell office:value-type="float" office:value="-1.4878450759452377" table:style-name="c11">
            <text:p>-1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15</text:p>
          </table:table-cell>
          <table:table-cell office:value-type="float" office:value="1.858929" table:style-name="c10">
            <text:p>1.8589</text:p>
          </table:table-cell>
          <table:table-cell office:value-type="string" table:style-name="c10">
            <text:p>2026-03-14 10:15</text:p>
          </table:table-cell>
          <table:table-cell office:value-type="float" office:value="1.8630680000000002" table:style-name="c10">
            <text:p>1.8631</text:p>
          </table:table-cell>
          <table:table-cell office:value-type="float" office:value="0.022310000435754596" table:style-name="c12">
            <text:p>+0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1:30</text:p>
          </table:table-cell>
          <table:table-cell office:value-type="float" office:value="1.872936" table:style-name="c10">
            <text:p>1.8729</text:p>
          </table:table-cell>
          <table:table-cell office:value-type="string" table:style-name="c10">
            <text:p>2026-03-16 11:30</text:p>
          </table:table-cell>
          <table:table-cell office:value-type="float" office:value="1.8980505" table:style-name="c10">
            <text:p>1.8981</text:p>
          </table:table-cell>
          <table:table-cell office:value-type="float" office:value="1.1383355891765756" table:style-name="c12">
            <text:p>+1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6:30</text:p>
          </table:table-cell>
          <table:table-cell office:value-type="float" office:value="1.9249619999999998" table:style-name="c10">
            <text:p>1.925</text:p>
          </table:table-cell>
          <table:table-cell office:value-type="string" table:style-name="c10">
            <text:p>2026-03-17 16:30</text:p>
          </table:table-cell>
          <table:table-cell office:value-type="float" office:value="1.9440275000000002" table:style-name="c10">
            <text:p>1.944</text:p>
          </table:table-cell>
          <table:table-cell office:value-type="float" office:value="0.788555256025858" table:style-name="c12">
            <text:p>+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1:15</text:p>
          </table:table-cell>
          <table:table-cell office:value-type="float" office:value="1.9709849999999998" table:style-name="c10">
            <text:p>1.971</text:p>
          </table:table-cell>
          <table:table-cell office:value-type="string" table:style-name="c10">
            <text:p>2026-03-18 20:00</text:p>
          </table:table-cell>
          <table:table-cell office:value-type="float" office:value="1.877061" table:style-name="c10">
            <text:p>1.8771</text:p>
          </table:table-cell>
          <table:table-cell office:value-type="float" office:value="-4.955707168699897" table:style-name="c11">
            <text:p>-5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7:00</text:p>
          </table:table-cell>
          <table:table-cell office:value-type="float" office:value="1.706853" table:style-name="c10">
            <text:p>1.7069</text:p>
          </table:table-cell>
          <table:table-cell office:value-type="string" table:style-name="c10">
            <text:p>2026-04-01 07:00</text:p>
          </table:table-cell>
          <table:table-cell office:value-type="float" office:value="1.7341325000000003" table:style-name="c10">
            <text:p>1.7341</text:p>
          </table:table-cell>
          <table:table-cell office:value-type="float" office:value="1.3951388392849484" table:style-name="c12">
            <text:p>+1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6:30</text:p>
          </table:table-cell>
          <table:table-cell office:value-type="float" office:value="1.7178585" table:style-name="c10">
            <text:p>1.7179</text:p>
          </table:table-cell>
          <table:table-cell office:value-type="string" table:style-name="c10">
            <text:p>2026-04-04 16:30</text:p>
          </table:table-cell>
          <table:table-cell office:value-type="float" office:value="1.707146" table:style-name="c10">
            <text:p>1.7071</text:p>
          </table:table-cell>
          <table:table-cell office:value-type="float" office:value="-0.8222496121770062" table:style-name="c11">
            <text:p>-0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7:30</text:p>
          </table:table-cell>
          <table:table-cell office:value-type="float" office:value="1.7298645" table:style-name="c10">
            <text:p>1.7299</text:p>
          </table:table-cell>
          <table:table-cell office:value-type="string" table:style-name="c10">
            <text:p>2026-04-07 07:30</text:p>
          </table:table-cell>
          <table:table-cell office:value-type="float" office:value="1.689155" table:style-name="c10">
            <text:p>1.6892</text:p>
          </table:table-cell>
          <table:table-cell office:value-type="float" office:value="-2.548530295002871" table:style-name="c11">
            <text:p>-2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1:15</text:p>
          </table:table-cell>
          <table:table-cell office:value-type="float" office:value="1.7398695" table:style-name="c10">
            <text:p>1.7399</text:p>
          </table:table-cell>
          <table:table-cell office:value-type="string" table:style-name="c10">
            <text:p>2026-04-08 21:15</text:p>
          </table:table-cell>
          <table:table-cell office:value-type="float" office:value="1.777111" table:style-name="c10">
            <text:p>1.7771</text:p>
          </table:table-cell>
          <table:table-cell office:value-type="float" office:value="1.9362978149223276" table:style-name="c12">
            <text:p>+1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1.8219104999999998" table:style-name="c10">
            <text:p>1.8219</text:p>
          </table:table-cell>
          <table:table-cell office:value-type="string" table:style-name="c10">
            <text:p>2026-04-10 15:45</text:p>
          </table:table-cell>
          <table:table-cell office:value-type="float" office:value="1.8300845000000001" table:style-name="c10">
            <text:p>1.8301</text:p>
          </table:table-cell>
          <table:table-cell office:value-type="float" office:value="0.24785306877042057" table:style-name="c12">
            <text:p>+0.2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6:00</text:p>
          </table:table-cell>
          <table:table-cell office:value-type="float" office:value="1.7968979999999999" table:style-name="c10">
            <text:p>1.7969</text:p>
          </table:table-cell>
          <table:table-cell office:value-type="string" table:style-name="c10">
            <text:p>2026-04-17 06:00</text:p>
          </table:table-cell>
          <table:table-cell office:value-type="float" office:value="1.787106" table:style-name="c10">
            <text:p>1.7871</text:p>
          </table:table-cell>
          <table:table-cell office:value-type="float" office:value="-0.743749778451519" table:style-name="c11">
            <text:p>-0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14:00</text:p>
          </table:table-cell>
          <table:table-cell office:value-type="float" office:value="1.864932" table:style-name="c10">
            <text:p>1.8649</text:p>
          </table:table-cell>
          <table:table-cell office:value-type="string" table:style-name="c10">
            <text:p>2026-04-18 14:00</text:p>
          </table:table-cell>
          <table:table-cell office:value-type="float" office:value="1.7941025" table:style-name="c10">
            <text:p>1.7941</text:p>
          </table:table-cell>
          <table:table-cell office:value-type="float" office:value="-3.9902747605542688" table:style-name="c11">
            <text:p>-4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0:30</text:p>
          </table:table-cell>
          <table:table-cell office:value-type="float" office:value="1.8059024999999997" table:style-name="c10">
            <text:p>1.8059</text:p>
          </table:table-cell>
          <table:table-cell office:value-type="string" table:style-name="c10">
            <text:p>2026-04-22 10:30</text:p>
          </table:table-cell>
          <table:table-cell office:value-type="float" office:value="1.8990500000000001" table:style-name="c10">
            <text:p>1.8991</text:p>
          </table:table-cell>
          <table:table-cell office:value-type="float" office:value="4.9477366053815475" table:style-name="c12">
            <text:p>+4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7:15</text:p>
          </table:table-cell>
          <table:table-cell office:value-type="float" office:value="1.8599294999999998" table:style-name="c10">
            <text:p>1.8599</text:p>
          </table:table-cell>
          <table:table-cell office:value-type="string" table:style-name="c10">
            <text:p>2026-04-24 07:15</text:p>
          </table:table-cell>
          <table:table-cell office:value-type="float" office:value="1.925037" table:style-name="c10">
            <text:p>1.925</text:p>
          </table:table-cell>
          <table:table-cell office:value-type="float" office:value="3.2936383361305" table:style-name="c12">
            <text:p>+3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4 08:15</text:p>
          </table:table-cell>
          <table:table-cell office:value-type="float" office:value="1.9379685" table:style-name="c10">
            <text:p>1.938</text:p>
          </table:table-cell>
          <table:table-cell office:value-type="string" table:style-name="c10">
            <text:p>2026-04-25 08:15</text:p>
          </table:table-cell>
          <table:table-cell office:value-type="float" office:value="2.0209889999999997" table:style-name="c10">
            <text:p>2.021</text:p>
          </table:table-cell>
          <table:table-cell office:value-type="float" office:value="4.075429656828766" table:style-name="c12">
            <text:p>+4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10:30</text:p>
          </table:table-cell>
          <table:table-cell office:value-type="float" office:value="2.0480235" table:style-name="c10">
            <text:p>2.048</text:p>
          </table:table-cell>
          <table:table-cell office:value-type="string" table:style-name="c10">
            <text:p>2026-04-26 10:30</text:p>
          </table:table-cell>
          <table:table-cell office:value-type="float" office:value="2.024987" table:style-name="c10">
            <text:p>2.025</text:p>
          </table:table-cell>
          <table:table-cell office:value-type="float" office:value="-1.3224676871627872" table:style-name="c11">
            <text:p>-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00</text:p>
          </table:table-cell>
          <table:table-cell office:value-type="float" office:value="1.9129559999999999" table:style-name="c10">
            <text:p>1.913</text:p>
          </table:table-cell>
          <table:table-cell office:value-type="string" table:style-name="c10">
            <text:p>2026-05-04 21:00</text:p>
          </table:table-cell>
          <table:table-cell office:value-type="float" office:value="1.881059" table:style-name="c10">
            <text:p>1.8811</text:p>
          </table:table-cell>
          <table:table-cell office:value-type="float" office:value="-1.863986256923822" table:style-name="c11">
            <text:p>-1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1:15</text:p>
          </table:table-cell>
          <table:table-cell office:value-type="float" office:value="1.9079534999999999" table:style-name="c10">
            <text:p>1.908</text:p>
          </table:table-cell>
          <table:table-cell office:value-type="string" table:style-name="c10">
            <text:p>2026-05-05 18:00</text:p>
          </table:table-cell>
          <table:table-cell office:value-type="float" office:value="1.8600695" table:style-name="c10">
            <text:p>1.8601</text:p>
          </table:table-cell>
          <table:table-cell office:value-type="float" office:value="-2.7045878702232518" table:style-name="c11">
            <text:p>-2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4:00</text:p>
          </table:table-cell>
          <table:table-cell office:value-type="float" office:value="1.9209599999999998" table:style-name="c10">
            <text:p>1.921</text:p>
          </table:table-cell>
          <table:table-cell office:value-type="string" table:style-name="c10">
            <text:p>2026-05-07 04:00</text:p>
          </table:table-cell>
          <table:table-cell office:value-type="float" office:value="1.8720635" table:style-name="c10">
            <text:p>1.8721</text:p>
          </table:table-cell>
          <table:table-cell office:value-type="float" office:value="-2.7402317037574786" table:style-name="c11">
            <text:p>-2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45</text:p>
          </table:table-cell>
          <table:table-cell office:value-type="float" office:value="1.9089539999999998" table:style-name="c10">
            <text:p>1.909</text:p>
          </table:table-cell>
          <table:table-cell office:value-type="string" table:style-name="c10">
            <text:p>2026-05-07 18:00</text:p>
          </table:table-cell>
          <table:table-cell office:value-type="float" office:value="1.887056" table:style-name="c10">
            <text:p>1.8871</text:p>
          </table:table-cell>
          <table:table-cell office:value-type="float" office:value="-1.344727266555401" table:style-name="c11">
            <text:p>-1.3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22:00</text:p>
          </table:table-cell>
          <table:table-cell office:value-type="float" office:value="1.9499745" table:style-name="c10">
            <text:p>1.95</text:p>
          </table:table-cell>
          <table:table-cell office:value-type="string" table:style-name="c10">
            <text:p>2026-05-09 22:00</text:p>
          </table:table-cell>
          <table:table-cell office:value-type="float" office:value="1.935032" table:style-name="c10">
            <text:p>1.935</text:p>
          </table:table-cell>
          <table:table-cell office:value-type="float" office:value="-0.9646602541725557" table:style-name="c11">
            <text:p>-1.0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5:30</text:p>
          </table:table-cell>
          <table:table-cell office:value-type="float" office:value="1.9329659999999997" table:style-name="c10">
            <text:p>1.933</text:p>
          </table:table-cell>
          <table:table-cell office:value-type="string" table:style-name="c10">
            <text:p>2026-05-11 05:30</text:p>
          </table:table-cell>
          <table:table-cell office:value-type="float" office:value="2.0019985" table:style-name="c10">
            <text:p>2.002</text:p>
          </table:table-cell>
          <table:table-cell office:value-type="float" office:value="3.3642860246119177" table:style-name="c12">
            <text:p>+3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9:45</text:p>
          </table:table-cell>
          <table:table-cell office:value-type="float" office:value="2.0490239999999997" table:style-name="c10">
            <text:p>2.049</text:p>
          </table:table-cell>
          <table:table-cell office:value-type="string" table:style-name="c10">
            <text:p>2026-05-12 09:45</text:p>
          </table:table-cell>
          <table:table-cell office:value-type="float" office:value="2.060969" table:style-name="c10">
            <text:p>2.061</text:p>
          </table:table-cell>
          <table:table-cell office:value-type="float" office:value="0.381895134903254" table:style-name="c12">
            <text:p>+0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0:15</text:p>
          </table:table-cell>
          <table:table-cell office:value-type="float" office:value="2.0800395000000003" table:style-name="c10">
            <text:p>2.08</text:p>
          </table:table-cell>
          <table:table-cell office:value-type="string" table:style-name="c10">
            <text:p>2026-05-13 10:15</text:p>
          </table:table-cell>
          <table:table-cell office:value-type="float" office:value="2.148925" table:style-name="c10">
            <text:p>2.1489</text:p>
          </table:table-cell>
          <table:table-cell office:value-type="float" office:value="3.10521982515235" table:style-name="c12">
            <text:p>+3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20:15</text:p>
          </table:table-cell>
          <table:table-cell office:value-type="float" office:value="2.0840415" table:style-name="c10">
            <text:p>2.084</text:p>
          </table:table-cell>
          <table:table-cell office:value-type="string" table:style-name="c10">
            <text:p>2026-05-14 03:00</text:p>
          </table:table-cell>
          <table:table-cell office:value-type="float" office:value="2.0119935" table:style-name="c10">
            <text:p>2.012</text:p>
          </table:table-cell>
          <table:table-cell office:value-type="float" office:value="-3.650118052183715" table:style-name="c11">
            <text:p>-3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03:45</text:p>
          </table:table-cell>
          <table:table-cell office:value-type="float" office:value="2.053026" table:style-name="c10">
            <text:p>2.053</text:p>
          </table:table-cell>
          <table:table-cell office:value-type="string" table:style-name="c10">
            <text:p>2026-05-18 03:45</text:p>
          </table:table-cell>
          <table:table-cell office:value-type="float" office:value="2.048975" table:style-name="c10">
            <text:p>2.049</text:p>
          </table:table-cell>
          <table:table-cell office:value-type="float" office:value="-0.3968240550777158" table:style-name="c11">
            <text:p>-0.4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8 06:15</text:p>
          </table:table-cell>
          <table:table-cell office:value-type="float" office:value="2.0700344999999998" table:style-name="c10">
            <text:p>2.07</text:p>
          </table:table-cell>
          <table:table-cell office:value-type="string" table:style-name="c10">
            <text:p>2026-05-19 06:15</text:p>
          </table:table-cell>
          <table:table-cell office:value-type="float" office:value="2.05897" table:style-name="c10">
            <text:p>2.059</text:p>
          </table:table-cell>
          <table:table-cell office:value-type="float" office:value="-0.7333395182544056" table:style-name="c11">
            <text:p>-0.7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7:45</text:p>
          </table:table-cell>
          <table:table-cell office:value-type="float" office:value="2.0780385" table:style-name="c10">
            <text:p>2.078</text:p>
          </table:table-cell>
          <table:table-cell office:value-type="string" table:style-name="c10">
            <text:p>2026-05-20 03:00</text:p>
          </table:table-cell>
          <table:table-cell office:value-type="float" office:value="2.008995" table:style-name="c10">
            <text:p>2.009</text:p>
          </table:table-cell>
          <table:table-cell office:value-type="float" office:value="-3.515790540213748" table:style-name="c11">
            <text:p>-3.5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8:15</text:p>
          </table:table-cell>
          <table:table-cell office:value-type="float" office:value="2.0310149999999996" table:style-name="c10">
            <text:p>2.031</text:p>
          </table:table-cell>
          <table:table-cell office:value-type="string" table:style-name="c10">
            <text:p>2026-05-22 18:15</text:p>
          </table:table-cell>
          <table:table-cell office:value-type="float" office:value="2.1379305" table:style-name="c10">
            <text:p>2.1379</text:p>
          </table:table-cell>
          <table:table-cell office:value-type="float" office:value="5.053718309835231" table:style-name="c12">
            <text:p>+5.1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01:45</text:p>
          </table:table-cell>
          <table:table-cell office:value-type="float" office:value="2.117058" table:style-name="c10">
            <text:p>2.1171</text:p>
          </table:table-cell>
          <table:table-cell office:value-type="string" table:style-name="c10">
            <text:p>2026-05-23 11:00</text:p>
          </table:table-cell>
          <table:table-cell office:value-type="float" office:value="2.0229880000000002" table:style-name="c10">
            <text:p>2.023</text:p>
          </table:table-cell>
          <table:table-cell office:value-type="float" office:value="-4.634448041196782" table:style-name="c11">
            <text:p>-4.6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21:00</text:p>
          </table:table-cell>
          <table:table-cell office:value-type="float" office:value="2.147073" table:style-name="c10">
            <text:p>2.1471</text:p>
          </table:table-cell>
          <table:table-cell office:value-type="string" table:style-name="c10">
            <text:p>2026-05-24 18:00</text:p>
          </table:table-cell>
          <table:table-cell office:value-type="float" office:value="2.044977" table:style-name="c10">
            <text:p>2.045</text:p>
          </table:table-cell>
          <table:table-cell office:value-type="float" office:value="-4.9455192731220565" table:style-name="c11">
            <text:p>-4.9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7:00</text:p>
          </table:table-cell>
          <table:table-cell office:value-type="float" office:value="2.1820904999999997" table:style-name="c10">
            <text:p>2.1821</text:p>
          </table:table-cell>
          <table:table-cell office:value-type="string" table:style-name="c10">
            <text:p>2026-05-26 07:00</text:p>
          </table:table-cell>
          <table:table-cell office:value-type="float" office:value="2.146926" table:style-name="c10">
            <text:p>2.1469</text:p>
          </table:table-cell>
          <table:table-cell office:value-type="float" office:value="-1.8081837152950087" table:style-name="c11">
            <text:p>-1.8</text:p>
          </table:table-cell>
        </table:table-row>
        <table:table-row>
          <table:table-cell office:value-type="string" table:style-name="c9">
            <text:p>ATO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3:45</text:p>
          </table:table-cell>
          <table:table-cell office:value-type="float" office:value="2.2541265" table:style-name="c10">
            <text:p>2.2541</text:p>
          </table:table-cell>
          <table:table-cell office:value-type="string" table:style-name="c10">
            <text:p>2026-05-27 13:45</text:p>
          </table:table-cell>
          <table:table-cell office:value-type="float" office:value="2.1739125" table:style-name="c10">
            <text:p>2.1739</text:p>
          </table:table-cell>
          <table:table-cell office:value-type="float" office:value="-3.7513267816823848" table:style-name="c11">
            <text:p>-3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45</text:p>
          </table:table-cell>
          <table:table-cell office:value-type="float" office:value="9.28464" table:style-name="c1">
            <text:p>9.2846</text:p>
          </table:table-cell>
          <table:table-cell office:value-type="string" table:style-name="c1">
            <text:p>2026-03-10 13:45</text:p>
          </table:table-cell>
          <table:table-cell office:value-type="float" office:value="9.365314999999999" table:style-name="c1">
            <text:p>9.3653</text:p>
          </table:table-cell>
          <table:table-cell office:value-type="float" office:value="0.6672712707762596" table:style-name="c13">
            <text:p>+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3-11 15:00</text:p>
          </table:table-cell>
          <table:table-cell office:value-type="float" office:value="9.685155" table:style-name="c1">
            <text:p>9.6852</text:p>
          </table:table-cell>
          <table:table-cell office:value-type="float" office:value="0.21746777187132693" table:style-name="c13">
            <text:p>+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30</text:p>
          </table:table-cell>
          <table:table-cell office:value-type="float" office:value="9.72486" table:style-name="c1">
            <text:p>9.7249</text:p>
          </table:table-cell>
          <table:table-cell office:value-type="string" table:style-name="c1">
            <text:p>2026-03-12 17:30</text:p>
          </table:table-cell>
          <table:table-cell office:value-type="float" office:value="9.565215" table:style-name="c1">
            <text:p>9.5652</text:p>
          </table:table-cell>
          <table:table-cell office:value-type="float" office:value="-1.838235869565208" table:style-name="c14">
            <text:p>-1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23:15</text:p>
          </table:table-cell>
          <table:table-cell office:value-type="float" office:value="9.734865" table:style-name="c1">
            <text:p>9.7349</text:p>
          </table:table-cell>
          <table:table-cell office:value-type="string" table:style-name="c1">
            <text:p>2026-03-13 23:15</text:p>
          </table:table-cell>
          <table:table-cell office:value-type="float" office:value="9.705145000000002" table:style-name="c1">
            <text:p>9.7051</text:p>
          </table:table-cell>
          <table:table-cell office:value-type="float" office:value="-0.5045841401498441" table:style-name="c14">
            <text:p>-0.5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9:15</text:p>
          </table:table-cell>
          <table:table-cell office:value-type="float" office:value="9.82491" table:style-name="c1">
            <text:p>9.8249</text:p>
          </table:table-cell>
          <table:table-cell office:value-type="string" table:style-name="c1">
            <text:p>2026-03-16 09:15</text:p>
          </table:table-cell>
          <table:table-cell office:value-type="float" office:value="10.25487" table:style-name="c1">
            <text:p>10.255</text:p>
          </table:table-cell>
          <table:table-cell office:value-type="float" office:value="4.167575223284503" table:style-name="c13">
            <text:p>+4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10.52526" table:style-name="c1">
            <text:p>10.525</text:p>
          </table:table-cell>
          <table:table-cell office:value-type="string" table:style-name="c1">
            <text:p>2026-03-18 00:15</text:p>
          </table:table-cell>
          <table:table-cell office:value-type="float" office:value="10.1949" table:style-name="c1">
            <text:p>10.195</text:p>
          </table:table-cell>
          <table:table-cell office:value-type="float" office:value="-3.3323604842065646" table:style-name="c14">
            <text:p>-3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2:45</text:p>
          </table:table-cell>
          <table:table-cell office:value-type="float" office:value="10.285139999999998" table:style-name="c1">
            <text:p>10.285</text:p>
          </table:table-cell>
          <table:table-cell office:value-type="string" table:style-name="c1">
            <text:p>2026-03-18 14:00</text:p>
          </table:table-cell>
          <table:table-cell office:value-type="float" office:value="9.795100000000001" table:style-name="c1">
            <text:p>9.7951</text:p>
          </table:table-cell>
          <table:table-cell office:value-type="float" office:value="-4.954919475087327" table:style-name="c14">
            <text:p>-5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9.524759999999999" table:style-name="c1">
            <text:p>9.5248</text:p>
          </table:table-cell>
          <table:table-cell office:value-type="string" table:style-name="c1">
            <text:p>2026-03-25 20:30</text:p>
          </table:table-cell>
          <table:table-cell office:value-type="float" office:value="9.61519" table:style-name="c1">
            <text:p>9.6152</text:p>
          </table:table-cell>
          <table:table-cell office:value-type="float" office:value="0.7476223567838058" table:style-name="c13">
            <text:p>+0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1:45</text:p>
          </table:table-cell>
          <table:table-cell office:value-type="float" office:value="8.98449" table:style-name="c1">
            <text:p>8.9845</text:p>
          </table:table-cell>
          <table:table-cell office:value-type="string" table:style-name="c1">
            <text:p>2026-04-01 01:45</text:p>
          </table:table-cell>
          <table:table-cell office:value-type="float" office:value="8.905545" table:style-name="c1">
            <text:p>8.9055</text:p>
          </table:table-cell>
          <table:table-cell office:value-type="float" office:value="-1.0768244436245022" table:style-name="c14">
            <text:p>-1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9.084539999999999" table:style-name="c1">
            <text:p>9.0845</text:p>
          </table:table-cell>
          <table:table-cell office:value-type="string" table:style-name="c1">
            <text:p>2026-04-02 05:30</text:p>
          </table:table-cell>
          <table:table-cell office:value-type="float" office:value="8.67566" table:style-name="c1">
            <text:p>8.6757</text:p>
          </table:table-cell>
          <table:table-cell office:value-type="float" office:value="-4.691736118064305" table:style-name="c14">
            <text:p>-4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5:00</text:p>
          </table:table-cell>
          <table:table-cell office:value-type="float" office:value="9.034514999999999" table:style-name="c1">
            <text:p>9.0345</text:p>
          </table:table-cell>
          <table:table-cell office:value-type="string" table:style-name="c1">
            <text:p>2026-04-04 15:00</text:p>
          </table:table-cell>
          <table:table-cell office:value-type="float" office:value="8.885555000000002" table:style-name="c1">
            <text:p>8.8856</text:p>
          </table:table-cell>
          <table:table-cell office:value-type="float" office:value="-1.8453920818660041" table:style-name="c14">
            <text:p>-1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0:15</text:p>
          </table:table-cell>
          <table:table-cell office:value-type="float" office:value="9.194595" table:style-name="c1">
            <text:p>9.1946</text:p>
          </table:table-cell>
          <table:table-cell office:value-type="string" table:style-name="c1">
            <text:p>2026-04-07 00:15</text:p>
          </table:table-cell>
          <table:table-cell office:value-type="float" office:value="8.885555000000002" table:style-name="c1">
            <text:p>8.8856</text:p>
          </table:table-cell>
          <table:table-cell office:value-type="float" office:value="-3.554286234956483" table:style-name="c14">
            <text:p>-3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9.344669999999999" table:style-name="c1">
            <text:p>9.3447</text:p>
          </table:table-cell>
          <table:table-cell office:value-type="string" table:style-name="c1">
            <text:p>2026-04-10 16:00</text:p>
          </table:table-cell>
          <table:table-cell office:value-type="float" office:value="9.41529" table:style-name="c1">
            <text:p>9.4153</text:p>
          </table:table-cell>
          <table:table-cell office:value-type="float" office:value="0.5543142271476675" table:style-name="c13">
            <text:p>+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9.454724999999998" table:style-name="c1">
            <text:p>9.4547</text:p>
          </table:table-cell>
          <table:table-cell office:value-type="string" table:style-name="c1">
            <text:p>2026-04-12 05:00</text:p>
          </table:table-cell>
          <table:table-cell office:value-type="float" office:value="9.075460000000001" table:style-name="c1">
            <text:p>9.0755</text:p>
          </table:table-cell>
          <table:table-cell office:value-type="float" office:value="-4.203261803383973" table:style-name="c14">
            <text:p>-4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0:00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4-14 20:00</text:p>
          </table:table-cell>
          <table:table-cell office:value-type="float" office:value="9.35532" table:style-name="c1">
            <text:p>9.3553</text:p>
          </table:table-cell>
          <table:table-cell office:value-type="float" office:value="-0.8294076625874003" table:style-name="c14">
            <text:p>-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9.534764999999998" table:style-name="c1">
            <text:p>9.5348</text:p>
          </table:table-cell>
          <table:table-cell office:value-type="string" table:style-name="c1">
            <text:p>2026-04-16 19:45</text:p>
          </table:table-cell>
          <table:table-cell office:value-type="float" office:value="9.825085000000001" table:style-name="c1">
            <text:p>9.8251</text:p>
          </table:table-cell>
          <table:table-cell office:value-type="float" office:value="2.8388707543919978" table:style-name="c13">
            <text:p>+2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9.6048" table:style-name="c1">
            <text:p>9.6048</text:p>
          </table:table-cell>
          <table:table-cell office:value-type="string" table:style-name="c1">
            <text:p>2026-04-18 07:15</text:p>
          </table:table-cell>
          <table:table-cell office:value-type="float" office:value="9.705145000000002" table:style-name="c1">
            <text:p>9.7051</text:p>
          </table:table-cell>
          <table:table-cell office:value-type="float" office:value="0.8427496162856318" table:style-name="c13">
            <text:p>+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1:45</text:p>
          </table:table-cell>
          <table:table-cell office:value-type="float" office:value="9.474735" table:style-name="c1">
            <text:p>9.4747</text:p>
          </table:table-cell>
          <table:table-cell office:value-type="string" table:style-name="c1">
            <text:p>2026-04-22 11:45</text:p>
          </table:table-cell>
          <table:table-cell office:value-type="float" office:value="9.565215" table:style-name="c1">
            <text:p>9.5652</text:p>
          </table:table-cell>
          <table:table-cell office:value-type="float" office:value="0.7531517790735132" table:style-name="c13">
            <text:p>+0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1:45</text:p>
          </table:table-cell>
          <table:table-cell office:value-type="float" office:value="9.494745" table:style-name="c1">
            <text:p>9.4947</text:p>
          </table:table-cell>
          <table:table-cell office:value-type="string" table:style-name="c1">
            <text:p>2026-04-27 10:00</text:p>
          </table:table-cell>
          <table:table-cell office:value-type="float" office:value="9.245375000000001" table:style-name="c1">
            <text:p>9.2454</text:p>
          </table:table-cell>
          <table:table-cell office:value-type="float" office:value="-2.8210500084520307" table:style-name="c14">
            <text:p>-2.8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9.4047" table:style-name="c1">
            <text:p>9.4047</text:p>
          </table:table-cell>
          <table:table-cell office:value-type="string" table:style-name="c1">
            <text:p>2026-04-29 17:00</text:p>
          </table:table-cell>
          <table:table-cell office:value-type="float" office:value="9.11544" table:style-name="c1">
            <text:p>9.1154</text:p>
          </table:table-cell>
          <table:table-cell office:value-type="float" office:value="-3.269447877763265" table:style-name="c14">
            <text:p>-3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9.2046" table:style-name="c1">
            <text:p>9.2046</text:p>
          </table:table-cell>
          <table:table-cell office:value-type="string" table:style-name="c1">
            <text:p>2026-05-05 02:00</text:p>
          </table:table-cell>
          <table:table-cell office:value-type="float" office:value="9.235380000000001" table:style-name="c1">
            <text:p>9.2354</text:p>
          </table:table-cell>
          <table:table-cell office:value-type="float" office:value="0.13382955674339225" table:style-name="c13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9.414705" table:style-name="c1">
            <text:p>9.4147</text:p>
          </table:table-cell>
          <table:table-cell office:value-type="string" table:style-name="c1">
            <text:p>2026-05-06 10:45</text:p>
          </table:table-cell>
          <table:table-cell office:value-type="float" office:value="9.735130000000002" table:style-name="c1">
            <text:p>9.7351</text:p>
          </table:table-cell>
          <table:table-cell office:value-type="float" office:value="3.196748863931509" table:style-name="c13">
            <text:p>+3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15</text:p>
          </table:table-cell>
          <table:table-cell office:value-type="float" office:value="9.6048" table:style-name="c1">
            <text:p>9.6048</text:p>
          </table:table-cell>
          <table:table-cell office:value-type="string" table:style-name="c1">
            <text:p>2026-05-08 05:15</text:p>
          </table:table-cell>
          <table:table-cell office:value-type="float" office:value="9.49525" table:style-name="c1">
            <text:p>9.4953</text:p>
          </table:table-cell>
          <table:table-cell office:value-type="float" office:value="-1.3381955350449615" table:style-name="c14">
            <text:p>-1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8:30</text:p>
          </table:table-cell>
          <table:table-cell office:value-type="float" office:value="9.88494" table:style-name="c1">
            <text:p>9.8849</text:p>
          </table:table-cell>
          <table:table-cell office:value-type="string" table:style-name="c1">
            <text:p>2026-05-09 18:30</text:p>
          </table:table-cell>
          <table:table-cell office:value-type="float" office:value="9.965015000000001" table:style-name="c1">
            <text:p>9.965</text:p>
          </table:table-cell>
          <table:table-cell office:value-type="float" office:value="0.6085513418897737" table:style-name="c13">
            <text:p>+0.6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09:15</text:p>
          </table:table-cell>
          <table:table-cell office:value-type="float" office:value="10.14507" table:style-name="c1">
            <text:p>10.145</text:p>
          </table:table-cell>
          <table:table-cell office:value-type="string" table:style-name="c1">
            <text:p>2026-05-12 09:15</text:p>
          </table:table-cell>
          <table:table-cell office:value-type="float" office:value="9.925035" table:style-name="c1">
            <text:p>9.925</text:p>
          </table:table-cell>
          <table:table-cell office:value-type="float" office:value="-2.364450368159121" table:style-name="c14">
            <text:p>-2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10:00</text:p>
          </table:table-cell>
          <table:table-cell office:value-type="float" office:value="10.155075" table:style-name="c1">
            <text:p>10.155</text:p>
          </table:table-cell>
          <table:table-cell office:value-type="string" table:style-name="c1">
            <text:p>2026-05-13 13:00</text:p>
          </table:table-cell>
          <table:table-cell office:value-type="float" office:value="9.865065" table:style-name="c1">
            <text:p>9.8651</text:p>
          </table:table-cell>
          <table:table-cell office:value-type="float" office:value="-3.050004701442399" table:style-name="c14">
            <text:p>-3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4:45</text:p>
          </table:table-cell>
          <table:table-cell office:value-type="float" office:value="9.2896425" table:style-name="c1">
            <text:p>9.2896</text:p>
          </table:table-cell>
          <table:table-cell office:value-type="string" table:style-name="c1">
            <text:p>2026-05-21 14:45</text:p>
          </table:table-cell>
          <table:table-cell office:value-type="float" office:value="9.31534" table:style-name="c1">
            <text:p>9.3153</text:p>
          </table:table-cell>
          <table:table-cell office:value-type="float" office:value="0.076172310613698" table:style-name="c13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5:30</text:p>
          </table:table-cell>
          <table:table-cell office:value-type="float" office:value="9.403699499999998" table:style-name="c1">
            <text:p>9.4037</text:p>
          </table:table-cell>
          <table:table-cell office:value-type="string" table:style-name="c1">
            <text:p>2026-05-22 15:30</text:p>
          </table:table-cell>
          <table:table-cell office:value-type="float" office:value="9.43528" table:style-name="c1">
            <text:p>9.4353</text:p>
          </table:table-cell>
          <table:table-cell office:value-type="float" office:value="0.13525926982249636" table:style-name="c13">
            <text:p>+0.1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9.4957455" table:style-name="c1">
            <text:p>9.4957</text:p>
          </table:table-cell>
          <table:table-cell office:value-type="string" table:style-name="c1">
            <text:p>2026-05-26 14:30</text:p>
          </table:table-cell>
          <table:table-cell office:value-type="float" office:value="9.473261" table:style-name="c1">
            <text:p>9.4733</text:p>
          </table:table-cell>
          <table:table-cell office:value-type="float" office:value="-0.4362116564623375" table:style-name="c14">
            <text:p>-0.4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0:15</text:p>
          </table:table-cell>
          <table:table-cell office:value-type="float" office:value="9.0195075" table:style-name="c1">
            <text:p>9.0195</text:p>
          </table:table-cell>
          <table:table-cell office:value-type="string" table:style-name="c1">
            <text:p>2026-06-01 08:00</text:p>
          </table:table-cell>
          <table:table-cell office:value-type="float" office:value="8.788603499999999" table:style-name="c1">
            <text:p>8.7886</text:p>
          </table:table-cell>
          <table:table-cell office:value-type="float" office:value="-2.7548335471366037" table:style-name="c14">
            <text:p>-2.8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4:00</text:p>
          </table:table-cell>
          <table:table-cell office:value-type="float" office:value="454.62719999999996" table:style-name="c10">
            <text:p>454.63</text:p>
          </table:table-cell>
          <table:table-cell office:value-type="string" table:style-name="c10">
            <text:p>2026-03-10 01:00</text:p>
          </table:table-cell>
          <table:table-cell office:value-type="float" office:value="445.57710000000003" table:style-name="c10">
            <text:p>445.58</text:p>
          </table:table-cell>
          <table:table-cell office:value-type="float" office:value="-2.1865846616524354" table:style-name="c11">
            <text:p>-2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6:45</text:p>
          </table:table-cell>
          <table:table-cell office:value-type="float" office:value="453.02639999999997" table:style-name="c10">
            <text:p>453.03</text:p>
          </table:table-cell>
          <table:table-cell office:value-type="string" table:style-name="c10">
            <text:p>2026-03-12 06:45</text:p>
          </table:table-cell>
          <table:table-cell office:value-type="float" office:value="453.1733" table:style-name="c10">
            <text:p>453.17</text:p>
          </table:table-cell>
          <table:table-cell office:value-type="float" office:value="-0.16753845398415068" table:style-name="c11">
            <text:p>-0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1:30</text:p>
          </table:table-cell>
          <table:table-cell office:value-type="float" office:value="469.33455" table:style-name="c10">
            <text:p>469.33</text:p>
          </table:table-cell>
          <table:table-cell office:value-type="string" table:style-name="c10">
            <text:p>2026-03-14 01:30</text:p>
          </table:table-cell>
          <table:table-cell office:value-type="float" office:value="460.1698" table:style-name="c10">
            <text:p>460.17</text:p>
          </table:table-cell>
          <table:table-cell office:value-type="float" office:value="-2.148708086843365" table:style-name="c11">
            <text:p>-2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1:30</text:p>
          </table:table-cell>
          <table:table-cell office:value-type="float" office:value="458.62919999999997" table:style-name="c10">
            <text:p>458.63</text:p>
          </table:table-cell>
          <table:table-cell office:value-type="string" table:style-name="c10">
            <text:p>2026-03-15 11:30</text:p>
          </table:table-cell>
          <table:table-cell office:value-type="float" office:value="467.86595000000005" table:style-name="c10">
            <text:p>467.87</text:p>
          </table:table-cell>
          <table:table-cell office:value-type="float" office:value="1.8100648554322474" table:style-name="c12">
            <text:p>+1.8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22:00</text:p>
          </table:table-cell>
          <table:table-cell office:value-type="float" office:value="465.0324" table:style-name="c10">
            <text:p>465.03</text:p>
          </table:table-cell>
          <table:table-cell office:value-type="string" table:style-name="c10">
            <text:p>2026-03-16 22:00</text:p>
          </table:table-cell>
          <table:table-cell office:value-type="float" office:value="480.65955" table:style-name="c10">
            <text:p>480.66</text:p>
          </table:table-cell>
          <table:table-cell office:value-type="float" office:value="3.153825746238348" table:style-name="c12">
            <text:p>+3.2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08:15</text:p>
          </table:table-cell>
          <table:table-cell office:value-type="float" office:value="468.8343" table:style-name="c10">
            <text:p>468.83</text:p>
          </table:table-cell>
          <table:table-cell office:value-type="string" table:style-name="c10">
            <text:p>2026-03-21 08:15</text:p>
          </table:table-cell>
          <table:table-cell office:value-type="float" office:value="469.3652000000001" table:style-name="c10">
            <text:p>469.37</text:p>
          </table:table-cell>
          <table:table-cell office:value-type="float" office:value="-0.08688806147501005" table:style-name="c11">
            <text:p>-0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04:15</text:p>
          </table:table-cell>
          <table:table-cell office:value-type="float" office:value="466.8333" table:style-name="c10">
            <text:p>466.83</text:p>
          </table:table-cell>
          <table:table-cell office:value-type="string" table:style-name="c10">
            <text:p>2026-03-23 04:15</text:p>
          </table:table-cell>
          <table:table-cell office:value-type="float" office:value="467.1663" table:style-name="c10">
            <text:p>467.17</text:p>
          </table:table-cell>
          <table:table-cell office:value-type="float" office:value="-0.12871091965804826" table:style-name="c11">
            <text:p>-0.1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15:45</text:p>
          </table:table-cell>
          <table:table-cell office:value-type="float" office:value="474.83729999999997" table:style-name="c10">
            <text:p>474.84</text:p>
          </table:table-cell>
          <table:table-cell office:value-type="string" table:style-name="c10">
            <text:p>2026-03-25 15:45</text:p>
          </table:table-cell>
          <table:table-cell office:value-type="float" office:value="475.762" table:style-name="c10">
            <text:p>475.76</text:p>
          </table:table-cell>
          <table:table-cell office:value-type="float" office:value="-0.005548898117291312" table:style-name="c11">
            <text:p>-0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6:45</text:p>
          </table:table-cell>
          <table:table-cell office:value-type="float" office:value="473.43659999999994" table:style-name="c10">
            <text:p>473.44</text:p>
          </table:table-cell>
          <table:table-cell office:value-type="string" table:style-name="c10">
            <text:p>2026-04-01 08:00</text:p>
          </table:table-cell>
          <table:table-cell office:value-type="float" office:value="460.26975000000004" table:style-name="c10">
            <text:p>460.27</text:p>
          </table:table-cell>
          <table:table-cell office:value-type="float" office:value="-2.9754626554537422" table:style-name="c11">
            <text:p>-3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2:45</text:p>
          </table:table-cell>
          <table:table-cell office:value-type="float" office:value="442.52115" table:style-name="c10">
            <text:p>442.52</text:p>
          </table:table-cell>
          <table:table-cell office:value-type="string" table:style-name="c10">
            <text:p>2026-04-08 22:45</text:p>
          </table:table-cell>
          <table:table-cell office:value-type="float" office:value="441.779" table:style-name="c10">
            <text:p>441.78</text:p>
          </table:table-cell>
          <table:table-cell office:value-type="float" office:value="-0.36727424689192434" table:style-name="c11">
            <text:p>-0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07:15</text:p>
          </table:table-cell>
          <table:table-cell office:value-type="float" office:value="445.52265" table:style-name="c10">
            <text:p>445.52</text:p>
          </table:table-cell>
          <table:table-cell office:value-type="string" table:style-name="c10">
            <text:p>2026-04-10 07:15</text:p>
          </table:table-cell>
          <table:table-cell office:value-type="float" office:value="438.98040000000003" table:style-name="c10">
            <text:p>438.98</text:p>
          </table:table-cell>
          <table:table-cell office:value-type="float" office:value="-1.6654084409849723" table:style-name="c11">
            <text:p>-1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1:30</text:p>
          </table:table-cell>
          <table:table-cell office:value-type="float" office:value="442.42109999999997" table:style-name="c10">
            <text:p>442.42</text:p>
          </table:table-cell>
          <table:table-cell office:value-type="string" table:style-name="c10">
            <text:p>2026-04-11 11:30</text:p>
          </table:table-cell>
          <table:table-cell office:value-type="float" office:value="439.08035" table:style-name="c10">
            <text:p>439.08</text:p>
          </table:table-cell>
          <table:table-cell office:value-type="float" office:value="-0.9534969330463494" table:style-name="c11">
            <text:p>-1.0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4:00</text:p>
          </table:table-cell>
          <table:table-cell office:value-type="float" office:value="443.2215" table:style-name="c10">
            <text:p>443.22</text:p>
          </table:table-cell>
          <table:table-cell office:value-type="string" table:style-name="c10">
            <text:p>2026-04-15 14:00</text:p>
          </table:table-cell>
          <table:table-cell office:value-type="float" office:value="433.28325" table:style-name="c10">
            <text:p>433.28</text:p>
          </table:table-cell>
          <table:table-cell office:value-type="float" office:value="-2.4376938430897277" table:style-name="c11">
            <text:p>-2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5:15</text:p>
          </table:table-cell>
          <table:table-cell office:value-type="float" office:value="436.61819999999994" table:style-name="c10">
            <text:p>436.62</text:p>
          </table:table-cell>
          <table:table-cell office:value-type="string" table:style-name="c10">
            <text:p>2026-04-16 15:15</text:p>
          </table:table-cell>
          <table:table-cell office:value-type="float" office:value="439.5801" table:style-name="c10">
            <text:p>439.58</text:p>
          </table:table-cell>
          <table:table-cell office:value-type="float" office:value="0.477116936513422" table:style-name="c12">
            <text:p>+0.5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441.92085" table:style-name="c10">
            <text:p>441.92</text:p>
          </table:table-cell>
          <table:table-cell office:value-type="string" table:style-name="c10">
            <text:p>2026-04-17 15:45</text:p>
          </table:table-cell>
          <table:table-cell office:value-type="float" office:value="457.87095000000005" table:style-name="c10">
            <text:p>457.87</text:p>
          </table:table-cell>
          <table:table-cell office:value-type="float" office:value="3.402151306269019" table:style-name="c12">
            <text:p>+3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452.6261999999999" table:style-name="c10">
            <text:p>452.63</text:p>
          </table:table-cell>
          <table:table-cell office:value-type="string" table:style-name="c10">
            <text:p>2026-04-23 02:30</text:p>
          </table:table-cell>
          <table:table-cell office:value-type="float" office:value="456.87145000000004" table:style-name="c10">
            <text:p>456.87</text:p>
          </table:table-cell>
          <table:table-cell office:value-type="float" office:value="0.7361403231739949" table:style-name="c12">
            <text:p>+0.7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15</text:p>
          </table:table-cell>
          <table:table-cell office:value-type="float" office:value="455.0274" table:style-name="c10">
            <text:p>455.03</text:p>
          </table:table-cell>
          <table:table-cell office:value-type="string" table:style-name="c10">
            <text:p>2026-04-29 20:00</text:p>
          </table:table-cell>
          <table:table-cell office:value-type="float" office:value="445.1773" table:style-name="c10">
            <text:p>445.18</text:p>
          </table:table-cell>
          <table:table-cell office:value-type="float" office:value="-2.36029949464579" table:style-name="c11">
            <text:p>-2.4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8:30</text:p>
          </table:table-cell>
          <table:table-cell office:value-type="float" office:value="451.92584999999997" table:style-name="c10">
            <text:p>451.93</text:p>
          </table:table-cell>
          <table:table-cell office:value-type="string" table:style-name="c10">
            <text:p>2026-05-06 08:30</text:p>
          </table:table-cell>
          <table:table-cell office:value-type="float" office:value="470.26475000000005" table:style-name="c10">
            <text:p>470.26</text:p>
          </table:table-cell>
          <table:table-cell office:value-type="float" office:value="3.8499326304857417" table:style-name="c12">
            <text:p>+3.8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8:00</text:p>
          </table:table-cell>
          <table:table-cell office:value-type="float" office:value="460.93035" table:style-name="c10">
            <text:p>460.93</text:p>
          </table:table-cell>
          <table:table-cell office:value-type="string" table:style-name="c10">
            <text:p>2026-05-11 14:00</text:p>
          </table:table-cell>
          <table:table-cell office:value-type="float" office:value="450.1748" table:style-name="c10">
            <text:p>450.17</text:p>
          </table:table-cell>
          <table:table-cell office:value-type="float" office:value="-2.5286790998249375" table:style-name="c11">
            <text:p>-2.5</text:p>
          </table:table-cell>
        </table:table-row>
        <table:table-row>
          <table:table-cell office:value-type="string" table:style-name="c9">
            <text:p>BC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3:15</text:p>
          </table:table-cell>
          <table:table-cell office:value-type="float" office:value="378.88935" table:style-name="c10">
            <text:p>378.89</text:p>
          </table:table-cell>
          <table:table-cell office:value-type="string" table:style-name="c10">
            <text:p>2026-05-22 13:15</text:p>
          </table:table-cell>
          <table:table-cell office:value-type="float" office:value="380.30975" table:style-name="c10">
            <text:p>380.31</text:p>
          </table:table-cell>
          <table:table-cell office:value-type="float" office:value="0.17423577879662755" table:style-name="c12">
            <text:p>+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3:00</text:p>
          </table:table-cell>
          <table:table-cell office:value-type="float" office:value="644.432055" table:style-name="c1">
            <text:p>644.43</text:p>
          </table:table-cell>
          <table:table-cell office:value-type="string" table:style-name="c1">
            <text:p>2026-03-11 03:00</text:p>
          </table:table-cell>
          <table:table-cell office:value-type="float" office:value="640.69949" table:style-name="c1">
            <text:p>640.7</text:p>
          </table:table-cell>
          <table:table-cell office:value-type="float" office:value="-0.7779444305435756" table:style-name="c14">
            <text:p>-0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649.08438" table:style-name="c1">
            <text:p>649.08</text:p>
          </table:table-cell>
          <table:table-cell office:value-type="string" table:style-name="c1">
            <text:p>2026-03-12 13:45</text:p>
          </table:table-cell>
          <table:table-cell office:value-type="float" office:value="652.6335200000001" table:style-name="c1">
            <text:p>652.63</text:p>
          </table:table-cell>
          <table:table-cell office:value-type="float" office:value="0.34579873783437964" table:style-name="c13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8:45</text:p>
          </table:table-cell>
          <table:table-cell office:value-type="float" office:value="667.7136899999999" table:style-name="c1">
            <text:p>667.71</text:p>
          </table:table-cell>
          <table:table-cell office:value-type="string" table:style-name="c1">
            <text:p>2026-03-14 08:45</text:p>
          </table:table-cell>
          <table:table-cell office:value-type="float" office:value="651.544065" table:style-name="c1">
            <text:p>651.54</text:p>
          </table:table-cell>
          <table:table-cell office:value-type="float" office:value="-2.616699619553231" table:style-name="c14">
            <text:p>-2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8:00</text:p>
          </table:table-cell>
          <table:table-cell office:value-type="float" office:value="662.280975" table:style-name="c1">
            <text:p>662.28</text:p>
          </table:table-cell>
          <table:table-cell office:value-type="string" table:style-name="c1">
            <text:p>2026-03-16 18:00</text:p>
          </table:table-cell>
          <table:table-cell office:value-type="float" office:value="678.0308150000001" table:style-name="c1">
            <text:p>678.03</text:p>
          </table:table-cell>
          <table:table-cell office:value-type="float" office:value="2.1734666922622825" table:style-name="c13">
            <text:p>+2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45</text:p>
          </table:table-cell>
          <table:table-cell office:value-type="float" office:value="635.59764" table:style-name="c1">
            <text:p>635.6</text:p>
          </table:table-cell>
          <table:table-cell office:value-type="string" table:style-name="c1">
            <text:p>2026-03-24 18:00</text:p>
          </table:table-cell>
          <table:table-cell office:value-type="float" office:value="628.5255800000001" table:style-name="c1">
            <text:p>628.53</text:p>
          </table:table-cell>
          <table:table-cell office:value-type="float" office:value="-1.3103388229100066" table:style-name="c14">
            <text:p>-1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2:00</text:p>
          </table:table-cell>
          <table:table-cell office:value-type="float" office:value="616.938315" table:style-name="c1">
            <text:p>616.94</text:p>
          </table:table-cell>
          <table:table-cell office:value-type="string" table:style-name="c1">
            <text:p>2026-03-31 08:00</text:p>
          </table:table-cell>
          <table:table-cell office:value-type="float" office:value="610.7144900000001" table:style-name="c1">
            <text:p>610.71</text:p>
          </table:table-cell>
          <table:table-cell office:value-type="float" office:value="-1.2067078805941711" table:style-name="c14">
            <text:p>-1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45</text:p>
          </table:table-cell>
          <table:table-cell office:value-type="float" office:value="622.000845" table:style-name="c1">
            <text:p>622</text:p>
          </table:table-cell>
          <table:table-cell office:value-type="string" table:style-name="c1">
            <text:p>2026-04-02 02:00</text:p>
          </table:table-cell>
          <table:table-cell office:value-type="float" office:value="603.827935" table:style-name="c1">
            <text:p>603.83</text:p>
          </table:table-cell>
          <table:table-cell office:value-type="float" office:value="-3.1157452916426465" table:style-name="c14">
            <text:p>-3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15:30</text:p>
          </table:table-cell>
          <table:table-cell office:value-type="float" office:value="594.51711" table:style-name="c1">
            <text:p>594.52</text:p>
          </table:table-cell>
          <table:table-cell office:value-type="string" table:style-name="c1">
            <text:p>2026-04-06 15:30</text:p>
          </table:table-cell>
          <table:table-cell office:value-type="float" office:value="607.1962500000001" table:style-name="c1">
            <text:p>607.2</text:p>
          </table:table-cell>
          <table:table-cell office:value-type="float" office:value="1.928515513413931" table:style-name="c13">
            <text:p>+1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16:30</text:p>
          </table:table-cell>
          <table:table-cell office:value-type="float" office:value="600.62016" table:style-name="c1">
            <text:p>600.62</text:p>
          </table:table-cell>
          <table:table-cell office:value-type="string" table:style-name="c1">
            <text:p>2026-04-08 16:30</text:p>
          </table:table-cell>
          <table:table-cell office:value-type="float" office:value="606.23673" table:style-name="c1">
            <text:p>606.24</text:p>
          </table:table-cell>
          <table:table-cell office:value-type="float" office:value="0.7333591294587771" table:style-name="c13">
            <text:p>+0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610.775235" table:style-name="c1">
            <text:p>610.78</text:p>
          </table:table-cell>
          <table:table-cell office:value-type="string" table:style-name="c1">
            <text:p>2026-04-12 05:00</text:p>
          </table:table-cell>
          <table:table-cell office:value-type="float" office:value="594.492605" table:style-name="c1">
            <text:p>594.49</text:p>
          </table:table-cell>
          <table:table-cell office:value-type="float" office:value="-2.8604664557813853" table:style-name="c14">
            <text:p>-2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612.38604" table:style-name="c1">
            <text:p>612.39</text:p>
          </table:table-cell>
          <table:table-cell office:value-type="string" table:style-name="c1">
            <text:p>2026-04-14 22:15</text:p>
          </table:table-cell>
          <table:table-cell office:value-type="float" office:value="616.081805" table:style-name="c1">
            <text:p>616.08</text:p>
          </table:table-cell>
          <table:table-cell office:value-type="float" office:value="0.40239608855308084" table:style-name="c13">
            <text:p>+0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626.93331" table:style-name="c1">
            <text:p>626.93</text:p>
          </table:table-cell>
          <table:table-cell office:value-type="string" table:style-name="c1">
            <text:p>2026-04-16 19:45</text:p>
          </table:table-cell>
          <table:table-cell office:value-type="float" office:value="635.92188" table:style-name="c1">
            <text:p>635.92</text:p>
          </table:table-cell>
          <table:table-cell office:value-type="float" office:value="1.23097019073366" table:style-name="c13">
            <text:p>+1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15</text:p>
          </table:table-cell>
          <table:table-cell office:value-type="float" office:value="640.1098949999999" table:style-name="c1">
            <text:p>640.11</text:p>
          </table:table-cell>
          <table:table-cell office:value-type="string" table:style-name="c1">
            <text:p>2026-04-18 13:15</text:p>
          </table:table-cell>
          <table:table-cell office:value-type="float" office:value="633.3931450000001" table:style-name="c1">
            <text:p>633.39</text:p>
          </table:table-cell>
          <table:table-cell office:value-type="float" office:value="-1.2471144344448626" table:style-name="c14">
            <text:p>-1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638.028855" table:style-name="c1">
            <text:p>638.03</text:p>
          </table:table-cell>
          <table:table-cell office:value-type="string" table:style-name="c1">
            <text:p>2026-04-23 02:30</text:p>
          </table:table-cell>
          <table:table-cell office:value-type="float" office:value="635.94187" table:style-name="c1">
            <text:p>635.94</text:p>
          </table:table-cell>
          <table:table-cell office:value-type="float" office:value="-0.526344971988757" table:style-name="c14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45</text:p>
          </table:table-cell>
          <table:table-cell office:value-type="float" office:value="638.509095" table:style-name="c1">
            <text:p>638.51</text:p>
          </table:table-cell>
          <table:table-cell office:value-type="string" table:style-name="c1">
            <text:p>2026-04-24 20:45</text:p>
          </table:table-cell>
          <table:table-cell office:value-type="float" office:value="637.56106" table:style-name="c1">
            <text:p>637.56</text:p>
          </table:table-cell>
          <table:table-cell office:value-type="float" office:value="-0.3480795459836039" table:style-name="c14">
            <text:p>-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623.8317599999999" table:style-name="c1">
            <text:p>623.83</text:p>
          </table:table-cell>
          <table:table-cell office:value-type="string" table:style-name="c1">
            <text:p>2026-05-05 02:15</text:p>
          </table:table-cell>
          <table:table-cell office:value-type="float" office:value="625.14727" table:style-name="c1">
            <text:p>625.15</text:p>
          </table:table-cell>
          <table:table-cell office:value-type="float" office:value="0.010554224951642155" table:style-name="c13">
            <text:p>+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633.3565199999999" table:style-name="c1">
            <text:p>633.36</text:p>
          </table:table-cell>
          <table:table-cell office:value-type="string" table:style-name="c1">
            <text:p>2026-05-06 13:15</text:p>
          </table:table-cell>
          <table:table-cell office:value-type="float" office:value="653.2931900000001" table:style-name="c1">
            <text:p>653.29</text:p>
          </table:table-cell>
          <table:table-cell office:value-type="float" office:value="2.9415876090120863" table:style-name="c13">
            <text:p>+2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45</text:p>
          </table:table-cell>
          <table:table-cell office:value-type="float" office:value="655.817745" table:style-name="c1">
            <text:p>655.82</text:p>
          </table:table-cell>
          <table:table-cell office:value-type="string" table:style-name="c1">
            <text:p>2026-05-10 01:45</text:p>
          </table:table-cell>
          <table:table-cell office:value-type="float" office:value="645.127275" table:style-name="c1">
            <text:p>645.13</text:p>
          </table:table-cell>
          <table:table-cell office:value-type="float" office:value="-1.8267391381312725" table:style-name="c14">
            <text:p>-1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30</text:p>
          </table:table-cell>
          <table:table-cell office:value-type="float" office:value="665.3325" table:style-name="c1">
            <text:p>665.33</text:p>
          </table:table-cell>
          <table:table-cell office:value-type="string" table:style-name="c1">
            <text:p>2026-05-11 22:30</text:p>
          </table:table-cell>
          <table:table-cell office:value-type="float" office:value="663.318175" table:style-name="c1">
            <text:p>663.32</text:p>
          </table:table-cell>
          <table:table-cell office:value-type="float" office:value="-0.5020494311979262" table:style-name="c14">
            <text:p>-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23:00</text:p>
          </table:table-cell>
          <table:table-cell office:value-type="float" office:value="670.405035" table:style-name="c1">
            <text:p>670.41</text:p>
          </table:table-cell>
          <table:table-cell office:value-type="string" table:style-name="c1">
            <text:p>2026-05-12 23:00</text:p>
          </table:table-cell>
          <table:table-cell office:value-type="float" office:value="665.936865" table:style-name="c1">
            <text:p>665.94</text:p>
          </table:table-cell>
          <table:table-cell office:value-type="float" office:value="-0.8650558230271943" table:style-name="c14">
            <text:p>-0.9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674.87727" table:style-name="c1">
            <text:p>674.88</text:p>
          </table:table-cell>
          <table:table-cell office:value-type="string" table:style-name="c1">
            <text:p>2026-05-14 01:15</text:p>
          </table:table-cell>
          <table:table-cell office:value-type="float" office:value="674.692485" table:style-name="c1">
            <text:p>674.69</text:p>
          </table:table-cell>
          <table:table-cell office:value-type="float" office:value="-0.22722580025771322" table:style-name="c14">
            <text:p>-0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7:15</text:p>
          </table:table-cell>
          <table:table-cell office:value-type="float" office:value="684.28197" table:style-name="c1">
            <text:p>684.28</text:p>
          </table:table-cell>
          <table:table-cell office:value-type="string" table:style-name="c1">
            <text:p>2026-05-15 17:15</text:p>
          </table:table-cell>
          <table:table-cell office:value-type="float" office:value="674.74246" table:style-name="c1">
            <text:p>674.74</text:p>
          </table:table-cell>
          <table:table-cell office:value-type="float" office:value="-1.5912037222813091" table:style-name="c14">
            <text:p>-1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15</text:p>
          </table:table-cell>
          <table:table-cell office:value-type="float" office:value="654.34701" table:style-name="c1">
            <text:p>654.35</text:p>
          </table:table-cell>
          <table:table-cell office:value-type="string" table:style-name="c1">
            <text:p>2026-05-22 01:15</text:p>
          </table:table-cell>
          <table:table-cell office:value-type="float" office:value="657.661005" table:style-name="c1">
            <text:p>657.66</text:p>
          </table:table-cell>
          <table:table-cell office:value-type="float" office:value="0.3055459290637108" table:style-name="c13">
            <text:p>+0.3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15</text:p>
          </table:table-cell>
          <table:table-cell office:value-type="float" office:value="659.8797749999999" table:style-name="c1">
            <text:p>659.88</text:p>
          </table:table-cell>
          <table:table-cell office:value-type="string" table:style-name="c1">
            <text:p>2026-05-23 08:00</text:p>
          </table:table-cell>
          <table:table-cell office:value-type="float" office:value="636.4416200000001" table:style-name="c1">
            <text:p>636.44</text:p>
          </table:table-cell>
          <table:table-cell office:value-type="float" office:value="-3.7446824004236046" table:style-name="c14">
            <text:p>-3.7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23:45</text:p>
          </table:table-cell>
          <table:table-cell office:value-type="float" office:value="657.78873" table:style-name="c1">
            <text:p>657.79</text:p>
          </table:table-cell>
          <table:table-cell office:value-type="string" table:style-name="c1">
            <text:p>2026-05-25 23:45</text:p>
          </table:table-cell>
          <table:table-cell office:value-type="float" office:value="662.158755" table:style-name="c1">
            <text:p>662.16</text:p>
          </table:table-cell>
          <table:table-cell office:value-type="float" office:value="0.46312280977434117" table:style-name="c13">
            <text:p>+0.5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0:30</text:p>
          </table:table-cell>
          <table:table-cell office:value-type="float" office:value="662.25096" table:style-name="c1">
            <text:p>662.25</text:p>
          </table:table-cell>
          <table:table-cell office:value-type="string" table:style-name="c1">
            <text:p>2026-05-27 04:00</text:p>
          </table:table-cell>
          <table:table-cell office:value-type="float" office:value="654.062805" table:style-name="c1">
            <text:p>654.06</text:p>
          </table:table-cell>
          <table:table-cell office:value-type="float" office:value="-1.4338411147331365" table:style-name="c14">
            <text:p>-1.4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00</text:p>
          </table:table-cell>
          <table:table-cell office:value-type="float" office:value="653.5766249999999" table:style-name="c1">
            <text:p>653.58</text:p>
          </table:table-cell>
          <table:table-cell office:value-type="string" table:style-name="c1">
            <text:p>2026-05-31 02:00</text:p>
          </table:table-cell>
          <table:table-cell office:value-type="float" office:value="727.77593" table:style-name="c1">
            <text:p>727.78</text:p>
          </table:table-cell>
          <table:table-cell office:value-type="float" office:value="11.130214596632815" table:style-name="c13">
            <text:p>+11.1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2:15</text:p>
          </table:table-cell>
          <table:table-cell office:value-type="float" office:value="733.2964649999999" table:style-name="c1">
            <text:p>733.3</text:p>
          </table:table-cell>
          <table:table-cell office:value-type="string" table:style-name="c1">
            <text:p>2026-06-01 02:15</text:p>
          </table:table-cell>
          <table:table-cell office:value-type="float" office:value="701.159245" table:style-name="c1">
            <text:p>701.16</text:p>
          </table:table-cell>
          <table:table-cell office:value-type="float" office:value="-4.573707760987899" table:style-name="c14">
            <text:p>-4.6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9:45</text:p>
          </table:table-cell>
          <table:table-cell office:value-type="float" office:value="717.9187799999999" table:style-name="c1">
            <text:p>717.92</text:p>
          </table:table-cell>
          <table:table-cell office:value-type="string" table:style-name="c1">
            <text:p>2026-06-01 16:00</text:p>
          </table:table-cell>
          <table:table-cell office:value-type="float" office:value="677.251205" table:style-name="c1">
            <text:p>677.25</text:p>
          </table:table-cell>
          <table:table-cell office:value-type="float" office:value="-5.853224811697344" table:style-name="c14">
            <text:p>-5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71091.96822" table:style-name="c10">
            <text:p>71092</text:p>
          </table:table-cell>
          <table:table-cell office:value-type="string" table:style-name="c10">
            <text:p>2026-03-06 16:00</text:p>
          </table:table-cell>
          <table:table-cell office:value-type="float" office:value="68470.45764500002" table:style-name="c10">
            <text:p>68470</text:p>
          </table:table-cell>
          <table:table-cell office:value-type="float" office:value="-3.880020611183932" table:style-name="c11">
            <text:p>-3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9:30</text:p>
          </table:table-cell>
          <table:table-cell office:value-type="float" office:value="69398.14173" table:style-name="c10">
            <text:p>69398</text:p>
          </table:table-cell>
          <table:table-cell office:value-type="string" table:style-name="c10">
            <text:p>2026-03-10 19:30</text:p>
          </table:table-cell>
          <table:table-cell office:value-type="float" office:value="69938.93304" table:style-name="c10">
            <text:p>69939</text:p>
          </table:table-cell>
          <table:table-cell office:value-type="float" office:value="0.5778013255932857" table:style-name="c12">
            <text:p>+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3:45</text:p>
          </table:table-cell>
          <table:table-cell office:value-type="float" office:value="70477.231005" table:style-name="c10">
            <text:p>70477</text:p>
          </table:table-cell>
          <table:table-cell office:value-type="string" table:style-name="c10">
            <text:p>2026-03-12 13:45</text:p>
          </table:table-cell>
          <table:table-cell office:value-type="float" office:value="70044.30033" table:style-name="c10">
            <text:p>70044</text:p>
          </table:table-cell>
          <table:table-cell office:value-type="float" office:value="-0.8129565012550355" table:style-name="c11">
            <text:p>-0.8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30</text:p>
          </table:table-cell>
          <table:table-cell office:value-type="float" office:value="71518.27126499999" table:style-name="c10">
            <text:p>71518</text:p>
          </table:table-cell>
          <table:table-cell office:value-type="string" table:style-name="c10">
            <text:p>2026-03-14 00:30</text:p>
          </table:table-cell>
          <table:table-cell office:value-type="float" office:value="70881.31161500001" table:style-name="c10">
            <text:p>70881</text:p>
          </table:table-cell>
          <table:table-cell office:value-type="float" office:value="-1.0887447055776711" table:style-name="c11">
            <text:p>-1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2:30</text:p>
          </table:table-cell>
          <table:table-cell office:value-type="float" office:value="71303.92414499998" table:style-name="c10">
            <text:p>71304</text:p>
          </table:table-cell>
          <table:table-cell office:value-type="string" table:style-name="c10">
            <text:p>2026-03-16 02:30</text:p>
          </table:table-cell>
          <table:table-cell office:value-type="float" office:value="72415.204285" table:style-name="c10">
            <text:p>72415</text:p>
          </table:table-cell>
          <table:table-cell office:value-type="float" office:value="1.3554964305594552" table:style-name="c12">
            <text:p>+1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73806.885" table:style-name="c10">
            <text:p>73807</text:p>
          </table:table-cell>
          <table:table-cell office:value-type="string" table:style-name="c10">
            <text:p>2026-03-17 03:45</text:p>
          </table:table-cell>
          <table:table-cell office:value-type="float" office:value="74385.64857" table:style-name="c10">
            <text:p>74386</text:p>
          </table:table-cell>
          <table:table-cell office:value-type="float" office:value="0.5826917888603234" table:style-name="c12">
            <text:p>+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1:00</text:p>
          </table:table-cell>
          <table:table-cell office:value-type="float" office:value="70128.236595" table:style-name="c10">
            <text:p>70128</text:p>
          </table:table-cell>
          <table:table-cell office:value-type="string" table:style-name="c10">
            <text:p>2026-03-25 21:00</text:p>
          </table:table-cell>
          <table:table-cell office:value-type="float" office:value="70973.99525" table:style-name="c10">
            <text:p>70974</text:p>
          </table:table-cell>
          <table:table-cell office:value-type="float" office:value="1.003706456445319" table:style-name="c12">
            <text:p>+1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15</text:p>
          </table:table-cell>
          <table:table-cell office:value-type="float" office:value="67927.86696" table:style-name="c10">
            <text:p>67928</text:p>
          </table:table-cell>
          <table:table-cell office:value-type="string" table:style-name="c10">
            <text:p>2026-03-31 08:15</text:p>
          </table:table-cell>
          <table:table-cell office:value-type="float" office:value="67317.694315" table:style-name="c10">
            <text:p>67318</text:p>
          </table:table-cell>
          <table:table-cell office:value-type="float" office:value="-1.0963699425071471" table:style-name="c11">
            <text:p>-1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4:00</text:p>
          </table:table-cell>
          <table:table-cell office:value-type="float" office:value="67335.93114" table:style-name="c10">
            <text:p>67336</text:p>
          </table:table-cell>
          <table:table-cell office:value-type="string" table:style-name="c10">
            <text:p>2026-04-01 14:00</text:p>
          </table:table-cell>
          <table:table-cell office:value-type="float" office:value="68082.00197" table:style-name="c10">
            <text:p>68082</text:p>
          </table:table-cell>
          <table:table-cell office:value-type="float" office:value="0.9058683792368516" table:style-name="c12">
            <text:p>+0.9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15:30</text:p>
          </table:table-cell>
          <table:table-cell office:value-type="float" office:value="67533.75" table:style-name="c10">
            <text:p>67534</text:p>
          </table:table-cell>
          <table:table-cell office:value-type="string" table:style-name="c10">
            <text:p>2026-04-06 15:30</text:p>
          </table:table-cell>
          <table:table-cell office:value-type="float" office:value="69708.038545" table:style-name="c10">
            <text:p>69708</text:p>
          </table:table-cell>
          <table:table-cell office:value-type="float" office:value="3.013222538284266" table:style-name="c12">
            <text:p>+3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17:45</text:p>
          </table:table-cell>
          <table:table-cell office:value-type="float" office:value="68728.517085" table:style-name="c10">
            <text:p>68729</text:p>
          </table:table-cell>
          <table:table-cell office:value-type="string" table:style-name="c10">
            <text:p>2026-04-08 17:45</text:p>
          </table:table-cell>
          <table:table-cell office:value-type="float" office:value="71813.05551" table:style-name="c10">
            <text:p>71813</text:p>
          </table:table-cell>
          <table:table-cell office:value-type="float" office:value="4.279132231819083" table:style-name="c12">
            <text:p>+4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72111.77787" table:style-name="c10">
            <text:p>72112</text:p>
          </table:table-cell>
          <table:table-cell office:value-type="string" table:style-name="c10">
            <text:p>2026-04-10 15:45</text:p>
          </table:table-cell>
          <table:table-cell office:value-type="float" office:value="72709.4271" table:style-name="c10">
            <text:p>72709</text:p>
          </table:table-cell>
          <table:table-cell office:value-type="float" office:value="0.6272249812540931" table:style-name="c12">
            <text:p>+0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6:15</text:p>
          </table:table-cell>
          <table:table-cell office:value-type="float" office:value="72908.97626999998" table:style-name="c10">
            <text:p>72909</text:p>
          </table:table-cell>
          <table:table-cell office:value-type="string" table:style-name="c10">
            <text:p>2026-04-12 09:00</text:p>
          </table:table-cell>
          <table:table-cell office:value-type="float" office:value="71593.39539500001" table:style-name="c10">
            <text:p>71593</text:p>
          </table:table-cell>
          <table:table-cell office:value-type="float" office:value="-2.0007084820292453" table:style-name="c11">
            <text:p>-2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19:45</text:p>
          </table:table-cell>
          <table:table-cell office:value-type="float" office:value="73052.257875" table:style-name="c10">
            <text:p>73052</text:p>
          </table:table-cell>
          <table:table-cell office:value-type="string" table:style-name="c10">
            <text:p>2026-04-14 19:45</text:p>
          </table:table-cell>
          <table:table-cell office:value-type="float" office:value="74082.130405" table:style-name="c10">
            <text:p>74082</text:p>
          </table:table-cell>
          <table:table-cell office:value-type="float" office:value="1.20705694385137" table:style-name="c12">
            <text:p>+1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0:30</text:p>
          </table:table-cell>
          <table:table-cell office:value-type="float" office:value="74622.24247499999" table:style-name="c10">
            <text:p>74622</text:p>
          </table:table-cell>
          <table:table-cell office:value-type="string" table:style-name="c10">
            <text:p>2026-04-16 00:30</text:p>
          </table:table-cell>
          <table:table-cell office:value-type="float" office:value="74558.292205" table:style-name="c10">
            <text:p>74558</text:p>
          </table:table-cell>
          <table:table-cell office:value-type="float" office:value="-0.285427359261059" table:style-name="c11">
            <text:p>-0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75235.52896499999" table:style-name="c10">
            <text:p>75236</text:p>
          </table:table-cell>
          <table:table-cell office:value-type="string" table:style-name="c10">
            <text:p>2026-04-17 02:45</text:p>
          </table:table-cell>
          <table:table-cell office:value-type="float" office:value="74623.37964500001" table:style-name="c10">
            <text:p>74623</text:p>
          </table:table-cell>
          <table:table-cell office:value-type="float" office:value="-1.0119174629110494" table:style-name="c11">
            <text:p>-1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45</text:p>
          </table:table-cell>
          <table:table-cell office:value-type="float" office:value="75376.999665" table:style-name="c10">
            <text:p>75377</text:p>
          </table:table-cell>
          <table:table-cell office:value-type="string" table:style-name="c10">
            <text:p>2026-04-18 08:45</text:p>
          </table:table-cell>
          <table:table-cell office:value-type="float" office:value="76514.253735" table:style-name="c10">
            <text:p>76514</text:p>
          </table:table-cell>
          <table:table-cell office:value-type="float" office:value="1.3058387587172593" table:style-name="c12">
            <text:p>+1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77278.18978500001" table:style-name="c10">
            <text:p>77278</text:p>
          </table:table-cell>
          <table:table-cell office:value-type="string" table:style-name="c10">
            <text:p>2026-04-23 02:30</text:p>
          </table:table-cell>
          <table:table-cell office:value-type="float" office:value="77996.972005" table:style-name="c10">
            <text:p>77997</text:p>
          </table:table-cell>
          <table:table-cell office:value-type="float" office:value="0.7283636877726707" table:style-name="c12">
            <text:p>+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5:00</text:p>
          </table:table-cell>
          <table:table-cell office:value-type="float" office:value="78219.87039" table:style-name="c10">
            <text:p>78220</text:p>
          </table:table-cell>
          <table:table-cell office:value-type="string" table:style-name="c10">
            <text:p>2026-04-24 15:00</text:p>
          </table:table-cell>
          <table:table-cell office:value-type="float" office:value="77998.631175" table:style-name="c10">
            <text:p>77999</text:p>
          </table:table-cell>
          <table:table-cell office:value-type="float" office:value="-0.48217732506884436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4:30</text:p>
          </table:table-cell>
          <table:table-cell office:value-type="float" office:value="78105.002985" table:style-name="c10">
            <text:p>78105</text:p>
          </table:table-cell>
          <table:table-cell office:value-type="string" table:style-name="c10">
            <text:p>2026-04-27 14:30</text:p>
          </table:table-cell>
          <table:table-cell office:value-type="float" office:value="77842.289385" table:style-name="c10">
            <text:p>77842</text:p>
          </table:table-cell>
          <table:table-cell office:value-type="float" office:value="-0.5355871205343199" table:style-name="c11">
            <text:p>-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14:45</text:p>
          </table:table-cell>
          <table:table-cell office:value-type="float" office:value="78217.46919" table:style-name="c10">
            <text:p>78217</text:p>
          </table:table-cell>
          <table:table-cell office:value-type="string" table:style-name="c10">
            <text:p>2026-04-27 17:00</text:p>
          </table:table-cell>
          <table:table-cell office:value-type="float" office:value="76580.280705" table:style-name="c10">
            <text:p>76580</text:p>
          </table:table-cell>
          <table:table-cell office:value-type="float" office:value="-2.2888396731176597" table:style-name="c11">
            <text:p>-2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03:45</text:p>
          </table:table-cell>
          <table:table-cell office:value-type="float" office:value="77196.97919999999" table:style-name="c10">
            <text:p>77197</text:p>
          </table:table-cell>
          <table:table-cell office:value-type="string" table:style-name="c10">
            <text:p>2026-05-02 03:45</text:p>
          </table:table-cell>
          <table:table-cell office:value-type="float" office:value="78359.96042" table:style-name="c10">
            <text:p>78360</text:p>
          </table:table-cell>
          <table:table-cell office:value-type="float" office:value="1.3035997904959906" table:style-name="c12">
            <text:p>+1.3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78846.073335" table:style-name="c10">
            <text:p>78846</text:p>
          </table:table-cell>
          <table:table-cell office:value-type="string" table:style-name="c10">
            <text:p>2026-05-03 21:45</text:p>
          </table:table-cell>
          <table:table-cell office:value-type="float" office:value="78660.65000000001" table:style-name="c10">
            <text:p>78661</text:p>
          </table:table-cell>
          <table:table-cell office:value-type="float" office:value="-0.43460119173477363" table:style-name="c11">
            <text:p>-0.4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79298.979675" table:style-name="c10">
            <text:p>79299</text:p>
          </table:table-cell>
          <table:table-cell office:value-type="string" table:style-name="c10">
            <text:p>2026-05-04 22:15</text:p>
          </table:table-cell>
          <table:table-cell office:value-type="float" office:value="80319.46018000001" table:style-name="c10">
            <text:p>80319</text:p>
          </table:table-cell>
          <table:table-cell office:value-type="float" office:value="1.0844047522736266" table:style-name="c12">
            <text:p>+1.1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3:45</text:p>
          </table:table-cell>
          <table:table-cell office:value-type="float" office:value="80950.99526999998" table:style-name="c10">
            <text:p>80951</text:p>
          </table:table-cell>
          <table:table-cell office:value-type="string" table:style-name="c10">
            <text:p>2026-05-06 03:45</text:p>
          </table:table-cell>
          <table:table-cell office:value-type="float" office:value="81502.80821" table:style-name="c10">
            <text:p>81503</text:p>
          </table:table-cell>
          <table:table-cell office:value-type="float" office:value="0.48040030278955204" table:style-name="c12">
            <text:p>+0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1:30</text:p>
          </table:table-cell>
          <table:table-cell office:value-type="float" office:value="82725.34199999999" table:style-name="c10">
            <text:p>82725</text:p>
          </table:table-cell>
          <table:table-cell office:value-type="string" table:style-name="c10">
            <text:p>2026-05-07 11:30</text:p>
          </table:table-cell>
          <table:table-cell office:value-type="float" office:value="80856.43156000001" table:style-name="c10">
            <text:p>80856</text:p>
          </table:table-cell>
          <table:table-cell office:value-type="float" office:value="-2.4545591442685533" table:style-name="c11">
            <text:p>-2.5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2:30</text:p>
          </table:table-cell>
          <table:table-cell office:value-type="float" office:value="81544.461855" table:style-name="c10">
            <text:p>81544</text:p>
          </table:table-cell>
          <table:table-cell office:value-type="string" table:style-name="c10">
            <text:p>2026-05-11 22:30</text:p>
          </table:table-cell>
          <table:table-cell office:value-type="float" office:value="81689.12500500001" table:style-name="c10">
            <text:p>81689</text:p>
          </table:table-cell>
          <table:table-cell office:value-type="float" office:value="-0.022850614819336368" table:style-name="c11">
            <text:p>-0.0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5:30</text:p>
          </table:table-cell>
          <table:table-cell office:value-type="float" office:value="77592.246735" table:style-name="c10">
            <text:p>77592</text:p>
          </table:table-cell>
          <table:table-cell office:value-type="string" table:style-name="c10">
            <text:p>2026-05-21 15:30</text:p>
          </table:table-cell>
          <table:table-cell office:value-type="float" office:value="77233.35400500002" table:style-name="c10">
            <text:p>77233</text:p>
          </table:table-cell>
          <table:table-cell office:value-type="float" office:value="-0.6615122338304968" table:style-name="c11">
            <text:p>-0.7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78019.53026999999" table:style-name="c10">
            <text:p>78020</text:p>
          </table:table-cell>
          <table:table-cell office:value-type="string" table:style-name="c10">
            <text:p>2026-05-22 17:00</text:p>
          </table:table-cell>
          <table:table-cell office:value-type="float" office:value="76912.194665" table:style-name="c10">
            <text:p>76912</text:p>
          </table:table-cell>
          <table:table-cell office:value-type="float" office:value="-1.6163684628337616" table:style-name="c11">
            <text:p>-1.6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22:15</text:p>
          </table:table-cell>
          <table:table-cell office:value-type="float" office:value="77023.19235" table:style-name="c10">
            <text:p>77023</text:p>
          </table:table-cell>
          <table:table-cell office:value-type="string" table:style-name="c10">
            <text:p>2026-05-25 22:15</text:p>
          </table:table-cell>
          <table:table-cell office:value-type="float" office:value="77369.39595" table:style-name="c10">
            <text:p>77369</text:p>
          </table:table-cell>
          <table:table-cell office:value-type="float" office:value="0.24868117206253704" table:style-name="c12">
            <text:p>+0.2</text:p>
          </table:table-cell>
        </table:table-row>
        <table:table-row>
          <table:table-cell office:value-type="string" table:style-name="c9">
            <text:p>BTC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77268.35487" table:style-name="c10">
            <text:p>77268</text:p>
          </table:table-cell>
          <table:table-cell office:value-type="string" table:style-name="c10">
            <text:p>2026-05-26 19:00</text:p>
          </table:table-cell>
          <table:table-cell office:value-type="float" office:value="75802.629725" table:style-name="c10">
            <text:p>75803</text:p>
          </table:table-cell>
          <table:table-cell office:value-type="float" office:value="-2.0930361524342023" table:style-name="c11">
            <text:p>-2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0:45</text:p>
          </table:table-cell>
          <table:table-cell office:value-type="float" office:value="0.09740868" table:style-name="c1">
            <text:p>0.097409</text:p>
          </table:table-cell>
          <table:table-cell office:value-type="string" table:style-name="c1">
            <text:p>2026-03-06 10:45</text:p>
          </table:table-cell>
          <table:table-cell office:value-type="float" office:value="0.093703125" table:style-name="c1">
            <text:p>0.093703</text:p>
          </table:table-cell>
          <table:table-cell office:value-type="float" office:value="-3.996427779203049" table:style-name="c14">
            <text:p>-4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4:00</text:p>
          </table:table-cell>
          <table:table-cell office:value-type="float" office:value="0.09196596" table:style-name="c1">
            <text:p>0.091966</text:p>
          </table:table-cell>
          <table:table-cell office:value-type="string" table:style-name="c1">
            <text:p>2026-03-10 14:00</text:p>
          </table:table-cell>
          <table:table-cell office:value-type="float" office:value="0.09605195000000001" table:style-name="c1">
            <text:p>0.096052</text:p>
          </table:table-cell>
          <table:table-cell office:value-type="float" office:value="4.234155933293171" table:style-name="c13">
            <text:p>+4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0.097938945" table:style-name="c1">
            <text:p>0.097939</text:p>
          </table:table-cell>
          <table:table-cell office:value-type="string" table:style-name="c1">
            <text:p>2026-03-11 14:45</text:p>
          </table:table-cell>
          <table:table-cell office:value-type="float" office:value="0.09390302500000001" table:style-name="c1">
            <text:p>0.093903</text:p>
          </table:table-cell>
          <table:table-cell office:value-type="float" office:value="-4.312515462541466" table:style-name="c14">
            <text:p>-4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30</text:p>
          </table:table-cell>
          <table:table-cell office:value-type="float" office:value="0.093916935" table:style-name="c1">
            <text:p>0.093917</text:p>
          </table:table-cell>
          <table:table-cell office:value-type="string" table:style-name="c1">
            <text:p>2026-03-12 06:00</text:p>
          </table:table-cell>
          <table:table-cell office:value-type="float" office:value="0.09199398" table:style-name="c1">
            <text:p>0.091994</text:p>
          </table:table-cell>
          <table:table-cell office:value-type="float" office:value="-2.2433131639357673" table:style-name="c14">
            <text:p>-2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11:00</text:p>
          </table:table-cell>
          <table:table-cell office:value-type="float" office:value="0.09436715999999999" table:style-name="c1">
            <text:p>0.094367</text:p>
          </table:table-cell>
          <table:table-cell office:value-type="string" table:style-name="c1">
            <text:p>2026-03-13 11:00</text:p>
          </table:table-cell>
          <table:table-cell office:value-type="float" office:value="0.09895050000000001" table:style-name="c1">
            <text:p>0.098951</text:p>
          </table:table-cell>
          <table:table-cell office:value-type="float" office:value="4.6473136952516425" table:style-name="c13">
            <text:p>+4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2:00</text:p>
          </table:table-cell>
          <table:table-cell office:value-type="float" office:value="0.100080015" table:style-name="c1">
            <text:p>0.10008</text:p>
          </table:table-cell>
          <table:table-cell office:value-type="string" table:style-name="c1">
            <text:p>2026-03-14 12:00</text:p>
          </table:table-cell>
          <table:table-cell office:value-type="float" office:value="0.095222365" table:style-name="c1">
            <text:p>0.095222</text:p>
          </table:table-cell>
          <table:table-cell office:value-type="float" office:value="-5.043963580176314" table:style-name="c14">
            <text:p>-5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3-16 02:15</text:p>
          </table:table-cell>
          <table:table-cell office:value-type="float" office:value="0.097781085" table:style-name="c1">
            <text:p>0.097781</text:p>
          </table:table-cell>
          <table:table-cell office:value-type="float" office:value="1.2843740238759116" table:style-name="c13">
            <text:p>+1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09940968" table:style-name="c1">
            <text:p>0.09941</text:p>
          </table:table-cell>
          <table:table-cell office:value-type="string" table:style-name="c1">
            <text:p>2026-03-17 03:30</text:p>
          </table:table-cell>
          <table:table-cell office:value-type="float" office:value="0.10260867000000001" table:style-name="c1">
            <text:p>0.10261</text:p>
          </table:table-cell>
          <table:table-cell office:value-type="float" office:value="3.011653662570901" table:style-name="c13">
            <text:p>+3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9:45</text:p>
          </table:table-cell>
          <table:table-cell office:value-type="float" office:value="0.09532764" table:style-name="c1">
            <text:p>0.095328</text:p>
          </table:table-cell>
          <table:table-cell office:value-type="string" table:style-name="c1">
            <text:p>2026-03-25 09:45</text:p>
          </table:table-cell>
          <table:table-cell office:value-type="float" office:value="0.09663166000000001" table:style-name="c1">
            <text:p>0.096632</text:p>
          </table:table-cell>
          <table:table-cell office:value-type="float" office:value="1.1653003385586835" table:style-name="c13">
            <text:p>+1.2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11:30</text:p>
          </table:table-cell>
          <table:table-cell office:value-type="float" office:value="0.09306651" table:style-name="c1">
            <text:p>0.093067</text:p>
          </table:table-cell>
          <table:table-cell office:value-type="string" table:style-name="c1">
            <text:p>2026-03-31 10:00</text:p>
          </table:table-cell>
          <table:table-cell office:value-type="float" office:value="0.08967514" table:style-name="c1">
            <text:p>0.089675</text:p>
          </table:table-cell>
          <table:table-cell office:value-type="float" office:value="-3.836643927939276" table:style-name="c14">
            <text:p>-3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9308651999999999" table:style-name="c1">
            <text:p>0.093087</text:p>
          </table:table-cell>
          <table:table-cell office:value-type="string" table:style-name="c1">
            <text:p>2026-04-02 05:00</text:p>
          </table:table-cell>
          <table:table-cell office:value-type="float" office:value="0.08969513000000001" table:style-name="c1">
            <text:p>0.089695</text:p>
          </table:table-cell>
          <table:table-cell office:value-type="float" office:value="-3.835883611150115" table:style-name="c14">
            <text:p>-3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5:15</text:p>
          </table:table-cell>
          <table:table-cell office:value-type="float" office:value="0.09188592" table:style-name="c1">
            <text:p>0.091886</text:p>
          </table:table-cell>
          <table:table-cell office:value-type="string" table:style-name="c1">
            <text:p>2026-04-04 15:15</text:p>
          </table:table-cell>
          <table:table-cell office:value-type="float" office:value="0.09145425" table:style-name="c1">
            <text:p>0.091454</text:p>
          </table:table-cell>
          <table:table-cell office:value-type="float" office:value="-0.6687499518424511" table:style-name="c14">
            <text:p>-0.7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7:30</text:p>
          </table:table-cell>
          <table:table-cell office:value-type="float" office:value="0.09244619999999999" table:style-name="c1">
            <text:p>0.092446</text:p>
          </table:table-cell>
          <table:table-cell office:value-type="string" table:style-name="c1">
            <text:p>2026-04-05 09:00</text:p>
          </table:table-cell>
          <table:table-cell office:value-type="float" office:value="0.090204875" table:style-name="c1">
            <text:p>0.090205</text:p>
          </table:table-cell>
          <table:table-cell office:value-type="float" office:value="-2.619517670953475" table:style-name="c14">
            <text:p>-2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1:00</text:p>
          </table:table-cell>
          <table:table-cell office:value-type="float" office:value="0.09282639" table:style-name="c1">
            <text:p>0.092826</text:p>
          </table:table-cell>
          <table:table-cell office:value-type="string" table:style-name="c1">
            <text:p>2026-04-07 01:00</text:p>
          </table:table-cell>
          <table:table-cell office:value-type="float" office:value="0.09065465" table:style-name="c1">
            <text:p>0.090655</text:p>
          </table:table-cell>
          <table:table-cell office:value-type="float" office:value="-2.5347949493134347" table:style-name="c14">
            <text:p>-2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15</text:p>
          </table:table-cell>
          <table:table-cell office:value-type="float" office:value="0.093436695" table:style-name="c1">
            <text:p>0.093437</text:p>
          </table:table-cell>
          <table:table-cell office:value-type="string" table:style-name="c1">
            <text:p>2026-04-08 22:15</text:p>
          </table:table-cell>
          <table:table-cell office:value-type="float" office:value="0.09322336500000002" table:style-name="c1">
            <text:p>0.093223</text:p>
          </table:table-cell>
          <table:table-cell office:value-type="float" office:value="-0.4277586087938934" table:style-name="c14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30</text:p>
          </table:table-cell>
          <table:table-cell office:value-type="float" office:value="0.09388692" table:style-name="c1">
            <text:p>0.093887</text:p>
          </table:table-cell>
          <table:table-cell office:value-type="string" table:style-name="c1">
            <text:p>2026-04-11 14:30</text:p>
          </table:table-cell>
          <table:table-cell office:value-type="float" office:value="0.09263366" table:style-name="c1">
            <text:p>0.092634</text:p>
          </table:table-cell>
          <table:table-cell office:value-type="float" office:value="-1.5320927412892038" table:style-name="c14">
            <text:p>-1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0.09350673" table:style-name="c1">
            <text:p>0.093507</text:p>
          </table:table-cell>
          <table:table-cell office:value-type="string" table:style-name="c1">
            <text:p>2026-04-12 04:00</text:p>
          </table:table-cell>
          <table:table-cell office:value-type="float" office:value="0.091104425" table:style-name="c1">
            <text:p>0.091104</text:p>
          </table:table-cell>
          <table:table-cell office:value-type="float" office:value="-2.763889557013688" table:style-name="c14">
            <text:p>-2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094016985" table:style-name="c1">
            <text:p>0.094017</text:p>
          </table:table-cell>
          <table:table-cell office:value-type="string" table:style-name="c1">
            <text:p>2026-04-14 22:30</text:p>
          </table:table-cell>
          <table:table-cell office:value-type="float" office:value="0.092703625" table:style-name="c1">
            <text:p>0.092704</text:p>
          </table:table-cell>
          <table:table-cell office:value-type="float" office:value="-1.5940465931501557" table:style-name="c14">
            <text:p>-1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4:30</text:p>
          </table:table-cell>
          <table:table-cell office:value-type="float" office:value="0.09409702499999999" table:style-name="c1">
            <text:p>0.094097</text:p>
          </table:table-cell>
          <table:table-cell office:value-type="string" table:style-name="c1">
            <text:p>2026-04-16 14:30</text:p>
          </table:table-cell>
          <table:table-cell office:value-type="float" office:value="0.09505245000000001" table:style-name="c1">
            <text:p>0.095052</text:p>
          </table:table-cell>
          <table:table-cell office:value-type="float" office:value="0.8134318300180299" table:style-name="c13">
            <text:p>+0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0.09735865499999999" table:style-name="c1">
            <text:p>0.097359</text:p>
          </table:table-cell>
          <table:table-cell office:value-type="string" table:style-name="c1">
            <text:p>2026-04-17 16:00</text:p>
          </table:table-cell>
          <table:table-cell office:value-type="float" office:value="0.10051971500000001" table:style-name="c1">
            <text:p>0.10052</text:p>
          </table:table-cell>
          <table:table-cell office:value-type="float" office:value="3.040429317470572" table:style-name="c13">
            <text:p>+3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7:00</text:p>
          </table:table-cell>
          <table:table-cell office:value-type="float" office:value="0.102020985" table:style-name="c1">
            <text:p>0.10202</text:p>
          </table:table-cell>
          <table:table-cell office:value-type="string" table:style-name="c1">
            <text:p>2026-04-18 15:00</text:p>
          </table:table-cell>
          <table:table-cell office:value-type="float" office:value="0.09612191500000002" table:style-name="c1">
            <text:p>0.096122</text:p>
          </table:table-cell>
          <table:table-cell office:value-type="float" office:value="-5.970553713125759" table:style-name="c14">
            <text:p>-6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1:15</text:p>
          </table:table-cell>
          <table:table-cell office:value-type="float" office:value="0.09584789999999999" table:style-name="c1">
            <text:p>0.095848</text:p>
          </table:table-cell>
          <table:table-cell office:value-type="string" table:style-name="c1">
            <text:p>2026-04-21 20:00</text:p>
          </table:table-cell>
          <table:table-cell office:value-type="float" office:value="0.093823065" table:style-name="c1">
            <text:p>0.093823</text:p>
          </table:table-cell>
          <table:table-cell office:value-type="float" office:value="-2.308227208874658" table:style-name="c14">
            <text:p>-2.3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3:00</text:p>
          </table:table-cell>
          <table:table-cell office:value-type="float" office:value="0.096598275" table:style-name="c1">
            <text:p>0.096598</text:p>
          </table:table-cell>
          <table:table-cell office:value-type="string" table:style-name="c1">
            <text:p>2026-04-23 03:00</text:p>
          </table:table-cell>
          <table:table-cell office:value-type="float" office:value="0.09583206000000001" table:style-name="c1">
            <text:p>0.095832</text:p>
          </table:table-cell>
          <table:table-cell office:value-type="float" office:value="-0.9915117924621408" table:style-name="c14">
            <text:p>-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4:45</text:p>
          </table:table-cell>
          <table:table-cell office:value-type="float" office:value="0.09592794" table:style-name="c1">
            <text:p>0.095928</text:p>
          </table:table-cell>
          <table:table-cell office:value-type="string" table:style-name="c1">
            <text:p>2026-04-24 04:45</text:p>
          </table:table-cell>
          <table:table-cell office:value-type="float" office:value="0.09713141" table:style-name="c1">
            <text:p>0.097131</text:p>
          </table:table-cell>
          <table:table-cell office:value-type="float" office:value="1.052148426631505" table:style-name="c13">
            <text:p>+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00</text:p>
          </table:table-cell>
          <table:table-cell office:value-type="float" office:value="0.097898925" table:style-name="c1">
            <text:p>0.097899</text:p>
          </table:table-cell>
          <table:table-cell office:value-type="string" table:style-name="c1">
            <text:p>2026-04-25 11:00</text:p>
          </table:table-cell>
          <table:table-cell office:value-type="float" office:value="0.098500725" table:style-name="c1">
            <text:p>0.098501</text:p>
          </table:table-cell>
          <table:table-cell office:value-type="float" office:value="0.41358682000338653" table:style-name="c13">
            <text:p>+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00</text:p>
          </table:table-cell>
          <table:table-cell office:value-type="float" office:value="0.09999997499999999" table:style-name="c1">
            <text:p>0.1</text:p>
          </table:table-cell>
          <table:table-cell office:value-type="string" table:style-name="c1">
            <text:p>2026-04-27 19:00</text:p>
          </table:table-cell>
          <table:table-cell office:value-type="float" office:value="0.09777109" table:style-name="c1">
            <text:p>0.097771</text:p>
          </table:table-cell>
          <table:table-cell office:value-type="float" office:value="-2.424330014992482" table:style-name="c14">
            <text:p>-2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8 01:15</text:p>
          </table:table-cell>
          <table:table-cell office:value-type="float" office:value="0.0994497" table:style-name="c1">
            <text:p>0.09945</text:p>
          </table:table-cell>
          <table:table-cell office:value-type="string" table:style-name="c1">
            <text:p>2026-04-29 01:15</text:p>
          </table:table-cell>
          <table:table-cell office:value-type="float" office:value="0.09973011" table:style-name="c1">
            <text:p>0.09973</text:p>
          </table:table-cell>
          <table:table-cell office:value-type="float" office:value="0.08149799356860221" table:style-name="c13">
            <text:p>+0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3:45</text:p>
          </table:table-cell>
          <table:table-cell office:value-type="float" office:value="0.10143068999999999" table:style-name="c1">
            <text:p>0.10143</text:p>
          </table:table-cell>
          <table:table-cell office:value-type="string" table:style-name="c1">
            <text:p>2026-04-30 03:45</text:p>
          </table:table-cell>
          <table:table-cell office:value-type="float" office:value="0.10721636500000001" table:style-name="c1">
            <text:p>0.10722</text:p>
          </table:table-cell>
          <table:table-cell office:value-type="float" office:value="5.492765046126591" table:style-name="c13">
            <text:p>+5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0.10959477" table:style-name="c1">
            <text:p>0.10959</text:p>
          </table:table-cell>
          <table:table-cell office:value-type="string" table:style-name="c1">
            <text:p>2026-05-02 03:30</text:p>
          </table:table-cell>
          <table:table-cell office:value-type="float" office:value="0.10824585" table:style-name="c1">
            <text:p>0.10825</text:p>
          </table:table-cell>
          <table:table-cell office:value-type="float" office:value="-1.4282647375873703" table:style-name="c14">
            <text:p>-1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4:45</text:p>
          </table:table-cell>
          <table:table-cell office:value-type="float" office:value="0.10893444" table:style-name="c1">
            <text:p>0.10893</text:p>
          </table:table-cell>
          <table:table-cell office:value-type="string" table:style-name="c1">
            <text:p>2026-05-03 14:45</text:p>
          </table:table-cell>
          <table:table-cell office:value-type="float" office:value="0.10866564000000001" table:style-name="c1">
            <text:p>0.10867</text:p>
          </table:table-cell>
          <table:table-cell office:value-type="float" office:value="-0.4461606580618449" table:style-name="c14">
            <text:p>-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30</text:p>
          </table:table-cell>
          <table:table-cell office:value-type="float" office:value="0.10921457999999999" table:style-name="c1">
            <text:p>0.10921</text:p>
          </table:table-cell>
          <table:table-cell office:value-type="string" table:style-name="c1">
            <text:p>2026-05-04 22:30</text:p>
          </table:table-cell>
          <table:table-cell office:value-type="float" office:value="0.110414765" table:style-name="c1">
            <text:p>0.11041</text:p>
          </table:table-cell>
          <table:table-cell office:value-type="float" office:value="0.8968270397276656" table:style-name="c13">
            <text:p>+0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30</text:p>
          </table:table-cell>
          <table:table-cell office:value-type="float" office:value="0.11257625999999998" table:style-name="c1">
            <text:p>0.11258</text:p>
          </table:table-cell>
          <table:table-cell office:value-type="string" table:style-name="c1">
            <text:p>2026-05-06 13:30</text:p>
          </table:table-cell>
          <table:table-cell office:value-type="float" office:value="0.11394300000000002" table:style-name="c1">
            <text:p>0.11394</text:p>
          </table:table-cell>
          <table:table-cell office:value-type="float" office:value="1.011730131201749" table:style-name="c13">
            <text:p>+1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45</text:p>
          </table:table-cell>
          <table:table-cell office:value-type="float" office:value="0.109584765" table:style-name="c1">
            <text:p>0.10958</text:p>
          </table:table-cell>
          <table:table-cell office:value-type="string" table:style-name="c1">
            <text:p>2026-05-10 02:00</text:p>
          </table:table-cell>
          <table:table-cell office:value-type="float" office:value="0.108055945" table:style-name="c1">
            <text:p>0.10806</text:p>
          </table:table-cell>
          <table:table-cell office:value-type="float" office:value="-1.5922138757654802" table:style-name="c14">
            <text:p>-1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2:45</text:p>
          </table:table-cell>
          <table:table-cell office:value-type="float" office:value="0.11103548999999999" table:style-name="c1">
            <text:p>0.11104</text:p>
          </table:table-cell>
          <table:table-cell office:value-type="string" table:style-name="c1">
            <text:p>2026-05-11 22:45</text:p>
          </table:table-cell>
          <table:table-cell office:value-type="float" office:value="0.11122436000000001" table:style-name="c1">
            <text:p>0.11122</text:p>
          </table:table-cell>
          <table:table-cell office:value-type="float" office:value="-0.030141259916083296" table:style-name="c14">
            <text:p>-0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0.11139566999999999" table:style-name="c1">
            <text:p>0.1114</text:p>
          </table:table-cell>
          <table:table-cell office:value-type="string" table:style-name="c1">
            <text:p>2026-05-14 01:15</text:p>
          </table:table-cell>
          <table:table-cell office:value-type="float" office:value="0.11457268500000001" table:style-name="c1">
            <text:p>0.11457</text:p>
          </table:table-cell>
          <table:table-cell office:value-type="float" office:value="2.6464082514921827" table:style-name="c13">
            <text:p>+2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0.106283115" table:style-name="c1">
            <text:p>0.10628</text:p>
          </table:table-cell>
          <table:table-cell office:value-type="string" table:style-name="c1">
            <text:p>2026-05-22 08:30</text:p>
          </table:table-cell>
          <table:table-cell office:value-type="float" office:value="0.10592701000000002" table:style-name="c1">
            <text:p>0.10593</text:p>
          </table:table-cell>
          <table:table-cell office:value-type="float" office:value="-0.5342834494359461" table:style-name="c14">
            <text:p>-0.5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2:30</text:p>
          </table:table-cell>
          <table:table-cell office:value-type="float" office:value="0.10129062" table:style-name="c1">
            <text:p>0.10129</text:p>
          </table:table-cell>
          <table:table-cell office:value-type="string" table:style-name="c1">
            <text:p>2026-05-31 02:30</text:p>
          </table:table-cell>
          <table:table-cell office:value-type="float" office:value="0.10086954000000001" table:style-name="c1">
            <text:p>0.10087</text:p>
          </table:table-cell>
          <table:table-cell office:value-type="float" office:value="-0.6147836892102965" table:style-name="c14">
            <text:p>-0.6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15</text:p>
          </table:table-cell>
          <table:table-cell office:value-type="float" office:value="0.101380665" table:style-name="c1">
            <text:p>0.10138</text:p>
          </table:table-cell>
          <table:table-cell office:value-type="string" table:style-name="c1">
            <text:p>2026-05-31 19:00</text:p>
          </table:table-cell>
          <table:table-cell office:value-type="float" office:value="0.099460245" table:style-name="c1">
            <text:p>0.09946</text:p>
          </table:table-cell>
          <table:table-cell office:value-type="float" office:value="-2.090379886297844" table:style-name="c14">
            <text:p>-2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9:30</text:p>
          </table:table-cell>
          <table:table-cell office:value-type="float" office:value="1.5397694999999998" table:style-name="c10">
            <text:p>1.5398</text:p>
          </table:table-cell>
          <table:table-cell office:value-type="string" table:style-name="c10">
            <text:p>2026-03-11 09:30</text:p>
          </table:table-cell>
          <table:table-cell office:value-type="float" office:value="1.495252" table:style-name="c10">
            <text:p>1.4953</text:p>
          </table:table-cell>
          <table:table-cell office:value-type="float" office:value="-3.085300023672355" table:style-name="c11">
            <text:p>-3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2:45</text:p>
          </table:table-cell>
          <table:table-cell office:value-type="float" office:value="1.534767" table:style-name="c10">
            <text:p>1.5348</text:p>
          </table:table-cell>
          <table:table-cell office:value-type="string" table:style-name="c10">
            <text:p>2026-03-12 12:45</text:p>
          </table:table-cell>
          <table:table-cell office:value-type="float" office:value="1.507246" table:style-name="c10">
            <text:p>1.5072</text:p>
          </table:table-cell>
          <table:table-cell office:value-type="float" office:value="-1.9894866617538698" table:style-name="c11">
            <text:p>-2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30</text:p>
          </table:table-cell>
          <table:table-cell office:value-type="float" office:value="1.5377684999999999" table:style-name="c10">
            <text:p>1.5378</text:p>
          </table:table-cell>
          <table:table-cell office:value-type="string" table:style-name="c10">
            <text:p>2026-03-13 20:00</text:p>
          </table:table-cell>
          <table:table-cell office:value-type="float" office:value="1.4702645" table:style-name="c10">
            <text:p>1.4703</text:p>
          </table:table-cell>
          <table:table-cell office:value-type="float" office:value="-4.580862381788931" table:style-name="c11">
            <text:p>-4.6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5:00</text:p>
          </table:table-cell>
          <table:table-cell office:value-type="float" office:value="1.5257625" table:style-name="c10">
            <text:p>1.5258</text:p>
          </table:table-cell>
          <table:table-cell office:value-type="string" table:style-name="c10">
            <text:p>2026-03-17 05:00</text:p>
          </table:table-cell>
          <table:table-cell office:value-type="float" office:value="1.5982005000000001" table:style-name="c10">
            <text:p>1.5982</text:p>
          </table:table-cell>
          <table:table-cell office:value-type="float" office:value="4.538268387150701" table:style-name="c12">
            <text:p>+4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2:45</text:p>
          </table:table-cell>
          <table:table-cell office:value-type="float" office:value="1.6478234999999999" table:style-name="c10">
            <text:p>1.6478</text:p>
          </table:table-cell>
          <table:table-cell office:value-type="string" table:style-name="c10">
            <text:p>2026-03-18 22:00</text:p>
          </table:table-cell>
          <table:table-cell office:value-type="float" office:value="1.55922" table:style-name="c10">
            <text:p>1.5592</text:p>
          </table:table-cell>
          <table:table-cell office:value-type="float" office:value="-5.566153218472714" table:style-name="c11">
            <text:p>-5.6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15</text:p>
          </table:table-cell>
          <table:table-cell office:value-type="float" office:value="1.296648" table:style-name="c10">
            <text:p>1.2966</text:p>
          </table:table-cell>
          <table:table-cell office:value-type="string" table:style-name="c10">
            <text:p>2026-04-02 03:00</text:p>
          </table:table-cell>
          <table:table-cell office:value-type="float" office:value="1.2283855000000001" table:style-name="c10">
            <text:p>1.2284</text:p>
          </table:table-cell>
          <table:table-cell office:value-type="float" office:value="-5.4539121345577035" table:style-name="c11">
            <text:p>-5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1:45</text:p>
          </table:table-cell>
          <table:table-cell office:value-type="float" office:value="1.2506249999999999" table:style-name="c10">
            <text:p>1.2506</text:p>
          </table:table-cell>
          <table:table-cell office:value-type="string" table:style-name="c10">
            <text:p>2026-04-05 09:00</text:p>
          </table:table-cell>
          <table:table-cell office:value-type="float" office:value="1.2283855000000001" table:style-name="c10">
            <text:p>1.2284</text:p>
          </table:table-cell>
          <table:table-cell office:value-type="float" office:value="-1.9746161011094165" table:style-name="c11">
            <text:p>-2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6:15</text:p>
          </table:table-cell>
          <table:table-cell office:value-type="float" office:value="1.270635" table:style-name="c10">
            <text:p>1.2706</text:p>
          </table:table-cell>
          <table:table-cell office:value-type="string" table:style-name="c10">
            <text:p>2026-04-07 06:15</text:p>
          </table:table-cell>
          <table:table-cell office:value-type="float" office:value="1.2303845000000002" table:style-name="c10">
            <text:p>1.2304</text:p>
          </table:table-cell>
          <table:table-cell office:value-type="float" office:value="-3.3613145093201235" table:style-name="c11">
            <text:p>-3.4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1.336668" table:style-name="c10">
            <text:p>1.3367</text:p>
          </table:table-cell>
          <table:table-cell office:value-type="string" table:style-name="c10">
            <text:p>2026-04-10 22:30</text:p>
          </table:table-cell>
          <table:table-cell office:value-type="float" office:value="1.3103445" table:style-name="c10">
            <text:p>1.3103</text:p>
          </table:table-cell>
          <table:table-cell office:value-type="float" office:value="-2.1653004826553857" table:style-name="c11">
            <text:p>-2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9:00</text:p>
          </table:table-cell>
          <table:table-cell office:value-type="float" office:value="1.302651" table:style-name="c10">
            <text:p>1.3027</text:p>
          </table:table-cell>
          <table:table-cell office:value-type="string" table:style-name="c10">
            <text:p>2026-04-12 02:00</text:p>
          </table:table-cell>
          <table:table-cell office:value-type="float" office:value="1.245377" table:style-name="c10">
            <text:p>1.2454</text:p>
          </table:table-cell>
          <table:table-cell office:value-type="float" office:value="-4.587837311989162" table:style-name="c11">
            <text:p>-4.6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4:45</text:p>
          </table:table-cell>
          <table:table-cell office:value-type="float" office:value="1.216608" table:style-name="c10">
            <text:p>1.2166</text:p>
          </table:table-cell>
          <table:table-cell office:value-type="string" table:style-name="c10">
            <text:p>2026-04-17 04:45</text:p>
          </table:table-cell>
          <table:table-cell office:value-type="float" office:value="1.2933530000000002" table:style-name="c10">
            <text:p>1.2934</text:p>
          </table:table-cell>
          <table:table-cell office:value-type="float" office:value="6.095602474502915" table:style-name="c12">
            <text:p>+6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6:45</text:p>
          </table:table-cell>
          <table:table-cell office:value-type="float" office:value="1.3196595" table:style-name="c10">
            <text:p>1.3197</text:p>
          </table:table-cell>
          <table:table-cell office:value-type="string" table:style-name="c10">
            <text:p>2026-04-18 06:45</text:p>
          </table:table-cell>
          <table:table-cell office:value-type="float" office:value="1.337331" table:style-name="c10">
            <text:p>1.3373</text:p>
          </table:table-cell>
          <table:table-cell office:value-type="float" office:value="1.136518573995815" table:style-name="c12">
            <text:p>+1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6:30</text:p>
          </table:table-cell>
          <table:table-cell office:value-type="float" office:value="1.302651" table:style-name="c10">
            <text:p>1.3027</text:p>
          </table:table-cell>
          <table:table-cell office:value-type="string" table:style-name="c10">
            <text:p>2026-04-18 23:00</text:p>
          </table:table-cell>
          <table:table-cell office:value-type="float" office:value="1.2803595" table:style-name="c10">
            <text:p>1.2804</text:p>
          </table:table-cell>
          <table:table-cell office:value-type="float" office:value="-1.9077203825506595" table:style-name="c11">
            <text:p>-1.9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3:30</text:p>
          </table:table-cell>
          <table:table-cell office:value-type="float" office:value="1.2916454999999998" table:style-name="c10">
            <text:p>1.2916</text:p>
          </table:table-cell>
          <table:table-cell office:value-type="string" table:style-name="c10">
            <text:p>2026-04-23 03:30</text:p>
          </table:table-cell>
          <table:table-cell office:value-type="float" office:value="1.25937" table:style-name="c10">
            <text:p>1.2594</text:p>
          </table:table-cell>
          <table:table-cell office:value-type="float" office:value="-2.6936942551187393" table:style-name="c11">
            <text:p>-2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01:15</text:p>
          </table:table-cell>
          <table:table-cell office:value-type="float" office:value="1.266633" table:style-name="c10">
            <text:p>1.2666</text:p>
          </table:table-cell>
          <table:table-cell office:value-type="string" table:style-name="c10">
            <text:p>2026-04-27 09:00</text:p>
          </table:table-cell>
          <table:table-cell office:value-type="float" office:value="1.2343825000000002" table:style-name="c10">
            <text:p>1.2344</text:p>
          </table:table-cell>
          <table:table-cell office:value-type="float" office:value="-2.7409700061106657" table:style-name="c11">
            <text:p>-2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1.2536264999999998" table:style-name="c10">
            <text:p>1.2536</text:p>
          </table:table-cell>
          <table:table-cell office:value-type="string" table:style-name="c10">
            <text:p>2026-04-29 16:00</text:p>
          </table:table-cell>
          <table:table-cell office:value-type="float" office:value="1.205397" table:style-name="c10">
            <text:p>1.2054</text:p>
          </table:table-cell>
          <table:table-cell office:value-type="float" office:value="-4.039407957872587" table:style-name="c11">
            <text:p>-4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19:15</text:p>
          </table:table-cell>
          <table:table-cell office:value-type="float" office:value="1.22061" table:style-name="c10">
            <text:p>1.2206</text:p>
          </table:table-cell>
          <table:table-cell office:value-type="string" table:style-name="c10">
            <text:p>2026-05-03 19:15</text:p>
          </table:table-cell>
          <table:table-cell office:value-type="float" office:value="1.211394" table:style-name="c10">
            <text:p>1.2114</text:p>
          </table:table-cell>
          <table:table-cell office:value-type="float" office:value="-0.9534230102981267" table:style-name="c11">
            <text:p>-1.0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45</text:p>
          </table:table-cell>
          <table:table-cell office:value-type="float" office:value="1.2576284999999998" table:style-name="c10">
            <text:p>1.2576</text:p>
          </table:table-cell>
          <table:table-cell office:value-type="string" table:style-name="c10">
            <text:p>2026-05-06 07:45</text:p>
          </table:table-cell>
          <table:table-cell office:value-type="float" office:value="1.311344" table:style-name="c10">
            <text:p>1.3113</text:p>
          </table:table-cell>
          <table:table-cell office:value-type="float" office:value="4.062735803458684" table:style-name="c12">
            <text:p>+4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8:30</text:p>
          </table:table-cell>
          <table:table-cell office:value-type="float" office:value="1.3196595" table:style-name="c10">
            <text:p>1.3197</text:p>
          </table:table-cell>
          <table:table-cell office:value-type="string" table:style-name="c10">
            <text:p>2026-05-07 08:30</text:p>
          </table:table-cell>
          <table:table-cell office:value-type="float" office:value="1.3203395" table:style-name="c10">
            <text:p>1.3203</text:p>
          </table:table-cell>
          <table:table-cell office:value-type="float" office:value="-0.14847456184720054" table:style-name="c11">
            <text:p>-0.1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6:00</text:p>
          </table:table-cell>
          <table:table-cell office:value-type="float" office:value="1.3596795" table:style-name="c10">
            <text:p>1.3597</text:p>
          </table:table-cell>
          <table:table-cell office:value-type="string" table:style-name="c10">
            <text:p>2026-05-09 16:00</text:p>
          </table:table-cell>
          <table:table-cell office:value-type="float" office:value="1.3423285" table:style-name="c10">
            <text:p>1.3423</text:p>
          </table:table-cell>
          <table:table-cell office:value-type="float" office:value="-1.473458610760825" table:style-name="c11">
            <text:p>-1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7:45</text:p>
          </table:table-cell>
          <table:table-cell office:value-type="float" office:value="1.348674" table:style-name="c10">
            <text:p>1.3487</text:p>
          </table:table-cell>
          <table:table-cell office:value-type="string" table:style-name="c10">
            <text:p>2026-05-11 07:45</text:p>
          </table:table-cell>
          <table:table-cell office:value-type="float" office:value="1.3603195000000001" table:style-name="c10">
            <text:p>1.3603</text:p>
          </table:table-cell>
          <table:table-cell office:value-type="float" office:value="0.6618516646350603" table:style-name="c12">
            <text:p>+0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5:30</text:p>
          </table:table-cell>
          <table:table-cell office:value-type="float" office:value="1.3716855" table:style-name="c10">
            <text:p>1.3717</text:p>
          </table:table-cell>
          <table:table-cell office:value-type="string" table:style-name="c10">
            <text:p>2026-05-12 11:00</text:p>
          </table:table-cell>
          <table:table-cell office:value-type="float" office:value="1.3383305" table:style-name="c10">
            <text:p>1.3383</text:p>
          </table:table-cell>
          <table:table-cell office:value-type="float" office:value="-2.6267189286100945" table:style-name="c11">
            <text:p>-2.6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9:45</text:p>
          </table:table-cell>
          <table:table-cell office:value-type="float" office:value="1.4217104999999999" table:style-name="c10">
            <text:p>1.4217</text:p>
          </table:table-cell>
          <table:table-cell office:value-type="string" table:style-name="c10">
            <text:p>2026-05-13 20:00</text:p>
          </table:table-cell>
          <table:table-cell office:value-type="float" office:value="1.321339" table:style-name="c10">
            <text:p>1.3213</text:p>
          </table:table-cell>
          <table:table-cell office:value-type="float" office:value="-7.245698520268351" table:style-name="c11">
            <text:p>-7.2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7:00</text:p>
          </table:table-cell>
          <table:table-cell office:value-type="float" office:value="1.3906949999999998" table:style-name="c10">
            <text:p>1.3907</text:p>
          </table:table-cell>
          <table:table-cell office:value-type="string" table:style-name="c10">
            <text:p>2026-05-15 11:00</text:p>
          </table:table-cell>
          <table:table-cell office:value-type="float" office:value="1.3413290000000002" table:style-name="c10">
            <text:p>1.3413</text:p>
          </table:table-cell>
          <table:table-cell office:value-type="float" office:value="-3.7425400012943033" table:style-name="c11">
            <text:p>-3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2:30</text:p>
          </table:table-cell>
          <table:table-cell office:value-type="float" office:value="1.2656325" table:style-name="c10">
            <text:p>1.2656</text:p>
          </table:table-cell>
          <table:table-cell office:value-type="string" table:style-name="c10">
            <text:p>2026-05-22 02:30</text:p>
          </table:table-cell>
          <table:table-cell office:value-type="float" office:value="1.29935" table:style-name="c10">
            <text:p>1.2994</text:p>
          </table:table-cell>
          <table:table-cell office:value-type="float" office:value="2.458857476400156" table:style-name="c12">
            <text:p>+2.5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03:15</text:p>
          </table:table-cell>
          <table:table-cell office:value-type="float" office:value="1.3076534999999998" table:style-name="c10">
            <text:p>1.3077</text:p>
          </table:table-cell>
          <table:table-cell office:value-type="string" table:style-name="c10">
            <text:p>2026-05-23 03:15</text:p>
          </table:table-cell>
          <table:table-cell office:value-type="float" office:value="1.2623685" table:style-name="c10">
            <text:p>1.2624</text:p>
          </table:table-cell>
          <table:table-cell office:value-type="float" office:value="-3.6560506763832934" table:style-name="c11">
            <text:p>-3.7</text:p>
          </table:table-cell>
        </table:table-row>
        <table:table-row>
          <table:table-cell office:value-type="string" table:style-name="c9">
            <text:p>DOT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8:15</text:p>
          </table:table-cell>
          <table:table-cell office:value-type="float" office:value="1.2916454999999998" table:style-name="c10">
            <text:p>1.2916</text:p>
          </table:table-cell>
          <table:table-cell office:value-type="string" table:style-name="c10">
            <text:p>2026-05-26 02:00</text:p>
          </table:table-cell>
          <table:table-cell office:value-type="float" office:value="1.2403795000000002" table:style-name="c10">
            <text:p>1.2404</text:p>
          </table:table-cell>
          <table:table-cell office:value-type="float" office:value="-4.161011563970119" table:style-name="c11">
            <text:p>-4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8.254125" table:style-name="c1">
            <text:p>8.2541</text:p>
          </table:table-cell>
          <table:table-cell office:value-type="string" table:style-name="c1">
            <text:p>2026-03-10 19:45</text:p>
          </table:table-cell>
          <table:table-cell office:value-type="float" office:value="8.25587" table:style-name="c1">
            <text:p>8.2559</text:p>
          </table:table-cell>
          <table:table-cell office:value-type="float" office:value="-0.17880131606923255" table:style-name="c14">
            <text:p>-0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07:00</text:p>
          </table:table-cell>
          <table:table-cell office:value-type="float" office:value="8.234115" table:style-name="c1">
            <text:p>8.2341</text:p>
          </table:table-cell>
          <table:table-cell office:value-type="string" table:style-name="c1">
            <text:p>2026-03-12 07:00</text:p>
          </table:table-cell>
          <table:table-cell office:value-type="float" office:value="8.1959" table:style-name="c1">
            <text:p>8.1959</text:p>
          </table:table-cell>
          <table:table-cell office:value-type="float" office:value="-0.6630779883448179" table:style-name="c14">
            <text:p>-0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2 09:45</text:p>
          </table:table-cell>
          <table:table-cell office:value-type="float" office:value="8.26413" table:style-name="c1">
            <text:p>8.2641</text:p>
          </table:table-cell>
          <table:table-cell office:value-type="string" table:style-name="c1">
            <text:p>2026-03-12 14:00</text:p>
          </table:table-cell>
          <table:table-cell office:value-type="float" office:value="8.205895000000002" table:style-name="c1">
            <text:p>8.2059</text:p>
          </table:table-cell>
          <table:table-cell office:value-type="float" office:value="-0.9031632380540722" table:style-name="c14">
            <text:p>-0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9:30</text:p>
          </table:table-cell>
          <table:table-cell office:value-type="float" office:value="8.434215" table:style-name="c1">
            <text:p>8.4342</text:p>
          </table:table-cell>
          <table:table-cell office:value-type="string" table:style-name="c1">
            <text:p>2026-03-14 09:30</text:p>
          </table:table-cell>
          <table:table-cell office:value-type="float" office:value="8.27586" table:style-name="c1">
            <text:p>8.2759</text:p>
          </table:table-cell>
          <table:table-cell office:value-type="float" office:value="-2.0736778009571744" table:style-name="c14">
            <text:p>-2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8.394195" table:style-name="c1">
            <text:p>8.3942</text:p>
          </table:table-cell>
          <table:table-cell office:value-type="string" table:style-name="c1">
            <text:p>2026-03-16 22:00</text:p>
          </table:table-cell>
          <table:table-cell office:value-type="float" office:value="9.045475000000001" table:style-name="c1">
            <text:p>9.0455</text:p>
          </table:table-cell>
          <table:table-cell office:value-type="float" office:value="7.543285514275078" table:style-name="c13">
            <text:p>+7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4:15</text:p>
          </table:table-cell>
          <table:table-cell office:value-type="float" office:value="8.84442" table:style-name="c1">
            <text:p>8.8444</text:p>
          </table:table-cell>
          <table:table-cell office:value-type="string" table:style-name="c1">
            <text:p>2026-03-18 14:00</text:p>
          </table:table-cell>
          <table:table-cell office:value-type="float" office:value="8.51574" table:style-name="c1">
            <text:p>8.5157</text:p>
          </table:table-cell>
          <table:table-cell office:value-type="float" office:value="-3.9087126601857647" table:style-name="c14">
            <text:p>-3.9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45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3-24 20:45</text:p>
          </table:table-cell>
          <table:table-cell office:value-type="float" office:value="8.69565" table:style-name="c1">
            <text:p>8.6957</text:p>
          </table:table-cell>
          <table:table-cell office:value-type="float" office:value="1.0947602614776564" table:style-name="c13">
            <text:p>+1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3:15</text:p>
          </table:table-cell>
          <table:table-cell office:value-type="float" office:value="8.794394999999998" table:style-name="c1">
            <text:p>8.7944</text:p>
          </table:table-cell>
          <table:table-cell office:value-type="string" table:style-name="c1">
            <text:p>2026-03-26 11:00</text:p>
          </table:table-cell>
          <table:table-cell office:value-type="float" office:value="8.33583" table:style-name="c1">
            <text:p>8.3358</text:p>
          </table:table-cell>
          <table:table-cell office:value-type="float" office:value="-5.403763694603192" table:style-name="c14">
            <text:p>-5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8.32416" table:style-name="c1">
            <text:p>8.3242</text:p>
          </table:table-cell>
          <table:table-cell office:value-type="string" table:style-name="c1">
            <text:p>2026-03-31 08:00</text:p>
          </table:table-cell>
          <table:table-cell office:value-type="float" office:value="8.125935000000002" table:style-name="c1">
            <text:p>8.1259</text:p>
          </table:table-cell>
          <table:table-cell office:value-type="float" office:value="-2.5764610971557023" table:style-name="c14">
            <text:p>-2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8.254125" table:style-name="c1">
            <text:p>8.2541</text:p>
          </table:table-cell>
          <table:table-cell office:value-type="string" table:style-name="c1">
            <text:p>2026-04-02 04:00</text:p>
          </table:table-cell>
          <table:table-cell office:value-type="float" office:value="7.936030000000001" table:style-name="c1">
            <text:p>7.936</text:p>
          </table:table-cell>
          <table:table-cell office:value-type="float" office:value="-4.045966398255418" table:style-name="c14">
            <text:p>-4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0:15</text:p>
          </table:table-cell>
          <table:table-cell office:value-type="float" office:value="8.174085" table:style-name="c1">
            <text:p>8.1741</text:p>
          </table:table-cell>
          <table:table-cell office:value-type="string" table:style-name="c1">
            <text:p>2026-04-04 20:15</text:p>
          </table:table-cell>
          <table:table-cell office:value-type="float" office:value="8.805595" table:style-name="c1">
            <text:p>8.8056</text:p>
          </table:table-cell>
          <table:table-cell office:value-type="float" office:value="7.51041389458269" table:style-name="c13">
            <text:p>+7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19:30</text:p>
          </table:table-cell>
          <table:table-cell office:value-type="float" office:value="8.58429" table:style-name="c1">
            <text:p>8.5843</text:p>
          </table:table-cell>
          <table:table-cell office:value-type="string" table:style-name="c1">
            <text:p>2026-04-06 19:30</text:p>
          </table:table-cell>
          <table:table-cell office:value-type="float" office:value="8.57571" table:style-name="c1">
            <text:p>8.5757</text:p>
          </table:table-cell>
          <table:table-cell office:value-type="float" office:value="-0.2996502248875377" table:style-name="c14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4:45</text:p>
          </table:table-cell>
          <table:table-cell office:value-type="float" office:value="8.614304999999998" table:style-name="c1">
            <text:p>8.6143</text:p>
          </table:table-cell>
          <table:table-cell office:value-type="string" table:style-name="c1">
            <text:p>2026-04-11 07:00</text:p>
          </table:table-cell>
          <table:table-cell office:value-type="float" office:value="8.35582" table:style-name="c1">
            <text:p>8.3558</text:p>
          </table:table-cell>
          <table:table-cell office:value-type="float" office:value="-3.194550044141675" table:style-name="c14">
            <text:p>-3.2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8.514254999999999" table:style-name="c1">
            <text:p>8.5143</text:p>
          </table:table-cell>
          <table:table-cell office:value-type="string" table:style-name="c1">
            <text:p>2026-04-14 23:00</text:p>
          </table:table-cell>
          <table:table-cell office:value-type="float" office:value="8.295850000000002" table:style-name="c1">
            <text:p>8.2959</text:p>
          </table:table-cell>
          <table:table-cell office:value-type="float" office:value="-2.759940877387357" table:style-name="c14">
            <text:p>-2.8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5:00</text:p>
          </table:table-cell>
          <table:table-cell office:value-type="float" office:value="8.454225" table:style-name="c1">
            <text:p>8.4542</text:p>
          </table:table-cell>
          <table:table-cell office:value-type="string" table:style-name="c1">
            <text:p>2026-04-16 15:00</text:p>
          </table:table-cell>
          <table:table-cell office:value-type="float" office:value="8.43578" table:style-name="c1">
            <text:p>8.4358</text:p>
          </table:table-cell>
          <table:table-cell office:value-type="float" office:value="-0.4176388045030732" table:style-name="c14">
            <text:p>-0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8.62431" table:style-name="c1">
            <text:p>8.6243</text:p>
          </table:table-cell>
          <table:table-cell office:value-type="string" table:style-name="c1">
            <text:p>2026-04-17 16:00</text:p>
          </table:table-cell>
          <table:table-cell office:value-type="float" office:value="8.765615" table:style-name="c1">
            <text:p>8.7656</text:p>
          </table:table-cell>
          <table:table-cell office:value-type="float" office:value="1.4352746551898" table:style-name="c13">
            <text:p>+1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7:00</text:p>
          </table:table-cell>
          <table:table-cell office:value-type="float" office:value="8.894445" table:style-name="c1">
            <text:p>8.8944</text:p>
          </table:table-cell>
          <table:table-cell office:value-type="string" table:style-name="c1">
            <text:p>2026-04-18 17:00</text:p>
          </table:table-cell>
          <table:table-cell office:value-type="float" office:value="8.505745000000001" table:style-name="c1">
            <text:p>8.5057</text:p>
          </table:table-cell>
          <table:table-cell office:value-type="float" office:value="-4.561307470617882" table:style-name="c14">
            <text:p>-4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15:30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1 20:00</text:p>
          </table:table-cell>
          <table:table-cell office:value-type="float" office:value="8.285855" table:style-name="c1">
            <text:p>8.2859</text:p>
          </table:table-cell>
          <table:table-cell office:value-type="float" office:value="-2.418429795078858" table:style-name="c14">
            <text:p>-2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8.56428" table:style-name="c1">
            <text:p>8.5643</text:p>
          </table:table-cell>
          <table:table-cell office:value-type="string" table:style-name="c1">
            <text:p>2026-04-23 02:45</text:p>
          </table:table-cell>
          <table:table-cell office:value-type="float" office:value="8.375810000000001" table:style-name="c1">
            <text:p>8.3758</text:p>
          </table:table-cell>
          <table:table-cell office:value-type="float" office:value="-2.396152907074478" table:style-name="c14">
            <text:p>-2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3 09:00</text:p>
          </table:table-cell>
          <table:table-cell office:value-type="float" office:value="8.445775" table:style-name="c1">
            <text:p>8.4458</text:p>
          </table:table-cell>
          <table:table-cell office:value-type="float" office:value="-0.5350701771310473" table:style-name="c14">
            <text:p>-0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00:30</text:p>
          </table:table-cell>
          <table:table-cell office:value-type="float" office:value="8.54427" table:style-name="c1">
            <text:p>8.5443</text:p>
          </table:table-cell>
          <table:table-cell office:value-type="string" table:style-name="c1">
            <text:p>2026-04-25 00:30</text:p>
          </table:table-cell>
          <table:table-cell office:value-type="float" office:value="8.475760000000001" table:style-name="c1">
            <text:p>8.4758</text:p>
          </table:table-cell>
          <table:table-cell office:value-type="float" office:value="-1.0001210663988402" table:style-name="c14">
            <text:p>-1.0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3:45</text:p>
          </table:table-cell>
          <table:table-cell office:value-type="float" office:value="8.474235" table:style-name="c1">
            <text:p>8.4742</text:p>
          </table:table-cell>
          <table:table-cell office:value-type="string" table:style-name="c1">
            <text:p>2026-04-29 19:00</text:p>
          </table:table-cell>
          <table:table-cell office:value-type="float" office:value="8.265865" table:style-name="c1">
            <text:p>8.2659</text:p>
          </table:table-cell>
          <table:table-cell office:value-type="float" office:value="-2.6538497473223344" table:style-name="c14">
            <text:p>-2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8.604299999999999" table:style-name="c1">
            <text:p>8.6043</text:p>
          </table:table-cell>
          <table:table-cell office:value-type="string" table:style-name="c1">
            <text:p>2026-05-05 02:15</text:p>
          </table:table-cell>
          <table:table-cell office:value-type="float" office:value="8.805595" table:style-name="c1">
            <text:p>8.8056</text:p>
          </table:table-cell>
          <table:table-cell office:value-type="float" office:value="2.1348931998535603" table:style-name="c13">
            <text:p>+2.1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2:30</text:p>
          </table:table-cell>
          <table:table-cell office:value-type="float" office:value="8.82441" table:style-name="c1">
            <text:p>8.8244</text:p>
          </table:table-cell>
          <table:table-cell office:value-type="string" table:style-name="c1">
            <text:p>2026-05-06 02:30</text:p>
          </table:table-cell>
          <table:table-cell office:value-type="float" office:value="9.075460000000001" table:style-name="c1">
            <text:p>9.0755</text:p>
          </table:table-cell>
          <table:table-cell office:value-type="float" office:value="2.6393623535171384" table:style-name="c13">
            <text:p>+2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3:45</text:p>
          </table:table-cell>
          <table:table-cell office:value-type="float" office:value="9.314655" table:style-name="c1">
            <text:p>9.3147</text:p>
          </table:table-cell>
          <table:table-cell office:value-type="string" table:style-name="c1">
            <text:p>2026-05-07 03:45</text:p>
          </table:table-cell>
          <table:table-cell office:value-type="float" office:value="9.205395000000001" table:style-name="c1">
            <text:p>9.2054</text:p>
          </table:table-cell>
          <table:table-cell office:value-type="float" office:value="-1.3705454963710229" table:style-name="c14">
            <text:p>-1.4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6:45</text:p>
          </table:table-cell>
          <table:table-cell office:value-type="float" office:value="9.314655" table:style-name="c1">
            <text:p>9.3147</text:p>
          </table:table-cell>
          <table:table-cell office:value-type="string" table:style-name="c1">
            <text:p>2026-05-08 06:45</text:p>
          </table:table-cell>
          <table:table-cell office:value-type="float" office:value="9.305345" table:style-name="c1">
            <text:p>9.3053</text:p>
          </table:table-cell>
          <table:table-cell office:value-type="float" office:value="-0.2996502248875377" table:style-name="c14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15</text:p>
          </table:table-cell>
          <table:table-cell office:value-type="float" office:value="9.38469" table:style-name="c1">
            <text:p>9.3847</text:p>
          </table:table-cell>
          <table:table-cell office:value-type="string" table:style-name="c1">
            <text:p>2026-05-09 08:15</text:p>
          </table:table-cell>
          <table:table-cell office:value-type="float" office:value="9.745125" table:style-name="c1">
            <text:p>9.7451</text:p>
          </table:table-cell>
          <table:table-cell office:value-type="float" office:value="3.6330927832991744" table:style-name="c13">
            <text:p>+3.6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0:15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5-11 00:15</text:p>
          </table:table-cell>
          <table:table-cell office:value-type="float" office:value="9.925035" table:style-name="c1">
            <text:p>9.925</text:p>
          </table:table-cell>
          <table:table-cell office:value-type="float" office:value="2.699634156313957" table:style-name="c13">
            <text:p>+2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06:30</text:p>
          </table:table-cell>
          <table:table-cell office:value-type="float" office:value="9.014505" table:style-name="c1">
            <text:p>9.0145</text:p>
          </table:table-cell>
          <table:table-cell office:value-type="string" table:style-name="c1">
            <text:p>2026-05-21 06:30</text:p>
          </table:table-cell>
          <table:table-cell office:value-type="float" office:value="9.005495" table:style-name="c1">
            <text:p>9.0055</text:p>
          </table:table-cell>
          <table:table-cell office:value-type="float" office:value="-0.2996502248875599" table:style-name="c14">
            <text:p>-0.3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4:15</text:p>
          </table:table-cell>
          <table:table-cell office:value-type="float" office:value="9.174584999999999" table:style-name="c1">
            <text:p>9.1746</text:p>
          </table:table-cell>
          <table:table-cell office:value-type="string" table:style-name="c1">
            <text:p>2026-05-23 00:00</text:p>
          </table:table-cell>
          <table:table-cell office:value-type="float" office:value="8.77561" table:style-name="c1">
            <text:p>8.7756</text:p>
          </table:table-cell>
          <table:table-cell office:value-type="float" office:value="-4.539905013578249" table:style-name="c14">
            <text:p>-4.5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7:00</text:p>
          </table:table-cell>
          <table:table-cell office:value-type="float" office:value="9.014505" table:style-name="c1">
            <text:p>9.0145</text:p>
          </table:table-cell>
          <table:table-cell office:value-type="string" table:style-name="c1">
            <text:p>2026-05-26 03:00</text:p>
          </table:table-cell>
          <table:table-cell office:value-type="float" office:value="8.805595" table:style-name="c1">
            <text:p>8.8056</text:p>
          </table:table-cell>
          <table:table-cell office:value-type="float" office:value="-2.51275454841946" table:style-name="c14">
            <text:p>-2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1:15</text:p>
          </table:table-cell>
          <table:table-cell office:value-type="float" office:value="2094.2766149999998" table:style-name="c10">
            <text:p>2094.3</text:p>
          </table:table-cell>
          <table:table-cell office:value-type="string" table:style-name="c10">
            <text:p>2026-03-06 16:00</text:p>
          </table:table-cell>
          <table:table-cell office:value-type="float" office:value="1977.0110000000002" table:style-name="c10">
            <text:p>1977</text:p>
          </table:table-cell>
          <table:table-cell office:value-type="float" office:value="-5.788044383477953" table:style-name="c11">
            <text:p>-5.8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3:30</text:p>
          </table:table-cell>
          <table:table-cell office:value-type="float" office:value="2019.2391149999999" table:style-name="c10">
            <text:p>2019.2</text:p>
          </table:table-cell>
          <table:table-cell office:value-type="string" table:style-name="c10">
            <text:p>2026-03-10 13:30</text:p>
          </table:table-cell>
          <table:table-cell office:value-type="float" office:value="2053.3528100000003" table:style-name="c10">
            <text:p>2053.4</text:p>
          </table:table-cell>
          <table:table-cell office:value-type="float" office:value="1.4861559737966212" table:style-name="c12">
            <text:p>+1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2076.227595" table:style-name="c10">
            <text:p>2076.2</text:p>
          </table:table-cell>
          <table:table-cell office:value-type="string" table:style-name="c10">
            <text:p>2026-03-11 15:00</text:p>
          </table:table-cell>
          <table:table-cell office:value-type="float" office:value="2061.64866" table:style-name="c10">
            <text:p>2061.6</text:p>
          </table:table-cell>
          <table:table-cell office:value-type="float" office:value="-0.9006801911492723" table:style-name="c11">
            <text:p>-0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6:45</text:p>
          </table:table-cell>
          <table:table-cell office:value-type="float" office:value="2069.444205" table:style-name="c10">
            <text:p>2069.4</text:p>
          </table:table-cell>
          <table:table-cell office:value-type="string" table:style-name="c10">
            <text:p>2026-03-12 16:45</text:p>
          </table:table-cell>
          <table:table-cell office:value-type="float" office:value="2069.9744950000004" table:style-name="c10">
            <text:p>2070</text:p>
          </table:table-cell>
          <table:table-cell office:value-type="float" office:value="-0.17432646924173678" table:style-name="c11">
            <text:p>-0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3:00</text:p>
          </table:table-cell>
          <table:table-cell office:value-type="float" office:value="2147.71332" table:style-name="c10">
            <text:p>2147.7</text:p>
          </table:table-cell>
          <table:table-cell office:value-type="string" table:style-name="c10">
            <text:p>2026-03-14 13:00</text:p>
          </table:table-cell>
          <table:table-cell office:value-type="float" office:value="2074.4022800000002" table:style-name="c10">
            <text:p>2074.4</text:p>
          </table:table-cell>
          <table:table-cell office:value-type="float" office:value="-3.60652278106276" table:style-name="c11">
            <text:p>-3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2:45</text:p>
          </table:table-cell>
          <table:table-cell office:value-type="float" office:value="2104.93194" table:style-name="c10">
            <text:p>2104.9</text:p>
          </table:table-cell>
          <table:table-cell office:value-type="string" table:style-name="c10">
            <text:p>2026-03-16 02:45</text:p>
          </table:table-cell>
          <table:table-cell office:value-type="float" office:value="2175.2418350000003" table:style-name="c10">
            <text:p>2175.2</text:p>
          </table:table-cell>
          <table:table-cell office:value-type="float" office:value="3.1336683775075036" table:style-name="c12">
            <text:p>+3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45</text:p>
          </table:table-cell>
          <table:table-cell office:value-type="float" office:value="2239.5192" table:style-name="c10">
            <text:p>2239.5</text:p>
          </table:table-cell>
          <table:table-cell office:value-type="string" table:style-name="c10">
            <text:p>2026-03-17 03:45</text:p>
          </table:table-cell>
          <table:table-cell office:value-type="float" office:value="2315.251795" table:style-name="c10">
            <text:p>2315.3</text:p>
          </table:table-cell>
          <table:table-cell office:value-type="float" office:value="3.1749853567584863" table:style-name="c12">
            <text:p>+3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07:30</text:p>
          </table:table-cell>
          <table:table-cell office:value-type="float" office:value="2336.58771" table:style-name="c10">
            <text:p>2336.6</text:p>
          </table:table-cell>
          <table:table-cell office:value-type="string" table:style-name="c10">
            <text:p>2026-03-18 07:30</text:p>
          </table:table-cell>
          <table:table-cell office:value-type="float" office:value="2316.451195" table:style-name="c10">
            <text:p>2316.5</text:p>
          </table:table-cell>
          <table:table-cell office:value-type="float" office:value="-1.0599688097650994" table:style-name="c11">
            <text:p>-1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30</text:p>
          </table:table-cell>
          <table:table-cell office:value-type="float" office:value="2142.840885" table:style-name="c10">
            <text:p>2142.8</text:p>
          </table:table-cell>
          <table:table-cell office:value-type="string" table:style-name="c10">
            <text:p>2026-03-25 20:30</text:p>
          </table:table-cell>
          <table:table-cell office:value-type="float" office:value="2160.2993100000003" table:style-name="c10">
            <text:p>2160.3</text:p>
          </table:table-cell>
          <table:table-cell office:value-type="float" office:value="0.6132040307467834" table:style-name="c12">
            <text:p>+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2060.60979" table:style-name="c10">
            <text:p>2060.6</text:p>
          </table:table-cell>
          <table:table-cell office:value-type="string" table:style-name="c10">
            <text:p>2026-03-31 08:00</text:p>
          </table:table-cell>
          <table:table-cell office:value-type="float" office:value="2054.95201" table:style-name="c10">
            <text:p>2055</text:p>
          </table:table-cell>
          <table:table-cell office:value-type="float" office:value="-0.47391937645748783" table:style-name="c11">
            <text:p>-0.5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2:45</text:p>
          </table:table-cell>
          <table:table-cell office:value-type="float" office:value="2057.2681199999997" table:style-name="c10">
            <text:p>2057.3</text:p>
          </table:table-cell>
          <table:table-cell office:value-type="string" table:style-name="c10">
            <text:p>2026-04-01 12:45</text:p>
          </table:table-cell>
          <table:table-cell office:value-type="float" office:value="2141.0789250000003" table:style-name="c10">
            <text:p>2141.1</text:p>
          </table:table-cell>
          <table:table-cell office:value-type="float" office:value="3.8658445856306622" table:style-name="c12">
            <text:p>+3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3:00</text:p>
          </table:table-cell>
          <table:table-cell office:value-type="float" office:value="2086.82289" table:style-name="c10">
            <text:p>2086.8</text:p>
          </table:table-cell>
          <table:table-cell office:value-type="string" table:style-name="c10">
            <text:p>2026-04-06 23:00</text:p>
          </table:table-cell>
          <table:table-cell office:value-type="float" office:value="2104.357295" table:style-name="c10">
            <text:p>2104.4</text:p>
          </table:table-cell>
          <table:table-cell office:value-type="float" office:value="0.6386643941448389" table:style-name="c12">
            <text:p>+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0:00</text:p>
          </table:table-cell>
          <table:table-cell office:value-type="float" office:value="2114.4466949999996" table:style-name="c10">
            <text:p>2114.4</text:p>
          </table:table-cell>
          <table:table-cell office:value-type="string" table:style-name="c10">
            <text:p>2026-04-08 20:00</text:p>
          </table:table-cell>
          <table:table-cell office:value-type="float" office:value="2209.9244850000005" table:style-name="c10">
            <text:p>2209.9</text:p>
          </table:table-cell>
          <table:table-cell office:value-type="float" office:value="4.30657113134203" table:style-name="c12">
            <text:p>+4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2214.116505" table:style-name="c10">
            <text:p>2214.1</text:p>
          </table:table-cell>
          <table:table-cell office:value-type="string" table:style-name="c10">
            <text:p>2026-04-10 15:45</text:p>
          </table:table-cell>
          <table:table-cell office:value-type="float" office:value="2231.693595" table:style-name="c10">
            <text:p>2231.7</text:p>
          </table:table-cell>
          <table:table-cell office:value-type="float" office:value="0.5923777937600239" table:style-name="c12">
            <text:p>+0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09:45</text:p>
          </table:table-cell>
          <table:table-cell office:value-type="float" office:value="2243.751315" table:style-name="c10">
            <text:p>2243.8</text:p>
          </table:table-cell>
          <table:table-cell office:value-type="string" table:style-name="c10">
            <text:p>2026-04-12 09:45</text:p>
          </table:table-cell>
          <table:table-cell office:value-type="float" office:value="2212.59315" table:style-name="c10">
            <text:p>2212.6</text:p>
          </table:table-cell>
          <table:table-cell office:value-type="float" office:value="-1.585787982339304" table:style-name="c11">
            <text:p>-1.6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0:00</text:p>
          </table:table-cell>
          <table:table-cell office:value-type="float" office:value="2263.4611649999997" table:style-name="c10">
            <text:p>2263.5</text:p>
          </table:table-cell>
          <table:table-cell office:value-type="string" table:style-name="c10">
            <text:p>2026-04-14 20:00</text:p>
          </table:table-cell>
          <table:table-cell office:value-type="float" office:value="2312.1633400000005" table:style-name="c10">
            <text:p>2312.2</text:p>
          </table:table-cell>
          <table:table-cell office:value-type="float" office:value="1.947467054657448" table:style-name="c12">
            <text:p>+1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4:30</text:p>
          </table:table-cell>
          <table:table-cell office:value-type="float" office:value="2341.17" table:style-name="c10">
            <text:p>2341.2</text:p>
          </table:table-cell>
          <table:table-cell office:value-type="string" table:style-name="c10">
            <text:p>2026-04-16 14:30</text:p>
          </table:table-cell>
          <table:table-cell office:value-type="float" office:value="2293.81252" table:style-name="c10">
            <text:p>2293.8</text:p>
          </table:table-cell>
          <table:table-cell office:value-type="float" office:value="-2.2186689231230683" table:style-name="c11">
            <text:p>-2.2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45</text:p>
          </table:table-cell>
          <table:table-cell office:value-type="float" office:value="2339.8693499999995" table:style-name="c10">
            <text:p>2339.9</text:p>
          </table:table-cell>
          <table:table-cell office:value-type="string" table:style-name="c10">
            <text:p>2026-04-17 15:45</text:p>
          </table:table-cell>
          <table:table-cell office:value-type="float" office:value="2438.190295" table:style-name="c10">
            <text:p>2438.2</text:p>
          </table:table-cell>
          <table:table-cell office:value-type="float" office:value="3.993684630310468" table:style-name="c12">
            <text:p>+4.0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3:00</text:p>
          </table:table-cell>
          <table:table-cell office:value-type="float" office:value="2371.535175" table:style-name="c10">
            <text:p>2371.5</text:p>
          </table:table-cell>
          <table:table-cell office:value-type="string" table:style-name="c10">
            <text:p>2026-04-23 03:00</text:p>
          </table:table-cell>
          <table:table-cell office:value-type="float" office:value="2350.78402" table:style-name="c10">
            <text:p>2350.8</text:p>
          </table:table-cell>
          <table:table-cell office:value-type="float" office:value="-1.0731602265178553" table:style-name="c11">
            <text:p>-1.1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14:30</text:p>
          </table:table-cell>
          <table:table-cell office:value-type="float" office:value="2351.1649949999996" table:style-name="c10">
            <text:p>2351.2</text:p>
          </table:table-cell>
          <table:table-cell office:value-type="string" table:style-name="c10">
            <text:p>2026-04-27 14:30</text:p>
          </table:table-cell>
          <table:table-cell office:value-type="float" office:value="2312.2632900000003" table:style-name="c10">
            <text:p>2312.3</text:p>
          </table:table-cell>
          <table:table-cell office:value-type="float" office:value="-1.8511639722974649" table:style-name="c11">
            <text:p>-1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15</text:p>
          </table:table-cell>
          <table:table-cell office:value-type="float" office:value="2345.172" table:style-name="c10">
            <text:p>2345.2</text:p>
          </table:table-cell>
          <table:table-cell office:value-type="string" table:style-name="c10">
            <text:p>2026-04-29 18:00</text:p>
          </table:table-cell>
          <table:table-cell office:value-type="float" office:value="2281.97844" table:style-name="c10">
            <text:p>2282</text:p>
          </table:table-cell>
          <table:table-cell office:value-type="float" office:value="-2.8891371251899667" table:style-name="c11">
            <text:p>-2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2:30</text:p>
          </table:table-cell>
          <table:table-cell office:value-type="float" office:value="2305.9524" table:style-name="c10">
            <text:p>2306</text:p>
          </table:table-cell>
          <table:table-cell office:value-type="string" table:style-name="c10">
            <text:p>2026-05-02 12:30</text:p>
          </table:table-cell>
          <table:table-cell office:value-type="float" office:value="2303.897475" table:style-name="c10">
            <text:p>2303.9</text:p>
          </table:table-cell>
          <table:table-cell office:value-type="float" office:value="-0.28883579958220995" table:style-name="c11">
            <text:p>-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2329.48416" table:style-name="c10">
            <text:p>2329.5</text:p>
          </table:table-cell>
          <table:table-cell office:value-type="string" table:style-name="c10">
            <text:p>2026-05-03 21:45</text:p>
          </table:table-cell>
          <table:table-cell office:value-type="float" office:value="2318.93995" table:style-name="c10">
            <text:p>2318.9</text:p>
          </table:table-cell>
          <table:table-cell office:value-type="float" office:value="-0.65163658206846" table:style-name="c11">
            <text:p>-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2349.07395" table:style-name="c10">
            <text:p>2349.1</text:p>
          </table:table-cell>
          <table:table-cell office:value-type="string" table:style-name="c10">
            <text:p>2026-05-04 22:15</text:p>
          </table:table-cell>
          <table:table-cell office:value-type="float" office:value="2362.808005" table:style-name="c10">
            <text:p>2362.8</text:p>
          </table:table-cell>
          <table:table-cell office:value-type="float" office:value="0.38358953314368005" table:style-name="c12">
            <text:p>+0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3:45</text:p>
          </table:table-cell>
          <table:table-cell office:value-type="float" office:value="2386.77279" table:style-name="c10">
            <text:p>2386.8</text:p>
          </table:table-cell>
          <table:table-cell office:value-type="string" table:style-name="c10">
            <text:p>2026-05-06 03:45</text:p>
          </table:table-cell>
          <table:table-cell office:value-type="float" office:value="2375.1718200000005" table:style-name="c10">
            <text:p>2375.2</text:p>
          </table:table-cell>
          <table:table-cell office:value-type="float" office:value="-0.6849809305970567" table:style-name="c11">
            <text:p>-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45</text:p>
          </table:table-cell>
          <table:table-cell office:value-type="float" office:value="2418.96888" table:style-name="c10">
            <text:p>2419</text:p>
          </table:table-cell>
          <table:table-cell office:value-type="string" table:style-name="c10">
            <text:p>2026-05-07 01:00</text:p>
          </table:table-cell>
          <table:table-cell office:value-type="float" office:value="2328.49517" table:style-name="c10">
            <text:p>2328.5</text:p>
          </table:table-cell>
          <table:table-cell office:value-type="float" office:value="-3.9326000690355967" table:style-name="c11">
            <text:p>-3.9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7:30</text:p>
          </table:table-cell>
          <table:table-cell office:value-type="float" office:value="2333.035935" table:style-name="c10">
            <text:p>2333</text:p>
          </table:table-cell>
          <table:table-cell office:value-type="string" table:style-name="c10">
            <text:p>2026-05-10 17:30</text:p>
          </table:table-cell>
          <table:table-cell office:value-type="float" office:value="2354.672075" table:style-name="c10">
            <text:p>2354.7</text:p>
          </table:table-cell>
          <table:table-cell office:value-type="float" office:value="0.725627508265303" table:style-name="c12">
            <text:p>+0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2:45</text:p>
          </table:table-cell>
          <table:table-cell office:value-type="float" office:value="2367.693255" table:style-name="c10">
            <text:p>2367.7</text:p>
          </table:table-cell>
          <table:table-cell office:value-type="string" table:style-name="c10">
            <text:p>2026-05-11 22:45</text:p>
          </table:table-cell>
          <table:table-cell office:value-type="float" office:value="2339.58962" table:style-name="c10">
            <text:p>2339.6</text:p>
          </table:table-cell>
          <table:table-cell office:value-type="float" office:value="-1.3844899283788292" table:style-name="c11">
            <text:p>-1.4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30</text:p>
          </table:table-cell>
          <table:table-cell office:value-type="float" office:value="2136.937935" table:style-name="c10">
            <text:p>2136.9</text:p>
          </table:table-cell>
          <table:table-cell office:value-type="string" table:style-name="c10">
            <text:p>2026-05-22 15:30</text:p>
          </table:table-cell>
          <table:table-cell office:value-type="float" office:value="2119.9395" table:style-name="c10">
            <text:p>2119.9</text:p>
          </table:table-cell>
          <table:table-cell office:value-type="float" office:value="-0.9937674703921595" table:style-name="c11">
            <text:p>-1.0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0:00</text:p>
          </table:table-cell>
          <table:table-cell office:value-type="float" office:value="2100.90993" table:style-name="c10">
            <text:p>2100.9</text:p>
          </table:table-cell>
          <table:table-cell office:value-type="string" table:style-name="c10">
            <text:p>2026-05-26 00:00</text:p>
          </table:table-cell>
          <table:table-cell office:value-type="float" office:value="2111.953495" table:style-name="c10">
            <text:p>2112</text:p>
          </table:table-cell>
          <table:table-cell office:value-type="float" office:value="0.3247054938473992" table:style-name="c12">
            <text:p>+0.3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0:30</text:p>
          </table:table-cell>
          <table:table-cell office:value-type="float" office:value="2122.350645" table:style-name="c10">
            <text:p>2122.4</text:p>
          </table:table-cell>
          <table:table-cell office:value-type="string" table:style-name="c10">
            <text:p>2026-05-26 18:00</text:p>
          </table:table-cell>
          <table:table-cell office:value-type="float" office:value="2069.8045800000004" table:style-name="c10">
            <text:p>2069.8</text:p>
          </table:table-cell>
          <table:table-cell office:value-type="float" office:value="-2.6707935603835886" table:style-name="c11">
            <text:p>-2.7</text:p>
          </table:table-cell>
        </table:table-row>
        <table:table-row>
          <table:table-cell office:value-type="string" table:style-name="c9">
            <text:p>ETH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1:30</text:p>
          </table:table-cell>
          <table:table-cell office:value-type="float" office:value="2031.0750299999997" table:style-name="c10">
            <text:p>2031.1</text:p>
          </table:table-cell>
          <table:table-cell office:value-type="string" table:style-name="c10">
            <text:p>2026-05-31 18:00</text:p>
          </table:table-cell>
          <table:table-cell office:value-type="float" office:value="2004.997" table:style-name="c10">
            <text:p>2005</text:p>
          </table:table-cell>
          <table:table-cell office:value-type="float" office:value="-1.4812854551709886" table:style-name="c11">
            <text:p>-1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1.0245119999999999" table:style-name="c1">
            <text:p>1.0245</text:p>
          </table:table-cell>
          <table:table-cell office:value-type="string" table:style-name="c1">
            <text:p>2026-03-06 16:00</text:p>
          </table:table-cell>
          <table:table-cell office:value-type="float" office:value="0.9765115000000001" table:style-name="c1">
            <text:p>0.97651</text:p>
          </table:table-cell>
          <table:table-cell office:value-type="float" office:value="-4.8757404977686765" table:style-name="c14">
            <text:p>-4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30</text:p>
          </table:table-cell>
          <table:table-cell office:value-type="float" office:value="0.8814405" table:style-name="c1">
            <text:p>0.88144</text:p>
          </table:table-cell>
          <table:table-cell office:value-type="string" table:style-name="c1">
            <text:p>2026-03-16 02:30</text:p>
          </table:table-cell>
          <table:table-cell office:value-type="float" office:value="0.8925535000000001" table:style-name="c1">
            <text:p>0.89255</text:p>
          </table:table-cell>
          <table:table-cell office:value-type="float" office:value="1.058356809506722" table:style-name="c13">
            <text:p>+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30</text:p>
          </table:table-cell>
          <table:table-cell office:value-type="float" office:value="0.9044519999999999" table:style-name="c1">
            <text:p>0.90445</text:p>
          </table:table-cell>
          <table:table-cell office:value-type="string" table:style-name="c1">
            <text:p>2026-03-17 03:30</text:p>
          </table:table-cell>
          <table:table-cell office:value-type="float" office:value="0.9705145000000001" table:style-name="c1">
            <text:p>0.97051</text:p>
          </table:table-cell>
          <table:table-cell office:value-type="float" office:value="7.089645610214834" table:style-name="c13">
            <text:p>+7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7:15</text:p>
          </table:table-cell>
          <table:table-cell office:value-type="float" office:value="0.9704849999999999" table:style-name="c1">
            <text:p>0.97048</text:p>
          </table:table-cell>
          <table:table-cell office:value-type="string" table:style-name="c1">
            <text:p>2026-03-18 07:15</text:p>
          </table:table-cell>
          <table:table-cell office:value-type="float" office:value="0.9735130000000001" table:style-name="c1">
            <text:p>0.97351</text:p>
          </table:table-cell>
          <table:table-cell office:value-type="float" office:value="0.11148523810260436" table:style-name="c13">
            <text:p>+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5:00</text:p>
          </table:table-cell>
          <table:table-cell office:value-type="float" office:value="0.9254625" table:style-name="c1">
            <text:p>0.92546</text:p>
          </table:table-cell>
          <table:table-cell office:value-type="string" table:style-name="c1">
            <text:p>2026-03-22 04:00</text:p>
          </table:table-cell>
          <table:table-cell office:value-type="float" office:value="0.8845575000000001" table:style-name="c1">
            <text:p>0.88456</text:p>
          </table:table-cell>
          <table:table-cell office:value-type="float" office:value="-4.611016701649151" table:style-name="c14">
            <text:p>-4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9:00</text:p>
          </table:table-cell>
          <table:table-cell office:value-type="float" office:value="0.930465" table:style-name="c1">
            <text:p>0.93046</text:p>
          </table:table-cell>
          <table:table-cell office:value-type="string" table:style-name="c1">
            <text:p>2026-03-24 19:00</text:p>
          </table:table-cell>
          <table:table-cell office:value-type="float" office:value="0.9105445000000001" table:style-name="c1">
            <text:p>0.91054</text:p>
          </table:table-cell>
          <table:table-cell office:value-type="float" office:value="-2.336539091260803" table:style-name="c14">
            <text:p>-2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0.932466" table:style-name="c1">
            <text:p>0.93247</text:p>
          </table:table-cell>
          <table:table-cell office:value-type="string" table:style-name="c1">
            <text:p>2026-03-25 20:30</text:p>
          </table:table-cell>
          <table:table-cell office:value-type="float" office:value="0.9285355000000001" table:style-name="c1">
            <text:p>0.92854</text:p>
          </table:table-cell>
          <table:table-cell office:value-type="float" office:value="-0.6205740975542273" table:style-name="c14">
            <text:p>-0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02:00</text:p>
          </table:table-cell>
          <table:table-cell office:value-type="float" office:value="0.8294144999999999" table:style-name="c1">
            <text:p>0.82941</text:p>
          </table:table-cell>
          <table:table-cell office:value-type="string" table:style-name="c1">
            <text:p>2026-04-01 02:00</text:p>
          </table:table-cell>
          <table:table-cell office:value-type="float" office:value="0.8245875" table:style-name="c1">
            <text:p>0.82459</text:p>
          </table:table-cell>
          <table:table-cell office:value-type="float" office:value="-0.780713432487623" table:style-name="c14">
            <text:p>-0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0.8464229999999999" table:style-name="c1">
            <text:p>0.84642</text:p>
          </table:table-cell>
          <table:table-cell office:value-type="string" table:style-name="c1">
            <text:p>2026-04-02 05:00</text:p>
          </table:table-cell>
          <table:table-cell office:value-type="float" office:value="0.8095950000000001" table:style-name="c1">
            <text:p>0.8096</text:p>
          </table:table-cell>
          <table:table-cell office:value-type="float" office:value="-4.54221830042425" table:style-name="c14">
            <text:p>-4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12:00</text:p>
          </table:table-cell>
          <table:table-cell office:value-type="float" office:value="0.8504249999999999" table:style-name="c1">
            <text:p>0.85042</text:p>
          </table:table-cell>
          <table:table-cell office:value-type="string" table:style-name="c1">
            <text:p>2026-04-04 12:00</text:p>
          </table:table-cell>
          <table:table-cell office:value-type="float" office:value="0.83958" table:style-name="c1">
            <text:p>0.83958</text:p>
          </table:table-cell>
          <table:table-cell office:value-type="float" office:value="-1.472595516359465" table:style-name="c14">
            <text:p>-1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2:30</text:p>
          </table:table-cell>
          <table:table-cell office:value-type="float" office:value="0.8414204999999999" table:style-name="c1">
            <text:p>0.84142</text:p>
          </table:table-cell>
          <table:table-cell office:value-type="string" table:style-name="c1">
            <text:p>2026-04-05 07:00</text:p>
          </table:table-cell>
          <table:table-cell office:value-type="float" office:value="0.8205895" table:style-name="c1">
            <text:p>0.82059</text:p>
          </table:table-cell>
          <table:table-cell office:value-type="float" office:value="-2.6706454632968835" table:style-name="c14">
            <text:p>-2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30</text:p>
          </table:table-cell>
          <table:table-cell office:value-type="float" office:value="0.8514255" table:style-name="c1">
            <text:p>0.85143</text:p>
          </table:table-cell>
          <table:table-cell office:value-type="string" table:style-name="c1">
            <text:p>2026-04-07 02:30</text:p>
          </table:table-cell>
          <table:table-cell office:value-type="float" office:value="0.8545725000000001" table:style-name="c1">
            <text:p>0.85457</text:p>
          </table:table-cell>
          <table:table-cell office:value-type="float" office:value="0.1689765660648268" table:style-name="c13">
            <text:p>+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5:15</text:p>
          </table:table-cell>
          <table:table-cell office:value-type="float" office:value="0.8634314999999999" table:style-name="c1">
            <text:p>0.86343</text:p>
          </table:table-cell>
          <table:table-cell office:value-type="string" table:style-name="c1">
            <text:p>2026-04-08 05:15</text:p>
          </table:table-cell>
          <table:table-cell office:value-type="float" office:value="0.9075460000000001" table:style-name="c1">
            <text:p>0.90755</text:p>
          </table:table-cell>
          <table:table-cell office:value-type="float" office:value="4.8990933902689715" table:style-name="c13">
            <text:p>+4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21:30</text:p>
          </table:table-cell>
          <table:table-cell office:value-type="float" office:value="0.8984489999999999" table:style-name="c1">
            <text:p>0.89845</text:p>
          </table:table-cell>
          <table:table-cell office:value-type="string" table:style-name="c1">
            <text:p>2026-04-09 21:30</text:p>
          </table:table-cell>
          <table:table-cell office:value-type="float" office:value="0.9065465" table:style-name="c1">
            <text:p>0.90655</text:p>
          </table:table-cell>
          <table:table-cell office:value-type="float" office:value="0.699573770631412" table:style-name="c13">
            <text:p>+0.7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22:30</text:p>
          </table:table-cell>
          <table:table-cell office:value-type="float" office:value="0.918459" table:style-name="c1">
            <text:p>0.91846</text:p>
          </table:table-cell>
          <table:table-cell office:value-type="string" table:style-name="c1">
            <text:p>2026-04-10 22:30</text:p>
          </table:table-cell>
          <table:table-cell office:value-type="float" office:value="0.9155420000000001" table:style-name="c1">
            <text:p>0.91554</text:p>
          </table:table-cell>
          <table:table-cell office:value-type="float" office:value="-0.5168623159008789" table:style-name="c14">
            <text:p>-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5:30</text:p>
          </table:table-cell>
          <table:table-cell office:value-type="float" office:value="0.8954475" table:style-name="c1">
            <text:p>0.89545</text:p>
          </table:table-cell>
          <table:table-cell office:value-type="string" table:style-name="c1">
            <text:p>2026-04-12 03:00</text:p>
          </table:table-cell>
          <table:table-cell office:value-type="float" office:value="0.8675660000000001" table:style-name="c1">
            <text:p>0.86757</text:p>
          </table:table-cell>
          <table:table-cell office:value-type="float" office:value="-3.307370273969157" table:style-name="c14">
            <text:p>-3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9214605" table:style-name="c1">
            <text:p>0.92146</text:p>
          </table:table-cell>
          <table:table-cell office:value-type="string" table:style-name="c1">
            <text:p>2026-04-14 22:30</text:p>
          </table:table-cell>
          <table:table-cell office:value-type="float" office:value="0.885557" table:style-name="c1">
            <text:p>0.88556</text:p>
          </table:table-cell>
          <table:table-cell office:value-type="float" office:value="-4.0884800209015975" table:style-name="c14">
            <text:p>-4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1:45</text:p>
          </table:table-cell>
          <table:table-cell office:value-type="float" office:value="0.896448" table:style-name="c1">
            <text:p>0.89645</text:p>
          </table:table-cell>
          <table:table-cell office:value-type="string" table:style-name="c1">
            <text:p>2026-04-16 01:45</text:p>
          </table:table-cell>
          <table:table-cell office:value-type="float" office:value="0.9145425" table:style-name="c1">
            <text:p>0.91454</text:p>
          </table:table-cell>
          <table:table-cell office:value-type="float" office:value="1.8145312993614882" table:style-name="c13">
            <text:p>+1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15</text:p>
          </table:table-cell>
          <table:table-cell office:value-type="float" office:value="0.9214605" table:style-name="c1">
            <text:p>0.92146</text:p>
          </table:table-cell>
          <table:table-cell office:value-type="string" table:style-name="c1">
            <text:p>2026-04-17 02:15</text:p>
          </table:table-cell>
          <table:table-cell office:value-type="float" office:value="0.9845075000000001" table:style-name="c1">
            <text:p>0.98451</text:p>
          </table:table-cell>
          <table:table-cell office:value-type="float" office:value="6.628495687823843" table:style-name="c13">
            <text:p>+6.6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30</text:p>
          </table:table-cell>
          <table:table-cell office:value-type="float" office:value="0.9984989999999999" table:style-name="c1">
            <text:p>0.9985</text:p>
          </table:table-cell>
          <table:table-cell office:value-type="string" table:style-name="c1">
            <text:p>2026-04-18 07:30</text:p>
          </table:table-cell>
          <table:table-cell office:value-type="float" office:value="0.9885055" table:style-name="c1">
            <text:p>0.98851</text:p>
          </table:table-cell>
          <table:table-cell office:value-type="float" office:value="-1.1987515755649158" table:style-name="c14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624809999999999" table:style-name="c1">
            <text:p>0.96248</text:p>
          </table:table-cell>
          <table:table-cell office:value-type="string" table:style-name="c1">
            <text:p>2026-04-23 05:00</text:p>
          </table:table-cell>
          <table:table-cell office:value-type="float" office:value="0.9185405000000001" table:style-name="c1">
            <text:p>0.91854</text:p>
          </table:table-cell>
          <table:table-cell office:value-type="float" office:value="-4.756110765770938" table:style-name="c14">
            <text:p>-4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0.9394694999999998" table:style-name="c1">
            <text:p>0.93947</text:p>
          </table:table-cell>
          <table:table-cell office:value-type="string" table:style-name="c1">
            <text:p>2026-04-25 11:15</text:p>
          </table:table-cell>
          <table:table-cell office:value-type="float" office:value="0.9465265" table:style-name="c1">
            <text:p>0.94653</text:p>
          </table:table-cell>
          <table:table-cell office:value-type="float" office:value="0.5497670255926623" table:style-name="c13">
            <text:p>+0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2:45</text:p>
          </table:table-cell>
          <table:table-cell office:value-type="float" office:value="0.9384689999999999" table:style-name="c1">
            <text:p>0.93847</text:p>
          </table:table-cell>
          <table:table-cell office:value-type="string" table:style-name="c1">
            <text:p>2026-04-26 22:45</text:p>
          </table:table-cell>
          <table:table-cell office:value-type="float" office:value="0.9425285" table:style-name="c1">
            <text:p>0.94253</text:p>
          </table:table-cell>
          <table:table-cell office:value-type="float" office:value="0.23180153297552852" table:style-name="c13">
            <text:p>+0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5:00</text:p>
          </table:table-cell>
          <table:table-cell office:value-type="float" office:value="0.9474734999999999" table:style-name="c1">
            <text:p>0.94747</text:p>
          </table:table-cell>
          <table:table-cell office:value-type="string" table:style-name="c1">
            <text:p>2026-04-29 20:00</text:p>
          </table:table-cell>
          <table:table-cell office:value-type="float" office:value="0.8945525000000001" table:style-name="c1">
            <text:p>0.89455</text:p>
          </table:table-cell>
          <table:table-cell office:value-type="float" office:value="-5.774220645485051" table:style-name="c14">
            <text:p>-5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3:30</text:p>
          </table:table-cell>
          <table:table-cell office:value-type="float" office:value="0.9334665" table:style-name="c1">
            <text:p>0.93347</text:p>
          </table:table-cell>
          <table:table-cell office:value-type="string" table:style-name="c1">
            <text:p>2026-05-02 03:30</text:p>
          </table:table-cell>
          <table:table-cell office:value-type="float" office:value="0.9185405000000001" table:style-name="c1">
            <text:p>0.91854</text:p>
          </table:table-cell>
          <table:table-cell office:value-type="float" office:value="-1.7956897713522602" table:style-name="c14">
            <text:p>-1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0.934467" table:style-name="c1">
            <text:p>0.93447</text:p>
          </table:table-cell>
          <table:table-cell office:value-type="string" table:style-name="c1">
            <text:p>2026-05-04 22:15</text:p>
          </table:table-cell>
          <table:table-cell office:value-type="float" office:value="0.945527" table:style-name="c1">
            <text:p>0.94553</text:p>
          </table:table-cell>
          <table:table-cell office:value-type="float" office:value="0.9812964531652701" table:style-name="c13">
            <text:p>+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4:30</text:p>
          </table:table-cell>
          <table:table-cell office:value-type="float" office:value="0.9454724999999999" table:style-name="c1">
            <text:p>0.94547</text:p>
          </table:table-cell>
          <table:table-cell office:value-type="string" table:style-name="c1">
            <text:p>2026-05-06 04:30</text:p>
          </table:table-cell>
          <table:table-cell office:value-type="float" office:value="1.125437" table:style-name="c1">
            <text:p>1.1254</text:p>
          </table:table-cell>
          <table:table-cell office:value-type="float" office:value="18.796395605054617" table:style-name="c13">
            <text:p>+18.8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4:45</text:p>
          </table:table-cell>
          <table:table-cell office:value-type="float" office:value="1.094547" table:style-name="c1">
            <text:p>1.0945</text:p>
          </table:table-cell>
          <table:table-cell office:value-type="string" table:style-name="c1">
            <text:p>2026-05-08 04:45</text:p>
          </table:table-cell>
          <table:table-cell office:value-type="float" office:value="1.095452" table:style-name="c1">
            <text:p>1.0955</text:p>
          </table:table-cell>
          <table:table-cell office:value-type="float" office:value="-0.11738267502444666" table:style-name="c14">
            <text:p>-0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45</text:p>
          </table:table-cell>
          <table:table-cell office:value-type="float" office:value="1.1935965" table:style-name="c1">
            <text:p>1.1936</text:p>
          </table:table-cell>
          <table:table-cell office:value-type="string" table:style-name="c1">
            <text:p>2026-05-09 15:45</text:p>
          </table:table-cell>
          <table:table-cell office:value-type="float" office:value="1.2083955000000002" table:style-name="c1">
            <text:p>1.2084</text:p>
          </table:table-cell>
          <table:table-cell office:value-type="float" office:value="1.0374877435967766" table:style-name="c13">
            <text:p>+1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9:00</text:p>
          </table:table-cell>
          <table:table-cell office:value-type="float" office:value="1.2216105" table:style-name="c1">
            <text:p>1.2216</text:p>
          </table:table-cell>
          <table:table-cell office:value-type="string" table:style-name="c1">
            <text:p>2026-05-10 19:00</text:p>
          </table:table-cell>
          <table:table-cell office:value-type="float" office:value="1.1884055000000002" table:style-name="c1">
            <text:p>1.1884</text:p>
          </table:table-cell>
          <table:table-cell office:value-type="float" office:value="-2.9125996047430602" table:style-name="c14">
            <text:p>-2.9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0.9694845" table:style-name="c1">
            <text:p>0.96948</text:p>
          </table:table-cell>
          <table:table-cell office:value-type="string" table:style-name="c1">
            <text:p>2026-05-21 15:30</text:p>
          </table:table-cell>
          <table:table-cell office:value-type="float" office:value="0.991504" table:style-name="c1">
            <text:p>0.9915</text:p>
          </table:table-cell>
          <table:table-cell office:value-type="float" office:value="2.066818345625965" table:style-name="c13">
            <text:p>+2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7:30</text:p>
          </table:table-cell>
          <table:table-cell office:value-type="float" office:value="1.022511" table:style-name="c1">
            <text:p>1.0225</text:p>
          </table:table-cell>
          <table:table-cell office:value-type="string" table:style-name="c1">
            <text:p>2026-05-23 03:00</text:p>
          </table:table-cell>
          <table:table-cell office:value-type="float" office:value="0.969515" table:style-name="c1">
            <text:p>0.96952</text:p>
          </table:table-cell>
          <table:table-cell office:value-type="float" office:value="-5.372466456106584" table:style-name="c14">
            <text:p>-5.4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30</text:p>
          </table:table-cell>
          <table:table-cell office:value-type="float" office:value="0.9854924999999999" table:style-name="c1">
            <text:p>0.98549</text:p>
          </table:table-cell>
          <table:table-cell office:value-type="string" table:style-name="c1">
            <text:p>2026-05-26 14:30</text:p>
          </table:table-cell>
          <table:table-cell office:value-type="float" office:value="1.0484755" table:style-name="c1">
            <text:p>1.0485</text:p>
          </table:table-cell>
          <table:table-cell office:value-type="float" office:value="6.178342044764418" table:style-name="c13">
            <text:p>+6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01:15</text:p>
          </table:table-cell>
          <table:table-cell office:value-type="float" office:value="1.0355174999999999" table:style-name="c1">
            <text:p>1.0355</text:p>
          </table:table-cell>
          <table:table-cell office:value-type="string" table:style-name="c1">
            <text:p>2026-05-28 01:15</text:p>
          </table:table-cell>
          <table:table-cell office:value-type="float" office:value="1.0494750000000002" table:style-name="c1">
            <text:p>1.0495</text:p>
          </table:table-cell>
          <table:table-cell office:value-type="float" office:value="1.1452823805488954" table:style-name="c13">
            <text:p>+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3:30</text:p>
          </table:table-cell>
          <table:table-cell office:value-type="float" office:value="0.9784889999999999" table:style-name="c1">
            <text:p>0.97849</text:p>
          </table:table-cell>
          <table:table-cell office:value-type="string" table:style-name="c1">
            <text:p>2026-05-31 08:00</text:p>
          </table:table-cell>
          <table:table-cell office:value-type="float" office:value="0.961519" table:style-name="c1">
            <text:p>0.96152</text:p>
          </table:table-cell>
          <table:table-cell office:value-type="float" office:value="-1.9307397917605607" table:style-name="c14">
            <text:p>-1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0:00</text:p>
          </table:table-cell>
          <table:table-cell office:value-type="float" office:value="0.096938445" table:style-name="c10">
            <text:p>0.096938</text:p>
          </table:table-cell>
          <table:table-cell office:value-type="string" table:style-name="c10">
            <text:p>2026-03-11 06:00</text:p>
          </table:table-cell>
          <table:table-cell office:value-type="float" office:value="0.09407294" table:style-name="c10">
            <text:p>0.094073</text:p>
          </table:table-cell>
          <table:table-cell office:value-type="float" office:value="-3.149995656583926" table:style-name="c11">
            <text:p>-3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9:45</text:p>
          </table:table-cell>
          <table:table-cell office:value-type="float" office:value="0.097438695" table:style-name="c10">
            <text:p>0.097439</text:p>
          </table:table-cell>
          <table:table-cell office:value-type="string" table:style-name="c10">
            <text:p>2026-03-14 06:00</text:p>
          </table:table-cell>
          <table:table-cell office:value-type="float" office:value="0.09422286500000002" table:style-name="c10">
            <text:p>0.094223</text:p>
          </table:table-cell>
          <table:table-cell office:value-type="float" office:value="-3.493664921451378" table:style-name="c11">
            <text:p>-3.5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00</text:p>
          </table:table-cell>
          <table:table-cell office:value-type="float" office:value="0.09600797999999999" table:style-name="c10">
            <text:p>0.096008</text:p>
          </table:table-cell>
          <table:table-cell office:value-type="string" table:style-name="c10">
            <text:p>2026-03-16 09:00</text:p>
          </table:table-cell>
          <table:table-cell office:value-type="float" office:value="0.097561195" table:style-name="c10">
            <text:p>0.097561</text:p>
          </table:table-cell>
          <table:table-cell office:value-type="float" office:value="1.414663834396901" table:style-name="c12">
            <text:p>+1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5:15</text:p>
          </table:table-cell>
          <table:table-cell office:value-type="float" office:value="0.099239595" table:style-name="c10">
            <text:p>0.09924</text:p>
          </table:table-cell>
          <table:table-cell office:value-type="string" table:style-name="c10">
            <text:p>2026-03-17 15:15</text:p>
          </table:table-cell>
          <table:table-cell office:value-type="float" office:value="0.09903046" table:style-name="c10">
            <text:p>0.09903</text:p>
          </table:table-cell>
          <table:table-cell office:value-type="float" office:value="-0.4102161939899096" table:style-name="c11">
            <text:p>-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5:15</text:p>
          </table:table-cell>
          <table:table-cell office:value-type="float" office:value="0.10067031" table:style-name="c10">
            <text:p>0.10067</text:p>
          </table:table-cell>
          <table:table-cell office:value-type="string" table:style-name="c10">
            <text:p>2026-03-18 16:00</text:p>
          </table:table-cell>
          <table:table-cell office:value-type="float" office:value="0.09521237" table:style-name="c10">
            <text:p>0.095212</text:p>
          </table:table-cell>
          <table:table-cell office:value-type="float" office:value="-5.610660707839276" table:style-name="c11">
            <text:p>-5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0:30</text:p>
          </table:table-cell>
          <table:table-cell office:value-type="float" office:value="0.093396675" table:style-name="c10">
            <text:p>0.093397</text:p>
          </table:table-cell>
          <table:table-cell office:value-type="string" table:style-name="c10">
            <text:p>2026-03-24 20:30</text:p>
          </table:table-cell>
          <table:table-cell office:value-type="float" office:value="0.09362316500000001" table:style-name="c10">
            <text:p>0.093623</text:p>
          </table:table-cell>
          <table:table-cell office:value-type="float" office:value="0.042118515637756815" table:style-name="c12">
            <text:p>+0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0.09372683999999999" table:style-name="c10">
            <text:p>0.093727</text:p>
          </table:table-cell>
          <table:table-cell office:value-type="string" table:style-name="c10">
            <text:p>2026-03-25 20:45</text:p>
          </table:table-cell>
          <table:table-cell office:value-type="float" office:value="0.09427284000000001" table:style-name="c10">
            <text:p>0.094273</text:p>
          </table:table-cell>
          <table:table-cell office:value-type="float" office:value="0.3814794063685678" table:style-name="c12">
            <text:p>+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2:45</text:p>
          </table:table-cell>
          <table:table-cell office:value-type="float" office:value="0.09100548" table:style-name="c10">
            <text:p>0.091005</text:p>
          </table:table-cell>
          <table:table-cell office:value-type="string" table:style-name="c10">
            <text:p>2026-04-02 05:00</text:p>
          </table:table-cell>
          <table:table-cell office:value-type="float" office:value="0.08587704" table:style-name="c10">
            <text:p>0.085877</text:p>
          </table:table-cell>
          <table:table-cell office:value-type="float" office:value="-5.823944011899062" table:style-name="c11">
            <text:p>-5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2:15</text:p>
          </table:table-cell>
          <table:table-cell office:value-type="float" office:value="0.08902449" table:style-name="c10">
            <text:p>0.089024</text:p>
          </table:table-cell>
          <table:table-cell office:value-type="string" table:style-name="c10">
            <text:p>2026-04-07 02:15</text:p>
          </table:table-cell>
          <table:table-cell office:value-type="float" office:value="0.08683656000000001" table:style-name="c10">
            <text:p>0.086837</text:p>
          </table:table-cell>
          <table:table-cell office:value-type="float" office:value="-2.652659154172088" table:style-name="c11">
            <text:p>-2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04:00</text:p>
          </table:table-cell>
          <table:table-cell office:value-type="float" office:value="0.089754855" table:style-name="c10">
            <text:p>0.089755</text:p>
          </table:table-cell>
          <table:table-cell office:value-type="string" table:style-name="c10">
            <text:p>2026-04-09 12:00</text:p>
          </table:table-cell>
          <table:table-cell office:value-type="float" office:value="0.08807594" table:style-name="c10">
            <text:p>0.088076</text:p>
          </table:table-cell>
          <table:table-cell office:value-type="float" office:value="-2.0667169525926843" table:style-name="c11">
            <text:p>-2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9:15</text:p>
          </table:table-cell>
          <table:table-cell office:value-type="float" office:value="0.09032514" table:style-name="c10">
            <text:p>0.090325</text:p>
          </table:table-cell>
          <table:table-cell office:value-type="string" table:style-name="c10">
            <text:p>2026-04-11 05:00</text:p>
          </table:table-cell>
          <table:table-cell office:value-type="float" office:value="0.08810592500000002" table:style-name="c10">
            <text:p>0.088106</text:p>
          </table:table-cell>
          <table:table-cell office:value-type="float" office:value="-2.651907037260026" table:style-name="c11">
            <text:p>-2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14:00</text:p>
          </table:table-cell>
          <table:table-cell office:value-type="float" office:value="0.087573765" table:style-name="c10">
            <text:p>0.087574</text:p>
          </table:table-cell>
          <table:table-cell office:value-type="string" table:style-name="c10">
            <text:p>2026-04-14 20:00</text:p>
          </table:table-cell>
          <table:table-cell office:value-type="float" office:value="0.084987485" table:style-name="c10">
            <text:p>0.084987</text:p>
          </table:table-cell>
          <table:table-cell office:value-type="float" office:value="-3.1472553252849034" table:style-name="c11">
            <text:p>-3.1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22:15</text:p>
          </table:table-cell>
          <table:table-cell office:value-type="float" office:value="0.08729362499999999" table:style-name="c10">
            <text:p>0.087294</text:p>
          </table:table-cell>
          <table:table-cell office:value-type="string" table:style-name="c10">
            <text:p>2026-04-16 22:15</text:p>
          </table:table-cell>
          <table:table-cell office:value-type="float" office:value="0.09033481" table:style-name="c10">
            <text:p>0.090335</text:p>
          </table:table-cell>
          <table:table-cell office:value-type="float" office:value="3.27699269541164" table:style-name="c12">
            <text:p>+3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6:45</text:p>
          </table:table-cell>
          <table:table-cell office:value-type="float" office:value="0.08946470999999999" table:style-name="c10">
            <text:p>0.089465</text:p>
          </table:table-cell>
          <table:table-cell office:value-type="string" table:style-name="c10">
            <text:p>2026-04-18 06:45</text:p>
          </table:table-cell>
          <table:table-cell office:value-type="float" office:value="0.090024965" table:style-name="c10">
            <text:p>0.090025</text:p>
          </table:table-cell>
          <table:table-cell office:value-type="float" office:value="0.42507832972913384" table:style-name="c12">
            <text:p>+0.4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4:00</text:p>
          </table:table-cell>
          <table:table-cell office:value-type="float" office:value="0.08939467499999999" table:style-name="c10">
            <text:p>0.089395</text:p>
          </table:table-cell>
          <table:table-cell office:value-type="string" table:style-name="c10">
            <text:p>2026-04-18 20:00</text:p>
          </table:table-cell>
          <table:table-cell office:value-type="float" office:value="0.088765595" table:style-name="c10">
            <text:p>0.088766</text:p>
          </table:table-cell>
          <table:table-cell office:value-type="float" office:value="-0.9022041015362303" table:style-name="c11">
            <text:p>-0.9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8:00</text:p>
          </table:table-cell>
          <table:table-cell office:value-type="float" office:value="0.090595275" table:style-name="c10">
            <text:p>0.090595</text:p>
          </table:table-cell>
          <table:table-cell office:value-type="string" table:style-name="c10">
            <text:p>2026-04-22 08:00</text:p>
          </table:table-cell>
          <table:table-cell office:value-type="float" office:value="0.09077459" table:style-name="c10">
            <text:p>0.090775</text:p>
          </table:table-cell>
          <table:table-cell office:value-type="float" office:value="-0.002365913023605337" table:style-name="c11">
            <text:p>-0.0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5:30</text:p>
          </table:table-cell>
          <table:table-cell office:value-type="float" office:value="0.09192594" table:style-name="c10">
            <text:p>0.091926</text:p>
          </table:table-cell>
          <table:table-cell office:value-type="string" table:style-name="c10">
            <text:p>2026-04-23 15:30</text:p>
          </table:table-cell>
          <table:table-cell office:value-type="float" office:value="0.090984485" table:style-name="c10">
            <text:p>0.090984</text:p>
          </table:table-cell>
          <table:table-cell office:value-type="float" office:value="-1.2219978229376816" table:style-name="c11">
            <text:p>-1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21:45</text:p>
          </table:table-cell>
          <table:table-cell office:value-type="float" office:value="0.090895425" table:style-name="c10">
            <text:p>0.090895</text:p>
          </table:table-cell>
          <table:table-cell office:value-type="string" table:style-name="c10">
            <text:p>2026-04-24 21:45</text:p>
          </table:table-cell>
          <table:table-cell office:value-type="float" office:value="0.091664145" table:style-name="c10">
            <text:p>0.091664</text:p>
          </table:table-cell>
          <table:table-cell office:value-type="float" office:value="0.6441285401822983" table:style-name="c12">
            <text:p>+0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5:00</text:p>
          </table:table-cell>
          <table:table-cell office:value-type="float" office:value="0.09174585" table:style-name="c10">
            <text:p>0.091746</text:p>
          </table:table-cell>
          <table:table-cell office:value-type="string" table:style-name="c10">
            <text:p>2026-04-27 05:00</text:p>
          </table:table-cell>
          <table:table-cell office:value-type="float" office:value="0.09251372000000001" table:style-name="c10">
            <text:p>0.092514</text:p>
          </table:table-cell>
          <table:table-cell office:value-type="float" office:value="0.6353803182596485" table:style-name="c12">
            <text:p>+0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15</text:p>
          </table:table-cell>
          <table:table-cell office:value-type="float" office:value="0.08861428499999999" table:style-name="c10">
            <text:p>0.088614</text:p>
          </table:table-cell>
          <table:table-cell office:value-type="string" table:style-name="c10">
            <text:p>2026-05-05 00:00</text:p>
          </table:table-cell>
          <table:table-cell office:value-type="float" office:value="0.08769613" table:style-name="c10">
            <text:p>0.087696</text:p>
          </table:table-cell>
          <table:table-cell office:value-type="float" office:value="-1.2339540559064388" table:style-name="c11">
            <text:p>-1.2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2:45</text:p>
          </table:table-cell>
          <table:table-cell office:value-type="float" office:value="0.08994495" table:style-name="c10">
            <text:p>0.089945</text:p>
          </table:table-cell>
          <table:table-cell office:value-type="string" table:style-name="c10">
            <text:p>2026-05-06 12:45</text:p>
          </table:table-cell>
          <table:table-cell office:value-type="float" office:value="0.09259368000000001" table:style-name="c10">
            <text:p>0.092594</text:p>
          </table:table-cell>
          <table:table-cell office:value-type="float" office:value="2.7390478661447837" table:style-name="c12">
            <text:p>+2.7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6:45</text:p>
          </table:table-cell>
          <table:table-cell office:value-type="float" office:value="0.09090543" table:style-name="c10">
            <text:p>0.090905</text:p>
          </table:table-cell>
          <table:table-cell office:value-type="string" table:style-name="c10">
            <text:p>2026-05-07 22:00</text:p>
          </table:table-cell>
          <table:table-cell office:value-type="float" office:value="0.08963516" table:style-name="c10">
            <text:p>0.089635</text:p>
          </table:table-cell>
          <table:table-cell office:value-type="float" office:value="-1.5944599622266686" table:style-name="c11">
            <text:p>-1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1:00</text:p>
          </table:table-cell>
          <table:table-cell office:value-type="float" office:value="0.09104549999999999" table:style-name="c10">
            <text:p>0.091045</text:p>
          </table:table-cell>
          <table:table-cell office:value-type="string" table:style-name="c10">
            <text:p>2026-05-09 11:00</text:p>
          </table:table-cell>
          <table:table-cell office:value-type="float" office:value="0.092563695" table:style-name="c10">
            <text:p>0.092564</text:p>
          </table:table-cell>
          <table:table-cell office:value-type="float" office:value="1.4642790403644579" table:style-name="c12">
            <text:p>+1.5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30</text:p>
          </table:table-cell>
          <table:table-cell office:value-type="float" office:value="0.092996475" table:style-name="c10">
            <text:p>0.092996</text:p>
          </table:table-cell>
          <table:table-cell office:value-type="string" table:style-name="c10">
            <text:p>2026-05-10 18:30</text:p>
          </table:table-cell>
          <table:table-cell office:value-type="float" office:value="0.0985507" table:style-name="c10">
            <text:p>0.098551</text:p>
          </table:table-cell>
          <table:table-cell office:value-type="float" office:value="5.760672273545864" table:style-name="c12">
            <text:p>+5.8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07:00</text:p>
          </table:table-cell>
          <table:table-cell office:value-type="float" office:value="0.096338145" table:style-name="c10">
            <text:p>0.096338</text:p>
          </table:table-cell>
          <table:table-cell office:value-type="string" table:style-name="c10">
            <text:p>2026-05-12 07:00</text:p>
          </table:table-cell>
          <table:table-cell office:value-type="float" office:value="0.09593201" table:style-name="c10">
            <text:p>0.095932</text:p>
          </table:table-cell>
          <table:table-cell office:value-type="float" office:value="-0.6206296457026417" table:style-name="c11">
            <text:p>-0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8:30</text:p>
          </table:table-cell>
          <table:table-cell office:value-type="float" office:value="0.09750873" table:style-name="c10">
            <text:p>0.097509</text:p>
          </table:table-cell>
          <table:table-cell office:value-type="string" table:style-name="c10">
            <text:p>2026-05-15 14:00</text:p>
          </table:table-cell>
          <table:table-cell office:value-type="float" office:value="0.091564195" table:style-name="c10">
            <text:p>0.091564</text:p>
          </table:table-cell>
          <table:table-cell office:value-type="float" office:value="-6.284126381099431" table:style-name="c11">
            <text:p>-6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7:30</text:p>
          </table:table-cell>
          <table:table-cell office:value-type="float" office:value="0.090075015" table:style-name="c10">
            <text:p>0.090075</text:p>
          </table:table-cell>
          <table:table-cell office:value-type="string" table:style-name="c10">
            <text:p>2026-05-23 00:00</text:p>
          </table:table-cell>
          <table:table-cell office:value-type="float" office:value="0.087866045" table:style-name="c10">
            <text:p>0.087866</text:p>
          </table:table-cell>
          <table:table-cell office:value-type="float" office:value="-2.647364781404693" table:style-name="c11">
            <text:p>-2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22:15</text:p>
          </table:table-cell>
          <table:table-cell office:value-type="float" office:value="0.09120558" table:style-name="c10">
            <text:p>0.091206</text:p>
          </table:table-cell>
          <table:table-cell office:value-type="string" table:style-name="c10">
            <text:p>2026-05-29 22:15</text:p>
          </table:table-cell>
          <table:table-cell office:value-type="float" office:value="0.09283356000000001" table:style-name="c10">
            <text:p>0.092834</text:p>
          </table:table-cell>
          <table:table-cell office:value-type="float" office:value="1.5814884501145876" table:style-name="c12">
            <text:p>+1.6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23:15</text:p>
          </table:table-cell>
          <table:table-cell office:value-type="float" office:value="0.09634815" table:style-name="c10">
            <text:p>0.096348</text:p>
          </table:table-cell>
          <table:table-cell office:value-type="string" table:style-name="c10">
            <text:p>2026-05-30 23:15</text:p>
          </table:table-cell>
          <table:table-cell office:value-type="float" office:value="0.09525235" table:style-name="c10">
            <text:p>0.095252</text:p>
          </table:table-cell>
          <table:table-cell office:value-type="float" office:value="-1.3349601913996367" table:style-name="c11">
            <text:p>-1.3</text:p>
          </table:table-cell>
        </table:table-row>
        <table:table-row>
          <table:table-cell office:value-type="string" table:style-name="c9">
            <text:p>HB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5:15</text:p>
          </table:table-cell>
          <table:table-cell office:value-type="float" office:value="0.096037995" table:style-name="c10">
            <text:p>0.096038</text:p>
          </table:table-cell>
          <table:table-cell office:value-type="string" table:style-name="c10">
            <text:p>2026-06-01 05:15</text:p>
          </table:table-cell>
          <table:table-cell office:value-type="float" office:value="0.095362295" table:style-name="c10">
            <text:p>0.095362</text:p>
          </table:table-cell>
          <table:table-cell office:value-type="float" office:value="-0.9020692567613398" table:style-name="c11">
            <text:p>-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30</text:p>
          </table:table-cell>
          <table:table-cell office:value-type="float" office:value="2.923461" table:style-name="c1">
            <text:p>2.9235</text:p>
          </table:table-cell>
          <table:table-cell office:value-type="string" table:style-name="c1">
            <text:p>2026-03-10 13:30</text:p>
          </table:table-cell>
          <table:table-cell office:value-type="float" office:value="2.9765110000000004" table:style-name="c1">
            <text:p>2.9765</text:p>
          </table:table-cell>
          <table:table-cell office:value-type="float" office:value="1.6111025428764192" table:style-name="c13">
            <text:p>+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3.0265125" table:style-name="c1">
            <text:p>3.0265</text:p>
          </table:table-cell>
          <table:table-cell office:value-type="string" table:style-name="c1">
            <text:p>2026-03-11 15:00</text:p>
          </table:table-cell>
          <table:table-cell office:value-type="float" office:value="2.9895045000000002" table:style-name="c1">
            <text:p>2.9895</text:p>
          </table:table-cell>
          <table:table-cell office:value-type="float" office:value="-1.4202491975665033" table:style-name="c14">
            <text:p>-1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9:45</text:p>
          </table:table-cell>
          <table:table-cell office:value-type="float" office:value="3.0105044999999997" table:style-name="c1">
            <text:p>3.0105</text:p>
          </table:table-cell>
          <table:table-cell office:value-type="string" table:style-name="c1">
            <text:p>2026-03-12 19:45</text:p>
          </table:table-cell>
          <table:table-cell office:value-type="float" office:value="3.0314835" table:style-name="c1">
            <text:p>3.0315</text:p>
          </table:table-cell>
          <table:table-cell office:value-type="float" office:value="0.4955669218730696" table:style-name="c13">
            <text:p>+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3.1005495" table:style-name="c1">
            <text:p>3.1005</text:p>
          </table:table-cell>
          <table:table-cell office:value-type="string" table:style-name="c1">
            <text:p>2026-03-14 00:30</text:p>
          </table:table-cell>
          <table:table-cell office:value-type="float" office:value="3.0814585000000005" table:style-name="c1">
            <text:p>3.0815</text:p>
          </table:table-cell>
          <table:table-cell office:value-type="float" office:value="-0.8143987232424266" table:style-name="c14">
            <text:p>-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0:45</text:p>
          </table:table-cell>
          <table:table-cell office:value-type="float" office:value="3.10155" table:style-name="c1">
            <text:p>3.1016</text:p>
          </table:table-cell>
          <table:table-cell office:value-type="string" table:style-name="c1">
            <text:p>2026-03-16 20:45</text:p>
          </table:table-cell>
          <table:table-cell office:value-type="float" office:value="3.2843570000000004" table:style-name="c1">
            <text:p>3.2844</text:p>
          </table:table-cell>
          <table:table-cell office:value-type="float" office:value="5.682370761619215" table:style-name="c13">
            <text:p>+5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22:15</text:p>
          </table:table-cell>
          <table:table-cell office:value-type="float" office:value="3.323661" table:style-name="c1">
            <text:p>3.3237</text:p>
          </table:table-cell>
          <table:table-cell office:value-type="string" table:style-name="c1">
            <text:p>2026-03-17 22:15</text:p>
          </table:table-cell>
          <table:table-cell office:value-type="float" office:value="3.2393795" table:style-name="c1">
            <text:p>3.2394</text:p>
          </table:table-cell>
          <table:table-cell office:value-type="float" office:value="-2.730634069494442" table:style-name="c14">
            <text:p>-2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22:30</text:p>
          </table:table-cell>
          <table:table-cell office:value-type="float" office:value="3.249624" table:style-name="c1">
            <text:p>3.2496</text:p>
          </table:table-cell>
          <table:table-cell office:value-type="string" table:style-name="c1">
            <text:p>2026-03-18 15:00</text:p>
          </table:table-cell>
          <table:table-cell office:value-type="float" office:value="3.0474755" table:style-name="c1">
            <text:p>3.0475</text:p>
          </table:table-cell>
          <table:table-cell office:value-type="float" office:value="-6.408138403843033" table:style-name="c14">
            <text:p>-6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15</text:p>
          </table:table-cell>
          <table:table-cell office:value-type="float" office:value="3.0665324999999997" table:style-name="c1">
            <text:p>3.0665</text:p>
          </table:table-cell>
          <table:table-cell office:value-type="string" table:style-name="c1">
            <text:p>2026-03-24 20:15</text:p>
          </table:table-cell>
          <table:table-cell office:value-type="float" office:value="3.0174905" table:style-name="c1">
            <text:p>3.0175</text:p>
          </table:table-cell>
          <table:table-cell office:value-type="float" office:value="-1.7959686880703152" table:style-name="c14">
            <text:p>-1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30</text:p>
          </table:table-cell>
          <table:table-cell office:value-type="float" office:value="3.0565275" table:style-name="c1">
            <text:p>3.0565</text:p>
          </table:table-cell>
          <table:table-cell office:value-type="string" table:style-name="c1">
            <text:p>2026-03-25 20:30</text:p>
          </table:table-cell>
          <table:table-cell office:value-type="float" office:value="3.0614685" table:style-name="c1">
            <text:p>3.0615</text:p>
          </table:table-cell>
          <table:table-cell office:value-type="float" office:value="-0.038569112546837925" table:style-name="c14">
            <text:p>-0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22:45</text:p>
          </table:table-cell>
          <table:table-cell office:value-type="float" office:value="3.0865424999999997" table:style-name="c1">
            <text:p>3.0865</text:p>
          </table:table-cell>
          <table:table-cell office:value-type="string" table:style-name="c1">
            <text:p>2026-03-26 08:00</text:p>
          </table:table-cell>
          <table:table-cell office:value-type="float" office:value="2.9975005" table:style-name="c1">
            <text:p>2.9975</text:p>
          </table:table-cell>
          <table:table-cell office:value-type="float" office:value="-3.078979262378534" table:style-name="c14">
            <text:p>-3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2.939469" table:style-name="c1">
            <text:p>2.9395</text:p>
          </table:table-cell>
          <table:table-cell office:value-type="string" table:style-name="c1">
            <text:p>2026-03-31 08:00</text:p>
          </table:table-cell>
          <table:table-cell office:value-type="float" office:value="2.8925530000000004" table:style-name="c1">
            <text:p>2.8926</text:p>
          </table:table-cell>
          <table:table-cell office:value-type="float" office:value="-1.7927800377210756" table:style-name="c14">
            <text:p>-1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4:00</text:p>
          </table:table-cell>
          <table:table-cell office:value-type="float" office:value="2.8824404999999995" table:style-name="c1">
            <text:p>2.8824</text:p>
          </table:table-cell>
          <table:table-cell office:value-type="string" table:style-name="c1">
            <text:p>2026-04-01 14:00</text:p>
          </table:table-cell>
          <table:table-cell office:value-type="float" office:value="2.9235375" table:style-name="c1">
            <text:p>2.9235</text:p>
          </table:table-cell>
          <table:table-cell office:value-type="float" office:value="1.223020858106194" table:style-name="c13">
            <text:p>+1.2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2.8804395" table:style-name="c1">
            <text:p>2.8804</text:p>
          </table:table-cell>
          <table:table-cell office:value-type="string" table:style-name="c1">
            <text:p>2026-04-07 02:15</text:p>
          </table:table-cell>
          <table:table-cell office:value-type="float" office:value="2.8195895" table:style-name="c1">
            <text:p>2.8196</text:p>
          </table:table-cell>
          <table:table-cell office:value-type="float" office:value="-2.308201904969709" table:style-name="c14">
            <text:p>-2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7:15</text:p>
          </table:table-cell>
          <table:table-cell office:value-type="float" office:value="2.8554269999999997" table:style-name="c1">
            <text:p>2.8554</text:p>
          </table:table-cell>
          <table:table-cell office:value-type="string" table:style-name="c1">
            <text:p>2026-04-07 17:00</text:p>
          </table:table-cell>
          <table:table-cell office:value-type="float" office:value="2.806596" table:style-name="c1">
            <text:p>2.8066</text:p>
          </table:table-cell>
          <table:table-cell office:value-type="float" office:value="-1.9065934938627405" table:style-name="c14">
            <text:p>-1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1:15</text:p>
          </table:table-cell>
          <table:table-cell office:value-type="float" office:value="2.905452" table:style-name="c1">
            <text:p>2.9055</text:p>
          </table:table-cell>
          <table:table-cell office:value-type="string" table:style-name="c1">
            <text:p>2026-04-08 21:15</text:p>
          </table:table-cell>
          <table:table-cell office:value-type="float" office:value="2.9335325" table:style-name="c1">
            <text:p>2.9335</text:p>
          </table:table-cell>
          <table:table-cell office:value-type="float" office:value="0.7646441425464889" table:style-name="c13">
            <text:p>+0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06:15</text:p>
          </table:table-cell>
          <table:table-cell office:value-type="float" office:value="2.9104544999999997" table:style-name="c1">
            <text:p>2.9105</text:p>
          </table:table-cell>
          <table:table-cell office:value-type="string" table:style-name="c1">
            <text:p>2026-04-10 06:15</text:p>
          </table:table-cell>
          <table:table-cell office:value-type="float" office:value="2.9955015" table:style-name="c1">
            <text:p>2.9955</text:p>
          </table:table-cell>
          <table:table-cell office:value-type="float" office:value="2.7163796067418478" table:style-name="c13">
            <text:p>+2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0:00</text:p>
          </table:table-cell>
          <table:table-cell office:value-type="float" office:value="3.0085034999999998" table:style-name="c1">
            <text:p>3.0085</text:p>
          </table:table-cell>
          <table:table-cell office:value-type="string" table:style-name="c1">
            <text:p>2026-04-11 10:00</text:p>
          </table:table-cell>
          <table:table-cell office:value-type="float" office:value="3.0114935000000003" table:style-name="c1">
            <text:p>3.0115</text:p>
          </table:table-cell>
          <table:table-cell office:value-type="float" office:value="-0.10071371053745892" table:style-name="c14">
            <text:p>-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6:45</text:p>
          </table:table-cell>
          <table:table-cell office:value-type="float" office:value="3.0325155" table:style-name="c1">
            <text:p>3.0325</text:p>
          </table:table-cell>
          <table:table-cell office:value-type="string" table:style-name="c1">
            <text:p>2026-04-12 05:00</text:p>
          </table:table-cell>
          <table:table-cell office:value-type="float" office:value="2.920539" table:style-name="c1">
            <text:p>2.9205</text:p>
          </table:table-cell>
          <table:table-cell office:value-type="float" office:value="-3.88504716500212" table:style-name="c14">
            <text:p>-3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8:45</text:p>
          </table:table-cell>
          <table:table-cell office:value-type="float" office:value="3.025512" table:style-name="c1">
            <text:p>3.0255</text:p>
          </table:table-cell>
          <table:table-cell office:value-type="string" table:style-name="c1">
            <text:p>2026-04-16 08:45</text:p>
          </table:table-cell>
          <table:table-cell office:value-type="float" office:value="3.350324" table:style-name="c1">
            <text:p>3.3503</text:p>
          </table:table-cell>
          <table:table-cell office:value-type="float" office:value="10.514408877704007" table:style-name="c13">
            <text:p>+10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15</text:p>
          </table:table-cell>
          <table:table-cell office:value-type="float" office:value="3.3566775" table:style-name="c1">
            <text:p>3.3567</text:p>
          </table:table-cell>
          <table:table-cell office:value-type="string" table:style-name="c1">
            <text:p>2026-04-17 12:15</text:p>
          </table:table-cell>
          <table:table-cell office:value-type="float" office:value="3.3953015" table:style-name="c1">
            <text:p>3.3953</text:p>
          </table:table-cell>
          <table:table-cell office:value-type="float" office:value="0.9484614563508131" table:style-name="c13">
            <text:p>+0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6:45</text:p>
          </table:table-cell>
          <table:table-cell office:value-type="float" office:value="3.38169" table:style-name="c1">
            <text:p>3.3817</text:p>
          </table:table-cell>
          <table:table-cell office:value-type="string" table:style-name="c1">
            <text:p>2026-04-18 16:00</text:p>
          </table:table-cell>
          <table:table-cell office:value-type="float" office:value="3.2773605" table:style-name="c1">
            <text:p>3.2774</text:p>
          </table:table-cell>
          <table:table-cell office:value-type="float" office:value="-3.2788618601793718" table:style-name="c14">
            <text:p>-3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0 17:15</text:p>
          </table:table-cell>
          <table:table-cell office:value-type="float" office:value="3.3306645" table:style-name="c1">
            <text:p>3.3307</text:p>
          </table:table-cell>
          <table:table-cell office:value-type="string" table:style-name="c1">
            <text:p>2026-04-21 17:15</text:p>
          </table:table-cell>
          <table:table-cell office:value-type="float" office:value="3.2413785" table:style-name="c1">
            <text:p>3.2414</text:p>
          </table:table-cell>
          <table:table-cell office:value-type="float" office:value="-2.8752675516102055" table:style-name="c14">
            <text:p>-2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3.3566775" table:style-name="c1">
            <text:p>3.3567</text:p>
          </table:table-cell>
          <table:table-cell office:value-type="string" table:style-name="c1">
            <text:p>2026-04-23 05:30</text:p>
          </table:table-cell>
          <table:table-cell office:value-type="float" office:value="3.2713635" table:style-name="c1">
            <text:p>3.2714</text:p>
          </table:table-cell>
          <table:table-cell office:value-type="float" office:value="-2.736439697781512" table:style-name="c14">
            <text:p>-2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3.3006494999999996" table:style-name="c1">
            <text:p>3.3006</text:p>
          </table:table-cell>
          <table:table-cell office:value-type="string" table:style-name="c1">
            <text:p>2026-04-23 11:00</text:p>
          </table:table-cell>
          <table:table-cell office:value-type="float" office:value="3.2573705" table:style-name="c1">
            <text:p>3.2574</text:p>
          </table:table-cell>
          <table:table-cell office:value-type="float" office:value="-1.5085056328913327" table:style-name="c14">
            <text:p>-1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16:00</text:p>
          </table:table-cell>
          <table:table-cell office:value-type="float" office:value="3.3516749999999997" table:style-name="c1">
            <text:p>3.3517</text:p>
          </table:table-cell>
          <table:table-cell office:value-type="string" table:style-name="c1">
            <text:p>2026-04-24 16:00</text:p>
          </table:table-cell>
          <table:table-cell office:value-type="float" office:value="3.4372805000000004" table:style-name="c1">
            <text:p>3.4373</text:p>
          </table:table-cell>
          <table:table-cell office:value-type="float" office:value="2.3491053363020153" table:style-name="c13">
            <text:p>+2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15:15</text:p>
          </table:table-cell>
          <table:table-cell office:value-type="float" office:value="3.6228105" table:style-name="c1">
            <text:p>3.6228</text:p>
          </table:table-cell>
          <table:table-cell office:value-type="string" table:style-name="c1">
            <text:p>2026-04-26 15:15</text:p>
          </table:table-cell>
          <table:table-cell office:value-type="float" office:value="3.6511735" table:style-name="c1">
            <text:p>3.6512</text:p>
          </table:table-cell>
          <table:table-cell office:value-type="float" office:value="0.581435440067879" table:style-name="c13">
            <text:p>+0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9:30</text:p>
          </table:table-cell>
          <table:table-cell office:value-type="float" office:value="3.743871" table:style-name="c1">
            <text:p>3.7439</text:p>
          </table:table-cell>
          <table:table-cell office:value-type="string" table:style-name="c1">
            <text:p>2026-04-27 19:30</text:p>
          </table:table-cell>
          <table:table-cell office:value-type="float" office:value="3.524237" table:style-name="c1">
            <text:p>3.5242</text:p>
          </table:table-cell>
          <table:table-cell office:value-type="float" office:value="-6.054667742638575" table:style-name="c14">
            <text:p>-6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3.6498239999999997" table:style-name="c1">
            <text:p>3.6498</text:p>
          </table:table-cell>
          <table:table-cell office:value-type="string" table:style-name="c1">
            <text:p>2026-05-02 13:15</text:p>
          </table:table-cell>
          <table:table-cell office:value-type="float" office:value="3.7451265" table:style-name="c1">
            <text:p>3.7451</text:p>
          </table:table-cell>
          <table:table-cell office:value-type="float" office:value="2.4060336094699375" table:style-name="c13">
            <text:p>+2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3.8008995" table:style-name="c1">
            <text:p>3.8009</text:p>
          </table:table-cell>
          <table:table-cell office:value-type="string" table:style-name="c1">
            <text:p>2026-05-04 20:00</text:p>
          </table:table-cell>
          <table:table-cell office:value-type="float" office:value="3.6831575" table:style-name="c1">
            <text:p>3.6832</text:p>
          </table:table-cell>
          <table:table-cell office:value-type="float" office:value="-3.2914480333536944" table:style-name="c14">
            <text:p>-3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30</text:p>
          </table:table-cell>
          <table:table-cell office:value-type="float" office:value="3.8569275" table:style-name="c1">
            <text:p>3.8569</text:p>
          </table:table-cell>
          <table:table-cell office:value-type="string" table:style-name="c1">
            <text:p>2026-05-06 20:30</text:p>
          </table:table-cell>
          <table:table-cell office:value-type="float" office:value="3.8690645000000004" table:style-name="c1">
            <text:p>3.8691</text:p>
          </table:table-cell>
          <table:table-cell office:value-type="float" office:value="0.11415148624132065" table:style-name="c13">
            <text:p>+0.1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00</text:p>
          </table:table-cell>
          <table:table-cell office:value-type="float" office:value="3.8739359999999996" table:style-name="c1">
            <text:p>3.8739</text:p>
          </table:table-cell>
          <table:table-cell office:value-type="string" table:style-name="c1">
            <text:p>2026-05-08 05:00</text:p>
          </table:table-cell>
          <table:table-cell office:value-type="float" office:value="3.8950515" table:style-name="c1">
            <text:p>3.8951</text:p>
          </table:table-cell>
          <table:table-cell office:value-type="float" office:value="0.34407620702820996" table:style-name="c13">
            <text:p>+0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5:15</text:p>
          </table:table-cell>
          <table:table-cell office:value-type="float" office:value="3.9109544999999994" table:style-name="c1">
            <text:p>3.911</text:p>
          </table:table-cell>
          <table:table-cell office:value-type="string" table:style-name="c1">
            <text:p>2026-05-09 05:15</text:p>
          </table:table-cell>
          <table:table-cell office:value-type="float" office:value="4.289854" table:style-name="c1">
            <text:p>4.2899</text:p>
          </table:table-cell>
          <table:table-cell office:value-type="float" office:value="9.468892615702917" table:style-name="c13">
            <text:p>+9.5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9:15</text:p>
          </table:table-cell>
          <table:table-cell office:value-type="float" office:value="4.144071" table:style-name="c1">
            <text:p>4.1441</text:p>
          </table:table-cell>
          <table:table-cell office:value-type="string" table:style-name="c1">
            <text:p>2026-05-11 09:15</text:p>
          </table:table-cell>
          <table:table-cell office:value-type="float" office:value="4.345826" table:style-name="c1">
            <text:p>4.3458</text:p>
          </table:table-cell>
          <table:table-cell office:value-type="float" office:value="4.658889623898799" table:style-name="c13">
            <text:p>+4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1 11:00</text:p>
          </table:table-cell>
          <table:table-cell office:value-type="float" office:value="4.3911945" table:style-name="c1">
            <text:p>4.3912</text:p>
          </table:table-cell>
          <table:table-cell office:value-type="string" table:style-name="c1">
            <text:p>2026-05-12 11:00</text:p>
          </table:table-cell>
          <table:table-cell office:value-type="float" office:value="4.8265855" table:style-name="c1">
            <text:p>4.8266</text:p>
          </table:table-cell>
          <table:table-cell office:value-type="float" office:value="9.695372308958294" table:style-name="c13">
            <text:p>+9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4:15</text:p>
          </table:table-cell>
          <table:table-cell office:value-type="float" office:value="4.9114545" table:style-name="c1">
            <text:p>4.9115</text:p>
          </table:table-cell>
          <table:table-cell office:value-type="string" table:style-name="c1">
            <text:p>2026-05-13 14:15</text:p>
          </table:table-cell>
          <table:table-cell office:value-type="float" office:value="5.7421275000000005" table:style-name="c1">
            <text:p>5.7421</text:p>
          </table:table-cell>
          <table:table-cell office:value-type="float" office:value="16.67926450560624" table:style-name="c13">
            <text:p>+16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5:00</text:p>
          </table:table-cell>
          <table:table-cell office:value-type="float" office:value="5.2686329999999995" table:style-name="c1">
            <text:p>5.2686</text:p>
          </table:table-cell>
          <table:table-cell office:value-type="string" table:style-name="c1">
            <text:p>2026-05-15 05:00</text:p>
          </table:table-cell>
          <table:table-cell office:value-type="float" office:value="5.085456000000001" table:style-name="c1">
            <text:p>5.0855</text:p>
          </table:table-cell>
          <table:table-cell office:value-type="float" office:value="-3.6696962294393787" table:style-name="c14">
            <text:p>-3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9 00:00</text:p>
          </table:table-cell>
          <table:table-cell office:value-type="float" office:value="5.148573" table:style-name="c1">
            <text:p>5.1486</text:p>
          </table:table-cell>
          <table:table-cell office:value-type="string" table:style-name="c1">
            <text:p>2026-05-20 00:00</text:p>
          </table:table-cell>
          <table:table-cell office:value-type="float" office:value="4.921538000000001" table:style-name="c1">
            <text:p>4.9215</text:p>
          </table:table-cell>
          <table:table-cell office:value-type="float" office:value="-4.6007535381550895" table:style-name="c14">
            <text:p>-4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0 15:30</text:p>
          </table:table-cell>
          <table:table-cell office:value-type="float" office:value="5.171584499999999" table:style-name="c1">
            <text:p>5.1716</text:p>
          </table:table-cell>
          <table:table-cell office:value-type="string" table:style-name="c1">
            <text:p>2026-05-21 15:30</text:p>
          </table:table-cell>
          <table:table-cell office:value-type="float" office:value="5.035481000000001" table:style-name="c1">
            <text:p>5.0355</text:p>
          </table:table-cell>
          <table:table-cell office:value-type="float" office:value="-2.8263954020087745" table:style-name="c14">
            <text:p>-2.8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7:45</text:p>
          </table:table-cell>
          <table:table-cell office:value-type="float" office:value="5.224611" table:style-name="c1">
            <text:p>5.2246</text:p>
          </table:table-cell>
          <table:table-cell office:value-type="string" table:style-name="c1">
            <text:p>2026-05-22 17:45</text:p>
          </table:table-cell>
          <table:table-cell office:value-type="float" office:value="5.6161905" table:style-name="c1">
            <text:p>5.6162</text:p>
          </table:table-cell>
          <table:table-cell office:value-type="float" office:value="7.280020181224978" table:style-name="c13">
            <text:p>+7.3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20:45</text:p>
          </table:table-cell>
          <table:table-cell office:value-type="float" office:value="5.489743499999999" table:style-name="c1">
            <text:p>5.4897</text:p>
          </table:table-cell>
          <table:table-cell office:value-type="string" table:style-name="c1">
            <text:p>2026-05-24 20:45</text:p>
          </table:table-cell>
          <table:table-cell office:value-type="float" office:value="5.1724125" table:style-name="c1">
            <text:p>5.1724</text:p>
          </table:table-cell>
          <table:table-cell office:value-type="float" office:value="-5.968778916310025" table:style-name="c14">
            <text:p>-6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0:30</text:p>
          </table:table-cell>
          <table:table-cell office:value-type="float" office:value="5.3276625" table:style-name="c1">
            <text:p>5.3277</text:p>
          </table:table-cell>
          <table:table-cell office:value-type="string" table:style-name="c1">
            <text:p>2026-05-26 10:30</text:p>
          </table:table-cell>
          <table:table-cell office:value-type="float" office:value="5.602197500000001" table:style-name="c1">
            <text:p>5.6022</text:p>
          </table:table-cell>
          <table:table-cell office:value-type="float" office:value="4.942809481597266" table:style-name="c13">
            <text:p>+4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3:45</text:p>
          </table:table-cell>
          <table:table-cell office:value-type="float" office:value="5.960979" table:style-name="c1">
            <text:p>5.961</text:p>
          </table:table-cell>
          <table:table-cell office:value-type="string" table:style-name="c1">
            <text:p>2026-05-27 13:45</text:p>
          </table:table-cell>
          <table:table-cell office:value-type="float" office:value="5.562217500000001" table:style-name="c1">
            <text:p>5.5622</text:p>
          </table:table-cell>
          <table:table-cell office:value-type="float" office:value="-6.876057989509765" table:style-name="c14">
            <text:p>-6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06:30</text:p>
          </table:table-cell>
          <table:table-cell office:value-type="float" office:value="6.087041999999999" table:style-name="c1">
            <text:p>6.087</text:p>
          </table:table-cell>
          <table:table-cell office:value-type="string" table:style-name="c1">
            <text:p>2026-05-30 06:30</text:p>
          </table:table-cell>
          <table:table-cell office:value-type="float" office:value="7.01649" table:style-name="c1">
            <text:p>7.0165</text:p>
          </table:table-cell>
          <table:table-cell office:value-type="float" office:value="15.038865125129774" table:style-name="c13">
            <text:p>+15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5:00</text:p>
          </table:table-cell>
          <table:table-cell office:value-type="float" office:value="6.5912939999999995" table:style-name="c1">
            <text:p>6.5913</text:p>
          </table:table-cell>
          <table:table-cell office:value-type="string" table:style-name="c1">
            <text:p>2026-06-01 05:00</text:p>
          </table:table-cell>
          <table:table-cell office:value-type="float" office:value="6.5017475000000005" table:style-name="c1">
            <text:p>6.5017</text:p>
          </table:table-cell>
          <table:table-cell office:value-type="float" office:value="-1.5557414561161886" table:style-name="c14">
            <text:p>-1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2:30</text:p>
          </table:table-cell>
          <table:table-cell office:value-type="float" office:value="6.78339" table:style-name="c1">
            <text:p>6.7834</text:p>
          </table:table-cell>
          <table:table-cell office:value-type="string" table:style-name="c1">
            <text:p>2026-06-02 12:30</text:p>
          </table:table-cell>
          <table:table-cell office:value-type="float" office:value="7.1254355" table:style-name="c1">
            <text:p>7.1254</text:p>
          </table:table-cell>
          <table:table-cell office:value-type="float" office:value="4.832417927253196" table:style-name="c13">
            <text:p>+4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1:00</text:p>
          </table:table-cell>
          <table:table-cell office:value-type="float" office:value="9.28464" table:style-name="c10">
            <text:p>9.2846</text:p>
          </table:table-cell>
          <table:table-cell office:value-type="string" table:style-name="c10">
            <text:p>2026-03-06 16:00</text:p>
          </table:table-cell>
          <table:table-cell office:value-type="float" office:value="8.785605" table:style-name="c10">
            <text:p>8.7856</text:p>
          </table:table-cell>
          <table:table-cell office:value-type="float" office:value="-5.564000590168261" table:style-name="c11">
            <text:p>-5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4:30</text:p>
          </table:table-cell>
          <table:table-cell office:value-type="float" office:value="8.92446" table:style-name="c10">
            <text:p>8.9245</text:p>
          </table:table-cell>
          <table:table-cell office:value-type="string" table:style-name="c10">
            <text:p>2026-03-10 14:30</text:p>
          </table:table-cell>
          <table:table-cell office:value-type="float" office:value="8.925535" table:style-name="c10">
            <text:p>8.9255</text:p>
          </table:table-cell>
          <table:table-cell office:value-type="float" office:value="-0.18787853231455598" table:style-name="c11">
            <text:p>-0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05:00</text:p>
          </table:table-cell>
          <table:table-cell office:value-type="float" office:value="9.02451" table:style-name="c10">
            <text:p>9.0245</text:p>
          </table:table-cell>
          <table:table-cell office:value-type="string" table:style-name="c10">
            <text:p>2026-03-12 05:00</text:p>
          </table:table-cell>
          <table:table-cell office:value-type="float" office:value="8.865565" table:style-name="c10">
            <text:p>8.8656</text:p>
          </table:table-cell>
          <table:table-cell office:value-type="float" office:value="-1.9576383031876476" table:style-name="c11">
            <text:p>-2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7:45</text:p>
          </table:table-cell>
          <table:table-cell office:value-type="float" office:value="8.944469999999999" table:style-name="c10">
            <text:p>8.9445</text:p>
          </table:table-cell>
          <table:table-cell office:value-type="string" table:style-name="c10">
            <text:p>2026-03-13 07:45</text:p>
          </table:table-cell>
          <table:table-cell office:value-type="float" office:value="9.17541" table:style-name="c10">
            <text:p>9.1754</text:p>
          </table:table-cell>
          <table:table-cell office:value-type="float" office:value="2.3768692321624485" table:style-name="c12">
            <text:p>+2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00</text:p>
          </table:table-cell>
          <table:table-cell office:value-type="float" office:value="9.28464" table:style-name="c10">
            <text:p>9.2846</text:p>
          </table:table-cell>
          <table:table-cell office:value-type="string" table:style-name="c10">
            <text:p>2026-03-14 09:00</text:p>
          </table:table-cell>
          <table:table-cell office:value-type="float" office:value="8.965515000000002" table:style-name="c10">
            <text:p>8.9655</text:p>
          </table:table-cell>
          <table:table-cell office:value-type="float" office:value="-3.6301575988406443" table:style-name="c11">
            <text:p>-3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15</text:p>
          </table:table-cell>
          <table:table-cell office:value-type="float" office:value="9.294645" table:style-name="c10">
            <text:p>9.2946</text:p>
          </table:table-cell>
          <table:table-cell office:value-type="string" table:style-name="c10">
            <text:p>2026-03-16 09:15</text:p>
          </table:table-cell>
          <table:table-cell office:value-type="float" office:value="9.5952" table:style-name="c10">
            <text:p>9.5952</text:p>
          </table:table-cell>
          <table:table-cell office:value-type="float" office:value="3.027272103453127" table:style-name="c12">
            <text:p>+3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1:00</text:p>
          </table:table-cell>
          <table:table-cell office:value-type="float" office:value="9.734865" table:style-name="c10">
            <text:p>9.7349</text:p>
          </table:table-cell>
          <table:table-cell office:value-type="string" table:style-name="c10">
            <text:p>2026-03-17 11:00</text:p>
          </table:table-cell>
          <table:table-cell office:value-type="float" office:value="9.745125" table:style-name="c10">
            <text:p>9.7451</text:p>
          </table:table-cell>
          <table:table-cell office:value-type="float" office:value="-0.09471630962524236" table:style-name="c11">
            <text:p>-0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9.2046" table:style-name="c10">
            <text:p>9.2046</text:p>
          </table:table-cell>
          <table:table-cell office:value-type="string" table:style-name="c10">
            <text:p>2026-03-25 20:45</text:p>
          </table:table-cell>
          <table:table-cell office:value-type="float" office:value="9.305345" table:style-name="c10">
            <text:p>9.3053</text:p>
          </table:table-cell>
          <table:table-cell office:value-type="float" office:value="0.892419174597503" table:style-name="c12">
            <text:p>+0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22:45</text:p>
          </table:table-cell>
          <table:table-cell office:value-type="float" office:value="9.38469" table:style-name="c10">
            <text:p>9.3847</text:p>
          </table:table-cell>
          <table:table-cell office:value-type="string" table:style-name="c10">
            <text:p>2026-03-26 11:00</text:p>
          </table:table-cell>
          <table:table-cell office:value-type="float" office:value="8.975510000000002" table:style-name="c10">
            <text:p>8.9755</text:p>
          </table:table-cell>
          <table:table-cell office:value-type="float" office:value="-4.551264287792134" table:style-name="c11">
            <text:p>-4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8.754375" table:style-name="c10">
            <text:p>8.7544</text:p>
          </table:table-cell>
          <table:table-cell office:value-type="string" table:style-name="c10">
            <text:p>2026-03-31 08:00</text:p>
          </table:table-cell>
          <table:table-cell office:value-type="float" office:value="8.705645" table:style-name="c10">
            <text:p>8.7056</text:p>
          </table:table-cell>
          <table:table-cell office:value-type="float" office:value="-0.7554232524309312" table:style-name="c11">
            <text:p>-0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3:15</text:p>
          </table:table-cell>
          <table:table-cell office:value-type="float" office:value="8.684339999999999" table:style-name="c10">
            <text:p>8.6843</text:p>
          </table:table-cell>
          <table:table-cell office:value-type="string" table:style-name="c10">
            <text:p>2026-04-01 13:15</text:p>
          </table:table-cell>
          <table:table-cell office:value-type="float" office:value="8.9955" table:style-name="c10">
            <text:p>8.9955</text:p>
          </table:table-cell>
          <table:table-cell office:value-type="float" office:value="3.375938706913839" table:style-name="c12">
            <text:p>+3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9:15</text:p>
          </table:table-cell>
          <table:table-cell office:value-type="float" office:value="8.774384999999999" table:style-name="c10">
            <text:p>8.7744</text:p>
          </table:table-cell>
          <table:table-cell office:value-type="string" table:style-name="c10">
            <text:p>2026-04-05 07:00</text:p>
          </table:table-cell>
          <table:table-cell office:value-type="float" office:value="8.55572" table:style-name="c10">
            <text:p>8.5557</text:p>
          </table:table-cell>
          <table:table-cell office:value-type="float" office:value="-2.687001815853729" table:style-name="c11">
            <text:p>-2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15</text:p>
          </table:table-cell>
          <table:table-cell office:value-type="float" office:value="8.894445" table:style-name="c10">
            <text:p>8.8944</text:p>
          </table:table-cell>
          <table:table-cell office:value-type="string" table:style-name="c10">
            <text:p>2026-04-07 00:15</text:p>
          </table:table-cell>
          <table:table-cell office:value-type="float" office:value="8.81559" table:style-name="c10">
            <text:p>8.8156</text:p>
          </table:table-cell>
          <table:table-cell office:value-type="float" office:value="-1.084692349101024" table:style-name="c11">
            <text:p>-1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08:45</text:p>
          </table:table-cell>
          <table:table-cell office:value-type="float" office:value="8.834415" table:style-name="c10">
            <text:p>8.8344</text:p>
          </table:table-cell>
          <table:table-cell office:value-type="string" table:style-name="c10">
            <text:p>2026-04-07 14:00</text:p>
          </table:table-cell>
          <table:table-cell office:value-type="float" office:value="8.615689999999999" table:style-name="c10">
            <text:p>8.6157</text:p>
          </table:table-cell>
          <table:table-cell office:value-type="float" office:value="-2.670779721237926" table:style-name="c11">
            <text:p>-2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9.2046" table:style-name="c10">
            <text:p>9.2046</text:p>
          </table:table-cell>
          <table:table-cell office:value-type="string" table:style-name="c10">
            <text:p>2026-04-08 23:00</text:p>
          </table:table-cell>
          <table:table-cell office:value-type="float" office:value="8.925535" table:style-name="c10">
            <text:p>8.9255</text:p>
          </table:table-cell>
          <table:table-cell office:value-type="float" office:value="-3.225638750896298" table:style-name="c11">
            <text:p>-3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22:30</text:p>
          </table:table-cell>
          <table:table-cell office:value-type="float" office:value="9.10455" table:style-name="c10">
            <text:p>9.1045</text:p>
          </table:table-cell>
          <table:table-cell office:value-type="string" table:style-name="c10">
            <text:p>2026-04-10 22:30</text:p>
          </table:table-cell>
          <table:table-cell office:value-type="float" office:value="9.09545" table:style-name="c10">
            <text:p>9.0954</text:p>
          </table:table-cell>
          <table:table-cell office:value-type="float" office:value="-0.2996502248875377" table:style-name="c11">
            <text:p>-0.3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7:00</text:p>
          </table:table-cell>
          <table:table-cell office:value-type="float" office:value="9.10455" table:style-name="c10">
            <text:p>9.1045</text:p>
          </table:table-cell>
          <table:table-cell office:value-type="string" table:style-name="c10">
            <text:p>2026-04-12 05:00</text:p>
          </table:table-cell>
          <table:table-cell office:value-type="float" office:value="8.77561" table:style-name="c10">
            <text:p>8.7756</text:p>
          </table:table-cell>
          <table:table-cell office:value-type="float" office:value="-3.8055965906057865" table:style-name="c11">
            <text:p>-3.8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15</text:p>
          </table:table-cell>
          <table:table-cell office:value-type="float" office:value="9.124559999999999" table:style-name="c10">
            <text:p>9.1246</text:p>
          </table:table-cell>
          <table:table-cell office:value-type="string" table:style-name="c10">
            <text:p>2026-04-14 22:15</text:p>
          </table:table-cell>
          <table:table-cell office:value-type="float" office:value="9.03548" table:style-name="c10">
            <text:p>9.0355</text:p>
          </table:table-cell>
          <table:table-cell office:value-type="float" office:value="-1.1742146965990519" table:style-name="c11">
            <text:p>-1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0:30</text:p>
          </table:table-cell>
          <table:table-cell office:value-type="float" office:value="9.06453" table:style-name="c10">
            <text:p>9.0645</text:p>
          </table:table-cell>
          <table:table-cell office:value-type="string" table:style-name="c10">
            <text:p>2026-04-16 00:30</text:p>
          </table:table-cell>
          <table:table-cell office:value-type="float" office:value="9.225385000000001" table:style-name="c10">
            <text:p>9.2254</text:p>
          </table:table-cell>
          <table:table-cell office:value-type="float" office:value="1.5711068900980063" table:style-name="c12">
            <text:p>+1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9.334665" table:style-name="c10">
            <text:p>9.3347</text:p>
          </table:table-cell>
          <table:table-cell office:value-type="string" table:style-name="c10">
            <text:p>2026-04-17 02:45</text:p>
          </table:table-cell>
          <table:table-cell office:value-type="float" office:value="9.445275" table:style-name="c10">
            <text:p>9.4453</text:p>
          </table:table-cell>
          <table:table-cell office:value-type="float" office:value="0.9826693863679292" table:style-name="c12">
            <text:p>+1.0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15</text:p>
          </table:table-cell>
          <table:table-cell office:value-type="float" office:value="9.454724999999998" table:style-name="c10">
            <text:p>9.4547</text:p>
          </table:table-cell>
          <table:table-cell office:value-type="string" table:style-name="c10">
            <text:p>2026-04-18 07:15</text:p>
          </table:table-cell>
          <table:table-cell office:value-type="float" office:value="9.605195" table:style-name="c10">
            <text:p>9.6052</text:p>
          </table:table-cell>
          <table:table-cell office:value-type="float" office:value="1.3883980252731076" table:style-name="c12">
            <text:p>+1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6 05:30</text:p>
          </table:table-cell>
          <table:table-cell office:value-type="float" office:value="9.414705" table:style-name="c10">
            <text:p>9.4147</text:p>
          </table:table-cell>
          <table:table-cell office:value-type="string" table:style-name="c10">
            <text:p>2026-04-27 05:30</text:p>
          </table:table-cell>
          <table:table-cell office:value-type="float" office:value="9.365314999999999" table:style-name="c10">
            <text:p>9.3653</text:p>
          </table:table-cell>
          <table:table-cell office:value-type="float" office:value="-0.7234561750474433" table:style-name="c11">
            <text:p>-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00</text:p>
          </table:table-cell>
          <table:table-cell office:value-type="float" office:value="9.394695" table:style-name="c10">
            <text:p>9.3947</text:p>
          </table:table-cell>
          <table:table-cell office:value-type="string" table:style-name="c10">
            <text:p>2026-04-29 16:00</text:p>
          </table:table-cell>
          <table:table-cell office:value-type="float" office:value="9.09545" table:style-name="c10">
            <text:p>9.0954</text:p>
          </table:table-cell>
          <table:table-cell office:value-type="float" office:value="-3.3787877578782655" table:style-name="c11">
            <text:p>-3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4:00</text:p>
          </table:table-cell>
          <table:table-cell office:value-type="float" office:value="9.264629999999999" table:style-name="c10">
            <text:p>9.2646</text:p>
          </table:table-cell>
          <table:table-cell office:value-type="string" table:style-name="c10">
            <text:p>2026-05-02 01:00</text:p>
          </table:table-cell>
          <table:table-cell office:value-type="float" office:value="9.105445" table:style-name="c10">
            <text:p>9.1054</text:p>
          </table:table-cell>
          <table:table-cell office:value-type="float" office:value="-1.9146666899271803" table:style-name="c11">
            <text:p>-1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9.214605" table:style-name="c10">
            <text:p>9.2146</text:p>
          </table:table-cell>
          <table:table-cell office:value-type="string" table:style-name="c10">
            <text:p>2026-05-03 07:00</text:p>
          </table:table-cell>
          <table:table-cell office:value-type="float" office:value="9.085455" table:style-name="c10">
            <text:p>9.0855</text:p>
          </table:table-cell>
          <table:table-cell office:value-type="float" office:value="-1.5986775835209577" table:style-name="c11">
            <text:p>-1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11:45</text:p>
          </table:table-cell>
          <table:table-cell office:value-type="float" office:value="9.18459" table:style-name="c10">
            <text:p>9.1846</text:p>
          </table:table-cell>
          <table:table-cell office:value-type="string" table:style-name="c10">
            <text:p>2026-05-04 11:45</text:p>
          </table:table-cell>
          <table:table-cell office:value-type="float" office:value="9.3953" table:style-name="c10">
            <text:p>9.3953</text:p>
          </table:table-cell>
          <table:table-cell office:value-type="float" office:value="2.0896827762589387" table:style-name="c12">
            <text:p>+2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9.524759999999999" table:style-name="c10">
            <text:p>9.5248</text:p>
          </table:table-cell>
          <table:table-cell office:value-type="string" table:style-name="c10">
            <text:p>2026-05-05 15:00</text:p>
          </table:table-cell>
          <table:table-cell office:value-type="float" office:value="9.67516" table:style-name="c10">
            <text:p>9.6752</text:p>
          </table:table-cell>
          <table:table-cell office:value-type="float" office:value="1.3759859057866253" table:style-name="c12">
            <text:p>+1.4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1:00</text:p>
          </table:table-cell>
          <table:table-cell office:value-type="float" office:value="9.794894999999999" table:style-name="c10">
            <text:p>9.7949</text:p>
          </table:table-cell>
          <table:table-cell office:value-type="string" table:style-name="c10">
            <text:p>2026-05-06 21:00</text:p>
          </table:table-cell>
          <table:table-cell office:value-type="float" office:value="10.004995000000001" table:style-name="c10">
            <text:p>10.005</text:p>
          </table:table-cell>
          <table:table-cell office:value-type="float" office:value="1.9408070734296068" table:style-name="c12">
            <text:p>+1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05:15</text:p>
          </table:table-cell>
          <table:table-cell office:value-type="float" office:value="10.025009999999998" table:style-name="c10">
            <text:p>10.025</text:p>
          </table:table-cell>
          <table:table-cell office:value-type="string" table:style-name="c10">
            <text:p>2026-05-08 05:15</text:p>
          </table:table-cell>
          <table:table-cell office:value-type="float" office:value="9.83508" table:style-name="c10">
            <text:p>9.8351</text:p>
          </table:table-cell>
          <table:table-cell office:value-type="float" office:value="-2.0906744723446447" table:style-name="c11">
            <text:p>-2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45</text:p>
          </table:table-cell>
          <table:table-cell office:value-type="float" office:value="10.26513" table:style-name="c10">
            <text:p>10.265</text:p>
          </table:table-cell>
          <table:table-cell office:value-type="string" table:style-name="c10">
            <text:p>2026-05-09 17:45</text:p>
          </table:table-cell>
          <table:table-cell office:value-type="float" office:value="10.404795" table:style-name="c10">
            <text:p>10.405</text:p>
          </table:table-cell>
          <table:table-cell office:value-type="float" office:value="1.1579572279649675" table:style-name="c12">
            <text:p>+1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15</text:p>
          </table:table-cell>
          <table:table-cell office:value-type="float" office:value="10.42521" table:style-name="c10">
            <text:p>10.425</text:p>
          </table:table-cell>
          <table:table-cell office:value-type="string" table:style-name="c10">
            <text:p>2026-05-10 18:15</text:p>
          </table:table-cell>
          <table:table-cell office:value-type="float" office:value="10.77461" table:style-name="c10">
            <text:p>10.775</text:p>
          </table:table-cell>
          <table:table-cell office:value-type="float" office:value="3.144891609953171" table:style-name="c12">
            <text:p>+3.1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23:15</text:p>
          </table:table-cell>
          <table:table-cell office:value-type="float" office:value="10.74537" table:style-name="c10">
            <text:p>10.745</text:p>
          </table:table-cell>
          <table:table-cell office:value-type="string" table:style-name="c10">
            <text:p>2026-05-11 23:15</text:p>
          </table:table-cell>
          <table:table-cell office:value-type="float" office:value="10.564715000000001" table:style-name="c10">
            <text:p>10.565</text:p>
          </table:table-cell>
          <table:table-cell office:value-type="float" office:value="-1.8777749419982448" table:style-name="c11">
            <text:p>-1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09:15</text:p>
          </table:table-cell>
          <table:table-cell office:value-type="float" office:value="10.72536" table:style-name="c10">
            <text:p>10.725</text:p>
          </table:table-cell>
          <table:table-cell office:value-type="string" table:style-name="c10">
            <text:p>2026-05-13 15:00</text:p>
          </table:table-cell>
          <table:table-cell office:value-type="float" office:value="10.21489" table:style-name="c10">
            <text:p>10.215</text:p>
          </table:table-cell>
          <table:table-cell office:value-type="float" office:value="-4.949853106189428" table:style-name="c11">
            <text:p>-4.9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30</text:p>
          </table:table-cell>
          <table:table-cell office:value-type="float" office:value="9.741868499999999" table:style-name="c10">
            <text:p>9.7419</text:p>
          </table:table-cell>
          <table:table-cell office:value-type="string" table:style-name="c10">
            <text:p>2026-05-22 08:30</text:p>
          </table:table-cell>
          <table:table-cell office:value-type="float" office:value="9.8340805" table:style-name="c10">
            <text:p>9.8341</text:p>
          </table:table-cell>
          <table:table-cell office:value-type="float" office:value="0.7447613677037612" table:style-name="c12">
            <text:p>+0.7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3:15</text:p>
          </table:table-cell>
          <table:table-cell office:value-type="float" office:value="10.0140045" table:style-name="c10">
            <text:p>10.014</text:p>
          </table:table-cell>
          <table:table-cell office:value-type="string" table:style-name="c10">
            <text:p>2026-05-23 00:00</text:p>
          </table:table-cell>
          <table:table-cell office:value-type="float" office:value="9.41529" table:style-name="c10">
            <text:p>9.4153</text:p>
          </table:table-cell>
          <table:table-cell office:value-type="float" office:value="-6.166720463426978" table:style-name="c11">
            <text:p>-6.2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4:30</text:p>
          </table:table-cell>
          <table:table-cell office:value-type="float" office:value="9.64482" table:style-name="c10">
            <text:p>9.6448</text:p>
          </table:table-cell>
          <table:table-cell office:value-type="string" table:style-name="c10">
            <text:p>2026-05-26 04:00</text:p>
          </table:table-cell>
          <table:table-cell office:value-type="float" office:value="9.409293" table:style-name="c10">
            <text:p>9.4093</text:p>
          </table:table-cell>
          <table:table-cell office:value-type="float" office:value="-2.6370235702376954" table:style-name="c11">
            <text:p>-2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06:00</text:p>
          </table:table-cell>
          <table:table-cell office:value-type="float" office:value="9.530762999999999" table:style-name="c10">
            <text:p>9.5308</text:p>
          </table:table-cell>
          <table:table-cell office:value-type="string" table:style-name="c10">
            <text:p>2026-05-26 20:00</text:p>
          </table:table-cell>
          <table:table-cell office:value-type="float" office:value="9.398298500000001" table:style-name="c10">
            <text:p>9.3983</text:p>
          </table:table-cell>
          <table:table-cell office:value-type="float" office:value="-1.586984155429083" table:style-name="c11">
            <text:p>-1.6</text:p>
          </table:table-cell>
        </table:table-row>
        <table:table-row>
          <table:table-cell office:value-type="string" table:style-name="c9">
            <text:p>LINK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3:15</text:p>
          </table:table-cell>
          <table:table-cell office:value-type="float" office:value="9.186591" table:style-name="c10">
            <text:p>9.1866</text:p>
          </table:table-cell>
          <table:table-cell office:value-type="string" table:style-name="c10">
            <text:p>2026-06-01 06:00</text:p>
          </table:table-cell>
          <table:table-cell office:value-type="float" office:value="9.051472" table:style-name="c10">
            <text:p>9.0515</text:p>
          </table:table-cell>
          <table:table-cell office:value-type="float" office:value="-1.667788328967723" table:style-name="c11">
            <text:p>-1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30</text:p>
          </table:table-cell>
          <table:table-cell office:value-type="float" office:value="54.617295" table:style-name="c1">
            <text:p>54.617</text:p>
          </table:table-cell>
          <table:table-cell office:value-type="string" table:style-name="c1">
            <text:p>2026-03-12 13:30</text:p>
          </table:table-cell>
          <table:table-cell office:value-type="float" office:value="54.252860000000005" table:style-name="c1">
            <text:p>54.253</text:p>
          </table:table-cell>
          <table:table-cell office:value-type="float" office:value="-0.8658181756163508" table:style-name="c14">
            <text:p>-0.9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55.237604999999995" table:style-name="c1">
            <text:p>55.238</text:p>
          </table:table-cell>
          <table:table-cell office:value-type="string" table:style-name="c1">
            <text:p>2026-03-14 00:30</text:p>
          </table:table-cell>
          <table:table-cell office:value-type="float" office:value="55.362305000000006" table:style-name="c1">
            <text:p>55.362</text:p>
          </table:table-cell>
          <table:table-cell office:value-type="float" office:value="0.025400725293955873" table:style-name="c13">
            <text:p>+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00</text:p>
          </table:table-cell>
          <table:table-cell office:value-type="float" office:value="55.757864999999995" table:style-name="c1">
            <text:p>55.758</text:p>
          </table:table-cell>
          <table:table-cell office:value-type="string" table:style-name="c1">
            <text:p>2026-03-16 22:00</text:p>
          </table:table-cell>
          <table:table-cell office:value-type="float" office:value="58.660655" table:style-name="c1">
            <text:p>58.661</text:p>
          </table:table-cell>
          <table:table-cell office:value-type="float" office:value="4.995756832968756" table:style-name="c13">
            <text:p>+5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19:15</text:p>
          </table:table-cell>
          <table:table-cell office:value-type="float" office:value="56.108039999999995" table:style-name="c1">
            <text:p>56.108</text:p>
          </table:table-cell>
          <table:table-cell office:value-type="string" table:style-name="c1">
            <text:p>2026-03-22 00:00</text:p>
          </table:table-cell>
          <table:table-cell office:value-type="float" office:value="54.762605" table:style-name="c1">
            <text:p>54.763</text:p>
          </table:table-cell>
          <table:table-cell office:value-type="float" office:value="-2.5930427214976626" table:style-name="c14">
            <text:p>-2.6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5:45</text:p>
          </table:table-cell>
          <table:table-cell office:value-type="float" office:value="55.837905" table:style-name="c1">
            <text:p>55.838</text:p>
          </table:table-cell>
          <table:table-cell office:value-type="string" table:style-name="c1">
            <text:p>2026-03-25 15:45</text:p>
          </table:table-cell>
          <table:table-cell office:value-type="float" office:value="55.91203" table:style-name="c1">
            <text:p>55.912</text:p>
          </table:table-cell>
          <table:table-cell office:value-type="float" office:value="-0.0674150435443388" table:style-name="c14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6:15</text:p>
          </table:table-cell>
          <table:table-cell office:value-type="float" office:value="54.687329999999996" table:style-name="c1">
            <text:p>54.687</text:p>
          </table:table-cell>
          <table:table-cell office:value-type="string" table:style-name="c1">
            <text:p>2026-04-02 04:00</text:p>
          </table:table-cell>
          <table:table-cell office:value-type="float" office:value="52.443765" table:style-name="c1">
            <text:p>52.444</text:p>
          </table:table-cell>
          <table:table-cell office:value-type="float" office:value="-4.294230649466691" table:style-name="c14">
            <text:p>-4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1:15</text:p>
          </table:table-cell>
          <table:table-cell office:value-type="float" office:value="53.446709999999996" table:style-name="c1">
            <text:p>53.447</text:p>
          </table:table-cell>
          <table:table-cell office:value-type="string" table:style-name="c1">
            <text:p>2026-04-04 21:15</text:p>
          </table:table-cell>
          <table:table-cell office:value-type="float" office:value="53.51323" table:style-name="c1">
            <text:p>53.513</text:p>
          </table:table-cell>
          <table:table-cell office:value-type="float" office:value="-0.07568837589814192" table:style-name="c14">
            <text:p>-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53.916945" table:style-name="c1">
            <text:p>53.917</text:p>
          </table:table-cell>
          <table:table-cell office:value-type="string" table:style-name="c1">
            <text:p>2026-04-06 23:15</text:p>
          </table:table-cell>
          <table:table-cell office:value-type="float" office:value="53.383295" table:style-name="c1">
            <text:p>53.383</text:p>
          </table:table-cell>
          <table:table-cell office:value-type="float" office:value="-1.1876845149609183" table:style-name="c14">
            <text:p>-1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54.657315" table:style-name="c1">
            <text:p>54.657</text:p>
          </table:table-cell>
          <table:table-cell office:value-type="string" table:style-name="c1">
            <text:p>2026-04-08 22:45</text:p>
          </table:table-cell>
          <table:table-cell office:value-type="float" office:value="54.202885" table:style-name="c1">
            <text:p>54.203</text:p>
          </table:table-cell>
          <table:table-cell office:value-type="float" office:value="-1.0296546164314857" table:style-name="c14">
            <text:p>-1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6:00</text:p>
          </table:table-cell>
          <table:table-cell office:value-type="float" office:value="54.737355" table:style-name="c1">
            <text:p>54.737</text:p>
          </table:table-cell>
          <table:table-cell office:value-type="string" table:style-name="c1">
            <text:p>2026-04-10 16:00</text:p>
          </table:table-cell>
          <table:table-cell office:value-type="float" office:value="54.882545" table:style-name="c1">
            <text:p>54.883</text:p>
          </table:table-cell>
          <table:table-cell office:value-type="float" office:value="0.06481824440549566" table:style-name="c13">
            <text:p>+0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7:00</text:p>
          </table:table-cell>
          <table:table-cell office:value-type="float" office:value="54.94746" table:style-name="c1">
            <text:p>54.947</text:p>
          </table:table-cell>
          <table:table-cell office:value-type="string" table:style-name="c1">
            <text:p>2026-04-12 06:00</text:p>
          </table:table-cell>
          <table:table-cell office:value-type="float" office:value="53.95301" table:style-name="c1">
            <text:p>53.953</text:p>
          </table:table-cell>
          <table:table-cell office:value-type="float" office:value="-2.0061019508272215" table:style-name="c14">
            <text:p>-2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3:45</text:p>
          </table:table-cell>
          <table:table-cell office:value-type="float" office:value="55.137555" table:style-name="c1">
            <text:p>55.138</text:p>
          </table:table-cell>
          <table:table-cell office:value-type="string" table:style-name="c1">
            <text:p>2026-04-15 13:45</text:p>
          </table:table-cell>
          <table:table-cell office:value-type="float" office:value="54.852560000000004" table:style-name="c1">
            <text:p>54.853</text:p>
          </table:table-cell>
          <table:table-cell office:value-type="float" office:value="-0.7157467672260553" table:style-name="c14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55.607789999999994" table:style-name="c1">
            <text:p>55.608</text:p>
          </table:table-cell>
          <table:table-cell office:value-type="string" table:style-name="c1">
            <text:p>2026-04-16 19:45</text:p>
          </table:table-cell>
          <table:table-cell office:value-type="float" office:value="56.45176" table:style-name="c1">
            <text:p>56.452</text:p>
          </table:table-cell>
          <table:table-cell office:value-type="float" office:value="1.3147850899307478" table:style-name="c13">
            <text:p>+1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56.04801" table:style-name="c1">
            <text:p>56.048</text:p>
          </table:table-cell>
          <table:table-cell office:value-type="string" table:style-name="c1">
            <text:p>2026-04-18 07:45</text:p>
          </table:table-cell>
          <table:table-cell office:value-type="float" office:value="56.461755000000004" table:style-name="c1">
            <text:p>56.462</text:p>
          </table:table-cell>
          <table:table-cell office:value-type="float" office:value="0.5368218278490433" table:style-name="c13">
            <text:p>+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30</text:p>
          </table:table-cell>
          <table:table-cell office:value-type="float" office:value="56.058015" table:style-name="c1">
            <text:p>56.058</text:p>
          </table:table-cell>
          <table:table-cell office:value-type="string" table:style-name="c1">
            <text:p>2026-04-23 02:30</text:p>
          </table:table-cell>
          <table:table-cell office:value-type="float" office:value="55.322325000000006" table:style-name="c1">
            <text:p>55.322</text:p>
          </table:table-cell>
          <table:table-cell office:value-type="float" office:value="-1.5096491156081582" table:style-name="c14">
            <text:p>-1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56.498234999999994" table:style-name="c1">
            <text:p>56.498</text:p>
          </table:table-cell>
          <table:table-cell office:value-type="string" table:style-name="c1">
            <text:p>2026-04-25 11:15</text:p>
          </table:table-cell>
          <table:table-cell office:value-type="float" office:value="56.341815000000004" table:style-name="c1">
            <text:p>56.342</text:p>
          </table:table-cell>
          <table:table-cell office:value-type="float" office:value="-0.4762047667241087" table:style-name="c14">
            <text:p>-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05:15</text:p>
          </table:table-cell>
          <table:table-cell office:value-type="float" office:value="56.158065" table:style-name="c1">
            <text:p>56.158</text:p>
          </table:table-cell>
          <table:table-cell office:value-type="string" table:style-name="c1">
            <text:p>2026-04-27 05:15</text:p>
          </table:table-cell>
          <table:table-cell office:value-type="float" office:value="56.121925000000005" table:style-name="c1">
            <text:p>56.122</text:p>
          </table:table-cell>
          <table:table-cell office:value-type="float" office:value="-0.2641254253952674" table:style-name="c14">
            <text:p>-0.3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57.318645" table:style-name="c1">
            <text:p>57.319</text:p>
          </table:table-cell>
          <table:table-cell office:value-type="string" table:style-name="c1">
            <text:p>2026-04-29 23:00</text:p>
          </table:table-cell>
          <table:table-cell office:value-type="float" office:value="55.24236500000001" table:style-name="c1">
            <text:p>55.242</text:p>
          </table:table-cell>
          <table:table-cell office:value-type="float" office:value="-3.8150055494769353" table:style-name="c14">
            <text:p>-3.8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55.757864999999995" table:style-name="c1">
            <text:p>55.758</text:p>
          </table:table-cell>
          <table:table-cell office:value-type="string" table:style-name="c1">
            <text:p>2026-05-05 00:00</text:p>
          </table:table-cell>
          <table:table-cell office:value-type="float" office:value="54.932520000000004" table:style-name="c1">
            <text:p>54.933</text:p>
          </table:table-cell>
          <table:table-cell office:value-type="float" office:value="-1.6771716554785376" table:style-name="c14">
            <text:p>-1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0:15</text:p>
          </table:table-cell>
          <table:table-cell office:value-type="float" office:value="56.20809" table:style-name="c1">
            <text:p>56.208</text:p>
          </table:table-cell>
          <table:table-cell office:value-type="string" table:style-name="c1">
            <text:p>2026-05-06 20:15</text:p>
          </table:table-cell>
          <table:table-cell office:value-type="float" office:value="57.021475" table:style-name="c1">
            <text:p>57.021</text:p>
          </table:table-cell>
          <table:table-cell office:value-type="float" office:value="1.2443032159160872" table:style-name="c13">
            <text:p>+1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5:30</text:p>
          </table:table-cell>
          <table:table-cell office:value-type="float" office:value="56.76837" table:style-name="c1">
            <text:p>56.768</text:p>
          </table:table-cell>
          <table:table-cell office:value-type="string" table:style-name="c1">
            <text:p>2026-05-08 05:30</text:p>
          </table:table-cell>
          <table:table-cell office:value-type="float" office:value="56.501735000000004" table:style-name="c1">
            <text:p>56.502</text:p>
          </table:table-cell>
          <table:table-cell office:value-type="float" office:value="-0.6686504619826006" table:style-name="c14">
            <text:p>-0.7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4:45</text:p>
          </table:table-cell>
          <table:table-cell office:value-type="float" office:value="57.348659999999995" table:style-name="c1">
            <text:p>57.349</text:p>
          </table:table-cell>
          <table:table-cell office:value-type="string" table:style-name="c1">
            <text:p>2026-05-09 14:45</text:p>
          </table:table-cell>
          <table:table-cell office:value-type="float" office:value="57.74111500000001" table:style-name="c1">
            <text:p>57.741</text:p>
          </table:table-cell>
          <table:table-cell office:value-type="float" office:value="0.4830636166825997" table:style-name="c13">
            <text:p>+0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8:15</text:p>
          </table:table-cell>
          <table:table-cell office:value-type="float" office:value="58.749359999999996" table:style-name="c1">
            <text:p>58.749</text:p>
          </table:table-cell>
          <table:table-cell office:value-type="string" table:style-name="c1">
            <text:p>2026-05-11 08:15</text:p>
          </table:table-cell>
          <table:table-cell office:value-type="float" office:value="58.7706" table:style-name="c1">
            <text:p>58.771</text:p>
          </table:table-cell>
          <table:table-cell office:value-type="float" office:value="-0.1638186856843915" table:style-name="c14">
            <text:p>-0.2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9:45</text:p>
          </table:table-cell>
          <table:table-cell office:value-type="float" office:value="58.90944" table:style-name="c1">
            <text:p>58.909</text:p>
          </table:table-cell>
          <table:table-cell office:value-type="string" table:style-name="c1">
            <text:p>2026-05-13 14:00</text:p>
          </table:table-cell>
          <table:table-cell office:value-type="float" office:value="57.181395" table:style-name="c1">
            <text:p>57.181</text:p>
          </table:table-cell>
          <table:table-cell office:value-type="float" office:value="-3.1274284878705316" table:style-name="c14">
            <text:p>-3.1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8:15</text:p>
          </table:table-cell>
          <table:table-cell office:value-type="float" office:value="58.81939499999999" table:style-name="c1">
            <text:p>58.819</text:p>
          </table:table-cell>
          <table:table-cell office:value-type="string" table:style-name="c1">
            <text:p>2026-05-15 16:00</text:p>
          </table:table-cell>
          <table:table-cell office:value-type="float" office:value="56.901535" table:style-name="c1">
            <text:p>56.902</text:p>
          </table:table-cell>
          <table:table-cell office:value-type="float" office:value="-3.4539732489002883" table:style-name="c14">
            <text:p>-3.5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17:45</text:p>
          </table:table-cell>
          <table:table-cell office:value-type="float" office:value="54.417195" table:style-name="c1">
            <text:p>54.417</text:p>
          </table:table-cell>
          <table:table-cell office:value-type="string" table:style-name="c1">
            <text:p>2026-05-22 20:00</text:p>
          </table:table-cell>
          <table:table-cell office:value-type="float" office:value="53.21338000000001" table:style-name="c1">
            <text:p>53.213</text:p>
          </table:table-cell>
          <table:table-cell office:value-type="float" office:value="-2.4076737998347753" table:style-name="c14">
            <text:p>-2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6:45</text:p>
          </table:table-cell>
          <table:table-cell office:value-type="float" office:value="1.2876435" table:style-name="c10">
            <text:p>1.2876</text:p>
          </table:table-cell>
          <table:table-cell office:value-type="string" table:style-name="c10">
            <text:p>2026-03-06 06:45</text:p>
          </table:table-cell>
          <table:table-cell office:value-type="float" office:value="1.2643674999999999" table:style-name="c10">
            <text:p>1.2644</text:p>
          </table:table-cell>
          <table:table-cell office:value-type="float" office:value="-2.003929708222829" table:style-name="c11">
            <text:p>-2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13:45</text:p>
          </table:table-cell>
          <table:table-cell office:value-type="float" office:value="1.26063" table:style-name="c10">
            <text:p>1.2606</text:p>
          </table:table-cell>
          <table:table-cell office:value-type="string" table:style-name="c10">
            <text:p>2026-03-06 16:00</text:p>
          </table:table-cell>
          <table:table-cell office:value-type="float" office:value="1.229385" table:style-name="c10">
            <text:p>1.2294</text:p>
          </table:table-cell>
          <table:table-cell office:value-type="float" office:value="-2.6734680766759444" table:style-name="c11">
            <text:p>-2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1.328664" table:style-name="c10">
            <text:p>1.3287</text:p>
          </table:table-cell>
          <table:table-cell office:value-type="string" table:style-name="c10">
            <text:p>2026-03-11 15:00</text:p>
          </table:table-cell>
          <table:table-cell office:value-type="float" office:value="1.3073460000000001" table:style-name="c10">
            <text:p>1.3073</text:p>
          </table:table-cell>
          <table:table-cell office:value-type="float" office:value="-1.8011615166814043" table:style-name="c11">
            <text:p>-1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17:45</text:p>
          </table:table-cell>
          <table:table-cell office:value-type="float" office:value="1.338669" table:style-name="c10">
            <text:p>1.3387</text:p>
          </table:table-cell>
          <table:table-cell office:value-type="string" table:style-name="c10">
            <text:p>2026-03-13 17:45</text:p>
          </table:table-cell>
          <table:table-cell office:value-type="float" office:value="1.3503245000000001" table:style-name="c10">
            <text:p>1.3503</text:p>
          </table:table-cell>
          <table:table-cell office:value-type="float" office:value="0.6690377774117406" table:style-name="c12">
            <text:p>+0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9:30</text:p>
          </table:table-cell>
          <table:table-cell office:value-type="float" office:value="1.3516754999999998" table:style-name="c10">
            <text:p>1.3517</text:p>
          </table:table-cell>
          <table:table-cell office:value-type="string" table:style-name="c10">
            <text:p>2026-03-16 09:30</text:p>
          </table:table-cell>
          <table:table-cell office:value-type="float" office:value="1.3803095" table:style-name="c10">
            <text:p>1.3803</text:p>
          </table:table-cell>
          <table:table-cell office:value-type="float" office:value="1.9142731602000973" table:style-name="c12">
            <text:p>+1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3:30</text:p>
          </table:table-cell>
          <table:table-cell office:value-type="float" office:value="1.4127059999999998" table:style-name="c10">
            <text:p>1.4127</text:p>
          </table:table-cell>
          <table:table-cell office:value-type="string" table:style-name="c10">
            <text:p>2026-03-17 13:30</text:p>
          </table:table-cell>
          <table:table-cell office:value-type="float" office:value="1.4402795000000002" table:style-name="c10">
            <text:p>1.4403</text:p>
          </table:table-cell>
          <table:table-cell office:value-type="float" office:value="1.7480198483973641" table:style-name="c12">
            <text:p>+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1:00</text:p>
          </table:table-cell>
          <table:table-cell office:value-type="float" office:value="1.322661" table:style-name="c10">
            <text:p>1.3227</text:p>
          </table:table-cell>
          <table:table-cell office:value-type="string" table:style-name="c10">
            <text:p>2026-03-24 18:00</text:p>
          </table:table-cell>
          <table:table-cell office:value-type="float" office:value="1.2783605" table:style-name="c10">
            <text:p>1.2784</text:p>
          </table:table-cell>
          <table:table-cell office:value-type="float" office:value="-3.5425511631098305" table:style-name="c11">
            <text:p>-3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30</text:p>
          </table:table-cell>
          <table:table-cell office:value-type="float" office:value="1.214607" table:style-name="c10">
            <text:p>1.2146</text:p>
          </table:table-cell>
          <table:table-cell office:value-type="string" table:style-name="c10">
            <text:p>2026-03-30 21:00</text:p>
          </table:table-cell>
          <table:table-cell office:value-type="float" office:value="1.155422" table:style-name="c10">
            <text:p>1.1554</text:p>
          </table:table-cell>
          <table:table-cell office:value-type="float" office:value="-5.062928879711704" table:style-name="c11">
            <text:p>-5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4:30</text:p>
          </table:table-cell>
          <table:table-cell office:value-type="float" office:value="1.1965979999999998" table:style-name="c10">
            <text:p>1.1966</text:p>
          </table:table-cell>
          <table:table-cell office:value-type="string" table:style-name="c10">
            <text:p>2026-04-01 14:30</text:p>
          </table:table-cell>
          <table:table-cell office:value-type="float" office:value="1.209395" table:style-name="c10">
            <text:p>1.2094</text:p>
          </table:table-cell>
          <table:table-cell office:value-type="float" office:value="0.8674107256572583" table:style-name="c12">
            <text:p>+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0:45</text:p>
          </table:table-cell>
          <table:table-cell office:value-type="float" office:value="1.2056025" table:style-name="c10">
            <text:p>1.2056</text:p>
          </table:table-cell>
          <table:table-cell office:value-type="string" table:style-name="c10">
            <text:p>2026-04-02 05:00</text:p>
          </table:table-cell>
          <table:table-cell office:value-type="float" office:value="1.153423" table:style-name="c10">
            <text:p>1.1534</text:p>
          </table:table-cell>
          <table:table-cell office:value-type="float" office:value="-4.519333078440024" table:style-name="c11">
            <text:p>-4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1:15</text:p>
          </table:table-cell>
          <table:table-cell office:value-type="float" office:value="1.236618" table:style-name="c10">
            <text:p>1.2366</text:p>
          </table:table-cell>
          <table:table-cell office:value-type="string" table:style-name="c10">
            <text:p>2026-04-05 11:15</text:p>
          </table:table-cell>
          <table:table-cell office:value-type="float" office:value="1.243378" table:style-name="c10">
            <text:p>1.2434</text:p>
          </table:table-cell>
          <table:table-cell office:value-type="float" office:value="0.34565948239473343" table:style-name="c12">
            <text:p>+0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5 22:45</text:p>
          </table:table-cell>
          <table:table-cell office:value-type="float" office:value="1.238619" table:style-name="c10">
            <text:p>1.2386</text:p>
          </table:table-cell>
          <table:table-cell office:value-type="string" table:style-name="c10">
            <text:p>2026-04-06 22:45</text:p>
          </table:table-cell>
          <table:table-cell office:value-type="float" office:value="1.2553720000000002" table:style-name="c10">
            <text:p>1.2554</text:p>
          </table:table-cell>
          <table:table-cell office:value-type="float" office:value="1.149950983474346" table:style-name="c12">
            <text:p>+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2:00</text:p>
          </table:table-cell>
          <table:table-cell office:value-type="float" office:value="1.3076534999999998" table:style-name="c10">
            <text:p>1.3077</text:p>
          </table:table-cell>
          <table:table-cell office:value-type="string" table:style-name="c10">
            <text:p>2026-04-08 22:00</text:p>
          </table:table-cell>
          <table:table-cell office:value-type="float" office:value="1.3523235" table:style-name="c10">
            <text:p>1.3523</text:p>
          </table:table-cell>
          <table:table-cell office:value-type="float" office:value="3.209313883494369" table:style-name="c12">
            <text:p>+3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30</text:p>
          </table:table-cell>
          <table:table-cell office:value-type="float" office:value="1.362681" table:style-name="c10">
            <text:p>1.3627</text:p>
          </table:table-cell>
          <table:table-cell office:value-type="string" table:style-name="c10">
            <text:p>2026-04-10 15:30</text:p>
          </table:table-cell>
          <table:table-cell office:value-type="float" office:value="1.3803095" table:style-name="c10">
            <text:p>1.3803</text:p>
          </table:table-cell>
          <table:table-cell office:value-type="float" office:value="1.0911769746184241" table:style-name="c12">
            <text:p>+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5:30</text:p>
          </table:table-cell>
          <table:table-cell office:value-type="float" office:value="1.3656825" table:style-name="c10">
            <text:p>1.3657</text:p>
          </table:table-cell>
          <table:table-cell office:value-type="string" table:style-name="c10">
            <text:p>2026-04-12 10:00</text:p>
          </table:table-cell>
          <table:table-cell office:value-type="float" office:value="1.327336" table:style-name="c10">
            <text:p>1.3273</text:p>
          </table:table-cell>
          <table:table-cell office:value-type="float" office:value="-3.0021505484620237" table:style-name="c11">
            <text:p>-3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4 01:15</text:p>
          </table:table-cell>
          <table:table-cell office:value-type="float" office:value="1.4197095" table:style-name="c10">
            <text:p>1.4197</text:p>
          </table:table-cell>
          <table:table-cell office:value-type="string" table:style-name="c10">
            <text:p>2026-04-15 00:00</text:p>
          </table:table-cell>
          <table:table-cell office:value-type="float" office:value="1.35932" table:style-name="c10">
            <text:p>1.3593</text:p>
          </table:table-cell>
          <table:table-cell office:value-type="float" office:value="-4.445048841329868" table:style-name="c11">
            <text:p>-4.4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4:00</text:p>
          </table:table-cell>
          <table:table-cell office:value-type="float" office:value="1.4297145" table:style-name="c10">
            <text:p>1.4297</text:p>
          </table:table-cell>
          <table:table-cell office:value-type="string" table:style-name="c10">
            <text:p>2026-04-17 04:00</text:p>
          </table:table-cell>
          <table:table-cell office:value-type="float" office:value="1.4082955000000001" table:style-name="c10">
            <text:p>1.4083</text:p>
          </table:table-cell>
          <table:table-cell office:value-type="float" office:value="-1.6950365058548411" table:style-name="c11">
            <text:p>-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6:45</text:p>
          </table:table-cell>
          <table:table-cell office:value-type="float" office:value="1.4197095" table:style-name="c10">
            <text:p>1.4197</text:p>
          </table:table-cell>
          <table:table-cell office:value-type="string" table:style-name="c10">
            <text:p>2026-04-18 06:45</text:p>
          </table:table-cell>
          <table:table-cell office:value-type="float" office:value="1.4182905000000001" table:style-name="c10">
            <text:p>1.4183</text:p>
          </table:table-cell>
          <table:table-cell office:value-type="float" office:value="-0.2996502248875599" table:style-name="c11">
            <text:p>-0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5:15</text:p>
          </table:table-cell>
          <table:table-cell office:value-type="float" office:value="1.368684" table:style-name="c10">
            <text:p>1.3687</text:p>
          </table:table-cell>
          <table:table-cell office:value-type="string" table:style-name="c10">
            <text:p>2026-04-22 05:15</text:p>
          </table:table-cell>
          <table:table-cell office:value-type="float" office:value="1.407296" table:style-name="c10">
            <text:p>1.4073</text:p>
          </table:table-cell>
          <table:table-cell office:value-type="float" office:value="2.615564680817495" table:style-name="c12">
            <text:p>+2.6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1.4127059999999998" table:style-name="c10">
            <text:p>1.4127</text:p>
          </table:table-cell>
          <table:table-cell office:value-type="string" table:style-name="c10">
            <text:p>2026-04-23 05:30</text:p>
          </table:table-cell>
          <table:table-cell office:value-type="float" office:value="1.3803095" table:style-name="c10">
            <text:p>1.3803</text:p>
          </table:table-cell>
          <table:table-cell office:value-type="float" office:value="-2.488538923916217" table:style-name="c11">
            <text:p>-2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12:15</text:p>
          </table:table-cell>
          <table:table-cell office:value-type="float" office:value="1.3946969999999999" table:style-name="c10">
            <text:p>1.3947</text:p>
          </table:table-cell>
          <table:table-cell office:value-type="string" table:style-name="c10">
            <text:p>2026-04-24 12:15</text:p>
          </table:table-cell>
          <table:table-cell office:value-type="float" office:value="1.421289" table:style-name="c10">
            <text:p>1.4213</text:p>
          </table:table-cell>
          <table:table-cell office:value-type="float" office:value="1.7029392971376733" table:style-name="c12">
            <text:p>+1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20:15</text:p>
          </table:table-cell>
          <table:table-cell office:value-type="float" office:value="1.2946469999999999" table:style-name="c10">
            <text:p>1.2946</text:p>
          </table:table-cell>
          <table:table-cell office:value-type="string" table:style-name="c10">
            <text:p>2026-05-06 20:15</text:p>
          </table:table-cell>
          <table:table-cell office:value-type="float" office:value="1.5222385" table:style-name="c10">
            <text:p>1.5222</text:p>
          </table:table-cell>
          <table:table-cell office:value-type="float" office:value="17.344383854324796" table:style-name="c12">
            <text:p>+17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8:00</text:p>
          </table:table-cell>
          <table:table-cell office:value-type="float" office:value="1.5357674999999997" table:style-name="c10">
            <text:p>1.5358</text:p>
          </table:table-cell>
          <table:table-cell office:value-type="string" table:style-name="c10">
            <text:p>2026-05-09 08:00</text:p>
          </table:table-cell>
          <table:table-cell office:value-type="float" office:value="1.5732130000000002" table:style-name="c10">
            <text:p>1.5732</text:p>
          </table:table-cell>
          <table:table-cell office:value-type="float" office:value="2.2334531244475597" table:style-name="c12">
            <text:p>+2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18:30</text:p>
          </table:table-cell>
          <table:table-cell office:value-type="float" office:value="1.574787" table:style-name="c10">
            <text:p>1.5748</text:p>
          </table:table-cell>
          <table:table-cell office:value-type="string" table:style-name="c10">
            <text:p>2026-05-10 18:30</text:p>
          </table:table-cell>
          <table:table-cell office:value-type="float" office:value="1.5952020000000002" table:style-name="c10">
            <text:p>1.5952</text:p>
          </table:table-cell>
          <table:table-cell office:value-type="float" office:value="1.0938743590085842" table:style-name="c12">
            <text:p>+1.1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8:45</text:p>
          </table:table-cell>
          <table:table-cell office:value-type="float" office:value="1.604802" table:style-name="c10">
            <text:p>1.6048</text:p>
          </table:table-cell>
          <table:table-cell office:value-type="string" table:style-name="c10">
            <text:p>2026-05-11 13:00</text:p>
          </table:table-cell>
          <table:table-cell office:value-type="float" office:value="1.53923" table:style-name="c10">
            <text:p>1.5392</text:p>
          </table:table-cell>
          <table:table-cell office:value-type="float" office:value="-4.277719043844663" table:style-name="c11">
            <text:p>-4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15:15</text:p>
          </table:table-cell>
          <table:table-cell office:value-type="float" office:value="1.576788" table:style-name="c10">
            <text:p>1.5768</text:p>
          </table:table-cell>
          <table:table-cell office:value-type="string" table:style-name="c10">
            <text:p>2026-05-13 15:15</text:p>
          </table:table-cell>
          <table:table-cell office:value-type="float" office:value="1.5682155" table:style-name="c10">
            <text:p>1.5682</text:p>
          </table:table-cell>
          <table:table-cell office:value-type="float" office:value="-0.7424817276958096" table:style-name="c11">
            <text:p>-0.7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3 18:15</text:p>
          </table:table-cell>
          <table:table-cell office:value-type="float" office:value="1.5937964999999998" table:style-name="c10">
            <text:p>1.5938</text:p>
          </table:table-cell>
          <table:table-cell office:value-type="string" table:style-name="c10">
            <text:p>2026-05-14 05:00</text:p>
          </table:table-cell>
          <table:table-cell office:value-type="float" office:value="1.5522235" table:style-name="c10">
            <text:p>1.5522</text:p>
          </table:table-cell>
          <table:table-cell office:value-type="float" office:value="-2.8031116128376388" table:style-name="c11">
            <text:p>-2.8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4 16:15</text:p>
          </table:table-cell>
          <table:table-cell office:value-type="float" office:value="1.6278134999999998" table:style-name="c10">
            <text:p>1.6278</text:p>
          </table:table-cell>
          <table:table-cell office:value-type="string" table:style-name="c10">
            <text:p>2026-05-15 03:00</text:p>
          </table:table-cell>
          <table:table-cell office:value-type="float" office:value="1.565217" table:style-name="c10">
            <text:p>1.5652</text:p>
          </table:table-cell>
          <table:table-cell office:value-type="float" office:value="-4.037647358435081" table:style-name="c11">
            <text:p>-4.0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21:15</text:p>
          </table:table-cell>
          <table:table-cell office:value-type="float" office:value="1.538769" table:style-name="c10">
            <text:p>1.5388</text:p>
          </table:table-cell>
          <table:table-cell office:value-type="string" table:style-name="c10">
            <text:p>2026-05-18 00:00</text:p>
          </table:table-cell>
          <table:table-cell office:value-type="float" office:value="1.507246" table:style-name="c10">
            <text:p>1.5072</text:p>
          </table:table-cell>
          <table:table-cell office:value-type="float" office:value="-2.2443904675750637" table:style-name="c11">
            <text:p>-2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7:15</text:p>
          </table:table-cell>
          <table:table-cell office:value-type="float" office:value="1.6438214999999998" table:style-name="c10">
            <text:p>1.6438</text:p>
          </table:table-cell>
          <table:table-cell office:value-type="string" table:style-name="c10">
            <text:p>2026-05-20 07:15</text:p>
          </table:table-cell>
          <table:table-cell office:value-type="float" office:value="1.6561715000000001" table:style-name="c10">
            <text:p>1.6562</text:p>
          </table:table-cell>
          <table:table-cell office:value-type="float" office:value="0.5498962735005275" table:style-name="c12">
            <text:p>+0.5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3:30</text:p>
          </table:table-cell>
          <table:table-cell office:value-type="float" office:value="1.6538264999999999" table:style-name="c10">
            <text:p>1.6538</text:p>
          </table:table-cell>
          <table:table-cell office:value-type="string" table:style-name="c10">
            <text:p>2026-05-21 13:30</text:p>
          </table:table-cell>
          <table:table-cell office:value-type="float" office:value="1.743128" table:style-name="c10">
            <text:p>1.7431</text:p>
          </table:table-cell>
          <table:table-cell office:value-type="float" office:value="5.188995769991611" table:style-name="c12">
            <text:p>+5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5:45</text:p>
          </table:table-cell>
          <table:table-cell office:value-type="float" office:value="1.8079034999999999" table:style-name="c10">
            <text:p>1.8079</text:p>
          </table:table-cell>
          <table:table-cell office:value-type="string" table:style-name="c10">
            <text:p>2026-05-22 15:45</text:p>
          </table:table-cell>
          <table:table-cell office:value-type="float" office:value="2.190904" table:style-name="c10">
            <text:p>2.1909</text:p>
          </table:table-cell>
          <table:table-cell office:value-type="float" office:value="20.942538299417013" table:style-name="c12">
            <text:p>+20.9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3 15:15</text:p>
          </table:table-cell>
          <table:table-cell office:value-type="float" office:value="2.2121055" table:style-name="c10">
            <text:p>2.2121</text:p>
          </table:table-cell>
          <table:table-cell office:value-type="string" table:style-name="c10">
            <text:p>2026-05-24 15:15</text:p>
          </table:table-cell>
          <table:table-cell office:value-type="float" office:value="2.4657665000000004" table:style-name="c10">
            <text:p>2.4658</text:p>
          </table:table-cell>
          <table:table-cell office:value-type="float" office:value="11.244126139847332" table:style-name="c12">
            <text:p>+11.2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5:15</text:p>
          </table:table-cell>
          <table:table-cell office:value-type="float" office:value="2.3881935" table:style-name="c10">
            <text:p>2.3882</text:p>
          </table:table-cell>
          <table:table-cell office:value-type="string" table:style-name="c10">
            <text:p>2026-05-26 05:15</text:p>
          </table:table-cell>
          <table:table-cell office:value-type="float" office:value="2.75862" table:style-name="c10">
            <text:p>2.7586</text:p>
          </table:table-cell>
          <table:table-cell office:value-type="float" office:value="15.279834679225113" table:style-name="c12">
            <text:p>+15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7 08:30</text:p>
          </table:table-cell>
          <table:table-cell office:value-type="float" office:value="2.5512749999999995" table:style-name="c10">
            <text:p>2.5513</text:p>
          </table:table-cell>
          <table:table-cell office:value-type="string" table:style-name="c10">
            <text:p>2026-05-27 09:00</text:p>
          </table:table-cell>
          <table:table-cell office:value-type="float" office:value="2.5227380000000004" table:style-name="c10">
            <text:p>2.5227</text:p>
          </table:table-cell>
          <table:table-cell office:value-type="float" office:value="-1.3162028108298474" table:style-name="c11">
            <text:p>-1.3</text:p>
          </table:table-cell>
        </table:table-row>
        <table:table-row>
          <table:table-cell office:value-type="string" table:style-name="c9">
            <text:p>NEAR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5:45</text:p>
          </table:table-cell>
          <table:table-cell office:value-type="float" office:value="2.4302144999999995" table:style-name="c10">
            <text:p>2.4302</text:p>
          </table:table-cell>
          <table:table-cell office:value-type="string" table:style-name="c10">
            <text:p>2026-06-02 14:00</text:p>
          </table:table-cell>
          <table:table-cell office:value-type="float" office:value="2.6836575000000003" table:style-name="c10">
            <text:p>2.6837</text:p>
          </table:table-cell>
          <table:table-cell office:value-type="float" office:value="10.208085280435174" table:style-name="c12">
            <text:p>+10.2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09:15</text:p>
          </table:table-cell>
          <table:table-cell office:value-type="float" office:value="0.1296648" table:style-name="c1">
            <text:p>0.12966</text:p>
          </table:table-cell>
          <table:table-cell office:value-type="string" table:style-name="c1">
            <text:p>2026-03-06 09:15</text:p>
          </table:table-cell>
          <table:table-cell office:value-type="float" office:value="0.12593700000000002" table:style-name="c1">
            <text:p>0.12594</text:p>
          </table:table-cell>
          <table:table-cell office:value-type="float" office:value="-3.0691043853073308" table:style-name="c14">
            <text:p>-3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45</text:p>
          </table:table-cell>
          <table:table-cell office:value-type="float" office:value="0.12056025" table:style-name="c1">
            <text:p>0.12056</text:p>
          </table:table-cell>
          <table:table-cell office:value-type="string" table:style-name="c1">
            <text:p>2026-03-10 19:45</text:p>
          </table:table-cell>
          <table:table-cell office:value-type="float" office:value="0.11884055000000002" table:style-name="c1">
            <text:p>0.11884</text:p>
          </table:table-cell>
          <table:table-cell office:value-type="float" office:value="-1.6234722965902781" table:style-name="c14">
            <text:p>-1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4:00</text:p>
          </table:table-cell>
          <table:table-cell office:value-type="float" office:value="0.12116054999999999" table:style-name="c1">
            <text:p>0.12116</text:p>
          </table:table-cell>
          <table:table-cell office:value-type="string" table:style-name="c1">
            <text:p>2026-03-12 12:00</text:p>
          </table:table-cell>
          <table:table-cell office:value-type="float" office:value="0.11834080000000001" table:style-name="c1">
            <text:p>0.11834</text:p>
          </table:table-cell>
          <table:table-cell office:value-type="float" office:value="-2.522531681475515" table:style-name="c14">
            <text:p>-2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10:30</text:p>
          </table:table-cell>
          <table:table-cell office:value-type="float" office:value="0.12556275" table:style-name="c1">
            <text:p>0.12556</text:p>
          </table:table-cell>
          <table:table-cell office:value-type="string" table:style-name="c1">
            <text:p>2026-03-14 10:30</text:p>
          </table:table-cell>
          <table:table-cell office:value-type="float" office:value="0.1223388" table:style-name="c1">
            <text:p>0.12234</text:p>
          </table:table-cell>
          <table:table-cell office:value-type="float" office:value="-2.762368028097517" table:style-name="c14">
            <text:p>-2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4:15</text:p>
          </table:table-cell>
          <table:table-cell office:value-type="float" office:value="0.1268634" table:style-name="c1">
            <text:p>0.12686</text:p>
          </table:table-cell>
          <table:table-cell office:value-type="string" table:style-name="c1">
            <text:p>2026-03-16 04:15</text:p>
          </table:table-cell>
          <table:table-cell office:value-type="float" office:value="0.1293353" table:style-name="c1">
            <text:p>0.12934</text:p>
          </table:table-cell>
          <table:table-cell office:value-type="float" office:value="1.7446787137188613" table:style-name="c13">
            <text:p>+1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7:30</text:p>
          </table:table-cell>
          <table:table-cell office:value-type="float" office:value="0.13196594999999997" table:style-name="c1">
            <text:p>0.13197</text:p>
          </table:table-cell>
          <table:table-cell office:value-type="string" table:style-name="c1">
            <text:p>2026-03-17 07:30</text:p>
          </table:table-cell>
          <table:table-cell office:value-type="float" office:value="0.13583205" table:style-name="c1">
            <text:p>0.13583</text:p>
          </table:table-cell>
          <table:table-cell office:value-type="float" office:value="2.723863035919516" table:style-name="c13">
            <text:p>+2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8:15</text:p>
          </table:table-cell>
          <table:table-cell office:value-type="float" office:value="0.13556775000000001" table:style-name="c1">
            <text:p>0.13557</text:p>
          </table:table-cell>
          <table:table-cell office:value-type="string" table:style-name="c1">
            <text:p>2026-03-18 08:15</text:p>
          </table:table-cell>
          <table:table-cell office:value-type="float" office:value="0.13513239999999999" table:style-name="c1">
            <text:p>0.13513</text:p>
          </table:table-cell>
          <table:table-cell office:value-type="float" office:value="-0.5203890066774908" table:style-name="c14">
            <text:p>-0.5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8:00</text:p>
          </table:table-cell>
          <table:table-cell office:value-type="float" office:value="0.1086543" table:style-name="c1">
            <text:p>0.10865</text:p>
          </table:table-cell>
          <table:table-cell office:value-type="string" table:style-name="c1">
            <text:p>2026-03-31 08:00</text:p>
          </table:table-cell>
          <table:table-cell office:value-type="float" office:value="0.10914540000000002" table:style-name="c1">
            <text:p>0.10915</text:p>
          </table:table-cell>
          <table:table-cell office:value-type="float" office:value="0.2511804368534154" table:style-name="c13">
            <text:p>+0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45</text:p>
          </table:table-cell>
          <table:table-cell office:value-type="float" office:value="0.112056" table:style-name="c1">
            <text:p>0.11206</text:p>
          </table:table-cell>
          <table:table-cell office:value-type="string" table:style-name="c1">
            <text:p>2026-04-02 05:45</text:p>
          </table:table-cell>
          <table:table-cell office:value-type="float" office:value="0.10744625000000001" table:style-name="c1">
            <text:p>0.10745</text:p>
          </table:table-cell>
          <table:table-cell office:value-type="float" office:value="-4.305467849780453" table:style-name="c14">
            <text:p>-4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20:15</text:p>
          </table:table-cell>
          <table:table-cell office:value-type="float" office:value="0.11075535" table:style-name="c1">
            <text:p>0.11076</text:p>
          </table:table-cell>
          <table:table-cell office:value-type="string" table:style-name="c1">
            <text:p>2026-04-04 20:15</text:p>
          </table:table-cell>
          <table:table-cell office:value-type="float" office:value="0.11004495000000002" table:style-name="c1">
            <text:p>0.11004</text:p>
          </table:table-cell>
          <table:table-cell office:value-type="float" office:value="-0.8400315244816547" table:style-name="c14">
            <text:p>-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0:00</text:p>
          </table:table-cell>
          <table:table-cell office:value-type="float" office:value="0.11335664999999999" table:style-name="c1">
            <text:p>0.11336</text:p>
          </table:table-cell>
          <table:table-cell office:value-type="string" table:style-name="c1">
            <text:p>2026-04-07 10:00</text:p>
          </table:table-cell>
          <table:table-cell office:value-type="float" office:value="0.11024485" table:style-name="c1">
            <text:p>0.11024</text:p>
          </table:table-cell>
          <table:table-cell office:value-type="float" office:value="-2.9395535728605093" table:style-name="c14">
            <text:p>-2.9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2:45</text:p>
          </table:table-cell>
          <table:table-cell office:value-type="float" office:value="0.11635815" table:style-name="c1">
            <text:p>0.11636</text:p>
          </table:table-cell>
          <table:table-cell office:value-type="string" table:style-name="c1">
            <text:p>2026-04-08 22:45</text:p>
          </table:table-cell>
          <table:table-cell office:value-type="float" office:value="0.11584205000000002" table:style-name="c1">
            <text:p>0.11584</text:p>
          </table:table-cell>
          <table:table-cell office:value-type="float" office:value="-0.6425577047675546" table:style-name="c14">
            <text:p>-0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3:00</text:p>
          </table:table-cell>
          <table:table-cell office:value-type="float" office:value="0.1164582" table:style-name="c1">
            <text:p>0.11646</text:p>
          </table:table-cell>
          <table:table-cell office:value-type="string" table:style-name="c1">
            <text:p>2026-04-14 23:00</text:p>
          </table:table-cell>
          <table:table-cell office:value-type="float" office:value="0.1107446" table:style-name="c1">
            <text:p>0.11074</text:p>
          </table:table-cell>
          <table:table-cell office:value-type="float" office:value="-5.0962306264393575" table:style-name="c14">
            <text:p>-5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0:15</text:p>
          </table:table-cell>
          <table:table-cell office:value-type="float" office:value="0.11395695" table:style-name="c1">
            <text:p>0.11396</text:p>
          </table:table-cell>
          <table:table-cell office:value-type="string" table:style-name="c1">
            <text:p>2026-04-16 10:15</text:p>
          </table:table-cell>
          <table:table-cell office:value-type="float" office:value="0.12113940000000001" table:style-name="c1">
            <text:p>0.12114</text:p>
          </table:table-cell>
          <table:table-cell office:value-type="float" office:value="6.090275616713159" table:style-name="c13">
            <text:p>+6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00</text:p>
          </table:table-cell>
          <table:table-cell office:value-type="float" office:value="0.1232616" table:style-name="c1">
            <text:p>0.12326</text:p>
          </table:table-cell>
          <table:table-cell office:value-type="string" table:style-name="c1">
            <text:p>2026-04-17 12:00</text:p>
          </table:table-cell>
          <table:table-cell office:value-type="float" office:value="0.1313343" table:style-name="c1">
            <text:p>0.13133</text:p>
          </table:table-cell>
          <table:table-cell office:value-type="float" office:value="6.336249678975436" table:style-name="c13">
            <text:p>+6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1282641" table:style-name="c1">
            <text:p>0.12826</text:p>
          </table:table-cell>
          <table:table-cell office:value-type="string" table:style-name="c1">
            <text:p>2026-04-23 02:00</text:p>
          </table:table-cell>
          <table:table-cell office:value-type="float" office:value="0.12023985000000001" table:style-name="c1">
            <text:p>0.12024</text:p>
          </table:table-cell>
          <table:table-cell office:value-type="float" office:value="-6.443431529282162" table:style-name="c14">
            <text:p>-6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00</text:p>
          </table:table-cell>
          <table:table-cell office:value-type="float" office:value="0.12416205" table:style-name="c1">
            <text:p>0.12416</text:p>
          </table:table-cell>
          <table:table-cell office:value-type="string" table:style-name="c1">
            <text:p>2026-04-25 16:00</text:p>
          </table:table-cell>
          <table:table-cell office:value-type="float" office:value="0.12543725" table:style-name="c1">
            <text:p>0.12544</text:p>
          </table:table-cell>
          <table:table-cell office:value-type="float" office:value="0.8250918354279824" table:style-name="c13">
            <text:p>+0.8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23:15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4-26 23:15</text:p>
          </table:table-cell>
          <table:table-cell office:value-type="float" office:value="0.12563715" table:style-name="c1">
            <text:p>0.12564</text:p>
          </table:table-cell>
          <table:table-cell office:value-type="float" office:value="0.09851411127503873" table:style-name="c13">
            <text:p>+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7 01:15</text:p>
          </table:table-cell>
          <table:table-cell office:value-type="float" office:value="0.1268634" table:style-name="c1">
            <text:p>0.12686</text:p>
          </table:table-cell>
          <table:table-cell office:value-type="string" table:style-name="c1">
            <text:p>2026-04-27 10:00</text:p>
          </table:table-cell>
          <table:table-cell office:value-type="float" office:value="0.12243875" table:style-name="c1">
            <text:p>0.12244</text:p>
          </table:table-cell>
          <table:table-cell office:value-type="float" office:value="-3.6806557771981496" table:style-name="c14">
            <text:p>-3.7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00</text:p>
          </table:table-cell>
          <table:table-cell office:value-type="float" office:value="0.1252626" table:style-name="c1">
            <text:p>0.12526</text:p>
          </table:table-cell>
          <table:table-cell office:value-type="string" table:style-name="c1">
            <text:p>2026-04-29 16:00</text:p>
          </table:table-cell>
          <table:table-cell office:value-type="float" office:value="0.11844075" table:style-name="c1">
            <text:p>0.11844</text:p>
          </table:table-cell>
          <table:table-cell office:value-type="float" office:value="-5.635052329466261" table:style-name="c14">
            <text:p>-5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6:00</text:p>
          </table:table-cell>
          <table:table-cell office:value-type="float" office:value="0.1234617" table:style-name="c1">
            <text:p>0.12346</text:p>
          </table:table-cell>
          <table:table-cell office:value-type="string" table:style-name="c1">
            <text:p>2026-05-03 16:00</text:p>
          </table:table-cell>
          <table:table-cell office:value-type="float" office:value="0.12203895000000001" table:style-name="c1">
            <text:p>0.12204</text:p>
          </table:table-cell>
          <table:table-cell office:value-type="float" office:value="-1.349978058823098" table:style-name="c14">
            <text:p>-1.3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4:15</text:p>
          </table:table-cell>
          <table:table-cell office:value-type="float" office:value="0.1270635" table:style-name="c1">
            <text:p>0.12706</text:p>
          </table:table-cell>
          <table:table-cell office:value-type="string" table:style-name="c1">
            <text:p>2026-05-05 04:15</text:p>
          </table:table-cell>
          <table:table-cell office:value-type="float" office:value="0.12743625" table:style-name="c1">
            <text:p>0.12744</text:p>
          </table:table-cell>
          <table:table-cell office:value-type="float" office:value="0.09287083721918332" table:style-name="c13">
            <text:p>+0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4:30</text:p>
          </table:table-cell>
          <table:table-cell office:value-type="float" office:value="0.1278639" table:style-name="c1">
            <text:p>0.12786</text:p>
          </table:table-cell>
          <table:table-cell office:value-type="string" table:style-name="c1">
            <text:p>2026-05-06 04:30</text:p>
          </table:table-cell>
          <table:table-cell office:value-type="float" office:value="0.13193400000000002" table:style-name="c1">
            <text:p>0.13193</text:p>
          </table:table-cell>
          <table:table-cell office:value-type="float" office:value="2.976887091665459" table:style-name="c13">
            <text:p>+3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8:30</text:p>
          </table:table-cell>
          <table:table-cell office:value-type="float" office:value="0.134067" table:style-name="c1">
            <text:p>0.13407</text:p>
          </table:table-cell>
          <table:table-cell office:value-type="string" table:style-name="c1">
            <text:p>2026-05-07 08:30</text:p>
          </table:table-cell>
          <table:table-cell office:value-type="float" office:value="0.14422785000000002" table:style-name="c1">
            <text:p>0.14423</text:p>
          </table:table-cell>
          <table:table-cell office:value-type="float" office:value="7.363884123497977" table:style-name="c13">
            <text:p>+7.4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11:45</text:p>
          </table:table-cell>
          <table:table-cell office:value-type="float" office:value="0.14717355000000001" table:style-name="c1">
            <text:p>0.14717</text:p>
          </table:table-cell>
          <table:table-cell office:value-type="string" table:style-name="c1">
            <text:p>2026-05-08 11:45</text:p>
          </table:table-cell>
          <table:table-cell office:value-type="float" office:value="0.15132430000000002" table:style-name="c1">
            <text:p>0.15132</text:p>
          </table:table-cell>
          <table:table-cell office:value-type="float" office:value="2.6147719643237366" table:style-name="c13">
            <text:p>+2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0.15897945" table:style-name="c1">
            <text:p>0.15898</text:p>
          </table:table-cell>
          <table:table-cell office:value-type="string" table:style-name="c1">
            <text:p>2026-05-09 17:45</text:p>
          </table:table-cell>
          <table:table-cell office:value-type="float" office:value="0.1657171" table:style-name="c1">
            <text:p>0.16572</text:p>
          </table:table-cell>
          <table:table-cell office:value-type="float" office:value="4.029691584100981" table:style-name="c13">
            <text:p>+4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45</text:p>
          </table:table-cell>
          <table:table-cell office:value-type="float" office:value="0.16398195" table:style-name="c1">
            <text:p>0.16398</text:p>
          </table:table-cell>
          <table:table-cell office:value-type="string" table:style-name="c1">
            <text:p>2026-05-11 11:00</text:p>
          </table:table-cell>
          <table:table-cell office:value-type="float" office:value="0.15842075" table:style-name="c1">
            <text:p>0.15842</text:p>
          </table:table-cell>
          <table:table-cell office:value-type="float" office:value="-3.5844695585398156" table:style-name="c14">
            <text:p>-3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2:45</text:p>
          </table:table-cell>
          <table:table-cell office:value-type="float" office:value="0.13096544999999998" table:style-name="c1">
            <text:p>0.13097</text:p>
          </table:table-cell>
          <table:table-cell office:value-type="string" table:style-name="c1">
            <text:p>2026-05-22 02:45</text:p>
          </table:table-cell>
          <table:table-cell office:value-type="float" office:value="0.13263365000000002" table:style-name="c1">
            <text:p>0.13263</text:p>
          </table:table-cell>
          <table:table-cell office:value-type="float" office:value="1.0713247911185997" table:style-name="c13">
            <text:p>+1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2 08:30</text:p>
          </table:table-cell>
          <table:table-cell office:value-type="float" office:value="0.1348674" table:style-name="c1">
            <text:p>0.13487</text:p>
          </table:table-cell>
          <table:table-cell office:value-type="string" table:style-name="c1">
            <text:p>2026-05-23 02:00</text:p>
          </table:table-cell>
          <table:table-cell office:value-type="float" office:value="0.12763615" table:style-name="c1">
            <text:p>0.12764</text:p>
          </table:table-cell>
          <table:table-cell office:value-type="float" office:value="-5.5509297753571385" table:style-name="c14">
            <text:p>-5.6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4:00</text:p>
          </table:table-cell>
          <table:table-cell office:value-type="float" office:value="0.13066529999999998" table:style-name="c1">
            <text:p>0.13067</text:p>
          </table:table-cell>
          <table:table-cell office:value-type="string" table:style-name="c1">
            <text:p>2026-05-26 14:00</text:p>
          </table:table-cell>
          <table:table-cell office:value-type="float" office:value="0.13283355" table:style-name="c1">
            <text:p>0.13283</text:p>
          </table:table-cell>
          <table:table-cell office:value-type="float" office:value="1.4561752305700448" table:style-name="c13">
            <text:p>+1.5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10:45</text:p>
          </table:table-cell>
          <table:table-cell office:value-type="float" office:value="0.1038519" table:style-name="c10">
            <text:p>0.10385</text:p>
          </table:table-cell>
          <table:table-cell office:value-type="string" table:style-name="c10">
            <text:p>2026-03-06 10:45</text:p>
          </table:table-cell>
          <table:table-cell office:value-type="float" office:value="0.10004995" table:style-name="c10">
            <text:p>0.10005</text:p>
          </table:table-cell>
          <table:table-cell office:value-type="float" office:value="-3.8535162573337556" table:style-name="c11">
            <text:p>-3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1:30</text:p>
          </table:table-cell>
          <table:table-cell office:value-type="float" office:value="0.09834915" table:style-name="c10">
            <text:p>0.098349</text:p>
          </table:table-cell>
          <table:table-cell office:value-type="string" table:style-name="c10">
            <text:p>2026-03-11 11:30</text:p>
          </table:table-cell>
          <table:table-cell office:value-type="float" office:value="0.09645175" table:style-name="c10">
            <text:p>0.096452</text:p>
          </table:table-cell>
          <table:table-cell office:value-type="float" office:value="-2.125292438470483" table:style-name="c11">
            <text:p>-2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11:00</text:p>
          </table:table-cell>
          <table:table-cell office:value-type="float" office:value="0.09914954999999999" table:style-name="c10">
            <text:p>0.09915</text:p>
          </table:table-cell>
          <table:table-cell office:value-type="string" table:style-name="c10">
            <text:p>2026-03-13 11:00</text:p>
          </table:table-cell>
          <table:table-cell office:value-type="float" office:value="0.0983508" table:style-name="c10">
            <text:p>0.098351</text:p>
          </table:table-cell>
          <table:table-cell office:value-type="float" office:value="-1.0038908388388834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3:30</text:p>
          </table:table-cell>
          <table:table-cell office:value-type="float" office:value="0.09854925" table:style-name="c10">
            <text:p>0.098549</text:p>
          </table:table-cell>
          <table:table-cell office:value-type="string" table:style-name="c10">
            <text:p>2026-03-17 03:30</text:p>
          </table:table-cell>
          <table:table-cell office:value-type="float" office:value="0.10094950000000001" table:style-name="c10">
            <text:p>0.10095</text:p>
          </table:table-cell>
          <table:table-cell office:value-type="float" office:value="2.2308155054452605" table:style-name="c12">
            <text:p>+2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11:15</text:p>
          </table:table-cell>
          <table:table-cell office:value-type="float" office:value="0.10075034999999999" table:style-name="c10">
            <text:p>0.10075</text:p>
          </table:table-cell>
          <table:table-cell office:value-type="string" table:style-name="c10">
            <text:p>2026-03-18 11:15</text:p>
          </table:table-cell>
          <table:table-cell office:value-type="float" office:value="0.09985005000000001" table:style-name="c10">
            <text:p>0.09985</text:p>
          </table:table-cell>
          <table:table-cell office:value-type="float" office:value="-1.091708614362119" table:style-name="c11">
            <text:p>-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0 11:00</text:p>
          </table:table-cell>
          <table:table-cell office:value-type="float" office:value="0.0984492" table:style-name="c10">
            <text:p>0.098449</text:p>
          </table:table-cell>
          <table:table-cell office:value-type="string" table:style-name="c10">
            <text:p>2026-03-21 11:00</text:p>
          </table:table-cell>
          <table:table-cell office:value-type="float" office:value="0.0963518" table:style-name="c10">
            <text:p>0.096352</text:p>
          </table:table-cell>
          <table:table-cell office:value-type="float" office:value="-2.326080098365446" table:style-name="c11">
            <text:p>-2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9:15</text:p>
          </table:table-cell>
          <table:table-cell office:value-type="float" office:value="0.0966483" table:style-name="c10">
            <text:p>0.096648</text:p>
          </table:table-cell>
          <table:table-cell office:value-type="string" table:style-name="c10">
            <text:p>2026-03-24 19:15</text:p>
          </table:table-cell>
          <table:table-cell office:value-type="float" office:value="0.09485255000000001" table:style-name="c10">
            <text:p>0.094853</text:p>
          </table:table-cell>
          <table:table-cell office:value-type="float" office:value="-2.0542112457746176" table:style-name="c11">
            <text:p>-2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0:45</text:p>
          </table:table-cell>
          <table:table-cell office:value-type="float" office:value="0.09534764999999999" table:style-name="c10">
            <text:p>0.095348</text:p>
          </table:table-cell>
          <table:table-cell office:value-type="string" table:style-name="c10">
            <text:p>2026-03-25 20:45</text:p>
          </table:table-cell>
          <table:table-cell office:value-type="float" office:value="0.09725135" table:style-name="c10">
            <text:p>0.097251</text:p>
          </table:table-cell>
          <table:table-cell office:value-type="float" office:value="1.792697094632123" table:style-name="c12">
            <text:p>+1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0.0944472" table:style-name="c10">
            <text:p>0.094447</text:p>
          </table:table-cell>
          <table:table-cell office:value-type="string" table:style-name="c10">
            <text:p>2026-03-30 21:00</text:p>
          </table:table-cell>
          <table:table-cell office:value-type="float" office:value="0.09125435000000001" table:style-name="c10">
            <text:p>0.091254</text:p>
          </table:table-cell>
          <table:table-cell office:value-type="float" office:value="-3.573708321316016" table:style-name="c11">
            <text:p>-3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15</text:p>
          </table:table-cell>
          <table:table-cell office:value-type="float" office:value="0.09474735000000001" table:style-name="c10">
            <text:p>0.094747</text:p>
          </table:table-cell>
          <table:table-cell office:value-type="string" table:style-name="c10">
            <text:p>2026-04-02 06:15</text:p>
          </table:table-cell>
          <table:table-cell office:value-type="float" office:value="0.09125435000000001" table:style-name="c10">
            <text:p>0.091254</text:p>
          </table:table-cell>
          <table:table-cell office:value-type="float" office:value="-3.879177038355164" table:style-name="c11">
            <text:p>-3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7:30</text:p>
          </table:table-cell>
          <table:table-cell office:value-type="float" office:value="0.0916458" table:style-name="c10">
            <text:p>0.091646</text:p>
          </table:table-cell>
          <table:table-cell office:value-type="string" table:style-name="c10">
            <text:p>2026-04-02 09:00</text:p>
          </table:table-cell>
          <table:table-cell office:value-type="float" office:value="0.09095450000000001" table:style-name="c10">
            <text:p>0.090955</text:p>
          </table:table-cell>
          <table:table-cell office:value-type="float" office:value="-0.9527092845498686" table:style-name="c11">
            <text:p>-1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16:45</text:p>
          </table:table-cell>
          <table:table-cell office:value-type="float" office:value="0.09294644999999999" table:style-name="c10">
            <text:p>0.092946</text:p>
          </table:table-cell>
          <table:table-cell office:value-type="string" table:style-name="c10">
            <text:p>2026-04-04 16:45</text:p>
          </table:table-cell>
          <table:table-cell office:value-type="float" office:value="0.09225385" table:style-name="c10">
            <text:p>0.092254</text:p>
          </table:table-cell>
          <table:table-cell office:value-type="float" office:value="-0.9435706755341333" table:style-name="c11">
            <text:p>-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7:30</text:p>
          </table:table-cell>
          <table:table-cell office:value-type="float" office:value="0.09304649999999999" table:style-name="c10">
            <text:p>0.093046</text:p>
          </table:table-cell>
          <table:table-cell office:value-type="string" table:style-name="c10">
            <text:p>2026-04-05 07:00</text:p>
          </table:table-cell>
          <table:table-cell office:value-type="float" office:value="0.09025485000000001" table:style-name="c10">
            <text:p>0.090255</text:p>
          </table:table-cell>
          <table:table-cell office:value-type="float" office:value="-3.1941765086811236" table:style-name="c11">
            <text:p>-3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13:15</text:p>
          </table:table-cell>
          <table:table-cell office:value-type="float" office:value="0.0922461" table:style-name="c10">
            <text:p>0.092246</text:p>
          </table:table-cell>
          <table:table-cell office:value-type="string" table:style-name="c10">
            <text:p>2026-04-08 19:00</text:p>
          </table:table-cell>
          <table:table-cell office:value-type="float" office:value="0.0893553" table:style-name="c10">
            <text:p>0.089355</text:p>
          </table:table-cell>
          <table:table-cell office:value-type="float" office:value="-3.32742657380638" table:style-name="c11">
            <text:p>-3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19:45</text:p>
          </table:table-cell>
          <table:table-cell office:value-type="float" office:value="0.086043" table:style-name="c10">
            <text:p>0.086043</text:p>
          </table:table-cell>
          <table:table-cell office:value-type="string" table:style-name="c10">
            <text:p>2026-04-16 19:45</text:p>
          </table:table-cell>
          <table:table-cell office:value-type="float" office:value="0.08995500000000001" table:style-name="c10">
            <text:p>0.089955</text:p>
          </table:table-cell>
          <table:table-cell office:value-type="float" office:value="4.337575346047906" table:style-name="c12">
            <text:p>+4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23:30</text:p>
          </table:table-cell>
          <table:table-cell office:value-type="float" office:value="0.0906453" table:style-name="c10">
            <text:p>0.090645</text:p>
          </table:table-cell>
          <table:table-cell office:value-type="string" table:style-name="c10">
            <text:p>2026-04-17 23:30</text:p>
          </table:table-cell>
          <table:table-cell office:value-type="float" office:value="0.09045475" table:style-name="c10">
            <text:p>0.090455</text:p>
          </table:table-cell>
          <table:table-cell office:value-type="float" office:value="-0.4096947610631507" table:style-name="c11">
            <text:p>-0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8 14:45</text:p>
          </table:table-cell>
          <table:table-cell office:value-type="float" office:value="0.0902451" table:style-name="c10">
            <text:p>0.090245</text:p>
          </table:table-cell>
          <table:table-cell office:value-type="string" table:style-name="c10">
            <text:p>2026-04-19 14:45</text:p>
          </table:table-cell>
          <table:table-cell office:value-type="float" office:value="0.08985504999999999" table:style-name="c10">
            <text:p>0.089855</text:p>
          </table:table-cell>
          <table:table-cell office:value-type="float" office:value="-0.6312478405475885" table:style-name="c11">
            <text:p>-0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6:00</text:p>
          </table:table-cell>
          <table:table-cell office:value-type="float" office:value="0.09094544999999998" table:style-name="c10">
            <text:p>0.090945</text:p>
          </table:table-cell>
          <table:table-cell office:value-type="string" table:style-name="c10">
            <text:p>2026-04-20 01:00</text:p>
          </table:table-cell>
          <table:table-cell office:value-type="float" office:value="0.0885557" table:style-name="c10">
            <text:p>0.088556</text:p>
          </table:table-cell>
          <table:table-cell office:value-type="float" office:value="-2.8223213413095305" table:style-name="c11">
            <text:p>-2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08:15</text:p>
          </table:table-cell>
          <table:table-cell office:value-type="float" office:value="0.09014504999999999" table:style-name="c10">
            <text:p>0.090145</text:p>
          </table:table-cell>
          <table:table-cell office:value-type="string" table:style-name="c10">
            <text:p>2026-04-21 08:15</text:p>
          </table:table-cell>
          <table:table-cell office:value-type="float" office:value="0.09265365" table:style-name="c10">
            <text:p>0.092654</text:p>
          </table:table-cell>
          <table:table-cell office:value-type="float" office:value="2.577385395703935" table:style-name="c12">
            <text:p>+2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10:30</text:p>
          </table:table-cell>
          <table:table-cell office:value-type="float" office:value="0.09334664999999999" table:style-name="c10">
            <text:p>0.093347</text:p>
          </table:table-cell>
          <table:table-cell office:value-type="string" table:style-name="c10">
            <text:p>2026-04-22 10:30</text:p>
          </table:table-cell>
          <table:table-cell office:value-type="float" office:value="0.0943528" table:style-name="c10">
            <text:p>0.094353</text:p>
          </table:table-cell>
          <table:table-cell office:value-type="float" office:value="0.875809418763307" table:style-name="c12">
            <text:p>+0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15:45</text:p>
          </table:table-cell>
          <table:table-cell office:value-type="float" office:value="0.09474735000000001" table:style-name="c10">
            <text:p>0.094747</text:p>
          </table:table-cell>
          <table:table-cell office:value-type="string" table:style-name="c10">
            <text:p>2026-04-23 15:45</text:p>
          </table:table-cell>
          <table:table-cell office:value-type="float" office:value="0.09645175" table:style-name="c10">
            <text:p>0.096452</text:p>
          </table:table-cell>
          <table:table-cell office:value-type="float" office:value="1.5953933822423494" table:style-name="c12">
            <text:p>+1.6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22:30</text:p>
          </table:table-cell>
          <table:table-cell office:value-type="float" office:value="0.09454725" table:style-name="c10">
            <text:p>0.094547</text:p>
          </table:table-cell>
          <table:table-cell office:value-type="string" table:style-name="c10">
            <text:p>2026-04-24 22:30</text:p>
          </table:table-cell>
          <table:table-cell office:value-type="float" office:value="0.09315340000000001" table:style-name="c10">
            <text:p>0.093153</text:p>
          </table:table-cell>
          <table:table-cell office:value-type="float" office:value="-1.6711894281430495" table:style-name="c11">
            <text:p>-1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1:00</text:p>
          </table:table-cell>
          <table:table-cell office:value-type="float" office:value="0.0934467" table:style-name="c10">
            <text:p>0.093447</text:p>
          </table:table-cell>
          <table:table-cell office:value-type="string" table:style-name="c10">
            <text:p>2026-04-30 01:00</text:p>
          </table:table-cell>
          <table:table-cell office:value-type="float" office:value="0.09395300000000001" table:style-name="c10">
            <text:p>0.093953</text:p>
          </table:table-cell>
          <table:table-cell office:value-type="float" office:value="0.34082311413887734" table:style-name="c12">
            <text:p>+0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30 01:15</text:p>
          </table:table-cell>
          <table:table-cell office:value-type="float" office:value="0.09484739999999998" table:style-name="c10">
            <text:p>0.094847</text:p>
          </table:table-cell>
          <table:table-cell office:value-type="string" table:style-name="c10">
            <text:p>2026-05-01 01:15</text:p>
          </table:table-cell>
          <table:table-cell office:value-type="float" office:value="0.09395300000000001" table:style-name="c10">
            <text:p>0.093953</text:p>
          </table:table-cell>
          <table:table-cell office:value-type="float" office:value="-1.1410033875467018" table:style-name="c11">
            <text:p>-1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00:30</text:p>
          </table:table-cell>
          <table:table-cell office:value-type="float" office:value="0.09694844999999999" table:style-name="c10">
            <text:p>0.096948</text:p>
          </table:table-cell>
          <table:table-cell office:value-type="string" table:style-name="c10">
            <text:p>2026-05-03 00:30</text:p>
          </table:table-cell>
          <table:table-cell office:value-type="float" office:value="0.0973513" table:style-name="c10">
            <text:p>0.097351</text:p>
          </table:table-cell>
          <table:table-cell office:value-type="float" office:value="0.21479946435454256" table:style-name="c12">
            <text:p>+0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2:15</text:p>
          </table:table-cell>
          <table:table-cell office:value-type="float" office:value="0.096048" table:style-name="c10">
            <text:p>0.096048</text:p>
          </table:table-cell>
          <table:table-cell office:value-type="string" table:style-name="c10">
            <text:p>2026-05-05 02:15</text:p>
          </table:table-cell>
          <table:table-cell office:value-type="float" office:value="0.09805095000000001" table:style-name="c10">
            <text:p>0.098051</text:p>
          </table:table-cell>
          <table:table-cell office:value-type="float" office:value="1.8812949264430667" table:style-name="c12">
            <text:p>+1.9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0:15</text:p>
          </table:table-cell>
          <table:table-cell office:value-type="float" office:value="0.09894945" table:style-name="c10">
            <text:p>0.098949</text:p>
          </table:table-cell>
          <table:table-cell office:value-type="string" table:style-name="c10">
            <text:p>2026-05-09 00:15</text:p>
          </table:table-cell>
          <table:table-cell office:value-type="float" office:value="0.10124935" table:style-name="c10">
            <text:p>0.10125</text:p>
          </table:table-cell>
          <table:table-cell office:value-type="float" office:value="2.119771812122262" table:style-name="c12">
            <text:p>+2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1:30</text:p>
          </table:table-cell>
          <table:table-cell office:value-type="float" office:value="0.1028514" table:style-name="c10">
            <text:p>0.10285</text:p>
          </table:table-cell>
          <table:table-cell office:value-type="string" table:style-name="c10">
            <text:p>2026-05-10 01:30</text:p>
          </table:table-cell>
          <table:table-cell office:value-type="float" office:value="0.1005497" table:style-name="c10">
            <text:p>0.10055</text:p>
          </table:table-cell>
          <table:table-cell office:value-type="float" office:value="-2.4333152978958106" table:style-name="c11">
            <text:p>-2.4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2:30</text:p>
          </table:table-cell>
          <table:table-cell office:value-type="float" office:value="0.1014507" table:style-name="c10">
            <text:p>0.10145</text:p>
          </table:table-cell>
          <table:table-cell office:value-type="string" table:style-name="c10">
            <text:p>2026-05-11 02:30</text:p>
          </table:table-cell>
          <table:table-cell office:value-type="float" office:value="0.10374810000000001" table:style-name="c10">
            <text:p>0.10375</text:p>
          </table:table-cell>
          <table:table-cell office:value-type="float" office:value="2.060121367422796" table:style-name="c12">
            <text:p>+2.1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7 19:45</text:p>
          </table:table-cell>
          <table:table-cell office:value-type="float" office:value="0.09244619999999999" table:style-name="c10">
            <text:p>0.092446</text:p>
          </table:table-cell>
          <table:table-cell office:value-type="string" table:style-name="c10">
            <text:p>2026-05-18 02:00</text:p>
          </table:table-cell>
          <table:table-cell office:value-type="float" office:value="0.0905547" table:style-name="c10">
            <text:p>0.090555</text:p>
          </table:table-cell>
          <table:table-cell office:value-type="float" office:value="-2.241864830896234" table:style-name="c11">
            <text:p>-2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0.09126561" table:style-name="c10">
            <text:p>0.091266</text:p>
          </table:table-cell>
          <table:table-cell office:value-type="string" table:style-name="c10">
            <text:p>2026-05-22 17:30</text:p>
          </table:table-cell>
          <table:table-cell office:value-type="float" office:value="0.09204395500000001" table:style-name="c10">
            <text:p>0.092044</text:p>
          </table:table-cell>
          <table:table-cell office:value-type="float" office:value="0.6512301117091335" table:style-name="c12">
            <text:p>+0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20:45</text:p>
          </table:table-cell>
          <table:table-cell office:value-type="float" office:value="0.09174585" table:style-name="c10">
            <text:p>0.091746</text:p>
          </table:table-cell>
          <table:table-cell office:value-type="string" table:style-name="c10">
            <text:p>2026-05-23 05:00</text:p>
          </table:table-cell>
          <table:table-cell office:value-type="float" office:value="0.0903548" table:style-name="c10">
            <text:p>0.090355</text:p>
          </table:table-cell>
          <table:table-cell office:value-type="float" office:value="-1.7130684877844637" table:style-name="c11">
            <text:p>-1.7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10:15</text:p>
          </table:table-cell>
          <table:table-cell office:value-type="float" office:value="0.09198596999999999" table:style-name="c10">
            <text:p>0.091986</text:p>
          </table:table-cell>
          <table:table-cell office:value-type="string" table:style-name="c10">
            <text:p>2026-05-24 22:00</text:p>
          </table:table-cell>
          <table:table-cell office:value-type="float" office:value="0.08919538" table:style-name="c10">
            <text:p>0.089195</text:p>
          </table:table-cell>
          <table:table-cell office:value-type="float" office:value="-3.2275482496080254" table:style-name="c11">
            <text:p>-3.2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7:15</text:p>
          </table:table-cell>
          <table:table-cell office:value-type="float" office:value="0.09219607499999999" table:style-name="c10">
            <text:p>0.092196</text:p>
          </table:table-cell>
          <table:table-cell office:value-type="string" table:style-name="c10">
            <text:p>2026-05-26 07:15</text:p>
          </table:table-cell>
          <table:table-cell office:value-type="float" office:value="0.0923538" table:style-name="c10">
            <text:p>0.092354</text:p>
          </table:table-cell>
          <table:table-cell office:value-type="float" office:value="-0.029166367657185166" table:style-name="c11">
            <text:p>-0.0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0 01:00</text:p>
          </table:table-cell>
          <table:table-cell office:value-type="float" office:value="0.09088542" table:style-name="c10">
            <text:p>0.090885</text:p>
          </table:table-cell>
          <table:table-cell office:value-type="string" table:style-name="c10">
            <text:p>2026-05-31 01:00</text:p>
          </table:table-cell>
          <table:table-cell office:value-type="float" office:value="0.09033481" table:style-name="c10">
            <text:p>0.090335</text:p>
          </table:table-cell>
          <table:table-cell office:value-type="float" office:value="-0.8045176940261745" table:style-name="c11">
            <text:p>-0.8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2:15</text:p>
          </table:table-cell>
          <table:table-cell office:value-type="float" office:value="0.09119557499999999" table:style-name="c10">
            <text:p>0.091196</text:p>
          </table:table-cell>
          <table:table-cell office:value-type="string" table:style-name="c10">
            <text:p>2026-06-01 02:15</text:p>
          </table:table-cell>
          <table:table-cell office:value-type="float" office:value="0.09257369" table:style-name="c10">
            <text:p>0.092574</text:p>
          </table:table-cell>
          <table:table-cell office:value-type="float" office:value="1.3082435125717717" table:style-name="c12">
            <text:p>+1.3</text:p>
          </table:table-cell>
        </table:table-row>
        <table:table-row>
          <table:table-cell office:value-type="string" table:style-name="c9">
            <text:p>P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1:00</text:p>
          </table:table-cell>
          <table:table-cell office:value-type="float" office:value="0.09294644999999999" table:style-name="c10">
            <text:p>0.092946</text:p>
          </table:table-cell>
          <table:table-cell office:value-type="string" table:style-name="c10">
            <text:p>2026-06-02 11:00</text:p>
          </table:table-cell>
          <table:table-cell office:value-type="float" office:value="0.09169413000000001" table:style-name="c10">
            <text:p>0.091694</text:p>
          </table:table-cell>
          <table:table-cell office:value-type="float" office:value="-1.5445630961375856" table:style-name="c11">
            <text:p>-1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0:30</text:p>
          </table:table-cell>
          <table:table-cell office:value-type="float" office:value="5.612804999999999e-06" table:style-name="c1">
            <text:p>0.0000056128</text:p>
          </table:table-cell>
          <table:table-cell office:value-type="string" table:style-name="c1">
            <text:p>2026-03-06 16:00</text:p>
          </table:table-cell>
          <table:table-cell office:value-type="float" office:value="5.33733e-06" table:style-name="c1">
            <text:p>0.0000053373</text:p>
          </table:table-cell>
          <table:table-cell office:value-type="float" office:value="-5.098062780909007" table:style-name="c14">
            <text:p>-5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9:30</text:p>
          </table:table-cell>
          <table:table-cell office:value-type="float" office:value="5.56278e-06" table:style-name="c1">
            <text:p>0.0000055628</text:p>
          </table:table-cell>
          <table:table-cell office:value-type="string" table:style-name="c1">
            <text:p>2026-03-10 19:30</text:p>
          </table:table-cell>
          <table:table-cell office:value-type="float" office:value="5.67716e-06" table:style-name="c1">
            <text:p>0.0000056772</text:p>
          </table:table-cell>
          <table:table-cell office:value-type="float" office:value="1.8521558853666686" table:style-name="c13">
            <text:p>+1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2:30</text:p>
          </table:table-cell>
          <table:table-cell office:value-type="float" office:value="5.772884999999999e-06" table:style-name="c1">
            <text:p>0.0000057729</text:p>
          </table:table-cell>
          <table:table-cell office:value-type="string" table:style-name="c1">
            <text:p>2026-03-12 12:30</text:p>
          </table:table-cell>
          <table:table-cell office:value-type="float" office:value="6.006995000000001e-06" table:style-name="c1">
            <text:p>0.000006007</text:p>
          </table:table-cell>
          <table:table-cell office:value-type="float" office:value="3.847331394874498" table:style-name="c13">
            <text:p>+3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45</text:p>
          </table:table-cell>
          <table:table-cell office:value-type="float" office:value="5.972984999999999e-06" table:style-name="c1">
            <text:p>0.000005973</text:p>
          </table:table-cell>
          <table:table-cell office:value-type="string" table:style-name="c1">
            <text:p>2026-03-14 00:45</text:p>
          </table:table-cell>
          <table:table-cell office:value-type="float" office:value="5.907045e-06" table:style-name="c1">
            <text:p>0.000005907</text:p>
          </table:table-cell>
          <table:table-cell office:value-type="float" office:value="-1.3016637904665562" table:style-name="c14">
            <text:p>-1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1:00</text:p>
          </table:table-cell>
          <table:table-cell office:value-type="float" office:value="6.02301e-06" table:style-name="c1">
            <text:p>0.000006023</text:p>
          </table:table-cell>
          <table:table-cell office:value-type="string" table:style-name="c1">
            <text:p>2026-03-17 01:00</text:p>
          </table:table-cell>
          <table:table-cell office:value-type="float" office:value="6.226885e-06" table:style-name="c1">
            <text:p>0.0000062269</text:p>
          </table:table-cell>
          <table:table-cell office:value-type="float" office:value="3.1782689533140562" table:style-name="c13">
            <text:p>+3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19:15</text:p>
          </table:table-cell>
          <table:table-cell office:value-type="float" office:value="6.093045e-06" table:style-name="c1">
            <text:p>0.000006093</text:p>
          </table:table-cell>
          <table:table-cell office:value-type="string" table:style-name="c1">
            <text:p>2026-03-18 13:00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-4.556151200508129" table:style-name="c14">
            <text:p>-4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0 11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3-21 11:15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-1.1236200577397049" table:style-name="c14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20:15</text:p>
          </table:table-cell>
          <table:table-cell office:value-type="float" office:value="6.143069999999999e-06" table:style-name="c1">
            <text:p>0.0000061431</text:p>
          </table:table-cell>
          <table:table-cell office:value-type="string" table:style-name="c1">
            <text:p>2026-03-24 20:15</text:p>
          </table:table-cell>
          <table:table-cell office:value-type="float" office:value="6.1269350000000005e-06" table:style-name="c1">
            <text:p>0.0000061269</text:p>
          </table:table-cell>
          <table:table-cell office:value-type="float" office:value="-0.46202864471670546" table:style-name="c14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20:45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3-25 20:45</text:p>
          </table:table-cell>
          <table:table-cell office:value-type="float" office:value="6.1069450000000005e-06" table:style-name="c1">
            <text:p>0.0000061069</text:p>
          </table:table-cell>
          <table:table-cell office:value-type="float" office:value="-2.0628396903638158" table:style-name="c14">
            <text:p>-2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06:00</text:p>
          </table:table-cell>
          <table:table-cell office:value-type="float" office:value="6.033015e-06" table:style-name="c1">
            <text:p>0.000006033</text:p>
          </table:table-cell>
          <table:table-cell office:value-type="string" table:style-name="c1">
            <text:p>2026-03-31 06:00</text:p>
          </table:table-cell>
          <table:table-cell office:value-type="float" office:value="5.9170400000000005e-06" table:style-name="c1">
            <text:p>0.000005917</text:p>
          </table:table-cell>
          <table:table-cell office:value-type="float" office:value="-2.118396240685605" table:style-name="c14">
            <text:p>-2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1 11:45</text:p>
          </table:table-cell>
          <table:table-cell office:value-type="float" office:value="5.932965e-06" table:style-name="c1">
            <text:p>0.000005933</text:p>
          </table:table-cell>
          <table:table-cell office:value-type="string" table:style-name="c1">
            <text:p>2026-04-01 11:45</text:p>
          </table:table-cell>
          <table:table-cell office:value-type="float" office:value="5.997e-06" table:style-name="c1">
            <text:p>0.000005997</text:p>
          </table:table-cell>
          <table:table-cell office:value-type="float" office:value="0.877251037213278" table:style-name="c13">
            <text:p>+0.9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12:45</text:p>
          </table:table-cell>
          <table:table-cell office:value-type="float" office:value="6.063029999999999e-06" table:style-name="c1">
            <text:p>0.000006063</text:p>
          </table:table-cell>
          <table:table-cell office:value-type="string" table:style-name="c1">
            <text:p>2026-04-02 06:00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-4.083656899520516" table:style-name="c14">
            <text:p>-4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9:15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05 07:00</text:p>
          </table:table-cell>
          <table:table-cell office:value-type="float" office:value="5.837080000000001e-06" table:style-name="c1">
            <text:p>0.0000058371</text:p>
          </table:table-cell>
          <table:table-cell office:value-type="float" office:value="-3.76032352286666" table:style-name="c14">
            <text:p>-3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6.153075e-06" table:style-name="c1">
            <text:p>0.0000061531</text:p>
          </table:table-cell>
          <table:table-cell office:value-type="string" table:style-name="c1">
            <text:p>2026-04-08 23:00</text:p>
          </table:table-cell>
          <table:table-cell office:value-type="float" office:value="5.967015e-06" table:style-name="c1">
            <text:p>0.000005967</text:p>
          </table:table-cell>
          <table:table-cell office:value-type="float" office:value="-3.217709242695732" table:style-name="c14">
            <text:p>-3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6.02301e-06" table:style-name="c1">
            <text:p>0.000006023</text:p>
          </table:table-cell>
          <table:table-cell office:value-type="string" table:style-name="c1">
            <text:p>2026-04-12 04:00</text:p>
          </table:table-cell>
          <table:table-cell office:value-type="float" office:value="5.807095e-06" table:style-name="c1">
            <text:p>0.0000058071</text:p>
          </table:table-cell>
          <table:table-cell office:value-type="float" office:value="-3.777569403089154" table:style-name="c14">
            <text:p>-3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6.013004999999999e-06" table:style-name="c1">
            <text:p>0.000006013</text:p>
          </table:table-cell>
          <table:table-cell office:value-type="string" table:style-name="c1">
            <text:p>2026-04-15 00:00</text:p>
          </table:table-cell>
          <table:table-cell office:value-type="float" office:value="5.827085e-06" table:style-name="c1">
            <text:p>0.0000058271</text:p>
          </table:table-cell>
          <table:table-cell office:value-type="float" office:value="-3.2856839951904027" table:style-name="c14">
            <text:p>-3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5.892945e-06" table:style-name="c1">
            <text:p>0.0000058929</text:p>
          </table:table-cell>
          <table:table-cell office:value-type="string" table:style-name="c1">
            <text:p>2026-04-16 12:15</text:p>
          </table:table-cell>
          <table:table-cell office:value-type="float" office:value="6.0869550000000006e-06" table:style-name="c1">
            <text:p>0.000006087</text:p>
          </table:table-cell>
          <table:table-cell office:value-type="float" office:value="3.085760633350576" table:style-name="c13">
            <text:p>+3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2:30</text:p>
          </table:table-cell>
          <table:table-cell office:value-type="float" office:value="6.10305e-06" table:style-name="c1">
            <text:p>0.000006103</text:p>
          </table:table-cell>
          <table:table-cell office:value-type="string" table:style-name="c1">
            <text:p>2026-04-17 12:30</text:p>
          </table:table-cell>
          <table:table-cell office:value-type="float" office:value="6.256870000000001e-06" table:style-name="c1">
            <text:p>0.0000062569</text:p>
          </table:table-cell>
          <table:table-cell office:value-type="float" office:value="2.315440916754752" table:style-name="c13">
            <text:p>+2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13:00</text:p>
          </table:table-cell>
          <table:table-cell office:value-type="float" office:value="6.333165e-06" table:style-name="c1">
            <text:p>0.0000063332</text:p>
          </table:table-cell>
          <table:table-cell office:value-type="string" table:style-name="c1">
            <text:p>2026-04-18 13:00</text:p>
          </table:table-cell>
          <table:table-cell office:value-type="float" office:value="6.1269350000000005e-06" table:style-name="c1">
            <text:p>0.0000061269</text:p>
          </table:table-cell>
          <table:table-cell office:value-type="float" office:value="-3.4497402651754605" table:style-name="c14">
            <text:p>-3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20:30</text:p>
          </table:table-cell>
          <table:table-cell office:value-type="float" office:value="6.0530249999999995e-06" table:style-name="c1">
            <text:p>0.000006053</text:p>
          </table:table-cell>
          <table:table-cell office:value-type="string" table:style-name="c1">
            <text:p>2026-04-22 20:30</text:p>
          </table:table-cell>
          <table:table-cell office:value-type="float" office:value="6.176910000000001e-06" table:style-name="c1">
            <text:p>0.0000061769</text:p>
          </table:table-cell>
          <table:table-cell office:value-type="float" office:value="1.8426713405280903" table:style-name="c13">
            <text:p>+1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06:30</text:p>
          </table:table-cell>
          <table:table-cell office:value-type="float" office:value="6.12306e-06" table:style-name="c1">
            <text:p>0.0000061231</text:p>
          </table:table-cell>
          <table:table-cell office:value-type="string" table:style-name="c1">
            <text:p>2026-04-24 06:30</text:p>
          </table:table-cell>
          <table:table-cell office:value-type="float" office:value="6.13693e-06" table:style-name="c1">
            <text:p>0.0000061369</text:p>
          </table:table-cell>
          <table:table-cell office:value-type="float" office:value="0.02616791163243537" table:style-name="c13">
            <text:p>+0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1:15</text:p>
          </table:table-cell>
          <table:table-cell office:value-type="float" office:value="6.213104999999999e-06" table:style-name="c1">
            <text:p>0.0000062131</text:p>
          </table:table-cell>
          <table:table-cell office:value-type="string" table:style-name="c1">
            <text:p>2026-04-25 11:15</text:p>
          </table:table-cell>
          <table:table-cell office:value-type="float" office:value="6.206895e-06" table:style-name="c1">
            <text:p>0.0000062069</text:p>
          </table:table-cell>
          <table:table-cell office:value-type="float" office:value="-0.2996502248875377" table:style-name="c14">
            <text:p>-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8:45</text:p>
          </table:table-cell>
          <table:table-cell office:value-type="float" office:value="6.2031e-06" table:style-name="c1">
            <text:p>0.0000062031</text:p>
          </table:table-cell>
          <table:table-cell office:value-type="string" table:style-name="c1">
            <text:p>2026-04-27 11:00</text:p>
          </table:table-cell>
          <table:table-cell office:value-type="float" office:value="6.1269350000000005e-06" table:style-name="c1">
            <text:p>0.0000061269</text:p>
          </table:table-cell>
          <table:table-cell office:value-type="float" office:value="-1.4252993352517174" table:style-name="c14">
            <text:p>-1.4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04:45</text:p>
          </table:table-cell>
          <table:table-cell office:value-type="float" office:value="6.22311e-06" table:style-name="c1">
            <text:p>0.0000062231</text:p>
          </table:table-cell>
          <table:table-cell office:value-type="string" table:style-name="c1">
            <text:p>2026-04-30 04:45</text:p>
          </table:table-cell>
          <table:table-cell office:value-type="float" office:value="6.166915e-06" table:style-name="c1">
            <text:p>0.0000061669</text:p>
          </table:table-cell>
          <table:table-cell office:value-type="float" office:value="-1.1010999819222156" table:style-name="c14">
            <text:p>-1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01:45</text:p>
          </table:table-cell>
          <table:table-cell office:value-type="float" office:value="6.293145e-06" table:style-name="c1">
            <text:p>0.0000062931</text:p>
          </table:table-cell>
          <table:table-cell office:value-type="string" table:style-name="c1">
            <text:p>2026-05-02 01:45</text:p>
          </table:table-cell>
          <table:table-cell office:value-type="float" office:value="6.276860000000001e-06" table:style-name="c1">
            <text:p>0.0000062769</text:p>
          </table:table-cell>
          <table:table-cell office:value-type="float" office:value="-0.45815634535671945" table:style-name="c14">
            <text:p>-0.5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4:30</text:p>
          </table:table-cell>
          <table:table-cell office:value-type="float" office:value="6.303149999999999e-06" table:style-name="c1">
            <text:p>0.0000063031</text:p>
          </table:table-cell>
          <table:table-cell office:value-type="string" table:style-name="c1">
            <text:p>2026-05-03 03:00</text:p>
          </table:table-cell>
          <table:table-cell office:value-type="float" office:value="6.206895e-06" table:style-name="c1">
            <text:p>0.0000062069</text:p>
          </table:table-cell>
          <table:table-cell office:value-type="float" office:value="-1.7239409359605773" table:style-name="c14">
            <text:p>-1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22:00</text:p>
          </table:table-cell>
          <table:table-cell office:value-type="float" office:value="6.403199999999999e-06" table:style-name="c1">
            <text:p>0.0000064032</text:p>
          </table:table-cell>
          <table:table-cell office:value-type="string" table:style-name="c1">
            <text:p>2026-05-06 22:00</text:p>
          </table:table-cell>
          <table:table-cell office:value-type="float" office:value="6.43678e-06" table:style-name="c1">
            <text:p>0.0000064368</text:p>
          </table:table-cell>
          <table:table-cell office:value-type="float" office:value="0.3234769612069366" table:style-name="c13">
            <text:p>+0.3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00</text:p>
          </table:table-cell>
          <table:table-cell office:value-type="float" office:value="6.373185e-06" table:style-name="c1">
            <text:p>0.0000063732</text:p>
          </table:table-cell>
          <table:table-cell office:value-type="string" table:style-name="c1">
            <text:p>2026-05-07 17:00</text:p>
          </table:table-cell>
          <table:table-cell office:value-type="float" office:value="6.256870000000001e-06" table:style-name="c1">
            <text:p>0.0000062569</text:p>
          </table:table-cell>
          <table:table-cell office:value-type="float" office:value="-2.0213203151956183" table:style-name="c14">
            <text:p>-2.0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7:45</text:p>
          </table:table-cell>
          <table:table-cell office:value-type="float" office:value="6.42321e-06" table:style-name="c1">
            <text:p>0.0000064232</text:p>
          </table:table-cell>
          <table:table-cell office:value-type="string" table:style-name="c1">
            <text:p>2026-05-09 17:45</text:p>
          </table:table-cell>
          <table:table-cell office:value-type="float" office:value="6.426785000000001e-06" table:style-name="c1">
            <text:p>0.0000064268</text:p>
          </table:table-cell>
          <table:table-cell office:value-type="float" office:value="-0.14435372991072892" table:style-name="c14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2:30</text:p>
          </table:table-cell>
          <table:table-cell office:value-type="float" office:value="6.393195e-06" table:style-name="c1">
            <text:p>0.0000063932</text:p>
          </table:table-cell>
          <table:table-cell office:value-type="string" table:style-name="c1">
            <text:p>2026-05-11 02:30</text:p>
          </table:table-cell>
          <table:table-cell office:value-type="float" office:value="6.516740000000001e-06" table:style-name="c1">
            <text:p>0.0000065167</text:p>
          </table:table-cell>
          <table:table-cell office:value-type="float" office:value="1.7286823996452538" table:style-name="c13">
            <text:p>+1.7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0:45</text:p>
          </table:table-cell>
          <table:table-cell office:value-type="float" office:value="5.812905e-06" table:style-name="c1">
            <text:p>0.0000058129</text:p>
          </table:table-cell>
          <table:table-cell office:value-type="string" table:style-name="c1">
            <text:p>2026-05-22 00:45</text:p>
          </table:table-cell>
          <table:table-cell office:value-type="float" office:value="5.817090000000001e-06" table:style-name="c1">
            <text:p>0.0000058171</text:p>
          </table:table-cell>
          <table:table-cell office:value-type="float" office:value="-0.1280489343968072" table:style-name="c14">
            <text:p>-0.1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45</text:p>
          </table:table-cell>
          <table:table-cell office:value-type="float" office:value="5.492745e-06" table:style-name="c1">
            <text:p>0.0000054927</text:p>
          </table:table-cell>
          <table:table-cell office:value-type="string" table:style-name="c1">
            <text:p>2026-05-31 01:45</text:p>
          </table:table-cell>
          <table:table-cell office:value-type="float" office:value="5.51724e-06" table:style-name="c1">
            <text:p>0.0000055172</text:p>
          </table:table-cell>
          <table:table-cell office:value-type="float" office:value="0.2451604296212606" table:style-name="c13">
            <text:p>+0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22:15</text:p>
          </table:table-cell>
          <table:table-cell office:value-type="float" office:value="5.512754999999999e-06" table:style-name="c1">
            <text:p>0.0000055128</text:p>
          </table:table-cell>
          <table:table-cell office:value-type="string" table:style-name="c1">
            <text:p>2026-06-01 12:00</text:p>
          </table:table-cell>
          <table:table-cell office:value-type="float" office:value="5.43728e-06" table:style-name="c1">
            <text:p>0.0000054373</text:p>
          </table:table-cell>
          <table:table-cell office:value-type="float" office:value="-1.5662608390904387" table:style-name="c14">
            <text:p>-1.6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18:00</text:p>
          </table:table-cell>
          <table:table-cell office:value-type="float" office:value="5.54277e-06" table:style-name="c1">
            <text:p>0.0000055428</text:p>
          </table:table-cell>
          <table:table-cell office:value-type="string" table:style-name="c1">
            <text:p>2026-06-02 14:00</text:p>
          </table:table-cell>
          <table:table-cell office:value-type="float" office:value="5.427285e-06" table:style-name="c1">
            <text:p>0.0000054273</text:p>
          </table:table-cell>
          <table:table-cell office:value-type="float" office:value="-2.2792600579673916" table:style-name="c14">
            <text:p>-2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1:30</text:p>
          </table:table-cell>
          <table:table-cell office:value-type="float" office:value="89.80488" table:style-name="c10">
            <text:p>89.805</text:p>
          </table:table-cell>
          <table:table-cell office:value-type="string" table:style-name="c10">
            <text:p>2026-03-06 16:00</text:p>
          </table:table-cell>
          <table:table-cell office:value-type="float" office:value="84.60767500000001" table:style-name="c10">
            <text:p>84.608</text:p>
          </table:table-cell>
          <table:table-cell office:value-type="float" office:value="-5.975550262218466" table:style-name="c11">
            <text:p>-6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88.14405" table:style-name="c10">
            <text:p>88.144</text:p>
          </table:table-cell>
          <table:table-cell office:value-type="string" table:style-name="c10">
            <text:p>2026-03-11 15:00</text:p>
          </table:table-cell>
          <table:table-cell office:value-type="float" office:value="86.49673000000001" table:style-name="c10">
            <text:p>86.497</text:p>
          </table:table-cell>
          <table:table-cell office:value-type="float" office:value="-2.065059369600064" table:style-name="c11">
            <text:p>-2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1 17:00</text:p>
          </table:table-cell>
          <table:table-cell office:value-type="float" office:value="86.493225" table:style-name="c10">
            <text:p>86.493</text:p>
          </table:table-cell>
          <table:table-cell office:value-type="string" table:style-name="c10">
            <text:p>2026-03-12 17:00</text:p>
          </table:table-cell>
          <table:table-cell office:value-type="float" office:value="86.7566" table:style-name="c10">
            <text:p>86.757</text:p>
          </table:table-cell>
          <table:table-cell office:value-type="float" office:value="0.10399491590238341" table:style-name="c12">
            <text:p>+0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00:45</text:p>
          </table:table-cell>
          <table:table-cell office:value-type="float" office:value="90.02499" table:style-name="c10">
            <text:p>90.025</text:p>
          </table:table-cell>
          <table:table-cell office:value-type="string" table:style-name="c10">
            <text:p>2026-03-14 00:45</text:p>
          </table:table-cell>
          <table:table-cell office:value-type="float" office:value="87.83606" table:style-name="c10">
            <text:p>87.836</text:p>
          </table:table-cell>
          <table:table-cell office:value-type="float" office:value="-2.6265087993233904" table:style-name="c11">
            <text:p>-2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8:00</text:p>
          </table:table-cell>
          <table:table-cell office:value-type="float" office:value="88.48422" table:style-name="c10">
            <text:p>88.484</text:p>
          </table:table-cell>
          <table:table-cell office:value-type="string" table:style-name="c10">
            <text:p>2026-03-16 18:00</text:p>
          </table:table-cell>
          <table:table-cell office:value-type="float" office:value="94.03296" table:style-name="c10">
            <text:p>94.033</text:p>
          </table:table-cell>
          <table:table-cell office:value-type="float" office:value="6.058445351001573" table:style-name="c12">
            <text:p>+6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7 16:30</text:p>
          </table:table-cell>
          <table:table-cell office:value-type="float" office:value="94.56725999999999" table:style-name="c10">
            <text:p>94.567</text:p>
          </table:table-cell>
          <table:table-cell office:value-type="string" table:style-name="c10">
            <text:p>2026-03-18 15:00</text:p>
          </table:table-cell>
          <table:table-cell office:value-type="float" office:value="88.90552500000001" table:style-name="c10">
            <text:p>88.906</text:p>
          </table:table-cell>
          <table:table-cell office:value-type="float" office:value="-6.17492475141499" table:style-name="c11">
            <text:p>-6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07:30</text:p>
          </table:table-cell>
          <table:table-cell office:value-type="float" office:value="91.23559499999999" table:style-name="c10">
            <text:p>91.236</text:p>
          </table:table-cell>
          <table:table-cell office:value-type="string" table:style-name="c10">
            <text:p>2026-03-25 07:30</text:p>
          </table:table-cell>
          <table:table-cell office:value-type="float" office:value="92.163895" table:style-name="c10">
            <text:p>92.164</text:p>
          </table:table-cell>
          <table:table-cell office:value-type="float" office:value="0.815541756367133" table:style-name="c12">
            <text:p>+0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5 11:45</text:p>
          </table:table-cell>
          <table:table-cell office:value-type="float" office:value="93.156555" table:style-name="c10">
            <text:p>93.157</text:p>
          </table:table-cell>
          <table:table-cell office:value-type="string" table:style-name="c10">
            <text:p>2026-03-26 09:00</text:p>
          </table:table-cell>
          <table:table-cell office:value-type="float" office:value="88.83556" table:style-name="c10">
            <text:p>88.836</text:p>
          </table:table-cell>
          <table:table-cell office:value-type="float" office:value="-4.829050714080186" table:style-name="c11">
            <text:p>-4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30</text:p>
          </table:table-cell>
          <table:table-cell office:value-type="float" office:value="83.79187499999999" table:style-name="c10">
            <text:p>83.792</text:p>
          </table:table-cell>
          <table:table-cell office:value-type="string" table:style-name="c10">
            <text:p>2026-03-31 10:00</text:p>
          </table:table-cell>
          <table:table-cell office:value-type="float" office:value="80.509725" table:style-name="c10">
            <text:p>80.51</text:p>
          </table:table-cell>
          <table:table-cell office:value-type="float" office:value="-4.109096425250058" table:style-name="c11">
            <text:p>-4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16:00</text:p>
          </table:table-cell>
          <table:table-cell office:value-type="float" office:value="83.66181" table:style-name="c10">
            <text:p>83.662</text:p>
          </table:table-cell>
          <table:table-cell office:value-type="string" table:style-name="c10">
            <text:p>2026-04-02 01:00</text:p>
          </table:table-cell>
          <table:table-cell office:value-type="float" office:value="81.589185" table:style-name="c10">
            <text:p>81.589</text:p>
          </table:table-cell>
          <table:table-cell office:value-type="float" office:value="-2.6723325503177575" table:style-name="c11">
            <text:p>-2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5:15</text:p>
          </table:table-cell>
          <table:table-cell office:value-type="float" office:value="81.190575" table:style-name="c10">
            <text:p>81.191</text:p>
          </table:table-cell>
          <table:table-cell office:value-type="string" table:style-name="c10">
            <text:p>2026-04-05 12:00</text:p>
          </table:table-cell>
          <table:table-cell office:value-type="float" office:value="79.870045" table:style-name="c10">
            <text:p>79.87</text:p>
          </table:table-cell>
          <table:table-cell office:value-type="float" office:value="-1.8231059700648533" table:style-name="c11">
            <text:p>-1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0:00</text:p>
          </table:table-cell>
          <table:table-cell office:value-type="float" office:value="81.930945" table:style-name="c10">
            <text:p>81.931</text:p>
          </table:table-cell>
          <table:table-cell office:value-type="string" table:style-name="c10">
            <text:p>2026-04-07 00:00</text:p>
          </table:table-cell>
          <table:table-cell office:value-type="float" office:value="79.989985" table:style-name="c10">
            <text:p>79.99</text:p>
          </table:table-cell>
          <table:table-cell office:value-type="float" office:value="-2.5641837525674616" table:style-name="c11">
            <text:p>-2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7 23:00</text:p>
          </table:table-cell>
          <table:table-cell office:value-type="float" office:value="85.28262" table:style-name="c10">
            <text:p>85.283</text:p>
          </table:table-cell>
          <table:table-cell office:value-type="string" table:style-name="c10">
            <text:p>2026-04-08 23:00</text:p>
          </table:table-cell>
          <table:table-cell office:value-type="float" office:value="82.588685" table:style-name="c10">
            <text:p>82.589</text:p>
          </table:table-cell>
          <table:table-cell office:value-type="float" office:value="-3.3524178564342866" table:style-name="c11">
            <text:p>-3.4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9 15:45</text:p>
          </table:table-cell>
          <table:table-cell office:value-type="float" office:value="83.411685" table:style-name="c10">
            <text:p>83.412</text:p>
          </table:table-cell>
          <table:table-cell office:value-type="string" table:style-name="c10">
            <text:p>2026-04-10 15:45</text:p>
          </table:table-cell>
          <table:table-cell office:value-type="float" office:value="84.63766000000001" table:style-name="c10">
            <text:p>84.638</text:p>
          </table:table-cell>
          <table:table-cell office:value-type="float" office:value="1.266949969491682" table:style-name="c12">
            <text:p>+1.3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19:15</text:p>
          </table:table-cell>
          <table:table-cell office:value-type="float" office:value="85.50272999999999" table:style-name="c10">
            <text:p>85.503</text:p>
          </table:table-cell>
          <table:table-cell office:value-type="string" table:style-name="c10">
            <text:p>2026-04-11 19:15</text:p>
          </table:table-cell>
          <table:table-cell office:value-type="float" office:value="85.587185" table:style-name="c10">
            <text:p>85.587</text:p>
          </table:table-cell>
          <table:table-cell office:value-type="float" office:value="-0.10132282655184177" table:style-name="c11">
            <text:p>-0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0:00</text:p>
          </table:table-cell>
          <table:table-cell office:value-type="float" office:value="84.132045" table:style-name="c10">
            <text:p>84.132</text:p>
          </table:table-cell>
          <table:table-cell office:value-type="string" table:style-name="c10">
            <text:p>2026-04-14 20:00</text:p>
          </table:table-cell>
          <table:table-cell office:value-type="float" office:value="83.89803" table:style-name="c10">
            <text:p>83.898</text:p>
          </table:table-cell>
          <table:table-cell office:value-type="float" office:value="-0.477496014711154" table:style-name="c11">
            <text:p>-0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15:15</text:p>
          </table:table-cell>
          <table:table-cell office:value-type="float" office:value="86.173065" table:style-name="c10">
            <text:p>86.173</text:p>
          </table:table-cell>
          <table:table-cell office:value-type="string" table:style-name="c10">
            <text:p>2026-04-17 15:15</text:p>
          </table:table-cell>
          <table:table-cell office:value-type="float" office:value="89.82506500000001" table:style-name="c10">
            <text:p>89.825</text:p>
          </table:table-cell>
          <table:table-cell office:value-type="float" office:value="4.029611451170978" table:style-name="c12">
            <text:p>+4.0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2:30</text:p>
          </table:table-cell>
          <table:table-cell office:value-type="float" office:value="87.29362499999999" table:style-name="c10">
            <text:p>87.294</text:p>
          </table:table-cell>
          <table:table-cell office:value-type="string" table:style-name="c10">
            <text:p>2026-04-23 02:30</text:p>
          </table:table-cell>
          <table:table-cell office:value-type="float" office:value="86.01697" table:style-name="c10">
            <text:p>86.017</text:p>
          </table:table-cell>
          <table:table-cell office:value-type="float" office:value="-1.6594601530524056" table:style-name="c11">
            <text:p>-1.7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21:45</text:p>
          </table:table-cell>
          <table:table-cell office:value-type="float" office:value="84.68231999999999" table:style-name="c10">
            <text:p>84.682</text:p>
          </table:table-cell>
          <table:table-cell office:value-type="string" table:style-name="c10">
            <text:p>2026-05-03 21:45</text:p>
          </table:table-cell>
          <table:table-cell office:value-type="float" office:value="83.928015" table:style-name="c10">
            <text:p>83.928</text:p>
          </table:table-cell>
          <table:table-cell office:value-type="float" office:value="-1.088866131661248" table:style-name="c11">
            <text:p>-1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22:15</text:p>
          </table:table-cell>
          <table:table-cell office:value-type="float" office:value="84.79237499999999" table:style-name="c10">
            <text:p>84.792</text:p>
          </table:table-cell>
          <table:table-cell office:value-type="string" table:style-name="c10">
            <text:p>2026-05-04 22:15</text:p>
          </table:table-cell>
          <table:table-cell office:value-type="float" office:value="84.447755" table:style-name="c10">
            <text:p>84.448</text:p>
          </table:table-cell>
          <table:table-cell office:value-type="float" office:value="-0.6055156047285792" table:style-name="c11">
            <text:p>-0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3:15</text:p>
          </table:table-cell>
          <table:table-cell office:value-type="float" office:value="85.94295" table:style-name="c10">
            <text:p>85.943</text:p>
          </table:table-cell>
          <table:table-cell office:value-type="string" table:style-name="c10">
            <text:p>2026-05-06 13:15</text:p>
          </table:table-cell>
          <table:table-cell office:value-type="float" office:value="88.87554" table:style-name="c10">
            <text:p>88.876</text:p>
          </table:table-cell>
          <table:table-cell office:value-type="float" office:value="3.2055308731431698" table:style-name="c12">
            <text:p>+3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16:45</text:p>
          </table:table-cell>
          <table:table-cell office:value-type="float" office:value="89.28461999999999" table:style-name="c10">
            <text:p>89.285</text:p>
          </table:table-cell>
          <table:table-cell office:value-type="string" table:style-name="c10">
            <text:p>2026-05-07 16:45</text:p>
          </table:table-cell>
          <table:table-cell office:value-type="float" office:value="88.485735" table:style-name="c10">
            <text:p>88.486</text:p>
          </table:table-cell>
          <table:table-cell office:value-type="float" office:value="-1.092873536634853" table:style-name="c11">
            <text:p>-1.1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7:30</text:p>
          </table:table-cell>
          <table:table-cell office:value-type="float" office:value="90.36515999999999" table:style-name="c10">
            <text:p>90.365</text:p>
          </table:table-cell>
          <table:table-cell office:value-type="string" table:style-name="c10">
            <text:p>2026-05-09 17:30</text:p>
          </table:table-cell>
          <table:table-cell office:value-type="float" office:value="93.18338500000002" table:style-name="c10">
            <text:p>93.183</text:p>
          </table:table-cell>
          <table:table-cell office:value-type="float" office:value="2.912573179071476" table:style-name="c12">
            <text:p>+2.9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9:15</text:p>
          </table:table-cell>
          <table:table-cell office:value-type="float" office:value="94.517235" table:style-name="c10">
            <text:p>94.517</text:p>
          </table:table-cell>
          <table:table-cell office:value-type="string" table:style-name="c10">
            <text:p>2026-05-11 09:15</text:p>
          </table:table-cell>
          <table:table-cell office:value-type="float" office:value="95.162395" table:style-name="c10">
            <text:p>95.162</text:p>
          </table:table-cell>
          <table:table-cell office:value-type="float" office:value="0.48132001787293266" table:style-name="c12">
            <text:p>+0.5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5:30</text:p>
          </table:table-cell>
          <table:table-cell office:value-type="float" office:value="96.26811" table:style-name="c10">
            <text:p>96.268</text:p>
          </table:table-cell>
          <table:table-cell office:value-type="string" table:style-name="c10">
            <text:p>2026-05-12 15:30</text:p>
          </table:table-cell>
          <table:table-cell office:value-type="float" office:value="93.79308" table:style-name="c10">
            <text:p>93.793</text:p>
          </table:table-cell>
          <table:table-cell office:value-type="float" office:value="-2.7657366150846463" table:style-name="c11">
            <text:p>-2.8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2 20:00</text:p>
          </table:table-cell>
          <table:table-cell office:value-type="float" office:value="94.96746" table:style-name="c10">
            <text:p>94.967</text:p>
          </table:table-cell>
          <table:table-cell office:value-type="string" table:style-name="c10">
            <text:p>2026-05-12 22:00</text:p>
          </table:table-cell>
          <table:table-cell office:value-type="float" office:value="94.63266000000002" table:style-name="c10">
            <text:p>94.633</text:p>
          </table:table-cell>
          <table:table-cell office:value-type="float" office:value="-0.5517370764049012" table:style-name="c11">
            <text:p>-0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17:00</text:p>
          </table:table-cell>
          <table:table-cell office:value-type="float" office:value="86.533245" table:style-name="c10">
            <text:p>86.533</text:p>
          </table:table-cell>
          <table:table-cell office:value-type="string" table:style-name="c10">
            <text:p>2026-05-21 17:00</text:p>
          </table:table-cell>
          <table:table-cell office:value-type="float" office:value="86.226865" table:style-name="c10">
            <text:p>86.227</text:p>
          </table:table-cell>
          <table:table-cell office:value-type="float" office:value="-0.5532526870279497" table:style-name="c11">
            <text:p>-0.6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7:30</text:p>
          </table:table-cell>
          <table:table-cell office:value-type="float" office:value="87.853905" table:style-name="c10">
            <text:p>87.854</text:p>
          </table:table-cell>
          <table:table-cell office:value-type="string" table:style-name="c10">
            <text:p>2026-05-22 17:30</text:p>
          </table:table-cell>
          <table:table-cell office:value-type="float" office:value="86.97649" table:style-name="c10">
            <text:p>86.976</text:p>
          </table:table-cell>
          <table:table-cell office:value-type="float" office:value="-1.1966241039712444" table:style-name="c11">
            <text:p>-1.2</text:p>
          </table:table-cell>
        </table:table-row>
        <table:table-row>
          <table:table-cell office:value-type="string" table:style-name="c9">
            <text:p>SOL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4 06:00</text:p>
          </table:table-cell>
          <table:table-cell office:value-type="float" office:value="86.20307999999999" table:style-name="c10">
            <text:p>86.203</text:p>
          </table:table-cell>
          <table:table-cell office:value-type="string" table:style-name="c10">
            <text:p>2026-05-25 06:00</text:p>
          </table:table-cell>
          <table:table-cell office:value-type="float" office:value="85.947005" table:style-name="c10">
            <text:p>85.947</text:p>
          </table:table-cell>
          <table:table-cell office:value-type="float" office:value="-0.4963663282042563" table:style-name="c11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9 13:45</text:p>
          </table:table-cell>
          <table:table-cell office:value-type="float" office:value="0.9312653999999999" table:style-name="c1">
            <text:p>0.93127</text:p>
          </table:table-cell>
          <table:table-cell office:value-type="string" table:style-name="c1">
            <text:p>2026-03-10 13:45</text:p>
          </table:table-cell>
          <table:table-cell office:value-type="float" office:value="0.96921515" table:style-name="c1">
            <text:p>0.96922</text:p>
          </table:table-cell>
          <table:table-cell office:value-type="float" office:value="3.867027478434193" table:style-name="c13">
            <text:p>+3.9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1.0041018" table:style-name="c1">
            <text:p>1.0041</text:p>
          </table:table-cell>
          <table:table-cell office:value-type="string" table:style-name="c1">
            <text:p>2026-03-11 15:00</text:p>
          </table:table-cell>
          <table:table-cell office:value-type="float" office:value="0.9746124500000001" table:style-name="c1">
            <text:p>0.97461</text:p>
          </table:table-cell>
          <table:table-cell office:value-type="float" office:value="-3.1309176308168873" table:style-name="c14">
            <text:p>-3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15</text:p>
          </table:table-cell>
          <table:table-cell office:value-type="float" office:value="0.98419185" table:style-name="c1">
            <text:p>0.98419</text:p>
          </table:table-cell>
          <table:table-cell office:value-type="string" table:style-name="c1">
            <text:p>2026-03-12 17:15</text:p>
          </table:table-cell>
          <table:table-cell office:value-type="float" office:value="0.9754120500000001" table:style-name="c1">
            <text:p>0.97541</text:p>
          </table:table-cell>
          <table:table-cell office:value-type="float" office:value="-1.0901988964803766" table:style-name="c14">
            <text:p>-1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15</text:p>
          </table:table-cell>
          <table:table-cell office:value-type="float" office:value="0.9990993" table:style-name="c1">
            <text:p>0.9991</text:p>
          </table:table-cell>
          <table:table-cell office:value-type="string" table:style-name="c1">
            <text:p>2026-03-14 00:15</text:p>
          </table:table-cell>
          <table:table-cell office:value-type="float" office:value="0.9939028" table:style-name="c1">
            <text:p>0.9939</text:p>
          </table:table-cell>
          <table:table-cell office:value-type="float" office:value="-0.7189787538836256" table:style-name="c14">
            <text:p>-0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22:45</text:p>
          </table:table-cell>
          <table:table-cell office:value-type="float" office:value="1.02461205" table:style-name="c1">
            <text:p>1.0246</text:p>
          </table:table-cell>
          <table:table-cell office:value-type="string" table:style-name="c1">
            <text:p>2026-03-16 22:45</text:p>
          </table:table-cell>
          <table:table-cell office:value-type="float" office:value="1.0802596" table:style-name="c1">
            <text:p>1.0803</text:p>
          </table:table-cell>
          <table:table-cell office:value-type="float" office:value="5.220328129031859" table:style-name="c13">
            <text:p>+5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1.0811403" table:style-name="c1">
            <text:p>1.0811</text:p>
          </table:table-cell>
          <table:table-cell office:value-type="string" table:style-name="c1">
            <text:p>2026-03-18 00:15</text:p>
          </table:table-cell>
          <table:table-cell office:value-type="float" office:value="1.02818565" table:style-name="c1">
            <text:p>1.0282</text:p>
          </table:table-cell>
          <table:table-cell office:value-type="float" office:value="-5.088145647179177" table:style-name="c14">
            <text:p>-5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8 05:15</text:p>
          </table:table-cell>
          <table:table-cell office:value-type="float" office:value="1.0479237000000001" table:style-name="c1">
            <text:p>1.0479</text:p>
          </table:table-cell>
          <table:table-cell office:value-type="string" table:style-name="c1">
            <text:p>2026-03-18 12:00</text:p>
          </table:table-cell>
          <table:table-cell office:value-type="float" office:value="1.0022986" table:style-name="c1">
            <text:p>1.0023</text:p>
          </table:table-cell>
          <table:table-cell office:value-type="float" office:value="-4.54505370013103" table:style-name="c14">
            <text:p>-4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15</text:p>
          </table:table-cell>
          <table:table-cell office:value-type="float" office:value="0.95297625" table:style-name="c1">
            <text:p>0.95298</text:p>
          </table:table-cell>
          <table:table-cell office:value-type="string" table:style-name="c1">
            <text:p>2026-03-25 07:15</text:p>
          </table:table-cell>
          <table:table-cell office:value-type="float" office:value="0.9598198500000001" table:style-name="c1">
            <text:p>0.95982</text:p>
          </table:table-cell>
          <table:table-cell office:value-type="float" office:value="0.5167935842944837" table:style-name="c13">
            <text:p>+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1:30</text:p>
          </table:table-cell>
          <table:table-cell office:value-type="float" office:value="0.9696845999999999" table:style-name="c1">
            <text:p>0.96968</text:p>
          </table:table-cell>
          <table:table-cell office:value-type="string" table:style-name="c1">
            <text:p>2026-03-26 11:00</text:p>
          </table:table-cell>
          <table:table-cell office:value-type="float" office:value="0.9248373500000001" table:style-name="c1">
            <text:p>0.92484</text:p>
          </table:table-cell>
          <table:table-cell office:value-type="float" office:value="-4.8155864146599665" table:style-name="c14">
            <text:p>-4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45</text:p>
          </table:table-cell>
          <table:table-cell office:value-type="float" office:value="0.8886440999999999" table:style-name="c1">
            <text:p>0.88864</text:p>
          </table:table-cell>
          <table:table-cell office:value-type="string" table:style-name="c1">
            <text:p>2026-04-02 05:45</text:p>
          </table:table-cell>
          <table:table-cell office:value-type="float" office:value="0.8605695" table:style-name="c1">
            <text:p>0.86057</text:p>
          </table:table-cell>
          <table:table-cell office:value-type="float" office:value="-3.3528471556273143" table:style-name="c14">
            <text:p>-3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30</text:p>
          </table:table-cell>
          <table:table-cell office:value-type="float" office:value="0.90045" table:style-name="c1">
            <text:p>0.90045</text:p>
          </table:table-cell>
          <table:table-cell office:value-type="string" table:style-name="c1">
            <text:p>2026-04-07 09:30</text:p>
          </table:table-cell>
          <table:table-cell office:value-type="float" office:value="0.8825585" table:style-name="c1">
            <text:p>0.88256</text:p>
          </table:table-cell>
          <table:table-cell office:value-type="float" office:value="-2.182879053972997" table:style-name="c14">
            <text:p>-2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0:00</text:p>
          </table:table-cell>
          <table:table-cell office:value-type="float" office:value="0.89174565" table:style-name="c1">
            <text:p>0.89175</text:p>
          </table:table-cell>
          <table:table-cell office:value-type="string" table:style-name="c1">
            <text:p>2026-04-08 20:00</text:p>
          </table:table-cell>
          <table:table-cell office:value-type="float" office:value="0.9217389" table:style-name="c1">
            <text:p>0.92174</text:p>
          </table:table-cell>
          <table:table-cell office:value-type="float" office:value="3.1568075424758257" table:style-name="c13">
            <text:p>+3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9 15:45</text:p>
          </table:table-cell>
          <table:table-cell office:value-type="float" office:value="0.9348672" table:style-name="c1">
            <text:p>0.93487</text:p>
          </table:table-cell>
          <table:table-cell office:value-type="string" table:style-name="c1">
            <text:p>2026-04-10 15:45</text:p>
          </table:table-cell>
          <table:table-cell office:value-type="float" office:value="0.94642655" table:style-name="c1">
            <text:p>0.94643</text:p>
          </table:table-cell>
          <table:table-cell office:value-type="float" office:value="1.034098033020081" table:style-name="c13">
            <text:p>+1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0 18:30</text:p>
          </table:table-cell>
          <table:table-cell office:value-type="float" office:value="0.95597775" table:style-name="c1">
            <text:p>0.95598</text:p>
          </table:table-cell>
          <table:table-cell office:value-type="string" table:style-name="c1">
            <text:p>2026-04-11 18:30</text:p>
          </table:table-cell>
          <table:table-cell office:value-type="float" office:value="0.94542705" table:style-name="c1">
            <text:p>0.94543</text:p>
          </table:table-cell>
          <table:table-cell office:value-type="float" office:value="-1.3013491865213278" table:style-name="c14">
            <text:p>-1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0.9552773999999999" table:style-name="c1">
            <text:p>0.95528</text:p>
          </table:table-cell>
          <table:table-cell office:value-type="string" table:style-name="c1">
            <text:p>2026-04-12 05:00</text:p>
          </table:table-cell>
          <table:table-cell office:value-type="float" office:value="0.9109443" table:style-name="c1">
            <text:p>0.91094</text:p>
          </table:table-cell>
          <table:table-cell office:value-type="float" office:value="-4.831484305574474" table:style-name="c14">
            <text:p>-4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15</text:p>
          </table:table-cell>
          <table:table-cell office:value-type="float" office:value="0.9390692999999999" table:style-name="c1">
            <text:p>0.93907</text:p>
          </table:table-cell>
          <table:table-cell office:value-type="string" table:style-name="c1">
            <text:p>2026-04-14 22:15</text:p>
          </table:table-cell>
          <table:table-cell office:value-type="float" office:value="0.9336329500000001" table:style-name="c1">
            <text:p>0.93363</text:p>
          </table:table-cell>
          <table:table-cell office:value-type="float" office:value="-0.7776510495071776" table:style-name="c14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00:15</text:p>
          </table:table-cell>
          <table:table-cell office:value-type="float" office:value="0.9393694499999999" table:style-name="c1">
            <text:p>0.93937</text:p>
          </table:table-cell>
          <table:table-cell office:value-type="string" table:style-name="c1">
            <text:p>2026-04-16 00:15</text:p>
          </table:table-cell>
          <table:table-cell office:value-type="float" office:value="0.9560217500000001" table:style-name="c1">
            <text:p>0.95602</text:p>
          </table:table-cell>
          <table:table-cell office:value-type="float" office:value="1.5692667588615317" table:style-name="c13">
            <text:p>+1.6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9721858499999999" table:style-name="c1">
            <text:p>0.97219</text:p>
          </table:table-cell>
          <table:table-cell office:value-type="string" table:style-name="c1">
            <text:p>2026-04-17 02:45</text:p>
          </table:table-cell>
          <table:table-cell office:value-type="float" office:value="0.9872061500000001" table:style-name="c1">
            <text:p>0.98721</text:p>
          </table:table-cell>
          <table:table-cell office:value-type="float" office:value="1.3420144827401392" table:style-name="c13">
            <text:p>+1.3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15</text:p>
          </table:table-cell>
          <table:table-cell office:value-type="float" office:value="0.9862928999999999" table:style-name="c1">
            <text:p>0.98629</text:p>
          </table:table-cell>
          <table:table-cell office:value-type="string" table:style-name="c1">
            <text:p>2026-04-18 07:15</text:p>
          </table:table-cell>
          <table:table-cell office:value-type="float" office:value="1.0017988500000001" table:style-name="c1">
            <text:p>1.0018</text:p>
          </table:table-cell>
          <table:table-cell office:value-type="float" office:value="1.3691018255175713" table:style-name="c13">
            <text:p>+1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5:30</text:p>
          </table:table-cell>
          <table:table-cell office:value-type="float" office:value="0.9742869" table:style-name="c1">
            <text:p>0.97429</text:p>
          </table:table-cell>
          <table:table-cell office:value-type="string" table:style-name="c1">
            <text:p>2026-04-23 04:00</text:p>
          </table:table-cell>
          <table:table-cell office:value-type="float" office:value="0.93243355" table:style-name="c1">
            <text:p>0.93243</text:p>
          </table:table-cell>
          <table:table-cell office:value-type="float" office:value="-4.487105868553709" table:style-name="c14">
            <text:p>-4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0.92176065" table:style-name="c1">
            <text:p>0.92176</text:p>
          </table:table-cell>
          <table:table-cell office:value-type="string" table:style-name="c1">
            <text:p>2026-05-02 13:15</text:p>
          </table:table-cell>
          <table:table-cell office:value-type="float" office:value="0.91864045" table:style-name="c1">
            <text:p>0.91864</text:p>
          </table:table-cell>
          <table:table-cell office:value-type="float" office:value="-0.5377276909737772" table:style-name="c14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2 16:00</text:p>
          </table:table-cell>
          <table:table-cell office:value-type="float" office:value="0.9273634499999999" table:style-name="c1">
            <text:p>0.92736</text:p>
          </table:table-cell>
          <table:table-cell office:value-type="string" table:style-name="c1">
            <text:p>2026-05-03 16:00</text:p>
          </table:table-cell>
          <table:table-cell office:value-type="float" office:value="0.92503725" table:style-name="c1">
            <text:p>0.92504</text:p>
          </table:table-cell>
          <table:table-cell office:value-type="float" office:value="-0.45023873463525543" table:style-name="c14">
            <text:p>-0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0.928464" table:style-name="c1">
            <text:p>0.92846</text:p>
          </table:table-cell>
          <table:table-cell office:value-type="string" table:style-name="c1">
            <text:p>2026-05-04 22:15</text:p>
          </table:table-cell>
          <table:table-cell office:value-type="float" office:value="0.9377309" table:style-name="c1">
            <text:p>0.93773</text:p>
          </table:table-cell>
          <table:table-cell office:value-type="float" office:value="0.7961941368647807" table:style-name="c13">
            <text:p>+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0:45</text:p>
          </table:table-cell>
          <table:table-cell office:value-type="float" office:value="0.9546771" table:style-name="c1">
            <text:p>0.95468</text:p>
          </table:table-cell>
          <table:table-cell office:value-type="string" table:style-name="c1">
            <text:p>2026-05-06 10:45</text:p>
          </table:table-cell>
          <table:table-cell office:value-type="float" office:value="1.0282856" table:style-name="c1">
            <text:p>1.0283</text:p>
          </table:table-cell>
          <table:table-cell office:value-type="float" office:value="7.494990409385527" table:style-name="c13">
            <text:p>+7.5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21:45</text:p>
          </table:table-cell>
          <table:table-cell office:value-type="float" office:value="1.0014004499999998" table:style-name="c1">
            <text:p>1.0014</text:p>
          </table:table-cell>
          <table:table-cell office:value-type="string" table:style-name="c1">
            <text:p>2026-05-07 21:45</text:p>
          </table:table-cell>
          <table:table-cell office:value-type="float" office:value="0.96501725" table:style-name="c1">
            <text:p>0.96502</text:p>
          </table:table-cell>
          <table:table-cell office:value-type="float" office:value="-3.825869010019878" table:style-name="c14">
            <text:p>-3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15:00</text:p>
          </table:table-cell>
          <table:table-cell office:value-type="float" office:value="1.00980465" table:style-name="c1">
            <text:p>1.0098</text:p>
          </table:table-cell>
          <table:table-cell office:value-type="string" table:style-name="c1">
            <text:p>2026-05-09 15:00</text:p>
          </table:table-cell>
          <table:table-cell office:value-type="float" office:value="1.0489752500000002" table:style-name="c1">
            <text:p>1.049</text:p>
          </table:table-cell>
          <table:table-cell office:value-type="float" office:value="3.67137331713121" table:style-name="c13">
            <text:p>+3.7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17:30</text:p>
          </table:table-cell>
          <table:table-cell office:value-type="float" office:value="1.06503225" table:style-name="c1">
            <text:p>1.065</text:p>
          </table:table-cell>
          <table:table-cell office:value-type="string" table:style-name="c1">
            <text:p>2026-05-10 17:30</text:p>
          </table:table-cell>
          <table:table-cell office:value-type="float" office:value="1.3275359000000002" table:style-name="c1">
            <text:p>1.3275</text:p>
          </table:table-cell>
          <table:table-cell office:value-type="float" office:value="24.39831335960956" table:style-name="c13">
            <text:p>+24.4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7:45</text:p>
          </table:table-cell>
          <table:table-cell office:value-type="float" office:value="1.3484739000000001" table:style-name="c1">
            <text:p>1.3485</text:p>
          </table:table-cell>
          <table:table-cell office:value-type="string" table:style-name="c1">
            <text:p>2026-05-11 17:45</text:p>
          </table:table-cell>
          <table:table-cell office:value-type="float" office:value="1.2957518000000001" table:style-name="c1">
            <text:p>1.2958</text:p>
          </table:table-cell>
          <table:table-cell office:value-type="float" office:value="-4.101844896530826" table:style-name="c14">
            <text:p>-4.1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3:00</text:p>
          </table:table-cell>
          <table:table-cell office:value-type="float" office:value="1.26853395" table:style-name="c1">
            <text:p>1.2685</text:p>
          </table:table-cell>
          <table:table-cell office:value-type="string" table:style-name="c1">
            <text:p>2026-05-13 13:00</text:p>
          </table:table-cell>
          <table:table-cell office:value-type="float" office:value="1.2199897" table:style-name="c1">
            <text:p>1.22</text:p>
          </table:table-cell>
          <table:table-cell office:value-type="float" office:value="-4.019049660460405" table:style-name="c14">
            <text:p>-4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1:00</text:p>
          </table:table-cell>
          <table:table-cell office:value-type="float" office:value="1.1229612" table:style-name="c1">
            <text:p>1.123</text:p>
          </table:table-cell>
          <table:table-cell office:value-type="string" table:style-name="c1">
            <text:p>2026-05-22 01:00</text:p>
          </table:table-cell>
          <table:table-cell office:value-type="float" office:value="1.0961516500000001" table:style-name="c1">
            <text:p>1.0962</text:p>
          </table:table-cell>
          <table:table-cell office:value-type="float" office:value="-2.5825253043782803" table:style-name="c14">
            <text:p>-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2:15</text:p>
          </table:table-cell>
          <table:table-cell office:value-type="float" office:value="1.3336664999999999" table:style-name="c10">
            <text:p>1.3337</text:p>
          </table:table-cell>
          <table:table-cell office:value-type="string" table:style-name="c10">
            <text:p>2026-03-06 02:15</text:p>
          </table:table-cell>
          <table:table-cell office:value-type="float" office:value="1.3413290000000002" table:style-name="c10">
            <text:p>1.3413</text:p>
          </table:table-cell>
          <table:table-cell office:value-type="float" office:value="0.3734954225063314" table:style-name="c12">
            <text:p>+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18:00</text:p>
          </table:table-cell>
          <table:table-cell office:value-type="float" office:value="1.3236614999999998" table:style-name="c10">
            <text:p>1.3237</text:p>
          </table:table-cell>
          <table:table-cell office:value-type="string" table:style-name="c10">
            <text:p>2026-03-07 18:00</text:p>
          </table:table-cell>
          <table:table-cell office:value-type="float" office:value="1.3073460000000001" table:style-name="c10">
            <text:p>1.3073</text:p>
          </table:table-cell>
          <table:table-cell office:value-type="float" office:value="-1.4300396781200986" table:style-name="c11">
            <text:p>-1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8 13:00</text:p>
          </table:table-cell>
          <table:table-cell office:value-type="float" office:value="1.3536765" table:style-name="c10">
            <text:p>1.3537</text:p>
          </table:table-cell>
          <table:table-cell office:value-type="string" table:style-name="c10">
            <text:p>2026-03-09 02:00</text:p>
          </table:table-cell>
          <table:table-cell office:value-type="float" office:value="1.3033480000000002" table:style-name="c10">
            <text:p>1.3033</text:p>
          </table:table-cell>
          <table:table-cell office:value-type="float" office:value="-3.910379817629961" table:style-name="c11">
            <text:p>-3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01:30</text:p>
          </table:table-cell>
          <table:table-cell office:value-type="float" office:value="1.318659" table:style-name="c10">
            <text:p>1.3187</text:p>
          </table:table-cell>
          <table:table-cell office:value-type="string" table:style-name="c10">
            <text:p>2026-03-17 01:30</text:p>
          </table:table-cell>
          <table:table-cell office:value-type="float" office:value="1.3343325000000001" table:style-name="c10">
            <text:p>1.3343</text:p>
          </table:table-cell>
          <table:table-cell office:value-type="float" office:value="0.9863178678111595" table:style-name="c12">
            <text:p>+1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2 01:15</text:p>
          </table:table-cell>
          <table:table-cell office:value-type="float" office:value="1.2696344999999998" table:style-name="c10">
            <text:p>1.2696</text:p>
          </table:table-cell>
          <table:table-cell office:value-type="string" table:style-name="c10">
            <text:p>2026-03-23 00:00</text:p>
          </table:table-cell>
          <table:table-cell office:value-type="float" office:value="1.2493750000000001" table:style-name="c10">
            <text:p>1.2494</text:p>
          </table:table-cell>
          <table:table-cell office:value-type="float" office:value="-1.7924056588726756" table:style-name="c11">
            <text:p>-1.8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11:15</text:p>
          </table:table-cell>
          <table:table-cell office:value-type="float" office:value="1.2956474999999998" table:style-name="c10">
            <text:p>1.2956</text:p>
          </table:table-cell>
          <table:table-cell office:value-type="string" table:style-name="c10">
            <text:p>2026-03-24 11:15</text:p>
          </table:table-cell>
          <table:table-cell office:value-type="float" office:value="1.3243375" table:style-name="c10">
            <text:p>1.3243</text:p>
          </table:table-cell>
          <table:table-cell office:value-type="float" office:value="2.01001038766333" table:style-name="c12">
            <text:p>+2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2 01:00</text:p>
          </table:table-cell>
          <table:table-cell office:value-type="float" office:value="1.2416205" table:style-name="c10">
            <text:p>1.2416</text:p>
          </table:table-cell>
          <table:table-cell office:value-type="string" table:style-name="c10">
            <text:p>2026-04-02 07:00</text:p>
          </table:table-cell>
          <table:table-cell office:value-type="float" office:value="1.2173910000000001" table:style-name="c10">
            <text:p>1.2174</text:p>
          </table:table-cell>
          <table:table-cell office:value-type="float" office:value="-2.1474407525487793" table:style-name="c11">
            <text:p>-2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3 05:15</text:p>
          </table:table-cell>
          <table:table-cell office:value-type="float" office:value="1.252626" table:style-name="c10">
            <text:p>1.2526</text:p>
          </table:table-cell>
          <table:table-cell office:value-type="string" table:style-name="c10">
            <text:p>2026-04-04 05:15</text:p>
          </table:table-cell>
          <table:table-cell office:value-type="float" office:value="1.2303845000000002" table:style-name="c10">
            <text:p>1.2304</text:p>
          </table:table-cell>
          <table:table-cell office:value-type="float" office:value="-1.9719404367704252" table:style-name="c11">
            <text:p>-2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4 13:00</text:p>
          </table:table-cell>
          <table:table-cell office:value-type="float" office:value="1.2346169999999999" table:style-name="c10">
            <text:p>1.2346</text:p>
          </table:table-cell>
          <table:table-cell office:value-type="string" table:style-name="c10">
            <text:p>2026-04-05 13:00</text:p>
          </table:table-cell>
          <table:table-cell office:value-type="float" office:value="1.243378" table:style-name="c10">
            <text:p>1.2434</text:p>
          </table:table-cell>
          <table:table-cell office:value-type="float" office:value="0.5082942627552045" table:style-name="c12">
            <text:p>+0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0 07:45</text:p>
          </table:table-cell>
          <table:table-cell office:value-type="float" office:value="1.284642" table:style-name="c10">
            <text:p>1.2846</text:p>
          </table:table-cell>
          <table:table-cell office:value-type="string" table:style-name="c10">
            <text:p>2026-04-11 07:45</text:p>
          </table:table-cell>
          <table:table-cell office:value-type="float" office:value="1.3203395" table:style-name="c10">
            <text:p>1.3203</text:p>
          </table:table-cell>
          <table:table-cell office:value-type="float" office:value="2.5733349321834353" table:style-name="c12">
            <text:p>+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08:00</text:p>
          </table:table-cell>
          <table:table-cell office:value-type="float" office:value="1.3376685" table:style-name="c10">
            <text:p>1.3377</text:p>
          </table:table-cell>
          <table:table-cell office:value-type="string" table:style-name="c10">
            <text:p>2026-04-12 08:00</text:p>
          </table:table-cell>
          <table:table-cell office:value-type="float" office:value="1.4162915" table:style-name="c10">
            <text:p>1.4163</text:p>
          </table:table-cell>
          <table:table-cell office:value-type="float" office:value="5.665965318873845" table:style-name="c12">
            <text:p>+5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2 16:15</text:p>
          </table:table-cell>
          <table:table-cell office:value-type="float" office:value="1.4677335" table:style-name="c10">
            <text:p>1.4677</text:p>
          </table:table-cell>
          <table:table-cell office:value-type="string" table:style-name="c10">
            <text:p>2026-04-13 16:15</text:p>
          </table:table-cell>
          <table:table-cell office:value-type="float" office:value="1.425287" table:style-name="c10">
            <text:p>1.4253</text:p>
          </table:table-cell>
          <table:table-cell office:value-type="float" office:value="-3.086094901628933" table:style-name="c11">
            <text:p>-3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45</text:p>
          </table:table-cell>
          <table:table-cell office:value-type="float" office:value="1.4417205" table:style-name="c10">
            <text:p>1.4417</text:p>
          </table:table-cell>
          <table:table-cell office:value-type="string" table:style-name="c10">
            <text:p>2026-04-14 19:00</text:p>
          </table:table-cell>
          <table:table-cell office:value-type="float" office:value="1.381309" table:style-name="c10">
            <text:p>1.3813</text:p>
          </table:table-cell>
          <table:table-cell office:value-type="float" office:value="-4.38176031283456" table:style-name="c11">
            <text:p>-4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1 00:15</text:p>
          </table:table-cell>
          <table:table-cell office:value-type="float" office:value="1.356678" table:style-name="c10">
            <text:p>1.3567</text:p>
          </table:table-cell>
          <table:table-cell office:value-type="string" table:style-name="c10">
            <text:p>2026-04-22 00:15</text:p>
          </table:table-cell>
          <table:table-cell office:value-type="float" office:value="1.3623185" table:style-name="c10">
            <text:p>1.3623</text:p>
          </table:table-cell>
          <table:table-cell office:value-type="float" office:value="0.21502709696037403" table:style-name="c12">
            <text:p>+0.2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0:30</text:p>
          </table:table-cell>
          <table:table-cell office:value-type="float" office:value="1.3656825" table:style-name="c10">
            <text:p>1.3657</text:p>
          </table:table-cell>
          <table:table-cell office:value-type="string" table:style-name="c10">
            <text:p>2026-04-23 00:30</text:p>
          </table:table-cell>
          <table:table-cell office:value-type="float" office:value="1.3623185" table:style-name="c10">
            <text:p>1.3623</text:p>
          </table:table-cell>
          <table:table-cell office:value-type="float" office:value="-0.445731323459142" table:style-name="c11">
            <text:p>-0.4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5 07:00</text:p>
          </table:table-cell>
          <table:table-cell office:value-type="float" office:value="1.350675" table:style-name="c10">
            <text:p>1.3507</text:p>
          </table:table-cell>
          <table:table-cell office:value-type="string" table:style-name="c10">
            <text:p>2026-04-25 17:00</text:p>
          </table:table-cell>
          <table:table-cell office:value-type="float" office:value="1.317341" table:style-name="c10">
            <text:p>1.3173</text:p>
          </table:table-cell>
          <table:table-cell office:value-type="float" office:value="-2.662917775112439" table:style-name="c11">
            <text:p>-2.7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10:30</text:p>
          </table:table-cell>
          <table:table-cell office:value-type="float" office:value="1.332666" table:style-name="c10">
            <text:p>1.3327</text:p>
          </table:table-cell>
          <table:table-cell office:value-type="string" table:style-name="c10">
            <text:p>2026-04-30 10:30</text:p>
          </table:table-cell>
          <table:table-cell office:value-type="float" office:value="1.3043475" table:style-name="c10">
            <text:p>1.3043</text:p>
          </table:table-cell>
          <table:table-cell office:value-type="float" office:value="-2.320603260869547" table:style-name="c11">
            <text:p>-2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00:15</text:p>
          </table:table-cell>
          <table:table-cell office:value-type="float" office:value="1.3476735" table:style-name="c10">
            <text:p>1.3477</text:p>
          </table:table-cell>
          <table:table-cell office:value-type="string" table:style-name="c10">
            <text:p>2026-05-02 00:15</text:p>
          </table:table-cell>
          <table:table-cell office:value-type="float" office:value="1.3153420000000002" table:style-name="c10">
            <text:p>1.3153</text:p>
          </table:table-cell>
          <table:table-cell office:value-type="float" office:value="-2.5941645849680617" table:style-name="c11">
            <text:p>-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2 08:30</text:p>
          </table:table-cell>
          <table:table-cell office:value-type="float" office:value="1.3336664999999999" table:style-name="c10">
            <text:p>1.3337</text:p>
          </table:table-cell>
          <table:table-cell office:value-type="string" table:style-name="c10">
            <text:p>2026-05-03 08:30</text:p>
          </table:table-cell>
          <table:table-cell office:value-type="float" office:value="1.3363315" table:style-name="c10">
            <text:p>1.3363</text:p>
          </table:table-cell>
          <table:table-cell office:value-type="float" office:value="-0.00047438160137858176" table:style-name="c11">
            <text:p>-0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00:45</text:p>
          </table:table-cell>
          <table:table-cell office:value-type="float" office:value="1.3656825" table:style-name="c10">
            <text:p>1.3657</text:p>
          </table:table-cell>
          <table:table-cell office:value-type="string" table:style-name="c10">
            <text:p>2026-05-05 00:45</text:p>
          </table:table-cell>
          <table:table-cell office:value-type="float" office:value="1.685157" table:style-name="c10">
            <text:p>1.6852</text:p>
          </table:table-cell>
          <table:table-cell office:value-type="float" office:value="23.14636609585319" table:style-name="c12">
            <text:p>+23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07:45</text:p>
          </table:table-cell>
          <table:table-cell office:value-type="float" office:value="1.7958975" table:style-name="c10">
            <text:p>1.7959</text:p>
          </table:table-cell>
          <table:table-cell office:value-type="string" table:style-name="c10">
            <text:p>2026-05-06 07:45</text:p>
          </table:table-cell>
          <table:table-cell office:value-type="float" office:value="2.1399295" table:style-name="c10">
            <text:p>2.1399</text:p>
          </table:table-cell>
          <table:table-cell office:value-type="float" office:value="18.918355915607687" table:style-name="c12">
            <text:p>+18.9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8:45</text:p>
          </table:table-cell>
          <table:table-cell office:value-type="float" office:value="2.235117" table:style-name="c10">
            <text:p>2.2351</text:p>
          </table:table-cell>
          <table:table-cell office:value-type="string" table:style-name="c10">
            <text:p>2026-05-07 08:45</text:p>
          </table:table-cell>
          <table:table-cell office:value-type="float" office:value="2.7356315" table:style-name="c10">
            <text:p>2.7356</text:p>
          </table:table-cell>
          <table:table-cell office:value-type="float" office:value="22.148548493501696" table:style-name="c12">
            <text:p>+22.1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7 17:45</text:p>
          </table:table-cell>
          <table:table-cell office:value-type="float" office:value="2.5392689999999996" table:style-name="c10">
            <text:p>2.5393</text:p>
          </table:table-cell>
          <table:table-cell office:value-type="string" table:style-name="c10">
            <text:p>2026-05-08 17:45</text:p>
          </table:table-cell>
          <table:table-cell office:value-type="float" office:value="2.6096945000000003" table:style-name="c10">
            <text:p>2.6097</text:p>
          </table:table-cell>
          <table:table-cell office:value-type="float" office:value="2.568011529873382" table:style-name="c12">
            <text:p>+2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22:45</text:p>
          </table:table-cell>
          <table:table-cell office:value-type="float" office:value="2.5602795" table:style-name="c10">
            <text:p>2.5603</text:p>
          </table:table-cell>
          <table:table-cell office:value-type="string" table:style-name="c10">
            <text:p>2026-05-09 17:00</text:p>
          </table:table-cell>
          <table:table-cell office:value-type="float" office:value="2.4247870000000002" table:style-name="c10">
            <text:p>2.4248</text:p>
          </table:table-cell>
          <table:table-cell office:value-type="float" office:value="-5.481419087759731" table:style-name="c11">
            <text:p>-5.5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8 13:00</text:p>
          </table:table-cell>
          <table:table-cell office:value-type="float" office:value="2.0510249999999997" table:style-name="c10">
            <text:p>2.051</text:p>
          </table:table-cell>
          <table:table-cell office:value-type="string" table:style-name="c10">
            <text:p>2026-05-18 17:00</text:p>
          </table:table-cell>
          <table:table-cell office:value-type="float" office:value="1.9310340000000001" table:style-name="c10">
            <text:p>1.931</text:p>
          </table:table-cell>
          <table:table-cell office:value-type="float" office:value="-6.038499626576954" table:style-name="c11">
            <text:p>-6.0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9 04:15</text:p>
          </table:table-cell>
          <table:table-cell office:value-type="float" office:value="2.0460225" table:style-name="c10">
            <text:p>2.046</text:p>
          </table:table-cell>
          <table:table-cell office:value-type="string" table:style-name="c10">
            <text:p>2026-05-20 04:15</text:p>
          </table:table-cell>
          <table:table-cell office:value-type="float" office:value="1.935032" table:style-name="c10">
            <text:p>1.935</text:p>
          </table:table-cell>
          <table:table-cell office:value-type="float" office:value="-5.613751997741955" table:style-name="c11">
            <text:p>-5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0:45</text:p>
          </table:table-cell>
          <table:table-cell office:value-type="float" office:value="2.0860425" table:style-name="c10">
            <text:p>2.086</text:p>
          </table:table-cell>
          <table:table-cell office:value-type="string" table:style-name="c10">
            <text:p>2026-05-22 00:45</text:p>
          </table:table-cell>
          <table:table-cell office:value-type="float" office:value="2.0559715" table:style-name="c10">
            <text:p>2.056</text:p>
          </table:table-cell>
          <table:table-cell office:value-type="float" office:value="-1.638551804601296" table:style-name="c11">
            <text:p>-1.6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16:00</text:p>
          </table:table-cell>
          <table:table-cell office:value-type="float" office:value="1.976988" table:style-name="c10">
            <text:p>1.977</text:p>
          </table:table-cell>
          <table:table-cell office:value-type="string" table:style-name="c10">
            <text:p>2026-05-26 16:00</text:p>
          </table:table-cell>
          <table:table-cell office:value-type="float" office:value="1.9150420000000001" table:style-name="c10">
            <text:p>1.915</text:p>
          </table:table-cell>
          <table:table-cell office:value-type="float" office:value="-3.3269887808120346" table:style-name="c11">
            <text:p>-3.3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0:45</text:p>
          </table:table-cell>
          <table:table-cell office:value-type="float" office:value="1.850925" table:style-name="c10">
            <text:p>1.8509</text:p>
          </table:table-cell>
          <table:table-cell office:value-type="string" table:style-name="c10">
            <text:p>2026-06-01 00:45</text:p>
          </table:table-cell>
          <table:table-cell office:value-type="float" office:value="1.925037" table:style-name="c10">
            <text:p>1.925</text:p>
          </table:table-cell>
          <table:table-cell office:value-type="float" office:value="3.7961479280359978" table:style-name="c12">
            <text:p>+3.8</text:p>
          </table:table-cell>
        </table:table-row>
        <table:table-row>
          <table:table-cell office:value-type="string" table:style-name="c9">
            <text:p>TON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01:00</text:p>
          </table:table-cell>
          <table:table-cell office:value-type="float" office:value="1.9379685" table:style-name="c10">
            <text:p>1.938</text:p>
          </table:table-cell>
          <table:table-cell office:value-type="string" table:style-name="c10">
            <text:p>2026-06-02 01:00</text:p>
          </table:table-cell>
          <table:table-cell office:value-type="float" office:value="2.0619685000000003" table:style-name="c10">
            <text:p>2.062</text:p>
          </table:table-cell>
          <table:table-cell office:value-type="float" office:value="6.1857623056566835" table:style-name="c12">
            <text:p>+6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21:30</text:p>
          </table:table-cell>
          <table:table-cell office:value-type="float" office:value="0.28454219999999997" table:style-name="c1">
            <text:p>0.28454</text:p>
          </table:table-cell>
          <table:table-cell office:value-type="string" table:style-name="c1">
            <text:p>2026-03-06 21:30</text:p>
          </table:table-cell>
          <table:table-cell office:value-type="float" office:value="0.28445770000000004" table:style-name="c1">
            <text:p>0.28446</text:p>
          </table:table-cell>
          <table:table-cell office:value-type="float" office:value="-0.22953746133259623" table:style-name="c14">
            <text:p>-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8 16:15</text:p>
          </table:table-cell>
          <table:table-cell office:value-type="float" office:value="0.2893446" table:style-name="c1">
            <text:p>0.28934</text:p>
          </table:table-cell>
          <table:table-cell office:value-type="string" table:style-name="c1">
            <text:p>2026-03-09 16:15</text:p>
          </table:table-cell>
          <table:table-cell office:value-type="float" office:value="0.28535725" table:style-name="c1">
            <text:p>0.28536</text:p>
          </table:table-cell>
          <table:table-cell office:value-type="float" office:value="-1.5752079502261318" table:style-name="c14">
            <text:p>-1.6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7:15</text:p>
          </table:table-cell>
          <table:table-cell office:value-type="float" office:value="0.29164575" table:style-name="c1">
            <text:p>0.29165</text:p>
          </table:table-cell>
          <table:table-cell office:value-type="string" table:style-name="c1">
            <text:p>2026-03-12 17:15</text:p>
          </table:table-cell>
          <table:table-cell office:value-type="float" office:value="0.2890554" table:style-name="c1">
            <text:p>0.28906</text:p>
          </table:table-cell>
          <table:table-cell office:value-type="float" office:value="-1.0863082162520632" table:style-name="c14">
            <text:p>-1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30</text:p>
          </table:table-cell>
          <table:table-cell office:value-type="float" office:value="0.290145" table:style-name="c1">
            <text:p>0.29014</text:p>
          </table:table-cell>
          <table:table-cell office:value-type="string" table:style-name="c1">
            <text:p>2026-03-14 00:30</text:p>
          </table:table-cell>
          <table:table-cell office:value-type="float" office:value="0.29335325" table:style-name="c1">
            <text:p>0.29335</text:p>
          </table:table-cell>
          <table:table-cell office:value-type="float" office:value="0.9036298586051927" table:style-name="c13">
            <text:p>+0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4 13:00</text:p>
          </table:table-cell>
          <table:table-cell office:value-type="float" office:value="0.29724854999999994" table:style-name="c1">
            <text:p>0.29725</text:p>
          </table:table-cell>
          <table:table-cell office:value-type="string" table:style-name="c1">
            <text:p>2026-03-15 13:00</text:p>
          </table:table-cell>
          <table:table-cell office:value-type="float" office:value="0.2976511" table:style-name="c1">
            <text:p>0.29765</text:p>
          </table:table-cell>
          <table:table-cell office:value-type="float" office:value="-0.06474532807643207" table:style-name="c14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2:45</text:p>
          </table:table-cell>
          <table:table-cell office:value-type="float" office:value="0.2965482" table:style-name="c1">
            <text:p>0.29655</text:p>
          </table:table-cell>
          <table:table-cell office:value-type="string" table:style-name="c1">
            <text:p>2026-03-18 02:45</text:p>
          </table:table-cell>
          <table:table-cell office:value-type="float" office:value="0.30814585000000005" table:style-name="c1">
            <text:p>0.30815</text:p>
          </table:table-cell>
          <table:table-cell office:value-type="float" office:value="3.7031640879459538" table:style-name="c13">
            <text:p>+3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9 22:45</text:p>
          </table:table-cell>
          <table:table-cell office:value-type="float" office:value="0.30425204999999994" table:style-name="c1">
            <text:p>0.30425</text:p>
          </table:table-cell>
          <table:table-cell office:value-type="string" table:style-name="c1">
            <text:p>2026-03-20 22:45</text:p>
          </table:table-cell>
          <table:table-cell office:value-type="float" office:value="0.31014485" table:style-name="c1">
            <text:p>0.31014</text:p>
          </table:table-cell>
          <table:table-cell office:value-type="float" office:value="1.7330435225827001" table:style-name="c13">
            <text:p>+1.7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1 04:15</text:p>
          </table:table-cell>
          <table:table-cell office:value-type="float" office:value="0.30965475" table:style-name="c1">
            <text:p>0.30965</text:p>
          </table:table-cell>
          <table:table-cell office:value-type="string" table:style-name="c1">
            <text:p>2026-03-22 04:15</text:p>
          </table:table-cell>
          <table:table-cell office:value-type="float" office:value="0.30874555000000004" table:style-name="c1">
            <text:p>0.30875</text:p>
          </table:table-cell>
          <table:table-cell office:value-type="float" office:value="-0.49293038600245476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3 11:15</text:p>
          </table:table-cell>
          <table:table-cell office:value-type="float" office:value="0.3099549" table:style-name="c1">
            <text:p>0.30995</text:p>
          </table:table-cell>
          <table:table-cell office:value-type="string" table:style-name="c1">
            <text:p>2026-03-23 12:00</text:p>
          </table:table-cell>
          <table:table-cell office:value-type="float" office:value="0.30814585000000005" table:style-name="c1">
            <text:p>0.30815</text:p>
          </table:table-cell>
          <table:table-cell office:value-type="float" office:value="-0.7823827125010618" table:style-name="c14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1:30</text:p>
          </table:table-cell>
          <table:table-cell office:value-type="float" office:value="0.31125555" table:style-name="c1">
            <text:p>0.31126</text:p>
          </table:table-cell>
          <table:table-cell office:value-type="string" table:style-name="c1">
            <text:p>2026-03-25 01:00</text:p>
          </table:table-cell>
          <table:table-cell office:value-type="float" office:value="0.30604690000000007" table:style-name="c1">
            <text:p>0.30605</text:p>
          </table:table-cell>
          <table:table-cell office:value-type="float" office:value="-1.8699868172952883" table:style-name="c14">
            <text:p>-1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16:15</text:p>
          </table:table-cell>
          <table:table-cell office:value-type="float" office:value="0.312156" table:style-name="c1">
            <text:p>0.31216</text:p>
          </table:table-cell>
          <table:table-cell office:value-type="string" table:style-name="c1">
            <text:p>2026-03-26 16:15</text:p>
          </table:table-cell>
          <table:table-cell office:value-type="float" office:value="0.31114435" table:style-name="c1">
            <text:p>0.31114</text:p>
          </table:table-cell>
          <table:table-cell office:value-type="float" office:value="-0.5233369070753002" table:style-name="c14">
            <text:p>-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6 21:30</text:p>
          </table:table-cell>
          <table:table-cell office:value-type="float" office:value="0.31125555" table:style-name="c1">
            <text:p>0.31126</text:p>
          </table:table-cell>
          <table:table-cell office:value-type="string" table:style-name="c1">
            <text:p>2026-03-27 19:00</text:p>
          </table:table-cell>
          <table:table-cell office:value-type="float" office:value="0.30934525" table:style-name="c1">
            <text:p>0.30935</text:p>
          </table:table-cell>
          <table:table-cell office:value-type="float" office:value="-0.8124131938370138" table:style-name="c14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8 11:45</text:p>
          </table:table-cell>
          <table:table-cell office:value-type="float" office:value="0.31405695" table:style-name="c1">
            <text:p>0.31406</text:p>
          </table:table-cell>
          <table:table-cell office:value-type="string" table:style-name="c1">
            <text:p>2026-03-29 11:45</text:p>
          </table:table-cell>
          <table:table-cell office:value-type="float" office:value="0.31914035" table:style-name="c1">
            <text:p>0.31914</text:p>
          </table:table-cell>
          <table:table-cell office:value-type="float" office:value="1.4154879999789705" table:style-name="c13">
            <text:p>+1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9 20:15</text:p>
          </table:table-cell>
          <table:table-cell office:value-type="float" office:value="0.32306145000000003" table:style-name="c1">
            <text:p>0.32306</text:p>
          </table:table-cell>
          <table:table-cell office:value-type="string" table:style-name="c1">
            <text:p>2026-03-30 20:15</text:p>
          </table:table-cell>
          <table:table-cell office:value-type="float" office:value="0.31954015" table:style-name="c1">
            <text:p>0.31954</text:p>
          </table:table-cell>
          <table:table-cell office:value-type="float" office:value="-1.2876995258487178" table:style-name="c14">
            <text:p>-1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11:30</text:p>
          </table:table-cell>
          <table:table-cell office:value-type="float" office:value="0.31825905" table:style-name="c1">
            <text:p>0.31826</text:p>
          </table:table-cell>
          <table:table-cell office:value-type="string" table:style-name="c1">
            <text:p>2026-04-07 00:00</text:p>
          </table:table-cell>
          <table:table-cell office:value-type="float" office:value="0.31634175000000003" table:style-name="c1">
            <text:p>0.31634</text:p>
          </table:table-cell>
          <table:table-cell office:value-type="float" office:value="-0.801129507000653" table:style-name="c14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2 02:45</text:p>
          </table:table-cell>
          <table:table-cell office:value-type="float" office:value="0.32005995" table:style-name="c1">
            <text:p>0.32006</text:p>
          </table:table-cell>
          <table:table-cell office:value-type="string" table:style-name="c1">
            <text:p>2026-04-13 02:45</text:p>
          </table:table-cell>
          <table:table-cell office:value-type="float" office:value="0.3204397" table:style-name="c1">
            <text:p>0.32044</text:p>
          </table:table-cell>
          <table:table-cell office:value-type="float" office:value="-0.08148753391356012" table:style-name="c14">
            <text:p>-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08:00</text:p>
          </table:table-cell>
          <table:table-cell office:value-type="float" office:value="0.32176079999999996" table:style-name="c1">
            <text:p>0.32176</text:p>
          </table:table-cell>
          <table:table-cell office:value-type="string" table:style-name="c1">
            <text:p>2026-04-14 08:00</text:p>
          </table:table-cell>
          <table:table-cell office:value-type="float" office:value="0.32123930000000006" table:style-name="c1">
            <text:p>0.32124</text:p>
          </table:table-cell>
          <table:table-cell office:value-type="float" office:value="-0.3616529299715565" table:style-name="c14">
            <text:p>-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15</text:p>
          </table:table-cell>
          <table:table-cell office:value-type="float" office:value="0.32646315" table:style-name="c1">
            <text:p>0.32646</text:p>
          </table:table-cell>
          <table:table-cell office:value-type="string" table:style-name="c1">
            <text:p>2026-04-16 12:15</text:p>
          </table:table-cell>
          <table:table-cell office:value-type="float" office:value="0.32733625000000005" table:style-name="c1">
            <text:p>0.32734</text:p>
          </table:table-cell>
          <table:table-cell office:value-type="float" office:value="0.06700751256309978" table:style-name="c13">
            <text:p>+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8 07:00</text:p>
          </table:table-cell>
          <table:table-cell office:value-type="float" office:value="0.3275637" table:style-name="c1">
            <text:p>0.32756</text:p>
          </table:table-cell>
          <table:table-cell office:value-type="string" table:style-name="c1">
            <text:p>2026-04-19 07:00</text:p>
          </table:table-cell>
          <table:table-cell office:value-type="float" office:value="0.32953515" table:style-name="c1">
            <text:p>0.32954</text:p>
          </table:table-cell>
          <table:table-cell office:value-type="float" office:value="0.40074930010558507" table:style-name="c13">
            <text:p>+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9 08:30</text:p>
          </table:table-cell>
          <table:table-cell office:value-type="float" office:value="0.33146564999999995" table:style-name="c1">
            <text:p>0.33147</text:p>
          </table:table-cell>
          <table:table-cell office:value-type="string" table:style-name="c1">
            <text:p>2026-04-20 08:30</text:p>
          </table:table-cell>
          <table:table-cell office:value-type="float" office:value="0.32933525" table:style-name="c1">
            <text:p>0.32934</text:p>
          </table:table-cell>
          <table:table-cell office:value-type="float" office:value="-0.841336399337278" table:style-name="c14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20:45</text:p>
          </table:table-cell>
          <table:table-cell office:value-type="float" office:value="0.3343671" table:style-name="c1">
            <text:p>0.33437</text:p>
          </table:table-cell>
          <table:table-cell office:value-type="string" table:style-name="c1">
            <text:p>2026-04-22 20:45</text:p>
          </table:table-cell>
          <table:table-cell office:value-type="float" office:value="0.32893545" table:style-name="c1">
            <text:p>0.32894</text:p>
          </table:table-cell>
          <table:table-cell office:value-type="float" office:value="-1.821109781599306" table:style-name="c14">
            <text:p>-1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2:45</text:p>
          </table:table-cell>
          <table:table-cell office:value-type="float" office:value="0.32696339999999996" table:style-name="c1">
            <text:p>0.32696</text:p>
          </table:table-cell>
          <table:table-cell office:value-type="string" table:style-name="c1">
            <text:p>2026-05-02 12:45</text:p>
          </table:table-cell>
          <table:table-cell office:value-type="float" office:value="0.3304347" table:style-name="c1">
            <text:p>0.33043</text:p>
          </table:table-cell>
          <table:table-cell office:value-type="float" office:value="0.8596561678463344" table:style-name="c13">
            <text:p>+0.9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5:30</text:p>
          </table:table-cell>
          <table:table-cell office:value-type="float" office:value="0.33726855" table:style-name="c1">
            <text:p>0.33727</text:p>
          </table:table-cell>
          <table:table-cell office:value-type="string" table:style-name="c1">
            <text:p>2026-05-04 05:30</text:p>
          </table:table-cell>
          <table:table-cell office:value-type="float" office:value="0.33853065000000004" table:style-name="c1">
            <text:p>0.33853</text:p>
          </table:table-cell>
          <table:table-cell office:value-type="float" office:value="0.17356413180240615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07:30</text:p>
          </table:table-cell>
          <table:table-cell office:value-type="float" office:value="0.34077029999999997" table:style-name="c1">
            <text:p>0.34077</text:p>
          </table:table-cell>
          <table:table-cell office:value-type="string" table:style-name="c1">
            <text:p>2026-05-06 07:30</text:p>
          </table:table-cell>
          <table:table-cell office:value-type="float" office:value="0.3432283" table:style-name="c1">
            <text:p>0.34323</text:p>
          </table:table-cell>
          <table:table-cell office:value-type="float" office:value="0.5199650991591698" table:style-name="c13">
            <text:p>+0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7:15</text:p>
          </table:table-cell>
          <table:table-cell office:value-type="float" office:value="0.3505752" table:style-name="c1">
            <text:p>0.35058</text:p>
          </table:table-cell>
          <table:table-cell office:value-type="string" table:style-name="c1">
            <text:p>2026-05-09 07:15</text:p>
          </table:table-cell>
          <table:table-cell office:value-type="float" office:value="0.35202390000000006" table:style-name="c1">
            <text:p>0.35202</text:p>
          </table:table-cell>
          <table:table-cell office:value-type="float" office:value="0.21250910614900587" table:style-name="c13">
            <text:p>+0.2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1:30</text:p>
          </table:table-cell>
          <table:table-cell office:value-type="float" office:value="0.35007495" table:style-name="c1">
            <text:p>0.35007</text:p>
          </table:table-cell>
          <table:table-cell office:value-type="string" table:style-name="c1">
            <text:p>2026-05-11 11:30</text:p>
          </table:table-cell>
          <table:table-cell office:value-type="float" office:value="0.35112435000000003" table:style-name="c1">
            <text:p>0.35112</text:p>
          </table:table-cell>
          <table:table-cell office:value-type="float" office:value="0.09926515003431113" table:style-name="c13">
            <text:p>+0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02:45</text:p>
          </table:table-cell>
          <table:table-cell office:value-type="float" office:value="0.35067524999999994" table:style-name="c1">
            <text:p>0.35068</text:p>
          </table:table-cell>
          <table:table-cell office:value-type="string" table:style-name="c1">
            <text:p>2026-05-15 02:45</text:p>
          </table:table-cell>
          <table:table-cell office:value-type="float" office:value="0.35292345" table:style-name="c1">
            <text:p>0.35292</text:p>
          </table:table-cell>
          <table:table-cell office:value-type="float" office:value="0.439924409678194" table:style-name="c13">
            <text:p>+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6 17:00</text:p>
          </table:table-cell>
          <table:table-cell office:value-type="float" office:value="0.35467724999999994" table:style-name="c1">
            <text:p>0.35468</text:p>
          </table:table-cell>
          <table:table-cell office:value-type="string" table:style-name="c1">
            <text:p>2026-05-17 17:00</text:p>
          </table:table-cell>
          <table:table-cell office:value-type="float" office:value="0.35672155" table:style-name="c1">
            <text:p>0.35672</text:p>
          </table:table-cell>
          <table:table-cell office:value-type="float" office:value="0.3753309865659471" table:style-name="c13">
            <text:p>+0.4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8 11:00</text:p>
          </table:table-cell>
          <table:table-cell office:value-type="float" office:value="0.35727855" table:style-name="c1">
            <text:p>0.35728</text:p>
          </table:table-cell>
          <table:table-cell office:value-type="string" table:style-name="c1">
            <text:p>2026-05-19 11:00</text:p>
          </table:table-cell>
          <table:table-cell office:value-type="float" office:value="0.3550224" table:style-name="c1">
            <text:p>0.35502</text:p>
          </table:table-cell>
          <table:table-cell office:value-type="float" office:value="-0.8301197420332085" table:style-name="c14">
            <text:p>-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12:30</text:p>
          </table:table-cell>
          <table:table-cell office:value-type="float" office:value="0.36368174999999997" table:style-name="c1">
            <text:p>0.36368</text:p>
          </table:table-cell>
          <table:table-cell office:value-type="string" table:style-name="c1">
            <text:p>2026-05-22 12:30</text:p>
          </table:table-cell>
          <table:table-cell office:value-type="float" office:value="0.36451765" table:style-name="c1">
            <text:p>0.36452</text:p>
          </table:table-cell>
          <table:table-cell office:value-type="float" office:value="0.029484354837738813" table:style-name="c13">
            <text:p>+0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3 10:30</text:p>
          </table:table-cell>
          <table:table-cell office:value-type="float" office:value="0.3619809" table:style-name="c1">
            <text:p>0.36198</text:p>
          </table:table-cell>
          <table:table-cell office:value-type="string" table:style-name="c1">
            <text:p>2026-05-23 13:00</text:p>
          </table:table-cell>
          <table:table-cell office:value-type="float" office:value="0.3590204" table:style-name="c1">
            <text:p>0.35902</text:p>
          </table:table-cell>
          <table:table-cell office:value-type="float" office:value="-1.0161259280807244" table:style-name="c14">
            <text:p>-1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09:15</text:p>
          </table:table-cell>
          <table:table-cell office:value-type="float" office:value="0.36348165" table:style-name="c1">
            <text:p>0.36348</text:p>
          </table:table-cell>
          <table:table-cell office:value-type="string" table:style-name="c1">
            <text:p>2026-05-25 09:15</text:p>
          </table:table-cell>
          <table:table-cell office:value-type="float" office:value="0.36721630000000005" table:style-name="c1">
            <text:p>0.36722</text:p>
          </table:table-cell>
          <table:table-cell office:value-type="float" office:value="0.8255119938792133" table:style-name="c13">
            <text:p>+0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12:30</text:p>
          </table:table-cell>
          <table:table-cell office:value-type="float" office:value="0.36828405" table:style-name="c1">
            <text:p>0.36828</text:p>
          </table:table-cell>
          <table:table-cell office:value-type="string" table:style-name="c1">
            <text:p>2026-05-26 12:30</text:p>
          </table:table-cell>
          <table:table-cell office:value-type="float" office:value="0.37581200000000003" table:style-name="c1">
            <text:p>0.37581</text:p>
          </table:table-cell>
          <table:table-cell office:value-type="float" office:value="1.8400747499111247" table:style-name="c13">
            <text:p>+1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7 12:00</text:p>
          </table:table-cell>
          <table:table-cell office:value-type="float" office:value="0.37428704999999995" table:style-name="c1">
            <text:p>0.37429</text:p>
          </table:table-cell>
          <table:table-cell office:value-type="string" table:style-name="c1">
            <text:p>2026-05-27 23:00</text:p>
          </table:table-cell>
          <table:table-cell office:value-type="float" office:value="0.3684157" table:style-name="c1">
            <text:p>0.36842</text:p>
          </table:table-cell>
          <table:table-cell office:value-type="float" office:value="-1.765439916849909" table:style-name="c14">
            <text:p>-1.8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5:15</text:p>
          </table:table-cell>
          <table:table-cell office:value-type="float" office:value="0.35167574999999995" table:style-name="c1">
            <text:p>0.35168</text:p>
          </table:table-cell>
          <table:table-cell office:value-type="string" table:style-name="c1">
            <text:p>2026-06-01 20:00</text:p>
          </table:table-cell>
          <table:table-cell office:value-type="float" office:value="0.34412785" table:style-name="c1">
            <text:p>0.34413</text:p>
          </table:table-cell>
          <table:table-cell office:value-type="float" office:value="-2.3418764507220025" table:style-name="c14">
            <text:p>-2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01:15</text:p>
          </table:table-cell>
          <table:table-cell office:value-type="float" office:value="4.016007" table:style-name="c10">
            <text:p>4.016</text:p>
          </table:table-cell>
          <table:table-cell office:value-type="string" table:style-name="c10">
            <text:p>2026-03-06 01:15</text:p>
          </table:table-cell>
          <table:table-cell office:value-type="float" office:value="3.9630175" table:style-name="c10">
            <text:p>3.963</text:p>
          </table:table-cell>
          <table:table-cell office:value-type="float" office:value="-1.5167197662379506" table:style-name="c11">
            <text:p>-1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6 08:00</text:p>
          </table:table-cell>
          <table:table-cell office:value-type="float" office:value="4.014005999999999" table:style-name="c10">
            <text:p>4.014</text:p>
          </table:table-cell>
          <table:table-cell office:value-type="string" table:style-name="c10">
            <text:p>2026-03-06 16:00</text:p>
          </table:table-cell>
          <table:table-cell office:value-type="float" office:value="3.8290845" table:style-name="c10">
            <text:p>3.8291</text:p>
          </table:table-cell>
          <table:table-cell office:value-type="float" office:value="-4.797597211252292" table:style-name="c11">
            <text:p>-4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9 13:45</text:p>
          </table:table-cell>
          <table:table-cell office:value-type="float" office:value="3.9149564999999997" table:style-name="c10">
            <text:p>3.915</text:p>
          </table:table-cell>
          <table:table-cell office:value-type="string" table:style-name="c10">
            <text:p>2026-03-10 13:45</text:p>
          </table:table-cell>
          <table:table-cell office:value-type="float" office:value="3.880059" table:style-name="c10">
            <text:p>3.8801</text:p>
          </table:table-cell>
          <table:table-cell office:value-type="float" office:value="-1.0895073276293132" table:style-name="c11">
            <text:p>-1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15:00</text:p>
          </table:table-cell>
          <table:table-cell office:value-type="float" office:value="3.9729855" table:style-name="c10">
            <text:p>3.973</text:p>
          </table:table-cell>
          <table:table-cell office:value-type="string" table:style-name="c10">
            <text:p>2026-03-11 15:00</text:p>
          </table:table-cell>
          <table:table-cell office:value-type="float" office:value="3.9310335" table:style-name="c10">
            <text:p>3.931</text:p>
          </table:table-cell>
          <table:table-cell office:value-type="float" office:value="-1.2537205576637622" table:style-name="c11">
            <text:p>-1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7:45</text:p>
          </table:table-cell>
          <table:table-cell office:value-type="float" office:value="3.887943" table:style-name="c10">
            <text:p>3.8879</text:p>
          </table:table-cell>
          <table:table-cell office:value-type="string" table:style-name="c10">
            <text:p>2026-03-13 07:45</text:p>
          </table:table-cell>
          <table:table-cell office:value-type="float" office:value="3.9880050000000002" table:style-name="c10">
            <text:p>3.988</text:p>
          </table:table-cell>
          <table:table-cell office:value-type="float" office:value="2.368604118038764" table:style-name="c12">
            <text:p>+2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0:15</text:p>
          </table:table-cell>
          <table:table-cell office:value-type="float" office:value="4.100048999999999" table:style-name="c10">
            <text:p>4.1</text:p>
          </table:table-cell>
          <table:table-cell office:value-type="string" table:style-name="c10">
            <text:p>2026-03-14 10:15</text:p>
          </table:table-cell>
          <table:table-cell office:value-type="float" office:value="3.924037" table:style-name="c10">
            <text:p>3.924</text:p>
          </table:table-cell>
          <table:table-cell office:value-type="float" office:value="-4.48424274839152" table:style-name="c11">
            <text:p>-4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4 13:45</text:p>
          </table:table-cell>
          <table:table-cell office:value-type="float" office:value="3.9489734999999997" table:style-name="c10">
            <text:p>3.949</text:p>
          </table:table-cell>
          <table:table-cell office:value-type="string" table:style-name="c10">
            <text:p>2026-03-14 15:00</text:p>
          </table:table-cell>
          <table:table-cell office:value-type="float" office:value="3.924037" table:style-name="c10">
            <text:p>3.924</text:p>
          </table:table-cell>
          <table:table-cell office:value-type="float" office:value="-0.8301055948589986" table:style-name="c11">
            <text:p>-0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11:00</text:p>
          </table:table-cell>
          <table:table-cell office:value-type="float" office:value="3.987993" table:style-name="c10">
            <text:p>3.988</text:p>
          </table:table-cell>
          <table:table-cell office:value-type="string" table:style-name="c10">
            <text:p>2026-03-16 11:00</text:p>
          </table:table-cell>
          <table:table-cell office:value-type="float" office:value="4.0669655" table:style-name="c10">
            <text:p>4.067</text:p>
          </table:table-cell>
          <table:table-cell office:value-type="float" office:value="1.776398202441687" table:style-name="c12">
            <text:p>+1.8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3:30</text:p>
          </table:table-cell>
          <table:table-cell office:value-type="float" office:value="3.6178079999999997" table:style-name="c10">
            <text:p>3.6178</text:p>
          </table:table-cell>
          <table:table-cell office:value-type="string" table:style-name="c10">
            <text:p>2026-03-25 23:30</text:p>
          </table:table-cell>
          <table:table-cell office:value-type="float" office:value="3.712143" table:style-name="c10">
            <text:p>3.7121</text:p>
          </table:table-cell>
          <table:table-cell office:value-type="float" office:value="2.402405714814071" table:style-name="c12">
            <text:p>+2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0 08:00</text:p>
          </table:table-cell>
          <table:table-cell office:value-type="float" office:value="3.5367675" table:style-name="c10">
            <text:p>3.5368</text:p>
          </table:table-cell>
          <table:table-cell office:value-type="string" table:style-name="c10">
            <text:p>2026-03-31 08:00</text:p>
          </table:table-cell>
          <table:table-cell office:value-type="float" office:value="3.510244" table:style-name="c10">
            <text:p>3.5102</text:p>
          </table:table-cell>
          <table:table-cell office:value-type="float" office:value="-0.9483370833960669" table:style-name="c11">
            <text:p>-0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14:30</text:p>
          </table:table-cell>
          <table:table-cell office:value-type="float" office:value="3.547773" table:style-name="c10">
            <text:p>3.5478</text:p>
          </table:table-cell>
          <table:table-cell office:value-type="string" table:style-name="c10">
            <text:p>2026-04-01 14:30</text:p>
          </table:table-cell>
          <table:table-cell office:value-type="float" office:value="3.6141920000000005" table:style-name="c10">
            <text:p>3.6142</text:p>
          </table:table-cell>
          <table:table-cell office:value-type="float" office:value="1.66848978759353" table:style-name="c12">
            <text:p>+1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6 09:15</text:p>
          </table:table-cell>
          <table:table-cell office:value-type="float" office:value="3.1785885" table:style-name="c10">
            <text:p>3.1786</text:p>
          </table:table-cell>
          <table:table-cell office:value-type="string" table:style-name="c10">
            <text:p>2026-04-07 01:00</text:p>
          </table:table-cell>
          <table:table-cell office:value-type="float" office:value="3.086456" table:style-name="c10">
            <text:p>3.0865</text:p>
          </table:table-cell>
          <table:table-cell office:value-type="float" office:value="-3.092640822931303" table:style-name="c11">
            <text:p>-3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8 08:15</text:p>
          </table:table-cell>
          <table:table-cell office:value-type="float" office:value="3.2546265" table:style-name="c10">
            <text:p>3.2546</text:p>
          </table:table-cell>
          <table:table-cell office:value-type="string" table:style-name="c10">
            <text:p>2026-04-09 04:00</text:p>
          </table:table-cell>
          <table:table-cell office:value-type="float" office:value="3.0554715" table:style-name="c10">
            <text:p>3.0555</text:p>
          </table:table-cell>
          <table:table-cell office:value-type="float" office:value="-6.306803177830089" table:style-name="c11">
            <text:p>-6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1 17:00</text:p>
          </table:table-cell>
          <table:table-cell office:value-type="float" office:value="3.1685834999999996" table:style-name="c10">
            <text:p>3.1686</text:p>
          </table:table-cell>
          <table:table-cell office:value-type="string" table:style-name="c10">
            <text:p>2026-04-12 04:00</text:p>
          </table:table-cell>
          <table:table-cell office:value-type="float" office:value="3.0794595" table:style-name="c10">
            <text:p>3.0795</text:p>
          </table:table-cell>
          <table:table-cell office:value-type="float" office:value="-3.007016843346566" table:style-name="c11">
            <text:p>-3.0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15</text:p>
          </table:table-cell>
          <table:table-cell office:value-type="float" office:value="3.16158" table:style-name="c10">
            <text:p>3.1616</text:p>
          </table:table-cell>
          <table:table-cell office:value-type="string" table:style-name="c10">
            <text:p>2026-04-14 22:15</text:p>
          </table:table-cell>
          <table:table-cell office:value-type="float" office:value="3.1264360000000004" table:style-name="c10">
            <text:p>3.1264</text:p>
          </table:table-cell>
          <table:table-cell office:value-type="float" office:value="-1.3092740200785546" table:style-name="c11">
            <text:p>-1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0:30</text:p>
          </table:table-cell>
          <table:table-cell office:value-type="float" office:value="3.145572" table:style-name="c10">
            <text:p>3.1456</text:p>
          </table:table-cell>
          <table:table-cell office:value-type="string" table:style-name="c10">
            <text:p>2026-04-16 00:30</text:p>
          </table:table-cell>
          <table:table-cell office:value-type="float" office:value="3.2113935000000002" table:style-name="c10">
            <text:p>3.2114</text:p>
          </table:table-cell>
          <table:table-cell office:value-type="float" office:value="1.888429970558625" table:style-name="c12">
            <text:p>+1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3.249624" table:style-name="c10">
            <text:p>3.2496</text:p>
          </table:table-cell>
          <table:table-cell office:value-type="string" table:style-name="c10">
            <text:p>2026-04-17 02:45</text:p>
          </table:table-cell>
          <table:table-cell office:value-type="float" office:value="3.3763110000000003" table:style-name="c10">
            <text:p>3.3763</text:p>
          </table:table-cell>
          <table:table-cell office:value-type="float" office:value="3.6908194397567318" table:style-name="c12">
            <text:p>+3.7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7:45</text:p>
          </table:table-cell>
          <table:table-cell office:value-type="float" office:value="3.3976979999999997" table:style-name="c10">
            <text:p>3.3977</text:p>
          </table:table-cell>
          <table:table-cell office:value-type="string" table:style-name="c10">
            <text:p>2026-04-18 07:45</text:p>
          </table:table-cell>
          <table:table-cell office:value-type="float" office:value="3.4682650000000006" table:style-name="c10">
            <text:p>3.4683</text:p>
          </table:table-cell>
          <table:table-cell office:value-type="float" office:value="1.8728544521908974" table:style-name="c12">
            <text:p>+1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3.383691" table:style-name="c10">
            <text:p>3.3837</text:p>
          </table:table-cell>
          <table:table-cell office:value-type="string" table:style-name="c10">
            <text:p>2026-04-23 05:30</text:p>
          </table:table-cell>
          <table:table-cell office:value-type="float" office:value="3.2803590000000002" table:style-name="c10">
            <text:p>3.2804</text:p>
          </table:table-cell>
          <table:table-cell office:value-type="float" office:value="-3.247620354252201" table:style-name="c11">
            <text:p>-3.2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7 03:45</text:p>
          </table:table-cell>
          <table:table-cell office:value-type="float" office:value="3.3586785" table:style-name="c10">
            <text:p>3.3587</text:p>
          </table:table-cell>
          <table:table-cell office:value-type="string" table:style-name="c10">
            <text:p>2026-04-27 16:00</text:p>
          </table:table-cell>
          <table:table-cell office:value-type="float" office:value="3.1934025" table:style-name="c10">
            <text:p>3.1934</text:p>
          </table:table-cell>
          <table:table-cell office:value-type="float" office:value="-5.110927157734812" table:style-name="c11">
            <text:p>-5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9 04:45</text:p>
          </table:table-cell>
          <table:table-cell office:value-type="float" office:value="3.2966474999999997" table:style-name="c10">
            <text:p>3.2966</text:p>
          </table:table-cell>
          <table:table-cell office:value-type="string" table:style-name="c10">
            <text:p>2026-04-29 19:00</text:p>
          </table:table-cell>
          <table:table-cell office:value-type="float" office:value="3.1534225" table:style-name="c10">
            <text:p>3.1534</text:p>
          </table:table-cell>
          <table:table-cell office:value-type="float" office:value="-4.535780412600987" table:style-name="c11">
            <text:p>-4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1 14:00</text:p>
          </table:table-cell>
          <table:table-cell office:value-type="float" office:value="3.2686334999999995" table:style-name="c10">
            <text:p>3.2686</text:p>
          </table:table-cell>
          <table:table-cell office:value-type="string" table:style-name="c10">
            <text:p>2026-05-02 14:00</text:p>
          </table:table-cell>
          <table:table-cell office:value-type="float" office:value="3.2283850000000003" table:style-name="c10">
            <text:p>3.2284</text:p>
          </table:table-cell>
          <table:table-cell office:value-type="float" office:value="-1.4287940699071688" table:style-name="c11">
            <text:p>-1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3 07:45</text:p>
          </table:table-cell>
          <table:table-cell office:value-type="float" office:value="3.2306144999999997" table:style-name="c10">
            <text:p>3.2306</text:p>
          </table:table-cell>
          <table:table-cell office:value-type="string" table:style-name="c10">
            <text:p>2026-05-04 07:45</text:p>
          </table:table-cell>
          <table:table-cell office:value-type="float" office:value="3.3803090000000005" table:style-name="c10">
            <text:p>3.3803</text:p>
          </table:table-cell>
          <table:table-cell office:value-type="float" office:value="4.424460495333027" table:style-name="c12">
            <text:p>+4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4 15:00</text:p>
          </table:table-cell>
          <table:table-cell office:value-type="float" office:value="3.335667" table:style-name="c10">
            <text:p>3.3357</text:p>
          </table:table-cell>
          <table:table-cell office:value-type="string" table:style-name="c10">
            <text:p>2026-05-05 15:00</text:p>
          </table:table-cell>
          <table:table-cell office:value-type="float" office:value="3.35832" table:style-name="c10">
            <text:p>3.3583</text:p>
          </table:table-cell>
          <table:table-cell office:value-type="float" office:value="0.4778570019129402" table:style-name="c12">
            <text:p>+0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09:00</text:p>
          </table:table-cell>
          <table:table-cell office:value-type="float" office:value="3.475737" table:style-name="c10">
            <text:p>3.4757</text:p>
          </table:table-cell>
          <table:table-cell office:value-type="string" table:style-name="c10">
            <text:p>2026-05-07 09:00</text:p>
          </table:table-cell>
          <table:table-cell office:value-type="float" office:value="3.4852565" table:style-name="c10">
            <text:p>3.4853</text:p>
          </table:table-cell>
          <table:table-cell office:value-type="float" office:value="0.07343686408092243" table:style-name="c12">
            <text:p>+0.1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00:15</text:p>
          </table:table-cell>
          <table:table-cell office:value-type="float" office:value="3.4447215" table:style-name="c10">
            <text:p>3.4447</text:p>
          </table:table-cell>
          <table:table-cell office:value-type="string" table:style-name="c10">
            <text:p>2026-05-09 00:15</text:p>
          </table:table-cell>
          <table:table-cell office:value-type="float" office:value="3.7111435000000004" table:style-name="c10">
            <text:p>3.7111</text:p>
          </table:table-cell>
          <table:table-cell office:value-type="float" office:value="7.518849467032407" table:style-name="c12">
            <text:p>+7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9 00:45</text:p>
          </table:table-cell>
          <table:table-cell office:value-type="float" office:value="3.7858919999999996" table:style-name="c10">
            <text:p>3.7859</text:p>
          </table:table-cell>
          <table:table-cell office:value-type="string" table:style-name="c10">
            <text:p>2026-05-10 00:45</text:p>
          </table:table-cell>
          <table:table-cell office:value-type="float" office:value="3.77811" table:style-name="c10">
            <text:p>3.7781</text:p>
          </table:table-cell>
          <table:table-cell office:value-type="float" office:value="-0.40504171513606746" table:style-name="c11">
            <text:p>-0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05:15</text:p>
          </table:table-cell>
          <table:table-cell office:value-type="float" office:value="3.7768874999999995" table:style-name="c10">
            <text:p>3.7769</text:p>
          </table:table-cell>
          <table:table-cell office:value-type="string" table:style-name="c10">
            <text:p>2026-05-11 05:15</text:p>
          </table:table-cell>
          <table:table-cell office:value-type="float" office:value="3.922038" table:style-name="c10">
            <text:p>3.922</text:p>
          </table:table-cell>
          <table:table-cell office:value-type="float" office:value="3.635542388752655" table:style-name="c12">
            <text:p>+3.6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1 16:15</text:p>
          </table:table-cell>
          <table:table-cell office:value-type="float" office:value="3.9259619999999997" table:style-name="c10">
            <text:p>3.926</text:p>
          </table:table-cell>
          <table:table-cell office:value-type="string" table:style-name="c10">
            <text:p>2026-05-12 09:00</text:p>
          </table:table-cell>
          <table:table-cell office:value-type="float" office:value="3.7990995000000005" table:style-name="c10">
            <text:p>3.7991</text:p>
          </table:table-cell>
          <table:table-cell office:value-type="float" office:value="-3.424814093985107" table:style-name="c11">
            <text:p>-3.4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5 08:45</text:p>
          </table:table-cell>
          <table:table-cell office:value-type="float" office:value="3.72186" table:style-name="c10">
            <text:p>3.7219</text:p>
          </table:table-cell>
          <table:table-cell office:value-type="string" table:style-name="c10">
            <text:p>2026-05-15 11:00</text:p>
          </table:table-cell>
          <table:table-cell office:value-type="float" office:value="3.6951515" table:style-name="c10">
            <text:p>3.6952</text:p>
          </table:table-cell>
          <table:table-cell office:value-type="float" office:value="-0.9160771186583871" table:style-name="c11">
            <text:p>-0.9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0 07:00</text:p>
          </table:table-cell>
          <table:table-cell office:value-type="float" office:value="3.5797889999999994" table:style-name="c10">
            <text:p>3.5798</text:p>
          </table:table-cell>
          <table:table-cell office:value-type="string" table:style-name="c10">
            <text:p>2026-05-21 07:00</text:p>
          </table:table-cell>
          <table:table-cell office:value-type="float" office:value="3.6391795" table:style-name="c10">
            <text:p>3.6392</text:p>
          </table:table-cell>
          <table:table-cell office:value-type="float" office:value="1.455833854439481" table:style-name="c12">
            <text:p>+1.5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08:15</text:p>
          </table:table-cell>
          <table:table-cell office:value-type="float" office:value="3.6868425" table:style-name="c10">
            <text:p>3.6868</text:p>
          </table:table-cell>
          <table:table-cell office:value-type="string" table:style-name="c10">
            <text:p>2026-05-22 08:15</text:p>
          </table:table-cell>
          <table:table-cell office:value-type="float" office:value="3.6091945000000005" table:style-name="c10">
            <text:p>3.6092</text:p>
          </table:table-cell>
          <table:table-cell office:value-type="float" office:value="-2.3017739381462454" table:style-name="c11">
            <text:p>-2.3</text:p>
          </table:table-cell>
        </table:table-row>
        <table:table-row>
          <table:table-cell office:value-type="string" table:style-name="c9">
            <text:p>UNI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2 11:45</text:p>
          </table:table-cell>
          <table:table-cell office:value-type="float" office:value="3.6248115" table:style-name="c10">
            <text:p>3.6248</text:p>
          </table:table-cell>
          <table:table-cell office:value-type="string" table:style-name="c10">
            <text:p>2026-05-22 21:00</text:p>
          </table:table-cell>
          <table:table-cell office:value-type="float" office:value="3.4972505000000003" table:style-name="c10">
            <text:p>3.4973</text:p>
          </table:table-cell>
          <table:table-cell office:value-type="float" office:value="-3.7119724363459894" table:style-name="c11">
            <text:p>-3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9:15</text:p>
          </table:table-cell>
          <table:table-cell office:value-type="float" office:value="0.0073216589999999995" table:style-name="c1">
            <text:p>0.0073217</text:p>
          </table:table-cell>
          <table:table-cell office:value-type="string" table:style-name="c1">
            <text:p>2026-03-06 16:00</text:p>
          </table:table-cell>
          <table:table-cell office:value-type="float" office:value="0.007038479" table:style-name="c1">
            <text:p>0.0070385</text:p>
          </table:table-cell>
          <table:table-cell office:value-type="float" office:value="-4.059871123757619" table:style-name="c14">
            <text:p>-4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4:45</text:p>
          </table:table-cell>
          <table:table-cell office:value-type="float" office:value="0.0071465715" table:style-name="c1">
            <text:p>0.0071466</text:p>
          </table:table-cell>
          <table:table-cell office:value-type="string" table:style-name="c1">
            <text:p>2026-03-11 14:45</text:p>
          </table:table-cell>
          <table:table-cell office:value-type="float" office:value="0.0071714125" table:style-name="c1">
            <text:p>0.0071714</text:p>
          </table:table-cell>
          <table:table-cell office:value-type="float" office:value="0.1469984091322596" table:style-name="c13">
            <text:p>+0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0:45</text:p>
          </table:table-cell>
          <table:table-cell office:value-type="float" office:value="0.0073046505" table:style-name="c1">
            <text:p>0.0073047</text:p>
          </table:table-cell>
          <table:table-cell office:value-type="string" table:style-name="c1">
            <text:p>2026-03-14 00:45</text:p>
          </table:table-cell>
          <table:table-cell office:value-type="float" office:value="0.007177409500000001" table:style-name="c1">
            <text:p>0.0071774</text:p>
          </table:table-cell>
          <table:table-cell office:value-type="float" office:value="-1.938335606754893" table:style-name="c14">
            <text:p>-1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11:00</text:p>
          </table:table-cell>
          <table:table-cell office:value-type="float" office:value="0.0073586775" table:style-name="c1">
            <text:p>0.0073587</text:p>
          </table:table-cell>
          <table:table-cell office:value-type="string" table:style-name="c1">
            <text:p>2026-03-16 11:00</text:p>
          </table:table-cell>
          <table:table-cell office:value-type="float" office:value="0.007599198500000001" table:style-name="c1">
            <text:p>0.0075992</text:p>
          </table:table-cell>
          <table:table-cell office:value-type="float" office:value="3.062101881737611" table:style-name="c13">
            <text:p>+3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0:15</text:p>
          </table:table-cell>
          <table:table-cell office:value-type="float" office:value="0.007831913999999999" table:style-name="c1">
            <text:p>0.0078319</text:p>
          </table:table-cell>
          <table:table-cell office:value-type="string" table:style-name="c1">
            <text:p>2026-03-18 00:15</text:p>
          </table:table-cell>
          <table:table-cell office:value-type="float" office:value="0.007576210000000001" table:style-name="c1">
            <text:p>0.0075762</text:p>
          </table:table-cell>
          <table:table-cell office:value-type="float" office:value="-3.4582714236902845" table:style-name="c14">
            <text:p>-3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12:30</text:p>
          </table:table-cell>
          <table:table-cell office:value-type="float" office:value="0.007110553499999999" table:style-name="c1">
            <text:p>0.0071106</text:p>
          </table:table-cell>
          <table:table-cell office:value-type="string" table:style-name="c1">
            <text:p>2026-03-25 12:30</text:p>
          </table:table-cell>
          <table:table-cell office:value-type="float" office:value="0.007186405000000001" table:style-name="c1">
            <text:p>0.0071864</text:p>
          </table:table-cell>
          <table:table-cell office:value-type="float" office:value="0.8647129426000433" table:style-name="c13">
            <text:p>+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30 22:00</text:p>
          </table:table-cell>
          <table:table-cell office:value-type="float" office:value="0.00676338" table:style-name="c1">
            <text:p>0.0067634</text:p>
          </table:table-cell>
          <table:table-cell office:value-type="string" table:style-name="c1">
            <text:p>2026-03-31 11:00</text:p>
          </table:table-cell>
          <table:table-cell office:value-type="float" office:value="0.006590703000000001" table:style-name="c1">
            <text:p>0.0065907</text:p>
          </table:table-cell>
          <table:table-cell office:value-type="float" office:value="-2.7479132519095395" table:style-name="c14">
            <text:p>-2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1 05:30</text:p>
          </table:table-cell>
          <table:table-cell office:value-type="float" office:value="0.0068464215" table:style-name="c1">
            <text:p>0.0068464</text:p>
          </table:table-cell>
          <table:table-cell office:value-type="string" table:style-name="c1">
            <text:p>2026-04-02 05:30</text:p>
          </table:table-cell>
          <table:table-cell office:value-type="float" office:value="0.0066866550000000005" table:style-name="c1">
            <text:p>0.0066867</text:p>
          </table:table-cell>
          <table:table-cell office:value-type="float" office:value="-2.5288119252517394" table:style-name="c14">
            <text:p>-2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3 05:45</text:p>
          </table:table-cell>
          <table:table-cell office:value-type="float" office:value="0.0070145055" table:style-name="c1">
            <text:p>0.0070145</text:p>
          </table:table-cell>
          <table:table-cell office:value-type="string" table:style-name="c1">
            <text:p>2026-04-04 05:45</text:p>
          </table:table-cell>
          <table:table-cell office:value-type="float" office:value="0.007374311000000001" table:style-name="c1">
            <text:p>0.0073743</text:p>
          </table:table-cell>
          <table:table-cell office:value-type="float" office:value="4.919295484350261" table:style-name="c13">
            <text:p>+4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07:15</text:p>
          </table:table-cell>
          <table:table-cell office:value-type="float" office:value="0.007541769" table:style-name="c1">
            <text:p>0.0075418</text:p>
          </table:table-cell>
          <table:table-cell office:value-type="string" table:style-name="c1">
            <text:p>2026-04-05 07:15</text:p>
          </table:table-cell>
          <table:table-cell office:value-type="float" office:value="0.007414291000000001" table:style-name="c1">
            <text:p>0.0074143</text:p>
          </table:table-cell>
          <table:table-cell office:value-type="float" office:value="-1.886814190530095" table:style-name="c14">
            <text:p>-1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5 23:15</text:p>
          </table:table-cell>
          <table:table-cell office:value-type="float" office:value="0.0074037" table:style-name="c1">
            <text:p>0.0074037</text:p>
          </table:table-cell>
          <table:table-cell office:value-type="string" table:style-name="c1">
            <text:p>2026-04-06 23:15</text:p>
          </table:table-cell>
          <table:table-cell office:value-type="float" office:value="0.0071454255" table:style-name="c1">
            <text:p>0.0071454</text:p>
          </table:table-cell>
          <table:table-cell office:value-type="float" office:value="-3.681378305097449" table:style-name="c14">
            <text:p>-3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00:00</text:p>
          </table:table-cell>
          <table:table-cell office:value-type="float" office:value="0.007099548" table:style-name="c1">
            <text:p>0.0070995</text:p>
          </table:table-cell>
          <table:table-cell office:value-type="string" table:style-name="c1">
            <text:p>2026-04-15 00:00</text:p>
          </table:table-cell>
          <table:table-cell office:value-type="float" office:value="0.006887554500000001" table:style-name="c1">
            <text:p>0.0068876</text:p>
          </table:table-cell>
          <table:table-cell office:value-type="float" office:value="-3.179944997139239" table:style-name="c14">
            <text:p>-3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9:45</text:p>
          </table:table-cell>
          <table:table-cell office:value-type="float" office:value="0.0070555259999999995" table:style-name="c1">
            <text:p>0.0070555</text:p>
          </table:table-cell>
          <table:table-cell office:value-type="string" table:style-name="c1">
            <text:p>2026-04-16 19:45</text:p>
          </table:table-cell>
          <table:table-cell office:value-type="float" office:value="0.007487254500000001" table:style-name="c1">
            <text:p>0.0074873</text:p>
          </table:table-cell>
          <table:table-cell office:value-type="float" office:value="5.906880341090104" table:style-name="c13">
            <text:p>+5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8:15</text:p>
          </table:table-cell>
          <table:table-cell office:value-type="float" office:value="0.007315655999999999" table:style-name="c1">
            <text:p>0.0073157</text:p>
          </table:table-cell>
          <table:table-cell office:value-type="string" table:style-name="c1">
            <text:p>2026-04-18 08:15</text:p>
          </table:table-cell>
          <table:table-cell office:value-type="float" office:value="0.007360318" table:style-name="c1">
            <text:p>0.0073603</text:p>
          </table:table-cell>
          <table:table-cell office:value-type="float" office:value="0.40937852077791437" table:style-name="c13">
            <text:p>+0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2 02:45</text:p>
          </table:table-cell>
          <table:table-cell office:value-type="float" office:value="0.007235615999999999" table:style-name="c1">
            <text:p>0.0072356</text:p>
          </table:table-cell>
          <table:table-cell office:value-type="string" table:style-name="c1">
            <text:p>2026-04-23 02:45</text:p>
          </table:table-cell>
          <table:table-cell office:value-type="float" office:value="0.0070654655000000005" table:style-name="c1">
            <text:p>0.0070655</text:p>
          </table:table-cell>
          <table:table-cell office:value-type="float" office:value="-2.546768174741443" table:style-name="c14">
            <text:p>-2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3 20:45</text:p>
          </table:table-cell>
          <table:table-cell office:value-type="float" office:value="0.0073076519999999996" table:style-name="c1">
            <text:p>0.0073077</text:p>
          </table:table-cell>
          <table:table-cell office:value-type="string" table:style-name="c1">
            <text:p>2026-04-24 20:45</text:p>
          </table:table-cell>
          <table:table-cell office:value-type="float" office:value="0.007310343" table:style-name="c1">
            <text:p>0.0073103</text:p>
          </table:table-cell>
          <table:table-cell office:value-type="float" office:value="-0.16314919836082353" table:style-name="c14">
            <text:p>-0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5 04:00</text:p>
          </table:table-cell>
          <table:table-cell office:value-type="float" office:value="0.0074067015" table:style-name="c1">
            <text:p>0.0074067</text:p>
          </table:table-cell>
          <table:table-cell office:value-type="string" table:style-name="c1">
            <text:p>2026-04-26 04:00</text:p>
          </table:table-cell>
          <table:table-cell office:value-type="float" office:value="0.007326335" table:style-name="c1">
            <text:p>0.0073263</text:p>
          </table:table-cell>
          <table:table-cell office:value-type="float" office:value="-1.2827821354080449" table:style-name="c14">
            <text:p>-1.3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15:30</text:p>
          </table:table-cell>
          <table:table-cell office:value-type="float" office:value="0.007409703" table:style-name="c1">
            <text:p>0.0074097</text:p>
          </table:table-cell>
          <table:table-cell office:value-type="string" table:style-name="c1">
            <text:p>2026-04-27 11:00</text:p>
          </table:table-cell>
          <table:table-cell office:value-type="float" office:value="0.007248374" table:style-name="c1">
            <text:p>0.0072484</text:p>
          </table:table-cell>
          <table:table-cell office:value-type="float" office:value="-2.372814397905021" table:style-name="c14">
            <text:p>-2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6:00</text:p>
          </table:table-cell>
          <table:table-cell office:value-type="float" office:value="0.0072386175" table:style-name="c1">
            <text:p>0.0072386</text:p>
          </table:table-cell>
          <table:table-cell office:value-type="string" table:style-name="c1">
            <text:p>2026-05-02 16:00</text:p>
          </table:table-cell>
          <table:table-cell office:value-type="float" office:value="0.0071694135" table:style-name="c1">
            <text:p>0.0071694</text:p>
          </table:table-cell>
          <table:table-cell office:value-type="float" office:value="-1.1540277903411722" table:style-name="c14">
            <text:p>-1.2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4:45</text:p>
          </table:table-cell>
          <table:table-cell office:value-type="float" office:value="0.007181589" table:style-name="c1">
            <text:p>0.0071816</text:p>
          </table:table-cell>
          <table:table-cell office:value-type="string" table:style-name="c1">
            <text:p>2026-05-04 04:45</text:p>
          </table:table-cell>
          <table:table-cell office:value-type="float" office:value="0.007377309500000001" table:style-name="c1">
            <text:p>0.0073773</text:p>
          </table:table-cell>
          <table:table-cell office:value-type="float" office:value="2.519961227376011" table:style-name="c13">
            <text:p>+2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6:15</text:p>
          </table:table-cell>
          <table:table-cell office:value-type="float" office:value="0.007417706999999999" table:style-name="c1">
            <text:p>0.0074177</text:p>
          </table:table-cell>
          <table:table-cell office:value-type="string" table:style-name="c1">
            <text:p>2026-05-05 06:15</text:p>
          </table:table-cell>
          <table:table-cell office:value-type="float" office:value="0.007246375000000001" table:style-name="c1">
            <text:p>0.0072464</text:p>
          </table:table-cell>
          <table:table-cell office:value-type="float" office:value="-2.5050531602960113" table:style-name="c14">
            <text:p>-2.5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1:00</text:p>
          </table:table-cell>
          <table:table-cell office:value-type="float" office:value="0.007306651499999999" table:style-name="c1">
            <text:p>0.0073067</text:p>
          </table:table-cell>
          <table:table-cell office:value-type="string" table:style-name="c1">
            <text:p>2026-05-06 11:00</text:p>
          </table:table-cell>
          <table:table-cell office:value-type="float" office:value="0.007734131000000001" table:style-name="c1">
            <text:p>0.0077341</text:p>
          </table:table-cell>
          <table:table-cell office:value-type="float" office:value="5.6389574914172735" table:style-name="c13">
            <text:p>+5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17:30</text:p>
          </table:table-cell>
          <table:table-cell office:value-type="float" office:value="0.007679838" table:style-name="c1">
            <text:p>0.0076798</text:p>
          </table:table-cell>
          <table:table-cell office:value-type="string" table:style-name="c1">
            <text:p>2026-05-07 17:30</text:p>
          </table:table-cell>
          <table:table-cell office:value-type="float" office:value="0.0076281840000000005" table:style-name="c1">
            <text:p>0.0076282</text:p>
          </table:table-cell>
          <table:table-cell office:value-type="float" office:value="-0.8711478004613915" table:style-name="c14">
            <text:p>-0.9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20:15</text:p>
          </table:table-cell>
          <table:table-cell office:value-type="float" office:value="0.007791894" table:style-name="c1">
            <text:p>0.0077919</text:p>
          </table:table-cell>
          <table:table-cell office:value-type="string" table:style-name="c1">
            <text:p>2026-05-09 20:15</text:p>
          </table:table-cell>
          <table:table-cell office:value-type="float" office:value="0.0076231865" table:style-name="c1">
            <text:p>0.0076232</text:p>
          </table:table-cell>
          <table:table-cell office:value-type="float" office:value="-2.3607386062169167" table:style-name="c14">
            <text:p>-2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00</text:p>
          </table:table-cell>
          <table:table-cell office:value-type="float" office:value="0.007909952999999999" table:style-name="c1">
            <text:p>0.00791</text:p>
          </table:table-cell>
          <table:table-cell office:value-type="string" table:style-name="c1">
            <text:p>2026-05-11 13:00</text:p>
          </table:table-cell>
          <table:table-cell office:value-type="float" office:value="0.0077881040000000006" table:style-name="c1">
            <text:p>0.0077881</text:p>
          </table:table-cell>
          <table:table-cell office:value-type="float" office:value="-1.737272268191714" table:style-name="c14">
            <text:p>-1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5 00:45</text:p>
          </table:table-cell>
          <table:table-cell office:value-type="float" office:value="0.006661329" table:style-name="c1">
            <text:p>0.0066613</text:p>
          </table:table-cell>
          <table:table-cell office:value-type="string" table:style-name="c1">
            <text:p>2026-05-25 02:00</text:p>
          </table:table-cell>
          <table:table-cell office:value-type="float" office:value="0.006602697" table:style-name="c1">
            <text:p>0.0066027</text:p>
          </table:table-cell>
          <table:table-cell office:value-type="float" office:value="-1.0783252306408975" table:style-name="c14">
            <text:p>-1.1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04:15</text:p>
          </table:table-cell>
          <table:table-cell office:value-type="float" office:value="0.0066763364999999995" table:style-name="c1">
            <text:p>0.0066763</text:p>
          </table:table-cell>
          <table:table-cell office:value-type="string" table:style-name="c1">
            <text:p>2026-05-26 07:00</text:p>
          </table:table-cell>
          <table:table-cell office:value-type="float" office:value="0.006584706" table:style-name="c1">
            <text:p>0.0065847</text:p>
          </table:table-cell>
          <table:table-cell office:value-type="float" office:value="-1.5696232101842011" table:style-name="c14">
            <text:p>-1.6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7:00</text:p>
          </table:table-cell>
          <table:table-cell office:value-type="float" office:value="0.0062831399999999996" table:style-name="c1">
            <text:p>0.0062831</text:p>
          </table:table-cell>
          <table:table-cell office:value-type="string" table:style-name="c1">
            <text:p>2026-05-31 07:00</text:p>
          </table:table-cell>
          <table:table-cell office:value-type="float" office:value="0.006142927000000001" table:style-name="c1">
            <text:p>0.0061429</text:p>
          </table:table-cell>
          <table:table-cell office:value-type="float" office:value="-2.4270143761399354" table:style-name="c14">
            <text:p>-2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05 20:30</text:p>
          </table:table-cell>
          <table:table-cell office:value-type="float" office:value="0.1582791" table:style-name="c10">
            <text:p>0.15828</text:p>
          </table:table-cell>
          <table:table-cell office:value-type="string" table:style-name="c10">
            <text:p>2026-03-06 16:00</text:p>
          </table:table-cell>
          <table:table-cell office:value-type="float" office:value="0.15182405000000002" table:style-name="c10">
            <text:p>0.15182</text:p>
          </table:table-cell>
          <table:table-cell office:value-type="float" office:value="-4.270018136285825" table:style-name="c11">
            <text:p>-4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0 03:00</text:p>
          </table:table-cell>
          <table:table-cell office:value-type="float" office:value="0.15417704999999998" table:style-name="c10">
            <text:p>0.15418</text:p>
          </table:table-cell>
          <table:table-cell office:value-type="string" table:style-name="c10">
            <text:p>2026-03-11 03:00</text:p>
          </table:table-cell>
          <table:table-cell office:value-type="float" office:value="0.15672160000000002" table:style-name="c10">
            <text:p>0.15672</text:p>
          </table:table-cell>
          <table:table-cell office:value-type="float" office:value="1.4472085966102055" table:style-name="c12">
            <text:p>+1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2 08:00</text:p>
          </table:table-cell>
          <table:table-cell office:value-type="float" office:value="0.15857925" table:style-name="c10">
            <text:p>0.15858</text:p>
          </table:table-cell>
          <table:table-cell office:value-type="string" table:style-name="c10">
            <text:p>2026-03-13 08:00</text:p>
          </table:table-cell>
          <table:table-cell office:value-type="float" office:value="0.16241875" table:style-name="c10">
            <text:p>0.16242</text:p>
          </table:table-cell>
          <table:table-cell office:value-type="float" office:value="2.216446930320326" table:style-name="c12">
            <text:p>+2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3 13:00</text:p>
          </table:table-cell>
          <table:table-cell office:value-type="float" office:value="0.16668329999999998" table:style-name="c10">
            <text:p>0.16668</text:p>
          </table:table-cell>
          <table:table-cell office:value-type="string" table:style-name="c10">
            <text:p>2026-03-14 13:00</text:p>
          </table:table-cell>
          <table:table-cell office:value-type="float" office:value="0.1635182" table:style-name="c10">
            <text:p>0.16352</text:p>
          </table:table-cell>
          <table:table-cell office:value-type="float" office:value="-2.09497465060986" table:style-name="c11">
            <text:p>-2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5 02:15</text:p>
          </table:table-cell>
          <table:table-cell office:value-type="float" office:value="0.1676838" table:style-name="c10">
            <text:p>0.16768</text:p>
          </table:table-cell>
          <table:table-cell office:value-type="string" table:style-name="c10">
            <text:p>2026-03-16 02:15</text:p>
          </table:table-cell>
          <table:table-cell office:value-type="float" office:value="0.1677161" table:style-name="c10">
            <text:p>0.16772</text:p>
          </table:table-cell>
          <table:table-cell office:value-type="float" office:value="-0.18067606047811324" table:style-name="c11">
            <text:p>-0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6 12:45</text:p>
          </table:table-cell>
          <table:table-cell office:value-type="float" office:value="0.17278634999999998" table:style-name="c10">
            <text:p>0.17279</text:p>
          </table:table-cell>
          <table:table-cell office:value-type="string" table:style-name="c10">
            <text:p>2026-03-17 12:45</text:p>
          </table:table-cell>
          <table:table-cell office:value-type="float" office:value="0.17271360000000002" table:style-name="c10">
            <text:p>0.17271</text:p>
          </table:table-cell>
          <table:table-cell office:value-type="float" office:value="-0.24191985443291486" table:style-name="c11">
            <text:p>-0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18 03:30</text:p>
          </table:table-cell>
          <table:table-cell office:value-type="float" office:value="0.17738865" table:style-name="c10">
            <text:p>0.17739</text:p>
          </table:table-cell>
          <table:table-cell office:value-type="string" table:style-name="c10">
            <text:p>2026-03-18 15:00</text:p>
          </table:table-cell>
          <table:table-cell office:value-type="float" office:value="0.16611689999999998" table:style-name="c10">
            <text:p>0.16612</text:p>
          </table:table-cell>
          <table:table-cell office:value-type="float" office:value="-6.541465693041815" table:style-name="c11">
            <text:p>-6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3 21:00</text:p>
          </table:table-cell>
          <table:table-cell office:value-type="float" office:value="0.16678334999999997" table:style-name="c10">
            <text:p>0.16678</text:p>
          </table:table-cell>
          <table:table-cell office:value-type="string" table:style-name="c10">
            <text:p>2026-03-24 21:00</text:p>
          </table:table-cell>
          <table:table-cell office:value-type="float" office:value="0.17001495" table:style-name="c10">
            <text:p>0.17001</text:p>
          </table:table-cell>
          <table:table-cell office:value-type="float" office:value="1.7338302144369155" table:style-name="c12">
            <text:p>+1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4 23:30</text:p>
          </table:table-cell>
          <table:table-cell office:value-type="float" office:value="0.17498745" table:style-name="c10">
            <text:p>0.17499</text:p>
          </table:table-cell>
          <table:table-cell office:value-type="string" table:style-name="c10">
            <text:p>2026-03-25 23:30</text:p>
          </table:table-cell>
          <table:table-cell office:value-type="float" office:value="0.17761115" table:style-name="c10">
            <text:p>0.17761</text:p>
          </table:table-cell>
          <table:table-cell office:value-type="float" office:value="1.2964674387506037" table:style-name="c12">
            <text:p>+1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26 14:15</text:p>
          </table:table-cell>
          <table:table-cell office:value-type="float" office:value="0.1754877" table:style-name="c10">
            <text:p>0.17549</text:p>
          </table:table-cell>
          <table:table-cell office:value-type="string" table:style-name="c10">
            <text:p>2026-03-27 12:00</text:p>
          </table:table-cell>
          <table:table-cell office:value-type="float" office:value="0.16881555" table:style-name="c10">
            <text:p>0.16882</text:p>
          </table:table-cell>
          <table:table-cell office:value-type="float" office:value="-3.9943610204304925" table:style-name="c11">
            <text:p>-4.0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3-31 01:45</text:p>
          </table:table-cell>
          <table:table-cell office:value-type="float" office:value="0.16958475" table:style-name="c10">
            <text:p>0.16958</text:p>
          </table:table-cell>
          <table:table-cell office:value-type="string" table:style-name="c10">
            <text:p>2026-03-31 10:00</text:p>
          </table:table-cell>
          <table:table-cell office:value-type="float" office:value="0.16501745" table:style-name="c10">
            <text:p>0.16502</text:p>
          </table:table-cell>
          <table:table-cell office:value-type="float" office:value="-2.8877419004657012" table:style-name="c11">
            <text:p>-2.9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01 06:15</text:p>
          </table:table-cell>
          <table:table-cell office:value-type="float" office:value="0.172086" table:style-name="c10">
            <text:p>0.17209</text:p>
          </table:table-cell>
          <table:table-cell office:value-type="string" table:style-name="c10">
            <text:p>2026-04-02 05:00</text:p>
          </table:table-cell>
          <table:table-cell office:value-type="float" office:value="0.16301845" table:style-name="c10">
            <text:p>0.16302</text:p>
          </table:table-cell>
          <table:table-cell office:value-type="float" office:value="-5.458563672553252" table:style-name="c11">
            <text:p>-5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3 22:30</text:p>
          </table:table-cell>
          <table:table-cell office:value-type="float" office:value="0.1554777" table:style-name="c10">
            <text:p>0.15548</text:p>
          </table:table-cell>
          <table:table-cell office:value-type="string" table:style-name="c10">
            <text:p>2026-04-14 22:30</text:p>
          </table:table-cell>
          <table:table-cell office:value-type="float" office:value="0.1541229" table:style-name="c10">
            <text:p>0.15412</text:p>
          </table:table-cell>
          <table:table-cell office:value-type="float" office:value="-1.069537095737827" table:style-name="c11">
            <text:p>-1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5 02:15</text:p>
          </table:table-cell>
          <table:table-cell office:value-type="float" office:value="0.1572786" table:style-name="c10">
            <text:p>0.15728</text:p>
          </table:table-cell>
          <table:table-cell office:value-type="string" table:style-name="c10">
            <text:p>2026-04-16 02:15</text:p>
          </table:table-cell>
          <table:table-cell office:value-type="float" office:value="0.15842075" table:style-name="c10">
            <text:p>0.15842</text:p>
          </table:table-cell>
          <table:table-cell office:value-type="float" office:value="0.5248437618023072" table:style-name="c12">
            <text:p>+0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6 02:45</text:p>
          </table:table-cell>
          <table:table-cell office:value-type="float" office:value="0.16008" table:style-name="c10">
            <text:p>0.16008</text:p>
          </table:table-cell>
          <table:table-cell office:value-type="string" table:style-name="c10">
            <text:p>2026-04-17 02:45</text:p>
          </table:table-cell>
          <table:table-cell office:value-type="float" office:value="0.16631680000000001" table:style-name="c10">
            <text:p>0.16632</text:p>
          </table:table-cell>
          <table:table-cell office:value-type="float" office:value="3.688363766116942" table:style-name="c12">
            <text:p>+3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7 08:00</text:p>
          </table:table-cell>
          <table:table-cell office:value-type="float" office:value="0.16728359999999998" table:style-name="c10">
            <text:p>0.16728</text:p>
          </table:table-cell>
          <table:table-cell office:value-type="string" table:style-name="c10">
            <text:p>2026-04-18 08:00</text:p>
          </table:table-cell>
          <table:table-cell office:value-type="float" office:value="0.17501245" table:style-name="c10">
            <text:p>0.17501</text:p>
          </table:table-cell>
          <table:table-cell office:value-type="float" office:value="4.41107204319493" table:style-name="c12">
            <text:p>+4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19 11:45</text:p>
          </table:table-cell>
          <table:table-cell office:value-type="float" office:value="0.17028509999999997" table:style-name="c10">
            <text:p>0.17029</text:p>
          </table:table-cell>
          <table:table-cell office:value-type="string" table:style-name="c10">
            <text:p>2026-04-20 01:00</text:p>
          </table:table-cell>
          <table:table-cell office:value-type="float" office:value="0.16811589999999998" table:style-name="c10">
            <text:p>0.16812</text:p>
          </table:table-cell>
          <table:table-cell office:value-type="float" office:value="-1.4712172022684267" table:style-name="c11">
            <text:p>-1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0 18:00</text:p>
          </table:table-cell>
          <table:table-cell office:value-type="float" office:value="0.1726863" table:style-name="c10">
            <text:p>0.17269</text:p>
          </table:table-cell>
          <table:table-cell office:value-type="string" table:style-name="c10">
            <text:p>2026-04-21 18:00</text:p>
          </table:table-cell>
          <table:table-cell office:value-type="float" office:value="0.17861065" table:style-name="c10">
            <text:p>0.17861</text:p>
          </table:table-cell>
          <table:table-cell office:value-type="float" office:value="3.223942669829638" table:style-name="c12">
            <text:p>+3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2 05:30</text:p>
          </table:table-cell>
          <table:table-cell office:value-type="float" office:value="0.1812906" table:style-name="c10">
            <text:p>0.18129</text:p>
          </table:table-cell>
          <table:table-cell office:value-type="string" table:style-name="c10">
            <text:p>2026-04-23 05:30</text:p>
          </table:table-cell>
          <table:table-cell office:value-type="float" office:value="0.17601195000000003" table:style-name="c10">
            <text:p>0.17601</text:p>
          </table:table-cell>
          <table:table-cell office:value-type="float" office:value="-3.105785897365876" table:style-name="c11">
            <text:p>-3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4-23 06:30</text:p>
          </table:table-cell>
          <table:table-cell office:value-type="float" office:value="0.17778885" table:style-name="c10">
            <text:p>0.17779</text:p>
          </table:table-cell>
          <table:table-cell office:value-type="string" table:style-name="c10">
            <text:p>2026-04-23 21:00</text:p>
          </table:table-cell>
          <table:table-cell office:value-type="float" office:value="0.1755122" table:style-name="c10">
            <text:p>0.17551</text:p>
          </table:table-cell>
          <table:table-cell office:value-type="float" office:value="-1.4778760804178614" table:style-name="c11">
            <text:p>-1.5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5 12:45</text:p>
          </table:table-cell>
          <table:table-cell office:value-type="float" office:value="0.1604802" table:style-name="c10">
            <text:p>0.16048</text:p>
          </table:table-cell>
          <table:table-cell office:value-type="string" table:style-name="c10">
            <text:p>2026-05-06 12:45</text:p>
          </table:table-cell>
          <table:table-cell office:value-type="float" office:value="0.16501745" table:style-name="c10">
            <text:p>0.16502</text:p>
          </table:table-cell>
          <table:table-cell office:value-type="float" office:value="2.6217440640340817" table:style-name="c12">
            <text:p>+2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6 21:45</text:p>
          </table:table-cell>
          <table:table-cell office:value-type="float" office:value="0.1624812" table:style-name="c10">
            <text:p>0.16248</text:p>
          </table:table-cell>
          <table:table-cell office:value-type="string" table:style-name="c10">
            <text:p>2026-05-07 18:00</text:p>
          </table:table-cell>
          <table:table-cell office:value-type="float" office:value="0.15912040000000002" table:style-name="c10">
            <text:p>0.15912</text:p>
          </table:table-cell>
          <table:table-cell office:value-type="float" office:value="-2.2641891367124023" table:style-name="c11">
            <text:p>-2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08 18:00</text:p>
          </table:table-cell>
          <table:table-cell office:value-type="float" office:value="0.1638819" table:style-name="c10">
            <text:p>0.16388</text:p>
          </table:table-cell>
          <table:table-cell office:value-type="string" table:style-name="c10">
            <text:p>2026-05-09 18:00</text:p>
          </table:table-cell>
          <table:table-cell office:value-type="float" office:value="0.16231879999999999" table:style-name="c10">
            <text:p>0.16232</text:p>
          </table:table-cell>
          <table:table-cell office:value-type="float" office:value="-1.1517899665551945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10 16:00</text:p>
          </table:table-cell>
          <table:table-cell office:value-type="float" office:value="0.16778384999999998" table:style-name="c10">
            <text:p>0.16778</text:p>
          </table:table-cell>
          <table:table-cell office:value-type="string" table:style-name="c10">
            <text:p>2026-05-11 16:00</text:p>
          </table:table-cell>
          <table:table-cell office:value-type="float" office:value="0.16921535000000001" table:style-name="c10">
            <text:p>0.16922</text:p>
          </table:table-cell>
          <table:table-cell office:value-type="float" office:value="0.6515755332530793" table:style-name="c12">
            <text:p>+0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1 18:15</text:p>
          </table:table-cell>
          <table:table-cell office:value-type="float" office:value="0.1482741" table:style-name="c10">
            <text:p>0.14827</text:p>
          </table:table-cell>
          <table:table-cell office:value-type="string" table:style-name="c10">
            <text:p>2026-05-22 18:15</text:p>
          </table:table-cell>
          <table:table-cell office:value-type="float" office:value="0.1465267" table:style-name="c10">
            <text:p>0.14653</text:p>
          </table:table-cell>
          <table:table-cell office:value-type="float" office:value="-1.3760372669940235" table:style-name="c11">
            <text:p>-1.4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5 07:00</text:p>
          </table:table-cell>
          <table:table-cell office:value-type="float" office:value="0.1506753" table:style-name="c10">
            <text:p>0.15068</text:p>
          </table:table-cell>
          <table:table-cell office:value-type="string" table:style-name="c10">
            <text:p>2026-05-26 07:00</text:p>
          </table:table-cell>
          <table:table-cell office:value-type="float" office:value="0.14922535" table:style-name="c10">
            <text:p>0.14923</text:p>
          </table:table-cell>
          <table:table-cell office:value-type="float" office:value="-1.1602774141813654" table:style-name="c11">
            <text:p>-1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6 11:00</text:p>
          </table:table-cell>
          <table:table-cell office:value-type="float" office:value="0.1504752" table:style-name="c10">
            <text:p>0.15048</text:p>
          </table:table-cell>
          <table:table-cell office:value-type="string" table:style-name="c10">
            <text:p>2026-05-26 23:00</text:p>
          </table:table-cell>
          <table:table-cell office:value-type="float" office:value="0.14762615" table:style-name="c10">
            <text:p>0.14763</text:p>
          </table:table-cell>
          <table:table-cell office:value-type="float" office:value="-2.089483631754596" table:style-name="c11">
            <text:p>-2.1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7 14:00</text:p>
          </table:table-cell>
          <table:table-cell office:value-type="float" office:value="0.15157574999999998" table:style-name="c10">
            <text:p>0.15158</text:p>
          </table:table-cell>
          <table:table-cell office:value-type="string" table:style-name="c10">
            <text:p>2026-05-28 14:00</text:p>
          </table:table-cell>
          <table:table-cell office:value-type="float" office:value="0.19770110000000002" table:style-name="c10">
            <text:p>0.1977</text:p>
          </table:table-cell>
          <table:table-cell office:value-type="float" office:value="30.1698296073746" table:style-name="c12">
            <text:p>+30.2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8 17:15</text:p>
          </table:table-cell>
          <table:table-cell office:value-type="float" office:value="0.21220605" table:style-name="c10">
            <text:p>0.21221</text:p>
          </table:table-cell>
          <table:table-cell office:value-type="string" table:style-name="c10">
            <text:p>2026-05-29 17:15</text:p>
          </table:table-cell>
          <table:table-cell office:value-type="float" office:value="0.21199395000000001" table:style-name="c10">
            <text:p>0.21199</text:p>
          </table:table-cell>
          <table:table-cell office:value-type="float" office:value="-0.2996502248875599" table:style-name="c11">
            <text:p>-0.3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29 19:45</text:p>
          </table:table-cell>
          <table:table-cell office:value-type="float" office:value="0.23581784999999997" table:style-name="c10">
            <text:p>0.23582</text:p>
          </table:table-cell>
          <table:table-cell office:value-type="string" table:style-name="c10">
            <text:p>2026-05-30 19:45</text:p>
          </table:table-cell>
          <table:table-cell office:value-type="float" office:value="0.24717635000000002" table:style-name="c10">
            <text:p>0.24718</text:p>
          </table:table-cell>
          <table:table-cell office:value-type="float" office:value="4.607112852716666" table:style-name="c12">
            <text:p>+4.6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5-31 02:45</text:p>
          </table:table-cell>
          <table:table-cell office:value-type="float" office:value="0.24192089999999997" table:style-name="c10">
            <text:p>0.24192</text:p>
          </table:table-cell>
          <table:table-cell office:value-type="string" table:style-name="c10">
            <text:p>2026-06-01 02:45</text:p>
          </table:table-cell>
          <table:table-cell office:value-type="float" office:value="0.27076455" table:style-name="c10">
            <text:p>0.27076</text:p>
          </table:table-cell>
          <table:table-cell office:value-type="float" office:value="11.699027105367922" table:style-name="c12">
            <text:p>+11.7</text:p>
          </table:table-cell>
        </table:table-row>
        <table:table-row>
          <table:table-cell office:value-type="string" table:style-name="c9">
            <text:p>XLM/USDT</text:p>
          </table:table-cell>
          <table:table-cell office:value-type="string" table:style-name="c10">
            <text:p>LONG</text:p>
          </table:table-cell>
          <table:table-cell office:value-type="string" table:style-name="c10">
            <text:p>2026-06-01 11:30</text:p>
          </table:table-cell>
          <table:table-cell office:value-type="float" office:value="0.26383185" table:style-name="c10">
            <text:p>0.26383</text:p>
          </table:table-cell>
          <table:table-cell office:value-type="string" table:style-name="c10">
            <text:p>2026-06-02 04:00</text:p>
          </table:table-cell>
          <table:table-cell office:value-type="float" office:value="0.23568210000000003" table:style-name="c10">
            <text:p>0.23568</text:p>
          </table:table-cell>
          <table:table-cell office:value-type="float" office:value="-10.848151395633232" table:style-name="c11">
            <text:p>-10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05 11:00</text:p>
          </table:table-cell>
          <table:table-cell office:value-type="float" office:value="1.44862395" table:style-name="c1">
            <text:p>1.4486</text:p>
          </table:table-cell>
          <table:table-cell office:value-type="string" table:style-name="c1">
            <text:p>2026-03-06 11:00</text:p>
          </table:table-cell>
          <table:table-cell office:value-type="float" office:value="1.4022985000000001" table:style-name="c1">
            <text:p>1.4023</text:p>
          </table:table-cell>
          <table:table-cell office:value-type="float" office:value="-3.3914008325970246" table:style-name="c14">
            <text:p>-3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08:45</text:p>
          </table:table-cell>
          <table:table-cell office:value-type="float" office:value="1.40800365" table:style-name="c1">
            <text:p>1.408</text:p>
          </table:table-cell>
          <table:table-cell office:value-type="string" table:style-name="c1">
            <text:p>2026-03-11 08:45</text:p>
          </table:table-cell>
          <table:table-cell office:value-type="float" office:value="1.3759117" table:style-name="c1">
            <text:p>1.3759</text:p>
          </table:table-cell>
          <table:table-cell office:value-type="float" office:value="-2.4745956793719825" table:style-name="c14">
            <text:p>-2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1 13:45</text:p>
          </table:table-cell>
          <table:table-cell office:value-type="float" office:value="1.3992993" table:style-name="c1">
            <text:p>1.3993</text:p>
          </table:table-cell>
          <table:table-cell office:value-type="string" table:style-name="c1">
            <text:p>2026-03-12 13:45</text:p>
          </table:table-cell>
          <table:table-cell office:value-type="float" office:value="1.38480725" table:style-name="c1">
            <text:p>1.3848</text:p>
          </table:table-cell>
          <table:table-cell office:value-type="float" office:value="-1.2334944849004215" table:style-name="c14">
            <text:p>-1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3 06:00</text:p>
          </table:table-cell>
          <table:table-cell office:value-type="float" office:value="1.4241116999999999" table:style-name="c1">
            <text:p>1.4241</text:p>
          </table:table-cell>
          <table:table-cell office:value-type="string" table:style-name="c1">
            <text:p>2026-03-14 06:00</text:p>
          </table:table-cell>
          <table:table-cell office:value-type="float" office:value="1.39460235" table:style-name="c1">
            <text:p>1.3946</text:p>
          </table:table-cell>
          <table:table-cell office:value-type="float" office:value="-2.26788110073457" table:style-name="c14">
            <text:p>-2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5 02:15</text:p>
          </table:table-cell>
          <table:table-cell office:value-type="float" office:value="1.4160076499999998" table:style-name="c1">
            <text:p>1.416</text:p>
          </table:table-cell>
          <table:table-cell office:value-type="string" table:style-name="c1">
            <text:p>2026-03-16 02:15</text:p>
          </table:table-cell>
          <table:table-cell office:value-type="float" office:value="1.44237845" table:style-name="c1">
            <text:p>1.4424</text:p>
          </table:table-cell>
          <table:table-cell office:value-type="float" office:value="1.65871176461867" table:style-name="c13">
            <text:p>+1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.4711351999999998" table:style-name="c1">
            <text:p>1.4711</text:p>
          </table:table-cell>
          <table:table-cell office:value-type="string" table:style-name="c1">
            <text:p>2026-03-17 03:45</text:p>
          </table:table-cell>
          <table:table-cell office:value-type="float" office:value="1.54292815" table:style-name="c1">
            <text:p>1.5429</text:p>
          </table:table-cell>
          <table:table-cell office:value-type="float" office:value="4.6704501821552835" table:style-name="c13">
            <text:p>+4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4 07:30</text:p>
          </table:table-cell>
          <table:table-cell office:value-type="float" office:value="1.4230111499999998" table:style-name="c1">
            <text:p>1.423</text:p>
          </table:table-cell>
          <table:table-cell office:value-type="string" table:style-name="c1">
            <text:p>2026-03-24 18:00</text:p>
          </table:table-cell>
          <table:table-cell office:value-type="float" office:value="1.3877058000000002" table:style-name="c1">
            <text:p>1.3877</text:p>
          </table:table-cell>
          <table:table-cell office:value-type="float" office:value="-2.6759715757813773" table:style-name="c14">
            <text:p>-2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25 05:30</text:p>
          </table:table-cell>
          <table:table-cell office:value-type="float" office:value="1.4221107" table:style-name="c1">
            <text:p>1.4221</text:p>
          </table:table-cell>
          <table:table-cell office:value-type="string" table:style-name="c1">
            <text:p>2026-03-26 05:30</text:p>
          </table:table-cell>
          <table:table-cell office:value-type="float" office:value="1.39540195" table:style-name="c1">
            <text:p>1.3954</text:p>
          </table:table-cell>
          <table:table-cell office:value-type="float" office:value="-2.0742519199138276" table:style-name="c14">
            <text:p>-2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2:15</text:p>
          </table:table-cell>
          <table:table-cell office:value-type="float" office:value="1.3448721" table:style-name="c1">
            <text:p>1.3449</text:p>
          </table:table-cell>
          <table:table-cell office:value-type="string" table:style-name="c1">
            <text:p>2026-04-07 02:15</text:p>
          </table:table-cell>
          <table:table-cell office:value-type="float" office:value="1.3151421" table:style-name="c1">
            <text:p>1.3151</text:p>
          </table:table-cell>
          <table:table-cell office:value-type="float" office:value="-2.406100108545639" table:style-name="c14">
            <text:p>-2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09:00</text:p>
          </table:table-cell>
          <table:table-cell office:value-type="float" office:value="1.3202598" table:style-name="c1">
            <text:p>1.3203</text:p>
          </table:table-cell>
          <table:table-cell office:value-type="string" table:style-name="c1">
            <text:p>2026-04-07 11:00</text:p>
          </table:table-cell>
          <table:table-cell office:value-type="float" office:value="1.30664635" table:style-name="c1">
            <text:p>1.3066</text:p>
          </table:table-cell>
          <table:table-cell office:value-type="float" office:value="-1.2289578197904771" table:style-name="c14">
            <text:p>-1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7 23:00</text:p>
          </table:table-cell>
          <table:table-cell office:value-type="float" office:value="1.3742868" table:style-name="c1">
            <text:p>1.3743</text:p>
          </table:table-cell>
          <table:table-cell office:value-type="string" table:style-name="c1">
            <text:p>2026-04-08 23:00</text:p>
          </table:table-cell>
          <table:table-cell office:value-type="float" office:value="1.3439277" table:style-name="c1">
            <text:p>1.3439</text:p>
          </table:table-cell>
          <table:table-cell office:value-type="float" office:value="-2.4045644236923347" table:style-name="c14">
            <text:p>-2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1 18:45</text:p>
          </table:table-cell>
          <table:table-cell office:value-type="float" office:value="1.364682" table:style-name="c1">
            <text:p>1.3647</text:p>
          </table:table-cell>
          <table:table-cell office:value-type="string" table:style-name="c1">
            <text:p>2026-04-12 05:00</text:p>
          </table:table-cell>
          <table:table-cell office:value-type="float" office:value="1.3272360500000002" table:style-name="c1">
            <text:p>1.3272</text:p>
          </table:table-cell>
          <table:table-cell office:value-type="float" office:value="-2.938347165416544" table:style-name="c14">
            <text:p>-2.9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1.3722857999999998" table:style-name="c1">
            <text:p>1.3723</text:p>
          </table:table-cell>
          <table:table-cell office:value-type="string" table:style-name="c1">
            <text:p>2026-04-14 22:30</text:p>
          </table:table-cell>
          <table:table-cell office:value-type="float" office:value="1.3609192" table:style-name="c1">
            <text:p>1.3609</text:p>
          </table:table-cell>
          <table:table-cell office:value-type="float" office:value="-1.0265410806407638" table:style-name="c14">
            <text:p>-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00</text:p>
          </table:table-cell>
          <table:table-cell office:value-type="float" office:value="1.3641817499999997" table:style-name="c1">
            <text:p>1.3642</text:p>
          </table:table-cell>
          <table:table-cell office:value-type="string" table:style-name="c1">
            <text:p>2026-04-16 12:00</text:p>
          </table:table-cell>
          <table:table-cell office:value-type="float" office:value="1.40879525" table:style-name="c1">
            <text:p>1.4088</text:p>
          </table:table-cell>
          <table:table-cell office:value-type="float" office:value="3.0639112636751342" table:style-name="c13">
            <text:p>+3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5:15</text:p>
          </table:table-cell>
          <table:table-cell office:value-type="float" office:value="1.4235114" table:style-name="c1">
            <text:p>1.4235</text:p>
          </table:table-cell>
          <table:table-cell office:value-type="string" table:style-name="c1">
            <text:p>2026-04-17 15:15</text:p>
          </table:table-cell>
          <table:table-cell office:value-type="float" office:value="1.495252" table:style-name="c1">
            <text:p>1.4953</text:p>
          </table:table-cell>
          <table:table-cell office:value-type="float" office:value="4.829718346618095" table:style-name="c13">
            <text:p>+4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1 07:00</text:p>
          </table:table-cell>
          <table:table-cell office:value-type="float" office:value="1.4377185" table:style-name="c1">
            <text:p>1.4377</text:p>
          </table:table-cell>
          <table:table-cell office:value-type="string" table:style-name="c1">
            <text:p>2026-04-22 07:00</text:p>
          </table:table-cell>
          <table:table-cell office:value-type="float" office:value="1.4558716999999999" table:style-name="c1">
            <text:p>1.4559</text:p>
          </table:table-cell>
          <table:table-cell office:value-type="float" office:value="1.0602153670346448" table:style-name="c13">
            <text:p>+1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6 22:15</text:p>
          </table:table-cell>
          <table:table-cell office:value-type="float" office:value="1.43161545" table:style-name="c1">
            <text:p>1.4316</text:p>
          </table:table-cell>
          <table:table-cell office:value-type="string" table:style-name="c1">
            <text:p>2026-04-27 11:00</text:p>
          </table:table-cell>
          <table:table-cell office:value-type="float" office:value="1.4144924" table:style-name="c1">
            <text:p>1.4145</text:p>
          </table:table-cell>
          <table:table-cell office:value-type="float" office:value="-1.3935739732062968" table:style-name="c14">
            <text:p>-1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1 13:15</text:p>
          </table:table-cell>
          <table:table-cell office:value-type="float" office:value="1.3898945999999999" table:style-name="c1">
            <text:p>1.3899</text:p>
          </table:table-cell>
          <table:table-cell office:value-type="string" table:style-name="c1">
            <text:p>2026-05-02 13:15</text:p>
          </table:table-cell>
          <table:table-cell office:value-type="float" office:value="1.389305" table:style-name="c1">
            <text:p>1.3893</text:p>
          </table:table-cell>
          <table:table-cell office:value-type="float" office:value="-0.2422356842741724" table:style-name="c14">
            <text:p>-0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22:15</text:p>
          </table:table-cell>
          <table:table-cell office:value-type="float" office:value="1.4023008" table:style-name="c1">
            <text:p>1.4023</text:p>
          </table:table-cell>
          <table:table-cell office:value-type="string" table:style-name="c1">
            <text:p>2026-05-04 22:15</text:p>
          </table:table-cell>
          <table:table-cell office:value-type="float" office:value="1.4001995500000002" table:style-name="c1">
            <text:p>1.4002</text:p>
          </table:table-cell>
          <table:table-cell office:value-type="float" office:value="-0.349443493182755" table:style-name="c14">
            <text:p>-0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5 13:15</text:p>
          </table:table-cell>
          <table:table-cell office:value-type="float" office:value="1.4187089999999998" table:style-name="c1">
            <text:p>1.4187</text:p>
          </table:table-cell>
          <table:table-cell office:value-type="string" table:style-name="c1">
            <text:p>2026-05-06 13:15</text:p>
          </table:table-cell>
          <table:table-cell office:value-type="float" office:value="1.4354819" table:style-name="c1">
            <text:p>1.4355</text:p>
          </table:table-cell>
          <table:table-cell office:value-type="float" office:value="0.9800016551597457" table:style-name="c13">
            <text:p>+1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7 07:15</text:p>
          </table:table-cell>
          <table:table-cell office:value-type="float" office:value="1.4195094" table:style-name="c1">
            <text:p>1.4195</text:p>
          </table:table-cell>
          <table:table-cell office:value-type="string" table:style-name="c1">
            <text:p>2026-05-07 15:00</text:p>
          </table:table-cell>
          <table:table-cell office:value-type="float" office:value="1.3927033" table:style-name="c1">
            <text:p>1.3927</text:p>
          </table:table-cell>
          <table:table-cell office:value-type="float" office:value="-2.084531028586345" table:style-name="c14">
            <text:p>-2.1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1:15</text:p>
          </table:table-cell>
          <table:table-cell office:value-type="float" office:value="1.4293143" table:style-name="c1">
            <text:p>1.4293</text:p>
          </table:table-cell>
          <table:table-cell office:value-type="string" table:style-name="c1">
            <text:p>2026-05-10 01:15</text:p>
          </table:table-cell>
          <table:table-cell office:value-type="float" office:value="1.4146923" table:style-name="c1">
            <text:p>1.4147</text:p>
          </table:table-cell>
          <table:table-cell office:value-type="float" office:value="-1.220863032553432" table:style-name="c14">
            <text:p>-1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5:45</text:p>
          </table:table-cell>
          <table:table-cell office:value-type="float" office:value="1.44362145" table:style-name="c1">
            <text:p>1.4436</text:p>
          </table:table-cell>
          <table:table-cell office:value-type="string" table:style-name="c1">
            <text:p>2026-05-11 15:45</text:p>
          </table:table-cell>
          <table:table-cell office:value-type="float" office:value="1.4834579" table:style-name="c1">
            <text:p>1.4835</text:p>
          </table:table-cell>
          <table:table-cell office:value-type="float" office:value="2.5540641321102786" table:style-name="c13">
            <text:p>+2.6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4 15:00</text:p>
          </table:table-cell>
          <table:table-cell office:value-type="float" office:value="1.4717355" table:style-name="c1">
            <text:p>1.4717</text:p>
          </table:table-cell>
          <table:table-cell office:value-type="string" table:style-name="c1">
            <text:p>2026-05-15 15:00</text:p>
          </table:table-cell>
          <table:table-cell office:value-type="float" office:value="1.43858035" table:style-name="c1">
            <text:p>1.4386</text:p>
          </table:table-cell>
          <table:table-cell office:value-type="float" office:value="-2.4481893736782223" table:style-name="c14">
            <text:p>-2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1 08:30</text:p>
          </table:table-cell>
          <table:table-cell office:value-type="float" office:value="1.3839916499999998" table:style-name="c1">
            <text:p>1.384</text:p>
          </table:table-cell>
          <table:table-cell office:value-type="string" table:style-name="c1">
            <text:p>2026-05-21 12:00</text:p>
          </table:table-cell>
          <table:table-cell office:value-type="float" office:value="1.36301815" table:style-name="c1">
            <text:p>1.363</text:p>
          </table:table-cell>
          <table:table-cell office:value-type="float" office:value="-1.712306088107518" table:style-name="c14">
            <text:p>-1.7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4 23:45</text:p>
          </table:table-cell>
          <table:table-cell office:value-type="float" office:value="1.3543768499999997" table:style-name="c1">
            <text:p>1.3544</text:p>
          </table:table-cell>
          <table:table-cell office:value-type="string" table:style-name="c1">
            <text:p>2026-05-25 23:45</text:p>
          </table:table-cell>
          <table:table-cell office:value-type="float" office:value="1.34982475" table:style-name="c1">
            <text:p>1.3498</text:p>
          </table:table-cell>
          <table:table-cell office:value-type="float" office:value="-0.5353310398985012" table:style-name="c14">
            <text:p>-0.5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1:15</text:p>
          </table:table-cell>
          <table:table-cell office:value-type="float" office:value="1.3560777" table:style-name="c1">
            <text:p>1.3561</text:p>
          </table:table-cell>
          <table:table-cell office:value-type="string" table:style-name="c1">
            <text:p>2026-05-31 01:15</text:p>
          </table:table-cell>
          <table:table-cell office:value-type="float" office:value="1.3413290000000002" table:style-name="c1">
            <text:p>1.3413</text:p>
          </table:table-cell>
          <table:table-cell office:value-type="float" office:value="-1.2853258092069164" table:style-name="c14">
            <text:p>-1.3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9:45</text:p>
          </table:table-cell>
          <table:table-cell office:value-type="float" office:value="1.3421707499999997" table:style-name="c1">
            <text:p>1.3422</text:p>
          </table:table-cell>
          <table:table-cell office:value-type="string" table:style-name="c1">
            <text:p>2026-06-01 05:00</text:p>
          </table:table-cell>
          <table:table-cell office:value-type="float" office:value="1.32163885" table:style-name="c1">
            <text:p>1.3216</text:p>
          </table:table-cell>
          <table:table-cell office:value-type="float" office:value="-1.7265952235324566" table:style-name="c14">
            <text:p>-1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