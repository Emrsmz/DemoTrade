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8" style:family="table-cell" style:display-name="c8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9" style:family="table-cell" style:display-name="c9">
      <style:table-cell-properties fo:border="0.5pt solid #d0d0d0" style:vertical-align="middle" fo:background-color="#F2F2F2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/>
      <style:text-properties fo:color="#C00000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/>
      <style:text-properties fo:color="#107C41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10.708643245648545" table:style-name="c3">
            <text:p>-10.7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27.302670940600372" table:style-name="c4">
            <text:p>+27.3</text:p>
          </table:table-cell>
          <table:table-cell office:value-type="float" office:value="46" table:style-name="c1">
            <text:p>46</text:p>
          </table:table-cell>
          <table:table-cell office:value-type="float" office:value="26.08695652173913" table:style-name="c1">
            <text:p>26.1</text:p>
          </table:table-cell>
          <table:table-cell office:value-type="float" office:value="10.708643245648545" table:style-name="c1">
            <text:p>1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14.597285596223422" table:style-name="c3">
            <text:p>-14.6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34.06320267282216" table:style-name="c5">
            <text:p>-34.1</text:p>
          </table:table-cell>
          <table:table-cell office:value-type="float" office:value="62" table:style-name="c1">
            <text:p>62</text:p>
          </table:table-cell>
          <table:table-cell office:value-type="float" office:value="12.903225806451612" table:style-name="c1">
            <text:p>12.9</text:p>
          </table:table-cell>
          <table:table-cell office:value-type="float" office:value="14.663144744954353" table:style-name="c1">
            <text:p>14.7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-14.697433355889666" table:style-name="c3">
            <text:p>-14.7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63.98867046929172" table:style-name="c5">
            <text:p>-64.0</text:p>
          </table:table-cell>
          <table:table-cell office:value-type="float" office:value="106" table:style-name="c1">
            <text:p>106</text:p>
          </table:table-cell>
          <table:table-cell office:value-type="float" office:value="24.528301886792452" table:style-name="c1">
            <text:p>24.5</text:p>
          </table:table-cell>
          <table:table-cell office:value-type="float" office:value="27.500752918142208" table:style-name="c1">
            <text:p>27.5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15.768705393201548" table:style-name="c3">
            <text:p>-15.8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-3.203550685427347" table:style-name="c5">
            <text:p>-3.2</text:p>
          </table:table-cell>
          <table:table-cell office:value-type="float" office:value="81" table:style-name="c1">
            <text:p>81</text:p>
          </table:table-cell>
          <table:table-cell office:value-type="float" office:value="27.160493827160494" table:style-name="c1">
            <text:p>27.2</text:p>
          </table:table-cell>
          <table:table-cell office:value-type="float" office:value="15.768705393201548" table:style-name="c1">
            <text:p>15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16.503412149004625" table:style-name="c3">
            <text:p>-16.5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-4.41687540664811" table:style-name="c5">
            <text:p>-4.4</text:p>
          </table:table-cell>
          <table:table-cell office:value-type="float" office:value="58" table:style-name="c1">
            <text:p>58</text:p>
          </table:table-cell>
          <table:table-cell office:value-type="float" office:value="15.517241379310345" table:style-name="c1">
            <text:p>15.5</text:p>
          </table:table-cell>
          <table:table-cell office:value-type="float" office:value="16.54620305586701" table:style-name="c1">
            <text:p>16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16.785781439149115" table:style-name="c3">
            <text:p>-16.8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-6.182516712392552" table:style-name="c5">
            <text:p>-6.2</text:p>
          </table:table-cell>
          <table:table-cell office:value-type="float" office:value="62" table:style-name="c1">
            <text:p>62</text:p>
          </table:table-cell>
          <table:table-cell office:value-type="float" office:value="12.903225806451612" table:style-name="c1">
            <text:p>12.9</text:p>
          </table:table-cell>
          <table:table-cell office:value-type="float" office:value="16.785781439149115" table:style-name="c1">
            <text:p>16.8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17.787667830879958" table:style-name="c3">
            <text:p>-17.8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-6.546172909274599" table:style-name="c5">
            <text:p>-6.5</text:p>
          </table:table-cell>
          <table:table-cell office:value-type="float" office:value="80" table:style-name="c1">
            <text:p>80</text:p>
          </table:table-cell>
          <table:table-cell office:value-type="float" office:value="25.0" table:style-name="c1">
            <text:p>25.0</text:p>
          </table:table-cell>
          <table:table-cell office:value-type="float" office:value="22.832367965968594" table:style-name="c1">
            <text:p>22.8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-17.987695172983525" table:style-name="c3">
            <text:p>-18.0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76.13441331970168" table:style-name="c5">
            <text:p>-76.1</text:p>
          </table:table-cell>
          <table:table-cell office:value-type="float" office:value="85" table:style-name="c1">
            <text:p>85</text:p>
          </table:table-cell>
          <table:table-cell office:value-type="float" office:value="35.294117647058826" table:style-name="c1">
            <text:p>35.3</text:p>
          </table:table-cell>
          <table:table-cell office:value-type="float" office:value="21.092747383671565" table:style-name="c1">
            <text:p>2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19.658106350817366" table:style-name="c3">
            <text:p>-19.7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23.31866441325406" table:style-name="c5">
            <text:p>-23.3</text:p>
          </table:table-cell>
          <table:table-cell office:value-type="float" office:value="79" table:style-name="c1">
            <text:p>79</text:p>
          </table:table-cell>
          <table:table-cell office:value-type="float" office:value="24.050632911392405" table:style-name="c1">
            <text:p>24.1</text:p>
          </table:table-cell>
          <table:table-cell office:value-type="float" office:value="20.323442307565447" table:style-name="c1">
            <text:p>2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19.833119840121277" table:style-name="c3">
            <text:p>-19.8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-11.320399683565508" table:style-name="c5">
            <text:p>-11.3</text:p>
          </table:table-cell>
          <table:table-cell office:value-type="float" office:value="108" table:style-name="c1">
            <text:p>108</text:p>
          </table:table-cell>
          <table:table-cell office:value-type="float" office:value="32.407407407407405" table:style-name="c1">
            <text:p>32.4</text:p>
          </table:table-cell>
          <table:table-cell office:value-type="float" office:value="21.79374866813927" table:style-name="c1">
            <text:p>21.8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21.0062272131638" table:style-name="c3">
            <text:p>-21.0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-2.501280346179559" table:style-name="c5">
            <text:p>-2.5</text:p>
          </table:table-cell>
          <table:table-cell office:value-type="float" office:value="76" table:style-name="c1">
            <text:p>76</text:p>
          </table:table-cell>
          <table:table-cell office:value-type="float" office:value="25.0" table:style-name="c1">
            <text:p>25.0</text:p>
          </table:table-cell>
          <table:table-cell office:value-type="float" office:value="21.70860612511887" table:style-name="c1">
            <text:p>21.7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-21.648059245809975" table:style-name="c3">
            <text:p>-21.6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-16.541958769067406" table:style-name="c5">
            <text:p>-16.5</text:p>
          </table:table-cell>
          <table:table-cell office:value-type="float" office:value="94" table:style-name="c1">
            <text:p>94</text:p>
          </table:table-cell>
          <table:table-cell office:value-type="float" office:value="23.404255319148938" table:style-name="c1">
            <text:p>23.4</text:p>
          </table:table-cell>
          <table:table-cell office:value-type="float" office:value="21.648059245809975" table:style-name="c1">
            <text:p>21.6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21.88074096338148" table:style-name="c3">
            <text:p>-21.9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4.018539612158083" table:style-name="c4">
            <text:p>+4.0</text:p>
          </table:table-cell>
          <table:table-cell office:value-type="float" office:value="72" table:style-name="c1">
            <text:p>72</text:p>
          </table:table-cell>
          <table:table-cell office:value-type="float" office:value="26.38888888888889" table:style-name="c1">
            <text:p>26.4</text:p>
          </table:table-cell>
          <table:table-cell office:value-type="float" office:value="22.068560066535976" table:style-name="c1">
            <text:p>22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22.105143026640146" table:style-name="c3">
            <text:p>-22.1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-14.458710651773266" table:style-name="c5">
            <text:p>-14.5</text:p>
          </table:table-cell>
          <table:table-cell office:value-type="float" office:value="84" table:style-name="c1">
            <text:p>84</text:p>
          </table:table-cell>
          <table:table-cell office:value-type="float" office:value="23.809523809523807" table:style-name="c1">
            <text:p>23.8</text:p>
          </table:table-cell>
          <table:table-cell office:value-type="float" office:value="22.23283057442151" table:style-name="c1">
            <text:p>22.2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22.2668813558852" table:style-name="c3">
            <text:p>-22.3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22.48032852771016" table:style-name="c5">
            <text:p>-22.5</text:p>
          </table:table-cell>
          <table:table-cell office:value-type="float" office:value="93" table:style-name="c1">
            <text:p>93</text:p>
          </table:table-cell>
          <table:table-cell office:value-type="float" office:value="31.182795698924732" table:style-name="c1">
            <text:p>31.2</text:p>
          </table:table-cell>
          <table:table-cell office:value-type="float" office:value="22.888902927637584" table:style-name="c1">
            <text:p>22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23.078185295916658" table:style-name="c3">
            <text:p>-23.1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-1.4069896437427438" table:style-name="c5">
            <text:p>-1.4</text:p>
          </table:table-cell>
          <table:table-cell office:value-type="float" office:value="79" table:style-name="c1">
            <text:p>79</text:p>
          </table:table-cell>
          <table:table-cell office:value-type="float" office:value="25.31645569620253" table:style-name="c1">
            <text:p>25.3</text:p>
          </table:table-cell>
          <table:table-cell office:value-type="float" office:value="24.01095552193907" table:style-name="c1">
            <text:p>24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-23.564354977725372" table:style-name="c3">
            <text:p>-23.6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-12.78780981132284" table:style-name="c5">
            <text:p>-12.8</text:p>
          </table:table-cell>
          <table:table-cell office:value-type="float" office:value="98" table:style-name="c1">
            <text:p>98</text:p>
          </table:table-cell>
          <table:table-cell office:value-type="float" office:value="23.46938775510204" table:style-name="c1">
            <text:p>23.5</text:p>
          </table:table-cell>
          <table:table-cell office:value-type="float" office:value="24.62089103926387" table:style-name="c1">
            <text:p>24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24.157250776664444" table:style-name="c3">
            <text:p>-24.2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-20.94296506237873" table:style-name="c5">
            <text:p>-20.9</text:p>
          </table:table-cell>
          <table:table-cell office:value-type="float" office:value="107" table:style-name="c1">
            <text:p>107</text:p>
          </table:table-cell>
          <table:table-cell office:value-type="float" office:value="30.8411214953271" table:style-name="c1">
            <text:p>30.8</text:p>
          </table:table-cell>
          <table:table-cell office:value-type="float" office:value="24.474384923711305" table:style-name="c1">
            <text:p>24.5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25.467813465173823" table:style-name="c3">
            <text:p>-25.5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-20.885837352253077" table:style-name="c5">
            <text:p>-20.9</text:p>
          </table:table-cell>
          <table:table-cell office:value-type="float" office:value="99" table:style-name="c1">
            <text:p>99</text:p>
          </table:table-cell>
          <table:table-cell office:value-type="float" office:value="19.19191919191919" table:style-name="c1">
            <text:p>19.2</text:p>
          </table:table-cell>
          <table:table-cell office:value-type="float" office:value="25.54298319983922" table:style-name="c1">
            <text:p>25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-25.47748950303484" table:style-name="c3">
            <text:p>-25.5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-20.98832541634752" table:style-name="c5">
            <text:p>-21.0</text:p>
          </table:table-cell>
          <table:table-cell office:value-type="float" office:value="85" table:style-name="c1">
            <text:p>85</text:p>
          </table:table-cell>
          <table:table-cell office:value-type="float" office:value="27.058823529411764" table:style-name="c1">
            <text:p>27.1</text:p>
          </table:table-cell>
          <table:table-cell office:value-type="float" office:value="25.811459354642462" table:style-name="c1">
            <text:p>25.8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26.224606088004304" table:style-name="c3">
            <text:p>-26.2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-22.02618115935804" table:style-name="c5">
            <text:p>-22.0</text:p>
          </table:table-cell>
          <table:table-cell office:value-type="float" office:value="90" table:style-name="c1">
            <text:p>90</text:p>
          </table:table-cell>
          <table:table-cell office:value-type="float" office:value="20.0" table:style-name="c1">
            <text:p>20.0</text:p>
          </table:table-cell>
          <table:table-cell office:value-type="float" office:value="26.224606088004304" table:style-name="c1">
            <text:p>26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-27.064995349550085" table:style-name="c3">
            <text:p>-27.1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-62.95664320508055" table:style-name="c5">
            <text:p>-63.0</text:p>
          </table:table-cell>
          <table:table-cell office:value-type="float" office:value="126" table:style-name="c1">
            <text:p>126</text:p>
          </table:table-cell>
          <table:table-cell office:value-type="float" office:value="33.33333333333333" table:style-name="c1">
            <text:p>33.3</text:p>
          </table:table-cell>
          <table:table-cell office:value-type="float" office:value="27.49681127622844" table:style-name="c1">
            <text:p>27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-28.10218737791437" table:style-name="c3">
            <text:p>-28.1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-22.407206682933673" table:style-name="c5">
            <text:p>-22.4</text:p>
          </table:table-cell>
          <table:table-cell office:value-type="float" office:value="109" table:style-name="c1">
            <text:p>109</text:p>
          </table:table-cell>
          <table:table-cell office:value-type="float" office:value="34.862385321100916" table:style-name="c1">
            <text:p>34.9</text:p>
          </table:table-cell>
          <table:table-cell office:value-type="float" office:value="28.484603761912407" table:style-name="c1">
            <text:p>28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28.184070528981213" table:style-name="c3">
            <text:p>-28.2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31.86978179733057" table:style-name="c5">
            <text:p>-31.9</text:p>
          </table:table-cell>
          <table:table-cell office:value-type="float" office:value="106" table:style-name="c1">
            <text:p>106</text:p>
          </table:table-cell>
          <table:table-cell office:value-type="float" office:value="24.528301886792452" table:style-name="c1">
            <text:p>24.5</text:p>
          </table:table-cell>
          <table:table-cell office:value-type="float" office:value="28.569501269794884" table:style-name="c1">
            <text:p>28.6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28.221918395397484" table:style-name="c3">
            <text:p>-28.2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-0.8009449884732405" table:style-name="c5">
            <text:p>-0.8</text:p>
          </table:table-cell>
          <table:table-cell office:value-type="float" office:value="87" table:style-name="c1">
            <text:p>87</text:p>
          </table:table-cell>
          <table:table-cell office:value-type="float" office:value="26.436781609195403" table:style-name="c1">
            <text:p>26.4</text:p>
          </table:table-cell>
          <table:table-cell office:value-type="float" office:value="28.221918395397484" table:style-name="c1">
            <text:p>28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-29.635998172081614" table:style-name="c3">
            <text:p>-29.6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-21.515348520109463" table:style-name="c5">
            <text:p>-21.5</text:p>
          </table:table-cell>
          <table:table-cell office:value-type="float" office:value="98" table:style-name="c1">
            <text:p>98</text:p>
          </table:table-cell>
          <table:table-cell office:value-type="float" office:value="23.46938775510204" table:style-name="c1">
            <text:p>23.5</text:p>
          </table:table-cell>
          <table:table-cell office:value-type="float" office:value="29.737227486412436" table:style-name="c1">
            <text:p>29.7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-32.02613668342173" table:style-name="c3">
            <text:p>-32.0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-20.941915967061615" table:style-name="c5">
            <text:p>-20.9</text:p>
          </table:table-cell>
          <table:table-cell office:value-type="float" office:value="86" table:style-name="c1">
            <text:p>86</text:p>
          </table:table-cell>
          <table:table-cell office:value-type="float" office:value="16.27906976744186" table:style-name="c1">
            <text:p>16.3</text:p>
          </table:table-cell>
          <table:table-cell office:value-type="float" office:value="32.05498906823214" table:style-name="c1">
            <text:p>3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-33.82010557415411" table:style-name="c3">
            <text:p>-33.8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165.09436171904412" table:style-name="c5">
            <text:p>-165.1</text:p>
          </table:table-cell>
          <table:table-cell office:value-type="float" office:value="149" table:style-name="c1">
            <text:p>149</text:p>
          </table:table-cell>
          <table:table-cell office:value-type="float" office:value="36.241610738255034" table:style-name="c1">
            <text:p>36.2</text:p>
          </table:table-cell>
          <table:table-cell office:value-type="float" office:value="37.970692313723816" table:style-name="c1">
            <text:p>38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-34.13013861232821" table:style-name="c3">
            <text:p>-34.1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130.9776459437065" table:style-name="c5">
            <text:p>-131.0</text:p>
          </table:table-cell>
          <table:table-cell office:value-type="float" office:value="108" table:style-name="c1">
            <text:p>108</text:p>
          </table:table-cell>
          <table:table-cell office:value-type="float" office:value="31.48148148148148" table:style-name="c1">
            <text:p>31.5</text:p>
          </table:table-cell>
          <table:table-cell office:value-type="float" office:value="35.64255584021801" table:style-name="c1">
            <text:p>35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41.208357720646234" table:style-name="c3">
            <text:p>-41.2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-31.079261394926284" table:style-name="c5">
            <text:p>-31.1</text:p>
          </table:table-cell>
          <table:table-cell office:value-type="float" office:value="106" table:style-name="c1">
            <text:p>106</text:p>
          </table:table-cell>
          <table:table-cell office:value-type="float" office:value="24.528301886792452" table:style-name="c1">
            <text:p>24.5</text:p>
          </table:table-cell>
          <table:table-cell office:value-type="float" office:value="41.243505275631684" table:style-name="c1">
            <text:p>41.2</text:p>
          </table:table-cell>
        </table:table-row>
        <table:table-row>
          <table:table-cell office:value-type="string" table:style-name="c6">
            <text:p>AVERAGE</text:p>
          </table:table-cell>
          <table:table-cell office:value-type="float" office:value="-23.45328368999314" table:style-name="c7">
            <text:p>-23.5</text:p>
          </table:table-cell>
          <table:table-cell office:value-type="float" office:value="4.563941399287484" table:style-name="c6">
            <text:p>+4.6</text:p>
          </table:table-cell>
          <table:table-cell office:value-type="float" office:value="-28.01722508928062" table:style-name="c7">
            <text:p>-28.0</text:p>
          </table:table-cell>
          <table:table-cell office:value-type="float" office:value="2719" table:style-name="c6">
            <text:p>2719</text:p>
          </table:table-cell>
          <table:table-cell office:value-type="float" office:value="25.422514278590274" table:style-name="c6">
            <text:p>25.4</text:p>
          </table:table-cell>
          <table:table-cell office:value-type="float" office:value="24.622319362559438" table:style-name="c6">
            <text:p>24.6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10:45</text:p>
          </table:table-cell>
          <table:table-cell office:value-type="float" office:value="0.27593789999999996" table:style-name="c9">
            <text:p>0.27594</text:p>
          </table:table-cell>
          <table:table-cell office:value-type="string" table:style-name="c9">
            <text:p>2026-03-05 11:15</text:p>
          </table:table-cell>
          <table:table-cell office:value-type="float" office:value="0.2760619" table:style-name="c9">
            <text:p>0.27606</text:p>
          </table:table-cell>
          <table:table-cell office:value-type="float" office:value="-0.1550521831542251" table:style-name="c10">
            <text:p>-0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6 13:45</text:p>
          </table:table-cell>
          <table:table-cell office:value-type="float" office:value="0.26793389999999995" table:style-name="c9">
            <text:p>0.26793</text:p>
          </table:table-cell>
          <table:table-cell office:value-type="string" table:style-name="c9">
            <text:p>2026-03-06 14:15</text:p>
          </table:table-cell>
          <table:table-cell office:value-type="float" office:value="0.26196895000000003" table:style-name="c9">
            <text:p>0.26197</text:p>
          </table:table-cell>
          <table:table-cell office:value-type="float" office:value="-2.421726377681188" table:style-name="c10">
            <text:p>-2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9:30</text:p>
          </table:table-cell>
          <table:table-cell office:value-type="float" office:value="0.26603295" table:style-name="c9">
            <text:p>0.26603</text:p>
          </table:table-cell>
          <table:table-cell office:value-type="string" table:style-name="c9">
            <text:p>2026-03-10 10:00</text:p>
          </table:table-cell>
          <table:table-cell office:value-type="float" office:value="0.2668665" table:style-name="c9">
            <text:p>0.26687</text:p>
          </table:table-cell>
          <table:table-cell office:value-type="float" office:value="0.11279951092524332" table:style-name="c11">
            <text:p>+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4:45</text:p>
          </table:table-cell>
          <table:table-cell office:value-type="float" office:value="0.2669334" table:style-name="c9">
            <text:p>0.26693</text:p>
          </table:table-cell>
          <table:table-cell office:value-type="string" table:style-name="c9">
            <text:p>2026-03-10 15:15</text:p>
          </table:table-cell>
          <table:table-cell office:value-type="float" office:value="0.2704647" table:style-name="c9">
            <text:p>0.27046</text:p>
          </table:table-cell>
          <table:table-cell office:value-type="float" office:value="1.1203697494206466" table:style-name="c11">
            <text:p>+1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1:15</text:p>
          </table:table-cell>
          <table:table-cell office:value-type="float" office:value="0.25992989999999994" table:style-name="c9">
            <text:p>0.25993</text:p>
          </table:table-cell>
          <table:table-cell office:value-type="string" table:style-name="c9">
            <text:p>2026-03-11 11:45</text:p>
          </table:table-cell>
          <table:table-cell office:value-type="float" office:value="0.25897045" table:style-name="c9">
            <text:p>0.25897</text:p>
          </table:table-cell>
          <table:table-cell office:value-type="float" office:value="-0.5682808824802099" table:style-name="c10">
            <text:p>-0.6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3:00</text:p>
          </table:table-cell>
          <table:table-cell office:value-type="float" office:value="0.26143065" table:style-name="c9">
            <text:p>0.26143</text:p>
          </table:table-cell>
          <table:table-cell office:value-type="string" table:style-name="c9">
            <text:p>2026-03-11 13:30</text:p>
          </table:table-cell>
          <table:table-cell office:value-type="float" office:value="0.26396795" table:style-name="c9">
            <text:p>0.26397</text:p>
          </table:table-cell>
          <table:table-cell office:value-type="float" office:value="0.7687040780987253" table:style-name="c11">
            <text:p>+0.8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7:30</text:p>
          </table:table-cell>
          <table:table-cell office:value-type="float" office:value="0.26583284999999995" table:style-name="c9">
            <text:p>0.26583</text:p>
          </table:table-cell>
          <table:table-cell office:value-type="string" table:style-name="c9">
            <text:p>2026-03-11 18:00</text:p>
          </table:table-cell>
          <table:table-cell office:value-type="float" office:value="0.26476755" table:style-name="c9">
            <text:p>0.26477</text:p>
          </table:table-cell>
          <table:table-cell office:value-type="float" office:value="-0.599839460190843" table:style-name="c10">
            <text:p>-0.6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8:30</text:p>
          </table:table-cell>
          <table:table-cell office:value-type="float" office:value="0.2615307" table:style-name="c9">
            <text:p>0.26153</text:p>
          </table:table-cell>
          <table:table-cell office:value-type="string" table:style-name="c9">
            <text:p>2026-03-12 09:00</text:p>
          </table:table-cell>
          <table:table-cell office:value-type="float" office:value="0.2606696" table:style-name="c9">
            <text:p>0.26067</text:p>
          </table:table-cell>
          <table:table-cell office:value-type="float" office:value="-0.5284957102168031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0:30</text:p>
          </table:table-cell>
          <table:table-cell office:value-type="float" office:value="0.2625312" table:style-name="c9">
            <text:p>0.26253</text:p>
          </table:table-cell>
          <table:table-cell office:value-type="string" table:style-name="c9">
            <text:p>2026-03-12 11:00</text:p>
          </table:table-cell>
          <table:table-cell office:value-type="float" office:value="0.26296845" table:style-name="c9">
            <text:p>0.26297</text:p>
          </table:table-cell>
          <table:table-cell office:value-type="float" office:value="-0.03368130399358238" table:style-name="c10">
            <text:p>-0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0:30</text:p>
          </table:table-cell>
          <table:table-cell office:value-type="float" office:value="0.26953469999999996" table:style-name="c9">
            <text:p>0.26953</text:p>
          </table:table-cell>
          <table:table-cell office:value-type="string" table:style-name="c9">
            <text:p>2026-03-13 01:00</text:p>
          </table:table-cell>
          <table:table-cell office:value-type="float" office:value="0.26916535" table:style-name="c9">
            <text:p>0.26917</text:p>
          </table:table-cell>
          <table:table-cell office:value-type="float" office:value="-0.3366585210178519" table:style-name="c10">
            <text:p>-0.3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5:45</text:p>
          </table:table-cell>
          <table:table-cell office:value-type="float" office:value="0.27543765" table:style-name="c9">
            <text:p>0.27544</text:p>
          </table:table-cell>
          <table:table-cell office:value-type="string" table:style-name="c9">
            <text:p>2026-03-13 06:15</text:p>
          </table:table-cell>
          <table:table-cell office:value-type="float" office:value="0.2732633" table:style-name="c9">
            <text:p>0.27326</text:p>
          </table:table-cell>
          <table:table-cell office:value-type="float" office:value="-0.9877383635461534" table:style-name="c10">
            <text:p>-1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2:45</text:p>
          </table:table-cell>
          <table:table-cell office:value-type="float" office:value="0.2767383" table:style-name="c9">
            <text:p>0.27674</text:p>
          </table:table-cell>
          <table:table-cell office:value-type="string" table:style-name="c9">
            <text:p>2026-03-13 13:15</text:p>
          </table:table-cell>
          <table:table-cell office:value-type="float" office:value="0.27796095000000004" table:style-name="c9">
            <text:p>0.27796</text:p>
          </table:table-cell>
          <table:table-cell office:value-type="float" office:value="0.24102412313367072" table:style-name="c11">
            <text:p>+0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30</text:p>
          </table:table-cell>
          <table:table-cell office:value-type="float" office:value="0.27923955" table:style-name="c9">
            <text:p>0.27924</text:p>
          </table:table-cell>
          <table:table-cell office:value-type="string" table:style-name="c9">
            <text:p>2026-03-13 14:00</text:p>
          </table:table-cell>
          <table:table-cell office:value-type="float" office:value="0.27886050000000007" table:style-name="c9">
            <text:p>0.27886</text:p>
          </table:table-cell>
          <table:table-cell office:value-type="float" office:value="-0.3353723136639952" table:style-name="c10">
            <text:p>-0.3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04:45</text:p>
          </table:table-cell>
          <table:table-cell office:value-type="float" office:value="0.2665332" table:style-name="c9">
            <text:p>0.26653</text:p>
          </table:table-cell>
          <table:table-cell office:value-type="string" table:style-name="c9">
            <text:p>2026-03-14 05:15</text:p>
          </table:table-cell>
          <table:table-cell office:value-type="float" office:value="0.2646676" table:style-name="c9">
            <text:p>0.26467</text:p>
          </table:table-cell>
          <table:table-cell office:value-type="float" office:value="-0.8984511244377935" table:style-name="c10">
            <text:p>-0.9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00</text:p>
          </table:table-cell>
          <table:table-cell office:value-type="float" office:value="0.26683334999999997" table:style-name="c9">
            <text:p>0.26683</text:p>
          </table:table-cell>
          <table:table-cell office:value-type="string" table:style-name="c9">
            <text:p>2026-03-15 22:30</text:p>
          </table:table-cell>
          <table:table-cell office:value-type="float" office:value="0.2660669" table:style-name="c9">
            <text:p>0.26607</text:p>
          </table:table-cell>
          <table:table-cell office:value-type="float" office:value="-0.4865650163669577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45</text:p>
          </table:table-cell>
          <table:table-cell office:value-type="float" office:value="0.27003494999999994" table:style-name="c9">
            <text:p>0.27003</text:p>
          </table:table-cell>
          <table:table-cell office:value-type="string" table:style-name="c9">
            <text:p>2026-03-15 23:15</text:p>
          </table:table-cell>
          <table:table-cell office:value-type="float" office:value="0.27106440000000004" table:style-name="c9">
            <text:p>0.27106</text:p>
          </table:table-cell>
          <table:table-cell office:value-type="float" office:value="0.18056635424419376" table:style-name="c11">
            <text:p>+0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0:15</text:p>
          </table:table-cell>
          <table:table-cell office:value-type="float" office:value="0.27193589999999995" table:style-name="c9">
            <text:p>0.27194</text:p>
          </table:table-cell>
          <table:table-cell office:value-type="string" table:style-name="c9">
            <text:p>2026-03-16 00:45</text:p>
          </table:table-cell>
          <table:table-cell office:value-type="float" office:value="0.2700649" table:style-name="c9">
            <text:p>0.27006</text:p>
          </table:table-cell>
          <table:table-cell office:value-type="float" office:value="-0.8865544178241813" table:style-name="c10">
            <text:p>-0.9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0.2783391" table:style-name="c9">
            <text:p>0.27834</text:p>
          </table:table-cell>
          <table:table-cell office:value-type="string" table:style-name="c9">
            <text:p>2026-03-16 04:15</text:p>
          </table:table-cell>
          <table:table-cell office:value-type="float" office:value="0.28005990000000003" table:style-name="c9">
            <text:p>0.28006</text:p>
          </table:table-cell>
          <table:table-cell office:value-type="float" office:value="0.4171028288515677" table:style-name="c11">
            <text:p>+0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4:30</text:p>
          </table:table-cell>
          <table:table-cell office:value-type="float" office:value="0.28064025000000004" table:style-name="c9">
            <text:p>0.28064</text:p>
          </table:table-cell>
          <table:table-cell office:value-type="string" table:style-name="c9">
            <text:p>2026-03-16 05:00</text:p>
          </table:table-cell>
          <table:table-cell office:value-type="float" office:value="0.2828585" table:style-name="c9">
            <text:p>0.28286</text:p>
          </table:table-cell>
          <table:table-cell office:value-type="float" office:value="0.5889446928941888" table:style-name="c11">
            <text:p>+0.6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07:30</text:p>
          </table:table-cell>
          <table:table-cell office:value-type="float" office:value="0.2877438" table:style-name="c9">
            <text:p>0.28774</text:p>
          </table:table-cell>
          <table:table-cell office:value-type="string" table:style-name="c9">
            <text:p>2026-03-17 08:00</text:p>
          </table:table-cell>
          <table:table-cell office:value-type="float" office:value="0.28635675" table:style-name="c9">
            <text:p>0.28636</text:p>
          </table:table-cell>
          <table:table-cell office:value-type="float" office:value="-0.6809797963500785" table:style-name="c10">
            <text:p>-0.7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05:15</text:p>
          </table:table-cell>
          <table:table-cell office:value-type="float" office:value="0.29444715" table:style-name="c9">
            <text:p>0.29445</text:p>
          </table:table-cell>
          <table:table-cell office:value-type="string" table:style-name="c9">
            <text:p>2026-03-18 05:45</text:p>
          </table:table-cell>
          <table:table-cell office:value-type="float" office:value="0.29095445000000003" table:style-name="c9">
            <text:p>0.29095</text:p>
          </table:table-cell>
          <table:table-cell office:value-type="float" office:value="-1.3837179084769446" table:style-name="c10">
            <text:p>-1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21:45</text:p>
          </table:table-cell>
          <table:table-cell office:value-type="float" office:value="0.264132" table:style-name="c9">
            <text:p>0.26413</text:p>
          </table:table-cell>
          <table:table-cell office:value-type="string" table:style-name="c9">
            <text:p>2026-03-23 22:15</text:p>
          </table:table-cell>
          <table:table-cell office:value-type="float" office:value="0.26196895000000003" table:style-name="c9">
            <text:p>0.26197</text:p>
          </table:table-cell>
          <table:table-cell office:value-type="float" office:value="-1.0171906209963" table:style-name="c10">
            <text:p>-1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08:15</text:p>
          </table:table-cell>
          <table:table-cell office:value-type="float" office:value="0.26783385" table:style-name="c9">
            <text:p>0.26783</text:p>
          </table:table-cell>
          <table:table-cell office:value-type="string" table:style-name="c9">
            <text:p>2026-03-24 08:45</text:p>
          </table:table-cell>
          <table:table-cell office:value-type="float" office:value="0.26756615" table:style-name="c9">
            <text:p>0.26757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0:15</text:p>
          </table:table-cell>
          <table:table-cell office:value-type="float" office:value="0.26843415" table:style-name="c9">
            <text:p>0.26843</text:p>
          </table:table-cell>
          <table:table-cell office:value-type="string" table:style-name="c9">
            <text:p>2026-03-25 00:45</text:p>
          </table:table-cell>
          <table:table-cell office:value-type="float" office:value="0.26786600000000005" table:style-name="c9">
            <text:p>0.26787</text:p>
          </table:table-cell>
          <table:table-cell office:value-type="float" office:value="-0.4111303029066704" table:style-name="c10">
            <text:p>-0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6:30</text:p>
          </table:table-cell>
          <table:table-cell office:value-type="float" office:value="0.2703351" table:style-name="c9">
            <text:p>0.27034</text:p>
          </table:table-cell>
          <table:table-cell office:value-type="string" table:style-name="c9">
            <text:p>2026-03-25 07:00</text:p>
          </table:table-cell>
          <table:table-cell office:value-type="float" office:value="0.26936525000000006" table:style-name="c9">
            <text:p>0.26937</text:p>
          </table:table-cell>
          <table:table-cell office:value-type="float" office:value="-0.5579412864810895" table:style-name="c10">
            <text:p>-0.6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3:15</text:p>
          </table:table-cell>
          <table:table-cell office:value-type="float" office:value="0.27643815" table:style-name="c9">
            <text:p>0.27644</text:p>
          </table:table-cell>
          <table:table-cell office:value-type="string" table:style-name="c9">
            <text:p>2026-03-25 13:45</text:p>
          </table:table-cell>
          <table:table-cell office:value-type="float" office:value="0.27296345000000005" table:style-name="c9">
            <text:p>0.27296</text:p>
          </table:table-cell>
          <table:table-cell office:value-type="float" office:value="-1.4543412103394382" table:style-name="c10">
            <text:p>-1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23:00</text:p>
          </table:table-cell>
          <table:table-cell office:value-type="float" office:value="0.27083535" table:style-name="c9">
            <text:p>0.27084</text:p>
          </table:table-cell>
          <table:table-cell office:value-type="string" table:style-name="c9">
            <text:p>2026-03-25 23:30</text:p>
          </table:table-cell>
          <table:table-cell office:value-type="float" office:value="0.2700649" table:style-name="c9">
            <text:p>0.27006</text:p>
          </table:table-cell>
          <table:table-cell office:value-type="float" office:value="-0.483803068949451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3 15:00</text:p>
          </table:table-cell>
          <table:table-cell office:value-type="float" office:value="0.24772379999999997" table:style-name="c9">
            <text:p>0.24772</text:p>
          </table:table-cell>
          <table:table-cell office:value-type="string" table:style-name="c9">
            <text:p>2026-04-03 15:30</text:p>
          </table:table-cell>
          <table:table-cell office:value-type="float" office:value="0.24727630000000003" table:style-name="c9">
            <text:p>0.24728</text:p>
          </table:table-cell>
          <table:table-cell office:value-type="float" office:value="-0.38018362535208183" table:style-name="c10">
            <text:p>-0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5:15</text:p>
          </table:table-cell>
          <table:table-cell office:value-type="float" office:value="0.2465232" table:style-name="c9">
            <text:p>0.24652</text:p>
          </table:table-cell>
          <table:table-cell office:value-type="string" table:style-name="c9">
            <text:p>2026-04-04 15:45</text:p>
          </table:table-cell>
          <table:table-cell office:value-type="float" office:value="0.24507740000000003" table:style-name="c9">
            <text:p>0.24508</text:p>
          </table:table-cell>
          <table:table-cell office:value-type="float" office:value="-0.7852038763897062" table:style-name="c10">
            <text:p>-0.8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9:15</text:p>
          </table:table-cell>
          <table:table-cell office:value-type="float" office:value="0.24982485" table:style-name="c9">
            <text:p>0.24982</text:p>
          </table:table-cell>
          <table:table-cell office:value-type="string" table:style-name="c9">
            <text:p>2026-04-04 19:45</text:p>
          </table:table-cell>
          <table:table-cell office:value-type="float" office:value="0.24757615000000002" table:style-name="c9">
            <text:p>0.24758</text:p>
          </table:table-cell>
          <table:table-cell office:value-type="float" office:value="-1.0982112963742185" table:style-name="c10">
            <text:p>-1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0:15</text:p>
          </table:table-cell>
          <table:table-cell office:value-type="float" office:value="0.25482734999999995" table:style-name="c9">
            <text:p>0.25483</text:p>
          </table:table-cell>
          <table:table-cell office:value-type="string" table:style-name="c9">
            <text:p>2026-04-06 00:45</text:p>
          </table:table-cell>
          <table:table-cell office:value-type="float" office:value="0.25537225" table:style-name="c9">
            <text:p>0.25537</text:p>
          </table:table-cell>
          <table:table-cell office:value-type="float" office:value="0.013503602439102202" table:style-name="c11">
            <text:p>+0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2:15</text:p>
          </table:table-cell>
          <table:table-cell office:value-type="float" office:value="0.2577288" table:style-name="c9">
            <text:p>0.25773</text:p>
          </table:table-cell>
          <table:table-cell office:value-type="string" table:style-name="c9">
            <text:p>2026-04-06 02:45</text:p>
          </table:table-cell>
          <table:table-cell office:value-type="float" office:value="0.2570714" table:style-name="c9">
            <text:p>0.25707</text:p>
          </table:table-cell>
          <table:table-cell office:value-type="float" office:value="-0.4544644326128666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10:30</text:p>
          </table:table-cell>
          <table:table-cell office:value-type="float" office:value="0.25842914999999994" table:style-name="c9">
            <text:p>0.25843</text:p>
          </table:table-cell>
          <table:table-cell office:value-type="string" table:style-name="c9">
            <text:p>2026-04-06 11:00</text:p>
          </table:table-cell>
          <table:table-cell office:value-type="float" office:value="0.25657165" table:style-name="c9">
            <text:p>0.25657</text:p>
          </table:table-cell>
          <table:table-cell office:value-type="float" office:value="-0.9172288529950778" table:style-name="c10">
            <text:p>-0.9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00</text:p>
          </table:table-cell>
          <table:table-cell office:value-type="float" office:value="0.26283134999999996" table:style-name="c9">
            <text:p>0.26283</text:p>
          </table:table-cell>
          <table:table-cell office:value-type="string" table:style-name="c9">
            <text:p>2026-04-07 23:30</text:p>
          </table:table-cell>
          <table:table-cell office:value-type="float" office:value="0.26556715000000003" table:style-name="c9">
            <text:p>0.26557</text:p>
          </table:table-cell>
          <table:table-cell office:value-type="float" office:value="0.8389148658065615" table:style-name="c11">
            <text:p>+0.8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22:30</text:p>
          </table:table-cell>
          <table:table-cell office:value-type="float" office:value="0.2583291" table:style-name="c9">
            <text:p>0.25833</text:p>
          </table:table-cell>
          <table:table-cell office:value-type="string" table:style-name="c9">
            <text:p>2026-04-09 23:00</text:p>
          </table:table-cell>
          <table:table-cell office:value-type="float" office:value="0.25597195" table:style-name="c9">
            <text:p>0.25597</text:p>
          </table:table-cell>
          <table:table-cell office:value-type="float" office:value="-1.1105361060948948" table:style-name="c10">
            <text:p>-1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4:30</text:p>
          </table:table-cell>
          <table:table-cell office:value-type="float" office:value="0.2549274" table:style-name="c9">
            <text:p>0.25493</text:p>
          </table:table-cell>
          <table:table-cell office:value-type="string" table:style-name="c9">
            <text:p>2026-04-10 15:00</text:p>
          </table:table-cell>
          <table:table-cell office:value-type="float" office:value="0.25517235000000005" table:style-name="c9">
            <text:p>0.25517</text:p>
          </table:table-cell>
          <table:table-cell office:value-type="float" office:value="-0.10400589644347091" table:style-name="c10">
            <text:p>-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9:15</text:p>
          </table:table-cell>
          <table:table-cell office:value-type="float" office:value="0.25782884999999994" table:style-name="c9">
            <text:p>0.25783</text:p>
          </table:table-cell>
          <table:table-cell office:value-type="string" table:style-name="c9">
            <text:p>2026-04-10 19:45</text:p>
          </table:table-cell>
          <table:table-cell office:value-type="float" office:value="0.25757115" table:style-name="c9">
            <text:p>0.25757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7:00</text:p>
          </table:table-cell>
          <table:table-cell office:value-type="float" office:value="0.24532259999999997" table:style-name="c9">
            <text:p>0.24532</text:p>
          </table:table-cell>
          <table:table-cell office:value-type="string" table:style-name="c9">
            <text:p>2026-04-15 17:30</text:p>
          </table:table-cell>
          <table:table-cell office:value-type="float" office:value="0.24577705000000002" table:style-name="c9">
            <text:p>0.24578</text:p>
          </table:table-cell>
          <table:table-cell office:value-type="float" office:value="-0.015024430260379695" table:style-name="c10">
            <text:p>-0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9:45</text:p>
          </table:table-cell>
          <table:table-cell office:value-type="float" office:value="0.24982485" table:style-name="c9">
            <text:p>0.24982</text:p>
          </table:table-cell>
          <table:table-cell office:value-type="string" table:style-name="c9">
            <text:p>2026-04-15 20:15</text:p>
          </table:table-cell>
          <table:table-cell office:value-type="float" office:value="0.24797595" table:style-name="c9">
            <text:p>0.24798</text:p>
          </table:table-cell>
          <table:table-cell office:value-type="float" office:value="-0.9384990820768935" table:style-name="c10">
            <text:p>-0.9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45</text:p>
          </table:table-cell>
          <table:table-cell office:value-type="float" office:value="0.2491245" table:style-name="c9">
            <text:p>0.24912</text:p>
          </table:table-cell>
          <table:table-cell office:value-type="string" table:style-name="c9">
            <text:p>2026-04-16 03:15</text:p>
          </table:table-cell>
          <table:table-cell office:value-type="float" office:value="0.24837575" table:style-name="c9">
            <text:p>0.24838</text:p>
          </table:table-cell>
          <table:table-cell office:value-type="float" office:value="-0.4998517304600769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4:00</text:p>
          </table:table-cell>
          <table:table-cell office:value-type="float" office:value="0.24932459999999998" table:style-name="c9">
            <text:p>0.24932</text:p>
          </table:table-cell>
          <table:table-cell office:value-type="string" table:style-name="c9">
            <text:p>2026-04-16 04:30</text:p>
          </table:table-cell>
          <table:table-cell office:value-type="float" office:value="0.2500749" table:style-name="c9">
            <text:p>0.25007</text:p>
          </table:table-cell>
          <table:table-cell office:value-type="float" office:value="0.10043143552622702" table:style-name="c11">
            <text:p>+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15</text:p>
          </table:table-cell>
          <table:table-cell office:value-type="float" office:value="0.25282635" table:style-name="c9">
            <text:p>0.25283</text:p>
          </table:table-cell>
          <table:table-cell office:value-type="string" table:style-name="c9">
            <text:p>2026-04-16 13:45</text:p>
          </table:table-cell>
          <table:table-cell office:value-type="float" office:value="0.25337325" table:style-name="c9">
            <text:p>0.25337</text:p>
          </table:table-cell>
          <table:table-cell office:value-type="float" office:value="0.015982065654940314" table:style-name="c11">
            <text:p>+0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9:00</text:p>
          </table:table-cell>
          <table:table-cell office:value-type="float" office:value="0.2591295" table:style-name="c9">
            <text:p>0.25913</text:p>
          </table:table-cell>
          <table:table-cell office:value-type="string" table:style-name="c9">
            <text:p>2026-04-16 19:30</text:p>
          </table:table-cell>
          <table:table-cell office:value-type="float" office:value="0.2584707" table:style-name="c9">
            <text:p>0.25847</text:p>
          </table:table-cell>
          <table:table-cell office:value-type="float" office:value="-0.4536275990576266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7:15</text:p>
          </table:table-cell>
          <table:table-cell office:value-type="float" office:value="0.25582784999999997" table:style-name="c9">
            <text:p>0.25583</text:p>
          </table:table-cell>
          <table:table-cell office:value-type="string" table:style-name="c9">
            <text:p>2026-04-17 07:45</text:p>
          </table:table-cell>
          <table:table-cell office:value-type="float" office:value="0.25597195" table:style-name="c9">
            <text:p>0.25597</text:p>
          </table:table-cell>
          <table:table-cell office:value-type="float" office:value="-0.14368565738638317" table:style-name="c10">
            <text:p>-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00</text:p>
          </table:table-cell>
          <table:table-cell office:value-type="float" office:value="0.25632809999999995" table:style-name="c9">
            <text:p>0.25633</text:p>
          </table:table-cell>
          <table:table-cell office:value-type="string" table:style-name="c9">
            <text:p>2026-04-17 08:30</text:p>
          </table:table-cell>
          <table:table-cell office:value-type="float" office:value="0.2564717" table:style-name="c9">
            <text:p>0.25647</text:p>
          </table:table-cell>
          <table:table-cell office:value-type="float" office:value="-0.1439900378850112" table:style-name="c10">
            <text:p>-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45</text:p>
          </table:table-cell>
          <table:table-cell office:value-type="float" office:value="0.2571285" table:style-name="c9">
            <text:p>0.25713</text:p>
          </table:table-cell>
          <table:table-cell office:value-type="string" table:style-name="c9">
            <text:p>2026-04-17 09:15</text:p>
          </table:table-cell>
          <table:table-cell office:value-type="float" office:value="0.25687150000000003" table:style-name="c9">
            <text:p>0.25687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2:15</text:p>
          </table:table-cell>
          <table:table-cell office:value-type="float" office:value="0.25842914999999994" table:style-name="c9">
            <text:p>0.25843</text:p>
          </table:table-cell>
          <table:table-cell office:value-type="string" table:style-name="c9">
            <text:p>2026-04-17 12:45</text:p>
          </table:table-cell>
          <table:table-cell office:value-type="float" office:value="0.2584707" table:style-name="c9">
            <text:p>0.25847</text:p>
          </table:table-cell>
          <table:table-cell office:value-type="float" office:value="-0.18385423211736418" table:style-name="c10">
            <text:p>-0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00</text:p>
          </table:table-cell>
          <table:table-cell office:value-type="float" office:value="0.26063025" table:style-name="c9">
            <text:p>0.26063</text:p>
          </table:table-cell>
          <table:table-cell office:value-type="string" table:style-name="c9">
            <text:p>2026-04-17 13:30</text:p>
          </table:table-cell>
          <table:table-cell office:value-type="float" office:value="0.2630684" table:style-name="c9">
            <text:p>0.26307</text:p>
          </table:table-cell>
          <table:table-cell office:value-type="float" office:value="0.7337123255646727" table:style-name="c11">
            <text:p>+0.7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45</text:p>
          </table:table-cell>
          <table:table-cell office:value-type="float" office:value="0.26463225" table:style-name="c9">
            <text:p>0.26463</text:p>
          </table:table-cell>
          <table:table-cell office:value-type="string" table:style-name="c9">
            <text:p>2026-04-17 14:15</text:p>
          </table:table-cell>
          <table:table-cell office:value-type="float" office:value="0.26536725000000005" table:style-name="c9">
            <text:p>0.26537</text:p>
          </table:table-cell>
          <table:table-cell office:value-type="float" office:value="0.07728871566108353" table:style-name="c11">
            <text:p>+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8:45</text:p>
          </table:table-cell>
          <table:table-cell office:value-type="float" office:value="0.2511255" table:style-name="c9">
            <text:p>0.25113</text:p>
          </table:table-cell>
          <table:table-cell office:value-type="string" table:style-name="c9">
            <text:p>2026-04-21 09:15</text:p>
          </table:table-cell>
          <table:table-cell office:value-type="float" office:value="0.249875" table:style-name="c9">
            <text:p>0.24988</text:p>
          </table:table-cell>
          <table:table-cell office:value-type="float" office:value="-0.6968627737923727" table:style-name="c10">
            <text:p>-0.7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2:30</text:p>
          </table:table-cell>
          <table:table-cell office:value-type="float" office:value="0.25382685" table:style-name="c9">
            <text:p>0.25383</text:p>
          </table:table-cell>
          <table:table-cell office:value-type="string" table:style-name="c9">
            <text:p>2026-04-22 03:00</text:p>
          </table:table-cell>
          <table:table-cell office:value-type="float" office:value="0.25417285000000006" table:style-name="c9">
            <text:p>0.25417</text:p>
          </table:table-cell>
          <table:table-cell office:value-type="float" office:value="-0.06385909416199986" table:style-name="c10">
            <text:p>-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0.25702845" table:style-name="c9">
            <text:p>0.25703</text:p>
          </table:table-cell>
          <table:table-cell office:value-type="string" table:style-name="c9">
            <text:p>2026-04-22 06:00</text:p>
          </table:table-cell>
          <table:table-cell office:value-type="float" office:value="0.25567210000000007" table:style-name="c9">
            <text:p>0.25567</text:p>
          </table:table-cell>
          <table:table-cell office:value-type="float" office:value="-0.7265493480974383" table:style-name="c10">
            <text:p>-0.7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3:30</text:p>
          </table:table-cell>
          <table:table-cell office:value-type="float" office:value="0.2553276" table:style-name="c9">
            <text:p>0.25533</text:p>
          </table:table-cell>
          <table:table-cell office:value-type="string" table:style-name="c9">
            <text:p>2026-04-22 14:00</text:p>
          </table:table-cell>
          <table:table-cell office:value-type="float" office:value="0.2548725" table:style-name="c9">
            <text:p>0.25487</text:p>
          </table:table-cell>
          <table:table-cell office:value-type="float" office:value="-0.3777852952442151" table:style-name="c10">
            <text:p>-0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06:45</text:p>
          </table:table-cell>
          <table:table-cell office:value-type="float" office:value="0.25192590000000004" table:style-name="c9">
            <text:p>0.25193</text:p>
          </table:table-cell>
          <table:table-cell office:value-type="string" table:style-name="c9">
            <text:p>2026-04-26 07:15</text:p>
          </table:table-cell>
          <table:table-cell office:value-type="float" office:value="0.25137425" table:style-name="c9">
            <text:p>0.25137</text:p>
          </table:table-cell>
          <table:table-cell office:value-type="float" office:value="-0.41843539141868114" table:style-name="c10">
            <text:p>-0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09:30</text:p>
          </table:table-cell>
          <table:table-cell office:value-type="float" office:value="0.25282635" table:style-name="c9">
            <text:p>0.25283</text:p>
          </table:table-cell>
          <table:table-cell office:value-type="string" table:style-name="c9">
            <text:p>2026-04-26 10:00</text:p>
          </table:table-cell>
          <table:table-cell office:value-type="float" office:value="0.2520739" table:style-name="c9">
            <text:p>0.25207</text:p>
          </table:table-cell>
          <table:table-cell office:value-type="float" office:value="-0.4969204064766086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00</text:p>
          </table:table-cell>
          <table:table-cell office:value-type="float" office:value="0.25302645" table:style-name="c9">
            <text:p>0.25303</text:p>
          </table:table-cell>
          <table:table-cell office:value-type="string" table:style-name="c9">
            <text:p>2026-04-29 10:30</text:p>
          </table:table-cell>
          <table:table-cell office:value-type="float" office:value="0.25377305000000006" table:style-name="c9">
            <text:p>0.25377</text:p>
          </table:table-cell>
          <table:table-cell office:value-type="float" office:value="0.0945781253501643" table:style-name="c11">
            <text:p>+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4:00</text:p>
          </table:table-cell>
          <table:table-cell office:value-type="float" office:value="0.25062524999999997" table:style-name="c9">
            <text:p>0.25063</text:p>
          </table:table-cell>
          <table:table-cell office:value-type="string" table:style-name="c9">
            <text:p>2026-05-01 14:30</text:p>
          </table:table-cell>
          <table:table-cell office:value-type="float" office:value="0.249875" table:style-name="c9">
            <text:p>0.24988</text:p>
          </table:table-cell>
          <table:table-cell office:value-type="float" office:value="-0.498652919049436" table:style-name="c10">
            <text:p>-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00</text:p>
          </table:table-cell>
          <table:table-cell office:value-type="float" office:value="0.25232609999999994" table:style-name="c9">
            <text:p>0.25233</text:p>
          </table:table-cell>
          <table:table-cell office:value-type="string" table:style-name="c9">
            <text:p>2026-05-04 02:30</text:p>
          </table:table-cell>
          <table:table-cell office:value-type="float" office:value="0.2520739" table:style-name="c9">
            <text:p>0.25207</text:p>
          </table:table-cell>
          <table:table-cell office:value-type="float" office:value="-0.2996502248875266" table:style-name="c10">
            <text:p>-0.3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00</text:p>
          </table:table-cell>
          <table:table-cell office:value-type="float" office:value="0.25262625" table:style-name="c9">
            <text:p>0.25263</text:p>
          </table:table-cell>
          <table:table-cell office:value-type="string" table:style-name="c9">
            <text:p>2026-05-04 15:30</text:p>
          </table:table-cell>
          <table:table-cell office:value-type="float" office:value="0.25057465" table:style-name="c9">
            <text:p>0.25057</text:p>
          </table:table-cell>
          <table:table-cell office:value-type="float" office:value="-1.0103853916012318" table:style-name="c10">
            <text:p>-1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7:00</text:p>
          </table:table-cell>
          <table:table-cell office:value-type="float" office:value="0.25482734999999995" table:style-name="c9">
            <text:p>0.25483</text:p>
          </table:table-cell>
          <table:table-cell office:value-type="string" table:style-name="c9">
            <text:p>2026-05-05 07:30</text:p>
          </table:table-cell>
          <table:table-cell office:value-type="float" office:value="0.2564717" table:style-name="c9">
            <text:p>0.25647</text:p>
          </table:table-cell>
          <table:table-cell office:value-type="float" office:value="0.44409011501320705" table:style-name="c11">
            <text:p>+0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7:45</text:p>
          </table:table-cell>
          <table:table-cell office:value-type="float" office:value="0.25802895" table:style-name="c9">
            <text:p>0.25803</text:p>
          </table:table-cell>
          <table:table-cell office:value-type="string" table:style-name="c9">
            <text:p>2026-05-05 08:15</text:p>
          </table:table-cell>
          <table:table-cell office:value-type="float" office:value="0.25757115" table:style-name="c9">
            <text:p>0.25757</text:p>
          </table:table-cell>
          <table:table-cell office:value-type="float" office:value="-0.3769672855894579" table:style-name="c10">
            <text:p>-0.4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1:00</text:p>
          </table:table-cell>
          <table:table-cell office:value-type="float" office:value="0.26133059999999997" table:style-name="c9">
            <text:p>0.26133</text:p>
          </table:table-cell>
          <table:table-cell office:value-type="string" table:style-name="c9">
            <text:p>2026-05-05 21:30</text:p>
          </table:table-cell>
          <table:table-cell office:value-type="float" office:value="0.2630684" table:style-name="c9">
            <text:p>0.26307</text:p>
          </table:table-cell>
          <table:table-cell office:value-type="float" office:value="0.46375214705052237" table:style-name="c11">
            <text:p>+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1:45</text:p>
          </table:table-cell>
          <table:table-cell office:value-type="float" office:value="0.2631315" table:style-name="c9">
            <text:p>0.26313</text:p>
          </table:table-cell>
          <table:table-cell office:value-type="string" table:style-name="c9">
            <text:p>2026-05-05 22:15</text:p>
          </table:table-cell>
          <table:table-cell office:value-type="float" office:value="0.2650674" table:style-name="c9">
            <text:p>0.26507</text:p>
          </table:table-cell>
          <table:table-cell office:value-type="float" office:value="0.5343450964251595" table:style-name="c11">
            <text:p>+0.5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2:30</text:p>
          </table:table-cell>
          <table:table-cell office:value-type="float" office:value="0.26443215" table:style-name="c9">
            <text:p>0.26443</text:p>
          </table:table-cell>
          <table:table-cell office:value-type="string" table:style-name="c9">
            <text:p>2026-05-05 23:00</text:p>
          </table:table-cell>
          <table:table-cell office:value-type="float" office:value="0.26236875000000004" table:style-name="c9">
            <text:p>0.26237</text:p>
          </table:table-cell>
          <table:table-cell office:value-type="float" office:value="-0.9786537420846564" table:style-name="c10">
            <text:p>-1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8:15</text:p>
          </table:table-cell>
          <table:table-cell office:value-type="float" office:value="0.26583284999999995" table:style-name="c9">
            <text:p>0.26583</text:p>
          </table:table-cell>
          <table:table-cell office:value-type="string" table:style-name="c9">
            <text:p>2026-05-06 08:45</text:p>
          </table:table-cell>
          <table:table-cell office:value-type="float" office:value="0.26896545" table:style-name="c9">
            <text:p>0.26897</text:p>
          </table:table-cell>
          <table:table-cell office:value-type="float" office:value="0.9761540251515433" table:style-name="c11">
            <text:p>+1.0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00</text:p>
          </table:table-cell>
          <table:table-cell office:value-type="float" office:value="0.272136" table:style-name="c9">
            <text:p>0.27214</text:p>
          </table:table-cell>
          <table:table-cell office:value-type="string" table:style-name="c9">
            <text:p>2026-05-06 09:30</text:p>
          </table:table-cell>
          <table:table-cell office:value-type="float" office:value="0.27056465" table:style-name="c9">
            <text:p>0.27056</text:p>
          </table:table-cell>
          <table:table-cell office:value-type="float" office:value="-0.776159249548003" table:style-name="c10">
            <text:p>-0.8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45</text:p>
          </table:table-cell>
          <table:table-cell office:value-type="float" office:value="0.2731365" table:style-name="c9">
            <text:p>0.27314</text:p>
          </table:table-cell>
          <table:table-cell office:value-type="string" table:style-name="c9">
            <text:p>2026-05-06 10:15</text:p>
          </table:table-cell>
          <table:table-cell office:value-type="float" office:value="0.2716641" table:style-name="c9">
            <text:p>0.27166</text:p>
          </table:table-cell>
          <table:table-cell office:value-type="float" office:value="-0.7378935206023174" table:style-name="c10">
            <text:p>-0.7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7:45</text:p>
          </table:table-cell>
          <table:table-cell office:value-type="float" office:value="0.27173579999999997" table:style-name="c9">
            <text:p>0.27174</text:p>
          </table:table-cell>
          <table:table-cell office:value-type="string" table:style-name="c9">
            <text:p>2026-05-08 18:15</text:p>
          </table:table-cell>
          <table:table-cell office:value-type="float" office:value="0.2716641" table:style-name="c9">
            <text:p>0.27166</text:p>
          </table:table-cell>
          <table:table-cell office:value-type="float" office:value="-0.22623317792501707" table:style-name="c10">
            <text:p>-0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21:45</text:p>
          </table:table-cell>
          <table:table-cell office:value-type="float" office:value="0.2773386" table:style-name="c9">
            <text:p>0.27734</text:p>
          </table:table-cell>
          <table:table-cell office:value-type="string" table:style-name="c9">
            <text:p>2026-05-08 22:15</text:p>
          </table:table-cell>
          <table:table-cell office:value-type="float" office:value="0.2770614" table:style-name="c9">
            <text:p>0.27706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2:00</text:p>
          </table:table-cell>
          <table:table-cell office:value-type="float" office:value="0.2777388" table:style-name="c9">
            <text:p>0.27774</text:p>
          </table:table-cell>
          <table:table-cell office:value-type="string" table:style-name="c9">
            <text:p>2026-05-09 02:30</text:p>
          </table:table-cell>
          <table:table-cell office:value-type="float" office:value="0.27656165" table:style-name="c9">
            <text:p>0.27656</text:p>
          </table:table-cell>
          <table:table-cell office:value-type="float" office:value="-0.6228862292016912" table:style-name="c10">
            <text:p>-0.6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18:30</text:p>
          </table:table-cell>
          <table:table-cell office:value-type="float" office:value="0.27303645" table:style-name="c9">
            <text:p>0.27304</text:p>
          </table:table-cell>
          <table:table-cell office:value-type="string" table:style-name="c9">
            <text:p>2026-05-09 19:00</text:p>
          </table:table-cell>
          <table:table-cell office:value-type="float" office:value="0.27186400000000005" table:style-name="c9">
            <text:p>0.27186</text:p>
          </table:table-cell>
          <table:table-cell office:value-type="float" office:value="-0.6284531373008773" table:style-name="c10">
            <text:p>-0.6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8:30</text:p>
          </table:table-cell>
          <table:table-cell office:value-type="float" office:value="0.27293639999999997" table:style-name="c9">
            <text:p>0.27294</text:p>
          </table:table-cell>
          <table:table-cell office:value-type="string" table:style-name="c9">
            <text:p>2026-05-10 09:00</text:p>
          </table:table-cell>
          <table:table-cell office:value-type="float" office:value="0.2730634" table:style-name="c9">
            <text:p>0.27306</text:p>
          </table:table-cell>
          <table:table-cell office:value-type="float" office:value="-0.15346202873633974" table:style-name="c10">
            <text:p>-0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5:45</text:p>
          </table:table-cell>
          <table:table-cell office:value-type="float" office:value="0.27743864999999995" table:style-name="c9">
            <text:p>0.27744</text:p>
          </table:table-cell>
          <table:table-cell office:value-type="string" table:style-name="c9">
            <text:p>2026-05-10 16:15</text:p>
          </table:table-cell>
          <table:table-cell office:value-type="float" office:value="0.2814592" table:style-name="c9">
            <text:p>0.28146</text:p>
          </table:table-cell>
          <table:table-cell office:value-type="float" office:value="1.2463703450114494" table:style-name="c11">
            <text:p>+1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30</text:p>
          </table:table-cell>
          <table:table-cell office:value-type="float" office:value="0.28404195" table:style-name="c9">
            <text:p>0.28404</text:p>
          </table:table-cell>
          <table:table-cell office:value-type="string" table:style-name="c9">
            <text:p>2026-05-10 17:00</text:p>
          </table:table-cell>
          <table:table-cell office:value-type="float" office:value="0.28445770000000004" table:style-name="c9">
            <text:p>0.28446</text:p>
          </table:table-cell>
          <table:table-cell office:value-type="float" office:value="-0.05382336739342408" table:style-name="c10">
            <text:p>-0.1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10:15</text:p>
          </table:table-cell>
          <table:table-cell office:value-type="float" office:value="0.27983985" table:style-name="c9">
            <text:p>0.27984</text:p>
          </table:table-cell>
          <table:table-cell office:value-type="string" table:style-name="c9">
            <text:p>2026-05-11 10:45</text:p>
          </table:table-cell>
          <table:table-cell office:value-type="float" office:value="0.27986000000000005" table:style-name="c9">
            <text:p>0.27986</text:p>
          </table:table-cell>
          <table:table-cell office:value-type="float" office:value="-0.19271384686633253" table:style-name="c10">
            <text:p>-0.2</text:p>
          </table:table-cell>
        </table:table-row>
        <table:table-row>
          <table:table-cell office:value-type="string" table:style-name="c8">
            <text:p>ADA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6:45</text:p>
          </table:table-cell>
          <table:table-cell office:value-type="float" office:value="0.24732359999999998" table:style-name="c9">
            <text:p>0.24732</text:p>
          </table:table-cell>
          <table:table-cell office:value-type="string" table:style-name="c9">
            <text:p>2026-05-25 17:15</text:p>
          </table:table-cell>
          <table:table-cell office:value-type="float" office:value="0.2468765" table:style-name="c9">
            <text:p>0.24688</text:p>
          </table:table-cell>
          <table:table-cell office:value-type="float" office:value="-0.3803139382978493" table:style-name="c10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0:45</text:p>
          </table:table-cell>
          <table:table-cell office:value-type="float" office:value="0.08394195" table:style-name="c1">
            <text:p>0.083942</text:p>
          </table:table-cell>
          <table:table-cell office:value-type="string" table:style-name="c1">
            <text:p>2026-03-10 01:15</text:p>
          </table:table-cell>
          <table:table-cell office:value-type="float" office:value="0.083958" table:style-name="c1">
            <text:p>0.083958</text:p>
          </table:table-cell>
          <table:table-cell office:value-type="float" office:value="-0.18081786520326437" table:style-name="c12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0848424" table:style-name="c1">
            <text:p>0.084842</text:p>
          </table:table-cell>
          <table:table-cell office:value-type="string" table:style-name="c1">
            <text:p>2026-03-10 03:15</text:p>
          </table:table-cell>
          <table:table-cell office:value-type="float" office:value="0.08445775000000001" table:style-name="c1">
            <text:p>0.084458</text:p>
          </table:table-cell>
          <table:table-cell office:value-type="float" office:value="-0.6523637264504445" table:style-name="c12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30</text:p>
          </table:table-cell>
          <table:table-cell office:value-type="float" office:value="0.08474235" table:style-name="c1">
            <text:p>0.084742</text:p>
          </table:table-cell>
          <table:table-cell office:value-type="string" table:style-name="c1">
            <text:p>2026-03-10 04:00</text:p>
          </table:table-cell>
          <table:table-cell office:value-type="float" office:value="0.08435780000000001" table:style-name="c1">
            <text:p>0.084358</text:p>
          </table:table-cell>
          <table:table-cell office:value-type="float" office:value="-0.6527801532527522" table:style-name="c12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7:30</text:p>
          </table:table-cell>
          <table:table-cell office:value-type="float" office:value="0.0858429" table:style-name="c1">
            <text:p>0.085843</text:p>
          </table:table-cell>
          <table:table-cell office:value-type="string" table:style-name="c1">
            <text:p>2026-03-10 08:00</text:p>
          </table:table-cell>
          <table:table-cell office:value-type="float" office:value="0.0855572" table:style-name="c1">
            <text:p>0.085557</text:p>
          </table:table-cell>
          <table:table-cell office:value-type="float" office:value="-0.5320519726150996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0.08944469999999999" table:style-name="c1">
            <text:p>0.089445</text:p>
          </table:table-cell>
          <table:table-cell office:value-type="string" table:style-name="c1">
            <text:p>2026-03-10 15:30</text:p>
          </table:table-cell>
          <table:table-cell office:value-type="float" office:value="0.08815590000000001" table:style-name="c1">
            <text:p>0.088156</text:p>
          </table:table-cell>
          <table:table-cell office:value-type="float" office:value="-1.6379099534125419" table:style-name="c12">
            <text:p>-1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15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11 13:45</text:p>
          </table:table-cell>
          <table:table-cell office:value-type="float" office:value="0.0867566" table:style-name="c1">
            <text:p>0.086757</text:p>
          </table:table-cell>
          <table:table-cell office:value-type="float" office:value="-0.18465558846874064" table:style-name="c12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15</text:p>
          </table:table-cell>
          <table:table-cell office:value-type="float" office:value="0.0868434" table:style-name="c1">
            <text:p>0.086843</text:p>
          </table:table-cell>
          <table:table-cell office:value-type="string" table:style-name="c1">
            <text:p>2026-03-11 14:45</text:p>
          </table:table-cell>
          <table:table-cell office:value-type="float" office:value="0.08715640000000001" table:style-name="c1">
            <text:p>0.087156</text:p>
          </table:table-cell>
          <table:table-cell office:value-type="float" office:value="0.15979839158761777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45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12 11:15</text:p>
          </table:table-cell>
          <table:table-cell office:value-type="float" office:value="0.08645675" table:style-name="c1">
            <text:p>0.086457</text:p>
          </table:table-cell>
          <table:table-cell office:value-type="float" office:value="-0.5296394977251984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7:45</text:p>
          </table:table-cell>
          <table:table-cell office:value-type="float" office:value="0.08774385" table:style-name="c1">
            <text:p>0.087744</text:p>
          </table:table-cell>
          <table:table-cell office:value-type="string" table:style-name="c1">
            <text:p>2026-03-12 18:15</text:p>
          </table:table-cell>
          <table:table-cell office:value-type="float" office:value="0.08735630000000001" table:style-name="c1">
            <text:p>0.087356</text:p>
          </table:table-cell>
          <table:table-cell office:value-type="float" office:value="-0.6407004521684301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2:15</text:p>
          </table:table-cell>
          <table:table-cell office:value-type="float" office:value="0.08874435" table:style-name="c1">
            <text:p>0.088744</text:p>
          </table:table-cell>
          <table:table-cell office:value-type="string" table:style-name="c1">
            <text:p>2026-03-12 22:45</text:p>
          </table:table-cell>
          <table:table-cell office:value-type="float" office:value="0.0885557" table:style-name="c1">
            <text:p>0.088556</text:p>
          </table:table-cell>
          <table:table-cell office:value-type="float" office:value="-0.41205197209738254" table:style-name="c12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15</text:p>
          </table:table-cell>
          <table:table-cell office:value-type="float" office:value="0.0898449" table:style-name="c1">
            <text:p>0.089845</text:p>
          </table:table-cell>
          <table:table-cell office:value-type="string" table:style-name="c1">
            <text:p>2026-03-13 00:45</text:p>
          </table:table-cell>
          <table:table-cell office:value-type="float" office:value="0.0907546" table:style-name="c1">
            <text:p>0.090755</text:p>
          </table:table-cell>
          <table:table-cell office:value-type="float" office:value="0.8105986590223768" table:style-name="c13">
            <text:p>+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45</text:p>
          </table:table-cell>
          <table:table-cell office:value-type="float" office:value="0.0916458" table:style-name="c1">
            <text:p>0.091646</text:p>
          </table:table-cell>
          <table:table-cell office:value-type="string" table:style-name="c1">
            <text:p>2026-03-13 10:15</text:p>
          </table:table-cell>
          <table:table-cell office:value-type="float" office:value="0.09205395000000001" table:style-name="c1">
            <text:p>0.092054</text:p>
          </table:table-cell>
          <table:table-cell office:value-type="float" office:value="0.24456565816437514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45</text:p>
          </table:table-cell>
          <table:table-cell office:value-type="float" office:value="0.09374685" table:style-name="c1">
            <text:p>0.093747</text:p>
          </table:table-cell>
          <table:table-cell office:value-type="string" table:style-name="c1">
            <text:p>2026-03-13 11:15</text:p>
          </table:table-cell>
          <table:table-cell office:value-type="float" office:value="0.09365315" table:style-name="c1">
            <text:p>0.093653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0.09574784999999998" table:style-name="c1">
            <text:p>0.095748</text:p>
          </table:table-cell>
          <table:table-cell office:value-type="string" table:style-name="c1">
            <text:p>2026-03-13 13:30</text:p>
          </table:table-cell>
          <table:table-cell office:value-type="float" office:value="0.0961519" table:style-name="c1">
            <text:p>0.096152</text:p>
          </table:table-cell>
          <table:table-cell office:value-type="float" office:value="0.22125024415693417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4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4 05:15</text:p>
          </table:table-cell>
          <table:table-cell office:value-type="float" office:value="0.09415290000000001" table:style-name="c1">
            <text:p>0.094153</text:p>
          </table:table-cell>
          <table:table-cell office:value-type="float" office:value="-2.4738011545628824" table:style-name="c12">
            <text:p>-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23:45</text:p>
          </table:table-cell>
          <table:table-cell office:value-type="float" office:value="0.09104549999999999" table:style-name="c1">
            <text:p>0.091045</text:p>
          </table:table-cell>
          <table:table-cell office:value-type="string" table:style-name="c1">
            <text:p>2026-03-15 00:15</text:p>
          </table:table-cell>
          <table:table-cell office:value-type="float" office:value="0.09015490000000001" table:style-name="c1">
            <text:p>0.090155</text:p>
          </table:table-cell>
          <table:table-cell office:value-type="float" office:value="-1.176136816317086" table:style-name="c12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9204599999999999" table:style-name="c1">
            <text:p>0.092046</text:p>
          </table:table-cell>
          <table:table-cell office:value-type="string" table:style-name="c1">
            <text:p>2026-03-15 11:30</text:p>
          </table:table-cell>
          <table:table-cell office:value-type="float" office:value="0.09215390000000001" table:style-name="c1">
            <text:p>0.092154</text:p>
          </table:table-cell>
          <table:table-cell office:value-type="float" office:value="-0.08291033407207271" table:style-name="c12">
            <text:p>-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2:45</text:p>
          </table:table-cell>
          <table:table-cell office:value-type="float" office:value="0.09254625" table:style-name="c1">
            <text:p>0.092546</text:p>
          </table:table-cell>
          <table:table-cell office:value-type="string" table:style-name="c1">
            <text:p>2026-03-15 13:15</text:p>
          </table:table-cell>
          <table:table-cell office:value-type="float" office:value="0.0915542" table:style-name="c1">
            <text:p>0.091554</text:p>
          </table:table-cell>
          <table:table-cell office:value-type="float" office:value="-1.2697076821589048" table:style-name="c12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45</text:p>
          </table:table-cell>
          <table:table-cell office:value-type="float" office:value="0.09234614999999999" table:style-name="c1">
            <text:p>0.092346</text:p>
          </table:table-cell>
          <table:table-cell office:value-type="string" table:style-name="c1">
            <text:p>2026-03-15 22:15</text:p>
          </table:table-cell>
          <table:table-cell office:value-type="float" office:value="0.09185405" table:style-name="c1">
            <text:p>0.091854</text:p>
          </table:table-cell>
          <table:table-cell office:value-type="float" office:value="-0.7317210798175933" table:style-name="c12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0.09284639999999998" table:style-name="c1">
            <text:p>0.092846</text:p>
          </table:table-cell>
          <table:table-cell office:value-type="string" table:style-name="c1">
            <text:p>2026-03-15 23:15</text:p>
          </table:table-cell>
          <table:table-cell office:value-type="float" office:value="0.0927536" table:style-name="c1">
            <text:p>0.092754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00</text:p>
          </table:table-cell>
          <table:table-cell office:value-type="float" office:value="0.09354675" table:style-name="c1">
            <text:p>0.093547</text:p>
          </table:table-cell>
          <table:table-cell office:value-type="string" table:style-name="c1">
            <text:p>2026-03-16 04:30</text:p>
          </table:table-cell>
          <table:table-cell office:value-type="float" office:value="0.0937531" table:style-name="c1">
            <text:p>0.093753</text:p>
          </table:table-cell>
          <table:table-cell office:value-type="float" office:value="0.02024394551387587" table:style-name="c13">
            <text:p>+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00</text:p>
          </table:table-cell>
          <table:table-cell office:value-type="float" office:value="0.0944472" table:style-name="c1">
            <text:p>0.094447</text:p>
          </table:table-cell>
          <table:table-cell office:value-type="string" table:style-name="c1">
            <text:p>2026-03-16 05:30</text:p>
          </table:table-cell>
          <table:table-cell office:value-type="float" office:value="0.0943528" table:style-name="c1">
            <text:p>0.094353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45</text:p>
          </table:table-cell>
          <table:table-cell office:value-type="float" office:value="0.09714855" table:style-name="c1">
            <text:p>0.097149</text:p>
          </table:table-cell>
          <table:table-cell office:value-type="string" table:style-name="c1">
            <text:p>2026-03-16 22:15</text:p>
          </table:table-cell>
          <table:table-cell office:value-type="float" office:value="0.09755120000000002" table:style-name="c1">
            <text:p>0.097551</text:p>
          </table:table-cell>
          <table:table-cell office:value-type="float" office:value="0.2137398357464182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0.09754875" table:style-name="c1">
            <text:p>0.097549</text:p>
          </table:table-cell>
          <table:table-cell office:value-type="string" table:style-name="c1">
            <text:p>2026-03-17 00:45</text:p>
          </table:table-cell>
          <table:table-cell office:value-type="float" office:value="0.09695150000000001" table:style-name="c1">
            <text:p>0.096952</text:p>
          </table:table-cell>
          <table:table-cell office:value-type="float" office:value="-0.8109340698881251" table:style-name="c12">
            <text:p>-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45</text:p>
          </table:table-cell>
          <table:table-cell office:value-type="float" office:value="0.0956478" table:style-name="c1">
            <text:p>0.095648</text:p>
          </table:table-cell>
          <table:table-cell office:value-type="string" table:style-name="c1">
            <text:p>2026-03-17 10:15</text:p>
          </table:table-cell>
          <table:table-cell office:value-type="float" office:value="0.09545225" table:style-name="c1">
            <text:p>0.095452</text:p>
          </table:table-cell>
          <table:table-cell office:value-type="float" office:value="-0.40393929368996995" table:style-name="c12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45</text:p>
          </table:table-cell>
          <table:table-cell office:value-type="float" office:value="0.09614805" table:style-name="c1">
            <text:p>0.096148</text:p>
          </table:table-cell>
          <table:table-cell office:value-type="string" table:style-name="c1">
            <text:p>2026-03-18 04:15</text:p>
          </table:table-cell>
          <table:table-cell office:value-type="float" office:value="0.09525235" table:style-name="c1">
            <text:p>0.095252</text:p>
          </table:table-cell>
          <table:table-cell office:value-type="float" office:value="-1.1296219191653023" table:style-name="c12">
            <text:p>-1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0.0884442" table:style-name="c1">
            <text:p>0.088444</text:p>
          </table:table-cell>
          <table:table-cell office:value-type="string" table:style-name="c1">
            <text:p>2026-03-25 13:45</text:p>
          </table:table-cell>
          <table:table-cell office:value-type="float" office:value="0.08805595000000001" table:style-name="c1">
            <text:p>0.088056</text:p>
          </table:table-cell>
          <table:table-cell office:value-type="float" office:value="-0.6379998281967558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8374184999999999" table:style-name="c1">
            <text:p>0.083742</text:p>
          </table:table-cell>
          <table:table-cell office:value-type="string" table:style-name="c1">
            <text:p>2026-03-30 08:30</text:p>
          </table:table-cell>
          <table:table-cell office:value-type="float" office:value="0.08385805" table:style-name="c1">
            <text:p>0.083858</text:p>
          </table:table-cell>
          <table:table-cell office:value-type="float" office:value="-0.06141760893746406" table:style-name="c12">
            <text:p>-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1:45</text:p>
          </table:table-cell>
          <table:table-cell office:value-type="float" office:value="0.0830415" table:style-name="c1">
            <text:p>0.083042</text:p>
          </table:table-cell>
          <table:table-cell office:value-type="string" table:style-name="c1">
            <text:p>2026-03-30 22:15</text:p>
          </table:table-cell>
          <table:table-cell office:value-type="float" office:value="0.08285855" table:style-name="c1">
            <text:p>0.082859</text:p>
          </table:table-cell>
          <table:table-cell office:value-type="float" office:value="-0.4197711282310723" table:style-name="c12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0.0830415" table:style-name="c1">
            <text:p>0.083042</text:p>
          </table:table-cell>
          <table:table-cell office:value-type="string" table:style-name="c1">
            <text:p>2026-03-31 02:15</text:p>
          </table:table-cell>
          <table:table-cell office:value-type="float" office:value="0.08335830000000001" table:style-name="c1">
            <text:p>0.083358</text:p>
          </table:table-cell>
          <table:table-cell office:value-type="float" office:value="0.1808333884864899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5:15</text:p>
          </table:table-cell>
          <table:table-cell office:value-type="float" office:value="0.08394195" table:style-name="c1">
            <text:p>0.083942</text:p>
          </table:table-cell>
          <table:table-cell office:value-type="string" table:style-name="c1">
            <text:p>2026-03-31 05:45</text:p>
          </table:table-cell>
          <table:table-cell office:value-type="float" office:value="0.08385805" table:style-name="c1">
            <text:p>0.08385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7:30</text:p>
          </table:table-cell>
          <table:table-cell office:value-type="float" office:value="0.0848424" table:style-name="c1">
            <text:p>0.084842</text:p>
          </table:table-cell>
          <table:table-cell office:value-type="string" table:style-name="c1">
            <text:p>2026-03-31 08:00</text:p>
          </table:table-cell>
          <table:table-cell office:value-type="float" office:value="0.0857571" table:style-name="c1">
            <text:p>0.085757</text:p>
          </table:table-cell>
          <table:table-cell office:value-type="float" office:value="0.876061446988774" table:style-name="c13">
            <text:p>+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8:15</text:p>
          </table:table-cell>
          <table:table-cell office:value-type="float" office:value="0.086043" table:style-name="c1">
            <text:p>0.086043</text:p>
          </table:table-cell>
          <table:table-cell office:value-type="string" table:style-name="c1">
            <text:p>2026-03-31 08:45</text:p>
          </table:table-cell>
          <table:table-cell office:value-type="float" office:value="0.08625685000000001" table:style-name="c1">
            <text:p>0.086257</text:p>
          </table:table-cell>
          <table:table-cell office:value-type="float" office:value="0.04814169293263504" table:style-name="c13">
            <text:p>+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0:00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31 10:30</text:p>
          </table:table-cell>
          <table:table-cell office:value-type="float" office:value="0.0877561" table:style-name="c1">
            <text:p>0.087756</text:p>
          </table:table-cell>
          <table:table-cell office:value-type="float" office:value="0.9652907757194074" table:style-name="c13">
            <text:p>+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45</text:p>
          </table:table-cell>
          <table:table-cell office:value-type="float" office:value="0.08774385" table:style-name="c1">
            <text:p>0.087744</text:p>
          </table:table-cell>
          <table:table-cell office:value-type="string" table:style-name="c1">
            <text:p>2026-03-31 15:15</text:p>
          </table:table-cell>
          <table:table-cell office:value-type="float" office:value="0.08885555" table:style-name="c1">
            <text:p>0.088856</text:p>
          </table:table-cell>
          <table:table-cell office:value-type="float" office:value="1.0645506842360097" table:style-name="c13">
            <text:p>+1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9:45</text:p>
          </table:table-cell>
          <table:table-cell office:value-type="float" office:value="0.09274635" table:style-name="c1">
            <text:p>0.092746</text:p>
          </table:table-cell>
          <table:table-cell office:value-type="string" table:style-name="c1">
            <text:p>2026-03-31 20:15</text:p>
          </table:table-cell>
          <table:table-cell office:value-type="float" office:value="0.09215390000000001" table:style-name="c1">
            <text:p>0.092154</text:p>
          </table:table-cell>
          <table:table-cell office:value-type="float" office:value="-0.8374083142894451" table:style-name="c12">
            <text:p>-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20:45</text:p>
          </table:table-cell>
          <table:table-cell office:value-type="float" office:value="0.0936468" table:style-name="c1">
            <text:p>0.093647</text:p>
          </table:table-cell>
          <table:table-cell office:value-type="string" table:style-name="c1">
            <text:p>2026-03-31 21:15</text:p>
          </table:table-cell>
          <table:table-cell office:value-type="float" office:value="0.09265365" table:style-name="c1">
            <text:p>0.092654</text:p>
          </table:table-cell>
          <table:table-cell office:value-type="float" office:value="-1.2583074342636391" table:style-name="c12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0:30</text:p>
          </table:table-cell>
          <table:table-cell office:value-type="float" office:value="0.09474735000000001" table:style-name="c1">
            <text:p>0.094747</text:p>
          </table:table-cell>
          <table:table-cell office:value-type="string" table:style-name="c1">
            <text:p>2026-04-01 01:00</text:p>
          </table:table-cell>
          <table:table-cell office:value-type="float" office:value="0.09685155000000001" table:style-name="c1">
            <text:p>0.096852</text:p>
          </table:table-cell>
          <table:table-cell office:value-type="float" office:value="2.0165141838267786" table:style-name="c13">
            <text:p>+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1:15</text:p>
          </table:table-cell>
          <table:table-cell office:value-type="float" office:value="0.09834915" table:style-name="c1">
            <text:p>0.098349</text:p>
          </table:table-cell>
          <table:table-cell office:value-type="string" table:style-name="c1">
            <text:p>2026-04-01 01:45</text:p>
          </table:table-cell>
          <table:table-cell office:value-type="float" office:value="0.0985507" table:style-name="c1">
            <text:p>0.098551</text:p>
          </table:table-cell>
          <table:table-cell office:value-type="float" office:value="0.004623477376286544" table:style-name="c13">
            <text:p>+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4:15</text:p>
          </table:table-cell>
          <table:table-cell office:value-type="float" office:value="0.09934965" table:style-name="c1">
            <text:p>0.09935</text:p>
          </table:table-cell>
          <table:table-cell office:value-type="string" table:style-name="c1">
            <text:p>2026-04-01 04:45</text:p>
          </table:table-cell>
          <table:table-cell office:value-type="float" office:value="0.10144925000000002" table:style-name="c1">
            <text:p>0.10145</text:p>
          </table:table-cell>
          <table:table-cell office:value-type="float" office:value="1.9092195586497107" table:style-name="c13">
            <text:p>+1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00</text:p>
          </table:table-cell>
          <table:table-cell office:value-type="float" office:value="0.10135065" table:style-name="c1">
            <text:p>0.10135</text:p>
          </table:table-cell>
          <table:table-cell office:value-type="string" table:style-name="c1">
            <text:p>2026-04-01 05:30</text:p>
          </table:table-cell>
          <table:table-cell office:value-type="float" office:value="0.10304845" table:style-name="c1">
            <text:p>0.10305</text:p>
          </table:table-cell>
          <table:table-cell office:value-type="float" office:value="1.4719255855290436" table:style-name="c13">
            <text:p>+1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0:45</text:p>
          </table:table-cell>
          <table:table-cell office:value-type="float" office:value="0.10515255" table:style-name="c1">
            <text:p>0.10515</text:p>
          </table:table-cell>
          <table:table-cell office:value-type="string" table:style-name="c1">
            <text:p>2026-04-01 11:15</text:p>
          </table:table-cell>
          <table:table-cell office:value-type="float" office:value="0.1053473" table:style-name="c1">
            <text:p>0.10535</text:p>
          </table:table-cell>
          <table:table-cell office:value-type="float" office:value="-0.015063118012803578" table:style-name="c12">
            <text:p>-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7:30</text:p>
          </table:table-cell>
          <table:table-cell office:value-type="float" office:value="0.10195095" table:style-name="c1">
            <text:p>0.10195</text:p>
          </table:table-cell>
          <table:table-cell office:value-type="string" table:style-name="c1">
            <text:p>2026-04-02 08:00</text:p>
          </table:table-cell>
          <table:table-cell office:value-type="float" office:value="0.1015492" table:style-name="c1">
            <text:p>0.10155</text:p>
          </table:table-cell>
          <table:table-cell office:value-type="float" office:value="-0.5931743164727554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10:00</text:p>
          </table:table-cell>
          <table:table-cell office:value-type="float" office:value="0.10375184999999999" table:style-name="c1">
            <text:p>0.10375</text:p>
          </table:table-cell>
          <table:table-cell office:value-type="string" table:style-name="c1">
            <text:p>2026-04-02 10:30</text:p>
          </table:table-cell>
          <table:table-cell office:value-type="float" office:value="0.10324835" table:style-name="c1">
            <text:p>0.10325</text:p>
          </table:table-cell>
          <table:table-cell office:value-type="float" office:value="-0.6842224515996365" table:style-name="c12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14:00</text:p>
          </table:table-cell>
          <table:table-cell office:value-type="float" office:value="0.10435215" table:style-name="c1">
            <text:p>0.10435</text:p>
          </table:table-cell>
          <table:table-cell office:value-type="string" table:style-name="c1">
            <text:p>2026-04-02 14:30</text:p>
          </table:table-cell>
          <table:table-cell office:value-type="float" office:value="0.10684655" table:style-name="c1">
            <text:p>0.10685</text:p>
          </table:table-cell>
          <table:table-cell office:value-type="float" office:value="2.1856892709445797" table:style-name="c13">
            <text:p>+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0.12516254999999998" table:style-name="c1">
            <text:p>0.12516</text:p>
          </table:table-cell>
          <table:table-cell office:value-type="string" table:style-name="c1">
            <text:p>2026-04-03 21:45</text:p>
          </table:table-cell>
          <table:table-cell office:value-type="float" office:value="0.12483755" table:style-name="c1">
            <text:p>0.12484</text:p>
          </table:table-cell>
          <table:table-cell office:value-type="float" office:value="-0.45904327009155255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1:00</text:p>
          </table:table-cell>
          <table:table-cell office:value-type="float" office:value="0.12236115" table:style-name="c1">
            <text:p>0.12236</text:p>
          </table:table-cell>
          <table:table-cell office:value-type="string" table:style-name="c1">
            <text:p>2026-04-05 21:30</text:p>
          </table:table-cell>
          <table:table-cell office:value-type="float" office:value="0.121939" table:style-name="c1">
            <text:p>0.12194</text:p>
          </table:table-cell>
          <table:table-cell office:value-type="float" office:value="-0.544213633984314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2:15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05 22:45</text:p>
          </table:table-cell>
          <table:table-cell office:value-type="float" office:value="0.12223885000000001" table:style-name="c1">
            <text:p>0.12224</text:p>
          </table:table-cell>
          <table:table-cell office:value-type="float" office:value="-1.7457471595789253" table:style-name="c12">
            <text:p>-1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4:00</text:p>
          </table:table-cell>
          <table:table-cell office:value-type="float" office:value="0.12176084999999999" table:style-name="c1">
            <text:p>0.12176</text:p>
          </table:table-cell>
          <table:table-cell office:value-type="string" table:style-name="c1">
            <text:p>2026-04-06 04:30</text:p>
          </table:table-cell>
          <table:table-cell office:value-type="float" office:value="0.12273860000000002" table:style-name="c1">
            <text:p>0.12274</text:p>
          </table:table-cell>
          <table:table-cell office:value-type="float" office:value="0.601503306358353" table:style-name="c13">
            <text:p>+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45</text:p>
          </table:table-cell>
          <table:table-cell office:value-type="float" office:value="0.12616304999999997" table:style-name="c1">
            <text:p>0.12616</text:p>
          </table:table-cell>
          <table:table-cell office:value-type="string" table:style-name="c1">
            <text:p>2026-04-06 12:15</text:p>
          </table:table-cell>
          <table:table-cell office:value-type="float" office:value="0.1249375" table:style-name="c1">
            <text:p>0.12494</text:p>
          </table:table-cell>
          <table:table-cell office:value-type="float" office:value="-1.169359858135921" table:style-name="c12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2:30</text:p>
          </table:table-cell>
          <table:table-cell office:value-type="float" office:value="0.1264632" table:style-name="c1">
            <text:p>0.12646</text:p>
          </table:table-cell>
          <table:table-cell office:value-type="string" table:style-name="c1">
            <text:p>2026-04-06 13:00</text:p>
          </table:table-cell>
          <table:table-cell office:value-type="float" office:value="0.12383805" table:style-name="c1">
            <text:p>0.12384</text:p>
          </table:table-cell>
          <table:table-cell office:value-type="float" office:value="-2.2715716998699786" table:style-name="c12">
            <text:p>-2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6:00</text:p>
          </table:table-cell>
          <table:table-cell office:value-type="float" office:value="0.12356175" table:style-name="c1">
            <text:p>0.12356</text:p>
          </table:table-cell>
          <table:table-cell office:value-type="string" table:style-name="c1">
            <text:p>2026-04-08 06:30</text:p>
          </table:table-cell>
          <table:table-cell office:value-type="float" office:value="0.1223388" table:style-name="c1">
            <text:p>0.12234</text:p>
          </table:table-cell>
          <table:table-cell office:value-type="float" office:value="-1.1876695346254018" table:style-name="c12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11735865" table:style-name="c1">
            <text:p>0.11736</text:p>
          </table:table-cell>
          <table:table-cell office:value-type="string" table:style-name="c1">
            <text:p>2026-04-08 22:00</text:p>
          </table:table-cell>
          <table:table-cell office:value-type="float" office:value="0.11814090000000001" table:style-name="c1">
            <text:p>0.11814</text:p>
          </table:table-cell>
          <table:table-cell office:value-type="float" office:value="0.4653140956376145" table:style-name="c13">
            <text:p>+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2:15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4-08 22:45</text:p>
          </table:table-cell>
          <table:table-cell office:value-type="float" office:value="0.11644175000000001" table:style-name="c1">
            <text:p>0.11644</text:p>
          </table:table-cell>
          <table:table-cell office:value-type="float" office:value="-1.06396295740544" table:style-name="c12">
            <text:p>-1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4:3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14 05:00</text:p>
          </table:table-cell>
          <table:table-cell office:value-type="float" office:value="0.11404295" table:style-name="c1">
            <text:p>0.11404</text:p>
          </table:table-cell>
          <table:table-cell office:value-type="float" office:value="0.5818736458031104" table:style-name="c13">
            <text:p>+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4-15 00:45</text:p>
          </table:table-cell>
          <table:table-cell office:value-type="float" office:value="0.107946" table:style-name="c1">
            <text:p>0.10795</text:p>
          </table:table-cell>
          <table:table-cell office:value-type="float" office:value="-0.6675481945374151" table:style-name="c12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1:1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4-15 01:45</text:p>
          </table:table-cell>
          <table:table-cell office:value-type="float" office:value="0.1089455" table:style-name="c1">
            <text:p>0.10895</text:p>
          </table:table-cell>
          <table:table-cell office:value-type="float" office:value="0.2521967295872507" table:style-name="c13">
            <text:p>+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4:30</text:p>
          </table:table-cell>
          <table:table-cell office:value-type="float" office:value="0.10945469999999999" table:style-name="c1">
            <text:p>0.10945</text:p>
          </table:table-cell>
          <table:table-cell office:value-type="string" table:style-name="c1">
            <text:p>2026-04-15 05:00</text:p>
          </table:table-cell>
          <table:table-cell office:value-type="float" office:value="0.10914540000000002" table:style-name="c1">
            <text:p>0.10915</text:p>
          </table:table-cell>
          <table:table-cell office:value-type="float" office:value="-0.4819177747506176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5:4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4-15 06:15</text:p>
          </table:table-cell>
          <table:table-cell office:value-type="float" office:value="0.11004495000000002" table:style-name="c1">
            <text:p>0.11004</text:p>
          </table:table-cell>
          <table:table-cell office:value-type="float" office:value="-0.39012241161631156" table:style-name="c12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00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5 16:30</text:p>
          </table:table-cell>
          <table:table-cell office:value-type="float" office:value="0.11264365" table:style-name="c1">
            <text:p>0.11264</text:p>
          </table:table-cell>
          <table:table-cell office:value-type="float" office:value="0.4131315429416471" table:style-name="c13">
            <text:p>+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00</text:p>
          </table:table-cell>
          <table:table-cell office:value-type="float" office:value="0.11295645" table:style-name="c1">
            <text:p>0.11296</text:p>
          </table:table-cell>
          <table:table-cell office:value-type="string" table:style-name="c1">
            <text:p>2026-04-15 19:30</text:p>
          </table:table-cell>
          <table:table-cell office:value-type="float" office:value="0.11354320000000001" table:style-name="c1">
            <text:p>0.11354</text:p>
          </table:table-cell>
          <table:table-cell office:value-type="float" office:value="0.318509605427586" table:style-name="c13">
            <text:p>+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4-15 20:15</text:p>
          </table:table-cell>
          <table:table-cell office:value-type="float" office:value="0.11304345000000002" table:style-name="c1">
            <text:p>0.11304</text:p>
          </table:table-cell>
          <table:table-cell office:value-type="float" office:value="-1.2599863435619918" table:style-name="c12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2:30</text:p>
          </table:table-cell>
          <table:table-cell office:value-type="float" office:value="0.11415704999999998" table:style-name="c1">
            <text:p>0.11416</text:p>
          </table:table-cell>
          <table:table-cell office:value-type="string" table:style-name="c1">
            <text:p>2026-04-15 23:00</text:p>
          </table:table-cell>
          <table:table-cell office:value-type="float" office:value="0.11304345000000002" table:style-name="c1">
            <text:p>0.11304</text:p>
          </table:table-cell>
          <table:table-cell office:value-type="float" office:value="-1.1734482071409147" table:style-name="c12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0:15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4-16 20:45</text:p>
          </table:table-cell>
          <table:table-cell office:value-type="float" office:value="0.1137431" table:style-name="c1">
            <text:p>0.11374</text:p>
          </table:table-cell>
          <table:table-cell office:value-type="float" office:value="-0.6488633589509685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1:15</text:p>
          </table:table-cell>
          <table:table-cell office:value-type="float" office:value="0.11535764999999999" table:style-name="c1">
            <text:p>0.11536</text:p>
          </table:table-cell>
          <table:table-cell office:value-type="string" table:style-name="c1">
            <text:p>2026-04-16 21:45</text:p>
          </table:table-cell>
          <table:table-cell office:value-type="float" office:value="0.1151424" table:style-name="c1">
            <text:p>0.11514</text:p>
          </table:table-cell>
          <table:table-cell office:value-type="float" office:value="-0.38612060630567324" table:style-name="c12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45</text:p>
          </table:table-cell>
          <table:table-cell office:value-type="float" office:value="0.11675835" table:style-name="c1">
            <text:p>0.11676</text:p>
          </table:table-cell>
          <table:table-cell office:value-type="string" table:style-name="c1">
            <text:p>2026-04-17 09:15</text:p>
          </table:table-cell>
          <table:table-cell office:value-type="float" office:value="0.11634180000000001" table:style-name="c1">
            <text:p>0.11634</text:p>
          </table:table-cell>
          <table:table-cell office:value-type="float" office:value="-0.5559493245664848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7:00</text:p>
          </table:table-cell>
          <table:table-cell office:value-type="float" office:value="0.10665329999999999" table:style-name="c1">
            <text:p>0.10665</text:p>
          </table:table-cell>
          <table:table-cell office:value-type="string" table:style-name="c1">
            <text:p>2026-04-22 07:30</text:p>
          </table:table-cell>
          <table:table-cell office:value-type="float" office:value="0.1063468" table:style-name="c1">
            <text:p>0.10635</text:p>
          </table:table-cell>
          <table:table-cell office:value-type="float" office:value="-0.48670529013167263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1:00</text:p>
          </table:table-cell>
          <table:table-cell office:value-type="float" office:value="0.10695344999999999" table:style-name="c1">
            <text:p>0.10695</text:p>
          </table:table-cell>
          <table:table-cell office:value-type="string" table:style-name="c1">
            <text:p>2026-04-24 01:30</text:p>
          </table:table-cell>
          <table:table-cell office:value-type="float" office:value="0.10644675" table:style-name="c1">
            <text:p>0.10645</text:p>
          </table:table-cell>
          <table:table-cell office:value-type="float" office:value="-0.6727104672640372" table:style-name="c12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2:00</text:p>
          </table:table-cell>
          <table:table-cell office:value-type="float" office:value="0.10715355" table:style-name="c1">
            <text:p>0.10715</text:p>
          </table:table-cell>
          <table:table-cell office:value-type="string" table:style-name="c1">
            <text:p>2026-04-24 02:30</text:p>
          </table:table-cell>
          <table:table-cell office:value-type="float" office:value="0.1063468" table:style-name="c1">
            <text:p>0.10635</text:p>
          </table:table-cell>
          <table:table-cell office:value-type="float" office:value="-0.9512864979274949" table:style-name="c12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30</text:p>
          </table:table-cell>
          <table:table-cell office:value-type="float" office:value="0.1062531" table:style-name="c1">
            <text:p>0.10625</text:p>
          </table:table-cell>
          <table:table-cell office:value-type="string" table:style-name="c1">
            <text:p>2026-04-24 09:00</text:p>
          </table:table-cell>
          <table:table-cell office:value-type="float" office:value="0.105947" table:style-name="c1">
            <text:p>0.10595</text:p>
          </table:table-cell>
          <table:table-cell office:value-type="float" office:value="-0.48740982898384244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0:00</text:p>
          </table:table-cell>
          <table:table-cell office:value-type="float" office:value="0.10635315" table:style-name="c1">
            <text:p>0.10635</text:p>
          </table:table-cell>
          <table:table-cell office:value-type="string" table:style-name="c1">
            <text:p>2026-04-24 10:30</text:p>
          </table:table-cell>
          <table:table-cell office:value-type="float" office:value="0.10654670000000001" table:style-name="c1">
            <text:p>0.10655</text:p>
          </table:table-cell>
          <table:table-cell office:value-type="float" office:value="-0.018275766444142416" table:style-name="c12">
            <text:p>-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5:45</text:p>
          </table:table-cell>
          <table:table-cell office:value-type="float" office:value="0.108054" table:style-name="c1">
            <text:p>0.10805</text:p>
          </table:table-cell>
          <table:table-cell office:value-type="string" table:style-name="c1">
            <text:p>2026-04-24 16:15</text:p>
          </table:table-cell>
          <table:table-cell office:value-type="float" office:value="0.10804595" table:style-name="c1">
            <text:p>0.10805</text:p>
          </table:table-cell>
          <table:table-cell office:value-type="float" office:value="-0.20733508620689456" table:style-name="c12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30</text:p>
          </table:table-cell>
          <table:table-cell office:value-type="float" office:value="0.10885439999999999" table:style-name="c1">
            <text:p>0.10885</text:p>
          </table:table-cell>
          <table:table-cell office:value-type="string" table:style-name="c1">
            <text:p>2026-04-24 17:00</text:p>
          </table:table-cell>
          <table:table-cell office:value-type="float" office:value="0.10884555" table:style-name="c1">
            <text:p>0.10885</text:p>
          </table:table-cell>
          <table:table-cell office:value-type="float" office:value="-0.20801387399128624" table:style-name="c12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2:00</text:p>
          </table:table-cell>
          <table:table-cell office:value-type="float" office:value="0.1092546" table:style-name="c1">
            <text:p>0.10925</text:p>
          </table:table-cell>
          <table:table-cell office:value-type="string" table:style-name="c1">
            <text:p>2026-04-24 22:30</text:p>
          </table:table-cell>
          <table:table-cell office:value-type="float" office:value="0.10984505" table:style-name="c1">
            <text:p>0.10985</text:p>
          </table:table-cell>
          <table:table-cell office:value-type="float" office:value="0.3394545813631744" table:style-name="c13">
            <text:p>+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2:45</text:p>
          </table:table-cell>
          <table:table-cell office:value-type="float" office:value="0.1096548" table:style-name="c1">
            <text:p>0.10965</text:p>
          </table:table-cell>
          <table:table-cell office:value-type="string" table:style-name="c1">
            <text:p>2026-04-24 23:15</text:p>
          </table:table-cell>
          <table:table-cell office:value-type="float" office:value="0.1093453" table:style-name="c1">
            <text:p>0.10935</text:p>
          </table:table-cell>
          <table:table-cell office:value-type="float" office:value="-0.48158516973264565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5:30</text:p>
          </table:table-cell>
          <table:table-cell office:value-type="float" office:value="0.11305649999999999" table:style-name="c1">
            <text:p>0.11306</text:p>
          </table:table-cell>
          <table:table-cell office:value-type="string" table:style-name="c1">
            <text:p>2026-04-25 06:00</text:p>
          </table:table-cell>
          <table:table-cell office:value-type="float" office:value="0.11424285" table:style-name="c1">
            <text:p>0.11424</text:p>
          </table:table-cell>
          <table:table-cell office:value-type="float" office:value="0.8473449495163932" table:style-name="c13">
            <text:p>+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6:15</text:p>
          </table:table-cell>
          <table:table-cell office:value-type="float" office:value="0.1148574" table:style-name="c1">
            <text:p>0.11486</text:p>
          </table:table-cell>
          <table:table-cell office:value-type="string" table:style-name="c1">
            <text:p>2026-04-25 06:45</text:p>
          </table:table-cell>
          <table:table-cell office:value-type="float" office:value="0.11494250000000002" table:style-name="c1">
            <text:p>0.11494</text:p>
          </table:table-cell>
          <table:table-cell office:value-type="float" office:value="-0.1259562357322941" table:style-name="c12">
            <text:p>-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4:30</text:p>
          </table:table-cell>
          <table:table-cell office:value-type="float" office:value="0.1164582" table:style-name="c1">
            <text:p>0.11646</text:p>
          </table:table-cell>
          <table:table-cell office:value-type="string" table:style-name="c1">
            <text:p>2026-04-25 15:00</text:p>
          </table:table-cell>
          <table:table-cell office:value-type="float" office:value="0.11564215" table:style-name="c1">
            <text:p>0.11564</text:p>
          </table:table-cell>
          <table:table-cell office:value-type="float" office:value="-0.8992227750815207" table:style-name="c12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0:00</text:p>
          </table:table-cell>
          <table:table-cell office:value-type="float" office:value="0.11785889999999999" table:style-name="c1">
            <text:p>0.11786</text:p>
          </table:table-cell>
          <table:table-cell office:value-type="string" table:style-name="c1">
            <text:p>2026-04-25 20:30</text:p>
          </table:table-cell>
          <table:table-cell office:value-type="float" office:value="0.11594200000000002" table:style-name="c1">
            <text:p>0.11594</text:p>
          </table:table-cell>
          <table:table-cell office:value-type="float" office:value="-1.823085111094691" table:style-name="c12">
            <text:p>-1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6:30</text:p>
          </table:table-cell>
          <table:table-cell office:value-type="float" office:value="0.1196598" table:style-name="c1">
            <text:p>0.11966</text:p>
          </table:table-cell>
          <table:table-cell office:value-type="string" table:style-name="c1">
            <text:p>2026-04-27 17:00</text:p>
          </table:table-cell>
          <table:table-cell office:value-type="float" office:value="0.11784105000000002" table:style-name="c1">
            <text:p>0.11784</text:p>
          </table:table-cell>
          <table:table-cell office:value-type="float" office:value="-1.7167956648347804" table:style-name="c12">
            <text:p>-1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0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03 00:30</text:p>
          </table:table-cell>
          <table:table-cell office:value-type="float" office:value="0.11294350000000002" table:style-name="c1">
            <text:p>0.11294</text:p>
          </table:table-cell>
          <table:table-cell office:value-type="float" office:value="-0.38780261195660026" table:style-name="c12">
            <text:p>-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3:30</text:p>
          </table:table-cell>
          <table:table-cell office:value-type="float" office:value="0.1128564" table:style-name="c1">
            <text:p>0.11286</text:p>
          </table:table-cell>
          <table:table-cell office:value-type="string" table:style-name="c1">
            <text:p>2026-05-03 04:00</text:p>
          </table:table-cell>
          <table:table-cell office:value-type="float" office:value="0.11394300000000002" table:style-name="c1">
            <text:p>0.11394</text:p>
          </table:table-cell>
          <table:table-cell office:value-type="float" office:value="0.7609917939966238" table:style-name="c13">
            <text:p>+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4:15</text:p>
          </table:table-cell>
          <table:table-cell office:value-type="float" office:value="0.1136568" table:style-name="c1">
            <text:p>0.11366</text:p>
          </table:table-cell>
          <table:table-cell office:value-type="string" table:style-name="c1">
            <text:p>2026-05-03 04:45</text:p>
          </table:table-cell>
          <table:table-cell office:value-type="float" office:value="0.1145427" table:style-name="c1">
            <text:p>0.11454</text:p>
          </table:table-cell>
          <table:table-cell office:value-type="float" office:value="0.5779936991891388" table:style-name="c13">
            <text:p>+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15</text:p>
          </table:table-cell>
          <table:table-cell office:value-type="float" office:value="0.11535764999999999" table:style-name="c1">
            <text:p>0.11536</text:p>
          </table:table-cell>
          <table:table-cell office:value-type="string" table:style-name="c1">
            <text:p>2026-05-03 05:45</text:p>
          </table:table-cell>
          <table:table-cell office:value-type="float" office:value="0.1147426" table:style-name="c1">
            <text:p>0.11474</text:p>
          </table:table-cell>
          <table:table-cell office:value-type="float" office:value="-0.7320021319782266" table:style-name="c12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1415704999999998" table:style-name="c1">
            <text:p>0.11416</text:p>
          </table:table-cell>
          <table:table-cell office:value-type="string" table:style-name="c1">
            <text:p>2026-05-04 15:30</text:p>
          </table:table-cell>
          <table:table-cell office:value-type="float" office:value="0.1137431" table:style-name="c1">
            <text:p>0.11374</text:p>
          </table:table-cell>
          <table:table-cell office:value-type="float" office:value="-0.5617896195635685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15</text:p>
          </table:table-cell>
          <table:table-cell office:value-type="float" office:value="0.11495745" table:style-name="c1">
            <text:p>0.11496</text:p>
          </table:table-cell>
          <table:table-cell office:value-type="string" table:style-name="c1">
            <text:p>2026-05-05 02:45</text:p>
          </table:table-cell>
          <table:table-cell office:value-type="float" office:value="0.11564215" table:style-name="c1">
            <text:p>0.11564</text:p>
          </table:table-cell>
          <table:table-cell office:value-type="float" office:value="0.39452105292001605" table:style-name="c13">
            <text:p>+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5:15</text:p>
          </table:table-cell>
          <table:table-cell office:value-type="float" office:value="0.11935965" table:style-name="c1">
            <text:p>0.11936</text:p>
          </table:table-cell>
          <table:table-cell office:value-type="string" table:style-name="c1">
            <text:p>2026-05-05 05:45</text:p>
          </table:table-cell>
          <table:table-cell office:value-type="float" office:value="0.11974010000000002" table:style-name="c1">
            <text:p>0.11974</text:p>
          </table:table-cell>
          <table:table-cell office:value-type="float" office:value="0.11820539026381471" table:style-name="c13">
            <text:p>+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0.12176084999999999" table:style-name="c1">
            <text:p>0.12176</text:p>
          </table:table-cell>
          <table:table-cell office:value-type="string" table:style-name="c1">
            <text:p>2026-05-05 11:15</text:p>
          </table:table-cell>
          <table:table-cell office:value-type="float" office:value="0.12083955" table:style-name="c1">
            <text:p>0.12084</text:p>
          </table:table-cell>
          <table:table-cell office:value-type="float" office:value="-0.9550346112481956" table:style-name="c12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0.11905949999999998" table:style-name="c1">
            <text:p>0.11906</text:p>
          </table:table-cell>
          <table:table-cell office:value-type="string" table:style-name="c1">
            <text:p>2026-05-05 21:00</text:p>
          </table:table-cell>
          <table:table-cell office:value-type="float" office:value="0.1195402" table:style-name="c1">
            <text:p>0.11954</text:p>
          </table:table-cell>
          <table:table-cell office:value-type="float" office:value="0.203040614314709" table:style-name="c13">
            <text:p>+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15</text:p>
          </table:table-cell>
          <table:table-cell office:value-type="float" office:value="0.1196598" table:style-name="c1">
            <text:p>0.11966</text:p>
          </table:table-cell>
          <table:table-cell office:value-type="string" table:style-name="c1">
            <text:p>2026-05-05 21:45</text:p>
          </table:table-cell>
          <table:table-cell office:value-type="float" office:value="0.1205397" table:style-name="c1">
            <text:p>0.12054</text:p>
          </table:table-cell>
          <table:table-cell office:value-type="float" office:value="0.5339647397873071" table:style-name="c13">
            <text:p>+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00</text:p>
          </table:table-cell>
          <table:table-cell office:value-type="float" office:value="0.12396194999999999" table:style-name="c1">
            <text:p>0.12396</text:p>
          </table:table-cell>
          <table:table-cell office:value-type="string" table:style-name="c1">
            <text:p>2026-05-06 08:30</text:p>
          </table:table-cell>
          <table:table-cell office:value-type="float" office:value="0.12273860000000002" table:style-name="c1">
            <text:p>0.12274</text:p>
          </table:table-cell>
          <table:table-cell office:value-type="float" office:value="-1.1848026441984572" table:style-name="c12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3:00</text:p>
          </table:table-cell>
          <table:table-cell office:value-type="float" office:value="0.1212606" table:style-name="c1">
            <text:p>0.12126</text:p>
          </table:table-cell>
          <table:table-cell office:value-type="string" table:style-name="c1">
            <text:p>2026-05-07 03:30</text:p>
          </table:table-cell>
          <table:table-cell office:value-type="float" office:value="0.1209395" table:style-name="c1">
            <text:p>0.12094</text:p>
          </table:table-cell>
          <table:table-cell office:value-type="float" office:value="-0.4641722542193971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00</text:p>
          </table:table-cell>
          <table:table-cell office:value-type="float" office:value="0.12216105" table:style-name="c1">
            <text:p>0.12216</text:p>
          </table:table-cell>
          <table:table-cell office:value-type="string" table:style-name="c1">
            <text:p>2026-05-07 04:30</text:p>
          </table:table-cell>
          <table:table-cell office:value-type="float" office:value="0.1257371" table:style-name="c1">
            <text:p>0.12574</text:p>
          </table:table-cell>
          <table:table-cell office:value-type="float" office:value="2.7215724955704124" table:style-name="c13">
            <text:p>+2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45</text:p>
          </table:table-cell>
          <table:table-cell office:value-type="float" office:value="0.12596295000000002" table:style-name="c1">
            <text:p>0.12596</text:p>
          </table:table-cell>
          <table:table-cell office:value-type="string" table:style-name="c1">
            <text:p>2026-05-07 05:15</text:p>
          </table:table-cell>
          <table:table-cell office:value-type="float" office:value="0.12593700000000002" table:style-name="c1">
            <text:p>0.12594</text:p>
          </table:table-cell>
          <table:table-cell office:value-type="float" office:value="-0.22046011386680497" table:style-name="c12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00</text:p>
          </table:table-cell>
          <table:table-cell office:value-type="float" office:value="0.1312656" table:style-name="c1">
            <text:p>0.13127</text:p>
          </table:table-cell>
          <table:table-cell office:value-type="string" table:style-name="c1">
            <text:p>2026-05-08 19:30</text:p>
          </table:table-cell>
          <table:table-cell office:value-type="float" office:value="0.1323338" table:style-name="c1">
            <text:p>0.13233</text:p>
          </table:table-cell>
          <table:table-cell office:value-type="float" office:value="0.6122432181774995" table:style-name="c13">
            <text:p>+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1:15</text:p>
          </table:table-cell>
          <table:table-cell office:value-type="float" office:value="0.13386689999999998" table:style-name="c1">
            <text:p>0.13387</text:p>
          </table:table-cell>
          <table:table-cell office:value-type="string" table:style-name="c1">
            <text:p>2026-05-08 21:45</text:p>
          </table:table-cell>
          <table:table-cell office:value-type="float" office:value="0.1345327" table:style-name="c1">
            <text:p>0.13453</text:p>
          </table:table-cell>
          <table:table-cell office:value-type="float" office:value="0.2964654688351054" table:style-name="c13">
            <text:p>+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5-10 06:30</text:p>
          </table:table-cell>
          <table:table-cell office:value-type="float" office:value="0.12813590000000002" table:style-name="c1">
            <text:p>0.12814</text:p>
          </table:table-cell>
          <table:table-cell office:value-type="float" office:value="-0.22182013138625223" table:style-name="c12">
            <text:p>-0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45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5-10 07:15</text:p>
          </table:table-cell>
          <table:table-cell office:value-type="float" office:value="0.12803595" table:style-name="c1">
            <text:p>0.12804</text:p>
          </table:table-cell>
          <table:table-cell office:value-type="float" office:value="-0.6100015082341925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3:45</text:p>
          </table:table-cell>
          <table:table-cell office:value-type="float" office:value="0.11325659999999999" table:style-name="c1">
            <text:p>0.11326</text:p>
          </table:table-cell>
          <table:table-cell office:value-type="string" table:style-name="c1">
            <text:p>2026-05-19 14:15</text:p>
          </table:table-cell>
          <table:table-cell office:value-type="float" office:value="0.11434280000000001" table:style-name="c1">
            <text:p>0.11434</text:p>
          </table:table-cell>
          <table:table-cell office:value-type="float" office:value="0.7572439423398025" table:style-name="c13">
            <text:p>+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20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19 20:30</text:p>
          </table:table-cell>
          <table:table-cell office:value-type="float" office:value="0.11384305" table:style-name="c1">
            <text:p>0.11384</text:p>
          </table:table-cell>
          <table:table-cell office:value-type="float" office:value="0.40556887166498523" table:style-name="c13">
            <text:p>+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0:45</text:p>
          </table:table-cell>
          <table:table-cell office:value-type="float" office:value="0.1148574" table:style-name="c1">
            <text:p>0.11486</text:p>
          </table:table-cell>
          <table:table-cell office:value-type="string" table:style-name="c1">
            <text:p>2026-05-20 01:15</text:p>
          </table:table-cell>
          <table:table-cell office:value-type="float" office:value="0.1145427" table:style-name="c1">
            <text:p>0.11454</text:p>
          </table:table-cell>
          <table:table-cell office:value-type="float" office:value="-0.47334421404279237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7:45</text:p>
          </table:table-cell>
          <table:table-cell office:value-type="float" office:value="0.11875935" table:style-name="c1">
            <text:p>0.11876</text:p>
          </table:table-cell>
          <table:table-cell office:value-type="string" table:style-name="c1">
            <text:p>2026-05-20 18:15</text:p>
          </table:table-cell>
          <table:table-cell office:value-type="float" office:value="0.11864065" table:style-name="c1">
            <text:p>0.11864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45</text:p>
          </table:table-cell>
          <table:table-cell office:value-type="float" office:value="0.11595794999999999" table:style-name="c1">
            <text:p>0.11596</text:p>
          </table:table-cell>
          <table:table-cell office:value-type="string" table:style-name="c1">
            <text:p>2026-05-21 16:15</text:p>
          </table:table-cell>
          <table:table-cell office:value-type="float" office:value="0.11504245" table:style-name="c1">
            <text:p>0.11504</text:p>
          </table:table-cell>
          <table:table-cell office:value-type="float" office:value="-0.9878321042670835" table:style-name="c12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0.11665829999999999" table:style-name="c1">
            <text:p>0.11666</text:p>
          </table:table-cell>
          <table:table-cell office:value-type="string" table:style-name="c1">
            <text:p>2026-05-21 18:15</text:p>
          </table:table-cell>
          <table:table-cell office:value-type="float" office:value="0.1167416" table:style-name="c1">
            <text:p>0.11674</text:p>
          </table:table-cell>
          <table:table-cell office:value-type="float" office:value="-0.12863761806916063" table:style-name="c12">
            <text:p>-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0.11555775" table:style-name="c1">
            <text:p>0.11556</text:p>
          </table:table-cell>
          <table:table-cell office:value-type="string" table:style-name="c1">
            <text:p>2026-05-22 04:45</text:p>
          </table:table-cell>
          <table:table-cell office:value-type="float" office:value="0.11484255" table:style-name="c1">
            <text:p>0.11484</text:p>
          </table:table-cell>
          <table:table-cell office:value-type="float" office:value="-0.8175741198231834" table:style-name="c12">
            <text:p>-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0:0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5-22 10:30</text:p>
          </table:table-cell>
          <table:table-cell office:value-type="float" office:value="0.11764115" table:style-name="c1">
            <text:p>0.11764</text:p>
          </table:table-cell>
          <table:table-cell office:value-type="float" office:value="-0.04487931404826284" table:style-name="c12">
            <text:p>-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00</text:p>
          </table:table-cell>
          <table:table-cell office:value-type="float" office:value="0.11975985" table:style-name="c1">
            <text:p>0.11976</text:p>
          </table:table-cell>
          <table:table-cell office:value-type="string" table:style-name="c1">
            <text:p>2026-05-22 13:30</text:p>
          </table:table-cell>
          <table:table-cell office:value-type="float" office:value="0.11734130000000001" table:style-name="c1">
            <text:p>0.11734</text:p>
          </table:table-cell>
          <table:table-cell office:value-type="float" office:value="-2.2153628772080047" table:style-name="c12">
            <text:p>-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8:00</text:p>
          </table:table-cell>
          <table:table-cell office:value-type="float" office:value="0.116058" table:style-name="c1">
            <text:p>0.11606</text:p>
          </table:table-cell>
          <table:table-cell office:value-type="string" table:style-name="c1">
            <text:p>2026-05-25 08:30</text:p>
          </table:table-cell>
          <table:table-cell office:value-type="float" office:value="0.11484255" table:style-name="c1">
            <text:p>0.11484</text:p>
          </table:table-cell>
          <table:table-cell office:value-type="float" office:value="-1.2450845762032592" table:style-name="c12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8 23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28 23:30</text:p>
          </table:table-cell>
          <table:table-cell office:value-type="float" office:value="0.1141429" table:style-name="c1">
            <text:p>0.11414</text:p>
          </table:table-cell>
          <table:table-cell office:value-type="float" office:value="0.6700260328721841" table:style-name="c13">
            <text:p>+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8 23:45</text:p>
          </table:table-cell>
          <table:table-cell office:value-type="float" office:value="0.1150575" table:style-name="c1">
            <text:p>0.11506</text:p>
          </table:table-cell>
          <table:table-cell office:value-type="string" table:style-name="c1">
            <text:p>2026-05-29 00:15</text:p>
          </table:table-cell>
          <table:table-cell office:value-type="float" office:value="0.11864065" table:style-name="c1">
            <text:p>0.11864</text:p>
          </table:table-cell>
          <table:table-cell office:value-type="float" office:value="2.9081001591812816" table:style-name="c13">
            <text:p>+2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0:30</text:p>
          </table:table-cell>
          <table:table-cell office:value-type="float" office:value="0.1184592" table:style-name="c1">
            <text:p>0.11846</text:p>
          </table:table-cell>
          <table:table-cell office:value-type="string" table:style-name="c1">
            <text:p>2026-05-29 01:00</text:p>
          </table:table-cell>
          <table:table-cell office:value-type="float" office:value="0.11604195" table:style-name="c1">
            <text:p>0.11604</text:p>
          </table:table-cell>
          <table:table-cell office:value-type="float" office:value="-2.2363968843703064" table:style-name="c12">
            <text:p>-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5:3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5-29 06:00</text:p>
          </table:table-cell>
          <table:table-cell office:value-type="float" office:value="0.11664165" table:style-name="c1">
            <text:p>0.11664</text:p>
          </table:table-cell>
          <table:table-cell office:value-type="float" office:value="-0.8941156835125863" table:style-name="c12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8:45</text:p>
          </table:table-cell>
          <table:table-cell office:value-type="float" office:value="0.1196598" table:style-name="c1">
            <text:p>0.11966</text:p>
          </table:table-cell>
          <table:table-cell office:value-type="string" table:style-name="c1">
            <text:p>2026-05-29 09:15</text:p>
          </table:table-cell>
          <table:table-cell office:value-type="float" office:value="0.11934030000000001" table:style-name="c1">
            <text:p>0.11934</text:p>
          </table:table-cell>
          <table:table-cell office:value-type="float" office:value="-0.4663732178225133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30</text:p>
          </table:table-cell>
          <table:table-cell office:value-type="float" office:value="0.11555775" table:style-name="c1">
            <text:p>0.11556</text:p>
          </table:table-cell>
          <table:table-cell office:value-type="string" table:style-name="c1">
            <text:p>2026-05-29 16:00</text:p>
          </table:table-cell>
          <table:table-cell office:value-type="float" office:value="0.11664165" table:style-name="c1">
            <text:p>0.11664</text:p>
          </table:table-cell>
          <table:table-cell office:value-type="float" office:value="0.7361975649837538" table:style-name="c13">
            <text:p>+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6:15</text:p>
          </table:table-cell>
          <table:table-cell office:value-type="float" office:value="0.11735865" table:style-name="c1">
            <text:p>0.11736</text:p>
          </table:table-cell>
          <table:table-cell office:value-type="string" table:style-name="c1">
            <text:p>2026-05-29 16:45</text:p>
          </table:table-cell>
          <table:table-cell office:value-type="float" office:value="0.11724135000000001" table:style-name="c1">
            <text:p>0.11724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1:45</text:p>
          </table:table-cell>
          <table:table-cell office:value-type="float" office:value="0.1202601" table:style-name="c1">
            <text:p>0.12026</text:p>
          </table:table-cell>
          <table:table-cell office:value-type="string" table:style-name="c1">
            <text:p>2026-05-29 22:15</text:p>
          </table:table-cell>
          <table:table-cell office:value-type="float" office:value="0.11824085000000001" table:style-name="c1">
            <text:p>0.11824</text:p>
          </table:table-cell>
          <table:table-cell office:value-type="float" office:value="-1.875612492547396" table:style-name="c12">
            <text:p>-1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3:00</text:p>
          </table:table-cell>
          <table:table-cell office:value-type="float" office:value="0.12076034999999999" table:style-name="c1">
            <text:p>0.12076</text:p>
          </table:table-cell>
          <table:table-cell office:value-type="string" table:style-name="c1">
            <text:p>2026-05-29 23:30</text:p>
          </table:table-cell>
          <table:table-cell office:value-type="float" office:value="0.1229385" table:style-name="c1">
            <text:p>0.12294</text:p>
          </table:table-cell>
          <table:table-cell office:value-type="float" office:value="1.6001907401725912" table:style-name="c13">
            <text:p>+1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15</text:p>
          </table:table-cell>
          <table:table-cell office:value-type="float" office:value="0.13036514999999999" table:style-name="c1">
            <text:p>0.13037</text:p>
          </table:table-cell>
          <table:table-cell office:value-type="string" table:style-name="c1">
            <text:p>2026-05-30 01:45</text:p>
          </table:table-cell>
          <table:table-cell office:value-type="float" office:value="0.13393300000000002" table:style-name="c1">
            <text:p>0.13393</text:p>
          </table:table-cell>
          <table:table-cell office:value-type="float" office:value="2.5314418255185878" table:style-name="c13">
            <text:p>+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00</text:p>
          </table:table-cell>
          <table:table-cell office:value-type="float" office:value="0.1348674" table:style-name="c1">
            <text:p>0.13487</text:p>
          </table:table-cell>
          <table:table-cell office:value-type="string" table:style-name="c1">
            <text:p>2026-05-30 02:30</text:p>
          </table:table-cell>
          <table:table-cell office:value-type="float" office:value="0.13443275000000002" table:style-name="c1">
            <text:p>0.13443</text:p>
          </table:table-cell>
          <table:table-cell office:value-type="float" office:value="-0.521535276315821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0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5-31 03:30</text:p>
          </table:table-cell>
          <table:table-cell office:value-type="float" office:value="0.1269365" table:style-name="c1">
            <text:p>0.12694</text:p>
          </table:table-cell>
          <table:table-cell office:value-type="float" office:value="-0.6126811503981311" table:style-name="c12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4:15</text:p>
          </table:table-cell>
          <table:table-cell office:value-type="float" office:value="0.12796395" table:style-name="c1">
            <text:p>0.12796</text:p>
          </table:table-cell>
          <table:table-cell office:value-type="string" table:style-name="c1">
            <text:p>2026-05-31 04:45</text:p>
          </table:table-cell>
          <table:table-cell office:value-type="float" office:value="0.12703645" table:style-name="c1">
            <text:p>0.12704</text:p>
          </table:table-cell>
          <table:table-cell office:value-type="float" office:value="-0.9232646097201647" table:style-name="c12">
            <text:p>-0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5:15</text:p>
          </table:table-cell>
          <table:table-cell office:value-type="float" office:value="0.12836414999999998" table:style-name="c1">
            <text:p>0.12836</text:p>
          </table:table-cell>
          <table:table-cell office:value-type="string" table:style-name="c1">
            <text:p>2026-05-31 05:45</text:p>
          </table:table-cell>
          <table:table-cell office:value-type="float" office:value="0.12793600000000002" table:style-name="c1">
            <text:p>0.12794</text:p>
          </table:table-cell>
          <table:table-cell office:value-type="float" office:value="-0.5327765298955844" table:style-name="c12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30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5-31 10:00</text:p>
          </table:table-cell>
          <table:table-cell office:value-type="float" office:value="0.12813590000000002" table:style-name="c1">
            <text:p>0.12814</text:p>
          </table:table-cell>
          <table:table-cell office:value-type="float" office:value="-2.3561127488967104" table:style-name="c12">
            <text:p>-2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11:15</text:p>
          </table:table-cell>
          <table:table-cell office:value-type="float" office:value="0.1302651" table:style-name="c1">
            <text:p>0.13027</text:p>
          </table:table-cell>
          <table:table-cell office:value-type="string" table:style-name="c1">
            <text:p>2026-05-31 11:45</text:p>
          </table:table-cell>
          <table:table-cell office:value-type="float" office:value="0.13303345" table:style-name="c1">
            <text:p>0.13303</text:p>
          </table:table-cell>
          <table:table-cell office:value-type="float" office:value="1.9210180880757877" table:style-name="c13">
            <text:p>+1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1:15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5-31 21:45</text:p>
          </table:table-cell>
          <table:table-cell office:value-type="float" office:value="0.12883555" table:style-name="c1">
            <text:p>0.12884</text:p>
          </table:table-cell>
          <table:table-cell office:value-type="float" office:value="0.010701058459106072" table:style-name="c13">
            <text:p>+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3:3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6-01 04:00</text:p>
          </table:table-cell>
          <table:table-cell office:value-type="float" office:value="0.12603695" table:style-name="c1">
            <text:p>0.12604</text:p>
          </table:table-cell>
          <table:table-cell office:value-type="float" office:value="-1.3170007327968691" table:style-name="c12">
            <text:p>-1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07:15</text:p>
          </table:table-cell>
          <table:table-cell office:value-type="float" office:value="1.0075034999999999" table:style-name="c9">
            <text:p>1.0075</text:p>
          </table:table-cell>
          <table:table-cell office:value-type="string" table:style-name="c9">
            <text:p>2026-03-05 07:45</text:p>
          </table:table-cell>
          <table:table-cell office:value-type="float" office:value="0.9985005" table:style-name="c9">
            <text:p>0.9985</text:p>
          </table:table-cell>
          <table:table-cell office:value-type="float" office:value="-1.091708614362119" table:style-name="c10">
            <text:p>-1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19:15</text:p>
          </table:table-cell>
          <table:table-cell office:value-type="float" office:value="0.9974985" table:style-name="c9">
            <text:p>0.9975</text:p>
          </table:table-cell>
          <table:table-cell office:value-type="string" table:style-name="c9">
            <text:p>2026-03-05 19:45</text:p>
          </table:table-cell>
          <table:table-cell office:value-type="float" office:value="0.9895050000000001" table:style-name="c9">
            <text:p>0.98951</text:p>
          </table:table-cell>
          <table:table-cell office:value-type="float" office:value="-0.9996526806807071" table:style-name="c10">
            <text:p>-1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6 08:00</text:p>
          </table:table-cell>
          <table:table-cell office:value-type="float" office:value="1.0235115" table:style-name="c9">
            <text:p>1.0235</text:p>
          </table:table-cell>
          <table:table-cell office:value-type="string" table:style-name="c9">
            <text:p>2026-03-06 08:30</text:p>
          </table:table-cell>
          <table:table-cell office:value-type="float" office:value="1.013493" table:style-name="c9">
            <text:p>1.0135</text:p>
          </table:table-cell>
          <table:table-cell office:value-type="float" office:value="-1.176779401794692" table:style-name="c10">
            <text:p>-1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4:30</text:p>
          </table:table-cell>
          <table:table-cell office:value-type="float" office:value="0.9664829999999999" table:style-name="c9">
            <text:p>0.96648</text:p>
          </table:table-cell>
          <table:table-cell office:value-type="string" table:style-name="c9">
            <text:p>2026-03-09 15:00</text:p>
          </table:table-cell>
          <table:table-cell office:value-type="float" office:value="0.9645175" table:style-name="c9">
            <text:p>0.96452</text:p>
          </table:table-cell>
          <table:table-cell office:value-type="float" office:value="-0.40285969670442734" table:style-name="c10">
            <text:p>-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5:15</text:p>
          </table:table-cell>
          <table:table-cell office:value-type="float" office:value="0.9904949999999999" table:style-name="c9">
            <text:p>0.99049</text:p>
          </table:table-cell>
          <table:table-cell office:value-type="string" table:style-name="c9">
            <text:p>2026-03-10 15:45</text:p>
          </table:table-cell>
          <table:table-cell office:value-type="float" office:value="0.9865065000000001" table:style-name="c9">
            <text:p>0.98651</text:p>
          </table:table-cell>
          <table:table-cell office:value-type="float" office:value="-0.6017724969333282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5:00</text:p>
          </table:table-cell>
          <table:table-cell office:value-type="float" office:value="0.9594794999999999" table:style-name="c9">
            <text:p>0.95948</text:p>
          </table:table-cell>
          <table:table-cell office:value-type="string" table:style-name="c9">
            <text:p>2026-03-13 15:30</text:p>
          </table:table-cell>
          <table:table-cell office:value-type="float" office:value="0.9575210000000001" table:style-name="c9">
            <text:p>0.95752</text:p>
          </table:table-cell>
          <table:table-cell office:value-type="float" office:value="-0.4036130505133184" table:style-name="c10">
            <text:p>-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45</text:p>
          </table:table-cell>
          <table:table-cell office:value-type="float" office:value="0.934467" table:style-name="c9">
            <text:p>0.93447</text:p>
          </table:table-cell>
          <table:table-cell office:value-type="string" table:style-name="c9">
            <text:p>2026-03-15 23:15</text:p>
          </table:table-cell>
          <table:table-cell office:value-type="float" office:value="0.9355320000000001" table:style-name="c9">
            <text:p>0.93553</text:p>
          </table:table-cell>
          <table:table-cell office:value-type="float" office:value="-0.08615911187872527" table:style-name="c10">
            <text:p>-0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30</text:p>
          </table:table-cell>
          <table:table-cell office:value-type="float" office:value="0.942471" table:style-name="c9">
            <text:p>0.94247</text:p>
          </table:table-cell>
          <table:table-cell office:value-type="string" table:style-name="c9">
            <text:p>2026-03-16 04:00</text:p>
          </table:table-cell>
          <table:table-cell office:value-type="float" office:value="0.951524" table:style-name="c9">
            <text:p>0.95152</text:p>
          </table:table-cell>
          <table:table-cell office:value-type="float" office:value="0.7587399001136363" table:style-name="c11">
            <text:p>+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4:15</text:p>
          </table:table-cell>
          <table:table-cell office:value-type="float" office:value="0.9604799999999999" table:style-name="c9">
            <text:p>0.96048</text:p>
          </table:table-cell>
          <table:table-cell office:value-type="string" table:style-name="c9">
            <text:p>2026-03-16 04:45</text:p>
          </table:table-cell>
          <table:table-cell office:value-type="float" office:value="0.9605195" table:style-name="c9">
            <text:p>0.96052</text:p>
          </table:table-cell>
          <table:table-cell office:value-type="float" office:value="-0.19579569387181417" table:style-name="c10">
            <text:p>-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3:45</text:p>
          </table:table-cell>
          <table:table-cell office:value-type="float" office:value="0.9974985" table:style-name="c9">
            <text:p>0.9975</text:p>
          </table:table-cell>
          <table:table-cell office:value-type="string" table:style-name="c9">
            <text:p>2026-03-16 14:15</text:p>
          </table:table-cell>
          <table:table-cell office:value-type="float" office:value="1.0074960000000002" table:style-name="c9">
            <text:p>1.0075</text:p>
          </table:table-cell>
          <table:table-cell office:value-type="float" office:value="0.8003536342160222" table:style-name="c11">
            <text:p>+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6:45</text:p>
          </table:table-cell>
          <table:table-cell office:value-type="float" office:value="1.0155074999999998" table:style-name="c9">
            <text:p>1.0155</text:p>
          </table:table-cell>
          <table:table-cell office:value-type="string" table:style-name="c9">
            <text:p>2026-03-16 17:15</text:p>
          </table:table-cell>
          <table:table-cell office:value-type="float" office:value="1.0074960000000002" table:style-name="c9">
            <text:p>1.0075</text:p>
          </table:table-cell>
          <table:table-cell office:value-type="float" office:value="-0.9872388440262281" table:style-name="c10">
            <text:p>-1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8:30</text:p>
          </table:table-cell>
          <table:table-cell office:value-type="float" office:value="1.0095044999999998" table:style-name="c9">
            <text:p>1.0095</text:p>
          </table:table-cell>
          <table:table-cell office:value-type="string" table:style-name="c9">
            <text:p>2026-03-16 19:00</text:p>
          </table:table-cell>
          <table:table-cell office:value-type="float" office:value="1.0004994999999999" table:style-name="c9">
            <text:p>1.0005</text:p>
          </table:table-cell>
          <table:table-cell office:value-type="float" office:value="-1.0901386274652425" table:style-name="c10">
            <text:p>-1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1:00</text:p>
          </table:table-cell>
          <table:table-cell office:value-type="float" office:value="1.0175085" table:style-name="c9">
            <text:p>1.0175</text:p>
          </table:table-cell>
          <table:table-cell office:value-type="string" table:style-name="c9">
            <text:p>2026-03-16 21:30</text:p>
          </table:table-cell>
          <table:table-cell office:value-type="float" office:value="1.0174910000000001" table:style-name="c9">
            <text:p>1.0175</text:p>
          </table:table-cell>
          <table:table-cell office:value-type="float" office:value="-0.20161644929744815" table:style-name="c10">
            <text:p>-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2:45</text:p>
          </table:table-cell>
          <table:table-cell office:value-type="float" office:value="1.0215104999999998" table:style-name="c9">
            <text:p>1.0215</text:p>
          </table:table-cell>
          <table:table-cell office:value-type="string" table:style-name="c9">
            <text:p>2026-03-16 23:15</text:p>
          </table:table-cell>
          <table:table-cell office:value-type="float" office:value="1.015492" table:style-name="c9">
            <text:p>1.0155</text:p>
          </table:table-cell>
          <table:table-cell office:value-type="float" office:value="-0.7878987546383165" table:style-name="c10">
            <text:p>-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08:15</text:p>
          </table:table-cell>
          <table:table-cell office:value-type="float" office:value="1.0025009999999999" table:style-name="c9">
            <text:p>1.0025</text:p>
          </table:table-cell>
          <table:table-cell office:value-type="string" table:style-name="c9">
            <text:p>2026-03-17 08:45</text:p>
          </table:table-cell>
          <table:table-cell office:value-type="float" office:value="1.0024985" table:style-name="c9">
            <text:p>1.0025</text:p>
          </table:table-cell>
          <table:table-cell office:value-type="float" office:value="-0.20014887780659407" table:style-name="c10">
            <text:p>-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23:15</text:p>
          </table:table-cell>
          <table:table-cell office:value-type="float" office:value="1.012506" table:style-name="c9">
            <text:p>1.0125</text:p>
          </table:table-cell>
          <table:table-cell office:value-type="string" table:style-name="c9">
            <text:p>2026-03-17 23:45</text:p>
          </table:table-cell>
          <table:table-cell office:value-type="float" office:value="1.005497" table:style-name="c9">
            <text:p>1.0055</text:p>
          </table:table-cell>
          <table:table-cell office:value-type="float" office:value="-0.8907590180206149" table:style-name="c10">
            <text:p>-0.9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13:45</text:p>
          </table:table-cell>
          <table:table-cell office:value-type="float" office:value="1.012506" table:style-name="c9">
            <text:p>1.0125</text:p>
          </table:table-cell>
          <table:table-cell office:value-type="string" table:style-name="c9">
            <text:p>2026-03-20 14:15</text:p>
          </table:table-cell>
          <table:table-cell office:value-type="float" office:value="1.0044975" table:style-name="c9">
            <text:p>1.0045</text:p>
          </table:table-cell>
          <table:table-cell office:value-type="float" office:value="-0.9892771502094666" table:style-name="c10">
            <text:p>-1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14:30</text:p>
          </table:table-cell>
          <table:table-cell office:value-type="float" office:value="1.0085039999999998" table:style-name="c9">
            <text:p>1.0085</text:p>
          </table:table-cell>
          <table:table-cell office:value-type="string" table:style-name="c9">
            <text:p>2026-03-20 15:00</text:p>
          </table:table-cell>
          <table:table-cell office:value-type="float" office:value="0.9885055" table:style-name="c9">
            <text:p>0.98851</text:p>
          </table:table-cell>
          <table:table-cell office:value-type="float" office:value="-2.1789226908866755" table:style-name="c10">
            <text:p>-2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16:00</text:p>
          </table:table-cell>
          <table:table-cell office:value-type="float" office:value="1.006503" table:style-name="c9">
            <text:p>1.0065</text:p>
          </table:table-cell>
          <table:table-cell office:value-type="string" table:style-name="c9">
            <text:p>2026-03-20 16:30</text:p>
          </table:table-cell>
          <table:table-cell office:value-type="float" office:value="1.0064965" table:style-name="c9">
            <text:p>1.0065</text:p>
          </table:table-cell>
          <table:table-cell office:value-type="float" office:value="-0.20054450940533153" table:style-name="c10">
            <text:p>-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1 09:15</text:p>
          </table:table-cell>
          <table:table-cell office:value-type="float" office:value="1.0245119999999999" table:style-name="c9">
            <text:p>1.0245</text:p>
          </table:table-cell>
          <table:table-cell office:value-type="string" table:style-name="c9">
            <text:p>2026-03-21 09:45</text:p>
          </table:table-cell>
          <table:table-cell office:value-type="float" office:value="1.0184905" table:style-name="c9">
            <text:p>1.0185</text:p>
          </table:table-cell>
          <table:table-cell office:value-type="float" office:value="-0.786468339023827" table:style-name="c10">
            <text:p>-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19:00</text:p>
          </table:table-cell>
          <table:table-cell office:value-type="float" office:value="1.012506" table:style-name="c9">
            <text:p>1.0125</text:p>
          </table:table-cell>
          <table:table-cell office:value-type="string" table:style-name="c9">
            <text:p>2026-03-23 19:30</text:p>
          </table:table-cell>
          <table:table-cell office:value-type="float" office:value="1.0064965" table:style-name="c9">
            <text:p>1.0065</text:p>
          </table:table-cell>
          <table:table-cell office:value-type="float" office:value="-0.7922408858317964" table:style-name="c10">
            <text:p>-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20:45</text:p>
          </table:table-cell>
          <table:table-cell office:value-type="float" office:value="1.06053" table:style-name="c9">
            <text:p>1.0605</text:p>
          </table:table-cell>
          <table:table-cell office:value-type="string" table:style-name="c9">
            <text:p>2026-03-23 21:15</text:p>
          </table:table-cell>
          <table:table-cell office:value-type="float" office:value="1.0404795" table:style-name="c9">
            <text:p>1.0405</text:p>
          </table:table-cell>
          <table:table-cell office:value-type="float" office:value="-2.0867319661395656" table:style-name="c10">
            <text:p>-2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06:15</text:p>
          </table:table-cell>
          <table:table-cell office:value-type="float" office:value="1.0835415" table:style-name="c9">
            <text:p>1.0835</text:p>
          </table:table-cell>
          <table:table-cell office:value-type="string" table:style-name="c9">
            <text:p>2026-03-24 06:45</text:p>
          </table:table-cell>
          <table:table-cell office:value-type="float" office:value="1.0464765" table:style-name="c9">
            <text:p>1.0465</text:p>
          </table:table-cell>
          <table:table-cell office:value-type="float" office:value="-3.613789275583812" table:style-name="c10">
            <text:p>-3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09:00</text:p>
          </table:table-cell>
          <table:table-cell office:value-type="float" office:value="1.074537" table:style-name="c9">
            <text:p>1.0745</text:p>
          </table:table-cell>
          <table:table-cell office:value-type="string" table:style-name="c9">
            <text:p>2026-03-24 09:30</text:p>
          </table:table-cell>
          <table:table-cell office:value-type="float" office:value="1.0664665" table:style-name="c9">
            <text:p>1.0665</text:p>
          </table:table-cell>
          <table:table-cell office:value-type="float" office:value="-0.9494662848743229" table:style-name="c10">
            <text:p>-0.9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16:30</text:p>
          </table:table-cell>
          <table:table-cell office:value-type="float" office:value="1.048524" table:style-name="c9">
            <text:p>1.0485</text:p>
          </table:table-cell>
          <table:table-cell office:value-type="string" table:style-name="c9">
            <text:p>2026-03-24 17:00</text:p>
          </table:table-cell>
          <table:table-cell office:value-type="float" office:value="1.047476" table:style-name="c9">
            <text:p>1.0475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3:30</text:p>
          </table:table-cell>
          <table:table-cell office:value-type="float" office:value="1.108554" table:style-name="c9">
            <text:p>1.1086</text:p>
          </table:table-cell>
          <table:table-cell office:value-type="string" table:style-name="c9">
            <text:p>2026-03-25 00:00</text:p>
          </table:table-cell>
          <table:table-cell office:value-type="float" office:value="1.1154420000000003" table:style-name="c9">
            <text:p>1.1154</text:p>
          </table:table-cell>
          <table:table-cell office:value-type="float" office:value="0.4202078962324052" table:style-name="c11">
            <text:p>+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0:15</text:p>
          </table:table-cell>
          <table:table-cell office:value-type="float" office:value="1.102551" table:style-name="c9">
            <text:p>1.1026</text:p>
          </table:table-cell>
          <table:table-cell office:value-type="string" table:style-name="c9">
            <text:p>2026-03-25 00:45</text:p>
          </table:table-cell>
          <table:table-cell office:value-type="float" office:value="1.0974510000000002" table:style-name="c9">
            <text:p>1.0975</text:p>
          </table:table-cell>
          <table:table-cell office:value-type="float" office:value="-0.6615389718026554" table:style-name="c10">
            <text:p>-0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8:15</text:p>
          </table:table-cell>
          <table:table-cell office:value-type="float" office:value="0.8614305" table:style-name="c9">
            <text:p>0.86143</text:p>
          </table:table-cell>
          <table:table-cell office:value-type="string" table:style-name="c9">
            <text:p>2026-04-06 08:45</text:p>
          </table:table-cell>
          <table:table-cell office:value-type="float" office:value="0.8645675" table:style-name="c9">
            <text:p>0.86457</text:p>
          </table:table-cell>
          <table:table-cell office:value-type="float" office:value="0.1635337461931119" table:style-name="c11">
            <text:p>+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30</text:p>
          </table:table-cell>
          <table:table-cell office:value-type="float" office:value="0.8684339999999999" table:style-name="c9">
            <text:p>0.86843</text:p>
          </table:table-cell>
          <table:table-cell office:value-type="string" table:style-name="c9">
            <text:p>2026-04-06 10:00</text:p>
          </table:table-cell>
          <table:table-cell office:value-type="float" office:value="0.871564" table:style-name="c9">
            <text:p>0.87156</text:p>
          </table:table-cell>
          <table:table-cell office:value-type="float" office:value="0.15979839158761777" table:style-name="c11">
            <text:p>+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05:45</text:p>
          </table:table-cell>
          <table:table-cell office:value-type="float" office:value="0.8824409999999999" table:style-name="c9">
            <text:p>0.88244</text:p>
          </table:table-cell>
          <table:table-cell office:value-type="string" table:style-name="c9">
            <text:p>2026-04-08 06:15</text:p>
          </table:table-cell>
          <table:table-cell office:value-type="float" office:value="0.8745625" table:style-name="c9">
            <text:p>0.87456</text:p>
          </table:table-cell>
          <table:table-cell office:value-type="float" office:value="-1.0909228421503547" table:style-name="c10">
            <text:p>-1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6:45</text:p>
          </table:table-cell>
          <table:table-cell office:value-type="float" office:value="0.8684339999999999" table:style-name="c9">
            <text:p>0.86843</text:p>
          </table:table-cell>
          <table:table-cell office:value-type="string" table:style-name="c9">
            <text:p>2026-04-10 17:15</text:p>
          </table:table-cell>
          <table:table-cell office:value-type="float" office:value="0.863568" table:style-name="c9">
            <text:p>0.86357</text:p>
          </table:table-cell>
          <table:table-cell office:value-type="float" office:value="-0.7590988413627042" table:style-name="c10">
            <text:p>-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9:15</text:p>
          </table:table-cell>
          <table:table-cell office:value-type="float" office:value="0.8744369999999999" table:style-name="c9">
            <text:p>0.87444</text:p>
          </table:table-cell>
          <table:table-cell office:value-type="string" table:style-name="c9">
            <text:p>2026-04-10 19:45</text:p>
          </table:table-cell>
          <table:table-cell office:value-type="float" office:value="0.869565" table:style-name="c9">
            <text:p>0.86957</text:p>
          </table:table-cell>
          <table:table-cell office:value-type="float" office:value="-0.7559447318674639" table:style-name="c10">
            <text:p>-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2:15</text:p>
          </table:table-cell>
          <table:table-cell office:value-type="float" office:value="0.8544269999999999" table:style-name="c9">
            <text:p>0.85443</text:p>
          </table:table-cell>
          <table:table-cell office:value-type="string" table:style-name="c9">
            <text:p>2026-04-11 12:45</text:p>
          </table:table-cell>
          <table:table-cell office:value-type="float" office:value="0.8525735" table:style-name="c9">
            <text:p>0.85257</text:p>
          </table:table-cell>
          <table:table-cell office:value-type="float" office:value="-0.41639536513943254" table:style-name="c10">
            <text:p>-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6:45</text:p>
          </table:table-cell>
          <table:table-cell office:value-type="float" office:value="0.8674335" table:style-name="c9">
            <text:p>0.86743</text:p>
          </table:table-cell>
          <table:table-cell office:value-type="string" table:style-name="c9">
            <text:p>2026-04-11 17:15</text:p>
          </table:table-cell>
          <table:table-cell office:value-type="float" office:value="0.8675660000000001" table:style-name="c9">
            <text:p>0.86757</text:p>
          </table:table-cell>
          <table:table-cell office:value-type="float" office:value="-0.18465558846874064" table:style-name="c10">
            <text:p>-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15</text:p>
          </table:table-cell>
          <table:table-cell office:value-type="float" office:value="0.8664329999999999" table:style-name="c9">
            <text:p>0.86643</text:p>
          </table:table-cell>
          <table:table-cell office:value-type="string" table:style-name="c9">
            <text:p>2026-04-11 18:45</text:p>
          </table:table-cell>
          <table:table-cell office:value-type="float" office:value="0.8755620000000001" table:style-name="c9">
            <text:p>0.87556</text:p>
          </table:table-cell>
          <table:table-cell office:value-type="float" office:value="0.8516240219382576" table:style-name="c11">
            <text:p>+0.9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9:00</text:p>
          </table:table-cell>
          <table:table-cell office:value-type="float" office:value="0.8744369999999999" table:style-name="c9">
            <text:p>0.87444</text:p>
          </table:table-cell>
          <table:table-cell office:value-type="string" table:style-name="c9">
            <text:p>2026-04-11 19:30</text:p>
          </table:table-cell>
          <table:table-cell office:value-type="float" office:value="0.8785605000000001" table:style-name="c9">
            <text:p>0.87856</text:p>
          </table:table-cell>
          <table:table-cell office:value-type="float" office:value="0.2707179088373701" table:style-name="c11">
            <text:p>+0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30</text:p>
          </table:table-cell>
          <table:table-cell office:value-type="float" office:value="0.8714354999999999" table:style-name="c9">
            <text:p>0.87144</text:p>
          </table:table-cell>
          <table:table-cell office:value-type="string" table:style-name="c9">
            <text:p>2026-04-13 23:00</text:p>
          </table:table-cell>
          <table:table-cell office:value-type="float" office:value="0.8745625" table:style-name="c9">
            <text:p>0.87456</text:p>
          </table:table-cell>
          <table:table-cell office:value-type="float" office:value="0.15821590496372107" table:style-name="c11">
            <text:p>+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2:00</text:p>
          </table:table-cell>
          <table:table-cell office:value-type="float" office:value="0.8774384999999999" table:style-name="c9">
            <text:p>0.87744</text:p>
          </table:table-cell>
          <table:table-cell office:value-type="string" table:style-name="c9">
            <text:p>2026-04-15 12:30</text:p>
          </table:table-cell>
          <table:table-cell office:value-type="float" office:value="0.8805595" table:style-name="c9">
            <text:p>0.88056</text:p>
          </table:table-cell>
          <table:table-cell office:value-type="float" office:value="0.15508341148697813" table:style-name="c11">
            <text:p>+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2:45</text:p>
          </table:table-cell>
          <table:table-cell office:value-type="float" office:value="0.8874434999999999" table:style-name="c9">
            <text:p>0.88744</text:p>
          </table:table-cell>
          <table:table-cell office:value-type="string" table:style-name="c9">
            <text:p>2026-04-15 13:15</text:p>
          </table:table-cell>
          <table:table-cell office:value-type="float" office:value="0.8835580000000001" table:style-name="c9">
            <text:p>0.88356</text:p>
          </table:table-cell>
          <table:table-cell office:value-type="float" office:value="-0.6368554665170278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5:30</text:p>
          </table:table-cell>
          <table:table-cell office:value-type="float" office:value="0.8934464999999999" table:style-name="c9">
            <text:p>0.89345</text:p>
          </table:table-cell>
          <table:table-cell office:value-type="string" table:style-name="c9">
            <text:p>2026-04-15 16:00</text:p>
          </table:table-cell>
          <table:table-cell office:value-type="float" office:value="0.9025485000000001" table:style-name="c9">
            <text:p>0.90255</text:p>
          </table:table-cell>
          <table:table-cell office:value-type="float" office:value="0.8168150581484346" table:style-name="c11">
            <text:p>+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30</text:p>
          </table:table-cell>
          <table:table-cell office:value-type="float" office:value="0.8974485" table:style-name="c9">
            <text:p>0.89745</text:p>
          </table:table-cell>
          <table:table-cell office:value-type="string" table:style-name="c9">
            <text:p>2026-04-16 03:00</text:p>
          </table:table-cell>
          <table:table-cell office:value-type="float" office:value="0.8985505" table:style-name="c9">
            <text:p>0.89855</text:p>
          </table:table-cell>
          <table:table-cell office:value-type="float" office:value="-0.07735290097423686" table:style-name="c10">
            <text:p>-0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4:15</text:p>
          </table:table-cell>
          <table:table-cell office:value-type="float" office:value="0.910455" table:style-name="c9">
            <text:p>0.91046</text:p>
          </table:table-cell>
          <table:table-cell office:value-type="string" table:style-name="c9">
            <text:p>2026-04-16 04:45</text:p>
          </table:table-cell>
          <table:table-cell office:value-type="float" office:value="0.925537" table:style-name="c9">
            <text:p>0.92554</text:p>
          </table:table-cell>
          <table:table-cell office:value-type="float" office:value="1.453322957971559" table:style-name="c11">
            <text:p>+1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2:15</text:p>
          </table:table-cell>
          <table:table-cell office:value-type="float" office:value="0.9384689999999999" table:style-name="c9">
            <text:p>0.93847</text:p>
          </table:table-cell>
          <table:table-cell office:value-type="string" table:style-name="c9">
            <text:p>2026-04-16 12:45</text:p>
          </table:table-cell>
          <table:table-cell office:value-type="float" office:value="0.9365315000000001" table:style-name="c9">
            <text:p>0.93653</text:p>
          </table:table-cell>
          <table:table-cell office:value-type="float" office:value="-0.4059405764601509" table:style-name="c10">
            <text:p>-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15</text:p>
          </table:table-cell>
          <table:table-cell office:value-type="float" office:value="0.942471" table:style-name="c9">
            <text:p>0.94247</text:p>
          </table:table-cell>
          <table:table-cell office:value-type="string" table:style-name="c9">
            <text:p>2026-04-16 15:45</text:p>
          </table:table-cell>
          <table:table-cell office:value-type="float" office:value="0.9735130000000001" table:style-name="c9">
            <text:p>0.97351</text:p>
          </table:table-cell>
          <table:table-cell office:value-type="float" office:value="3.087198175116268" table:style-name="c11">
            <text:p>+3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6:00</text:p>
          </table:table-cell>
          <table:table-cell office:value-type="float" office:value="0.988494" table:style-name="c9">
            <text:p>0.98849</text:p>
          </table:table-cell>
          <table:table-cell office:value-type="string" table:style-name="c9">
            <text:p>2026-04-16 16:30</text:p>
          </table:table-cell>
          <table:table-cell office:value-type="float" office:value="0.9735130000000001" table:style-name="c9">
            <text:p>0.97351</text:p>
          </table:table-cell>
          <table:table-cell office:value-type="float" office:value="-1.7124082176522948" table:style-name="c10">
            <text:p>-1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9:45</text:p>
          </table:table-cell>
          <table:table-cell office:value-type="float" office:value="0.9914955" table:style-name="c9">
            <text:p>0.9915</text:p>
          </table:table-cell>
          <table:table-cell office:value-type="string" table:style-name="c9">
            <text:p>2026-04-16 20:15</text:p>
          </table:table-cell>
          <table:table-cell office:value-type="float" office:value="0.9895050000000001" table:style-name="c9">
            <text:p>0.98951</text:p>
          </table:table-cell>
          <table:table-cell office:value-type="float" office:value="-0.4002560268805966" table:style-name="c10">
            <text:p>-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22:45</text:p>
          </table:table-cell>
          <table:table-cell office:value-type="float" office:value="1.0035014999999998" table:style-name="c9">
            <text:p>1.0035</text:p>
          </table:table-cell>
          <table:table-cell office:value-type="string" table:style-name="c9">
            <text:p>2026-04-16 23:15</text:p>
          </table:table-cell>
          <table:table-cell office:value-type="float" office:value="0.9975010000000001" table:style-name="c9">
            <text:p>0.9975</text:p>
          </table:table-cell>
          <table:table-cell office:value-type="float" office:value="-0.7966609416129034" table:style-name="c10">
            <text:p>-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9:45</text:p>
          </table:table-cell>
          <table:table-cell office:value-type="float" office:value="1.0015005" table:style-name="c9">
            <text:p>1.0015</text:p>
          </table:table-cell>
          <table:table-cell office:value-type="string" table:style-name="c9">
            <text:p>2026-04-17 10:15</text:p>
          </table:table-cell>
          <table:table-cell office:value-type="float" office:value="1.0024985" table:style-name="c9">
            <text:p>1.0025</text:p>
          </table:table-cell>
          <table:table-cell office:value-type="float" office:value="-0.1004487268353782" table:style-name="c10">
            <text:p>-0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0.9604799999999999" table:style-name="c9">
            <text:p>0.96048</text:p>
          </table:table-cell>
          <table:table-cell office:value-type="string" table:style-name="c9">
            <text:p>2026-04-22 06:00</text:p>
          </table:table-cell>
          <table:table-cell office:value-type="float" office:value="0.951524" table:style-name="c9">
            <text:p>0.95152</text:p>
          </table:table-cell>
          <table:table-cell office:value-type="float" office:value="-1.1304864730134923" table:style-name="c10">
            <text:p>-1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8:15</text:p>
          </table:table-cell>
          <table:table-cell office:value-type="float" office:value="0.9664829999999999" table:style-name="c9">
            <text:p>0.96648</text:p>
          </table:table-cell>
          <table:table-cell office:value-type="string" table:style-name="c9">
            <text:p>2026-04-22 08:45</text:p>
          </table:table-cell>
          <table:table-cell office:value-type="float" office:value="0.9685155" table:style-name="c9">
            <text:p>0.96852</text:p>
          </table:table-cell>
          <table:table-cell office:value-type="float" office:value="0.009978190563120215" table:style-name="c11">
            <text:p>+0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2:00</text:p>
          </table:table-cell>
          <table:table-cell office:value-type="float" office:value="0.986493" table:style-name="c9">
            <text:p>0.98649</text:p>
          </table:table-cell>
          <table:table-cell office:value-type="string" table:style-name="c9">
            <text:p>2026-04-22 12:30</text:p>
          </table:table-cell>
          <table:table-cell office:value-type="float" office:value="0.977511" table:style-name="c9">
            <text:p>0.97751</text:p>
          </table:table-cell>
          <table:table-cell office:value-type="float" office:value="-1.1085780121095512" table:style-name="c10">
            <text:p>-1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06:15</text:p>
          </table:table-cell>
          <table:table-cell office:value-type="float" office:value="0.9534765" table:style-name="c9">
            <text:p>0.95348</text:p>
          </table:table-cell>
          <table:table-cell office:value-type="string" table:style-name="c9">
            <text:p>2026-04-23 06:45</text:p>
          </table:table-cell>
          <table:table-cell office:value-type="float" office:value="0.9525235" table:style-name="c9">
            <text:p>0.95252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2:45</text:p>
          </table:table-cell>
          <table:table-cell office:value-type="float" office:value="0.9494744999999999" table:style-name="c9">
            <text:p>0.94947</text:p>
          </table:table-cell>
          <table:table-cell office:value-type="string" table:style-name="c9">
            <text:p>2026-04-23 13:15</text:p>
          </table:table-cell>
          <table:table-cell office:value-type="float" office:value="0.945527" table:style-name="c9">
            <text:p>0.94553</text:p>
          </table:table-cell>
          <table:table-cell office:value-type="float" office:value="-0.6148251978331132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11:15</text:p>
          </table:table-cell>
          <table:table-cell office:value-type="float" office:value="0.9594794999999999" table:style-name="c9">
            <text:p>0.95948</text:p>
          </table:table-cell>
          <table:table-cell office:value-type="string" table:style-name="c9">
            <text:p>2026-04-24 11:45</text:p>
          </table:table-cell>
          <table:table-cell office:value-type="float" office:value="0.9585205" table:style-name="c9">
            <text:p>0.95852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12:00</text:p>
          </table:table-cell>
          <table:table-cell office:value-type="float" office:value="0.9634814999999999" table:style-name="c9">
            <text:p>0.96348</text:p>
          </table:table-cell>
          <table:table-cell office:value-type="string" table:style-name="c9">
            <text:p>2026-04-24 12:30</text:p>
          </table:table-cell>
          <table:table-cell office:value-type="float" office:value="0.963518" table:style-name="c9">
            <text:p>0.96352</text:p>
          </table:table-cell>
          <table:table-cell office:value-type="float" office:value="-0.19611922823633554" table:style-name="c10">
            <text:p>-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20:00</text:p>
          </table:table-cell>
          <table:table-cell office:value-type="float" office:value="0.9714854999999999" table:style-name="c9">
            <text:p>0.97149</text:p>
          </table:table-cell>
          <table:table-cell office:value-type="string" table:style-name="c9">
            <text:p>2026-04-24 20:30</text:p>
          </table:table-cell>
          <table:table-cell office:value-type="float" office:value="0.967516" table:style-name="c9">
            <text:p>0.96752</text:p>
          </table:table-cell>
          <table:table-cell office:value-type="float" office:value="-0.6076842612679267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21:15</text:p>
          </table:table-cell>
          <table:table-cell office:value-type="float" office:value="0.9794894999999999" table:style-name="c9">
            <text:p>0.97949</text:p>
          </table:table-cell>
          <table:table-cell office:value-type="string" table:style-name="c9">
            <text:p>2026-04-24 21:45</text:p>
          </table:table-cell>
          <table:table-cell office:value-type="float" office:value="0.9785105000000001" table:style-name="c9">
            <text:p>0.97851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5 04:15</text:p>
          </table:table-cell>
          <table:table-cell office:value-type="float" office:value="0.9954974999999999" table:style-name="c9">
            <text:p>0.9955</text:p>
          </table:table-cell>
          <table:table-cell office:value-type="string" table:style-name="c9">
            <text:p>2026-04-25 04:45</text:p>
          </table:table-cell>
          <table:table-cell office:value-type="float" office:value="0.983508" table:style-name="c9">
            <text:p>0.98351</text:p>
          </table:table-cell>
          <table:table-cell office:value-type="float" office:value="-1.4018651470244614" table:style-name="c10">
            <text:p>-1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5 22:30</text:p>
          </table:table-cell>
          <table:table-cell office:value-type="float" office:value="0.9674834999999999" table:style-name="c9">
            <text:p>0.96748</text:p>
          </table:table-cell>
          <table:table-cell office:value-type="string" table:style-name="c9">
            <text:p>2026-04-25 23:00</text:p>
          </table:table-cell>
          <table:table-cell office:value-type="float" office:value="0.9645175" table:style-name="c9">
            <text:p>0.96452</text:p>
          </table:table-cell>
          <table:table-cell office:value-type="float" office:value="-0.5058557052910806" table:style-name="c10">
            <text:p>-0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04:45</text:p>
          </table:table-cell>
          <table:table-cell office:value-type="float" office:value="0.9684839999999999" table:style-name="c9">
            <text:p>0.96848</text:p>
          </table:table-cell>
          <table:table-cell office:value-type="string" table:style-name="c9">
            <text:p>2026-04-26 05:15</text:p>
          </table:table-cell>
          <table:table-cell office:value-type="float" office:value="0.9725135" table:style-name="c9">
            <text:p>0.97251</text:p>
          </table:table-cell>
          <table:table-cell office:value-type="float" office:value="0.21533092064507375" table:style-name="c11">
            <text:p>+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09:00</text:p>
          </table:table-cell>
          <table:table-cell office:value-type="float" office:value="0.9814904999999999" table:style-name="c9">
            <text:p>0.98149</text:p>
          </table:table-cell>
          <table:table-cell office:value-type="string" table:style-name="c9">
            <text:p>2026-04-26 09:30</text:p>
          </table:table-cell>
          <table:table-cell office:value-type="float" office:value="0.977511" table:style-name="c9">
            <text:p>0.97751</text:p>
          </table:table-cell>
          <table:table-cell office:value-type="float" office:value="-0.6045442608970664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0:00</text:p>
          </table:table-cell>
          <table:table-cell office:value-type="float" office:value="0.986493" table:style-name="c9">
            <text:p>0.98649</text:p>
          </table:table-cell>
          <table:table-cell office:value-type="string" table:style-name="c9">
            <text:p>2026-04-26 10:30</text:p>
          </table:table-cell>
          <table:table-cell office:value-type="float" office:value="0.9885055" table:style-name="c9">
            <text:p>0.98851</text:p>
          </table:table-cell>
          <table:table-cell office:value-type="float" office:value="0.0036976953207146224" table:style-name="c11">
            <text:p>+0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1:30</text:p>
          </table:table-cell>
          <table:table-cell office:value-type="float" office:value="0.9994995" table:style-name="c9">
            <text:p>0.9995</text:p>
          </table:table-cell>
          <table:table-cell office:value-type="string" table:style-name="c9">
            <text:p>2026-04-26 12:00</text:p>
          </table:table-cell>
          <table:table-cell office:value-type="float" office:value="0.9905045" table:style-name="c9">
            <text:p>0.9905</text:p>
          </table:table-cell>
          <table:table-cell office:value-type="float" office:value="-1.098051424287838" table:style-name="c10">
            <text:p>-1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6:00</text:p>
          </table:table-cell>
          <table:table-cell office:value-type="float" office:value="0.9934964999999999" table:style-name="c9">
            <text:p>0.9935</text:p>
          </table:table-cell>
          <table:table-cell office:value-type="string" table:style-name="c9">
            <text:p>2026-04-26 16:30</text:p>
          </table:table-cell>
          <table:table-cell office:value-type="float" office:value="0.9885055" table:style-name="c9">
            <text:p>0.98851</text:p>
          </table:table-cell>
          <table:table-cell office:value-type="float" office:value="-0.701262912803402" table:style-name="c10">
            <text:p>-0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8:30</text:p>
          </table:table-cell>
          <table:table-cell office:value-type="float" office:value="0.9934964999999999" table:style-name="c9">
            <text:p>0.9935</text:p>
          </table:table-cell>
          <table:table-cell office:value-type="string" table:style-name="c9">
            <text:p>2026-04-26 19:00</text:p>
          </table:table-cell>
          <table:table-cell office:value-type="float" office:value="0.9895050000000001" table:style-name="c9">
            <text:p>0.98951</text:p>
          </table:table-cell>
          <table:table-cell office:value-type="float" office:value="-0.6008597408244332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03:45</text:p>
          </table:table-cell>
          <table:table-cell office:value-type="float" office:value="0.9874934999999999" table:style-name="c9">
            <text:p>0.98749</text:p>
          </table:table-cell>
          <table:table-cell office:value-type="string" table:style-name="c9">
            <text:p>2026-04-29 04:15</text:p>
          </table:table-cell>
          <table:table-cell office:value-type="float" office:value="0.9895050000000001" table:style-name="c9">
            <text:p>0.98951</text:p>
          </table:table-cell>
          <table:table-cell office:value-type="float" office:value="0.003390351936505276" table:style-name="c11">
            <text:p>+0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06:00</text:p>
          </table:table-cell>
          <table:table-cell office:value-type="float" office:value="0.994497" table:style-name="c9">
            <text:p>0.9945</text:p>
          </table:table-cell>
          <table:table-cell office:value-type="string" table:style-name="c9">
            <text:p>2026-04-29 06:30</text:p>
          </table:table-cell>
          <table:table-cell office:value-type="float" office:value="1.0014990000000001" table:style-name="c9">
            <text:p>1.0015</text:p>
          </table:table-cell>
          <table:table-cell office:value-type="float" office:value="0.5027670771254211" table:style-name="c11">
            <text:p>+0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06:45</text:p>
          </table:table-cell>
          <table:table-cell office:value-type="float" office:value="1.0075034999999999" table:style-name="c9">
            <text:p>1.0075</text:p>
          </table:table-cell>
          <table:table-cell office:value-type="string" table:style-name="c9">
            <text:p>2026-04-29 07:15</text:p>
          </table:table-cell>
          <table:table-cell office:value-type="float" office:value="1.0024985" table:style-name="c9">
            <text:p>1.0025</text:p>
          </table:table-cell>
          <table:table-cell office:value-type="float" office:value="-0.6956794196248506" table:style-name="c10">
            <text:p>-0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45</text:p>
          </table:table-cell>
          <table:table-cell office:value-type="float" office:value="1.0035014999999998" table:style-name="c9">
            <text:p>1.0035</text:p>
          </table:table-cell>
          <table:table-cell office:value-type="string" table:style-name="c9">
            <text:p>2026-04-29 11:15</text:p>
          </table:table-cell>
          <table:table-cell office:value-type="float" office:value="0.9985005" table:style-name="c9">
            <text:p>0.9985</text:p>
          </table:table-cell>
          <table:table-cell office:value-type="float" office:value="-0.6972587982678413" table:style-name="c10">
            <text:p>-0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8:00</text:p>
          </table:table-cell>
          <table:table-cell office:value-type="float" office:value="0.9844919999999999" table:style-name="c9">
            <text:p>0.98449</text:p>
          </table:table-cell>
          <table:table-cell office:value-type="string" table:style-name="c9">
            <text:p>2026-04-29 18:30</text:p>
          </table:table-cell>
          <table:table-cell office:value-type="float" office:value="0.951524" table:style-name="c9">
            <text:p>0.95152</text:p>
          </table:table-cell>
          <table:table-cell office:value-type="float" office:value="-3.5419380224521846" table:style-name="c10">
            <text:p>-3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20:45</text:p>
          </table:table-cell>
          <table:table-cell office:value-type="float" office:value="0.9834915" table:style-name="c9">
            <text:p>0.98349</text:p>
          </table:table-cell>
          <table:table-cell office:value-type="string" table:style-name="c9">
            <text:p>2026-04-29 21:15</text:p>
          </table:table-cell>
          <table:table-cell office:value-type="float" office:value="0.9825085" table:style-name="c9">
            <text:p>0.98251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30 02:15</text:p>
          </table:table-cell>
          <table:table-cell office:value-type="float" office:value="1.0275134999999997" table:style-name="c9">
            <text:p>1.0275</text:p>
          </table:table-cell>
          <table:table-cell office:value-type="string" table:style-name="c9">
            <text:p>2026-04-30 02:45</text:p>
          </table:table-cell>
          <table:table-cell office:value-type="float" office:value="1.0074960000000002" table:style-name="c9">
            <text:p>1.0075</text:p>
          </table:table-cell>
          <table:table-cell office:value-type="float" office:value="-2.1441552353326454" table:style-name="c10">
            <text:p>-2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02:00</text:p>
          </table:table-cell>
          <table:table-cell office:value-type="float" office:value="1.022511" table:style-name="c9">
            <text:p>1.0225</text:p>
          </table:table-cell>
          <table:table-cell office:value-type="string" table:style-name="c9">
            <text:p>2026-05-01 02:30</text:p>
          </table:table-cell>
          <table:table-cell office:value-type="float" office:value="1.015492" table:style-name="c9">
            <text:p>1.0155</text:p>
          </table:table-cell>
          <table:table-cell office:value-type="float" office:value="-0.8849751746435763" table:style-name="c10">
            <text:p>-0.9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01:15</text:p>
          </table:table-cell>
          <table:table-cell office:value-type="float" office:value="1.0095044999999998" table:style-name="c9">
            <text:p>1.0095</text:p>
          </table:table-cell>
          <table:table-cell office:value-type="string" table:style-name="c9">
            <text:p>2026-05-02 01:45</text:p>
          </table:table-cell>
          <table:table-cell office:value-type="float" office:value="1.0044975" table:style-name="c9">
            <text:p>1.0045</text:p>
          </table:table-cell>
          <table:table-cell office:value-type="float" office:value="-0.6948944261763956" table:style-name="c10">
            <text:p>-0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02:15</text:p>
          </table:table-cell>
          <table:table-cell office:value-type="float" office:value="1.0135064999999999" table:style-name="c9">
            <text:p>1.0135</text:p>
          </table:table-cell>
          <table:table-cell office:value-type="string" table:style-name="c9">
            <text:p>2026-05-02 02:45</text:p>
          </table:table-cell>
          <table:table-cell office:value-type="float" office:value="1.0024985" table:style-name="c9">
            <text:p>1.0025</text:p>
          </table:table-cell>
          <table:table-cell office:value-type="float" office:value="-1.283859008452315" table:style-name="c10">
            <text:p>-1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1:45</text:p>
          </table:table-cell>
          <table:table-cell office:value-type="float" office:value="1.0005" table:style-name="c9">
            <text:p>1.0005</text:p>
          </table:table-cell>
          <table:table-cell office:value-type="string" table:style-name="c9">
            <text:p>2026-05-06 02:15</text:p>
          </table:table-cell>
          <table:table-cell office:value-type="float" office:value="1.005497" table:style-name="c9">
            <text:p>1.0055</text:p>
          </table:table-cell>
          <table:table-cell office:value-type="float" office:value="0.29855187376313097" table:style-name="c11">
            <text:p>+0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3:15</text:p>
          </table:table-cell>
          <table:table-cell office:value-type="float" office:value="1.0115055" table:style-name="c9">
            <text:p>1.0115</text:p>
          </table:table-cell>
          <table:table-cell office:value-type="string" table:style-name="c9">
            <text:p>2026-05-06 03:45</text:p>
          </table:table-cell>
          <table:table-cell office:value-type="float" office:value="1.01949" table:style-name="c9">
            <text:p>1.0195</text:p>
          </table:table-cell>
          <table:table-cell office:value-type="float" office:value="0.5878899808255955" table:style-name="c11">
            <text:p>+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8:15</text:p>
          </table:table-cell>
          <table:table-cell office:value-type="float" office:value="1.0275134999999997" table:style-name="c9">
            <text:p>1.0275</text:p>
          </table:table-cell>
          <table:table-cell office:value-type="string" table:style-name="c9">
            <text:p>2026-05-06 08:45</text:p>
          </table:table-cell>
          <table:table-cell office:value-type="float" office:value="1.0394800000000002" table:style-name="c9">
            <text:p>1.0395</text:p>
          </table:table-cell>
          <table:table-cell office:value-type="float" office:value="0.9623795191012308" table:style-name="c11">
            <text:p>+1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15</text:p>
          </table:table-cell>
          <table:table-cell office:value-type="float" office:value="1.0535264999999998" table:style-name="c9">
            <text:p>1.0535</text:p>
          </table:table-cell>
          <table:table-cell office:value-type="string" table:style-name="c9">
            <text:p>2026-05-06 09:45</text:p>
          </table:table-cell>
          <table:table-cell office:value-type="float" office:value="1.057471" table:style-name="c9">
            <text:p>1.0575</text:p>
          </table:table-cell>
          <table:table-cell office:value-type="float" office:value="0.1737607427055865" table:style-name="c11">
            <text:p>+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4:30</text:p>
          </table:table-cell>
          <table:table-cell office:value-type="float" office:value="1.0155074999999998" table:style-name="c9">
            <text:p>1.0155</text:p>
          </table:table-cell>
          <table:table-cell office:value-type="string" table:style-name="c9">
            <text:p>2026-05-07 05:00</text:p>
          </table:table-cell>
          <table:table-cell office:value-type="float" office:value="1.0174910000000001" table:style-name="c9">
            <text:p>1.0175</text:p>
          </table:table-cell>
          <table:table-cell office:value-type="float" office:value="-0.00496938811379577" table:style-name="c10">
            <text:p>-0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18:15</text:p>
          </table:table-cell>
          <table:table-cell office:value-type="float" office:value="1.0245119999999999" table:style-name="c9">
            <text:p>1.0245</text:p>
          </table:table-cell>
          <table:table-cell office:value-type="string" table:style-name="c9">
            <text:p>2026-05-07 18:45</text:p>
          </table:table-cell>
          <table:table-cell office:value-type="float" office:value="1.021489" table:style-name="c9">
            <text:p>1.0215</text:p>
          </table:table-cell>
          <table:table-cell office:value-type="float" office:value="-0.49437747054204007" table:style-name="c10">
            <text:p>-0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2:00</text:p>
          </table:table-cell>
          <table:table-cell office:value-type="float" office:value="1.062531" table:style-name="c9">
            <text:p>1.0625</text:p>
          </table:table-cell>
          <table:table-cell office:value-type="string" table:style-name="c9">
            <text:p>2026-05-08 12:30</text:p>
          </table:table-cell>
          <table:table-cell office:value-type="float" office:value="1.0564715" table:style-name="c9">
            <text:p>1.0565</text:p>
          </table:table-cell>
          <table:table-cell office:value-type="float" office:value="-0.7690492351281719" table:style-name="c10">
            <text:p>-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5:00</text:p>
          </table:table-cell>
          <table:table-cell office:value-type="float" office:value="1.062531" table:style-name="c9">
            <text:p>1.0625</text:p>
          </table:table-cell>
          <table:table-cell office:value-type="string" table:style-name="c9">
            <text:p>2026-05-08 15:30</text:p>
          </table:table-cell>
          <table:table-cell office:value-type="float" office:value="1.053473" table:style-name="c9">
            <text:p>1.0535</text:p>
          </table:table-cell>
          <table:table-cell office:value-type="float" office:value="-1.0506886412725458" table:style-name="c10">
            <text:p>-1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5:45</text:p>
          </table:table-cell>
          <table:table-cell office:value-type="float" office:value="1.0675335" table:style-name="c9">
            <text:p>1.0675</text:p>
          </table:table-cell>
          <table:table-cell office:value-type="string" table:style-name="c9">
            <text:p>2026-05-08 16:15</text:p>
          </table:table-cell>
          <table:table-cell office:value-type="float" office:value="1.0704645" table:style-name="c9">
            <text:p>1.0705</text:p>
          </table:table-cell>
          <table:table-cell office:value-type="float" office:value="0.07410928692168639" table:style-name="c11">
            <text:p>+0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17:30</text:p>
          </table:table-cell>
          <table:table-cell office:value-type="float" office:value="1.1155575" table:style-name="c9">
            <text:p>1.1156</text:p>
          </table:table-cell>
          <table:table-cell office:value-type="string" table:style-name="c9">
            <text:p>2026-05-09 18:00</text:p>
          </table:table-cell>
          <table:table-cell office:value-type="float" office:value="1.111444" table:style-name="c9">
            <text:p>1.1114</text:p>
          </table:table-cell>
          <table:table-cell office:value-type="float" office:value="-0.5679022870627382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45</text:p>
          </table:table-cell>
          <table:table-cell office:value-type="float" office:value="1.1415705" table:style-name="c9">
            <text:p>1.1416</text:p>
          </table:table-cell>
          <table:table-cell office:value-type="string" table:style-name="c9">
            <text:p>2026-05-10 17:15</text:p>
          </table:table-cell>
          <table:table-cell office:value-type="float" office:value="1.169415" table:style-name="c9">
            <text:p>1.1694</text:p>
          </table:table-cell>
          <table:table-cell office:value-type="float" office:value="2.234363923647309" table:style-name="c11">
            <text:p>+2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7:30</text:p>
          </table:table-cell>
          <table:table-cell office:value-type="float" office:value="1.2006" table:style-name="c9">
            <text:p>1.2006</text:p>
          </table:table-cell>
          <table:table-cell office:value-type="string" table:style-name="c9">
            <text:p>2026-05-10 18:00</text:p>
          </table:table-cell>
          <table:table-cell office:value-type="float" office:value="1.1744125" table:style-name="c9">
            <text:p>1.1744</text:p>
          </table:table-cell>
          <table:table-cell office:value-type="float" office:value="-2.3767408452023964" table:style-name="c10">
            <text:p>-2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9:45</text:p>
          </table:table-cell>
          <table:table-cell office:value-type="float" office:value="1.2126059999999999" table:style-name="c9">
            <text:p>1.2126</text:p>
          </table:table-cell>
          <table:table-cell office:value-type="string" table:style-name="c9">
            <text:p>2026-05-10 20:15</text:p>
          </table:table-cell>
          <table:table-cell office:value-type="float" office:value="1.2073960000000001" table:style-name="c9">
            <text:p>1.2074</text:p>
          </table:table-cell>
          <table:table-cell office:value-type="float" office:value="-0.6286942835512899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0:30</text:p>
          </table:table-cell>
          <table:table-cell office:value-type="float" office:value="1.2286139999999999" table:style-name="c9">
            <text:p>1.2286</text:p>
          </table:table-cell>
          <table:table-cell office:value-type="string" table:style-name="c9">
            <text:p>2026-05-10 21:00</text:p>
          </table:table-cell>
          <table:table-cell office:value-type="float" office:value="1.1764115000000002" table:style-name="c9">
            <text:p>1.1764</text:p>
          </table:table-cell>
          <table:table-cell office:value-type="float" office:value="-4.440299930531455" table:style-name="c10">
            <text:p>-4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06:30</text:p>
          </table:table-cell>
          <table:table-cell office:value-type="float" office:value="1.1375685" table:style-name="c9">
            <text:p>1.1376</text:p>
          </table:table-cell>
          <table:table-cell office:value-type="string" table:style-name="c9">
            <text:p>2026-05-11 07:00</text:p>
          </table:table-cell>
          <table:table-cell office:value-type="float" office:value="1.125437" table:style-name="c9">
            <text:p>1.1254</text:p>
          </table:table-cell>
          <table:table-cell office:value-type="float" office:value="-1.2642094575403662" table:style-name="c10">
            <text:p>-1.3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10:15</text:p>
          </table:table-cell>
          <table:table-cell office:value-type="float" office:value="1.1335665" table:style-name="c9">
            <text:p>1.1336</text:p>
          </table:table-cell>
          <table:table-cell office:value-type="string" table:style-name="c9">
            <text:p>2026-05-11 10:45</text:p>
          </table:table-cell>
          <table:table-cell office:value-type="float" office:value="1.1284355000000001" table:style-name="c9">
            <text:p>1.1284</text:p>
          </table:table-cell>
          <table:table-cell office:value-type="float" office:value="-0.6516373379505946" table:style-name="c10">
            <text:p>-0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2:30</text:p>
          </table:table-cell>
          <table:table-cell office:value-type="float" office:value="0.9624809999999999" table:style-name="c9">
            <text:p>0.96248</text:p>
          </table:table-cell>
          <table:table-cell office:value-type="string" table:style-name="c9">
            <text:p>2026-05-21 03:00</text:p>
          </table:table-cell>
          <table:table-cell office:value-type="float" office:value="0.95952" table:style-name="c9">
            <text:p>0.95952</text:p>
          </table:table-cell>
          <table:table-cell office:value-type="float" office:value="-0.5069274593472395" table:style-name="c10">
            <text:p>-0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8:15</text:p>
          </table:table-cell>
          <table:table-cell office:value-type="float" office:value="0.9704849999999999" table:style-name="c9">
            <text:p>0.97048</text:p>
          </table:table-cell>
          <table:table-cell office:value-type="string" table:style-name="c9">
            <text:p>2026-05-21 08:45</text:p>
          </table:table-cell>
          <table:table-cell office:value-type="float" office:value="0.9685155" table:style-name="c9">
            <text:p>0.96852</text:p>
          </table:table-cell>
          <table:table-cell office:value-type="float" office:value="-0.4024340906351065" table:style-name="c10">
            <text:p>-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5:30</text:p>
          </table:table-cell>
          <table:table-cell office:value-type="float" office:value="0.9614805" table:style-name="c9">
            <text:p>0.96148</text:p>
          </table:table-cell>
          <table:table-cell office:value-type="string" table:style-name="c9">
            <text:p>2026-05-21 16:00</text:p>
          </table:table-cell>
          <table:table-cell office:value-type="float" office:value="0.9585205" table:style-name="c9">
            <text:p>0.95852</text:p>
          </table:table-cell>
          <table:table-cell office:value-type="float" office:value="-0.5071431484569899" table:style-name="c10">
            <text:p>-0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15</text:p>
          </table:table-cell>
          <table:table-cell office:value-type="float" office:value="0.9654824999999999" table:style-name="c9">
            <text:p>0.96548</text:p>
          </table:table-cell>
          <table:table-cell office:value-type="string" table:style-name="c9">
            <text:p>2026-05-21 17:45</text:p>
          </table:table-cell>
          <table:table-cell office:value-type="float" office:value="0.9735130000000001" table:style-name="c9">
            <text:p>0.97351</text:p>
          </table:table-cell>
          <table:table-cell office:value-type="float" office:value="0.6301975968492801" table:style-name="c11">
            <text:p>+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4:30</text:p>
          </table:table-cell>
          <table:table-cell office:value-type="float" office:value="0.9894944999999999" table:style-name="c9">
            <text:p>0.98949</text:p>
          </table:table-cell>
          <table:table-cell office:value-type="string" table:style-name="c9">
            <text:p>2026-05-22 05:00</text:p>
          </table:table-cell>
          <table:table-cell office:value-type="float" office:value="0.9845075000000001" table:style-name="c9">
            <text:p>0.98451</text:p>
          </table:table-cell>
          <table:table-cell office:value-type="float" office:value="-0.7028872310558487" table:style-name="c10">
            <text:p>-0.7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1:00</text:p>
          </table:table-cell>
          <table:table-cell office:value-type="float" office:value="0.9684839999999999" table:style-name="c9">
            <text:p>0.96848</text:p>
          </table:table-cell>
          <table:table-cell office:value-type="string" table:style-name="c9">
            <text:p>2026-05-25 11:30</text:p>
          </table:table-cell>
          <table:table-cell office:value-type="float" office:value="0.9645175" table:style-name="c9">
            <text:p>0.96452</text:p>
          </table:table-cell>
          <table:table-cell office:value-type="float" office:value="-0.6086389122071156" table:style-name="c10">
            <text:p>-0.6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4:15</text:p>
          </table:table-cell>
          <table:table-cell office:value-type="float" office:value="0.9734864999999999" table:style-name="c9">
            <text:p>0.97349</text:p>
          </table:table-cell>
          <table:table-cell office:value-type="string" table:style-name="c9">
            <text:p>2026-05-25 14:45</text:p>
          </table:table-cell>
          <table:table-cell office:value-type="float" office:value="0.9735130000000001" table:style-name="c9">
            <text:p>0.97351</text:p>
          </table:table-cell>
          <table:table-cell office:value-type="float" office:value="-0.19718326725638446" table:style-name="c10">
            <text:p>-0.2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7:15</text:p>
          </table:table-cell>
          <table:table-cell office:value-type="float" office:value="0.986493" table:style-name="c9">
            <text:p>0.98649</text:p>
          </table:table-cell>
          <table:table-cell office:value-type="string" table:style-name="c9">
            <text:p>2026-05-25 17:45</text:p>
          </table:table-cell>
          <table:table-cell office:value-type="float" office:value="0.9845075000000001" table:style-name="c9">
            <text:p>0.98451</text:p>
          </table:table-cell>
          <table:table-cell office:value-type="float" office:value="-0.40076619829030324" table:style-name="c10">
            <text:p>-0.4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04:30</text:p>
          </table:table-cell>
          <table:table-cell office:value-type="float" office:value="0.9654824999999999" table:style-name="c9">
            <text:p>0.96548</text:p>
          </table:table-cell>
          <table:table-cell office:value-type="string" table:style-name="c9">
            <text:p>2026-05-26 05:00</text:p>
          </table:table-cell>
          <table:table-cell office:value-type="float" office:value="0.967516" table:style-name="c9">
            <text:p>0.96752</text:p>
          </table:table-cell>
          <table:table-cell office:value-type="float" office:value="0.010299049024742324" table:style-name="c11">
            <text:p>+0.0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05:15</text:p>
          </table:table-cell>
          <table:table-cell office:value-type="float" office:value="0.9684839999999999" table:style-name="c9">
            <text:p>0.96848</text:p>
          </table:table-cell>
          <table:table-cell office:value-type="string" table:style-name="c9">
            <text:p>2026-05-26 05:45</text:p>
          </table:table-cell>
          <table:table-cell office:value-type="float" office:value="0.9785105000000001" table:style-name="c9">
            <text:p>0.97851</text:p>
          </table:table-cell>
          <table:table-cell office:value-type="float" office:value="0.8333082952841853" table:style-name="c11">
            <text:p>+0.8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06:00</text:p>
          </table:table-cell>
          <table:table-cell office:value-type="float" office:value="0.9784889999999999" table:style-name="c9">
            <text:p>0.97849</text:p>
          </table:table-cell>
          <table:table-cell office:value-type="string" table:style-name="c9">
            <text:p>2026-05-26 06:30</text:p>
          </table:table-cell>
          <table:table-cell office:value-type="float" office:value="0.975512" table:style-name="c9">
            <text:p>0.97551</text:p>
          </table:table-cell>
          <table:table-cell office:value-type="float" office:value="-0.5035364207466753" table:style-name="c10">
            <text:p>-0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0:30</text:p>
          </table:table-cell>
          <table:table-cell office:value-type="float" office:value="0.996498" table:style-name="c9">
            <text:p>0.9965</text:p>
          </table:table-cell>
          <table:table-cell office:value-type="string" table:style-name="c9">
            <text:p>2026-05-26 11:00</text:p>
          </table:table-cell>
          <table:table-cell office:value-type="float" office:value="0.993503" table:style-name="c9">
            <text:p>0.9935</text:p>
          </table:table-cell>
          <table:table-cell office:value-type="float" office:value="-0.4998517304600658" table:style-name="c10">
            <text:p>-0.5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1:15</text:p>
          </table:table-cell>
          <table:table-cell office:value-type="float" office:value="0.996498" table:style-name="c9">
            <text:p>0.9965</text:p>
          </table:table-cell>
          <table:table-cell office:value-type="string" table:style-name="c9">
            <text:p>2026-05-26 11:45</text:p>
          </table:table-cell>
          <table:table-cell office:value-type="float" office:value="0.9975010000000001" table:style-name="c9">
            <text:p>0.9975</text:p>
          </table:table-cell>
          <table:table-cell office:value-type="float" office:value="-0.09944871931502064" table:style-name="c10">
            <text:p>-0.1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4:30</text:p>
          </table:table-cell>
          <table:table-cell office:value-type="float" office:value="1.0095044999999998" table:style-name="c9">
            <text:p>1.0095</text:p>
          </table:table-cell>
          <table:table-cell office:value-type="string" table:style-name="c9">
            <text:p>2026-05-26 15:00</text:p>
          </table:table-cell>
          <table:table-cell office:value-type="float" office:value="0.9925035000000001" table:style-name="c9">
            <text:p>0.9925</text:p>
          </table:table-cell>
          <table:table-cell office:value-type="float" office:value="-1.880627030042914" table:style-name="c10">
            <text:p>-1.9</text:p>
          </table:table-cell>
        </table:table-row>
        <table:table-row>
          <table:table-cell office:value-type="string" table:style-name="c8">
            <text:p>AP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03:30</text:p>
          </table:table-cell>
          <table:table-cell office:value-type="float" office:value="0.9594794999999999" table:style-name="c9">
            <text:p>0.95948</text:p>
          </table:table-cell>
          <table:table-cell office:value-type="string" table:style-name="c9">
            <text:p>2026-06-01 04:00</text:p>
          </table:table-cell>
          <table:table-cell office:value-type="float" office:value="0.953523" table:style-name="c9">
            <text:p>0.95352</text:p>
          </table:table-cell>
          <table:table-cell office:value-type="float" office:value="-0.819464353016397" table:style-name="c10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30</text:p>
          </table:table-cell>
          <table:table-cell office:value-type="float" office:value="0.1042521" table:style-name="c1">
            <text:p>0.10425</text:p>
          </table:table-cell>
          <table:table-cell office:value-type="string" table:style-name="c1">
            <text:p>2026-03-05 10:00</text:p>
          </table:table-cell>
          <table:table-cell office:value-type="float" office:value="0.10404795" table:style-name="c1">
            <text:p>0.10405</text:p>
          </table:table-cell>
          <table:table-cell office:value-type="float" office:value="-0.39533194252201476" table:style-name="c12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10355174999999998" table:style-name="c1">
            <text:p>0.10355</text:p>
          </table:table-cell>
          <table:table-cell office:value-type="string" table:style-name="c1">
            <text:p>2026-03-05 19:45</text:p>
          </table:table-cell>
          <table:table-cell office:value-type="float" office:value="0.10264865000000001" table:style-name="c1">
            <text:p>0.10265</text:p>
          </table:table-cell>
          <table:table-cell office:value-type="float" office:value="-1.0702809477869502" table:style-name="c12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6:30</text:p>
          </table:table-cell>
          <table:table-cell office:value-type="float" office:value="0.09954975" table:style-name="c1">
            <text:p>0.09955</text:p>
          </table:table-cell>
          <table:table-cell office:value-type="string" table:style-name="c1">
            <text:p>2026-03-09 17:00</text:p>
          </table:table-cell>
          <table:table-cell office:value-type="float" office:value="0.0985507" table:style-name="c1">
            <text:p>0.098551</text:p>
          </table:table-cell>
          <table:table-cell office:value-type="float" office:value="-1.2014624339086732" table:style-name="c12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10095045" table:style-name="c1">
            <text:p>0.10095</text:p>
          </table:table-cell>
          <table:table-cell office:value-type="string" table:style-name="c1">
            <text:p>2026-03-09 20:00</text:p>
          </table:table-cell>
          <table:table-cell office:value-type="float" office:value="0.09925035" table:style-name="c1">
            <text:p>0.09925</text:p>
          </table:table-cell>
          <table:table-cell office:value-type="float" office:value="-1.8806270300429584" table:style-name="c12">
            <text:p>-1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1004502" table:style-name="c1">
            <text:p>0.10045</text:p>
          </table:table-cell>
          <table:table-cell office:value-type="string" table:style-name="c1">
            <text:p>2026-03-10 03:15</text:p>
          </table:table-cell>
          <table:table-cell office:value-type="float" office:value="0.09975010000000001" table:style-name="c1">
            <text:p>0.09975</text:p>
          </table:table-cell>
          <table:table-cell office:value-type="float" office:value="-0.8954690482447902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15</text:p>
          </table:table-cell>
          <table:table-cell office:value-type="float" office:value="0.1004502" table:style-name="c1">
            <text:p>0.10045</text:p>
          </table:table-cell>
          <table:table-cell office:value-type="string" table:style-name="c1">
            <text:p>2026-03-10 08:45</text:p>
          </table:table-cell>
          <table:table-cell office:value-type="float" office:value="0.09995000000000001" table:style-name="c1">
            <text:p>0.09995</text:p>
          </table:table-cell>
          <table:table-cell office:value-type="float" office:value="-0.6968627737923838" table:style-name="c12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0.1012506" table:style-name="c1">
            <text:p>0.10125</text:p>
          </table:table-cell>
          <table:table-cell office:value-type="string" table:style-name="c1">
            <text:p>2026-03-10 10:00</text:p>
          </table:table-cell>
          <table:table-cell office:value-type="float" office:value="0.1005497" table:style-name="c1">
            <text:p>0.10055</text:p>
          </table:table-cell>
          <table:table-cell office:value-type="float" office:value="-0.8907590180206371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15</text:p>
          </table:table-cell>
          <table:table-cell office:value-type="float" office:value="0.09864929999999998" table:style-name="c1">
            <text:p>0.098649</text:p>
          </table:table-cell>
          <table:table-cell office:value-type="string" table:style-name="c1">
            <text:p>2026-03-11 07:45</text:p>
          </table:table-cell>
          <table:table-cell office:value-type="float" office:value="0.09795100000000001" table:style-name="c1">
            <text:p>0.097951</text:p>
          </table:table-cell>
          <table:table-cell office:value-type="float" office:value="-0.9063460653040312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45</text:p>
          </table:table-cell>
          <table:table-cell office:value-type="float" office:value="0.10085039999999999" table:style-name="c1">
            <text:p>0.10085</text:p>
          </table:table-cell>
          <table:table-cell office:value-type="string" table:style-name="c1">
            <text:p>2026-03-11 13:15</text:p>
          </table:table-cell>
          <table:table-cell office:value-type="float" office:value="0.10144925000000002" table:style-name="c1">
            <text:p>0.10145</text:p>
          </table:table-cell>
          <table:table-cell office:value-type="float" office:value="0.3927133152174189" table:style-name="c13">
            <text:p>+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0.1018509" table:style-name="c1">
            <text:p>0.10185</text:p>
          </table:table-cell>
          <table:table-cell office:value-type="string" table:style-name="c1">
            <text:p>2026-03-11 14:15</text:p>
          </table:table-cell>
          <table:table-cell office:value-type="float" office:value="0.10174910000000001" table:style-name="c1">
            <text:p>0.10175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30</text:p>
          </table:table-cell>
          <table:table-cell office:value-type="float" office:value="0.10235115" table:style-name="c1">
            <text:p>0.10235</text:p>
          </table:table-cell>
          <table:table-cell office:value-type="string" table:style-name="c1">
            <text:p>2026-03-11 15:00</text:p>
          </table:table-cell>
          <table:table-cell office:value-type="float" office:value="0.1015492" table:style-name="c1">
            <text:p>0.10155</text:p>
          </table:table-cell>
          <table:table-cell office:value-type="float" office:value="-0.9818618069264429" table:style-name="c12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00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3-12 10:30</text:p>
          </table:table-cell>
          <table:table-cell office:value-type="float" office:value="0.09985005000000001" table:style-name="c1">
            <text:p>0.09985</text:p>
          </table:table-cell>
          <table:table-cell office:value-type="float" office:value="0.20186058887057268" table:style-name="c13">
            <text:p>+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1024512" table:style-name="c1">
            <text:p>0.10245</text:p>
          </table:table-cell>
          <table:table-cell office:value-type="string" table:style-name="c1">
            <text:p>2026-03-13 01:00</text:p>
          </table:table-cell>
          <table:table-cell office:value-type="float" office:value="0.101949" table:style-name="c1">
            <text:p>0.10195</text:p>
          </table:table-cell>
          <table:table-cell office:value-type="float" office:value="-0.6891047161966091" table:style-name="c12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0.10515255" table:style-name="c1">
            <text:p>0.10515</text:p>
          </table:table-cell>
          <table:table-cell office:value-type="string" table:style-name="c1">
            <text:p>2026-03-13 10:45</text:p>
          </table:table-cell>
          <table:table-cell office:value-type="float" office:value="0.10464765000000001" table:style-name="c1">
            <text:p>0.10465</text:p>
          </table:table-cell>
          <table:table-cell office:value-type="float" office:value="-0.6790997007205202" table:style-name="c12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0.10595294999999999" table:style-name="c1">
            <text:p>0.10595</text:p>
          </table:table-cell>
          <table:table-cell office:value-type="string" table:style-name="c1">
            <text:p>2026-03-13 14:00</text:p>
          </table:table-cell>
          <table:table-cell office:value-type="float" office:value="0.10624685000000002" table:style-name="c1">
            <text:p>0.10625</text:p>
          </table:table-cell>
          <table:table-cell office:value-type="float" office:value="0.07693277709588386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0:30</text:p>
          </table:table-cell>
          <table:table-cell office:value-type="float" office:value="0.10235115" table:style-name="c1">
            <text:p>0.10235</text:p>
          </table:table-cell>
          <table:table-cell office:value-type="string" table:style-name="c1">
            <text:p>2026-03-15 11:00</text:p>
          </table:table-cell>
          <table:table-cell office:value-type="float" office:value="0.1023488" table:style-name="c1">
            <text:p>0.10235</text:p>
          </table:table-cell>
          <table:table-cell office:value-type="float" office:value="-0.20219142745342422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15</text:p>
          </table:table-cell>
          <table:table-cell office:value-type="float" office:value="0.1022511" table:style-name="c1">
            <text:p>0.10225</text:p>
          </table:table-cell>
          <table:table-cell office:value-type="string" table:style-name="c1">
            <text:p>2026-03-15 18:45</text:p>
          </table:table-cell>
          <table:table-cell office:value-type="float" office:value="0.10204895" table:style-name="c1">
            <text:p>0.10205</text:p>
          </table:table-cell>
          <table:table-cell office:value-type="float" office:value="-0.39720438318021634" table:style-name="c12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0.10375184999999999" table:style-name="c1">
            <text:p>0.10375</text:p>
          </table:table-cell>
          <table:table-cell office:value-type="string" table:style-name="c1">
            <text:p>2026-03-15 23:15</text:p>
          </table:table-cell>
          <table:table-cell office:value-type="float" office:value="0.10424785" table:style-name="c1">
            <text:p>0.10425</text:p>
          </table:table-cell>
          <table:table-cell office:value-type="float" office:value="0.27720811518061605" table:style-name="c13">
            <text:p>+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1050525" table:style-name="c1">
            <text:p>0.10505</text:p>
          </table:table-cell>
          <table:table-cell office:value-type="string" table:style-name="c1">
            <text:p>2026-03-16 04:00</text:p>
          </table:table-cell>
          <table:table-cell office:value-type="float" office:value="0.105947" table:style-name="c1">
            <text:p>0.10595</text:p>
          </table:table-cell>
          <table:table-cell office:value-type="float" office:value="0.6498769158278073" table:style-name="c13">
            <text:p>+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15</text:p>
          </table:table-cell>
          <table:table-cell office:value-type="float" office:value="0.10675335" table:style-name="c1">
            <text:p>0.10675</text:p>
          </table:table-cell>
          <table:table-cell office:value-type="string" table:style-name="c1">
            <text:p>2026-03-16 04:45</text:p>
          </table:table-cell>
          <table:table-cell office:value-type="float" office:value="0.10674660000000001" table:style-name="c1">
            <text:p>0.10675</text:p>
          </table:table-cell>
          <table:table-cell office:value-type="float" office:value="-0.20621034693522056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3-16 21:45</text:p>
          </table:table-cell>
          <table:table-cell office:value-type="float" office:value="0.1107446" table:style-name="c1">
            <text:p>0.11074</text:p>
          </table:table-cell>
          <table:table-cell office:value-type="float" office:value="0.24318289548510563" table:style-name="c13">
            <text:p>+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4:4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3-17 15:15</text:p>
          </table:table-cell>
          <table:table-cell office:value-type="float" office:value="0.10744625000000001" table:style-name="c1">
            <text:p>0.10745</text:p>
          </table:table-cell>
          <table:table-cell office:value-type="float" office:value="-1.1274206565997313" table:style-name="c12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9274635" table:style-name="c1">
            <text:p>0.092746</text:p>
          </table:table-cell>
          <table:table-cell office:value-type="string" table:style-name="c1">
            <text:p>2026-03-30 08:30</text:p>
          </table:table-cell>
          <table:table-cell office:value-type="float" office:value="0.0927536" table:style-name="c1">
            <text:p>0.092754</text:p>
          </table:table-cell>
          <table:table-cell office:value-type="float" office:value="-0.19209860700718506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45</text:p>
          </table:table-cell>
          <table:table-cell office:value-type="float" office:value="0.09314655" table:style-name="c1">
            <text:p>0.093147</text:p>
          </table:table-cell>
          <table:table-cell office:value-type="string" table:style-name="c1">
            <text:p>2026-03-30 09:15</text:p>
          </table:table-cell>
          <table:table-cell office:value-type="float" office:value="0.09265365" table:style-name="c1">
            <text:p>0.092654</text:p>
          </table:table-cell>
          <table:table-cell office:value-type="float" office:value="-0.7280083334809229" table:style-name="c12">
            <text:p>-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2:30</text:p>
          </table:table-cell>
          <table:table-cell office:value-type="float" office:value="0.09334664999999999" table:style-name="c1">
            <text:p>0.093347</text:p>
          </table:table-cell>
          <table:table-cell office:value-type="string" table:style-name="c1">
            <text:p>2026-03-30 13:00</text:p>
          </table:table-cell>
          <table:table-cell office:value-type="float" office:value="0.09345325" table:style-name="c1">
            <text:p>0.093453</text:p>
          </table:table-cell>
          <table:table-cell office:value-type="float" office:value="-0.08593028967829319" table:style-name="c12">
            <text:p>-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1:15</text:p>
          </table:table-cell>
          <table:table-cell office:value-type="float" office:value="0.0912456" table:style-name="c1">
            <text:p>0.091246</text:p>
          </table:table-cell>
          <table:table-cell office:value-type="string" table:style-name="c1">
            <text:p>2026-03-30 21:45</text:p>
          </table:table-cell>
          <table:table-cell office:value-type="float" office:value="0.0915542" table:style-name="c1">
            <text:p>0.091554</text:p>
          </table:table-cell>
          <table:table-cell office:value-type="float" office:value="0.13763201096821387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0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3-31 12:30</text:p>
          </table:table-cell>
          <table:table-cell office:value-type="float" office:value="0.09215390000000001" table:style-name="c1">
            <text:p>0.092154</text:p>
          </table:table-cell>
          <table:table-cell office:value-type="float" office:value="-0.5154518477773928" table:style-name="c12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3:15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3-31 13:45</text:p>
          </table:table-cell>
          <table:table-cell office:value-type="float" office:value="0.09245375" table:style-name="c1">
            <text:p>0.092454</text:p>
          </table:table-cell>
          <table:table-cell office:value-type="float" office:value="-0.1917494134426101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9474735000000001" table:style-name="c1">
            <text:p>0.094747</text:p>
          </table:table-cell>
          <table:table-cell office:value-type="string" table:style-name="c1">
            <text:p>2026-04-01 06:00</text:p>
          </table:table-cell>
          <table:table-cell office:value-type="float" office:value="0.0947526" table:style-name="c1">
            <text:p>0.094753</text:p>
          </table:table-cell>
          <table:table-cell office:value-type="float" office:value="-0.19437002449145258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09674834999999998" table:style-name="c1">
            <text:p>0.096748</text:p>
          </table:table-cell>
          <table:table-cell office:value-type="string" table:style-name="c1">
            <text:p>2026-04-01 13:15</text:p>
          </table:table-cell>
          <table:table-cell office:value-type="float" office:value="0.09545225" table:style-name="c1">
            <text:p>0.095452</text:p>
          </table:table-cell>
          <table:table-cell office:value-type="float" office:value="-1.5368831073087952" table:style-name="c12">
            <text:p>-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9:15</text:p>
          </table:table-cell>
          <table:table-cell office:value-type="float" office:value="0.09434714999999999" table:style-name="c1">
            <text:p>0.094347</text:p>
          </table:table-cell>
          <table:table-cell office:value-type="string" table:style-name="c1">
            <text:p>2026-04-03 09:45</text:p>
          </table:table-cell>
          <table:table-cell office:value-type="float" office:value="0.09465265" table:style-name="c1">
            <text:p>0.094653</text:p>
          </table:table-cell>
          <table:table-cell office:value-type="float" office:value="0.12325687914263028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0.09374685" table:style-name="c1">
            <text:p>0.093747</text:p>
          </table:table-cell>
          <table:table-cell office:value-type="string" table:style-name="c1">
            <text:p>2026-04-04 19:45</text:p>
          </table:table-cell>
          <table:table-cell office:value-type="float" office:value="0.09285355" table:style-name="c1">
            <text:p>0.092854</text:p>
          </table:table-cell>
          <table:table-cell office:value-type="float" office:value="-1.1508805324658922" table:style-name="c12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4-06 08:45</text:p>
          </table:table-cell>
          <table:table-cell office:value-type="float" office:value="0.09685155000000001" table:style-name="c1">
            <text:p>0.096852</text:p>
          </table:table-cell>
          <table:table-cell office:value-type="float" office:value="0.32153575501971954" table:style-name="c13">
            <text:p>+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00</text:p>
          </table:table-cell>
          <table:table-cell office:value-type="float" office:value="0.09654825" table:style-name="c1">
            <text:p>0.096548</text:p>
          </table:table-cell>
          <table:table-cell office:value-type="string" table:style-name="c1">
            <text:p>2026-04-06 09:30</text:p>
          </table:table-cell>
          <table:table-cell office:value-type="float" office:value="0.09745125" table:style-name="c1">
            <text:p>0.097451</text:p>
          </table:table-cell>
          <table:table-cell office:value-type="float" office:value="0.7335140214866476" table:style-name="c13">
            <text:p>+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0.09714855" table:style-name="c1">
            <text:p>0.097149</text:p>
          </table:table-cell>
          <table:table-cell office:value-type="string" table:style-name="c1">
            <text:p>2026-04-06 10:15</text:p>
          </table:table-cell>
          <table:table-cell office:value-type="float" office:value="0.09795100000000001" table:style-name="c1">
            <text:p>0.097951</text:p>
          </table:table-cell>
          <table:table-cell office:value-type="float" office:value="0.624451884253574" table:style-name="c13">
            <text:p>+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6:00</text:p>
          </table:table-cell>
          <table:table-cell office:value-type="float" office:value="0.0942471" table:style-name="c1">
            <text:p>0.094247</text:p>
          </table:table-cell>
          <table:table-cell office:value-type="string" table:style-name="c1">
            <text:p>2026-04-07 06:30</text:p>
          </table:table-cell>
          <table:table-cell office:value-type="float" office:value="0.09385305000000001" table:style-name="c1">
            <text:p>0.093853</text:p>
          </table:table-cell>
          <table:table-cell office:value-type="float" office:value="-0.6171672623879187" table:style-name="c12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09484739999999998" table:style-name="c1">
            <text:p>0.094847</text:p>
          </table:table-cell>
          <table:table-cell office:value-type="string" table:style-name="c1">
            <text:p>2026-04-07 18:30</text:p>
          </table:table-cell>
          <table:table-cell office:value-type="float" office:value="0.09515240000000001" table:style-name="c1">
            <text:p>0.095152</text:p>
          </table:table-cell>
          <table:table-cell office:value-type="float" office:value="0.12102635644206661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9:30</text:p>
          </table:table-cell>
          <table:table-cell office:value-type="float" office:value="0.0956478" table:style-name="c1">
            <text:p>0.095648</text:p>
          </table:table-cell>
          <table:table-cell office:value-type="string" table:style-name="c1">
            <text:p>2026-04-07 20:00</text:p>
          </table:table-cell>
          <table:table-cell office:value-type="float" office:value="0.09695150000000001" table:style-name="c1">
            <text:p>0.096952</text:p>
          </table:table-cell>
          <table:table-cell office:value-type="float" office:value="1.1603967383463143" table:style-name="c13">
            <text:p>+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15</text:p>
          </table:table-cell>
          <table:table-cell office:value-type="float" office:value="0.0974487" table:style-name="c1">
            <text:p>0.097449</text:p>
          </table:table-cell>
          <table:table-cell office:value-type="string" table:style-name="c1">
            <text:p>2026-04-07 20:45</text:p>
          </table:table-cell>
          <table:table-cell office:value-type="float" office:value="0.09705145000000001" table:style-name="c1">
            <text:p>0.097051</text:p>
          </table:table-cell>
          <table:table-cell office:value-type="float" office:value="-0.6067354911353351" table:style-name="c12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10075034999999999" table:style-name="c1">
            <text:p>0.10075</text:p>
          </table:table-cell>
          <table:table-cell office:value-type="string" table:style-name="c1">
            <text:p>2026-04-07 23:15</text:p>
          </table:table-cell>
          <table:table-cell office:value-type="float" office:value="0.10204895" table:style-name="c1">
            <text:p>0.10205</text:p>
          </table:table-cell>
          <table:table-cell office:value-type="float" office:value="1.0864519566929465" table:style-name="c13">
            <text:p>+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4:15</text:p>
          </table:table-cell>
          <table:table-cell office:value-type="float" office:value="0.1028514" table:style-name="c1">
            <text:p>0.10285</text:p>
          </table:table-cell>
          <table:table-cell office:value-type="string" table:style-name="c1">
            <text:p>2026-04-08 04:45</text:p>
          </table:table-cell>
          <table:table-cell office:value-type="float" office:value="0.10364815000000001" table:style-name="c1">
            <text:p>0.10365</text:p>
          </table:table-cell>
          <table:table-cell office:value-type="float" office:value="0.5732127595249104" table:style-name="c13">
            <text:p>+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15</text:p>
          </table:table-cell>
          <table:table-cell office:value-type="float" office:value="0.1038519" table:style-name="c1">
            <text:p>0.10385</text:p>
          </table:table-cell>
          <table:table-cell office:value-type="string" table:style-name="c1">
            <text:p>2026-04-08 21:45</text:p>
          </table:table-cell>
          <table:table-cell office:value-type="float" office:value="0.10474760000000001" table:style-name="c1">
            <text:p>0.10475</text:p>
          </table:table-cell>
          <table:table-cell office:value-type="float" office:value="0.6608541082060215" table:style-name="c13">
            <text:p>+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0.10395195" table:style-name="c1">
            <text:p>0.10395</text:p>
          </table:table-cell>
          <table:table-cell office:value-type="string" table:style-name="c1">
            <text:p>2026-04-09 16:30</text:p>
          </table:table-cell>
          <table:table-cell office:value-type="float" office:value="0.10364815000000001" table:style-name="c1">
            <text:p>0.10365</text:p>
          </table:table-cell>
          <table:table-cell office:value-type="float" office:value="-0.4915662013555311" table:style-name="c12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1:45</text:p>
          </table:table-cell>
          <table:table-cell office:value-type="float" office:value="0.1070535" table:style-name="c1">
            <text:p>0.10705</text:p>
          </table:table-cell>
          <table:table-cell office:value-type="string" table:style-name="c1">
            <text:p>2026-04-09 22:15</text:p>
          </table:table-cell>
          <table:table-cell office:value-type="float" office:value="0.10804595" table:style-name="c1">
            <text:p>0.10805</text:p>
          </table:table-cell>
          <table:table-cell office:value-type="float" office:value="0.7253066419594001" table:style-name="c13">
            <text:p>+0.7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10895445" table:style-name="c1">
            <text:p>0.10895</text:p>
          </table:table-cell>
          <table:table-cell office:value-type="string" table:style-name="c1">
            <text:p>2026-04-09 23:00</text:p>
          </table:table-cell>
          <table:table-cell office:value-type="float" office:value="0.10784605" table:style-name="c1">
            <text:p>0.10785</text:p>
          </table:table-cell>
          <table:table-cell office:value-type="float" office:value="-1.2151722613899518" table:style-name="c12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5:00</text:p>
          </table:table-cell>
          <table:table-cell office:value-type="float" office:value="0.112056" table:style-name="c1">
            <text:p>0.11206</text:p>
          </table:table-cell>
          <table:table-cell office:value-type="string" table:style-name="c1">
            <text:p>2026-04-10 05:30</text:p>
          </table:table-cell>
          <table:table-cell office:value-type="float" office:value="0.11104445000000002" table:style-name="c1">
            <text:p>0.11104</text:p>
          </table:table-cell>
          <table:table-cell office:value-type="float" office:value="-1.1008137498661252" table:style-name="c12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21:45</text:p>
          </table:table-cell>
          <table:table-cell office:value-type="float" office:value="0.1136568" table:style-name="c1">
            <text:p>0.11366</text:p>
          </table:table-cell>
          <table:table-cell office:value-type="string" table:style-name="c1">
            <text:p>2026-04-10 22:15</text:p>
          </table:table-cell>
          <table:table-cell office:value-type="float" office:value="0.11484255" table:style-name="c1">
            <text:p>0.11484</text:p>
          </table:table-cell>
          <table:table-cell office:value-type="float" office:value="0.8412868764121395" table:style-name="c13">
            <text:p>+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22:30</text:p>
          </table:table-cell>
          <table:table-cell office:value-type="float" office:value="0.11495745" table:style-name="c1">
            <text:p>0.11496</text:p>
          </table:table-cell>
          <table:table-cell office:value-type="string" table:style-name="c1">
            <text:p>2026-04-10 23:00</text:p>
          </table:table-cell>
          <table:table-cell office:value-type="float" office:value="0.11544225000000001" table:style-name="c1">
            <text:p>0.11544</text:p>
          </table:table-cell>
          <table:table-cell office:value-type="float" office:value="0.22097823346813872" table:style-name="c13">
            <text:p>+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02:30</text:p>
          </table:table-cell>
          <table:table-cell office:value-type="float" office:value="0.1174587" table:style-name="c1">
            <text:p>0.11746</text:p>
          </table:table-cell>
          <table:table-cell office:value-type="string" table:style-name="c1">
            <text:p>2026-04-11 03:00</text:p>
          </table:table-cell>
          <table:table-cell office:value-type="float" office:value="0.1189405" table:style-name="c1">
            <text:p>0.11894</text:p>
          </table:table-cell>
          <table:table-cell office:value-type="float" office:value="1.0591279662553799" table:style-name="c13">
            <text:p>+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04:00</text:p>
          </table:table-cell>
          <table:table-cell office:value-type="float" office:value="0.1206603" table:style-name="c1">
            <text:p>0.12066</text:p>
          </table:table-cell>
          <table:table-cell office:value-type="string" table:style-name="c1">
            <text:p>2026-04-11 04:30</text:p>
          </table:table-cell>
          <table:table-cell office:value-type="float" office:value="0.11824085000000001" table:style-name="c1">
            <text:p>0.11824</text:p>
          </table:table-cell>
          <table:table-cell office:value-type="float" office:value="-2.2010665141309893" table:style-name="c12">
            <text:p>-2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30</text:p>
          </table:table-cell>
          <table:table-cell office:value-type="float" office:value="0.11665829999999999" table:style-name="c1">
            <text:p>0.11666</text:p>
          </table:table-cell>
          <table:table-cell office:value-type="string" table:style-name="c1">
            <text:p>2026-04-11 19:00</text:p>
          </table:table-cell>
          <table:table-cell office:value-type="float" office:value="0.1167416" table:style-name="c1">
            <text:p>0.11674</text:p>
          </table:table-cell>
          <table:table-cell office:value-type="float" office:value="-0.12863761806917173" table:style-name="c12">
            <text:p>-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3:15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2 13:45</text:p>
          </table:table-cell>
          <table:table-cell office:value-type="float" office:value="0.11184405" table:style-name="c1">
            <text:p>0.1118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8:15</text:p>
          </table:table-cell>
          <table:table-cell office:value-type="float" office:value="0.11295645" table:style-name="c1">
            <text:p>0.11296</text:p>
          </table:table-cell>
          <table:table-cell office:value-type="string" table:style-name="c1">
            <text:p>2026-04-12 18:45</text:p>
          </table:table-cell>
          <table:table-cell office:value-type="float" office:value="0.111944" table:style-name="c1">
            <text:p>0.11194</text:p>
          </table:table-cell>
          <table:table-cell office:value-type="float" office:value="-1.0944271495784363" table:style-name="c12">
            <text:p>-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21:00</text:p>
          </table:table-cell>
          <table:table-cell office:value-type="float" office:value="0.11245619999999999" table:style-name="c1">
            <text:p>0.11246</text:p>
          </table:table-cell>
          <table:table-cell office:value-type="string" table:style-name="c1">
            <text:p>2026-04-12 21:30</text:p>
          </table:table-cell>
          <table:table-cell office:value-type="float" office:value="0.11164415" table:style-name="c1">
            <text:p>0.11164</text:p>
          </table:table-cell>
          <table:table-cell office:value-type="float" office:value="-0.9205598765119172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6:45</text:p>
          </table:table-cell>
          <table:table-cell office:value-type="float" office:value="0.11135564999999999" table:style-name="c1">
            <text:p>0.11136</text:p>
          </table:table-cell>
          <table:table-cell office:value-type="string" table:style-name="c1">
            <text:p>2026-04-14 17:15</text:p>
          </table:table-cell>
          <table:table-cell office:value-type="float" office:value="0.11164415" table:style-name="c1">
            <text:p>0.11164</text:p>
          </table:table-cell>
          <table:table-cell office:value-type="float" office:value="0.05866190368428725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7:30</text:p>
          </table:table-cell>
          <table:table-cell office:value-type="float" office:value="0.11145569999999999" table:style-name="c1">
            <text:p>0.11146</text:p>
          </table:table-cell>
          <table:table-cell office:value-type="string" table:style-name="c1">
            <text:p>2026-04-14 18:00</text:p>
          </table:table-cell>
          <table:table-cell office:value-type="float" office:value="0.11154420000000001" table:style-name="c1">
            <text:p>0.11154</text:p>
          </table:table-cell>
          <table:table-cell office:value-type="float" office:value="-0.12065498292144206" table:style-name="c12">
            <text:p>-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1:15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15 11:45</text:p>
          </table:table-cell>
          <table:table-cell office:value-type="float" office:value="0.11304345000000002" table:style-name="c1">
            <text:p>0.11304</text:p>
          </table:table-cell>
          <table:table-cell office:value-type="float" office:value="-0.47564378141905506" table:style-name="c12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5:30</text:p>
          </table:table-cell>
          <table:table-cell office:value-type="float" office:value="0.11785889999999999" table:style-name="c1">
            <text:p>0.11786</text:p>
          </table:table-cell>
          <table:table-cell office:value-type="string" table:style-name="c1">
            <text:p>2026-04-16 06:00</text:p>
          </table:table-cell>
          <table:table-cell office:value-type="float" office:value="0.11824085000000001" table:style-name="c1">
            <text:p>0.11824</text:p>
          </table:table-cell>
          <table:table-cell office:value-type="float" office:value="0.12352613239221544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30</text:p>
          </table:table-cell>
          <table:table-cell office:value-type="float" office:value="0.1192596" table:style-name="c1">
            <text:p>0.11926</text:p>
          </table:table-cell>
          <table:table-cell office:value-type="string" table:style-name="c1">
            <text:p>2026-04-16 08:00</text:p>
          </table:table-cell>
          <table:table-cell office:value-type="float" office:value="0.1195402" table:style-name="c1">
            <text:p>0.11954</text:p>
          </table:table-cell>
          <table:table-cell office:value-type="float" office:value="0.034914707243705045" table:style-name="c13">
            <text:p>+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8:15</text:p>
          </table:table-cell>
          <table:table-cell office:value-type="float" office:value="0.1194597" table:style-name="c1">
            <text:p>0.11946</text:p>
          </table:table-cell>
          <table:table-cell office:value-type="string" table:style-name="c1">
            <text:p>2026-04-16 08:45</text:p>
          </table:table-cell>
          <table:table-cell office:value-type="float" office:value="0.11864065" table:style-name="c1">
            <text:p>0.11864</text:p>
          </table:table-cell>
          <table:table-cell office:value-type="float" office:value="-0.8841581381419883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0.1202601" table:style-name="c1">
            <text:p>0.12026</text:p>
          </table:table-cell>
          <table:table-cell office:value-type="string" table:style-name="c1">
            <text:p>2026-04-16 12:45</text:p>
          </table:table-cell>
          <table:table-cell office:value-type="float" office:value="0.12123935000000001" table:style-name="c1">
            <text:p>0.12124</text:p>
          </table:table-cell>
          <table:table-cell office:value-type="float" office:value="0.6127489827050026" table:style-name="c13">
            <text:p>+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15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16 13:45</text:p>
          </table:table-cell>
          <table:table-cell office:value-type="float" office:value="0.12463765000000002" table:style-name="c1">
            <text:p>0.12464</text:p>
          </table:table-cell>
          <table:table-cell office:value-type="float" office:value="0.1823820866762471" table:style-name="c13">
            <text:p>+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0.1244622" table:style-name="c1">
            <text:p>0.12446</text:p>
          </table:table-cell>
          <table:table-cell office:value-type="string" table:style-name="c1">
            <text:p>2026-04-16 16:15</text:p>
          </table:table-cell>
          <table:table-cell office:value-type="float" office:value="0.12343825" table:style-name="c1">
            <text:p>0.12344</text:p>
          </table:table-cell>
          <table:table-cell office:value-type="float" office:value="-1.0209550062187378" table:style-name="c12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8:15</text:p>
          </table:table-cell>
          <table:table-cell office:value-type="float" office:value="0.12466229999999999" table:style-name="c1">
            <text:p>0.12466</text:p>
          </table:table-cell>
          <table:table-cell office:value-type="string" table:style-name="c1">
            <text:p>2026-04-16 18:45</text:p>
          </table:table-cell>
          <table:table-cell office:value-type="float" office:value="0.12563715" table:style-name="c1">
            <text:p>0.12564</text:p>
          </table:table-cell>
          <table:table-cell office:value-type="float" office:value="0.580529428022758" table:style-name="c13">
            <text:p>+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2:00</text:p>
          </table:table-cell>
          <table:table-cell office:value-type="float" office:value="0.13396694999999997" table:style-name="c1">
            <text:p>0.13397</text:p>
          </table:table-cell>
          <table:table-cell office:value-type="string" table:style-name="c1">
            <text:p>2026-04-17 12:30</text:p>
          </table:table-cell>
          <table:table-cell office:value-type="float" office:value="0.13423285000000001" table:style-name="c1">
            <text:p>0.13423</text:p>
          </table:table-cell>
          <table:table-cell office:value-type="float" office:value="-0.00181497537261599" table:style-name="c12">
            <text:p>-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15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18 06:45</text:p>
          </table:table-cell>
          <table:table-cell office:value-type="float" office:value="0.1331334" table:style-name="c1">
            <text:p>0.13313</text:p>
          </table:table-cell>
          <table:table-cell office:value-type="float" office:value="0.7593823220408247" table:style-name="c13">
            <text:p>+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7:00</text:p>
          </table:table-cell>
          <table:table-cell office:value-type="float" office:value="0.1330665" table:style-name="c1">
            <text:p>0.13307</text:p>
          </table:table-cell>
          <table:table-cell office:value-type="string" table:style-name="c1">
            <text:p>2026-04-18 07:30</text:p>
          </table:table-cell>
          <table:table-cell office:value-type="float" office:value="0.1335332" table:style-name="c1">
            <text:p>0.13353</text:p>
          </table:table-cell>
          <table:table-cell office:value-type="float" office:value="0.15012578913549124" table:style-name="c13">
            <text:p>+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22:30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4-18 23:00</text:p>
          </table:table-cell>
          <table:table-cell office:value-type="float" office:value="0.1285357" table:style-name="c1">
            <text:p>0.12854</text:p>
          </table:table-cell>
          <table:table-cell office:value-type="float" office:value="-0.2220624040508934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6:00</text:p>
          </table:table-cell>
          <table:table-cell office:value-type="float" office:value="0.12916455" table:style-name="c1">
            <text:p>0.12916</text:p>
          </table:table-cell>
          <table:table-cell office:value-type="string" table:style-name="c1">
            <text:p>2026-04-22 06:30</text:p>
          </table:table-cell>
          <table:table-cell office:value-type="float" office:value="0.1287356" table:style-name="c1">
            <text:p>0.12874</text:p>
          </table:table-cell>
          <table:table-cell office:value-type="float" office:value="-0.5313319052324905" table:style-name="c12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8:00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22 18:30</text:p>
          </table:table-cell>
          <table:table-cell office:value-type="float" office:value="0.1315342" table:style-name="c1">
            <text:p>0.13153</text:p>
          </table:table-cell>
          <table:table-cell office:value-type="float" office:value="-0.45094058873446086" table:style-name="c12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7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4-23 07:45</text:p>
          </table:table-cell>
          <table:table-cell office:value-type="float" office:value="0.1271364" table:style-name="c1">
            <text:p>0.12714</text:p>
          </table:table-cell>
          <table:table-cell office:value-type="float" office:value="-0.1426418000448626" table:style-name="c12">
            <text:p>-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15</text:p>
          </table:table-cell>
          <table:table-cell office:value-type="float" office:value="0.1288644" table:style-name="c1">
            <text:p>0.12886</text:p>
          </table:table-cell>
          <table:table-cell office:value-type="string" table:style-name="c1">
            <text:p>2026-04-24 00:45</text:p>
          </table:table-cell>
          <table:table-cell office:value-type="float" office:value="0.13013490000000003" table:style-name="c1">
            <text:p>0.13013</text:p>
          </table:table-cell>
          <table:table-cell office:value-type="float" office:value="0.784049229189776" table:style-name="c13">
            <text:p>+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1:00</text:p>
          </table:table-cell>
          <table:table-cell office:value-type="float" office:value="0.1308654" table:style-name="c1">
            <text:p>0.13087</text:p>
          </table:table-cell>
          <table:table-cell office:value-type="string" table:style-name="c1">
            <text:p>2026-04-24 01:30</text:p>
          </table:table-cell>
          <table:table-cell office:value-type="float" office:value="0.13003495" table:style-name="c1">
            <text:p>0.13003</text:p>
          </table:table-cell>
          <table:table-cell office:value-type="float" office:value="-0.8332147879042018" table:style-name="c12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2:15</text:p>
          </table:table-cell>
          <table:table-cell office:value-type="float" office:value="0.1308654" table:style-name="c1">
            <text:p>0.13087</text:p>
          </table:table-cell>
          <table:table-cell office:value-type="string" table:style-name="c1">
            <text:p>2026-04-24 12:45</text:p>
          </table:table-cell>
          <table:table-cell office:value-type="float" office:value="0.1313343" table:style-name="c1">
            <text:p>0.13133</text:p>
          </table:table-cell>
          <table:table-cell office:value-type="float" office:value="0.15769082912671095" table:style-name="c13">
            <text:p>+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2:15</text:p>
          </table:table-cell>
          <table:table-cell office:value-type="float" office:value="0.132066" table:style-name="c1">
            <text:p>0.13207</text:p>
          </table:table-cell>
          <table:table-cell office:value-type="string" table:style-name="c1">
            <text:p>2026-04-25 02:45</text:p>
          </table:table-cell>
          <table:table-cell office:value-type="float" office:value="0.13243375000000002" table:style-name="c1">
            <text:p>0.13243</text:p>
          </table:table-cell>
          <table:table-cell office:value-type="float" office:value="0.0780026151697033" table:style-name="c13">
            <text:p>+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15</text:p>
          </table:table-cell>
          <table:table-cell office:value-type="float" office:value="0.12916455" table:style-name="c1">
            <text:p>0.12916</text:p>
          </table:table-cell>
          <table:table-cell office:value-type="string" table:style-name="c1">
            <text:p>2026-04-25 23:45</text:p>
          </table:table-cell>
          <table:table-cell office:value-type="float" office:value="0.12903545" table:style-name="c1">
            <text:p>0.1290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0:00</text:p>
          </table:table-cell>
          <table:table-cell office:value-type="float" office:value="0.1292646" table:style-name="c1">
            <text:p>0.12926</text:p>
          </table:table-cell>
          <table:table-cell office:value-type="string" table:style-name="c1">
            <text:p>2026-04-26 00:30</text:p>
          </table:table-cell>
          <table:table-cell office:value-type="float" office:value="0.1285357" table:style-name="c1">
            <text:p>0.12854</text:p>
          </table:table-cell>
          <table:table-cell office:value-type="float" office:value="-0.7626549452054099" table:style-name="c12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30</text:p>
          </table:table-cell>
          <table:table-cell office:value-type="float" office:value="0.1314657" table:style-name="c1">
            <text:p>0.13147</text:p>
          </table:table-cell>
          <table:table-cell office:value-type="string" table:style-name="c1">
            <text:p>2026-04-26 06:00</text:p>
          </table:table-cell>
          <table:table-cell office:value-type="float" office:value="0.1305347" table:style-name="c1">
            <text:p>0.13053</text:p>
          </table:table-cell>
          <table:table-cell office:value-type="float" office:value="-0.9066538764863963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9:15</text:p>
          </table:table-cell>
          <table:table-cell office:value-type="float" office:value="0.13216604999999998" table:style-name="c1">
            <text:p>0.13217</text:p>
          </table:table-cell>
          <table:table-cell office:value-type="string" table:style-name="c1">
            <text:p>2026-04-26 09:45</text:p>
          </table:table-cell>
          <table:table-cell office:value-type="float" office:value="0.13173410000000002" table:style-name="c1">
            <text:p>0.13173</text:p>
          </table:table-cell>
          <table:table-cell office:value-type="float" office:value="-0.5260703984873327" table:style-name="c12">
            <text:p>-0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4-27 01:45</text:p>
          </table:table-cell>
          <table:table-cell office:value-type="float" office:value="0.13083455" table:style-name="c1">
            <text:p>0.13083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310655" table:style-name="c1">
            <text:p>0.13107</text:p>
          </table:table-cell>
          <table:table-cell office:value-type="string" table:style-name="c1">
            <text:p>2026-04-29 10:30</text:p>
          </table:table-cell>
          <table:table-cell office:value-type="float" office:value="0.13183405" table:style-name="c1">
            <text:p>0.13183</text:p>
          </table:table-cell>
          <table:table-cell office:value-type="float" office:value="0.3853140102086483" table:style-name="c13">
            <text:p>+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11:15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4-30 11:45</text:p>
          </table:table-cell>
          <table:table-cell office:value-type="float" office:value="0.12723635" table:style-name="c1">
            <text:p>0.12724</text:p>
          </table:table-cell>
          <table:table-cell office:value-type="float" office:value="-0.9222909728976103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5-06 09:30</text:p>
          </table:table-cell>
          <table:table-cell office:value-type="float" office:value="0.12413790000000001" table:style-name="c1">
            <text:p>0.12414</text:p>
          </table:table-cell>
          <table:table-cell office:value-type="float" office:value="-0.21931150629357354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45</text:p>
          </table:table-cell>
          <table:table-cell office:value-type="float" office:value="0.12486239999999998" table:style-name="c1">
            <text:p>0.12486</text:p>
          </table:table-cell>
          <table:table-cell office:value-type="string" table:style-name="c1">
            <text:p>2026-05-06 17:15</text:p>
          </table:table-cell>
          <table:table-cell office:value-type="float" office:value="0.12463765000000002" table:style-name="c1">
            <text:p>0.12464</text:p>
          </table:table-cell>
          <table:table-cell office:value-type="float" office:value="-0.37953832566887113" table:style-name="c12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0:15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5-06 20:45</text:p>
          </table:table-cell>
          <table:table-cell office:value-type="float" office:value="0.12443775" table:style-name="c1">
            <text:p>0.12444</text:p>
          </table:table-cell>
          <table:table-cell office:value-type="float" office:value="-1.3299400079372026" table:style-name="c12">
            <text:p>-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0.1282641" table:style-name="c1">
            <text:p>0.12826</text:p>
          </table:table-cell>
          <table:table-cell office:value-type="string" table:style-name="c1">
            <text:p>2026-05-06 22:15</text:p>
          </table:table-cell>
          <table:table-cell office:value-type="float" office:value="0.1275362" table:style-name="c1">
            <text:p>0.12754</text:p>
          </table:table-cell>
          <table:table-cell office:value-type="float" office:value="-0.7662665264871471" table:style-name="c12">
            <text:p>-0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2:45</text:p>
          </table:table-cell>
          <table:table-cell office:value-type="float" office:value="0.12866429999999998" table:style-name="c1">
            <text:p>0.12866</text:p>
          </table:table-cell>
          <table:table-cell office:value-type="string" table:style-name="c1">
            <text:p>2026-05-06 23:15</text:p>
          </table:table-cell>
          <table:table-cell office:value-type="float" office:value="0.1273363" table:style-name="c1">
            <text:p>0.12734</text:p>
          </table:table-cell>
          <table:table-cell office:value-type="float" office:value="-1.2299800828201701" table:style-name="c12">
            <text:p>-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0:15</text:p>
          </table:table-cell>
          <table:table-cell office:value-type="float" office:value="0.1292646" table:style-name="c1">
            <text:p>0.12926</text:p>
          </table:table-cell>
          <table:table-cell office:value-type="string" table:style-name="c1">
            <text:p>2026-05-07 00:45</text:p>
          </table:table-cell>
          <table:table-cell office:value-type="float" office:value="0.12623685" table:style-name="c1">
            <text:p>0.12624</text:p>
          </table:table-cell>
          <table:table-cell office:value-type="float" office:value="-2.5375063730905367" table:style-name="c12">
            <text:p>-2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9:30</text:p>
          </table:table-cell>
          <table:table-cell office:value-type="float" office:value="0.1346673" table:style-name="c1">
            <text:p>0.13467</text:p>
          </table:table-cell>
          <table:table-cell office:value-type="string" table:style-name="c1">
            <text:p>2026-05-08 10:00</text:p>
          </table:table-cell>
          <table:table-cell office:value-type="float" office:value="0.13193400000000002" table:style-name="c1">
            <text:p>0.13193</text:p>
          </table:table-cell>
          <table:table-cell office:value-type="float" office:value="-2.2255113646742597" table:style-name="c12">
            <text:p>-2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1:45</text:p>
          </table:table-cell>
          <table:table-cell office:value-type="float" office:value="0.13416704999999998" table:style-name="c1">
            <text:p>0.13417</text:p>
          </table:table-cell>
          <table:table-cell office:value-type="string" table:style-name="c1">
            <text:p>2026-05-08 12:15</text:p>
          </table:table-cell>
          <table:table-cell office:value-type="float" office:value="0.13393300000000002" table:style-name="c1">
            <text:p>0.13393</text:p>
          </table:table-cell>
          <table:table-cell office:value-type="float" office:value="-0.3739979875833632" table:style-name="c12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0.1352676" table:style-name="c1">
            <text:p>0.13527</text:p>
          </table:table-cell>
          <table:table-cell office:value-type="string" table:style-name="c1">
            <text:p>2026-05-08 15:30</text:p>
          </table:table-cell>
          <table:table-cell office:value-type="float" office:value="0.13523235" table:style-name="c1">
            <text:p>0.13523</text:p>
          </table:table-cell>
          <table:table-cell office:value-type="float" office:value="-0.22590736262786404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0.14197094999999998" table:style-name="c1">
            <text:p>0.14197</text:p>
          </table:table-cell>
          <table:table-cell office:value-type="string" table:style-name="c1">
            <text:p>2026-05-08 18:15</text:p>
          </table:table-cell>
          <table:table-cell office:value-type="float" office:value="0.141929" table:style-name="c1">
            <text:p>0.14193</text:p>
          </table:table-cell>
          <table:table-cell office:value-type="float" office:value="-0.22938923138853262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00</text:p>
          </table:table-cell>
          <table:table-cell office:value-type="float" office:value="0.14457224999999999" table:style-name="c1">
            <text:p>0.14457</text:p>
          </table:table-cell>
          <table:table-cell office:value-type="string" table:style-name="c1">
            <text:p>2026-05-08 19:30</text:p>
          </table:table-cell>
          <table:table-cell office:value-type="float" office:value="0.1465267" table:style-name="c1">
            <text:p>0.14653</text:p>
          </table:table-cell>
          <table:table-cell office:value-type="float" office:value="1.1492821939895315" table:style-name="c13">
            <text:p>+1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2:30</text:p>
          </table:table-cell>
          <table:table-cell office:value-type="float" office:value="0.1450725" table:style-name="c1">
            <text:p>0.14507</text:p>
          </table:table-cell>
          <table:table-cell office:value-type="string" table:style-name="c1">
            <text:p>2026-05-09 03:00</text:p>
          </table:table-cell>
          <table:table-cell office:value-type="float" office:value="0.14542725" table:style-name="c1">
            <text:p>0.14543</text:p>
          </table:table-cell>
          <table:table-cell office:value-type="float" office:value="0.04414408468180753" table:style-name="c13">
            <text:p>+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3:15</text:p>
          </table:table-cell>
          <table:table-cell office:value-type="float" office:value="0.14557274999999997" table:style-name="c1">
            <text:p>0.14557</text:p>
          </table:table-cell>
          <table:table-cell office:value-type="string" table:style-name="c1">
            <text:p>2026-05-09 03:45</text:p>
          </table:table-cell>
          <table:table-cell office:value-type="float" office:value="0.14372810000000003" table:style-name="c1">
            <text:p>0.14373</text:p>
          </table:table-cell>
          <table:table-cell office:value-type="float" office:value="-1.464534036692955" table:style-name="c12">
            <text:p>-1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6:45</text:p>
          </table:table-cell>
          <table:table-cell office:value-type="float" office:value="0.14557274999999997" table:style-name="c1">
            <text:p>0.14557</text:p>
          </table:table-cell>
          <table:table-cell office:value-type="string" table:style-name="c1">
            <text:p>2026-05-09 07:15</text:p>
          </table:table-cell>
          <table:table-cell office:value-type="float" office:value="0.1467266" table:style-name="c1">
            <text:p>0.14673</text:p>
          </table:table-cell>
          <table:table-cell office:value-type="float" office:value="0.5911432782577997" table:style-name="c13">
            <text:p>+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8:15</text:p>
          </table:table-cell>
          <table:table-cell office:value-type="float" office:value="0.14857425" table:style-name="c1">
            <text:p>0.14857</text:p>
          </table:table-cell>
          <table:table-cell office:value-type="string" table:style-name="c1">
            <text:p>2026-05-09 08:45</text:p>
          </table:table-cell>
          <table:table-cell office:value-type="float" office:value="0.14842575" table:style-name="c1">
            <text:p>0.14843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45</text:p>
          </table:table-cell>
          <table:table-cell office:value-type="float" office:value="0.14117055" table:style-name="c1">
            <text:p>0.14117</text:p>
          </table:table-cell>
          <table:table-cell office:value-type="string" table:style-name="c1">
            <text:p>2026-05-10 08:15</text:p>
          </table:table-cell>
          <table:table-cell office:value-type="float" office:value="0.14122935" table:style-name="c1">
            <text:p>0.14123</text:p>
          </table:table-cell>
          <table:table-cell office:value-type="float" office:value="-0.15833151507166354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30</text:p>
          </table:table-cell>
          <table:table-cell office:value-type="float" office:value="0.14257124999999998" table:style-name="c1">
            <text:p>0.14257</text:p>
          </table:table-cell>
          <table:table-cell office:value-type="string" table:style-name="c1">
            <text:p>2026-05-10 09:00</text:p>
          </table:table-cell>
          <table:table-cell office:value-type="float" office:value="0.14222885000000002" table:style-name="c1">
            <text:p>0.14223</text:p>
          </table:table-cell>
          <table:table-cell office:value-type="float" office:value="-0.43958054036137284" table:style-name="c12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0:45</text:p>
          </table:table-cell>
          <table:table-cell office:value-type="float" office:value="0.14337165" table:style-name="c1">
            <text:p>0.14337</text:p>
          </table:table-cell>
          <table:table-cell office:value-type="string" table:style-name="c1">
            <text:p>2026-05-10 11:15</text:p>
          </table:table-cell>
          <table:table-cell office:value-type="float" office:value="0.14402795000000002" table:style-name="c1">
            <text:p>0.14403</text:p>
          </table:table-cell>
          <table:table-cell office:value-type="float" office:value="0.2569462846734538" table:style-name="c13">
            <text:p>+0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2:30</text:p>
          </table:table-cell>
          <table:table-cell office:value-type="float" office:value="0.1436718" table:style-name="c1">
            <text:p>0.14367</text:p>
          </table:table-cell>
          <table:table-cell office:value-type="string" table:style-name="c1">
            <text:p>2026-05-10 13:00</text:p>
          </table:table-cell>
          <table:table-cell office:value-type="float" office:value="0.14332830000000002" table:style-name="c1">
            <text:p>0.14333</text:p>
          </table:table-cell>
          <table:table-cell office:value-type="float" office:value="-0.4385086507581626" table:style-name="c12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45</text:p>
          </table:table-cell>
          <table:table-cell office:value-type="float" office:value="0.1438719" table:style-name="c1">
            <text:p>0.14387</text:p>
          </table:table-cell>
          <table:table-cell office:value-type="string" table:style-name="c1">
            <text:p>2026-05-10 17:15</text:p>
          </table:table-cell>
          <table:table-cell office:value-type="float" office:value="0.14352820000000002" table:style-name="c1">
            <text:p>0.14353</text:p>
          </table:table-cell>
          <table:table-cell office:value-type="float" office:value="-0.43831552360120707" table:style-name="c12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0.1448724" table:style-name="c1">
            <text:p>0.14487</text:p>
          </table:table-cell>
          <table:table-cell office:value-type="string" table:style-name="c1">
            <text:p>2026-05-10 23:30</text:p>
          </table:table-cell>
          <table:table-cell office:value-type="float" office:value="0.143928" table:style-name="c1">
            <text:p>0.14393</text:p>
          </table:table-cell>
          <table:table-cell office:value-type="float" office:value="-0.850480886628513" table:style-name="c12">
            <text:p>-0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0.1428714" table:style-name="c1">
            <text:p>0.14287</text:p>
          </table:table-cell>
          <table:table-cell office:value-type="string" table:style-name="c1">
            <text:p>2026-05-11 09:45</text:p>
          </table:table-cell>
          <table:table-cell office:value-type="float" office:value="0.1423288" table:style-name="c1">
            <text:p>0.14233</text:p>
          </table:table-cell>
          <table:table-cell office:value-type="float" office:value="-0.5789229133332352" table:style-name="c12">
            <text:p>-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30</text:p>
          </table:table-cell>
          <table:table-cell office:value-type="float" office:value="0.1432716" table:style-name="c1">
            <text:p>0.14327</text:p>
          </table:table-cell>
          <table:table-cell office:value-type="string" table:style-name="c1">
            <text:p>2026-05-11 11:00</text:p>
          </table:table-cell>
          <table:table-cell office:value-type="float" office:value="0.1421289" table:style-name="c1">
            <text:p>0.14213</text:p>
          </table:table-cell>
          <table:table-cell office:value-type="float" office:value="-0.995881717730529" table:style-name="c12">
            <text:p>-1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00</text:p>
          </table:table-cell>
          <table:table-cell office:value-type="float" office:value="0.10995495" table:style-name="c1">
            <text:p>0.10995</text:p>
          </table:table-cell>
          <table:table-cell office:value-type="string" table:style-name="c1">
            <text:p>2026-05-25 17:30</text:p>
          </table:table-cell>
          <table:table-cell office:value-type="float" office:value="0.11064465000000001" table:style-name="c1">
            <text:p>0.11064</text:p>
          </table:table-cell>
          <table:table-cell office:value-type="float" office:value="0.426103003684708" table:style-name="c13">
            <text:p>+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15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5-26 05:45</text:p>
          </table:table-cell>
          <table:table-cell office:value-type="float" office:value="0.1093453" table:style-name="c1">
            <text:p>0.10935</text:p>
          </table:table-cell>
          <table:table-cell office:value-type="float" office:value="0.620094699237117" table:style-name="c13">
            <text:p>+0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9:30</text:p>
          </table:table-cell>
          <table:table-cell office:value-type="float" office:value="0.11095545" table:style-name="c1">
            <text:p>0.11096</text:p>
          </table:table-cell>
          <table:table-cell office:value-type="string" table:style-name="c1">
            <text:p>2026-05-26 10:00</text:p>
          </table:table-cell>
          <table:table-cell office:value-type="float" office:value="0.1109445" table:style-name="c1">
            <text:p>0.11094</text:p>
          </table:table-cell>
          <table:table-cell office:value-type="float" office:value="-0.20974909794876373" table:style-name="c12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0.11255625" table:style-name="c1">
            <text:p>0.11256</text:p>
          </table:table-cell>
          <table:table-cell office:value-type="string" table:style-name="c1">
            <text:p>2026-05-26 11:00</text:p>
          </table:table-cell>
          <table:table-cell office:value-type="float" office:value="0.11244375000000001" table:style-name="c1">
            <text:p>0.11244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09:15</text:p>
          </table:table-cell>
          <table:table-cell office:value-type="float" office:value="1.8789389999999997" table:style-name="c9">
            <text:p>1.8789</text:p>
          </table:table-cell>
          <table:table-cell office:value-type="string" table:style-name="c9">
            <text:p>2026-03-05 09:45</text:p>
          </table:table-cell>
          <table:table-cell office:value-type="float" office:value="1.8710640000000003" table:style-name="c9">
            <text:p>1.8711</text:p>
          </table:table-cell>
          <table:table-cell office:value-type="float" office:value="-0.6181816938175988" table:style-name="c10">
            <text:p>-0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9:30</text:p>
          </table:table-cell>
          <table:table-cell office:value-type="float" office:value="1.7858924999999999" table:style-name="c9">
            <text:p>1.7859</text:p>
          </table:table-cell>
          <table:table-cell office:value-type="string" table:style-name="c9">
            <text:p>2026-03-10 10:00</text:p>
          </table:table-cell>
          <table:table-cell office:value-type="float" office:value="1.7851070000000002" table:style-name="c9">
            <text:p>1.7851</text:p>
          </table:table-cell>
          <table:table-cell office:value-type="float" office:value="-0.2437956871984004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4:30</text:p>
          </table:table-cell>
          <table:table-cell office:value-type="float" office:value="1.816908" table:style-name="c9">
            <text:p>1.8169</text:p>
          </table:table-cell>
          <table:table-cell office:value-type="string" table:style-name="c9">
            <text:p>2026-03-10 15:00</text:p>
          </table:table-cell>
          <table:table-cell office:value-type="float" office:value="1.8250870000000001" table:style-name="c9">
            <text:p>1.8251</text:p>
          </table:table-cell>
          <table:table-cell office:value-type="float" office:value="0.24936051175954432" table:style-name="c11">
            <text:p>+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03:45</text:p>
          </table:table-cell>
          <table:table-cell office:value-type="float" office:value="1.812906" table:style-name="c9">
            <text:p>1.8129</text:p>
          </table:table-cell>
          <table:table-cell office:value-type="string" table:style-name="c9">
            <text:p>2026-03-11 04:15</text:p>
          </table:table-cell>
          <table:table-cell office:value-type="float" office:value="1.8090950000000001" table:style-name="c9">
            <text:p>1.8091</text:p>
          </table:table-cell>
          <table:table-cell office:value-type="float" office:value="-0.4096947610631618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9:00</text:p>
          </table:table-cell>
          <table:table-cell office:value-type="float" office:value="1.846923" table:style-name="c9">
            <text:p>1.8469</text:p>
          </table:table-cell>
          <table:table-cell office:value-type="string" table:style-name="c9">
            <text:p>2026-03-11 19:30</text:p>
          </table:table-cell>
          <table:table-cell office:value-type="float" office:value="1.8390800000000003" table:style-name="c9">
            <text:p>1.8391</text:p>
          </table:table-cell>
          <table:table-cell office:value-type="float" office:value="-0.6237033660851043" table:style-name="c10">
            <text:p>-0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23:15</text:p>
          </table:table-cell>
          <table:table-cell office:value-type="float" office:value="1.8499245" table:style-name="c9">
            <text:p>1.8499</text:p>
          </table:table-cell>
          <table:table-cell office:value-type="string" table:style-name="c9">
            <text:p>2026-03-11 23:45</text:p>
          </table:table-cell>
          <table:table-cell office:value-type="float" office:value="1.8390800000000003" table:style-name="c9">
            <text:p>1.8391</text:p>
          </table:table-cell>
          <table:table-cell office:value-type="float" office:value="-0.784941273008688" table:style-name="c10">
            <text:p>-0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0:15</text:p>
          </table:table-cell>
          <table:table-cell office:value-type="float" office:value="1.858929" table:style-name="c9">
            <text:p>1.8589</text:p>
          </table:table-cell>
          <table:table-cell office:value-type="string" table:style-name="c9">
            <text:p>2026-03-13 10:45</text:p>
          </table:table-cell>
          <table:table-cell office:value-type="float" office:value="1.8640675" table:style-name="c9">
            <text:p>1.8641</text:p>
          </table:table-cell>
          <table:table-cell office:value-type="float" office:value="0.07597003798960333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30</text:p>
          </table:table-cell>
          <table:table-cell office:value-type="float" office:value="1.8759374999999998" table:style-name="c9">
            <text:p>1.8759</text:p>
          </table:table-cell>
          <table:table-cell office:value-type="string" table:style-name="c9">
            <text:p>2026-03-13 14:00</text:p>
          </table:table-cell>
          <table:table-cell office:value-type="float" office:value="1.8720635" table:style-name="c9">
            <text:p>1.8721</text:p>
          </table:table-cell>
          <table:table-cell office:value-type="float" office:value="-0.4059972646476506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5:00</text:p>
          </table:table-cell>
          <table:table-cell office:value-type="float" office:value="1.8829409999999998" table:style-name="c9">
            <text:p>1.8829</text:p>
          </table:table-cell>
          <table:table-cell office:value-type="string" table:style-name="c9">
            <text:p>2026-03-13 15:30</text:p>
          </table:table-cell>
          <table:table-cell office:value-type="float" office:value="1.891054" table:style-name="c9">
            <text:p>1.8911</text:p>
          </table:table-cell>
          <table:table-cell office:value-type="float" office:value="0.23010721281231383" table:style-name="c11">
            <text:p>+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04:00</text:p>
          </table:table-cell>
          <table:table-cell office:value-type="float" office:value="1.884942" table:style-name="c9">
            <text:p>1.8849</text:p>
          </table:table-cell>
          <table:table-cell office:value-type="string" table:style-name="c9">
            <text:p>2026-03-14 04:30</text:p>
          </table:table-cell>
          <table:table-cell office:value-type="float" office:value="1.8760615" table:style-name="c9">
            <text:p>1.8761</text:p>
          </table:table-cell>
          <table:table-cell office:value-type="float" office:value="-0.6700867686379564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1:30</text:p>
          </table:table-cell>
          <table:table-cell office:value-type="float" office:value="1.872936" table:style-name="c9">
            <text:p>1.8729</text:p>
          </table:table-cell>
          <table:table-cell office:value-type="string" table:style-name="c9">
            <text:p>2026-03-15 12:00</text:p>
          </table:table-cell>
          <table:table-cell office:value-type="float" office:value="1.8620685000000001" table:style-name="c9">
            <text:p>1.8621</text:p>
          </table:table-cell>
          <table:table-cell office:value-type="float" office:value="-0.7789788295755717" table:style-name="c10">
            <text:p>-0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1.8919454999999998" table:style-name="c9">
            <text:p>1.8919</text:p>
          </table:table-cell>
          <table:table-cell office:value-type="string" table:style-name="c9">
            <text:p>2026-03-16 04:15</text:p>
          </table:table-cell>
          <table:table-cell office:value-type="float" office:value="1.8880555" table:style-name="c9">
            <text:p>1.8881</text:p>
          </table:table-cell>
          <table:table-cell office:value-type="float" office:value="-0.40509744834085204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6:30</text:p>
          </table:table-cell>
          <table:table-cell office:value-type="float" office:value="1.9249619999999998" table:style-name="c9">
            <text:p>1.925</text:p>
          </table:table-cell>
          <table:table-cell office:value-type="string" table:style-name="c9">
            <text:p>2026-03-16 17:00</text:p>
          </table:table-cell>
          <table:table-cell office:value-type="float" office:value="1.9310340000000001" table:style-name="c9">
            <text:p>1.931</text:p>
          </table:table-cell>
          <table:table-cell office:value-type="float" office:value="0.11490424403184374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7:15</text:p>
          </table:table-cell>
          <table:table-cell office:value-type="float" office:value="1.9439715" table:style-name="c9">
            <text:p>1.944</text:p>
          </table:table-cell>
          <table:table-cell office:value-type="string" table:style-name="c9">
            <text:p>2026-03-16 17:45</text:p>
          </table:table-cell>
          <table:table-cell office:value-type="float" office:value="1.9520235000000001" table:style-name="c9">
            <text:p>1.952</text:p>
          </table:table-cell>
          <table:table-cell office:value-type="float" office:value="0.21347561029059214" table:style-name="c11">
            <text:p>+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8:00</text:p>
          </table:table-cell>
          <table:table-cell office:value-type="float" office:value="1.9559775" table:style-name="c9">
            <text:p>1.956</text:p>
          </table:table-cell>
          <table:table-cell office:value-type="string" table:style-name="c9">
            <text:p>2026-03-16 18:30</text:p>
          </table:table-cell>
          <table:table-cell office:value-type="float" office:value="1.9700145000000002" table:style-name="c9">
            <text:p>1.97</text:p>
          </table:table-cell>
          <table:table-cell office:value-type="float" office:value="0.5163117170059683" table:style-name="c11">
            <text:p>+0.5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01:15</text:p>
          </table:table-cell>
          <table:table-cell office:value-type="float" office:value="1.9709849999999998" table:style-name="c9">
            <text:p>1.971</text:p>
          </table:table-cell>
          <table:table-cell office:value-type="string" table:style-name="c9">
            <text:p>2026-03-18 01:45</text:p>
          </table:table-cell>
          <table:table-cell office:value-type="float" office:value="1.9700145000000002" table:style-name="c9">
            <text:p>1.97</text:p>
          </table:table-cell>
          <table:table-cell office:value-type="float" office:value="-0.24904091028088438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03:00</text:p>
          </table:table-cell>
          <table:table-cell office:value-type="float" office:value="1.992996" table:style-name="c9">
            <text:p>1.993</text:p>
          </table:table-cell>
          <table:table-cell office:value-type="string" table:style-name="c9">
            <text:p>2026-03-18 03:30</text:p>
          </table:table-cell>
          <table:table-cell office:value-type="float" office:value="2.0029980000000003" table:style-name="c9">
            <text:p>2.003</text:p>
          </table:table-cell>
          <table:table-cell office:value-type="float" office:value="0.3009542918299912" table:style-name="c11">
            <text:p>+0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09:15</text:p>
          </table:table-cell>
          <table:table-cell office:value-type="float" office:value="2.0150069999999998" table:style-name="c9">
            <text:p>2.015</text:p>
          </table:table-cell>
          <table:table-cell office:value-type="string" table:style-name="c9">
            <text:p>2026-03-18 09:45</text:p>
          </table:table-cell>
          <table:table-cell office:value-type="float" office:value="2.0199895" table:style-name="c9">
            <text:p>2.02</text:p>
          </table:table-cell>
          <table:table-cell office:value-type="float" office:value="0.04687532050755561" table:style-name="c11">
            <text:p>+0.0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10:45</text:p>
          </table:table-cell>
          <table:table-cell office:value-type="float" office:value="2.0220105" table:style-name="c9">
            <text:p>2.022</text:p>
          </table:table-cell>
          <table:table-cell office:value-type="string" table:style-name="c9">
            <text:p>2026-03-18 11:15</text:p>
          </table:table-cell>
          <table:table-cell office:value-type="float" office:value="2.01899" table:style-name="c9">
            <text:p>2.019</text:p>
          </table:table-cell>
          <table:table-cell office:value-type="float" office:value="-0.3489824118124041" table:style-name="c10">
            <text:p>-0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07:00</text:p>
          </table:table-cell>
          <table:table-cell office:value-type="float" office:value="1.706853" table:style-name="c9">
            <text:p>1.7069</text:p>
          </table:table-cell>
          <table:table-cell office:value-type="string" table:style-name="c9">
            <text:p>2026-03-31 07:30</text:p>
          </table:table-cell>
          <table:table-cell office:value-type="float" office:value="1.7021485" table:style-name="c9">
            <text:p>1.7021</text:p>
          </table:table-cell>
          <table:table-cell office:value-type="float" office:value="-0.47497323152608795" table:style-name="c10">
            <text:p>-0.5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5:15</text:p>
          </table:table-cell>
          <table:table-cell office:value-type="float" office:value="1.6918455" table:style-name="c9">
            <text:p>1.6918</text:p>
          </table:table-cell>
          <table:table-cell office:value-type="string" table:style-name="c9">
            <text:p>2026-03-31 15:45</text:p>
          </table:table-cell>
          <table:table-cell office:value-type="float" office:value="1.687156" table:style-name="c9">
            <text:p>1.6872</text:p>
          </table:table-cell>
          <table:table-cell office:value-type="float" office:value="-0.4765284326494146" table:style-name="c10">
            <text:p>-0.5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5:30</text:p>
          </table:table-cell>
          <table:table-cell office:value-type="float" office:value="1.722861" table:style-name="c9">
            <text:p>1.7229</text:p>
          </table:table-cell>
          <table:table-cell office:value-type="string" table:style-name="c9">
            <text:p>2026-04-01 06:00</text:p>
          </table:table-cell>
          <table:table-cell office:value-type="float" office:value="1.7241375" table:style-name="c9">
            <text:p>1.7241</text:p>
          </table:table-cell>
          <table:table-cell office:value-type="float" office:value="-0.1259562357323052" table:style-name="c10">
            <text:p>-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15</text:p>
          </table:table-cell>
          <table:table-cell office:value-type="float" office:value="1.7378685" table:style-name="c9">
            <text:p>1.7379</text:p>
          </table:table-cell>
          <table:table-cell office:value-type="string" table:style-name="c9">
            <text:p>2026-04-01 06:45</text:p>
          </table:table-cell>
          <table:table-cell office:value-type="float" office:value="1.7351320000000001" table:style-name="c9">
            <text:p>1.7351</text:p>
          </table:table-cell>
          <table:table-cell office:value-type="float" office:value="-0.35704823857500845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3 16:30</text:p>
          </table:table-cell>
          <table:table-cell office:value-type="float" office:value="1.7178585" table:style-name="c9">
            <text:p>1.7179</text:p>
          </table:table-cell>
          <table:table-cell office:value-type="string" table:style-name="c9">
            <text:p>2026-04-03 17:00</text:p>
          </table:table-cell>
          <table:table-cell office:value-type="float" office:value="1.711144" table:style-name="c9">
            <text:p>1.7111</text:p>
          </table:table-cell>
          <table:table-cell office:value-type="float" office:value="-0.5899832178261399" table:style-name="c10">
            <text:p>-0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7:30</text:p>
          </table:table-cell>
          <table:table-cell office:value-type="float" office:value="1.7298645" table:style-name="c9">
            <text:p>1.7299</text:p>
          </table:table-cell>
          <table:table-cell office:value-type="string" table:style-name="c9">
            <text:p>2026-04-06 08:00</text:p>
          </table:table-cell>
          <table:table-cell office:value-type="float" office:value="1.7321335000000002" table:style-name="c9">
            <text:p>1.7321</text:p>
          </table:table-cell>
          <table:table-cell office:value-type="float" office:value="-0.06899585872187641" table:style-name="c10">
            <text:p>-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45</text:p>
          </table:table-cell>
          <table:table-cell office:value-type="float" office:value="1.7488739999999998" table:style-name="c9">
            <text:p>1.7489</text:p>
          </table:table-cell>
          <table:table-cell office:value-type="string" table:style-name="c9">
            <text:p>2026-04-06 10:15</text:p>
          </table:table-cell>
          <table:table-cell office:value-type="float" office:value="1.73913" table:style-name="c9">
            <text:p>1.7391</text:p>
          </table:table-cell>
          <table:table-cell office:value-type="float" office:value="-0.7559447318674528" table:style-name="c10">
            <text:p>-0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1:15</text:p>
          </table:table-cell>
          <table:table-cell office:value-type="float" office:value="1.7398695" table:style-name="c9">
            <text:p>1.7399</text:p>
          </table:table-cell>
          <table:table-cell office:value-type="string" table:style-name="c9">
            <text:p>2026-04-07 21:45</text:p>
          </table:table-cell>
          <table:table-cell office:value-type="float" office:value="1.745127" table:style-name="c9">
            <text:p>1.7451</text:p>
          </table:table-cell>
          <table:table-cell office:value-type="float" office:value="0.1016737822578051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2:45</text:p>
          </table:table-cell>
          <table:table-cell office:value-type="float" office:value="1.756878" table:style-name="c9">
            <text:p>1.7569</text:p>
          </table:table-cell>
          <table:table-cell office:value-type="string" table:style-name="c9">
            <text:p>2026-04-07 23:15</text:p>
          </table:table-cell>
          <table:table-cell office:value-type="float" office:value="1.7741125" table:style-name="c9">
            <text:p>1.7741</text:p>
          </table:table-cell>
          <table:table-cell office:value-type="float" office:value="0.7791121018363212" table:style-name="c11">
            <text:p>+0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30</text:p>
          </table:table-cell>
          <table:table-cell office:value-type="float" office:value="1.7898944999999997" table:style-name="c9">
            <text:p>1.7899</text:p>
          </table:table-cell>
          <table:table-cell office:value-type="string" table:style-name="c9">
            <text:p>2026-04-08 00:00</text:p>
          </table:table-cell>
          <table:table-cell office:value-type="float" office:value="1.8050970000000002" table:style-name="c9">
            <text:p>1.8051</text:p>
          </table:table-cell>
          <table:table-cell office:value-type="float" office:value="0.6477538814159578" table:style-name="c11">
            <text:p>+0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00:15</text:p>
          </table:table-cell>
          <table:table-cell office:value-type="float" office:value="1.8019005" table:style-name="c9">
            <text:p>1.8019</text:p>
          </table:table-cell>
          <table:table-cell office:value-type="string" table:style-name="c9">
            <text:p>2026-04-08 00:45</text:p>
          </table:table-cell>
          <table:table-cell office:value-type="float" office:value="1.7881055000000001" table:style-name="c9">
            <text:p>1.7881</text:p>
          </table:table-cell>
          <table:table-cell office:value-type="float" office:value="-0.9639501678644136" table:style-name="c10">
            <text:p>-1.0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15:45</text:p>
          </table:table-cell>
          <table:table-cell office:value-type="float" office:value="1.788894" table:style-name="c9">
            <text:p>1.7889</text:p>
          </table:table-cell>
          <table:table-cell office:value-type="string" table:style-name="c9">
            <text:p>2026-04-08 16:15</text:p>
          </table:table-cell>
          <table:table-cell office:value-type="float" office:value="1.777111" table:style-name="c9">
            <text:p>1.7771</text:p>
          </table:table-cell>
          <table:table-cell office:value-type="float" office:value="-0.8572584451063014" table:style-name="c10">
            <text:p>-0.9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5:45</text:p>
          </table:table-cell>
          <table:table-cell office:value-type="float" office:value="1.8219104999999998" table:style-name="c9">
            <text:p>1.8219</text:p>
          </table:table-cell>
          <table:table-cell office:value-type="string" table:style-name="c9">
            <text:p>2026-04-09 16:15</text:p>
          </table:table-cell>
          <table:table-cell office:value-type="float" office:value="1.81909" table:style-name="c9">
            <text:p>1.8191</text:p>
          </table:table-cell>
          <table:table-cell office:value-type="float" office:value="-0.3544005542533313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4:30</text:p>
          </table:table-cell>
          <table:table-cell office:value-type="float" office:value="1.8419204999999998" table:style-name="c9">
            <text:p>1.8419</text:p>
          </table:table-cell>
          <table:table-cell office:value-type="string" table:style-name="c9">
            <text:p>2026-04-10 15:00</text:p>
          </table:table-cell>
          <table:table-cell office:value-type="float" office:value="1.8420785000000002" table:style-name="c9">
            <text:p>1.8421</text:p>
          </table:table-cell>
          <table:table-cell office:value-type="float" office:value="-0.19133914419756648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6:00</text:p>
          </table:table-cell>
          <table:table-cell office:value-type="float" office:value="1.7968979999999999" table:style-name="c9">
            <text:p>1.7969</text:p>
          </table:table-cell>
          <table:table-cell office:value-type="string" table:style-name="c9">
            <text:p>2026-04-16 06:30</text:p>
          </table:table-cell>
          <table:table-cell office:value-type="float" office:value="1.797101" table:style-name="c9">
            <text:p>1.7971</text:p>
          </table:table-cell>
          <table:table-cell office:value-type="float" office:value="-0.18862533649653956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7:30</text:p>
          </table:table-cell>
          <table:table-cell office:value-type="float" office:value="1.806903" table:style-name="c9">
            <text:p>1.8069</text:p>
          </table:table-cell>
          <table:table-cell office:value-type="string" table:style-name="c9">
            <text:p>2026-04-16 08:00</text:p>
          </table:table-cell>
          <table:table-cell office:value-type="float" office:value="1.7981005" table:style-name="c9">
            <text:p>1.7981</text:p>
          </table:table-cell>
          <table:table-cell office:value-type="float" office:value="-0.6860856891321654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30</text:p>
          </table:table-cell>
          <table:table-cell office:value-type="float" office:value="1.8179085" table:style-name="c9">
            <text:p>1.8179</text:p>
          </table:table-cell>
          <table:table-cell office:value-type="string" table:style-name="c9">
            <text:p>2026-04-16 14:00</text:p>
          </table:table-cell>
          <table:table-cell office:value-type="float" office:value="1.8040975000000001" table:style-name="c9">
            <text:p>1.8041</text:p>
          </table:table-cell>
          <table:table-cell office:value-type="float" office:value="-0.9581005260990816" table:style-name="c10">
            <text:p>-1.0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4:00</text:p>
          </table:table-cell>
          <table:table-cell office:value-type="float" office:value="1.864932" table:style-name="c9">
            <text:p>1.8649</text:p>
          </table:table-cell>
          <table:table-cell office:value-type="string" table:style-name="c9">
            <text:p>2026-04-17 14:30</text:p>
          </table:table-cell>
          <table:table-cell office:value-type="float" office:value="1.851074" table:style-name="c9">
            <text:p>1.8511</text:p>
          </table:table-cell>
          <table:table-cell office:value-type="float" office:value="-0.9414979702208948" table:style-name="c10">
            <text:p>-0.9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0:30</text:p>
          </table:table-cell>
          <table:table-cell office:value-type="float" office:value="1.8059024999999997" table:style-name="c9">
            <text:p>1.8059</text:p>
          </table:table-cell>
          <table:table-cell office:value-type="string" table:style-name="c9">
            <text:p>2026-04-21 11:00</text:p>
          </table:table-cell>
          <table:table-cell office:value-type="float" office:value="1.8120935" table:style-name="c9">
            <text:p>1.8121</text:p>
          </table:table-cell>
          <table:table-cell office:value-type="float" office:value="0.14223498187195815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5:30</text:p>
          </table:table-cell>
          <table:table-cell office:value-type="float" office:value="1.8219104999999998" table:style-name="c9">
            <text:p>1.8219</text:p>
          </table:table-cell>
          <table:table-cell office:value-type="string" table:style-name="c9">
            <text:p>2026-04-21 16:00</text:p>
          </table:table-cell>
          <table:table-cell office:value-type="float" office:value="1.835082" table:style-name="c9">
            <text:p>1.8351</text:p>
          </table:table-cell>
          <table:table-cell office:value-type="float" office:value="0.5216047155993886" table:style-name="c11">
            <text:p>+0.5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6:15</text:p>
          </table:table-cell>
          <table:table-cell office:value-type="float" office:value="1.8259124999999998" table:style-name="c9">
            <text:p>1.8259</text:p>
          </table:table-cell>
          <table:table-cell office:value-type="string" table:style-name="c9">
            <text:p>2026-04-21 16:45</text:p>
          </table:table-cell>
          <table:table-cell office:value-type="float" office:value="1.8210890000000002" table:style-name="c9">
            <text:p>1.8211</text:p>
          </table:table-cell>
          <table:table-cell office:value-type="float" office:value="-0.4635412108192294" table:style-name="c10">
            <text:p>-0.5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0:30</text:p>
          </table:table-cell>
          <table:table-cell office:value-type="float" office:value="1.862931" table:style-name="c9">
            <text:p>1.8629</text:p>
          </table:table-cell>
          <table:table-cell office:value-type="string" table:style-name="c9">
            <text:p>2026-04-22 01:00</text:p>
          </table:table-cell>
          <table:table-cell office:value-type="float" office:value="1.8530730000000002" table:style-name="c9">
            <text:p>1.8531</text:p>
          </table:table-cell>
          <table:table-cell office:value-type="float" office:value="-0.728008333480934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2:15</text:p>
          </table:table-cell>
          <table:table-cell office:value-type="float" office:value="1.8769379999999998" table:style-name="c9">
            <text:p>1.8769</text:p>
          </table:table-cell>
          <table:table-cell office:value-type="string" table:style-name="c9">
            <text:p>2026-04-22 02:45</text:p>
          </table:table-cell>
          <table:table-cell office:value-type="float" office:value="1.883058" table:style-name="c9">
            <text:p>1.8831</text:p>
          </table:table-cell>
          <table:table-cell office:value-type="float" office:value="0.12551118140291528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07:15</text:p>
          </table:table-cell>
          <table:table-cell office:value-type="float" office:value="1.8599294999999998" table:style-name="c9">
            <text:p>1.8599</text:p>
          </table:table-cell>
          <table:table-cell office:value-type="string" table:style-name="c9">
            <text:p>2026-04-23 07:45</text:p>
          </table:table-cell>
          <table:table-cell office:value-type="float" office:value="1.8600695" table:style-name="c9">
            <text:p>1.8601</text:p>
          </table:table-cell>
          <table:table-cell office:value-type="float" office:value="-0.19238787978251848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2:45</text:p>
          </table:table-cell>
          <table:table-cell office:value-type="float" office:value="1.8759374999999998" table:style-name="c9">
            <text:p>1.8759</text:p>
          </table:table-cell>
          <table:table-cell office:value-type="string" table:style-name="c9">
            <text:p>2026-04-23 13:15</text:p>
          </table:table-cell>
          <table:table-cell office:value-type="float" office:value="1.8710640000000003" table:style-name="c9">
            <text:p>1.8711</text:p>
          </table:table-cell>
          <table:table-cell office:value-type="float" office:value="-0.4591707845277071" table:style-name="c10">
            <text:p>-0.5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20:30</text:p>
          </table:table-cell>
          <table:table-cell office:value-type="float" office:value="1.8869429999999998" table:style-name="c9">
            <text:p>1.8869</text:p>
          </table:table-cell>
          <table:table-cell office:value-type="string" table:style-name="c9">
            <text:p>2026-04-23 21:00</text:p>
          </table:table-cell>
          <table:table-cell office:value-type="float" office:value="1.893053" table:style-name="c9">
            <text:p>1.8931</text:p>
          </table:table-cell>
          <table:table-cell office:value-type="float" office:value="0.12325687914263028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00:15</text:p>
          </table:table-cell>
          <table:table-cell office:value-type="float" office:value="1.9139564999999998" table:style-name="c9">
            <text:p>1.914</text:p>
          </table:table-cell>
          <table:table-cell office:value-type="string" table:style-name="c9">
            <text:p>2026-04-24 00:45</text:p>
          </table:table-cell>
          <table:table-cell office:value-type="float" office:value="1.9200395000000001" table:style-name="c9">
            <text:p>1.92</text:p>
          </table:table-cell>
          <table:table-cell office:value-type="float" office:value="0.1172879864041132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01:00</text:p>
          </table:table-cell>
          <table:table-cell office:value-type="float" office:value="1.9259625" table:style-name="c9">
            <text:p>1.926</text:p>
          </table:table-cell>
          <table:table-cell office:value-type="string" table:style-name="c9">
            <text:p>2026-04-24 01:30</text:p>
          </table:table-cell>
          <table:table-cell office:value-type="float" office:value="1.925037" table:style-name="c9">
            <text:p>1.925</text:p>
          </table:table-cell>
          <table:table-cell office:value-type="float" office:value="-0.2478578353939831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08:15</text:p>
          </table:table-cell>
          <table:table-cell office:value-type="float" office:value="1.9379685" table:style-name="c9">
            <text:p>1.938</text:p>
          </table:table-cell>
          <table:table-cell office:value-type="string" table:style-name="c9">
            <text:p>2026-04-24 08:45</text:p>
          </table:table-cell>
          <table:table-cell office:value-type="float" office:value="1.9410290000000001" table:style-name="c9">
            <text:p>1.941</text:p>
          </table:table-cell>
          <table:table-cell office:value-type="float" office:value="-0.042292584786596255" table:style-name="c10">
            <text:p>-0.0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09:00</text:p>
          </table:table-cell>
          <table:table-cell office:value-type="float" office:value="1.944972" table:style-name="c9">
            <text:p>1.945</text:p>
          </table:table-cell>
          <table:table-cell office:value-type="string" table:style-name="c9">
            <text:p>2026-04-24 09:30</text:p>
          </table:table-cell>
          <table:table-cell office:value-type="float" office:value="1.935032" table:style-name="c9">
            <text:p>1.935</text:p>
          </table:table-cell>
          <table:table-cell office:value-type="float" office:value="-0.7099397301349231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11:15</text:p>
          </table:table-cell>
          <table:table-cell office:value-type="float" office:value="1.9629809999999999" table:style-name="c9">
            <text:p>1.963</text:p>
          </table:table-cell>
          <table:table-cell office:value-type="string" table:style-name="c9">
            <text:p>2026-04-24 11:45</text:p>
          </table:table-cell>
          <table:table-cell office:value-type="float" office:value="1.9660165000000003" table:style-name="c9">
            <text:p>1.966</text:p>
          </table:table-cell>
          <table:table-cell office:value-type="float" office:value="-0.045571861546256365" table:style-name="c10">
            <text:p>-0.0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16:00</text:p>
          </table:table-cell>
          <table:table-cell office:value-type="float" office:value="1.9939965" table:style-name="c9">
            <text:p>1.994</text:p>
          </table:table-cell>
          <table:table-cell office:value-type="string" table:style-name="c9">
            <text:p>2026-04-24 16:30</text:p>
          </table:table-cell>
          <table:table-cell office:value-type="float" office:value="1.983008" table:style-name="c9">
            <text:p>1.983</text:p>
          </table:table-cell>
          <table:table-cell office:value-type="float" office:value="-0.7498775946698011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5 00:30</text:p>
          </table:table-cell>
          <table:table-cell office:value-type="float" office:value="1.998999" table:style-name="c9">
            <text:p>1.999</text:p>
          </table:table-cell>
          <table:table-cell office:value-type="string" table:style-name="c9">
            <text:p>2026-04-25 01:00</text:p>
          </table:table-cell>
          <table:table-cell office:value-type="float" office:value="2.006996" table:style-name="c9">
            <text:p>2.007</text:p>
          </table:table-cell>
          <table:table-cell office:value-type="float" office:value="0.19935052473762926" table:style-name="c11">
            <text:p>+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5 10:30</text:p>
          </table:table-cell>
          <table:table-cell office:value-type="float" office:value="2.0480235" table:style-name="c9">
            <text:p>2.048</text:p>
          </table:table-cell>
          <table:table-cell office:value-type="string" table:style-name="c9">
            <text:p>2026-04-25 11:00</text:p>
          </table:table-cell>
          <table:table-cell office:value-type="float" office:value="2.0539725000000004" table:style-name="c9">
            <text:p>2.054</text:p>
          </table:table-cell>
          <table:table-cell office:value-type="float" office:value="0.08999452264586427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00</text:p>
          </table:table-cell>
          <table:table-cell office:value-type="float" office:value="1.9129559999999999" table:style-name="c9">
            <text:p>1.913</text:p>
          </table:table-cell>
          <table:table-cell office:value-type="string" table:style-name="c9">
            <text:p>2026-05-04 02:30</text:p>
          </table:table-cell>
          <table:table-cell office:value-type="float" office:value="1.9120435000000002" table:style-name="c9">
            <text:p>1.912</text:p>
          </table:table-cell>
          <table:table-cell office:value-type="float" office:value="-0.2475056904863271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45</text:p>
          </table:table-cell>
          <table:table-cell office:value-type="float" office:value="1.9179585" table:style-name="c9">
            <text:p>1.918</text:p>
          </table:table-cell>
          <table:table-cell office:value-type="string" table:style-name="c9">
            <text:p>2026-05-04 03:15</text:p>
          </table:table-cell>
          <table:table-cell office:value-type="float" office:value="1.91904" table:style-name="c9">
            <text:p>1.919</text:p>
          </table:table-cell>
          <table:table-cell office:value-type="float" office:value="-0.14362463838502038" table:style-name="c10">
            <text:p>-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5:00</text:p>
          </table:table-cell>
          <table:table-cell office:value-type="float" office:value="1.9209599999999998" table:style-name="c9">
            <text:p>1.921</text:p>
          </table:table-cell>
          <table:table-cell office:value-type="string" table:style-name="c9">
            <text:p>2026-05-04 05:30</text:p>
          </table:table-cell>
          <table:table-cell office:value-type="float" office:value="1.913043" table:style-name="c9">
            <text:p>1.913</text:p>
          </table:table-cell>
          <table:table-cell office:value-type="float" office:value="-0.6112138179347637" table:style-name="c10">
            <text:p>-0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1:15</text:p>
          </table:table-cell>
          <table:table-cell office:value-type="float" office:value="1.9079534999999999" table:style-name="c9">
            <text:p>1.908</text:p>
          </table:table-cell>
          <table:table-cell office:value-type="string" table:style-name="c9">
            <text:p>2026-05-05 01:45</text:p>
          </table:table-cell>
          <table:table-cell office:value-type="float" office:value="1.905047" table:style-name="c9">
            <text:p>1.905</text:p>
          </table:table-cell>
          <table:table-cell office:value-type="float" office:value="-0.3519314780470184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4:00</text:p>
          </table:table-cell>
          <table:table-cell office:value-type="float" office:value="1.9209599999999998" table:style-name="c9">
            <text:p>1.921</text:p>
          </table:table-cell>
          <table:table-cell office:value-type="string" table:style-name="c9">
            <text:p>2026-05-06 04:30</text:p>
          </table:table-cell>
          <table:table-cell office:value-type="float" office:value="1.9200395000000001" table:style-name="c9">
            <text:p>1.92</text:p>
          </table:table-cell>
          <table:table-cell office:value-type="float" office:value="-0.24772295937967037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8:45</text:p>
          </table:table-cell>
          <table:table-cell office:value-type="float" office:value="1.9589789999999998" table:style-name="c9">
            <text:p>1.959</text:p>
          </table:table-cell>
          <table:table-cell office:value-type="string" table:style-name="c9">
            <text:p>2026-05-06 09:15</text:p>
          </table:table-cell>
          <table:table-cell office:value-type="float" office:value="1.9520235000000001" table:style-name="c9">
            <text:p>1.952</text:p>
          </table:table-cell>
          <table:table-cell office:value-type="float" office:value="-0.5542476451508516" table:style-name="c10">
            <text:p>-0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2:45</text:p>
          </table:table-cell>
          <table:table-cell office:value-type="float" office:value="1.9699845" table:style-name="c9">
            <text:p>1.97</text:p>
          </table:table-cell>
          <table:table-cell office:value-type="string" table:style-name="c9">
            <text:p>2026-05-06 13:15</text:p>
          </table:table-cell>
          <table:table-cell office:value-type="float" office:value="1.9700145000000002" table:style-name="c9">
            <text:p>1.97</text:p>
          </table:table-cell>
          <table:table-cell office:value-type="float" office:value="-0.19838018956492842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5:45</text:p>
          </table:table-cell>
          <table:table-cell office:value-type="float" office:value="1.9089539999999998" table:style-name="c9">
            <text:p>1.909</text:p>
          </table:table-cell>
          <table:table-cell office:value-type="string" table:style-name="c9">
            <text:p>2026-05-07 06:15</text:p>
          </table:table-cell>
          <table:table-cell office:value-type="float" office:value="1.9000495000000002" table:style-name="c9">
            <text:p>1.9</text:p>
          </table:table-cell>
          <table:table-cell office:value-type="float" office:value="-0.6654271894712793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22:00</text:p>
          </table:table-cell>
          <table:table-cell office:value-type="float" office:value="1.9499745" table:style-name="c9">
            <text:p>1.95</text:p>
          </table:table-cell>
          <table:table-cell office:value-type="string" table:style-name="c9">
            <text:p>2026-05-08 22:30</text:p>
          </table:table-cell>
          <table:table-cell office:value-type="float" office:value="1.9410290000000001" table:style-name="c9">
            <text:p>1.941</text:p>
          </table:table-cell>
          <table:table-cell office:value-type="float" office:value="-0.6577325483487106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0:30</text:p>
          </table:table-cell>
          <table:table-cell office:value-type="float" office:value="1.972986" table:style-name="c9">
            <text:p>1.973</text:p>
          </table:table-cell>
          <table:table-cell office:value-type="string" table:style-name="c9">
            <text:p>2026-05-09 01:00</text:p>
          </table:table-cell>
          <table:table-cell office:value-type="float" office:value="1.9840075000000001" table:style-name="c9">
            <text:p>1.984</text:p>
          </table:table-cell>
          <table:table-cell office:value-type="float" office:value="0.3576036022303386" table:style-name="c11">
            <text:p>+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5:30</text:p>
          </table:table-cell>
          <table:table-cell office:value-type="float" office:value="1.9329659999999997" table:style-name="c9">
            <text:p>1.933</text:p>
          </table:table-cell>
          <table:table-cell office:value-type="string" table:style-name="c9">
            <text:p>2026-05-10 06:00</text:p>
          </table:table-cell>
          <table:table-cell office:value-type="float" office:value="1.9300345" table:style-name="c9">
            <text:p>1.93</text:p>
          </table:table-cell>
          <table:table-cell office:value-type="float" office:value="-0.35125496079597696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5:15</text:p>
          </table:table-cell>
          <table:table-cell office:value-type="float" office:value="1.9749869999999998" table:style-name="c9">
            <text:p>1.975</text:p>
          </table:table-cell>
          <table:table-cell office:value-type="string" table:style-name="c9">
            <text:p>2026-05-10 15:45</text:p>
          </table:table-cell>
          <table:table-cell office:value-type="float" office:value="2.0019985" table:style-name="c9">
            <text:p>2.002</text:p>
          </table:table-cell>
          <table:table-cell office:value-type="float" office:value="1.1650458964286958" table:style-name="c11">
            <text:p>+1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09:45</text:p>
          </table:table-cell>
          <table:table-cell office:value-type="float" office:value="2.0490239999999997" table:style-name="c9">
            <text:p>2.049</text:p>
          </table:table-cell>
          <table:table-cell office:value-type="string" table:style-name="c9">
            <text:p>2026-05-11 10:15</text:p>
          </table:table-cell>
          <table:table-cell office:value-type="float" office:value="2.0869560000000003" table:style-name="c9">
            <text:p>2.087</text:p>
          </table:table-cell>
          <table:table-cell office:value-type="float" office:value="1.6476222316576417" table:style-name="c11">
            <text:p>+1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23:30</text:p>
          </table:table-cell>
          <table:table-cell office:value-type="float" office:value="2.0420205" table:style-name="c9">
            <text:p>2.042</text:p>
          </table:table-cell>
          <table:table-cell office:value-type="string" table:style-name="c9">
            <text:p>2026-05-12 00:00</text:p>
          </table:table-cell>
          <table:table-cell office:value-type="float" office:value="2.0419785000000004" table:style-name="c9">
            <text:p>2.042</text:p>
          </table:table-cell>
          <table:table-cell office:value-type="float" office:value="-0.20195267488742896" table:style-name="c10">
            <text:p>-0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06:45</text:p>
          </table:table-cell>
          <table:table-cell office:value-type="float" office:value="2.057028" table:style-name="c9">
            <text:p>2.057</text:p>
          </table:table-cell>
          <table:table-cell office:value-type="string" table:style-name="c9">
            <text:p>2026-05-12 07:15</text:p>
          </table:table-cell>
          <table:table-cell office:value-type="float" office:value="2.060969" table:style-name="c9">
            <text:p>2.061</text:p>
          </table:table-cell>
          <table:table-cell office:value-type="float" office:value="-0.008695896750054999" table:style-name="c10">
            <text:p>-0.0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07:30</text:p>
          </table:table-cell>
          <table:table-cell office:value-type="float" office:value="2.0630309999999996" table:style-name="c9">
            <text:p>2.063</text:p>
          </table:table-cell>
          <table:table-cell office:value-type="string" table:style-name="c9">
            <text:p>2026-05-12 08:00</text:p>
          </table:table-cell>
          <table:table-cell office:value-type="float" office:value="2.0479755" table:style-name="c9">
            <text:p>2.048</text:p>
          </table:table-cell>
          <table:table-cell office:value-type="float" office:value="-0.9282169305502297" table:style-name="c10">
            <text:p>-0.9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10:15</text:p>
          </table:table-cell>
          <table:table-cell office:value-type="float" office:value="2.0800395000000003" table:style-name="c9">
            <text:p>2.08</text:p>
          </table:table-cell>
          <table:table-cell office:value-type="string" table:style-name="c9">
            <text:p>2026-05-12 10:45</text:p>
          </table:table-cell>
          <table:table-cell office:value-type="float" office:value="2.0469760000000004" table:style-name="c9">
            <text:p>2.047</text:p>
          </table:table-cell>
          <table:table-cell office:value-type="float" office:value="-1.7862836270176596" table:style-name="c10">
            <text:p>-1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17:15</text:p>
          </table:table-cell>
          <table:table-cell office:value-type="float" office:value="2.0620304999999997" table:style-name="c9">
            <text:p>2.062</text:p>
          </table:table-cell>
          <table:table-cell office:value-type="string" table:style-name="c9">
            <text:p>2026-05-12 17:45</text:p>
          </table:table-cell>
          <table:table-cell office:value-type="float" office:value="2.074962" table:style-name="c9">
            <text:p>2.075</text:p>
          </table:table-cell>
          <table:table-cell office:value-type="float" office:value="0.42597095251502015" table:style-name="c11">
            <text:p>+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18:15</text:p>
          </table:table-cell>
          <table:table-cell office:value-type="float" office:value="2.097048" table:style-name="c9">
            <text:p>2.097</text:p>
          </table:table-cell>
          <table:table-cell office:value-type="string" table:style-name="c9">
            <text:p>2026-05-12 18:45</text:p>
          </table:table-cell>
          <table:table-cell office:value-type="float" office:value="2.128935" table:style-name="c9">
            <text:p>2.1289</text:p>
          </table:table-cell>
          <table:table-cell office:value-type="float" office:value="1.3176264413117922" table:style-name="c11">
            <text:p>+1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19:00</text:p>
          </table:table-cell>
          <table:table-cell office:value-type="float" office:value="2.109054" table:style-name="c9">
            <text:p>2.1091</text:p>
          </table:table-cell>
          <table:table-cell office:value-type="string" table:style-name="c9">
            <text:p>2026-05-12 19:30</text:p>
          </table:table-cell>
          <table:table-cell office:value-type="float" office:value="2.1319335" table:style-name="c9">
            <text:p>2.1319</text:p>
          </table:table-cell>
          <table:table-cell office:value-type="float" office:value="0.8827543028059104" table:style-name="c11">
            <text:p>+0.9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02:00</text:p>
          </table:table-cell>
          <table:table-cell office:value-type="float" office:value="2.157078" table:style-name="c9">
            <text:p>2.1571</text:p>
          </table:table-cell>
          <table:table-cell office:value-type="string" table:style-name="c9">
            <text:p>2026-05-13 02:30</text:p>
          </table:table-cell>
          <table:table-cell office:value-type="float" office:value="2.17891" table:style-name="c9">
            <text:p>2.1789</text:p>
          </table:table-cell>
          <table:table-cell office:value-type="float" office:value="0.8101866928317047" table:style-name="c11">
            <text:p>+0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02:45</text:p>
          </table:table-cell>
          <table:table-cell office:value-type="float" office:value="2.173086" table:style-name="c9">
            <text:p>2.1731</text:p>
          </table:table-cell>
          <table:table-cell office:value-type="string" table:style-name="c9">
            <text:p>2026-05-13 03:15</text:p>
          </table:table-cell>
          <table:table-cell office:value-type="float" office:value="2.1599195" table:style-name="c9">
            <text:p>2.1599</text:p>
          </table:table-cell>
          <table:table-cell office:value-type="float" office:value="-0.8045783314834298" table:style-name="c10">
            <text:p>-0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05:15</text:p>
          </table:table-cell>
          <table:table-cell office:value-type="float" office:value="2.2011000000000003" table:style-name="c9">
            <text:p>2.2011</text:p>
          </table:table-cell>
          <table:table-cell office:value-type="string" table:style-name="c9">
            <text:p>2026-05-13 05:45</text:p>
          </table:table-cell>
          <table:table-cell office:value-type="float" office:value="2.1759115" table:style-name="c9">
            <text:p>2.1759</text:p>
          </table:table-cell>
          <table:table-cell office:value-type="float" office:value="-1.3419720634455623" table:style-name="c10">
            <text:p>-1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20:15</text:p>
          </table:table-cell>
          <table:table-cell office:value-type="float" office:value="2.0840415" table:style-name="c9">
            <text:p>2.084</text:p>
          </table:table-cell>
          <table:table-cell office:value-type="string" table:style-name="c9">
            <text:p>2026-05-13 20:45</text:p>
          </table:table-cell>
          <table:table-cell office:value-type="float" office:value="2.076961" table:style-name="c9">
            <text:p>2.077</text:p>
          </table:table-cell>
          <table:table-cell office:value-type="float" office:value="-0.5389693554087249" table:style-name="c10">
            <text:p>-0.5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7 03:45</text:p>
          </table:table-cell>
          <table:table-cell office:value-type="float" office:value="2.053026" table:style-name="c9">
            <text:p>2.053</text:p>
          </table:table-cell>
          <table:table-cell office:value-type="string" table:style-name="c9">
            <text:p>2026-05-17 04:15</text:p>
          </table:table-cell>
          <table:table-cell office:value-type="float" office:value="2.0559715" table:style-name="c9">
            <text:p>2.056</text:p>
          </table:table-cell>
          <table:table-cell office:value-type="float" office:value="-0.05671564941213125" table:style-name="c10">
            <text:p>-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7 10:15</text:p>
          </table:table-cell>
          <table:table-cell office:value-type="float" office:value="2.125062" table:style-name="c9">
            <text:p>2.1251</text:p>
          </table:table-cell>
          <table:table-cell office:value-type="string" table:style-name="c9">
            <text:p>2026-05-17 10:45</text:p>
          </table:table-cell>
          <table:table-cell office:value-type="float" office:value="2.090954" table:style-name="c9">
            <text:p>2.091</text:p>
          </table:table-cell>
          <table:table-cell office:value-type="float" office:value="-1.8017270576576205" table:style-name="c10">
            <text:p>-1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8 03:00</text:p>
          </table:table-cell>
          <table:table-cell office:value-type="float" office:value="2.053026" table:style-name="c9">
            <text:p>2.053</text:p>
          </table:table-cell>
          <table:table-cell office:value-type="string" table:style-name="c9">
            <text:p>2026-05-18 03:30</text:p>
          </table:table-cell>
          <table:table-cell office:value-type="float" office:value="2.0519735" table:style-name="c9">
            <text:p>2.052</text:p>
          </table:table-cell>
          <table:table-cell office:value-type="float" office:value="-0.2510633097924764" table:style-name="c10">
            <text:p>-0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8 06:15</text:p>
          </table:table-cell>
          <table:table-cell office:value-type="float" office:value="2.0700344999999998" table:style-name="c9">
            <text:p>2.07</text:p>
          </table:table-cell>
          <table:table-cell office:value-type="string" table:style-name="c9">
            <text:p>2026-05-18 06:45</text:p>
          </table:table-cell>
          <table:table-cell office:value-type="float" office:value="2.0599695000000002" table:style-name="c9">
            <text:p>2.06</text:p>
          </table:table-cell>
          <table:table-cell office:value-type="float" office:value="-0.6851518189913919" table:style-name="c10">
            <text:p>-0.7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00:15</text:p>
          </table:table-cell>
          <table:table-cell office:value-type="float" office:value="2.0870429999999995" table:style-name="c9">
            <text:p>2.087</text:p>
          </table:table-cell>
          <table:table-cell office:value-type="string" table:style-name="c9">
            <text:p>2026-05-19 00:45</text:p>
          </table:table-cell>
          <table:table-cell office:value-type="float" office:value="2.0679655" table:style-name="c9">
            <text:p>2.068</text:p>
          </table:table-cell>
          <table:table-cell office:value-type="float" office:value="-1.1121650600634303" table:style-name="c10">
            <text:p>-1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07:45</text:p>
          </table:table-cell>
          <table:table-cell office:value-type="float" office:value="2.0780385" table:style-name="c9">
            <text:p>2.078</text:p>
          </table:table-cell>
          <table:table-cell office:value-type="string" table:style-name="c9">
            <text:p>2026-05-19 08:15</text:p>
          </table:table-cell>
          <table:table-cell office:value-type="float" office:value="2.062968" table:style-name="c9">
            <text:p>2.063</text:p>
          </table:table-cell>
          <table:table-cell office:value-type="float" office:value="-0.9236774502493494" table:style-name="c10">
            <text:p>-0.9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11:00</text:p>
          </table:table-cell>
          <table:table-cell office:value-type="float" office:value="2.08104" table:style-name="c9">
            <text:p>2.081</text:p>
          </table:table-cell>
          <table:table-cell office:value-type="string" table:style-name="c9">
            <text:p>2026-05-19 11:30</text:p>
          </table:table-cell>
          <table:table-cell office:value-type="float" office:value="2.0599695000000002" table:style-name="c9">
            <text:p>2.06</text:p>
          </table:table-cell>
          <table:table-cell office:value-type="float" office:value="-1.2103745737948035" table:style-name="c10">
            <text:p>-1.2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17:00</text:p>
          </table:table-cell>
          <table:table-cell office:value-type="float" office:value="2.08104" table:style-name="c9">
            <text:p>2.081</text:p>
          </table:table-cell>
          <table:table-cell office:value-type="string" table:style-name="c9">
            <text:p>2026-05-19 17:30</text:p>
          </table:table-cell>
          <table:table-cell office:value-type="float" office:value="2.0799595" table:style-name="c9">
            <text:p>2.08</text:p>
          </table:table-cell>
          <table:table-cell office:value-type="float" office:value="-0.2517173644187132" table:style-name="c10">
            <text:p>-0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8:15</text:p>
          </table:table-cell>
          <table:table-cell office:value-type="float" office:value="2.0310149999999996" table:style-name="c9">
            <text:p>2.031</text:p>
          </table:table-cell>
          <table:table-cell office:value-type="string" table:style-name="c9">
            <text:p>2026-05-21 18:45</text:p>
          </table:table-cell>
          <table:table-cell office:value-type="float" office:value="2.040979" table:style-name="c9">
            <text:p>2.041</text:p>
          </table:table-cell>
          <table:table-cell office:value-type="float" office:value="0.28971144865994614" table:style-name="c11">
            <text:p>+0.3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3:15</text:p>
          </table:table-cell>
          <table:table-cell office:value-type="float" office:value="2.089044" table:style-name="c9">
            <text:p>2.089</text:p>
          </table:table-cell>
          <table:table-cell office:value-type="string" table:style-name="c9">
            <text:p>2026-05-22 03:45</text:p>
          </table:table-cell>
          <table:table-cell office:value-type="float" office:value="2.1309340000000003" table:style-name="c9">
            <text:p>2.1309</text:p>
          </table:table-cell>
          <table:table-cell office:value-type="float" office:value="1.8013150002585077" table:style-name="c11">
            <text:p>+1.8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4:00</text:p>
          </table:table-cell>
          <table:table-cell office:value-type="float" office:value="2.1510749999999996" table:style-name="c9">
            <text:p>2.1511</text:p>
          </table:table-cell>
          <table:table-cell office:value-type="string" table:style-name="c9">
            <text:p>2026-05-22 04:30</text:p>
          </table:table-cell>
          <table:table-cell office:value-type="float" office:value="2.1199395" table:style-name="c9">
            <text:p>2.1199</text:p>
          </table:table-cell>
          <table:table-cell office:value-type="float" office:value="-1.6444456404588137" table:style-name="c10">
            <text:p>-1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1:30</text:p>
          </table:table-cell>
          <table:table-cell office:value-type="float" office:value="2.1780885" table:style-name="c9">
            <text:p>2.1781</text:p>
          </table:table-cell>
          <table:table-cell office:value-type="string" table:style-name="c9">
            <text:p>2026-05-22 12:00</text:p>
          </table:table-cell>
          <table:table-cell office:value-type="float" office:value="2.184907" table:style-name="c9">
            <text:p>2.1849</text:p>
          </table:table-cell>
          <table:table-cell office:value-type="float" office:value="0.11252393587315446" table:style-name="c11">
            <text:p>+0.1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3 01:45</text:p>
          </table:table-cell>
          <table:table-cell office:value-type="float" office:value="2.117058" table:style-name="c9">
            <text:p>2.1171</text:p>
          </table:table-cell>
          <table:table-cell office:value-type="string" table:style-name="c9">
            <text:p>2026-05-23 02:15</text:p>
          </table:table-cell>
          <table:table-cell office:value-type="float" office:value="2.112943" table:style-name="c9">
            <text:p>2.1129</text:p>
          </table:table-cell>
          <table:table-cell office:value-type="float" office:value="-0.3938849600247152" table:style-name="c10">
            <text:p>-0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3 21:00</text:p>
          </table:table-cell>
          <table:table-cell office:value-type="float" office:value="2.147073" table:style-name="c9">
            <text:p>2.1471</text:p>
          </table:table-cell>
          <table:table-cell office:value-type="string" table:style-name="c9">
            <text:p>2026-05-23 21:30</text:p>
          </table:table-cell>
          <table:table-cell office:value-type="float" office:value="2.1179405000000004" table:style-name="c9">
            <text:p>2.1179</text:p>
          </table:table-cell>
          <table:table-cell office:value-type="float" office:value="-1.5540348679108584" table:style-name="c10">
            <text:p>-1.6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07:00</text:p>
          </table:table-cell>
          <table:table-cell office:value-type="float" office:value="2.1820904999999997" table:style-name="c9">
            <text:p>2.1821</text:p>
          </table:table-cell>
          <table:table-cell office:value-type="string" table:style-name="c9">
            <text:p>2026-05-25 07:30</text:p>
          </table:table-cell>
          <table:table-cell office:value-type="float" office:value="2.132933" table:style-name="c9">
            <text:p>2.1329</text:p>
          </table:table-cell>
          <table:table-cell office:value-type="float" office:value="-2.448167620316377" table:style-name="c10">
            <text:p>-2.4</text:p>
          </table:table-cell>
        </table:table-row>
        <table:table-row>
          <table:table-cell office:value-type="string" table:style-name="c8">
            <text:p>ATO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3:45</text:p>
          </table:table-cell>
          <table:table-cell office:value-type="float" office:value="2.2541265" table:style-name="c9">
            <text:p>2.2541</text:p>
          </table:table-cell>
          <table:table-cell office:value-type="string" table:style-name="c9">
            <text:p>2026-05-26 14:15</text:p>
          </table:table-cell>
          <table:table-cell office:value-type="float" office:value="2.2768610000000002" table:style-name="c9">
            <text:p>2.2769</text:p>
          </table:table-cell>
          <table:table-cell office:value-type="float" office:value="0.8066563638287505" table:style-name="c11">
            <text:p>+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9.28464" table:style-name="c1">
            <text:p>9.2846</text:p>
          </table:table-cell>
          <table:table-cell office:value-type="string" table:style-name="c1">
            <text:p>2026-03-09 14:15</text:p>
          </table:table-cell>
          <table:table-cell office:value-type="float" office:value="9.235380000000001" table:style-name="c1">
            <text:p>9.2354</text:p>
          </table:table-cell>
          <table:table-cell office:value-type="float" office:value="-0.7293931118492192" table:style-name="c12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30</text:p>
          </table:table-cell>
          <table:table-cell office:value-type="float" office:value="9.28464" table:style-name="c1">
            <text:p>9.2846</text:p>
          </table:table-cell>
          <table:table-cell office:value-type="string" table:style-name="c1">
            <text:p>2026-03-09 15:00</text:p>
          </table:table-cell>
          <table:table-cell office:value-type="float" office:value="9.255370000000001" table:style-name="c1">
            <text:p>9.2554</text:p>
          </table:table-cell>
          <table:table-cell office:value-type="float" office:value="-0.514521668368384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9.48474" table:style-name="c1">
            <text:p>9.4847</text:p>
          </table:table-cell>
          <table:table-cell office:value-type="string" table:style-name="c1">
            <text:p>2026-03-10 03:15</text:p>
          </table:table-cell>
          <table:table-cell office:value-type="float" office:value="9.445275" table:style-name="c1">
            <text:p>9.4453</text:p>
          </table:table-cell>
          <table:table-cell office:value-type="float" office:value="-0.6151576608847464" table:style-name="c12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9.56478" table:style-name="c1">
            <text:p>9.5648</text:p>
          </table:table-cell>
          <table:table-cell office:value-type="string" table:style-name="c1">
            <text:p>2026-03-10 10:00</text:p>
          </table:table-cell>
          <table:table-cell office:value-type="float" office:value="9.565215" table:style-name="c1">
            <text:p>9.5652</text:p>
          </table:table-cell>
          <table:table-cell office:value-type="float" office:value="-0.1953611560851387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3-10 15:30</text:p>
          </table:table-cell>
          <table:table-cell office:value-type="float" office:value="9.645175" table:style-name="c1">
            <text:p>9.6452</text:p>
          </table:table-cell>
          <table:table-cell office:value-type="float" office:value="-0.19622662553576697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6:30</text:p>
          </table:table-cell>
          <table:table-cell office:value-type="float" office:value="9.90495" table:style-name="c1">
            <text:p>9.9049</text:p>
          </table:table-cell>
          <table:table-cell office:value-type="string" table:style-name="c1">
            <text:p>2026-03-10 17:00</text:p>
          </table:table-cell>
          <table:table-cell office:value-type="float" office:value="9.825085000000001" table:style-name="c1">
            <text:p>9.8251</text:p>
          </table:table-cell>
          <table:table-cell office:value-type="float" office:value="-1.004602192994386" table:style-name="c12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9.714855" table:style-name="c1">
            <text:p>9.7149</text:p>
          </table:table-cell>
          <table:table-cell office:value-type="string" table:style-name="c1">
            <text:p>2026-03-11 14:30</text:p>
          </table:table-cell>
          <table:table-cell office:value-type="float" office:value="9.725135000000002" table:style-name="c1">
            <text:p>9.7251</text:p>
          </table:table-cell>
          <table:table-cell office:value-type="float" office:value="-0.09429420063395977" table:style-name="c12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3-11 18:00</text:p>
          </table:table-cell>
          <table:table-cell office:value-type="float" office:value="9.67516" table:style-name="c1">
            <text:p>9.6752</text:p>
          </table:table-cell>
          <table:table-cell office:value-type="float" office:value="-0.7099397301349231" table:style-name="c12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3-12 08:15</text:p>
          </table:table-cell>
          <table:table-cell office:value-type="float" office:value="9.57521" table:style-name="c1">
            <text:p>9.5752</text:p>
          </table:table-cell>
          <table:table-cell office:value-type="float" office:value="-0.19547013107866773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45</text:p>
          </table:table-cell>
          <table:table-cell office:value-type="float" office:value="9.634815" table:style-name="c1">
            <text:p>9.6348</text:p>
          </table:table-cell>
          <table:table-cell office:value-type="string" table:style-name="c1">
            <text:p>2026-03-12 11:15</text:p>
          </table:table-cell>
          <table:table-cell office:value-type="float" office:value="9.565215" table:style-name="c1">
            <text:p>9.5652</text:p>
          </table:table-cell>
          <table:table-cell office:value-type="float" office:value="-0.9208362047947949" table:style-name="c12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3:15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3-12 23:45</text:p>
          </table:table-cell>
          <table:table-cell office:value-type="float" office:value="9.685155" table:style-name="c1">
            <text:p>9.6852</text:p>
          </table:table-cell>
          <table:table-cell office:value-type="float" office:value="-0.7095180554121505" table:style-name="c12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9.874934999999999" table:style-name="c1">
            <text:p>9.8749</text:p>
          </table:table-cell>
          <table:table-cell office:value-type="string" table:style-name="c1">
            <text:p>2026-03-13 01:00</text:p>
          </table:table-cell>
          <table:table-cell office:value-type="float" office:value="9.815090000000001" table:style-name="c1">
            <text:p>9.8151</text:p>
          </table:table-cell>
          <table:table-cell office:value-type="float" office:value="-0.8047178529276167" table:style-name="c12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2:15</text:p>
          </table:table-cell>
          <table:table-cell office:value-type="float" office:value="10.004999999999999" table:style-name="c1">
            <text:p>10.005</text:p>
          </table:table-cell>
          <table:table-cell office:value-type="string" table:style-name="c1">
            <text:p>2026-03-13 02:45</text:p>
          </table:table-cell>
          <table:table-cell office:value-type="float" office:value="9.895050000000001" table:style-name="c1">
            <text:p>9.8951</text:p>
          </table:table-cell>
          <table:table-cell office:value-type="float" office:value="-1.2966537226386743" table:style-name="c12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00</text:p>
          </table:table-cell>
          <table:table-cell office:value-type="float" office:value="9.954975" table:style-name="c1">
            <text:p>9.955</text:p>
          </table:table-cell>
          <table:table-cell office:value-type="string" table:style-name="c1">
            <text:p>2026-03-13 10:30</text:p>
          </table:table-cell>
          <table:table-cell office:value-type="float" office:value="9.995000000000001" table:style-name="c1">
            <text:p>9.995</text:p>
          </table:table-cell>
          <table:table-cell office:value-type="float" office:value="0.20135655790196605" table:style-name="c13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2:30</text:p>
          </table:table-cell>
          <table:table-cell office:value-type="float" office:value="10.06503" table:style-name="c1">
            <text:p>10.065</text:p>
          </table:table-cell>
          <table:table-cell office:value-type="string" table:style-name="c1">
            <text:p>2026-03-13 13:00</text:p>
          </table:table-cell>
          <table:table-cell office:value-type="float" office:value="10.084955" table:style-name="c1">
            <text:p>10.085</text:p>
          </table:table-cell>
          <table:table-cell office:value-type="float" office:value="-0.0023330784408970295" table:style-name="c12">
            <text:p>-0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10.185089999999999" table:style-name="c1">
            <text:p>10.185</text:p>
          </table:table-cell>
          <table:table-cell office:value-type="string" table:style-name="c1">
            <text:p>2026-03-13 14:00</text:p>
          </table:table-cell>
          <table:table-cell office:value-type="float" office:value="10.21489" table:style-name="c1">
            <text:p>10.215</text:p>
          </table:table-cell>
          <table:table-cell office:value-type="float" office:value="0.09209967599699276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15</text:p>
          </table:table-cell>
          <table:table-cell office:value-type="float" office:value="9.82491" table:style-name="c1">
            <text:p>9.8249</text:p>
          </table:table-cell>
          <table:table-cell office:value-type="string" table:style-name="c1">
            <text:p>2026-03-15 09:45</text:p>
          </table:table-cell>
          <table:table-cell office:value-type="float" office:value="9.83508" table:style-name="c1">
            <text:p>9.8351</text:p>
          </table:table-cell>
          <table:table-cell office:value-type="float" office:value="-0.09659452269792368" table:style-name="c12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9.94497" table:style-name="c1">
            <text:p>9.945</text:p>
          </table:table-cell>
          <table:table-cell office:value-type="string" table:style-name="c1">
            <text:p>2026-03-15 23:15</text:p>
          </table:table-cell>
          <table:table-cell office:value-type="float" office:value="10.004995000000001" table:style-name="c1">
            <text:p>10.005</text:p>
          </table:table-cell>
          <table:table-cell office:value-type="float" office:value="0.4024649143738124" table:style-name="c13">
            <text:p>+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2:00</text:p>
          </table:table-cell>
          <table:table-cell office:value-type="float" office:value="10.004999999999999" table:style-name="c1">
            <text:p>10.005</text:p>
          </table:table-cell>
          <table:table-cell office:value-type="string" table:style-name="c1">
            <text:p>2026-03-16 02:30</text:p>
          </table:table-cell>
          <table:table-cell office:value-type="float" office:value="9.905045000000001" table:style-name="c1">
            <text:p>9.905</text:p>
          </table:table-cell>
          <table:table-cell office:value-type="float" office:value="-1.1969533728635406" table:style-name="c12">
            <text:p>-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10.105049999999999" table:style-name="c1">
            <text:p>10.105</text:p>
          </table:table-cell>
          <table:table-cell office:value-type="string" table:style-name="c1">
            <text:p>2026-03-16 04:00</text:p>
          </table:table-cell>
          <table:table-cell office:value-type="float" office:value="10.264865" table:style-name="c1">
            <text:p>10.265</text:p>
          </table:table-cell>
          <table:table-cell office:value-type="float" office:value="1.3784744742975308" table:style-name="c13">
            <text:p>+1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0.52526" table:style-name="c1">
            <text:p>10.525</text:p>
          </table:table-cell>
          <table:table-cell office:value-type="string" table:style-name="c1">
            <text:p>2026-03-17 00:45</text:p>
          </table:table-cell>
          <table:table-cell office:value-type="float" office:value="10.484755000000002" table:style-name="c1">
            <text:p>10.485</text:p>
          </table:table-cell>
          <table:table-cell office:value-type="float" office:value="-0.5839668116986885" table:style-name="c12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1:30</text:p>
          </table:table-cell>
          <table:table-cell office:value-type="float" office:value="10.295144999999998" table:style-name="c1">
            <text:p>10.295</text:p>
          </table:table-cell>
          <table:table-cell office:value-type="string" table:style-name="c1">
            <text:p>2026-03-17 22:00</text:p>
          </table:table-cell>
          <table:table-cell office:value-type="float" office:value="10.294850000000002" table:style-name="c1">
            <text:p>10.295</text:p>
          </table:table-cell>
          <table:table-cell office:value-type="float" office:value="-0.20275970032471724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45</text:p>
          </table:table-cell>
          <table:table-cell office:value-type="float" office:value="10.285139999999998" table:style-name="c1">
            <text:p>10.285</text:p>
          </table:table-cell>
          <table:table-cell office:value-type="string" table:style-name="c1">
            <text:p>2026-03-18 03:15</text:p>
          </table:table-cell>
          <table:table-cell office:value-type="float" office:value="10.27486" table:style-name="c1">
            <text:p>10.275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3-24 21:00</text:p>
          </table:table-cell>
          <table:table-cell office:value-type="float" office:value="9.55522" table:style-name="c1">
            <text:p>9.5552</text:p>
          </table:table-cell>
          <table:table-cell office:value-type="float" office:value="0.11925880778098641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3-25 09:15</text:p>
          </table:table-cell>
          <table:table-cell office:value-type="float" office:value="9.685155" table:style-name="c1">
            <text:p>9.6852</text:p>
          </table:table-cell>
          <table:table-cell office:value-type="float" office:value="-0.607367353823085" table:style-name="c12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45</text:p>
          </table:table-cell>
          <table:table-cell office:value-type="float" office:value="9.76488" table:style-name="c1">
            <text:p>9.7649</text:p>
          </table:table-cell>
          <table:table-cell office:value-type="string" table:style-name="c1">
            <text:p>2026-03-25 12:15</text:p>
          </table:table-cell>
          <table:table-cell office:value-type="float" office:value="9.765115" table:style-name="c1">
            <text:p>9.7651</text:p>
          </table:table-cell>
          <table:table-cell office:value-type="float" office:value="-0.1974982271671477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8.98449" table:style-name="c1">
            <text:p>8.9845</text:p>
          </table:table-cell>
          <table:table-cell office:value-type="string" table:style-name="c1">
            <text:p>2026-03-31 02:15</text:p>
          </table:table-cell>
          <table:table-cell office:value-type="float" office:value="9.025485" table:style-name="c1">
            <text:p>9.0255</text:p>
          </table:table-cell>
          <table:table-cell office:value-type="float" office:value="0.2554742170674196" table:style-name="c13">
            <text:p>+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8.874434999999998" table:style-name="c1">
            <text:p>8.8744</text:p>
          </table:table-cell>
          <table:table-cell office:value-type="string" table:style-name="c1">
            <text:p>2026-03-31 14:30</text:p>
          </table:table-cell>
          <table:table-cell office:value-type="float" office:value="8.925535" table:style-name="c1">
            <text:p>8.9255</text:p>
          </table:table-cell>
          <table:table-cell office:value-type="float" office:value="0.37476025837139826" table:style-name="c13">
            <text:p>+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6:45</text:p>
          </table:table-cell>
          <table:table-cell office:value-type="float" office:value="8.864429999999999" table:style-name="c1">
            <text:p>8.8644</text:p>
          </table:table-cell>
          <table:table-cell office:value-type="string" table:style-name="c1">
            <text:p>2026-03-31 17:15</text:p>
          </table:table-cell>
          <table:table-cell office:value-type="float" office:value="8.945525" table:style-name="c1">
            <text:p>8.9455</text:p>
          </table:table-cell>
          <table:table-cell office:value-type="float" office:value="0.713107278471381" table:style-name="c13">
            <text:p>+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9.084539999999999" table:style-name="c1">
            <text:p>9.0845</text:p>
          </table:table-cell>
          <table:table-cell office:value-type="string" table:style-name="c1">
            <text:p>2026-04-01 06:00</text:p>
          </table:table-cell>
          <table:table-cell office:value-type="float" office:value="9.085455" table:style-name="c1">
            <text:p>9.0855</text:p>
          </table:table-cell>
          <table:table-cell office:value-type="float" office:value="-0.18984807755813016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9.254624999999999" table:style-name="c1">
            <text:p>9.2546</text:p>
          </table:table-cell>
          <table:table-cell office:value-type="string" table:style-name="c1">
            <text:p>2026-04-01 06:45</text:p>
          </table:table-cell>
          <table:table-cell office:value-type="float" office:value="9.3953" table:style-name="c1">
            <text:p>9.3953</text:p>
          </table:table-cell>
          <table:table-cell office:value-type="float" office:value="1.3171122038980743" table:style-name="c13">
            <text:p>+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7:15</text:p>
          </table:table-cell>
          <table:table-cell office:value-type="float" office:value="9.454724999999998" table:style-name="c1">
            <text:p>9.4547</text:p>
          </table:table-cell>
          <table:table-cell office:value-type="string" table:style-name="c1">
            <text:p>2026-04-01 07:45</text:p>
          </table:table-cell>
          <table:table-cell office:value-type="float" office:value="9.37531" table:style-name="c1">
            <text:p>9.3753</text:p>
          </table:table-cell>
          <table:table-cell office:value-type="float" office:value="-1.0381713343328047" table:style-name="c12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00</text:p>
          </table:table-cell>
          <table:table-cell office:value-type="float" office:value="9.034514999999999" table:style-name="c1">
            <text:p>9.0345</text:p>
          </table:table-cell>
          <table:table-cell office:value-type="string" table:style-name="c1">
            <text:p>2026-04-03 15:30</text:p>
          </table:table-cell>
          <table:table-cell office:value-type="float" office:value="9.01549" table:style-name="c1">
            <text:p>9.0155</text:p>
          </table:table-cell>
          <table:table-cell office:value-type="float" office:value="-0.41006035752887415" table:style-name="c12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9.194595" table:style-name="c1">
            <text:p>9.1946</text:p>
          </table:table-cell>
          <table:table-cell office:value-type="string" table:style-name="c1">
            <text:p>2026-04-06 00:45</text:p>
          </table:table-cell>
          <table:table-cell office:value-type="float" office:value="9.31534" table:style-name="c1">
            <text:p>9.3153</text:p>
          </table:table-cell>
          <table:table-cell office:value-type="float" office:value="1.1106920461423364" table:style-name="c13">
            <text:p>+1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00</text:p>
          </table:table-cell>
          <table:table-cell office:value-type="float" office:value="9.42471" table:style-name="c1">
            <text:p>9.4247</text:p>
          </table:table-cell>
          <table:table-cell office:value-type="string" table:style-name="c1">
            <text:p>2026-04-06 01:30</text:p>
          </table:table-cell>
          <table:table-cell office:value-type="float" office:value="9.485255" table:style-name="c1">
            <text:p>9.4853</text:p>
          </table:table-cell>
          <table:table-cell office:value-type="float" office:value="0.4412228626132997" table:style-name="c13">
            <text:p>+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9.344669999999999" table:style-name="c1">
            <text:p>9.3447</text:p>
          </table:table-cell>
          <table:table-cell office:value-type="string" table:style-name="c1">
            <text:p>2026-04-09 16:30</text:p>
          </table:table-cell>
          <table:table-cell office:value-type="float" office:value="9.31534" table:style-name="c1">
            <text:p>9.3153</text:p>
          </table:table-cell>
          <table:table-cell office:value-type="float" office:value="-0.5131413378963501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00</text:p>
          </table:table-cell>
          <table:table-cell office:value-type="float" office:value="9.42471" table:style-name="c1">
            <text:p>9.4247</text:p>
          </table:table-cell>
          <table:table-cell office:value-type="string" table:style-name="c1">
            <text:p>2026-04-09 22:30</text:p>
          </table:table-cell>
          <table:table-cell office:value-type="float" office:value="9.55522" table:style-name="c1">
            <text:p>9.5552</text:p>
          </table:table-cell>
          <table:table-cell office:value-type="float" office:value="1.182095950114137" table:style-name="c13">
            <text:p>+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45</text:p>
          </table:table-cell>
          <table:table-cell office:value-type="float" office:value="9.554775" table:style-name="c1">
            <text:p>9.5548</text:p>
          </table:table-cell>
          <table:table-cell office:value-type="string" table:style-name="c1">
            <text:p>2026-04-09 23:15</text:p>
          </table:table-cell>
          <table:table-cell office:value-type="float" office:value="9.47526" table:style-name="c1">
            <text:p>9.4753</text:p>
          </table:table-cell>
          <table:table-cell office:value-type="float" office:value="-1.0304381289983011" table:style-name="c12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5:15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10 05:45</text:p>
          </table:table-cell>
          <table:table-cell office:value-type="float" office:value="9.35532" table:style-name="c1">
            <text:p>9.3553</text:p>
          </table:table-cell>
          <table:table-cell office:value-type="float" office:value="-0.7239070324412289" table:style-name="c12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9.454724999999998" table:style-name="c1">
            <text:p>9.4547</text:p>
          </table:table-cell>
          <table:table-cell office:value-type="string" table:style-name="c1">
            <text:p>2026-04-11 17:15</text:p>
          </table:table-cell>
          <table:table-cell office:value-type="float" office:value="9.385305" table:style-name="c1">
            <text:p>9.3853</text:p>
          </table:table-cell>
          <table:table-cell office:value-type="float" office:value="-0.9326683186977713" table:style-name="c12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9.48474" table:style-name="c1">
            <text:p>9.4847</text:p>
          </table:table-cell>
          <table:table-cell office:value-type="string" table:style-name="c1">
            <text:p>2026-04-11 19:15</text:p>
          </table:table-cell>
          <table:table-cell office:value-type="float" office:value="9.505245" table:style-name="c1">
            <text:p>9.5052</text:p>
          </table:table-cell>
          <table:table-cell office:value-type="float" office:value="0.01585721110963778" table:style-name="c13">
            <text:p>+0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0:00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4-13 20:30</text:p>
          </table:table-cell>
          <table:table-cell office:value-type="float" office:value="9.31534" table:style-name="c1">
            <text:p>9.3153</text:p>
          </table:table-cell>
          <table:table-cell office:value-type="float" office:value="-1.2532136127472837" table:style-name="c12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3 23:00</text:p>
          </table:table-cell>
          <table:table-cell office:value-type="float" office:value="9.5952" table:style-name="c1">
            <text:p>9.5952</text:p>
          </table:table-cell>
          <table:table-cell office:value-type="float" office:value="0.643886208315414" table:style-name="c13">
            <text:p>+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9.704849999999999" table:style-name="c1">
            <text:p>9.7048</text:p>
          </table:table-cell>
          <table:table-cell office:value-type="string" table:style-name="c1">
            <text:p>2026-04-14 00:00</text:p>
          </table:table-cell>
          <table:table-cell office:value-type="float" office:value="9.65517" table:style-name="c1">
            <text:p>9.6552</text:p>
          </table:table-cell>
          <table:table-cell office:value-type="float" office:value="-0.7107856878777019" table:style-name="c12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9.534764999999998" table:style-name="c1">
            <text:p>9.5348</text:p>
          </table:table-cell>
          <table:table-cell office:value-type="string" table:style-name="c1">
            <text:p>2026-04-15 20:15</text:p>
          </table:table-cell>
          <table:table-cell office:value-type="float" office:value="9.47526" table:style-name="c1">
            <text:p>9.4753</text:p>
          </table:table-cell>
          <table:table-cell office:value-type="float" office:value="-0.8227370547674417" table:style-name="c12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6 13:00</text:p>
          </table:table-cell>
          <table:table-cell office:value-type="float" office:value="9.505245" table:style-name="c1">
            <text:p>9.5052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4-16 16:15</text:p>
          </table:table-cell>
          <table:table-cell office:value-type="float" office:value="9.585205" table:style-name="c1">
            <text:p>9.5852</text:p>
          </table:table-cell>
          <table:table-cell office:value-type="float" office:value="-0.09129003726977558" table:style-name="c12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4-17 07:45</text:p>
          </table:table-cell>
          <table:table-cell office:value-type="float" office:value="9.5952" table:style-name="c1">
            <text:p>9.5952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00</text:p>
          </table:table-cell>
          <table:table-cell office:value-type="float" office:value="9.634815" table:style-name="c1">
            <text:p>9.6348</text:p>
          </table:table-cell>
          <table:table-cell office:value-type="string" table:style-name="c1">
            <text:p>2026-04-17 08:30</text:p>
          </table:table-cell>
          <table:table-cell office:value-type="float" office:value="9.625185000000002" table:style-name="c1">
            <text:p>9.6252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30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4-17 10:00</text:p>
          </table:table-cell>
          <table:table-cell office:value-type="float" office:value="9.67516" table:style-name="c1">
            <text:p>9.6752</text:p>
          </table:table-cell>
          <table:table-cell office:value-type="float" office:value="-0.709939730134912" table:style-name="c12">
            <text:p>-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4-17 13:30</text:p>
          </table:table-cell>
          <table:table-cell office:value-type="float" office:value="9.875060000000001" table:style-name="c1">
            <text:p>9.8751</text:p>
          </table:table-cell>
          <table:table-cell office:value-type="float" office:value="1.2373541395797716" table:style-name="c13">
            <text:p>+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9.894945" table:style-name="c1">
            <text:p>9.8949</text:p>
          </table:table-cell>
          <table:table-cell office:value-type="string" table:style-name="c1">
            <text:p>2026-04-17 14:15</text:p>
          </table:table-cell>
          <table:table-cell office:value-type="float" office:value="9.885055000000001" table:style-name="c1">
            <text:p>9.8851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1:45</text:p>
          </table:table-cell>
          <table:table-cell office:value-type="float" office:value="9.474735" table:style-name="c1">
            <text:p>9.4747</text:p>
          </table:table-cell>
          <table:table-cell office:value-type="string" table:style-name="c1">
            <text:p>2026-04-21 12:15</text:p>
          </table:table-cell>
          <table:table-cell office:value-type="float" office:value="9.345325" table:style-name="c1">
            <text:p>9.3453</text:p>
          </table:table-cell>
          <table:table-cell office:value-type="float" office:value="-1.5630126296408253" table:style-name="c12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9.594795" table:style-name="c1">
            <text:p>9.5948</text:p>
          </table:table-cell>
          <table:table-cell office:value-type="string" table:style-name="c1">
            <text:p>2026-04-22 03:15</text:p>
          </table:table-cell>
          <table:table-cell office:value-type="float" office:value="9.5952" table:style-name="c1">
            <text:p>9.5952</text:p>
          </table:table-cell>
          <table:table-cell office:value-type="float" office:value="-0.19568739926177914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4-22 06:00</text:p>
          </table:table-cell>
          <table:table-cell office:value-type="float" office:value="9.605195" table:style-name="c1">
            <text:p>9.6052</text:p>
          </table:table-cell>
          <table:table-cell office:value-type="float" office:value="-0.6099210229428831" table:style-name="c12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1:45</text:p>
          </table:table-cell>
          <table:table-cell office:value-type="float" office:value="9.494745" table:style-name="c1">
            <text:p>9.4947</text:p>
          </table:table-cell>
          <table:table-cell office:value-type="string" table:style-name="c1">
            <text:p>2026-04-26 12:15</text:p>
          </table:table-cell>
          <table:table-cell office:value-type="float" office:value="9.465265" table:style-name="c1">
            <text:p>9.4653</text:p>
          </table:table-cell>
          <table:table-cell office:value-type="float" office:value="-0.509766873517925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4-26 19:15</text:p>
          </table:table-cell>
          <table:table-cell office:value-type="float" office:value="9.49525" table:style-name="c1">
            <text:p>9.4953</text:p>
          </table:table-cell>
          <table:table-cell office:value-type="float" office:value="-0.5091047412217997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29 10:30</text:p>
          </table:table-cell>
          <table:table-cell office:value-type="float" office:value="9.41529" table:style-name="c1">
            <text:p>9.4153</text:p>
          </table:table-cell>
          <table:table-cell office:value-type="float" office:value="-0.08752182111071427" table:style-name="c12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9.2046" table:style-name="c1">
            <text:p>9.2046</text:p>
          </table:table-cell>
          <table:table-cell office:value-type="string" table:style-name="c1">
            <text:p>2026-05-04 02:30</text:p>
          </table:table-cell>
          <table:table-cell office:value-type="float" office:value="9.225385000000001" table:style-name="c1">
            <text:p>9.2254</text:p>
          </table:table-cell>
          <table:table-cell office:value-type="float" office:value="0.025459611335665322" table:style-name="c13">
            <text:p>+0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3:15</text:p>
          </table:table-cell>
          <table:table-cell office:value-type="float" office:value="9.32466" table:style-name="c1">
            <text:p>9.3247</text:p>
          </table:table-cell>
          <table:table-cell office:value-type="string" table:style-name="c1">
            <text:p>2026-05-04 03:45</text:p>
          </table:table-cell>
          <table:table-cell office:value-type="float" office:value="9.255370000000001" table:style-name="c1">
            <text:p>9.2554</text:p>
          </table:table-cell>
          <table:table-cell office:value-type="float" office:value="-0.9414979702208726" table:style-name="c12">
            <text:p>-0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5 11:15</text:p>
          </table:table-cell>
          <table:table-cell office:value-type="float" office:value="9.37531" table:style-name="c1">
            <text:p>9.3753</text:p>
          </table:table-cell>
          <table:table-cell office:value-type="float" office:value="-0.617504687507453" table:style-name="c12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9.464730000000001" table:style-name="c1">
            <text:p>9.4647</text:p>
          </table:table-cell>
          <table:table-cell office:value-type="string" table:style-name="c1">
            <text:p>2026-05-05 13:45</text:p>
          </table:table-cell>
          <table:table-cell office:value-type="float" office:value="9.445275" table:style-name="c1">
            <text:p>9.4453</text:p>
          </table:table-cell>
          <table:table-cell office:value-type="float" office:value="-0.40504171513610077" table:style-name="c12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00</text:p>
          </table:table-cell>
          <table:table-cell office:value-type="float" office:value="9.48474" table:style-name="c1">
            <text:p>9.4847</text:p>
          </table:table-cell>
          <table:table-cell office:value-type="string" table:style-name="c1">
            <text:p>2026-05-05 14:30</text:p>
          </table:table-cell>
          <table:table-cell office:value-type="float" office:value="9.45527" table:style-name="c1">
            <text:p>9.4553</text:p>
          </table:table-cell>
          <table:table-cell office:value-type="float" office:value="-0.5099885155523509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00</text:p>
          </table:table-cell>
          <table:table-cell office:value-type="float" office:value="9.574785" table:style-name="c1">
            <text:p>9.5748</text:p>
          </table:table-cell>
          <table:table-cell office:value-type="string" table:style-name="c1">
            <text:p>2026-05-06 04:30</text:p>
          </table:table-cell>
          <table:table-cell office:value-type="float" office:value="9.51524" table:style-name="c1">
            <text:p>9.5152</text:p>
          </table:table-cell>
          <table:table-cell office:value-type="float" office:value="-0.8205506939320317" table:style-name="c12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9.624809999999998" table:style-name="c1">
            <text:p>9.6248</text:p>
          </table:table-cell>
          <table:table-cell office:value-type="string" table:style-name="c1">
            <text:p>2026-05-06 09:00</text:p>
          </table:table-cell>
          <table:table-cell office:value-type="float" office:value="9.715140000000002" table:style-name="c1">
            <text:p>9.7151</text:p>
          </table:table-cell>
          <table:table-cell office:value-type="float" office:value="0.7367359474109492" table:style-name="c13">
            <text:p>+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15</text:p>
          </table:table-cell>
          <table:table-cell office:value-type="float" office:value="9.68484" table:style-name="c1">
            <text:p>9.6848</text:p>
          </table:table-cell>
          <table:table-cell office:value-type="string" table:style-name="c1">
            <text:p>2026-05-06 09:45</text:p>
          </table:table-cell>
          <table:table-cell office:value-type="float" office:value="9.725135000000002" table:style-name="c1">
            <text:p>9.7251</text:p>
          </table:table-cell>
          <table:table-cell office:value-type="float" office:value="0.21533092064507375" table:style-name="c13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0:00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5-06 10:30</text:p>
          </table:table-cell>
          <table:table-cell office:value-type="float" office:value="9.745125" table:style-name="c1">
            <text:p>9.7451</text:p>
          </table:table-cell>
          <table:table-cell office:value-type="float" office:value="-0.09471630962525346" table:style-name="c12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5-07 05:45</text:p>
          </table:table-cell>
          <table:table-cell office:value-type="float" office:value="9.57521" table:style-name="c1">
            <text:p>9.5752</text:p>
          </table:table-cell>
          <table:table-cell office:value-type="float" office:value="-0.5073592869190291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45</text:p>
          </table:table-cell>
          <table:table-cell office:value-type="float" office:value="9.634815" table:style-name="c1">
            <text:p>9.6348</text:p>
          </table:table-cell>
          <table:table-cell office:value-type="string" table:style-name="c1">
            <text:p>2026-05-07 07:15</text:p>
          </table:table-cell>
          <table:table-cell office:value-type="float" office:value="9.665165" table:style-name="c1">
            <text:p>9.6652</text:p>
          </table:table-cell>
          <table:table-cell office:value-type="float" office:value="0.11447376171729307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30</text:p>
          </table:table-cell>
          <table:table-cell office:value-type="float" office:value="9.88494" table:style-name="c1">
            <text:p>9.8849</text:p>
          </table:table-cell>
          <table:table-cell office:value-type="string" table:style-name="c1">
            <text:p>2026-05-08 19:00</text:p>
          </table:table-cell>
          <table:table-cell office:value-type="float" office:value="9.895050000000001" table:style-name="c1">
            <text:p>9.8951</text:p>
          </table:table-cell>
          <table:table-cell office:value-type="float" office:value="-0.09782765449258823" table:style-name="c12">
            <text:p>-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0.06503" table:style-name="c1">
            <text:p>10.065</text:p>
          </table:table-cell>
          <table:table-cell office:value-type="string" table:style-name="c1">
            <text:p>2026-05-09 01:45</text:p>
          </table:table-cell>
          <table:table-cell office:value-type="float" office:value="10.064965" table:style-name="c1">
            <text:p>10.065</text:p>
          </table:table-cell>
          <table:table-cell office:value-type="float" office:value="-0.20054450940533153" table:style-name="c12">
            <text:p>-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45</text:p>
          </table:table-cell>
          <table:table-cell office:value-type="float" office:value="9.954975" table:style-name="c1">
            <text:p>9.955</text:p>
          </table:table-cell>
          <table:table-cell office:value-type="string" table:style-name="c1">
            <text:p>2026-05-09 18:15</text:p>
          </table:table-cell>
          <table:table-cell office:value-type="float" office:value="9.925035" table:style-name="c1">
            <text:p>9.925</text:p>
          </table:table-cell>
          <table:table-cell office:value-type="float" office:value="-0.500052938003348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10.14507" table:style-name="c1">
            <text:p>10.145</text:p>
          </table:table-cell>
          <table:table-cell office:value-type="string" table:style-name="c1">
            <text:p>2026-05-11 09:45</text:p>
          </table:table-cell>
          <table:table-cell office:value-type="float" office:value="10.104945" table:style-name="c1">
            <text:p>10.105</text:p>
          </table:table-cell>
          <table:table-cell office:value-type="float" office:value="-0.5946216739263432" table:style-name="c12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0:00</text:p>
          </table:table-cell>
          <table:table-cell office:value-type="float" office:value="10.155075" table:style-name="c1">
            <text:p>10.155</text:p>
          </table:table-cell>
          <table:table-cell office:value-type="string" table:style-name="c1">
            <text:p>2026-05-13 10:30</text:p>
          </table:table-cell>
          <table:table-cell office:value-type="float" office:value="10.07496" table:style-name="c1">
            <text:p>10.075</text:p>
          </table:table-cell>
          <table:table-cell office:value-type="float" office:value="-0.9872388440262614" table:style-name="c12">
            <text:p>-1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4:45</text:p>
          </table:table-cell>
          <table:table-cell office:value-type="float" office:value="9.2896425" table:style-name="c1">
            <text:p>9.2896</text:p>
          </table:table-cell>
          <table:table-cell office:value-type="string" table:style-name="c1">
            <text:p>2026-05-20 15:15</text:p>
          </table:table-cell>
          <table:table-cell office:value-type="float" office:value="9.266364500000002" table:style-name="c1">
            <text:p>9.2664</text:p>
          </table:table-cell>
          <table:table-cell office:value-type="float" office:value="-0.4499792390880164" table:style-name="c12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9.347671499999999" table:style-name="c1">
            <text:p>9.3477</text:p>
          </table:table-cell>
          <table:table-cell office:value-type="string" table:style-name="c1">
            <text:p>2026-05-20 16:00</text:p>
          </table:table-cell>
          <table:table-cell office:value-type="float" office:value="9.3363295" table:style-name="c1">
            <text:p>9.3363</text:p>
          </table:table-cell>
          <table:table-cell office:value-type="float" office:value="-0.3209924810740006" table:style-name="c12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7:30</text:p>
          </table:table-cell>
          <table:table-cell office:value-type="float" office:value="9.3676815" table:style-name="c1">
            <text:p>9.3677</text:p>
          </table:table-cell>
          <table:table-cell office:value-type="string" table:style-name="c1">
            <text:p>2026-05-20 18:00</text:p>
          </table:table-cell>
          <table:table-cell office:value-type="float" office:value="9.3363295" table:style-name="c1">
            <text:p>9.3363</text:p>
          </table:table-cell>
          <table:table-cell office:value-type="float" office:value="-0.5339135694408581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00</text:p>
          </table:table-cell>
          <table:table-cell office:value-type="float" office:value="9.476735999999999" table:style-name="c1">
            <text:p>9.4767</text:p>
          </table:table-cell>
          <table:table-cell office:value-type="string" table:style-name="c1">
            <text:p>2026-05-21 08:30</text:p>
          </table:table-cell>
          <table:table-cell office:value-type="float" office:value="9.494250500000001" table:style-name="c1">
            <text:p>9.4943</text:p>
          </table:table-cell>
          <table:table-cell office:value-type="float" office:value="-0.015453704202561536" table:style-name="c12">
            <text:p>-0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30</text:p>
          </table:table-cell>
          <table:table-cell office:value-type="float" office:value="9.403699499999998" table:style-name="c1">
            <text:p>9.4037</text:p>
          </table:table-cell>
          <table:table-cell office:value-type="string" table:style-name="c1">
            <text:p>2026-05-21 16:00</text:p>
          </table:table-cell>
          <table:table-cell office:value-type="float" office:value="9.3723115" table:style-name="c1">
            <text:p>9.3723</text:p>
          </table:table-cell>
          <table:table-cell office:value-type="float" office:value="-0.533016295219757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9.4957455" table:style-name="c1">
            <text:p>9.4957</text:p>
          </table:table-cell>
          <table:table-cell office:value-type="string" table:style-name="c1">
            <text:p>2026-05-25 15:00</text:p>
          </table:table-cell>
          <table:table-cell office:value-type="float" office:value="9.467264" table:style-name="c1">
            <text:p>9.4673</text:p>
          </table:table-cell>
          <table:table-cell office:value-type="float" office:value="-0.49924000949688185" table:style-name="c12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45</text:p>
          </table:table-cell>
          <table:table-cell office:value-type="float" office:value="9.319657499999998" table:style-name="c1">
            <text:p>9.3197</text:p>
          </table:table-cell>
          <table:table-cell office:value-type="string" table:style-name="c1">
            <text:p>2026-05-26 06:15</text:p>
          </table:table-cell>
          <table:table-cell office:value-type="float" office:value="9.2963495" table:style-name="c1">
            <text:p>9.2963</text:p>
          </table:table-cell>
          <table:table-cell office:value-type="float" office:value="-0.44949508767353485" table:style-name="c12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45</text:p>
          </table:table-cell>
          <table:table-cell office:value-type="float" office:value="9.448722" table:style-name="c1">
            <text:p>9.4487</text:p>
          </table:table-cell>
          <table:table-cell office:value-type="string" table:style-name="c1">
            <text:p>2026-05-26 11:15</text:p>
          </table:table-cell>
          <table:table-cell office:value-type="float" office:value="9.4122915" table:style-name="c1">
            <text:p>9.4123</text:p>
          </table:table-cell>
          <table:table-cell office:value-type="float" office:value="-0.5846893443208545" table:style-name="c12">
            <text:p>-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30</text:p>
          </table:table-cell>
          <table:table-cell office:value-type="float" office:value="9.482738999999999" table:style-name="c1">
            <text:p>9.4827</text:p>
          </table:table-cell>
          <table:table-cell office:value-type="string" table:style-name="c1">
            <text:p>2026-05-26 15:00</text:p>
          </table:table-cell>
          <table:table-cell office:value-type="float" office:value="9.351322" table:style-name="c1">
            <text:p>9.3513</text:p>
          </table:table-cell>
          <table:table-cell office:value-type="float" office:value="-1.5829845435796464" table:style-name="c12">
            <text:p>-1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15</text:p>
          </table:table-cell>
          <table:table-cell office:value-type="float" office:value="9.0195075" table:style-name="c1">
            <text:p>9.0195</text:p>
          </table:table-cell>
          <table:table-cell office:value-type="string" table:style-name="c1">
            <text:p>2026-06-01 00:45</text:p>
          </table:table-cell>
          <table:table-cell office:value-type="float" office:value="9.051472" table:style-name="c1">
            <text:p>9.0515</text:p>
          </table:table-cell>
          <table:table-cell office:value-type="float" office:value="0.1537845328251075" table:style-name="c13">
            <text:p>+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4:00</text:p>
          </table:table-cell>
          <table:table-cell office:value-type="float" office:value="454.62719999999996" table:style-name="c9">
            <text:p>454.63</text:p>
          </table:table-cell>
          <table:table-cell office:value-type="string" table:style-name="c9">
            <text:p>2026-03-09 14:30</text:p>
          </table:table-cell>
          <table:table-cell office:value-type="float" office:value="448.7755" table:style-name="c9">
            <text:p>448.78</text:p>
          </table:table-cell>
          <table:table-cell office:value-type="float" office:value="-1.4844695223910742" table:style-name="c10">
            <text:p>-1.5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06:45</text:p>
          </table:table-cell>
          <table:table-cell office:value-type="float" office:value="453.02639999999997" table:style-name="c9">
            <text:p>453.03</text:p>
          </table:table-cell>
          <table:table-cell office:value-type="string" table:style-name="c9">
            <text:p>2026-03-11 07:15</text:p>
          </table:table-cell>
          <table:table-cell office:value-type="float" office:value="451.87395000000004" table:style-name="c9">
            <text:p>451.87</text:p>
          </table:table-cell>
          <table:table-cell office:value-type="float" office:value="-0.45378062427484656" table:style-name="c10">
            <text:p>-0.5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1:30</text:p>
          </table:table-cell>
          <table:table-cell office:value-type="float" office:value="469.33455" table:style-name="c9">
            <text:p>469.33</text:p>
          </table:table-cell>
          <table:table-cell office:value-type="string" table:style-name="c9">
            <text:p>2026-03-13 02:00</text:p>
          </table:table-cell>
          <table:table-cell office:value-type="float" office:value="466.86645000000004" table:style-name="c9">
            <text:p>466.87</text:p>
          </table:table-cell>
          <table:table-cell office:value-type="float" office:value="-0.7247209977509605" table:style-name="c10">
            <text:p>-0.7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9:15</text:p>
          </table:table-cell>
          <table:table-cell office:value-type="float" office:value="470.23499999999996" table:style-name="c9">
            <text:p>470.23</text:p>
          </table:table-cell>
          <table:table-cell office:value-type="string" table:style-name="c9">
            <text:p>2026-03-13 09:45</text:p>
          </table:table-cell>
          <table:table-cell office:value-type="float" office:value="470.1648" table:style-name="c9">
            <text:p>470.16</text:p>
          </table:table-cell>
          <table:table-cell office:value-type="float" office:value="-0.2147988633767972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45</text:p>
          </table:table-cell>
          <table:table-cell office:value-type="float" office:value="472.93634999999995" table:style-name="c9">
            <text:p>472.94</text:p>
          </table:table-cell>
          <table:table-cell office:value-type="string" table:style-name="c9">
            <text:p>2026-03-13 14:15</text:p>
          </table:table-cell>
          <table:table-cell office:value-type="float" office:value="470.26475000000005" table:style-name="c9">
            <text:p>470.26</text:p>
          </table:table-cell>
          <table:table-cell office:value-type="float" office:value="-0.7636670844289872" table:style-name="c10">
            <text:p>-0.8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11:30</text:p>
          </table:table-cell>
          <table:table-cell office:value-type="float" office:value="458.62919999999997" table:style-name="c9">
            <text:p>458.63</text:p>
          </table:table-cell>
          <table:table-cell office:value-type="string" table:style-name="c9">
            <text:p>2026-03-14 12:00</text:p>
          </table:table-cell>
          <table:table-cell office:value-type="float" office:value="460.1698" table:style-name="c9">
            <text:p>460.17</text:p>
          </table:table-cell>
          <table:table-cell office:value-type="float" office:value="0.13534257517837656" table:style-name="c11">
            <text:p>+0.1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16:00</text:p>
          </table:table-cell>
          <table:table-cell office:value-type="float" office:value="461.73075" table:style-name="c9">
            <text:p>461.73</text:p>
          </table:table-cell>
          <table:table-cell office:value-type="string" table:style-name="c9">
            <text:p>2026-03-14 16:30</text:p>
          </table:table-cell>
          <table:table-cell office:value-type="float" office:value="462.06885000000005" table:style-name="c9">
            <text:p>462.07</text:p>
          </table:table-cell>
          <table:table-cell office:value-type="float" office:value="-0.12682188291550656" table:style-name="c10">
            <text:p>-0.1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23:45</text:p>
          </table:table-cell>
          <table:table-cell office:value-type="float" office:value="468.234" table:style-name="c9">
            <text:p>468.23</text:p>
          </table:table-cell>
          <table:table-cell office:value-type="string" table:style-name="c9">
            <text:p>2026-03-15 00:15</text:p>
          </table:table-cell>
          <table:table-cell office:value-type="float" office:value="468.46565000000004" table:style-name="c9">
            <text:p>468.47</text:p>
          </table:table-cell>
          <table:table-cell office:value-type="float" office:value="-0.15052577009571078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00</text:p>
          </table:table-cell>
          <table:table-cell office:value-type="float" office:value="465.0324" table:style-name="c9">
            <text:p>465.03</text:p>
          </table:table-cell>
          <table:table-cell office:value-type="string" table:style-name="c9">
            <text:p>2026-03-15 22:30</text:p>
          </table:table-cell>
          <table:table-cell office:value-type="float" office:value="463.9679" table:style-name="c9">
            <text:p>463.97</text:p>
          </table:table-cell>
          <table:table-cell office:value-type="float" office:value="-0.42835119275558275" table:style-name="c10">
            <text:p>-0.4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3:00</text:p>
          </table:table-cell>
          <table:table-cell office:value-type="float" office:value="469.73474999999996" table:style-name="c9">
            <text:p>469.73</text:p>
          </table:table-cell>
          <table:table-cell office:value-type="string" table:style-name="c9">
            <text:p>2026-03-15 23:30</text:p>
          </table:table-cell>
          <table:table-cell office:value-type="float" office:value="467.26625" table:style-name="c9">
            <text:p>467.27</text:p>
          </table:table-cell>
          <table:table-cell office:value-type="float" office:value="-0.7243588501276377" table:style-name="c10">
            <text:p>-0.7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473.2365" table:style-name="c9">
            <text:p>473.24</text:p>
          </table:table-cell>
          <table:table-cell office:value-type="string" table:style-name="c9">
            <text:p>2026-03-16 04:15</text:p>
          </table:table-cell>
          <table:table-cell office:value-type="float" office:value="471.9639" table:style-name="c9">
            <text:p>471.96</text:p>
          </table:table-cell>
          <table:table-cell office:value-type="float" office:value="-0.468276609285212" table:style-name="c10">
            <text:p>-0.5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9:15</text:p>
          </table:table-cell>
          <table:table-cell office:value-type="float" office:value="481.8408" table:style-name="c9">
            <text:p>481.84</text:p>
          </table:table-cell>
          <table:table-cell office:value-type="string" table:style-name="c9">
            <text:p>2026-03-16 19:45</text:p>
          </table:table-cell>
          <table:table-cell office:value-type="float" office:value="480.85945000000004" table:style-name="c9">
            <text:p>480.86</text:p>
          </table:table-cell>
          <table:table-cell office:value-type="float" office:value="-0.40315972423879964" table:style-name="c10">
            <text:p>-0.4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08:15</text:p>
          </table:table-cell>
          <table:table-cell office:value-type="float" office:value="468.8343" table:style-name="c9">
            <text:p>468.83</text:p>
          </table:table-cell>
          <table:table-cell office:value-type="string" table:style-name="c9">
            <text:p>2026-03-20 08:45</text:p>
          </table:table-cell>
          <table:table-cell office:value-type="float" office:value="470.46465" table:style-name="c9">
            <text:p>470.46</text:p>
          </table:table-cell>
          <table:table-cell office:value-type="float" office:value="0.1471503182787659" table:style-name="c11">
            <text:p>+0.1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11:15</text:p>
          </table:table-cell>
          <table:table-cell office:value-type="float" office:value="467.93384999999995" table:style-name="c9">
            <text:p>467.93</text:p>
          </table:table-cell>
          <table:table-cell office:value-type="string" table:style-name="c9">
            <text:p>2026-03-20 11:45</text:p>
          </table:table-cell>
          <table:table-cell office:value-type="float" office:value="466.86645000000004" table:style-name="c9">
            <text:p>466.87</text:p>
          </table:table-cell>
          <table:table-cell office:value-type="float" office:value="-0.427553175208395" table:style-name="c10">
            <text:p>-0.4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23:45</text:p>
          </table:table-cell>
          <table:table-cell office:value-type="float" office:value="474.83729999999997" table:style-name="c9">
            <text:p>474.84</text:p>
          </table:table-cell>
          <table:table-cell office:value-type="string" table:style-name="c9">
            <text:p>2026-03-21 00:15</text:p>
          </table:table-cell>
          <table:table-cell office:value-type="float" office:value="475.46215" table:style-name="c9">
            <text:p>475.46</text:p>
          </table:table-cell>
          <table:table-cell office:value-type="float" office:value="-0.0685706109966433" table:style-name="c10">
            <text:p>-0.1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2 04:15</text:p>
          </table:table-cell>
          <table:table-cell office:value-type="float" office:value="466.8333" table:style-name="c9">
            <text:p>466.83</text:p>
          </table:table-cell>
          <table:table-cell office:value-type="string" table:style-name="c9">
            <text:p>2026-03-22 04:45</text:p>
          </table:table-cell>
          <table:table-cell office:value-type="float" office:value="467.86595000000005" table:style-name="c9">
            <text:p>467.87</text:p>
          </table:table-cell>
          <table:table-cell office:value-type="float" office:value="0.020860972417779955" table:style-name="c11">
            <text:p>+0.0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2 22:45</text:p>
          </table:table-cell>
          <table:table-cell office:value-type="float" office:value="468.43409999999994" table:style-name="c9">
            <text:p>468.43</text:p>
          </table:table-cell>
          <table:table-cell office:value-type="string" table:style-name="c9">
            <text:p>2026-03-22 23:15</text:p>
          </table:table-cell>
          <table:table-cell office:value-type="float" office:value="470.56460000000004" table:style-name="c9">
            <text:p>470.56</text:p>
          </table:table-cell>
          <table:table-cell office:value-type="float" office:value="0.2540040028256252" table:style-name="c11">
            <text:p>+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15:45</text:p>
          </table:table-cell>
          <table:table-cell office:value-type="float" office:value="474.83729999999997" table:style-name="c9">
            <text:p>474.84</text:p>
          </table:table-cell>
          <table:table-cell office:value-type="string" table:style-name="c9">
            <text:p>2026-03-24 16:15</text:p>
          </table:table-cell>
          <table:table-cell office:value-type="float" office:value="474.56260000000003" table:style-name="c9">
            <text:p>474.56</text:p>
          </table:table-cell>
          <table:table-cell office:value-type="float" office:value="-0.25763574963465485" table:style-name="c10">
            <text:p>-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6:45</text:p>
          </table:table-cell>
          <table:table-cell office:value-type="float" office:value="473.43659999999994" table:style-name="c9">
            <text:p>473.44</text:p>
          </table:table-cell>
          <table:table-cell office:value-type="string" table:style-name="c9">
            <text:p>2026-03-31 17:15</text:p>
          </table:table-cell>
          <table:table-cell office:value-type="float" office:value="477.26125" table:style-name="c9">
            <text:p>477.26</text:p>
          </table:table-cell>
          <table:table-cell office:value-type="float" office:value="0.6063335114459001" table:style-name="c11">
            <text:p>+0.6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30</text:p>
          </table:table-cell>
          <table:table-cell office:value-type="float" office:value="465.23249999999996" table:style-name="c9">
            <text:p>465.23</text:p>
          </table:table-cell>
          <table:table-cell office:value-type="string" table:style-name="c9">
            <text:p>2026-04-01 07:00</text:p>
          </table:table-cell>
          <table:table-cell office:value-type="float" office:value="463.66805" table:style-name="c9">
            <text:p>463.67</text:p>
          </table:table-cell>
          <table:table-cell office:value-type="float" office:value="-0.5355005146781555" table:style-name="c10">
            <text:p>-0.5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2:45</text:p>
          </table:table-cell>
          <table:table-cell office:value-type="float" office:value="442.52115" table:style-name="c9">
            <text:p>442.52</text:p>
          </table:table-cell>
          <table:table-cell office:value-type="string" table:style-name="c9">
            <text:p>2026-04-07 23:15</text:p>
          </table:table-cell>
          <table:table-cell office:value-type="float" office:value="444.67755" table:style-name="c9">
            <text:p>444.68</text:p>
          </table:table-cell>
          <table:table-cell office:value-type="float" office:value="0.2864246324836728" table:style-name="c11">
            <text:p>+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12:45</text:p>
          </table:table-cell>
          <table:table-cell office:value-type="float" office:value="449.32455" table:style-name="c9">
            <text:p>449.32</text:p>
          </table:table-cell>
          <table:table-cell office:value-type="string" table:style-name="c9">
            <text:p>2026-04-08 13:15</text:p>
          </table:table-cell>
          <table:table-cell office:value-type="float" office:value="448.67555" table:style-name="c9">
            <text:p>448.68</text:p>
          </table:table-cell>
          <table:table-cell office:value-type="float" office:value="-0.3440502915876831" table:style-name="c10">
            <text:p>-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07:15</text:p>
          </table:table-cell>
          <table:table-cell office:value-type="float" office:value="445.52265" table:style-name="c9">
            <text:p>445.52</text:p>
          </table:table-cell>
          <table:table-cell office:value-type="string" table:style-name="c9">
            <text:p>2026-04-09 07:45</text:p>
          </table:table-cell>
          <table:table-cell office:value-type="float" office:value="443.778" table:style-name="c9">
            <text:p>443.78</text:p>
          </table:table-cell>
          <table:table-cell office:value-type="float" office:value="-0.590713451268976" table:style-name="c10">
            <text:p>-0.6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5:45</text:p>
          </table:table-cell>
          <table:table-cell office:value-type="float" office:value="440.62019999999995" table:style-name="c9">
            <text:p>440.62</text:p>
          </table:table-cell>
          <table:table-cell office:value-type="string" table:style-name="c9">
            <text:p>2026-04-09 16:15</text:p>
          </table:table-cell>
          <table:table-cell office:value-type="float" office:value="441.3792" table:style-name="c9">
            <text:p>441.38</text:p>
          </table:table-cell>
          <table:table-cell office:value-type="float" office:value="-0.027987146481234237" table:style-name="c10">
            <text:p>-0.0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6:30</text:p>
          </table:table-cell>
          <table:table-cell office:value-type="float" office:value="441.8208" table:style-name="c9">
            <text:p>441.82</text:p>
          </table:table-cell>
          <table:table-cell office:value-type="string" table:style-name="c9">
            <text:p>2026-04-09 17:00</text:p>
          </table:table-cell>
          <table:table-cell office:value-type="float" office:value="441.87895000000003" table:style-name="c9">
            <text:p>441.88</text:p>
          </table:table-cell>
          <table:table-cell office:value-type="float" office:value="-0.18676486508784063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1:30</text:p>
          </table:table-cell>
          <table:table-cell office:value-type="float" office:value="442.42109999999997" table:style-name="c9">
            <text:p>442.42</text:p>
          </table:table-cell>
          <table:table-cell office:value-type="string" table:style-name="c9">
            <text:p>2026-04-10 12:00</text:p>
          </table:table-cell>
          <table:table-cell office:value-type="float" office:value="442.1788" table:style-name="c9">
            <text:p>442.18</text:p>
          </table:table-cell>
          <table:table-cell office:value-type="float" office:value="-0.25455734846280276" table:style-name="c10">
            <text:p>-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4:15</text:p>
          </table:table-cell>
          <table:table-cell office:value-type="float" office:value="444.12194999999997" table:style-name="c9">
            <text:p>444.12</text:p>
          </table:table-cell>
          <table:table-cell office:value-type="string" table:style-name="c9">
            <text:p>2026-04-10 14:45</text:p>
          </table:table-cell>
          <table:table-cell office:value-type="float" office:value="443.67805" table:style-name="c9">
            <text:p>443.68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14:00</text:p>
          </table:table-cell>
          <table:table-cell office:value-type="float" office:value="443.2215" table:style-name="c9">
            <text:p>443.22</text:p>
          </table:table-cell>
          <table:table-cell office:value-type="string" table:style-name="c9">
            <text:p>2026-04-14 14:30</text:p>
          </table:table-cell>
          <table:table-cell office:value-type="float" office:value="443.07835000000006" table:style-name="c9">
            <text:p>443.08</text:p>
          </table:table-cell>
          <table:table-cell office:value-type="float" office:value="-0.23213305799693051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0:15</text:p>
          </table:table-cell>
          <table:table-cell office:value-type="float" office:value="434.8173" table:style-name="c9">
            <text:p>434.82</text:p>
          </table:table-cell>
          <table:table-cell office:value-type="string" table:style-name="c9">
            <text:p>2026-04-15 10:45</text:p>
          </table:table-cell>
          <table:table-cell office:value-type="float" office:value="435.1823" table:style-name="c9">
            <text:p>435.18</text:p>
          </table:table-cell>
          <table:table-cell office:value-type="float" office:value="-0.11612450049709455" table:style-name="c10">
            <text:p>-0.1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5:15</text:p>
          </table:table-cell>
          <table:table-cell office:value-type="float" office:value="436.61819999999994" table:style-name="c9">
            <text:p>436.62</text:p>
          </table:table-cell>
          <table:table-cell office:value-type="string" table:style-name="c9">
            <text:p>2026-04-15 15:45</text:p>
          </table:table-cell>
          <table:table-cell office:value-type="float" office:value="433.98290000000003" table:style-name="c9">
            <text:p>433.98</text:p>
          </table:table-cell>
          <table:table-cell office:value-type="float" office:value="-0.8022642704999305" table:style-name="c10">
            <text:p>-0.8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45</text:p>
          </table:table-cell>
          <table:table-cell office:value-type="float" office:value="444.02189999999996" table:style-name="c9">
            <text:p>444.02</text:p>
          </table:table-cell>
          <table:table-cell office:value-type="string" table:style-name="c9">
            <text:p>2026-04-16 03:15</text:p>
          </table:table-cell>
          <table:table-cell office:value-type="float" office:value="442.67855000000003" table:style-name="c9">
            <text:p>442.68</text:p>
          </table:table-cell>
          <table:table-cell office:value-type="float" office:value="-0.5018366034310273" table:style-name="c10">
            <text:p>-0.5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30</text:p>
          </table:table-cell>
          <table:table-cell office:value-type="float" office:value="442.32105" table:style-name="c9">
            <text:p>442.32</text:p>
          </table:table-cell>
          <table:table-cell office:value-type="string" table:style-name="c9">
            <text:p>2026-04-16 14:00</text:p>
          </table:table-cell>
          <table:table-cell office:value-type="float" office:value="437.1813" table:style-name="c9">
            <text:p>437.18</text:p>
          </table:table-cell>
          <table:table-cell office:value-type="float" office:value="-1.3595725138335624" table:style-name="c10">
            <text:p>-1.4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441.92085" table:style-name="c9">
            <text:p>441.92</text:p>
          </table:table-cell>
          <table:table-cell office:value-type="string" table:style-name="c9">
            <text:p>2026-04-16 16:15</text:p>
          </table:table-cell>
          <table:table-cell office:value-type="float" office:value="441.779" table:style-name="c9">
            <text:p>441.78</text:p>
          </table:table-cell>
          <table:table-cell office:value-type="float" office:value="-0.23193434322005269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22:30</text:p>
          </table:table-cell>
          <table:table-cell office:value-type="float" office:value="448.6242" table:style-name="c9">
            <text:p>448.62</text:p>
          </table:table-cell>
          <table:table-cell office:value-type="string" table:style-name="c9">
            <text:p>2026-04-16 23:00</text:p>
          </table:table-cell>
          <table:table-cell office:value-type="float" office:value="448.7755" table:style-name="c9">
            <text:p>448.78</text:p>
          </table:table-cell>
          <table:table-cell office:value-type="float" office:value="-0.16624208513494887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23:45</text:p>
          </table:table-cell>
          <table:table-cell office:value-type="float" office:value="455.62769999999995" table:style-name="c9">
            <text:p>455.63</text:p>
          </table:table-cell>
          <table:table-cell office:value-type="string" table:style-name="c9">
            <text:p>2026-04-17 00:15</text:p>
          </table:table-cell>
          <table:table-cell office:value-type="float" office:value="456.67155" table:style-name="c9">
            <text:p>456.67</text:p>
          </table:table-cell>
          <table:table-cell office:value-type="float" office:value="0.028743549075294084" table:style-name="c11">
            <text:p>+0.0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00</text:p>
          </table:table-cell>
          <table:table-cell office:value-type="float" office:value="452.32605" table:style-name="c9">
            <text:p>452.33</text:p>
          </table:table-cell>
          <table:table-cell office:value-type="string" table:style-name="c9">
            <text:p>2026-04-17 13:30</text:p>
          </table:table-cell>
          <table:table-cell office:value-type="float" office:value="454.07285" table:style-name="c9">
            <text:p>454.07</text:p>
          </table:table-cell>
          <table:table-cell office:value-type="float" office:value="0.18550962803269844" table:style-name="c11">
            <text:p>+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45</text:p>
          </table:table-cell>
          <table:table-cell office:value-type="float" office:value="455.52765" table:style-name="c9">
            <text:p>455.53</text:p>
          </table:table-cell>
          <table:table-cell office:value-type="string" table:style-name="c9">
            <text:p>2026-04-17 14:15</text:p>
          </table:table-cell>
          <table:table-cell office:value-type="float" office:value="457.67105" table:style-name="c9">
            <text:p>457.67</text:p>
          </table:table-cell>
          <table:table-cell office:value-type="float" office:value="0.2696906699406698" table:style-name="c11">
            <text:p>+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4:45</text:p>
          </table:table-cell>
          <table:table-cell office:value-type="float" office:value="460.33004999999997" table:style-name="c9">
            <text:p>460.33</text:p>
          </table:table-cell>
          <table:table-cell office:value-type="string" table:style-name="c9">
            <text:p>2026-04-17 15:15</text:p>
          </table:table-cell>
          <table:table-cell office:value-type="float" office:value="459.8699500000001" table:style-name="c9">
            <text:p>459.87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2:30</text:p>
          </table:table-cell>
          <table:table-cell office:value-type="float" office:value="452.6261999999999" table:style-name="c9">
            <text:p>452.63</text:p>
          </table:table-cell>
          <table:table-cell office:value-type="string" table:style-name="c9">
            <text:p>2026-04-22 03:00</text:p>
          </table:table-cell>
          <table:table-cell office:value-type="float" office:value="452.57360000000006" table:style-name="c9">
            <text:p>452.57</text:p>
          </table:table-cell>
          <table:table-cell office:value-type="float" office:value="-0.21149783781846399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458.32905" table:style-name="c9">
            <text:p>458.33</text:p>
          </table:table-cell>
          <table:table-cell office:value-type="string" table:style-name="c9">
            <text:p>2026-04-22 06:00</text:p>
          </table:table-cell>
          <table:table-cell office:value-type="float" office:value="465.3672" table:style-name="c9">
            <text:p>465.37</text:p>
          </table:table-cell>
          <table:table-cell office:value-type="float" office:value="1.3326410287979984" table:style-name="c11">
            <text:p>+1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15</text:p>
          </table:table-cell>
          <table:table-cell office:value-type="float" office:value="455.0274" table:style-name="c9">
            <text:p>455.03</text:p>
          </table:table-cell>
          <table:table-cell office:value-type="string" table:style-name="c9">
            <text:p>2026-04-29 10:45</text:p>
          </table:table-cell>
          <table:table-cell office:value-type="float" office:value="454.37270000000007" table:style-name="c9">
            <text:p>454.37</text:p>
          </table:table-cell>
          <table:table-cell office:value-type="float" office:value="-0.34349382637176573" table:style-name="c10">
            <text:p>-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8:30</text:p>
          </table:table-cell>
          <table:table-cell office:value-type="float" office:value="451.92584999999997" table:style-name="c9">
            <text:p>451.93</text:p>
          </table:table-cell>
          <table:table-cell office:value-type="string" table:style-name="c9">
            <text:p>2026-05-05 09:00</text:p>
          </table:table-cell>
          <table:table-cell office:value-type="float" office:value="453.97290000000004" table:style-name="c9">
            <text:p>453.97</text:p>
          </table:table-cell>
          <table:table-cell office:value-type="float" office:value="0.2521560058801997" table:style-name="c11">
            <text:p>+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3:15</text:p>
          </table:table-cell>
          <table:table-cell office:value-type="float" office:value="464.53215" table:style-name="c9">
            <text:p>464.53</text:p>
          </table:table-cell>
          <table:table-cell office:value-type="string" table:style-name="c9">
            <text:p>2026-05-05 23:45</text:p>
          </table:table-cell>
          <table:table-cell office:value-type="float" office:value="460.86945000000003" table:style-name="c9">
            <text:p>460.87</text:p>
          </table:table-cell>
          <table:table-cell office:value-type="float" office:value="-0.9867945696654057" table:style-name="c10">
            <text:p>-1.0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4:45</text:p>
          </table:table-cell>
          <table:table-cell office:value-type="float" office:value="474.4371" table:style-name="c9">
            <text:p>474.44</text:p>
          </table:table-cell>
          <table:table-cell office:value-type="string" table:style-name="c9">
            <text:p>2026-05-06 05:30</text:p>
          </table:table-cell>
          <table:table-cell office:value-type="float" office:value="476.7615" table:style-name="c9">
            <text:p>476.76</text:p>
          </table:table-cell>
          <table:table-cell office:value-type="float" office:value="0.28904859284824" table:style-name="c11">
            <text:p>+0.3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8:00</text:p>
          </table:table-cell>
          <table:table-cell office:value-type="float" office:value="460.93035" table:style-name="c9">
            <text:p>460.93</text:p>
          </table:table-cell>
          <table:table-cell office:value-type="string" table:style-name="c9">
            <text:p>2026-05-10 18:30</text:p>
          </table:table-cell>
          <table:table-cell office:value-type="float" office:value="460.86945000000003" table:style-name="c9">
            <text:p>460.87</text:p>
          </table:table-cell>
          <table:table-cell office:value-type="float" office:value="-0.2130859967346299" table:style-name="c10">
            <text:p>-0.2</text:p>
          </table:table-cell>
        </table:table-row>
        <table:table-row>
          <table:table-cell office:value-type="string" table:style-name="c8">
            <text:p>BC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3:15</text:p>
          </table:table-cell>
          <table:table-cell office:value-type="float" office:value="378.88935" table:style-name="c9">
            <text:p>378.89</text:p>
          </table:table-cell>
          <table:table-cell office:value-type="string" table:style-name="c9">
            <text:p>2026-05-21 13:45</text:p>
          </table:table-cell>
          <table:table-cell office:value-type="float" office:value="377.11135" table:style-name="c9">
            <text:p>377.11</text:p>
          </table:table-cell>
          <table:table-cell office:value-type="float" office:value="-0.6682282277530205" table:style-name="c10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00</text:p>
          </table:table-cell>
          <table:table-cell office:value-type="float" office:value="644.432055" table:style-name="c1">
            <text:p>644.43</text:p>
          </table:table-cell>
          <table:table-cell office:value-type="string" table:style-name="c1">
            <text:p>2026-03-10 03:30</text:p>
          </table:table-cell>
          <table:table-cell office:value-type="float" office:value="644.4975900000001" table:style-name="c1">
            <text:p>644.5</text:p>
          </table:table-cell>
          <table:table-cell office:value-type="float" office:value="-0.18975090902483283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648.213945" table:style-name="c1">
            <text:p>648.21</text:p>
          </table:table-cell>
          <table:table-cell office:value-type="string" table:style-name="c1">
            <text:p>2026-03-10 09:15</text:p>
          </table:table-cell>
          <table:table-cell office:value-type="float" office:value="645.1872450000001" table:style-name="c1">
            <text:p>645.19</text:p>
          </table:table-cell>
          <table:table-cell office:value-type="float" office:value="-0.6658957796341292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651.2154449999999" table:style-name="c1">
            <text:p>651.22</text:p>
          </table:table-cell>
          <table:table-cell office:value-type="string" table:style-name="c1">
            <text:p>2026-03-10 15:30</text:p>
          </table:table-cell>
          <table:table-cell office:value-type="float" office:value="648.3756500000001" table:style-name="c1">
            <text:p>648.38</text:p>
          </table:table-cell>
          <table:table-cell office:value-type="float" office:value="-0.6351043968789605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649.08438" table:style-name="c1">
            <text:p>649.08</text:p>
          </table:table-cell>
          <table:table-cell office:value-type="string" table:style-name="c1">
            <text:p>2026-03-11 14:15</text:p>
          </table:table-cell>
          <table:table-cell office:value-type="float" office:value="646.1467650000001" table:style-name="c1">
            <text:p>646.15</text:p>
          </table:table-cell>
          <table:table-cell office:value-type="float" office:value="-0.6515735878954487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650.70519" table:style-name="c1">
            <text:p>650.71</text:p>
          </table:table-cell>
          <table:table-cell office:value-type="string" table:style-name="c1">
            <text:p>2026-03-12 10:15</text:p>
          </table:table-cell>
          <table:table-cell office:value-type="float" office:value="649.6450150000001" table:style-name="c1">
            <text:p>649.65</text:p>
          </table:table-cell>
          <table:table-cell office:value-type="float" office:value="-0.36250139406218684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3:00</text:p>
          </table:table-cell>
          <table:table-cell office:value-type="float" office:value="655.8877799999999" table:style-name="c1">
            <text:p>655.89</text:p>
          </table:table-cell>
          <table:table-cell office:value-type="string" table:style-name="c1">
            <text:p>2026-03-12 13:30</text:p>
          </table:table-cell>
          <table:table-cell office:value-type="float" office:value="652.703485" table:style-name="c1">
            <text:p>652.7</text:p>
          </table:table-cell>
          <table:table-cell office:value-type="float" office:value="-0.6844233729304983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667.7136899999999" table:style-name="c1">
            <text:p>667.71</text:p>
          </table:table-cell>
          <table:table-cell office:value-type="string" table:style-name="c1">
            <text:p>2026-03-13 09:15</text:p>
          </table:table-cell>
          <table:table-cell office:value-type="float" office:value="665.5070800000001" table:style-name="c1">
            <text:p>665.51</text:p>
          </table:table-cell>
          <table:table-cell office:value-type="float" office:value="-0.5297118669110645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671.545605" table:style-name="c1">
            <text:p>671.55</text:p>
          </table:table-cell>
          <table:table-cell office:value-type="string" table:style-name="c1">
            <text:p>2026-03-13 13:30</text:p>
          </table:table-cell>
          <table:table-cell office:value-type="float" office:value="674.2327150000001" table:style-name="c1">
            <text:p>674.23</text:p>
          </table:table-cell>
          <table:table-cell office:value-type="float" office:value="0.19943825002251003" table:style-name="c13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676.227945" table:style-name="c1">
            <text:p>676.23</text:p>
          </table:table-cell>
          <table:table-cell office:value-type="string" table:style-name="c1">
            <text:p>2026-03-13 14:15</text:p>
          </table:table-cell>
          <table:table-cell office:value-type="float" office:value="675.572045" table:style-name="c1">
            <text:p>675.57</text:p>
          </table:table-cell>
          <table:table-cell office:value-type="float" office:value="-0.29670003033590575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00</text:p>
          </table:table-cell>
          <table:table-cell office:value-type="float" office:value="662.280975" table:style-name="c1">
            <text:p>662.28</text:p>
          </table:table-cell>
          <table:table-cell office:value-type="string" table:style-name="c1">
            <text:p>2026-03-15 18:30</text:p>
          </table:table-cell>
          <table:table-cell office:value-type="float" office:value="661.0093300000001" table:style-name="c1">
            <text:p>661.01</text:p>
          </table:table-cell>
          <table:table-cell office:value-type="float" office:value="-0.3915260665112607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1:45</text:p>
          </table:table-cell>
          <table:table-cell office:value-type="float" office:value="668.29398" table:style-name="c1">
            <text:p>668.29</text:p>
          </table:table-cell>
          <table:table-cell office:value-type="string" table:style-name="c1">
            <text:p>2026-03-15 22:15</text:p>
          </table:table-cell>
          <table:table-cell office:value-type="float" office:value="665.716975" table:style-name="c1">
            <text:p>665.72</text:p>
          </table:table-cell>
          <table:table-cell office:value-type="float" office:value="-0.5847386554379885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674.026845" table:style-name="c1">
            <text:p>674.03</text:p>
          </table:table-cell>
          <table:table-cell office:value-type="string" table:style-name="c1">
            <text:p>2026-03-15 23:15</text:p>
          </table:table-cell>
          <table:table-cell office:value-type="float" office:value="676.7714450000001" table:style-name="c1">
            <text:p>676.77</text:p>
          </table:table-cell>
          <table:table-cell office:value-type="float" office:value="0.20648048245690553" table:style-name="c13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82.030845" table:style-name="c1">
            <text:p>682.03</text:p>
          </table:table-cell>
          <table:table-cell office:value-type="string" table:style-name="c1">
            <text:p>2026-03-16 04:15</text:p>
          </table:table-cell>
          <table:table-cell office:value-type="float" office:value="682.5485550000001" table:style-name="c1">
            <text:p>682.55</text:p>
          </table:table-cell>
          <table:table-cell office:value-type="float" office:value="-0.12414461422854961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45</text:p>
          </table:table-cell>
          <table:table-cell office:value-type="float" office:value="635.59764" table:style-name="c1">
            <text:p>635.6</text:p>
          </table:table-cell>
          <table:table-cell office:value-type="string" table:style-name="c1">
            <text:p>2026-03-24 08:15</text:p>
          </table:table-cell>
          <table:table-cell office:value-type="float" office:value="636.7814500000001" table:style-name="c1">
            <text:p>636.78</text:p>
          </table:table-cell>
          <table:table-cell office:value-type="float" office:value="-0.014020838489869902" table:style-name="c12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616.938315" table:style-name="c1">
            <text:p>616.94</text:p>
          </table:table-cell>
          <table:table-cell office:value-type="string" table:style-name="c1">
            <text:p>2026-03-31 02:30</text:p>
          </table:table-cell>
          <table:table-cell office:value-type="float" office:value="616.8214350000001" table:style-name="c1">
            <text:p>616.82</text:p>
          </table:table-cell>
          <table:table-cell office:value-type="float" office:value="-0.21880729657145492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45</text:p>
          </table:table-cell>
          <table:table-cell office:value-type="float" office:value="622.000845" table:style-name="c1">
            <text:p>622</text:p>
          </table:table-cell>
          <table:table-cell office:value-type="string" table:style-name="c1">
            <text:p>2026-04-01 07:15</text:p>
          </table:table-cell>
          <table:table-cell office:value-type="float" office:value="620.199745" table:style-name="c1">
            <text:p>620.2</text:p>
          </table:table-cell>
          <table:table-cell office:value-type="float" office:value="-0.4888866815373927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5:30</text:p>
          </table:table-cell>
          <table:table-cell office:value-type="float" office:value="594.51711" table:style-name="c1">
            <text:p>594.52</text:p>
          </table:table-cell>
          <table:table-cell office:value-type="string" table:style-name="c1">
            <text:p>2026-04-05 16:00</text:p>
          </table:table-cell>
          <table:table-cell office:value-type="float" office:value="592.833435" table:style-name="c1">
            <text:p>592.83</text:p>
          </table:table-cell>
          <table:table-cell office:value-type="float" office:value="-0.48253431033549177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600.1099049999999" table:style-name="c1">
            <text:p>600.11</text:p>
          </table:table-cell>
          <table:table-cell office:value-type="string" table:style-name="c1">
            <text:p>2026-04-05 23:45</text:p>
          </table:table-cell>
          <table:table-cell office:value-type="float" office:value="601.65902" table:style-name="c1">
            <text:p>601.66</text:p>
          </table:table-cell>
          <table:table-cell office:value-type="float" office:value="0.05772252984561632" table:style-name="c13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604.9023" table:style-name="c1">
            <text:p>604.9</text:p>
          </table:table-cell>
          <table:table-cell office:value-type="string" table:style-name="c1">
            <text:p>2026-04-06 00:45</text:p>
          </table:table-cell>
          <table:table-cell office:value-type="float" office:value="604.79745" table:style-name="c1">
            <text:p>604.8</text:p>
          </table:table-cell>
          <table:table-cell office:value-type="float" office:value="-0.21719872821609476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607.7237099999999" table:style-name="c1">
            <text:p>607.72</text:p>
          </table:table-cell>
          <table:table-cell office:value-type="string" table:style-name="c1">
            <text:p>2026-04-06 10:00</text:p>
          </table:table-cell>
          <table:table-cell office:value-type="float" office:value="606.686505" table:style-name="c1">
            <text:p>606.69</text:p>
          </table:table-cell>
          <table:table-cell office:value-type="float" office:value="-0.3702293141557344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6:30</text:p>
          </table:table-cell>
          <table:table-cell office:value-type="float" office:value="600.62016" table:style-name="c1">
            <text:p>600.62</text:p>
          </table:table-cell>
          <table:table-cell office:value-type="string" table:style-name="c1">
            <text:p>2026-04-07 17:00</text:p>
          </table:table-cell>
          <table:table-cell office:value-type="float" office:value="600.929385" table:style-name="c1">
            <text:p>600.93</text:p>
          </table:table-cell>
          <table:table-cell office:value-type="float" office:value="-0.14851863124524245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608.7142049999999" table:style-name="c1">
            <text:p>608.71</text:p>
          </table:table-cell>
          <table:table-cell office:value-type="string" table:style-name="c1">
            <text:p>2026-04-07 20:30</text:p>
          </table:table-cell>
          <table:table-cell office:value-type="float" office:value="607.7859550000001" table:style-name="c1">
            <text:p>607.79</text:p>
          </table:table-cell>
          <table:table-cell office:value-type="float" office:value="-0.3520887316971310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612.155925" table:style-name="c1">
            <text:p>612.16</text:p>
          </table:table-cell>
          <table:table-cell office:value-type="string" table:style-name="c1">
            <text:p>2026-04-07 21:45</text:p>
          </table:table-cell>
          <table:table-cell office:value-type="float" office:value="611.803945" table:style-name="c1">
            <text:p>611.8</text:p>
          </table:table-cell>
          <table:table-cell office:value-type="float" office:value="-0.25728348313465155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15</text:p>
          </table:table-cell>
          <table:table-cell office:value-type="float" office:value="613.88679" table:style-name="c1">
            <text:p>613.89</text:p>
          </table:table-cell>
          <table:table-cell office:value-type="string" table:style-name="c1">
            <text:p>2026-04-07 22:45</text:p>
          </table:table-cell>
          <table:table-cell office:value-type="float" office:value="615.17226" table:style-name="c1">
            <text:p>615.17</text:p>
          </table:table-cell>
          <table:table-cell office:value-type="float" office:value="0.009079956299440362" table:style-name="c13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19.76973" table:style-name="c1">
            <text:p>619.77</text:p>
          </table:table-cell>
          <table:table-cell office:value-type="string" table:style-name="c1">
            <text:p>2026-04-07 23:30</text:p>
          </table:table-cell>
          <table:table-cell office:value-type="float" office:value="624.3976450000001" table:style-name="c1">
            <text:p>624.4</text:p>
          </table:table-cell>
          <table:table-cell office:value-type="float" office:value="0.5453225519170157" table:style-name="c13">
            <text:p>+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45</text:p>
          </table:table-cell>
          <table:table-cell office:value-type="float" office:value="621.69069" table:style-name="c1">
            <text:p>621.69</text:p>
          </table:table-cell>
          <table:table-cell office:value-type="string" table:style-name="c1">
            <text:p>2026-04-08 00:15</text:p>
          </table:table-cell>
          <table:table-cell office:value-type="float" office:value="619.340175" table:style-name="c1">
            <text:p>619.34</text:p>
          </table:table-cell>
          <table:table-cell office:value-type="float" office:value="-0.5772285265885024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10.775235" table:style-name="c1">
            <text:p>610.78</text:p>
          </table:table-cell>
          <table:table-cell office:value-type="string" table:style-name="c1">
            <text:p>2026-04-11 19:15</text:p>
          </table:table-cell>
          <table:table-cell office:value-type="float" office:value="612.45362" table:style-name="c1">
            <text:p>612.45</text:p>
          </table:table-cell>
          <table:table-cell office:value-type="float" office:value="0.07434653332336616" table:style-name="c13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612.38604" table:style-name="c1">
            <text:p>612.39</text:p>
          </table:table-cell>
          <table:table-cell office:value-type="string" table:style-name="c1">
            <text:p>2026-04-13 22:45</text:p>
          </table:table-cell>
          <table:table-cell office:value-type="float" office:value="614.19275" table:style-name="c1">
            <text:p>614.19</text:p>
          </table:table-cell>
          <table:table-cell office:value-type="float" office:value="0.0945381924039479" table:style-name="c13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617.378535" table:style-name="c1">
            <text:p>617.38</text:p>
          </table:table-cell>
          <table:table-cell office:value-type="string" table:style-name="c1">
            <text:p>2026-04-14 00:00</text:p>
          </table:table-cell>
          <table:table-cell office:value-type="float" office:value="614.4026450000001" table:style-name="c1">
            <text:p>614.4</text:p>
          </table:table-cell>
          <table:table-cell office:value-type="float" office:value="-0.6809567629938562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8:45</text:p>
          </table:table-cell>
          <table:table-cell office:value-type="float" office:value="618.5091" table:style-name="c1">
            <text:p>618.51</text:p>
          </table:table-cell>
          <table:table-cell office:value-type="string" table:style-name="c1">
            <text:p>2026-04-14 09:15</text:p>
          </table:table-cell>
          <table:table-cell office:value-type="float" office:value="617.6310300000001" table:style-name="c1">
            <text:p>617.63</text:p>
          </table:table-cell>
          <table:table-cell office:value-type="float" office:value="-0.3415817857764458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22.55112" table:style-name="c1">
            <text:p>622.55</text:p>
          </table:table-cell>
          <table:table-cell office:value-type="string" table:style-name="c1">
            <text:p>2026-04-14 14:30</text:p>
          </table:table-cell>
          <table:table-cell office:value-type="float" office:value="620.36966" table:style-name="c1">
            <text:p>620.37</text:p>
          </table:table-cell>
          <table:table-cell office:value-type="float" office:value="-0.5496061030843435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26.93331" table:style-name="c1">
            <text:p>626.93</text:p>
          </table:table-cell>
          <table:table-cell office:value-type="string" table:style-name="c1">
            <text:p>2026-04-15 20:15</text:p>
          </table:table-cell>
          <table:table-cell office:value-type="float" office:value="622.898395" table:style-name="c1">
            <text:p>622.9</text:p>
          </table:table-cell>
          <table:table-cell office:value-type="float" office:value="-0.8422090208613953" table:style-name="c12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626.262975" table:style-name="c1">
            <text:p>626.26</text:p>
          </table:table-cell>
          <table:table-cell office:value-type="string" table:style-name="c1">
            <text:p>2026-04-16 03:15</text:p>
          </table:table-cell>
          <table:table-cell office:value-type="float" office:value="624.0178350000001" table:style-name="c1">
            <text:p>624.02</text:p>
          </table:table-cell>
          <table:table-cell office:value-type="float" office:value="-0.5576813242336276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25.3525199999999" table:style-name="c1">
            <text:p>625.35</text:p>
          </table:table-cell>
          <table:table-cell office:value-type="string" table:style-name="c1">
            <text:p>2026-04-16 16:15</text:p>
          </table:table-cell>
          <table:table-cell office:value-type="float" office:value="625.22723" table:style-name="c1">
            <text:p>625.23</text:p>
          </table:table-cell>
          <table:table-cell office:value-type="float" office:value="-0.21989504939869953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00</text:p>
          </table:table-cell>
          <table:table-cell office:value-type="float" office:value="636.167925" table:style-name="c1">
            <text:p>636.17</text:p>
          </table:table-cell>
          <table:table-cell office:value-type="string" table:style-name="c1">
            <text:p>2026-04-16 19:30</text:p>
          </table:table-cell>
          <table:table-cell office:value-type="float" office:value="634.32268" table:style-name="c1">
            <text:p>634.32</text:p>
          </table:table-cell>
          <table:table-cell office:value-type="float" office:value="-0.4893764547025836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640.1098949999999" table:style-name="c1">
            <text:p>640.11</text:p>
          </table:table-cell>
          <table:table-cell office:value-type="string" table:style-name="c1">
            <text:p>2026-04-17 13:45</text:p>
          </table:table-cell>
          <table:table-cell office:value-type="float" office:value="641.17925" table:style-name="c1">
            <text:p>641.18</text:p>
          </table:table-cell>
          <table:table-cell office:value-type="float" office:value="-0.03317591594953484" table:style-name="c12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4:00</text:p>
          </table:table-cell>
          <table:table-cell office:value-type="float" office:value="643.3715249999999" table:style-name="c1">
            <text:p>643.37</text:p>
          </table:table-cell>
          <table:table-cell office:value-type="string" table:style-name="c1">
            <text:p>2026-04-17 14:30</text:p>
          </table:table-cell>
          <table:table-cell office:value-type="float" office:value="642.97835" table:style-name="c1">
            <text:p>642.98</text:p>
          </table:table-cell>
          <table:table-cell office:value-type="float" office:value="-0.26088949486066104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638.028855" table:style-name="c1">
            <text:p>638.03</text:p>
          </table:table-cell>
          <table:table-cell office:value-type="string" table:style-name="c1">
            <text:p>2026-04-22 03:00</text:p>
          </table:table-cell>
          <table:table-cell office:value-type="float" office:value="639.7599600000001" table:style-name="c1">
            <text:p>639.76</text:p>
          </table:table-cell>
          <table:table-cell office:value-type="float" office:value="0.0708784307192678" table:style-name="c13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15</text:p>
          </table:table-cell>
          <table:table-cell office:value-type="float" office:value="640.9603199999999" table:style-name="c1">
            <text:p>640.96</text:p>
          </table:table-cell>
          <table:table-cell office:value-type="string" table:style-name="c1">
            <text:p>2026-04-22 03:45</text:p>
          </table:table-cell>
          <table:table-cell office:value-type="float" office:value="639.56006" table:style-name="c1">
            <text:p>639.56</text:p>
          </table:table-cell>
          <table:table-cell office:value-type="float" office:value="-0.41792611435601534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643.151415" table:style-name="c1">
            <text:p>643.15</text:p>
          </table:table-cell>
          <table:table-cell office:value-type="string" table:style-name="c1">
            <text:p>2026-04-22 06:00</text:p>
          </table:table-cell>
          <table:table-cell office:value-type="float" office:value="642.508585" table:style-name="c1">
            <text:p>642.51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3:45</text:p>
          </table:table-cell>
          <table:table-cell office:value-type="float" office:value="651.035355" table:style-name="c1">
            <text:p>651.04</text:p>
          </table:table-cell>
          <table:table-cell office:value-type="string" table:style-name="c1">
            <text:p>2026-04-22 14:15</text:p>
          </table:table-cell>
          <table:table-cell office:value-type="float" office:value="651.97385" table:style-name="c1">
            <text:p>651.97</text:p>
          </table:table-cell>
          <table:table-cell office:value-type="float" office:value="-0.05603393476993901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638.509095" table:style-name="c1">
            <text:p>638.51</text:p>
          </table:table-cell>
          <table:table-cell office:value-type="string" table:style-name="c1">
            <text:p>2026-04-23 21:15</text:p>
          </table:table-cell>
          <table:table-cell office:value-type="float" office:value="637.1212800000001" table:style-name="c1">
            <text:p>637.12</text:p>
          </table:table-cell>
          <table:table-cell office:value-type="float" office:value="-0.4168179372166847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4 02:45</text:p>
          </table:table-cell>
          <table:table-cell office:value-type="float" office:value="625.9168850000001" table:style-name="c1">
            <text:p>625.92</text:p>
          </table:table-cell>
          <table:table-cell office:value-type="float" office:value="0.1336766096815989" table:style-name="c13">
            <text:p>+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635.85777" table:style-name="c1">
            <text:p>635.86</text:p>
          </table:table-cell>
          <table:table-cell office:value-type="string" table:style-name="c1">
            <text:p>2026-05-04 04:45</text:p>
          </table:table-cell>
          <table:table-cell office:value-type="float" office:value="635.672005" table:style-name="c1">
            <text:p>635.67</text:p>
          </table:table-cell>
          <table:table-cell office:value-type="float" office:value="-0.22905646619604259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627.743715" table:style-name="c1">
            <text:p>627.74</text:p>
          </table:table-cell>
          <table:table-cell office:value-type="string" table:style-name="c1">
            <text:p>2026-05-04 15:45</text:p>
          </table:table-cell>
          <table:table-cell office:value-type="float" office:value="625.5670600000001" table:style-name="c1">
            <text:p>625.57</text:p>
          </table:table-cell>
          <table:table-cell office:value-type="float" office:value="-0.5459494808227272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633.3565199999999" table:style-name="c1">
            <text:p>633.36</text:p>
          </table:table-cell>
          <table:table-cell office:value-type="string" table:style-name="c1">
            <text:p>2026-05-05 13:45</text:p>
          </table:table-cell>
          <table:table-cell office:value-type="float" office:value="631.174255" table:style-name="c1">
            <text:p>631.17</text:p>
          </table:table-cell>
          <table:table-cell office:value-type="float" office:value="-0.5437667770034071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45</text:p>
          </table:table-cell>
          <table:table-cell office:value-type="float" office:value="633.67668" table:style-name="c1">
            <text:p>633.68</text:p>
          </table:table-cell>
          <table:table-cell office:value-type="string" table:style-name="c1">
            <text:p>2026-05-06 02:15</text:p>
          </table:table-cell>
          <table:table-cell office:value-type="float" office:value="634.092795" table:style-name="c1">
            <text:p>634.09</text:p>
          </table:table-cell>
          <table:table-cell office:value-type="float" office:value="-0.13436449913306614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45</text:p>
          </table:table-cell>
          <table:table-cell office:value-type="float" office:value="644.50209" table:style-name="c1">
            <text:p>644.5</text:p>
          </table:table-cell>
          <table:table-cell office:value-type="string" table:style-name="c1">
            <text:p>2026-05-06 09:15</text:p>
          </table:table-cell>
          <table:table-cell office:value-type="float" office:value="643.767955" table:style-name="c1">
            <text:p>643.77</text:p>
          </table:table-cell>
          <table:table-cell office:value-type="float" office:value="-0.31357961027634884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1:30</text:p>
          </table:table-cell>
          <table:table-cell office:value-type="float" office:value="649.82475" table:style-name="c1">
            <text:p>649.82</text:p>
          </table:table-cell>
          <table:table-cell office:value-type="string" table:style-name="c1">
            <text:p>2026-05-06 12:00</text:p>
          </table:table-cell>
          <table:table-cell office:value-type="float" office:value="652.23372" table:style-name="c1">
            <text:p>652.23</text:p>
          </table:table-cell>
          <table:table-cell office:value-type="float" office:value="0.17006966781734079" table:style-name="c13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2:15</text:p>
          </table:table-cell>
          <table:table-cell office:value-type="float" office:value="653.336505" table:style-name="c1">
            <text:p>653.34</text:p>
          </table:table-cell>
          <table:table-cell office:value-type="string" table:style-name="c1">
            <text:p>2026-05-06 12:45</text:p>
          </table:table-cell>
          <table:table-cell office:value-type="float" office:value="658.4706" table:style-name="c1">
            <text:p>658.47</text:p>
          </table:table-cell>
          <table:table-cell office:value-type="float" office:value="0.5843561841994305" table:style-name="c13">
            <text:p>+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3:00</text:p>
          </table:table-cell>
          <table:table-cell office:value-type="float" office:value="657.40854" table:style-name="c1">
            <text:p>657.41</text:p>
          </table:table-cell>
          <table:table-cell office:value-type="string" table:style-name="c1">
            <text:p>2026-05-06 13:30</text:p>
          </table:table-cell>
          <table:table-cell office:value-type="float" office:value="649.8749" table:style-name="c1">
            <text:p>649.87</text:p>
          </table:table-cell>
          <table:table-cell office:value-type="float" office:value="-1.3435693921925562" table:style-name="c12">
            <text:p>-1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45</text:p>
          </table:table-cell>
          <table:table-cell office:value-type="float" office:value="655.817745" table:style-name="c1">
            <text:p>655.82</text:p>
          </table:table-cell>
          <table:table-cell office:value-type="string" table:style-name="c1">
            <text:p>2026-05-09 02:15</text:p>
          </table:table-cell>
          <table:table-cell office:value-type="float" office:value="653.9028850000001" table:style-name="c1">
            <text:p>653.9</text:p>
          </table:table-cell>
          <table:table-cell office:value-type="float" office:value="-0.49129684148983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665.3325" table:style-name="c1">
            <text:p>665.33</text:p>
          </table:table-cell>
          <table:table-cell office:value-type="string" table:style-name="c1">
            <text:p>2026-05-10 23:00</text:p>
          </table:table-cell>
          <table:table-cell office:value-type="float" office:value="665.457105" table:style-name="c1">
            <text:p>665.46</text:p>
          </table:table-cell>
          <table:table-cell office:value-type="float" office:value="-0.18120920786149908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3:00</text:p>
          </table:table-cell>
          <table:table-cell office:value-type="float" office:value="670.405035" table:style-name="c1">
            <text:p>670.41</text:p>
          </table:table-cell>
          <table:table-cell office:value-type="string" table:style-name="c1">
            <text:p>2026-05-11 23:30</text:p>
          </table:table-cell>
          <table:table-cell office:value-type="float" office:value="668.4056300000001" table:style-name="c1">
            <text:p>668.41</text:p>
          </table:table-cell>
          <table:table-cell office:value-type="float" office:value="-0.4975421842364103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8:45</text:p>
          </table:table-cell>
          <table:table-cell office:value-type="float" office:value="660.5100899999999" table:style-name="c1">
            <text:p>660.51</text:p>
          </table:table-cell>
          <table:table-cell office:value-type="string" table:style-name="c1">
            <text:p>2026-05-12 19:15</text:p>
          </table:table-cell>
          <table:table-cell office:value-type="float" office:value="662.14876" table:style-name="c1">
            <text:p>662.15</text:p>
          </table:table-cell>
          <table:table-cell office:value-type="float" office:value="0.04769565727000824" table:style-name="c13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674.87727" table:style-name="c1">
            <text:p>674.88</text:p>
          </table:table-cell>
          <table:table-cell office:value-type="string" table:style-name="c1">
            <text:p>2026-05-13 01:45</text:p>
          </table:table-cell>
          <table:table-cell office:value-type="float" office:value="678.6605000000001" table:style-name="c1">
            <text:p>678.66</text:p>
          </table:table-cell>
          <table:table-cell office:value-type="float" office:value="0.3595598441921366" table:style-name="c13">
            <text:p>+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7:15</text:p>
          </table:table-cell>
          <table:table-cell office:value-type="float" office:value="684.28197" table:style-name="c1">
            <text:p>684.28</text:p>
          </table:table-cell>
          <table:table-cell office:value-type="string" table:style-name="c1">
            <text:p>2026-05-14 17:45</text:p>
          </table:table-cell>
          <table:table-cell office:value-type="float" office:value="682.8584000000001" table:style-name="c1">
            <text:p>682.86</text:p>
          </table:table-cell>
          <table:table-cell office:value-type="float" office:value="-0.4075226388910891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15</text:p>
          </table:table-cell>
          <table:table-cell office:value-type="float" office:value="654.34701" table:style-name="c1">
            <text:p>654.35</text:p>
          </table:table-cell>
          <table:table-cell office:value-type="string" table:style-name="c1">
            <text:p>2026-05-21 01:45</text:p>
          </table:table-cell>
          <table:table-cell office:value-type="float" office:value="652.21373" table:style-name="c1">
            <text:p>652.21</text:p>
          </table:table-cell>
          <table:table-cell office:value-type="float" office:value="-0.5252649120028763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655.58763" table:style-name="c1">
            <text:p>655.59</text:p>
          </table:table-cell>
          <table:table-cell office:value-type="string" table:style-name="c1">
            <text:p>2026-05-21 09:00</text:p>
          </table:table-cell>
          <table:table-cell office:value-type="float" office:value="654.602535" table:style-name="c1">
            <text:p>654.6</text:p>
          </table:table-cell>
          <table:table-cell office:value-type="float" office:value="-0.34986100446481316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659.80974" table:style-name="c1">
            <text:p>659.81</text:p>
          </table:table-cell>
          <table:table-cell office:value-type="string" table:style-name="c1">
            <text:p>2026-05-21 18:00</text:p>
          </table:table-cell>
          <table:table-cell office:value-type="float" office:value="657.461105" table:style-name="c1">
            <text:p>657.46</text:p>
          </table:table-cell>
          <table:table-cell office:value-type="float" office:value="-0.5551448435567208" table:style-name="c12">
            <text:p>-0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15</text:p>
          </table:table-cell>
          <table:table-cell office:value-type="float" office:value="659.8797749999999" table:style-name="c1">
            <text:p>659.88</text:p>
          </table:table-cell>
          <table:table-cell office:value-type="string" table:style-name="c1">
            <text:p>2026-05-22 08:45</text:p>
          </table:table-cell>
          <table:table-cell office:value-type="float" office:value="659.300185" table:style-name="c1">
            <text:p>659.3</text:p>
          </table:table-cell>
          <table:table-cell office:value-type="float" office:value="-0.28755708868556384" table:style-name="c12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2:30</text:p>
          </table:table-cell>
          <table:table-cell office:value-type="float" office:value="659.0793749999999" table:style-name="c1">
            <text:p>659.08</text:p>
          </table:table-cell>
          <table:table-cell office:value-type="string" table:style-name="c1">
            <text:p>2026-05-22 13:00</text:p>
          </table:table-cell>
          <table:table-cell office:value-type="float" office:value="660.2896900000001" table:style-name="c1">
            <text:p>660.29</text:p>
          </table:table-cell>
          <table:table-cell office:value-type="float" office:value="-0.016629877138840676" table:style-name="c12">
            <text:p>-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45</text:p>
          </table:table-cell>
          <table:table-cell office:value-type="float" office:value="663.281475" table:style-name="c1">
            <text:p>663.28</text:p>
          </table:table-cell>
          <table:table-cell office:value-type="string" table:style-name="c1">
            <text:p>2026-05-22 14:15</text:p>
          </table:table-cell>
          <table:table-cell office:value-type="float" office:value="661.678995" table:style-name="c1">
            <text:p>661.68</text:p>
          </table:table-cell>
          <table:table-cell office:value-type="float" office:value="-0.44101583132636346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657.78873" table:style-name="c1">
            <text:p>657.79</text:p>
          </table:table-cell>
          <table:table-cell office:value-type="string" table:style-name="c1">
            <text:p>2026-05-25 00:15</text:p>
          </table:table-cell>
          <table:table-cell office:value-type="float" office:value="658.3706500000001" table:style-name="c1">
            <text:p>658.37</text:p>
          </table:table-cell>
          <table:table-cell office:value-type="float" office:value="-0.11161074914582958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15</text:p>
          </table:table-cell>
          <table:table-cell office:value-type="float" office:value="666.1429049999999" table:style-name="c1">
            <text:p>666.14</text:p>
          </table:table-cell>
          <table:table-cell office:value-type="string" table:style-name="c1">
            <text:p>2026-05-25 12:45</text:p>
          </table:table-cell>
          <table:table-cell office:value-type="float" office:value="669.575045" table:style-name="c1">
            <text:p>669.58</text:p>
          </table:table-cell>
          <table:table-cell office:value-type="float" office:value="0.3142958469317003" table:style-name="c13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662.25096" table:style-name="c1">
            <text:p>662.25</text:p>
          </table:table-cell>
          <table:table-cell office:value-type="string" table:style-name="c1">
            <text:p>2026-05-26 11:00</text:p>
          </table:table-cell>
          <table:table-cell office:value-type="float" office:value="662.44861" table:style-name="c1">
            <text:p>662.45</text:p>
          </table:table-cell>
          <table:table-cell office:value-type="float" office:value="-0.1701144791681486" table:style-name="c12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30</text:p>
          </table:table-cell>
          <table:table-cell office:value-type="float" office:value="667.9938299999999" table:style-name="c1">
            <text:p>667.99</text:p>
          </table:table-cell>
          <table:table-cell office:value-type="string" table:style-name="c1">
            <text:p>2026-05-26 15:00</text:p>
          </table:table-cell>
          <table:table-cell office:value-type="float" office:value="662.5585550000001" table:style-name="c1">
            <text:p>662.56</text:p>
          </table:table-cell>
          <table:table-cell office:value-type="float" office:value="-1.0119449084499577" table:style-name="c12">
            <text:p>-1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659.179425" table:style-name="c1">
            <text:p>659.18</text:p>
          </table:table-cell>
          <table:table-cell office:value-type="string" table:style-name="c1">
            <text:p>2026-05-27 01:45</text:p>
          </table:table-cell>
          <table:table-cell office:value-type="float" office:value="657.3711500000001" table:style-name="c1">
            <text:p>657.37</text:p>
          </table:table-cell>
          <table:table-cell office:value-type="float" office:value="-0.47367375412997736" table:style-name="c12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00</text:p>
          </table:table-cell>
          <table:table-cell office:value-type="float" office:value="653.5766249999999" table:style-name="c1">
            <text:p>653.58</text:p>
          </table:table-cell>
          <table:table-cell office:value-type="string" table:style-name="c1">
            <text:p>2026-05-30 02:30</text:p>
          </table:table-cell>
          <table:table-cell office:value-type="float" office:value="654.302685" table:style-name="c1">
            <text:p>654.3</text:p>
          </table:table-cell>
          <table:table-cell office:value-type="float" office:value="-0.0890318051559702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45</text:p>
          </table:table-cell>
          <table:table-cell office:value-type="float" office:value="657.898785" table:style-name="c1">
            <text:p>657.9</text:p>
          </table:table-cell>
          <table:table-cell office:value-type="string" table:style-name="c1">
            <text:p>2026-05-30 03:15</text:p>
          </table:table-cell>
          <table:table-cell office:value-type="float" office:value="660.20973" table:style-name="c1">
            <text:p>660.21</text:p>
          </table:table-cell>
          <table:table-cell office:value-type="float" office:value="0.1506593069221296" table:style-name="c13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4:30</text:p>
          </table:table-cell>
          <table:table-cell office:value-type="float" office:value="682.8512549999999" table:style-name="c1">
            <text:p>682.85</text:p>
          </table:table-cell>
          <table:table-cell office:value-type="string" table:style-name="c1">
            <text:p>2026-05-30 15:00</text:p>
          </table:table-cell>
          <table:table-cell office:value-type="float" office:value="686.326665" table:style-name="c1">
            <text:p>686.33</text:p>
          </table:table-cell>
          <table:table-cell office:value-type="float" office:value="0.3080382413099825" table:style-name="c13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5:30</text:p>
          </table:table-cell>
          <table:table-cell office:value-type="float" office:value="690.475065" table:style-name="c1">
            <text:p>690.48</text:p>
          </table:table-cell>
          <table:table-cell office:value-type="string" table:style-name="c1">
            <text:p>2026-05-30 16:00</text:p>
          </table:table-cell>
          <table:table-cell office:value-type="float" office:value="694.182735" table:style-name="c1">
            <text:p>694.18</text:p>
          </table:table-cell>
          <table:table-cell office:value-type="float" office:value="0.33600036124912247" table:style-name="c13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6:15</text:p>
          </table:table-cell>
          <table:table-cell office:value-type="float" office:value="703.25145" table:style-name="c1">
            <text:p>703.25</text:p>
          </table:table-cell>
          <table:table-cell office:value-type="string" table:style-name="c1">
            <text:p>2026-05-30 16:45</text:p>
          </table:table-cell>
          <table:table-cell office:value-type="float" office:value="707.26619" table:style-name="c1">
            <text:p>707.27</text:p>
          </table:table-cell>
          <table:table-cell office:value-type="float" office:value="0.36984138265054867" table:style-name="c13">
            <text:p>+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7:00</text:p>
          </table:table-cell>
          <table:table-cell office:value-type="float" office:value="708.91428" table:style-name="c1">
            <text:p>708.91</text:p>
          </table:table-cell>
          <table:table-cell office:value-type="string" table:style-name="c1">
            <text:p>2026-05-30 17:30</text:p>
          </table:table-cell>
          <table:table-cell office:value-type="float" office:value="705.017315" table:style-name="c1">
            <text:p>705.02</text:p>
          </table:table-cell>
          <table:table-cell office:value-type="float" office:value="-0.748510047319817" table:style-name="c12">
            <text:p>-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20:00</text:p>
          </table:table-cell>
          <table:table-cell office:value-type="float" office:value="721.490565" table:style-name="c1">
            <text:p>721.49</text:p>
          </table:table-cell>
          <table:table-cell office:value-type="string" table:style-name="c1">
            <text:p>2026-05-30 20:30</text:p>
          </table:table-cell>
          <table:table-cell office:value-type="float" office:value="719.8998700000001" table:style-name="c1">
            <text:p>719.9</text:p>
          </table:table-cell>
          <table:table-cell office:value-type="float" office:value="-0.4199327041968681" table:style-name="c12">
            <text:p>-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2:15</text:p>
          </table:table-cell>
          <table:table-cell office:value-type="float" office:value="733.2964649999999" table:style-name="c1">
            <text:p>733.3</text:p>
          </table:table-cell>
          <table:table-cell office:value-type="string" table:style-name="c1">
            <text:p>2026-05-31 02:45</text:p>
          </table:table-cell>
          <table:table-cell office:value-type="float" office:value="737.17123" table:style-name="c1">
            <text:p>737.17</text:p>
          </table:table-cell>
          <table:table-cell office:value-type="float" office:value="0.32744733212781707" table:style-name="c13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00</text:p>
          </table:table-cell>
          <table:table-cell office:value-type="float" office:value="740.2499399999999" table:style-name="c1">
            <text:p>740.25</text:p>
          </table:table-cell>
          <table:table-cell office:value-type="string" table:style-name="c1">
            <text:p>2026-05-31 03:30</text:p>
          </table:table-cell>
          <table:table-cell office:value-type="float" office:value="740.8194050000001" table:style-name="c1">
            <text:p>740.82</text:p>
          </table:table-cell>
          <table:table-cell office:value-type="float" office:value="-0.12312503403848485" table:style-name="c12">
            <text:p>-0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13:30</text:p>
          </table:table-cell>
          <table:table-cell office:value-type="float" office:value="732.06585" table:style-name="c1">
            <text:p>732.07</text:p>
          </table:table-cell>
          <table:table-cell office:value-type="string" table:style-name="c1">
            <text:p>2026-05-31 14:00</text:p>
          </table:table-cell>
          <table:table-cell office:value-type="float" office:value="727.0962700000001" table:style-name="c1">
            <text:p>727.1</text:p>
          </table:table-cell>
          <table:table-cell office:value-type="float" office:value="-0.8773862957450862" table:style-name="c12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9:45</text:p>
          </table:table-cell>
          <table:table-cell office:value-type="float" office:value="717.9187799999999" table:style-name="c1">
            <text:p>717.92</text:p>
          </table:table-cell>
          <table:table-cell office:value-type="string" table:style-name="c1">
            <text:p>2026-06-01 10:15</text:p>
          </table:table-cell>
          <table:table-cell office:value-type="float" office:value="706.0068200000001" table:style-name="c1">
            <text:p>706.01</text:p>
          </table:table-cell>
          <table:table-cell office:value-type="float" office:value="-1.8558182352020003" table:style-name="c12">
            <text:p>-1.9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6 08:00</text:p>
          </table:table-cell>
          <table:table-cell office:value-type="float" office:value="71091.96822" table:style-name="c9">
            <text:p>71092</text:p>
          </table:table-cell>
          <table:table-cell office:value-type="string" table:style-name="c9">
            <text:p>2026-03-06 08:30</text:p>
          </table:table-cell>
          <table:table-cell office:value-type="float" office:value="70898.66293500001" table:style-name="c9">
            <text:p>70899</text:p>
          </table:table-cell>
          <table:table-cell office:value-type="float" office:value="-0.47126520842729613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9:30</text:p>
          </table:table-cell>
          <table:table-cell office:value-type="float" office:value="69398.14173" table:style-name="c9">
            <text:p>69398</text:p>
          </table:table-cell>
          <table:table-cell office:value-type="string" table:style-name="c9">
            <text:p>2026-03-09 20:00</text:p>
          </table:table-cell>
          <table:table-cell office:value-type="float" office:value="68957.434035" table:style-name="c9">
            <text:p>68957</text:p>
          </table:table-cell>
          <table:table-cell office:value-type="float" office:value="-0.833673051199102" table:style-name="c10">
            <text:p>-0.8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1:00</text:p>
          </table:table-cell>
          <table:table-cell office:value-type="float" office:value="69191.93867999999" table:style-name="c9">
            <text:p>69192</text:p>
          </table:table-cell>
          <table:table-cell office:value-type="string" table:style-name="c9">
            <text:p>2026-03-10 01:30</text:p>
          </table:table-cell>
          <table:table-cell office:value-type="float" office:value="68941.19215999999" table:style-name="c9">
            <text:p>68941</text:p>
          </table:table-cell>
          <table:table-cell office:value-type="float" office:value="-0.5615682556964652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2:45</text:p>
          </table:table-cell>
          <table:table-cell office:value-type="float" office:value="70355.32008" table:style-name="c9">
            <text:p>70355</text:p>
          </table:table-cell>
          <table:table-cell office:value-type="string" table:style-name="c9">
            <text:p>2026-03-10 03:15</text:p>
          </table:table-cell>
          <table:table-cell office:value-type="float" office:value="70137.05393000001" table:style-name="c9">
            <text:p>70137</text:p>
          </table:table-cell>
          <table:table-cell office:value-type="float" office:value="-0.5095138795452092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8:15</text:p>
          </table:table-cell>
          <table:table-cell office:value-type="float" office:value="70934.80967999999" table:style-name="c9">
            <text:p>70935</text:p>
          </table:table-cell>
          <table:table-cell office:value-type="string" table:style-name="c9">
            <text:p>2026-03-10 08:45</text:p>
          </table:table-cell>
          <table:table-cell office:value-type="float" office:value="70883.22065999999" table:style-name="c9">
            <text:p>70883</text:p>
          </table:table-cell>
          <table:table-cell office:value-type="float" office:value="-0.2724819858843208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5:00</text:p>
          </table:table-cell>
          <table:table-cell office:value-type="float" office:value="71503.543905" table:style-name="c9">
            <text:p>71504</text:p>
          </table:table-cell>
          <table:table-cell office:value-type="string" table:style-name="c9">
            <text:p>2026-03-10 15:30</text:p>
          </table:table-cell>
          <table:table-cell office:value-type="float" office:value="71312.335995" table:style-name="c9">
            <text:p>71312</text:p>
          </table:table-cell>
          <table:table-cell office:value-type="float" office:value="-0.46677584274346096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3:45</text:p>
          </table:table-cell>
          <table:table-cell office:value-type="float" office:value="70477.231005" table:style-name="c9">
            <text:p>70477</text:p>
          </table:table-cell>
          <table:table-cell office:value-type="string" table:style-name="c9">
            <text:p>2026-03-11 14:15</text:p>
          </table:table-cell>
          <table:table-cell office:value-type="float" office:value="70192.895995" table:style-name="c9">
            <text:p>70193</text:p>
          </table:table-cell>
          <table:table-cell office:value-type="float" office:value="-0.6025358871773356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4:30</text:p>
          </table:table-cell>
          <table:table-cell office:value-type="float" office:value="70699.502085" table:style-name="c9">
            <text:p>70700</text:p>
          </table:table-cell>
          <table:table-cell office:value-type="string" table:style-name="c9">
            <text:p>2026-03-11 15:00</text:p>
          </table:table-cell>
          <table:table-cell office:value-type="float" office:value="70543.41065" table:style-name="c9">
            <text:p>70543</text:p>
          </table:table-cell>
          <table:table-cell office:value-type="float" office:value="-0.42024017726765006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0:30</text:p>
          </table:table-cell>
          <table:table-cell office:value-type="float" office:value="71518.27126499999" table:style-name="c9">
            <text:p>71518</text:p>
          </table:table-cell>
          <table:table-cell office:value-type="string" table:style-name="c9">
            <text:p>2026-03-13 01:00</text:p>
          </table:table-cell>
          <table:table-cell office:value-type="float" office:value="71439.8622" table:style-name="c9">
            <text:p>71440</text:p>
          </table:table-cell>
          <table:table-cell office:value-type="float" office:value="-0.30931585121528604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00</text:p>
          </table:table-cell>
          <table:table-cell office:value-type="float" office:value="72821.12236499999" table:style-name="c9">
            <text:p>72821</text:p>
          </table:table-cell>
          <table:table-cell office:value-type="string" table:style-name="c9">
            <text:p>2026-03-13 13:30</text:p>
          </table:table-cell>
          <table:table-cell office:value-type="float" office:value="72986.658415" table:style-name="c9">
            <text:p>72987</text:p>
          </table:table-cell>
          <table:table-cell office:value-type="float" office:value="0.02696431912982966" table:style-name="c11">
            <text:p>+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45</text:p>
          </table:table-cell>
          <table:table-cell office:value-type="float" office:value="73307.41539" table:style-name="c9">
            <text:p>73307</text:p>
          </table:table-cell>
          <table:table-cell office:value-type="string" table:style-name="c9">
            <text:p>2026-03-13 14:15</text:p>
          </table:table-cell>
          <table:table-cell office:value-type="float" office:value="73464.599325" table:style-name="c9">
            <text:p>73465</text:p>
          </table:table-cell>
          <table:table-cell office:value-type="float" office:value="0.014088889772456703" table:style-name="c11">
            <text:p>+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4:30</text:p>
          </table:table-cell>
          <table:table-cell office:value-type="float" office:value="73775.38926" table:style-name="c9">
            <text:p>73775</text:p>
          </table:table-cell>
          <table:table-cell office:value-type="string" table:style-name="c9">
            <text:p>2026-03-13 15:00</text:p>
          </table:table-cell>
          <table:table-cell office:value-type="float" office:value="72346.52864" table:style-name="c9">
            <text:p>72347</text:p>
          </table:table-cell>
          <table:table-cell office:value-type="float" office:value="-2.132799767692295" table:style-name="c10">
            <text:p>-2.1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2:30</text:p>
          </table:table-cell>
          <table:table-cell office:value-type="float" office:value="71303.92414499998" table:style-name="c9">
            <text:p>71304</text:p>
          </table:table-cell>
          <table:table-cell office:value-type="string" table:style-name="c9">
            <text:p>2026-03-15 03:00</text:p>
          </table:table-cell>
          <table:table-cell office:value-type="float" office:value="71414.81473" table:style-name="c9">
            <text:p>71415</text:p>
          </table:table-cell>
          <table:table-cell office:value-type="float" office:value="-0.044692672987323157" table:style-name="c10">
            <text:p>-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8:00</text:p>
          </table:table-cell>
          <table:table-cell office:value-type="float" office:value="71855.86998" table:style-name="c9">
            <text:p>71856</text:p>
          </table:table-cell>
          <table:table-cell office:value-type="string" table:style-name="c9">
            <text:p>2026-03-15 18:30</text:p>
          </table:table-cell>
          <table:table-cell office:value-type="float" office:value="71690.51681000002" table:style-name="c9">
            <text:p>71691</text:p>
          </table:table-cell>
          <table:table-cell office:value-type="float" office:value="-0.4295578262278221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00</text:p>
          </table:table-cell>
          <table:table-cell office:value-type="float" office:value="72145.64479499999" table:style-name="c9">
            <text:p>72146</text:p>
          </table:table-cell>
          <table:table-cell office:value-type="string" table:style-name="c9">
            <text:p>2026-03-15 22:30</text:p>
          </table:table-cell>
          <table:table-cell office:value-type="float" office:value="71895.52425500001" table:style-name="c9">
            <text:p>71896</text:p>
          </table:table-cell>
          <table:table-cell office:value-type="float" office:value="-0.5458953123293808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45</text:p>
          </table:table-cell>
          <table:table-cell office:value-type="float" office:value="72427.59569999999" table:style-name="c9">
            <text:p>72428</text:p>
          </table:table-cell>
          <table:table-cell office:value-type="string" table:style-name="c9">
            <text:p>2026-03-15 23:15</text:p>
          </table:table-cell>
          <table:table-cell office:value-type="float" office:value="72955.504" table:style-name="c9">
            <text:p>72956</text:p>
          </table:table-cell>
          <table:table-cell office:value-type="float" office:value="0.527520268775139" table:style-name="c11">
            <text:p>+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73806.885" table:style-name="c9">
            <text:p>73807</text:p>
          </table:table-cell>
          <table:table-cell office:value-type="string" table:style-name="c9">
            <text:p>2026-03-16 04:15</text:p>
          </table:table-cell>
          <table:table-cell office:value-type="float" office:value="73659.102025" table:style-name="c9">
            <text:p>73659</text:p>
          </table:table-cell>
          <table:table-cell office:value-type="float" office:value="-0.39972899540194895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3:45</text:p>
          </table:table-cell>
          <table:table-cell office:value-type="float" office:value="74116.689825" table:style-name="c9">
            <text:p>74117</text:p>
          </table:table-cell>
          <table:table-cell office:value-type="string" table:style-name="c9">
            <text:p>2026-03-16 14:15</text:p>
          </table:table-cell>
          <table:table-cell office:value-type="float" office:value="74261.47069" table:style-name="c9">
            <text:p>74261</text:p>
          </table:table-cell>
          <table:table-cell office:value-type="float" office:value="-0.0049487030761352635" table:style-name="c10">
            <text:p>-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1:15</text:p>
          </table:table-cell>
          <table:table-cell office:value-type="float" office:value="74405.11396499998" table:style-name="c9">
            <text:p>74405</text:p>
          </table:table-cell>
          <table:table-cell office:value-type="string" table:style-name="c9">
            <text:p>2026-03-16 21:45</text:p>
          </table:table-cell>
          <table:table-cell office:value-type="float" office:value="74398.782" table:style-name="c9">
            <text:p>74399</text:p>
          </table:table-cell>
          <table:table-cell office:value-type="float" office:value="-0.20839310896144658" table:style-name="c10">
            <text:p>-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00:15</text:p>
          </table:table-cell>
          <table:table-cell office:value-type="float" office:value="75447.034665" table:style-name="c9">
            <text:p>75447</text:p>
          </table:table-cell>
          <table:table-cell office:value-type="string" table:style-name="c9">
            <text:p>2026-03-17 00:45</text:p>
          </table:table-cell>
          <table:table-cell office:value-type="float" office:value="74959.46152000001" table:style-name="c9">
            <text:p>74959</text:p>
          </table:table-cell>
          <table:table-cell office:value-type="float" office:value="-0.8448537592083527" table:style-name="c10">
            <text:p>-0.8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01:15</text:p>
          </table:table-cell>
          <table:table-cell office:value-type="float" office:value="75878.80044" table:style-name="c9">
            <text:p>75879</text:p>
          </table:table-cell>
          <table:table-cell office:value-type="string" table:style-name="c9">
            <text:p>2026-03-17 01:45</text:p>
          </table:table-cell>
          <table:table-cell office:value-type="float" office:value="75640.330915" table:style-name="c9">
            <text:p>75640</text:p>
          </table:table-cell>
          <table:table-cell office:value-type="float" office:value="-0.513548638406891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1:00</text:p>
          </table:table-cell>
          <table:table-cell office:value-type="float" office:value="70128.236595" table:style-name="c9">
            <text:p>70128</text:p>
          </table:table-cell>
          <table:table-cell office:value-type="string" table:style-name="c9">
            <text:p>2026-03-24 21:30</text:p>
          </table:table-cell>
          <table:table-cell office:value-type="float" office:value="70024.88004500001" table:style-name="c9">
            <text:p>70025</text:p>
          </table:table-cell>
          <table:table-cell office:value-type="float" office:value="-0.3469876001805816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5:15</text:p>
          </table:table-cell>
          <table:table-cell office:value-type="float" office:value="71280.952665" table:style-name="c9">
            <text:p>71281</text:p>
          </table:table-cell>
          <table:table-cell office:value-type="string" table:style-name="c9">
            <text:p>2026-03-25 05:45</text:p>
          </table:table-cell>
          <table:table-cell office:value-type="float" office:value="71185.319535" table:style-name="c9">
            <text:p>71185</text:p>
          </table:table-cell>
          <table:table-cell office:value-type="float" office:value="-0.33379545987366477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8:45</text:p>
          </table:table-cell>
          <table:table-cell office:value-type="float" office:value="71514.05916" table:style-name="c9">
            <text:p>71514</text:p>
          </table:table-cell>
          <table:table-cell office:value-type="string" table:style-name="c9">
            <text:p>2026-03-25 09:15</text:p>
          </table:table-cell>
          <table:table-cell office:value-type="float" office:value="71298.362985" table:style-name="c9">
            <text:p>71298</text:p>
          </table:table-cell>
          <table:table-cell office:value-type="float" office:value="-0.5009107395310353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8:15</text:p>
          </table:table-cell>
          <table:table-cell office:value-type="float" office:value="67927.86696" table:style-name="c9">
            <text:p>67928</text:p>
          </table:table-cell>
          <table:table-cell office:value-type="string" table:style-name="c9">
            <text:p>2026-03-30 08:45</text:p>
          </table:table-cell>
          <table:table-cell office:value-type="float" office:value="67727.1195" table:style-name="c9">
            <text:p>67727</text:p>
          </table:table-cell>
          <table:table-cell office:value-type="float" office:value="-0.4948395804603156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01:00</text:p>
          </table:table-cell>
          <table:table-cell office:value-type="float" office:value="67242.34437" table:style-name="c9">
            <text:p>67242</text:p>
          </table:table-cell>
          <table:table-cell office:value-type="string" table:style-name="c9">
            <text:p>2026-03-31 01:30</text:p>
          </table:table-cell>
          <table:table-cell office:value-type="float" office:value="67741.59226" table:style-name="c9">
            <text:p>67742</text:p>
          </table:table-cell>
          <table:table-cell office:value-type="float" office:value="0.5410763864363233" table:style-name="c11">
            <text:p>+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01:45</text:p>
          </table:table-cell>
          <table:table-cell office:value-type="float" office:value="67967.276655" table:style-name="c9">
            <text:p>67967</text:p>
          </table:table-cell>
          <table:table-cell office:value-type="string" table:style-name="c9">
            <text:p>2026-03-31 02:15</text:p>
          </table:table-cell>
          <table:table-cell office:value-type="float" office:value="67882.64170000001" table:style-name="c9">
            <text:p>67883</text:p>
          </table:table-cell>
          <table:table-cell office:value-type="float" office:value="-0.32417417116280545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4:00</text:p>
          </table:table-cell>
          <table:table-cell office:value-type="float" office:value="67335.93114" table:style-name="c9">
            <text:p>67336</text:p>
          </table:table-cell>
          <table:table-cell office:value-type="string" table:style-name="c9">
            <text:p>2026-03-31 14:30</text:p>
          </table:table-cell>
          <table:table-cell office:value-type="float" office:value="67704.13100000001" table:style-name="c9">
            <text:p>67704</text:p>
          </table:table-cell>
          <table:table-cell office:value-type="float" office:value="0.34581730465250704" table:style-name="c11">
            <text:p>+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6:45</text:p>
          </table:table-cell>
          <table:table-cell office:value-type="float" office:value="67809.92801999999" table:style-name="c9">
            <text:p>67810</text:p>
          </table:table-cell>
          <table:table-cell office:value-type="string" table:style-name="c9">
            <text:p>2026-03-31 17:15</text:p>
          </table:table-cell>
          <table:table-cell office:value-type="float" office:value="68419.773" table:style-name="c9">
            <text:p>68420</text:p>
          </table:table-cell>
          <table:table-cell office:value-type="float" office:value="0.697646889749648" table:style-name="c11">
            <text:p>+0.7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7:30</text:p>
          </table:table-cell>
          <table:table-cell office:value-type="float" office:value="68068.01699999999" table:style-name="c9">
            <text:p>68068</text:p>
          </table:table-cell>
          <table:table-cell office:value-type="string" table:style-name="c9">
            <text:p>2026-03-31 18:00</text:p>
          </table:table-cell>
          <table:table-cell office:value-type="float" office:value="67492.99662" table:style-name="c9">
            <text:p>67493</text:p>
          </table:table-cell>
          <table:table-cell office:value-type="float" office:value="-1.0429845197978516" table:style-name="c10">
            <text:p>-1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15:30</text:p>
          </table:table-cell>
          <table:table-cell office:value-type="float" office:value="67533.75" table:style-name="c9">
            <text:p>67534</text:p>
          </table:table-cell>
          <table:table-cell office:value-type="string" table:style-name="c9">
            <text:p>2026-04-05 16:00</text:p>
          </table:table-cell>
          <table:table-cell office:value-type="float" office:value="67272.996675" table:style-name="c9">
            <text:p>67273</text:p>
          </table:table-cell>
          <table:table-cell office:value-type="float" office:value="-0.5852363379100445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22:45</text:p>
          </table:table-cell>
          <table:table-cell office:value-type="float" office:value="67998.29215499999" table:style-name="c9">
            <text:p>67998</text:p>
          </table:table-cell>
          <table:table-cell office:value-type="string" table:style-name="c9">
            <text:p>2026-04-05 23:15</text:p>
          </table:table-cell>
          <table:table-cell office:value-type="float" office:value="68565.69000500001" table:style-name="c9">
            <text:p>68566</text:p>
          </table:table-cell>
          <table:table-cell office:value-type="float" office:value="0.6328615352560352" table:style-name="c11">
            <text:p>+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23:30</text:p>
          </table:table-cell>
          <table:table-cell office:value-type="float" office:value="68838.732165" table:style-name="c9">
            <text:p>68839</text:p>
          </table:table-cell>
          <table:table-cell office:value-type="string" table:style-name="c9">
            <text:p>2026-04-06 00:00</text:p>
          </table:table-cell>
          <table:table-cell office:value-type="float" office:value="68999.66291" table:style-name="c9">
            <text:p>69000</text:p>
          </table:table-cell>
          <table:table-cell office:value-type="float" office:value="0.033412031453150526" table:style-name="c11">
            <text:p>+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0:15</text:p>
          </table:table-cell>
          <table:table-cell office:value-type="float" office:value="69269.17727999999" table:style-name="c9">
            <text:p>69269</text:p>
          </table:table-cell>
          <table:table-cell office:value-type="string" table:style-name="c9">
            <text:p>2026-04-06 00:45</text:p>
          </table:table-cell>
          <table:table-cell office:value-type="float" office:value="69278.073635" table:style-name="c9">
            <text:p>69278</text:p>
          </table:table-cell>
          <table:table-cell office:value-type="float" office:value="-0.1870825081010108" table:style-name="c10">
            <text:p>-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15</text:p>
          </table:table-cell>
          <table:table-cell office:value-type="float" office:value="69668.40679499999" table:style-name="c9">
            <text:p>69668</text:p>
          </table:table-cell>
          <table:table-cell office:value-type="string" table:style-name="c9">
            <text:p>2026-04-06 09:45</text:p>
          </table:table-cell>
          <table:table-cell office:value-type="float" office:value="69818.39334000001" table:style-name="c9">
            <text:p>69818</text:p>
          </table:table-cell>
          <table:table-cell office:value-type="float" office:value="0.014955956641893309" table:style-name="c11">
            <text:p>+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17:45</text:p>
          </table:table-cell>
          <table:table-cell office:value-type="float" office:value="68728.517085" table:style-name="c9">
            <text:p>68729</text:p>
          </table:table-cell>
          <table:table-cell office:value-type="string" table:style-name="c9">
            <text:p>2026-04-07 18:15</text:p>
          </table:table-cell>
          <table:table-cell office:value-type="float" office:value="68613.21622999999" table:style-name="c9">
            <text:p>68613</text:p>
          </table:table-cell>
          <table:table-cell office:value-type="float" office:value="-0.36732739909336454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0:00</text:p>
          </table:table-cell>
          <table:table-cell office:value-type="float" office:value="69045.79564499999" table:style-name="c9">
            <text:p>69046</text:p>
          </table:table-cell>
          <table:table-cell office:value-type="string" table:style-name="c9">
            <text:p>2026-04-07 20:30</text:p>
          </table:table-cell>
          <table:table-cell office:value-type="float" office:value="69329.447935" table:style-name="c9">
            <text:p>69329</text:p>
          </table:table-cell>
          <table:table-cell office:value-type="float" office:value="0.21009638924835983" table:style-name="c11">
            <text:p>+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1:15</text:p>
          </table:table-cell>
          <table:table-cell office:value-type="float" office:value="70016.17059" table:style-name="c9">
            <text:p>70016</text:p>
          </table:table-cell>
          <table:table-cell office:value-type="string" table:style-name="c9">
            <text:p>2026-04-07 21:45</text:p>
          </table:table-cell>
          <table:table-cell office:value-type="float" office:value="69877.16394" table:style-name="c9">
            <text:p>69877</text:p>
          </table:table-cell>
          <table:table-cell office:value-type="float" office:value="-0.39803819370244353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2:45</text:p>
          </table:table-cell>
          <table:table-cell office:value-type="float" office:value="70797.17089499999" table:style-name="c9">
            <text:p>70797</text:p>
          </table:table-cell>
          <table:table-cell office:value-type="string" table:style-name="c9">
            <text:p>2026-04-07 23:15</text:p>
          </table:table-cell>
          <table:table-cell office:value-type="float" office:value="71451.60632500002" table:style-name="c9">
            <text:p>71452</text:p>
          </table:table-cell>
          <table:table-cell office:value-type="float" office:value="0.7226329279670152" table:style-name="c11">
            <text:p>+0.7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30</text:p>
          </table:table-cell>
          <table:table-cell office:value-type="float" office:value="72789.646635" table:style-name="c9">
            <text:p>72790</text:p>
          </table:table-cell>
          <table:table-cell office:value-type="string" table:style-name="c9">
            <text:p>2026-04-08 00:00</text:p>
          </table:table-cell>
          <table:table-cell office:value-type="float" office:value="71888.25789000001" table:style-name="c9">
            <text:p>71888</text:p>
          </table:table-cell>
          <table:table-cell office:value-type="float" office:value="-1.4357720099434923" table:style-name="c10">
            <text:p>-1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13:00</text:p>
          </table:table-cell>
          <table:table-cell office:value-type="float" office:value="72107.98597499999" table:style-name="c9">
            <text:p>72108</text:p>
          </table:table-cell>
          <table:table-cell office:value-type="string" table:style-name="c9">
            <text:p>2026-04-08 13:30</text:p>
          </table:table-cell>
          <table:table-cell office:value-type="float" office:value="72451.61607" table:style-name="c9">
            <text:p>72452</text:p>
          </table:table-cell>
          <table:table-cell office:value-type="float" office:value="0.2756966676964234" table:style-name="c11">
            <text:p>+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5:45</text:p>
          </table:table-cell>
          <table:table-cell office:value-type="float" office:value="72111.77787" table:style-name="c9">
            <text:p>72112</text:p>
          </table:table-cell>
          <table:table-cell office:value-type="string" table:style-name="c9">
            <text:p>2026-04-09 16:15</text:p>
          </table:table-cell>
          <table:table-cell office:value-type="float" office:value="72140.53169" table:style-name="c9">
            <text:p>72141</text:p>
          </table:table-cell>
          <table:table-cell office:value-type="float" office:value="-0.16010575007101568" table:style-name="c10">
            <text:p>-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2:45</text:p>
          </table:table-cell>
          <table:table-cell office:value-type="float" office:value="72351.507675" table:style-name="c9">
            <text:p>72352</text:p>
          </table:table-cell>
          <table:table-cell office:value-type="string" table:style-name="c9">
            <text:p>2026-04-10 13:15</text:p>
          </table:table-cell>
          <table:table-cell office:value-type="float" office:value="72177.89300000001" table:style-name="c9">
            <text:p>72178</text:p>
          </table:table-cell>
          <table:table-cell office:value-type="float" office:value="-0.4393803160743781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4:15</text:p>
          </table:table-cell>
          <table:table-cell office:value-type="float" office:value="72745.664655" table:style-name="c9">
            <text:p>72746</text:p>
          </table:table-cell>
          <table:table-cell office:value-type="string" table:style-name="c9">
            <text:p>2026-04-10 14:45</text:p>
          </table:table-cell>
          <table:table-cell office:value-type="float" office:value="72828.597485" table:style-name="c9">
            <text:p>72829</text:p>
          </table:table-cell>
          <table:table-cell office:value-type="float" office:value="-0.08612408267854033" table:style-name="c10">
            <text:p>-0.1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6:15</text:p>
          </table:table-cell>
          <table:table-cell office:value-type="float" office:value="72908.97626999998" table:style-name="c9">
            <text:p>72909</text:p>
          </table:table-cell>
          <table:table-cell office:value-type="string" table:style-name="c9">
            <text:p>2026-04-11 16:45</text:p>
          </table:table-cell>
          <table:table-cell office:value-type="float" office:value="73070.98623" table:style-name="c9">
            <text:p>73071</text:p>
          </table:table-cell>
          <table:table-cell office:value-type="float" office:value="0.021864329115262038" table:style-name="c11">
            <text:p>+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45</text:p>
          </table:table-cell>
          <table:table-cell office:value-type="float" office:value="73500.161715" table:style-name="c9">
            <text:p>73500</text:p>
          </table:table-cell>
          <table:table-cell office:value-type="string" table:style-name="c9">
            <text:p>2026-04-11 19:15</text:p>
          </table:table-cell>
          <table:table-cell office:value-type="float" office:value="73533.21500000001" table:style-name="c9">
            <text:p>73533</text:p>
          </table:table-cell>
          <table:table-cell office:value-type="float" office:value="-0.15501953890494358" table:style-name="c10">
            <text:p>-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9:30</text:p>
          </table:table-cell>
          <table:table-cell office:value-type="float" office:value="73655.22920999999" table:style-name="c9">
            <text:p>73655</text:p>
          </table:table-cell>
          <table:table-cell office:value-type="string" table:style-name="c9">
            <text:p>2026-04-11 20:00</text:p>
          </table:table-cell>
          <table:table-cell office:value-type="float" office:value="73650.31642" table:style-name="c9">
            <text:p>73650</text:p>
          </table:table-cell>
          <table:table-cell office:value-type="float" office:value="-0.20655664798733264" table:style-name="c10">
            <text:p>-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19:45</text:p>
          </table:table-cell>
          <table:table-cell office:value-type="float" office:value="73052.257875" table:style-name="c9">
            <text:p>73052</text:p>
          </table:table-cell>
          <table:table-cell office:value-type="string" table:style-name="c9">
            <text:p>2026-04-13 20:15</text:p>
          </table:table-cell>
          <table:table-cell office:value-type="float" office:value="73023.47" table:style-name="c9">
            <text:p>73023</text:p>
          </table:table-cell>
          <table:table-cell office:value-type="float" office:value="-0.2392284600279293" table:style-name="c10">
            <text:p>-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15</text:p>
          </table:table-cell>
          <table:table-cell office:value-type="float" office:value="73790.13663" table:style-name="c9">
            <text:p>73790</text:p>
          </table:table-cell>
          <table:table-cell office:value-type="string" table:style-name="c9">
            <text:p>2026-04-13 22:45</text:p>
          </table:table-cell>
          <table:table-cell office:value-type="float" office:value="74222.87000000001" table:style-name="c9">
            <text:p>74223</text:p>
          </table:table-cell>
          <table:table-cell office:value-type="float" office:value="0.38536566790203786" table:style-name="c11">
            <text:p>+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13:45</text:p>
          </table:table-cell>
          <table:table-cell office:value-type="float" office:value="75226.09425" table:style-name="c9">
            <text:p>75226</text:p>
          </table:table-cell>
          <table:table-cell office:value-type="string" table:style-name="c9">
            <text:p>2026-04-14 14:30</text:p>
          </table:table-cell>
          <table:table-cell office:value-type="float" office:value="75817.15246000001" table:style-name="c9">
            <text:p>75817</text:p>
          </table:table-cell>
          <table:table-cell office:value-type="float" office:value="0.5842383904338888" table:style-name="c11">
            <text:p>+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00:30</text:p>
          </table:table-cell>
          <table:table-cell office:value-type="float" office:value="74622.24247499999" table:style-name="c9">
            <text:p>74622</text:p>
          </table:table-cell>
          <table:table-cell office:value-type="string" table:style-name="c9">
            <text:p>2026-04-15 01:00</text:p>
          </table:table-cell>
          <table:table-cell office:value-type="float" office:value="74531.085815" table:style-name="c9">
            <text:p>74531</text:p>
          </table:table-cell>
          <table:table-cell office:value-type="float" office:value="-0.3218132993317968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20:00</text:p>
          </table:table-cell>
          <table:table-cell office:value-type="float" office:value="75040.1013" table:style-name="c9">
            <text:p>75040</text:p>
          </table:table-cell>
          <table:table-cell office:value-type="string" table:style-name="c9">
            <text:p>2026-04-15 20:30</text:p>
          </table:table-cell>
          <table:table-cell office:value-type="float" office:value="74728.75693" table:style-name="c9">
            <text:p>74729</text:p>
          </table:table-cell>
          <table:table-cell office:value-type="float" office:value="-0.6139745910805017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45</text:p>
          </table:table-cell>
          <table:table-cell office:value-type="float" office:value="75235.52896499999" table:style-name="c9">
            <text:p>75236</text:p>
          </table:table-cell>
          <table:table-cell office:value-type="string" table:style-name="c9">
            <text:p>2026-04-16 03:15</text:p>
          </table:table-cell>
          <table:table-cell office:value-type="float" office:value="74917.59246500001" table:style-name="c9">
            <text:p>74918</text:p>
          </table:table-cell>
          <table:table-cell office:value-type="float" office:value="-0.6216434891487044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30</text:p>
          </table:table-cell>
          <table:table-cell office:value-type="float" office:value="75012.98775" table:style-name="c9">
            <text:p>75013</text:p>
          </table:table-cell>
          <table:table-cell office:value-type="string" table:style-name="c9">
            <text:p>2026-04-16 14:00</text:p>
          </table:table-cell>
          <table:table-cell office:value-type="float" office:value="73751.135985" table:style-name="c9">
            <text:p>73751</text:p>
          </table:table-cell>
          <table:table-cell office:value-type="float" office:value="-1.8787150440278455" table:style-name="c10">
            <text:p>-1.9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6:00</text:p>
          </table:table-cell>
          <table:table-cell office:value-type="float" office:value="74734.5486" table:style-name="c9">
            <text:p>74735</text:p>
          </table:table-cell>
          <table:table-cell office:value-type="string" table:style-name="c9">
            <text:p>2026-04-16 16:30</text:p>
          </table:table-cell>
          <table:table-cell office:value-type="float" office:value="74533.084815" table:style-name="c9">
            <text:p>74533</text:p>
          </table:table-cell>
          <table:table-cell office:value-type="float" office:value="-0.46893361652711185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45</text:p>
          </table:table-cell>
          <table:table-cell office:value-type="float" office:value="75376.999665" table:style-name="c9">
            <text:p>75377</text:p>
          </table:table-cell>
          <table:table-cell office:value-type="string" table:style-name="c9">
            <text:p>2026-04-17 09:15</text:p>
          </table:table-cell>
          <table:table-cell office:value-type="float" office:value="75864.87858500001" table:style-name="c9">
            <text:p>75865</text:p>
          </table:table-cell>
          <table:table-cell office:value-type="float" office:value="0.4460578547871519" table:style-name="c11">
            <text:p>+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9:30</text:p>
          </table:table-cell>
          <table:table-cell office:value-type="float" office:value="76323.10248" table:style-name="c9">
            <text:p>76323</text:p>
          </table:table-cell>
          <table:table-cell office:value-type="string" table:style-name="c9">
            <text:p>2026-04-17 10:00</text:p>
          </table:table-cell>
          <table:table-cell office:value-type="float" office:value="75742.10000500001" table:style-name="c9">
            <text:p>75742</text:p>
          </table:table-cell>
          <table:table-cell office:value-type="float" office:value="-0.959618921547245" table:style-name="c10">
            <text:p>-1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15</text:p>
          </table:table-cell>
          <table:table-cell office:value-type="float" office:value="76948.444995" table:style-name="c9">
            <text:p>76948</text:p>
          </table:table-cell>
          <table:table-cell office:value-type="string" table:style-name="c9">
            <text:p>2026-04-17 13:45</text:p>
          </table:table-cell>
          <table:table-cell office:value-type="float" office:value="76854.003775" table:style-name="c9">
            <text:p>76854</text:p>
          </table:table-cell>
          <table:table-cell office:value-type="float" office:value="-0.32238776698130245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4:00</text:p>
          </table:table-cell>
          <table:table-cell office:value-type="float" office:value="77378.780055" table:style-name="c9">
            <text:p>77379</text:p>
          </table:table-cell>
          <table:table-cell office:value-type="string" table:style-name="c9">
            <text:p>2026-04-17 14:30</text:p>
          </table:table-cell>
          <table:table-cell office:value-type="float" office:value="77415.54286500001" table:style-name="c9">
            <text:p>77416</text:p>
          </table:table-cell>
          <table:table-cell office:value-type="float" office:value="-0.15248477696758744" table:style-name="c10">
            <text:p>-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2:30</text:p>
          </table:table-cell>
          <table:table-cell office:value-type="float" office:value="77278.18978500001" table:style-name="c9">
            <text:p>77278</text:p>
          </table:table-cell>
          <table:table-cell office:value-type="string" table:style-name="c9">
            <text:p>2026-04-22 03:00</text:p>
          </table:table-cell>
          <table:table-cell office:value-type="float" office:value="77565.89765" table:style-name="c9">
            <text:p>77566</text:p>
          </table:table-cell>
          <table:table-cell office:value-type="float" office:value="0.17165727609134152" table:style-name="c11">
            <text:p>+0.2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3:15</text:p>
          </table:table-cell>
          <table:table-cell office:value-type="float" office:value="77645.58339" table:style-name="c9">
            <text:p>77646</text:p>
          </table:table-cell>
          <table:table-cell office:value-type="string" table:style-name="c9">
            <text:p>2026-04-22 03:45</text:p>
          </table:table-cell>
          <table:table-cell office:value-type="float" office:value="77544.538335" table:style-name="c9">
            <text:p>77545</text:p>
          </table:table-cell>
          <table:table-cell office:value-type="float" office:value="-0.3297761134017474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78297.659265" table:style-name="c9">
            <text:p>78298</text:p>
          </table:table-cell>
          <table:table-cell office:value-type="string" table:style-name="c9">
            <text:p>2026-04-22 06:00</text:p>
          </table:table-cell>
          <table:table-cell office:value-type="float" office:value="77955.92254" table:style-name="c9">
            <text:p>77956</text:p>
          </table:table-cell>
          <table:table-cell office:value-type="float" office:value="-0.6354859376746069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4:00</text:p>
          </table:table-cell>
          <table:table-cell office:value-type="float" office:value="78880.36047" table:style-name="c9">
            <text:p>78880</text:p>
          </table:table-cell>
          <table:table-cell office:value-type="string" table:style-name="c9">
            <text:p>2026-04-22 14:30</text:p>
          </table:table-cell>
          <table:table-cell office:value-type="float" office:value="78968.79585000001" table:style-name="c9">
            <text:p>78969</text:p>
          </table:table-cell>
          <table:table-cell office:value-type="float" office:value="-0.08801080838182207" table:style-name="c10">
            <text:p>-0.1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5:00</text:p>
          </table:table-cell>
          <table:table-cell office:value-type="float" office:value="78219.87039" table:style-name="c9">
            <text:p>78220</text:p>
          </table:table-cell>
          <table:table-cell office:value-type="string" table:style-name="c9">
            <text:p>2026-04-23 15:30</text:p>
          </table:table-cell>
          <table:table-cell office:value-type="float" office:value="78347.68656" table:style-name="c9">
            <text:p>78348</text:p>
          </table:table-cell>
          <table:table-cell office:value-type="float" office:value="-0.03682038245504948" table:style-name="c10">
            <text:p>-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4:30</text:p>
          </table:table-cell>
          <table:table-cell office:value-type="float" office:value="78105.002985" table:style-name="c9">
            <text:p>78105</text:p>
          </table:table-cell>
          <table:table-cell office:value-type="string" table:style-name="c9">
            <text:p>2026-04-26 15:00</text:p>
          </table:table-cell>
          <table:table-cell office:value-type="float" office:value="78056.60217499999" table:style-name="c9">
            <text:p>78057</text:p>
          </table:table-cell>
          <table:table-cell office:value-type="float" office:value="-0.26174502264225685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22:15</text:p>
          </table:table-cell>
          <table:table-cell office:value-type="float" office:value="78608.80476" table:style-name="c9">
            <text:p>78609</text:p>
          </table:table-cell>
          <table:table-cell office:value-type="string" table:style-name="c9">
            <text:p>2026-04-26 22:45</text:p>
          </table:table-cell>
          <table:table-cell office:value-type="float" office:value="78242.37924000001" table:style-name="c9">
            <text:p>78242</text:p>
          </table:table-cell>
          <table:table-cell office:value-type="float" office:value="-0.665106202412058" table:style-name="c10">
            <text:p>-0.7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7 01:00</text:p>
          </table:table-cell>
          <table:table-cell office:value-type="float" office:value="79348.65449999999" table:style-name="c9">
            <text:p>79349</text:p>
          </table:table-cell>
          <table:table-cell office:value-type="string" table:style-name="c9">
            <text:p>2026-04-27 01:30</text:p>
          </table:table-cell>
          <table:table-cell office:value-type="float" office:value="78868.915815" table:style-name="c9">
            <text:p>78869</text:p>
          </table:table-cell>
          <table:table-cell office:value-type="float" office:value="-0.8032872790731282" table:style-name="c10">
            <text:p>-0.8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7 14:45</text:p>
          </table:table-cell>
          <table:table-cell office:value-type="float" office:value="78217.46919" table:style-name="c9">
            <text:p>78217</text:p>
          </table:table-cell>
          <table:table-cell office:value-type="string" table:style-name="c9">
            <text:p>2026-04-27 15:15</text:p>
          </table:table-cell>
          <table:table-cell office:value-type="float" office:value="77336.93219" table:style-name="c9">
            <text:p>77337</text:p>
          </table:table-cell>
          <table:table-cell office:value-type="float" office:value="-1.3234045260827276" table:style-name="c10">
            <text:p>-1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03:45</text:p>
          </table:table-cell>
          <table:table-cell office:value-type="float" office:value="77196.97919999999" table:style-name="c9">
            <text:p>77197</text:p>
          </table:table-cell>
          <table:table-cell office:value-type="string" table:style-name="c9">
            <text:p>2026-05-01 04:15</text:p>
          </table:table-cell>
          <table:table-cell office:value-type="float" office:value="77077.72186" table:style-name="c9">
            <text:p>77078</text:p>
          </table:table-cell>
          <table:table-cell office:value-type="float" office:value="-0.35407565014944353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2:30</text:p>
          </table:table-cell>
          <table:table-cell office:value-type="float" office:value="77801.92151999999" table:style-name="c9">
            <text:p>77802</text:p>
          </table:table-cell>
          <table:table-cell office:value-type="string" table:style-name="c9">
            <text:p>2026-05-01 13:00</text:p>
          </table:table-cell>
          <table:table-cell office:value-type="float" office:value="77857.061995" table:style-name="c9">
            <text:p>77857</text:p>
          </table:table-cell>
          <table:table-cell office:value-type="float" office:value="-0.12916877882271915" table:style-name="c10">
            <text:p>-0.1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3:15</text:p>
          </table:table-cell>
          <table:table-cell office:value-type="float" office:value="78383.54218499998" table:style-name="c9">
            <text:p>78384</text:p>
          </table:table-cell>
          <table:table-cell office:value-type="string" table:style-name="c9">
            <text:p>2026-05-01 13:45</text:p>
          </table:table-cell>
          <table:table-cell office:value-type="float" office:value="78219.940465" table:style-name="c9">
            <text:p>78220</text:p>
          </table:table-cell>
          <table:table-cell office:value-type="float" office:value="-0.40820224765337754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4:00</text:p>
          </table:table-cell>
          <table:table-cell office:value-type="float" office:value="78776.62862999999" table:style-name="c9">
            <text:p>78777</text:p>
          </table:table-cell>
          <table:table-cell office:value-type="string" table:style-name="c9">
            <text:p>2026-05-01 14:30</text:p>
          </table:table-cell>
          <table:table-cell office:value-type="float" office:value="78236.732065" table:style-name="c9">
            <text:p>78237</text:p>
          </table:table-cell>
          <table:table-cell office:value-type="float" office:value="-0.8838811770789268" table:style-name="c10">
            <text:p>-0.9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21:45</text:p>
          </table:table-cell>
          <table:table-cell office:value-type="float" office:value="78846.073335" table:style-name="c9">
            <text:p>78846</text:p>
          </table:table-cell>
          <table:table-cell office:value-type="string" table:style-name="c9">
            <text:p>2026-05-02 22:15</text:p>
          </table:table-cell>
          <table:table-cell office:value-type="float" office:value="78731.74443500002" table:style-name="c9">
            <text:p>78732</text:p>
          </table:table-cell>
          <table:table-cell office:value-type="float" office:value="-0.34461279507361775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07:30</text:p>
          </table:table-cell>
          <table:table-cell office:value-type="float" office:value="78451.96637999998" table:style-name="c9">
            <text:p>78452</text:p>
          </table:table-cell>
          <table:table-cell office:value-type="string" table:style-name="c9">
            <text:p>2026-05-03 08:00</text:p>
          </table:table-cell>
          <table:table-cell office:value-type="float" office:value="78324.05838000002" table:style-name="c9">
            <text:p>78324</text:p>
          </table:table-cell>
          <table:table-cell office:value-type="float" office:value="-0.36261397365572323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20:45</text:p>
          </table:table-cell>
          <table:table-cell office:value-type="float" office:value="79047.293895" table:style-name="c9">
            <text:p>79047</text:p>
          </table:table-cell>
          <table:table-cell office:value-type="string" table:style-name="c9">
            <text:p>2026-05-03 21:15</text:p>
          </table:table-cell>
          <table:table-cell office:value-type="float" office:value="78971.04472500001" table:style-name="c9">
            <text:p>78971</text:p>
          </table:table-cell>
          <table:table-cell office:value-type="float" office:value="-0.2961673662304376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22:15</text:p>
          </table:table-cell>
          <table:table-cell office:value-type="float" office:value="79298.979675" table:style-name="c9">
            <text:p>79299</text:p>
          </table:table-cell>
          <table:table-cell office:value-type="string" table:style-name="c9">
            <text:p>2026-05-03 22:45</text:p>
          </table:table-cell>
          <table:table-cell office:value-type="float" office:value="79228.36600000001" table:style-name="c9">
            <text:p>79228</text:p>
          </table:table-cell>
          <table:table-cell office:value-type="float" office:value="-0.2887693884240261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00</text:p>
          </table:table-cell>
          <table:table-cell office:value-type="float" office:value="79809.31471499999" table:style-name="c9">
            <text:p>79809</text:p>
          </table:table-cell>
          <table:table-cell office:value-type="string" table:style-name="c9">
            <text:p>2026-05-04 02:30</text:p>
          </table:table-cell>
          <table:table-cell office:value-type="float" office:value="79665.3474" table:style-name="c9">
            <text:p>79665</text:p>
          </table:table-cell>
          <table:table-cell office:value-type="float" office:value="-0.3799285152809362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00</text:p>
          </table:table-cell>
          <table:table-cell office:value-type="float" office:value="80256.25807499999" table:style-name="c9">
            <text:p>80256</text:p>
          </table:table-cell>
          <table:table-cell office:value-type="string" table:style-name="c9">
            <text:p>2026-05-04 15:30</text:p>
          </table:table-cell>
          <table:table-cell office:value-type="float" office:value="79660.519815" table:style-name="c9">
            <text:p>79661</text:p>
          </table:table-cell>
          <table:table-cell office:value-type="float" office:value="-0.9407112382496585" table:style-name="c10">
            <text:p>-0.9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3:45</text:p>
          </table:table-cell>
          <table:table-cell office:value-type="float" office:value="80950.99526999998" table:style-name="c9">
            <text:p>80951</text:p>
          </table:table-cell>
          <table:table-cell office:value-type="string" table:style-name="c9">
            <text:p>2026-05-05 04:15</text:p>
          </table:table-cell>
          <table:table-cell office:value-type="float" office:value="80767.83588000001" table:style-name="c9">
            <text:p>80768</text:p>
          </table:table-cell>
          <table:table-cell office:value-type="float" office:value="-0.42570729708100163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3:15</text:p>
          </table:table-cell>
          <table:table-cell office:value-type="float" office:value="81662.800995" table:style-name="c9">
            <text:p>81663</text:p>
          </table:table-cell>
          <table:table-cell office:value-type="string" table:style-name="c9">
            <text:p>2026-05-05 13:45</text:p>
          </table:table-cell>
          <table:table-cell office:value-type="float" office:value="81373.40294500001" table:style-name="c9">
            <text:p>81373</text:p>
          </table:table-cell>
          <table:table-cell office:value-type="float" office:value="-0.5535733246704755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1:30</text:p>
          </table:table-cell>
          <table:table-cell office:value-type="float" office:value="82725.34199999999" table:style-name="c9">
            <text:p>82725</text:p>
          </table:table-cell>
          <table:table-cell office:value-type="string" table:style-name="c9">
            <text:p>2026-05-06 12:00</text:p>
          </table:table-cell>
          <table:table-cell office:value-type="float" office:value="82481.61856" table:style-name="c9">
            <text:p>82482</text:p>
          </table:table-cell>
          <table:table-cell office:value-type="float" office:value="-0.4939286869329873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7:00</text:p>
          </table:table-cell>
          <table:table-cell office:value-type="float" office:value="81479.33931" table:style-name="c9">
            <text:p>81479</text:p>
          </table:table-cell>
          <table:table-cell office:value-type="string" table:style-name="c9">
            <text:p>2026-05-07 07:30</text:p>
          </table:table-cell>
          <table:table-cell office:value-type="float" office:value="81520.57932" table:style-name="c9">
            <text:p>81521</text:p>
          </table:table-cell>
          <table:table-cell office:value-type="float" office:value="-0.14938710732246285" table:style-name="c10">
            <text:p>-0.1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2:30</text:p>
          </table:table-cell>
          <table:table-cell office:value-type="float" office:value="81544.461855" table:style-name="c9">
            <text:p>81544</text:p>
          </table:table-cell>
          <table:table-cell office:value-type="string" table:style-name="c9">
            <text:p>2026-05-10 23:00</text:p>
          </table:table-cell>
          <table:table-cell office:value-type="float" office:value="82003.467755" table:style-name="c9">
            <text:p>82003</text:p>
          </table:table-cell>
          <table:table-cell office:value-type="float" office:value="0.36186512393994175" table:style-name="c11">
            <text:p>+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3:15</text:p>
          </table:table-cell>
          <table:table-cell office:value-type="float" office:value="82441.2" table:style-name="c9">
            <text:p>82441</text:p>
          </table:table-cell>
          <table:table-cell office:value-type="string" table:style-name="c9">
            <text:p>2026-05-10 23:45</text:p>
          </table:table-cell>
          <table:table-cell office:value-type="float" office:value="82346.66607" table:style-name="c9">
            <text:p>82347</text:p>
          </table:table-cell>
          <table:table-cell office:value-type="float" office:value="-0.3143390870995466" table:style-name="c10">
            <text:p>-0.3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15:30</text:p>
          </table:table-cell>
          <table:table-cell office:value-type="float" office:value="77592.246735" table:style-name="c9">
            <text:p>77592</text:p>
          </table:table-cell>
          <table:table-cell office:value-type="string" table:style-name="c9">
            <text:p>2026-05-20 16:00</text:p>
          </table:table-cell>
          <table:table-cell office:value-type="float" office:value="77416.72227500001" table:style-name="c9">
            <text:p>77417</text:p>
          </table:table-cell>
          <table:table-cell office:value-type="float" office:value="-0.4256617145727448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8:30</text:p>
          </table:table-cell>
          <table:table-cell office:value-type="float" office:value="78094.377675" table:style-name="c9">
            <text:p>78094</text:p>
          </table:table-cell>
          <table:table-cell office:value-type="string" table:style-name="c9">
            <text:p>2026-05-21 09:00</text:p>
          </table:table-cell>
          <table:table-cell office:value-type="float" office:value="77885.66768500001" table:style-name="c9">
            <text:p>77886</text:p>
          </table:table-cell>
          <table:table-cell office:value-type="float" office:value="-0.4666193016081399" table:style-name="c10">
            <text:p>-0.5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30</text:p>
          </table:table-cell>
          <table:table-cell office:value-type="float" office:value="78019.53026999999" table:style-name="c9">
            <text:p>78020</text:p>
          </table:table-cell>
          <table:table-cell office:value-type="string" table:style-name="c9">
            <text:p>2026-05-21 18:00</text:p>
          </table:table-cell>
          <table:table-cell office:value-type="float" office:value="77830.44531000001" table:style-name="c9">
            <text:p>77830</text:p>
          </table:table-cell>
          <table:table-cell office:value-type="float" office:value="-0.44177146283997937" table:style-name="c10">
            <text:p>-0.4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4 22:15</text:p>
          </table:table-cell>
          <table:table-cell office:value-type="float" office:value="77023.19235" table:style-name="c9">
            <text:p>77023</text:p>
          </table:table-cell>
          <table:table-cell office:value-type="string" table:style-name="c9">
            <text:p>2026-05-24 22:45</text:p>
          </table:table-cell>
          <table:table-cell office:value-type="float" office:value="76744.238685" table:style-name="c9">
            <text:p>76744</text:p>
          </table:table-cell>
          <table:table-cell office:value-type="float" office:value="-0.561344427489574" table:style-name="c10">
            <text:p>-0.6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0:30</text:p>
          </table:table-cell>
          <table:table-cell office:value-type="float" office:value="77268.35487" table:style-name="c9">
            <text:p>77268</text:p>
          </table:table-cell>
          <table:table-cell office:value-type="string" table:style-name="c9">
            <text:p>2026-05-26 11:00</text:p>
          </table:table-cell>
          <table:table-cell office:value-type="float" office:value="77391.285" table:style-name="c9">
            <text:p>77391</text:p>
          </table:table-cell>
          <table:table-cell office:value-type="float" office:value="-0.04112297818229527" table:style-name="c10">
            <text:p>-0.0</text:p>
          </table:table-cell>
        </table:table-row>
        <table:table-row>
          <table:table-cell office:value-type="string" table:style-name="c8">
            <text:p>BTC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4:30</text:p>
          </table:table-cell>
          <table:table-cell office:value-type="float" office:value="77997.3792" table:style-name="c9">
            <text:p>77997</text:p>
          </table:table-cell>
          <table:table-cell office:value-type="string" table:style-name="c9">
            <text:p>2026-05-26 15:00</text:p>
          </table:table-cell>
          <table:table-cell office:value-type="float" office:value="76869.555995" table:style-name="c9">
            <text:p>76870</text:p>
          </table:table-cell>
          <table:table-cell office:value-type="float" office:value="-1.6429852651177468" table:style-name="c10">
            <text:p>-1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0:45</text:p>
          </table:table-cell>
          <table:table-cell office:value-type="float" office:value="0.09740868" table:style-name="c1">
            <text:p>0.097409</text:p>
          </table:table-cell>
          <table:table-cell office:value-type="string" table:style-name="c1">
            <text:p>2026-03-05 11:15</text:p>
          </table:table-cell>
          <table:table-cell office:value-type="float" office:value="0.09747124" table:style-name="c1">
            <text:p>0.097471</text:p>
          </table:table-cell>
          <table:table-cell office:value-type="float" office:value="-0.13580412829740096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00</text:p>
          </table:table-cell>
          <table:table-cell office:value-type="float" office:value="0.09438716999999999" table:style-name="c1">
            <text:p>0.094387</text:p>
          </table:table-cell>
          <table:table-cell office:value-type="string" table:style-name="c1">
            <text:p>2026-03-05 21:30</text:p>
          </table:table-cell>
          <table:table-cell office:value-type="float" office:value="0.094502725" table:style-name="c1">
            <text:p>0.094503</text:p>
          </table:table-cell>
          <table:table-cell office:value-type="float" office:value="-0.0777181340165023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00</text:p>
          </table:table-cell>
          <table:table-cell office:value-type="float" office:value="0.09196596" table:style-name="c1">
            <text:p>0.091966</text:p>
          </table:table-cell>
          <table:table-cell office:value-type="string" table:style-name="c1">
            <text:p>2026-03-09 14:30</text:p>
          </table:table-cell>
          <table:table-cell office:value-type="float" office:value="0.0915542" table:style-name="c1">
            <text:p>0.091554</text:p>
          </table:table-cell>
          <table:table-cell office:value-type="float" office:value="-0.6467358637913256" table:style-name="c12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30</text:p>
          </table:table-cell>
          <table:table-cell office:value-type="float" office:value="0.09667831499999999" table:style-name="c1">
            <text:p>0.096678</text:p>
          </table:table-cell>
          <table:table-cell office:value-type="string" table:style-name="c1">
            <text:p>2026-03-10 14:00</text:p>
          </table:table-cell>
          <table:table-cell office:value-type="float" office:value="0.09605195000000001" table:style-name="c1">
            <text:p>0.096052</text:p>
          </table:table-cell>
          <table:table-cell office:value-type="float" office:value="-0.8464905993137761" table:style-name="c12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97938945" table:style-name="c1">
            <text:p>0.097939</text:p>
          </table:table-cell>
          <table:table-cell office:value-type="string" table:style-name="c1">
            <text:p>2026-03-10 15:15</text:p>
          </table:table-cell>
          <table:table-cell office:value-type="float" office:value="0.09837079" table:style-name="c1">
            <text:p>0.098371</text:p>
          </table:table-cell>
          <table:table-cell office:value-type="float" office:value="0.2401514441369601" table:style-name="c13">
            <text:p>+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0.09286641" table:style-name="c1">
            <text:p>0.092866</text:p>
          </table:table-cell>
          <table:table-cell office:value-type="string" table:style-name="c1">
            <text:p>2026-03-11 13:00</text:p>
          </table:table-cell>
          <table:table-cell office:value-type="float" office:value="0.092443755" table:style-name="c1">
            <text:p>0.092444</text:p>
          </table:table-cell>
          <table:table-cell office:value-type="float" office:value="-0.654111714068617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0.093696825" table:style-name="c1">
            <text:p>0.093697</text:p>
          </table:table-cell>
          <table:table-cell office:value-type="string" table:style-name="c1">
            <text:p>2026-03-11 14:15</text:p>
          </table:table-cell>
          <table:table-cell office:value-type="float" office:value="0.09297349" table:style-name="c1">
            <text:p>0.092973</text:p>
          </table:table-cell>
          <table:table-cell office:value-type="float" office:value="-0.9703519905930547" table:style-name="c12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0.093916935" table:style-name="c1">
            <text:p>0.093917</text:p>
          </table:table-cell>
          <table:table-cell office:value-type="string" table:style-name="c1">
            <text:p>2026-03-11 18:00</text:p>
          </table:table-cell>
          <table:table-cell office:value-type="float" office:value="0.093643155" table:style-name="c1">
            <text:p>0.093643</text:p>
          </table:table-cell>
          <table:table-cell office:value-type="float" office:value="-0.4908301861054176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1:00</text:p>
          </table:table-cell>
          <table:table-cell office:value-type="float" office:value="0.09436715999999999" table:style-name="c1">
            <text:p>0.094367</text:p>
          </table:table-cell>
          <table:table-cell office:value-type="string" table:style-name="c1">
            <text:p>2026-03-12 11:30</text:p>
          </table:table-cell>
          <table:table-cell office:value-type="float" office:value="0.094362795" table:style-name="c1">
            <text:p>0.094363</text:p>
          </table:table-cell>
          <table:table-cell office:value-type="float" office:value="-0.20451630334641369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1:00</text:p>
          </table:table-cell>
          <table:table-cell office:value-type="float" office:value="0.09686841" table:style-name="c1">
            <text:p>0.096868</text:p>
          </table:table-cell>
          <table:table-cell office:value-type="string" table:style-name="c1">
            <text:p>2026-03-13 01:30</text:p>
          </table:table-cell>
          <table:table-cell office:value-type="float" office:value="0.09675160000000001" table:style-name="c1">
            <text:p>0.096752</text:p>
          </table:table-cell>
          <table:table-cell office:value-type="float" office:value="-0.32024521554548935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45</text:p>
          </table:table-cell>
          <table:table-cell office:value-type="float" office:value="0.09854925" table:style-name="c1">
            <text:p>0.098549</text:p>
          </table:table-cell>
          <table:table-cell office:value-type="string" table:style-name="c1">
            <text:p>2026-03-13 10:15</text:p>
          </table:table-cell>
          <table:table-cell office:value-type="float" office:value="0.09864065500000001" table:style-name="c1">
            <text:p>0.098641</text:p>
          </table:table-cell>
          <table:table-cell office:value-type="float" office:value="-0.10733482938226624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45</text:p>
          </table:table-cell>
          <table:table-cell office:value-type="float" office:value="0.09902949" table:style-name="c1">
            <text:p>0.099029</text:p>
          </table:table-cell>
          <table:table-cell office:value-type="string" table:style-name="c1">
            <text:p>2026-03-13 11:15</text:p>
          </table:table-cell>
          <table:table-cell office:value-type="float" office:value="0.09953021000000001" table:style-name="c1">
            <text:p>0.09953</text:p>
          </table:table-cell>
          <table:table-cell office:value-type="float" office:value="0.30471641347442624" table:style-name="c13">
            <text:p>+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2:00</text:p>
          </table:table-cell>
          <table:table-cell office:value-type="float" office:value="0.100080015" table:style-name="c1">
            <text:p>0.10008</text:p>
          </table:table-cell>
          <table:table-cell office:value-type="string" table:style-name="c1">
            <text:p>2026-03-13 12:30</text:p>
          </table:table-cell>
          <table:table-cell office:value-type="float" office:value="0.10008993000000001" table:style-name="c1">
            <text:p>0.10009</text:p>
          </table:table-cell>
          <table:table-cell office:value-type="float" office:value="-0.19001273138296026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1:15</text:p>
          </table:table-cell>
          <table:table-cell office:value-type="float" office:value="0.09478737" table:style-name="c1">
            <text:p>0.094787</text:p>
          </table:table-cell>
          <table:table-cell office:value-type="string" table:style-name="c1">
            <text:p>2026-03-14 11:45</text:p>
          </table:table-cell>
          <table:table-cell office:value-type="float" office:value="0.09523236" table:style-name="c1">
            <text:p>0.095232</text:p>
          </table:table-cell>
          <table:table-cell office:value-type="float" office:value="0.26862282639554813" table:style-name="c13">
            <text:p>+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2:00</text:p>
          </table:table-cell>
          <table:table-cell office:value-type="float" office:value="0.09531763499999998" table:style-name="c1">
            <text:p>0.095318</text:p>
          </table:table-cell>
          <table:table-cell office:value-type="string" table:style-name="c1">
            <text:p>2026-03-14 12:30</text:p>
          </table:table-cell>
          <table:table-cell office:value-type="float" office:value="0.094922515" table:style-name="c1">
            <text:p>0.094923</text:p>
          </table:table-cell>
          <table:table-cell office:value-type="float" office:value="-0.6136011531181929" table:style-name="c12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5 02:45</text:p>
          </table:table-cell>
          <table:table-cell office:value-type="float" office:value="0.097081435" table:style-name="c1">
            <text:p>0.097081</text:p>
          </table:table-cell>
          <table:table-cell office:value-type="float" office:value="0.5596570473174634" table:style-name="c13">
            <text:p>+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00</text:p>
          </table:table-cell>
          <table:table-cell office:value-type="float" office:value="0.09650823" table:style-name="c1">
            <text:p>0.096508</text:p>
          </table:table-cell>
          <table:table-cell office:value-type="string" table:style-name="c1">
            <text:p>2026-03-15 09:30</text:p>
          </table:table-cell>
          <table:table-cell office:value-type="float" office:value="0.09629183" table:style-name="c1">
            <text:p>0.096292</text:p>
          </table:table-cell>
          <table:table-cell office:value-type="float" office:value="-0.42368134631627363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0.09692843999999999" table:style-name="c1">
            <text:p>0.096928</text:p>
          </table:table-cell>
          <table:table-cell office:value-type="string" table:style-name="c1">
            <text:p>2026-03-15 23:15</text:p>
          </table:table-cell>
          <table:table-cell office:value-type="float" office:value="0.09765115" table:style-name="c1">
            <text:p>0.097651</text:p>
          </table:table-cell>
          <table:table-cell office:value-type="float" office:value="0.5442214391875311" table:style-name="c13">
            <text:p>+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9940968" table:style-name="c1">
            <text:p>0.09941</text:p>
          </table:table-cell>
          <table:table-cell office:value-type="string" table:style-name="c1">
            <text:p>2026-03-16 04:00</text:p>
          </table:table-cell>
          <table:table-cell office:value-type="float" office:value="0.09993001" table:style-name="c1">
            <text:p>0.09993</text:p>
          </table:table-cell>
          <table:table-cell office:value-type="float" office:value="0.32247353578647164" table:style-name="c13">
            <text:p>+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15</text:p>
          </table:table-cell>
          <table:table-cell office:value-type="float" office:value="0.10132063499999999" table:style-name="c1">
            <text:p>0.10132</text:p>
          </table:table-cell>
          <table:table-cell office:value-type="string" table:style-name="c1">
            <text:p>2026-03-16 14:45</text:p>
          </table:table-cell>
          <table:table-cell office:value-type="float" office:value="0.10085954500000001" table:style-name="c1">
            <text:p>0.10086</text:p>
          </table:table-cell>
          <table:table-cell office:value-type="float" office:value="-0.6540703485079735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0.10319157" table:style-name="c1">
            <text:p>0.10319</text:p>
          </table:table-cell>
          <table:table-cell office:value-type="string" table:style-name="c1">
            <text:p>2026-03-16 15:30</text:p>
          </table:table-cell>
          <table:table-cell office:value-type="float" office:value="0.10159917500000001" table:style-name="c1">
            <text:p>0.1016</text:p>
          </table:table-cell>
          <table:table-cell office:value-type="float" office:value="-1.739959718439199" table:style-name="c12">
            <text:p>-1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0.102981465" table:style-name="c1">
            <text:p>0.10298</text:p>
          </table:table-cell>
          <table:table-cell office:value-type="string" table:style-name="c1">
            <text:p>2026-03-16 22:45</text:p>
          </table:table-cell>
          <table:table-cell office:value-type="float" office:value="0.103158395" table:style-name="c1">
            <text:p>0.10316</text:p>
          </table:table-cell>
          <table:table-cell office:value-type="float" office:value="-0.028435827364658994" table:style-name="c12">
            <text:p>-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3:00</text:p>
          </table:table-cell>
          <table:table-cell office:value-type="float" office:value="0.103301625" table:style-name="c1">
            <text:p>0.1033</text:p>
          </table:table-cell>
          <table:table-cell office:value-type="string" table:style-name="c1">
            <text:p>2026-03-16 23:30</text:p>
          </table:table-cell>
          <table:table-cell office:value-type="float" office:value="0.10280857" table:style-name="c1">
            <text:p>0.10281</text:p>
          </table:table-cell>
          <table:table-cell office:value-type="float" office:value="-0.6762423451034727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0.10389192" table:style-name="c1">
            <text:p>0.10389</text:p>
          </table:table-cell>
          <table:table-cell office:value-type="string" table:style-name="c1">
            <text:p>2026-03-17 00:45</text:p>
          </table:table-cell>
          <table:table-cell office:value-type="float" office:value="0.10295849500000001" table:style-name="c1">
            <text:p>0.10296</text:p>
          </table:table-cell>
          <table:table-cell office:value-type="float" office:value="-1.0965617263642757" table:style-name="c12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2:45</text:p>
          </table:table-cell>
          <table:table-cell office:value-type="float" office:value="0.10427210999999999" table:style-name="c1">
            <text:p>0.10427</text:p>
          </table:table-cell>
          <table:table-cell office:value-type="string" table:style-name="c1">
            <text:p>2026-03-17 03:15</text:p>
          </table:table-cell>
          <table:table-cell office:value-type="float" office:value="0.102678635" table:style-name="c1">
            <text:p>0.10268</text:p>
          </table:table-cell>
          <table:table-cell office:value-type="float" office:value="-1.725034231459388" table:style-name="c12">
            <text:p>-1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0.09532764" table:style-name="c1">
            <text:p>0.095328</text:p>
          </table:table-cell>
          <table:table-cell office:value-type="string" table:style-name="c1">
            <text:p>2026-03-24 10:15</text:p>
          </table:table-cell>
          <table:table-cell office:value-type="float" office:value="0.094502725" table:style-name="c1">
            <text:p>0.094503</text:p>
          </table:table-cell>
          <table:table-cell office:value-type="float" office:value="-1.063517304398831" table:style-name="c12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094437195" table:style-name="c1">
            <text:p>0.094437</text:p>
          </table:table-cell>
          <table:table-cell office:value-type="string" table:style-name="c1">
            <text:p>2026-03-24 21:00</text:p>
          </table:table-cell>
          <table:table-cell office:value-type="float" office:value="0.094542705" table:style-name="c1">
            <text:p>0.094543</text:p>
          </table:table-cell>
          <table:table-cell office:value-type="float" office:value="-0.08839829189652981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3:30</text:p>
          </table:table-cell>
          <table:table-cell office:value-type="float" office:value="0.09531763499999998" table:style-name="c1">
            <text:p>0.095318</text:p>
          </table:table-cell>
          <table:table-cell office:value-type="string" table:style-name="c1">
            <text:p>2026-03-25 00:00</text:p>
          </table:table-cell>
          <table:table-cell office:value-type="float" office:value="0.09506244500000001" table:style-name="c1">
            <text:p>0.095062</text:p>
          </table:table-cell>
          <table:table-cell office:value-type="float" office:value="-0.4670907199438745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15</text:p>
          </table:table-cell>
          <table:table-cell office:value-type="float" office:value="0.096658305" table:style-name="c1">
            <text:p>0.096658</text:p>
          </table:table-cell>
          <table:table-cell office:value-type="string" table:style-name="c1">
            <text:p>2026-03-25 05:45</text:p>
          </table:table-cell>
          <table:table-cell office:value-type="float" office:value="0.096321815" table:style-name="c1">
            <text:p>0.096322</text:p>
          </table:table-cell>
          <table:table-cell office:value-type="float" office:value="-0.5473273177974525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6:30</text:p>
          </table:table-cell>
          <table:table-cell office:value-type="float" office:value="0.09745870499999999" table:style-name="c1">
            <text:p>0.097459</text:p>
          </table:table-cell>
          <table:table-cell office:value-type="string" table:style-name="c1">
            <text:p>2026-03-25 07:00</text:p>
          </table:table-cell>
          <table:table-cell office:value-type="float" office:value="0.096921515" table:style-name="c1">
            <text:p>0.096922</text:p>
          </table:table-cell>
          <table:table-cell office:value-type="float" office:value="-0.7499957120146394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1:30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3-30 12:00</text:p>
          </table:table-cell>
          <table:table-cell office:value-type="float" office:value="0.09284355500000001" table:style-name="c1">
            <text:p>0.092844</text:p>
          </table:table-cell>
          <table:table-cell office:value-type="float" office:value="-0.43898634046231066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0.09200598" table:style-name="c1">
            <text:p>0.092006</text:p>
          </table:table-cell>
          <table:table-cell office:value-type="string" table:style-name="c1">
            <text:p>2026-03-31 02:00</text:p>
          </table:table-cell>
          <table:table-cell office:value-type="float" office:value="0.09217389000000001" table:style-name="c1">
            <text:p>0.092174</text:p>
          </table:table-cell>
          <table:table-cell office:value-type="float" office:value="-0.017765808385494797" table:style-name="c12">
            <text:p>-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9308651999999999" table:style-name="c1">
            <text:p>0.093087</text:p>
          </table:table-cell>
          <table:table-cell office:value-type="string" table:style-name="c1">
            <text:p>2026-04-01 06:00</text:p>
          </table:table-cell>
          <table:table-cell office:value-type="float" office:value="0.09316339500000001" table:style-name="c1">
            <text:p>0.093163</text:p>
          </table:table-cell>
          <table:table-cell office:value-type="float" office:value="-0.11748062620127175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0.094016985" table:style-name="c1">
            <text:p>0.094017</text:p>
          </table:table-cell>
          <table:table-cell office:value-type="string" table:style-name="c1">
            <text:p>2026-04-01 06:45</text:p>
          </table:table-cell>
          <table:table-cell office:value-type="float" office:value="0.09428283500000001" table:style-name="c1">
            <text:p>0.094283</text:p>
          </table:table-cell>
          <table:table-cell office:value-type="float" office:value="0.08230280181291683" table:style-name="c13">
            <text:p>+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15</text:p>
          </table:table-cell>
          <table:table-cell office:value-type="float" office:value="0.09188592" table:style-name="c1">
            <text:p>0.091886</text:p>
          </table:table-cell>
          <table:table-cell office:value-type="string" table:style-name="c1">
            <text:p>2026-04-03 15:45</text:p>
          </table:table-cell>
          <table:table-cell office:value-type="float" office:value="0.09149423" table:style-name="c1">
            <text:p>0.091494</text:p>
          </table:table-cell>
          <table:table-cell office:value-type="float" office:value="-0.6253264545536541" table:style-name="c12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3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4-04 18:00</text:p>
          </table:table-cell>
          <table:table-cell office:value-type="float" office:value="0.092203875" table:style-name="c1">
            <text:p>0.092204</text:p>
          </table:table-cell>
          <table:table-cell office:value-type="float" office:value="-0.4615014420549235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0.09309652499999999" table:style-name="c1">
            <text:p>0.093097</text:p>
          </table:table-cell>
          <table:table-cell office:value-type="string" table:style-name="c1">
            <text:p>2026-04-04 19:45</text:p>
          </table:table-cell>
          <table:table-cell office:value-type="float" office:value="0.092203875" table:style-name="c1">
            <text:p>0.092204</text:p>
          </table:table-cell>
          <table:table-cell office:value-type="float" office:value="-1.1568267946896693" table:style-name="c12">
            <text:p>-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00</text:p>
          </table:table-cell>
          <table:table-cell office:value-type="float" office:value="0.09282639" table:style-name="c1">
            <text:p>0.092826</text:p>
          </table:table-cell>
          <table:table-cell office:value-type="string" table:style-name="c1">
            <text:p>2026-04-06 01:30</text:p>
          </table:table-cell>
          <table:table-cell office:value-type="float" office:value="0.092143905" table:style-name="c1">
            <text:p>0.092144</text:p>
          </table:table-cell>
          <table:table-cell office:value-type="float" office:value="-0.9336576226814497" table:style-name="c12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0.09316656" table:style-name="c1">
            <text:p>0.093167</text:p>
          </table:table-cell>
          <table:table-cell office:value-type="string" table:style-name="c1">
            <text:p>2026-04-06 02:45</text:p>
          </table:table-cell>
          <table:table-cell office:value-type="float" office:value="0.092863545" table:style-name="c1">
            <text:p>0.092864</text:p>
          </table:table-cell>
          <table:table-cell office:value-type="float" office:value="-0.5244899312102924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4-06 10:15</text:p>
          </table:table-cell>
          <table:table-cell office:value-type="float" office:value="0.093103425" table:style-name="c1">
            <text:p>0.093103</text:p>
          </table:table-cell>
          <table:table-cell office:value-type="float" office:value="-0.1603141093128091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15</text:p>
          </table:table-cell>
          <table:table-cell office:value-type="float" office:value="0.093436695" table:style-name="c1">
            <text:p>0.093437</text:p>
          </table:table-cell>
          <table:table-cell office:value-type="string" table:style-name="c1">
            <text:p>2026-04-07 22:45</text:p>
          </table:table-cell>
          <table:table-cell office:value-type="float" office:value="0.09372311500000001" table:style-name="c1">
            <text:p>0.093723</text:p>
          </table:table-cell>
          <table:table-cell office:value-type="float" office:value="0.10602632414919988" table:style-name="c13">
            <text:p>+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0.09505750499999999" table:style-name="c1">
            <text:p>0.095058</text:p>
          </table:table-cell>
          <table:table-cell office:value-type="string" table:style-name="c1">
            <text:p>2026-04-07 23:30</text:p>
          </table:table-cell>
          <table:table-cell office:value-type="float" office:value="0.09597199" table:style-name="c1">
            <text:p>0.095972</text:p>
          </table:table-cell>
          <table:table-cell office:value-type="float" office:value="0.7602103505557123" table:style-name="c13">
            <text:p>+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0.09388692" table:style-name="c1">
            <text:p>0.093887</text:p>
          </table:table-cell>
          <table:table-cell office:value-type="string" table:style-name="c1">
            <text:p>2026-04-10 15:00</text:p>
          </table:table-cell>
          <table:table-cell office:value-type="float" office:value="0.09394300500000001" table:style-name="c1">
            <text:p>0.093943</text:p>
          </table:table-cell>
          <table:table-cell office:value-type="float" office:value="-0.1402826581114791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5:15</text:p>
          </table:table-cell>
          <table:table-cell office:value-type="float" office:value="0.094257105" table:style-name="c1">
            <text:p>0.094257</text:p>
          </table:table-cell>
          <table:table-cell office:value-type="string" table:style-name="c1">
            <text:p>2026-04-10 15:45</text:p>
          </table:table-cell>
          <table:table-cell office:value-type="float" office:value="0.09351322000000001" table:style-name="c1">
            <text:p>0.093513</text:p>
          </table:table-cell>
          <table:table-cell office:value-type="float" office:value="-0.9875307827245328" table:style-name="c12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0.0952476" table:style-name="c1">
            <text:p>0.095248</text:p>
          </table:table-cell>
          <table:table-cell office:value-type="string" table:style-name="c1">
            <text:p>2026-04-10 19:45</text:p>
          </table:table-cell>
          <table:table-cell office:value-type="float" office:value="0.094922515" table:style-name="c1">
            <text:p>0.094923</text:p>
          </table:table-cell>
          <table:table-cell office:value-type="float" office:value="-0.5405229186719596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0.09350673" table:style-name="c1">
            <text:p>0.093507</text:p>
          </table:table-cell>
          <table:table-cell office:value-type="string" table:style-name="c1">
            <text:p>2026-04-11 17:15</text:p>
          </table:table-cell>
          <table:table-cell office:value-type="float" office:value="0.093103425" table:style-name="c1">
            <text:p>0.093103</text:p>
          </table:table-cell>
          <table:table-cell office:value-type="float" office:value="-0.630349009718334" table:style-name="c12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0.09394694999999999" table:style-name="c1">
            <text:p>0.093947</text:p>
          </table:table-cell>
          <table:table-cell office:value-type="string" table:style-name="c1">
            <text:p>2026-04-11 19:15</text:p>
          </table:table-cell>
          <table:table-cell office:value-type="float" office:value="0.09421287" table:style-name="c1">
            <text:p>0.094213</text:p>
          </table:table-cell>
          <table:table-cell office:value-type="float" office:value="0.082587537828549" table:style-name="c13">
            <text:p>+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30</text:p>
          </table:table-cell>
          <table:table-cell office:value-type="float" office:value="0.09445720499999999" table:style-name="c1">
            <text:p>0.094457</text:p>
          </table:table-cell>
          <table:table-cell office:value-type="string" table:style-name="c1">
            <text:p>2026-04-11 20:00</text:p>
          </table:table-cell>
          <table:table-cell office:value-type="float" office:value="0.09465265" table:style-name="c1">
            <text:p>0.094653</text:p>
          </table:table-cell>
          <table:table-cell office:value-type="float" office:value="0.006600187513505773" table:style-name="c13">
            <text:p>+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094016985" table:style-name="c1">
            <text:p>0.094017</text:p>
          </table:table-cell>
          <table:table-cell office:value-type="string" table:style-name="c1">
            <text:p>2026-04-13 23:00</text:p>
          </table:table-cell>
          <table:table-cell office:value-type="float" office:value="0.09401297000000002" table:style-name="c1">
            <text:p>0.094013</text:p>
          </table:table-cell>
          <table:table-cell office:value-type="float" office:value="-0.20416196821241295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9:00</text:p>
          </table:table-cell>
          <table:table-cell office:value-type="float" office:value="0.09441718499999999" table:style-name="c1">
            <text:p>0.094417</text:p>
          </table:table-cell>
          <table:table-cell office:value-type="string" table:style-name="c1">
            <text:p>2026-04-14 09:30</text:p>
          </table:table-cell>
          <table:table-cell office:value-type="float" office:value="0.094362795" table:style-name="c1">
            <text:p>0.094363</text:p>
          </table:table-cell>
          <table:table-cell office:value-type="float" office:value="-0.2573908840906358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1:15</text:p>
          </table:table-cell>
          <table:table-cell office:value-type="float" office:value="0.095297625" table:style-name="c1">
            <text:p>0.095298</text:p>
          </table:table-cell>
          <table:table-cell office:value-type="string" table:style-name="c1">
            <text:p>2026-04-14 11:45</text:p>
          </table:table-cell>
          <table:table-cell office:value-type="float" office:value="0.094502725" table:style-name="c1">
            <text:p>0.094503</text:p>
          </table:table-cell>
          <table:table-cell office:value-type="float" office:value="-1.0323562074868065" table:style-name="c12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0.09549772499999999" table:style-name="c1">
            <text:p>0.095498</text:p>
          </table:table-cell>
          <table:table-cell office:value-type="string" table:style-name="c1">
            <text:p>2026-04-14 14:15</text:p>
          </table:table-cell>
          <table:table-cell office:value-type="float" office:value="0.097221365" table:style-name="c1">
            <text:p>0.097221</text:p>
          </table:table-cell>
          <table:table-cell office:value-type="float" office:value="1.601393636722781" table:style-name="c13">
            <text:p>+1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30</text:p>
          </table:table-cell>
          <table:table-cell office:value-type="float" office:value="0.09670833" table:style-name="c1">
            <text:p>0.096708</text:p>
          </table:table-cell>
          <table:table-cell office:value-type="string" table:style-name="c1">
            <text:p>2026-04-14 15:00</text:p>
          </table:table-cell>
          <table:table-cell office:value-type="float" office:value="0.09603196" table:style-name="c1">
            <text:p>0.096032</text:p>
          </table:table-cell>
          <table:table-cell office:value-type="float" office:value="-0.8978935817007705" table:style-name="c12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0.09409702499999999" table:style-name="c1">
            <text:p>0.094097</text:p>
          </table:table-cell>
          <table:table-cell office:value-type="string" table:style-name="c1">
            <text:p>2026-04-15 15:00</text:p>
          </table:table-cell>
          <table:table-cell office:value-type="float" office:value="0.09391302000000001" table:style-name="c1">
            <text:p>0.093913</text:p>
          </table:table-cell>
          <table:table-cell office:value-type="float" office:value="-0.3950572581651435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15</text:p>
          </table:table-cell>
          <table:table-cell office:value-type="float" office:value="0.094317135" table:style-name="c1">
            <text:p>0.094317</text:p>
          </table:table-cell>
          <table:table-cell office:value-type="string" table:style-name="c1">
            <text:p>2026-04-15 16:45</text:p>
          </table:table-cell>
          <table:table-cell office:value-type="float" office:value="0.09428283500000001" table:style-name="c1">
            <text:p>0.094283</text:p>
          </table:table-cell>
          <table:table-cell office:value-type="float" office:value="-0.23619397171571466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09640818" table:style-name="c1">
            <text:p>0.096408</text:p>
          </table:table-cell>
          <table:table-cell office:value-type="string" table:style-name="c1">
            <text:p>2026-04-15 20:15</text:p>
          </table:table-cell>
          <table:table-cell office:value-type="float" office:value="0.095682135" table:style-name="c1">
            <text:p>0.095682</text:p>
          </table:table-cell>
          <table:table-cell office:value-type="float" office:value="-0.9514893734795082" table:style-name="c12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09646821" table:style-name="c1">
            <text:p>0.096468</text:p>
          </table:table-cell>
          <table:table-cell office:value-type="string" table:style-name="c1">
            <text:p>2026-04-16 03:15</text:p>
          </table:table-cell>
          <table:table-cell office:value-type="float" office:value="0.09633181" table:style-name="c1">
            <text:p>0.096332</text:p>
          </table:table-cell>
          <table:table-cell office:value-type="float" office:value="-0.34101108353725706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30</text:p>
          </table:table-cell>
          <table:table-cell office:value-type="float" office:value="0.09645820499999999" table:style-name="c1">
            <text:p>0.096458</text:p>
          </table:table-cell>
          <table:table-cell office:value-type="string" table:style-name="c1">
            <text:p>2026-04-16 04:00</text:p>
          </table:table-cell>
          <table:table-cell office:value-type="float" office:value="0.096981485" table:style-name="c1">
            <text:p>0.096981</text:p>
          </table:table-cell>
          <table:table-cell office:value-type="float" office:value="0.3415095807401958" table:style-name="c13">
            <text:p>+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15</text:p>
          </table:table-cell>
          <table:table-cell office:value-type="float" office:value="0.097598775" table:style-name="c1">
            <text:p>0.097599</text:p>
          </table:table-cell>
          <table:table-cell office:value-type="string" table:style-name="c1">
            <text:p>2026-04-16 04:45</text:p>
          </table:table-cell>
          <table:table-cell office:value-type="float" office:value="0.097401275" table:style-name="c1">
            <text:p>0.097401</text:p>
          </table:table-cell>
          <table:table-cell office:value-type="float" office:value="-0.40185458139716523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9735865499999999" table:style-name="c1">
            <text:p>0.097359</text:p>
          </table:table-cell>
          <table:table-cell office:value-type="string" table:style-name="c1">
            <text:p>2026-04-16 16:30</text:p>
          </table:table-cell>
          <table:table-cell office:value-type="float" office:value="0.09802096500000002" table:style-name="c1">
            <text:p>0.098021</text:p>
          </table:table-cell>
          <table:table-cell office:value-type="float" office:value="0.479018625478167" table:style-name="c13">
            <text:p>+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098179065" table:style-name="c1">
            <text:p>0.098179</text:p>
          </table:table-cell>
          <table:table-cell office:value-type="string" table:style-name="c1">
            <text:p>2026-04-17 07:45</text:p>
          </table:table-cell>
          <table:table-cell office:value-type="float" office:value="0.09803096" table:style-name="c1">
            <text:p>0.098031</text:p>
          </table:table-cell>
          <table:table-cell office:value-type="float" office:value="-0.3504503623455779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00</text:p>
          </table:table-cell>
          <table:table-cell office:value-type="float" office:value="0.09812904" table:style-name="c1">
            <text:p>0.098129</text:p>
          </table:table-cell>
          <table:table-cell office:value-type="string" table:style-name="c1">
            <text:p>2026-04-17 08:30</text:p>
          </table:table-cell>
          <table:table-cell office:value-type="float" office:value="0.09807094000000001" table:style-name="c1">
            <text:p>0.098071</text:p>
          </table:table-cell>
          <table:table-cell office:value-type="float" office:value="-0.2589893970836754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45</text:p>
          </table:table-cell>
          <table:table-cell office:value-type="float" office:value="0.09837916499999999" table:style-name="c1">
            <text:p>0.098379</text:p>
          </table:table-cell>
          <table:table-cell office:value-type="string" table:style-name="c1">
            <text:p>2026-04-17 09:15</text:p>
          </table:table-cell>
          <table:table-cell office:value-type="float" office:value="0.098460745" table:style-name="c1">
            <text:p>0.098461</text:p>
          </table:table-cell>
          <table:table-cell office:value-type="float" office:value="-0.1171417029764088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30</text:p>
          </table:table-cell>
          <table:table-cell office:value-type="float" office:value="0.09953974499999999" table:style-name="c1">
            <text:p>0.09954</text:p>
          </table:table-cell>
          <table:table-cell office:value-type="string" table:style-name="c1">
            <text:p>2026-04-17 10:00</text:p>
          </table:table-cell>
          <table:table-cell office:value-type="float" office:value="0.09887053999999999" table:style-name="c1">
            <text:p>0.098871</text:p>
          </table:table-cell>
          <table:table-cell office:value-type="float" office:value="-0.8708553648193451" table:style-name="c12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0.10017005999999999" table:style-name="c1">
            <text:p>0.10017</text:p>
          </table:table-cell>
          <table:table-cell office:value-type="string" table:style-name="c1">
            <text:p>2026-04-17 13:30</text:p>
          </table:table-cell>
          <table:table-cell office:value-type="float" office:value="0.10095949500000001" table:style-name="c1">
            <text:p>0.10096</text:p>
          </table:table-cell>
          <table:table-cell office:value-type="float" office:value="0.5866193646035578" table:style-name="c13">
            <text:p>+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0.102020985" table:style-name="c1">
            <text:p>0.10202</text:p>
          </table:table-cell>
          <table:table-cell office:value-type="string" table:style-name="c1">
            <text:p>2026-04-17 17:30</text:p>
          </table:table-cell>
          <table:table-cell office:value-type="float" office:value="0.100459745" table:style-name="c1">
            <text:p>0.10046</text:p>
          </table:table-cell>
          <table:table-cell office:value-type="float" office:value="-1.7271535167544094" table:style-name="c12">
            <text:p>-1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1:15</text:p>
          </table:table-cell>
          <table:table-cell office:value-type="float" office:value="0.09584789999999999" table:style-name="c1">
            <text:p>0.095848</text:p>
          </table:table-cell>
          <table:table-cell office:value-type="string" table:style-name="c1">
            <text:p>2026-04-21 01:45</text:p>
          </table:table-cell>
          <table:table-cell office:value-type="float" office:value="0.09569213000000001" table:style-name="c1">
            <text:p>0.095692</text:p>
          </table:table-cell>
          <table:table-cell office:value-type="float" office:value="-0.3620930326798777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0.096598275" table:style-name="c1">
            <text:p>0.096598</text:p>
          </table:table-cell>
          <table:table-cell office:value-type="string" table:style-name="c1">
            <text:p>2026-04-22 03:30</text:p>
          </table:table-cell>
          <table:table-cell office:value-type="float" office:value="0.09631182" table:style-name="c1">
            <text:p>0.096312</text:p>
          </table:table-cell>
          <table:table-cell office:value-type="float" office:value="-0.49584977390122464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09726860999999999" table:style-name="c1">
            <text:p>0.097269</text:p>
          </table:table-cell>
          <table:table-cell office:value-type="string" table:style-name="c1">
            <text:p>2026-04-22 06:00</text:p>
          </table:table-cell>
          <table:table-cell office:value-type="float" office:value="0.097101425" table:style-name="c1">
            <text:p>0.097101</text:p>
          </table:table-cell>
          <table:table-cell office:value-type="float" office:value="-0.37143611754603123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7:15</text:p>
          </table:table-cell>
          <table:table-cell office:value-type="float" office:value="0.097818885" table:style-name="c1">
            <text:p>0.097819</text:p>
          </table:table-cell>
          <table:table-cell office:value-type="string" table:style-name="c1">
            <text:p>2026-04-22 07:45</text:p>
          </table:table-cell>
          <table:table-cell office:value-type="float" office:value="0.09739128000000001" table:style-name="c1">
            <text:p>0.097391</text:p>
          </table:table-cell>
          <table:table-cell office:value-type="float" office:value="-0.6361656736528887" table:style-name="c12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4:45</text:p>
          </table:table-cell>
          <table:table-cell office:value-type="float" office:value="0.09592794" table:style-name="c1">
            <text:p>0.095928</text:p>
          </table:table-cell>
          <table:table-cell office:value-type="string" table:style-name="c1">
            <text:p>2026-04-23 05:15</text:p>
          </table:table-cell>
          <table:table-cell office:value-type="float" office:value="0.096041955" table:style-name="c1">
            <text:p>0.096042</text:p>
          </table:table-cell>
          <table:table-cell office:value-type="float" office:value="-0.08128275041139332" table:style-name="c12">
            <text:p>-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45</text:p>
          </table:table-cell>
          <table:table-cell office:value-type="float" office:value="0.09760877999999999" table:style-name="c1">
            <text:p>0.097609</text:p>
          </table:table-cell>
          <table:table-cell office:value-type="string" table:style-name="c1">
            <text:p>2026-04-23 16:15</text:p>
          </table:table-cell>
          <table:table-cell office:value-type="float" office:value="0.0971514" table:style-name="c1">
            <text:p>0.097151</text:p>
          </table:table-cell>
          <table:table-cell office:value-type="float" office:value="-0.6675481945373929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2:00</text:p>
          </table:table-cell>
          <table:table-cell office:value-type="float" office:value="0.097978965" table:style-name="c1">
            <text:p>0.097979</text:p>
          </table:table-cell>
          <table:table-cell office:value-type="string" table:style-name="c1">
            <text:p>2026-04-24 02:30</text:p>
          </table:table-cell>
          <table:table-cell office:value-type="float" office:value="0.097681135" table:style-name="c1">
            <text:p>0.097681</text:p>
          </table:table-cell>
          <table:table-cell office:value-type="float" office:value="-0.5032657661417361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00</text:p>
          </table:table-cell>
          <table:table-cell office:value-type="float" office:value="0.097898925" table:style-name="c1">
            <text:p>0.097899</text:p>
          </table:table-cell>
          <table:table-cell office:value-type="string" table:style-name="c1">
            <text:p>2026-04-24 11:30</text:p>
          </table:table-cell>
          <table:table-cell office:value-type="float" office:value="0.09847074" table:style-name="c1">
            <text:p>0.098471</text:p>
          </table:table-cell>
          <table:table-cell office:value-type="float" office:value="0.383019518079486" table:style-name="c13">
            <text:p>+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9999997499999999" table:style-name="c1">
            <text:p>0.1</text:p>
          </table:table-cell>
          <table:table-cell office:value-type="string" table:style-name="c1">
            <text:p>2026-04-27 01:30</text:p>
          </table:table-cell>
          <table:table-cell office:value-type="float" office:value="0.099580185" table:style-name="c1">
            <text:p>0.09958</text:p>
          </table:table-cell>
          <table:table-cell office:value-type="float" office:value="-0.6188509445277157" table:style-name="c12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4:45</text:p>
          </table:table-cell>
          <table:table-cell office:value-type="float" office:value="0.099139545" table:style-name="c1">
            <text:p>0.09914</text:p>
          </table:table-cell>
          <table:table-cell office:value-type="string" table:style-name="c1">
            <text:p>2026-04-27 15:15</text:p>
          </table:table-cell>
          <table:table-cell office:value-type="float" office:value="0.098100925" table:style-name="c1">
            <text:p>0.098101</text:p>
          </table:table-cell>
          <table:table-cell office:value-type="float" office:value="-1.245440201561332" table:style-name="c12">
            <text:p>-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8 01:15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4-28 01:45</text:p>
          </table:table-cell>
          <table:table-cell office:value-type="float" office:value="0.09913041000000002" table:style-name="c1">
            <text:p>0.09913</text:p>
          </table:table-cell>
          <table:table-cell office:value-type="float" office:value="-0.5203149829411058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8 04:15</text:p>
          </table:table-cell>
          <table:table-cell office:value-type="float" office:value="0.100120035" table:style-name="c1">
            <text:p>0.10012</text:p>
          </table:table-cell>
          <table:table-cell office:value-type="string" table:style-name="c1">
            <text:p>2026-04-28 04:45</text:p>
          </table:table-cell>
          <table:table-cell office:value-type="float" office:value="0.09945025" table:style-name="c1">
            <text:p>0.09945</text:p>
          </table:table-cell>
          <table:table-cell office:value-type="float" office:value="-0.8675446924783836" table:style-name="c12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0.10143068999999999" table:style-name="c1">
            <text:p>0.10143</text:p>
          </table:table-cell>
          <table:table-cell office:value-type="string" table:style-name="c1">
            <text:p>2026-04-29 04:15</text:p>
          </table:table-cell>
          <table:table-cell office:value-type="float" office:value="0.101299325" table:style-name="c1">
            <text:p>0.1013</text:p>
          </table:table-cell>
          <table:table-cell office:value-type="float" office:value="-0.3291531889164756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0.102361155" table:style-name="c1">
            <text:p>0.10236</text:p>
          </table:table-cell>
          <table:table-cell office:value-type="string" table:style-name="c1">
            <text:p>2026-04-29 05:15</text:p>
          </table:table-cell>
          <table:table-cell office:value-type="float" office:value="0.10181906500000001" table:style-name="c1">
            <text:p>0.10182</text:p>
          </table:table-cell>
          <table:table-cell office:value-type="float" office:value="-0.7284270199324983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6:00</text:p>
          </table:table-cell>
          <table:table-cell office:value-type="float" office:value="0.102361155" table:style-name="c1">
            <text:p>0.10236</text:p>
          </table:table-cell>
          <table:table-cell office:value-type="string" table:style-name="c1">
            <text:p>2026-04-29 06:30</text:p>
          </table:table-cell>
          <table:table-cell office:value-type="float" office:value="0.10230882000000001" table:style-name="c1">
            <text:p>0.10231</text:p>
          </table:table-cell>
          <table:table-cell office:value-type="float" office:value="-0.25092558908698104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7:45</text:p>
          </table:table-cell>
          <table:table-cell office:value-type="float" office:value="0.10453224" table:style-name="c1">
            <text:p>0.10453</text:p>
          </table:table-cell>
          <table:table-cell office:value-type="string" table:style-name="c1">
            <text:p>2026-04-29 08:15</text:p>
          </table:table-cell>
          <table:table-cell office:value-type="float" office:value="0.10526734" table:style-name="c1">
            <text:p>0.10527</text:p>
          </table:table-cell>
          <table:table-cell office:value-type="float" office:value="0.5019222656474254" table:style-name="c13">
            <text:p>+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0951472999999999" table:style-name="c1">
            <text:p>0.10951</text:p>
          </table:table-cell>
          <table:table-cell office:value-type="string" table:style-name="c1">
            <text:p>2026-04-29 10:30</text:p>
          </table:table-cell>
          <table:table-cell office:value-type="float" office:value="0.10990502" table:style-name="c1">
            <text:p>0.10991</text:p>
          </table:table-cell>
          <table:table-cell office:value-type="float" office:value="0.15576887695381014" table:style-name="c13">
            <text:p>+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0:30</text:p>
          </table:table-cell>
          <table:table-cell office:value-type="float" office:value="0.10570282499999999" table:style-name="c1">
            <text:p>0.1057</text:p>
          </table:table-cell>
          <table:table-cell office:value-type="string" table:style-name="c1">
            <text:p>2026-04-30 01:00</text:p>
          </table:table-cell>
          <table:table-cell office:value-type="float" office:value="0.10788603" table:style-name="c1">
            <text:p>0.10789</text:p>
          </table:table-cell>
          <table:table-cell office:value-type="float" office:value="1.8613890650793996" table:style-name="c13">
            <text:p>+1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10959477" table:style-name="c1">
            <text:p>0.10959</text:p>
          </table:table-cell>
          <table:table-cell office:value-type="string" table:style-name="c1">
            <text:p>2026-05-01 04:00</text:p>
          </table:table-cell>
          <table:table-cell office:value-type="float" office:value="0.109055445" table:style-name="c1">
            <text:p>0.10906</text:p>
          </table:table-cell>
          <table:table-cell office:value-type="float" office:value="-0.6910246123560393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11030512499999999" table:style-name="c1">
            <text:p>0.11031</text:p>
          </table:table-cell>
          <table:table-cell office:value-type="string" table:style-name="c1">
            <text:p>2026-05-01 13:45</text:p>
          </table:table-cell>
          <table:table-cell office:value-type="float" office:value="0.1093453" table:style-name="c1">
            <text:p>0.10935</text:p>
          </table:table-cell>
          <table:table-cell office:value-type="float" office:value="-1.0683150530856778" table:style-name="c12">
            <text:p>-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45</text:p>
          </table:table-cell>
          <table:table-cell office:value-type="float" office:value="0.10893444" table:style-name="c1">
            <text:p>0.10893</text:p>
          </table:table-cell>
          <table:table-cell office:value-type="string" table:style-name="c1">
            <text:p>2026-05-02 15:15</text:p>
          </table:table-cell>
          <table:table-cell office:value-type="float" office:value="0.10887553500000001" table:style-name="c1">
            <text:p>0.10888</text:p>
          </table:table-cell>
          <table:table-cell office:value-type="float" office:value="-0.2538657145205736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12:15</text:p>
          </table:table-cell>
          <table:table-cell office:value-type="float" office:value="0.109324635" table:style-name="c1">
            <text:p>0.10932</text:p>
          </table:table-cell>
          <table:table-cell office:value-type="string" table:style-name="c1">
            <text:p>2026-05-03 12:45</text:p>
          </table:table-cell>
          <table:table-cell office:value-type="float" office:value="0.10900547000000001" table:style-name="c1">
            <text:p>0.10901</text:p>
          </table:table-cell>
          <table:table-cell office:value-type="float" office:value="-0.49125884072699355" table:style-name="c12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30</text:p>
          </table:table-cell>
          <table:table-cell office:value-type="float" office:value="0.10921457999999999" table:style-name="c1">
            <text:p>0.10921</text:p>
          </table:table-cell>
          <table:table-cell office:value-type="string" table:style-name="c1">
            <text:p>2026-05-03 23:00</text:p>
          </table:table-cell>
          <table:table-cell office:value-type="float" office:value="0.10921536500000001" table:style-name="c1">
            <text:p>0.10922</text:p>
          </table:table-cell>
          <table:table-cell office:value-type="float" office:value="-0.19918266831679965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1:45</text:p>
          </table:table-cell>
          <table:table-cell office:value-type="float" office:value="0.11153574" table:style-name="c1">
            <text:p>0.11154</text:p>
          </table:table-cell>
          <table:table-cell office:value-type="string" table:style-name="c1">
            <text:p>2026-05-04 02:15</text:p>
          </table:table-cell>
          <table:table-cell office:value-type="float" office:value="0.11204395000000002" table:style-name="c1">
            <text:p>0.11204</text:p>
          </table:table-cell>
          <table:table-cell office:value-type="float" office:value="0.2548368298358916" table:style-name="c13">
            <text:p>+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3:15</text:p>
          </table:table-cell>
          <table:table-cell office:value-type="float" office:value="0.11093544" table:style-name="c1">
            <text:p>0.11094</text:p>
          </table:table-cell>
          <table:table-cell office:value-type="string" table:style-name="c1">
            <text:p>2026-05-04 13:45</text:p>
          </table:table-cell>
          <table:table-cell office:value-type="float" office:value="0.11086454000000001" table:style-name="c1">
            <text:p>0.11086</text:p>
          </table:table-cell>
          <table:table-cell office:value-type="float" office:value="-0.2636832877392137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4:45</text:p>
          </table:table-cell>
          <table:table-cell office:value-type="float" office:value="0.11162578499999999" table:style-name="c1">
            <text:p>0.11163</text:p>
          </table:table-cell>
          <table:table-cell office:value-type="string" table:style-name="c1">
            <text:p>2026-05-04 15:15</text:p>
          </table:table-cell>
          <table:table-cell office:value-type="float" office:value="0.11087453500000001" table:style-name="c1">
            <text:p>0.11087</text:p>
          </table:table-cell>
          <table:table-cell office:value-type="float" office:value="-0.8715622429575576" table:style-name="c12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30</text:p>
          </table:table-cell>
          <table:table-cell office:value-type="float" office:value="0.11257625999999998" table:style-name="c1">
            <text:p>0.11258</text:p>
          </table:table-cell>
          <table:table-cell office:value-type="string" table:style-name="c1">
            <text:p>2026-05-05 14:00</text:p>
          </table:table-cell>
          <table:table-cell office:value-type="float" office:value="0.112353795" table:style-name="c1">
            <text:p>0.11235</text:p>
          </table:table-cell>
          <table:table-cell office:value-type="float" office:value="-0.3971176837860746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0.115487715" table:style-name="c1">
            <text:p>0.11549</text:p>
          </table:table-cell>
          <table:table-cell office:value-type="string" table:style-name="c1">
            <text:p>2026-05-05 22:30</text:p>
          </table:table-cell>
          <table:table-cell office:value-type="float" office:value="0.11613190500000001" table:style-name="c1">
            <text:p>0.11613</text:p>
          </table:table-cell>
          <table:table-cell office:value-type="float" office:value="0.35678454795387005" table:style-name="c13">
            <text:p>+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0.11575785" table:style-name="c1">
            <text:p>0.11576</text:p>
          </table:table-cell>
          <table:table-cell office:value-type="string" table:style-name="c1">
            <text:p>2026-05-06 04:15</text:p>
          </table:table-cell>
          <table:table-cell office:value-type="float" office:value="0.11576209000000001" table:style-name="c1">
            <text:p>0.11576</text:p>
          </table:table-cell>
          <table:table-cell office:value-type="float" office:value="-0.1962445034267457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45</text:p>
          </table:table-cell>
          <table:table-cell office:value-type="float" office:value="0.109584765" table:style-name="c1">
            <text:p>0.10958</text:p>
          </table:table-cell>
          <table:table-cell office:value-type="string" table:style-name="c1">
            <text:p>2026-05-09 18:15</text:p>
          </table:table-cell>
          <table:table-cell office:value-type="float" office:value="0.10950522000000001" table:style-name="c1">
            <text:p>0.10951</text:p>
          </table:table-cell>
          <table:table-cell office:value-type="float" office:value="-0.27234254212252784" table:style-name="c12">
            <text:p>-0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45</text:p>
          </table:table-cell>
          <table:table-cell office:value-type="float" office:value="0.11103548999999999" table:style-name="c1">
            <text:p>0.11104</text:p>
          </table:table-cell>
          <table:table-cell office:value-type="string" table:style-name="c1">
            <text:p>2026-05-10 23:15</text:p>
          </table:table-cell>
          <table:table-cell office:value-type="float" office:value="0.11182406" table:style-name="c1">
            <text:p>0.11182</text:p>
          </table:table-cell>
          <table:table-cell office:value-type="float" office:value="0.5088766700268588" table:style-name="c13">
            <text:p>+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30</text:p>
          </table:table-cell>
          <table:table-cell office:value-type="float" office:value="0.11196595499999999" table:style-name="c1">
            <text:p>0.11197</text:p>
          </table:table-cell>
          <table:table-cell office:value-type="string" table:style-name="c1">
            <text:p>2026-05-11 00:00</text:p>
          </table:table-cell>
          <table:table-cell office:value-type="float" office:value="0.11240377000000001" table:style-name="c1">
            <text:p>0.1124</text:p>
          </table:table-cell>
          <table:table-cell office:value-type="float" office:value="0.19034345196271563" table:style-name="c13">
            <text:p>+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0.11139566999999999" table:style-name="c1">
            <text:p>0.1114</text:p>
          </table:table-cell>
          <table:table-cell office:value-type="string" table:style-name="c1">
            <text:p>2026-05-13 01:45</text:p>
          </table:table-cell>
          <table:table-cell office:value-type="float" office:value="0.111354295" table:style-name="c1">
            <text:p>0.11135</text:p>
          </table:table-cell>
          <table:table-cell office:value-type="float" office:value="-0.2369681296454207" table:style-name="c12">
            <text:p>-0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4:45</text:p>
          </table:table-cell>
          <table:table-cell office:value-type="float" office:value="0.11243618999999999" table:style-name="c1">
            <text:p>0.11244</text:p>
          </table:table-cell>
          <table:table-cell office:value-type="string" table:style-name="c1">
            <text:p>2026-05-13 05:15</text:p>
          </table:table-cell>
          <table:table-cell office:value-type="float" office:value="0.11223385500000001" table:style-name="c1">
            <text:p>0.11223</text:p>
          </table:table-cell>
          <table:table-cell office:value-type="float" office:value="-0.37949567318581456" table:style-name="c12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0.11429711999999999" table:style-name="c1">
            <text:p>0.1143</text:p>
          </table:table-cell>
          <table:table-cell office:value-type="string" table:style-name="c1">
            <text:p>2026-05-13 10:15</text:p>
          </table:table-cell>
          <table:table-cell office:value-type="float" office:value="0.11358318" table:style-name="c1">
            <text:p>0.11358</text:p>
          </table:table-cell>
          <table:table-cell office:value-type="float" office:value="-0.8232865157232094" table:style-name="c12">
            <text:p>-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7:30</text:p>
          </table:table-cell>
          <table:table-cell office:value-type="float" office:value="0.11281638" table:style-name="c1">
            <text:p>0.11282</text:p>
          </table:table-cell>
          <table:table-cell office:value-type="string" table:style-name="c1">
            <text:p>2026-05-13 18:00</text:p>
          </table:table-cell>
          <table:table-cell office:value-type="float" office:value="0.11310342" table:style-name="c1">
            <text:p>0.1131</text:p>
          </table:table-cell>
          <table:table-cell office:value-type="float" office:value="0.05402253061124185" table:style-name="c13">
            <text:p>+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0.106283115" table:style-name="c1">
            <text:p>0.10628</text:p>
          </table:table-cell>
          <table:table-cell office:value-type="string" table:style-name="c1">
            <text:p>2026-05-21 09:00</text:p>
          </table:table-cell>
          <table:table-cell office:value-type="float" office:value="0.10578708" table:style-name="c1">
            <text:p>0.10579</text:p>
          </table:table-cell>
          <table:table-cell office:value-type="float" office:value="-0.6656780551830721" table:style-name="c12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15</text:p>
          </table:table-cell>
          <table:table-cell office:value-type="float" office:value="0.10518256499999999" table:style-name="c1">
            <text:p>0.10518</text:p>
          </table:table-cell>
          <table:table-cell office:value-type="string" table:style-name="c1">
            <text:p>2026-05-21 17:45</text:p>
          </table:table-cell>
          <table:table-cell office:value-type="float" office:value="0.10612691" table:style-name="c1">
            <text:p>0.10613</text:p>
          </table:table-cell>
          <table:table-cell office:value-type="float" office:value="0.6961204139773525" table:style-name="c13">
            <text:p>+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30</text:p>
          </table:table-cell>
          <table:table-cell office:value-type="float" office:value="0.10129062" table:style-name="c1">
            <text:p>0.10129</text:p>
          </table:table-cell>
          <table:table-cell office:value-type="string" table:style-name="c1">
            <text:p>2026-05-30 03:00</text:p>
          </table:table-cell>
          <table:table-cell office:value-type="float" office:value="0.10152921000000001" table:style-name="c1">
            <text:p>0.10153</text:p>
          </table:table-cell>
          <table:table-cell office:value-type="float" office:value="0.035179080955383135" table:style-name="c13">
            <text:p>+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15</text:p>
          </table:table-cell>
          <table:table-cell office:value-type="float" office:value="0.101380665" table:style-name="c1">
            <text:p>0.10138</text:p>
          </table:table-cell>
          <table:table-cell office:value-type="string" table:style-name="c1">
            <text:p>2026-05-31 03:45</text:p>
          </table:table-cell>
          <table:table-cell office:value-type="float" office:value="0.10119937500000001" table:style-name="c1">
            <text:p>0.1012</text:p>
          </table:table-cell>
          <table:table-cell office:value-type="float" office:value="-0.37836361659787654" table:style-name="c12">
            <text:p>-0.4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9:30</text:p>
          </table:table-cell>
          <table:table-cell office:value-type="float" office:value="1.5397694999999998" table:style-name="c9">
            <text:p>1.5398</text:p>
          </table:table-cell>
          <table:table-cell office:value-type="string" table:style-name="c9">
            <text:p>2026-03-10 10:00</text:p>
          </table:table-cell>
          <table:table-cell office:value-type="float" office:value="1.5302345" table:style-name="c9">
            <text:p>1.5302</text:p>
          </table:table-cell>
          <table:table-cell office:value-type="float" office:value="-0.8179106525684432" table:style-name="c10">
            <text:p>-0.8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05:00</text:p>
          </table:table-cell>
          <table:table-cell office:value-type="float" office:value="1.4957475" table:style-name="c9">
            <text:p>1.4957</text:p>
          </table:table-cell>
          <table:table-cell office:value-type="string" table:style-name="c9">
            <text:p>2026-03-11 05:30</text:p>
          </table:table-cell>
          <table:table-cell office:value-type="float" office:value="1.4842575000000002" table:style-name="c9">
            <text:p>1.4843</text:p>
          </table:table-cell>
          <table:table-cell office:value-type="float" office:value="-0.9665421966274401" table:style-name="c10">
            <text:p>-1.0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2:45</text:p>
          </table:table-cell>
          <table:table-cell office:value-type="float" office:value="1.534767" table:style-name="c9">
            <text:p>1.5348</text:p>
          </table:table-cell>
          <table:table-cell office:value-type="string" table:style-name="c9">
            <text:p>2026-03-11 13:15</text:p>
          </table:table-cell>
          <table:table-cell office:value-type="float" office:value="1.5462265" table:style-name="c9">
            <text:p>1.5462</text:p>
          </table:table-cell>
          <table:table-cell office:value-type="float" office:value="0.5452679935456173" table:style-name="c11">
            <text:p>+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3:45</text:p>
          </table:table-cell>
          <table:table-cell office:value-type="float" office:value="1.5377684999999999" table:style-name="c9">
            <text:p>1.5378</text:p>
          </table:table-cell>
          <table:table-cell office:value-type="string" table:style-name="c9">
            <text:p>2026-03-11 14:15</text:p>
          </table:table-cell>
          <table:table-cell office:value-type="float" office:value="1.537231" table:style-name="c9">
            <text:p>1.5372</text:p>
          </table:table-cell>
          <table:table-cell office:value-type="float" office:value="-0.2347833740254046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8:15</text:p>
          </table:table-cell>
          <table:table-cell office:value-type="float" office:value="1.5107549999999998" table:style-name="c9">
            <text:p>1.5108</text:p>
          </table:table-cell>
          <table:table-cell office:value-type="string" table:style-name="c9">
            <text:p>2026-03-12 08:45</text:p>
          </table:table-cell>
          <table:table-cell office:value-type="float" office:value="1.5102445" table:style-name="c9">
            <text:p>1.5102</text:p>
          </table:table-cell>
          <table:table-cell office:value-type="float" office:value="-0.23362350318216762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0:30</text:p>
          </table:table-cell>
          <table:table-cell office:value-type="float" office:value="1.5377684999999999" table:style-name="c9">
            <text:p>1.5378</text:p>
          </table:table-cell>
          <table:table-cell office:value-type="string" table:style-name="c9">
            <text:p>2026-03-13 01:00</text:p>
          </table:table-cell>
          <table:table-cell office:value-type="float" office:value="1.5322335" table:style-name="c9">
            <text:p>1.5322</text:p>
          </table:table-cell>
          <table:table-cell office:value-type="float" office:value="-0.5591176283361143" table:style-name="c10">
            <text:p>-0.6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0:30</text:p>
          </table:table-cell>
          <table:table-cell office:value-type="float" office:value="1.522761" table:style-name="c9">
            <text:p>1.5228</text:p>
          </table:table-cell>
          <table:table-cell office:value-type="string" table:style-name="c9">
            <text:p>2026-03-13 11:00</text:p>
          </table:table-cell>
          <table:table-cell office:value-type="float" office:value="1.5222385" table:style-name="c9">
            <text:p>1.5222</text:p>
          </table:table-cell>
          <table:table-cell office:value-type="float" office:value="-0.23414408180272295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30</text:p>
          </table:table-cell>
          <table:table-cell office:value-type="float" office:value="1.5377684999999999" table:style-name="c9">
            <text:p>1.5378</text:p>
          </table:table-cell>
          <table:table-cell office:value-type="string" table:style-name="c9">
            <text:p>2026-03-13 14:00</text:p>
          </table:table-cell>
          <table:table-cell office:value-type="float" office:value="1.5362315" table:style-name="c9">
            <text:p>1.5362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5:00</text:p>
          </table:table-cell>
          <table:table-cell office:value-type="float" office:value="1.5257625" table:style-name="c9">
            <text:p>1.5258</text:p>
          </table:table-cell>
          <table:table-cell office:value-type="string" table:style-name="c9">
            <text:p>2026-03-16 05:30</text:p>
          </table:table-cell>
          <table:table-cell office:value-type="float" office:value="1.5302345" table:style-name="c9">
            <text:p>1.5302</text:p>
          </table:table-cell>
          <table:table-cell office:value-type="float" office:value="0.09261344635878022" table:style-name="c11">
            <text:p>+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5:45</text:p>
          </table:table-cell>
          <table:table-cell office:value-type="float" office:value="1.5487739999999999" table:style-name="c9">
            <text:p>1.5488</text:p>
          </table:table-cell>
          <table:table-cell office:value-type="string" table:style-name="c9">
            <text:p>2026-03-16 06:15</text:p>
          </table:table-cell>
          <table:table-cell office:value-type="float" office:value="1.5412290000000002" table:style-name="c9">
            <text:p>1.5412</text:p>
          </table:table-cell>
          <table:table-cell office:value-type="float" office:value="-0.6860856891321543" table:style-name="c10">
            <text:p>-0.7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6:30</text:p>
          </table:table-cell>
          <table:table-cell office:value-type="float" office:value="1.556778" table:style-name="c9">
            <text:p>1.5568</text:p>
          </table:table-cell>
          <table:table-cell office:value-type="string" table:style-name="c9">
            <text:p>2026-03-16 07:00</text:p>
          </table:table-cell>
          <table:table-cell office:value-type="float" office:value="1.5772110000000001" table:style-name="c9">
            <text:p>1.5772</text:p>
          </table:table-cell>
          <table:table-cell office:value-type="float" office:value="1.1099948233466828" table:style-name="c11">
            <text:p>+1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1:15</text:p>
          </table:table-cell>
          <table:table-cell office:value-type="float" office:value="1.6058024999999998" table:style-name="c9">
            <text:p>1.6058</text:p>
          </table:table-cell>
          <table:table-cell office:value-type="string" table:style-name="c9">
            <text:p>2026-03-16 11:45</text:p>
          </table:table-cell>
          <table:table-cell office:value-type="float" office:value="1.597201" table:style-name="c9">
            <text:p>1.5972</text:p>
          </table:table-cell>
          <table:table-cell office:value-type="float" office:value="-0.7344804108225911" table:style-name="c10">
            <text:p>-0.7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7:15</text:p>
          </table:table-cell>
          <table:table-cell office:value-type="float" office:value="1.5937964999999998" table:style-name="c9">
            <text:p>1.5938</text:p>
          </table:table-cell>
          <table:table-cell office:value-type="string" table:style-name="c9">
            <text:p>2026-03-16 17:45</text:p>
          </table:table-cell>
          <table:table-cell office:value-type="float" office:value="1.5982005000000001" table:style-name="c9">
            <text:p>1.5982</text:p>
          </table:table-cell>
          <table:table-cell office:value-type="float" office:value="0.07586898330496084" table:style-name="c11">
            <text:p>+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0:45</text:p>
          </table:table-cell>
          <table:table-cell office:value-type="float" office:value="1.6328159999999998" table:style-name="c9">
            <text:p>1.6328</text:p>
          </table:table-cell>
          <table:table-cell office:value-type="string" table:style-name="c9">
            <text:p>2026-03-16 21:15</text:p>
          </table:table-cell>
          <table:table-cell office:value-type="float" office:value="1.6291849999999999" table:style-name="c9">
            <text:p>1.6292</text:p>
          </table:table-cell>
          <table:table-cell office:value-type="float" office:value="-0.421832026082547" table:style-name="c10">
            <text:p>-0.4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02:45</text:p>
          </table:table-cell>
          <table:table-cell office:value-type="float" office:value="1.6478234999999999" table:style-name="c9">
            <text:p>1.6478</text:p>
          </table:table-cell>
          <table:table-cell office:value-type="string" table:style-name="c9">
            <text:p>2026-03-18 03:15</text:p>
          </table:table-cell>
          <table:table-cell office:value-type="float" office:value="1.6341825" table:style-name="c9">
            <text:p>1.6342</text:p>
          </table:table-cell>
          <table:table-cell office:value-type="float" office:value="-1.0260644308992872" table:style-name="c10">
            <text:p>-1.0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10:00</text:p>
          </table:table-cell>
          <table:table-cell office:value-type="float" office:value="1.6348169999999997" table:style-name="c9">
            <text:p>1.6348</text:p>
          </table:table-cell>
          <table:table-cell office:value-type="string" table:style-name="c9">
            <text:p>2026-03-18 10:30</text:p>
          </table:table-cell>
          <table:table-cell office:value-type="float" office:value="1.6341825" table:style-name="c9">
            <text:p>1.6342</text:p>
          </table:table-cell>
          <table:table-cell office:value-type="float" office:value="-0.23863409895418242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15</text:p>
          </table:table-cell>
          <table:table-cell office:value-type="float" office:value="1.296648" table:style-name="c9">
            <text:p>1.2966</text:p>
          </table:table-cell>
          <table:table-cell office:value-type="string" table:style-name="c9">
            <text:p>2026-04-01 06:45</text:p>
          </table:table-cell>
          <table:table-cell office:value-type="float" office:value="1.3003495" table:style-name="c9">
            <text:p>1.3003</text:p>
          </table:table-cell>
          <table:table-cell office:value-type="float" office:value="0.08499618628186045" table:style-name="c11">
            <text:p>+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2 00:45</text:p>
          </table:table-cell>
          <table:table-cell office:value-type="float" office:value="1.2696344999999998" table:style-name="c9">
            <text:p>1.2696</text:p>
          </table:table-cell>
          <table:table-cell office:value-type="string" table:style-name="c9">
            <text:p>2026-04-02 01:15</text:p>
          </table:table-cell>
          <table:table-cell office:value-type="float" office:value="1.2563715" table:style-name="c9">
            <text:p>1.2564</text:p>
          </table:table-cell>
          <table:table-cell office:value-type="float" office:value="-1.242443130562365" table:style-name="c10">
            <text:p>-1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1:45</text:p>
          </table:table-cell>
          <table:table-cell office:value-type="float" office:value="1.2506249999999999" table:style-name="c9">
            <text:p>1.2506</text:p>
          </table:table-cell>
          <table:table-cell office:value-type="string" table:style-name="c9">
            <text:p>2026-04-04 12:15</text:p>
          </table:table-cell>
          <table:table-cell office:value-type="float" office:value="1.2553720000000002" table:style-name="c9">
            <text:p>1.2554</text:p>
          </table:table-cell>
          <table:table-cell office:value-type="float" office:value="0.178911454033015" table:style-name="c11">
            <text:p>+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2:30</text:p>
          </table:table-cell>
          <table:table-cell office:value-type="float" office:value="1.2576284999999998" table:style-name="c9">
            <text:p>1.2576</text:p>
          </table:table-cell>
          <table:table-cell office:value-type="string" table:style-name="c9">
            <text:p>2026-04-04 13:00</text:p>
          </table:table-cell>
          <table:table-cell office:value-type="float" office:value="1.253373" table:style-name="c9">
            <text:p>1.2534</text:p>
          </table:table-cell>
          <table:table-cell office:value-type="float" office:value="-0.5375985537064198" table:style-name="c10">
            <text:p>-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7:30</text:p>
          </table:table-cell>
          <table:table-cell office:value-type="float" office:value="1.264632" table:style-name="c9">
            <text:p>1.2646</text:p>
          </table:table-cell>
          <table:table-cell office:value-type="string" table:style-name="c9">
            <text:p>2026-04-04 18:00</text:p>
          </table:table-cell>
          <table:table-cell office:value-type="float" office:value="1.2613690000000002" table:style-name="c9">
            <text:p>1.2614</text:p>
          </table:table-cell>
          <table:table-cell office:value-type="float" office:value="-0.4574039428861365" table:style-name="c10">
            <text:p>-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6:15</text:p>
          </table:table-cell>
          <table:table-cell office:value-type="float" office:value="1.270635" table:style-name="c9">
            <text:p>1.2706</text:p>
          </table:table-cell>
          <table:table-cell office:value-type="string" table:style-name="c9">
            <text:p>2026-04-06 06:45</text:p>
          </table:table-cell>
          <table:table-cell office:value-type="float" office:value="1.267366" table:style-name="c9">
            <text:p>1.2674</text:p>
          </table:table-cell>
          <table:table-cell office:value-type="float" office:value="-0.45665864973024606" table:style-name="c10">
            <text:p>-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30</text:p>
          </table:table-cell>
          <table:table-cell office:value-type="float" office:value="1.282641" table:style-name="c9">
            <text:p>1.2826</text:p>
          </table:table-cell>
          <table:table-cell office:value-type="string" table:style-name="c9">
            <text:p>2026-04-06 10:00</text:p>
          </table:table-cell>
          <table:table-cell office:value-type="float" office:value="1.2913540000000001" table:style-name="c9">
            <text:p>1.2914</text:p>
          </table:table-cell>
          <table:table-cell office:value-type="float" office:value="0.47804361111178917" table:style-name="c11">
            <text:p>+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12:30</text:p>
          </table:table-cell>
          <table:table-cell office:value-type="float" office:value="1.3096545" table:style-name="c9">
            <text:p>1.3097</text:p>
          </table:table-cell>
          <table:table-cell office:value-type="string" table:style-name="c9">
            <text:p>2026-04-06 13:00</text:p>
          </table:table-cell>
          <table:table-cell office:value-type="float" office:value="1.295352" table:style-name="c9">
            <text:p>1.2954</text:p>
          </table:table-cell>
          <table:table-cell office:value-type="float" office:value="-1.2897988475586541" table:style-name="c10">
            <text:p>-1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22:30</text:p>
          </table:table-cell>
          <table:table-cell office:value-type="float" office:value="1.336668" table:style-name="c9">
            <text:p>1.3367</text:p>
          </table:table-cell>
          <table:table-cell office:value-type="string" table:style-name="c9">
            <text:p>2026-04-09 23:00</text:p>
          </table:table-cell>
          <table:table-cell office:value-type="float" office:value="1.321339" table:style-name="c9">
            <text:p>1.3213</text:p>
          </table:table-cell>
          <table:table-cell office:value-type="float" office:value="-1.3444143692375343" table:style-name="c10">
            <text:p>-1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5:00</text:p>
          </table:table-cell>
          <table:table-cell office:value-type="float" office:value="1.3176584999999998" table:style-name="c9">
            <text:p>1.3177</text:p>
          </table:table-cell>
          <table:table-cell office:value-type="string" table:style-name="c9">
            <text:p>2026-04-10 15:30</text:p>
          </table:table-cell>
          <table:table-cell office:value-type="float" office:value="1.3183405" table:style-name="c9">
            <text:p>1.3183</text:p>
          </table:table-cell>
          <table:table-cell office:value-type="float" office:value="-0.1482449860491175" table:style-name="c10">
            <text:p>-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9:15</text:p>
          </table:table-cell>
          <table:table-cell office:value-type="float" office:value="1.32066" table:style-name="c9">
            <text:p>1.3207</text:p>
          </table:table-cell>
          <table:table-cell office:value-type="string" table:style-name="c9">
            <text:p>2026-04-10 19:45</text:p>
          </table:table-cell>
          <table:table-cell office:value-type="float" office:value="1.3143425" table:style-name="c9">
            <text:p>1.3143</text:p>
          </table:table-cell>
          <table:table-cell office:value-type="float" office:value="-0.677303064944812" table:style-name="c10">
            <text:p>-0.7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9:00</text:p>
          </table:table-cell>
          <table:table-cell office:value-type="float" office:value="1.302651" table:style-name="c9">
            <text:p>1.3027</text:p>
          </table:table-cell>
          <table:table-cell office:value-type="string" table:style-name="c9">
            <text:p>2026-04-11 19:30</text:p>
          </table:table-cell>
          <table:table-cell office:value-type="float" office:value="1.3103445" table:style-name="c9">
            <text:p>1.3103</text:p>
          </table:table-cell>
          <table:table-cell office:value-type="float" office:value="0.3895226998251955" table:style-name="c11">
            <text:p>+0.4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4:45</text:p>
          </table:table-cell>
          <table:table-cell office:value-type="float" office:value="1.216608" table:style-name="c9">
            <text:p>1.2166</text:p>
          </table:table-cell>
          <table:table-cell office:value-type="string" table:style-name="c9">
            <text:p>2026-04-16 05:15</text:p>
          </table:table-cell>
          <table:table-cell office:value-type="float" office:value="1.2123935000000001" table:style-name="c9">
            <text:p>1.2124</text:p>
          </table:table-cell>
          <table:table-cell office:value-type="float" office:value="-0.5456214825564132" table:style-name="c10">
            <text:p>-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5:45</text:p>
          </table:table-cell>
          <table:table-cell office:value-type="float" office:value="1.232616" table:style-name="c9">
            <text:p>1.2326</text:p>
          </table:table-cell>
          <table:table-cell office:value-type="string" table:style-name="c9">
            <text:p>2026-04-16 06:15</text:p>
          </table:table-cell>
          <table:table-cell office:value-type="float" office:value="1.231384" table:style-name="c9">
            <text:p>1.2314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7:00</text:p>
          </table:table-cell>
          <table:table-cell office:value-type="float" office:value="1.252626" table:style-name="c9">
            <text:p>1.2526</text:p>
          </table:table-cell>
          <table:table-cell office:value-type="string" table:style-name="c9">
            <text:p>2026-04-16 07:30</text:p>
          </table:table-cell>
          <table:table-cell office:value-type="float" office:value="1.2703645" table:style-name="c9">
            <text:p>1.2704</text:p>
          </table:table-cell>
          <table:table-cell office:value-type="float" office:value="1.213374252530297" table:style-name="c11">
            <text:p>+1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7:45</text:p>
          </table:table-cell>
          <table:table-cell office:value-type="float" office:value="1.2736364999999998" table:style-name="c9">
            <text:p>1.2736</text:p>
          </table:table-cell>
          <table:table-cell office:value-type="string" table:style-name="c9">
            <text:p>2026-04-16 08:15</text:p>
          </table:table-cell>
          <table:table-cell office:value-type="float" office:value="1.2713640000000002" table:style-name="c9">
            <text:p>1.2714</text:p>
          </table:table-cell>
          <table:table-cell office:value-type="float" office:value="-0.37796943130945504" table:style-name="c10">
            <text:p>-0.4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15</text:p>
          </table:table-cell>
          <table:table-cell office:value-type="float" office:value="1.2976484999999998" table:style-name="c9">
            <text:p>1.2976</text:p>
          </table:table-cell>
          <table:table-cell office:value-type="string" table:style-name="c9">
            <text:p>2026-04-16 13:45</text:p>
          </table:table-cell>
          <table:table-cell office:value-type="float" office:value="1.301349" table:style-name="c9">
            <text:p>1.3013</text:p>
          </table:table-cell>
          <table:table-cell office:value-type="float" office:value="0.08469962004349352" table:style-name="c11">
            <text:p>+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1.3166579999999999" table:style-name="c9">
            <text:p>1.3167</text:p>
          </table:table-cell>
          <table:table-cell office:value-type="string" table:style-name="c9">
            <text:p>2026-04-16 16:15</text:p>
          </table:table-cell>
          <table:table-cell office:value-type="float" office:value="1.3203395" table:style-name="c9">
            <text:p>1.3203</text:p>
          </table:table-cell>
          <table:table-cell office:value-type="float" office:value="0.07915049614251046" table:style-name="c11">
            <text:p>+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8:30</text:p>
          </table:table-cell>
          <table:table-cell office:value-type="float" office:value="1.3196595" table:style-name="c9">
            <text:p>1.3197</text:p>
          </table:table-cell>
          <table:table-cell office:value-type="string" table:style-name="c9">
            <text:p>2026-04-16 19:00</text:p>
          </table:table-cell>
          <table:table-cell office:value-type="float" office:value="1.3283355000000001" table:style-name="c9">
            <text:p>1.3283</text:p>
          </table:table-cell>
          <table:table-cell office:value-type="float" office:value="0.45622809031422573" table:style-name="c11">
            <text:p>+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6:45</text:p>
          </table:table-cell>
          <table:table-cell office:value-type="float" office:value="1.3196595" table:style-name="c9">
            <text:p>1.3197</text:p>
          </table:table-cell>
          <table:table-cell office:value-type="string" table:style-name="c9">
            <text:p>2026-04-17 07:15</text:p>
          </table:table-cell>
          <table:table-cell office:value-type="float" office:value="1.3183405" table:style-name="c9">
            <text:p>1.3183</text:p>
          </table:table-cell>
          <table:table-cell office:value-type="float" office:value="-0.299650224887571" table:style-name="c10">
            <text:p>-0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8 16:30</text:p>
          </table:table-cell>
          <table:table-cell office:value-type="float" office:value="1.302651" table:style-name="c9">
            <text:p>1.3027</text:p>
          </table:table-cell>
          <table:table-cell office:value-type="string" table:style-name="c9">
            <text:p>2026-04-18 17:00</text:p>
          </table:table-cell>
          <table:table-cell office:value-type="float" office:value="1.289355" table:style-name="c9">
            <text:p>1.2894</text:p>
          </table:table-cell>
          <table:table-cell office:value-type="float" office:value="-1.218547457837893" table:style-name="c10">
            <text:p>-1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3:30</text:p>
          </table:table-cell>
          <table:table-cell office:value-type="float" office:value="1.2916454999999998" table:style-name="c9">
            <text:p>1.2916</text:p>
          </table:table-cell>
          <table:table-cell office:value-type="string" table:style-name="c9">
            <text:p>2026-04-22 04:00</text:p>
          </table:table-cell>
          <table:table-cell office:value-type="float" office:value="1.2913540000000001" table:style-name="c9">
            <text:p>1.2914</text:p>
          </table:table-cell>
          <table:table-cell office:value-type="float" office:value="-0.22242299810587562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4:45</text:p>
          </table:table-cell>
          <table:table-cell office:value-type="float" office:value="1.3036515" table:style-name="c9">
            <text:p>1.3037</text:p>
          </table:table-cell>
          <table:table-cell office:value-type="string" table:style-name="c9">
            <text:p>2026-04-22 05:15</text:p>
          </table:table-cell>
          <table:table-cell office:value-type="float" office:value="1.3083455" table:style-name="c9">
            <text:p>1.3083</text:p>
          </table:table-cell>
          <table:table-cell office:value-type="float" office:value="0.159445783286416" table:style-name="c11">
            <text:p>+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1.3236614999999998" table:style-name="c9">
            <text:p>1.3237</text:p>
          </table:table-cell>
          <table:table-cell office:value-type="string" table:style-name="c9">
            <text:p>2026-04-22 06:00</text:p>
          </table:table-cell>
          <table:table-cell office:value-type="float" office:value="1.311344" table:style-name="c9">
            <text:p>1.3113</text:p>
          </table:table-cell>
          <table:table-cell office:value-type="float" office:value="-1.1286024905914238" table:style-name="c10">
            <text:p>-1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7 01:15</text:p>
          </table:table-cell>
          <table:table-cell office:value-type="float" office:value="1.266633" table:style-name="c9">
            <text:p>1.2666</text:p>
          </table:table-cell>
          <table:table-cell office:value-type="string" table:style-name="c9">
            <text:p>2026-04-27 01:45</text:p>
          </table:table-cell>
          <table:table-cell office:value-type="float" office:value="1.2663665" table:style-name="c9">
            <text:p>1.2664</text:p>
          </table:table-cell>
          <table:table-cell office:value-type="float" office:value="-0.22089797388036292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00</text:p>
          </table:table-cell>
          <table:table-cell office:value-type="float" office:value="1.2536264999999998" table:style-name="c9">
            <text:p>1.2536</text:p>
          </table:table-cell>
          <table:table-cell office:value-type="string" table:style-name="c9">
            <text:p>2026-04-29 10:30</text:p>
          </table:table-cell>
          <table:table-cell office:value-type="float" office:value="1.2563715" table:style-name="c9">
            <text:p>1.2564</text:p>
          </table:table-cell>
          <table:table-cell office:value-type="float" office:value="0.018627028983519978" table:style-name="c11">
            <text:p>+0.0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19:15</text:p>
          </table:table-cell>
          <table:table-cell office:value-type="float" office:value="1.22061" table:style-name="c9">
            <text:p>1.2206</text:p>
          </table:table-cell>
          <table:table-cell office:value-type="string" table:style-name="c9">
            <text:p>2026-05-02 19:45</text:p>
          </table:table-cell>
          <table:table-cell office:value-type="float" office:value="1.2223885" table:style-name="c9">
            <text:p>1.2224</text:p>
          </table:table-cell>
          <table:table-cell office:value-type="float" office:value="-0.05448543035858622" table:style-name="c10">
            <text:p>-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20:00</text:p>
          </table:table-cell>
          <table:table-cell office:value-type="float" office:value="1.2236115" table:style-name="c9">
            <text:p>1.2236</text:p>
          </table:table-cell>
          <table:table-cell office:value-type="string" table:style-name="c9">
            <text:p>2026-05-02 20:30</text:p>
          </table:table-cell>
          <table:table-cell office:value-type="float" office:value="1.2223885" table:style-name="c9">
            <text:p>1.2224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20:45</text:p>
          </table:table-cell>
          <table:table-cell office:value-type="float" office:value="1.2296145" table:style-name="c9">
            <text:p>1.2296</text:p>
          </table:table-cell>
          <table:table-cell office:value-type="string" table:style-name="c9">
            <text:p>2026-05-02 21:15</text:p>
          </table:table-cell>
          <table:table-cell office:value-type="float" office:value="1.2233880000000001" table:style-name="c9">
            <text:p>1.2234</text:p>
          </table:table-cell>
          <table:table-cell office:value-type="float" office:value="-0.705265968480373" table:style-name="c10">
            <text:p>-0.7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07:45</text:p>
          </table:table-cell>
          <table:table-cell office:value-type="float" office:value="1.2156075" table:style-name="c9">
            <text:p>1.2156</text:p>
          </table:table-cell>
          <table:table-cell office:value-type="string" table:style-name="c9">
            <text:p>2026-05-03 08:15</text:p>
          </table:table-cell>
          <table:table-cell office:value-type="float" office:value="1.2173910000000001" table:style-name="c9">
            <text:p>1.2174</text:p>
          </table:table-cell>
          <table:table-cell office:value-type="float" office:value="-0.053476521739126426" table:style-name="c10">
            <text:p>-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7:45</text:p>
          </table:table-cell>
          <table:table-cell office:value-type="float" office:value="1.2576284999999998" table:style-name="c9">
            <text:p>1.2576</text:p>
          </table:table-cell>
          <table:table-cell office:value-type="string" table:style-name="c9">
            <text:p>2026-05-05 08:15</text:p>
          </table:table-cell>
          <table:table-cell office:value-type="float" office:value="1.2583705" table:style-name="c9">
            <text:p>1.2584</text:p>
          </table:table-cell>
          <table:table-cell office:value-type="float" office:value="-0.14101800567495326" table:style-name="c10">
            <text:p>-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2:45</text:p>
          </table:table-cell>
          <table:table-cell office:value-type="float" office:value="1.2736364999999998" table:style-name="c9">
            <text:p>1.2736</text:p>
          </table:table-cell>
          <table:table-cell office:value-type="string" table:style-name="c9">
            <text:p>2026-05-05 13:15</text:p>
          </table:table-cell>
          <table:table-cell office:value-type="float" office:value="1.27936" table:style-name="c9">
            <text:p>1.2794</text:p>
          </table:table-cell>
          <table:table-cell office:value-type="float" office:value="0.2485842200659505" table:style-name="c11">
            <text:p>+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4:15</text:p>
          </table:table-cell>
          <table:table-cell office:value-type="float" office:value="1.2876435" table:style-name="c9">
            <text:p>1.2876</text:p>
          </table:table-cell>
          <table:table-cell office:value-type="string" table:style-name="c9">
            <text:p>2026-05-05 14:45</text:p>
          </table:table-cell>
          <table:table-cell office:value-type="float" office:value="1.2713640000000002" table:style-name="c9">
            <text:p>1.2714</text:p>
          </table:table-cell>
          <table:table-cell office:value-type="float" office:value="-1.461658963525203" table:style-name="c10">
            <text:p>-1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1:15</text:p>
          </table:table-cell>
          <table:table-cell office:value-type="float" office:value="1.2896444999999999" table:style-name="c9">
            <text:p>1.2896</text:p>
          </table:table-cell>
          <table:table-cell office:value-type="string" table:style-name="c9">
            <text:p>2026-05-05 21:45</text:p>
          </table:table-cell>
          <table:table-cell office:value-type="float" office:value="1.283358" table:style-name="c9">
            <text:p>1.2834</text:p>
          </table:table-cell>
          <table:table-cell office:value-type="float" office:value="-0.686385483906593" table:style-name="c10">
            <text:p>-0.7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2:00</text:p>
          </table:table-cell>
          <table:table-cell office:value-type="float" office:value="1.296648" table:style-name="c9">
            <text:p>1.2966</text:p>
          </table:table-cell>
          <table:table-cell office:value-type="string" table:style-name="c9">
            <text:p>2026-05-06 02:30</text:p>
          </table:table-cell>
          <table:table-cell office:value-type="float" office:value="1.2823585" table:style-name="c9">
            <text:p>1.2824</text:p>
          </table:table-cell>
          <table:table-cell office:value-type="float" office:value="-1.2997308939280305" table:style-name="c10">
            <text:p>-1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8:30</text:p>
          </table:table-cell>
          <table:table-cell office:value-type="float" office:value="1.3196595" table:style-name="c9">
            <text:p>1.3197</text:p>
          </table:table-cell>
          <table:table-cell office:value-type="string" table:style-name="c9">
            <text:p>2026-05-06 09:00</text:p>
          </table:table-cell>
          <table:table-cell office:value-type="float" office:value="1.3283355000000001" table:style-name="c9">
            <text:p>1.3283</text:p>
          </table:table-cell>
          <table:table-cell office:value-type="float" office:value="0.4562280903142035" table:style-name="c11">
            <text:p>+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20:15</text:p>
          </table:table-cell>
          <table:table-cell office:value-type="float" office:value="1.3176584999999998" table:style-name="c9">
            <text:p>1.3177</text:p>
          </table:table-cell>
          <table:table-cell office:value-type="string" table:style-name="c9">
            <text:p>2026-05-06 20:45</text:p>
          </table:table-cell>
          <table:table-cell office:value-type="float" office:value="1.3033480000000002" table:style-name="c9">
            <text:p>1.3033</text:p>
          </table:table-cell>
          <table:table-cell office:value-type="float" office:value="-1.2837842773373853" table:style-name="c10">
            <text:p>-1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5:15</text:p>
          </table:table-cell>
          <table:table-cell office:value-type="float" office:value="1.318659" table:style-name="c9">
            <text:p>1.3187</text:p>
          </table:table-cell>
          <table:table-cell office:value-type="string" table:style-name="c9">
            <text:p>2026-05-07 05:45</text:p>
          </table:table-cell>
          <table:table-cell office:value-type="float" office:value="1.3193400000000002" table:style-name="c9">
            <text:p>1.3193</text:p>
          </table:table-cell>
          <table:table-cell office:value-type="float" office:value="-0.1483598610406367" table:style-name="c10">
            <text:p>-0.1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6:00</text:p>
          </table:table-cell>
          <table:table-cell office:value-type="float" office:value="1.3596795" table:style-name="c9">
            <text:p>1.3597</text:p>
          </table:table-cell>
          <table:table-cell office:value-type="string" table:style-name="c9">
            <text:p>2026-05-08 16:30</text:p>
          </table:table-cell>
          <table:table-cell office:value-type="float" office:value="1.3503245000000001" table:style-name="c9">
            <text:p>1.3503</text:p>
          </table:table-cell>
          <table:table-cell office:value-type="float" office:value="-0.8865544178241702" table:style-name="c10">
            <text:p>-0.9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7:45</text:p>
          </table:table-cell>
          <table:table-cell office:value-type="float" office:value="1.364682" table:style-name="c9">
            <text:p>1.3647</text:p>
          </table:table-cell>
          <table:table-cell office:value-type="string" table:style-name="c9">
            <text:p>2026-05-08 18:15</text:p>
          </table:table-cell>
          <table:table-cell office:value-type="float" office:value="1.3673160000000002" table:style-name="c9">
            <text:p>1.3673</text:p>
          </table:table-cell>
          <table:table-cell office:value-type="float" office:value="-0.007273832585141804" table:style-name="c10">
            <text:p>-0.0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7:45</text:p>
          </table:table-cell>
          <table:table-cell office:value-type="float" office:value="1.348674" table:style-name="c9">
            <text:p>1.3487</text:p>
          </table:table-cell>
          <table:table-cell office:value-type="string" table:style-name="c9">
            <text:p>2026-05-10 08:15</text:p>
          </table:table-cell>
          <table:table-cell office:value-type="float" office:value="1.349325" table:style-name="c9">
            <text:p>1.3493</text:p>
          </table:table-cell>
          <table:table-cell office:value-type="float" office:value="-0.15172685726867474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8:45</text:p>
          </table:table-cell>
          <table:table-cell office:value-type="float" office:value="1.356678" table:style-name="c9">
            <text:p>1.3567</text:p>
          </table:table-cell>
          <table:table-cell office:value-type="string" table:style-name="c9">
            <text:p>2026-05-10 09:15</text:p>
          </table:table-cell>
          <table:table-cell office:value-type="float" office:value="1.3573210000000002" table:style-name="c9">
            <text:p>1.3573</text:p>
          </table:table-cell>
          <table:table-cell office:value-type="float" office:value="-0.15259956150242004" table:style-name="c10">
            <text:p>-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00</text:p>
          </table:table-cell>
          <table:table-cell office:value-type="float" office:value="1.3736865" table:style-name="c9">
            <text:p>1.3737</text:p>
          </table:table-cell>
          <table:table-cell office:value-type="string" table:style-name="c9">
            <text:p>2026-05-10 16:30</text:p>
          </table:table-cell>
          <table:table-cell office:value-type="float" office:value="1.383308" table:style-name="c9">
            <text:p>1.3833</text:p>
          </table:table-cell>
          <table:table-cell office:value-type="float" office:value="0.49911441278631674" table:style-name="c11">
            <text:p>+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7:15</text:p>
          </table:table-cell>
          <table:table-cell office:value-type="float" office:value="1.392696" table:style-name="c9">
            <text:p>1.3927</text:p>
          </table:table-cell>
          <table:table-cell office:value-type="string" table:style-name="c9">
            <text:p>2026-05-10 17:45</text:p>
          </table:table-cell>
          <table:table-cell office:value-type="float" office:value="1.395302" table:style-name="c9">
            <text:p>1.3953</text:p>
          </table:table-cell>
          <table:table-cell office:value-type="float" office:value="-0.013154966913064836" table:style-name="c10">
            <text:p>-0.0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15:30</text:p>
          </table:table-cell>
          <table:table-cell office:value-type="float" office:value="1.3716855" table:style-name="c9">
            <text:p>1.3717</text:p>
          </table:table-cell>
          <table:table-cell office:value-type="string" table:style-name="c9">
            <text:p>2026-05-11 16:00</text:p>
          </table:table-cell>
          <table:table-cell office:value-type="float" office:value="1.3673160000000002" table:style-name="c9">
            <text:p>1.3673</text:p>
          </table:table-cell>
          <table:table-cell office:value-type="float" office:value="-0.5178129158615263" table:style-name="c10">
            <text:p>-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09:45</text:p>
          </table:table-cell>
          <table:table-cell office:value-type="float" office:value="1.4217104999999999" table:style-name="c9">
            <text:p>1.4217</text:p>
          </table:table-cell>
          <table:table-cell office:value-type="string" table:style-name="c9">
            <text:p>2026-05-13 10:15</text:p>
          </table:table-cell>
          <table:table-cell office:value-type="float" office:value="1.4202895000000002" table:style-name="c9">
            <text:p>1.4203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4 17:00</text:p>
          </table:table-cell>
          <table:table-cell office:value-type="float" office:value="1.3906949999999998" table:style-name="c9">
            <text:p>1.3907</text:p>
          </table:table-cell>
          <table:table-cell office:value-type="string" table:style-name="c9">
            <text:p>2026-05-14 17:30</text:p>
          </table:table-cell>
          <table:table-cell office:value-type="float" office:value="1.3863065" table:style-name="c9">
            <text:p>1.3863</text:p>
          </table:table-cell>
          <table:table-cell office:value-type="float" office:value="-0.5148308359129605" table:style-name="c10">
            <text:p>-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2:30</text:p>
          </table:table-cell>
          <table:table-cell office:value-type="float" office:value="1.2656325" table:style-name="c9">
            <text:p>1.2656</text:p>
          </table:table-cell>
          <table:table-cell office:value-type="string" table:style-name="c9">
            <text:p>2026-05-21 03:00</text:p>
          </table:table-cell>
          <table:table-cell office:value-type="float" office:value="1.2643674999999999" table:style-name="c9">
            <text:p>1.2644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5:00</text:p>
          </table:table-cell>
          <table:table-cell office:value-type="float" office:value="1.286643" table:style-name="c9">
            <text:p>1.2866</text:p>
          </table:table-cell>
          <table:table-cell office:value-type="string" table:style-name="c9">
            <text:p>2026-05-21 05:30</text:p>
          </table:table-cell>
          <table:table-cell office:value-type="float" office:value="1.2743625" table:style-name="c9">
            <text:p>1.2744</text:p>
          </table:table-cell>
          <table:table-cell office:value-type="float" office:value="-1.1524525946591146" table:style-name="c10">
            <text:p>-1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45</text:p>
          </table:table-cell>
          <table:table-cell office:value-type="float" office:value="1.2786389999999999" table:style-name="c9">
            <text:p>1.2786</text:p>
          </table:table-cell>
          <table:table-cell office:value-type="string" table:style-name="c9">
            <text:p>2026-05-21 18:15</text:p>
          </table:table-cell>
          <table:table-cell office:value-type="float" office:value="1.2843575" table:style-name="c9">
            <text:p>1.2844</text:p>
          </table:table-cell>
          <table:table-cell office:value-type="float" office:value="0.24643932787129508" table:style-name="c11">
            <text:p>+0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20:00</text:p>
          </table:table-cell>
          <table:table-cell office:value-type="float" office:value="1.3016504999999998" table:style-name="c9">
            <text:p>1.3017</text:p>
          </table:table-cell>
          <table:table-cell office:value-type="string" table:style-name="c9">
            <text:p>2026-05-21 20:30</text:p>
          </table:table-cell>
          <table:table-cell office:value-type="float" office:value="1.2973510000000001" table:style-name="c9">
            <text:p>1.2974</text:p>
          </table:table-cell>
          <table:table-cell office:value-type="float" office:value="-0.5295511083044047" table:style-name="c10">
            <text:p>-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3:15</text:p>
          </table:table-cell>
          <table:table-cell office:value-type="float" office:value="1.3076534999999998" table:style-name="c9">
            <text:p>1.3077</text:p>
          </table:table-cell>
          <table:table-cell office:value-type="string" table:style-name="c9">
            <text:p>2026-05-22 03:45</text:p>
          </table:table-cell>
          <table:table-cell office:value-type="float" office:value="1.3163415" table:style-name="c9">
            <text:p>1.3163</text:p>
          </table:table-cell>
          <table:table-cell office:value-type="float" office:value="0.4631680595432952" table:style-name="c11">
            <text:p>+0.5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4:15</text:p>
          </table:table-cell>
          <table:table-cell office:value-type="float" office:value="1.3316655" table:style-name="c9">
            <text:p>1.3317</text:p>
          </table:table-cell>
          <table:table-cell office:value-type="string" table:style-name="c9">
            <text:p>2026-05-22 04:45</text:p>
          </table:table-cell>
          <table:table-cell office:value-type="float" office:value="1.321339" table:style-name="c9">
            <text:p>1.3213</text:p>
          </table:table-cell>
          <table:table-cell office:value-type="float" office:value="-0.9738073608575148" table:style-name="c10">
            <text:p>-1.0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5:45</text:p>
          </table:table-cell>
          <table:table-cell office:value-type="float" office:value="1.3236614999999998" table:style-name="c9">
            <text:p>1.3237</text:p>
          </table:table-cell>
          <table:table-cell office:value-type="string" table:style-name="c9">
            <text:p>2026-05-22 06:15</text:p>
          </table:table-cell>
          <table:table-cell office:value-type="float" office:value="1.317341" table:style-name="c9">
            <text:p>1.3173</text:p>
          </table:table-cell>
          <table:table-cell office:value-type="float" office:value="-0.6764467092984061" table:style-name="c10">
            <text:p>-0.7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3:00</text:p>
          </table:table-cell>
          <table:table-cell office:value-type="float" office:value="1.3476735" table:style-name="c9">
            <text:p>1.3477</text:p>
          </table:table-cell>
          <table:table-cell office:value-type="string" table:style-name="c9">
            <text:p>2026-05-22 13:30</text:p>
          </table:table-cell>
          <table:table-cell office:value-type="float" office:value="1.3343325000000001" table:style-name="c9">
            <text:p>1.3343</text:p>
          </table:table-cell>
          <table:table-cell office:value-type="float" office:value="-1.1878493320154893" table:style-name="c10">
            <text:p>-1.2</text:p>
          </table:table-cell>
        </table:table-row>
        <table:table-row>
          <table:table-cell office:value-type="string" table:style-name="c8">
            <text:p>DOT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8:15</text:p>
          </table:table-cell>
          <table:table-cell office:value-type="float" office:value="1.2916454999999998" table:style-name="c9">
            <text:p>1.2916</text:p>
          </table:table-cell>
          <table:table-cell office:value-type="string" table:style-name="c9">
            <text:p>2026-05-25 18:45</text:p>
          </table:table-cell>
          <table:table-cell office:value-type="float" office:value="1.2813590000000001" table:style-name="c9">
            <text:p>1.2814</text:p>
          </table:table-cell>
          <table:table-cell office:value-type="float" office:value="-0.9946952659223962" table:style-name="c10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3-09 20:15</text:p>
          </table:table-cell>
          <table:table-cell office:value-type="float" office:value="8.225885000000002" table:style-name="c1">
            <text:p>8.2259</text:p>
          </table:table-cell>
          <table:table-cell office:value-type="float" office:value="-0.5413480425241701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15</text:p>
          </table:table-cell>
          <table:table-cell office:value-type="float" office:value="8.334165" table:style-name="c1">
            <text:p>8.3342</text:p>
          </table:table-cell>
          <table:table-cell office:value-type="string" table:style-name="c1">
            <text:p>2026-03-10 09:45</text:p>
          </table:table-cell>
          <table:table-cell office:value-type="float" office:value="8.395800000000001" table:style-name="c1">
            <text:p>8.3958</text:p>
          </table:table-cell>
          <table:table-cell office:value-type="float" office:value="0.5381678404495327" table:style-name="c13">
            <text:p>+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0:00</text:p>
          </table:table-cell>
          <table:table-cell office:value-type="float" office:value="8.394195" table:style-name="c1">
            <text:p>8.3942</text:p>
          </table:table-cell>
          <table:table-cell office:value-type="string" table:style-name="c1">
            <text:p>2026-03-10 10:30</text:p>
          </table:table-cell>
          <table:table-cell office:value-type="float" office:value="8.35582" table:style-name="c1">
            <text:p>8.3558</text:p>
          </table:table-cell>
          <table:table-cell office:value-type="float" office:value="-0.6561473039403909" table:style-name="c12">
            <text:p>-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3-10 15:30</text:p>
          </table:table-cell>
          <table:table-cell office:value-type="float" office:value="8.475760000000001" table:style-name="c1">
            <text:p>8.4758</text:p>
          </table:table-cell>
          <table:table-cell office:value-type="float" office:value="-0.7677269843951118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00</text:p>
          </table:table-cell>
          <table:table-cell office:value-type="float" office:value="8.234115" table:style-name="c1">
            <text:p>8.2341</text:p>
          </table:table-cell>
          <table:table-cell office:value-type="string" table:style-name="c1">
            <text:p>2026-03-11 07:30</text:p>
          </table:table-cell>
          <table:table-cell office:value-type="float" office:value="8.17591" table:style-name="c1">
            <text:p>8.1759</text:p>
          </table:table-cell>
          <table:table-cell office:value-type="float" office:value="-0.9053631639829973" table:style-name="c12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3-12 10:15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0.9031632380540722" table:style-name="c12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30</text:p>
          </table:table-cell>
          <table:table-cell office:value-type="float" office:value="8.434215" table:style-name="c1">
            <text:p>8.4342</text:p>
          </table:table-cell>
          <table:table-cell office:value-type="string" table:style-name="c1">
            <text:p>2026-03-13 10:00</text:p>
          </table:table-cell>
          <table:table-cell office:value-type="float" office:value="8.475760000000001" table:style-name="c1">
            <text:p>8.4758</text:p>
          </table:table-cell>
          <table:table-cell office:value-type="float" office:value="0.2916923004689709" table:style-name="c13">
            <text:p>+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3-13 10:45</text:p>
          </table:table-cell>
          <table:table-cell office:value-type="float" office:value="8.525735" table:style-name="c1">
            <text:p>8.5257</text:p>
          </table:table-cell>
          <table:table-cell office:value-type="float" office:value="-0.1826310350106719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1:00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3-13 11:30</text:p>
          </table:table-cell>
          <table:table-cell office:value-type="float" office:value="8.545725000000001" table:style-name="c1">
            <text:p>8.5457</text:p>
          </table:table-cell>
          <table:table-cell office:value-type="float" office:value="-0.4161225961201498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8.694344999999998" table:style-name="c1">
            <text:p>8.6943</text:p>
          </table:table-cell>
          <table:table-cell office:value-type="string" table:style-name="c1">
            <text:p>2026-03-13 13:30</text:p>
          </table:table-cell>
          <table:table-cell office:value-type="float" office:value="8.745625" table:style-name="c1">
            <text:p>8.7456</text:p>
          </table:table-cell>
          <table:table-cell office:value-type="float" office:value="0.3887296354699643" table:style-name="c13">
            <text:p>+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8.82441" table:style-name="c1">
            <text:p>8.8244</text:p>
          </table:table-cell>
          <table:table-cell office:value-type="string" table:style-name="c1">
            <text:p>2026-03-13 14:15</text:p>
          </table:table-cell>
          <table:table-cell office:value-type="float" office:value="8.75562" table:style-name="c1">
            <text:p>8.7556</text:p>
          </table:table-cell>
          <table:table-cell office:value-type="float" office:value="-0.977883896827092" table:style-name="c12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8.394195" table:style-name="c1">
            <text:p>8.3942</text:p>
          </table:table-cell>
          <table:table-cell office:value-type="string" table:style-name="c1">
            <text:p>2026-03-15 22:30</text:p>
          </table:table-cell>
          <table:table-cell office:value-type="float" office:value="8.365815" table:style-name="c1">
            <text:p>8.3658</text:p>
          </table:table-cell>
          <table:table-cell office:value-type="float" office:value="-0.5373149442561176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8.46423" table:style-name="c1">
            <text:p>8.4642</text:p>
          </table:table-cell>
          <table:table-cell office:value-type="string" table:style-name="c1">
            <text:p>2026-03-15 23:15</text:p>
          </table:table-cell>
          <table:table-cell office:value-type="float" office:value="8.485755000000001" table:style-name="c1">
            <text:p>8.4858</text:p>
          </table:table-cell>
          <table:table-cell office:value-type="float" office:value="0.053897114740508734" table:style-name="c13">
            <text:p>+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8.594294999999999" table:style-name="c1">
            <text:p>8.5943</text:p>
          </table:table-cell>
          <table:table-cell office:value-type="string" table:style-name="c1">
            <text:p>2026-03-16 04:00</text:p>
          </table:table-cell>
          <table:table-cell office:value-type="float" office:value="8.65567" table:style-name="c1">
            <text:p>8.6557</text:p>
          </table:table-cell>
          <table:table-cell office:value-type="float" office:value="0.512808970020262" table:style-name="c13">
            <text:p>+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45</text:p>
          </table:table-cell>
          <table:table-cell office:value-type="float" office:value="8.734365" table:style-name="c1">
            <text:p>8.7344</text:p>
          </table:table-cell>
          <table:table-cell office:value-type="string" table:style-name="c1">
            <text:p>2026-03-16 05:15</text:p>
          </table:table-cell>
          <table:table-cell office:value-type="float" office:value="8.805595" table:style-name="c1">
            <text:p>8.8056</text:p>
          </table:table-cell>
          <table:table-cell office:value-type="float" office:value="0.6139841373127952" table:style-name="c13">
            <text:p>+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45</text:p>
          </table:table-cell>
          <table:table-cell office:value-type="float" office:value="8.974485" table:style-name="c1">
            <text:p>8.9745</text:p>
          </table:table-cell>
          <table:table-cell office:value-type="string" table:style-name="c1">
            <text:p>2026-03-16 06:15</text:p>
          </table:table-cell>
          <table:table-cell office:value-type="float" office:value="8.885555000000002" table:style-name="c1">
            <text:p>8.8856</text:p>
          </table:table-cell>
          <table:table-cell office:value-type="float" office:value="-1.1888395205407076" table:style-name="c12">
            <text:p>-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8:15</text:p>
          </table:table-cell>
          <table:table-cell office:value-type="float" office:value="9.164579999999999" table:style-name="c1">
            <text:p>9.1646</text:p>
          </table:table-cell>
          <table:table-cell office:value-type="string" table:style-name="c1">
            <text:p>2026-03-16 08:45</text:p>
          </table:table-cell>
          <table:table-cell office:value-type="float" office:value="9.025485" table:style-name="c1">
            <text:p>9.0255</text:p>
          </table:table-cell>
          <table:table-cell office:value-type="float" office:value="-1.714611520822551" table:style-name="c12">
            <text:p>-1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00</text:p>
          </table:table-cell>
          <table:table-cell office:value-type="float" office:value="8.944469999999999" table:style-name="c1">
            <text:p>8.9445</text:p>
          </table:table-cell>
          <table:table-cell office:value-type="string" table:style-name="c1">
            <text:p>2026-03-16 14:30</text:p>
          </table:table-cell>
          <table:table-cell office:value-type="float" office:value="8.85557" table:style-name="c1">
            <text:p>8.8556</text:p>
          </table:table-cell>
          <table:table-cell office:value-type="float" office:value="-1.1918233772375442" table:style-name="c12">
            <text:p>-1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9.034514999999999" table:style-name="c1">
            <text:p>9.0345</text:p>
          </table:table-cell>
          <table:table-cell office:value-type="string" table:style-name="c1">
            <text:p>2026-03-16 21:45</text:p>
          </table:table-cell>
          <table:table-cell office:value-type="float" office:value="9.065465000000001" table:style-name="c1">
            <text:p>9.0655</text:p>
          </table:table-cell>
          <table:table-cell office:value-type="float" office:value="0.14199030567774162" table:style-name="c13">
            <text:p>+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4:15</text:p>
          </table:table-cell>
          <table:table-cell office:value-type="float" office:value="8.84442" table:style-name="c1">
            <text:p>8.8444</text:p>
          </table:table-cell>
          <table:table-cell office:value-type="string" table:style-name="c1">
            <text:p>2026-03-17 14:45</text:p>
          </table:table-cell>
          <table:table-cell office:value-type="float" office:value="8.865565" table:style-name="c1">
            <text:p>8.8656</text:p>
          </table:table-cell>
          <table:table-cell office:value-type="float" office:value="0.03869937842164717" table:style-name="c13">
            <text:p>+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45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3-23 21:15</text:p>
          </table:table-cell>
          <table:table-cell office:value-type="float" office:value="8.585705" table:style-name="c1">
            <text:p>8.5857</text:p>
          </table:table-cell>
          <table:table-cell office:value-type="float" office:value="-0.1834493510237678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1:30</text:p>
          </table:table-cell>
          <table:table-cell office:value-type="float" office:value="8.66433" table:style-name="c1">
            <text:p>8.6643</text:p>
          </table:table-cell>
          <table:table-cell office:value-type="string" table:style-name="c1">
            <text:p>2026-03-23 22:00</text:p>
          </table:table-cell>
          <table:table-cell office:value-type="float" office:value="8.67566" table:style-name="c1">
            <text:p>8.6757</text:p>
          </table:table-cell>
          <table:table-cell office:value-type="float" office:value="-0.06939537552238528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8.704349999999998" table:style-name="c1">
            <text:p>8.7043</text:p>
          </table:table-cell>
          <table:table-cell office:value-type="string" table:style-name="c1">
            <text:p>2026-03-24 21:15</text:p>
          </table:table-cell>
          <table:table-cell office:value-type="float" office:value="8.605695" table:style-name="c1">
            <text:p>8.6057</text:p>
          </table:table-cell>
          <table:table-cell office:value-type="float" office:value="-1.3310331535955733" table:style-name="c12">
            <text:p>-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8.794394999999998" table:style-name="c1">
            <text:p>8.7944</text:p>
          </table:table-cell>
          <table:table-cell office:value-type="string" table:style-name="c1">
            <text:p>2026-03-25 13:45</text:p>
          </table:table-cell>
          <table:table-cell office:value-type="float" office:value="8.71564" table:style-name="c1">
            <text:p>8.7156</text:p>
          </table:table-cell>
          <table:table-cell office:value-type="float" office:value="-1.093623431287749" table:style-name="c12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8.32416" table:style-name="c1">
            <text:p>8.3242</text:p>
          </table:table-cell>
          <table:table-cell office:value-type="string" table:style-name="c1">
            <text:p>2026-03-30 08:30</text:p>
          </table:table-cell>
          <table:table-cell office:value-type="float" office:value="8.365815" table:style-name="c1">
            <text:p>8.3658</text:p>
          </table:table-cell>
          <table:table-cell office:value-type="float" office:value="0.29951053097250213" table:style-name="c13">
            <text:p>+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4-01 06:00</text:p>
          </table:table-cell>
          <table:table-cell office:value-type="float" office:value="8.25587" table:style-name="c1">
            <text:p>8.2559</text:p>
          </table:table-cell>
          <table:table-cell office:value-type="float" office:value="-0.17880131606925476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8.34417" table:style-name="c1">
            <text:p>8.3442</text:p>
          </table:table-cell>
          <table:table-cell office:value-type="string" table:style-name="c1">
            <text:p>2026-04-01 06:45</text:p>
          </table:table-cell>
          <table:table-cell office:value-type="float" office:value="8.365815" table:style-name="c1">
            <text:p>8.3658</text:p>
          </table:table-cell>
          <table:table-cell office:value-type="float" office:value="0.058984126821459704" table:style-name="c13">
            <text:p>+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8.174085" table:style-name="c1">
            <text:p>8.1741</text:p>
          </table:table-cell>
          <table:table-cell office:value-type="string" table:style-name="c1">
            <text:p>2026-04-03 20:45</text:p>
          </table:table-cell>
          <table:table-cell office:value-type="float" office:value="8.145925" table:style-name="c1">
            <text:p>8.1459</text:p>
          </table:table-cell>
          <table:table-cell office:value-type="float" office:value="-0.5437147286210031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8.18409" table:style-name="c1">
            <text:p>8.1841</text:p>
          </table:table-cell>
          <table:table-cell office:value-type="string" table:style-name="c1">
            <text:p>2026-04-03 21:45</text:p>
          </table:table-cell>
          <table:table-cell office:value-type="float" office:value="8.135930000000002" table:style-name="c1">
            <text:p>8.1359</text:p>
          </table:table-cell>
          <table:table-cell office:value-type="float" office:value="-0.7871824976264707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2:15</text:p>
          </table:table-cell>
          <table:table-cell office:value-type="float" office:value="8.14407" table:style-name="c1">
            <text:p>8.1441</text:p>
          </table:table-cell>
          <table:table-cell office:value-type="string" table:style-name="c1">
            <text:p>2026-04-04 02:45</text:p>
          </table:table-cell>
          <table:table-cell office:value-type="float" office:value="8.11594" table:style-name="c1">
            <text:p>8.1159</text:p>
          </table:table-cell>
          <table:table-cell office:value-type="float" office:value="-0.5446142292489853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4:00</text:p>
          </table:table-cell>
          <table:table-cell office:value-type="float" office:value="8.194094999999999" table:style-name="c1">
            <text:p>8.1941</text:p>
          </table:table-cell>
          <table:table-cell office:value-type="string" table:style-name="c1">
            <text:p>2026-04-04 04:30</text:p>
          </table:table-cell>
          <table:table-cell office:value-type="float" office:value="8.17591" table:style-name="c1">
            <text:p>8.1759</text:p>
          </table:table-cell>
          <table:table-cell office:value-type="float" office:value="-0.421384473697195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7:1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4-04 07:45</text:p>
          </table:table-cell>
          <table:table-cell office:value-type="float" office:value="8.215890000000002" table:style-name="c1">
            <text:p>8.2159</text:p>
          </table:table-cell>
          <table:table-cell office:value-type="float" office:value="-0.7824606354207564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0:45</text:p>
          </table:table-cell>
          <table:table-cell office:value-type="float" office:value="8.374184999999999" table:style-name="c1">
            <text:p>8.3742</text:p>
          </table:table-cell>
          <table:table-cell office:value-type="string" table:style-name="c1">
            <text:p>2026-04-04 11:15</text:p>
          </table:table-cell>
          <table:table-cell office:value-type="float" office:value="8.405795000000001" table:style-name="c1">
            <text:p>8.4058</text:p>
          </table:table-cell>
          <table:table-cell office:value-type="float" office:value="0.17681500701265396" table:style-name="c13">
            <text:p>+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1:30</text:p>
          </table:table-cell>
          <table:table-cell office:value-type="float" office:value="8.44422" table:style-name="c1">
            <text:p>8.4442</text:p>
          </table:table-cell>
          <table:table-cell office:value-type="string" table:style-name="c1">
            <text:p>2026-04-04 12:00</text:p>
          </table:table-cell>
          <table:table-cell office:value-type="float" office:value="8.395800000000001" table:style-name="c1">
            <text:p>8.3958</text:p>
          </table:table-cell>
          <table:table-cell office:value-type="float" office:value="-0.7721637309307305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6:30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4-04 17:00</text:p>
          </table:table-cell>
          <table:table-cell office:value-type="float" office:value="8.455770000000001" table:style-name="c1">
            <text:p>8.4558</text:p>
          </table:table-cell>
          <table:table-cell office:value-type="float" office:value="-1.0017653641488988" table:style-name="c12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15</text:p>
          </table:table-cell>
          <table:table-cell office:value-type="float" office:value="8.66433" table:style-name="c1">
            <text:p>8.6643</text:p>
          </table:table-cell>
          <table:table-cell office:value-type="string" table:style-name="c1">
            <text:p>2026-04-04 17:45</text:p>
          </table:table-cell>
          <table:table-cell office:value-type="float" office:value="8.71564" table:style-name="c1">
            <text:p>8.7156</text:p>
          </table:table-cell>
          <table:table-cell office:value-type="float" office:value="0.3911143232079084" table:style-name="c13">
            <text:p>+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8:15</text:p>
          </table:table-cell>
          <table:table-cell office:value-type="float" office:value="8.834415" table:style-name="c1">
            <text:p>8.8344</text:p>
          </table:table-cell>
          <table:table-cell office:value-type="string" table:style-name="c1">
            <text:p>2026-04-04 18:45</text:p>
          </table:table-cell>
          <table:table-cell office:value-type="float" office:value="8.825585" table:style-name="c1">
            <text:p>8.8256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9:30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4-05 20:00</text:p>
          </table:table-cell>
          <table:table-cell office:value-type="float" office:value="8.5957" table:style-name="c1">
            <text:p>8.5957</text:p>
          </table:table-cell>
          <table:table-cell office:value-type="float" office:value="-0.06724847715998683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2:00</text:p>
          </table:table-cell>
          <table:table-cell office:value-type="float" office:value="8.684339999999999" table:style-name="c1">
            <text:p>8.6843</text:p>
          </table:table-cell>
          <table:table-cell office:value-type="string" table:style-name="c1">
            <text:p>2026-04-05 22:30</text:p>
          </table:table-cell>
          <table:table-cell office:value-type="float" office:value="8.665665" table:style-name="c1">
            <text:p>8.6657</text:p>
          </table:table-cell>
          <table:table-cell office:value-type="float" office:value="-0.41451237900632654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2:45</text:p>
          </table:table-cell>
          <table:table-cell office:value-type="float" office:value="8.704349999999998" table:style-name="c1">
            <text:p>8.7043</text:p>
          </table:table-cell>
          <table:table-cell office:value-type="string" table:style-name="c1">
            <text:p>2026-04-05 23:15</text:p>
          </table:table-cell>
          <table:table-cell office:value-type="float" office:value="8.75562" table:style-name="c1">
            <text:p>8.7556</text:p>
          </table:table-cell>
          <table:table-cell office:value-type="float" office:value="0.38793839425117493" table:style-name="c13">
            <text:p>+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30</text:p>
          </table:table-cell>
          <table:table-cell office:value-type="float" office:value="8.804400000000001" table:style-name="c1">
            <text:p>8.8044</text:p>
          </table:table-cell>
          <table:table-cell office:value-type="string" table:style-name="c1">
            <text:p>2026-04-06 00:00</text:p>
          </table:table-cell>
          <table:table-cell office:value-type="float" office:value="8.73563" table:style-name="c1">
            <text:p>8.7356</text:p>
          </table:table-cell>
          <table:table-cell office:value-type="float" office:value="-0.9794253369906136" table:style-name="c12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30</text:p>
          </table:table-cell>
          <table:table-cell office:value-type="float" office:value="8.784389999999998" table:style-name="c1">
            <text:p>8.7844</text:p>
          </table:table-cell>
          <table:table-cell office:value-type="string" table:style-name="c1">
            <text:p>2026-04-06 02:00</text:p>
          </table:table-cell>
          <table:table-cell office:value-type="float" office:value="8.71564" table:style-name="c1">
            <text:p>8.7156</text:p>
          </table:table-cell>
          <table:table-cell office:value-type="float" office:value="-0.9809737996605117" table:style-name="c12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30</text:p>
          </table:table-cell>
          <table:table-cell office:value-type="float" office:value="8.74437" table:style-name="c1">
            <text:p>8.7444</text:p>
          </table:table-cell>
          <table:table-cell office:value-type="string" table:style-name="c1">
            <text:p>2026-04-06 11:00</text:p>
          </table:table-cell>
          <table:table-cell office:value-type="float" office:value="8.69565" table:style-name="c1">
            <text:p>8.6957</text:p>
          </table:table-cell>
          <table:table-cell office:value-type="float" office:value="-0.7559447318674528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45</text:p>
          </table:table-cell>
          <table:table-cell office:value-type="float" office:value="8.614304999999998" table:style-name="c1">
            <text:p>8.6143</text:p>
          </table:table-cell>
          <table:table-cell office:value-type="string" table:style-name="c1">
            <text:p>2026-04-10 15:15</text:p>
          </table:table-cell>
          <table:table-cell office:value-type="float" office:value="8.615689999999999" table:style-name="c1">
            <text:p>8.6157</text:p>
          </table:table-cell>
          <table:table-cell office:value-type="float" office:value="-0.18385423211738638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8.514254999999999" table:style-name="c1">
            <text:p>8.5143</text:p>
          </table:table-cell>
          <table:table-cell office:value-type="string" table:style-name="c1">
            <text:p>2026-04-13 23:30</text:p>
          </table:table-cell>
          <table:table-cell office:value-type="float" office:value="8.57571" table:style-name="c1">
            <text:p>8.5757</text:p>
          </table:table-cell>
          <table:table-cell office:value-type="float" office:value="0.5204466592790835" table:style-name="c13">
            <text:p>+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9:15</text:p>
          </table:table-cell>
          <table:table-cell office:value-type="float" office:value="8.52426" table:style-name="c1">
            <text:p>8.5243</text:p>
          </table:table-cell>
          <table:table-cell office:value-type="string" table:style-name="c1">
            <text:p>2026-04-14 09:45</text:p>
          </table:table-cell>
          <table:table-cell office:value-type="float" office:value="8.475760000000001" table:style-name="c1">
            <text:p>8.4758</text:p>
          </table:table-cell>
          <table:table-cell office:value-type="float" office:value="-0.7677269843951229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8.454225" table:style-name="c1">
            <text:p>8.4542</text:p>
          </table:table-cell>
          <table:table-cell office:value-type="string" table:style-name="c1">
            <text:p>2026-04-15 15:30</text:p>
          </table:table-cell>
          <table:table-cell office:value-type="float" office:value="8.405795000000001" table:style-name="c1">
            <text:p>8.4058</text:p>
          </table:table-cell>
          <table:table-cell office:value-type="float" office:value="-0.7716045433496133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30</text:p>
          </table:table-cell>
          <table:table-cell office:value-type="float" office:value="8.46423" table:style-name="c1">
            <text:p>8.4642</text:p>
          </table:table-cell>
          <table:table-cell office:value-type="string" table:style-name="c1">
            <text:p>2026-04-15 17:00</text:p>
          </table:table-cell>
          <table:table-cell office:value-type="float" office:value="8.43578" table:style-name="c1">
            <text:p>8.4358</text:p>
          </table:table-cell>
          <table:table-cell office:value-type="float" office:value="-0.5353484513062723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8.534265" table:style-name="c1">
            <text:p>8.5343</text:p>
          </table:table-cell>
          <table:table-cell office:value-type="string" table:style-name="c1">
            <text:p>2026-04-15 20:15</text:p>
          </table:table-cell>
          <table:table-cell office:value-type="float" office:value="8.475760000000001" table:style-name="c1">
            <text:p>8.4758</text:p>
          </table:table-cell>
          <table:table-cell office:value-type="float" office:value="-0.8840602470159831" table:style-name="c12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00</text:p>
          </table:table-cell>
          <table:table-cell office:value-type="float" office:value="8.494245" table:style-name="c1">
            <text:p>8.4942</text:p>
          </table:table-cell>
          <table:table-cell office:value-type="string" table:style-name="c1">
            <text:p>2026-04-16 03:30</text:p>
          </table:table-cell>
          <table:table-cell office:value-type="float" office:value="8.505745000000001" table:style-name="c1">
            <text:p>8.5057</text:p>
          </table:table-cell>
          <table:table-cell office:value-type="float" office:value="-0.06478485439256332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8.554275" table:style-name="c1">
            <text:p>8.5543</text:p>
          </table:table-cell>
          <table:table-cell office:value-type="string" table:style-name="c1">
            <text:p>2026-04-16 13:00</text:p>
          </table:table-cell>
          <table:table-cell office:value-type="float" office:value="8.565715" table:style-name="c1">
            <text:p>8.5657</text:p>
          </table:table-cell>
          <table:table-cell office:value-type="float" office:value="-0.06643303243115684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8.62431" table:style-name="c1">
            <text:p>8.6243</text:p>
          </table:table-cell>
          <table:table-cell office:value-type="string" table:style-name="c1">
            <text:p>2026-04-16 16:30</text:p>
          </table:table-cell>
          <table:table-cell office:value-type="float" office:value="8.57571" table:style-name="c1">
            <text:p>8.5757</text:p>
          </table:table-cell>
          <table:table-cell office:value-type="float" office:value="-0.7622968595748403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8.674335" table:style-name="c1">
            <text:p>8.6743</text:p>
          </table:table-cell>
          <table:table-cell office:value-type="string" table:style-name="c1">
            <text:p>2026-04-17 08:15</text:p>
          </table:table-cell>
          <table:table-cell office:value-type="float" office:value="8.67566" table:style-name="c1">
            <text:p>8.6757</text:p>
          </table:table-cell>
          <table:table-cell office:value-type="float" office:value="-0.18465558846871843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45</text:p>
          </table:table-cell>
          <table:table-cell office:value-type="float" office:value="8.684339999999999" table:style-name="c1">
            <text:p>8.6843</text:p>
          </table:table-cell>
          <table:table-cell office:value-type="string" table:style-name="c1">
            <text:p>2026-04-17 09:15</text:p>
          </table:table-cell>
          <table:table-cell office:value-type="float" office:value="8.65567" table:style-name="c1">
            <text:p>8.6557</text:p>
          </table:table-cell>
          <table:table-cell office:value-type="float" office:value="-0.5293745331251265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4-17 17:30</text:p>
          </table:table-cell>
          <table:table-cell office:value-type="float" office:value="8.825585" table:style-name="c1">
            <text:p>8.8256</text:p>
          </table:table-cell>
          <table:table-cell office:value-type="float" office:value="-0.9725434742133943" table:style-name="c12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5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1 16:00</text:p>
          </table:table-cell>
          <table:table-cell office:value-type="float" office:value="8.475760000000001" table:style-name="c1">
            <text:p>8.4758</text:p>
          </table:table-cell>
          <table:table-cell office:value-type="float" office:value="-0.1819402487657995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4-22 03:15</text:p>
          </table:table-cell>
          <table:table-cell office:value-type="float" office:value="8.57571" table:style-name="c1">
            <text:p>8.5757</text:p>
          </table:table-cell>
          <table:table-cell office:value-type="float" office:value="-0.06670548242233565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8.634315" table:style-name="c1">
            <text:p>8.6343</text:p>
          </table:table-cell>
          <table:table-cell office:value-type="string" table:style-name="c1">
            <text:p>2026-04-22 06:00</text:p>
          </table:table-cell>
          <table:table-cell office:value-type="float" office:value="8.605695" table:style-name="c1">
            <text:p>8.6057</text:p>
          </table:table-cell>
          <table:table-cell office:value-type="float" office:value="-0.5307054966722902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1:00</text:p>
          </table:table-cell>
          <table:table-cell office:value-type="float" office:value="8.72436" table:style-name="c1">
            <text:p>8.7244</text:p>
          </table:table-cell>
          <table:table-cell office:value-type="string" table:style-name="c1">
            <text:p>2026-04-22 11:30</text:p>
          </table:table-cell>
          <table:table-cell office:value-type="float" office:value="8.705645" table:style-name="c1">
            <text:p>8.7056</text:p>
          </table:table-cell>
          <table:table-cell office:value-type="float" office:value="-0.41398548839111093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3 07:00</text:p>
          </table:table-cell>
          <table:table-cell office:value-type="float" office:value="8.465765000000001" table:style-name="c1">
            <text:p>8.465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30</text:p>
          </table:table-cell>
          <table:table-cell office:value-type="float" office:value="8.54427" table:style-name="c1">
            <text:p>8.5443</text:p>
          </table:table-cell>
          <table:table-cell office:value-type="string" table:style-name="c1">
            <text:p>2026-04-24 01:00</text:p>
          </table:table-cell>
          <table:table-cell office:value-type="float" office:value="8.53573" table:style-name="c1">
            <text:p>8.5357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9 04:15</text:p>
          </table:table-cell>
          <table:table-cell office:value-type="float" office:value="8.445775" table:style-name="c1">
            <text:p>8.4458</text:p>
          </table:table-cell>
          <table:table-cell office:value-type="float" office:value="-0.5350701771310584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8.504249999999999" table:style-name="c1">
            <text:p>8.5042</text:p>
          </table:table-cell>
          <table:table-cell office:value-type="string" table:style-name="c1">
            <text:p>2026-04-29 05:15</text:p>
          </table:table-cell>
          <table:table-cell office:value-type="float" office:value="8.495750000000001" table:style-name="c1">
            <text:p>8.4958</text:p>
          </table:table-cell>
          <table:table-cell office:value-type="float" office:value="-0.29965022488751547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4-29 10:30</text:p>
          </table:table-cell>
          <table:table-cell office:value-type="float" office:value="8.585705" table:style-name="c1">
            <text:p>8.5857</text:p>
          </table:table-cell>
          <table:table-cell office:value-type="float" office:value="-0.1834493510237678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.604299999999999" table:style-name="c1">
            <text:p>8.6043</text:p>
          </table:table-cell>
          <table:table-cell office:value-type="string" table:style-name="c1">
            <text:p>2026-05-04 02:45</text:p>
          </table:table-cell>
          <table:table-cell office:value-type="float" office:value="8.645675" table:style-name="c1">
            <text:p>8.6457</text:p>
          </table:table-cell>
          <table:table-cell office:value-type="float" office:value="0.28000297147940945" table:style-name="c13">
            <text:p>+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3:15</text:p>
          </table:table-cell>
          <table:table-cell office:value-type="float" office:value="8.674335" table:style-name="c1">
            <text:p>8.6743</text:p>
          </table:table-cell>
          <table:table-cell office:value-type="string" table:style-name="c1">
            <text:p>2026-05-04 03:45</text:p>
          </table:table-cell>
          <table:table-cell office:value-type="float" office:value="8.65567" table:style-name="c1">
            <text:p>8.6557</text:p>
          </table:table-cell>
          <table:table-cell office:value-type="float" office:value="-0.4146448613063569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2:45</text:p>
          </table:table-cell>
          <table:table-cell office:value-type="float" office:value="8.654325" table:style-name="c1">
            <text:p>8.6543</text:p>
          </table:table-cell>
          <table:table-cell office:value-type="string" table:style-name="c1">
            <text:p>2026-05-04 13:15</text:p>
          </table:table-cell>
          <table:table-cell office:value-type="float" office:value="8.67566" table:style-name="c1">
            <text:p>8.6757</text:p>
          </table:table-cell>
          <table:table-cell office:value-type="float" office:value="0.04613133502613387" table:style-name="c13">
            <text:p>+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4:15</text:p>
          </table:table-cell>
          <table:table-cell office:value-type="float" office:value="8.854424999999999" table:style-name="c1">
            <text:p>8.8544</text:p>
          </table:table-cell>
          <table:table-cell office:value-type="string" table:style-name="c1">
            <text:p>2026-05-04 14:45</text:p>
          </table:table-cell>
          <table:table-cell office:value-type="float" office:value="8.75562" table:style-name="c1">
            <text:p>8.7556</text:p>
          </table:table-cell>
          <table:table-cell office:value-type="float" office:value="-1.313552087007308" table:style-name="c12">
            <text:p>-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30</text:p>
          </table:table-cell>
          <table:table-cell office:value-type="float" office:value="8.82441" table:style-name="c1">
            <text:p>8.8244</text:p>
          </table:table-cell>
          <table:table-cell office:value-type="string" table:style-name="c1">
            <text:p>2026-05-05 03:00</text:p>
          </table:table-cell>
          <table:table-cell office:value-type="float" office:value="8.805595" table:style-name="c1">
            <text:p>8.8056</text:p>
          </table:table-cell>
          <table:table-cell office:value-type="float" office:value="-0.41268917021081153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8:15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5-05 08:45</text:p>
          </table:table-cell>
          <table:table-cell office:value-type="float" office:value="8.85557" table:style-name="c1">
            <text:p>8.8556</text:p>
          </table:table-cell>
          <table:table-cell office:value-type="float" office:value="-0.6360968495504604" table:style-name="c12">
            <text:p>-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30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5-05 11:00</text:p>
          </table:table-cell>
          <table:table-cell office:value-type="float" office:value="8.965515000000002" table:style-name="c1">
            <text:p>8.9655</text:p>
          </table:table-cell>
          <table:table-cell office:value-type="float" office:value="0.5975407742135896" table:style-name="c13">
            <text:p>+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00</text:p>
          </table:table-cell>
          <table:table-cell office:value-type="float" office:value="8.994495" table:style-name="c1">
            <text:p>8.9945</text:p>
          </table:table-cell>
          <table:table-cell office:value-type="string" table:style-name="c1">
            <text:p>2026-05-05 21:30</text:p>
          </table:table-cell>
          <table:table-cell office:value-type="float" office:value="8.985505" table:style-name="c1">
            <text:p>8.9855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9.02451" table:style-name="c1">
            <text:p>9.0245</text:p>
          </table:table-cell>
          <table:table-cell office:value-type="string" table:style-name="c1">
            <text:p>2026-05-05 22:30</text:p>
          </table:table-cell>
          <table:table-cell office:value-type="float" office:value="9.005495" table:style-name="c1">
            <text:p>9.0055</text:p>
          </table:table-cell>
          <table:table-cell office:value-type="float" office:value="-0.41018276344089166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9.314655" table:style-name="c1">
            <text:p>9.3147</text:p>
          </table:table-cell>
          <table:table-cell office:value-type="string" table:style-name="c1">
            <text:p>2026-05-06 04:15</text:p>
          </table:table-cell>
          <table:table-cell office:value-type="float" office:value="9.325335" table:style-name="c1">
            <text:p>9.3253</text:p>
          </table:table-cell>
          <table:table-cell office:value-type="float" office:value="-0.08547117059085618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15</text:p>
          </table:table-cell>
          <table:table-cell office:value-type="float" office:value="9.394695" table:style-name="c1">
            <text:p>9.3947</text:p>
          </table:table-cell>
          <table:table-cell office:value-type="string" table:style-name="c1">
            <text:p>2026-05-06 09:45</text:p>
          </table:table-cell>
          <table:table-cell office:value-type="float" office:value="9.35532" table:style-name="c1">
            <text:p>9.3553</text:p>
          </table:table-cell>
          <table:table-cell office:value-type="float" office:value="-0.6181816938176321" table:style-name="c12">
            <text:p>-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5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6 16:15</text:p>
          </table:table-cell>
          <table:table-cell office:value-type="float" office:value="9.465265" table:style-name="c1">
            <text:p>9.4653</text:p>
          </table:table-cell>
          <table:table-cell office:value-type="float" office:value="0.3360587003522708" table:style-name="c13">
            <text:p>+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45</text:p>
          </table:table-cell>
          <table:table-cell office:value-type="float" office:value="9.314655" table:style-name="c1">
            <text:p>9.3147</text:p>
          </table:table-cell>
          <table:table-cell office:value-type="string" table:style-name="c1">
            <text:p>2026-05-07 07:15</text:p>
          </table:table-cell>
          <table:table-cell office:value-type="float" office:value="9.33533" table:style-name="c1">
            <text:p>9.3353</text:p>
          </table:table-cell>
          <table:table-cell office:value-type="float" office:value="0.021618356557495666" table:style-name="c13">
            <text:p>+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6:30</text:p>
          </table:table-cell>
          <table:table-cell office:value-type="float" office:value="9.32466" table:style-name="c1">
            <text:p>9.3247</text:p>
          </table:table-cell>
          <table:table-cell office:value-type="string" table:style-name="c1">
            <text:p>2026-05-07 17:00</text:p>
          </table:table-cell>
          <table:table-cell office:value-type="float" office:value="9.215390000000001" table:style-name="c1">
            <text:p>9.2154</text:p>
          </table:table-cell>
          <table:table-cell office:value-type="float" office:value="-1.3693964671097625" table:style-name="c12">
            <text:p>-1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15</text:p>
          </table:table-cell>
          <table:table-cell office:value-type="float" office:value="9.38469" table:style-name="c1">
            <text:p>9.3847</text:p>
          </table:table-cell>
          <table:table-cell office:value-type="string" table:style-name="c1">
            <text:p>2026-05-08 08:45</text:p>
          </table:table-cell>
          <table:table-cell office:value-type="float" office:value="9.41529" table:style-name="c1">
            <text:p>9.4153</text:p>
          </table:table-cell>
          <table:table-cell office:value-type="float" office:value="0.12551118140289308" table:style-name="c13">
            <text:p>+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9:30</text:p>
          </table:table-cell>
          <table:table-cell office:value-type="float" office:value="9.444719999999998" table:style-name="c1">
            <text:p>9.4447</text:p>
          </table:table-cell>
          <table:table-cell office:value-type="string" table:style-name="c1">
            <text:p>2026-05-08 10:00</text:p>
          </table:table-cell>
          <table:table-cell office:value-type="float" office:value="9.49525" table:style-name="c1">
            <text:p>9.4953</text:p>
          </table:table-cell>
          <table:table-cell office:value-type="float" office:value="0.3340384389373341" table:style-name="c13">
            <text:p>+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0:15</text:p>
          </table:table-cell>
          <table:table-cell office:value-type="float" office:value="9.50475" table:style-name="c1">
            <text:p>9.5047</text:p>
          </table:table-cell>
          <table:table-cell office:value-type="string" table:style-name="c1">
            <text:p>2026-05-08 10:45</text:p>
          </table:table-cell>
          <table:table-cell office:value-type="float" office:value="9.45527" table:style-name="c1">
            <text:p>9.4553</text:p>
          </table:table-cell>
          <table:table-cell office:value-type="float" office:value="-0.7194411713090765" table:style-name="c12">
            <text:p>-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9.474735" table:style-name="c1">
            <text:p>9.4747</text:p>
          </table:table-cell>
          <table:table-cell office:value-type="string" table:style-name="c1">
            <text:p>2026-05-08 15:15</text:p>
          </table:table-cell>
          <table:table-cell office:value-type="float" office:value="9.445275" table:style-name="c1">
            <text:p>9.4453</text:p>
          </table:table-cell>
          <table:table-cell office:value-type="float" office:value="-0.5102106256797745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9.534764999999998" table:style-name="c1">
            <text:p>9.5348</text:p>
          </table:table-cell>
          <table:table-cell office:value-type="string" table:style-name="c1">
            <text:p>2026-05-08 16:15</text:p>
          </table:table-cell>
          <table:table-cell office:value-type="float" office:value="9.745125" table:style-name="c1">
            <text:p>9.7451</text:p>
          </table:table-cell>
          <table:table-cell office:value-type="float" office:value="2.00193182658408" table:style-name="c13">
            <text:p>+2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5-10 00:45</text:p>
          </table:table-cell>
          <table:table-cell office:value-type="float" office:value="9.635180000000002" table:style-name="c1">
            <text:p>9.6352</text:p>
          </table:table-cell>
          <table:table-cell office:value-type="float" office:value="-0.29965022488751547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30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5-10 08:00</text:p>
          </table:table-cell>
          <table:table-cell office:value-type="float" office:value="9.665165" table:style-name="c1">
            <text:p>9.6652</text:p>
          </table:table-cell>
          <table:table-cell office:value-type="float" office:value="-0.8125121064467611" table:style-name="c12">
            <text:p>-0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45</text:p>
          </table:table-cell>
          <table:table-cell office:value-type="float" office:value="9.784889999999999" table:style-name="c1">
            <text:p>9.7849</text:p>
          </table:table-cell>
          <table:table-cell office:value-type="string" table:style-name="c1">
            <text:p>2026-05-10 17:15</text:p>
          </table:table-cell>
          <table:table-cell office:value-type="float" office:value="9.77511" table:style-name="c1">
            <text:p>9.7751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9.914954999999999" table:style-name="c1">
            <text:p>9.915</text:p>
          </table:table-cell>
          <table:table-cell office:value-type="string" table:style-name="c1">
            <text:p>2026-05-10 23:00</text:p>
          </table:table-cell>
          <table:table-cell office:value-type="float" office:value="9.945025" table:style-name="c1">
            <text:p>9.945</text:p>
          </table:table-cell>
          <table:table-cell office:value-type="float" office:value="0.10277298308463134" table:style-name="c13">
            <text:p>+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9.994995" table:style-name="c1">
            <text:p>9.995</text:p>
          </table:table-cell>
          <table:table-cell office:value-type="string" table:style-name="c1">
            <text:p>2026-05-10 23:45</text:p>
          </table:table-cell>
          <table:table-cell office:value-type="float" office:value="10.014990000000001" table:style-name="c1">
            <text:p>10.015</text:p>
          </table:table-cell>
          <table:table-cell office:value-type="float" office:value="-0.0002497751124153069" table:style-name="c12">
            <text:p>-0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6:3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0 07:00</text:p>
          </table:table-cell>
          <table:table-cell office:value-type="float" office:value="9.025485" table:style-name="c1">
            <text:p>9.0255</text:p>
          </table:table-cell>
          <table:table-cell office:value-type="float" office:value="-0.0783397925343654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8:15</text:p>
          </table:table-cell>
          <table:table-cell office:value-type="float" office:value="9.054525" table:style-name="c1">
            <text:p>9.0545</text:p>
          </table:table-cell>
          <table:table-cell office:value-type="string" table:style-name="c1">
            <text:p>2026-05-20 08:45</text:p>
          </table:table-cell>
          <table:table-cell office:value-type="float" office:value="9.065465000000001" table:style-name="c1">
            <text:p>9.0655</text:p>
          </table:table-cell>
          <table:table-cell office:value-type="float" office:value="-0.07931796019116089" table:style-name="c12">
            <text:p>-0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9.074535" table:style-name="c1">
            <text:p>9.0745</text:p>
          </table:table-cell>
          <table:table-cell office:value-type="string" table:style-name="c1">
            <text:p>2026-05-20 16:00</text:p>
          </table:table-cell>
          <table:table-cell office:value-type="float" office:value="9.075460000000001" table:style-name="c1">
            <text:p>9.0755</text:p>
          </table:table-cell>
          <table:table-cell office:value-type="float" office:value="-0.18972701675620263" table:style-name="c12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7:15</text:p>
          </table:table-cell>
          <table:table-cell office:value-type="float" office:value="9.10455" table:style-name="c1">
            <text:p>9.1045</text:p>
          </table:table-cell>
          <table:table-cell office:value-type="string" table:style-name="c1">
            <text:p>2026-05-20 17:45</text:p>
          </table:table-cell>
          <table:table-cell office:value-type="float" office:value="9.065465000000001" table:style-name="c1">
            <text:p>9.0655</text:p>
          </table:table-cell>
          <table:table-cell office:value-type="float" office:value="-0.6283326966736058" table:style-name="c12">
            <text:p>-0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9.174584999999999" table:style-name="c1">
            <text:p>9.1746</text:p>
          </table:table-cell>
          <table:table-cell office:value-type="string" table:style-name="c1">
            <text:p>2026-05-22 04:45</text:p>
          </table:table-cell>
          <table:table-cell office:value-type="float" office:value="9.075460000000001" table:style-name="c1">
            <text:p>9.0755</text:p>
          </table:table-cell>
          <table:table-cell office:value-type="float" office:value="-1.2781705607392446" table:style-name="c12">
            <text:p>-1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30</text:p>
          </table:table-cell>
          <table:table-cell office:value-type="float" office:value="9.28464" table:style-name="c1">
            <text:p>9.2846</text:p>
          </table:table-cell>
          <table:table-cell office:value-type="string" table:style-name="c1">
            <text:p>2026-05-22 09:00</text:p>
          </table:table-cell>
          <table:table-cell office:value-type="float" office:value="9.205395000000001" table:style-name="c1">
            <text:p>9.2054</text:p>
          </table:table-cell>
          <table:table-cell office:value-type="float" office:value="-1.051700277070522" table:style-name="c12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7:0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5 07:30</text:p>
          </table:table-cell>
          <table:table-cell office:value-type="float" office:value="8.985505" table:style-name="c1">
            <text:p>8.9855</text:p>
          </table:table-cell>
          <table:table-cell office:value-type="float" office:value="-0.5209606572407322" table:style-name="c12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1:00</text:p>
          </table:table-cell>
          <table:table-cell office:value-type="float" office:value="9.06453" table:style-name="c1">
            <text:p>9.0645</text:p>
          </table:table-cell>
          <table:table-cell office:value-type="string" table:style-name="c1">
            <text:p>2026-05-25 11:30</text:p>
          </table:table-cell>
          <table:table-cell office:value-type="float" office:value="9.055470000000001" table:style-name="c1">
            <text:p>9.0555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9.114555" table:style-name="c1">
            <text:p>9.1146</text:p>
          </table:table-cell>
          <table:table-cell office:value-type="string" table:style-name="c1">
            <text:p>2026-05-25 15:00</text:p>
          </table:table-cell>
          <table:table-cell office:value-type="float" office:value="9.09545" table:style-name="c1">
            <text:p>9.0954</text:p>
          </table:table-cell>
          <table:table-cell office:value-type="float" office:value="-0.4090907844650604" table:style-name="c12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00</text:p>
          </table:table-cell>
          <table:table-cell office:value-type="float" office:value="9.134565" table:style-name="c1">
            <text:p>9.1346</text:p>
          </table:table-cell>
          <table:table-cell office:value-type="string" table:style-name="c1">
            <text:p>2026-05-25 17:30</text:p>
          </table:table-cell>
          <table:table-cell office:value-type="float" office:value="9.085455" table:style-name="c1">
            <text:p>9.0855</text:p>
          </table:table-cell>
          <table:table-cell office:value-type="float" office:value="-0.7364535097730496" table:style-name="c12">
            <text:p>-0.7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21:15</text:p>
          </table:table-cell>
          <table:table-cell office:value-type="float" office:value="2094.2766149999998" table:style-name="c9">
            <text:p>2094.3</text:p>
          </table:table-cell>
          <table:table-cell office:value-type="string" table:style-name="c9">
            <text:p>2026-03-05 21:45</text:p>
          </table:table-cell>
          <table:table-cell office:value-type="float" office:value="2080.61917" table:style-name="c9">
            <text:p>2080.6</text:p>
          </table:table-cell>
          <table:table-cell office:value-type="float" office:value="-0.8507282463653842" table:style-name="c10">
            <text:p>-0.9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3:30</text:p>
          </table:table-cell>
          <table:table-cell office:value-type="float" office:value="2019.2391149999999" table:style-name="c9">
            <text:p>2019.2</text:p>
          </table:table-cell>
          <table:table-cell office:value-type="string" table:style-name="c9">
            <text:p>2026-03-09 14:00</text:p>
          </table:table-cell>
          <table:table-cell office:value-type="float" office:value="2017.1409250000002" table:style-name="c9">
            <text:p>2017.1</text:p>
          </table:table-cell>
          <table:table-cell office:value-type="float" office:value="-0.30360221647521834" table:style-name="c10">
            <text:p>-0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9:45</text:p>
          </table:table-cell>
          <table:table-cell office:value-type="float" office:value="2032.65582" table:style-name="c9">
            <text:p>2032.7</text:p>
          </table:table-cell>
          <table:table-cell office:value-type="string" table:style-name="c9">
            <text:p>2026-03-09 20:15</text:p>
          </table:table-cell>
          <table:table-cell office:value-type="float" office:value="2031.1139350000003" table:style-name="c9">
            <text:p>2031.1</text:p>
          </table:table-cell>
          <table:table-cell office:value-type="float" office:value="-0.2756040496843526" table:style-name="c10">
            <text:p>-0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5:00</text:p>
          </table:table-cell>
          <table:table-cell office:value-type="float" office:value="2076.227595" table:style-name="c9">
            <text:p>2076.2</text:p>
          </table:table-cell>
          <table:table-cell office:value-type="string" table:style-name="c9">
            <text:p>2026-03-10 15:30</text:p>
          </table:table-cell>
          <table:table-cell office:value-type="float" office:value="2068.0754450000004" table:style-name="c9">
            <text:p>2068.1</text:p>
          </table:table-cell>
          <table:table-cell office:value-type="float" office:value="-0.5917575146454079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3:45</text:p>
          </table:table-cell>
          <table:table-cell office:value-type="float" office:value="2064.15156" table:style-name="c9">
            <text:p>2064.2</text:p>
          </table:table-cell>
          <table:table-cell office:value-type="string" table:style-name="c9">
            <text:p>2026-03-11 14:15</text:p>
          </table:table-cell>
          <table:table-cell office:value-type="float" office:value="2049.2548600000005" table:style-name="c9">
            <text:p>2049.3</text:p>
          </table:table-cell>
          <table:table-cell office:value-type="float" office:value="-0.92014369648028" table:style-name="c10">
            <text:p>-0.9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6:45</text:p>
          </table:table-cell>
          <table:table-cell office:value-type="float" office:value="2069.444205" table:style-name="c9">
            <text:p>2069.4</text:p>
          </table:table-cell>
          <table:table-cell office:value-type="string" table:style-name="c9">
            <text:p>2026-03-11 17:15</text:p>
          </table:table-cell>
          <table:table-cell office:value-type="float" office:value="2070.28434" table:style-name="c9">
            <text:p>2070.3</text:p>
          </table:table-cell>
          <table:table-cell office:value-type="float" office:value="-0.15938402145321273" table:style-name="c10">
            <text:p>-0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8:00</text:p>
          </table:table-cell>
          <table:table-cell office:value-type="float" office:value="2041.710345" table:style-name="c9">
            <text:p>2041.7</text:p>
          </table:table-cell>
          <table:table-cell office:value-type="string" table:style-name="c9">
            <text:p>2026-03-12 08:30</text:p>
          </table:table-cell>
          <table:table-cell office:value-type="float" office:value="2043.59769" table:style-name="c9">
            <text:p>2043.6</text:p>
          </table:table-cell>
          <table:table-cell office:value-type="float" office:value="-0.10764537622549586" table:style-name="c10">
            <text:p>-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4:15</text:p>
          </table:table-cell>
          <table:table-cell office:value-type="float" office:value="2081.250105" table:style-name="c9">
            <text:p>2081.3</text:p>
          </table:table-cell>
          <table:table-cell office:value-type="string" table:style-name="c9">
            <text:p>2026-03-12 14:45</text:p>
          </table:table-cell>
          <table:table-cell office:value-type="float" office:value="2044.6071850000003" table:style-name="c9">
            <text:p>2044.6</text:p>
          </table:table-cell>
          <table:table-cell office:value-type="float" office:value="-1.9570012111934432" table:style-name="c10">
            <text:p>-2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00</text:p>
          </table:table-cell>
          <table:table-cell office:value-type="float" office:value="2147.71332" table:style-name="c9">
            <text:p>2147.7</text:p>
          </table:table-cell>
          <table:table-cell office:value-type="string" table:style-name="c9">
            <text:p>2026-03-13 13:30</text:p>
          </table:table-cell>
          <table:table-cell office:value-type="float" office:value="2181.9085" table:style-name="c9">
            <text:p>2181.9</text:p>
          </table:table-cell>
          <table:table-cell office:value-type="float" office:value="1.3890841310468804" table:style-name="c11">
            <text:p>+1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45</text:p>
          </table:table-cell>
          <table:table-cell office:value-type="float" office:value="2189.684295" table:style-name="c9">
            <text:p>2189.7</text:p>
          </table:table-cell>
          <table:table-cell office:value-type="string" table:style-name="c9">
            <text:p>2026-03-13 14:15</text:p>
          </table:table-cell>
          <table:table-cell office:value-type="float" office:value="2192.193355" table:style-name="c9">
            <text:p>2192.2</text:p>
          </table:table-cell>
          <table:table-cell office:value-type="float" office:value="-0.08554358822056018" table:style-name="c10">
            <text:p>-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2:45</text:p>
          </table:table-cell>
          <table:table-cell office:value-type="float" office:value="2104.93194" table:style-name="c9">
            <text:p>2104.9</text:p>
          </table:table-cell>
          <table:table-cell office:value-type="string" table:style-name="c9">
            <text:p>2026-03-15 03:15</text:p>
          </table:table-cell>
          <table:table-cell office:value-type="float" office:value="2101.7486000000004" table:style-name="c9">
            <text:p>2101.7</text:p>
          </table:table-cell>
          <table:table-cell office:value-type="float" office:value="-0.3508301295195193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5:45</text:p>
          </table:table-cell>
          <table:table-cell office:value-type="float" office:value="2113.7163299999997" table:style-name="c9">
            <text:p>2113.7</text:p>
          </table:table-cell>
          <table:table-cell office:value-type="string" table:style-name="c9">
            <text:p>2026-03-15 06:15</text:p>
          </table:table-cell>
          <table:table-cell office:value-type="float" office:value="2108.04545" table:style-name="c9">
            <text:p>2108</text:p>
          </table:table-cell>
          <table:table-cell office:value-type="float" office:value="-0.4676532377714815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9:30</text:p>
          </table:table-cell>
          <table:table-cell office:value-type="float" office:value="2118.7988699999996" table:style-name="c9">
            <text:p>2118.8</text:p>
          </table:table-cell>
          <table:table-cell office:value-type="string" table:style-name="c9">
            <text:p>2026-03-15 10:00</text:p>
          </table:table-cell>
          <table:table-cell office:value-type="float" office:value="2116.1414" table:style-name="c9">
            <text:p>2116.1</text:p>
          </table:table-cell>
          <table:table-cell office:value-type="float" office:value="-0.32507269831608676" table:style-name="c10">
            <text:p>-0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8:00</text:p>
          </table:table-cell>
          <table:table-cell office:value-type="float" office:value="2111.8253849999996" table:style-name="c9">
            <text:p>2111.8</text:p>
          </table:table-cell>
          <table:table-cell office:value-type="string" table:style-name="c9">
            <text:p>2026-03-15 18:30</text:p>
          </table:table-cell>
          <table:table-cell office:value-type="float" office:value="2107.255845" table:style-name="c9">
            <text:p>2107.3</text:p>
          </table:table-cell>
          <table:table-cell office:value-type="float" office:value="-0.4158461441240102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0:45</text:p>
          </table:table-cell>
          <table:table-cell office:value-type="float" office:value="2131.975455" table:style-name="c9">
            <text:p>2132</text:p>
          </table:table-cell>
          <table:table-cell office:value-type="string" table:style-name="c9">
            <text:p>2026-03-15 21:15</text:p>
          </table:table-cell>
          <table:table-cell office:value-type="float" office:value="2122.728105" table:style-name="c9">
            <text:p>2122.7</text:p>
          </table:table-cell>
          <table:table-cell office:value-type="float" office:value="-0.6327785552247223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45</text:p>
          </table:table-cell>
          <table:table-cell office:value-type="float" office:value="2173.2760949999997" table:style-name="c9">
            <text:p>2173.3</text:p>
          </table:table-cell>
          <table:table-cell office:value-type="string" table:style-name="c9">
            <text:p>2026-03-15 23:15</text:p>
          </table:table-cell>
          <table:table-cell office:value-type="float" office:value="2195.2418300000004" table:style-name="c9">
            <text:p>2195.2</text:p>
          </table:table-cell>
          <table:table-cell office:value-type="float" office:value="0.8087995180304342" table:style-name="c11">
            <text:p>+0.8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2239.5192" table:style-name="c9">
            <text:p>2239.5</text:p>
          </table:table-cell>
          <table:table-cell office:value-type="string" table:style-name="c9">
            <text:p>2026-03-16 04:15</text:p>
          </table:table-cell>
          <table:table-cell office:value-type="float" office:value="2243.7775500000002" table:style-name="c9">
            <text:p>2243.8</text:p>
          </table:table-cell>
          <table:table-cell office:value-type="float" office:value="-0.010134377166748365" table:style-name="c10">
            <text:p>-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4:30</text:p>
          </table:table-cell>
          <table:table-cell office:value-type="float" office:value="2250.274575" table:style-name="c9">
            <text:p>2250.3</text:p>
          </table:table-cell>
          <table:table-cell office:value-type="string" table:style-name="c9">
            <text:p>2026-03-16 05:00</text:p>
          </table:table-cell>
          <table:table-cell office:value-type="float" office:value="2262.1683500000004" table:style-name="c9">
            <text:p>2262.2</text:p>
          </table:table-cell>
          <table:table-cell office:value-type="float" office:value="0.3275911548860977" table:style-name="c11">
            <text:p>+0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2:30</text:p>
          </table:table-cell>
          <table:table-cell office:value-type="float" office:value="2301.15" table:style-name="c9">
            <text:p>2301.2</text:p>
          </table:table-cell>
          <table:table-cell office:value-type="string" table:style-name="c9">
            <text:p>2026-03-16 13:00</text:p>
          </table:table-cell>
          <table:table-cell office:value-type="float" office:value="2278.1403600000003" table:style-name="c9">
            <text:p>2278.1</text:p>
          </table:table-cell>
          <table:table-cell office:value-type="float" office:value="-1.1978203324268133" table:style-name="c10">
            <text:p>-1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3:45</text:p>
          </table:table-cell>
          <table:table-cell office:value-type="float" office:value="2292.4556549999998" table:style-name="c9">
            <text:p>2292.5</text:p>
          </table:table-cell>
          <table:table-cell office:value-type="string" table:style-name="c9">
            <text:p>2026-03-16 14:15</text:p>
          </table:table-cell>
          <table:table-cell office:value-type="float" office:value="2296.53116" table:style-name="c9">
            <text:p>2296.5</text:p>
          </table:table-cell>
          <table:table-cell office:value-type="float" office:value="-0.022476368854340567" table:style-name="c10">
            <text:p>-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7:30</text:p>
          </table:table-cell>
          <table:table-cell office:value-type="float" office:value="2301.780315" table:style-name="c9">
            <text:p>2301.8</text:p>
          </table:table-cell>
          <table:table-cell office:value-type="string" table:style-name="c9">
            <text:p>2026-03-16 18:00</text:p>
          </table:table-cell>
          <table:table-cell office:value-type="float" office:value="2313.592625" table:style-name="c9">
            <text:p>2313.6</text:p>
          </table:table-cell>
          <table:table-cell office:value-type="float" office:value="0.31225561778363" table:style-name="c11">
            <text:p>+0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1:15</text:p>
          </table:table-cell>
          <table:table-cell office:value-type="float" office:value="2352.285555" table:style-name="c9">
            <text:p>2352.3</text:p>
          </table:table-cell>
          <table:table-cell office:value-type="string" table:style-name="c9">
            <text:p>2026-03-16 21:45</text:p>
          </table:table-cell>
          <table:table-cell office:value-type="float" office:value="2357.84049" table:style-name="c9">
            <text:p>2357.8</text:p>
          </table:table-cell>
          <table:table-cell office:value-type="float" office:value="0.03577847335334283" table:style-name="c11">
            <text:p>+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2:00</text:p>
          </table:table-cell>
          <table:table-cell office:value-type="float" office:value="2362.22052" table:style-name="c9">
            <text:p>2362.2</text:p>
          </table:table-cell>
          <table:table-cell office:value-type="string" table:style-name="c9">
            <text:p>2026-03-16 22:30</text:p>
          </table:table-cell>
          <table:table-cell office:value-type="float" office:value="2358.4202" table:style-name="c9">
            <text:p>2358.4</text:p>
          </table:table-cell>
          <table:table-cell office:value-type="float" office:value="-0.3604575401707111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07:30</text:p>
          </table:table-cell>
          <table:table-cell office:value-type="float" office:value="2336.58771" table:style-name="c9">
            <text:p>2336.6</text:p>
          </table:table-cell>
          <table:table-cell office:value-type="string" table:style-name="c9">
            <text:p>2026-03-17 08:00</text:p>
          </table:table-cell>
          <table:table-cell office:value-type="float" office:value="2326.5461450000003" table:style-name="c9">
            <text:p>2326.5</text:p>
          </table:table-cell>
          <table:table-cell office:value-type="float" office:value="-0.6287943174987709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0:30</text:p>
          </table:table-cell>
          <table:table-cell office:value-type="float" office:value="2142.840885" table:style-name="c9">
            <text:p>2142.8</text:p>
          </table:table-cell>
          <table:table-cell office:value-type="string" table:style-name="c9">
            <text:p>2026-03-24 21:00</text:p>
          </table:table-cell>
          <table:table-cell office:value-type="float" office:value="2147.40576" table:style-name="c9">
            <text:p>2147.4</text:p>
          </table:table-cell>
          <table:table-cell office:value-type="float" office:value="0.01270327104851976" table:style-name="c11">
            <text:p>+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5:15</text:p>
          </table:table-cell>
          <table:table-cell office:value-type="float" office:value="2175.597255" table:style-name="c9">
            <text:p>2175.6</text:p>
          </table:table-cell>
          <table:table-cell office:value-type="string" table:style-name="c9">
            <text:p>2026-03-25 05:45</text:p>
          </table:table-cell>
          <table:table-cell office:value-type="float" office:value="2172.03344" table:style-name="c9">
            <text:p>2172</text:p>
          </table:table-cell>
          <table:table-cell office:value-type="float" office:value="-0.3633811280277621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8:45</text:p>
          </table:table-cell>
          <table:table-cell office:value-type="float" office:value="2184.841875" table:style-name="c9">
            <text:p>2184.8</text:p>
          </table:table-cell>
          <table:table-cell office:value-type="string" table:style-name="c9">
            <text:p>2026-03-25 09:15</text:p>
          </table:table-cell>
          <table:table-cell office:value-type="float" office:value="2178.7500800000003" table:style-name="c9">
            <text:p>2178.8</text:p>
          </table:table-cell>
          <table:table-cell office:value-type="float" office:value="-0.4781635014167618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8:00</text:p>
          </table:table-cell>
          <table:table-cell office:value-type="float" office:value="2060.60979" table:style-name="c9">
            <text:p>2060.6</text:p>
          </table:table-cell>
          <table:table-cell office:value-type="string" table:style-name="c9">
            <text:p>2026-03-30 08:30</text:p>
          </table:table-cell>
          <table:table-cell office:value-type="float" office:value="2058.9700000000003" table:style-name="c9">
            <text:p>2059</text:p>
          </table:table-cell>
          <table:table-cell office:value-type="float" office:value="-0.27931882387105533" table:style-name="c10">
            <text:p>-0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01:30</text:p>
          </table:table-cell>
          <table:table-cell office:value-type="float" office:value="2062.240605" table:style-name="c9">
            <text:p>2062.2</text:p>
          </table:table-cell>
          <table:table-cell office:value-type="string" table:style-name="c9">
            <text:p>2026-03-31 02:00</text:p>
          </table:table-cell>
          <table:table-cell office:value-type="float" office:value="2071.953505" table:style-name="c9">
            <text:p>2072</text:p>
          </table:table-cell>
          <table:table-cell office:value-type="float" office:value="0.2701462152378209" table:style-name="c11">
            <text:p>+0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2:45</text:p>
          </table:table-cell>
          <table:table-cell office:value-type="float" office:value="2057.2681199999997" table:style-name="c9">
            <text:p>2057.3</text:p>
          </table:table-cell>
          <table:table-cell office:value-type="string" table:style-name="c9">
            <text:p>2026-03-31 13:15</text:p>
          </table:table-cell>
          <table:table-cell office:value-type="float" office:value="2059.099935" table:style-name="c9">
            <text:p>2059.1</text:p>
          </table:table-cell>
          <table:table-cell office:value-type="float" office:value="-0.11103685260356322" table:style-name="c10">
            <text:p>-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5:30</text:p>
          </table:table-cell>
          <table:table-cell office:value-type="float" office:value="2128.56375" table:style-name="c9">
            <text:p>2128.6</text:p>
          </table:table-cell>
          <table:table-cell office:value-type="string" table:style-name="c9">
            <text:p>2026-04-01 06:00</text:p>
          </table:table-cell>
          <table:table-cell office:value-type="float" office:value="2121.608665" table:style-name="c9">
            <text:p>2121.6</text:p>
          </table:table-cell>
          <table:table-cell office:value-type="float" office:value="-0.5259969649175189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15</text:p>
          </table:table-cell>
          <table:table-cell office:value-type="float" office:value="2139.279105" table:style-name="c9">
            <text:p>2139.3</text:p>
          </table:table-cell>
          <table:table-cell office:value-type="string" table:style-name="c9">
            <text:p>2026-04-01 06:45</text:p>
          </table:table-cell>
          <table:table-cell office:value-type="float" office:value="2153.8325449999998" table:style-name="c9">
            <text:p>2153.8</text:p>
          </table:table-cell>
          <table:table-cell office:value-type="float" office:value="0.4790365464044877" table:style-name="c11">
            <text:p>+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7:00</text:p>
          </table:table-cell>
          <table:table-cell office:value-type="float" office:value="2152.31562" table:style-name="c9">
            <text:p>2152.3</text:p>
          </table:table-cell>
          <table:table-cell office:value-type="string" table:style-name="c9">
            <text:p>2026-04-01 07:30</text:p>
          </table:table-cell>
          <table:table-cell office:value-type="float" office:value="2138.2703300000003" table:style-name="c9">
            <text:p>2138.3</text:p>
          </table:table-cell>
          <table:table-cell office:value-type="float" office:value="-0.851161986626725" table:style-name="c10">
            <text:p>-0.9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23:00</text:p>
          </table:table-cell>
          <table:table-cell office:value-type="float" office:value="2086.82289" table:style-name="c9">
            <text:p>2086.8</text:p>
          </table:table-cell>
          <table:table-cell office:value-type="string" table:style-name="c9">
            <text:p>2026-04-05 23:30</text:p>
          </table:table-cell>
          <table:table-cell office:value-type="float" office:value="2107.1459" table:style-name="c9">
            <text:p>2107.1</text:p>
          </table:table-cell>
          <table:table-cell office:value-type="float" office:value="0.7720264821275746" table:style-name="c11">
            <text:p>+0.8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23:45</text:p>
          </table:table-cell>
          <table:table-cell office:value-type="float" office:value="2112.11553" table:style-name="c9">
            <text:p>2112.1</text:p>
          </table:table-cell>
          <table:table-cell office:value-type="string" table:style-name="c9">
            <text:p>2026-04-06 00:15</text:p>
          </table:table-cell>
          <table:table-cell office:value-type="float" office:value="2118.750095" table:style-name="c9">
            <text:p>2118.8</text:p>
          </table:table-cell>
          <table:table-cell office:value-type="float" office:value="0.113591492795595" table:style-name="c11">
            <text:p>+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0:30</text:p>
          </table:table-cell>
          <table:table-cell office:value-type="float" office:value="2124.191565" table:style-name="c9">
            <text:p>2124.2</text:p>
          </table:table-cell>
          <table:table-cell office:value-type="string" table:style-name="c9">
            <text:p>2026-04-06 01:00</text:p>
          </table:table-cell>
          <table:table-cell office:value-type="float" office:value="2120.9390000000003" table:style-name="c9">
            <text:p>2120.9</text:p>
          </table:table-cell>
          <table:table-cell office:value-type="float" office:value="-0.35271404822661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15</text:p>
          </table:table-cell>
          <table:table-cell office:value-type="float" office:value="2149.6342799999998" table:style-name="c9">
            <text:p>2149.6</text:p>
          </table:table-cell>
          <table:table-cell office:value-type="string" table:style-name="c9">
            <text:p>2026-04-06 09:45</text:p>
          </table:table-cell>
          <table:table-cell office:value-type="float" office:value="2151.04394" table:style-name="c9">
            <text:p>2151</text:p>
          </table:table-cell>
          <table:table-cell office:value-type="float" office:value="-0.13445435174487264" table:style-name="c10">
            <text:p>-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15:15</text:p>
          </table:table-cell>
          <table:table-cell office:value-type="float" office:value="2168.2835999999998" table:style-name="c9">
            <text:p>2168.3</text:p>
          </table:table-cell>
          <table:table-cell office:value-type="string" table:style-name="c9">
            <text:p>2026-04-06 15:45</text:p>
          </table:table-cell>
          <table:table-cell office:value-type="float" office:value="2163.53769" table:style-name="c9">
            <text:p>2163.5</text:p>
          </table:table-cell>
          <table:table-cell office:value-type="float" office:value="-0.41834111747696134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20:45</text:p>
          </table:table-cell>
          <table:table-cell office:value-type="float" office:value="2151.4651949999998" table:style-name="c9">
            <text:p>2151.5</text:p>
          </table:table-cell>
          <table:table-cell office:value-type="string" table:style-name="c9">
            <text:p>2026-04-06 21:15</text:p>
          </table:table-cell>
          <table:table-cell office:value-type="float" office:value="2145.1668799999998" table:style-name="c9">
            <text:p>2145.2</text:p>
          </table:table-cell>
          <table:table-cell office:value-type="float" office:value="-0.4920601838097505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0:00</text:p>
          </table:table-cell>
          <table:table-cell office:value-type="float" office:value="2114.4466949999996" table:style-name="c9">
            <text:p>2114.4</text:p>
          </table:table-cell>
          <table:table-cell office:value-type="string" table:style-name="c9">
            <text:p>2026-04-07 20:30</text:p>
          </table:table-cell>
          <table:table-cell office:value-type="float" office:value="2114.7121150000003" table:style-name="c9">
            <text:p>2114.7</text:p>
          </table:table-cell>
          <table:table-cell office:value-type="float" office:value="-0.1873723999405108" table:style-name="c10">
            <text:p>-0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1:15</text:p>
          </table:table-cell>
          <table:table-cell office:value-type="float" office:value="2143.37115" table:style-name="c9">
            <text:p>2143.4</text:p>
          </table:table-cell>
          <table:table-cell office:value-type="string" table:style-name="c9">
            <text:p>2026-04-07 21:45</text:p>
          </table:table-cell>
          <table:table-cell office:value-type="float" office:value="2142.418255" table:style-name="c9">
            <text:p>2142.4</text:p>
          </table:table-cell>
          <table:table-cell office:value-type="float" office:value="-0.24426889816749897" table:style-name="c10">
            <text:p>-0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2:15</text:p>
          </table:table-cell>
          <table:table-cell office:value-type="float" office:value="2160.17955" table:style-name="c9">
            <text:p>2160.2</text:p>
          </table:table-cell>
          <table:table-cell office:value-type="string" table:style-name="c9">
            <text:p>2026-04-07 22:45</text:p>
          </table:table-cell>
          <table:table-cell office:value-type="float" office:value="2176.9209950000004" table:style-name="c9">
            <text:p>2176.9</text:p>
          </table:table-cell>
          <table:table-cell office:value-type="float" office:value="0.5735532461176973" table:style-name="c11">
            <text:p>+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00</text:p>
          </table:table-cell>
          <table:table-cell office:value-type="float" office:value="2220.88989" table:style-name="c9">
            <text:p>2220.9</text:p>
          </table:table-cell>
          <table:table-cell office:value-type="string" table:style-name="c9">
            <text:p>2026-04-07 23:30</text:p>
          </table:table-cell>
          <table:table-cell office:value-type="float" office:value="2269.2248200000004" table:style-name="c9">
            <text:p>2269.2</text:p>
          </table:table-cell>
          <table:table-cell office:value-type="float" office:value="1.9721261185452255" table:style-name="c11">
            <text:p>+2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45</text:p>
          </table:table-cell>
          <table:table-cell office:value-type="float" office:value="2249.434155" table:style-name="c9">
            <text:p>2249.4</text:p>
          </table:table-cell>
          <table:table-cell office:value-type="string" table:style-name="c9">
            <text:p>2026-04-08 00:15</text:p>
          </table:table-cell>
          <table:table-cell office:value-type="float" office:value="2242.508185" table:style-name="c9">
            <text:p>2242.5</text:p>
          </table:table-cell>
          <table:table-cell office:value-type="float" office:value="-0.5071828324672567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13:30</text:p>
          </table:table-cell>
          <table:table-cell office:value-type="float" office:value="2261.7703199999996" table:style-name="c9">
            <text:p>2261.8</text:p>
          </table:table-cell>
          <table:table-cell office:value-type="string" table:style-name="c9">
            <text:p>2026-04-08 14:00</text:p>
          </table:table-cell>
          <table:table-cell office:value-type="float" office:value="2234.9319750000004" table:style-name="c9">
            <text:p>2234.9</text:p>
          </table:table-cell>
          <table:table-cell office:value-type="float" office:value="-1.3841358577038942" table:style-name="c10">
            <text:p>-1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5:45</text:p>
          </table:table-cell>
          <table:table-cell office:value-type="float" office:value="2214.116505" table:style-name="c9">
            <text:p>2214.1</text:p>
          </table:table-cell>
          <table:table-cell office:value-type="string" table:style-name="c9">
            <text:p>2026-04-09 16:15</text:p>
          </table:table-cell>
          <table:table-cell office:value-type="float" office:value="2214.45222" table:style-name="c9">
            <text:p>2214.5</text:p>
          </table:table-cell>
          <table:table-cell office:value-type="float" office:value="-0.1847678285465837" table:style-name="c10">
            <text:p>-0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1:30</text:p>
          </table:table-cell>
          <table:table-cell office:value-type="float" office:value="2218.26858" table:style-name="c9">
            <text:p>2218.3</text:p>
          </table:table-cell>
          <table:table-cell office:value-type="string" table:style-name="c9">
            <text:p>2026-04-10 12:00</text:p>
          </table:table-cell>
          <table:table-cell office:value-type="float" office:value="2214.55217" table:style-name="c9">
            <text:p>2214.6</text:p>
          </table:table-cell>
          <table:table-cell office:value-type="float" office:value="-0.3671016152530071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2:45</text:p>
          </table:table-cell>
          <table:table-cell office:value-type="float" office:value="2225.8123499999997" table:style-name="c9">
            <text:p>2225.8</text:p>
          </table:table-cell>
          <table:table-cell office:value-type="string" table:style-name="c9">
            <text:p>2026-04-10 13:15</text:p>
          </table:table-cell>
          <table:table-cell office:value-type="float" office:value="2217.6906000000004" table:style-name="c9">
            <text:p>2217.7</text:p>
          </table:table-cell>
          <table:table-cell office:value-type="float" office:value="-0.5640598368231609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4:30</text:p>
          </table:table-cell>
          <table:table-cell office:value-type="float" office:value="2246.372625" table:style-name="c9">
            <text:p>2246.4</text:p>
          </table:table-cell>
          <table:table-cell office:value-type="string" table:style-name="c9">
            <text:p>2026-04-10 15:00</text:p>
          </table:table-cell>
          <table:table-cell office:value-type="float" office:value="2241.63862" table:style-name="c9">
            <text:p>2241.6</text:p>
          </table:table-cell>
          <table:table-cell office:value-type="float" office:value="-0.410218700977083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09:45</text:p>
          </table:table-cell>
          <table:table-cell office:value-type="float" office:value="2243.751315" table:style-name="c9">
            <text:p>2243.8</text:p>
          </table:table-cell>
          <table:table-cell office:value-type="string" table:style-name="c9">
            <text:p>2026-04-11 10:15</text:p>
          </table:table-cell>
          <table:table-cell office:value-type="float" office:value="2238.850015" table:style-name="c9">
            <text:p>2238.9</text:p>
          </table:table-cell>
          <table:table-cell office:value-type="float" office:value="-0.4179055458284897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6:45</text:p>
          </table:table-cell>
          <table:table-cell office:value-type="float" office:value="2264.7518099999998" table:style-name="c9">
            <text:p>2264.8</text:p>
          </table:table-cell>
          <table:table-cell office:value-type="string" table:style-name="c9">
            <text:p>2026-04-11 17:15</text:p>
          </table:table-cell>
          <table:table-cell office:value-type="float" office:value="2255.43172" table:style-name="c9">
            <text:p>2255.4</text:p>
          </table:table-cell>
          <table:table-cell office:value-type="float" office:value="-0.6106054512118875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45</text:p>
          </table:table-cell>
          <table:table-cell office:value-type="float" office:value="2296.8078299999997" table:style-name="c9">
            <text:p>2296.8</text:p>
          </table:table-cell>
          <table:table-cell office:value-type="string" table:style-name="c9">
            <text:p>2026-04-11 19:15</text:p>
          </table:table-cell>
          <table:table-cell office:value-type="float" office:value="2313.2428000000004" table:style-name="c9">
            <text:p>2313.2</text:p>
          </table:table-cell>
          <table:table-cell office:value-type="float" office:value="0.5142266361396475" table:style-name="c11">
            <text:p>+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9:30</text:p>
          </table:table-cell>
          <table:table-cell office:value-type="float" office:value="2322.1605" table:style-name="c9">
            <text:p>2322.2</text:p>
          </table:table-cell>
          <table:table-cell office:value-type="string" table:style-name="c9">
            <text:p>2026-04-11 20:00</text:p>
          </table:table-cell>
          <table:table-cell office:value-type="float" office:value="2314.80202" table:style-name="c9">
            <text:p>2314.8</text:p>
          </table:table-cell>
          <table:table-cell office:value-type="float" office:value="-0.5161473222018764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0:00</text:p>
          </table:table-cell>
          <table:table-cell office:value-type="float" office:value="2263.4611649999997" table:style-name="c9">
            <text:p>2263.5</text:p>
          </table:table-cell>
          <table:table-cell office:value-type="string" table:style-name="c9">
            <text:p>2026-04-13 20:30</text:p>
          </table:table-cell>
          <table:table-cell office:value-type="float" office:value="2252.9229750000004" table:style-name="c9">
            <text:p>2252.9</text:p>
          </table:table-cell>
          <table:table-cell office:value-type="float" office:value="-0.664547872948551" table:style-name="c10">
            <text:p>-0.7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15</text:p>
          </table:table-cell>
          <table:table-cell office:value-type="float" office:value="2296.56771" table:style-name="c9">
            <text:p>2296.6</text:p>
          </table:table-cell>
          <table:table-cell office:value-type="string" table:style-name="c9">
            <text:p>2026-04-13 22:45</text:p>
          </table:table-cell>
          <table:table-cell office:value-type="float" office:value="2342.9979150000004" table:style-name="c9">
            <text:p>2343</text:p>
          </table:table-cell>
          <table:table-cell office:value-type="float" office:value="1.8177801588926679" table:style-name="c11">
            <text:p>+1.8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00</text:p>
          </table:table-cell>
          <table:table-cell office:value-type="float" office:value="2353.9163699999995" table:style-name="c9">
            <text:p>2353.9</text:p>
          </table:table-cell>
          <table:table-cell office:value-type="string" table:style-name="c9">
            <text:p>2026-04-13 23:30</text:p>
          </table:table-cell>
          <table:table-cell office:value-type="float" office:value="2386.7960049999997" table:style-name="c9">
            <text:p>2386.8</text:p>
          </table:table-cell>
          <table:table-cell office:value-type="float" office:value="1.194113356967108" table:style-name="c11">
            <text:p>+1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45</text:p>
          </table:table-cell>
          <table:table-cell office:value-type="float" office:value="2374.20651" table:style-name="c9">
            <text:p>2374.2</text:p>
          </table:table-cell>
          <table:table-cell office:value-type="string" table:style-name="c9">
            <text:p>2026-04-14 00:15</text:p>
          </table:table-cell>
          <table:table-cell office:value-type="float" office:value="2366.3862150000004" table:style-name="c9">
            <text:p>2366.4</text:p>
          </table:table-cell>
          <table:table-cell office:value-type="float" office:value="-0.5286271851636326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07:15</text:p>
          </table:table-cell>
          <table:table-cell office:value-type="float" office:value="2383.761285" table:style-name="c9">
            <text:p>2383.8</text:p>
          </table:table-cell>
          <table:table-cell office:value-type="string" table:style-name="c9">
            <text:p>2026-04-14 07:45</text:p>
          </table:table-cell>
          <table:table-cell office:value-type="float" office:value="2370.1343400000005" table:style-name="c9">
            <text:p>2370.1</text:p>
          </table:table-cell>
          <table:table-cell office:value-type="float" office:value="-0.770414540299047" table:style-name="c10">
            <text:p>-0.8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08:45</text:p>
          </table:table-cell>
          <table:table-cell office:value-type="float" office:value="2389.0739399999998" table:style-name="c9">
            <text:p>2389.1</text:p>
          </table:table-cell>
          <table:table-cell office:value-type="string" table:style-name="c9">
            <text:p>2026-04-14 09:15</text:p>
          </table:table-cell>
          <table:table-cell office:value-type="float" office:value="2391.333735" table:style-name="c9">
            <text:p>2391.3</text:p>
          </table:table-cell>
          <table:table-cell office:value-type="float" office:value="-0.10550034028099509" table:style-name="c10">
            <text:p>-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13:45</text:p>
          </table:table-cell>
          <table:table-cell office:value-type="float" office:value="2391.2050050000003" table:style-name="c9">
            <text:p>2391.2</text:p>
          </table:table-cell>
          <table:table-cell office:value-type="string" table:style-name="c9">
            <text:p>2026-04-14 14:15</text:p>
          </table:table-cell>
          <table:table-cell office:value-type="float" office:value="2381.94843" table:style-name="c9">
            <text:p>2381.9</text:p>
          </table:table-cell>
          <table:table-cell office:value-type="float" office:value="-0.5862353868555159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4:30</text:p>
          </table:table-cell>
          <table:table-cell office:value-type="float" office:value="2341.17" table:style-name="c9">
            <text:p>2341.2</text:p>
          </table:table-cell>
          <table:table-cell office:value-type="string" table:style-name="c9">
            <text:p>2026-04-15 15:00</text:p>
          </table:table-cell>
          <table:table-cell office:value-type="float" office:value="2337.240795" table:style-name="c9">
            <text:p>2337.2</text:p>
          </table:table-cell>
          <table:table-cell office:value-type="float" office:value="-0.36739533435011795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9:45</text:p>
          </table:table-cell>
          <table:table-cell office:value-type="float" office:value="2376.617715" table:style-name="c9">
            <text:p>2376.6</text:p>
          </table:table-cell>
          <table:table-cell office:value-type="string" table:style-name="c9">
            <text:p>2026-04-15 20:15</text:p>
          </table:table-cell>
          <table:table-cell office:value-type="float" office:value="2361.968425" table:style-name="c9">
            <text:p>2362</text:p>
          </table:table-cell>
          <table:table-cell office:value-type="float" office:value="-0.8150601907625177" table:style-name="c10">
            <text:p>-0.8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2339.8693499999995" table:style-name="c9">
            <text:p>2339.9</text:p>
          </table:table-cell>
          <table:table-cell office:value-type="string" table:style-name="c9">
            <text:p>2026-04-16 16:15</text:p>
          </table:table-cell>
          <table:table-cell office:value-type="float" office:value="2334.841995" table:style-name="c9">
            <text:p>2334.8</text:p>
          </table:table-cell>
          <table:table-cell office:value-type="float" office:value="-0.41432672931095427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9:30</text:p>
          </table:table-cell>
          <table:table-cell office:value-type="float" office:value="2372.8658399999995" table:style-name="c9">
            <text:p>2372.9</text:p>
          </table:table-cell>
          <table:table-cell office:value-type="string" table:style-name="c9">
            <text:p>2026-04-17 10:00</text:p>
          </table:table-cell>
          <table:table-cell office:value-type="float" office:value="2357.92045" table:style-name="c9">
            <text:p>2357.9</text:p>
          </table:table-cell>
          <table:table-cell office:value-type="float" office:value="-0.8284864929215652" table:style-name="c10">
            <text:p>-0.8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00</text:p>
          </table:table-cell>
          <table:table-cell office:value-type="float" office:value="2373.155985" table:style-name="c9">
            <text:p>2373.2</text:p>
          </table:table-cell>
          <table:table-cell office:value-type="string" table:style-name="c9">
            <text:p>2026-04-17 13:30</text:p>
          </table:table-cell>
          <table:table-cell office:value-type="float" office:value="2403.567615" table:style-name="c9">
            <text:p>2403.6</text:p>
          </table:table-cell>
          <table:table-cell office:value-type="float" office:value="1.0790229761325598" table:style-name="c11">
            <text:p>+1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45</text:p>
          </table:table-cell>
          <table:table-cell office:value-type="float" office:value="2419.559175" table:style-name="c9">
            <text:p>2419.6</text:p>
          </table:table-cell>
          <table:table-cell office:value-type="string" table:style-name="c9">
            <text:p>2026-04-17 14:15</text:p>
          </table:table-cell>
          <table:table-cell office:value-type="float" office:value="2428.9948950000003" table:style-name="c9">
            <text:p>2429</text:p>
          </table:table-cell>
          <table:table-cell office:value-type="float" office:value="0.18929725927845364" table:style-name="c11">
            <text:p>+0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3:00</text:p>
          </table:table-cell>
          <table:table-cell office:value-type="float" office:value="2371.535175" table:style-name="c9">
            <text:p>2371.5</text:p>
          </table:table-cell>
          <table:table-cell office:value-type="string" table:style-name="c9">
            <text:p>2026-04-22 03:30</text:p>
          </table:table-cell>
          <table:table-cell office:value-type="float" office:value="2363.93744" table:style-name="c9">
            <text:p>2363.9</text:p>
          </table:table-cell>
          <table:table-cell office:value-type="float" office:value="-0.5196315902234017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2389.0239149999998" table:style-name="c9">
            <text:p>2389</text:p>
          </table:table-cell>
          <table:table-cell office:value-type="string" table:style-name="c9">
            <text:p>2026-04-22 06:00</text:p>
          </table:table-cell>
          <table:table-cell office:value-type="float" office:value="2395.611595" table:style-name="c9">
            <text:p>2395.6</text:p>
          </table:table-cell>
          <table:table-cell office:value-type="float" office:value="0.07529654309028633" table:style-name="c11">
            <text:p>+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3:30</text:p>
          </table:table-cell>
          <table:table-cell office:value-type="float" office:value="2410.6847399999997" table:style-name="c9">
            <text:p>2410.7</text:p>
          </table:table-cell>
          <table:table-cell office:value-type="string" table:style-name="c9">
            <text:p>2026-04-22 14:00</text:p>
          </table:table-cell>
          <table:table-cell office:value-type="float" office:value="2416.1913000000004" table:style-name="c9">
            <text:p>2416.2</text:p>
          </table:table-cell>
          <table:table-cell office:value-type="float" office:value="0.028066448510433162" table:style-name="c11">
            <text:p>+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4:15</text:p>
          </table:table-cell>
          <table:table-cell office:value-type="float" office:value="2424.27153" table:style-name="c9">
            <text:p>2424.3</text:p>
          </table:table-cell>
          <table:table-cell office:value-type="string" table:style-name="c9">
            <text:p>2026-04-22 14:45</text:p>
          </table:table-cell>
          <table:table-cell office:value-type="float" office:value="2394.7420300000003" table:style-name="c9">
            <text:p>2394.7</text:p>
          </table:table-cell>
          <table:table-cell office:value-type="float" office:value="-1.4155423141882784" table:style-name="c10">
            <text:p>-1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4:30</text:p>
          </table:table-cell>
          <table:table-cell office:value-type="float" office:value="2351.1649949999996" table:style-name="c9">
            <text:p>2351.2</text:p>
          </table:table-cell>
          <table:table-cell office:value-type="string" table:style-name="c9">
            <text:p>2026-04-26 15:00</text:p>
          </table:table-cell>
          <table:table-cell office:value-type="float" office:value="2345.0269" table:style-name="c9">
            <text:p>2345</text:p>
          </table:table-cell>
          <table:table-cell office:value-type="float" office:value="-0.46044423918023547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8:15</text:p>
          </table:table-cell>
          <table:table-cell office:value-type="float" office:value="2364.56169" table:style-name="c9">
            <text:p>2364.6</text:p>
          </table:table-cell>
          <table:table-cell office:value-type="string" table:style-name="c9">
            <text:p>2026-04-26 18:45</text:p>
          </table:table-cell>
          <table:table-cell office:value-type="float" office:value="2359.289765" table:style-name="c9">
            <text:p>2359.3</text:p>
          </table:table-cell>
          <table:table-cell office:value-type="float" office:value="-0.4224100086910765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7 01:00</text:p>
          </table:table-cell>
          <table:table-cell office:value-type="float" office:value="2391.75528" table:style-name="c9">
            <text:p>2391.8</text:p>
          </table:table-cell>
          <table:table-cell office:value-type="string" table:style-name="c9">
            <text:p>2026-04-27 01:30</text:p>
          </table:table-cell>
          <table:table-cell office:value-type="float" office:value="2381.68856" table:style-name="c9">
            <text:p>2381.7</text:p>
          </table:table-cell>
          <table:table-cell office:value-type="float" office:value="-0.6199511946489711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15</text:p>
          </table:table-cell>
          <table:table-cell office:value-type="float" office:value="2345.172" table:style-name="c9">
            <text:p>2345.2</text:p>
          </table:table-cell>
          <table:table-cell office:value-type="string" table:style-name="c9">
            <text:p>2026-04-29 10:45</text:p>
          </table:table-cell>
          <table:table-cell office:value-type="float" office:value="2330.843995" table:style-name="c9">
            <text:p>2330.8</text:p>
          </table:table-cell>
          <table:table-cell office:value-type="float" office:value="-0.8096362290699766" table:style-name="c10">
            <text:p>-0.8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2:30</text:p>
          </table:table-cell>
          <table:table-cell office:value-type="float" office:value="2305.9524" table:style-name="c9">
            <text:p>2306</text:p>
          </table:table-cell>
          <table:table-cell office:value-type="string" table:style-name="c9">
            <text:p>2026-05-01 13:00</text:p>
          </table:table-cell>
          <table:table-cell office:value-type="float" office:value="2300.219315" table:style-name="c9">
            <text:p>2300.2</text:p>
          </table:table-cell>
          <table:table-cell office:value-type="float" office:value="-0.4480241400770191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4:00</text:p>
          </table:table-cell>
          <table:table-cell office:value-type="float" office:value="2319.37911" table:style-name="c9">
            <text:p>2319.4</text:p>
          </table:table-cell>
          <table:table-cell office:value-type="string" table:style-name="c9">
            <text:p>2026-05-01 14:30</text:p>
          </table:table-cell>
          <table:table-cell office:value-type="float" office:value="2308.10537" table:style-name="c9">
            <text:p>2308.1</text:p>
          </table:table-cell>
          <table:table-cell office:value-type="float" office:value="-0.6849955044490263" table:style-name="c10">
            <text:p>-0.7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21:45</text:p>
          </table:table-cell>
          <table:table-cell office:value-type="float" office:value="2329.48416" table:style-name="c9">
            <text:p>2329.5</text:p>
          </table:table-cell>
          <table:table-cell office:value-type="string" table:style-name="c9">
            <text:p>2026-05-02 22:15</text:p>
          </table:table-cell>
          <table:table-cell office:value-type="float" office:value="2324.227305" table:style-name="c9">
            <text:p>2324.2</text:p>
          </table:table-cell>
          <table:table-cell office:value-type="float" office:value="-0.4251149483109451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12:15</text:p>
          </table:table-cell>
          <table:table-cell office:value-type="float" office:value="2330.62473" table:style-name="c9">
            <text:p>2330.6</text:p>
          </table:table-cell>
          <table:table-cell office:value-type="string" table:style-name="c9">
            <text:p>2026-05-03 12:45</text:p>
          </table:table-cell>
          <table:table-cell office:value-type="float" office:value="2324.3572400000003" table:style-name="c9">
            <text:p>2324.4</text:p>
          </table:table-cell>
          <table:table-cell office:value-type="float" office:value="-0.4682813145452158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22:15</text:p>
          </table:table-cell>
          <table:table-cell office:value-type="float" office:value="2349.07395" table:style-name="c9">
            <text:p>2349.1</text:p>
          </table:table-cell>
          <table:table-cell office:value-type="string" table:style-name="c9">
            <text:p>2026-05-03 22:45</text:p>
          </table:table-cell>
          <table:table-cell office:value-type="float" office:value="2345.216805" table:style-name="c9">
            <text:p>2345.2</text:p>
          </table:table-cell>
          <table:table-cell office:value-type="float" office:value="-0.36377030162013657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00</text:p>
          </table:table-cell>
          <table:table-cell office:value-type="float" office:value="2352.385605" table:style-name="c9">
            <text:p>2352.4</text:p>
          </table:table-cell>
          <table:table-cell office:value-type="string" table:style-name="c9">
            <text:p>2026-05-04 02:30</text:p>
          </table:table-cell>
          <table:table-cell office:value-type="float" office:value="2362.53814" table:style-name="c9">
            <text:p>2362.5</text:p>
          </table:table-cell>
          <table:table-cell office:value-type="float" office:value="0.23082190464860375" table:style-name="c11">
            <text:p>+0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45</text:p>
          </table:table-cell>
          <table:table-cell office:value-type="float" office:value="2381.840325" table:style-name="c9">
            <text:p>2381.8</text:p>
          </table:table-cell>
          <table:table-cell office:value-type="string" table:style-name="c9">
            <text:p>2026-05-04 03:15</text:p>
          </table:table-cell>
          <table:table-cell office:value-type="float" office:value="2384.06737" table:style-name="c9">
            <text:p>2384.1</text:p>
          </table:table-cell>
          <table:table-cell office:value-type="float" office:value="-0.10658588848226902" table:style-name="c10">
            <text:p>-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3:30</text:p>
          </table:table-cell>
          <table:table-cell office:value-type="float" office:value="2381.2600350000002" table:style-name="c9">
            <text:p>2381.3</text:p>
          </table:table-cell>
          <table:table-cell office:value-type="string" table:style-name="c9">
            <text:p>2026-05-04 04:00</text:p>
          </table:table-cell>
          <table:table-cell office:value-type="float" office:value="2383.917445" table:style-name="c9">
            <text:p>2383.9</text:p>
          </table:table-cell>
          <table:table-cell office:value-type="float" office:value="-0.08852628195036294" table:style-name="c10">
            <text:p>-0.1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00</text:p>
          </table:table-cell>
          <table:table-cell office:value-type="float" office:value="2372.5857" table:style-name="c9">
            <text:p>2372.6</text:p>
          </table:table-cell>
          <table:table-cell office:value-type="string" table:style-name="c9">
            <text:p>2026-05-04 15:30</text:p>
          </table:table-cell>
          <table:table-cell office:value-type="float" office:value="2347.275775" table:style-name="c9">
            <text:p>2347.3</text:p>
          </table:table-cell>
          <table:table-cell office:value-type="float" office:value="-1.264533006088031" table:style-name="c10">
            <text:p>-1.3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3:45</text:p>
          </table:table-cell>
          <table:table-cell office:value-type="float" office:value="2386.77279" table:style-name="c9">
            <text:p>2386.8</text:p>
          </table:table-cell>
          <table:table-cell office:value-type="string" table:style-name="c9">
            <text:p>2026-05-05 04:15</text:p>
          </table:table-cell>
          <table:table-cell office:value-type="float" office:value="2378.88996" table:style-name="c9">
            <text:p>2378.9</text:p>
          </table:table-cell>
          <table:table-cell office:value-type="float" office:value="-0.5295112749311937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45</text:p>
          </table:table-cell>
          <table:table-cell office:value-type="float" office:value="2418.96888" table:style-name="c9">
            <text:p>2419</text:p>
          </table:table-cell>
          <table:table-cell office:value-type="string" table:style-name="c9">
            <text:p>2026-05-06 10:15</text:p>
          </table:table-cell>
          <table:table-cell office:value-type="float" office:value="2409.93443" table:style-name="c9">
            <text:p>2409.9</text:p>
          </table:table-cell>
          <table:table-cell office:value-type="float" office:value="-0.5726369214625993" table:style-name="c10">
            <text:p>-0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17:30</text:p>
          </table:table-cell>
          <table:table-cell office:value-type="float" office:value="2333.035935" table:style-name="c9">
            <text:p>2333</text:p>
          </table:table-cell>
          <table:table-cell office:value-type="string" table:style-name="c9">
            <text:p>2026-05-09 18:00</text:p>
          </table:table-cell>
          <table:table-cell office:value-type="float" office:value="2328.29527" table:style-name="c9">
            <text:p>2328.3</text:p>
          </table:table-cell>
          <table:table-cell office:value-type="float" office:value="-0.40269106462476056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00</text:p>
          </table:table-cell>
          <table:table-cell office:value-type="float" office:value="2348.73378" table:style-name="c9">
            <text:p>2348.7</text:p>
          </table:table-cell>
          <table:table-cell office:value-type="string" table:style-name="c9">
            <text:p>2026-05-10 16:30</text:p>
          </table:table-cell>
          <table:table-cell office:value-type="float" office:value="2344.177325" table:style-name="c9">
            <text:p>2344.2</text:p>
          </table:table-cell>
          <table:table-cell office:value-type="float" office:value="-0.3935084321337934" table:style-name="c10">
            <text:p>-0.4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2:45</text:p>
          </table:table-cell>
          <table:table-cell office:value-type="float" office:value="2367.693255" table:style-name="c9">
            <text:p>2367.7</text:p>
          </table:table-cell>
          <table:table-cell office:value-type="string" table:style-name="c9">
            <text:p>2026-05-10 23:15</text:p>
          </table:table-cell>
          <table:table-cell office:value-type="float" office:value="2377.91045" table:style-name="c9">
            <text:p>2377.9</text:p>
          </table:table-cell>
          <table:table-cell office:value-type="float" office:value="0.23076266314951965" table:style-name="c11">
            <text:p>+0.2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5:30</text:p>
          </table:table-cell>
          <table:table-cell office:value-type="float" office:value="2136.937935" table:style-name="c9">
            <text:p>2136.9</text:p>
          </table:table-cell>
          <table:table-cell office:value-type="string" table:style-name="c9">
            <text:p>2026-05-21 16:00</text:p>
          </table:table-cell>
          <table:table-cell office:value-type="float" office:value="2131.57368" table:style-name="c9">
            <text:p>2131.6</text:p>
          </table:table-cell>
          <table:table-cell office:value-type="float" office:value="-0.4504235068633511" table:style-name="c10">
            <text:p>-0.5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00:00</text:p>
          </table:table-cell>
          <table:table-cell office:value-type="float" office:value="2100.90993" table:style-name="c9">
            <text:p>2100.9</text:p>
          </table:table-cell>
          <table:table-cell office:value-type="string" table:style-name="c9">
            <text:p>2026-05-25 00:30</text:p>
          </table:table-cell>
          <table:table-cell office:value-type="float" office:value="2105.1868799999997" table:style-name="c9">
            <text:p>2105.2</text:p>
          </table:table-cell>
          <table:table-cell office:value-type="float" office:value="0.003269127624139223" table:style-name="c11">
            <text:p>+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4:45</text:p>
          </table:table-cell>
          <table:table-cell office:value-type="float" office:value="2125.612275" table:style-name="c9">
            <text:p>2125.6</text:p>
          </table:table-cell>
          <table:table-cell office:value-type="string" table:style-name="c9">
            <text:p>2026-05-25 15:15</text:p>
          </table:table-cell>
          <table:table-cell office:value-type="float" office:value="2129.2148600000005" table:style-name="c9">
            <text:p>2129.2</text:p>
          </table:table-cell>
          <table:table-cell office:value-type="float" office:value="-0.030754221399076354" table:style-name="c10">
            <text:p>-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0:30</text:p>
          </table:table-cell>
          <table:table-cell office:value-type="float" office:value="2122.350645" table:style-name="c9">
            <text:p>2122.4</text:p>
          </table:table-cell>
          <table:table-cell office:value-type="string" table:style-name="c9">
            <text:p>2026-05-26 11:00</text:p>
          </table:table-cell>
          <table:table-cell office:value-type="float" office:value="2126.5062150000003" table:style-name="c9">
            <text:p>2126.5</text:p>
          </table:table-cell>
          <table:table-cell office:value-type="float" office:value="-0.004491054482869128" table:style-name="c10">
            <text:p>-0.0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4:30</text:p>
          </table:table-cell>
          <table:table-cell office:value-type="float" office:value="2139.0990150000002" table:style-name="c9">
            <text:p>2139.1</text:p>
          </table:table-cell>
          <table:table-cell office:value-type="string" table:style-name="c9">
            <text:p>2026-05-26 15:00</text:p>
          </table:table-cell>
          <table:table-cell office:value-type="float" office:value="2108.24535" table:style-name="c9">
            <text:p>2108.2</text:p>
          </table:table-cell>
          <table:table-cell office:value-type="float" office:value="-1.6393840214381061" table:style-name="c10">
            <text:p>-1.6</text:p>
          </table:table-cell>
        </table:table-row>
        <table:table-row>
          <table:table-cell office:value-type="string" table:style-name="c8">
            <text:p>ETH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1:30</text:p>
          </table:table-cell>
          <table:table-cell office:value-type="float" office:value="2031.0750299999997" table:style-name="c9">
            <text:p>2031.1</text:p>
          </table:table-cell>
          <table:table-cell office:value-type="string" table:style-name="c9">
            <text:p>2026-05-31 02:00</text:p>
          </table:table-cell>
          <table:table-cell office:value-type="float" office:value="2028.095445" table:style-name="c9">
            <text:p>2028.1</text:p>
          </table:table-cell>
          <table:table-cell office:value-type="float" office:value="-0.3463066450358987" table:style-name="c10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3-05 19:45</text:p>
          </table:table-cell>
          <table:table-cell office:value-type="float" office:value="1.0144925" table:style-name="c1">
            <text:p>1.0145</text:p>
          </table:table-cell>
          <table:table-cell office:value-type="float" office:value="-1.1759228303328761" table:style-name="c12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30</text:p>
          </table:table-cell>
          <table:table-cell office:value-type="float" office:value="0.8814405" table:style-name="c1">
            <text:p>0.88144</text:p>
          </table:table-cell>
          <table:table-cell office:value-type="string" table:style-name="c1">
            <text:p>2026-03-15 03:00</text:p>
          </table:table-cell>
          <table:table-cell office:value-type="float" office:value="0.8845575000000001" table:style-name="c1">
            <text:p>0.88456</text:p>
          </table:table-cell>
          <table:table-cell office:value-type="float" office:value="0.15301878657718593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3:0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3-15 23:30</text:p>
          </table:table-cell>
          <table:table-cell office:value-type="float" office:value="0.8915540000000001" table:style-name="c1">
            <text:p>0.89155</text:p>
          </table:table-cell>
          <table:table-cell office:value-type="float" office:value="-1.1858755562218826" table:style-name="c12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9044519999999999" table:style-name="c1">
            <text:p>0.90445</text:p>
          </table:table-cell>
          <table:table-cell office:value-type="string" table:style-name="c1">
            <text:p>2026-03-16 04:00</text:p>
          </table:table-cell>
          <table:table-cell office:value-type="float" office:value="0.9115440000000001" table:style-name="c1">
            <text:p>0.91154</text:p>
          </table:table-cell>
          <table:table-cell office:value-type="float" office:value="0.5826537554231903" table:style-name="c13">
            <text:p>+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45</text:p>
          </table:table-cell>
          <table:table-cell office:value-type="float" office:value="0.9394694999999998" table:style-name="c1">
            <text:p>0.93947</text:p>
          </table:table-cell>
          <table:table-cell office:value-type="string" table:style-name="c1">
            <text:p>2026-03-16 06:15</text:p>
          </table:table-cell>
          <table:table-cell office:value-type="float" office:value="0.9315340000000001" table:style-name="c1">
            <text:p>0.93153</text:p>
          </table:table-cell>
          <table:table-cell office:value-type="float" office:value="-1.0428903190576988" table:style-name="c12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6:30</text:p>
          </table:table-cell>
          <table:table-cell office:value-type="float" office:value="0.9434714999999999" table:style-name="c1">
            <text:p>0.94347</text:p>
          </table:table-cell>
          <table:table-cell office:value-type="string" table:style-name="c1">
            <text:p>2026-03-16 07:00</text:p>
          </table:table-cell>
          <table:table-cell office:value-type="float" office:value="0.943528" table:style-name="c1">
            <text:p>0.94353</text:p>
          </table:table-cell>
          <table:table-cell office:value-type="float" office:value="-0.1939234488800068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3-16 17:00</text:p>
          </table:table-cell>
          <table:table-cell office:value-type="float" office:value="0.951524" table:style-name="c1">
            <text:p>0.95152</text:p>
          </table:table-cell>
          <table:table-cell office:value-type="float" office:value="-0.40426759086352737" table:style-name="c12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8:30</text:p>
          </table:table-cell>
          <table:table-cell office:value-type="float" office:value="0.9684839999999999" table:style-name="c1">
            <text:p>0.96848</text:p>
          </table:table-cell>
          <table:table-cell office:value-type="string" table:style-name="c1">
            <text:p>2026-03-16 19:00</text:p>
          </table:table-cell>
          <table:table-cell office:value-type="float" office:value="0.967516" table:style-name="c1">
            <text:p>0.96752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9:15</text:p>
          </table:table-cell>
          <table:table-cell office:value-type="float" office:value="0.9874934999999999" table:style-name="c1">
            <text:p>0.98749</text:p>
          </table:table-cell>
          <table:table-cell office:value-type="string" table:style-name="c1">
            <text:p>2026-03-16 19:45</text:p>
          </table:table-cell>
          <table:table-cell office:value-type="float" office:value="0.9745125" table:style-name="c1">
            <text:p>0.97451</text:p>
          </table:table-cell>
          <table:table-cell office:value-type="float" office:value="-1.5118125321837428" table:style-name="c12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15</text:p>
          </table:table-cell>
          <table:table-cell office:value-type="float" office:value="0.9704849999999999" table:style-name="c1">
            <text:p>0.97048</text:p>
          </table:table-cell>
          <table:table-cell office:value-type="string" table:style-name="c1">
            <text:p>2026-03-17 07:45</text:p>
          </table:table-cell>
          <table:table-cell office:value-type="float" office:value="0.9705145000000001" table:style-name="c1">
            <text:p>0.97051</text:p>
          </table:table-cell>
          <table:table-cell office:value-type="float" office:value="-0.19686635913999107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30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3-17 09:00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-1.0169189283056213" table:style-name="c12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30</text:p>
          </table:table-cell>
          <table:table-cell office:value-type="float" office:value="0.9714854999999999" table:style-name="c1">
            <text:p>0.97149</text:p>
          </table:table-cell>
          <table:table-cell office:value-type="string" table:style-name="c1">
            <text:p>2026-03-17 10:00</text:p>
          </table:table-cell>
          <table:table-cell office:value-type="float" office:value="0.9685155" table:style-name="c1">
            <text:p>0.96852</text:p>
          </table:table-cell>
          <table:table-cell office:value-type="float" office:value="-0.5050062491411156" table:style-name="c12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1:30</text:p>
          </table:table-cell>
          <table:table-cell office:value-type="float" office:value="0.9814904999999999" table:style-name="c1">
            <text:p>0.98149</text:p>
          </table:table-cell>
          <table:table-cell office:value-type="string" table:style-name="c1">
            <text:p>2026-03-17 12:00</text:p>
          </table:table-cell>
          <table:table-cell office:value-type="float" office:value="0.977511" table:style-name="c1">
            <text:p>0.97751</text:p>
          </table:table-cell>
          <table:table-cell office:value-type="float" office:value="-0.6045442608970664" table:style-name="c12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5:00</text:p>
          </table:table-cell>
          <table:table-cell office:value-type="float" office:value="0.9254625" table:style-name="c1">
            <text:p>0.92546</text:p>
          </table:table-cell>
          <table:table-cell office:value-type="string" table:style-name="c1">
            <text:p>2026-03-21 15:30</text:p>
          </table:table-cell>
          <table:table-cell office:value-type="float" office:value="0.943528" table:style-name="c1">
            <text:p>0.94353</text:p>
          </table:table-cell>
          <table:table-cell office:value-type="float" office:value="1.7482488515742078" table:style-name="c13">
            <text:p>+1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6:00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3-21 16:30</text:p>
          </table:table-cell>
          <table:table-cell office:value-type="float" office:value="0.955522" table:style-name="c1">
            <text:p>0.95552</text:p>
          </table:table-cell>
          <table:table-cell office:value-type="float" office:value="-2.0415885046171645" table:style-name="c12">
            <text:p>-2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9:00</text:p>
          </table:table-cell>
          <table:table-cell office:value-type="float" office:value="0.930465" table:style-name="c1">
            <text:p>0.93046</text:p>
          </table:table-cell>
          <table:table-cell office:value-type="string" table:style-name="c1">
            <text:p>2026-03-23 19:30</text:p>
          </table:table-cell>
          <table:table-cell office:value-type="float" office:value="0.9245375000000001" table:style-name="c1">
            <text:p>0.92454</text:p>
          </table:table-cell>
          <table:table-cell office:value-type="float" office:value="-0.8356736107752449" table:style-name="c12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45</text:p>
          </table:table-cell>
          <table:table-cell office:value-type="float" office:value="0.9394694999999998" table:style-name="c1">
            <text:p>0.93947</text:p>
          </table:table-cell>
          <table:table-cell office:value-type="string" table:style-name="c1">
            <text:p>2026-03-23 21:15</text:p>
          </table:table-cell>
          <table:table-cell office:value-type="float" office:value="0.9345325000000001" table:style-name="c1">
            <text:p>0.93453</text:p>
          </table:table-cell>
          <table:table-cell office:value-type="float" office:value="-0.7243588501276155" table:style-name="c12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32466" table:style-name="c1">
            <text:p>0.93247</text:p>
          </table:table-cell>
          <table:table-cell office:value-type="string" table:style-name="c1">
            <text:p>2026-03-24 21:00</text:p>
          </table:table-cell>
          <table:table-cell office:value-type="float" office:value="0.9315340000000001" table:style-name="c1">
            <text:p>0.93153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2:00</text:p>
          </table:table-cell>
          <table:table-cell office:value-type="float" office:value="0.934467" table:style-name="c1">
            <text:p>0.93447</text:p>
          </table:table-cell>
          <table:table-cell office:value-type="string" table:style-name="c1">
            <text:p>2026-03-24 22:30</text:p>
          </table:table-cell>
          <table:table-cell office:value-type="float" office:value="0.9235380000000001" table:style-name="c1">
            <text:p>0.92354</text:p>
          </table:table-cell>
          <table:table-cell office:value-type="float" office:value="-1.3671057899315886" table:style-name="c12">
            <text:p>-1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0:45</text:p>
          </table:table-cell>
          <table:table-cell office:value-type="float" office:value="0.9314655" table:style-name="c1">
            <text:p>0.93147</text:p>
          </table:table-cell>
          <table:table-cell office:value-type="string" table:style-name="c1">
            <text:p>2026-03-25 11:15</text:p>
          </table:table-cell>
          <table:table-cell office:value-type="float" office:value="0.9295350000000001" table:style-name="c1">
            <text:p>0.92954</text:p>
          </table:table-cell>
          <table:table-cell office:value-type="float" office:value="-0.4067397520358784" table:style-name="c12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0.8294144999999999" table:style-name="c1">
            <text:p>0.82941</text:p>
          </table:table-cell>
          <table:table-cell office:value-type="string" table:style-name="c1">
            <text:p>2026-03-31 02:30</text:p>
          </table:table-cell>
          <table:table-cell office:value-type="float" office:value="0.831584" table:style-name="c1">
            <text:p>0.83158</text:p>
          </table:table-cell>
          <table:table-cell office:value-type="float" office:value="0.061147180812515245" table:style-name="c13">
            <text:p>+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7:00</text:p>
          </table:table-cell>
          <table:table-cell office:value-type="float" office:value="0.8394194999999999" table:style-name="c1">
            <text:p>0.83942</text:p>
          </table:table-cell>
          <table:table-cell office:value-type="string" table:style-name="c1">
            <text:p>2026-03-31 07:30</text:p>
          </table:table-cell>
          <table:table-cell office:value-type="float" office:value="0.8405795" table:style-name="c1">
            <text:p>0.84058</text:p>
          </table:table-cell>
          <table:table-cell office:value-type="float" office:value="-0.061985505518979966" table:style-name="c12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0.8314154999999999" table:style-name="c1">
            <text:p>0.83142</text:p>
          </table:table-cell>
          <table:table-cell office:value-type="string" table:style-name="c1">
            <text:p>2026-03-31 14:30</text:p>
          </table:table-cell>
          <table:table-cell office:value-type="float" office:value="0.8345825" table:style-name="c1">
            <text:p>0.83458</text:p>
          </table:table-cell>
          <table:table-cell office:value-type="float" office:value="0.18025518919242423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0.8464229999999999" table:style-name="c1">
            <text:p>0.84642</text:p>
          </table:table-cell>
          <table:table-cell office:value-type="string" table:style-name="c1">
            <text:p>2026-04-01 06:45</text:p>
          </table:table-cell>
          <table:table-cell office:value-type="float" office:value="0.847576" table:style-name="c1">
            <text:p>0.84758</text:p>
          </table:table-cell>
          <table:table-cell office:value-type="float" office:value="-0.06395199846883637" table:style-name="c12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7:15</text:p>
          </table:table-cell>
          <table:table-cell office:value-type="float" office:value="0.8494244999999999" table:style-name="c1">
            <text:p>0.84942</text:p>
          </table:table-cell>
          <table:table-cell office:value-type="string" table:style-name="c1">
            <text:p>2026-04-01 07:45</text:p>
          </table:table-cell>
          <table:table-cell office:value-type="float" office:value="0.847576" table:style-name="c1">
            <text:p>0.84758</text:p>
          </table:table-cell>
          <table:table-cell office:value-type="float" office:value="-0.41708291013502485" table:style-name="c12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8554274999999999" table:style-name="c1">
            <text:p>0.85543</text:p>
          </table:table-cell>
          <table:table-cell office:value-type="string" table:style-name="c1">
            <text:p>2026-04-01 13:15</text:p>
          </table:table-cell>
          <table:table-cell office:value-type="float" office:value="0.8465765000000001" table:style-name="c1">
            <text:p>0.84658</text:p>
          </table:table-cell>
          <table:table-cell office:value-type="float" office:value="-1.232518994713172" table:style-name="c12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2:00</text:p>
          </table:table-cell>
          <table:table-cell office:value-type="float" office:value="0.8504249999999999" table:style-name="c1">
            <text:p>0.85042</text:p>
          </table:table-cell>
          <table:table-cell office:value-type="string" table:style-name="c1">
            <text:p>2026-04-03 12:30</text:p>
          </table:table-cell>
          <table:table-cell office:value-type="float" office:value="0.847576" table:style-name="c1">
            <text:p>0.84758</text:p>
          </table:table-cell>
          <table:table-cell office:value-type="float" office:value="-0.5342392831819365" table:style-name="c12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2:30</text:p>
          </table:table-cell>
          <table:table-cell office:value-type="float" office:value="0.8414204999999999" table:style-name="c1">
            <text:p>0.84142</text:p>
          </table:table-cell>
          <table:table-cell office:value-type="string" table:style-name="c1">
            <text:p>2026-04-04 13:00</text:p>
          </table:table-cell>
          <table:table-cell office:value-type="float" office:value="0.841579" table:style-name="c1">
            <text:p>0.84158</text:p>
          </table:table-cell>
          <table:table-cell office:value-type="float" office:value="-0.1811004629670765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30</text:p>
          </table:table-cell>
          <table:table-cell office:value-type="float" office:value="0.8514255" table:style-name="c1">
            <text:p>0.85143</text:p>
          </table:table-cell>
          <table:table-cell office:value-type="string" table:style-name="c1">
            <text:p>2026-04-06 03:00</text:p>
          </table:table-cell>
          <table:table-cell office:value-type="float" office:value="0.8565715" table:style-name="c1">
            <text:p>0.85657</text:p>
          </table:table-cell>
          <table:table-cell office:value-type="float" office:value="0.40328996154097574" table:style-name="c13">
            <text:p>+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45</text:p>
          </table:table-cell>
          <table:table-cell office:value-type="float" office:value="0.8584289999999999" table:style-name="c1">
            <text:p>0.85843</text:p>
          </table:table-cell>
          <table:table-cell office:value-type="string" table:style-name="c1">
            <text:p>2026-04-06 09:15</text:p>
          </table:table-cell>
          <table:table-cell office:value-type="float" office:value="0.8625685000000001" table:style-name="c1">
            <text:p>0.86257</text:p>
          </table:table-cell>
          <table:table-cell office:value-type="float" office:value="0.2813541444312895" table:style-name="c13">
            <text:p>+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872436" table:style-name="c1">
            <text:p>0.87244</text:p>
          </table:table-cell>
          <table:table-cell office:value-type="string" table:style-name="c1">
            <text:p>2026-04-06 10:00</text:p>
          </table:table-cell>
          <table:table-cell office:value-type="float" office:value="0.8745625" table:style-name="c1">
            <text:p>0.87456</text:p>
          </table:table-cell>
          <table:table-cell office:value-type="float" office:value="0.0433555656231599" table:style-name="c13">
            <text:p>+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15</text:p>
          </table:table-cell>
          <table:table-cell office:value-type="float" office:value="0.8834415" table:style-name="c1">
            <text:p>0.88344</text:p>
          </table:table-cell>
          <table:table-cell office:value-type="string" table:style-name="c1">
            <text:p>2026-04-06 10:45</text:p>
          </table:table-cell>
          <table:table-cell office:value-type="float" office:value="0.8805595" table:style-name="c1">
            <text:p>0.88056</text:p>
          </table:table-cell>
          <table:table-cell office:value-type="float" office:value="-0.5254720816828318" table:style-name="c12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2:00</text:p>
          </table:table-cell>
          <table:table-cell office:value-type="float" office:value="0.894447" table:style-name="c1">
            <text:p>0.89445</text:p>
          </table:table-cell>
          <table:table-cell office:value-type="string" table:style-name="c1">
            <text:p>2026-04-06 12:30</text:p>
          </table:table-cell>
          <table:table-cell office:value-type="float" office:value="0.901549" table:style-name="c1">
            <text:p>0.90155</text:p>
          </table:table-cell>
          <table:table-cell office:value-type="float" office:value="0.5925229274624577" table:style-name="c13">
            <text:p>+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5:15</text:p>
          </table:table-cell>
          <table:table-cell office:value-type="float" office:value="0.8634314999999999" table:style-name="c1">
            <text:p>0.86343</text:p>
          </table:table-cell>
          <table:table-cell office:value-type="string" table:style-name="c1">
            <text:p>2026-04-07 05:45</text:p>
          </table:table-cell>
          <table:table-cell office:value-type="float" office:value="0.8585705" table:style-name="c1">
            <text:p>0.85857</text:p>
          </table:table-cell>
          <table:table-cell office:value-type="float" office:value="-0.7617607684570205" table:style-name="c12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8604299999999999" table:style-name="c1">
            <text:p>0.86043</text:p>
          </table:table-cell>
          <table:table-cell office:value-type="string" table:style-name="c1">
            <text:p>2026-04-07 18:30</text:p>
          </table:table-cell>
          <table:table-cell office:value-type="float" office:value="0.8605695" table:style-name="c1">
            <text:p>0.86057</text:p>
          </table:table-cell>
          <table:table-cell office:value-type="float" office:value="-0.18371958561415047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45</text:p>
          </table:table-cell>
          <table:table-cell office:value-type="float" office:value="0.8614305" table:style-name="c1">
            <text:p>0.86143</text:p>
          </table:table-cell>
          <table:table-cell office:value-type="string" table:style-name="c1">
            <text:p>2026-04-07 19:15</text:p>
          </table:table-cell>
          <table:table-cell office:value-type="float" office:value="0.8605695" table:style-name="c1">
            <text:p>0.86057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0.8824409999999999" table:style-name="c1">
            <text:p>0.88244</text:p>
          </table:table-cell>
          <table:table-cell office:value-type="string" table:style-name="c1">
            <text:p>2026-04-07 21:45</text:p>
          </table:table-cell>
          <table:table-cell office:value-type="float" office:value="0.885557" table:style-name="c1">
            <text:p>0.88556</text:p>
          </table:table-cell>
          <table:table-cell office:value-type="float" office:value="0.15250555640546892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00</text:p>
          </table:table-cell>
          <table:table-cell office:value-type="float" office:value="0.896448" table:style-name="c1">
            <text:p>0.89645</text:p>
          </table:table-cell>
          <table:table-cell office:value-type="string" table:style-name="c1">
            <text:p>2026-04-07 22:30</text:p>
          </table:table-cell>
          <table:table-cell office:value-type="float" office:value="0.9025485000000001" table:style-name="c1">
            <text:p>0.90255</text:p>
          </table:table-cell>
          <table:table-cell office:value-type="float" office:value="0.4792587577305163" table:style-name="c13">
            <text:p>+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910455" table:style-name="c1">
            <text:p>0.91046</text:p>
          </table:table-cell>
          <table:table-cell office:value-type="string" table:style-name="c1">
            <text:p>2026-04-07 23:15</text:p>
          </table:table-cell>
          <table:table-cell office:value-type="float" office:value="0.9185405000000001" table:style-name="c1">
            <text:p>0.91854</text:p>
          </table:table-cell>
          <table:table-cell office:value-type="float" office:value="0.6863971904707" table:style-name="c13">
            <text:p>+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8984489999999999" table:style-name="c1">
            <text:p>0.89845</text:p>
          </table:table-cell>
          <table:table-cell office:value-type="string" table:style-name="c1">
            <text:p>2026-04-08 22:00</text:p>
          </table:table-cell>
          <table:table-cell office:value-type="float" office:value="0.8985505" table:style-name="c1">
            <text:p>0.89855</text:p>
          </table:table-cell>
          <table:table-cell office:value-type="float" office:value="-0.18862533649655067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918459" table:style-name="c1">
            <text:p>0.91846</text:p>
          </table:table-cell>
          <table:table-cell office:value-type="string" table:style-name="c1">
            <text:p>2026-04-09 23:00</text:p>
          </table:table-cell>
          <table:table-cell office:value-type="float" office:value="0.9115440000000001" table:style-name="c1">
            <text:p>0.91154</text:p>
          </table:table-cell>
          <table:table-cell office:value-type="float" office:value="-0.951286497927506" table:style-name="c12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5:30</text:p>
          </table:table-cell>
          <table:table-cell office:value-type="float" office:value="0.8954475" table:style-name="c1">
            <text:p>0.89545</text:p>
          </table:table-cell>
          <table:table-cell office:value-type="string" table:style-name="c1">
            <text:p>2026-04-11 16:00</text:p>
          </table:table-cell>
          <table:table-cell office:value-type="float" office:value="0.8975510000000001" table:style-name="c1">
            <text:p>0.89755</text:p>
          </table:table-cell>
          <table:table-cell office:value-type="float" office:value="0.03454089167707064" table:style-name="c13">
            <text:p>+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15</text:p>
          </table:table-cell>
          <table:table-cell office:value-type="float" office:value="0.9044519999999999" table:style-name="c1">
            <text:p>0.90445</text:p>
          </table:table-cell>
          <table:table-cell office:value-type="string" table:style-name="c1">
            <text:p>2026-04-11 16:45</text:p>
          </table:table-cell>
          <table:table-cell office:value-type="float" office:value="0.9075460000000001" table:style-name="c1">
            <text:p>0.90755</text:p>
          </table:table-cell>
          <table:table-cell office:value-type="float" office:value="0.14150176526781522" table:style-name="c13">
            <text:p>+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0.908454" table:style-name="c1">
            <text:p>0.90845</text:p>
          </table:table-cell>
          <table:table-cell office:value-type="string" table:style-name="c1">
            <text:p>2026-04-11 17:30</text:p>
          </table:table-cell>
          <table:table-cell office:value-type="float" office:value="0.9075460000000001" table:style-name="c1">
            <text:p>0.90755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0.9174585" table:style-name="c1">
            <text:p>0.91746</text:p>
          </table:table-cell>
          <table:table-cell office:value-type="string" table:style-name="c1">
            <text:p>2026-04-11 19:15</text:p>
          </table:table-cell>
          <table:table-cell office:value-type="float" office:value="0.9155420000000001" table:style-name="c1">
            <text:p>0.91554</text:p>
          </table:table-cell>
          <table:table-cell office:value-type="float" office:value="-0.4083747066488397" table:style-name="c12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3 23:00</text:p>
          </table:table-cell>
          <table:table-cell office:value-type="float" office:value="0.9215390000000001" table:style-name="c1">
            <text:p>0.92154</text:p>
          </table:table-cell>
          <table:table-cell office:value-type="float" office:value="-0.19139794500142582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0.928464" table:style-name="c1">
            <text:p>0.92846</text:p>
          </table:table-cell>
          <table:table-cell office:value-type="string" table:style-name="c1">
            <text:p>2026-04-14 00:00</text:p>
          </table:table-cell>
          <table:table-cell office:value-type="float" office:value="0.9185405000000001" table:style-name="c1">
            <text:p>0.91854</text:p>
          </table:table-cell>
          <table:table-cell office:value-type="float" office:value="-1.266571720551346" table:style-name="c12">
            <text:p>-1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1:45</text:p>
          </table:table-cell>
          <table:table-cell office:value-type="float" office:value="0.896448" table:style-name="c1">
            <text:p>0.89645</text:p>
          </table:table-cell>
          <table:table-cell office:value-type="string" table:style-name="c1">
            <text:p>2026-04-15 02:15</text:p>
          </table:table-cell>
          <table:table-cell office:value-type="float" office:value="0.8975510000000001" table:style-name="c1">
            <text:p>0.89755</text:p>
          </table:table-cell>
          <table:table-cell office:value-type="float" office:value="-0.0771048012823794" table:style-name="c12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908454" table:style-name="c1">
            <text:p>0.90845</text:p>
          </table:table-cell>
          <table:table-cell office:value-type="string" table:style-name="c1">
            <text:p>2026-04-15 12:30</text:p>
          </table:table-cell>
          <table:table-cell office:value-type="float" office:value="0.9055470000000001" table:style-name="c1">
            <text:p>0.90555</text:p>
          </table:table-cell>
          <table:table-cell office:value-type="float" office:value="-0.5192545195463638" table:style-name="c12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15</text:p>
          </table:table-cell>
          <table:table-cell office:value-type="float" office:value="0.9124559999999999" table:style-name="c1">
            <text:p>0.91246</text:p>
          </table:table-cell>
          <table:table-cell office:value-type="string" table:style-name="c1">
            <text:p>2026-04-15 15:45</text:p>
          </table:table-cell>
          <table:table-cell office:value-type="float" office:value="0.9035480000000001" table:style-name="c1">
            <text:p>0.90355</text:p>
          </table:table-cell>
          <table:table-cell office:value-type="float" office:value="-1.1742146965990519" table:style-name="c12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7:00</text:p>
          </table:table-cell>
          <table:table-cell office:value-type="float" office:value="0.914457" table:style-name="c1">
            <text:p>0.91446</text:p>
          </table:table-cell>
          <table:table-cell office:value-type="string" table:style-name="c1">
            <text:p>2026-04-15 17:30</text:p>
          </table:table-cell>
          <table:table-cell office:value-type="float" office:value="0.9165415000000001" table:style-name="c1">
            <text:p>0.91654</text:p>
          </table:table-cell>
          <table:table-cell office:value-type="float" office:value="0.027593811573445315" table:style-name="c13">
            <text:p>+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9194595" table:style-name="c1">
            <text:p>0.91946</text:p>
          </table:table-cell>
          <table:table-cell office:value-type="string" table:style-name="c1">
            <text:p>2026-04-15 20:15</text:p>
          </table:table-cell>
          <table:table-cell office:value-type="float" office:value="0.9155420000000001" table:style-name="c1">
            <text:p>0.91554</text:p>
          </table:table-cell>
          <table:table-cell office:value-type="float" office:value="-0.6251138258944411" table:style-name="c12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6 02:45</text:p>
          </table:table-cell>
          <table:table-cell office:value-type="float" office:value="0.9325335000000001" table:style-name="c1">
            <text:p>0.93253</text:p>
          </table:table-cell>
          <table:table-cell office:value-type="float" office:value="0.999377133745849" table:style-name="c13">
            <text:p>+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00</text:p>
          </table:table-cell>
          <table:table-cell office:value-type="float" office:value="0.9314655" table:style-name="c1">
            <text:p>0.93147</text:p>
          </table:table-cell>
          <table:table-cell office:value-type="string" table:style-name="c1">
            <text:p>2026-04-16 03:30</text:p>
          </table:table-cell>
          <table:table-cell office:value-type="float" office:value="0.93953" table:style-name="c1">
            <text:p>0.93953</text:p>
          </table:table-cell>
          <table:table-cell office:value-type="float" office:value="0.6641555194475846" table:style-name="c13">
            <text:p>+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45</text:p>
          </table:table-cell>
          <table:table-cell office:value-type="float" office:value="0.9434714999999999" table:style-name="c1">
            <text:p>0.94347</text:p>
          </table:table-cell>
          <table:table-cell office:value-type="string" table:style-name="c1">
            <text:p>2026-04-16 04:15</text:p>
          </table:table-cell>
          <table:table-cell office:value-type="float" office:value="0.947526" table:style-name="c1">
            <text:p>0.94753</text:p>
          </table:table-cell>
          <table:table-cell office:value-type="float" office:value="0.22898365515016117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30</text:p>
          </table:table-cell>
          <table:table-cell office:value-type="float" office:value="0.9524759999999999" table:style-name="c1">
            <text:p>0.95248</text:p>
          </table:table-cell>
          <table:table-cell office:value-type="string" table:style-name="c1">
            <text:p>2026-04-16 05:00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1.1665313894523521" table:style-name="c13">
            <text:p>+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0.9974985" table:style-name="c1">
            <text:p>0.9975</text:p>
          </table:table-cell>
          <table:table-cell office:value-type="string" table:style-name="c1">
            <text:p>2026-04-16 12:45</text:p>
          </table:table-cell>
          <table:table-cell office:value-type="float" office:value="0.987506" table:style-name="c1">
            <text:p>0.98751</text:p>
          </table:table-cell>
          <table:table-cell office:value-type="float" office:value="-1.19965338233593" table:style-name="c12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1.0025009999999999" table:style-name="c1">
            <text:p>1.0025</text:p>
          </table:table-cell>
          <table:table-cell office:value-type="string" table:style-name="c1">
            <text:p>2026-04-16 14:00</text:p>
          </table:table-cell>
          <table:table-cell office:value-type="float" office:value="0.9895050000000001" table:style-name="c1">
            <text:p>0.98951</text:p>
          </table:table-cell>
          <table:table-cell office:value-type="float" office:value="-1.4936663898589275" table:style-name="c12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1.0155074999999998" table:style-name="c1">
            <text:p>1.0155</text:p>
          </table:table-cell>
          <table:table-cell office:value-type="string" table:style-name="c1">
            <text:p>2026-04-16 16:30</text:p>
          </table:table-cell>
          <table:table-cell office:value-type="float" office:value="1.0014990000000001" table:style-name="c1">
            <text:p>1.0015</text:p>
          </table:table-cell>
          <table:table-cell office:value-type="float" office:value="-1.5766005175736786" table:style-name="c12">
            <text:p>-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30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4-17 08:00</text:p>
          </table:table-cell>
          <table:table-cell office:value-type="float" office:value="1.0064965" table:style-name="c1">
            <text:p>1.0065</text:p>
          </table:table-cell>
          <table:table-cell office:value-type="float" office:value="0.5994511257898072" table:style-name="c13">
            <text:p>+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1.0005" table:style-name="c1">
            <text:p>1.0005</text:p>
          </table:table-cell>
          <table:table-cell office:value-type="string" table:style-name="c1">
            <text:p>2026-04-17 08:45</text:p>
          </table:table-cell>
          <table:table-cell office:value-type="float" office:value="0.9905045" table:style-name="c1">
            <text:p>0.9905</text:p>
          </table:table-cell>
          <table:table-cell office:value-type="float" office:value="-1.1969533728635628" table:style-name="c12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15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4-18 06:45</text:p>
          </table:table-cell>
          <table:table-cell office:value-type="float" office:value="0.9925035000000001" table:style-name="c1">
            <text:p>0.9925</text:p>
          </table:table-cell>
          <table:table-cell office:value-type="float" office:value="0.5100988088189595" table:style-name="c13">
            <text:p>+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624809999999999" table:style-name="c1">
            <text:p>0.96248</text:p>
          </table:table-cell>
          <table:table-cell office:value-type="string" table:style-name="c1">
            <text:p>2026-04-22 06:00</text:p>
          </table:table-cell>
          <table:table-cell office:value-type="float" office:value="0.953523" table:style-name="c1">
            <text:p>0.95352</text:p>
          </table:table-cell>
          <table:table-cell office:value-type="float" office:value="-1.1287591627263338" table:style-name="c12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0.9394694999999998" table:style-name="c1">
            <text:p>0.93947</text:p>
          </table:table-cell>
          <table:table-cell office:value-type="string" table:style-name="c1">
            <text:p>2026-04-24 11:45</text:p>
          </table:table-cell>
          <table:table-cell office:value-type="float" office:value="0.941529" table:style-name="c1">
            <text:p>0.94153</text:p>
          </table:table-cell>
          <table:table-cell office:value-type="float" office:value="0.01888124404252345" table:style-name="c13">
            <text:p>+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9464729999999999" table:style-name="c1">
            <text:p>0.94647</text:p>
          </table:table-cell>
          <table:table-cell office:value-type="string" table:style-name="c1">
            <text:p>2026-04-24 16:30</text:p>
          </table:table-cell>
          <table:table-cell office:value-type="float" office:value="0.945527" table:style-name="c1">
            <text:p>0.94553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15</text:p>
          </table:table-cell>
          <table:table-cell office:value-type="float" office:value="0.9564779999999999" table:style-name="c1">
            <text:p>0.95648</text:p>
          </table:table-cell>
          <table:table-cell office:value-type="string" table:style-name="c1">
            <text:p>2026-04-25 04:45</text:p>
          </table:table-cell>
          <table:table-cell office:value-type="float" office:value="0.951524" table:style-name="c1">
            <text:p>0.95152</text:p>
          </table:table-cell>
          <table:table-cell office:value-type="float" office:value="-0.7168065000972335" table:style-name="c12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2:45</text:p>
          </table:table-cell>
          <table:table-cell office:value-type="float" office:value="0.9384689999999999" table:style-name="c1">
            <text:p>0.93847</text:p>
          </table:table-cell>
          <table:table-cell office:value-type="string" table:style-name="c1">
            <text:p>2026-04-25 23:15</text:p>
          </table:table-cell>
          <table:table-cell office:value-type="float" office:value="0.9385305" table:style-name="c1">
            <text:p>0.93853</text:p>
          </table:table-cell>
          <table:table-cell office:value-type="float" office:value="-0.19335987331491333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0.9494744999999999" table:style-name="c1">
            <text:p>0.94947</text:p>
          </table:table-cell>
          <table:table-cell office:value-type="string" table:style-name="c1">
            <text:p>2026-04-26 05:45</text:p>
          </table:table-cell>
          <table:table-cell office:value-type="float" office:value="0.9485255" table:style-name="c1">
            <text:p>0.94853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6:15</text:p>
          </table:table-cell>
          <table:table-cell office:value-type="float" office:value="0.9504749999999998" table:style-name="c1">
            <text:p>0.95047</text:p>
          </table:table-cell>
          <table:table-cell office:value-type="string" table:style-name="c1">
            <text:p>2026-04-26 06:45</text:p>
          </table:table-cell>
          <table:table-cell office:value-type="float" office:value="0.953523" table:style-name="c1">
            <text:p>0.95352</text:p>
          </table:table-cell>
          <table:table-cell office:value-type="float" office:value="0.12014072153399002" table:style-name="c13">
            <text:p>+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5:00</text:p>
          </table:table-cell>
          <table:table-cell office:value-type="float" office:value="0.9474734999999999" table:style-name="c1">
            <text:p>0.94747</text:p>
          </table:table-cell>
          <table:table-cell office:value-type="string" table:style-name="c1">
            <text:p>2026-04-29 05:30</text:p>
          </table:table-cell>
          <table:table-cell office:value-type="float" office:value="0.9445275" table:style-name="c1">
            <text:p>0.94453</text:p>
          </table:table-cell>
          <table:table-cell office:value-type="float" office:value="-0.5102106256797523" table:style-name="c12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9554774999999999" table:style-name="c1">
            <text:p>0.95548</text:p>
          </table:table-cell>
          <table:table-cell office:value-type="string" table:style-name="c1">
            <text:p>2026-04-29 10:30</text:p>
          </table:table-cell>
          <table:table-cell office:value-type="float" office:value="0.9625185" table:style-name="c1">
            <text:p>0.96252</text:p>
          </table:table-cell>
          <table:table-cell office:value-type="float" office:value="0.5355359512390523" table:style-name="c13">
            <text:p>+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1:15</text:p>
          </table:table-cell>
          <table:table-cell office:value-type="float" office:value="0.9824909999999999" table:style-name="c1">
            <text:p>0.98249</text:p>
          </table:table-cell>
          <table:table-cell office:value-type="string" table:style-name="c1">
            <text:p>2026-04-29 11:45</text:p>
          </table:table-cell>
          <table:table-cell office:value-type="float" office:value="0.9785105000000001" table:style-name="c1">
            <text:p>0.97851</text:p>
          </table:table-cell>
          <table:table-cell office:value-type="float" office:value="-0.604233778171992" table:style-name="c12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9334665" table:style-name="c1">
            <text:p>0.93347</text:p>
          </table:table-cell>
          <table:table-cell office:value-type="string" table:style-name="c1">
            <text:p>2026-05-01 04:00</text:p>
          </table:table-cell>
          <table:table-cell office:value-type="float" office:value="0.9315340000000001" table:style-name="c1">
            <text:p>0.93153</text:p>
          </table:table-cell>
          <table:table-cell office:value-type="float" office:value="-0.406510192492171" table:style-name="c12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30</text:p>
          </table:table-cell>
          <table:table-cell office:value-type="float" office:value="0.9254625" table:style-name="c1">
            <text:p>0.92546</text:p>
          </table:table-cell>
          <table:table-cell office:value-type="string" table:style-name="c1">
            <text:p>2026-05-01 13:00</text:p>
          </table:table-cell>
          <table:table-cell office:value-type="float" office:value="0.9235380000000001" table:style-name="c1">
            <text:p>0.92354</text:p>
          </table:table-cell>
          <table:table-cell office:value-type="float" office:value="-0.40743438680658217" table:style-name="c12">
            <text:p>-0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9294645" table:style-name="c1">
            <text:p>0.92946</text:p>
          </table:table-cell>
          <table:table-cell office:value-type="string" table:style-name="c1">
            <text:p>2026-05-01 13:45</text:p>
          </table:table-cell>
          <table:table-cell office:value-type="float" office:value="0.9305345000000002" table:style-name="c1">
            <text:p>0.93053</text:p>
          </table:table-cell>
          <table:table-cell office:value-type="float" office:value="-0.08501007467199839" table:style-name="c12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34467" table:style-name="c1">
            <text:p>0.93447</text:p>
          </table:table-cell>
          <table:table-cell office:value-type="string" table:style-name="c1">
            <text:p>2026-05-03 22:45</text:p>
          </table:table-cell>
          <table:table-cell office:value-type="float" office:value="0.9345325000000001" table:style-name="c1">
            <text:p>0.93453</text:p>
          </table:table-cell>
          <table:table-cell office:value-type="float" office:value="-0.19290466838314257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484739999999999" table:style-name="c1">
            <text:p>0.94847</text:p>
          </table:table-cell>
          <table:table-cell office:value-type="string" table:style-name="c1">
            <text:p>2026-05-04 02:30</text:p>
          </table:table-cell>
          <table:table-cell office:value-type="float" office:value="0.9585205" table:style-name="c1">
            <text:p>0.95852</text:p>
          </table:table-cell>
          <table:table-cell office:value-type="float" office:value="0.8572103737688019" table:style-name="c13">
            <text:p>+0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0.9704849999999999" table:style-name="c1">
            <text:p>0.97048</text:p>
          </table:table-cell>
          <table:table-cell office:value-type="string" table:style-name="c1">
            <text:p>2026-05-04 03:15</text:p>
          </table:table-cell>
          <table:table-cell office:value-type="float" office:value="0.971514" table:style-name="c1">
            <text:p>0.97151</text:p>
          </table:table-cell>
          <table:table-cell office:value-type="float" office:value="-0.09408249339247776" table:style-name="c12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0.9454724999999999" table:style-name="c1">
            <text:p>0.94547</text:p>
          </table:table-cell>
          <table:table-cell office:value-type="string" table:style-name="c1">
            <text:p>2026-05-04 15:45</text:p>
          </table:table-cell>
          <table:table-cell office:value-type="float" office:value="0.9365315000000001" table:style-name="c1">
            <text:p>0.93653</text:p>
          </table:table-cell>
          <table:table-cell office:value-type="float" office:value="-1.1436743499678603" table:style-name="c12">
            <text:p>-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4:30</text:p>
          </table:table-cell>
          <table:table-cell office:value-type="float" office:value="0.9454724999999999" table:style-name="c1">
            <text:p>0.94547</text:p>
          </table:table-cell>
          <table:table-cell office:value-type="string" table:style-name="c1">
            <text:p>2026-05-05 05:00</text:p>
          </table:table-cell>
          <table:table-cell office:value-type="float" office:value="0.9445275" table:style-name="c1">
            <text:p>0.94453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45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5-05 21:15</text:p>
          </table:table-cell>
          <table:table-cell office:value-type="float" office:value="0.9965015" table:style-name="c1">
            <text:p>0.9965</text:p>
          </table:table-cell>
          <table:table-cell office:value-type="float" office:value="2.1595567582601394" table:style-name="c13">
            <text:p>+2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1:30</text:p>
          </table:table-cell>
          <table:table-cell office:value-type="float" office:value="0.9914955" table:style-name="c1">
            <text:p>0.9915</text:p>
          </table:table-cell>
          <table:table-cell office:value-type="string" table:style-name="c1">
            <text:p>2026-05-06 02:00</text:p>
          </table:table-cell>
          <table:table-cell office:value-type="float" office:value="1.0344825" table:style-name="c1">
            <text:p>1.0345</text:p>
          </table:table-cell>
          <table:table-cell office:value-type="float" office:value="4.127005062806655" table:style-name="c13">
            <text:p>+4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4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5-06 03:15</text:p>
          </table:table-cell>
          <table:table-cell office:value-type="float" office:value="1.0504745" table:style-name="c1">
            <text:p>1.0505</text:p>
          </table:table-cell>
          <table:table-cell office:value-type="float" office:value="2.3291675914484333" table:style-name="c13">
            <text:p>+2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30</text:p>
          </table:table-cell>
          <table:table-cell office:value-type="float" office:value="1.074537" table:style-name="c1">
            <text:p>1.0745</text:p>
          </table:table-cell>
          <table:table-cell office:value-type="string" table:style-name="c1">
            <text:p>2026-05-06 04:00</text:p>
          </table:table-cell>
          <table:table-cell office:value-type="float" office:value="1.1174410000000001" table:style-name="c1">
            <text:p>1.1174</text:p>
          </table:table-cell>
          <table:table-cell office:value-type="float" office:value="3.784907866457843" table:style-name="c13">
            <text:p>+3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45</text:p>
          </table:table-cell>
          <table:table-cell office:value-type="float" office:value="1.094547" table:style-name="c1">
            <text:p>1.0945</text:p>
          </table:table-cell>
          <table:table-cell office:value-type="string" table:style-name="c1">
            <text:p>2026-05-07 05:15</text:p>
          </table:table-cell>
          <table:table-cell office:value-type="float" office:value="1.0874560000000002" table:style-name="c1">
            <text:p>1.0875</text:p>
          </table:table-cell>
          <table:table-cell office:value-type="float" office:value="-0.8464528744768107" table:style-name="c12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1.108554" table:style-name="c1">
            <text:p>1.1086</text:p>
          </table:table-cell>
          <table:table-cell office:value-type="string" table:style-name="c1">
            <text:p>2026-05-07 07:30</text:p>
          </table:table-cell>
          <table:table-cell office:value-type="float" office:value="1.0904545" table:style-name="c1">
            <text:p>1.0905</text:p>
          </table:table-cell>
          <table:table-cell office:value-type="float" office:value="-1.829348732267455" table:style-name="c12">
            <text:p>-1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2:15</text:p>
          </table:table-cell>
          <table:table-cell office:value-type="float" office:value="1.118559" table:style-name="c1">
            <text:p>1.1186</text:p>
          </table:table-cell>
          <table:table-cell office:value-type="string" table:style-name="c1">
            <text:p>2026-05-07 12:45</text:p>
          </table:table-cell>
          <table:table-cell office:value-type="float" office:value="1.1074460000000002" table:style-name="c1">
            <text:p>1.1074</text:p>
          </table:table-cell>
          <table:table-cell office:value-type="float" office:value="-1.1914243731443674" table:style-name="c12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20:00</text:p>
          </table:table-cell>
          <table:table-cell office:value-type="float" office:value="1.08054" table:style-name="c1">
            <text:p>1.0805</text:p>
          </table:table-cell>
          <table:table-cell office:value-type="string" table:style-name="c1">
            <text:p>2026-05-07 20:30</text:p>
          </table:table-cell>
          <table:table-cell office:value-type="float" office:value="1.0844575" table:style-name="c1">
            <text:p>1.0845</text:p>
          </table:table-cell>
          <table:table-cell office:value-type="float" office:value="0.16192546851574452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1.1935965" table:style-name="c1">
            <text:p>1.1936</text:p>
          </table:table-cell>
          <table:table-cell office:value-type="string" table:style-name="c1">
            <text:p>2026-05-08 16:15</text:p>
          </table:table-cell>
          <table:table-cell office:value-type="float" office:value="1.215392" table:style-name="c1">
            <text:p>1.2154</text:p>
          </table:table-cell>
          <table:table-cell office:value-type="float" office:value="1.6224856048086655" table:style-name="c13">
            <text:p>+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1:45</text:p>
          </table:table-cell>
          <table:table-cell office:value-type="float" office:value="1.2596294999999997" table:style-name="c1">
            <text:p>1.2596</text:p>
          </table:table-cell>
          <table:table-cell office:value-type="string" table:style-name="c1">
            <text:p>2026-05-08 22:15</text:p>
          </table:table-cell>
          <table:table-cell office:value-type="float" office:value="1.2713640000000002" table:style-name="c1">
            <text:p>1.2714</text:p>
          </table:table-cell>
          <table:table-cell office:value-type="float" office:value="0.7298212183820985" table:style-name="c13">
            <text:p>+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3:00</text:p>
          </table:table-cell>
          <table:table-cell office:value-type="float" office:value="1.2816404999999997" table:style-name="c1">
            <text:p>1.2816</text:p>
          </table:table-cell>
          <table:table-cell office:value-type="string" table:style-name="c1">
            <text:p>2026-05-08 23:30</text:p>
          </table:table-cell>
          <table:table-cell office:value-type="float" office:value="1.3163415" table:style-name="c1">
            <text:p>1.3163</text:p>
          </table:table-cell>
          <table:table-cell office:value-type="float" office:value="2.502233141157806" table:style-name="c13">
            <text:p>+2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3:45</text:p>
          </table:table-cell>
          <table:table-cell office:value-type="float" office:value="1.30065" table:style-name="c1">
            <text:p>1.3007</text:p>
          </table:table-cell>
          <table:table-cell office:value-type="string" table:style-name="c1">
            <text:p>2026-05-09 00:15</text:p>
          </table:table-cell>
          <table:table-cell office:value-type="float" office:value="1.273363" table:style-name="c1">
            <text:p>1.2734</text:p>
          </table:table-cell>
          <table:table-cell office:value-type="float" office:value="-2.293657220389822" table:style-name="c12">
            <text:p>-2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6:30</text:p>
          </table:table-cell>
          <table:table-cell office:value-type="float" office:value="1.2876435" table:style-name="c1">
            <text:p>1.2876</text:p>
          </table:table-cell>
          <table:table-cell office:value-type="string" table:style-name="c1">
            <text:p>2026-05-09 07:00</text:p>
          </table:table-cell>
          <table:table-cell office:value-type="float" office:value="1.2703645" table:style-name="c1">
            <text:p>1.2704</text:p>
          </table:table-cell>
          <table:table-cell office:value-type="float" office:value="-1.5391262127677496" table:style-name="c12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9:00</text:p>
          </table:table-cell>
          <table:table-cell office:value-type="float" office:value="1.2216105" table:style-name="c1">
            <text:p>1.2216</text:p>
          </table:table-cell>
          <table:table-cell office:value-type="string" table:style-name="c1">
            <text:p>2026-05-09 19:30</text:p>
          </table:table-cell>
          <table:table-cell office:value-type="float" office:value="1.2173910000000001" table:style-name="c1">
            <text:p>1.2174</text:p>
          </table:table-cell>
          <table:table-cell office:value-type="float" office:value="-0.5446142292489964" table:style-name="c12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15</text:p>
          </table:table-cell>
          <table:table-cell office:value-type="float" office:value="1.1845919999999999" table:style-name="c1">
            <text:p>1.1846</text:p>
          </table:table-cell>
          <table:table-cell office:value-type="string" table:style-name="c1">
            <text:p>2026-05-10 16:45</text:p>
          </table:table-cell>
          <table:table-cell office:value-type="float" office:value="1.1784105" table:style-name="c1">
            <text:p>1.1784</text:p>
          </table:table-cell>
          <table:table-cell office:value-type="float" office:value="-0.7206821073837855" table:style-name="c12">
            <text:p>-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0.9694845" table:style-name="c1">
            <text:p>0.96948</text:p>
          </table:table-cell>
          <table:table-cell office:value-type="string" table:style-name="c1">
            <text:p>2026-05-20 16:00</text:p>
          </table:table-cell>
          <table:table-cell office:value-type="float" office:value="0.969515" table:style-name="c1">
            <text:p>0.96952</text:p>
          </table:table-cell>
          <table:table-cell office:value-type="float" office:value="-0.19676028703914383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15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5-21 08:45</text:p>
          </table:table-cell>
          <table:table-cell office:value-type="float" office:value="0.9945025000000001" table:style-name="c1">
            <text:p>0.9945</text:p>
          </table:table-cell>
          <table:table-cell office:value-type="float" office:value="-0.5993506751133193" table:style-name="c12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4:15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1 14:45</text:p>
          </table:table-cell>
          <table:table-cell office:value-type="float" office:value="0.97951" table:style-name="c1">
            <text:p>0.97951</text:p>
          </table:table-cell>
          <table:table-cell office:value-type="float" office:value="-0.805743370954104" table:style-name="c12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15</text:p>
          </table:table-cell>
          <table:table-cell office:value-type="float" office:value="0.988494" table:style-name="c1">
            <text:p>0.98849</text:p>
          </table:table-cell>
          <table:table-cell office:value-type="string" table:style-name="c1">
            <text:p>2026-05-21 15:45</text:p>
          </table:table-cell>
          <table:table-cell office:value-type="float" office:value="0.9885055" table:style-name="c1">
            <text:p>0.98851</text:p>
          </table:table-cell>
          <table:table-cell office:value-type="float" office:value="-0.1987389396900685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7:30</text:p>
          </table:table-cell>
          <table:table-cell office:value-type="float" office:value="1.022511" table:style-name="c1">
            <text:p>1.0225</text:p>
          </table:table-cell>
          <table:table-cell office:value-type="string" table:style-name="c1">
            <text:p>2026-05-22 08:00</text:p>
          </table:table-cell>
          <table:table-cell office:value-type="float" office:value="1.0144925" table:style-name="c1">
            <text:p>1.0145</text:p>
          </table:table-cell>
          <table:table-cell office:value-type="float" office:value="-0.982529332936255" table:style-name="c12">
            <text:p>-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5 15:00</text:p>
          </table:table-cell>
          <table:table-cell office:value-type="float" office:value="0.9845075000000001" table:style-name="c1">
            <text:p>0.98451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00</text:p>
          </table:table-cell>
          <table:table-cell office:value-type="float" office:value="0.986493" table:style-name="c1">
            <text:p>0.98649</text:p>
          </table:table-cell>
          <table:table-cell office:value-type="string" table:style-name="c1">
            <text:p>2026-05-26 05:30</text:p>
          </table:table-cell>
          <table:table-cell office:value-type="float" office:value="0.991504" table:style-name="c1">
            <text:p>0.9915</text:p>
          </table:table-cell>
          <table:table-cell office:value-type="float" office:value="0.3070456155289669" table:style-name="c13">
            <text:p>+0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45</text:p>
          </table:table-cell>
          <table:table-cell office:value-type="float" office:value="0.996498" table:style-name="c1">
            <text:p>0.9965</text:p>
          </table:table-cell>
          <table:table-cell office:value-type="string" table:style-name="c1">
            <text:p>2026-05-26 06:15</text:p>
          </table:table-cell>
          <table:table-cell office:value-type="float" office:value="0.9905045" table:style-name="c1">
            <text:p>0.9905</text:p>
          </table:table-cell>
          <table:table-cell office:value-type="float" office:value="-0.8001539888188525" table:style-name="c12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8:15</text:p>
          </table:table-cell>
          <table:table-cell office:value-type="float" office:value="0.994497" table:style-name="c1">
            <text:p>0.9945</text:p>
          </table:table-cell>
          <table:table-cell office:value-type="string" table:style-name="c1">
            <text:p>2026-05-26 08:45</text:p>
          </table:table-cell>
          <table:table-cell office:value-type="float" office:value="0.9945025000000001" table:style-name="c1">
            <text:p>0.9945</text:p>
          </table:table-cell>
          <table:table-cell office:value-type="float" office:value="-0.19934806213592893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3:45</text:p>
          </table:table-cell>
          <table:table-cell office:value-type="float" office:value="1.0275134999999997" table:style-name="c1">
            <text:p>1.0275</text:p>
          </table:table-cell>
          <table:table-cell office:value-type="string" table:style-name="c1">
            <text:p>2026-05-26 14:15</text:p>
          </table:table-cell>
          <table:table-cell office:value-type="float" office:value="1.037481" table:style-name="c1">
            <text:p>1.0375</text:p>
          </table:table-cell>
          <table:table-cell office:value-type="float" office:value="0.7682210969491177" table:style-name="c13">
            <text:p>+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30</text:p>
          </table:table-cell>
          <table:table-cell office:value-type="float" office:value="1.0495245" table:style-name="c1">
            <text:p>1.0495</text:p>
          </table:table-cell>
          <table:table-cell office:value-type="string" table:style-name="c1">
            <text:p>2026-05-26 15:00</text:p>
          </table:table-cell>
          <table:table-cell office:value-type="float" office:value="1.029485" table:style-name="c1">
            <text:p>1.0295</text:p>
          </table:table-cell>
          <table:table-cell office:value-type="float" office:value="-2.105471622148891" table:style-name="c12">
            <text:p>-2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1.0355174999999999" table:style-name="c1">
            <text:p>1.0355</text:p>
          </table:table-cell>
          <table:table-cell office:value-type="string" table:style-name="c1">
            <text:p>2026-05-27 01:45</text:p>
          </table:table-cell>
          <table:table-cell office:value-type="float" office:value="1.035482" table:style-name="c1">
            <text:p>1.0355</text:p>
          </table:table-cell>
          <table:table-cell office:value-type="float" office:value="-0.2033213845251014" table:style-name="c12">
            <text:p>-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30</text:p>
          </table:table-cell>
          <table:table-cell office:value-type="float" office:value="0.9784889999999999" table:style-name="c1">
            <text:p>0.97849</text:p>
          </table:table-cell>
          <table:table-cell office:value-type="string" table:style-name="c1">
            <text:p>2026-05-31 04:00</text:p>
          </table:table-cell>
          <table:table-cell office:value-type="float" office:value="0.977511" table:style-name="c1">
            <text:p>0.97751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0:00</text:p>
          </table:table-cell>
          <table:table-cell office:value-type="float" office:value="0.096938445" table:style-name="c9">
            <text:p>0.096938</text:p>
          </table:table-cell>
          <table:table-cell office:value-type="string" table:style-name="c9">
            <text:p>2026-03-10 10:30</text:p>
          </table:table-cell>
          <table:table-cell office:value-type="float" office:value="0.09629183" table:style-name="c9">
            <text:p>0.096292</text:p>
          </table:table-cell>
          <table:table-cell office:value-type="float" office:value="-0.8656032889427956" table:style-name="c10">
            <text:p>-0.9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4:45</text:p>
          </table:table-cell>
          <table:table-cell office:value-type="float" office:value="0.09741868499999999" table:style-name="c9">
            <text:p>0.097419</text:p>
          </table:table-cell>
          <table:table-cell office:value-type="string" table:style-name="c9">
            <text:p>2026-03-10 15:15</text:p>
          </table:table-cell>
          <table:table-cell office:value-type="float" office:value="0.09784105500000001" table:style-name="c9">
            <text:p>0.097841</text:p>
          </table:table-cell>
          <table:table-cell office:value-type="float" office:value="0.2327949007472352" table:style-name="c11">
            <text:p>+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9:45</text:p>
          </table:table-cell>
          <table:table-cell office:value-type="float" office:value="0.097438695" table:style-name="c9">
            <text:p>0.097439</text:p>
          </table:table-cell>
          <table:table-cell office:value-type="string" table:style-name="c9">
            <text:p>2026-03-13 10:15</text:p>
          </table:table-cell>
          <table:table-cell office:value-type="float" office:value="0.097781085" table:style-name="c9">
            <text:p>0.097781</text:p>
          </table:table-cell>
          <table:table-cell office:value-type="float" office:value="0.15078774514067916" table:style-name="c11">
            <text:p>+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2:45</text:p>
          </table:table-cell>
          <table:table-cell office:value-type="float" office:value="0.09895945499999999" table:style-name="c9">
            <text:p>0.098959</text:p>
          </table:table-cell>
          <table:table-cell office:value-type="string" table:style-name="c9">
            <text:p>2026-03-13 13:15</text:p>
          </table:table-cell>
          <table:table-cell office:value-type="float" office:value="0.09901047" table:style-name="c9">
            <text:p>0.09901</text:p>
          </table:table-cell>
          <table:table-cell office:value-type="float" office:value="-0.1484516356016652" table:style-name="c10">
            <text:p>-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30</text:p>
          </table:table-cell>
          <table:table-cell office:value-type="float" office:value="0.099179565" table:style-name="c9">
            <text:p>0.09918</text:p>
          </table:table-cell>
          <table:table-cell office:value-type="string" table:style-name="c9">
            <text:p>2026-03-13 14:00</text:p>
          </table:table-cell>
          <table:table-cell office:value-type="float" office:value="0.09947024" table:style-name="c9">
            <text:p>0.09947</text:p>
          </table:table-cell>
          <table:table-cell office:value-type="float" office:value="0.09259366104299449" table:style-name="c11">
            <text:p>+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9:00</text:p>
          </table:table-cell>
          <table:table-cell office:value-type="float" office:value="0.09600797999999999" table:style-name="c9">
            <text:p>0.096008</text:p>
          </table:table-cell>
          <table:table-cell office:value-type="string" table:style-name="c9">
            <text:p>2026-03-15 09:30</text:p>
          </table:table-cell>
          <table:table-cell office:value-type="float" office:value="0.09613191" table:style-name="c9">
            <text:p>0.096132</text:p>
          </table:table-cell>
          <table:table-cell office:value-type="float" office:value="-0.0710750169829577" table:style-name="c10">
            <text:p>-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0:15</text:p>
          </table:table-cell>
          <table:table-cell office:value-type="float" office:value="0.09690842999999999" table:style-name="c9">
            <text:p>0.096908</text:p>
          </table:table-cell>
          <table:table-cell office:value-type="string" table:style-name="c9">
            <text:p>2026-03-15 10:45</text:p>
          </table:table-cell>
          <table:table-cell office:value-type="float" office:value="0.09680157500000001" table:style-name="c9">
            <text:p>0.096802</text:p>
          </table:table-cell>
          <table:table-cell office:value-type="float" office:value="-0.30994346768901115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3:00</text:p>
          </table:table-cell>
          <table:table-cell office:value-type="float" office:value="0.096618285" table:style-name="c9">
            <text:p>0.096618</text:p>
          </table:table-cell>
          <table:table-cell office:value-type="string" table:style-name="c9">
            <text:p>2026-03-15 23:30</text:p>
          </table:table-cell>
          <table:table-cell office:value-type="float" office:value="0.095722115" table:style-name="c9">
            <text:p>0.095722</text:p>
          </table:table-cell>
          <table:table-cell office:value-type="float" office:value="-1.1255825001292408" table:style-name="c10">
            <text:p>-1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0.097178565" table:style-name="c9">
            <text:p>0.097179</text:p>
          </table:table-cell>
          <table:table-cell office:value-type="string" table:style-name="c9">
            <text:p>2026-03-16 04:15</text:p>
          </table:table-cell>
          <table:table-cell office:value-type="float" office:value="0.09716139500000001" table:style-name="c9">
            <text:p>0.097161</text:p>
          </table:table-cell>
          <table:table-cell office:value-type="float" office:value="-0.2175331860528984" table:style-name="c10">
            <text:p>-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5:00</text:p>
          </table:table-cell>
          <table:table-cell office:value-type="float" office:value="0.09795895499999999" table:style-name="c9">
            <text:p>0.097959</text:p>
          </table:table-cell>
          <table:table-cell office:value-type="string" table:style-name="c9">
            <text:p>2026-03-16 05:30</text:p>
          </table:table-cell>
          <table:table-cell office:value-type="float" office:value="0.098080935" table:style-name="c9">
            <text:p>0.098081</text:p>
          </table:table-cell>
          <table:table-cell office:value-type="float" office:value="-0.07562737787984997" table:style-name="c10">
            <text:p>-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5:15</text:p>
          </table:table-cell>
          <table:table-cell office:value-type="float" office:value="0.099239595" table:style-name="c9">
            <text:p>0.09924</text:p>
          </table:table-cell>
          <table:table-cell office:value-type="string" table:style-name="c9">
            <text:p>2026-03-16 15:45</text:p>
          </table:table-cell>
          <table:table-cell office:value-type="float" office:value="0.098560695" table:style-name="c9">
            <text:p>0.098561</text:p>
          </table:table-cell>
          <table:table-cell office:value-type="float" office:value="-0.8826344256090524" table:style-name="c10">
            <text:p>-0.9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05:15</text:p>
          </table:table-cell>
          <table:table-cell office:value-type="float" office:value="0.10067031" table:style-name="c9">
            <text:p>0.10067</text:p>
          </table:table-cell>
          <table:table-cell office:value-type="string" table:style-name="c9">
            <text:p>2026-03-18 05:45</text:p>
          </table:table-cell>
          <table:table-cell office:value-type="float" office:value="0.09987004000000001" table:style-name="c9">
            <text:p>0.09987</text:p>
          </table:table-cell>
          <table:table-cell office:value-type="float" office:value="-0.9932523401984028" table:style-name="c10">
            <text:p>-1.0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20:30</text:p>
          </table:table-cell>
          <table:table-cell office:value-type="float" office:value="0.093396675" table:style-name="c9">
            <text:p>0.093397</text:p>
          </table:table-cell>
          <table:table-cell office:value-type="string" table:style-name="c9">
            <text:p>2026-03-23 21:00</text:p>
          </table:table-cell>
          <table:table-cell office:value-type="float" office:value="0.09336329500000001" table:style-name="c9">
            <text:p>0.093363</text:p>
          </table:table-cell>
          <table:table-cell office:value-type="float" office:value="-0.23556858603904773" table:style-name="c10">
            <text:p>-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0:30</text:p>
          </table:table-cell>
          <table:table-cell office:value-type="float" office:value="0.093716835" table:style-name="c9">
            <text:p>0.093717</text:p>
          </table:table-cell>
          <table:table-cell office:value-type="string" table:style-name="c9">
            <text:p>2026-03-24 21:00</text:p>
          </table:table-cell>
          <table:table-cell office:value-type="float" office:value="0.09373311000000001" table:style-name="c9">
            <text:p>0.093733</text:p>
          </table:table-cell>
          <table:table-cell office:value-type="float" office:value="-0.1825685714738401" table:style-name="c10">
            <text:p>-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0:45</text:p>
          </table:table-cell>
          <table:table-cell office:value-type="float" office:value="0.09470732999999999" table:style-name="c9">
            <text:p>0.094707</text:p>
          </table:table-cell>
          <table:table-cell office:value-type="string" table:style-name="c9">
            <text:p>2026-03-25 01:15</text:p>
          </table:table-cell>
          <table:table-cell office:value-type="float" office:value="0.094542705" table:style-name="c9">
            <text:p>0.094543</text:p>
          </table:table-cell>
          <table:table-cell office:value-type="float" office:value="-0.37337750657207014" table:style-name="c10">
            <text:p>-0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6:45</text:p>
          </table:table-cell>
          <table:table-cell office:value-type="float" office:value="0.09538767" table:style-name="c9">
            <text:p>0.095388</text:p>
          </table:table-cell>
          <table:table-cell office:value-type="string" table:style-name="c9">
            <text:p>2026-03-25 07:15</text:p>
          </table:table-cell>
          <table:table-cell office:value-type="float" office:value="0.09515240000000001" table:style-name="c9">
            <text:p>0.095152</text:p>
          </table:table-cell>
          <table:table-cell office:value-type="float" office:value="-0.44605308799342547" table:style-name="c10">
            <text:p>-0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7:45</text:p>
          </table:table-cell>
          <table:table-cell office:value-type="float" office:value="0.09545770499999999" table:style-name="c9">
            <text:p>0.095458</text:p>
          </table:table-cell>
          <table:table-cell office:value-type="string" table:style-name="c9">
            <text:p>2026-03-25 08:15</text:p>
          </table:table-cell>
          <table:table-cell office:value-type="float" office:value="0.09513241" table:style-name="c9">
            <text:p>0.095132</text:p>
          </table:table-cell>
          <table:table-cell office:value-type="float" office:value="-0.5399927513341951" table:style-name="c10">
            <text:p>-0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12:45</text:p>
          </table:table-cell>
          <table:table-cell office:value-type="float" office:value="0.09100548" table:style-name="c9">
            <text:p>0.091005</text:p>
          </table:table-cell>
          <table:table-cell office:value-type="string" table:style-name="c9">
            <text:p>2026-04-01 13:15</text:p>
          </table:table-cell>
          <table:table-cell office:value-type="float" office:value="0.090464745" table:style-name="c9">
            <text:p>0.090465</text:p>
          </table:table-cell>
          <table:table-cell office:value-type="float" office:value="-0.7928907415850173" table:style-name="c10">
            <text:p>-0.8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2:15</text:p>
          </table:table-cell>
          <table:table-cell office:value-type="float" office:value="0.08902449" table:style-name="c9">
            <text:p>0.089024</text:p>
          </table:table-cell>
          <table:table-cell office:value-type="string" table:style-name="c9">
            <text:p>2026-04-06 02:45</text:p>
          </table:table-cell>
          <table:table-cell office:value-type="float" office:value="0.0889555" table:style-name="c9">
            <text:p>0.088956</text:p>
          </table:table-cell>
          <table:table-cell office:value-type="float" office:value="-0.27724061603722205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10:00</text:p>
          </table:table-cell>
          <table:table-cell office:value-type="float" office:value="0.08962479" table:style-name="c9">
            <text:p>0.089625</text:p>
          </table:table-cell>
          <table:table-cell office:value-type="string" table:style-name="c9">
            <text:p>2026-04-06 10:30</text:p>
          </table:table-cell>
          <table:table-cell office:value-type="float" office:value="0.08995500000000001" table:style-name="c9">
            <text:p>0.089955</text:p>
          </table:table-cell>
          <table:table-cell office:value-type="float" office:value="0.16779950614111971" table:style-name="c11">
            <text:p>+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04:00</text:p>
          </table:table-cell>
          <table:table-cell office:value-type="float" office:value="0.089754855" table:style-name="c9">
            <text:p>0.089755</text:p>
          </table:table-cell>
          <table:table-cell office:value-type="string" table:style-name="c9">
            <text:p>2026-04-09 04:30</text:p>
          </table:table-cell>
          <table:table-cell office:value-type="float" office:value="0.089305325" table:style-name="c9">
            <text:p>0.089305</text:p>
          </table:table-cell>
          <table:table-cell office:value-type="float" office:value="-0.699740804745308" table:style-name="c10">
            <text:p>-0.7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9:15</text:p>
          </table:table-cell>
          <table:table-cell office:value-type="float" office:value="0.09032514" table:style-name="c9">
            <text:p>0.090325</text:p>
          </table:table-cell>
          <table:table-cell office:value-type="string" table:style-name="c9">
            <text:p>2026-04-10 19:45</text:p>
          </table:table-cell>
          <table:table-cell office:value-type="float" office:value="0.09007494" table:style-name="c9">
            <text:p>0.090075</text:p>
          </table:table-cell>
          <table:table-cell office:value-type="float" office:value="-0.4763455722958221" table:style-name="c10">
            <text:p>-0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14:00</text:p>
          </table:table-cell>
          <table:table-cell office:value-type="float" office:value="0.087573765" table:style-name="c9">
            <text:p>0.087574</text:p>
          </table:table-cell>
          <table:table-cell office:value-type="string" table:style-name="c9">
            <text:p>2026-04-14 14:30</text:p>
          </table:table-cell>
          <table:table-cell office:value-type="float" office:value="0.08747624000000001" table:style-name="c9">
            <text:p>0.087476</text:p>
          </table:table-cell>
          <table:table-cell office:value-type="float" office:value="-0.311040645289129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22:15</text:p>
          </table:table-cell>
          <table:table-cell office:value-type="float" office:value="0.08729362499999999" table:style-name="c9">
            <text:p>0.087294</text:p>
          </table:table-cell>
          <table:table-cell office:value-type="string" table:style-name="c9">
            <text:p>2026-04-15 22:45</text:p>
          </table:table-cell>
          <table:table-cell office:value-type="float" office:value="0.08694650500000001" table:style-name="c9">
            <text:p>0.086947</text:p>
          </table:table-cell>
          <table:table-cell office:value-type="float" office:value="-0.5967515537302792" table:style-name="c10">
            <text:p>-0.6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45</text:p>
          </table:table-cell>
          <table:table-cell office:value-type="float" office:value="0.08754374999999999" table:style-name="c9">
            <text:p>0.087544</text:p>
          </table:table-cell>
          <table:table-cell office:value-type="string" table:style-name="c9">
            <text:p>2026-04-16 03:15</text:p>
          </table:table-cell>
          <table:table-cell office:value-type="float" office:value="0.087446255" table:style-name="c9">
            <text:p>0.087446</text:p>
          </table:table-cell>
          <table:table-cell office:value-type="float" office:value="-0.311044550576145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7:30</text:p>
          </table:table-cell>
          <table:table-cell office:value-type="float" office:value="0.08822408999999999" table:style-name="c9">
            <text:p>0.088224</text:p>
          </table:table-cell>
          <table:table-cell office:value-type="string" table:style-name="c9">
            <text:p>2026-04-16 08:00</text:p>
          </table:table-cell>
          <table:table-cell office:value-type="float" office:value="0.08806594499999999" table:style-name="c9">
            <text:p>0.088066</text:p>
          </table:table-cell>
          <table:table-cell office:value-type="float" office:value="-0.3787954333731358" table:style-name="c10">
            <text:p>-0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15</text:p>
          </table:table-cell>
          <table:table-cell office:value-type="float" office:value="0.08906451" table:style-name="c9">
            <text:p>0.089065</text:p>
          </table:table-cell>
          <table:table-cell office:value-type="string" table:style-name="c9">
            <text:p>2026-04-16 13:45</text:p>
          </table:table-cell>
          <table:table-cell office:value-type="float" office:value="0.08905545000000001" table:style-name="c9">
            <text:p>0.089055</text:p>
          </table:table-cell>
          <table:table-cell office:value-type="float" office:value="-0.21005206737226834" table:style-name="c10">
            <text:p>-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20:15</text:p>
          </table:table-cell>
          <table:table-cell office:value-type="float" office:value="0.09120558" table:style-name="c9">
            <text:p>0.091206</text:p>
          </table:table-cell>
          <table:table-cell office:value-type="string" table:style-name="c9">
            <text:p>2026-04-16 20:45</text:p>
          </table:table-cell>
          <table:table-cell office:value-type="float" office:value="0.09041477" table:style-name="c9">
            <text:p>0.090415</text:p>
          </table:table-cell>
          <table:table-cell office:value-type="float" office:value="-1.0652299182023706" table:style-name="c10">
            <text:p>-1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21:15</text:p>
          </table:table-cell>
          <table:table-cell office:value-type="float" office:value="0.09096546" table:style-name="c9">
            <text:p>0.090965</text:p>
          </table:table-cell>
          <table:table-cell office:value-type="string" table:style-name="c9">
            <text:p>2026-04-16 21:45</text:p>
          </table:table-cell>
          <table:table-cell office:value-type="float" office:value="0.09031482" table:style-name="c9">
            <text:p>0.090315</text:p>
          </table:table-cell>
          <table:table-cell office:value-type="float" office:value="-0.9137306898464481" table:style-name="c10">
            <text:p>-0.9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6:45</text:p>
          </table:table-cell>
          <table:table-cell office:value-type="float" office:value="0.08946470999999999" table:style-name="c9">
            <text:p>0.089465</text:p>
          </table:table-cell>
          <table:table-cell office:value-type="string" table:style-name="c9">
            <text:p>2026-04-17 07:15</text:p>
          </table:table-cell>
          <table:table-cell office:value-type="float" office:value="0.08981507" table:style-name="c9">
            <text:p>0.089815</text:p>
          </table:table-cell>
          <table:table-cell office:value-type="float" office:value="0.19093525823759006" table:style-name="c11">
            <text:p>+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7:30</text:p>
          </table:table-cell>
          <table:table-cell office:value-type="float" office:value="0.09000498" table:style-name="c9">
            <text:p>0.090005</text:p>
          </table:table-cell>
          <table:table-cell office:value-type="string" table:style-name="c9">
            <text:p>2026-04-17 08:00</text:p>
          </table:table-cell>
          <table:table-cell office:value-type="float" office:value="0.09105445000000001" table:style-name="c9">
            <text:p>0.091054</text:p>
          </table:table-cell>
          <table:table-cell office:value-type="float" office:value="0.9637823978739801" table:style-name="c11">
            <text:p>+1.0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2:30</text:p>
          </table:table-cell>
          <table:table-cell office:value-type="float" office:value="0.091715835" table:style-name="c9">
            <text:p>0.091716</text:p>
          </table:table-cell>
          <table:table-cell office:value-type="string" table:style-name="c9">
            <text:p>2026-04-17 13:00</text:p>
          </table:table-cell>
          <table:table-cell office:value-type="float" office:value="0.09215390000000001" table:style-name="c9">
            <text:p>0.092154</text:p>
          </table:table-cell>
          <table:table-cell office:value-type="float" office:value="0.2767781091455035" table:style-name="c11">
            <text:p>+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15</text:p>
          </table:table-cell>
          <table:table-cell office:value-type="float" office:value="0.09312654" table:style-name="c9">
            <text:p>0.093127</text:p>
          </table:table-cell>
          <table:table-cell office:value-type="string" table:style-name="c9">
            <text:p>2026-04-17 13:45</text:p>
          </table:table-cell>
          <table:table-cell office:value-type="float" office:value="0.09319338" table:style-name="c9">
            <text:p>0.093193</text:p>
          </table:table-cell>
          <table:table-cell office:value-type="float" office:value="-0.1282701651108109" table:style-name="c10">
            <text:p>-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8 14:00</text:p>
          </table:table-cell>
          <table:table-cell office:value-type="float" office:value="0.08939467499999999" table:style-name="c9">
            <text:p>0.089395</text:p>
          </table:table-cell>
          <table:table-cell office:value-type="string" table:style-name="c9">
            <text:p>2026-04-18 14:30</text:p>
          </table:table-cell>
          <table:table-cell office:value-type="float" office:value="0.08929533" table:style-name="c9">
            <text:p>0.089295</text:p>
          </table:table-cell>
          <table:table-cell office:value-type="float" office:value="-0.3108086300106616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8 14:45</text:p>
          </table:table-cell>
          <table:table-cell office:value-type="float" office:value="0.08944469999999999" table:style-name="c9">
            <text:p>0.089445</text:p>
          </table:table-cell>
          <table:table-cell office:value-type="string" table:style-name="c9">
            <text:p>2026-04-18 15:15</text:p>
          </table:table-cell>
          <table:table-cell office:value-type="float" office:value="0.08933531" table:style-name="c9">
            <text:p>0.089335</text:p>
          </table:table-cell>
          <table:table-cell office:value-type="float" office:value="-0.3219545536962909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8:00</text:p>
          </table:table-cell>
          <table:table-cell office:value-type="float" office:value="0.090595275" table:style-name="c9">
            <text:p>0.090595</text:p>
          </table:table-cell>
          <table:table-cell office:value-type="string" table:style-name="c9">
            <text:p>2026-04-21 08:30</text:p>
          </table:table-cell>
          <table:table-cell office:value-type="float" office:value="0.09071462" table:style-name="c9">
            <text:p>0.090715</text:p>
          </table:table-cell>
          <table:table-cell office:value-type="float" office:value="-0.06842909343783843" table:style-name="c10">
            <text:p>-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1:00</text:p>
          </table:table-cell>
          <table:table-cell office:value-type="float" office:value="0.091395675" table:style-name="c9">
            <text:p>0.091396</text:p>
          </table:table-cell>
          <table:table-cell office:value-type="string" table:style-name="c9">
            <text:p>2026-04-21 11:30</text:p>
          </table:table-cell>
          <table:table-cell office:value-type="float" office:value="0.09081457" table:style-name="c9">
            <text:p>0.090815</text:p>
          </table:table-cell>
          <table:table-cell office:value-type="float" office:value="-0.8344413731065425" table:style-name="c10">
            <text:p>-0.8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5:30</text:p>
          </table:table-cell>
          <table:table-cell office:value-type="float" office:value="0.09192594" table:style-name="c9">
            <text:p>0.091926</text:p>
          </table:table-cell>
          <table:table-cell office:value-type="string" table:style-name="c9">
            <text:p>2026-04-22 16:00</text:p>
          </table:table-cell>
          <table:table-cell office:value-type="float" office:value="0.092643655" table:style-name="c9">
            <text:p>0.092644</text:p>
          </table:table-cell>
          <table:table-cell office:value-type="float" office:value="0.5792927803131676" table:style-name="c11">
            <text:p>+0.6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6:15</text:p>
          </table:table-cell>
          <table:table-cell office:value-type="float" office:value="0.09280638" table:style-name="c9">
            <text:p>0.092806</text:p>
          </table:table-cell>
          <table:table-cell office:value-type="string" table:style-name="c9">
            <text:p>2026-04-22 16:45</text:p>
          </table:table-cell>
          <table:table-cell office:value-type="float" office:value="0.09227384000000001" table:style-name="c9">
            <text:p>0.092274</text:p>
          </table:table-cell>
          <table:table-cell office:value-type="float" office:value="-0.7725712458130363" table:style-name="c10">
            <text:p>-0.8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2:00</text:p>
          </table:table-cell>
          <table:table-cell office:value-type="float" office:value="0.090695325" table:style-name="c9">
            <text:p>0.090695</text:p>
          </table:table-cell>
          <table:table-cell office:value-type="string" table:style-name="c9">
            <text:p>2026-04-23 12:30</text:p>
          </table:table-cell>
          <table:table-cell office:value-type="float" office:value="0.09087454" table:style-name="c9">
            <text:p>0.090875</text:p>
          </table:table-cell>
          <table:table-cell office:value-type="float" office:value="-0.0026938604167137115" table:style-name="c10">
            <text:p>-0.0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21:45</text:p>
          </table:table-cell>
          <table:table-cell office:value-type="float" office:value="0.090895425" table:style-name="c9">
            <text:p>0.090895</text:p>
          </table:table-cell>
          <table:table-cell office:value-type="string" table:style-name="c9">
            <text:p>2026-04-23 22:15</text:p>
          </table:table-cell>
          <table:table-cell office:value-type="float" office:value="0.09085455" table:style-name="c9">
            <text:p>0.090855</text:p>
          </table:table-cell>
          <table:table-cell office:value-type="float" office:value="-0.2447793664532627" table:style-name="c10">
            <text:p>-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00:15</text:p>
          </table:table-cell>
          <table:table-cell office:value-type="float" office:value="0.091075515" table:style-name="c9">
            <text:p>0.091076</text:p>
          </table:table-cell>
          <table:table-cell office:value-type="string" table:style-name="c9">
            <text:p>2026-04-24 00:45</text:p>
          </table:table-cell>
          <table:table-cell office:value-type="float" office:value="0.090804575" table:style-name="c9">
            <text:p>0.090805</text:p>
          </table:table-cell>
          <table:table-cell office:value-type="float" office:value="-0.4967947152700547" table:style-name="c10">
            <text:p>-0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11:30</text:p>
          </table:table-cell>
          <table:table-cell office:value-type="float" office:value="0.09151573499999999" table:style-name="c9">
            <text:p>0.091516</text:p>
          </table:table-cell>
          <table:table-cell office:value-type="string" table:style-name="c9">
            <text:p>2026-04-24 12:00</text:p>
          </table:table-cell>
          <table:table-cell office:value-type="float" office:value="0.09126434500000001" table:style-name="c9">
            <text:p>0.091264</text:p>
          </table:table-cell>
          <table:table-cell office:value-type="float" office:value="-0.4740468135397302" table:style-name="c10">
            <text:p>-0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05:00</text:p>
          </table:table-cell>
          <table:table-cell office:value-type="float" office:value="0.09174585" table:style-name="c9">
            <text:p>0.091746</text:p>
          </table:table-cell>
          <table:table-cell office:value-type="string" table:style-name="c9">
            <text:p>2026-04-26 05:30</text:p>
          </table:table-cell>
          <table:table-cell office:value-type="float" office:value="0.09193401000000001" table:style-name="c9">
            <text:p>0.091934</text:p>
          </table:table-cell>
          <table:table-cell office:value-type="float" office:value="0.0047783240440857355" table:style-name="c11">
            <text:p>+0.0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15</text:p>
          </table:table-cell>
          <table:table-cell office:value-type="float" office:value="0.08861428499999999" table:style-name="c9">
            <text:p>0.088614</text:p>
          </table:table-cell>
          <table:table-cell office:value-type="string" table:style-name="c9">
            <text:p>2026-05-04 15:45</text:p>
          </table:table-cell>
          <table:table-cell office:value-type="float" office:value="0.08803596000000001" table:style-name="c9">
            <text:p>0.088036</text:p>
          </table:table-cell>
          <table:table-cell office:value-type="float" office:value="-0.8512271853685527" table:style-name="c10">
            <text:p>-0.9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2:45</text:p>
          </table:table-cell>
          <table:table-cell office:value-type="float" office:value="0.08994495" table:style-name="c9">
            <text:p>0.089945</text:p>
          </table:table-cell>
          <table:table-cell office:value-type="string" table:style-name="c9">
            <text:p>2026-05-05 13:15</text:p>
          </table:table-cell>
          <table:table-cell office:value-type="float" office:value="0.090744605" table:style-name="c9">
            <text:p>0.090745</text:p>
          </table:table-cell>
          <table:table-cell office:value-type="float" office:value="0.6873721477470562" table:style-name="c11">
            <text:p>+0.7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3:30</text:p>
          </table:table-cell>
          <table:table-cell office:value-type="float" office:value="0.090755355" table:style-name="c9">
            <text:p>0.090755</text:p>
          </table:table-cell>
          <table:table-cell office:value-type="string" table:style-name="c9">
            <text:p>2026-05-05 14:00</text:p>
          </table:table-cell>
          <table:table-cell office:value-type="float" office:value="0.09061467000000001" table:style-name="c9">
            <text:p>0.090615</text:p>
          </table:table-cell>
          <table:table-cell office:value-type="float" office:value="-0.35460576990743453" table:style-name="c10">
            <text:p>-0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0:15</text:p>
          </table:table-cell>
          <table:table-cell office:value-type="float" office:value="0.09072533999999999" table:style-name="c9">
            <text:p>0.090725</text:p>
          </table:table-cell>
          <table:table-cell office:value-type="string" table:style-name="c9">
            <text:p>2026-05-05 20:45</text:p>
          </table:table-cell>
          <table:table-cell office:value-type="float" office:value="0.090564695" table:style-name="c9">
            <text:p>0.090565</text:p>
          </table:table-cell>
          <table:table-cell office:value-type="float" office:value="-0.3766134415202904" table:style-name="c10">
            <text:p>-0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4:00</text:p>
          </table:table-cell>
          <table:table-cell office:value-type="float" office:value="0.09136565999999999" table:style-name="c9">
            <text:p>0.091366</text:p>
          </table:table-cell>
          <table:table-cell office:value-type="string" table:style-name="c9">
            <text:p>2026-05-06 04:30</text:p>
          </table:table-cell>
          <table:table-cell office:value-type="float" office:value="0.09093451000000001" table:style-name="c9">
            <text:p>0.090935</text:p>
          </table:table-cell>
          <table:table-cell office:value-type="float" office:value="-0.6708517023682359" table:style-name="c10">
            <text:p>-0.7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00</text:p>
          </table:table-cell>
          <table:table-cell office:value-type="float" office:value="0.092456205" table:style-name="c9">
            <text:p>0.092456</text:p>
          </table:table-cell>
          <table:table-cell office:value-type="string" table:style-name="c9">
            <text:p>2026-05-06 09:30</text:p>
          </table:table-cell>
          <table:table-cell office:value-type="float" office:value="0.09213391" table:style-name="c9">
            <text:p>0.092134</text:p>
          </table:table-cell>
          <table:table-cell office:value-type="float" office:value="-0.5477952356902405" table:style-name="c10">
            <text:p>-0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1:30</text:p>
          </table:table-cell>
          <table:table-cell office:value-type="float" office:value="0.09274635" table:style-name="c9">
            <text:p>0.092746</text:p>
          </table:table-cell>
          <table:table-cell office:value-type="string" table:style-name="c9">
            <text:p>2026-05-06 12:00</text:p>
          </table:table-cell>
          <table:table-cell office:value-type="float" office:value="0.09294350500000001" table:style-name="c9">
            <text:p>0.092944</text:p>
          </table:table-cell>
          <table:table-cell office:value-type="float" office:value="0.012249466965541522" table:style-name="c11">
            <text:p>+0.0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6:45</text:p>
          </table:table-cell>
          <table:table-cell office:value-type="float" office:value="0.09090543" table:style-name="c9">
            <text:p>0.090905</text:p>
          </table:table-cell>
          <table:table-cell office:value-type="string" table:style-name="c9">
            <text:p>2026-05-07 07:15</text:p>
          </table:table-cell>
          <table:table-cell office:value-type="float" office:value="0.09103446" table:style-name="c9">
            <text:p>0.091034</text:p>
          </table:table-cell>
          <table:table-cell office:value-type="float" office:value="-0.05824501962093942" table:style-name="c10">
            <text:p>-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1:00</text:p>
          </table:table-cell>
          <table:table-cell office:value-type="float" office:value="0.09104549999999999" table:style-name="c9">
            <text:p>0.091045</text:p>
          </table:table-cell>
          <table:table-cell office:value-type="string" table:style-name="c9">
            <text:p>2026-05-08 11:30</text:p>
          </table:table-cell>
          <table:table-cell office:value-type="float" office:value="0.09095450000000001" table:style-name="c9">
            <text:p>0.090955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4:30</text:p>
          </table:table-cell>
          <table:table-cell office:value-type="float" office:value="0.091455705" table:style-name="c9">
            <text:p>0.091456</text:p>
          </table:table-cell>
          <table:table-cell office:value-type="string" table:style-name="c9">
            <text:p>2026-05-08 15:00</text:p>
          </table:table-cell>
          <table:table-cell office:value-type="float" office:value="0.09172411500000001" table:style-name="c9">
            <text:p>0.091724</text:p>
          </table:table-cell>
          <table:table-cell office:value-type="float" office:value="0.09299965935971599" table:style-name="c11">
            <text:p>+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6:00</text:p>
          </table:table-cell>
          <table:table-cell office:value-type="float" office:value="0.09230612999999999" table:style-name="c9">
            <text:p>0.092306</text:p>
          </table:table-cell>
          <table:table-cell office:value-type="string" table:style-name="c9">
            <text:p>2026-05-08 16:30</text:p>
          </table:table-cell>
          <table:table-cell office:value-type="float" office:value="0.09169413000000001" table:style-name="c9">
            <text:p>0.091694</text:p>
          </table:table-cell>
          <table:table-cell office:value-type="float" office:value="-0.8615858620331873" table:style-name="c10">
            <text:p>-0.9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00</text:p>
          </table:table-cell>
          <table:table-cell office:value-type="float" office:value="0.093636795" table:style-name="c9">
            <text:p>0.093637</text:p>
          </table:table-cell>
          <table:table-cell office:value-type="string" table:style-name="c9">
            <text:p>2026-05-09 01:30</text:p>
          </table:table-cell>
          <table:table-cell office:value-type="float" office:value="0.094442755" table:style-name="c9">
            <text:p>0.094443</text:p>
          </table:table-cell>
          <table:table-cell office:value-type="float" office:value="0.6591094160740996" table:style-name="c11">
            <text:p>+0.7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45</text:p>
          </table:table-cell>
          <table:table-cell office:value-type="float" office:value="0.094897425" table:style-name="c9">
            <text:p>0.094897</text:p>
          </table:table-cell>
          <table:table-cell office:value-type="string" table:style-name="c9">
            <text:p>2026-05-09 02:15</text:p>
          </table:table-cell>
          <table:table-cell office:value-type="float" office:value="0.09465265" table:style-name="c9">
            <text:p>0.094653</text:p>
          </table:table-cell>
          <table:table-cell office:value-type="float" office:value="-0.457320783308901" table:style-name="c10">
            <text:p>-0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18:30</text:p>
          </table:table-cell>
          <table:table-cell office:value-type="float" office:value="0.092996475" table:style-name="c9">
            <text:p>0.092996</text:p>
          </table:table-cell>
          <table:table-cell office:value-type="string" table:style-name="c9">
            <text:p>2026-05-09 19:00</text:p>
          </table:table-cell>
          <table:table-cell office:value-type="float" office:value="0.09272361500000001" table:style-name="c9">
            <text:p>0.092724</text:p>
          </table:table-cell>
          <table:table-cell office:value-type="float" office:value="-0.49272244607656557" table:style-name="c10">
            <text:p>-0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7:30</text:p>
          </table:table-cell>
          <table:table-cell office:value-type="float" office:value="0.09409702499999999" table:style-name="c9">
            <text:p>0.094097</text:p>
          </table:table-cell>
          <table:table-cell office:value-type="string" table:style-name="c9">
            <text:p>2026-05-10 08:00</text:p>
          </table:table-cell>
          <table:table-cell office:value-type="float" office:value="0.094022965" table:style-name="c9">
            <text:p>0.094023</text:p>
          </table:table-cell>
          <table:table-cell office:value-type="float" office:value="-0.2784486619369475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8:15</text:p>
          </table:table-cell>
          <table:table-cell office:value-type="float" office:value="0.0942471" table:style-name="c9">
            <text:p>0.094247</text:p>
          </table:table-cell>
          <table:table-cell office:value-type="string" table:style-name="c9">
            <text:p>2026-05-10 08:45</text:p>
          </table:table-cell>
          <table:table-cell office:value-type="float" office:value="0.09412291500000002" table:style-name="c9">
            <text:p>0.094123</text:p>
          </table:table-cell>
          <table:table-cell office:value-type="float" office:value="-0.3314019286375758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2:15</text:p>
          </table:table-cell>
          <table:table-cell office:value-type="float" office:value="0.09562778999999999" table:style-name="c9">
            <text:p>0.095628</text:p>
          </table:table-cell>
          <table:table-cell office:value-type="string" table:style-name="c9">
            <text:p>2026-05-10 12:45</text:p>
          </table:table-cell>
          <table:table-cell office:value-type="float" office:value="0.095102425" table:style-name="c9">
            <text:p>0.095102</text:p>
          </table:table-cell>
          <table:table-cell office:value-type="float" office:value="-0.7481870568952553" table:style-name="c10">
            <text:p>-0.7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15</text:p>
          </table:table-cell>
          <table:table-cell office:value-type="float" office:value="0.09636816" table:style-name="c9">
            <text:p>0.096368</text:p>
          </table:table-cell>
          <table:table-cell office:value-type="string" table:style-name="c9">
            <text:p>2026-05-10 16:45</text:p>
          </table:table-cell>
          <table:table-cell office:value-type="float" office:value="0.0971514" table:style-name="c9">
            <text:p>0.097151</text:p>
          </table:table-cell>
          <table:table-cell office:value-type="float" office:value="0.6112333694033412" table:style-name="c11">
            <text:p>+0.6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07:00</text:p>
          </table:table-cell>
          <table:table-cell office:value-type="float" office:value="0.096338145" table:style-name="c9">
            <text:p>0.096338</text:p>
          </table:table-cell>
          <table:table-cell office:value-type="string" table:style-name="c9">
            <text:p>2026-05-11 07:30</text:p>
          </table:table-cell>
          <table:table-cell office:value-type="float" office:value="0.09584205500000001" table:style-name="c9">
            <text:p>0.095842</text:p>
          </table:table-cell>
          <table:table-cell office:value-type="float" office:value="-0.7138172194876669" table:style-name="c10">
            <text:p>-0.7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06:15</text:p>
          </table:table-cell>
          <table:table-cell office:value-type="float" office:value="0.096278115" table:style-name="c9">
            <text:p>0.096278</text:p>
          </table:table-cell>
          <table:table-cell office:value-type="string" table:style-name="c9">
            <text:p>2026-05-12 06:45</text:p>
          </table:table-cell>
          <table:table-cell office:value-type="float" office:value="0.096181885" table:style-name="c9">
            <text:p>0.096182</text:p>
          </table:table-cell>
          <table:table-cell office:value-type="float" office:value="-0.299650224887571" table:style-name="c10">
            <text:p>-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4 18:30</text:p>
          </table:table-cell>
          <table:table-cell office:value-type="float" office:value="0.09750873" table:style-name="c9">
            <text:p>0.097509</text:p>
          </table:table-cell>
          <table:table-cell office:value-type="string" table:style-name="c9">
            <text:p>2026-05-14 19:00</text:p>
          </table:table-cell>
          <table:table-cell office:value-type="float" office:value="0.09801097" table:style-name="c9">
            <text:p>0.098011</text:p>
          </table:table-cell>
          <table:table-cell office:value-type="float" office:value="0.3141422013905881" table:style-name="c11">
            <text:p>+0.3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7:30</text:p>
          </table:table-cell>
          <table:table-cell office:value-type="float" office:value="0.090075015" table:style-name="c9">
            <text:p>0.090075</text:p>
          </table:table-cell>
          <table:table-cell office:value-type="string" table:style-name="c9">
            <text:p>2026-05-22 18:00</text:p>
          </table:table-cell>
          <table:table-cell office:value-type="float" office:value="0.08953521000000002" table:style-name="c9">
            <text:p>0.089535</text:p>
          </table:table-cell>
          <table:table-cell office:value-type="float" office:value="-0.7979858618840874" table:style-name="c10">
            <text:p>-0.8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8 22:15</text:p>
          </table:table-cell>
          <table:table-cell office:value-type="float" office:value="0.09120558" table:style-name="c9">
            <text:p>0.091206</text:p>
          </table:table-cell>
          <table:table-cell office:value-type="string" table:style-name="c9">
            <text:p>2026-05-28 22:45</text:p>
          </table:table-cell>
          <table:table-cell office:value-type="float" office:value="0.0907546" table:style-name="c9">
            <text:p>0.090755</text:p>
          </table:table-cell>
          <table:table-cell office:value-type="float" office:value="-0.6933769243065879" table:style-name="c10">
            <text:p>-0.7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8 23:00</text:p>
          </table:table-cell>
          <table:table-cell office:value-type="float" office:value="0.091795875" table:style-name="c9">
            <text:p>0.091796</text:p>
          </table:table-cell>
          <table:table-cell office:value-type="string" table:style-name="c9">
            <text:p>2026-05-28 23:30</text:p>
          </table:table-cell>
          <table:table-cell office:value-type="float" office:value="0.09195400000000001" table:style-name="c9">
            <text:p>0.091954</text:p>
          </table:table-cell>
          <table:table-cell office:value-type="float" office:value="-0.02798714648124534" table:style-name="c10">
            <text:p>-0.0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9 00:15</text:p>
          </table:table-cell>
          <table:table-cell office:value-type="float" office:value="0.092716335" table:style-name="c9">
            <text:p>0.092716</text:p>
          </table:table-cell>
          <table:table-cell office:value-type="string" table:style-name="c9">
            <text:p>2026-05-29 00:45</text:p>
          </table:table-cell>
          <table:table-cell office:value-type="float" office:value="0.09100447500000002" table:style-name="c9">
            <text:p>0.091004</text:p>
          </table:table-cell>
          <table:table-cell office:value-type="float" office:value="-2.0425504799396865" table:style-name="c10">
            <text:p>-2.0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9 03:45</text:p>
          </table:table-cell>
          <table:table-cell office:value-type="float" office:value="0.09184590000000001" table:style-name="c9">
            <text:p>0.091846</text:p>
          </table:table-cell>
          <table:table-cell office:value-type="string" table:style-name="c9">
            <text:p>2026-05-29 04:15</text:p>
          </table:table-cell>
          <table:table-cell office:value-type="float" office:value="0.08979508000000001" table:style-name="c9">
            <text:p>0.089795</text:p>
          </table:table-cell>
          <table:table-cell office:value-type="float" office:value="-2.42832871681804" table:style-name="c10">
            <text:p>-2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9 15:15</text:p>
          </table:table-cell>
          <table:table-cell office:value-type="float" office:value="0.090955455" table:style-name="c9">
            <text:p>0.090955</text:p>
          </table:table-cell>
          <table:table-cell office:value-type="string" table:style-name="c9">
            <text:p>2026-05-29 15:45</text:p>
          </table:table-cell>
          <table:table-cell office:value-type="float" office:value="0.09153421" table:style-name="c9">
            <text:p>0.091534</text:p>
          </table:table-cell>
          <table:table-cell office:value-type="float" office:value="0.43513400511272504" table:style-name="c11">
            <text:p>+0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9 16:00</text:p>
          </table:table-cell>
          <table:table-cell office:value-type="float" office:value="0.092456205" table:style-name="c9">
            <text:p>0.092456</text:p>
          </table:table-cell>
          <table:table-cell office:value-type="string" table:style-name="c9">
            <text:p>2026-05-29 16:30</text:p>
          </table:table-cell>
          <table:table-cell office:value-type="float" office:value="0.09137429000000001" table:style-name="c9">
            <text:p>0.091374</text:p>
          </table:table-cell>
          <table:table-cell office:value-type="float" office:value="-1.3677526626904024" table:style-name="c10">
            <text:p>-1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9 23:15</text:p>
          </table:table-cell>
          <table:table-cell office:value-type="float" office:value="0.09634815" table:style-name="c9">
            <text:p>0.096348</text:p>
          </table:table-cell>
          <table:table-cell office:value-type="string" table:style-name="c9">
            <text:p>2026-05-29 23:45</text:p>
          </table:table-cell>
          <table:table-cell office:value-type="float" office:value="0.098080935" table:style-name="c9">
            <text:p>0.098081</text:p>
          </table:table-cell>
          <table:table-cell office:value-type="float" office:value="1.594967013829529" table:style-name="c11">
            <text:p>+1.6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0 00:00</text:p>
          </table:table-cell>
          <table:table-cell office:value-type="float" office:value="0.09926961" table:style-name="c9">
            <text:p>0.09927</text:p>
          </table:table-cell>
          <table:table-cell office:value-type="string" table:style-name="c9">
            <text:p>2026-05-30 00:30</text:p>
          </table:table-cell>
          <table:table-cell office:value-type="float" office:value="0.10492751000000002" table:style-name="c9">
            <text:p>0.10493</text:p>
          </table:table-cell>
          <table:table-cell office:value-type="float" office:value="5.488235430269173" table:style-name="c11">
            <text:p>+5.5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0 00:45</text:p>
          </table:table-cell>
          <table:table-cell office:value-type="float" office:value="0.10621308" table:style-name="c9">
            <text:p>0.10621</text:p>
          </table:table-cell>
          <table:table-cell office:value-type="string" table:style-name="c9">
            <text:p>2026-05-30 01:15</text:p>
          </table:table-cell>
          <table:table-cell office:value-type="float" office:value="0.108735605" table:style-name="c9">
            <text:p>0.10874</text:p>
          </table:table-cell>
          <table:table-cell office:value-type="float" office:value="2.1703188774913507" table:style-name="c11">
            <text:p>+2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5:15</text:p>
          </table:table-cell>
          <table:table-cell office:value-type="float" office:value="0.096037995" table:style-name="c9">
            <text:p>0.096038</text:p>
          </table:table-cell>
          <table:table-cell office:value-type="string" table:style-name="c9">
            <text:p>2026-05-31 05:45</text:p>
          </table:table-cell>
          <table:table-cell office:value-type="float" office:value="0.09630182500000001" table:style-name="c9">
            <text:p>0.096302</text:p>
          </table:table-cell>
          <table:table-cell office:value-type="float" office:value="0.0742650362755004" table:style-name="c11">
            <text:p>+0.1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8:45</text:p>
          </table:table-cell>
          <table:table-cell office:value-type="float" office:value="0.09795895499999999" table:style-name="c9">
            <text:p>0.097959</text:p>
          </table:table-cell>
          <table:table-cell office:value-type="string" table:style-name="c9">
            <text:p>2026-05-31 09:15</text:p>
          </table:table-cell>
          <table:table-cell office:value-type="float" office:value="0.09737129000000001" table:style-name="c9">
            <text:p>0.097371</text:p>
          </table:table-cell>
          <table:table-cell office:value-type="float" office:value="-0.7986102023137764" table:style-name="c10">
            <text:p>-0.8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11:30</text:p>
          </table:table-cell>
          <table:table-cell office:value-type="float" office:value="0.09898947" table:style-name="c9">
            <text:p>0.098989</text:p>
          </table:table-cell>
          <table:table-cell office:value-type="string" table:style-name="c9">
            <text:p>2026-05-31 12:00</text:p>
          </table:table-cell>
          <table:table-cell office:value-type="float" office:value="0.098780585" table:style-name="c9">
            <text:p>0.098781</text:p>
          </table:table-cell>
          <table:table-cell office:value-type="float" office:value="-0.41049557030156114" table:style-name="c10">
            <text:p>-0.4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20:30</text:p>
          </table:table-cell>
          <table:table-cell office:value-type="float" office:value="0.09649822499999999" table:style-name="c9">
            <text:p>0.096498</text:p>
          </table:table-cell>
          <table:table-cell office:value-type="string" table:style-name="c9">
            <text:p>2026-05-31 21:00</text:p>
          </table:table-cell>
          <table:table-cell office:value-type="float" office:value="0.096541705" table:style-name="c9">
            <text:p>0.096542</text:p>
          </table:table-cell>
          <table:table-cell office:value-type="float" office:value="-0.15493224698691632" table:style-name="c10">
            <text:p>-0.2</text:p>
          </table:table-cell>
        </table:table-row>
        <table:table-row>
          <table:table-cell office:value-type="string" table:style-name="c8">
            <text:p>HB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03:30</text:p>
          </table:table-cell>
          <table:table-cell office:value-type="float" office:value="0.09792893999999999" table:style-name="c9">
            <text:p>0.097929</text:p>
          </table:table-cell>
          <table:table-cell office:value-type="string" table:style-name="c9">
            <text:p>2026-06-01 04:00</text:p>
          </table:table-cell>
          <table:table-cell office:value-type="float" office:value="0.0963518" table:style-name="c9">
            <text:p>0.096352</text:p>
          </table:table-cell>
          <table:table-cell office:value-type="float" office:value="-1.8071749252059677" table:style-name="c10">
            <text:p>-1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30</text:p>
          </table:table-cell>
          <table:table-cell office:value-type="float" office:value="2.923461" table:style-name="c1">
            <text:p>2.9235</text:p>
          </table:table-cell>
          <table:table-cell office:value-type="string" table:style-name="c1">
            <text:p>2026-03-09 14:00</text:p>
          </table:table-cell>
          <table:table-cell office:value-type="float" office:value="2.908545" table:style-name="c1">
            <text:p>2.9085</text:p>
          </table:table-cell>
          <table:table-cell office:value-type="float" office:value="-0.7090972465512713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21:15</text:p>
          </table:table-cell>
          <table:table-cell office:value-type="float" office:value="2.955477" table:style-name="c1">
            <text:p>2.9555</text:p>
          </table:table-cell>
          <table:table-cell office:value-type="string" table:style-name="c1">
            <text:p>2026-03-09 21:45</text:p>
          </table:table-cell>
          <table:table-cell office:value-type="float" office:value="2.93853" table:style-name="c1">
            <text:p>2.9385</text:p>
          </table:table-cell>
          <table:table-cell office:value-type="float" office:value="-0.7721637309307416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2.9824904999999995" table:style-name="c1">
            <text:p>2.9825</text:p>
          </table:table-cell>
          <table:table-cell office:value-type="string" table:style-name="c1">
            <text:p>2026-03-10 09:15</text:p>
          </table:table-cell>
          <table:table-cell office:value-type="float" office:value="2.972513" table:style-name="c1">
            <text:p>2.9725</text:p>
          </table:table-cell>
          <table:table-cell office:value-type="float" office:value="-0.5337671146647183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0265125" table:style-name="c1">
            <text:p>3.0265</text:p>
          </table:table-cell>
          <table:table-cell office:value-type="string" table:style-name="c1">
            <text:p>2026-03-10 15:30</text:p>
          </table:table-cell>
          <table:table-cell office:value-type="float" office:value="2.9865060000000003" table:style-name="c1">
            <text:p>2.9865</text:p>
          </table:table-cell>
          <table:table-cell office:value-type="float" office:value="-1.5191255775087509" table:style-name="c12">
            <text:p>-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5:00</text:p>
          </table:table-cell>
          <table:table-cell office:value-type="float" office:value="2.9454719999999996" table:style-name="c1">
            <text:p>2.9455</text:p>
          </table:table-cell>
          <table:table-cell office:value-type="string" table:style-name="c1">
            <text:p>2026-03-11 05:30</text:p>
          </table:table-cell>
          <table:table-cell office:value-type="float" office:value="2.9165410000000005" table:style-name="c1">
            <text:p>2.9165</text:p>
          </table:table-cell>
          <table:table-cell office:value-type="float" office:value="-1.1801560313253412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45</text:p>
          </table:table-cell>
          <table:table-cell office:value-type="float" office:value="3.0105044999999997" table:style-name="c1">
            <text:p>3.0105</text:p>
          </table:table-cell>
          <table:table-cell office:value-type="string" table:style-name="c1">
            <text:p>2026-03-11 20:15</text:p>
          </table:table-cell>
          <table:table-cell office:value-type="float" office:value="3.002498" table:style-name="c1">
            <text:p>3.0025</text:p>
          </table:table-cell>
          <table:table-cell office:value-type="float" office:value="-0.465320463796004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3.1005495" table:style-name="c1">
            <text:p>3.1005</text:p>
          </table:table-cell>
          <table:table-cell office:value-type="string" table:style-name="c1">
            <text:p>2026-03-13 01:00</text:p>
          </table:table-cell>
          <table:table-cell office:value-type="float" office:value="3.0874555000000004" table:style-name="c1">
            <text:p>3.0875</text:p>
          </table:table-cell>
          <table:table-cell office:value-type="float" office:value="-0.6213680363593599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4:15</text:p>
          </table:table-cell>
          <table:table-cell office:value-type="float" office:value="3.1235609999999996" table:style-name="c1">
            <text:p>3.1236</text:p>
          </table:table-cell>
          <table:table-cell office:value-type="string" table:style-name="c1">
            <text:p>2026-03-13 04:45</text:p>
          </table:table-cell>
          <table:table-cell office:value-type="float" office:value="3.1034475" table:style-name="c1">
            <text:p>3.1034</text:p>
          </table:table-cell>
          <table:table-cell office:value-type="float" office:value="-0.8425413030992424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3.1405695" table:style-name="c1">
            <text:p>3.1406</text:p>
          </table:table-cell>
          <table:table-cell office:value-type="string" table:style-name="c1">
            <text:p>2026-03-13 11:00</text:p>
          </table:table-cell>
          <table:table-cell office:value-type="float" office:value="3.1334325" table:style-name="c1">
            <text:p>3.1334</text:p>
          </table:table-cell>
          <table:table-cell office:value-type="float" office:value="-0.4266975008035967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15</text:p>
          </table:table-cell>
          <table:table-cell office:value-type="float" office:value="3.1445714999999996" table:style-name="c1">
            <text:p>3.1446</text:p>
          </table:table-cell>
          <table:table-cell office:value-type="string" table:style-name="c1">
            <text:p>2026-03-13 13:45</text:p>
          </table:table-cell>
          <table:table-cell office:value-type="float" office:value="3.1634175" table:style-name="c1">
            <text:p>3.1634</text:p>
          </table:table-cell>
          <table:table-cell office:value-type="float" office:value="0.39822050214157745" table:style-name="c13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0:45</text:p>
          </table:table-cell>
          <table:table-cell office:value-type="float" office:value="3.10155" table:style-name="c1">
            <text:p>3.1016</text:p>
          </table:table-cell>
          <table:table-cell office:value-type="string" table:style-name="c1">
            <text:p>2026-03-15 21:15</text:p>
          </table:table-cell>
          <table:table-cell office:value-type="float" office:value="3.0824580000000004" table:style-name="c1">
            <text:p>3.0825</text:p>
          </table:table-cell>
          <table:table-cell office:value-type="float" office:value="-0.8142326753397433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3.1105544999999997" table:style-name="c1">
            <text:p>3.1106</text:p>
          </table:table-cell>
          <table:table-cell office:value-type="string" table:style-name="c1">
            <text:p>2026-03-15 23:15</text:p>
          </table:table-cell>
          <table:table-cell office:value-type="float" office:value="3.1154415" table:style-name="c1">
            <text:p>3.1154</text:p>
          </table:table-cell>
          <table:table-cell office:value-type="float" office:value="-0.04310381182838219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3.1345665" table:style-name="c1">
            <text:p>3.1346</text:p>
          </table:table-cell>
          <table:table-cell office:value-type="string" table:style-name="c1">
            <text:p>2026-03-16 04:00</text:p>
          </table:table-cell>
          <table:table-cell office:value-type="float" office:value="3.142428" table:style-name="c1">
            <text:p>3.1424</text:p>
          </table:table-cell>
          <table:table-cell office:value-type="float" office:value="0.05039888061078024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00</text:p>
          </table:table-cell>
          <table:table-cell office:value-type="float" office:value="3.1675829999999996" table:style-name="c1">
            <text:p>3.1676</text:p>
          </table:table-cell>
          <table:table-cell office:value-type="string" table:style-name="c1">
            <text:p>2026-03-16 05:30</text:p>
          </table:table-cell>
          <table:table-cell office:value-type="float" office:value="3.1794095" table:style-name="c1">
            <text:p>3.1794</text:p>
          </table:table-cell>
          <table:table-cell office:value-type="float" office:value="0.1727140349440104" table:style-name="c13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6:00</text:p>
          </table:table-cell>
          <table:table-cell office:value-type="float" office:value="3.2026005" table:style-name="c1">
            <text:p>3.2026</text:p>
          </table:table-cell>
          <table:table-cell office:value-type="string" table:style-name="c1">
            <text:p>2026-03-16 06:30</text:p>
          </table:table-cell>
          <table:table-cell office:value-type="float" office:value="3.1914035000000003" table:style-name="c1">
            <text:p>3.1914</text:p>
          </table:table-cell>
          <table:table-cell office:value-type="float" office:value="-0.5488232327603759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3.323661" table:style-name="c1">
            <text:p>3.3237</text:p>
          </table:table-cell>
          <table:table-cell office:value-type="string" table:style-name="c1">
            <text:p>2026-03-16 22:45</text:p>
          </table:table-cell>
          <table:table-cell office:value-type="float" office:value="3.3213385" table:style-name="c1">
            <text:p>3.3213</text:p>
          </table:table-cell>
          <table:table-cell office:value-type="float" office:value="-0.26963807865783007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3.3296639999999997" table:style-name="c1">
            <text:p>3.3297</text:p>
          </table:table-cell>
          <table:table-cell office:value-type="string" table:style-name="c1">
            <text:p>2026-03-17 00:45</text:p>
          </table:table-cell>
          <table:table-cell office:value-type="float" office:value="3.3013485" table:style-name="c1">
            <text:p>3.3013</text:p>
          </table:table-cell>
          <table:table-cell office:value-type="float" office:value="-1.0486011697126152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2:30</text:p>
          </table:table-cell>
          <table:table-cell office:value-type="float" office:value="3.249624" table:style-name="c1">
            <text:p>3.2496</text:p>
          </table:table-cell>
          <table:table-cell office:value-type="string" table:style-name="c1">
            <text:p>2026-03-17 23:00</text:p>
          </table:table-cell>
          <table:table-cell office:value-type="float" office:value="3.244377" table:style-name="c1">
            <text:p>3.2444</text:p>
          </table:table-cell>
          <table:table-cell office:value-type="float" office:value="-0.3610420658820779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3.0665324999999997" table:style-name="c1">
            <text:p>3.0665</text:p>
          </table:table-cell>
          <table:table-cell office:value-type="string" table:style-name="c1">
            <text:p>2026-03-23 20:45</text:p>
          </table:table-cell>
          <table:table-cell office:value-type="float" office:value="3.0914535" table:style-name="c1">
            <text:p>3.0915</text:p>
          </table:table-cell>
          <table:table-cell office:value-type="float" office:value="0.6111523179193501" table:style-name="c13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1:00</text:p>
          </table:table-cell>
          <table:table-cell office:value-type="float" office:value="3.0845415" table:style-name="c1">
            <text:p>3.0845</text:p>
          </table:table-cell>
          <table:table-cell office:value-type="string" table:style-name="c1">
            <text:p>2026-03-23 21:30</text:p>
          </table:table-cell>
          <table:table-cell office:value-type="float" office:value="3.084457" table:style-name="c1">
            <text:p>3.0845</text:p>
          </table:table-cell>
          <table:table-cell office:value-type="float" office:value="-0.202633990918899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3.0565275" table:style-name="c1">
            <text:p>3.0565</text:p>
          </table:table-cell>
          <table:table-cell office:value-type="string" table:style-name="c1">
            <text:p>2026-03-24 21:00</text:p>
          </table:table-cell>
          <table:table-cell office:value-type="float" office:value="3.0514735" table:style-name="c1">
            <text:p>3.0515</text:p>
          </table:table-cell>
          <table:table-cell office:value-type="float" office:value="-0.36492050297272094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0:00</text:p>
          </table:table-cell>
          <table:table-cell office:value-type="float" office:value="3.063531" table:style-name="c1">
            <text:p>3.0635</text:p>
          </table:table-cell>
          <table:table-cell office:value-type="string" table:style-name="c1">
            <text:p>2026-03-25 00:30</text:p>
          </table:table-cell>
          <table:table-cell office:value-type="float" office:value="3.0624680000000004" table:style-name="c1">
            <text:p>3.0625</text:p>
          </table:table-cell>
          <table:table-cell office:value-type="float" office:value="-0.23452916037081106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0:30</text:p>
          </table:table-cell>
          <table:table-cell office:value-type="float" office:value="3.089544" table:style-name="c1">
            <text:p>3.0895</text:p>
          </table:table-cell>
          <table:table-cell office:value-type="string" table:style-name="c1">
            <text:p>2026-03-25 11:00</text:p>
          </table:table-cell>
          <table:table-cell office:value-type="float" office:value="3.09845" table:style-name="c1">
            <text:p>3.0985</text:p>
          </table:table-cell>
          <table:table-cell office:value-type="float" office:value="0.08778636750277347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22:45</text:p>
          </table:table-cell>
          <table:table-cell office:value-type="float" office:value="3.0865424999999997" table:style-name="c1">
            <text:p>3.0865</text:p>
          </table:table-cell>
          <table:table-cell office:value-type="string" table:style-name="c1">
            <text:p>2026-03-25 23:15</text:p>
          </table:table-cell>
          <table:table-cell office:value-type="float" office:value="3.076461" table:style-name="c1">
            <text:p>3.0765</text:p>
          </table:table-cell>
          <table:table-cell office:value-type="float" office:value="-0.5258746814275073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2.939469" table:style-name="c1">
            <text:p>2.9395</text:p>
          </table:table-cell>
          <table:table-cell office:value-type="string" table:style-name="c1">
            <text:p>2026-03-30 08:30</text:p>
          </table:table-cell>
          <table:table-cell office:value-type="float" office:value="2.9325330000000003" table:style-name="c1">
            <text:p>2.9325</text:p>
          </table:table-cell>
          <table:table-cell office:value-type="float" office:value="-0.4353892987814856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2.9004494999999997" table:style-name="c1">
            <text:p>2.9004</text:p>
          </table:table-cell>
          <table:table-cell office:value-type="string" table:style-name="c1">
            <text:p>2026-03-31 02:00</text:p>
          </table:table-cell>
          <table:table-cell office:value-type="float" office:value="2.8995495" table:style-name="c1">
            <text:p>2.8995</text:p>
          </table:table-cell>
          <table:table-cell office:value-type="float" office:value="-0.2308676448426139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2.8824404999999995" table:style-name="c1">
            <text:p>2.8824</text:p>
          </table:table-cell>
          <table:table-cell office:value-type="string" table:style-name="c1">
            <text:p>2026-03-31 14:30</text:p>
          </table:table-cell>
          <table:table-cell office:value-type="float" office:value="2.8935525" table:style-name="c1">
            <text:p>2.8936</text:p>
          </table:table-cell>
          <table:table-cell office:value-type="float" office:value="0.1848360287922901" table:style-name="c13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2.96148" table:style-name="c1">
            <text:p>2.9615</text:p>
          </table:table-cell>
          <table:table-cell office:value-type="string" table:style-name="c1">
            <text:p>2026-04-01 13:15</text:p>
          </table:table-cell>
          <table:table-cell office:value-type="float" office:value="2.9375305000000003" table:style-name="c1">
            <text:p>2.9375</text:p>
          </table:table-cell>
          <table:table-cell office:value-type="float" office:value="-1.0069837874812415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2.8804395" table:style-name="c1">
            <text:p>2.8804</text:p>
          </table:table-cell>
          <table:table-cell office:value-type="string" table:style-name="c1">
            <text:p>2026-04-06 02:45</text:p>
          </table:table-cell>
          <table:table-cell office:value-type="float" office:value="2.864567" table:style-name="c1">
            <text:p>2.8646</text:p>
          </table:table-cell>
          <table:table-cell office:value-type="float" office:value="-0.7498428428370008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2.9164575" table:style-name="c1">
            <text:p>2.9165</text:p>
          </table:table-cell>
          <table:table-cell office:value-type="string" table:style-name="c1">
            <text:p>2026-04-06 10:00</text:p>
          </table:table-cell>
          <table:table-cell office:value-type="float" office:value="2.9245370000000004" table:style-name="c1">
            <text:p>2.9245</text:p>
          </table:table-cell>
          <table:table-cell office:value-type="float" office:value="0.07657751011289626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2:15</text:p>
          </table:table-cell>
          <table:table-cell office:value-type="float" office:value="2.9564775" table:style-name="c1">
            <text:p>2.9565</text:p>
          </table:table-cell>
          <table:table-cell office:value-type="string" table:style-name="c1">
            <text:p>2026-04-06 12:45</text:p>
          </table:table-cell>
          <table:table-cell office:value-type="float" office:value="2.95852" table:style-name="c1">
            <text:p>2.9585</text:p>
          </table:table-cell>
          <table:table-cell office:value-type="float" office:value="-0.13095250953204518" table:style-name="c12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7:15</text:p>
          </table:table-cell>
          <table:table-cell office:value-type="float" office:value="2.8554269999999997" table:style-name="c1">
            <text:p>2.8554</text:p>
          </table:table-cell>
          <table:table-cell office:value-type="string" table:style-name="c1">
            <text:p>2026-04-07 07:45</text:p>
          </table:table-cell>
          <table:table-cell office:value-type="float" office:value="2.874562" table:style-name="c1">
            <text:p>2.8746</text:p>
          </table:table-cell>
          <table:table-cell office:value-type="float" office:value="0.4688878602745028" table:style-name="c13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8:00</text:p>
          </table:table-cell>
          <table:table-cell office:value-type="float" office:value="2.8704345" table:style-name="c1">
            <text:p>2.8704</text:p>
          </table:table-cell>
          <table:table-cell office:value-type="string" table:style-name="c1">
            <text:p>2026-04-07 08:30</text:p>
          </table:table-cell>
          <table:table-cell office:value-type="float" office:value="2.8455765" table:style-name="c1">
            <text:p>2.8456</text:p>
          </table:table-cell>
          <table:table-cell office:value-type="float" office:value="-1.06417016042345" table:style-name="c12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2.905452" table:style-name="c1">
            <text:p>2.9055</text:p>
          </table:table-cell>
          <table:table-cell office:value-type="string" table:style-name="c1">
            <text:p>2026-04-07 21:45</text:p>
          </table:table-cell>
          <table:table-cell office:value-type="float" office:value="2.9175405000000003" table:style-name="c1">
            <text:p>2.9175</text:p>
          </table:table-cell>
          <table:table-cell office:value-type="float" office:value="0.21533092064507375" table:style-name="c13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00</text:p>
          </table:table-cell>
          <table:table-cell office:value-type="float" office:value="2.9264624999999995" table:style-name="c1">
            <text:p>2.9265</text:p>
          </table:table-cell>
          <table:table-cell office:value-type="string" table:style-name="c1">
            <text:p>2026-04-07 22:30</text:p>
          </table:table-cell>
          <table:table-cell office:value-type="float" office:value="2.9255365" table:style-name="c1">
            <text:p>2.9255</text:p>
          </table:table-cell>
          <table:table-cell office:value-type="float" office:value="-0.23147904555411714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2.959479" table:style-name="c1">
            <text:p>2.9595</text:p>
          </table:table-cell>
          <table:table-cell office:value-type="string" table:style-name="c1">
            <text:p>2026-04-07 23:15</text:p>
          </table:table-cell>
          <table:table-cell office:value-type="float" office:value="3.010494" table:style-name="c1">
            <text:p>3.0105</text:p>
          </table:table-cell>
          <table:table-cell office:value-type="float" office:value="1.520437296361954" table:style-name="c13">
            <text:p>+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30</text:p>
          </table:table-cell>
          <table:table-cell office:value-type="float" office:value="3.0425204999999997" table:style-name="c1">
            <text:p>3.0425</text:p>
          </table:table-cell>
          <table:table-cell office:value-type="string" table:style-name="c1">
            <text:p>2026-04-08 00:00</text:p>
          </table:table-cell>
          <table:table-cell office:value-type="float" office:value="3.014492" table:style-name="c1">
            <text:p>3.0145</text:p>
          </table:table-cell>
          <table:table-cell office:value-type="float" office:value="-1.119284800480369" table:style-name="c12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06:15</text:p>
          </table:table-cell>
          <table:table-cell office:value-type="float" office:value="2.9104544999999997" table:style-name="c1">
            <text:p>2.9105</text:p>
          </table:table-cell>
          <table:table-cell office:value-type="string" table:style-name="c1">
            <text:p>2026-04-09 06:45</text:p>
          </table:table-cell>
          <table:table-cell office:value-type="float" office:value="2.9075455" table:style-name="c1">
            <text:p>2.9075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9:45</text:p>
          </table:table-cell>
          <table:table-cell office:value-type="float" office:value="2.979489" table:style-name="c1">
            <text:p>2.9795</text:p>
          </table:table-cell>
          <table:table-cell office:value-type="string" table:style-name="c1">
            <text:p>2026-04-09 20:15</text:p>
          </table:table-cell>
          <table:table-cell office:value-type="float" office:value="2.9845070000000002" table:style-name="c1">
            <text:p>2.9845</text:p>
          </table:table-cell>
          <table:table-cell office:value-type="float" office:value="-0.03181852636474636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0:00</text:p>
          </table:table-cell>
          <table:table-cell office:value-type="float" office:value="3.0085034999999998" table:style-name="c1">
            <text:p>3.0085</text:p>
          </table:table-cell>
          <table:table-cell office:value-type="string" table:style-name="c1">
            <text:p>2026-04-10 10:30</text:p>
          </table:table-cell>
          <table:table-cell office:value-type="float" office:value="3.0094945" table:style-name="c1">
            <text:p>3.0095</text:p>
          </table:table-cell>
          <table:table-cell office:value-type="float" office:value="-0.16702588198749257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3.0225104999999997" table:style-name="c1">
            <text:p>3.0225</text:p>
          </table:table-cell>
          <table:table-cell office:value-type="string" table:style-name="c1">
            <text:p>2026-04-10 15:00</text:p>
          </table:table-cell>
          <table:table-cell office:value-type="float" office:value="3.0554715" table:style-name="c1">
            <text:p>3.0555</text:p>
          </table:table-cell>
          <table:table-cell office:value-type="float" office:value="0.8884373593243122" table:style-name="c13">
            <text:p>+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5:15</text:p>
          </table:table-cell>
          <table:table-cell office:value-type="float" office:value="3.0605295" table:style-name="c1">
            <text:p>3.0605</text:p>
          </table:table-cell>
          <table:table-cell office:value-type="string" table:style-name="c1">
            <text:p>2026-04-10 15:45</text:p>
          </table:table-cell>
          <table:table-cell office:value-type="float" office:value="3.034482" table:style-name="c1">
            <text:p>3.0345</text:p>
          </table:table-cell>
          <table:table-cell office:value-type="float" office:value="-1.0492769149259895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6:15</text:p>
          </table:table-cell>
          <table:table-cell office:value-type="float" office:value="3.049524" table:style-name="c1">
            <text:p>3.0495</text:p>
          </table:table-cell>
          <table:table-cell office:value-type="string" table:style-name="c1">
            <text:p>2026-04-10 16:45</text:p>
          </table:table-cell>
          <table:table-cell office:value-type="float" office:value="3.0474755" table:style-name="c1">
            <text:p>3.0475</text:p>
          </table:table-cell>
          <table:table-cell office:value-type="float" office:value="-0.2669401363786794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15</text:p>
          </table:table-cell>
          <table:table-cell office:value-type="float" office:value="3.0865424999999997" table:style-name="c1">
            <text:p>3.0865</text:p>
          </table:table-cell>
          <table:table-cell office:value-type="string" table:style-name="c1">
            <text:p>2026-04-10 19:45</text:p>
          </table:table-cell>
          <table:table-cell office:value-type="float" office:value="3.064467" table:style-name="c1">
            <text:p>3.0645</text:p>
          </table:table-cell>
          <table:table-cell office:value-type="float" office:value="-0.9136880354960186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3.0325155" table:style-name="c1">
            <text:p>3.0325</text:p>
          </table:table-cell>
          <table:table-cell office:value-type="string" table:style-name="c1">
            <text:p>2026-04-11 17:15</text:p>
          </table:table-cell>
          <table:table-cell office:value-type="float" office:value="3.020489" table:style-name="c1">
            <text:p>3.0205</text:p>
          </table:table-cell>
          <table:table-cell office:value-type="float" office:value="-0.5956921740713383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45</text:p>
          </table:table-cell>
          <table:table-cell office:value-type="float" office:value="3.0335159999999997" table:style-name="c1">
            <text:p>3.0335</text:p>
          </table:table-cell>
          <table:table-cell office:value-type="string" table:style-name="c1">
            <text:p>2026-04-11 18:15</text:p>
          </table:table-cell>
          <table:table-cell office:value-type="float" office:value="3.022488" table:style-name="c1">
            <text:p>3.0225</text:p>
          </table:table-cell>
          <table:table-cell office:value-type="float" office:value="-0.5627118337928394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3.06153" table:style-name="c1">
            <text:p>3.0615</text:p>
          </table:table-cell>
          <table:table-cell office:value-type="string" table:style-name="c1">
            <text:p>2026-04-11 19:15</text:p>
          </table:table-cell>
          <table:table-cell office:value-type="float" office:value="3.064467" table:style-name="c1">
            <text:p>3.0645</text:p>
          </table:table-cell>
          <table:table-cell office:value-type="float" office:value="-0.10415934297557383" table:style-name="c12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8:45</text:p>
          </table:table-cell>
          <table:table-cell office:value-type="float" office:value="3.025512" table:style-name="c1">
            <text:p>3.0255</text:p>
          </table:table-cell>
          <table:table-cell office:value-type="string" table:style-name="c1">
            <text:p>2026-04-15 09:15</text:p>
          </table:table-cell>
          <table:table-cell office:value-type="float" office:value="3.0154915" table:style-name="c1">
            <text:p>3.0155</text:p>
          </table:table-cell>
          <table:table-cell office:value-type="float" office:value="-0.5304380715892121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3.0535259999999997" table:style-name="c1">
            <text:p>3.0535</text:p>
          </table:table-cell>
          <table:table-cell office:value-type="string" table:style-name="c1">
            <text:p>2026-04-15 12:30</text:p>
          </table:table-cell>
          <table:table-cell office:value-type="float" office:value="3.066466" table:style-name="c1">
            <text:p>3.0665</text:p>
          </table:table-cell>
          <table:table-cell office:value-type="float" office:value="0.2230252654144893" table:style-name="c13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3.1095539999999997" table:style-name="c1">
            <text:p>3.1096</text:p>
          </table:table-cell>
          <table:table-cell office:value-type="string" table:style-name="c1">
            <text:p>2026-04-15 15:30</text:p>
          </table:table-cell>
          <table:table-cell office:value-type="float" office:value="3.07846" table:style-name="c1">
            <text:p>3.0785</text:p>
          </table:table-cell>
          <table:table-cell office:value-type="float" office:value="-1.1978515742128937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15</text:p>
          </table:table-cell>
          <table:table-cell office:value-type="float" office:value="3.1225604999999996" table:style-name="c1">
            <text:p>3.1226</text:p>
          </table:table-cell>
          <table:table-cell office:value-type="string" table:style-name="c1">
            <text:p>2026-04-15 16:45</text:p>
          </table:table-cell>
          <table:table-cell office:value-type="float" office:value="3.1374305" table:style-name="c1">
            <text:p>3.1374</text:p>
          </table:table-cell>
          <table:table-cell office:value-type="float" office:value="0.27535980265234183" table:style-name="c13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1:30</text:p>
          </table:table-cell>
          <table:table-cell office:value-type="float" office:value="3.3516749999999997" table:style-name="c1">
            <text:p>3.3517</text:p>
          </table:table-cell>
          <table:table-cell office:value-type="string" table:style-name="c1">
            <text:p>2026-04-15 22:00</text:p>
          </table:table-cell>
          <table:table-cell office:value-type="float" office:value="3.4112935" table:style-name="c1">
            <text:p>3.4113</text:p>
          </table:table-cell>
          <table:table-cell office:value-type="float" office:value="1.5753115768533776" table:style-name="c13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2:15</text:p>
          </table:table-cell>
          <table:table-cell office:value-type="float" office:value="3.3846914999999997" table:style-name="c1">
            <text:p>3.3847</text:p>
          </table:table-cell>
          <table:table-cell office:value-type="string" table:style-name="c1">
            <text:p>2026-04-15 22:45</text:p>
          </table:table-cell>
          <table:table-cell office:value-type="float" office:value="3.2853565000000002" table:style-name="c1">
            <text:p>3.2854</text:p>
          </table:table-cell>
          <table:table-cell office:value-type="float" office:value="-3.1288649982871397" table:style-name="c12">
            <text:p>-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15</text:p>
          </table:table-cell>
          <table:table-cell office:value-type="float" office:value="3.311655" table:style-name="c1">
            <text:p>3.3117</text:p>
          </table:table-cell>
          <table:table-cell office:value-type="string" table:style-name="c1">
            <text:p>2026-04-16 03:45</text:p>
          </table:table-cell>
          <table:table-cell office:value-type="float" office:value="3.314342" table:style-name="c1">
            <text:p>3.3143</text:p>
          </table:table-cell>
          <table:table-cell office:value-type="float" office:value="-0.11892451532543591" table:style-name="c12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8:00</text:p>
          </table:table-cell>
          <table:table-cell office:value-type="float" office:value="3.3706845" table:style-name="c1">
            <text:p>3.3707</text:p>
          </table:table-cell>
          <table:table-cell office:value-type="string" table:style-name="c1">
            <text:p>2026-04-16 08:30</text:p>
          </table:table-cell>
          <table:table-cell office:value-type="float" office:value="3.3473255" table:style-name="c1">
            <text:p>3.3473</text:p>
          </table:table-cell>
          <table:table-cell office:value-type="float" office:value="-0.8915193241758268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16 12:45</text:p>
          </table:table-cell>
          <table:table-cell office:value-type="float" office:value="3.366316" table:style-name="c1">
            <text:p>3.3663</text:p>
          </table:table-cell>
          <table:table-cell office:value-type="float" office:value="0.08667005740050637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15</text:p>
          </table:table-cell>
          <table:table-cell office:value-type="float" office:value="3.4177079999999997" table:style-name="c1">
            <text:p>3.4177</text:p>
          </table:table-cell>
          <table:table-cell office:value-type="string" table:style-name="c1">
            <text:p>2026-04-16 13:45</text:p>
          </table:table-cell>
          <table:table-cell office:value-type="float" office:value="3.4312835" table:style-name="c1">
            <text:p>3.4313</text:p>
          </table:table-cell>
          <table:table-cell office:value-type="float" office:value="0.19651662118298496" table:style-name="c13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3.3966974999999997" table:style-name="c1">
            <text:p>3.3967</text:p>
          </table:table-cell>
          <table:table-cell office:value-type="string" table:style-name="c1">
            <text:p>2026-04-16 16:15</text:p>
          </table:table-cell>
          <table:table-cell office:value-type="float" office:value="3.3753115" table:style-name="c1">
            <text:p>3.3753</text:p>
          </table:table-cell>
          <table:table-cell office:value-type="float" office:value="-0.8282529630177504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3.405702" table:style-name="c1">
            <text:p>3.4057</text:p>
          </table:table-cell>
          <table:table-cell office:value-type="string" table:style-name="c1">
            <text:p>2026-04-17 08:45</text:p>
          </table:table-cell>
          <table:table-cell office:value-type="float" office:value="3.3992995" table:style-name="c1">
            <text:p>3.3993</text:p>
          </table:table-cell>
          <table:table-cell office:value-type="float" office:value="-0.38751774819110185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3.38169" table:style-name="c1">
            <text:p>3.3817</text:p>
          </table:table-cell>
          <table:table-cell office:value-type="string" table:style-name="c1">
            <text:p>2026-04-18 07:15</text:p>
          </table:table-cell>
          <table:table-cell office:value-type="float" office:value="3.382308" table:style-name="c1">
            <text:p>3.3823</text:p>
          </table:table-cell>
          <table:table-cell office:value-type="float" office:value="-0.18166164527202433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7:15</text:p>
          </table:table-cell>
          <table:table-cell office:value-type="float" office:value="3.3306645" table:style-name="c1">
            <text:p>3.3307</text:p>
          </table:table-cell>
          <table:table-cell office:value-type="string" table:style-name="c1">
            <text:p>2026-04-20 17:45</text:p>
          </table:table-cell>
          <table:table-cell office:value-type="float" office:value="3.3073455000000003" table:style-name="c1">
            <text:p>3.3073</text:p>
          </table:table-cell>
          <table:table-cell office:value-type="float" office:value="-0.89863099854397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22 06:00</text:p>
          </table:table-cell>
          <table:table-cell office:value-type="float" office:value="3.3353315000000006" table:style-name="c1">
            <text:p>3.3353</text:p>
          </table:table-cell>
          <table:table-cell office:value-type="float" office:value="-0.834555231132561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4:15</text:p>
          </table:table-cell>
          <table:table-cell office:value-type="float" office:value="3.3536759999999997" table:style-name="c1">
            <text:p>3.3537</text:p>
          </table:table-cell>
          <table:table-cell office:value-type="string" table:style-name="c1">
            <text:p>2026-04-22 14:45</text:p>
          </table:table-cell>
          <table:table-cell office:value-type="float" office:value="3.3413285000000004" table:style-name="c1">
            <text:p>3.3413</text:p>
          </table:table-cell>
          <table:table-cell office:value-type="float" office:value="-0.567342094808776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3.3006494999999996" table:style-name="c1">
            <text:p>3.3006</text:p>
          </table:table-cell>
          <table:table-cell office:value-type="string" table:style-name="c1">
            <text:p>2026-04-23 07:00</text:p>
          </table:table-cell>
          <table:table-cell office:value-type="float" office:value="3.2923530000000003" table:style-name="c1">
            <text:p>3.2924</text:p>
          </table:table-cell>
          <table:table-cell office:value-type="float" office:value="-0.4507571508880148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3.3516749999999997" table:style-name="c1">
            <text:p>3.3517</text:p>
          </table:table-cell>
          <table:table-cell office:value-type="string" table:style-name="c1">
            <text:p>2026-04-23 16:30</text:p>
          </table:table-cell>
          <table:table-cell office:value-type="float" office:value="3.3333325" table:style-name="c1">
            <text:p>3.3333</text:p>
          </table:table-cell>
          <table:table-cell office:value-type="float" office:value="-0.7460697014925355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15</text:p>
          </table:table-cell>
          <table:table-cell office:value-type="float" office:value="3.3246615" table:style-name="c1">
            <text:p>3.3247</text:p>
          </table:table-cell>
          <table:table-cell office:value-type="string" table:style-name="c1">
            <text:p>2026-04-23 20:45</text:p>
          </table:table-cell>
          <table:table-cell office:value-type="float" office:value="3.350324" table:style-name="c1">
            <text:p>3.3503</text:p>
          </table:table-cell>
          <table:table-cell office:value-type="float" office:value="0.5704400981573876" table:style-name="c13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15</text:p>
          </table:table-cell>
          <table:table-cell office:value-type="float" office:value="3.431715" table:style-name="c1">
            <text:p>3.4317</text:p>
          </table:table-cell>
          <table:table-cell office:value-type="string" table:style-name="c1">
            <text:p>2026-04-24 08:45</text:p>
          </table:table-cell>
          <table:table-cell office:value-type="float" office:value="3.442278" table:style-name="c1">
            <text:p>3.4423</text:p>
          </table:table-cell>
          <table:table-cell office:value-type="float" office:value="0.10728997827615938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9:45</text:p>
          </table:table-cell>
          <table:table-cell office:value-type="float" office:value="3.4537259999999996" table:style-name="c1">
            <text:p>3.4537</text:p>
          </table:table-cell>
          <table:table-cell office:value-type="string" table:style-name="c1">
            <text:p>2026-04-24 10:15</text:p>
          </table:table-cell>
          <table:table-cell office:value-type="float" office:value="3.4552715" table:style-name="c1">
            <text:p>3.4553</text:p>
          </table:table-cell>
          <table:table-cell office:value-type="float" office:value="-0.15524068002209512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5:15</text:p>
          </table:table-cell>
          <table:table-cell office:value-type="float" office:value="3.6228105" table:style-name="c1">
            <text:p>3.6228</text:p>
          </table:table-cell>
          <table:table-cell office:value-type="string" table:style-name="c1">
            <text:p>2026-04-25 15:45</text:p>
          </table:table-cell>
          <table:table-cell office:value-type="float" office:value="3.648175" table:style-name="c1">
            <text:p>3.6482</text:p>
          </table:table-cell>
          <table:table-cell office:value-type="float" office:value="0.4988336589782927" table:style-name="c13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6:15</text:p>
          </table:table-cell>
          <table:table-cell office:value-type="float" office:value="3.645822" table:style-name="c1">
            <text:p>3.6458</text:p>
          </table:table-cell>
          <table:table-cell office:value-type="string" table:style-name="c1">
            <text:p>2026-04-25 16:45</text:p>
          </table:table-cell>
          <table:table-cell office:value-type="float" office:value="3.594202" table:style-name="c1">
            <text:p>3.5942</text:p>
          </table:table-cell>
          <table:table-cell office:value-type="float" office:value="-1.6129369398176774" table:style-name="c12">
            <text:p>-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3.6328154999999995" table:style-name="c1">
            <text:p>3.6328</text:p>
          </table:table-cell>
          <table:table-cell office:value-type="string" table:style-name="c1">
            <text:p>2026-04-26 05:45</text:p>
          </table:table-cell>
          <table:table-cell office:value-type="float" office:value="3.6391795" table:style-name="c1">
            <text:p>3.6392</text:p>
          </table:table-cell>
          <table:table-cell office:value-type="float" office:value="-0.02506925607699273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6:15</text:p>
          </table:table-cell>
          <table:table-cell office:value-type="float" office:value="3.6758369999999996" table:style-name="c1">
            <text:p>3.6758</text:p>
          </table:table-cell>
          <table:table-cell office:value-type="string" table:style-name="c1">
            <text:p>2026-04-26 06:45</text:p>
          </table:table-cell>
          <table:table-cell office:value-type="float" office:value="3.7331325" table:style-name="c1">
            <text:p>3.7331</text:p>
          </table:table-cell>
          <table:table-cell office:value-type="float" office:value="1.3556903674591947" table:style-name="c13">
            <text:p>+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7:00</text:p>
          </table:table-cell>
          <table:table-cell office:value-type="float" office:value="3.8008995" table:style-name="c1">
            <text:p>3.8009</text:p>
          </table:table-cell>
          <table:table-cell office:value-type="string" table:style-name="c1">
            <text:p>2026-04-26 07:30</text:p>
          </table:table-cell>
          <table:table-cell office:value-type="float" office:value="4.029984000000001" table:style-name="c1">
            <text:p>4.03</text:p>
          </table:table-cell>
          <table:table-cell office:value-type="float" office:value="5.815164594170441" table:style-name="c13">
            <text:p>+5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9:30</text:p>
          </table:table-cell>
          <table:table-cell office:value-type="float" office:value="3.743871" table:style-name="c1">
            <text:p>3.7439</text:p>
          </table:table-cell>
          <table:table-cell office:value-type="string" table:style-name="c1">
            <text:p>2026-04-26 20:00</text:p>
          </table:table-cell>
          <table:table-cell office:value-type="float" office:value="3.7831075000000003" table:style-name="c1">
            <text:p>3.7831</text:p>
          </table:table-cell>
          <table:table-cell office:value-type="float" office:value="0.8460245587388115" table:style-name="c13">
            <text:p>+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0:45</text:p>
          </table:table-cell>
          <table:table-cell office:value-type="float" office:value="3.8449215" table:style-name="c1">
            <text:p>3.8449</text:p>
          </table:table-cell>
          <table:table-cell office:value-type="string" table:style-name="c1">
            <text:p>2026-04-26 21:15</text:p>
          </table:table-cell>
          <table:table-cell office:value-type="float" office:value="3.7451265" table:style-name="c1">
            <text:p>3.7451</text:p>
          </table:table-cell>
          <table:table-cell office:value-type="float" office:value="-2.790213216927828" table:style-name="c12">
            <text:p>-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2:30</text:p>
          </table:table-cell>
          <table:table-cell office:value-type="float" office:value="3.8089034999999996" table:style-name="c1">
            <text:p>3.8089</text:p>
          </table:table-cell>
          <table:table-cell office:value-type="string" table:style-name="c1">
            <text:p>2026-04-27 03:00</text:p>
          </table:table-cell>
          <table:table-cell office:value-type="float" office:value="3.8440770000000004" table:style-name="c1">
            <text:p>3.8441</text:p>
          </table:table-cell>
          <table:table-cell office:value-type="float" office:value="0.7217087562601865" table:style-name="c13">
            <text:p>+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30</text:p>
          </table:table-cell>
          <table:table-cell office:value-type="float" office:value="3.8949464999999996" table:style-name="c1">
            <text:p>3.8949</text:p>
          </table:table-cell>
          <table:table-cell office:value-type="string" table:style-name="c1">
            <text:p>2026-04-27 04:00</text:p>
          </table:table-cell>
          <table:table-cell office:value-type="float" office:value="3.8230875" table:style-name="c1">
            <text:p>3.8231</text:p>
          </table:table-cell>
          <table:table-cell office:value-type="float" office:value="-2.0411410506536942" table:style-name="c12">
            <text:p>-2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3.6498239999999997" table:style-name="c1">
            <text:p>3.6498</text:p>
          </table:table-cell>
          <table:table-cell office:value-type="string" table:style-name="c1">
            <text:p>2026-05-01 13:45</text:p>
          </table:table-cell>
          <table:table-cell office:value-type="float" office:value="3.6611685" table:style-name="c1">
            <text:p>3.6612</text:p>
          </table:table-cell>
          <table:table-cell office:value-type="float" office:value="0.11030187122722523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9:15</text:p>
          </table:table-cell>
          <table:table-cell office:value-type="float" office:value="3.645822" table:style-name="c1">
            <text:p>3.6458</text:p>
          </table:table-cell>
          <table:table-cell office:value-type="string" table:style-name="c1">
            <text:p>2026-05-01 19:45</text:p>
          </table:table-cell>
          <table:table-cell office:value-type="float" office:value="3.632183" table:style-name="c1">
            <text:p>3.6322</text:p>
          </table:table-cell>
          <table:table-cell office:value-type="float" office:value="-0.573251623831339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2:00</text:p>
          </table:table-cell>
          <table:table-cell office:value-type="float" office:value="3.6908445" table:style-name="c1">
            <text:p>3.6908</text:p>
          </table:table-cell>
          <table:table-cell office:value-type="string" table:style-name="c1">
            <text:p>2026-05-02 02:30</text:p>
          </table:table-cell>
          <table:table-cell office:value-type="float" office:value="3.6831575" table:style-name="c1">
            <text:p>3.6832</text:p>
          </table:table-cell>
          <table:table-cell office:value-type="float" office:value="-0.4077557817052546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3:45</text:p>
          </table:table-cell>
          <table:table-cell office:value-type="float" office:value="3.711855" table:style-name="c1">
            <text:p>3.7119</text:p>
          </table:table-cell>
          <table:table-cell office:value-type="string" table:style-name="c1">
            <text:p>2026-05-02 04:15</text:p>
          </table:table-cell>
          <table:table-cell office:value-type="float" office:value="3.7211385" table:style-name="c1">
            <text:p>3.7211</text:p>
          </table:table-cell>
          <table:table-cell office:value-type="float" office:value="0.04970410046998275" table:style-name="c13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4:30</text:p>
          </table:table-cell>
          <table:table-cell office:value-type="float" office:value="3.743871" table:style-name="c1">
            <text:p>3.7439</text:p>
          </table:table-cell>
          <table:table-cell office:value-type="string" table:style-name="c1">
            <text:p>2026-05-02 05:00</text:p>
          </table:table-cell>
          <table:table-cell office:value-type="float" office:value="3.744127" table:style-name="c1">
            <text:p>3.7441</text:p>
          </table:table-cell>
          <table:table-cell office:value-type="float" office:value="-0.19307582641068244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09:30</text:p>
          </table:table-cell>
          <table:table-cell office:value-type="float" office:value="3.8349165" table:style-name="c1">
            <text:p>3.8349</text:p>
          </table:table-cell>
          <table:table-cell office:value-type="string" table:style-name="c1">
            <text:p>2026-05-02 10:00</text:p>
          </table:table-cell>
          <table:table-cell office:value-type="float" office:value="3.860069" table:style-name="c1">
            <text:p>3.8601</text:p>
          </table:table-cell>
          <table:table-cell office:value-type="float" office:value="0.45467018822966665" table:style-name="c13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3.8008995" table:style-name="c1">
            <text:p>3.8009</text:p>
          </table:table-cell>
          <table:table-cell office:value-type="string" table:style-name="c1">
            <text:p>2026-05-04 04:45</text:p>
          </table:table-cell>
          <table:table-cell office:value-type="float" office:value="3.7831075000000003" table:style-name="c1">
            <text:p>3.7831</text:p>
          </table:table-cell>
          <table:table-cell office:value-type="float" office:value="-0.6670639908395226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7:15</text:p>
          </table:table-cell>
          <table:table-cell office:value-type="float" office:value="3.811905" table:style-name="c1">
            <text:p>3.8119</text:p>
          </table:table-cell>
          <table:table-cell office:value-type="string" table:style-name="c1">
            <text:p>2026-05-04 07:45</text:p>
          </table:table-cell>
          <table:table-cell office:value-type="float" office:value="3.8080950000000002" table:style-name="c1">
            <text:p>3.8081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3.8569275" table:style-name="c1">
            <text:p>3.8569</text:p>
          </table:table-cell>
          <table:table-cell office:value-type="string" table:style-name="c1">
            <text:p>2026-05-05 21:00</text:p>
          </table:table-cell>
          <table:table-cell office:value-type="float" office:value="3.848075" table:style-name="c1">
            <text:p>3.8481</text:p>
          </table:table-cell>
          <table:table-cell office:value-type="float" office:value="-0.42896325961532256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6 03:15</text:p>
          </table:table-cell>
          <table:table-cell office:value-type="float" office:value="3.8400790000000002" table:style-name="c1">
            <text:p>3.8401</text:p>
          </table:table-cell>
          <table:table-cell office:value-type="float" office:value="-0.944208989919304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00</text:p>
          </table:table-cell>
          <table:table-cell office:value-type="float" office:value="3.8739359999999996" table:style-name="c1">
            <text:p>3.8739</text:p>
          </table:table-cell>
          <table:table-cell office:value-type="string" table:style-name="c1">
            <text:p>2026-05-07 05:30</text:p>
          </table:table-cell>
          <table:table-cell office:value-type="float" office:value="3.8840570000000003" table:style-name="c1">
            <text:p>3.8841</text:p>
          </table:table-cell>
          <table:table-cell office:value-type="float" office:value="0.06083657698527922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9:45</text:p>
          </table:table-cell>
          <table:table-cell office:value-type="float" office:value="3.8689335" table:style-name="c1">
            <text:p>3.8689</text:p>
          </table:table-cell>
          <table:table-cell office:value-type="string" table:style-name="c1">
            <text:p>2026-05-07 20:15</text:p>
          </table:table-cell>
          <table:table-cell office:value-type="float" office:value="3.8790595" table:style-name="c1">
            <text:p>3.8791</text:p>
          </table:table-cell>
          <table:table-cell office:value-type="float" office:value="0.06130268353021773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3:30</text:p>
          </table:table-cell>
          <table:table-cell office:value-type="float" office:value="3.8769375" table:style-name="c1">
            <text:p>3.8769</text:p>
          </table:table-cell>
          <table:table-cell office:value-type="string" table:style-name="c1">
            <text:p>2026-05-08 04:00</text:p>
          </table:table-cell>
          <table:table-cell office:value-type="float" office:value="3.8680650000000005" table:style-name="c1">
            <text:p>3.8681</text:p>
          </table:table-cell>
          <table:table-cell office:value-type="float" office:value="-0.42829583750059186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5:15</text:p>
          </table:table-cell>
          <table:table-cell office:value-type="float" office:value="3.9109544999999994" table:style-name="c1">
            <text:p>3.911</text:p>
          </table:table-cell>
          <table:table-cell office:value-type="string" table:style-name="c1">
            <text:p>2026-05-08 05:45</text:p>
          </table:table-cell>
          <table:table-cell office:value-type="float" office:value="3.9070455" table:style-name="c1">
            <text:p>3.907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00</text:p>
          </table:table-cell>
          <table:table-cell office:value-type="float" office:value="4.036016999999999" table:style-name="c1">
            <text:p>4.036</text:p>
          </table:table-cell>
          <table:table-cell office:value-type="string" table:style-name="c1">
            <text:p>2026-05-08 08:30</text:p>
          </table:table-cell>
          <table:table-cell office:value-type="float" office:value="4.061968" table:style-name="c1">
            <text:p>4.062</text:p>
          </table:table-cell>
          <table:table-cell office:value-type="float" office:value="0.4418000709115244" table:style-name="c13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45</text:p>
          </table:table-cell>
          <table:table-cell office:value-type="float" office:value="4.08204" table:style-name="c1">
            <text:p>4.082</text:p>
          </table:table-cell>
          <table:table-cell office:value-type="string" table:style-name="c1">
            <text:p>2026-05-08 09:15</text:p>
          </table:table-cell>
          <table:table-cell office:value-type="float" office:value="4.005996000000001" table:style-name="c1">
            <text:p>4.006</text:p>
          </table:table-cell>
          <table:table-cell office:value-type="float" office:value="-2.059068162095412" table:style-name="c12">
            <text:p>-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0:15</text:p>
          </table:table-cell>
          <table:table-cell office:value-type="float" office:value="4.050024" table:style-name="c1">
            <text:p>4.05</text:p>
          </table:table-cell>
          <table:table-cell office:value-type="string" table:style-name="c1">
            <text:p>2026-05-08 10:45</text:p>
          </table:table-cell>
          <table:table-cell office:value-type="float" office:value="4.059969000000001" table:style-name="c1">
            <text:p>4.06</text:p>
          </table:table-cell>
          <table:table-cell office:value-type="float" office:value="0.04516323777343789" table:style-name="c13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4.1650815" table:style-name="c1">
            <text:p>4.1651</text:p>
          </table:table-cell>
          <table:table-cell office:value-type="string" table:style-name="c1">
            <text:p>2026-05-08 16:15</text:p>
          </table:table-cell>
          <table:table-cell office:value-type="float" office:value="4.165916" table:style-name="c1">
            <text:p>4.1659</text:p>
          </table:table-cell>
          <table:table-cell office:value-type="float" office:value="-0.17990442885691404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00</text:p>
          </table:table-cell>
          <table:table-cell office:value-type="float" office:value="4.2231105" table:style-name="c1">
            <text:p>4.2231</text:p>
          </table:table-cell>
          <table:table-cell office:value-type="string" table:style-name="c1">
            <text:p>2026-05-08 18:30</text:p>
          </table:table-cell>
          <table:table-cell office:value-type="float" office:value="4.231883" table:style-name="c1">
            <text:p>4.2319</text:p>
          </table:table-cell>
          <table:table-cell office:value-type="float" office:value="0.007410790766670949" table:style-name="c13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4.312155" table:style-name="c1">
            <text:p>4.3122</text:p>
          </table:table-cell>
          <table:table-cell office:value-type="string" table:style-name="c1">
            <text:p>2026-05-09 01:45</text:p>
          </table:table-cell>
          <table:table-cell office:value-type="float" office:value="4.3188395" table:style-name="c1">
            <text:p>4.3188</text:p>
          </table:table-cell>
          <table:table-cell office:value-type="float" office:value="-0.04519457580952624" table:style-name="c12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2:00</text:p>
          </table:table-cell>
          <table:table-cell office:value-type="float" office:value="4.328162999999999" table:style-name="c1">
            <text:p>4.3282</text:p>
          </table:table-cell>
          <table:table-cell office:value-type="string" table:style-name="c1">
            <text:p>2026-05-09 02:30</text:p>
          </table:table-cell>
          <table:table-cell office:value-type="float" office:value="4.3108435" table:style-name="c1">
            <text:p>4.3108</text:p>
          </table:table-cell>
          <table:table-cell office:value-type="float" office:value="-0.5992583032686127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15</text:p>
          </table:table-cell>
          <table:table-cell office:value-type="float" office:value="4.144071" table:style-name="c1">
            <text:p>4.1441</text:p>
          </table:table-cell>
          <table:table-cell office:value-type="string" table:style-name="c1">
            <text:p>2026-05-10 09:45</text:p>
          </table:table-cell>
          <table:table-cell office:value-type="float" office:value="4.1299339999999995" table:style-name="c1">
            <text:p>4.1299</text:p>
          </table:table-cell>
          <table:table-cell office:value-type="float" office:value="-0.5403560427898468" table:style-name="c12">
            <text:p>-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45</text:p>
          </table:table-cell>
          <table:table-cell office:value-type="float" office:value="4.210104" table:style-name="c1">
            <text:p>4.2101</text:p>
          </table:table-cell>
          <table:table-cell office:value-type="string" table:style-name="c1">
            <text:p>2026-05-10 14:15</text:p>
          </table:table-cell>
          <table:table-cell office:value-type="float" office:value="4.1849065" table:style-name="c1">
            <text:p>4.1849</text:p>
          </table:table-cell>
          <table:table-cell office:value-type="float" office:value="-0.797204251807071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5:30</text:p>
          </table:table-cell>
          <table:table-cell office:value-type="float" office:value="4.2691335" table:style-name="c1">
            <text:p>4.2691</text:p>
          </table:table-cell>
          <table:table-cell office:value-type="string" table:style-name="c1">
            <text:p>2026-05-11 06:00</text:p>
          </table:table-cell>
          <table:table-cell office:value-type="float" office:value="4.279859" table:style-name="c1">
            <text:p>4.2799</text:p>
          </table:table-cell>
          <table:table-cell office:value-type="float" office:value="0.050831435910825284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15</text:p>
          </table:table-cell>
          <table:table-cell office:value-type="float" office:value="4.278137999999999" table:style-name="c1">
            <text:p>4.2781</text:p>
          </table:table-cell>
          <table:table-cell office:value-type="string" table:style-name="c1">
            <text:p>2026-05-11 06:45</text:p>
          </table:table-cell>
          <table:table-cell office:value-type="float" office:value="4.2588695" table:style-name="c1">
            <text:p>4.2589</text:p>
          </table:table-cell>
          <table:table-cell office:value-type="float" office:value="-0.649394202115483" table:style-name="c12">
            <text:p>-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8:30</text:p>
          </table:table-cell>
          <table:table-cell office:value-type="float" office:value="4.320158999999999" table:style-name="c1">
            <text:p>4.3202</text:p>
          </table:table-cell>
          <table:table-cell office:value-type="string" table:style-name="c1">
            <text:p>2026-05-11 09:00</text:p>
          </table:table-cell>
          <table:table-cell office:value-type="float" office:value="4.320838500000001" table:style-name="c1">
            <text:p>4.3208</text:p>
          </table:table-cell>
          <table:table-cell office:value-type="float" office:value="-0.18420285367966027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1:00</text:p>
          </table:table-cell>
          <table:table-cell office:value-type="float" office:value="4.3911945" table:style-name="c1">
            <text:p>4.3912</text:p>
          </table:table-cell>
          <table:table-cell office:value-type="string" table:style-name="c1">
            <text:p>2026-05-11 11:30</text:p>
          </table:table-cell>
          <table:table-cell office:value-type="float" office:value="4.4667655" table:style-name="c1">
            <text:p>4.4668</text:p>
          </table:table-cell>
          <table:table-cell office:value-type="float" office:value="1.517626599448052" table:style-name="c13">
            <text:p>+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1:45</text:p>
          </table:table-cell>
          <table:table-cell office:value-type="float" office:value="4.4722349999999995" table:style-name="c1">
            <text:p>4.4722</text:p>
          </table:table-cell>
          <table:table-cell office:value-type="string" table:style-name="c1">
            <text:p>2026-05-11 12:15</text:p>
          </table:table-cell>
          <table:table-cell office:value-type="float" office:value="4.4207885000000005" table:style-name="c1">
            <text:p>4.4208</text:p>
          </table:table-cell>
          <table:table-cell office:value-type="float" office:value="-1.3479536788987723" table:style-name="c12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7:15</text:p>
          </table:table-cell>
          <table:table-cell office:value-type="float" office:value="4.4212095" table:style-name="c1">
            <text:p>4.4212</text:p>
          </table:table-cell>
          <table:table-cell office:value-type="string" table:style-name="c1">
            <text:p>2026-05-11 17:45</text:p>
          </table:table-cell>
          <table:table-cell office:value-type="float" office:value="4.5007485" table:style-name="c1">
            <text:p>4.5007</text:p>
          </table:table-cell>
          <table:table-cell office:value-type="float" office:value="1.5955363288824076" table:style-name="c13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8:00</text:p>
          </table:table-cell>
          <table:table-cell office:value-type="float" office:value="4.5452715" table:style-name="c1">
            <text:p>4.5453</text:p>
          </table:table-cell>
          <table:table-cell office:value-type="string" table:style-name="c1">
            <text:p>2026-05-11 18:30</text:p>
          </table:table-cell>
          <table:table-cell office:value-type="float" office:value="4.5637170000000005" table:style-name="c1">
            <text:p>4.5637</text:p>
          </table:table-cell>
          <table:table-cell office:value-type="float" office:value="0.20510611339719098" table:style-name="c13">
            <text:p>+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1:15</text:p>
          </table:table-cell>
          <table:table-cell office:value-type="float" office:value="4.703350499999999" table:style-name="c1">
            <text:p>4.7034</text:p>
          </table:table-cell>
          <table:table-cell office:value-type="string" table:style-name="c1">
            <text:p>2026-05-11 21:45</text:p>
          </table:table-cell>
          <table:table-cell office:value-type="float" office:value="4.6326825000000005" table:style-name="c1">
            <text:p>4.6327</text:p>
          </table:table-cell>
          <table:table-cell office:value-type="float" office:value="-1.6993998707410696" table:style-name="c12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2:30</text:p>
          </table:table-cell>
          <table:table-cell office:value-type="float" office:value="4.7373675" table:style-name="c1">
            <text:p>4.7374</text:p>
          </table:table-cell>
          <table:table-cell office:value-type="string" table:style-name="c1">
            <text:p>2026-05-11 23:00</text:p>
          </table:table-cell>
          <table:table-cell office:value-type="float" office:value="4.619689" table:style-name="c1">
            <text:p>4.6197</text:p>
          </table:table-cell>
          <table:table-cell office:value-type="float" office:value="-2.6789827538395317" table:style-name="c12">
            <text:p>-2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5:45</text:p>
          </table:table-cell>
          <table:table-cell office:value-type="float" office:value="4.743370499999999" table:style-name="c1">
            <text:p>4.7434</text:p>
          </table:table-cell>
          <table:table-cell office:value-type="string" table:style-name="c1">
            <text:p>2026-05-12 06:15</text:p>
          </table:table-cell>
          <table:table-cell office:value-type="float" office:value="4.663667" table:style-name="c1">
            <text:p>4.6637</text:p>
          </table:table-cell>
          <table:table-cell office:value-type="float" office:value="-1.8768546613215142" table:style-name="c12">
            <text:p>-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09:45</text:p>
          </table:table-cell>
          <table:table-cell office:value-type="float" office:value="4.810403999999999" table:style-name="c1">
            <text:p>4.8104</text:p>
          </table:table-cell>
          <table:table-cell office:value-type="string" table:style-name="c1">
            <text:p>2026-05-12 10:15</text:p>
          </table:table-cell>
          <table:table-cell office:value-type="float" office:value="4.847575" table:style-name="c1">
            <text:p>4.8476</text:p>
          </table:table-cell>
          <table:table-cell office:value-type="float" office:value="0.5712762914507952" table:style-name="c13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4:15</text:p>
          </table:table-cell>
          <table:table-cell office:value-type="float" office:value="4.9114545" table:style-name="c1">
            <text:p>4.9115</text:p>
          </table:table-cell>
          <table:table-cell office:value-type="string" table:style-name="c1">
            <text:p>2026-05-12 14:45</text:p>
          </table:table-cell>
          <table:table-cell office:value-type="float" office:value="4.6826574999999995" table:style-name="c1">
            <text:p>4.6827</text:p>
          </table:table-cell>
          <table:table-cell office:value-type="float" office:value="-4.849024506742361" table:style-name="c12">
            <text:p>-4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45</text:p>
          </table:table-cell>
          <table:table-cell office:value-type="float" office:value="4.853425499999999" table:style-name="c1">
            <text:p>4.8534</text:p>
          </table:table-cell>
          <table:table-cell office:value-type="string" table:style-name="c1">
            <text:p>2026-05-12 18:15</text:p>
          </table:table-cell>
          <table:table-cell office:value-type="float" office:value="4.827585" table:style-name="c1">
            <text:p>4.8276</text:p>
          </table:table-cell>
          <table:table-cell office:value-type="float" office:value="-0.7312534706672369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30</text:p>
          </table:table-cell>
          <table:table-cell office:value-type="float" office:value="4.969483499999999" table:style-name="c1">
            <text:p>4.9695</text:p>
          </table:table-cell>
          <table:table-cell office:value-type="string" table:style-name="c1">
            <text:p>2026-05-13 02:00</text:p>
          </table:table-cell>
          <table:table-cell office:value-type="float" office:value="4.979509" table:style-name="c1">
            <text:p>4.9795</text:p>
          </table:table-cell>
          <table:table-cell office:value-type="float" office:value="0.0014380067667296714" table:style-name="c13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2:15</text:p>
          </table:table-cell>
          <table:table-cell office:value-type="float" office:value="5.0655315" table:style-name="c1">
            <text:p>5.0655</text:p>
          </table:table-cell>
          <table:table-cell office:value-type="string" table:style-name="c1">
            <text:p>2026-05-13 02:45</text:p>
          </table:table-cell>
          <table:table-cell office:value-type="float" office:value="5.079459" table:style-name="c1">
            <text:p>5.0795</text:p>
          </table:table-cell>
          <table:table-cell office:value-type="float" office:value="0.07449685110043625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6:00</text:p>
          </table:table-cell>
          <table:table-cell office:value-type="float" office:value="5.2596285" table:style-name="c1">
            <text:p>5.2596</text:p>
          </table:table-cell>
          <table:table-cell office:value-type="string" table:style-name="c1">
            <text:p>2026-05-13 06:30</text:p>
          </table:table-cell>
          <table:table-cell office:value-type="float" office:value="5.273362" table:style-name="c1">
            <text:p>5.2734</text:p>
          </table:table-cell>
          <table:table-cell office:value-type="float" office:value="0.06068963543717221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5:00</text:p>
          </table:table-cell>
          <table:table-cell office:value-type="float" office:value="5.2686329999999995" table:style-name="c1">
            <text:p>5.2686</text:p>
          </table:table-cell>
          <table:table-cell office:value-type="string" table:style-name="c1">
            <text:p>2026-05-14 05:30</text:p>
          </table:table-cell>
          <table:table-cell office:value-type="float" office:value="5.21739" table:style-name="c1">
            <text:p>5.2174</text:p>
          </table:table-cell>
          <table:table-cell office:value-type="float" office:value="-1.1705609901088043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0:15</text:p>
          </table:table-cell>
          <table:table-cell office:value-type="float" office:value="5.2576275" table:style-name="c1">
            <text:p>5.2576</text:p>
          </table:table-cell>
          <table:table-cell office:value-type="string" table:style-name="c1">
            <text:p>2026-05-14 10:45</text:p>
          </table:table-cell>
          <table:table-cell office:value-type="float" office:value="5.268364500000001" table:style-name="c1">
            <text:p>5.2684</text:p>
          </table:table-cell>
          <table:table-cell office:value-type="float" office:value="0.003909355778830559" table:style-name="c13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00</text:p>
          </table:table-cell>
          <table:table-cell office:value-type="float" office:value="5.148573" table:style-name="c1">
            <text:p>5.1486</text:p>
          </table:table-cell>
          <table:table-cell office:value-type="string" table:style-name="c1">
            <text:p>2026-05-19 00:30</text:p>
          </table:table-cell>
          <table:table-cell office:value-type="float" office:value="5.3163405" table:style-name="c1">
            <text:p>5.3163</text:p>
          </table:table-cell>
          <table:table-cell office:value-type="float" office:value="3.0521104651813236" table:style-name="c13">
            <text:p>+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45</text:p>
          </table:table-cell>
          <table:table-cell office:value-type="float" office:value="5.3536755" table:style-name="c1">
            <text:p>5.3537</text:p>
          </table:table-cell>
          <table:table-cell office:value-type="string" table:style-name="c1">
            <text:p>2026-05-19 01:15</text:p>
          </table:table-cell>
          <table:table-cell office:value-type="float" office:value="5.3023475" table:style-name="c1">
            <text:p>5.3023</text:p>
          </table:table-cell>
          <table:table-cell office:value-type="float" office:value="-1.1567266759537453" table:style-name="c12">
            <text:p>-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6:15</text:p>
          </table:table-cell>
          <table:table-cell office:value-type="float" office:value="4.94247" table:style-name="c1">
            <text:p>4.9425</text:p>
          </table:table-cell>
          <table:table-cell office:value-type="string" table:style-name="c1">
            <text:p>2026-05-19 16:45</text:p>
          </table:table-cell>
          <table:table-cell office:value-type="float" office:value="5.0764605" table:style-name="c1">
            <text:p>5.0765</text:p>
          </table:table-cell>
          <table:table-cell office:value-type="float" office:value="2.5056835036024516" table:style-name="c13">
            <text:p>+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7:00</text:p>
          </table:table-cell>
          <table:table-cell office:value-type="float" office:value="5.080539" table:style-name="c1">
            <text:p>5.0805</text:p>
          </table:table-cell>
          <table:table-cell office:value-type="string" table:style-name="c1">
            <text:p>2026-05-19 17:30</text:p>
          </table:table-cell>
          <table:table-cell office:value-type="float" office:value="5.0384795" table:style-name="c1">
            <text:p>5.0385</text:p>
          </table:table-cell>
          <table:table-cell office:value-type="float" office:value="-1.026100193709767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5.171584499999999" table:style-name="c1">
            <text:p>5.1716</text:p>
          </table:table-cell>
          <table:table-cell office:value-type="string" table:style-name="c1">
            <text:p>2026-05-20 16:00</text:p>
          </table:table-cell>
          <table:table-cell office:value-type="float" office:value="5.128434500000001" table:style-name="c1">
            <text:p>5.1284</text:p>
          </table:table-cell>
          <table:table-cell office:value-type="float" office:value="-1.0325992075639223" table:style-name="c12">
            <text:p>-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45</text:p>
          </table:table-cell>
          <table:table-cell office:value-type="float" office:value="4.917457499999999" table:style-name="c1">
            <text:p>4.9175</text:p>
          </table:table-cell>
          <table:table-cell office:value-type="string" table:style-name="c1">
            <text:p>2026-05-21 04:15</text:p>
          </table:table-cell>
          <table:table-cell office:value-type="float" office:value="4.9625175" table:style-name="c1">
            <text:p>4.9625</text:p>
          </table:table-cell>
          <table:table-cell office:value-type="float" office:value="0.7145954493251949" table:style-name="c13">
            <text:p>+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5.224611" table:style-name="c1">
            <text:p>5.2246</text:p>
          </table:table-cell>
          <table:table-cell office:value-type="string" table:style-name="c1">
            <text:p>2026-05-21 18:15</text:p>
          </table:table-cell>
          <table:table-cell office:value-type="float" office:value="5.3043465" table:style-name="c1">
            <text:p>5.3043</text:p>
          </table:table-cell>
          <table:table-cell office:value-type="float" office:value="1.323201121509343" table:style-name="c13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8:30</text:p>
          </table:table-cell>
          <table:table-cell office:value-type="float" office:value="5.2466219999999995" table:style-name="c1">
            <text:p>5.2466</text:p>
          </table:table-cell>
          <table:table-cell office:value-type="string" table:style-name="c1">
            <text:p>2026-05-21 19:00</text:p>
          </table:table-cell>
          <table:table-cell office:value-type="float" office:value="5.184406500000001" table:style-name="c1">
            <text:p>5.1844</text:p>
          </table:table-cell>
          <table:table-cell office:value-type="float" office:value="-1.3833496789648292" table:style-name="c12">
            <text:p>-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22:45</text:p>
          </table:table-cell>
          <table:table-cell office:value-type="float" office:value="5.324661" table:style-name="c1">
            <text:p>5.3247</text:p>
          </table:table-cell>
          <table:table-cell office:value-type="string" table:style-name="c1">
            <text:p>2026-05-21 23:15</text:p>
          </table:table-cell>
          <table:table-cell office:value-type="float" office:value="5.2403785" table:style-name="c1">
            <text:p>5.2404</text:p>
          </table:table-cell>
          <table:table-cell office:value-type="float" office:value="-1.7796065631502156" table:style-name="c12">
            <text:p>-1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9:30</text:p>
          </table:table-cell>
          <table:table-cell office:value-type="float" office:value="5.316657" table:style-name="c1">
            <text:p>5.3167</text:p>
          </table:table-cell>
          <table:table-cell office:value-type="string" table:style-name="c1">
            <text:p>2026-05-22 10:00</text:p>
          </table:table-cell>
          <table:table-cell office:value-type="float" office:value="5.289354" table:style-name="c1">
            <text:p>5.2894</text:p>
          </table:table-cell>
          <table:table-cell office:value-type="float" office:value="-0.7124104234296103" table:style-name="c12">
            <text:p>-0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2:15</text:p>
          </table:table-cell>
          <table:table-cell office:value-type="float" office:value="5.512754999999999" table:style-name="c1">
            <text:p>5.5128</text:p>
          </table:table-cell>
          <table:table-cell office:value-type="string" table:style-name="c1">
            <text:p>2026-05-22 12:45</text:p>
          </table:table-cell>
          <table:table-cell office:value-type="float" office:value="5.4512730000000005" table:style-name="c1">
            <text:p>5.4513</text:p>
          </table:table-cell>
          <table:table-cell office:value-type="float" office:value="-1.312938716249823" table:style-name="c12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45</text:p>
          </table:table-cell>
          <table:table-cell office:value-type="float" office:value="5.508753" table:style-name="c1">
            <text:p>5.5088</text:p>
          </table:table-cell>
          <table:table-cell office:value-type="string" table:style-name="c1">
            <text:p>2026-05-22 14:15</text:p>
          </table:table-cell>
          <table:table-cell office:value-type="float" office:value="5.415291000000001" table:style-name="c1">
            <text:p>5.4153</text:p>
          </table:table-cell>
          <table:table-cell office:value-type="float" office:value="-1.893117493360097" table:style-name="c12">
            <text:p>-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0:45</text:p>
          </table:table-cell>
          <table:table-cell office:value-type="float" office:value="5.489743499999999" table:style-name="c1">
            <text:p>5.4897</text:p>
          </table:table-cell>
          <table:table-cell office:value-type="string" table:style-name="c1">
            <text:p>2026-05-23 21:15</text:p>
          </table:table-cell>
          <table:table-cell office:value-type="float" office:value="5.4412780000000005" table:style-name="c1">
            <text:p>5.4413</text:p>
          </table:table-cell>
          <table:table-cell office:value-type="float" office:value="-1.0809724483848648" table:style-name="c12">
            <text:p>-1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6:45</text:p>
          </table:table-cell>
          <table:table-cell office:value-type="float" office:value="5.216607" table:style-name="c1">
            <text:p>5.2166</text:p>
          </table:table-cell>
          <table:table-cell office:value-type="string" table:style-name="c1">
            <text:p>2026-05-24 07:15</text:p>
          </table:table-cell>
          <table:table-cell office:value-type="float" office:value="5.227385000000001" table:style-name="c1">
            <text:p>5.2274</text:p>
          </table:table-cell>
          <table:table-cell office:value-type="float" office:value="0.006296379715786671" table:style-name="c13">
            <text:p>+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16:15</text:p>
          </table:table-cell>
          <table:table-cell office:value-type="float" office:value="5.1955965" table:style-name="c1">
            <text:p>5.1956</text:p>
          </table:table-cell>
          <table:table-cell office:value-type="string" table:style-name="c1">
            <text:p>2026-05-24 16:45</text:p>
          </table:table-cell>
          <table:table-cell office:value-type="float" office:value="5.1864055" table:style-name="c1">
            <text:p>5.1864</text:p>
          </table:table-cell>
          <table:table-cell office:value-type="float" office:value="-0.37644618080907577" table:style-name="c12">
            <text:p>-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0:30</text:p>
          </table:table-cell>
          <table:table-cell office:value-type="float" office:value="5.3276625" table:style-name="c1">
            <text:p>5.3277</text:p>
          </table:table-cell>
          <table:table-cell office:value-type="string" table:style-name="c1">
            <text:p>2026-05-25 11:00</text:p>
          </table:table-cell>
          <table:table-cell office:value-type="float" office:value="5.425286" table:style-name="c1">
            <text:p>5.4253</text:p>
          </table:table-cell>
          <table:table-cell office:value-type="float" office:value="1.628826024283625" table:style-name="c13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1:15</text:p>
          </table:table-cell>
          <table:table-cell office:value-type="float" office:value="5.470733999999999" table:style-name="c1">
            <text:p>5.4707</text:p>
          </table:table-cell>
          <table:table-cell office:value-type="string" table:style-name="c1">
            <text:p>2026-05-25 11:45</text:p>
          </table:table-cell>
          <table:table-cell office:value-type="float" office:value="5.43728" table:style-name="c1">
            <text:p>5.4373</text:p>
          </table:table-cell>
          <table:table-cell office:value-type="float" office:value="-0.8101860320753884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45</text:p>
          </table:table-cell>
          <table:table-cell office:value-type="float" office:value="5.719858499999999" table:style-name="c1">
            <text:p>5.7199</text:p>
          </table:table-cell>
          <table:table-cell office:value-type="string" table:style-name="c1">
            <text:p>2026-05-25 13:15</text:p>
          </table:table-cell>
          <table:table-cell office:value-type="float" office:value="5.547225" table:style-name="c1">
            <text:p>5.5472</text:p>
          </table:table-cell>
          <table:table-cell office:value-type="float" office:value="-3.2120095763732426" table:style-name="c12">
            <text:p>-3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23:30</text:p>
          </table:table-cell>
          <table:table-cell office:value-type="float" office:value="5.711854499999999" table:style-name="c1">
            <text:p>5.7119</text:p>
          </table:table-cell>
          <table:table-cell office:value-type="string" table:style-name="c1">
            <text:p>2026-05-26 00:00</text:p>
          </table:table-cell>
          <table:table-cell office:value-type="float" office:value="5.6701635" table:style-name="c1">
            <text:p>5.6702</text:p>
          </table:table-cell>
          <table:table-cell office:value-type="float" office:value="-0.9283439701851415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3:45</text:p>
          </table:table-cell>
          <table:table-cell office:value-type="float" office:value="5.960979" table:style-name="c1">
            <text:p>5.961</text:p>
          </table:table-cell>
          <table:table-cell office:value-type="string" table:style-name="c1">
            <text:p>2026-05-26 14:15</text:p>
          </table:table-cell>
          <table:table-cell office:value-type="float" office:value="6.0339815" table:style-name="c1">
            <text:p>6.034</text:p>
          </table:table-cell>
          <table:table-cell office:value-type="float" office:value="1.0223248728355117" table:style-name="c13">
            <text:p>+1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6:30</text:p>
          </table:table-cell>
          <table:table-cell office:value-type="float" office:value="6.087041999999999" table:style-name="c1">
            <text:p>6.087</text:p>
          </table:table-cell>
          <table:table-cell office:value-type="string" table:style-name="c1">
            <text:p>2026-05-29 07:00</text:p>
          </table:table-cell>
          <table:table-cell office:value-type="float" office:value="6.1759105000000005" table:style-name="c1">
            <text:p>6.1759</text:p>
          </table:table-cell>
          <table:table-cell office:value-type="float" office:value="1.2571435339283177" table:style-name="c13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7:15</text:p>
          </table:table-cell>
          <table:table-cell office:value-type="float" office:value="6.201099" table:style-name="c1">
            <text:p>6.2011</text:p>
          </table:table-cell>
          <table:table-cell office:value-type="string" table:style-name="c1">
            <text:p>2026-05-29 07:45</text:p>
          </table:table-cell>
          <table:table-cell office:value-type="float" office:value="6.1579195" table:style-name="c1">
            <text:p>6.1579</text:p>
          </table:table-cell>
          <table:table-cell office:value-type="float" office:value="-0.894828176110396" table:style-name="c12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15:15</text:p>
          </table:table-cell>
          <table:table-cell office:value-type="float" office:value="6.353174999999999" table:style-name="c1">
            <text:p>6.3532</text:p>
          </table:table-cell>
          <table:table-cell office:value-type="string" table:style-name="c1">
            <text:p>2026-05-29 15:45</text:p>
          </table:table-cell>
          <table:table-cell office:value-type="float" office:value="6.6546710000000004" table:style-name="c1">
            <text:p>6.6547</text:p>
          </table:table-cell>
          <table:table-cell office:value-type="float" office:value="4.536209260267543" table:style-name="c13">
            <text:p>+4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5:00</text:p>
          </table:table-cell>
          <table:table-cell office:value-type="float" office:value="6.749373" table:style-name="c1">
            <text:p>6.7494</text:p>
          </table:table-cell>
          <table:table-cell office:value-type="string" table:style-name="c1">
            <text:p>2026-05-30 05:30</text:p>
          </table:table-cell>
          <table:table-cell office:value-type="float" office:value="6.8475745" table:style-name="c1">
            <text:p>6.8476</text:p>
          </table:table-cell>
          <table:table-cell office:value-type="float" office:value="1.252163698383546" table:style-name="c13">
            <text:p>+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6:00</text:p>
          </table:table-cell>
          <table:table-cell office:value-type="float" office:value="6.995495999999999" table:style-name="c1">
            <text:p>6.9955</text:p>
          </table:table-cell>
          <table:table-cell office:value-type="string" table:style-name="c1">
            <text:p>2026-05-30 06:30</text:p>
          </table:table-cell>
          <table:table-cell office:value-type="float" office:value="7.01649" table:style-name="c1">
            <text:p>7.0165</text:p>
          </table:table-cell>
          <table:table-cell office:value-type="float" office:value="0.09960746871988668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5:00</text:p>
          </table:table-cell>
          <table:table-cell office:value-type="float" office:value="6.5912939999999995" table:style-name="c1">
            <text:p>6.5913</text:p>
          </table:table-cell>
          <table:table-cell office:value-type="string" table:style-name="c1">
            <text:p>2026-05-31 05:30</text:p>
          </table:table-cell>
          <table:table-cell office:value-type="float" office:value="6.589703500000001" table:style-name="c1">
            <text:p>6.5897</text:p>
          </table:table-cell>
          <table:table-cell office:value-type="float" office:value="-0.22398207842797557" table:style-name="c12">
            <text:p>-0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6:00</text:p>
          </table:table-cell>
          <table:table-cell office:value-type="float" office:value="6.655326" table:style-name="c1">
            <text:p>6.6553</text:p>
          </table:table-cell>
          <table:table-cell office:value-type="string" table:style-name="c1">
            <text:p>2026-05-31 06:30</text:p>
          </table:table-cell>
          <table:table-cell office:value-type="float" office:value="6.498749" table:style-name="c1">
            <text:p>6.4987</text:p>
          </table:table-cell>
          <table:table-cell office:value-type="float" office:value="-2.5478541434484026" table:style-name="c12">
            <text:p>-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00</text:p>
          </table:table-cell>
          <table:table-cell office:value-type="float" office:value="6.545271" table:style-name="c1">
            <text:p>6.5453</text:p>
          </table:table-cell>
          <table:table-cell office:value-type="string" table:style-name="c1">
            <text:p>2026-06-01 00:30</text:p>
          </table:table-cell>
          <table:table-cell office:value-type="float" office:value="6.502747" table:style-name="c1">
            <text:p>6.5027</text:p>
          </table:table-cell>
          <table:table-cell office:value-type="float" office:value="-0.848291709434168" table:style-name="c12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2:30</text:p>
          </table:table-cell>
          <table:table-cell office:value-type="float" office:value="6.78339" table:style-name="c1">
            <text:p>6.7834</text:p>
          </table:table-cell>
          <table:table-cell office:value-type="string" table:style-name="c1">
            <text:p>2026-06-01 13:00</text:p>
          </table:table-cell>
          <table:table-cell office:value-type="float" office:value="6.828584" table:style-name="c1">
            <text:p>6.8286</text:p>
          </table:table-cell>
          <table:table-cell office:value-type="float" office:value="0.4650132247150607" table:style-name="c13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6:15</text:p>
          </table:table-cell>
          <table:table-cell office:value-type="float" office:value="7.113555" table:style-name="c1">
            <text:p>7.1136</text:p>
          </table:table-cell>
          <table:table-cell office:value-type="string" table:style-name="c1">
            <text:p>2026-06-01 16:45</text:p>
          </table:table-cell>
          <table:table-cell office:value-type="float" office:value="7.2313825000000005" table:style-name="c1">
            <text:p>7.2314</text:p>
          </table:table-cell>
          <table:table-cell office:value-type="float" office:value="1.4531688639857432" table:style-name="c13">
            <text:p>+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9:30</text:p>
          </table:table-cell>
          <table:table-cell office:value-type="float" office:value="7.241619" table:style-name="c1">
            <text:p>7.2416</text:p>
          </table:table-cell>
          <table:table-cell office:value-type="string" table:style-name="c1">
            <text:p>2026-06-01 20:00</text:p>
          </table:table-cell>
          <table:table-cell office:value-type="float" office:value="7.328334" table:style-name="c1">
            <text:p>7.3283</text:p>
          </table:table-cell>
          <table:table-cell office:value-type="float" office:value="0.9951595124515711" table:style-name="c13">
            <text:p>+1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21:00</text:p>
          </table:table-cell>
          <table:table-cell office:value-type="float" office:value="9.28464" table:style-name="c9">
            <text:p>9.2846</text:p>
          </table:table-cell>
          <table:table-cell office:value-type="string" table:style-name="c9">
            <text:p>2026-03-05 21:30</text:p>
          </table:table-cell>
          <table:table-cell office:value-type="float" office:value="9.295350000000001" table:style-name="c9">
            <text:p>9.2954</text:p>
          </table:table-cell>
          <table:table-cell office:value-type="float" office:value="-0.08477878140668027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4:30</text:p>
          </table:table-cell>
          <table:table-cell office:value-type="float" office:value="8.92446" table:style-name="c9">
            <text:p>8.9245</text:p>
          </table:table-cell>
          <table:table-cell office:value-type="string" table:style-name="c9">
            <text:p>2026-03-09 15:00</text:p>
          </table:table-cell>
          <table:table-cell office:value-type="float" office:value="8.925535" table:style-name="c9">
            <text:p>8.9255</text:p>
          </table:table-cell>
          <table:table-cell office:value-type="float" office:value="-0.18787853231455598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20:00</text:p>
          </table:table-cell>
          <table:table-cell office:value-type="float" office:value="9.014505" table:style-name="c9">
            <text:p>9.0145</text:p>
          </table:table-cell>
          <table:table-cell office:value-type="string" table:style-name="c9">
            <text:p>2026-03-09 20:30</text:p>
          </table:table-cell>
          <table:table-cell office:value-type="float" office:value="9.01549" table:style-name="c9">
            <text:p>9.0155</text:p>
          </table:table-cell>
          <table:table-cell office:value-type="float" office:value="-0.1889950087109571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05:00</text:p>
          </table:table-cell>
          <table:table-cell office:value-type="float" office:value="9.02451" table:style-name="c9">
            <text:p>9.0245</text:p>
          </table:table-cell>
          <table:table-cell office:value-type="string" table:style-name="c9">
            <text:p>2026-03-11 05:30</text:p>
          </table:table-cell>
          <table:table-cell office:value-type="float" office:value="8.955520000000002" table:style-name="c9">
            <text:p>8.9555</text:p>
          </table:table-cell>
          <table:table-cell office:value-type="float" office:value="-0.9628454562075728" table:style-name="c10">
            <text:p>-1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3:45</text:p>
          </table:table-cell>
          <table:table-cell office:value-type="float" office:value="9.074535" table:style-name="c9">
            <text:p>9.0745</text:p>
          </table:table-cell>
          <table:table-cell office:value-type="string" table:style-name="c9">
            <text:p>2026-03-11 14:15</text:p>
          </table:table-cell>
          <table:table-cell office:value-type="float" office:value="9.055470000000001" table:style-name="c9">
            <text:p>9.0555</text:p>
          </table:table-cell>
          <table:table-cell office:value-type="float" office:value="-0.4095734330188505" table:style-name="c10">
            <text:p>-0.4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7:30</text:p>
          </table:table-cell>
          <table:table-cell office:value-type="float" office:value="9.14457" table:style-name="c9">
            <text:p>9.1446</text:p>
          </table:table-cell>
          <table:table-cell office:value-type="string" table:style-name="c9">
            <text:p>2026-03-11 18:00</text:p>
          </table:table-cell>
          <table:table-cell office:value-type="float" office:value="9.075460000000001" table:style-name="c9">
            <text:p>9.0755</text:p>
          </table:table-cell>
          <table:table-cell office:value-type="float" office:value="-0.9541382978095037" table:style-name="c10">
            <text:p>-1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7:45</text:p>
          </table:table-cell>
          <table:table-cell office:value-type="float" office:value="8.944469999999999" table:style-name="c9">
            <text:p>8.9445</text:p>
          </table:table-cell>
          <table:table-cell office:value-type="string" table:style-name="c9">
            <text:p>2026-03-12 08:15</text:p>
          </table:table-cell>
          <table:table-cell office:value-type="float" office:value="8.93553" table:style-name="c9">
            <text:p>8.9355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0:45</text:p>
          </table:table-cell>
          <table:table-cell office:value-type="float" office:value="9.094545" table:style-name="c9">
            <text:p>9.0945</text:p>
          </table:table-cell>
          <table:table-cell office:value-type="string" table:style-name="c9">
            <text:p>2026-03-12 11:15</text:p>
          </table:table-cell>
          <table:table-cell office:value-type="float" office:value="9.045475000000001" table:style-name="c9">
            <text:p>9.0455</text:p>
          </table:table-cell>
          <table:table-cell office:value-type="float" office:value="-0.7383756364391925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0:00</text:p>
          </table:table-cell>
          <table:table-cell office:value-type="float" office:value="9.28464" table:style-name="c9">
            <text:p>9.2846</text:p>
          </table:table-cell>
          <table:table-cell office:value-type="string" table:style-name="c9">
            <text:p>2026-03-13 10:30</text:p>
          </table:table-cell>
          <table:table-cell office:value-type="float" office:value="9.295350000000001" table:style-name="c9">
            <text:p>9.2954</text:p>
          </table:table-cell>
          <table:table-cell office:value-type="float" office:value="-0.08477878140668027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30</text:p>
          </table:table-cell>
          <table:table-cell office:value-type="float" office:value="9.514755" table:style-name="c9">
            <text:p>9.5148</text:p>
          </table:table-cell>
          <table:table-cell office:value-type="string" table:style-name="c9">
            <text:p>2026-03-13 14:00</text:p>
          </table:table-cell>
          <table:table-cell office:value-type="float" office:value="9.51524" table:style-name="c9">
            <text:p>9.5152</text:p>
          </table:table-cell>
          <table:table-cell office:value-type="float" office:value="-0.19481284342054428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9:15</text:p>
          </table:table-cell>
          <table:table-cell office:value-type="float" office:value="9.294645" table:style-name="c9">
            <text:p>9.2946</text:p>
          </table:table-cell>
          <table:table-cell office:value-type="string" table:style-name="c9">
            <text:p>2026-03-15 09:45</text:p>
          </table:table-cell>
          <table:table-cell office:value-type="float" office:value="9.255370000000001" table:style-name="c9">
            <text:p>9.2554</text:p>
          </table:table-cell>
          <table:table-cell office:value-type="float" office:value="-0.6216104502108188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1:45</text:p>
          </table:table-cell>
          <table:table-cell office:value-type="float" office:value="9.314655" table:style-name="c9">
            <text:p>9.3147</text:p>
          </table:table-cell>
          <table:table-cell office:value-type="string" table:style-name="c9">
            <text:p>2026-03-15 22:15</text:p>
          </table:table-cell>
          <table:table-cell office:value-type="float" office:value="9.265365000000001" table:style-name="c9">
            <text:p>9.2654</text:p>
          </table:table-cell>
          <table:table-cell office:value-type="float" office:value="-0.7280083334809451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45</text:p>
          </table:table-cell>
          <table:table-cell office:value-type="float" office:value="9.434714999999999" table:style-name="c9">
            <text:p>9.4347</text:p>
          </table:table-cell>
          <table:table-cell office:value-type="string" table:style-name="c9">
            <text:p>2026-03-15 23:15</text:p>
          </table:table-cell>
          <table:table-cell office:value-type="float" office:value="9.505245" table:style-name="c9">
            <text:p>9.5052</text:p>
          </table:table-cell>
          <table:table-cell office:value-type="float" office:value="0.5461639831727982" table:style-name="c11">
            <text:p>+0.5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3:30</text:p>
          </table:table-cell>
          <table:table-cell office:value-type="float" office:value="9.42471" table:style-name="c9">
            <text:p>9.4247</text:p>
          </table:table-cell>
          <table:table-cell office:value-type="string" table:style-name="c9">
            <text:p>2026-03-16 00:00</text:p>
          </table:table-cell>
          <table:table-cell office:value-type="float" office:value="9.49525" table:style-name="c9">
            <text:p>9.4953</text:p>
          </table:table-cell>
          <table:table-cell office:value-type="float" office:value="0.5470618751134193" table:style-name="c11">
            <text:p>+0.5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9.734865" table:style-name="c9">
            <text:p>9.7349</text:p>
          </table:table-cell>
          <table:table-cell office:value-type="string" table:style-name="c9">
            <text:p>2026-03-16 04:15</text:p>
          </table:table-cell>
          <table:table-cell office:value-type="float" office:value="9.745125" table:style-name="c9">
            <text:p>9.7451</text:p>
          </table:table-cell>
          <table:table-cell office:value-type="float" office:value="-0.09471630962524236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1:00</text:p>
          </table:table-cell>
          <table:table-cell office:value-type="float" office:value="9.734865" table:style-name="c9">
            <text:p>9.7349</text:p>
          </table:table-cell>
          <table:table-cell office:value-type="string" table:style-name="c9">
            <text:p>2026-03-16 11:30</text:p>
          </table:table-cell>
          <table:table-cell office:value-type="float" office:value="9.645175" table:style-name="c9">
            <text:p>9.6452</text:p>
          </table:table-cell>
          <table:table-cell office:value-type="float" office:value="-1.1193858859367745" table:style-name="c10">
            <text:p>-1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3:45</text:p>
          </table:table-cell>
          <table:table-cell office:value-type="float" office:value="9.754875" table:style-name="c9">
            <text:p>9.7549</text:p>
          </table:table-cell>
          <table:table-cell office:value-type="string" table:style-name="c9">
            <text:p>2026-03-16 14:15</text:p>
          </table:table-cell>
          <table:table-cell office:value-type="float" office:value="9.765115" table:style-name="c9">
            <text:p>9.7651</text:p>
          </table:table-cell>
          <table:table-cell office:value-type="float" office:value="-0.09513668688734267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0:45</text:p>
          </table:table-cell>
          <table:table-cell office:value-type="float" office:value="9.2046" table:style-name="c9">
            <text:p>9.2046</text:p>
          </table:table-cell>
          <table:table-cell office:value-type="string" table:style-name="c9">
            <text:p>2026-03-24 21:15</text:p>
          </table:table-cell>
          <table:table-cell office:value-type="float" office:value="9.165415000000001" table:style-name="c9">
            <text:p>9.1654</text:p>
          </table:table-cell>
          <table:table-cell office:value-type="float" office:value="-0.6247600611107296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5:15</text:p>
          </table:table-cell>
          <table:table-cell office:value-type="float" office:value="9.30465" table:style-name="c9">
            <text:p>9.3047</text:p>
          </table:table-cell>
          <table:table-cell office:value-type="string" table:style-name="c9">
            <text:p>2026-03-25 05:45</text:p>
          </table:table-cell>
          <table:table-cell office:value-type="float" office:value="9.31534" table:style-name="c9">
            <text:p>9.3153</text:p>
          </table:table-cell>
          <table:table-cell office:value-type="float" office:value="-0.08524087053246587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8:45</text:p>
          </table:table-cell>
          <table:table-cell office:value-type="float" office:value="9.394695" table:style-name="c9">
            <text:p>9.3947</text:p>
          </table:table-cell>
          <table:table-cell office:value-type="string" table:style-name="c9">
            <text:p>2026-03-25 09:15</text:p>
          </table:table-cell>
          <table:table-cell office:value-type="float" office:value="9.35532" table:style-name="c9">
            <text:p>9.3553</text:p>
          </table:table-cell>
          <table:table-cell office:value-type="float" office:value="-0.6181816938175988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2:15</text:p>
          </table:table-cell>
          <table:table-cell office:value-type="float" office:value="9.444719999999998" table:style-name="c9">
            <text:p>9.4447</text:p>
          </table:table-cell>
          <table:table-cell office:value-type="string" table:style-name="c9">
            <text:p>2026-03-25 12:45</text:p>
          </table:table-cell>
          <table:table-cell office:value-type="float" office:value="9.385305" table:style-name="c9">
            <text:p>9.3853</text:p>
          </table:table-cell>
          <table:table-cell office:value-type="float" office:value="-0.8277241114082456" table:style-name="c10">
            <text:p>-0.8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22:45</text:p>
          </table:table-cell>
          <table:table-cell office:value-type="float" office:value="9.38469" table:style-name="c9">
            <text:p>9.3847</text:p>
          </table:table-cell>
          <table:table-cell office:value-type="string" table:style-name="c9">
            <text:p>2026-03-25 23:15</text:p>
          </table:table-cell>
          <table:table-cell office:value-type="float" office:value="9.37531" table:style-name="c9">
            <text:p>9.3753</text:p>
          </table:table-cell>
          <table:table-cell office:value-type="float" office:value="-0.299650224887571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8:00</text:p>
          </table:table-cell>
          <table:table-cell office:value-type="float" office:value="8.754375" table:style-name="c9">
            <text:p>8.7544</text:p>
          </table:table-cell>
          <table:table-cell office:value-type="string" table:style-name="c9">
            <text:p>2026-03-30 08:30</text:p>
          </table:table-cell>
          <table:table-cell office:value-type="float" office:value="8.765615" table:style-name="c9">
            <text:p>8.7656</text:p>
          </table:table-cell>
          <table:table-cell office:value-type="float" office:value="-0.07176371111586866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11:30</text:p>
          </table:table-cell>
          <table:table-cell office:value-type="float" office:value="8.834415" table:style-name="c9">
            <text:p>8.8344</text:p>
          </table:table-cell>
          <table:table-cell office:value-type="string" table:style-name="c9">
            <text:p>2026-03-30 12:00</text:p>
          </table:table-cell>
          <table:table-cell office:value-type="float" office:value="8.85557" table:style-name="c9">
            <text:p>8.8556</text:p>
          </table:table-cell>
          <table:table-cell office:value-type="float" office:value="0.039082560305336855" table:style-name="c11">
            <text:p>+0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01:30</text:p>
          </table:table-cell>
          <table:table-cell office:value-type="float" office:value="8.76438" table:style-name="c9">
            <text:p>8.7644</text:p>
          </table:table-cell>
          <table:table-cell office:value-type="string" table:style-name="c9">
            <text:p>2026-03-31 02:00</text:p>
          </table:table-cell>
          <table:table-cell office:value-type="float" office:value="8.785605" table:style-name="c9">
            <text:p>8.7856</text:p>
          </table:table-cell>
          <table:table-cell office:value-type="float" office:value="0.04178932913680988" table:style-name="c11">
            <text:p>+0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3:15</text:p>
          </table:table-cell>
          <table:table-cell office:value-type="float" office:value="8.684339999999999" table:style-name="c9">
            <text:p>8.6843</text:p>
          </table:table-cell>
          <table:table-cell office:value-type="string" table:style-name="c9">
            <text:p>2026-03-31 13:45</text:p>
          </table:table-cell>
          <table:table-cell office:value-type="float" office:value="8.685655" table:style-name="c9">
            <text:p>8.6857</text:p>
          </table:table-cell>
          <table:table-cell office:value-type="float" office:value="-0.1847880707687488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6:45</text:p>
          </table:table-cell>
          <table:table-cell office:value-type="float" office:value="8.784389999999998" table:style-name="c9">
            <text:p>8.7844</text:p>
          </table:table-cell>
          <table:table-cell office:value-type="string" table:style-name="c9">
            <text:p>2026-03-31 17:15</text:p>
          </table:table-cell>
          <table:table-cell office:value-type="float" office:value="8.875560000000002" table:style-name="c9">
            <text:p>8.8756</text:p>
          </table:table-cell>
          <table:table-cell office:value-type="float" office:value="0.8358890664007967" table:style-name="c11">
            <text:p>+0.8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5:30</text:p>
          </table:table-cell>
          <table:table-cell office:value-type="float" office:value="8.92446" table:style-name="c9">
            <text:p>8.9245</text:p>
          </table:table-cell>
          <table:table-cell office:value-type="string" table:style-name="c9">
            <text:p>2026-04-01 06:00</text:p>
          </table:table-cell>
          <table:table-cell office:value-type="float" office:value="8.91554" table:style-name="c9">
            <text:p>8.9155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45</text:p>
          </table:table-cell>
          <table:table-cell office:value-type="float" office:value="9.094545" table:style-name="c9">
            <text:p>9.0945</text:p>
          </table:table-cell>
          <table:table-cell office:value-type="string" table:style-name="c9">
            <text:p>2026-04-01 07:15</text:p>
          </table:table-cell>
          <table:table-cell office:value-type="float" office:value="9.135430000000001" table:style-name="c9">
            <text:p>9.1354</text:p>
          </table:table-cell>
          <table:table-cell office:value-type="float" office:value="0.2487565395520308" table:style-name="c11">
            <text:p>+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7:30</text:p>
          </table:table-cell>
          <table:table-cell office:value-type="float" office:value="9.074535" table:style-name="c9">
            <text:p>9.0745</text:p>
          </table:table-cell>
          <table:table-cell office:value-type="string" table:style-name="c9">
            <text:p>2026-04-01 08:00</text:p>
          </table:table-cell>
          <table:table-cell office:value-type="float" office:value="9.055470000000001" table:style-name="c9">
            <text:p>9.0555</text:p>
          </table:table-cell>
          <table:table-cell office:value-type="float" office:value="-0.4095734330188505" table:style-name="c10">
            <text:p>-0.4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9:15</text:p>
          </table:table-cell>
          <table:table-cell office:value-type="float" office:value="8.774384999999999" table:style-name="c9">
            <text:p>8.7744</text:p>
          </table:table-cell>
          <table:table-cell office:value-type="string" table:style-name="c9">
            <text:p>2026-04-04 19:45</text:p>
          </table:table-cell>
          <table:table-cell office:value-type="float" office:value="8.71564" table:style-name="c9">
            <text:p>8.7156</text:p>
          </table:table-cell>
          <table:table-cell office:value-type="float" office:value="-0.8680672703556769" table:style-name="c10">
            <text:p>-0.9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0:15</text:p>
          </table:table-cell>
          <table:table-cell office:value-type="float" office:value="8.894445" table:style-name="c9">
            <text:p>8.8944</text:p>
          </table:table-cell>
          <table:table-cell office:value-type="string" table:style-name="c9">
            <text:p>2026-04-06 00:45</text:p>
          </table:table-cell>
          <table:table-cell office:value-type="float" office:value="8.945525" table:style-name="c9">
            <text:p>8.9455</text:p>
          </table:table-cell>
          <table:table-cell office:value-type="float" office:value="0.3732430244382856" table:style-name="c11">
            <text:p>+0.4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6:15</text:p>
          </table:table-cell>
          <table:table-cell office:value-type="float" office:value="9.0045" table:style-name="c9">
            <text:p>9.0045</text:p>
          </table:table-cell>
          <table:table-cell office:value-type="string" table:style-name="c9">
            <text:p>2026-04-06 06:45</text:p>
          </table:table-cell>
          <table:table-cell office:value-type="float" office:value="8.905545" table:style-name="c9">
            <text:p>8.9055</text:p>
          </table:table-cell>
          <table:table-cell office:value-type="float" office:value="-1.2966537226386743" table:style-name="c10">
            <text:p>-1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15</text:p>
          </table:table-cell>
          <table:table-cell office:value-type="float" office:value="9.044519999999999" table:style-name="c9">
            <text:p>9.0445</text:p>
          </table:table-cell>
          <table:table-cell office:value-type="string" table:style-name="c9">
            <text:p>2026-04-06 09:45</text:p>
          </table:table-cell>
          <table:table-cell office:value-type="float" office:value="9.085455" table:style-name="c9">
            <text:p>9.0855</text:p>
          </table:table-cell>
          <table:table-cell office:value-type="float" office:value="0.25178976280664234" table:style-name="c11">
            <text:p>+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08:45</text:p>
          </table:table-cell>
          <table:table-cell office:value-type="float" office:value="8.834415" table:style-name="c9">
            <text:p>8.8344</text:p>
          </table:table-cell>
          <table:table-cell office:value-type="string" table:style-name="c9">
            <text:p>2026-04-07 09:15</text:p>
          </table:table-cell>
          <table:table-cell office:value-type="float" office:value="8.865565" table:style-name="c9">
            <text:p>8.8656</text:p>
          </table:table-cell>
          <table:table-cell office:value-type="float" office:value="0.1519934887029839" table:style-name="c11">
            <text:p>+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00</text:p>
          </table:table-cell>
          <table:table-cell office:value-type="float" office:value="9.2046" table:style-name="c9">
            <text:p>9.2046</text:p>
          </table:table-cell>
          <table:table-cell office:value-type="string" table:style-name="c9">
            <text:p>2026-04-07 23:30</text:p>
          </table:table-cell>
          <table:table-cell office:value-type="float" office:value="9.405295" table:style-name="c9">
            <text:p>9.4053</text:p>
          </table:table-cell>
          <table:table-cell office:value-type="float" office:value="1.9761186286748167" table:style-name="c11">
            <text:p>+2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45</text:p>
          </table:table-cell>
          <table:table-cell office:value-type="float" office:value="9.32466" table:style-name="c9">
            <text:p>9.3247</text:p>
          </table:table-cell>
          <table:table-cell office:value-type="string" table:style-name="c9">
            <text:p>2026-04-08 00:15</text:p>
          </table:table-cell>
          <table:table-cell office:value-type="float" office:value="9.285355" table:style-name="c9">
            <text:p>9.2854</text:p>
          </table:table-cell>
          <table:table-cell office:value-type="float" office:value="-0.6205740975542384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22:30</text:p>
          </table:table-cell>
          <table:table-cell office:value-type="float" office:value="9.10455" table:style-name="c9">
            <text:p>9.1045</text:p>
          </table:table-cell>
          <table:table-cell office:value-type="string" table:style-name="c9">
            <text:p>2026-04-09 23:00</text:p>
          </table:table-cell>
          <table:table-cell office:value-type="float" office:value="9.01549" table:style-name="c9">
            <text:p>9.0155</text:p>
          </table:table-cell>
          <table:table-cell office:value-type="float" office:value="-1.1761368163171082" table:style-name="c10">
            <text:p>-1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4:30</text:p>
          </table:table-cell>
          <table:table-cell office:value-type="float" office:value="9.124559999999999" table:style-name="c9">
            <text:p>9.1246</text:p>
          </table:table-cell>
          <table:table-cell office:value-type="string" table:style-name="c9">
            <text:p>2026-04-10 15:00</text:p>
          </table:table-cell>
          <table:table-cell office:value-type="float" office:value="9.125435000000001" table:style-name="c9">
            <text:p>9.1254</text:p>
          </table:table-cell>
          <table:table-cell office:value-type="float" office:value="-0.19032966592358314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7:00</text:p>
          </table:table-cell>
          <table:table-cell office:value-type="float" office:value="9.10455" table:style-name="c9">
            <text:p>9.1045</text:p>
          </table:table-cell>
          <table:table-cell office:value-type="string" table:style-name="c9">
            <text:p>2026-04-11 17:30</text:p>
          </table:table-cell>
          <table:table-cell office:value-type="float" office:value="9.085455" table:style-name="c9">
            <text:p>9.0855</text:p>
          </table:table-cell>
          <table:table-cell office:value-type="float" office:value="-0.40921104881626036" table:style-name="c10">
            <text:p>-0.4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45</text:p>
          </table:table-cell>
          <table:table-cell office:value-type="float" office:value="9.194595" table:style-name="c9">
            <text:p>9.1946</text:p>
          </table:table-cell>
          <table:table-cell office:value-type="string" table:style-name="c9">
            <text:p>2026-04-11 19:15</text:p>
          </table:table-cell>
          <table:table-cell office:value-type="float" office:value="9.225385000000001" table:style-name="c9">
            <text:p>9.2254</text:p>
          </table:table-cell>
          <table:table-cell office:value-type="float" office:value="0.13430124312165947" table:style-name="c11">
            <text:p>+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9:30</text:p>
          </table:table-cell>
          <table:table-cell office:value-type="float" office:value="9.254624999999999" table:style-name="c9">
            <text:p>9.2546</text:p>
          </table:table-cell>
          <table:table-cell office:value-type="string" table:style-name="c9">
            <text:p>2026-04-11 20:00</text:p>
          </table:table-cell>
          <table:table-cell office:value-type="float" office:value="9.265365000000001" table:style-name="c9">
            <text:p>9.2654</text:p>
          </table:table-cell>
          <table:table-cell office:value-type="float" office:value="-0.08408190104945978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15</text:p>
          </table:table-cell>
          <table:table-cell office:value-type="float" office:value="9.124559999999999" table:style-name="c9">
            <text:p>9.1246</text:p>
          </table:table-cell>
          <table:table-cell office:value-type="string" table:style-name="c9">
            <text:p>2026-04-13 22:45</text:p>
          </table:table-cell>
          <table:table-cell office:value-type="float" office:value="9.295350000000001" table:style-name="c9">
            <text:p>9.2954</text:p>
          </table:table-cell>
          <table:table-cell office:value-type="float" office:value="1.6681198364633776" table:style-name="c11">
            <text:p>+1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00</text:p>
          </table:table-cell>
          <table:table-cell office:value-type="float" office:value="9.334665" table:style-name="c9">
            <text:p>9.3347</text:p>
          </table:table-cell>
          <table:table-cell office:value-type="string" table:style-name="c9">
            <text:p>2026-04-13 23:30</text:p>
          </table:table-cell>
          <table:table-cell office:value-type="float" office:value="9.41529" table:style-name="c9">
            <text:p>9.4153</text:p>
          </table:table-cell>
          <table:table-cell office:value-type="float" office:value="0.6620894835540403" table:style-name="c11">
            <text:p>+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45</text:p>
          </table:table-cell>
          <table:table-cell office:value-type="float" office:value="9.38469" table:style-name="c9">
            <text:p>9.3847</text:p>
          </table:table-cell>
          <table:table-cell office:value-type="string" table:style-name="c9">
            <text:p>2026-04-14 00:15</text:p>
          </table:table-cell>
          <table:table-cell office:value-type="float" office:value="9.33533" table:style-name="c9">
            <text:p>9.3353</text:p>
          </table:table-cell>
          <table:table-cell office:value-type="float" office:value="-0.7248116311780239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00:30</text:p>
          </table:table-cell>
          <table:table-cell office:value-type="float" office:value="9.06453" table:style-name="c9">
            <text:p>9.0645</text:p>
          </table:table-cell>
          <table:table-cell office:value-type="string" table:style-name="c9">
            <text:p>2026-04-15 01:00</text:p>
          </table:table-cell>
          <table:table-cell office:value-type="float" office:value="9.045475000000001" table:style-name="c9">
            <text:p>9.0455</text:p>
          </table:table-cell>
          <table:table-cell office:value-type="float" office:value="-0.4096947610631507" table:style-name="c10">
            <text:p>-0.4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7:30</text:p>
          </table:table-cell>
          <table:table-cell office:value-type="float" office:value="9.24462" table:style-name="c9">
            <text:p>9.2446</text:p>
          </table:table-cell>
          <table:table-cell office:value-type="string" table:style-name="c9">
            <text:p>2026-04-15 18:00</text:p>
          </table:table-cell>
          <table:table-cell office:value-type="float" office:value="9.245375000000001" table:style-name="c9">
            <text:p>9.2454</text:p>
          </table:table-cell>
          <table:table-cell office:value-type="float" office:value="-0.1917494134426101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9:45</text:p>
          </table:table-cell>
          <table:table-cell office:value-type="float" office:value="9.354674999999999" table:style-name="c9">
            <text:p>9.3547</text:p>
          </table:table-cell>
          <table:table-cell office:value-type="string" table:style-name="c9">
            <text:p>2026-04-15 20:15</text:p>
          </table:table-cell>
          <table:table-cell office:value-type="float" office:value="9.285355" table:style-name="c9">
            <text:p>9.2854</text:p>
          </table:table-cell>
          <table:table-cell office:value-type="float" office:value="-0.9394385656904092" table:style-name="c10">
            <text:p>-0.9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45</text:p>
          </table:table-cell>
          <table:table-cell office:value-type="float" office:value="9.334665" table:style-name="c9">
            <text:p>9.3347</text:p>
          </table:table-cell>
          <table:table-cell office:value-type="string" table:style-name="c9">
            <text:p>2026-04-16 03:15</text:p>
          </table:table-cell>
          <table:table-cell office:value-type="float" office:value="9.285355" table:style-name="c9">
            <text:p>9.2854</text:p>
          </table:table-cell>
          <table:table-cell office:value-type="float" office:value="-0.7270900953060488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5:30</text:p>
          </table:table-cell>
          <table:table-cell office:value-type="float" office:value="9.364679999999998" table:style-name="c9">
            <text:p>9.3647</text:p>
          </table:table-cell>
          <table:table-cell office:value-type="string" table:style-name="c9">
            <text:p>2026-04-16 06:00</text:p>
          </table:table-cell>
          <table:table-cell office:value-type="float" office:value="9.305345" table:style-name="c9">
            <text:p>9.3053</text:p>
          </table:table-cell>
          <table:table-cell office:value-type="float" office:value="-0.832237563429794" table:style-name="c10">
            <text:p>-0.8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15</text:p>
          </table:table-cell>
          <table:table-cell office:value-type="float" office:value="9.414705" table:style-name="c9">
            <text:p>9.4147</text:p>
          </table:table-cell>
          <table:table-cell office:value-type="string" table:style-name="c9">
            <text:p>2026-04-16 13:45</text:p>
          </table:table-cell>
          <table:table-cell office:value-type="float" office:value="9.37531" table:style-name="c9">
            <text:p>9.3753</text:p>
          </table:table-cell>
          <table:table-cell office:value-type="float" office:value="-0.617504687507453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9.42471" table:style-name="c9">
            <text:p>9.4247</text:p>
          </table:table-cell>
          <table:table-cell office:value-type="string" table:style-name="c9">
            <text:p>2026-04-16 16:15</text:p>
          </table:table-cell>
          <table:table-cell office:value-type="float" office:value="9.425285" table:style-name="c9">
            <text:p>9.4253</text:p>
          </table:table-cell>
          <table:table-cell office:value-type="float" office:value="-0.19381121238742915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7:15</text:p>
          </table:table-cell>
          <table:table-cell office:value-type="float" office:value="9.454724999999998" table:style-name="c9">
            <text:p>9.4547</text:p>
          </table:table-cell>
          <table:table-cell office:value-type="string" table:style-name="c9">
            <text:p>2026-04-17 07:45</text:p>
          </table:table-cell>
          <table:table-cell office:value-type="float" office:value="9.45527" table:style-name="c9">
            <text:p>9.4553</text:p>
          </table:table-cell>
          <table:table-cell office:value-type="float" office:value="-0.19414720925249318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00</text:p>
          </table:table-cell>
          <table:table-cell office:value-type="float" office:value="9.474735" table:style-name="c9">
            <text:p>9.4747</text:p>
          </table:table-cell>
          <table:table-cell office:value-type="string" table:style-name="c9">
            <text:p>2026-04-17 08:30</text:p>
          </table:table-cell>
          <table:table-cell office:value-type="float" office:value="9.485255" table:style-name="c9">
            <text:p>9.4853</text:p>
          </table:table-cell>
          <table:table-cell office:value-type="float" office:value="-0.08908982409534527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45</text:p>
          </table:table-cell>
          <table:table-cell office:value-type="float" office:value="9.534764999999998" table:style-name="c9">
            <text:p>9.5348</text:p>
          </table:table-cell>
          <table:table-cell office:value-type="string" table:style-name="c9">
            <text:p>2026-04-17 09:15</text:p>
          </table:table-cell>
          <table:table-cell office:value-type="float" office:value="9.51524" table:style-name="c9">
            <text:p>9.5152</text:p>
          </table:table-cell>
          <table:table-cell office:value-type="float" office:value="-0.40426759086352737" table:style-name="c10">
            <text:p>-0.4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9:30</text:p>
          </table:table-cell>
          <table:table-cell office:value-type="float" office:value="9.58479" table:style-name="c9">
            <text:p>9.5848</text:p>
          </table:table-cell>
          <table:table-cell office:value-type="string" table:style-name="c9">
            <text:p>2026-04-17 10:00</text:p>
          </table:table-cell>
          <table:table-cell office:value-type="float" office:value="9.55522" table:style-name="c9">
            <text:p>9.5552</text:p>
          </table:table-cell>
          <table:table-cell office:value-type="float" office:value="-0.5077929175287044" table:style-name="c10">
            <text:p>-0.5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30</text:p>
          </table:table-cell>
          <table:table-cell office:value-type="float" office:value="9.72486" table:style-name="c9">
            <text:p>9.7249</text:p>
          </table:table-cell>
          <table:table-cell office:value-type="string" table:style-name="c9">
            <text:p>2026-04-17 14:00</text:p>
          </table:table-cell>
          <table:table-cell office:value-type="float" office:value="9.785105" table:style-name="c9">
            <text:p>9.7851</text:p>
          </table:table-cell>
          <table:table-cell office:value-type="float" office:value="0.4183564092953507" table:style-name="c11">
            <text:p>+0.4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05:30</text:p>
          </table:table-cell>
          <table:table-cell office:value-type="float" office:value="9.414705" table:style-name="c9">
            <text:p>9.4147</text:p>
          </table:table-cell>
          <table:table-cell office:value-type="string" table:style-name="c9">
            <text:p>2026-04-26 06:00</text:p>
          </table:table-cell>
          <table:table-cell office:value-type="float" office:value="9.385305" table:style-name="c9">
            <text:p>9.3853</text:p>
          </table:table-cell>
          <table:table-cell office:value-type="float" office:value="-0.5115531999674849" table:style-name="c10">
            <text:p>-0.5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11:45</text:p>
          </table:table-cell>
          <table:table-cell office:value-type="float" office:value="9.48474" table:style-name="c9">
            <text:p>9.4847</text:p>
          </table:table-cell>
          <table:table-cell office:value-type="string" table:style-name="c9">
            <text:p>2026-04-26 12:15</text:p>
          </table:table-cell>
          <table:table-cell office:value-type="float" office:value="9.45527" table:style-name="c9">
            <text:p>9.4553</text:p>
          </table:table-cell>
          <table:table-cell office:value-type="float" office:value="-0.5099885155523509" table:style-name="c10">
            <text:p>-0.5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6 22:15</text:p>
          </table:table-cell>
          <table:table-cell office:value-type="float" office:value="9.494745" table:style-name="c9">
            <text:p>9.4947</text:p>
          </table:table-cell>
          <table:table-cell office:value-type="string" table:style-name="c9">
            <text:p>2026-04-26 22:45</text:p>
          </table:table-cell>
          <table:table-cell office:value-type="float" office:value="9.445275" table:style-name="c9">
            <text:p>9.4453</text:p>
          </table:table-cell>
          <table:table-cell office:value-type="float" office:value="-0.7198835221482902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00</text:p>
          </table:table-cell>
          <table:table-cell office:value-type="float" office:value="9.394695" table:style-name="c9">
            <text:p>9.3947</text:p>
          </table:table-cell>
          <table:table-cell office:value-type="string" table:style-name="c9">
            <text:p>2026-04-29 10:30</text:p>
          </table:table-cell>
          <table:table-cell office:value-type="float" office:value="9.405295" table:style-name="c9">
            <text:p>9.4053</text:p>
          </table:table-cell>
          <table:table-cell office:value-type="float" office:value="-0.08729591226750433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4:00</text:p>
          </table:table-cell>
          <table:table-cell office:value-type="float" office:value="9.264629999999999" table:style-name="c9">
            <text:p>9.2646</text:p>
          </table:table-cell>
          <table:table-cell office:value-type="string" table:style-name="c9">
            <text:p>2026-05-01 14:30</text:p>
          </table:table-cell>
          <table:table-cell office:value-type="float" office:value="9.225385000000001" table:style-name="c9">
            <text:p>9.2254</text:p>
          </table:table-cell>
          <table:table-cell office:value-type="float" office:value="-0.6226535178954551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21:45</text:p>
          </table:table-cell>
          <table:table-cell office:value-type="float" office:value="9.214605" table:style-name="c9">
            <text:p>9.2146</text:p>
          </table:table-cell>
          <table:table-cell office:value-type="string" table:style-name="c9">
            <text:p>2026-05-02 22:15</text:p>
          </table:table-cell>
          <table:table-cell office:value-type="float" office:value="9.205395000000001" table:style-name="c9">
            <text:p>9.2054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11:45</text:p>
          </table:table-cell>
          <table:table-cell office:value-type="float" office:value="9.18459" table:style-name="c9">
            <text:p>9.1846</text:p>
          </table:table-cell>
          <table:table-cell office:value-type="string" table:style-name="c9">
            <text:p>2026-05-03 12:15</text:p>
          </table:table-cell>
          <table:table-cell office:value-type="float" office:value="9.1954" table:style-name="c9">
            <text:p>9.1954</text:p>
          </table:table-cell>
          <table:table-cell office:value-type="float" office:value="-0.08243813387424082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22:15</text:p>
          </table:table-cell>
          <table:table-cell office:value-type="float" office:value="9.194595" table:style-name="c9">
            <text:p>9.1946</text:p>
          </table:table-cell>
          <table:table-cell office:value-type="string" table:style-name="c9">
            <text:p>2026-05-03 22:45</text:p>
          </table:table-cell>
          <table:table-cell office:value-type="float" office:value="9.205395000000001" table:style-name="c9">
            <text:p>9.2054</text:p>
          </table:table-cell>
          <table:table-cell office:value-type="float" office:value="-0.0826744908829502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15</text:p>
          </table:table-cell>
          <table:table-cell office:value-type="float" office:value="9.274634999999998" table:style-name="c9">
            <text:p>9.2746</text:p>
          </table:table-cell>
          <table:table-cell office:value-type="string" table:style-name="c9">
            <text:p>2026-05-04 02:45</text:p>
          </table:table-cell>
          <table:table-cell office:value-type="float" office:value="9.325335" table:style-name="c9">
            <text:p>9.3253</text:p>
          </table:table-cell>
          <table:table-cell office:value-type="float" office:value="0.34565948239475563" table:style-name="c11">
            <text:p>+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9:00</text:p>
          </table:table-cell>
          <table:table-cell office:value-type="float" office:value="9.4047" table:style-name="c9">
            <text:p>9.4047</text:p>
          </table:table-cell>
          <table:table-cell office:value-type="string" table:style-name="c9">
            <text:p>2026-05-04 09:30</text:p>
          </table:table-cell>
          <table:table-cell office:value-type="float" office:value="9.49525" table:style-name="c9">
            <text:p>9.4953</text:p>
          </table:table-cell>
          <table:table-cell office:value-type="float" office:value="0.7609917939966238" table:style-name="c11">
            <text:p>+0.8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9:45</text:p>
          </table:table-cell>
          <table:table-cell office:value-type="float" office:value="9.64482" table:style-name="c9">
            <text:p>9.6448</text:p>
          </table:table-cell>
          <table:table-cell office:value-type="string" table:style-name="c9">
            <text:p>2026-05-04 10:15</text:p>
          </table:table-cell>
          <table:table-cell office:value-type="float" office:value="9.345325" table:style-name="c9">
            <text:p>9.3453</text:p>
          </table:table-cell>
          <table:table-cell office:value-type="float" office:value="-3.2989346060890656" table:style-name="c10">
            <text:p>-3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0:45</text:p>
          </table:table-cell>
          <table:table-cell office:value-type="float" office:value="9.48474" table:style-name="c9">
            <text:p>9.4847</text:p>
          </table:table-cell>
          <table:table-cell office:value-type="string" table:style-name="c9">
            <text:p>2026-05-04 11:15</text:p>
          </table:table-cell>
          <table:table-cell office:value-type="float" office:value="9.43528" table:style-name="c9">
            <text:p>9.4353</text:p>
          </table:table-cell>
          <table:table-cell office:value-type="float" office:value="-0.720326806217142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00</text:p>
          </table:table-cell>
          <table:table-cell office:value-type="float" office:value="9.524759999999999" table:style-name="c9">
            <text:p>9.5248</text:p>
          </table:table-cell>
          <table:table-cell office:value-type="string" table:style-name="c9">
            <text:p>2026-05-04 15:30</text:p>
          </table:table-cell>
          <table:table-cell office:value-type="float" office:value="9.445275" table:style-name="c9">
            <text:p>9.4453</text:p>
          </table:table-cell>
          <table:table-cell office:value-type="float" office:value="-1.0327410320574715" table:style-name="c10">
            <text:p>-1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2:45</text:p>
          </table:table-cell>
          <table:table-cell office:value-type="float" office:value="9.50475" table:style-name="c9">
            <text:p>9.5047</text:p>
          </table:table-cell>
          <table:table-cell office:value-type="string" table:style-name="c9">
            <text:p>2026-05-05 03:15</text:p>
          </table:table-cell>
          <table:table-cell office:value-type="float" office:value="9.49525" table:style-name="c9">
            <text:p>9.4953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7:45</text:p>
          </table:table-cell>
          <table:table-cell office:value-type="float" office:value="9.624809999999998" table:style-name="c9">
            <text:p>9.6248</text:p>
          </table:table-cell>
          <table:table-cell office:value-type="string" table:style-name="c9">
            <text:p>2026-05-05 08:15</text:p>
          </table:table-cell>
          <table:table-cell office:value-type="float" office:value="9.61519" table:style-name="c9">
            <text:p>9.6152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0:00</text:p>
          </table:table-cell>
          <table:table-cell office:value-type="float" office:value="9.624809999999998" table:style-name="c9">
            <text:p>9.6248</text:p>
          </table:table-cell>
          <table:table-cell office:value-type="string" table:style-name="c9">
            <text:p>2026-05-05 10:30</text:p>
          </table:table-cell>
          <table:table-cell office:value-type="float" office:value="9.65517" table:style-name="c9">
            <text:p>9.6552</text:p>
          </table:table-cell>
          <table:table-cell office:value-type="float" office:value="0.11490424403184374" table:style-name="c11">
            <text:p>+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0:45</text:p>
          </table:table-cell>
          <table:table-cell office:value-type="float" office:value="9.68484" table:style-name="c9">
            <text:p>9.6848</text:p>
          </table:table-cell>
          <table:table-cell office:value-type="string" table:style-name="c9">
            <text:p>2026-05-05 11:15</text:p>
          </table:table-cell>
          <table:table-cell office:value-type="float" office:value="9.67516" table:style-name="c9">
            <text:p>9.6752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1:00</text:p>
          </table:table-cell>
          <table:table-cell office:value-type="float" office:value="9.794894999999999" table:style-name="c9">
            <text:p>9.7949</text:p>
          </table:table-cell>
          <table:table-cell office:value-type="string" table:style-name="c9">
            <text:p>2026-05-05 21:30</text:p>
          </table:table-cell>
          <table:table-cell office:value-type="float" office:value="9.785105" table:style-name="c9">
            <text:p>9.7851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2:30</text:p>
          </table:table-cell>
          <table:table-cell office:value-type="float" office:value="9.84492" table:style-name="c9">
            <text:p>9.8449</text:p>
          </table:table-cell>
          <table:table-cell office:value-type="string" table:style-name="c9">
            <text:p>2026-05-05 23:00</text:p>
          </table:table-cell>
          <table:table-cell office:value-type="float" office:value="9.785105" table:style-name="c9">
            <text:p>9.7851</text:p>
          </table:table-cell>
          <table:table-cell office:value-type="float" office:value="-0.8062576932570287" table:style-name="c10">
            <text:p>-0.8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5:15</text:p>
          </table:table-cell>
          <table:table-cell office:value-type="float" office:value="10.025009999999998" table:style-name="c9">
            <text:p>10.025</text:p>
          </table:table-cell>
          <table:table-cell office:value-type="string" table:style-name="c9">
            <text:p>2026-05-07 05:45</text:p>
          </table:table-cell>
          <table:table-cell office:value-type="float" office:value="9.995000000000001" table:style-name="c9">
            <text:p>9.995</text:p>
          </table:table-cell>
          <table:table-cell office:value-type="float" office:value="-0.4986529190494471" table:style-name="c10">
            <text:p>-0.5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4:30</text:p>
          </table:table-cell>
          <table:table-cell office:value-type="float" office:value="9.894945" table:style-name="c9">
            <text:p>9.8949</text:p>
          </table:table-cell>
          <table:table-cell office:value-type="string" table:style-name="c9">
            <text:p>2026-05-08 05:00</text:p>
          </table:table-cell>
          <table:table-cell office:value-type="float" office:value="9.845075" table:style-name="c9">
            <text:p>9.8451</text:p>
          </table:table-cell>
          <table:table-cell office:value-type="float" office:value="-0.7028872310558709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7:45</text:p>
          </table:table-cell>
          <table:table-cell office:value-type="float" office:value="10.26513" table:style-name="c9">
            <text:p>10.265</text:p>
          </table:table-cell>
          <table:table-cell office:value-type="string" table:style-name="c9">
            <text:p>2026-05-08 18:15</text:p>
          </table:table-cell>
          <table:table-cell office:value-type="float" office:value="10.41479" table:style-name="c9">
            <text:p>10.415</text:p>
          </table:table-cell>
          <table:table-cell office:value-type="float" office:value="1.2551310581551567" table:style-name="c11">
            <text:p>+1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8:30</text:p>
          </table:table-cell>
          <table:table-cell office:value-type="float" office:value="10.42521" table:style-name="c9">
            <text:p>10.425</text:p>
          </table:table-cell>
          <table:table-cell office:value-type="string" table:style-name="c9">
            <text:p>2026-05-08 19:00</text:p>
          </table:table-cell>
          <table:table-cell office:value-type="float" office:value="10.374810000000002" table:style-name="c9">
            <text:p>10.375</text:p>
          </table:table-cell>
          <table:table-cell office:value-type="float" office:value="-0.6823770954254016" table:style-name="c10">
            <text:p>-0.7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45</text:p>
          </table:table-cell>
          <table:table-cell office:value-type="float" office:value="10.515255" table:style-name="c9">
            <text:p>10.515</text:p>
          </table:table-cell>
          <table:table-cell office:value-type="string" table:style-name="c9">
            <text:p>2026-05-09 02:15</text:p>
          </table:table-cell>
          <table:table-cell office:value-type="float" office:value="10.544725000000001" table:style-name="c9">
            <text:p>10.545</text:p>
          </table:table-cell>
          <table:table-cell office:value-type="float" office:value="0.07979925094543372" table:style-name="c11">
            <text:p>+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18:15</text:p>
          </table:table-cell>
          <table:table-cell office:value-type="float" office:value="10.42521" table:style-name="c9">
            <text:p>10.425</text:p>
          </table:table-cell>
          <table:table-cell office:value-type="string" table:style-name="c9">
            <text:p>2026-05-09 18:45</text:p>
          </table:table-cell>
          <table:table-cell office:value-type="float" office:value="10.41479" table:style-name="c9">
            <text:p>10.415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7:45</text:p>
          </table:table-cell>
          <table:table-cell office:value-type="float" office:value="10.46523" table:style-name="c9">
            <text:p>10.465</text:p>
          </table:table-cell>
          <table:table-cell office:value-type="string" table:style-name="c9">
            <text:p>2026-05-10 08:15</text:p>
          </table:table-cell>
          <table:table-cell office:value-type="float" office:value="10.454770000000002" table:style-name="c9">
            <text:p>10.455</text:p>
          </table:table-cell>
          <table:table-cell office:value-type="float" office:value="-0.2996502248875266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8:30</text:p>
          </table:table-cell>
          <table:table-cell office:value-type="float" office:value="10.48524" table:style-name="c9">
            <text:p>10.485</text:p>
          </table:table-cell>
          <table:table-cell office:value-type="string" table:style-name="c9">
            <text:p>2026-05-10 09:00</text:p>
          </table:table-cell>
          <table:table-cell office:value-type="float" office:value="10.49475" table:style-name="c9">
            <text:p>10.495</text:p>
          </table:table-cell>
          <table:table-cell office:value-type="float" office:value="-0.1093823818052897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3:30</text:p>
          </table:table-cell>
          <table:table-cell office:value-type="float" office:value="10.56528" table:style-name="c9">
            <text:p>10.565</text:p>
          </table:table-cell>
          <table:table-cell office:value-type="string" table:style-name="c9">
            <text:p>2026-05-10 14:00</text:p>
          </table:table-cell>
          <table:table-cell office:value-type="float" office:value="10.584705" table:style-name="c9">
            <text:p>10.585</text:p>
          </table:table-cell>
          <table:table-cell office:value-type="float" office:value="-0.016410594844618043" table:style-name="c10">
            <text:p>-0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00</text:p>
          </table:table-cell>
          <table:table-cell office:value-type="float" office:value="10.635315" table:style-name="c9">
            <text:p>10.635</text:p>
          </table:table-cell>
          <table:table-cell office:value-type="string" table:style-name="c9">
            <text:p>2026-05-10 16:30</text:p>
          </table:table-cell>
          <table:table-cell office:value-type="float" office:value="10.654670000000001" table:style-name="c9">
            <text:p>10.655</text:p>
          </table:table-cell>
          <table:table-cell office:value-type="float" office:value="-0.01827576644415352" table:style-name="c10">
            <text:p>-0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3:15</text:p>
          </table:table-cell>
          <table:table-cell office:value-type="float" office:value="10.74537" table:style-name="c9">
            <text:p>10.745</text:p>
          </table:table-cell>
          <table:table-cell office:value-type="string" table:style-name="c9">
            <text:p>2026-05-10 23:45</text:p>
          </table:table-cell>
          <table:table-cell office:value-type="float" office:value="10.754620000000001" table:style-name="c9">
            <text:p>10.755</text:p>
          </table:table-cell>
          <table:table-cell office:value-type="float" office:value="-0.11398849346274664" table:style-name="c10">
            <text:p>-0.1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01:30</text:p>
          </table:table-cell>
          <table:table-cell office:value-type="float" office:value="10.715355" table:style-name="c9">
            <text:p>10.715</text:p>
          </table:table-cell>
          <table:table-cell office:value-type="string" table:style-name="c9">
            <text:p>2026-05-11 02:00</text:p>
          </table:table-cell>
          <table:table-cell office:value-type="float" office:value="10.674660000000001" table:style-name="c9">
            <text:p>10.675</text:p>
          </table:table-cell>
          <table:table-cell office:value-type="float" office:value="-0.5789229133332463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16:15</text:p>
          </table:table-cell>
          <table:table-cell office:value-type="float" office:value="10.64532" table:style-name="c9">
            <text:p>10.645</text:p>
          </table:table-cell>
          <table:table-cell office:value-type="string" table:style-name="c9">
            <text:p>2026-05-11 16:45</text:p>
          </table:table-cell>
          <table:table-cell office:value-type="float" office:value="10.554720000000001" table:style-name="c9">
            <text:p>10.555</text:p>
          </table:table-cell>
          <table:table-cell office:value-type="float" office:value="-1.0492769149259673" table:style-name="c10">
            <text:p>-1.0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09:15</text:p>
          </table:table-cell>
          <table:table-cell office:value-type="float" office:value="10.72536" table:style-name="c9">
            <text:p>10.725</text:p>
          </table:table-cell>
          <table:table-cell office:value-type="string" table:style-name="c9">
            <text:p>2026-05-13 09:45</text:p>
          </table:table-cell>
          <table:table-cell office:value-type="float" office:value="10.724635000000001" table:style-name="c9">
            <text:p>10.725</text:p>
          </table:table-cell>
          <table:table-cell office:value-type="float" office:value="-0.20664616726152607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8:30</text:p>
          </table:table-cell>
          <table:table-cell office:value-type="float" office:value="9.741868499999999" table:style-name="c9">
            <text:p>9.7419</text:p>
          </table:table-cell>
          <table:table-cell office:value-type="string" table:style-name="c9">
            <text:p>2026-05-21 09:00</text:p>
          </table:table-cell>
          <table:table-cell office:value-type="float" office:value="9.673161000000002" table:style-name="c9">
            <text:p>9.6732</text:p>
          </table:table-cell>
          <table:table-cell office:value-type="float" office:value="-0.9037706558961967" table:style-name="c10">
            <text:p>-0.9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5:30</text:p>
          </table:table-cell>
          <table:table-cell office:value-type="float" office:value="9.6838395" table:style-name="c9">
            <text:p>9.6838</text:p>
          </table:table-cell>
          <table:table-cell office:value-type="string" table:style-name="c9">
            <text:p>2026-05-21 16:00</text:p>
          </table:table-cell>
          <table:table-cell office:value-type="float" office:value="9.6441755" table:style-name="c9">
            <text:p>9.6442</text:p>
          </table:table-cell>
          <table:table-cell office:value-type="float" office:value="-0.6086708358239545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30</text:p>
          </table:table-cell>
          <table:table-cell office:value-type="float" office:value="9.8079015" table:style-name="c9">
            <text:p>9.8079</text:p>
          </table:table-cell>
          <table:table-cell office:value-type="string" table:style-name="c9">
            <text:p>2026-05-21 18:00</text:p>
          </table:table-cell>
          <table:table-cell office:value-type="float" office:value="9.804095499999999" table:style-name="c9">
            <text:p>9.8041</text:p>
          </table:table-cell>
          <table:table-cell office:value-type="float" office:value="-0.23862787472429536" table:style-name="c10">
            <text:p>-0.2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3:15</text:p>
          </table:table-cell>
          <table:table-cell office:value-type="float" office:value="10.0140045" table:style-name="c9">
            <text:p>10.014</text:p>
          </table:table-cell>
          <table:table-cell office:value-type="string" table:style-name="c9">
            <text:p>2026-05-22 13:45</text:p>
          </table:table-cell>
          <table:table-cell office:value-type="float" office:value="9.957019" table:style-name="c9">
            <text:p>9.957</text:p>
          </table:table-cell>
          <table:table-cell office:value-type="float" office:value="-0.7678205155689621" table:style-name="c10">
            <text:p>-0.8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4:30</text:p>
          </table:table-cell>
          <table:table-cell office:value-type="float" office:value="9.64482" table:style-name="c9">
            <text:p>9.6448</text:p>
          </table:table-cell>
          <table:table-cell office:value-type="string" table:style-name="c9">
            <text:p>2026-05-25 15:00</text:p>
          </table:table-cell>
          <table:table-cell office:value-type="float" office:value="9.6101925" table:style-name="c9">
            <text:p>9.6102</text:p>
          </table:table-cell>
          <table:table-cell office:value-type="float" office:value="-0.55820922326697" table:style-name="c10">
            <text:p>-0.6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06:00</text:p>
          </table:table-cell>
          <table:table-cell office:value-type="float" office:value="9.530762999999999" table:style-name="c9">
            <text:p>9.5308</text:p>
          </table:table-cell>
          <table:table-cell office:value-type="string" table:style-name="c9">
            <text:p>2026-05-26 06:30</text:p>
          </table:table-cell>
          <table:table-cell office:value-type="float" office:value="9.500247500000002" table:style-name="c9">
            <text:p>9.5002</text:p>
          </table:table-cell>
          <table:table-cell office:value-type="float" office:value="-0.5194389447360837" table:style-name="c10">
            <text:p>-0.5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08:30</text:p>
          </table:table-cell>
          <table:table-cell office:value-type="float" office:value="9.542769" table:style-name="c9">
            <text:p>9.5428</text:p>
          </table:table-cell>
          <table:table-cell office:value-type="string" table:style-name="c9">
            <text:p>2026-05-26 09:00</text:p>
          </table:table-cell>
          <table:table-cell office:value-type="float" office:value="9.53523" table:style-name="c9">
            <text:p>9.5352</text:p>
          </table:table-cell>
          <table:table-cell office:value-type="float" office:value="-0.27874430126099137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0:30</text:p>
          </table:table-cell>
          <table:table-cell office:value-type="float" office:value="9.606800999999999" table:style-name="c9">
            <text:p>9.6068</text:p>
          </table:table-cell>
          <table:table-cell office:value-type="string" table:style-name="c9">
            <text:p>2026-05-26 11:00</text:p>
          </table:table-cell>
          <table:table-cell office:value-type="float" office:value="9.597199000000002" table:style-name="c9">
            <text:p>9.5972</text:p>
          </table:table-cell>
          <table:table-cell office:value-type="float" office:value="-0.2996502248875266" table:style-name="c10">
            <text:p>-0.3</text:p>
          </table:table-cell>
        </table:table-row>
        <table:table-row>
          <table:table-cell office:value-type="string" table:style-name="c8">
            <text:p>LINK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03:15</text:p>
          </table:table-cell>
          <table:table-cell office:value-type="float" office:value="9.186591" table:style-name="c9">
            <text:p>9.1866</text:p>
          </table:table-cell>
          <table:table-cell office:value-type="string" table:style-name="c9">
            <text:p>2026-06-01 03:45</text:p>
          </table:table-cell>
          <table:table-cell office:value-type="float" office:value="9.1844055" table:style-name="c9">
            <text:p>9.1844</text:p>
          </table:table-cell>
          <table:table-cell office:value-type="float" office:value="-0.22364255243862985" table:style-name="c10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30</text:p>
          </table:table-cell>
          <table:table-cell office:value-type="float" office:value="54.617295" table:style-name="c1">
            <text:p>54.617</text:p>
          </table:table-cell>
          <table:table-cell office:value-type="string" table:style-name="c1">
            <text:p>2026-03-11 14:00</text:p>
          </table:table-cell>
          <table:table-cell office:value-type="float" office:value="54.572700000000005" table:style-name="c1">
            <text:p>54.573</text:p>
          </table:table-cell>
          <table:table-cell office:value-type="float" office:value="-0.2813867426059824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54.64731" table:style-name="c1">
            <text:p>54.647</text:p>
          </table:table-cell>
          <table:table-cell office:value-type="string" table:style-name="c1">
            <text:p>2026-03-12 10:15</text:p>
          </table:table-cell>
          <table:table-cell office:value-type="float" office:value="54.382795" table:style-name="c1">
            <text:p>54.383</text:p>
          </table:table-cell>
          <table:table-cell office:value-type="float" office:value="-0.6829726974758699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55.237604999999995" table:style-name="c1">
            <text:p>55.238</text:p>
          </table:table-cell>
          <table:table-cell office:value-type="string" table:style-name="c1">
            <text:p>2026-03-13 01:00</text:p>
          </table:table-cell>
          <table:table-cell office:value-type="float" office:value="55.03247" table:style-name="c1">
            <text:p>55.032</text:p>
          </table:table-cell>
          <table:table-cell office:value-type="float" office:value="-0.5705260167054527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55.927949999999996" table:style-name="c1">
            <text:p>55.928</text:p>
          </table:table-cell>
          <table:table-cell office:value-type="string" table:style-name="c1">
            <text:p>2026-03-13 10:45</text:p>
          </table:table-cell>
          <table:table-cell office:value-type="float" office:value="55.922025000000005" table:style-name="c1">
            <text:p>55.922</text:p>
          </table:table-cell>
          <table:table-cell office:value-type="float" office:value="-0.21047281006184582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00</text:p>
          </table:table-cell>
          <table:table-cell office:value-type="float" office:value="56.278124999999996" table:style-name="c1">
            <text:p>56.278</text:p>
          </table:table-cell>
          <table:table-cell office:value-type="string" table:style-name="c1">
            <text:p>2026-03-13 13:30</text:p>
          </table:table-cell>
          <table:table-cell office:value-type="float" office:value="56.401785000000004" table:style-name="c1">
            <text:p>56.402</text:p>
          </table:table-cell>
          <table:table-cell office:value-type="float" office:value="0.019390894392823377" table:style-name="c13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56.57827499999999" table:style-name="c1">
            <text:p>56.578</text:p>
          </table:table-cell>
          <table:table-cell office:value-type="string" table:style-name="c1">
            <text:p>2026-03-13 14:15</text:p>
          </table:table-cell>
          <table:table-cell office:value-type="float" office:value="56.53172000000001" table:style-name="c1">
            <text:p>56.532</text:p>
          </table:table-cell>
          <table:table-cell office:value-type="float" office:value="-0.2820197474737274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3-15 22:30</text:p>
          </table:table-cell>
          <table:table-cell office:value-type="float" office:value="55.55221" table:style-name="c1">
            <text:p>55.552</text:p>
          </table:table-cell>
          <table:table-cell office:value-type="float" office:value="-0.5679985555221645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56.028" table:style-name="c1">
            <text:p>56.028</text:p>
          </table:table-cell>
          <table:table-cell office:value-type="string" table:style-name="c1">
            <text:p>2026-03-15 23:15</text:p>
          </table:table-cell>
          <table:table-cell office:value-type="float" office:value="56.23187" table:style-name="c1">
            <text:p>56.232</text:p>
          </table:table-cell>
          <table:table-cell office:value-type="float" office:value="0.16324425621119243" table:style-name="c13">
            <text:p>+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56.798385" table:style-name="c1">
            <text:p>56.798</text:p>
          </table:table-cell>
          <table:table-cell office:value-type="string" table:style-name="c1">
            <text:p>2026-03-16 04:15</text:p>
          </table:table-cell>
          <table:table-cell office:value-type="float" office:value="56.87155" table:style-name="c1">
            <text:p>56.872</text:p>
          </table:table-cell>
          <table:table-cell office:value-type="float" office:value="-0.07134221941346164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57.92894999999999" table:style-name="c1">
            <text:p>57.929</text:p>
          </table:table-cell>
          <table:table-cell office:value-type="string" table:style-name="c1">
            <text:p>2026-03-16 14:15</text:p>
          </table:table-cell>
          <table:table-cell office:value-type="float" office:value="57.990990000000004" table:style-name="c1">
            <text:p>57.991</text:p>
          </table:table-cell>
          <table:table-cell office:value-type="float" office:value="-0.09301737561270285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58.259114999999994" table:style-name="c1">
            <text:p>58.259</text:p>
          </table:table-cell>
          <table:table-cell office:value-type="string" table:style-name="c1">
            <text:p>2026-03-16 15:30</text:p>
          </table:table-cell>
          <table:table-cell office:value-type="float" office:value="58.13092" table:style-name="c1">
            <text:p>58.131</text:p>
          </table:table-cell>
          <table:table-cell office:value-type="float" office:value="-0.41950295516844927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58.34916" table:style-name="c1">
            <text:p>58.349</text:p>
          </table:table-cell>
          <table:table-cell office:value-type="string" table:style-name="c1">
            <text:p>2026-03-16 17:15</text:p>
          </table:table-cell>
          <table:table-cell office:value-type="float" office:value="58.340815" table:style-name="c1">
            <text:p>58.341</text:p>
          </table:table-cell>
          <table:table-cell office:value-type="float" office:value="-0.21417324462769116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9:15</text:p>
          </table:table-cell>
          <table:table-cell office:value-type="float" office:value="56.108039999999995" table:style-name="c1">
            <text:p>56.108</text:p>
          </table:table-cell>
          <table:table-cell office:value-type="string" table:style-name="c1">
            <text:p>2026-03-21 19:45</text:p>
          </table:table-cell>
          <table:table-cell office:value-type="float" office:value="55.842065" table:style-name="c1">
            <text:p>55.842</text:p>
          </table:table-cell>
          <table:table-cell office:value-type="float" office:value="-0.672993189451998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5:45</text:p>
          </table:table-cell>
          <table:table-cell office:value-type="float" office:value="55.837905" table:style-name="c1">
            <text:p>55.838</text:p>
          </table:table-cell>
          <table:table-cell office:value-type="string" table:style-name="c1">
            <text:p>2026-03-24 16:15</text:p>
          </table:table-cell>
          <table:table-cell office:value-type="float" office:value="55.85206000000001" table:style-name="c1">
            <text:p>55.852</text:p>
          </table:table-cell>
          <table:table-cell office:value-type="float" office:value="-0.17460051185658187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8:45</text:p>
          </table:table-cell>
          <table:table-cell office:value-type="float" office:value="56.71834499999999" table:style-name="c1">
            <text:p>56.718</text:p>
          </table:table-cell>
          <table:table-cell office:value-type="string" table:style-name="c1">
            <text:p>2026-03-25 09:15</text:p>
          </table:table-cell>
          <table:table-cell office:value-type="float" office:value="56.35181000000001" table:style-name="c1">
            <text:p>56.352</text:p>
          </table:table-cell>
          <table:table-cell office:value-type="float" office:value="-0.8448452933349504" table:style-name="c12">
            <text:p>-0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54.687329999999996" table:style-name="c1">
            <text:p>54.687</text:p>
          </table:table-cell>
          <table:table-cell office:value-type="string" table:style-name="c1">
            <text:p>2026-04-01 06:45</text:p>
          </table:table-cell>
          <table:table-cell office:value-type="float" office:value="54.652660000000004" table:style-name="c1">
            <text:p>54.653</text:p>
          </table:table-cell>
          <table:table-cell office:value-type="float" office:value="-0.26317003836169306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53.446709999999996" table:style-name="c1">
            <text:p>53.447</text:p>
          </table:table-cell>
          <table:table-cell office:value-type="string" table:style-name="c1">
            <text:p>2026-04-03 21:45</text:p>
          </table:table-cell>
          <table:table-cell office:value-type="float" office:value="53.383295" table:style-name="c1">
            <text:p>53.383</text:p>
          </table:table-cell>
          <table:table-cell office:value-type="float" office:value="-0.31831371230334193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53.916945" table:style-name="c1">
            <text:p>53.917</text:p>
          </table:table-cell>
          <table:table-cell office:value-type="string" table:style-name="c1">
            <text:p>2026-04-05 23:45</text:p>
          </table:table-cell>
          <table:table-cell office:value-type="float" office:value="53.973000000000006" table:style-name="c1">
            <text:p>53.973</text:p>
          </table:table-cell>
          <table:table-cell office:value-type="float" office:value="-0.09614236674573284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54.24711" table:style-name="c1">
            <text:p>54.247</text:p>
          </table:table-cell>
          <table:table-cell office:value-type="string" table:style-name="c1">
            <text:p>2026-04-06 00:45</text:p>
          </table:table-cell>
          <table:table-cell office:value-type="float" office:value="54.23287" table:style-name="c1">
            <text:p>54.233</text:p>
          </table:table-cell>
          <table:table-cell office:value-type="float" office:value="-0.22609777208407733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54.657315" table:style-name="c1">
            <text:p>54.657</text:p>
          </table:table-cell>
          <table:table-cell office:value-type="string" table:style-name="c1">
            <text:p>2026-04-07 23:15</text:p>
          </table:table-cell>
          <table:table-cell office:value-type="float" office:value="55.022475" table:style-name="c1">
            <text:p>55.022</text:p>
          </table:table-cell>
          <table:table-cell office:value-type="float" office:value="0.4668543862335728" table:style-name="c13">
            <text:p>+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3:15</text:p>
          </table:table-cell>
          <table:table-cell office:value-type="float" office:value="55.32764999999999" table:style-name="c1">
            <text:p>55.328</text:p>
          </table:table-cell>
          <table:table-cell office:value-type="string" table:style-name="c1">
            <text:p>2026-04-08 13:45</text:p>
          </table:table-cell>
          <table:table-cell office:value-type="float" office:value="55.14241500000001" table:style-name="c1">
            <text:p>55.142</text:p>
          </table:table-cell>
          <table:table-cell office:value-type="float" office:value="-0.5340271773425997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54.737355" table:style-name="c1">
            <text:p>54.737</text:p>
          </table:table-cell>
          <table:table-cell office:value-type="string" table:style-name="c1">
            <text:p>2026-04-09 16:30</text:p>
          </table:table-cell>
          <table:table-cell office:value-type="float" office:value="54.622675" table:style-name="c1">
            <text:p>54.623</text:p>
          </table:table-cell>
          <table:table-cell office:value-type="float" office:value="-0.40899076567546544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2:45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0 13:15</text:p>
          </table:table-cell>
          <table:table-cell office:value-type="float" office:value="55.00248500000001" table:style-name="c1">
            <text:p>55.002</text:p>
          </table:table-cell>
          <table:table-cell office:value-type="float" office:value="-0.09995906546906852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55.26762" table:style-name="c1">
            <text:p>55.268</text:p>
          </table:table-cell>
          <table:table-cell office:value-type="string" table:style-name="c1">
            <text:p>2026-04-10 15:00</text:p>
          </table:table-cell>
          <table:table-cell office:value-type="float" office:value="55.28234500000001" table:style-name="c1">
            <text:p>55.282</text:p>
          </table:table-cell>
          <table:table-cell office:value-type="float" office:value="-0.17331017267433468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5:15</text:p>
          </table:table-cell>
          <table:table-cell office:value-type="float" office:value="55.427699999999994" table:style-name="c1">
            <text:p>55.428</text:p>
          </table:table-cell>
          <table:table-cell office:value-type="string" table:style-name="c1">
            <text:p>2026-04-10 15:45</text:p>
          </table:table-cell>
          <table:table-cell office:value-type="float" office:value="55.122425" table:style-name="c1">
            <text:p>55.122</text:p>
          </table:table-cell>
          <table:table-cell office:value-type="float" office:value="-0.7495615505875075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1 17:30</text:p>
          </table:table-cell>
          <table:table-cell office:value-type="float" office:value="54.932520000000004" table:style-name="c1">
            <text:p>54.933</text:p>
          </table:table-cell>
          <table:table-cell office:value-type="float" office:value="-0.2270352578263024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55.517745" table:style-name="c1">
            <text:p>55.518</text:p>
          </table:table-cell>
          <table:table-cell office:value-type="string" table:style-name="c1">
            <text:p>2026-04-11 19:15</text:p>
          </table:table-cell>
          <table:table-cell office:value-type="float" office:value="55.41228" table:style-name="c1">
            <text:p>55.412</text:p>
          </table:table-cell>
          <table:table-cell office:value-type="float" office:value="-0.38948654654470394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55.137555" table:style-name="c1">
            <text:p>55.138</text:p>
          </table:table-cell>
          <table:table-cell office:value-type="string" table:style-name="c1">
            <text:p>2026-04-14 14:15</text:p>
          </table:table-cell>
          <table:table-cell office:value-type="float" office:value="55.022475" table:style-name="c1">
            <text:p>55.022</text:p>
          </table:table-cell>
          <table:table-cell office:value-type="float" office:value="-0.408197148975864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3:15</text:p>
          </table:table-cell>
          <table:table-cell office:value-type="float" office:value="54.74735999999999" table:style-name="c1">
            <text:p>54.747</text:p>
          </table:table-cell>
          <table:table-cell office:value-type="string" table:style-name="c1">
            <text:p>2026-04-15 13:45</text:p>
          </table:table-cell>
          <table:table-cell office:value-type="float" office:value="54.852560000000004" table:style-name="c1">
            <text:p>54.853</text:p>
          </table:table-cell>
          <table:table-cell office:value-type="float" office:value="-0.008128734317036646" table:style-name="c12">
            <text:p>-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55.607789999999994" table:style-name="c1">
            <text:p>55.608</text:p>
          </table:table-cell>
          <table:table-cell office:value-type="string" table:style-name="c1">
            <text:p>2026-04-15 20:15</text:p>
          </table:table-cell>
          <table:table-cell office:value-type="float" office:value="55.28234500000001" table:style-name="c1">
            <text:p>55.282</text:p>
          </table:table-cell>
          <table:table-cell office:value-type="float" office:value="-0.78398081933303" table:style-name="c12">
            <text:p>-0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55.897935" table:style-name="c1">
            <text:p>55.898</text:p>
          </table:table-cell>
          <table:table-cell office:value-type="string" table:style-name="c1">
            <text:p>2026-04-16 16:30</text:p>
          </table:table-cell>
          <table:table-cell office:value-type="float" office:value="55.642165000000006" table:style-name="c1">
            <text:p>55.642</text:p>
          </table:table-cell>
          <table:table-cell office:value-type="float" office:value="-0.6565514232949599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56.04801" table:style-name="c1">
            <text:p>56.048</text:p>
          </table:table-cell>
          <table:table-cell office:value-type="string" table:style-name="c1">
            <text:p>2026-04-17 08:15</text:p>
          </table:table-cell>
          <table:table-cell office:value-type="float" office:value="55.962005000000005" table:style-name="c1">
            <text:p>55.962</text:p>
          </table:table-cell>
          <table:table-cell office:value-type="float" office:value="-0.35304205804094213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30</text:p>
          </table:table-cell>
          <table:table-cell office:value-type="float" office:value="56.38818" table:style-name="c1">
            <text:p>56.388</text:p>
          </table:table-cell>
          <table:table-cell office:value-type="string" table:style-name="c1">
            <text:p>2026-04-17 10:00</text:p>
          </table:table-cell>
          <table:table-cell office:value-type="float" office:value="56.13192" table:style-name="c1">
            <text:p>56.132</text:p>
          </table:table-cell>
          <table:table-cell office:value-type="float" office:value="-0.6534484852676492" table:style-name="c12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56.668319999999994" table:style-name="c1">
            <text:p>56.668</text:p>
          </table:table-cell>
          <table:table-cell office:value-type="string" table:style-name="c1">
            <text:p>2026-04-17 13:30</text:p>
          </table:table-cell>
          <table:table-cell office:value-type="float" office:value="57.141415" table:style-name="c1">
            <text:p>57.141</text:p>
          </table:table-cell>
          <table:table-cell office:value-type="float" office:value="0.6332803079657445" table:style-name="c13">
            <text:p>+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17 14:15</text:p>
          </table:table-cell>
          <table:table-cell office:value-type="float" office:value="57.121425" table:style-name="c1">
            <text:p>57.121</text:p>
          </table:table-cell>
          <table:table-cell office:value-type="float" office:value="-0.543288712730372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56.058015" table:style-name="c1">
            <text:p>56.058</text:p>
          </table:table-cell>
          <table:table-cell office:value-type="string" table:style-name="c1">
            <text:p>2026-04-22 03:00</text:p>
          </table:table-cell>
          <table:table-cell office:value-type="float" office:value="55.91203" table:style-name="c1">
            <text:p>55.912</text:p>
          </table:table-cell>
          <table:table-cell office:value-type="float" office:value="-0.4597971368946907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56.268119999999996" table:style-name="c1">
            <text:p>56.268</text:p>
          </table:table-cell>
          <table:table-cell office:value-type="string" table:style-name="c1">
            <text:p>2026-04-22 06:00</text:p>
          </table:table-cell>
          <table:table-cell office:value-type="float" office:value="56.261855000000004" table:style-name="c1">
            <text:p>56.262</text:p>
          </table:table-cell>
          <table:table-cell office:value-type="float" office:value="-0.21101193383570305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56.498234999999994" table:style-name="c1">
            <text:p>56.498</text:p>
          </table:table-cell>
          <table:table-cell office:value-type="string" table:style-name="c1">
            <text:p>2026-04-24 11:45</text:p>
          </table:table-cell>
          <table:table-cell office:value-type="float" office:value="56.341815000000004" table:style-name="c1">
            <text:p>56.342</text:p>
          </table:table-cell>
          <table:table-cell office:value-type="float" office:value="-0.4762047667241087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56.158065" table:style-name="c1">
            <text:p>56.158</text:p>
          </table:table-cell>
          <table:table-cell office:value-type="string" table:style-name="c1">
            <text:p>2026-04-26 05:45</text:p>
          </table:table-cell>
          <table:table-cell office:value-type="float" office:value="56.03197000000001" table:style-name="c1">
            <text:p>56.032</text:p>
          </table:table-cell>
          <table:table-cell office:value-type="float" office:value="-0.42398702311055025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29 10:30</text:p>
          </table:table-cell>
          <table:table-cell office:value-type="float" office:value="57.311330000000005" table:style-name="c1">
            <text:p>57.311</text:p>
          </table:table-cell>
          <table:table-cell office:value-type="float" office:value="-0.21263647922937778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5-04 02:30</text:p>
          </table:table-cell>
          <table:table-cell office:value-type="float" office:value="55.902035000000005" table:style-name="c1">
            <text:p>55.902</text:p>
          </table:table-cell>
          <table:table-cell office:value-type="float" office:value="0.058147549291942546" table:style-name="c13">
            <text:p>+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56.148059999999994" table:style-name="c1">
            <text:p>56.148</text:p>
          </table:table-cell>
          <table:table-cell office:value-type="string" table:style-name="c1">
            <text:p>2026-05-04 03:15</text:p>
          </table:table-cell>
          <table:table-cell office:value-type="float" office:value="56.081945000000005" table:style-name="c1">
            <text:p>56.082</text:p>
          </table:table-cell>
          <table:table-cell office:value-type="float" office:value="-0.31741578970848616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56.20809" table:style-name="c1">
            <text:p>56.208</text:p>
          </table:table-cell>
          <table:table-cell office:value-type="string" table:style-name="c1">
            <text:p>2026-05-05 20:45</text:p>
          </table:table-cell>
          <table:table-cell office:value-type="float" office:value="56.321825000000004" table:style-name="c1">
            <text:p>56.322</text:p>
          </table:table-cell>
          <table:table-cell office:value-type="float" office:value="0.002041826763732324" table:style-name="c13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00</text:p>
          </table:table-cell>
          <table:table-cell office:value-type="float" office:value="57.178574999999995" table:style-name="c1">
            <text:p>57.179</text:p>
          </table:table-cell>
          <table:table-cell office:value-type="string" table:style-name="c1">
            <text:p>2026-05-06 08:30</text:p>
          </table:table-cell>
          <table:table-cell office:value-type="float" office:value="57.481245" table:style-name="c1">
            <text:p>57.481</text:p>
          </table:table-cell>
          <table:table-cell office:value-type="float" office:value="0.32838347448322924" table:style-name="c13">
            <text:p>+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45</text:p>
          </table:table-cell>
          <table:table-cell office:value-type="float" office:value="57.58878" table:style-name="c1">
            <text:p>57.589</text:p>
          </table:table-cell>
          <table:table-cell office:value-type="string" table:style-name="c1">
            <text:p>2026-05-06 09:15</text:p>
          </table:table-cell>
          <table:table-cell office:value-type="float" office:value="57.56120500000001" table:style-name="c1">
            <text:p>57.561</text:p>
          </table:table-cell>
          <table:table-cell office:value-type="float" office:value="-0.247686873719144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30</text:p>
          </table:table-cell>
          <table:table-cell office:value-type="float" office:value="56.76837" table:style-name="c1">
            <text:p>56.768</text:p>
          </table:table-cell>
          <table:table-cell office:value-type="string" table:style-name="c1">
            <text:p>2026-05-07 06:00</text:p>
          </table:table-cell>
          <table:table-cell office:value-type="float" office:value="56.67165000000001" table:style-name="c1">
            <text:p>56.672</text:p>
          </table:table-cell>
          <table:table-cell office:value-type="float" office:value="-0.36993598433423536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8:15</text:p>
          </table:table-cell>
          <table:table-cell office:value-type="float" office:value="56.72835" table:style-name="c1">
            <text:p>56.728</text:p>
          </table:table-cell>
          <table:table-cell office:value-type="string" table:style-name="c1">
            <text:p>2026-05-07 18:45</text:p>
          </table:table-cell>
          <table:table-cell office:value-type="float" office:value="56.59169" table:style-name="c1">
            <text:p>56.592</text:p>
          </table:table-cell>
          <table:table-cell office:value-type="float" office:value="-0.44032091240093774" table:style-name="c12">
            <text:p>-0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57.348659999999995" table:style-name="c1">
            <text:p>57.349</text:p>
          </table:table-cell>
          <table:table-cell office:value-type="string" table:style-name="c1">
            <text:p>2026-05-08 15:15</text:p>
          </table:table-cell>
          <table:table-cell office:value-type="float" office:value="57.13142" table:style-name="c1">
            <text:p>57.131</text:p>
          </table:table-cell>
          <table:table-cell office:value-type="float" office:value="-0.5779484796680556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6:00</text:p>
          </table:table-cell>
          <table:table-cell office:value-type="float" office:value="57.858914999999996" table:style-name="c1">
            <text:p>57.859</text:p>
          </table:table-cell>
          <table:table-cell office:value-type="string" table:style-name="c1">
            <text:p>2026-05-08 16:30</text:p>
          </table:table-cell>
          <table:table-cell office:value-type="float" office:value="57.441265" table:style-name="c1">
            <text:p>57.441</text:p>
          </table:table-cell>
          <table:table-cell office:value-type="float" office:value="-0.9202991254415815" table:style-name="c12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30</text:p>
          </table:table-cell>
          <table:table-cell office:value-type="float" office:value="58.82939999999999" table:style-name="c1">
            <text:p>58.829</text:p>
          </table:table-cell>
          <table:table-cell office:value-type="string" table:style-name="c1">
            <text:p>2026-05-09 02:00</text:p>
          </table:table-cell>
          <table:table-cell office:value-type="float" office:value="58.95051" table:style-name="c1">
            <text:p>58.951</text:p>
          </table:table-cell>
          <table:table-cell office:value-type="float" office:value="0.005554927485262873" table:style-name="c13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15</text:p>
          </table:table-cell>
          <table:table-cell office:value-type="float" office:value="58.749359999999996" table:style-name="c1">
            <text:p>58.749</text:p>
          </table:table-cell>
          <table:table-cell office:value-type="string" table:style-name="c1">
            <text:p>2026-05-10 08:45</text:p>
          </table:table-cell>
          <table:table-cell office:value-type="float" office:value="58.51073" table:style-name="c1">
            <text:p>58.511</text:p>
          </table:table-cell>
          <table:table-cell office:value-type="float" office:value="-0.605271188094636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15</text:p>
          </table:table-cell>
          <table:table-cell office:value-type="float" office:value="59.489729999999994" table:style-name="c1">
            <text:p>59.49</text:p>
          </table:table-cell>
          <table:table-cell office:value-type="string" table:style-name="c1">
            <text:p>2026-05-10 16:45</text:p>
          </table:table-cell>
          <table:table-cell office:value-type="float" office:value="59.420275000000004" table:style-name="c1">
            <text:p>59.42</text:p>
          </table:table-cell>
          <table:table-cell office:value-type="float" office:value="-0.31641785855304194" table:style-name="c12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59.68982999999999" table:style-name="c1">
            <text:p>59.69</text:p>
          </table:table-cell>
          <table:table-cell office:value-type="string" table:style-name="c1">
            <text:p>2026-05-10 23:00</text:p>
          </table:table-cell>
          <table:table-cell office:value-type="float" office:value="59.930020000000006" table:style-name="c1">
            <text:p>59.93</text:p>
          </table:table-cell>
          <table:table-cell office:value-type="float" office:value="0.20169246590249212" table:style-name="c13">
            <text:p>+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58.90944" table:style-name="c1">
            <text:p>58.909</text:p>
          </table:table-cell>
          <table:table-cell office:value-type="string" table:style-name="c1">
            <text:p>2026-05-13 10:15</text:p>
          </table:table-cell>
          <table:table-cell office:value-type="float" office:value="58.71063" table:style-name="c1">
            <text:p>58.711</text:p>
          </table:table-cell>
          <table:table-cell office:value-type="float" office:value="-0.536709480466957" table:style-name="c12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8:15</text:p>
          </table:table-cell>
          <table:table-cell office:value-type="float" office:value="58.81939499999999" table:style-name="c1">
            <text:p>58.819</text:p>
          </table:table-cell>
          <table:table-cell office:value-type="string" table:style-name="c1">
            <text:p>2026-05-14 18:45</text:p>
          </table:table-cell>
          <table:table-cell office:value-type="float" office:value="58.83057" table:style-name="c1">
            <text:p>58.831</text:p>
          </table:table-cell>
          <table:table-cell office:value-type="float" office:value="-0.18093914333867644" table:style-name="c12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9:00</text:p>
          </table:table-cell>
          <table:table-cell office:value-type="float" office:value="59.2296" table:style-name="c1">
            <text:p>59.23</text:p>
          </table:table-cell>
          <table:table-cell office:value-type="string" table:style-name="c1">
            <text:p>2026-05-14 19:30</text:p>
          </table:table-cell>
          <table:table-cell office:value-type="float" office:value="58.9705" table:style-name="c1">
            <text:p>58.971</text:p>
          </table:table-cell>
          <table:table-cell office:value-type="float" office:value="-0.6364757308845448" table:style-name="c12">
            <text:p>-0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5 07:15</text:p>
          </table:table-cell>
          <table:table-cell office:value-type="float" office:value="58.18907999999999" table:style-name="c1">
            <text:p>58.189</text:p>
          </table:table-cell>
          <table:table-cell office:value-type="string" table:style-name="c1">
            <text:p>2026-05-15 07:45</text:p>
          </table:table-cell>
          <table:table-cell office:value-type="float" office:value="58.27085" table:style-name="c1">
            <text:p>58.271</text:p>
          </table:table-cell>
          <table:table-cell office:value-type="float" office:value="-0.05965626050451478" table:style-name="c12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7:45</text:p>
          </table:table-cell>
          <table:table-cell office:value-type="float" office:value="54.417195" table:style-name="c1">
            <text:p>54.417</text:p>
          </table:table-cell>
          <table:table-cell office:value-type="string" table:style-name="c1">
            <text:p>2026-05-22 18:15</text:p>
          </table:table-cell>
          <table:table-cell office:value-type="float" office:value="54.042965" table:style-name="c1">
            <text:p>54.043</text:p>
          </table:table-cell>
          <table:table-cell office:value-type="float" office:value="-0.8862306979163348" table:style-name="c12">
            <text:p>-0.9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06:45</text:p>
          </table:table-cell>
          <table:table-cell office:value-type="float" office:value="1.2876435" table:style-name="c9">
            <text:p>1.2876</text:p>
          </table:table-cell>
          <table:table-cell office:value-type="string" table:style-name="c9">
            <text:p>2026-03-05 07:15</text:p>
          </table:table-cell>
          <table:table-cell office:value-type="float" office:value="1.2913540000000001" table:style-name="c9">
            <text:p>1.2914</text:p>
          </table:table-cell>
          <table:table-cell office:value-type="float" office:value="0.08768602132500636" table:style-name="c11">
            <text:p>+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09:00</text:p>
          </table:table-cell>
          <table:table-cell office:value-type="float" office:value="1.3156575" table:style-name="c9">
            <text:p>1.3157</text:p>
          </table:table-cell>
          <table:table-cell office:value-type="string" table:style-name="c9">
            <text:p>2026-03-05 09:30</text:p>
          </table:table-cell>
          <table:table-cell office:value-type="float" office:value="1.3003495" table:style-name="c9">
            <text:p>1.3003</text:p>
          </table:table-cell>
          <table:table-cell office:value-type="float" office:value="-1.3610988156492088" table:style-name="c10">
            <text:p>-1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19:15</text:p>
          </table:table-cell>
          <table:table-cell office:value-type="float" office:value="1.282641" table:style-name="c9">
            <text:p>1.2826</text:p>
          </table:table-cell>
          <table:table-cell office:value-type="string" table:style-name="c9">
            <text:p>2026-03-05 19:45</text:p>
          </table:table-cell>
          <table:table-cell office:value-type="float" office:value="1.2663665" table:style-name="c9">
            <text:p>1.2664</text:p>
          </table:table-cell>
          <table:table-cell office:value-type="float" office:value="-1.466190978886528" table:style-name="c10">
            <text:p>-1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6 13:45</text:p>
          </table:table-cell>
          <table:table-cell office:value-type="float" office:value="1.26063" table:style-name="c9">
            <text:p>1.2606</text:p>
          </table:table-cell>
          <table:table-cell office:value-type="string" table:style-name="c9">
            <text:p>2026-03-06 14:15</text:p>
          </table:table-cell>
          <table:table-cell office:value-type="float" office:value="1.241379" table:style-name="c9">
            <text:p>1.2414</text:p>
          </table:table-cell>
          <table:table-cell office:value-type="float" office:value="-1.7239409359605773" table:style-name="c10">
            <text:p>-1.7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5:00</text:p>
          </table:table-cell>
          <table:table-cell office:value-type="float" office:value="1.328664" table:style-name="c9">
            <text:p>1.3287</text:p>
          </table:table-cell>
          <table:table-cell office:value-type="string" table:style-name="c9">
            <text:p>2026-03-10 15:30</text:p>
          </table:table-cell>
          <table:table-cell office:value-type="float" office:value="1.3073460000000001" table:style-name="c9">
            <text:p>1.3073</text:p>
          </table:table-cell>
          <table:table-cell office:value-type="float" office:value="-1.8011615166814154" table:style-name="c10">
            <text:p>-1.8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01:15</text:p>
          </table:table-cell>
          <table:table-cell office:value-type="float" office:value="1.298649" table:style-name="c9">
            <text:p>1.2986</text:p>
          </table:table-cell>
          <table:table-cell office:value-type="string" table:style-name="c9">
            <text:p>2026-03-11 01:45</text:p>
          </table:table-cell>
          <table:table-cell office:value-type="float" office:value="1.2823585" table:style-name="c9">
            <text:p>1.2824</text:p>
          </table:table-cell>
          <table:table-cell office:value-type="float" office:value="-1.451811431841854" table:style-name="c10">
            <text:p>-1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7:45</text:p>
          </table:table-cell>
          <table:table-cell office:value-type="float" office:value="1.338669" table:style-name="c9">
            <text:p>1.3387</text:p>
          </table:table-cell>
          <table:table-cell office:value-type="string" table:style-name="c9">
            <text:p>2026-03-12 18:15</text:p>
          </table:table-cell>
          <table:table-cell office:value-type="float" office:value="1.3453270000000002" table:style-name="c9">
            <text:p>1.3453</text:p>
          </table:table-cell>
          <table:table-cell office:value-type="float" office:value="0.2964654688351054" table:style-name="c11">
            <text:p>+0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21:45</text:p>
          </table:table-cell>
          <table:table-cell office:value-type="float" office:value="1.3516754999999998" table:style-name="c9">
            <text:p>1.3517</text:p>
          </table:table-cell>
          <table:table-cell office:value-type="string" table:style-name="c9">
            <text:p>2026-03-12 22:15</text:p>
          </table:table-cell>
          <table:table-cell office:value-type="float" office:value="1.3573210000000002" table:style-name="c9">
            <text:p>1.3573</text:p>
          </table:table-cell>
          <table:table-cell office:value-type="float" office:value="0.21693189829956605" table:style-name="c11">
            <text:p>+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0:30</text:p>
          </table:table-cell>
          <table:table-cell office:value-type="float" office:value="1.382691" table:style-name="c9">
            <text:p>1.3827</text:p>
          </table:table-cell>
          <table:table-cell office:value-type="string" table:style-name="c9">
            <text:p>2026-03-13 01:00</text:p>
          </table:table-cell>
          <table:table-cell office:value-type="float" office:value="1.383308" table:style-name="c9">
            <text:p>1.3833</text:p>
          </table:table-cell>
          <table:table-cell office:value-type="float" office:value="-0.15536607181214634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0:30</text:p>
          </table:table-cell>
          <table:table-cell office:value-type="float" office:value="1.352676" table:style-name="c9">
            <text:p>1.3527</text:p>
          </table:table-cell>
          <table:table-cell office:value-type="string" table:style-name="c9">
            <text:p>2026-03-13 11:00</text:p>
          </table:table-cell>
          <table:table-cell office:value-type="float" office:value="1.3473260000000002" table:style-name="c9">
            <text:p>1.3473</text:p>
          </table:table-cell>
          <table:table-cell office:value-type="float" office:value="-0.5946216739263432" table:style-name="c10">
            <text:p>-0.6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9:30</text:p>
          </table:table-cell>
          <table:table-cell office:value-type="float" office:value="1.3516754999999998" table:style-name="c9">
            <text:p>1.3517</text:p>
          </table:table-cell>
          <table:table-cell office:value-type="string" table:style-name="c9">
            <text:p>2026-03-15 10:00</text:p>
          </table:table-cell>
          <table:table-cell office:value-type="float" office:value="1.3483255" table:style-name="c9">
            <text:p>1.3483</text:p>
          </table:table-cell>
          <table:table-cell office:value-type="float" office:value="-0.44724511722669114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2:30</text:p>
          </table:table-cell>
          <table:table-cell office:value-type="float" office:value="1.3556774999999999" table:style-name="c9">
            <text:p>1.3557</text:p>
          </table:table-cell>
          <table:table-cell office:value-type="string" table:style-name="c9">
            <text:p>2026-03-15 13:00</text:p>
          </table:table-cell>
          <table:table-cell office:value-type="float" office:value="1.3553220000000001" table:style-name="c9">
            <text:p>1.3553</text:p>
          </table:table-cell>
          <table:table-cell office:value-type="float" office:value="-0.2260706309575644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30</text:p>
          </table:table-cell>
          <table:table-cell office:value-type="float" office:value="1.3816905" table:style-name="c9">
            <text:p>1.3817</text:p>
          </table:table-cell>
          <table:table-cell office:value-type="string" table:style-name="c9">
            <text:p>2026-03-16 04:00</text:p>
          </table:table-cell>
          <table:table-cell office:value-type="float" office:value="1.389305" table:style-name="c9">
            <text:p>1.3893</text:p>
          </table:table-cell>
          <table:table-cell office:value-type="float" office:value="0.35009861506611895" table:style-name="c11">
            <text:p>+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3:30</text:p>
          </table:table-cell>
          <table:table-cell office:value-type="float" office:value="1.4127059999999998" table:style-name="c9">
            <text:p>1.4127</text:p>
          </table:table-cell>
          <table:table-cell office:value-type="string" table:style-name="c9">
            <text:p>2026-03-16 14:00</text:p>
          </table:table-cell>
          <table:table-cell office:value-type="float" office:value="1.431284" table:style-name="c9">
            <text:p>1.4313</text:p>
          </table:table-cell>
          <table:table-cell office:value-type="float" office:value="1.1125360325503042" table:style-name="c11">
            <text:p>+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4:15</text:p>
          </table:table-cell>
          <table:table-cell office:value-type="float" office:value="1.4287139999999998" table:style-name="c9">
            <text:p>1.4287</text:p>
          </table:table-cell>
          <table:table-cell office:value-type="string" table:style-name="c9">
            <text:p>2026-03-16 14:45</text:p>
          </table:table-cell>
          <table:table-cell office:value-type="float" office:value="1.411294" table:style-name="c9">
            <text:p>1.4113</text:p>
          </table:table-cell>
          <table:table-cell office:value-type="float" office:value="-1.4167409786703167" table:style-name="c10">
            <text:p>-1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6:30</text:p>
          </table:table-cell>
          <table:table-cell office:value-type="float" office:value="1.4397195" table:style-name="c9">
            <text:p>1.4397</text:p>
          </table:table-cell>
          <table:table-cell office:value-type="string" table:style-name="c9">
            <text:p>2026-03-16 17:00</text:p>
          </table:table-cell>
          <table:table-cell office:value-type="float" office:value="1.4392800000000001" table:style-name="c9">
            <text:p>1.4393</text:p>
          </table:table-cell>
          <table:table-cell office:value-type="float" office:value="-0.23036575666300907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0:30</text:p>
          </table:table-cell>
          <table:table-cell office:value-type="float" office:value="1.458729" table:style-name="c9">
            <text:p>1.4587</text:p>
          </table:table-cell>
          <table:table-cell office:value-type="string" table:style-name="c9">
            <text:p>2026-03-16 21:00</text:p>
          </table:table-cell>
          <table:table-cell office:value-type="float" office:value="1.463268" table:style-name="c9">
            <text:p>1.4633</text:p>
          </table:table-cell>
          <table:table-cell office:value-type="float" office:value="0.11063928035981441" table:style-name="c11">
            <text:p>+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1:15</text:p>
          </table:table-cell>
          <table:table-cell office:value-type="float" office:value="1.4817405" table:style-name="c9">
            <text:p>1.4817</text:p>
          </table:table-cell>
          <table:table-cell office:value-type="string" table:style-name="c9">
            <text:p>2026-03-16 21:45</text:p>
          </table:table-cell>
          <table:table-cell office:value-type="float" office:value="1.47926" table:style-name="c9">
            <text:p>1.4793</text:p>
          </table:table-cell>
          <table:table-cell office:value-type="float" office:value="-0.36696983986062026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07:15</text:p>
          </table:table-cell>
          <table:table-cell office:value-type="float" office:value="1.4627309999999998" table:style-name="c9">
            <text:p>1.4627</text:p>
          </table:table-cell>
          <table:table-cell office:value-type="string" table:style-name="c9">
            <text:p>2026-03-17 07:45</text:p>
          </table:table-cell>
          <table:table-cell office:value-type="float" office:value="1.463268" table:style-name="c9">
            <text:p>1.4633</text:p>
          </table:table-cell>
          <table:table-cell office:value-type="float" office:value="-0.1632612375070952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08:00</text:p>
          </table:table-cell>
          <table:table-cell office:value-type="float" office:value="1.4627309999999998" table:style-name="c9">
            <text:p>1.4627</text:p>
          </table:table-cell>
          <table:table-cell office:value-type="string" table:style-name="c9">
            <text:p>2026-03-17 08:30</text:p>
          </table:table-cell>
          <table:table-cell office:value-type="float" office:value="1.4662665000000001" table:style-name="c9">
            <text:p>1.4663</text:p>
          </table:table-cell>
          <table:table-cell office:value-type="float" office:value="0.041322243563612915" table:style-name="c11">
            <text:p>+0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21:00</text:p>
          </table:table-cell>
          <table:table-cell office:value-type="float" office:value="1.322661" table:style-name="c9">
            <text:p>1.3227</text:p>
          </table:table-cell>
          <table:table-cell office:value-type="string" table:style-name="c9">
            <text:p>2026-03-23 21:30</text:p>
          </table:table-cell>
          <table:table-cell office:value-type="float" office:value="1.3203395" table:style-name="c9">
            <text:p>1.3203</text:p>
          </table:table-cell>
          <table:table-cell office:value-type="float" office:value="-0.3750665257764574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8:30</text:p>
          </table:table-cell>
          <table:table-cell office:value-type="float" office:value="1.214607" table:style-name="c9">
            <text:p>1.2146</text:p>
          </table:table-cell>
          <table:table-cell office:value-type="string" table:style-name="c9">
            <text:p>2026-03-30 09:00</text:p>
          </table:table-cell>
          <table:table-cell office:value-type="float" office:value="1.2203895000000002" table:style-name="c9">
            <text:p>1.2204</text:p>
          </table:table-cell>
          <table:table-cell office:value-type="float" office:value="0.27522823345329517" table:style-name="c11">
            <text:p>+0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9:15</text:p>
          </table:table-cell>
          <table:table-cell office:value-type="float" office:value="1.2126059999999999" table:style-name="c9">
            <text:p>1.2126</text:p>
          </table:table-cell>
          <table:table-cell office:value-type="string" table:style-name="c9">
            <text:p>2026-03-30 09:45</text:p>
          </table:table-cell>
          <table:table-cell office:value-type="float" office:value="1.205397" table:style-name="c9">
            <text:p>1.2054</text:p>
          </table:table-cell>
          <table:table-cell office:value-type="float" office:value="-0.7932163128831493" table:style-name="c10">
            <text:p>-0.8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4:30</text:p>
          </table:table-cell>
          <table:table-cell office:value-type="float" office:value="1.1965979999999998" table:style-name="c9">
            <text:p>1.1966</text:p>
          </table:table-cell>
          <table:table-cell office:value-type="string" table:style-name="c9">
            <text:p>2026-03-31 15:00</text:p>
          </table:table-cell>
          <table:table-cell office:value-type="float" office:value="1.1764115000000002" table:style-name="c9">
            <text:p>1.1764</text:p>
          </table:table-cell>
          <table:table-cell office:value-type="float" office:value="-1.8835186577697338" table:style-name="c10">
            <text:p>-1.9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7:15</text:p>
          </table:table-cell>
          <table:table-cell office:value-type="float" office:value="1.2026009999999998" table:style-name="c9">
            <text:p>1.2026</text:p>
          </table:table-cell>
          <table:table-cell office:value-type="string" table:style-name="c9">
            <text:p>2026-03-31 17:45</text:p>
          </table:table-cell>
          <table:table-cell office:value-type="float" office:value="1.1864065000000001" table:style-name="c9">
            <text:p>1.1864</text:p>
          </table:table-cell>
          <table:table-cell office:value-type="float" office:value="-1.5438309625137148" table:style-name="c10">
            <text:p>-1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5:30</text:p>
          </table:table-cell>
          <table:table-cell office:value-type="float" office:value="1.2086039999999998" table:style-name="c9">
            <text:p>1.2086</text:p>
          </table:table-cell>
          <table:table-cell office:value-type="string" table:style-name="c9">
            <text:p>2026-04-01 06:00</text:p>
          </table:table-cell>
          <table:table-cell office:value-type="float" office:value="1.2063965" table:style-name="c9">
            <text:p>1.2064</text:p>
          </table:table-cell>
          <table:table-cell office:value-type="float" office:value="-0.38218362701926134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12:45</text:p>
          </table:table-cell>
          <table:table-cell office:value-type="float" office:value="1.2276135" table:style-name="c9">
            <text:p>1.2276</text:p>
          </table:table-cell>
          <table:table-cell office:value-type="string" table:style-name="c9">
            <text:p>2026-04-01 13:15</text:p>
          </table:table-cell>
          <table:table-cell office:value-type="float" office:value="1.209395" table:style-name="c9">
            <text:p>1.2094</text:p>
          </table:table-cell>
          <table:table-cell office:value-type="float" office:value="-1.680991664314535" table:style-name="c10">
            <text:p>-1.7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2 00:45</text:p>
          </table:table-cell>
          <table:table-cell office:value-type="float" office:value="1.2056025" table:style-name="c9">
            <text:p>1.2056</text:p>
          </table:table-cell>
          <table:table-cell office:value-type="string" table:style-name="c9">
            <text:p>2026-04-02 01:15</text:p>
          </table:table-cell>
          <table:table-cell office:value-type="float" office:value="1.191404" table:style-name="c9">
            <text:p>1.1914</text:p>
          </table:table-cell>
          <table:table-cell office:value-type="float" office:value="-1.375255658146024" table:style-name="c10">
            <text:p>-1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1:15</text:p>
          </table:table-cell>
          <table:table-cell office:value-type="float" office:value="1.236618" table:style-name="c9">
            <text:p>1.2366</text:p>
          </table:table-cell>
          <table:table-cell office:value-type="string" table:style-name="c9">
            <text:p>2026-04-04 11:45</text:p>
          </table:table-cell>
          <table:table-cell office:value-type="float" office:value="1.2343825000000002" table:style-name="c9">
            <text:p>1.2344</text:p>
          </table:table-cell>
          <table:table-cell office:value-type="float" office:value="-0.380313938297816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2:30</text:p>
          </table:table-cell>
          <table:table-cell office:value-type="float" office:value="1.244622" table:style-name="c9">
            <text:p>1.2446</text:p>
          </table:table-cell>
          <table:table-cell office:value-type="string" table:style-name="c9">
            <text:p>2026-04-04 13:00</text:p>
          </table:table-cell>
          <table:table-cell office:value-type="float" office:value="1.247376" table:style-name="c9">
            <text:p>1.2474</text:p>
          </table:table-cell>
          <table:table-cell office:value-type="float" office:value="0.02092967792632905" table:style-name="c11">
            <text:p>+0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3:30</text:p>
          </table:table-cell>
          <table:table-cell office:value-type="float" office:value="1.254627" table:style-name="c9">
            <text:p>1.2546</text:p>
          </table:table-cell>
          <table:table-cell office:value-type="string" table:style-name="c9">
            <text:p>2026-04-04 14:00</text:p>
          </table:table-cell>
          <table:table-cell office:value-type="float" office:value="1.243378" table:style-name="c9">
            <text:p>1.2434</text:p>
          </table:table-cell>
          <table:table-cell office:value-type="float" office:value="-1.094708835534386" table:style-name="c10">
            <text:p>-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5:15</text:p>
          </table:table-cell>
          <table:table-cell office:value-type="float" office:value="1.2626309999999998" table:style-name="c9">
            <text:p>1.2626</text:p>
          </table:table-cell>
          <table:table-cell office:value-type="string" table:style-name="c9">
            <text:p>2026-04-04 15:45</text:p>
          </table:table-cell>
          <table:table-cell office:value-type="float" office:value="1.2653670000000001" table:style-name="c9">
            <text:p>1.2654</text:p>
          </table:table-cell>
          <table:table-cell office:value-type="float" office:value="0.016357222894125556" table:style-name="c11">
            <text:p>+0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6:15</text:p>
          </table:table-cell>
          <table:table-cell office:value-type="float" office:value="1.2696344999999998" table:style-name="c9">
            <text:p>1.2696</text:p>
          </table:table-cell>
          <table:table-cell office:value-type="string" table:style-name="c9">
            <text:p>2026-04-04 16:45</text:p>
          </table:table-cell>
          <table:table-cell office:value-type="float" office:value="1.2703645" table:style-name="c9">
            <text:p>1.2704</text:p>
          </table:table-cell>
          <table:table-cell office:value-type="float" office:value="-0.1425180739417442" table:style-name="c10">
            <text:p>-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7:30</text:p>
          </table:table-cell>
          <table:table-cell office:value-type="float" office:value="1.276638" table:style-name="c9">
            <text:p>1.2766</text:p>
          </table:table-cell>
          <table:table-cell office:value-type="string" table:style-name="c9">
            <text:p>2026-04-04 18:00</text:p>
          </table:table-cell>
          <table:table-cell office:value-type="float" office:value="1.2783605" table:style-name="c9">
            <text:p>1.2784</text:p>
          </table:table-cell>
          <table:table-cell office:value-type="float" office:value="-0.06524501381754977" table:style-name="c10">
            <text:p>-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22:45</text:p>
          </table:table-cell>
          <table:table-cell office:value-type="float" office:value="1.238619" table:style-name="c9">
            <text:p>1.2386</text:p>
          </table:table-cell>
          <table:table-cell office:value-type="string" table:style-name="c9">
            <text:p>2026-04-05 23:15</text:p>
          </table:table-cell>
          <table:table-cell office:value-type="float" office:value="1.2423785000000003" table:style-name="c9">
            <text:p>1.2424</text:p>
          </table:table-cell>
          <table:table-cell office:value-type="float" office:value="0.10301677743520532" table:style-name="c11">
            <text:p>+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23:30</text:p>
          </table:table-cell>
          <table:table-cell office:value-type="float" office:value="1.2436215" table:style-name="c9">
            <text:p>1.2436</text:p>
          </table:table-cell>
          <table:table-cell office:value-type="string" table:style-name="c9">
            <text:p>2026-04-06 00:00</text:p>
          </table:table-cell>
          <table:table-cell office:value-type="float" office:value="1.247376" table:style-name="c9">
            <text:p>1.2474</text:p>
          </table:table-cell>
          <table:table-cell office:value-type="float" office:value="0.1013970388900498" table:style-name="c11">
            <text:p>+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0:15</text:p>
          </table:table-cell>
          <table:table-cell office:value-type="float" office:value="1.254627" table:style-name="c9">
            <text:p>1.2546</text:p>
          </table:table-cell>
          <table:table-cell office:value-type="string" table:style-name="c9">
            <text:p>2026-04-06 00:45</text:p>
          </table:table-cell>
          <table:table-cell office:value-type="float" office:value="1.2603695" table:style-name="c9">
            <text:p>1.2604</text:p>
          </table:table-cell>
          <table:table-cell office:value-type="float" office:value="0.2568908025652128" table:style-name="c11">
            <text:p>+0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2:00</text:p>
          </table:table-cell>
          <table:table-cell office:value-type="float" office:value="1.3076534999999998" table:style-name="c9">
            <text:p>1.3077</text:p>
          </table:table-cell>
          <table:table-cell office:value-type="string" table:style-name="c9">
            <text:p>2026-04-07 22:30</text:p>
          </table:table-cell>
          <table:table-cell office:value-type="float" office:value="1.2973510000000001" table:style-name="c9">
            <text:p>1.2974</text:p>
          </table:table-cell>
          <table:table-cell office:value-type="float" office:value="-0.9861866808752895" table:style-name="c10">
            <text:p>-1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2:45</text:p>
          </table:table-cell>
          <table:table-cell office:value-type="float" office:value="1.318659" table:style-name="c9">
            <text:p>1.3187</text:p>
          </table:table-cell>
          <table:table-cell office:value-type="string" table:style-name="c9">
            <text:p>2026-04-07 23:15</text:p>
          </table:table-cell>
          <table:table-cell office:value-type="float" office:value="1.3313340000000002" table:style-name="c9">
            <text:p>1.3313</text:p>
          </table:table-cell>
          <table:table-cell office:value-type="float" office:value="0.7593823220408025" table:style-name="c11">
            <text:p>+0.8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05:30</text:p>
          </table:table-cell>
          <table:table-cell office:value-type="float" office:value="1.3236614999999998" table:style-name="c9">
            <text:p>1.3237</text:p>
          </table:table-cell>
          <table:table-cell office:value-type="string" table:style-name="c9">
            <text:p>2026-04-08 06:00</text:p>
          </table:table-cell>
          <table:table-cell office:value-type="float" office:value="1.321339" table:style-name="c9">
            <text:p>1.3213</text:p>
          </table:table-cell>
          <table:table-cell office:value-type="float" office:value="-0.37500952176970914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08:00</text:p>
          </table:table-cell>
          <table:table-cell office:value-type="float" office:value="1.3516754999999998" table:style-name="c9">
            <text:p>1.3517</text:p>
          </table:table-cell>
          <table:table-cell office:value-type="string" table:style-name="c9">
            <text:p>2026-04-08 08:30</text:p>
          </table:table-cell>
          <table:table-cell office:value-type="float" office:value="1.3563215" table:style-name="c9">
            <text:p>1.3563</text:p>
          </table:table-cell>
          <table:table-cell office:value-type="float" office:value="0.14313445212998932" table:style-name="c11">
            <text:p>+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08:45</text:p>
          </table:table-cell>
          <table:table-cell office:value-type="float" office:value="1.362681" table:style-name="c9">
            <text:p>1.3627</text:p>
          </table:table-cell>
          <table:table-cell office:value-type="string" table:style-name="c9">
            <text:p>2026-04-08 09:15</text:p>
          </table:table-cell>
          <table:table-cell office:value-type="float" office:value="1.3653170000000001" table:style-name="c9">
            <text:p>1.3653</text:p>
          </table:table-cell>
          <table:table-cell office:value-type="float" office:value="-0.00684449867576209" table:style-name="c10">
            <text:p>-0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13:30</text:p>
          </table:table-cell>
          <table:table-cell office:value-type="float" office:value="1.3896944999999998" table:style-name="c9">
            <text:p>1.3897</text:p>
          </table:table-cell>
          <table:table-cell office:value-type="string" table:style-name="c9">
            <text:p>2026-04-08 14:00</text:p>
          </table:table-cell>
          <table:table-cell office:value-type="float" office:value="1.377311" table:style-name="c9">
            <text:p>1.3773</text:p>
          </table:table-cell>
          <table:table-cell office:value-type="float" office:value="-1.089213830018021" table:style-name="c10">
            <text:p>-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5:30</text:p>
          </table:table-cell>
          <table:table-cell office:value-type="float" office:value="1.362681" table:style-name="c9">
            <text:p>1.3627</text:p>
          </table:table-cell>
          <table:table-cell office:value-type="string" table:style-name="c9">
            <text:p>2026-04-09 16:00</text:p>
          </table:table-cell>
          <table:table-cell office:value-type="float" office:value="1.3803095" table:style-name="c9">
            <text:p>1.3803</text:p>
          </table:table-cell>
          <table:table-cell office:value-type="float" office:value="1.0911769746184463" table:style-name="c11">
            <text:p>+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6:15</text:p>
          </table:table-cell>
          <table:table-cell office:value-type="float" office:value="1.3856925" table:style-name="c9">
            <text:p>1.3857</text:p>
          </table:table-cell>
          <table:table-cell office:value-type="string" table:style-name="c9">
            <text:p>2026-04-09 16:45</text:p>
          </table:table-cell>
          <table:table-cell office:value-type="float" office:value="1.3643175" table:style-name="c9">
            <text:p>1.3643</text:p>
          </table:table-cell>
          <table:table-cell office:value-type="float" office:value="-1.7393664671274345" table:style-name="c10">
            <text:p>-1.7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5:30</text:p>
          </table:table-cell>
          <table:table-cell office:value-type="float" office:value="1.3656825" table:style-name="c9">
            <text:p>1.3657</text:p>
          </table:table-cell>
          <table:table-cell office:value-type="string" table:style-name="c9">
            <text:p>2026-04-11 16:00</text:p>
          </table:table-cell>
          <table:table-cell office:value-type="float" office:value="1.3673160000000002" table:style-name="c9">
            <text:p>1.3673</text:p>
          </table:table-cell>
          <table:table-cell office:value-type="float" office:value="-0.08052857703017002" table:style-name="c10">
            <text:p>-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6:15</text:p>
          </table:table-cell>
          <table:table-cell office:value-type="float" office:value="1.3866929999999997" table:style-name="c9">
            <text:p>1.3867</text:p>
          </table:table-cell>
          <table:table-cell office:value-type="string" table:style-name="c9">
            <text:p>2026-04-11 16:45</text:p>
          </table:table-cell>
          <table:table-cell office:value-type="float" office:value="1.3823085000000002" table:style-name="c9">
            <text:p>1.3823</text:p>
          </table:table-cell>
          <table:table-cell office:value-type="float" office:value="-0.5154518477773928" table:style-name="c10">
            <text:p>-0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7:30</text:p>
          </table:table-cell>
          <table:table-cell office:value-type="float" office:value="1.3996994999999999" table:style-name="c9">
            <text:p>1.3997</text:p>
          </table:table-cell>
          <table:table-cell office:value-type="string" table:style-name="c9">
            <text:p>2026-04-11 18:00</text:p>
          </table:table-cell>
          <table:table-cell office:value-type="float" office:value="1.4062965" table:style-name="c9">
            <text:p>1.4063</text:p>
          </table:table-cell>
          <table:table-cell office:value-type="float" office:value="0.2704732906241958" table:style-name="c11">
            <text:p>+0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01:15</text:p>
          </table:table-cell>
          <table:table-cell office:value-type="float" office:value="1.4197095" table:style-name="c9">
            <text:p>1.4197</text:p>
          </table:table-cell>
          <table:table-cell office:value-type="string" table:style-name="c9">
            <text:p>2026-04-14 01:45</text:p>
          </table:table-cell>
          <table:table-cell office:value-type="float" office:value="1.4122935" table:style-name="c9">
            <text:p>1.4123</text:p>
          </table:table-cell>
          <table:table-cell office:value-type="float" office:value="-0.7212161858816901" table:style-name="c10">
            <text:p>-0.7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4:00</text:p>
          </table:table-cell>
          <table:table-cell office:value-type="float" office:value="1.4297145" table:style-name="c9">
            <text:p>1.4297</text:p>
          </table:table-cell>
          <table:table-cell office:value-type="string" table:style-name="c9">
            <text:p>2026-04-16 04:30</text:p>
          </table:table-cell>
          <table:table-cell office:value-type="float" office:value="1.427286" table:style-name="c9">
            <text:p>1.4273</text:p>
          </table:table-cell>
          <table:table-cell office:value-type="float" office:value="-0.3694195389359112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1.4137065" table:style-name="c9">
            <text:p>1.4137</text:p>
          </table:table-cell>
          <table:table-cell office:value-type="string" table:style-name="c9">
            <text:p>2026-04-16 16:15</text:p>
          </table:table-cell>
          <table:table-cell office:value-type="float" office:value="1.4082955000000001" table:style-name="c9">
            <text:p>1.4083</text:p>
          </table:table-cell>
          <table:table-cell office:value-type="float" office:value="-0.5818875915545418" table:style-name="c10">
            <text:p>-0.6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6:45</text:p>
          </table:table-cell>
          <table:table-cell office:value-type="float" office:value="1.4197095" table:style-name="c9">
            <text:p>1.4197</text:p>
          </table:table-cell>
          <table:table-cell office:value-type="string" table:style-name="c9">
            <text:p>2026-04-17 07:15</text:p>
          </table:table-cell>
          <table:table-cell office:value-type="float" office:value="1.415292" table:style-name="c9">
            <text:p>1.4153</text:p>
          </table:table-cell>
          <table:table-cell office:value-type="float" office:value="-0.5104332053846083" table:style-name="c10">
            <text:p>-0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7:30</text:p>
          </table:table-cell>
          <table:table-cell office:value-type="float" office:value="1.4197095" table:style-name="c9">
            <text:p>1.4197</text:p>
          </table:table-cell>
          <table:table-cell office:value-type="string" table:style-name="c9">
            <text:p>2026-04-17 08:00</text:p>
          </table:table-cell>
          <table:table-cell office:value-type="float" office:value="1.425287" table:style-name="c9">
            <text:p>1.4253</text:p>
          </table:table-cell>
          <table:table-cell office:value-type="float" office:value="0.19217672960560872" table:style-name="c11">
            <text:p>+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15</text:p>
          </table:table-cell>
          <table:table-cell office:value-type="float" office:value="1.4127059999999998" table:style-name="c9">
            <text:p>1.4127</text:p>
          </table:table-cell>
          <table:table-cell office:value-type="string" table:style-name="c9">
            <text:p>2026-04-17 13:45</text:p>
          </table:table-cell>
          <table:table-cell office:value-type="float" office:value="1.421289" table:style-name="c9">
            <text:p>1.4213</text:p>
          </table:table-cell>
          <table:table-cell office:value-type="float" office:value="0.40644290383138326" table:style-name="c11">
            <text:p>+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4:00</text:p>
          </table:table-cell>
          <table:table-cell office:value-type="float" office:value="1.4277134999999999" table:style-name="c9">
            <text:p>1.4277</text:p>
          </table:table-cell>
          <table:table-cell office:value-type="string" table:style-name="c9">
            <text:p>2026-04-17 14:30</text:p>
          </table:table-cell>
          <table:table-cell office:value-type="float" office:value="1.423288" table:style-name="c9">
            <text:p>1.4233</text:p>
          </table:table-cell>
          <table:table-cell office:value-type="float" office:value="-0.5092515208408255" table:style-name="c10">
            <text:p>-0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5:15</text:p>
          </table:table-cell>
          <table:table-cell office:value-type="float" office:value="1.368684" table:style-name="c9">
            <text:p>1.3687</text:p>
          </table:table-cell>
          <table:table-cell office:value-type="string" table:style-name="c9">
            <text:p>2026-04-21 05:45</text:p>
          </table:table-cell>
          <table:table-cell office:value-type="float" office:value="1.3633180000000003" table:style-name="c9">
            <text:p>1.3633</text:p>
          </table:table-cell>
          <table:table-cell office:value-type="float" office:value="-0.5911717154580387" table:style-name="c10">
            <text:p>-0.6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8:00</text:p>
          </table:table-cell>
          <table:table-cell office:value-type="float" office:value="1.3796895" table:style-name="c9">
            <text:p>1.3797</text:p>
          </table:table-cell>
          <table:table-cell office:value-type="string" table:style-name="c9">
            <text:p>2026-04-21 08:30</text:p>
          </table:table-cell>
          <table:table-cell office:value-type="float" office:value="1.3803095" table:style-name="c9">
            <text:p>1.3803</text:p>
          </table:table-cell>
          <table:table-cell office:value-type="float" office:value="-0.1550521831542473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2:30</text:p>
          </table:table-cell>
          <table:table-cell office:value-type="float" office:value="1.4006999999999998" table:style-name="c9">
            <text:p>1.4007</text:p>
          </table:table-cell>
          <table:table-cell office:value-type="string" table:style-name="c9">
            <text:p>2026-04-22 03:00</text:p>
          </table:table-cell>
          <table:table-cell office:value-type="float" office:value="1.4022985000000001" table:style-name="c9">
            <text:p>1.4023</text:p>
          </table:table-cell>
          <table:table-cell office:value-type="float" office:value="-0.08600661822657507" table:style-name="c10">
            <text:p>-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1.4127059999999998" table:style-name="c9">
            <text:p>1.4127</text:p>
          </table:table-cell>
          <table:table-cell office:value-type="string" table:style-name="c9">
            <text:p>2026-04-22 06:00</text:p>
          </table:table-cell>
          <table:table-cell office:value-type="float" office:value="1.407296" table:style-name="c9">
            <text:p>1.4073</text:p>
          </table:table-cell>
          <table:table-cell office:value-type="float" office:value="-0.5820874763751038" table:style-name="c10">
            <text:p>-0.6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5:45</text:p>
          </table:table-cell>
          <table:table-cell office:value-type="float" office:value="1.4287139999999998" table:style-name="c9">
            <text:p>1.4287</text:p>
          </table:table-cell>
          <table:table-cell office:value-type="string" table:style-name="c9">
            <text:p>2026-04-22 16:15</text:p>
          </table:table-cell>
          <table:table-cell office:value-type="float" office:value="1.4182905000000001" table:style-name="c9">
            <text:p>1.4183</text:p>
          </table:table-cell>
          <table:table-cell office:value-type="float" office:value="-0.928013773890346" table:style-name="c10">
            <text:p>-0.9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2:15</text:p>
          </table:table-cell>
          <table:table-cell office:value-type="float" office:value="1.3946969999999999" table:style-name="c9">
            <text:p>1.3947</text:p>
          </table:table-cell>
          <table:table-cell office:value-type="string" table:style-name="c9">
            <text:p>2026-04-23 12:45</text:p>
          </table:table-cell>
          <table:table-cell office:value-type="float" office:value="1.389305" table:style-name="c9">
            <text:p>1.3893</text:p>
          </table:table-cell>
          <table:table-cell office:value-type="float" office:value="-0.5857344423197186" table:style-name="c10">
            <text:p>-0.6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4:30</text:p>
          </table:table-cell>
          <table:table-cell office:value-type="float" office:value="1.398699" table:style-name="c9">
            <text:p>1.3987</text:p>
          </table:table-cell>
          <table:table-cell office:value-type="string" table:style-name="c9">
            <text:p>2026-04-23 15:00</text:p>
          </table:table-cell>
          <table:table-cell office:value-type="float" office:value="1.3983005000000002" table:style-name="c9">
            <text:p>1.3983</text:p>
          </table:table-cell>
          <table:table-cell office:value-type="float" office:value="-0.22833380873940046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21:15</text:p>
          </table:table-cell>
          <table:table-cell office:value-type="float" office:value="1.4006999999999998" table:style-name="c9">
            <text:p>1.4007</text:p>
          </table:table-cell>
          <table:table-cell office:value-type="string" table:style-name="c9">
            <text:p>2026-04-23 21:45</text:p>
          </table:table-cell>
          <table:table-cell office:value-type="float" office:value="1.4022985000000001" table:style-name="c9">
            <text:p>1.4023</text:p>
          </table:table-cell>
          <table:table-cell office:value-type="float" office:value="-0.08600661822658617" table:style-name="c10">
            <text:p>-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0:15</text:p>
          </table:table-cell>
          <table:table-cell office:value-type="float" office:value="1.2946469999999999" table:style-name="c9">
            <text:p>1.2946</text:p>
          </table:table-cell>
          <table:table-cell office:value-type="string" table:style-name="c9">
            <text:p>2026-05-05 20:45</text:p>
          </table:table-cell>
          <table:table-cell office:value-type="float" office:value="1.295352" table:style-name="c9">
            <text:p>1.2954</text:p>
          </table:table-cell>
          <table:table-cell office:value-type="float" office:value="-0.1455538573835069" table:style-name="c10">
            <text:p>-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1:00</text:p>
          </table:table-cell>
          <table:table-cell office:value-type="float" office:value="1.306653" table:style-name="c9">
            <text:p>1.3067</text:p>
          </table:table-cell>
          <table:table-cell office:value-type="string" table:style-name="c9">
            <text:p>2026-05-05 21:30</text:p>
          </table:table-cell>
          <table:table-cell office:value-type="float" office:value="1.3083455" table:style-name="c9">
            <text:p>1.3083</text:p>
          </table:table-cell>
          <table:table-cell office:value-type="float" office:value="-0.07062951330613076" table:style-name="c10">
            <text:p>-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2:00</text:p>
          </table:table-cell>
          <table:table-cell office:value-type="float" office:value="1.3116554999999999" table:style-name="c9">
            <text:p>1.3117</text:p>
          </table:table-cell>
          <table:table-cell office:value-type="string" table:style-name="c9">
            <text:p>2026-05-06 02:30</text:p>
          </table:table-cell>
          <table:table-cell office:value-type="float" office:value="1.3003495" table:style-name="c9">
            <text:p>1.3003</text:p>
          </table:table-cell>
          <table:table-cell office:value-type="float" office:value="-1.0601410698540592" table:style-name="c10">
            <text:p>-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5:45</text:p>
          </table:table-cell>
          <table:table-cell office:value-type="float" office:value="1.3176584999999998" table:style-name="c9">
            <text:p>1.3177</text:p>
          </table:table-cell>
          <table:table-cell office:value-type="string" table:style-name="c9">
            <text:p>2026-05-06 06:15</text:p>
          </table:table-cell>
          <table:table-cell office:value-type="float" office:value="1.3143425" table:style-name="c9">
            <text:p>1.3143</text:p>
          </table:table-cell>
          <table:table-cell office:value-type="float" office:value="-0.45105546372595784" table:style-name="c10">
            <text:p>-0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7:45</text:p>
          </table:table-cell>
          <table:table-cell office:value-type="float" office:value="1.3556774999999999" table:style-name="c9">
            <text:p>1.3557</text:p>
          </table:table-cell>
          <table:table-cell office:value-type="string" table:style-name="c9">
            <text:p>2026-05-06 08:15</text:p>
          </table:table-cell>
          <table:table-cell office:value-type="float" office:value="1.3803095" table:style-name="c9">
            <text:p>1.3803</text:p>
          </table:table-cell>
          <table:table-cell office:value-type="float" office:value="1.6134192172917228" table:style-name="c11">
            <text:p>+1.6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8:30</text:p>
          </table:table-cell>
          <table:table-cell office:value-type="float" office:value="1.404702" table:style-name="c9">
            <text:p>1.4047</text:p>
          </table:table-cell>
          <table:table-cell office:value-type="string" table:style-name="c9">
            <text:p>2026-05-06 09:00</text:p>
          </table:table-cell>
          <table:table-cell office:value-type="float" office:value="1.4262865000000002" table:style-name="c9">
            <text:p>1.4263</text:p>
          </table:table-cell>
          <table:table-cell office:value-type="float" office:value="1.3336176133087685" table:style-name="c11">
            <text:p>+1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6:15</text:p>
          </table:table-cell>
          <table:table-cell office:value-type="float" office:value="1.52076" table:style-name="c9">
            <text:p>1.5208</text:p>
          </table:table-cell>
          <table:table-cell office:value-type="string" table:style-name="c9">
            <text:p>2026-05-06 16:45</text:p>
          </table:table-cell>
          <table:table-cell office:value-type="float" office:value="1.505247" table:style-name="c9">
            <text:p>1.5052</text:p>
          </table:table-cell>
          <table:table-cell office:value-type="float" office:value="-1.2179429201846448" table:style-name="c10">
            <text:p>-1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8:00</text:p>
          </table:table-cell>
          <table:table-cell office:value-type="float" office:value="1.5357674999999997" table:style-name="c9">
            <text:p>1.5358</text:p>
          </table:table-cell>
          <table:table-cell office:value-type="string" table:style-name="c9">
            <text:p>2026-05-08 08:30</text:p>
          </table:table-cell>
          <table:table-cell office:value-type="float" office:value="1.521239" table:style-name="c9">
            <text:p>1.5212</text:p>
          </table:table-cell>
          <table:table-cell office:value-type="float" office:value="-1.1440180079992368" table:style-name="c10">
            <text:p>-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9:30</text:p>
          </table:table-cell>
          <table:table-cell office:value-type="float" office:value="1.5677834999999998" table:style-name="c9">
            <text:p>1.5678</text:p>
          </table:table-cell>
          <table:table-cell office:value-type="string" table:style-name="c9">
            <text:p>2026-05-08 10:00</text:p>
          </table:table-cell>
          <table:table-cell office:value-type="float" office:value="1.5582205" table:style-name="c9">
            <text:p>1.5582</text:p>
          </table:table-cell>
          <table:table-cell office:value-type="float" office:value="-0.8086500961070109" table:style-name="c10">
            <text:p>-0.8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5:00</text:p>
          </table:table-cell>
          <table:table-cell office:value-type="float" office:value="1.5757875" table:style-name="c9">
            <text:p>1.5758</text:p>
          </table:table-cell>
          <table:table-cell office:value-type="string" table:style-name="c9">
            <text:p>2026-05-08 15:30</text:p>
          </table:table-cell>
          <table:table-cell office:value-type="float" office:value="1.565217" table:style-name="c9">
            <text:p>1.5652</text:p>
          </table:table-cell>
          <table:table-cell office:value-type="float" office:value="-0.8693665093167491" table:style-name="c10">
            <text:p>-0.9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23:00</text:p>
          </table:table-cell>
          <table:table-cell office:value-type="float" office:value="1.5937964999999998" table:style-name="c9">
            <text:p>1.5938</text:p>
          </table:table-cell>
          <table:table-cell office:value-type="string" table:style-name="c9">
            <text:p>2026-05-08 23:30</text:p>
          </table:table-cell>
          <table:table-cell office:value-type="float" office:value="1.5902045" table:style-name="c9">
            <text:p>1.5902</text:p>
          </table:table-cell>
          <table:table-cell office:value-type="float" office:value="-0.4248232942850483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45</text:p>
          </table:table-cell>
          <table:table-cell office:value-type="float" office:value="1.6078035" table:style-name="c9">
            <text:p>1.6078</text:p>
          </table:table-cell>
          <table:table-cell office:value-type="string" table:style-name="c9">
            <text:p>2026-05-09 02:15</text:p>
          </table:table-cell>
          <table:table-cell office:value-type="float" office:value="1.6141925000000001" table:style-name="c9">
            <text:p>1.6142</text:p>
          </table:table-cell>
          <table:table-cell office:value-type="float" office:value="0.19668007890891737" table:style-name="c11">
            <text:p>+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18:30</text:p>
          </table:table-cell>
          <table:table-cell office:value-type="float" office:value="1.574787" table:style-name="c9">
            <text:p>1.5748</text:p>
          </table:table-cell>
          <table:table-cell office:value-type="string" table:style-name="c9">
            <text:p>2026-05-09 19:00</text:p>
          </table:table-cell>
          <table:table-cell office:value-type="float" office:value="1.5582205" table:style-name="c9">
            <text:p>1.5582</text:p>
          </table:table-cell>
          <table:table-cell office:value-type="float" office:value="-1.249780622998542" table:style-name="c10">
            <text:p>-1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8:45</text:p>
          </table:table-cell>
          <table:table-cell office:value-type="float" office:value="1.604802" table:style-name="c9">
            <text:p>1.6048</text:p>
          </table:table-cell>
          <table:table-cell office:value-type="string" table:style-name="c9">
            <text:p>2026-05-10 19:15</text:p>
          </table:table-cell>
          <table:table-cell office:value-type="float" office:value="1.6091950000000002" table:style-name="c9">
            <text:p>1.6092</text:p>
          </table:table-cell>
          <table:table-cell office:value-type="float" office:value="0.07329372688968938" table:style-name="c11">
            <text:p>+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0:00</text:p>
          </table:table-cell>
          <table:table-cell office:value-type="float" office:value="1.6238115" table:style-name="c9">
            <text:p>1.6238</text:p>
          </table:table-cell>
          <table:table-cell office:value-type="string" table:style-name="c9">
            <text:p>2026-05-10 20:30</text:p>
          </table:table-cell>
          <table:table-cell office:value-type="float" office:value="1.6001995" table:style-name="c9">
            <text:p>1.6002</text:p>
          </table:table-cell>
          <table:table-cell office:value-type="float" office:value="-1.6511029020609858" table:style-name="c10">
            <text:p>-1.7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07:45</text:p>
          </table:table-cell>
          <table:table-cell office:value-type="float" office:value="1.552776" table:style-name="c9">
            <text:p>1.5528</text:p>
          </table:table-cell>
          <table:table-cell office:value-type="string" table:style-name="c9">
            <text:p>2026-05-11 08:15</text:p>
          </table:table-cell>
          <table:table-cell office:value-type="float" office:value="1.5482255" table:style-name="c9">
            <text:p>1.5482</text:p>
          </table:table-cell>
          <table:table-cell office:value-type="float" office:value="-0.4923699731641751" table:style-name="c10">
            <text:p>-0.5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15:15</text:p>
          </table:table-cell>
          <table:table-cell office:value-type="float" office:value="1.576788" table:style-name="c9">
            <text:p>1.5768</text:p>
          </table:table-cell>
          <table:table-cell office:value-type="string" table:style-name="c9">
            <text:p>2026-05-12 15:45</text:p>
          </table:table-cell>
          <table:table-cell office:value-type="float" office:value="1.5522235" table:style-name="c9">
            <text:p>1.5522</text:p>
          </table:table-cell>
          <table:table-cell office:value-type="float" office:value="-1.754668019828931" table:style-name="c10">
            <text:p>-1.8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19:00</text:p>
          </table:table-cell>
          <table:table-cell office:value-type="float" office:value="1.6238115" table:style-name="c9">
            <text:p>1.6238</text:p>
          </table:table-cell>
          <table:table-cell office:value-type="string" table:style-name="c9">
            <text:p>2026-05-12 19:30</text:p>
          </table:table-cell>
          <table:table-cell office:value-type="float" office:value="1.5952020000000002" table:style-name="c9">
            <text:p>1.5952</text:p>
          </table:table-cell>
          <table:table-cell office:value-type="float" office:value="-1.9582512377821826" table:style-name="c10">
            <text:p>-2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01:15</text:p>
          </table:table-cell>
          <table:table-cell office:value-type="float" office:value="1.6638315" table:style-name="c9">
            <text:p>1.6638</text:p>
          </table:table-cell>
          <table:table-cell office:value-type="string" table:style-name="c9">
            <text:p>2026-05-13 01:45</text:p>
          </table:table-cell>
          <table:table-cell office:value-type="float" office:value="1.6741625000000002" table:style-name="c9">
            <text:p>1.6742</text:p>
          </table:table-cell>
          <table:table-cell office:value-type="float" office:value="0.41977502905194974" table:style-name="c11">
            <text:p>+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3 18:15</text:p>
          </table:table-cell>
          <table:table-cell office:value-type="float" office:value="1.5937964999999998" table:style-name="c9">
            <text:p>1.5938</text:p>
          </table:table-cell>
          <table:table-cell office:value-type="string" table:style-name="c9">
            <text:p>2026-05-13 18:45</text:p>
          </table:table-cell>
          <table:table-cell office:value-type="float" office:value="1.6021985" table:style-name="c9">
            <text:p>1.6022</text:p>
          </table:table-cell>
          <table:table-cell office:value-type="float" office:value="0.32621512209998205" table:style-name="c11">
            <text:p>+0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4 02:15</text:p>
          </table:table-cell>
          <table:table-cell office:value-type="float" office:value="1.610805" table:style-name="c9">
            <text:p>1.6108</text:p>
          </table:table-cell>
          <table:table-cell office:value-type="string" table:style-name="c9">
            <text:p>2026-05-14 02:45</text:p>
          </table:table-cell>
          <table:table-cell office:value-type="float" office:value="1.5852070000000003" table:style-name="c9">
            <text:p>1.5852</text:p>
          </table:table-cell>
          <table:table-cell office:value-type="float" office:value="-1.7858666190507133" table:style-name="c10">
            <text:p>-1.8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4 16:15</text:p>
          </table:table-cell>
          <table:table-cell office:value-type="float" office:value="1.6278134999999998" table:style-name="c9">
            <text:p>1.6278</text:p>
          </table:table-cell>
          <table:table-cell office:value-type="string" table:style-name="c9">
            <text:p>2026-05-14 16:45</text:p>
          </table:table-cell>
          <table:table-cell office:value-type="float" office:value="1.6171910000000003" table:style-name="c9">
            <text:p>1.6172</text:p>
          </table:table-cell>
          <table:table-cell office:value-type="float" office:value="-0.8511579986896112" table:style-name="c10">
            <text:p>-0.9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7 21:15</text:p>
          </table:table-cell>
          <table:table-cell office:value-type="float" office:value="1.538769" table:style-name="c9">
            <text:p>1.5388</text:p>
          </table:table-cell>
          <table:table-cell office:value-type="string" table:style-name="c9">
            <text:p>2026-05-17 21:45</text:p>
          </table:table-cell>
          <table:table-cell office:value-type="float" office:value="1.53923" table:style-name="c9">
            <text:p>1.5392</text:p>
          </table:table-cell>
          <table:table-cell office:value-type="float" office:value="-0.1700008753750537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07:15</text:p>
          </table:table-cell>
          <table:table-cell office:value-type="float" office:value="1.6438214999999998" table:style-name="c9">
            <text:p>1.6438</text:p>
          </table:table-cell>
          <table:table-cell office:value-type="string" table:style-name="c9">
            <text:p>2026-05-19 07:45</text:p>
          </table:table-cell>
          <table:table-cell office:value-type="float" office:value="1.665167" table:style-name="c9">
            <text:p>1.6652</text:p>
          </table:table-cell>
          <table:table-cell office:value-type="float" office:value="1.0960333081785345" table:style-name="c11">
            <text:p>+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08:00</text:p>
          </table:table-cell>
          <table:table-cell office:value-type="float" office:value="1.6568279999999997" table:style-name="c9">
            <text:p>1.6568</text:p>
          </table:table-cell>
          <table:table-cell office:value-type="string" table:style-name="c9">
            <text:p>2026-05-19 08:30</text:p>
          </table:table-cell>
          <table:table-cell office:value-type="float" office:value="1.641179" table:style-name="c9">
            <text:p>1.6412</text:p>
          </table:table-cell>
          <table:table-cell office:value-type="float" office:value="-1.142527578058783" table:style-name="c10">
            <text:p>-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05:30</text:p>
          </table:table-cell>
          <table:table-cell office:value-type="float" office:value="1.622811" table:style-name="c9">
            <text:p>1.6228</text:p>
          </table:table-cell>
          <table:table-cell office:value-type="string" table:style-name="c9">
            <text:p>2026-05-20 06:00</text:p>
          </table:table-cell>
          <table:table-cell office:value-type="float" office:value="1.6621685000000002" table:style-name="c9">
            <text:p>1.6622</text:p>
          </table:table-cell>
          <table:table-cell office:value-type="float" office:value="2.2205189124611557" table:style-name="c11">
            <text:p>+2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13:30</text:p>
          </table:table-cell>
          <table:table-cell office:value-type="float" office:value="1.6538264999999999" table:style-name="c9">
            <text:p>1.6538</text:p>
          </table:table-cell>
          <table:table-cell office:value-type="string" table:style-name="c9">
            <text:p>2026-05-20 14:00</text:p>
          </table:table-cell>
          <table:table-cell office:value-type="float" office:value="1.653173" table:style-name="c9">
            <text:p>1.6532</text:p>
          </table:table-cell>
          <table:table-cell office:value-type="float" office:value="-0.23933543373504396" table:style-name="c10">
            <text:p>-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15:30</text:p>
          </table:table-cell>
          <table:table-cell office:value-type="float" office:value="1.7048519999999998" table:style-name="c9">
            <text:p>1.7049</text:p>
          </table:table-cell>
          <table:table-cell office:value-type="string" table:style-name="c9">
            <text:p>2026-05-20 16:00</text:p>
          </table:table-cell>
          <table:table-cell office:value-type="float" office:value="1.687156" table:style-name="c9">
            <text:p>1.6872</text:p>
          </table:table-cell>
          <table:table-cell office:value-type="float" office:value="-1.2358037439026859" table:style-name="c10">
            <text:p>-1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2:45</text:p>
          </table:table-cell>
          <table:table-cell office:value-type="float" office:value="1.7308649999999999" table:style-name="c9">
            <text:p>1.7309</text:p>
          </table:table-cell>
          <table:table-cell office:value-type="string" table:style-name="c9">
            <text:p>2026-05-21 03:15</text:p>
          </table:table-cell>
          <table:table-cell office:value-type="float" office:value="1.7381305000000002" table:style-name="c9">
            <text:p>1.7381</text:p>
          </table:table-cell>
          <table:table-cell office:value-type="float" office:value="0.21902211498299184" table:style-name="c11">
            <text:p>+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4:45</text:p>
          </table:table-cell>
          <table:table-cell office:value-type="float" office:value="1.7658824999999998" table:style-name="c9">
            <text:p>1.7659</text:p>
          </table:table-cell>
          <table:table-cell office:value-type="string" table:style-name="c9">
            <text:p>2026-05-21 05:15</text:p>
          </table:table-cell>
          <table:table-cell office:value-type="float" office:value="1.7691150000000002" table:style-name="c9">
            <text:p>1.7691</text:p>
          </table:table-cell>
          <table:table-cell office:value-type="float" office:value="-0.01721297339996042" table:style-name="c10">
            <text:p>-0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8:30</text:p>
          </table:table-cell>
          <table:table-cell office:value-type="float" office:value="1.7648819999999998" table:style-name="c9">
            <text:p>1.7649</text:p>
          </table:table-cell>
          <table:table-cell office:value-type="string" table:style-name="c9">
            <text:p>2026-05-21 09:00</text:p>
          </table:table-cell>
          <table:table-cell office:value-type="float" office:value="1.7681155" table:style-name="c9">
            <text:p>1.7681</text:p>
          </table:table-cell>
          <table:table-cell office:value-type="float" office:value="-0.017052861579391898" table:style-name="c10">
            <text:p>-0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5:45</text:p>
          </table:table-cell>
          <table:table-cell office:value-type="float" office:value="1.8079034999999999" table:style-name="c9">
            <text:p>1.8079</text:p>
          </table:table-cell>
          <table:table-cell office:value-type="string" table:style-name="c9">
            <text:p>2026-05-21 16:15</text:p>
          </table:table-cell>
          <table:table-cell office:value-type="float" office:value="1.8050970000000002" table:style-name="c9">
            <text:p>1.8051</text:p>
          </table:table-cell>
          <table:table-cell office:value-type="float" office:value="-0.35482474053507573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8:00</text:p>
          </table:table-cell>
          <table:table-cell office:value-type="float" office:value="1.8579284999999999" table:style-name="c9">
            <text:p>1.8579</text:p>
          </table:table-cell>
          <table:table-cell office:value-type="string" table:style-name="c9">
            <text:p>2026-05-21 18:30</text:p>
          </table:table-cell>
          <table:table-cell office:value-type="float" office:value="1.851074" table:style-name="c9">
            <text:p>1.8511</text:p>
          </table:table-cell>
          <table:table-cell office:value-type="float" office:value="-0.5680948931026997" table:style-name="c10">
            <text:p>-0.6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20:00</text:p>
          </table:table-cell>
          <table:table-cell office:value-type="float" office:value="1.9249619999999998" table:style-name="c9">
            <text:p>1.925</text:p>
          </table:table-cell>
          <table:table-cell office:value-type="string" table:style-name="c9">
            <text:p>2026-05-21 20:30</text:p>
          </table:table-cell>
          <table:table-cell office:value-type="float" office:value="1.9340325000000003" table:style-name="c9">
            <text:p>1.934</text:p>
          </table:table-cell>
          <table:table-cell office:value-type="float" office:value="0.27036216987663675" table:style-name="c11">
            <text:p>+0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1:15</text:p>
          </table:table-cell>
          <table:table-cell office:value-type="float" office:value="2.0100045" table:style-name="c9">
            <text:p>2.01</text:p>
          </table:table-cell>
          <table:table-cell office:value-type="string" table:style-name="c9">
            <text:p>2026-05-22 01:45</text:p>
          </table:table-cell>
          <table:table-cell office:value-type="float" office:value="2.0179905000000002" table:style-name="c9">
            <text:p>2.018</text:p>
          </table:table-cell>
          <table:table-cell office:value-type="float" office:value="0.1966183155560408" table:style-name="c11">
            <text:p>+0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08:15</text:p>
          </table:table-cell>
          <table:table-cell office:value-type="float" office:value="2.2641315" table:style-name="c9">
            <text:p>2.2641</text:p>
          </table:table-cell>
          <table:table-cell office:value-type="string" table:style-name="c9">
            <text:p>2026-05-22 08:45</text:p>
          </table:table-cell>
          <table:table-cell office:value-type="float" office:value="2.2468760000000003" table:style-name="c9">
            <text:p>2.2469</text:p>
          </table:table-cell>
          <table:table-cell office:value-type="float" office:value="-0.9605009746120996" table:style-name="c10">
            <text:p>-1.0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3:15</text:p>
          </table:table-cell>
          <table:table-cell office:value-type="float" office:value="2.3141565" table:style-name="c9">
            <text:p>2.3142</text:p>
          </table:table-cell>
          <table:table-cell office:value-type="string" table:style-name="c9">
            <text:p>2026-05-22 13:45</text:p>
          </table:table-cell>
          <table:table-cell office:value-type="float" office:value="2.3218385" table:style-name="c9">
            <text:p>2.3218</text:p>
          </table:table-cell>
          <table:table-cell office:value-type="float" office:value="0.13139322420501198" table:style-name="c11">
            <text:p>+0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3 15:15</text:p>
          </table:table-cell>
          <table:table-cell office:value-type="float" office:value="2.2121055" table:style-name="c9">
            <text:p>2.2121</text:p>
          </table:table-cell>
          <table:table-cell office:value-type="string" table:style-name="c9">
            <text:p>2026-05-23 15:45</text:p>
          </table:table-cell>
          <table:table-cell office:value-type="float" office:value="2.2318835000000004" table:style-name="c9">
            <text:p>2.2319</text:p>
          </table:table-cell>
          <table:table-cell office:value-type="float" office:value="0.6923930564568748" table:style-name="c11">
            <text:p>+0.7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4 15:15</text:p>
          </table:table-cell>
          <table:table-cell office:value-type="float" office:value="2.4682334999999997" table:style-name="c9">
            <text:p>2.4682</text:p>
          </table:table-cell>
          <table:table-cell office:value-type="string" table:style-name="c9">
            <text:p>2026-05-24 15:45</text:p>
          </table:table-cell>
          <table:table-cell office:value-type="float" office:value="2.4257865" table:style-name="c9">
            <text:p>2.4258</text:p>
          </table:table-cell>
          <table:table-cell office:value-type="float" office:value="-1.9161942017844047" table:style-name="c10">
            <text:p>-1.9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05:15</text:p>
          </table:table-cell>
          <table:table-cell office:value-type="float" office:value="2.3881935" table:style-name="c9">
            <text:p>2.3882</text:p>
          </table:table-cell>
          <table:table-cell office:value-type="string" table:style-name="c9">
            <text:p>2026-05-25 05:45</text:p>
          </table:table-cell>
          <table:table-cell office:value-type="float" office:value="2.3658165" table:style-name="c9">
            <text:p>2.3658</text:p>
          </table:table-cell>
          <table:table-cell office:value-type="float" office:value="-1.1350113457514799" table:style-name="c10">
            <text:p>-1.1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2:15</text:p>
          </table:table-cell>
          <table:table-cell office:value-type="float" office:value="2.5072529999999995" table:style-name="c9">
            <text:p>2.5073</text:p>
          </table:table-cell>
          <table:table-cell office:value-type="string" table:style-name="c9">
            <text:p>2026-05-25 12:45</text:p>
          </table:table-cell>
          <table:table-cell office:value-type="float" office:value="2.5417285000000005" table:style-name="c9">
            <text:p>2.5417</text:p>
          </table:table-cell>
          <table:table-cell office:value-type="float" office:value="1.1723820742661761" table:style-name="c11">
            <text:p>+1.2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4:15</text:p>
          </table:table-cell>
          <table:table-cell office:value-type="float" office:value="2.6583285" table:style-name="c9">
            <text:p>2.6583</text:p>
          </table:table-cell>
          <table:table-cell office:value-type="string" table:style-name="c9">
            <text:p>2026-05-25 14:45</text:p>
          </table:table-cell>
          <table:table-cell office:value-type="float" office:value="2.6516735000000002" table:style-name="c9">
            <text:p>2.6517</text:p>
          </table:table-cell>
          <table:table-cell office:value-type="float" office:value="-0.44974484253921254" table:style-name="c10">
            <text:p>-0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7 08:30</text:p>
          </table:table-cell>
          <table:table-cell office:value-type="float" office:value="2.5512749999999995" table:style-name="c9">
            <text:p>2.5513</text:p>
          </table:table-cell>
          <table:table-cell office:value-type="string" table:style-name="c9">
            <text:p>2026-05-27 09:00</text:p>
          </table:table-cell>
          <table:table-cell office:value-type="float" office:value="2.5227380000000004" table:style-name="c9">
            <text:p>2.5227</text:p>
          </table:table-cell>
          <table:table-cell office:value-type="float" office:value="-1.3162028108298585" table:style-name="c10">
            <text:p>-1.3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15:45</text:p>
          </table:table-cell>
          <table:table-cell office:value-type="float" office:value="2.4302144999999995" table:style-name="c9">
            <text:p>2.4302</text:p>
          </table:table-cell>
          <table:table-cell office:value-type="string" table:style-name="c9">
            <text:p>2026-06-01 16:15</text:p>
          </table:table-cell>
          <table:table-cell office:value-type="float" office:value="2.400799" table:style-name="c9">
            <text:p>2.4008</text:p>
          </table:table-cell>
          <table:table-cell office:value-type="float" office:value="-1.4078879539645262" table:style-name="c10">
            <text:p>-1.4</text:p>
          </table:table-cell>
        </table:table-row>
        <table:table-row>
          <table:table-cell office:value-type="string" table:style-name="c8">
            <text:p>NEAR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2 03:00</text:p>
          </table:table-cell>
          <table:table-cell office:value-type="float" office:value="2.6673329999999997" table:style-name="c9">
            <text:p>2.6673</text:p>
          </table:table-cell>
          <table:table-cell office:value-type="string" table:style-name="c9">
            <text:p>2026-06-02 03:30</text:p>
          </table:table-cell>
          <table:table-cell office:value-type="float" office:value="2.7156415000000003" table:style-name="c9">
            <text:p>2.7156</text:p>
          </table:table-cell>
          <table:table-cell office:value-type="float" office:value="1.607595776061732" table:style-name="c11">
            <text:p>+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15</text:p>
          </table:table-cell>
          <table:table-cell office:value-type="float" office:value="0.1296648" table:style-name="c1">
            <text:p>0.12966</text:p>
          </table:table-cell>
          <table:table-cell office:value-type="string" table:style-name="c1">
            <text:p>2026-03-05 09:45</text:p>
          </table:table-cell>
          <table:table-cell office:value-type="float" office:value="0.12883555" table:style-name="c1">
            <text:p>0.12884</text:p>
          </table:table-cell>
          <table:table-cell office:value-type="float" office:value="-0.8381552005247372" table:style-name="c12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00</text:p>
          </table:table-cell>
          <table:table-cell office:value-type="float" office:value="0.12996494999999997" table:style-name="c1">
            <text:p>0.12996</text:p>
          </table:table-cell>
          <table:table-cell office:value-type="string" table:style-name="c1">
            <text:p>2026-03-05 11:30</text:p>
          </table:table-cell>
          <table:table-cell office:value-type="float" office:value="0.12843575000000002" table:style-name="c1">
            <text:p>0.12844</text:p>
          </table:table-cell>
          <table:table-cell office:value-type="float" office:value="-1.3741728552582377" table:style-name="c12">
            <text:p>-1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0.12056025" table:style-name="c1">
            <text:p>0.12056</text:p>
          </table:table-cell>
          <table:table-cell office:value-type="string" table:style-name="c1">
            <text:p>2026-03-09 20:15</text:p>
          </table:table-cell>
          <table:table-cell office:value-type="float" office:value="0.11974010000000002" table:style-name="c1">
            <text:p>0.11974</text:p>
          </table:table-cell>
          <table:table-cell office:value-type="float" office:value="-0.8788223812574714" table:style-name="c12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0.12116054999999999" table:style-name="c1">
            <text:p>0.12116</text:p>
          </table:table-cell>
          <table:table-cell office:value-type="string" table:style-name="c1">
            <text:p>2026-03-11 14:30</text:p>
          </table:table-cell>
          <table:table-cell office:value-type="float" office:value="0.12183905" table:style-name="c1">
            <text:p>0.12184</text:p>
          </table:table-cell>
          <table:table-cell office:value-type="float" office:value="0.35898131780518483" table:style-name="c13">
            <text:p>+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30</text:p>
          </table:table-cell>
          <table:table-cell office:value-type="float" office:value="0.11995995" table:style-name="c1">
            <text:p>0.11996</text:p>
          </table:table-cell>
          <table:table-cell office:value-type="string" table:style-name="c1">
            <text:p>2026-03-12 11:00</text:p>
          </table:table-cell>
          <table:table-cell office:value-type="float" office:value="0.11964015" table:style-name="c1">
            <text:p>0.11964</text:p>
          </table:table-cell>
          <table:table-cell office:value-type="float" office:value="-0.46595606271091494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0.12556275" table:style-name="c1">
            <text:p>0.12556</text:p>
          </table:table-cell>
          <table:table-cell office:value-type="string" table:style-name="c1">
            <text:p>2026-03-13 11:00</text:p>
          </table:table-cell>
          <table:table-cell office:value-type="float" office:value="0.1257371" table:style-name="c1">
            <text:p>0.12574</text:p>
          </table:table-cell>
          <table:table-cell office:value-type="float" office:value="-0.0613226955446633" table:style-name="c12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0.1264632" table:style-name="c1">
            <text:p>0.12646</text:p>
          </table:table-cell>
          <table:table-cell office:value-type="string" table:style-name="c1">
            <text:p>2026-03-13 14:00</text:p>
          </table:table-cell>
          <table:table-cell office:value-type="float" office:value="0.1265367" table:style-name="c1">
            <text:p>0.12654</text:p>
          </table:table-cell>
          <table:table-cell office:value-type="float" office:value="-0.14189650688896105" table:style-name="c12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5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3-13 15:45</text:p>
          </table:table-cell>
          <table:table-cell office:value-type="float" office:value="0.12593700000000002" table:style-name="c1">
            <text:p>0.12594</text:p>
          </table:table-cell>
          <table:table-cell office:value-type="float" office:value="-0.9286745136895092" table:style-name="c12">
            <text:p>-0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15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3-14 04:45</text:p>
          </table:table-cell>
          <table:table-cell office:value-type="float" office:value="0.12523735" table:style-name="c1">
            <text:p>0.12524</text:p>
          </table:table-cell>
          <table:table-cell office:value-type="float" office:value="-0.6959155260604977" table:style-name="c12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4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3-15 04:45</text:p>
          </table:table-cell>
          <table:table-cell office:value-type="float" office:value="0.1267366" table:style-name="c1">
            <text:p>0.1267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12756375" table:style-name="c1">
            <text:p>0.12756</text:p>
          </table:table-cell>
          <table:table-cell office:value-type="string" table:style-name="c1">
            <text:p>2026-03-15 11:30</text:p>
          </table:table-cell>
          <table:table-cell office:value-type="float" office:value="0.12703645" table:style-name="c1">
            <text:p>0.12704</text:p>
          </table:table-cell>
          <table:table-cell office:value-type="float" office:value="-0.6124356359467287" table:style-name="c12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1288644" table:style-name="c1">
            <text:p>0.12886</text:p>
          </table:table-cell>
          <table:table-cell office:value-type="string" table:style-name="c1">
            <text:p>2026-03-16 04:00</text:p>
          </table:table-cell>
          <table:table-cell office:value-type="float" office:value="0.1291354" table:style-name="c1">
            <text:p>0.12914</text:p>
          </table:table-cell>
          <table:table-cell office:value-type="float" office:value="0.009978190563120215" table:style-name="c13">
            <text:p>+0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7:30</text:p>
          </table:table-cell>
          <table:table-cell office:value-type="float" office:value="0.13196594999999997" table:style-name="c1">
            <text:p>0.13197</text:p>
          </table:table-cell>
          <table:table-cell office:value-type="string" table:style-name="c1">
            <text:p>2026-03-16 08:00</text:p>
          </table:table-cell>
          <table:table-cell office:value-type="float" office:value="0.13123435" table:style-name="c1">
            <text:p>0.13123</text:p>
          </table:table-cell>
          <table:table-cell office:value-type="float" office:value="-0.7531772140086046" table:style-name="c12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0.1312656" table:style-name="c1">
            <text:p>0.13127</text:p>
          </table:table-cell>
          <table:table-cell office:value-type="string" table:style-name="c1">
            <text:p>2026-03-16 15:30</text:p>
          </table:table-cell>
          <table:table-cell office:value-type="float" office:value="0.13063465000000002" table:style-name="c1">
            <text:p>0.13063</text:p>
          </table:table-cell>
          <table:table-cell office:value-type="float" office:value="-0.6796058261646531" table:style-name="c12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45</text:p>
          </table:table-cell>
          <table:table-cell office:value-type="float" office:value="0.13236615" table:style-name="c1">
            <text:p>0.13237</text:p>
          </table:table-cell>
          <table:table-cell office:value-type="string" table:style-name="c1">
            <text:p>2026-03-16 17:15</text:p>
          </table:table-cell>
          <table:table-cell office:value-type="float" office:value="0.13243375000000002" table:style-name="c1">
            <text:p>0.13243</text:p>
          </table:table-cell>
          <table:table-cell office:value-type="float" office:value="-0.14893163112319474" table:style-name="c12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30</text:p>
          </table:table-cell>
          <table:table-cell office:value-type="float" office:value="0.13596794999999998" table:style-name="c1">
            <text:p>0.13597</text:p>
          </table:table-cell>
          <table:table-cell office:value-type="string" table:style-name="c1">
            <text:p>2026-03-17 08:00</text:p>
          </table:table-cell>
          <table:table-cell office:value-type="float" office:value="0.1353323" table:style-name="c1">
            <text:p>0.13533</text:p>
          </table:table-cell>
          <table:table-cell office:value-type="float" office:value="-0.6664653454729441" table:style-name="c12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15</text:p>
          </table:table-cell>
          <table:table-cell office:value-type="float" office:value="0.13556775000000001" table:style-name="c1">
            <text:p>0.13557</text:p>
          </table:table-cell>
          <table:table-cell office:value-type="string" table:style-name="c1">
            <text:p>2026-03-17 08:45</text:p>
          </table:table-cell>
          <table:table-cell office:value-type="float" office:value="0.13543225" table:style-name="c1">
            <text:p>0.13543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1086543" table:style-name="c1">
            <text:p>0.10865</text:p>
          </table:table-cell>
          <table:table-cell office:value-type="string" table:style-name="c1">
            <text:p>2026-03-30 08:30</text:p>
          </table:table-cell>
          <table:table-cell office:value-type="float" office:value="0.1083458" table:style-name="c1">
            <text:p>0.10835</text:p>
          </table:table-cell>
          <table:table-cell office:value-type="float" office:value="-0.48326044546785907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2:30</text:p>
          </table:table-cell>
          <table:table-cell office:value-type="float" office:value="0.10885439999999999" table:style-name="c1">
            <text:p>0.10885</text:p>
          </table:table-cell>
          <table:table-cell office:value-type="string" table:style-name="c1">
            <text:p>2026-03-30 13:00</text:p>
          </table:table-cell>
          <table:table-cell office:value-type="float" office:value="0.10914540000000002" table:style-name="c1">
            <text:p>0.10915</text:p>
          </table:table-cell>
          <table:table-cell office:value-type="float" office:value="0.06689517869742367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7:00</text:p>
          </table:table-cell>
          <table:table-cell office:value-type="float" office:value="0.1090545" table:style-name="c1">
            <text:p>0.10905</text:p>
          </table:table-cell>
          <table:table-cell office:value-type="string" table:style-name="c1">
            <text:p>2026-03-31 07:30</text:p>
          </table:table-cell>
          <table:table-cell office:value-type="float" office:value="0.107946" table:style-name="c1">
            <text:p>0.10795</text:p>
          </table:table-cell>
          <table:table-cell office:value-type="float" office:value="-1.2143323329161015" table:style-name="c12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112056" table:style-name="c1">
            <text:p>0.11206</text:p>
          </table:table-cell>
          <table:table-cell office:value-type="string" table:style-name="c1">
            <text:p>2026-04-01 06:15</text:p>
          </table:table-cell>
          <table:table-cell office:value-type="float" office:value="0.111944" table:style-name="c1">
            <text:p>0.11194</text:p>
          </table:table-cell>
          <table:table-cell office:value-type="float" office:value="-0.299650224887571" table:style-name="c12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7:45</text:p>
          </table:table-cell>
          <table:table-cell office:value-type="float" office:value="0.1128564" table:style-name="c1">
            <text:p>0.11286</text:p>
          </table:table-cell>
          <table:table-cell office:value-type="string" table:style-name="c1">
            <text:p>2026-04-01 08:15</text:p>
          </table:table-cell>
          <table:table-cell office:value-type="float" office:value="0.11254370000000001" table:style-name="c1">
            <text:p>0.11254</text:p>
          </table:table-cell>
          <table:table-cell office:value-type="float" office:value="-0.4764238947015831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01 13:15</text:p>
          </table:table-cell>
          <table:table-cell office:value-type="float" office:value="0.111944" table:style-name="c1">
            <text:p>0.11194</text:p>
          </table:table-cell>
          <table:table-cell office:value-type="float" office:value="-1.2693264826472594" table:style-name="c12">
            <text:p>-1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0.11075535" table:style-name="c1">
            <text:p>0.11076</text:p>
          </table:table-cell>
          <table:table-cell office:value-type="string" table:style-name="c1">
            <text:p>2026-04-03 20:45</text:p>
          </table:table-cell>
          <table:table-cell office:value-type="float" office:value="0.11024485" table:style-name="c1">
            <text:p>0.11024</text:p>
          </table:table-cell>
          <table:table-cell office:value-type="float" office:value="-0.6599044246169639" table:style-name="c12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00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06 10:30</text:p>
          </table:table-cell>
          <table:table-cell office:value-type="float" office:value="0.11404295" table:style-name="c1">
            <text:p>0.11404</text:p>
          </table:table-cell>
          <table:table-cell office:value-type="float" office:value="0.40432400123857626" table:style-name="c13">
            <text:p>+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00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4-06 11:30</text:p>
          </table:table-cell>
          <table:table-cell office:value-type="float" office:value="0.11424285" table:style-name="c1">
            <text:p>0.11424</text:p>
          </table:table-cell>
          <table:table-cell office:value-type="float" office:value="-0.2123469413716772" table:style-name="c12">
            <text:p>-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8:1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4-07 08:45</text:p>
          </table:table-cell>
          <table:table-cell office:value-type="float" office:value="0.10984505" table:style-name="c1">
            <text:p>0.10985</text:p>
          </table:table-cell>
          <table:table-cell office:value-type="float" office:value="-0.5710667850738926" table:style-name="c12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11635815" table:style-name="c1">
            <text:p>0.11636</text:p>
          </table:table-cell>
          <table:table-cell office:value-type="string" table:style-name="c1">
            <text:p>2026-04-07 23:15</text:p>
          </table:table-cell>
          <table:table-cell office:value-type="float" office:value="0.1175412" table:style-name="c1">
            <text:p>0.11754</text:p>
          </table:table-cell>
          <table:table-cell office:value-type="float" office:value="0.814799084722484" table:style-name="c13">
            <text:p>+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30</text:p>
          </table:table-cell>
          <table:table-cell office:value-type="float" office:value="0.11915954999999999" table:style-name="c1">
            <text:p>0.11916</text:p>
          </table:table-cell>
          <table:table-cell office:value-type="string" table:style-name="c1">
            <text:p>2026-04-08 00:00</text:p>
          </table:table-cell>
          <table:table-cell office:value-type="float" office:value="0.11874060000000002" table:style-name="c1">
            <text:p>0.11874</text:p>
          </table:table-cell>
          <table:table-cell office:value-type="float" office:value="-0.5507846071925893" table:style-name="c12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4:15</text:p>
          </table:table-cell>
          <table:table-cell office:value-type="float" office:value="0.12016004999999999" table:style-name="c1">
            <text:p>0.12016</text:p>
          </table:table-cell>
          <table:table-cell office:value-type="string" table:style-name="c1">
            <text:p>2026-04-08 04:45</text:p>
          </table:table-cell>
          <table:table-cell office:value-type="float" office:value="0.1205397" table:style-name="c1">
            <text:p>0.12054</text:p>
          </table:table-cell>
          <table:table-cell office:value-type="float" office:value="0.11542200564997884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17:15</text:p>
          </table:table-cell>
          <table:table-cell office:value-type="float" office:value="0.1176588" table:style-name="c1">
            <text:p>0.11766</text:p>
          </table:table-cell>
          <table:table-cell office:value-type="string" table:style-name="c1">
            <text:p>2026-04-08 17:45</text:p>
          </table:table-cell>
          <table:table-cell office:value-type="float" office:value="0.11664165" table:style-name="c1">
            <text:p>0.11664</text:p>
          </table:table-cell>
          <table:table-cell office:value-type="float" office:value="-1.062663105819539" table:style-name="c12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0.1164582" table:style-name="c1">
            <text:p>0.11646</text:p>
          </table:table-cell>
          <table:table-cell office:value-type="string" table:style-name="c1">
            <text:p>2026-04-13 23:30</text:p>
          </table:table-cell>
          <table:table-cell office:value-type="float" office:value="0.11584205000000002" table:style-name="c1">
            <text:p>0.11584</text:p>
          </table:table-cell>
          <table:table-cell office:value-type="float" office:value="-0.7279163321689541" table:style-name="c12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45</text:p>
          </table:table-cell>
          <table:table-cell office:value-type="float" office:value="0.116058" table:style-name="c1">
            <text:p>0.11606</text:p>
          </table:table-cell>
          <table:table-cell office:value-type="string" table:style-name="c1">
            <text:p>2026-04-14 00:15</text:p>
          </table:table-cell>
          <table:table-cell office:value-type="float" office:value="0.11584205000000002" table:style-name="c1">
            <text:p>0.11584</text:p>
          </table:table-cell>
          <table:table-cell office:value-type="float" office:value="-0.385598802279874" table:style-name="c12">
            <text:p>-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45</text:p>
          </table:table-cell>
          <table:table-cell office:value-type="float" office:value="0.11535764999999999" table:style-name="c1">
            <text:p>0.11536</text:p>
          </table:table-cell>
          <table:table-cell office:value-type="string" table:style-name="c1">
            <text:p>2026-04-14 15:15</text:p>
          </table:table-cell>
          <table:table-cell office:value-type="float" office:value="0.1131434" table:style-name="c1">
            <text:p>0.11314</text:p>
          </table:table-cell>
          <table:table-cell office:value-type="float" office:value="-2.11552823466844" table:style-name="c12">
            <text:p>-2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0:15</text:p>
          </table:table-cell>
          <table:table-cell office:value-type="float" office:value="0.11395695" table:style-name="c1">
            <text:p>0.11396</text:p>
          </table:table-cell>
          <table:table-cell office:value-type="string" table:style-name="c1">
            <text:p>2026-04-15 10:45</text:p>
          </table:table-cell>
          <table:table-cell office:value-type="float" office:value="0.11394300000000002" table:style-name="c1">
            <text:p>0.11394</text:p>
          </table:table-cell>
          <table:table-cell office:value-type="float" office:value="-0.21211699418067775" table:style-name="c12">
            <text:p>-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1:45</text:p>
          </table:table-cell>
          <table:table-cell office:value-type="float" office:value="0.11515754999999998" table:style-name="c1">
            <text:p>0.11516</text:p>
          </table:table-cell>
          <table:table-cell office:value-type="string" table:style-name="c1">
            <text:p>2026-04-15 12:15</text:p>
          </table:table-cell>
          <table:table-cell office:value-type="float" office:value="0.1151424" table:style-name="c1">
            <text:p>0.11514</text:p>
          </table:table-cell>
          <table:table-cell office:value-type="float" office:value="-0.21302959085182094" table:style-name="c12">
            <text:p>-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30</text:p>
          </table:table-cell>
          <table:table-cell office:value-type="float" office:value="0.11555775" table:style-name="c1">
            <text:p>0.11556</text:p>
          </table:table-cell>
          <table:table-cell office:value-type="string" table:style-name="c1">
            <text:p>2026-04-15 13:00</text:p>
          </table:table-cell>
          <table:table-cell office:value-type="float" office:value="0.11604195" table:style-name="c1">
            <text:p>0.11604</text:p>
          </table:table-cell>
          <table:table-cell office:value-type="float" office:value="0.21827367004809695" table:style-name="c13">
            <text:p>+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0.1176588" table:style-name="c1">
            <text:p>0.11766</text:p>
          </table:table-cell>
          <table:table-cell office:value-type="string" table:style-name="c1">
            <text:p>2026-04-15 15:30</text:p>
          </table:table-cell>
          <table:table-cell office:value-type="float" office:value="0.11644175000000001" table:style-name="c1">
            <text:p>0.11644</text:p>
          </table:table-cell>
          <table:table-cell office:value-type="float" office:value="-1.232221523804422" table:style-name="c12">
            <text:p>-1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15</text:p>
          </table:table-cell>
          <table:table-cell office:value-type="float" office:value="0.11815904999999999" table:style-name="c1">
            <text:p>0.11816</text:p>
          </table:table-cell>
          <table:table-cell office:value-type="string" table:style-name="c1">
            <text:p>2026-04-15 16:45</text:p>
          </table:table-cell>
          <table:table-cell office:value-type="float" office:value="0.11924035000000001" table:style-name="c1">
            <text:p>0.11924</text:p>
          </table:table-cell>
          <table:table-cell office:value-type="float" office:value="0.7133931259180049" table:style-name="c13">
            <text:p>+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1206603" table:style-name="c1">
            <text:p>0.12066</text:p>
          </table:table-cell>
          <table:table-cell office:value-type="string" table:style-name="c1">
            <text:p>2026-04-16 02:45</text:p>
          </table:table-cell>
          <table:table-cell office:value-type="float" office:value="0.12123935000000001" table:style-name="c1">
            <text:p>0.12124</text:p>
          </table:table-cell>
          <table:table-cell office:value-type="float" office:value="0.2790416892300085" table:style-name="c13">
            <text:p>+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5:30</text:p>
          </table:table-cell>
          <table:table-cell office:value-type="float" office:value="0.1222611" table:style-name="c1">
            <text:p>0.12226</text:p>
          </table:table-cell>
          <table:table-cell office:value-type="string" table:style-name="c1">
            <text:p>2026-04-16 06:00</text:p>
          </table:table-cell>
          <table:table-cell office:value-type="float" office:value="0.12263865000000002" table:style-name="c1">
            <text:p>0.12264</text:p>
          </table:table-cell>
          <table:table-cell office:value-type="float" office:value="0.10828901314481332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30</text:p>
          </table:table-cell>
          <table:table-cell office:value-type="float" office:value="0.1232616" table:style-name="c1">
            <text:p>0.12326</text:p>
          </table:table-cell>
          <table:table-cell office:value-type="string" table:style-name="c1">
            <text:p>2026-04-16 08:00</text:p>
          </table:table-cell>
          <table:table-cell office:value-type="float" office:value="0.12263865000000002" table:style-name="c1">
            <text:p>0.12264</text:p>
          </table:table-cell>
          <table:table-cell office:value-type="float" office:value="-0.7042782678060244" table:style-name="c12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00</text:p>
          </table:table-cell>
          <table:table-cell office:value-type="float" office:value="0.1232616" table:style-name="c1">
            <text:p>0.12326</text:p>
          </table:table-cell>
          <table:table-cell office:value-type="string" table:style-name="c1">
            <text:p>2026-04-16 12:30</text:p>
          </table:table-cell>
          <table:table-cell office:value-type="float" office:value="0.12523735" table:style-name="c1">
            <text:p>0.12524</text:p>
          </table:table-cell>
          <table:table-cell office:value-type="float" office:value="1.3997875553700467" table:style-name="c13">
            <text:p>+1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30</text:p>
          </table:table-cell>
          <table:table-cell office:value-type="float" office:value="0.1276638" table:style-name="c1">
            <text:p>0.12766</text:p>
          </table:table-cell>
          <table:table-cell office:value-type="string" table:style-name="c1">
            <text:p>2026-04-16 16:00</text:p>
          </table:table-cell>
          <table:table-cell office:value-type="float" office:value="0.1305347" table:style-name="c1">
            <text:p>0.13053</text:p>
          </table:table-cell>
          <table:table-cell office:value-type="float" office:value="2.0444018858125856" table:style-name="c13">
            <text:p>+2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15</text:p>
          </table:table-cell>
          <table:table-cell office:value-type="float" office:value="0.13116555" table:style-name="c1">
            <text:p>0.13117</text:p>
          </table:table-cell>
          <table:table-cell office:value-type="string" table:style-name="c1">
            <text:p>2026-04-16 19:45</text:p>
          </table:table-cell>
          <table:table-cell office:value-type="float" office:value="0.13193400000000002" table:style-name="c1">
            <text:p>0.13193</text:p>
          </table:table-cell>
          <table:table-cell office:value-type="float" office:value="0.3847915355823517" table:style-name="c13">
            <text:p>+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1282641" table:style-name="c1">
            <text:p>0.12826</text:p>
          </table:table-cell>
          <table:table-cell office:value-type="string" table:style-name="c1">
            <text:p>2026-04-22 06:00</text:p>
          </table:table-cell>
          <table:table-cell office:value-type="float" office:value="0.1275362" table:style-name="c1">
            <text:p>0.12754</text:p>
          </table:table-cell>
          <table:table-cell office:value-type="float" office:value="-0.7662665264871582" table:style-name="c12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24 16:30</text:p>
          </table:table-cell>
          <table:table-cell office:value-type="float" office:value="0.12363815000000002" table:style-name="c1">
            <text:p>0.12364</text:p>
          </table:table-cell>
          <table:table-cell office:value-type="float" office:value="-0.6210050992634164" table:style-name="c12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20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4 20:30</text:p>
          </table:table-cell>
          <table:table-cell office:value-type="float" office:value="0.12453770000000002" table:style-name="c1">
            <text:p>0.12454</text:p>
          </table:table-cell>
          <table:table-cell office:value-type="float" office:value="-0.7774474282826516" table:style-name="c12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1:4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4-25 02:15</text:p>
          </table:table-cell>
          <table:table-cell office:value-type="float" office:value="0.12663665000000002" table:style-name="c1">
            <text:p>0.12664</text:p>
          </table:table-cell>
          <table:table-cell office:value-type="float" office:value="-0.5351628621515947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15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4-25 04:45</text:p>
          </table:table-cell>
          <table:table-cell office:value-type="float" office:value="0.12823585" table:style-name="c1">
            <text:p>0.12824</text:p>
          </table:table-cell>
          <table:table-cell office:value-type="float" office:value="-0.45482586656085955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9:00</text:p>
          </table:table-cell>
          <table:table-cell office:value-type="float" office:value="0.13246619999999998" table:style-name="c1">
            <text:p>0.13247</text:p>
          </table:table-cell>
          <table:table-cell office:value-type="string" table:style-name="c1">
            <text:p>2026-04-25 09:30</text:p>
          </table:table-cell>
          <table:table-cell office:value-type="float" office:value="0.13063465000000002" table:style-name="c1">
            <text:p>0.13063</text:p>
          </table:table-cell>
          <table:table-cell office:value-type="float" office:value="-1.5797906676193296" table:style-name="c12">
            <text:p>-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15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5 23:45</text:p>
          </table:table-cell>
          <table:table-cell office:value-type="float" office:value="0.1251374" table:style-name="c1">
            <text:p>0.12514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0.1256628" table:style-name="c1">
            <text:p>0.12566</text:p>
          </table:table-cell>
          <table:table-cell office:value-type="string" table:style-name="c1">
            <text:p>2026-04-26 05:45</text:p>
          </table:table-cell>
          <table:table-cell office:value-type="float" office:value="0.1253373" table:style-name="c1">
            <text:p>0.12534</text:p>
          </table:table-cell>
          <table:table-cell office:value-type="float" office:value="-0.4584087436377282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5:45</text:p>
          </table:table-cell>
          <table:table-cell office:value-type="float" office:value="0.1264632" table:style-name="c1">
            <text:p>0.12646</text:p>
          </table:table-cell>
          <table:table-cell office:value-type="string" table:style-name="c1">
            <text:p>2026-04-26 16:15</text:p>
          </table:table-cell>
          <table:table-cell office:value-type="float" office:value="0.12633680000000003" table:style-name="c1">
            <text:p>0.12634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4-27 01:45</text:p>
          </table:table-cell>
          <table:table-cell office:value-type="float" office:value="0.1269365" table:style-name="c1">
            <text:p>0.12694</text:p>
          </table:table-cell>
          <table:table-cell office:value-type="float" office:value="-0.14239415268704203" table:style-name="c12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30</text:p>
          </table:table-cell>
          <table:table-cell office:value-type="float" office:value="0.12896444999999998" table:style-name="c1">
            <text:p>0.12896</text:p>
          </table:table-cell>
          <table:table-cell office:value-type="string" table:style-name="c1">
            <text:p>2026-04-27 04:00</text:p>
          </table:table-cell>
          <table:table-cell office:value-type="float" office:value="0.1283358" table:style-name="c1">
            <text:p>0.12834</text:p>
          </table:table-cell>
          <table:table-cell office:value-type="float" office:value="-0.6863854839066041" table:style-name="c12">
            <text:p>-0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9 10:30</text:p>
          </table:table-cell>
          <table:table-cell office:value-type="float" office:value="0.12563715" table:style-name="c1">
            <text:p>0.12564</text:p>
          </table:table-cell>
          <table:table-cell office:value-type="float" office:value="0.09851411127503873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1234617" table:style-name="c1">
            <text:p>0.12346</text:p>
          </table:table-cell>
          <table:table-cell office:value-type="string" table:style-name="c1">
            <text:p>2026-05-02 16:30</text:p>
          </table:table-cell>
          <table:table-cell office:value-type="float" office:value="0.1233383" table:style-name="c1">
            <text:p>0.12334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9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5-02 19:30</text:p>
          </table:table-cell>
          <table:table-cell office:value-type="float" office:value="0.12543725" table:style-name="c1">
            <text:p>0.12544</text:p>
          </table:table-cell>
          <table:table-cell office:value-type="float" office:value="-0.060751623190002935" table:style-name="c12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0:15</text:p>
          </table:table-cell>
          <table:table-cell office:value-type="float" office:value="0.12636314999999998" table:style-name="c1">
            <text:p>0.12636</text:p>
          </table:table-cell>
          <table:table-cell office:value-type="string" table:style-name="c1">
            <text:p>2026-05-02 20:45</text:p>
          </table:table-cell>
          <table:table-cell office:value-type="float" office:value="0.12613690000000002" table:style-name="c1">
            <text:p>0.12614</text:p>
          </table:table-cell>
          <table:table-cell office:value-type="float" office:value="-0.37858953587336375" table:style-name="c12">
            <text:p>-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5-04 04:45</text:p>
          </table:table-cell>
          <table:table-cell office:value-type="float" office:value="0.1273363" table:style-name="c1">
            <text:p>0.12734</text:p>
          </table:table-cell>
          <table:table-cell office:value-type="float" office:value="0.01436662479787909" table:style-name="c13">
            <text:p>+0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2486239999999998" table:style-name="c1">
            <text:p>0.12486</text:p>
          </table:table-cell>
          <table:table-cell office:value-type="string" table:style-name="c1">
            <text:p>2026-05-04 15:30</text:p>
          </table:table-cell>
          <table:table-cell office:value-type="float" office:value="0.12313840000000001" table:style-name="c1">
            <text:p>0.12314</text:p>
          </table:table-cell>
          <table:table-cell office:value-type="float" office:value="-1.5778598373889619" table:style-name="c12">
            <text:p>-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15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5-05 02:45</text:p>
          </table:table-cell>
          <table:table-cell office:value-type="float" office:value="0.12793600000000002" table:style-name="c1">
            <text:p>0.12794</text:p>
          </table:table-cell>
          <table:table-cell office:value-type="float" office:value="0.16989616337828028" table:style-name="c13">
            <text:p>+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4:15</text:p>
          </table:table-cell>
          <table:table-cell office:value-type="float" office:value="0.12756375" table:style-name="c1">
            <text:p>0.12756</text:p>
          </table:table-cell>
          <table:table-cell office:value-type="string" table:style-name="c1">
            <text:p>2026-05-05 04:45</text:p>
          </table:table-cell>
          <table:table-cell office:value-type="float" office:value="0.12763615" table:style-name="c1">
            <text:p>0.12764</text:p>
          </table:table-cell>
          <table:table-cell office:value-type="float" office:value="-0.14325751935797548" table:style-name="c12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9:00</text:p>
          </table:table-cell>
          <table:table-cell office:value-type="float" office:value="0.12836414999999998" table:style-name="c1">
            <text:p>0.12836</text:p>
          </table:table-cell>
          <table:table-cell office:value-type="string" table:style-name="c1">
            <text:p>2026-05-05 09:30</text:p>
          </table:table-cell>
          <table:table-cell office:value-type="float" office:value="0.12903545" table:style-name="c1">
            <text:p>0.12904</text:p>
          </table:table-cell>
          <table:table-cell office:value-type="float" office:value="0.32201992180063144" table:style-name="c13">
            <text:p>+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0.12936465" table:style-name="c1">
            <text:p>0.12936</text:p>
          </table:table-cell>
          <table:table-cell office:value-type="string" table:style-name="c1">
            <text:p>2026-05-05 20:45</text:p>
          </table:table-cell>
          <table:table-cell office:value-type="float" office:value="0.1297351" table:style-name="c1">
            <text:p>0.12974</text:p>
          </table:table-cell>
          <table:table-cell office:value-type="float" office:value="0.08588863735186081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0.134067" table:style-name="c1">
            <text:p>0.13407</text:p>
          </table:table-cell>
          <table:table-cell office:value-type="string" table:style-name="c1">
            <text:p>2026-05-06 09:00</text:p>
          </table:table-cell>
          <table:table-cell office:value-type="float" office:value="0.13483255" table:style-name="c1">
            <text:p>0.13483</text:p>
          </table:table-cell>
          <table:table-cell office:value-type="float" office:value="0.36997899001991463" table:style-name="c13">
            <text:p>+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3:00</text:p>
          </table:table-cell>
          <table:table-cell office:value-type="float" office:value="0.1372686" table:style-name="c1">
            <text:p>0.13727</text:p>
          </table:table-cell>
          <table:table-cell office:value-type="string" table:style-name="c1">
            <text:p>2026-05-06 13:30</text:p>
          </table:table-cell>
          <table:table-cell office:value-type="float" office:value="0.13513239999999999" table:style-name="c1">
            <text:p>0.13513</text:p>
          </table:table-cell>
          <table:table-cell office:value-type="float" office:value="-1.7530080933294334" table:style-name="c12">
            <text:p>-1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00</text:p>
          </table:table-cell>
          <table:table-cell office:value-type="float" office:value="0.13626809999999998" table:style-name="c1">
            <text:p>0.13627</text:p>
          </table:table-cell>
          <table:table-cell office:value-type="string" table:style-name="c1">
            <text:p>2026-05-06 16:30</text:p>
          </table:table-cell>
          <table:table-cell office:value-type="float" office:value="0.13593200000000003" table:style-name="c1">
            <text:p>0.13593</text:p>
          </table:table-cell>
          <table:table-cell office:value-type="float" office:value="-0.44605308799339216" table:style-name="c12">
            <text:p>-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30</text:p>
          </table:table-cell>
          <table:table-cell office:value-type="float" office:value="0.1450725" table:style-name="c1">
            <text:p>0.14507</text:p>
          </table:table-cell>
          <table:table-cell office:value-type="string" table:style-name="c1">
            <text:p>2026-05-06 22:00</text:p>
          </table:table-cell>
          <table:table-cell office:value-type="float" office:value="0.14762615" table:style-name="c1">
            <text:p>0.14763</text:p>
          </table:table-cell>
          <table:table-cell office:value-type="float" office:value="1.556839046786962" table:style-name="c13">
            <text:p>+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00</text:p>
          </table:table-cell>
          <table:table-cell office:value-type="float" office:value="0.1496748" table:style-name="c1">
            <text:p>0.14967</text:p>
          </table:table-cell>
          <table:table-cell office:value-type="string" table:style-name="c1">
            <text:p>2026-05-07 06:30</text:p>
          </table:table-cell>
          <table:table-cell office:value-type="float" office:value="0.14542725" table:style-name="c1">
            <text:p>0.14543</text:p>
          </table:table-cell>
          <table:table-cell office:value-type="float" office:value="-3.0320795970664394" table:style-name="c12">
            <text:p>-3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1:45</text:p>
          </table:table-cell>
          <table:table-cell office:value-type="float" office:value="0.14717355000000001" table:style-name="c1">
            <text:p>0.14717</text:p>
          </table:table-cell>
          <table:table-cell office:value-type="string" table:style-name="c1">
            <text:p>2026-05-07 12:15</text:p>
          </table:table-cell>
          <table:table-cell office:value-type="float" office:value="0.1481259" table:style-name="c1">
            <text:p>0.14813</text:p>
          </table:table-cell>
          <table:table-cell office:value-type="float" office:value="0.4458996374688162" table:style-name="c13">
            <text:p>+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2:30</text:p>
          </table:table-cell>
          <table:table-cell office:value-type="float" office:value="0.1484742" table:style-name="c1">
            <text:p>0.14847</text:p>
          </table:table-cell>
          <table:table-cell office:value-type="string" table:style-name="c1">
            <text:p>2026-05-07 13:00</text:p>
          </table:table-cell>
          <table:table-cell office:value-type="float" office:value="0.14762615" table:style-name="c1">
            <text:p>0.14763</text:p>
          </table:table-cell>
          <table:table-cell office:value-type="float" office:value="-0.7699348936381023" table:style-name="c12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0.15897945" table:style-name="c1">
            <text:p>0.15898</text:p>
          </table:table-cell>
          <table:table-cell office:value-type="string" table:style-name="c1">
            <text:p>2026-05-08 18:15</text:p>
          </table:table-cell>
          <table:table-cell office:value-type="float" office:value="0.16341825000000001" table:style-name="c1">
            <text:p>0.16342</text:p>
          </table:table-cell>
          <table:table-cell office:value-type="float" office:value="2.586577647771482" table:style-name="c13">
            <text:p>+2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3:00</text:p>
          </table:table-cell>
          <table:table-cell office:value-type="float" office:value="0.17478734999999998" table:style-name="c1">
            <text:p>0.17479</text:p>
          </table:table-cell>
          <table:table-cell office:value-type="string" table:style-name="c1">
            <text:p>2026-05-08 23:30</text:p>
          </table:table-cell>
          <table:table-cell office:value-type="float" office:value="0.17321335000000002" table:style-name="c1">
            <text:p>0.17321</text:p>
          </table:table-cell>
          <table:table-cell office:value-type="float" office:value="-1.098622690171791" table:style-name="c12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45</text:p>
          </table:table-cell>
          <table:table-cell office:value-type="float" office:value="0.16398195" table:style-name="c1">
            <text:p>0.16398</text:p>
          </table:table-cell>
          <table:table-cell office:value-type="string" table:style-name="c1">
            <text:p>2026-05-11 00:15</text:p>
          </table:table-cell>
          <table:table-cell office:value-type="float" office:value="0.16251870000000002" table:style-name="c1">
            <text:p>0.16252</text:p>
          </table:table-cell>
          <table:table-cell office:value-type="float" office:value="-1.0904400644704992" table:style-name="c12">
            <text:p>-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15</text:p>
          </table:table-cell>
          <table:table-cell office:value-type="float" office:value="0.16038015" table:style-name="c1">
            <text:p>0.16038</text:p>
          </table:table-cell>
          <table:table-cell office:value-type="string" table:style-name="c1">
            <text:p>2026-05-11 10:45</text:p>
          </table:table-cell>
          <table:table-cell office:value-type="float" office:value="0.15982005" table:style-name="c1">
            <text:p>0.15982</text:p>
          </table:table-cell>
          <table:table-cell office:value-type="float" office:value="-0.5484346285684283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45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5-21 03:15</text:p>
          </table:table-cell>
          <table:table-cell office:value-type="float" office:value="0.13083455" table:style-name="c1">
            <text:p>0.13083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1 09:00</text:p>
          </table:table-cell>
          <table:table-cell office:value-type="float" office:value="0.13013490000000003" table:style-name="c1">
            <text:p>0.13013</text:p>
          </table:table-cell>
          <table:table-cell office:value-type="float" office:value="-0.6050111736627506" table:style-name="c12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30</text:p>
          </table:table-cell>
          <table:table-cell office:value-type="float" office:value="0.1348674" table:style-name="c1">
            <text:p>0.13487</text:p>
          </table:table-cell>
          <table:table-cell office:value-type="string" table:style-name="c1">
            <text:p>2026-05-22 09:00</text:p>
          </table:table-cell>
          <table:table-cell office:value-type="float" office:value="0.13383305" table:style-name="c1">
            <text:p>0.13383</text:p>
          </table:table-cell>
          <table:table-cell office:value-type="float" office:value="-0.9653053791724209" table:style-name="c12">
            <text:p>-1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3:30</text:p>
          </table:table-cell>
          <table:table-cell office:value-type="float" office:value="0.13626809999999998" table:style-name="c1">
            <text:p>0.13627</text:p>
          </table:table-cell>
          <table:table-cell office:value-type="string" table:style-name="c1">
            <text:p>2026-05-22 14:00</text:p>
          </table:table-cell>
          <table:table-cell office:value-type="float" office:value="0.13593200000000003" table:style-name="c1">
            <text:p>0.13593</text:p>
          </table:table-cell>
          <table:table-cell office:value-type="float" office:value="-0.44605308799340326" table:style-name="c12">
            <text:p>-0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0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5 14:30</text:p>
          </table:table-cell>
          <table:table-cell office:value-type="float" office:value="0.13123435" table:style-name="c1">
            <text:p>0.13123</text:p>
          </table:table-cell>
          <table:table-cell office:value-type="float" office:value="0.23473143546910435" table:style-name="c13">
            <text:p>+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00</text:p>
          </table:table-cell>
          <table:table-cell office:value-type="float" office:value="0.13216604999999998" table:style-name="c1">
            <text:p>0.13217</text:p>
          </table:table-cell>
          <table:table-cell office:value-type="string" table:style-name="c1">
            <text:p>2026-05-25 17:30</text:p>
          </table:table-cell>
          <table:table-cell office:value-type="float" office:value="0.13183405" table:style-name="c1">
            <text:p>0.13183</text:p>
          </table:table-cell>
          <table:table-cell office:value-type="float" office:value="-0.45059700728740104" table:style-name="c12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30</text:p>
          </table:table-cell>
          <table:table-cell office:value-type="float" office:value="0.12996494999999997" table:style-name="c1">
            <text:p>0.12996</text:p>
          </table:table-cell>
          <table:table-cell office:value-type="string" table:style-name="c1">
            <text:p>2026-05-26 06:00</text:p>
          </table:table-cell>
          <table:table-cell office:value-type="float" office:value="0.13013490000000003" table:style-name="c1">
            <text:p>0.13013</text:p>
          </table:table-cell>
          <table:table-cell office:value-type="float" office:value="-0.06939537552235198" table:style-name="c12">
            <text:p>-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0.13336665" table:style-name="c1">
            <text:p>0.13337</text:p>
          </table:table-cell>
          <table:table-cell office:value-type="string" table:style-name="c1">
            <text:p>2026-05-26 11:00</text:p>
          </table:table-cell>
          <table:table-cell office:value-type="float" office:value="0.13363315000000003" table:style-name="c1">
            <text:p>0.13363</text:p>
          </table:table-cell>
          <table:table-cell office:value-type="float" office:value="-0.00047438160136747953" table:style-name="c12">
            <text:p>-0.0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10:45</text:p>
          </table:table-cell>
          <table:table-cell office:value-type="float" office:value="0.1038519" table:style-name="c9">
            <text:p>0.10385</text:p>
          </table:table-cell>
          <table:table-cell office:value-type="string" table:style-name="c9">
            <text:p>2026-03-05 11:15</text:p>
          </table:table-cell>
          <table:table-cell office:value-type="float" office:value="0.10364815000000001" table:style-name="c9">
            <text:p>0.10365</text:p>
          </table:table-cell>
          <table:table-cell office:value-type="float" office:value="-0.3957006581969069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1:30</text:p>
          </table:table-cell>
          <table:table-cell office:value-type="float" office:value="0.09834915" table:style-name="c9">
            <text:p>0.098349</text:p>
          </table:table-cell>
          <table:table-cell office:value-type="string" table:style-name="c9">
            <text:p>2026-03-10 12:00</text:p>
          </table:table-cell>
          <table:table-cell office:value-type="float" office:value="0.09755120000000002" table:style-name="c9">
            <text:p>0.097551</text:p>
          </table:table-cell>
          <table:table-cell office:value-type="float" office:value="-1.0096221968364572" table:style-name="c10">
            <text:p>-1.0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5:00</text:p>
          </table:table-cell>
          <table:table-cell office:value-type="float" office:value="0.09874934999999999" table:style-name="c9">
            <text:p>0.098749</text:p>
          </table:table-cell>
          <table:table-cell office:value-type="string" table:style-name="c9">
            <text:p>2026-03-10 15:30</text:p>
          </table:table-cell>
          <table:table-cell office:value-type="float" office:value="0.09795100000000001" table:style-name="c9">
            <text:p>0.097951</text:p>
          </table:table-cell>
          <table:table-cell office:value-type="float" office:value="-1.0067449041436527" table:style-name="c10">
            <text:p>-1.0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04:00</text:p>
          </table:table-cell>
          <table:table-cell office:value-type="float" office:value="0.0966483" table:style-name="c9">
            <text:p>0.096648</text:p>
          </table:table-cell>
          <table:table-cell office:value-type="string" table:style-name="c9">
            <text:p>2026-03-11 04:30</text:p>
          </table:table-cell>
          <table:table-cell office:value-type="float" office:value="0.09685155000000001" table:style-name="c9">
            <text:p>0.096852</text:p>
          </table:table-cell>
          <table:table-cell office:value-type="float" office:value="0.00997819056309801" table:style-name="c11">
            <text:p>+0.0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1:00</text:p>
          </table:table-cell>
          <table:table-cell office:value-type="float" office:value="0.09914954999999999" table:style-name="c9">
            <text:p>0.09915</text:p>
          </table:table-cell>
          <table:table-cell office:value-type="string" table:style-name="c9">
            <text:p>2026-03-12 11:30</text:p>
          </table:table-cell>
          <table:table-cell office:value-type="float" office:value="0.09845075" table:style-name="c9">
            <text:p>0.098451</text:p>
          </table:table-cell>
          <table:table-cell office:value-type="float" office:value="-0.9032850368458356" table:style-name="c10">
            <text:p>-0.9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30</text:p>
          </table:table-cell>
          <table:table-cell office:value-type="float" office:value="0.09854925" table:style-name="c9">
            <text:p>0.098549</text:p>
          </table:table-cell>
          <table:table-cell office:value-type="string" table:style-name="c9">
            <text:p>2026-03-16 04:00</text:p>
          </table:table-cell>
          <table:table-cell office:value-type="float" office:value="0.09905045" table:style-name="c9">
            <text:p>0.09905</text:p>
          </table:table-cell>
          <table:table-cell office:value-type="float" office:value="0.3076615503923241" table:style-name="c11">
            <text:p>+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1:30</text:p>
          </table:table-cell>
          <table:table-cell office:value-type="float" office:value="0.10095045" table:style-name="c9">
            <text:p>0.10095</text:p>
          </table:table-cell>
          <table:table-cell office:value-type="string" table:style-name="c9">
            <text:p>2026-03-16 12:00</text:p>
          </table:table-cell>
          <table:table-cell office:value-type="float" office:value="0.10104945" table:style-name="c9">
            <text:p>0.10105</text:p>
          </table:table-cell>
          <table:table-cell office:value-type="float" office:value="-0.10202812424312535" table:style-name="c10">
            <text:p>-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7:00</text:p>
          </table:table-cell>
          <table:table-cell office:value-type="float" office:value="0.10085039999999999" table:style-name="c9">
            <text:p>0.10085</text:p>
          </table:table-cell>
          <table:table-cell office:value-type="string" table:style-name="c9">
            <text:p>2026-03-16 17:30</text:p>
          </table:table-cell>
          <table:table-cell office:value-type="float" office:value="0.10074960000000001" table:style-name="c9">
            <text:p>0.10075</text:p>
          </table:table-cell>
          <table:table-cell office:value-type="float" office:value="-0.2996502248875266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11:15</text:p>
          </table:table-cell>
          <table:table-cell office:value-type="float" office:value="0.10075034999999999" table:style-name="c9">
            <text:p>0.10075</text:p>
          </table:table-cell>
          <table:table-cell office:value-type="string" table:style-name="c9">
            <text:p>2026-03-17 11:45</text:p>
          </table:table-cell>
          <table:table-cell office:value-type="float" office:value="0.1005497" table:style-name="c9">
            <text:p>0.10055</text:p>
          </table:table-cell>
          <table:table-cell office:value-type="float" office:value="-0.3986575235718437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11:00</text:p>
          </table:table-cell>
          <table:table-cell office:value-type="float" office:value="0.0984492" table:style-name="c9">
            <text:p>0.098449</text:p>
          </table:table-cell>
          <table:table-cell office:value-type="string" table:style-name="c9">
            <text:p>2026-03-20 11:30</text:p>
          </table:table-cell>
          <table:table-cell office:value-type="float" office:value="0.09895050000000001" table:style-name="c9">
            <text:p>0.098951</text:p>
          </table:table-cell>
          <table:table-cell office:value-type="float" office:value="0.30827873715584264" table:style-name="c11">
            <text:p>+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16:45</text:p>
          </table:table-cell>
          <table:table-cell office:value-type="float" office:value="0.09974984999999999" table:style-name="c9">
            <text:p>0.09975</text:p>
          </table:table-cell>
          <table:table-cell office:value-type="string" table:style-name="c9">
            <text:p>2026-03-20 17:15</text:p>
          </table:table-cell>
          <table:table-cell office:value-type="float" office:value="0.10074960000000001" table:style-name="c9">
            <text:p>0.10075</text:p>
          </table:table-cell>
          <table:table-cell office:value-type="float" office:value="0.8003536342160222" table:style-name="c11">
            <text:p>+0.8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0 17:45</text:p>
          </table:table-cell>
          <table:table-cell office:value-type="float" office:value="0.1002501" table:style-name="c9">
            <text:p>0.10025</text:p>
          </table:table-cell>
          <table:table-cell office:value-type="string" table:style-name="c9">
            <text:p>2026-03-20 18:15</text:p>
          </table:table-cell>
          <table:table-cell office:value-type="float" office:value="0.09905045" table:style-name="c9">
            <text:p>0.09905</text:p>
          </table:table-cell>
          <table:table-cell office:value-type="float" office:value="-1.3941650427780172" table:style-name="c10">
            <text:p>-1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19:15</text:p>
          </table:table-cell>
          <table:table-cell office:value-type="float" office:value="0.0966483" table:style-name="c9">
            <text:p>0.096648</text:p>
          </table:table-cell>
          <table:table-cell office:value-type="string" table:style-name="c9">
            <text:p>2026-03-23 19:45</text:p>
          </table:table-cell>
          <table:table-cell office:value-type="float" office:value="0.09605195000000001" table:style-name="c9">
            <text:p>0.096052</text:p>
          </table:table-cell>
          <table:table-cell office:value-type="float" office:value="-0.8156975839719971" table:style-name="c10">
            <text:p>-0.8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21:00</text:p>
          </table:table-cell>
          <table:table-cell office:value-type="float" office:value="0.0970485" table:style-name="c9">
            <text:p>0.097048</text:p>
          </table:table-cell>
          <table:table-cell office:value-type="string" table:style-name="c9">
            <text:p>2026-03-23 21:30</text:p>
          </table:table-cell>
          <table:table-cell office:value-type="float" office:value="0.09685155000000001" table:style-name="c9">
            <text:p>0.096852</text:p>
          </table:table-cell>
          <table:table-cell office:value-type="float" office:value="-0.4024340906350843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0:45</text:p>
          </table:table-cell>
          <table:table-cell office:value-type="float" office:value="0.09534764999999999" table:style-name="c9">
            <text:p>0.095348</text:p>
          </table:table-cell>
          <table:table-cell office:value-type="string" table:style-name="c9">
            <text:p>2026-03-24 21:15</text:p>
          </table:table-cell>
          <table:table-cell office:value-type="float" office:value="0.09485255000000001" table:style-name="c9">
            <text:p>0.094853</text:p>
          </table:table-cell>
          <table:table-cell office:value-type="float" office:value="-0.7181196887914632" table:style-name="c10">
            <text:p>-0.7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1:45</text:p>
          </table:table-cell>
          <table:table-cell office:value-type="float" office:value="0.0970485" table:style-name="c9">
            <text:p>0.097048</text:p>
          </table:table-cell>
          <table:table-cell office:value-type="string" table:style-name="c9">
            <text:p>2026-03-25 12:15</text:p>
          </table:table-cell>
          <table:table-cell office:value-type="float" office:value="0.09695150000000001" table:style-name="c9">
            <text:p>0.096952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5:45</text:p>
          </table:table-cell>
          <table:table-cell office:value-type="float" office:value="0.09774884999999998" table:style-name="c9">
            <text:p>0.097749</text:p>
          </table:table-cell>
          <table:table-cell office:value-type="string" table:style-name="c9">
            <text:p>2026-03-25 16:15</text:p>
          </table:table-cell>
          <table:table-cell office:value-type="float" office:value="0.09805095000000001" table:style-name="c9">
            <text:p>0.098051</text:p>
          </table:table-cell>
          <table:table-cell office:value-type="float" office:value="0.10853953877720812" table:style-name="c11">
            <text:p>+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6:30</text:p>
          </table:table-cell>
          <table:table-cell office:value-type="float" office:value="0.09994995" table:style-name="c9">
            <text:p>0.09995</text:p>
          </table:table-cell>
          <table:table-cell office:value-type="string" table:style-name="c9">
            <text:p>2026-03-25 17:00</text:p>
          </table:table-cell>
          <table:table-cell office:value-type="float" office:value="0.09775110000000001" table:style-name="c9">
            <text:p>0.097751</text:p>
          </table:table-cell>
          <table:table-cell office:value-type="float" office:value="-2.3954533733133387" table:style-name="c10">
            <text:p>-2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8:00</text:p>
          </table:table-cell>
          <table:table-cell office:value-type="float" office:value="0.0944472" table:style-name="c9">
            <text:p>0.094447</text:p>
          </table:table-cell>
          <table:table-cell office:value-type="string" table:style-name="c9">
            <text:p>2026-03-30 08:30</text:p>
          </table:table-cell>
          <table:table-cell office:value-type="float" office:value="0.0947526" table:style-name="c9">
            <text:p>0.094753</text:p>
          </table:table-cell>
          <table:table-cell office:value-type="float" office:value="0.1228088843290287" table:style-name="c11">
            <text:p>+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15</text:p>
          </table:table-cell>
          <table:table-cell office:value-type="float" office:value="0.09474735000000001" table:style-name="c9">
            <text:p>0.094747</text:p>
          </table:table-cell>
          <table:table-cell office:value-type="string" table:style-name="c9">
            <text:p>2026-04-01 06:45</text:p>
          </table:table-cell>
          <table:table-cell office:value-type="float" office:value="0.09465265" table:style-name="c9">
            <text:p>0.094653</text:p>
          </table:table-cell>
          <table:table-cell office:value-type="float" office:value="-0.299650224887571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2 07:30</text:p>
          </table:table-cell>
          <table:table-cell office:value-type="float" office:value="0.0916458" table:style-name="c9">
            <text:p>0.091646</text:p>
          </table:table-cell>
          <table:table-cell office:value-type="string" table:style-name="c9">
            <text:p>2026-04-02 08:00</text:p>
          </table:table-cell>
          <table:table-cell office:value-type="float" office:value="0.09165415" table:style-name="c9">
            <text:p>0.091654</text:p>
          </table:table-cell>
          <table:table-cell office:value-type="float" office:value="-0.190807048277164" table:style-name="c10">
            <text:p>-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3 16:45</text:p>
          </table:table-cell>
          <table:table-cell office:value-type="float" office:value="0.09294644999999999" table:style-name="c9">
            <text:p>0.092946</text:p>
          </table:table-cell>
          <table:table-cell office:value-type="string" table:style-name="c9">
            <text:p>2026-04-03 17:15</text:p>
          </table:table-cell>
          <table:table-cell office:value-type="float" office:value="0.09265365" table:style-name="c9">
            <text:p>0.092654</text:p>
          </table:table-cell>
          <table:table-cell office:value-type="float" office:value="-0.514290375103077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7:30</text:p>
          </table:table-cell>
          <table:table-cell office:value-type="float" office:value="0.09304649999999999" table:style-name="c9">
            <text:p>0.093046</text:p>
          </table:table-cell>
          <table:table-cell office:value-type="string" table:style-name="c9">
            <text:p>2026-04-04 18:00</text:p>
          </table:table-cell>
          <table:table-cell office:value-type="float" office:value="0.0925537" table:style-name="c9">
            <text:p>0.092554</text:p>
          </table:table-cell>
          <table:table-cell office:value-type="float" office:value="-0.7284689335977035" table:style-name="c10">
            <text:p>-0.7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13:15</text:p>
          </table:table-cell>
          <table:table-cell office:value-type="float" office:value="0.0922461" table:style-name="c9">
            <text:p>0.092246</text:p>
          </table:table-cell>
          <table:table-cell office:value-type="string" table:style-name="c9">
            <text:p>2026-04-08 13:45</text:p>
          </table:table-cell>
          <table:table-cell office:value-type="float" office:value="0.09145425" table:style-name="c9">
            <text:p>0.091454</text:p>
          </table:table-cell>
          <table:table-cell office:value-type="float" office:value="-1.0565943121172539" table:style-name="c10">
            <text:p>-1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9:45</text:p>
          </table:table-cell>
          <table:table-cell office:value-type="float" office:value="0.086043" table:style-name="c9">
            <text:p>0.086043</text:p>
          </table:table-cell>
          <table:table-cell office:value-type="string" table:style-name="c9">
            <text:p>2026-04-15 20:15</text:p>
          </table:table-cell>
          <table:table-cell office:value-type="float" office:value="0.08565715" table:style-name="c9">
            <text:p>0.085657</text:p>
          </table:table-cell>
          <table:table-cell office:value-type="float" office:value="-0.6474421427077215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4:15</text:p>
          </table:table-cell>
          <table:table-cell office:value-type="float" office:value="0.08714354999999999" table:style-name="c9">
            <text:p>0.087144</text:p>
          </table:table-cell>
          <table:table-cell office:value-type="string" table:style-name="c9">
            <text:p>2026-04-16 04:45</text:p>
          </table:table-cell>
          <table:table-cell office:value-type="float" office:value="0.08685655" table:style-name="c9">
            <text:p>0.086857</text:p>
          </table:table-cell>
          <table:table-cell office:value-type="float" office:value="-0.528583289813167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7:15</text:p>
          </table:table-cell>
          <table:table-cell office:value-type="float" office:value="0.0874437" table:style-name="c9">
            <text:p>0.087444</text:p>
          </table:table-cell>
          <table:table-cell office:value-type="string" table:style-name="c9">
            <text:p>2026-04-16 07:45</text:p>
          </table:table-cell>
          <table:table-cell office:value-type="float" office:value="0.08745625" table:style-name="c9">
            <text:p>0.087456</text:p>
          </table:table-cell>
          <table:table-cell office:value-type="float" office:value="-0.18557659814257832" table:style-name="c10">
            <text:p>-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2:15</text:p>
          </table:table-cell>
          <table:table-cell office:value-type="float" office:value="0.08794395" table:style-name="c9">
            <text:p>0.087944</text:p>
          </table:table-cell>
          <table:table-cell office:value-type="string" table:style-name="c9">
            <text:p>2026-04-16 12:45</text:p>
          </table:table-cell>
          <table:table-cell office:value-type="float" office:value="0.08785605" table:style-name="c9">
            <text:p>0.087856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45</text:p>
          </table:table-cell>
          <table:table-cell office:value-type="float" office:value="0.08874435" table:style-name="c9">
            <text:p>0.088744</text:p>
          </table:table-cell>
          <table:table-cell office:value-type="string" table:style-name="c9">
            <text:p>2026-04-16 14:15</text:p>
          </table:table-cell>
          <table:table-cell office:value-type="float" office:value="0.08695649999999999" table:style-name="c9">
            <text:p>0.086956</text:p>
          </table:table-cell>
          <table:table-cell office:value-type="float" office:value="-2.210479927454534" table:style-name="c10">
            <text:p>-2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0.0886443" table:style-name="c9">
            <text:p>0.088644</text:p>
          </table:table-cell>
          <table:table-cell office:value-type="string" table:style-name="c9">
            <text:p>2026-04-16 16:15</text:p>
          </table:table-cell>
          <table:table-cell office:value-type="float" office:value="0.0885557" table:style-name="c9">
            <text:p>0.088556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23:30</text:p>
          </table:table-cell>
          <table:table-cell office:value-type="float" office:value="0.0906453" table:style-name="c9">
            <text:p>0.090645</text:p>
          </table:table-cell>
          <table:table-cell office:value-type="string" table:style-name="c9">
            <text:p>2026-04-17 00:00</text:p>
          </table:table-cell>
          <table:table-cell office:value-type="float" office:value="0.0907546" table:style-name="c9">
            <text:p>0.090755</text:p>
          </table:table-cell>
          <table:table-cell office:value-type="float" office:value="-0.07956115253630047" table:style-name="c10">
            <text:p>-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00</text:p>
          </table:table-cell>
          <table:table-cell office:value-type="float" office:value="0.08994495" table:style-name="c9">
            <text:p>0.089945</text:p>
          </table:table-cell>
          <table:table-cell office:value-type="string" table:style-name="c9">
            <text:p>2026-04-17 08:30</text:p>
          </table:table-cell>
          <table:table-cell office:value-type="float" office:value="0.0897551" table:style-name="c9">
            <text:p>0.089755</text:p>
          </table:table-cell>
          <table:table-cell office:value-type="float" office:value="-0.4105516150712085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8 14:45</text:p>
          </table:table-cell>
          <table:table-cell office:value-type="float" office:value="0.0902451" table:style-name="c9">
            <text:p>0.090245</text:p>
          </table:table-cell>
          <table:table-cell office:value-type="string" table:style-name="c9">
            <text:p>2026-04-18 15:15</text:p>
          </table:table-cell>
          <table:table-cell office:value-type="float" office:value="0.08985504999999999" table:style-name="c9">
            <text:p>0.089855</text:p>
          </table:table-cell>
          <table:table-cell office:value-type="float" office:value="-0.6312478405475996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8 15:30</text:p>
          </table:table-cell>
          <table:table-cell office:value-type="float" office:value="0.09014504999999999" table:style-name="c9">
            <text:p>0.090145</text:p>
          </table:table-cell>
          <table:table-cell office:value-type="string" table:style-name="c9">
            <text:p>2026-04-18 16:00</text:p>
          </table:table-cell>
          <table:table-cell office:value-type="float" office:value="0.0897551" table:style-name="c9">
            <text:p>0.089755</text:p>
          </table:table-cell>
          <table:table-cell office:value-type="float" office:value="-0.6316158734173127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9 11:15</text:p>
          </table:table-cell>
          <table:table-cell office:value-type="float" office:value="0.0898449" table:style-name="c9">
            <text:p>0.089845</text:p>
          </table:table-cell>
          <table:table-cell office:value-type="string" table:style-name="c9">
            <text:p>2026-04-19 11:45</text:p>
          </table:table-cell>
          <table:table-cell office:value-type="float" office:value="0.08965515" table:style-name="c9">
            <text:p>0.089655</text:p>
          </table:table-cell>
          <table:table-cell office:value-type="float" office:value="-0.410675113278558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9 16:00</text:p>
          </table:table-cell>
          <table:table-cell office:value-type="float" office:value="0.09094544999999998" table:style-name="c9">
            <text:p>0.090945</text:p>
          </table:table-cell>
          <table:table-cell office:value-type="string" table:style-name="c9">
            <text:p>2026-04-19 16:30</text:p>
          </table:table-cell>
          <table:table-cell office:value-type="float" office:value="0.09015490000000001" table:style-name="c9">
            <text:p>0.090155</text:p>
          </table:table-cell>
          <table:table-cell office:value-type="float" office:value="-1.0674196951029225" table:style-name="c10">
            <text:p>-1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0 08:15</text:p>
          </table:table-cell>
          <table:table-cell office:value-type="float" office:value="0.09014504999999999" table:style-name="c9">
            <text:p>0.090145</text:p>
          </table:table-cell>
          <table:table-cell office:value-type="string" table:style-name="c9">
            <text:p>2026-04-20 08:45</text:p>
          </table:table-cell>
          <table:table-cell office:value-type="float" office:value="0.09045475" table:style-name="c9">
            <text:p>0.090455</text:p>
          </table:table-cell>
          <table:table-cell office:value-type="float" office:value="0.14297063981882907" table:style-name="c11">
            <text:p>+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0 13:15</text:p>
          </table:table-cell>
          <table:table-cell office:value-type="float" office:value="0.09174585" table:style-name="c9">
            <text:p>0.091746</text:p>
          </table:table-cell>
          <table:table-cell office:value-type="string" table:style-name="c9">
            <text:p>2026-04-20 13:45</text:p>
          </table:table-cell>
          <table:table-cell office:value-type="float" office:value="0.0913543" table:style-name="c9">
            <text:p>0.091354</text:p>
          </table:table-cell>
          <table:table-cell office:value-type="float" office:value="-0.6258236701714659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0 16:30</text:p>
          </table:table-cell>
          <table:table-cell office:value-type="float" office:value="0.09354675" table:style-name="c9">
            <text:p>0.093547</text:p>
          </table:table-cell>
          <table:table-cell office:value-type="string" table:style-name="c9">
            <text:p>2026-04-20 17:00</text:p>
          </table:table-cell>
          <table:table-cell office:value-type="float" office:value="0.09395300000000001" table:style-name="c9">
            <text:p>0.093953</text:p>
          </table:table-cell>
          <table:table-cell office:value-type="float" office:value="0.2335067257815071" table:style-name="c11">
            <text:p>+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7:30</text:p>
          </table:table-cell>
          <table:table-cell office:value-type="float" office:value="0.09274635" table:style-name="c9">
            <text:p>0.092746</text:p>
          </table:table-cell>
          <table:table-cell office:value-type="string" table:style-name="c9">
            <text:p>2026-04-21 08:00</text:p>
          </table:table-cell>
          <table:table-cell office:value-type="float" office:value="0.09245375" table:style-name="c9">
            <text:p>0.092454</text:p>
          </table:table-cell>
          <table:table-cell office:value-type="float" office:value="-0.5147534606483428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0:30</text:p>
          </table:table-cell>
          <table:table-cell office:value-type="float" office:value="0.09334664999999999" table:style-name="c9">
            <text:p>0.093347</text:p>
          </table:table-cell>
          <table:table-cell office:value-type="string" table:style-name="c9">
            <text:p>2026-04-21 11:00</text:p>
          </table:table-cell>
          <table:table-cell office:value-type="float" office:value="0.09385305000000001" table:style-name="c9">
            <text:p>0.093853</text:p>
          </table:table-cell>
          <table:table-cell office:value-type="float" office:value="0.3415095807401958" table:style-name="c11">
            <text:p>+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6:00</text:p>
          </table:table-cell>
          <table:table-cell office:value-type="float" office:value="0.09434714999999999" table:style-name="c9">
            <text:p>0.094347</text:p>
          </table:table-cell>
          <table:table-cell office:value-type="string" table:style-name="c9">
            <text:p>2026-04-21 16:30</text:p>
          </table:table-cell>
          <table:table-cell office:value-type="float" office:value="0.0933533" table:style-name="c9">
            <text:p>0.093353</text:p>
          </table:table-cell>
          <table:table-cell office:value-type="float" office:value="-1.2511912089554378" table:style-name="c10">
            <text:p>-1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8:15</text:p>
          </table:table-cell>
          <table:table-cell office:value-type="float" office:value="0.09414705" table:style-name="c9">
            <text:p>0.094147</text:p>
          </table:table-cell>
          <table:table-cell office:value-type="string" table:style-name="c9">
            <text:p>2026-04-21 18:45</text:p>
          </table:table-cell>
          <table:table-cell office:value-type="float" office:value="0.09325335" table:style-name="c9">
            <text:p>0.093253</text:p>
          </table:table-cell>
          <table:table-cell office:value-type="float" office:value="-1.1472621252073156" table:style-name="c10">
            <text:p>-1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3:00</text:p>
          </table:table-cell>
          <table:table-cell office:value-type="float" office:value="0.09484739999999998" table:style-name="c9">
            <text:p>0.094847</text:p>
          </table:table-cell>
          <table:table-cell office:value-type="string" table:style-name="c9">
            <text:p>2026-04-22 03:30</text:p>
          </table:table-cell>
          <table:table-cell office:value-type="float" office:value="0.09425285" table:style-name="c9">
            <text:p>0.094253</text:p>
          </table:table-cell>
          <table:table-cell office:value-type="float" office:value="-0.8254959515495375" table:style-name="c10">
            <text:p>-0.8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45</text:p>
          </table:table-cell>
          <table:table-cell office:value-type="float" office:value="0.0950475" table:style-name="c9">
            <text:p>0.095047</text:p>
          </table:table-cell>
          <table:table-cell office:value-type="string" table:style-name="c9">
            <text:p>2026-04-22 06:15</text:p>
          </table:table-cell>
          <table:table-cell office:value-type="float" office:value="0.09485255000000001" table:style-name="c9">
            <text:p>0.094853</text:p>
          </table:table-cell>
          <table:table-cell office:value-type="float" office:value="-0.40459796149292515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5:45</text:p>
          </table:table-cell>
          <table:table-cell office:value-type="float" office:value="0.09474735000000001" table:style-name="c9">
            <text:p>0.094747</text:p>
          </table:table-cell>
          <table:table-cell office:value-type="string" table:style-name="c9">
            <text:p>2026-04-22 16:15</text:p>
          </table:table-cell>
          <table:table-cell office:value-type="float" office:value="0.0947526" table:style-name="c9">
            <text:p>0.094753</text:p>
          </table:table-cell>
          <table:table-cell office:value-type="float" office:value="-0.19437002449145258" table:style-name="c10">
            <text:p>-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8:30</text:p>
          </table:table-cell>
          <table:table-cell office:value-type="float" office:value="0.09534764999999999" table:style-name="c9">
            <text:p>0.095348</text:p>
          </table:table-cell>
          <table:table-cell office:value-type="string" table:style-name="c9">
            <text:p>2026-04-22 19:00</text:p>
          </table:table-cell>
          <table:table-cell office:value-type="float" office:value="0.09445275" table:style-name="c9">
            <text:p>0.094453</text:p>
          </table:table-cell>
          <table:table-cell office:value-type="float" office:value="-1.136589152695422" table:style-name="c10">
            <text:p>-1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06:30</text:p>
          </table:table-cell>
          <table:table-cell office:value-type="float" office:value="0.0932466" table:style-name="c9">
            <text:p>0.093247</text:p>
          </table:table-cell>
          <table:table-cell office:value-type="string" table:style-name="c9">
            <text:p>2026-04-23 07:00</text:p>
          </table:table-cell>
          <table:table-cell office:value-type="float" office:value="0.09325335" table:style-name="c9">
            <text:p>0.093253</text:p>
          </table:table-cell>
          <table:table-cell office:value-type="float" office:value="-0.1926756006653374" table:style-name="c10">
            <text:p>-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3:00</text:p>
          </table:table-cell>
          <table:table-cell office:value-type="float" office:value="0.0944472" table:style-name="c9">
            <text:p>0.094447</text:p>
          </table:table-cell>
          <table:table-cell office:value-type="string" table:style-name="c9">
            <text:p>2026-04-23 13:30</text:p>
          </table:table-cell>
          <table:table-cell office:value-type="float" office:value="0.09415290000000001" table:style-name="c9">
            <text:p>0.094153</text:p>
          </table:table-cell>
          <table:table-cell office:value-type="float" office:value="-0.5108797794958431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22:30</text:p>
          </table:table-cell>
          <table:table-cell office:value-type="float" office:value="0.09454725" table:style-name="c9">
            <text:p>0.094547</text:p>
          </table:table-cell>
          <table:table-cell office:value-type="string" table:style-name="c9">
            <text:p>2026-04-23 23:00</text:p>
          </table:table-cell>
          <table:table-cell office:value-type="float" office:value="0.09405295000000001" table:style-name="c9">
            <text:p>0.094053</text:p>
          </table:table-cell>
          <table:table-cell office:value-type="float" office:value="-0.7216622874277046" table:style-name="c10">
            <text:p>-0.7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4 14:15</text:p>
          </table:table-cell>
          <table:table-cell office:value-type="float" office:value="0.09594794999999999" table:style-name="c9">
            <text:p>0.095948</text:p>
          </table:table-cell>
          <table:table-cell office:value-type="string" table:style-name="c9">
            <text:p>2026-04-24 14:45</text:p>
          </table:table-cell>
          <table:table-cell office:value-type="float" office:value="0.09605195000000001" table:style-name="c9">
            <text:p>0.096052</text:p>
          </table:table-cell>
          <table:table-cell office:value-type="float" office:value="-0.0917245736359984" table:style-name="c10">
            <text:p>-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01:00</text:p>
          </table:table-cell>
          <table:table-cell office:value-type="float" office:value="0.0934467" table:style-name="c9">
            <text:p>0.093447</text:p>
          </table:table-cell>
          <table:table-cell office:value-type="string" table:style-name="c9">
            <text:p>2026-04-29 01:30</text:p>
          </table:table-cell>
          <table:table-cell office:value-type="float" office:value="0.09295350000000001" table:style-name="c9">
            <text:p>0.092954</text:p>
          </table:table-cell>
          <table:table-cell office:value-type="float" office:value="-0.7266324509051514" table:style-name="c10">
            <text:p>-0.7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04:00</text:p>
          </table:table-cell>
          <table:table-cell office:value-type="float" office:value="0.0936468" table:style-name="c9">
            <text:p>0.093647</text:p>
          </table:table-cell>
          <table:table-cell office:value-type="string" table:style-name="c9">
            <text:p>2026-04-29 04:30</text:p>
          </table:table-cell>
          <table:table-cell office:value-type="float" office:value="0.0933533" table:style-name="c9">
            <text:p>0.093353</text:p>
          </table:table-cell>
          <table:table-cell office:value-type="float" office:value="-0.5126851603044602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30 01:15</text:p>
          </table:table-cell>
          <table:table-cell office:value-type="float" office:value="0.09484739999999998" table:style-name="c9">
            <text:p>0.094847</text:p>
          </table:table-cell>
          <table:table-cell office:value-type="string" table:style-name="c9">
            <text:p>2026-04-30 01:45</text:p>
          </table:table-cell>
          <table:table-cell office:value-type="float" office:value="0.09515240000000001" table:style-name="c9">
            <text:p>0.095152</text:p>
          </table:table-cell>
          <table:table-cell office:value-type="float" office:value="0.12102635644206661" table:style-name="c11">
            <text:p>+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30 07:15</text:p>
          </table:table-cell>
          <table:table-cell office:value-type="float" office:value="0.09394694999999999" table:style-name="c9">
            <text:p>0.093947</text:p>
          </table:table-cell>
          <table:table-cell office:value-type="string" table:style-name="c9">
            <text:p>2026-04-30 07:45</text:p>
          </table:table-cell>
          <table:table-cell office:value-type="float" office:value="0.0937531" table:style-name="c9">
            <text:p>0.093753</text:p>
          </table:table-cell>
          <table:table-cell office:value-type="float" office:value="-0.40582738119755435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30 16:00</text:p>
          </table:table-cell>
          <table:table-cell office:value-type="float" office:value="0.09614805" table:style-name="c9">
            <text:p>0.096148</text:p>
          </table:table-cell>
          <table:table-cell office:value-type="string" table:style-name="c9">
            <text:p>2026-04-30 16:30</text:p>
          </table:table-cell>
          <table:table-cell office:value-type="float" office:value="0.09585205000000001" table:style-name="c9">
            <text:p>0.095852</text:p>
          </table:table-cell>
          <table:table-cell office:value-type="float" office:value="-0.5071431484569788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30 18:30</text:p>
          </table:table-cell>
          <table:table-cell office:value-type="float" office:value="0.09674834999999998" table:style-name="c9">
            <text:p>0.096748</text:p>
          </table:table-cell>
          <table:table-cell office:value-type="string" table:style-name="c9">
            <text:p>2026-04-30 19:00</text:p>
          </table:table-cell>
          <table:table-cell office:value-type="float" office:value="0.09565215" table:style-name="c9">
            <text:p>0.095652</text:p>
          </table:table-cell>
          <table:table-cell office:value-type="float" office:value="-1.3306776269052412" table:style-name="c10">
            <text:p>-1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00:30</text:p>
          </table:table-cell>
          <table:table-cell office:value-type="float" office:value="0.09694844999999999" table:style-name="c9">
            <text:p>0.096948</text:p>
          </table:table-cell>
          <table:table-cell office:value-type="string" table:style-name="c9">
            <text:p>2026-05-02 01:00</text:p>
          </table:table-cell>
          <table:table-cell office:value-type="float" office:value="0.0973513" table:style-name="c9">
            <text:p>0.097351</text:p>
          </table:table-cell>
          <table:table-cell office:value-type="float" office:value="0.21479946435452035" table:style-name="c11">
            <text:p>+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14:45</text:p>
          </table:table-cell>
          <table:table-cell office:value-type="float" office:value="0.09774884999999998" table:style-name="c9">
            <text:p>0.097749</text:p>
          </table:table-cell>
          <table:table-cell office:value-type="string" table:style-name="c9">
            <text:p>2026-05-02 15:15</text:p>
          </table:table-cell>
          <table:table-cell office:value-type="float" office:value="0.09755120000000002" table:style-name="c9">
            <text:p>0.097551</text:p>
          </table:table-cell>
          <table:table-cell office:value-type="float" office:value="-0.4016976658037241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15</text:p>
          </table:table-cell>
          <table:table-cell office:value-type="float" office:value="0.096048" table:style-name="c9">
            <text:p>0.096048</text:p>
          </table:table-cell>
          <table:table-cell office:value-type="string" table:style-name="c9">
            <text:p>2026-05-04 02:45</text:p>
          </table:table-cell>
          <table:table-cell office:value-type="float" office:value="0.0961519" table:style-name="c9">
            <text:p>0.096152</text:p>
          </table:table-cell>
          <table:table-cell office:value-type="float" office:value="-0.09194116285606846" table:style-name="c10">
            <text:p>-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3:00</text:p>
          </table:table-cell>
          <table:table-cell office:value-type="float" office:value="0.09654825" table:style-name="c9">
            <text:p>0.096548</text:p>
          </table:table-cell>
          <table:table-cell office:value-type="string" table:style-name="c9">
            <text:p>2026-05-04 03:30</text:p>
          </table:table-cell>
          <table:table-cell office:value-type="float" office:value="0.09625185" table:style-name="c9">
            <text:p>0.096252</text:p>
          </table:table-cell>
          <table:table-cell office:value-type="float" office:value="-0.5062830741623947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21:30</text:p>
          </table:table-cell>
          <table:table-cell office:value-type="float" office:value="0.09814905" table:style-name="c9">
            <text:p>0.098149</text:p>
          </table:table-cell>
          <table:table-cell office:value-type="string" table:style-name="c9">
            <text:p>2026-05-04 22:00</text:p>
          </table:table-cell>
          <table:table-cell office:value-type="float" office:value="0.09775110000000001" table:style-name="c9">
            <text:p>0.097751</text:p>
          </table:table-cell>
          <table:table-cell office:value-type="float" office:value="-0.6045442608970553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1:15</text:p>
          </table:table-cell>
          <table:table-cell office:value-type="float" office:value="0.09874934999999999" table:style-name="c9">
            <text:p>0.098749</text:p>
          </table:table-cell>
          <table:table-cell office:value-type="string" table:style-name="c9">
            <text:p>2026-05-05 01:45</text:p>
          </table:table-cell>
          <table:table-cell office:value-type="float" office:value="0.09805095000000001" table:style-name="c9">
            <text:p>0.098051</text:p>
          </table:table-cell>
          <table:table-cell office:value-type="float" office:value="-0.9057313785356236" table:style-name="c10">
            <text:p>-0.9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0:15</text:p>
          </table:table-cell>
          <table:table-cell office:value-type="float" office:value="0.09894945" table:style-name="c9">
            <text:p>0.098949</text:p>
          </table:table-cell>
          <table:table-cell office:value-type="string" table:style-name="c9">
            <text:p>2026-05-08 00:45</text:p>
          </table:table-cell>
          <table:table-cell office:value-type="float" office:value="0.0985507" table:style-name="c9">
            <text:p>0.098551</text:p>
          </table:table-cell>
          <table:table-cell office:value-type="float" office:value="-0.6020779795137599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8:45</text:p>
          </table:table-cell>
          <table:table-cell office:value-type="float" office:value="0.10085039999999999" table:style-name="c9">
            <text:p>0.10085</text:p>
          </table:table-cell>
          <table:table-cell office:value-type="string" table:style-name="c9">
            <text:p>2026-05-08 09:15</text:p>
          </table:table-cell>
          <table:table-cell office:value-type="float" office:value="0.10174910000000001" table:style-name="c9">
            <text:p>0.10175</text:p>
          </table:table-cell>
          <table:table-cell office:value-type="float" office:value="0.6894405466909559" table:style-name="c11">
            <text:p>+0.7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9:45</text:p>
          </table:table-cell>
          <table:table-cell office:value-type="float" office:value="0.1022511" table:style-name="c9">
            <text:p>0.10225</text:p>
          </table:table-cell>
          <table:table-cell office:value-type="string" table:style-name="c9">
            <text:p>2026-05-08 10:15</text:p>
          </table:table-cell>
          <table:table-cell office:value-type="float" office:value="0.1013493" table:style-name="c9">
            <text:p>0.10135</text:p>
          </table:table-cell>
          <table:table-cell office:value-type="float" office:value="-1.0800834912289448" table:style-name="c10">
            <text:p>-1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8:15</text:p>
          </table:table-cell>
          <table:table-cell office:value-type="float" office:value="0.1014507" table:style-name="c9">
            <text:p>0.10145</text:p>
          </table:table-cell>
          <table:table-cell office:value-type="string" table:style-name="c9">
            <text:p>2026-05-08 18:45</text:p>
          </table:table-cell>
          <table:table-cell office:value-type="float" office:value="0.10124935" table:style-name="c9">
            <text:p>0.10125</text:p>
          </table:table-cell>
          <table:table-cell office:value-type="float" office:value="-0.3979740412338395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30</text:p>
          </table:table-cell>
          <table:table-cell office:value-type="float" office:value="0.1028514" table:style-name="c9">
            <text:p>0.10285</text:p>
          </table:table-cell>
          <table:table-cell office:value-type="string" table:style-name="c9">
            <text:p>2026-05-09 02:00</text:p>
          </table:table-cell>
          <table:table-cell office:value-type="float" office:value="0.10304845" table:style-name="c9">
            <text:p>0.10305</text:p>
          </table:table-cell>
          <table:table-cell office:value-type="float" office:value="-0.008695896750054999" table:style-name="c10">
            <text:p>-0.0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2:15</text:p>
          </table:table-cell>
          <table:table-cell office:value-type="float" office:value="0.10375184999999999" table:style-name="c9">
            <text:p>0.10375</text:p>
          </table:table-cell>
          <table:table-cell office:value-type="string" table:style-name="c9">
            <text:p>2026-05-09 02:45</text:p>
          </table:table-cell>
          <table:table-cell office:value-type="float" office:value="0.1031484" table:style-name="c9">
            <text:p>0.10315</text:p>
          </table:table-cell>
          <table:table-cell office:value-type="float" office:value="-0.7803655082776806" table:style-name="c10">
            <text:p>-0.8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2:30</text:p>
          </table:table-cell>
          <table:table-cell office:value-type="float" office:value="0.1014507" table:style-name="c9">
            <text:p>0.10145</text:p>
          </table:table-cell>
          <table:table-cell office:value-type="string" table:style-name="c9">
            <text:p>2026-05-10 03:00</text:p>
          </table:table-cell>
          <table:table-cell office:value-type="float" office:value="0.10174910000000001" table:style-name="c9">
            <text:p>0.10175</text:p>
          </table:table-cell>
          <table:table-cell office:value-type="float" office:value="0.09364504049751421" table:style-name="c11">
            <text:p>+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7:30</text:p>
          </table:table-cell>
          <table:table-cell office:value-type="float" office:value="0.10275134999999999" table:style-name="c9">
            <text:p>0.10275</text:p>
          </table:table-cell>
          <table:table-cell office:value-type="string" table:style-name="c9">
            <text:p>2026-05-10 08:00</text:p>
          </table:table-cell>
          <table:table-cell office:value-type="float" office:value="0.1021489" table:style-name="c9">
            <text:p>0.10215</text:p>
          </table:table-cell>
          <table:table-cell office:value-type="float" office:value="-0.7850462802678426" table:style-name="c10">
            <text:p>-0.8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7:30</text:p>
          </table:table-cell>
          <table:table-cell office:value-type="float" office:value="0.10375184999999999" table:style-name="c9">
            <text:p>0.10375</text:p>
          </table:table-cell>
          <table:table-cell office:value-type="string" table:style-name="c9">
            <text:p>2026-05-10 18:00</text:p>
          </table:table-cell>
          <table:table-cell office:value-type="float" office:value="0.10374810000000001" table:style-name="c9">
            <text:p>0.10375</text:p>
          </table:table-cell>
          <table:table-cell office:value-type="float" office:value="-0.20350716820952686" table:style-name="c10">
            <text:p>-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9:00</text:p>
          </table:table-cell>
          <table:table-cell office:value-type="float" office:value="0.10415205" table:style-name="c9">
            <text:p>0.10415</text:p>
          </table:table-cell>
          <table:table-cell office:value-type="string" table:style-name="c9">
            <text:p>2026-05-10 19:30</text:p>
          </table:table-cell>
          <table:table-cell office:value-type="float" office:value="0.1041479" table:style-name="c9">
            <text:p>0.10415</text:p>
          </table:table-cell>
          <table:table-cell office:value-type="float" office:value="-0.20387659397964608" table:style-name="c10">
            <text:p>-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2:45</text:p>
          </table:table-cell>
          <table:table-cell office:value-type="float" office:value="0.1042521" table:style-name="c9">
            <text:p>0.10425</text:p>
          </table:table-cell>
          <table:table-cell office:value-type="string" table:style-name="c9">
            <text:p>2026-05-10 23:15</text:p>
          </table:table-cell>
          <table:table-cell office:value-type="float" office:value="0.10424785" table:style-name="c9">
            <text:p>0.10425</text:p>
          </table:table-cell>
          <table:table-cell office:value-type="float" office:value="-0.2039685072530828" table:style-name="c10">
            <text:p>-0.2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7 19:45</text:p>
          </table:table-cell>
          <table:table-cell office:value-type="float" office:value="0.09244619999999999" table:style-name="c9">
            <text:p>0.092446</text:p>
          </table:table-cell>
          <table:table-cell office:value-type="string" table:style-name="c9">
            <text:p>2026-05-17 20:15</text:p>
          </table:table-cell>
          <table:table-cell office:value-type="float" office:value="0.09215390000000001" table:style-name="c9">
            <text:p>0.092154</text:p>
          </table:table-cell>
          <table:table-cell office:value-type="float" office:value="-0.5154518477774039" table:style-name="c10">
            <text:p>-0.5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30</text:p>
          </table:table-cell>
          <table:table-cell office:value-type="float" office:value="0.09126561" table:style-name="c9">
            <text:p>0.091266</text:p>
          </table:table-cell>
          <table:table-cell office:value-type="string" table:style-name="c9">
            <text:p>2026-05-21 18:00</text:p>
          </table:table-cell>
          <table:table-cell office:value-type="float" office:value="0.09119438" table:style-name="c9">
            <text:p>0.091194</text:p>
          </table:table-cell>
          <table:table-cell office:value-type="float" office:value="-0.2777909068048756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20:45</text:p>
          </table:table-cell>
          <table:table-cell office:value-type="float" office:value="0.09174585" table:style-name="c9">
            <text:p>0.091746</text:p>
          </table:table-cell>
          <table:table-cell office:value-type="string" table:style-name="c9">
            <text:p>2026-05-22 21:15</text:p>
          </table:table-cell>
          <table:table-cell office:value-type="float" office:value="0.091664145" table:style-name="c9">
            <text:p>0.091664</text:p>
          </table:table-cell>
          <table:table-cell office:value-type="float" office:value="-0.288777776711413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4 10:15</text:p>
          </table:table-cell>
          <table:table-cell office:value-type="float" office:value="0.09198596999999999" table:style-name="c9">
            <text:p>0.091986</text:p>
          </table:table-cell>
          <table:table-cell office:value-type="string" table:style-name="c9">
            <text:p>2026-05-24 10:45</text:p>
          </table:table-cell>
          <table:table-cell office:value-type="float" office:value="0.09159418000000001" table:style-name="c9">
            <text:p>0.091594</text:p>
          </table:table-cell>
          <table:table-cell office:value-type="float" office:value="-0.6249722276342462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07:15</text:p>
          </table:table-cell>
          <table:table-cell office:value-type="float" office:value="0.09219607499999999" table:style-name="c9">
            <text:p>0.092196</text:p>
          </table:table-cell>
          <table:table-cell office:value-type="string" table:style-name="c9">
            <text:p>2026-05-25 07:45</text:p>
          </table:table-cell>
          <table:table-cell office:value-type="float" office:value="0.091864045" table:style-name="c9">
            <text:p>0.091864</text:p>
          </table:table-cell>
          <table:table-cell office:value-type="float" office:value="-0.5593147278286859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7:00</text:p>
          </table:table-cell>
          <table:table-cell office:value-type="float" office:value="0.09350673" table:style-name="c9">
            <text:p>0.093507</text:p>
          </table:table-cell>
          <table:table-cell office:value-type="string" table:style-name="c9">
            <text:p>2026-05-25 17:30</text:p>
          </table:table-cell>
          <table:table-cell office:value-type="float" office:value="0.093443255" table:style-name="c9">
            <text:p>0.093443</text:p>
          </table:table-cell>
          <table:table-cell office:value-type="float" office:value="-0.2676471166781269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0 01:00</text:p>
          </table:table-cell>
          <table:table-cell office:value-type="float" office:value="0.09088542" table:style-name="c9">
            <text:p>0.090885</text:p>
          </table:table-cell>
          <table:table-cell office:value-type="string" table:style-name="c9">
            <text:p>2026-05-30 01:30</text:p>
          </table:table-cell>
          <table:table-cell office:value-type="float" office:value="0.09159418000000001" table:style-name="c9">
            <text:p>0.091594</text:p>
          </table:table-cell>
          <table:table-cell office:value-type="float" office:value="0.5783801562230906" table:style-name="c11">
            <text:p>+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2:15</text:p>
          </table:table-cell>
          <table:table-cell office:value-type="float" office:value="0.09119557499999999" table:style-name="c9">
            <text:p>0.091196</text:p>
          </table:table-cell>
          <table:table-cell office:value-type="string" table:style-name="c9">
            <text:p>2026-05-31 02:45</text:p>
          </table:table-cell>
          <table:table-cell office:value-type="float" office:value="0.09081457" table:style-name="c9">
            <text:p>0.090815</text:p>
          </table:table-cell>
          <table:table-cell office:value-type="float" office:value="-0.6168537513250971" table:style-name="c10">
            <text:p>-0.6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20:15</text:p>
          </table:table-cell>
          <table:table-cell office:value-type="float" office:value="0.091995975" table:style-name="c9">
            <text:p>0.091996</text:p>
          </table:table-cell>
          <table:table-cell office:value-type="string" table:style-name="c9">
            <text:p>2026-05-31 20:45</text:p>
          </table:table-cell>
          <table:table-cell office:value-type="float" office:value="0.09184405500000001" table:style-name="c9">
            <text:p>0.091844</text:p>
          </table:table-cell>
          <table:table-cell office:value-type="float" office:value="-0.36470754937375505" table:style-name="c10">
            <text:p>-0.4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21:45</text:p>
          </table:table-cell>
          <table:table-cell office:value-type="float" office:value="0.09292644" table:style-name="c9">
            <text:p>0.092926</text:p>
          </table:table-cell>
          <table:table-cell office:value-type="string" table:style-name="c9">
            <text:p>2026-05-31 22:15</text:p>
          </table:table-cell>
          <table:table-cell office:value-type="float" office:value="0.093003475" table:style-name="c9">
            <text:p>0.093003</text:p>
          </table:table-cell>
          <table:table-cell office:value-type="float" office:value="-0.11716681121648476" table:style-name="c10">
            <text:p>-0.1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11:00</text:p>
          </table:table-cell>
          <table:table-cell office:value-type="float" office:value="0.09294644999999999" table:style-name="c9">
            <text:p>0.092946</text:p>
          </table:table-cell>
          <table:table-cell office:value-type="string" table:style-name="c9">
            <text:p>2026-06-01 11:30</text:p>
          </table:table-cell>
          <table:table-cell office:value-type="float" office:value="0.09285355" table:style-name="c9">
            <text:p>0.092854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P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15:45</text:p>
          </table:table-cell>
          <table:table-cell office:value-type="float" office:value="0.09325660499999999" table:style-name="c9">
            <text:p>0.093257</text:p>
          </table:table-cell>
          <table:table-cell office:value-type="string" table:style-name="c9">
            <text:p>2026-06-01 16:15</text:p>
          </table:table-cell>
          <table:table-cell office:value-type="float" office:value="0.09313341" table:style-name="c9">
            <text:p>0.093133</text:p>
          </table:table-cell>
          <table:table-cell office:value-type="float" office:value="-0.33173916913443735" table:style-name="c10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30</text:p>
          </table:table-cell>
          <table:table-cell office:value-type="float" office:value="5.612804999999999e-06" table:style-name="c1">
            <text:p>0.0000056128</text:p>
          </table:table-cell>
          <table:table-cell office:value-type="string" table:style-name="c1">
            <text:p>2026-03-05 21:00</text:p>
          </table:table-cell>
          <table:table-cell office:value-type="float" office:value="5.61719e-06" table:style-name="c1">
            <text:p>0.0000056172</text:p>
          </table:table-cell>
          <table:table-cell office:value-type="float" office:value="-0.12193124133118571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5.56278e-06" table:style-name="c1">
            <text:p>0.0000055628</text:p>
          </table:table-cell>
          <table:table-cell office:value-type="string" table:style-name="c1">
            <text:p>2026-03-09 20:00</text:p>
          </table:table-cell>
          <table:table-cell office:value-type="float" office:value="5.487255e-06" table:style-name="c1">
            <text:p>0.0000054873</text:p>
          </table:table-cell>
          <table:table-cell office:value-type="float" office:value="-1.5548704558691728" table:style-name="c12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15</text:p>
          </table:table-cell>
          <table:table-cell office:value-type="float" office:value="5.632815e-06" table:style-name="c1">
            <text:p>0.0000056328</text:p>
          </table:table-cell>
          <table:table-cell office:value-type="string" table:style-name="c1">
            <text:p>2026-03-10 08:45</text:p>
          </table:table-cell>
          <table:table-cell office:value-type="float" office:value="5.61719e-06" table:style-name="c1">
            <text:p>0.0000056172</text:p>
          </table:table-cell>
          <table:table-cell office:value-type="float" office:value="-0.4767378799055199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9:30</text:p>
          </table:table-cell>
          <table:table-cell office:value-type="float" office:value="5.712855e-06" table:style-name="c1">
            <text:p>0.0000057129</text:p>
          </table:table-cell>
          <table:table-cell office:value-type="string" table:style-name="c1">
            <text:p>2026-03-10 10:00</text:p>
          </table:table-cell>
          <table:table-cell office:value-type="float" office:value="5.7071450000000006e-06" table:style-name="c1">
            <text:p>0.0000057071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1:00</text:p>
          </table:table-cell>
          <table:table-cell office:value-type="float" office:value="5.72286e-06" table:style-name="c1">
            <text:p>0.0000057229</text:p>
          </table:table-cell>
          <table:table-cell office:value-type="string" table:style-name="c1">
            <text:p>2026-03-10 11:30</text:p>
          </table:table-cell>
          <table:table-cell office:value-type="float" office:value="5.7271350000000005e-06" table:style-name="c1">
            <text:p>0.0000057271</text:p>
          </table:table-cell>
          <table:table-cell office:value-type="float" office:value="-0.12534891409187177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00</text:p>
          </table:table-cell>
          <table:table-cell office:value-type="float" office:value="5.792895e-06" table:style-name="c1">
            <text:p>0.0000057929</text:p>
          </table:table-cell>
          <table:table-cell office:value-type="string" table:style-name="c1">
            <text:p>2026-03-10 13:30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0.04473785723717594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5.942969999999999e-06" table:style-name="c1">
            <text:p>0.000005943</text:p>
          </table:table-cell>
          <table:table-cell office:value-type="string" table:style-name="c1">
            <text:p>2026-03-10 15:30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1.7144982554177624" table:style-name="c13">
            <text:p>+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5.772884999999999e-06" table:style-name="c1">
            <text:p>0.0000057729</text:p>
          </table:table-cell>
          <table:table-cell office:value-type="string" table:style-name="c1">
            <text:p>2026-03-11 13:00</text:p>
          </table:table-cell>
          <table:table-cell office:value-type="float" office:value="5.7471250000000005e-06" table:style-name="c1">
            <text:p>0.0000057471</text:p>
          </table:table-cell>
          <table:table-cell office:value-type="float" office:value="-0.6452320265343703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15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3-11 13:45</text:p>
          </table:table-cell>
          <table:table-cell office:value-type="float" office:value="5.797100000000001e-06" table:style-name="c1">
            <text:p>0.0000057971</text:p>
          </table:table-cell>
          <table:table-cell office:value-type="float" office:value="-0.47125151537826815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5.8029e-06" table:style-name="c1">
            <text:p>0.0000058029</text:p>
          </table:table-cell>
          <table:table-cell office:value-type="string" table:style-name="c1">
            <text:p>2026-03-11 14:3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0.21604123946645792" table:style-name="c13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6:0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3-11 16:30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0.8118095559240701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15</text:p>
          </table:table-cell>
          <table:table-cell office:value-type="float" office:value="5.74287e-06" table:style-name="c1">
            <text:p>0.0000057429</text:p>
          </table:table-cell>
          <table:table-cell office:value-type="string" table:style-name="c1">
            <text:p>2026-03-12 07:45</text:p>
          </table:table-cell>
          <table:table-cell office:value-type="float" office:value="5.817090000000001e-06" table:style-name="c1">
            <text:p>0.0000058171</text:p>
          </table:table-cell>
          <table:table-cell office:value-type="float" office:value="1.0899016883544554" table:style-name="c13">
            <text:p>+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8:00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3-12 08:3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0.21515364658462044" table:style-name="c13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01:15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0.03435429697216108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1:30</text:p>
          </table:table-cell>
          <table:table-cell office:value-type="float" office:value="5.98299e-06" table:style-name="c1">
            <text:p>0.000005983</text:p>
          </table:table-cell>
          <table:table-cell office:value-type="string" table:style-name="c1">
            <text:p>2026-03-13 02:00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0.03379576098236914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7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3 08:15</text:p>
          </table:table-cell>
          <table:table-cell office:value-type="float" office:value="5.97701e-06" table:style-name="c1">
            <text:p>0.000005977</text:p>
          </table:table-cell>
          <table:table-cell office:value-type="float" office:value="-0.1326479639576994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1:15</text:p>
          </table:table-cell>
          <table:table-cell office:value-type="float" office:value="6.113054999999999e-06" table:style-name="c1">
            <text:p>0.0000061131</text:p>
          </table:table-cell>
          <table:table-cell office:value-type="string" table:style-name="c1">
            <text:p>2026-03-13 11:45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1.005755336816061" table:style-name="c13">
            <text:p>+1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2:00</text:p>
          </table:table-cell>
          <table:table-cell office:value-type="float" office:value="6.193095e-06" table:style-name="c1">
            <text:p>0.0000061931</text:p>
          </table:table-cell>
          <table:table-cell office:value-type="string" table:style-name="c1">
            <text:p>2026-03-13 12:30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-0.6217838267457476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1:00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3-16 01:30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0.6308806228115138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1:45</text:p>
          </table:table-cell>
          <table:table-cell office:value-type="float" office:value="5.992995e-06" table:style-name="c1">
            <text:p>0.000005993</text:p>
          </table:table-cell>
          <table:table-cell office:value-type="string" table:style-name="c1">
            <text:p>2026-03-16 02:15</text:p>
          </table:table-cell>
          <table:table-cell office:value-type="float" office:value="5.97701e-06" table:style-name="c1">
            <text:p>0.000005977</text:p>
          </table:table-cell>
          <table:table-cell office:value-type="float" office:value="-0.4660948822750366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6.08304e-06" table:style-name="c1">
            <text:p>0.000006083</text:p>
          </table:table-cell>
          <table:table-cell office:value-type="string" table:style-name="c1">
            <text:p>2026-03-16 04:15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0.35627312889607854" table:style-name="c13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45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16 05:15</text:p>
          </table:table-cell>
          <table:table-cell office:value-type="float" office:value="6.1969e-06" table:style-name="c1">
            <text:p>0.0000061969</text:p>
          </table:table-cell>
          <table:table-cell office:value-type="float" office:value="0.6746202940874912" table:style-name="c13">
            <text:p>+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7:15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3-16 07:45</text:p>
          </table:table-cell>
          <table:table-cell office:value-type="float" office:value="6.346825000000001e-06" table:style-name="c1">
            <text:p>0.0000063468</text:p>
          </table:table-cell>
          <table:table-cell office:value-type="float" office:value="0.4916223923752572" table:style-name="c13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9:1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17 19:45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2:15</text:p>
          </table:table-cell>
          <table:table-cell office:value-type="float" office:value="6.133064999999999e-06" table:style-name="c1">
            <text:p>0.0000061331</text:p>
          </table:table-cell>
          <table:table-cell office:value-type="string" table:style-name="c1">
            <text:p>2026-03-17 22:45</text:p>
          </table:table-cell>
          <table:table-cell office:value-type="float" office:value="6.09695e-06" table:style-name="c1">
            <text:p>0.000006097</text:p>
          </table:table-cell>
          <table:table-cell office:value-type="float" office:value="-0.7875801585340958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15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3-18 02:45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-0.4617646147657805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00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18 03:30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0.8369987139166701" table:style-name="c13">
            <text:p>+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1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3-20 11:45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1.6180019574510096" table:style-name="c12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5:30</text:p>
          </table:table-cell>
          <table:table-cell office:value-type="float" office:value="6.043019999999999e-06" table:style-name="c1">
            <text:p>0.000006043</text:p>
          </table:table-cell>
          <table:table-cell office:value-type="string" table:style-name="c1">
            <text:p>2026-03-21 06:00</text:p>
          </table:table-cell>
          <table:table-cell office:value-type="float" office:value="6.01699e-06" table:style-name="c1">
            <text:p>0.000006017</text:p>
          </table:table-cell>
          <table:table-cell office:value-type="float" office:value="-0.629783833414399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6:30</text:p>
          </table:table-cell>
          <table:table-cell office:value-type="float" office:value="6.08304e-06" table:style-name="c1">
            <text:p>0.000006083</text:p>
          </table:table-cell>
          <table:table-cell office:value-type="string" table:style-name="c1">
            <text:p>2026-03-21 07:00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1.119554417117108" table:style-name="c12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23 20:45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-0.46202864471669436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2:0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3-23 22:3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1.2676147858109554" table:style-name="c12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6.173085e-06" table:style-name="c1">
            <text:p>0.0000061731</text:p>
          </table:table-cell>
          <table:table-cell office:value-type="string" table:style-name="c1">
            <text:p>2026-03-24 10:15</text:p>
          </table:table-cell>
          <table:table-cell office:value-type="float" office:value="6.1469250000000004e-06" table:style-name="c1">
            <text:p>0.0000061469</text:p>
          </table:table-cell>
          <table:table-cell office:value-type="float" office:value="-0.6228280199446323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3-24 21:15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-1.1010999819222156" table:style-name="c12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6:00</text:p>
          </table:table-cell>
          <table:table-cell office:value-type="float" office:value="6.033015e-06" table:style-name="c1">
            <text:p>0.000006033</text:p>
          </table:table-cell>
          <table:table-cell office:value-type="string" table:style-name="c1">
            <text:p>2026-03-30 06:30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3-30 08:30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0.026167911632413166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5:4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30 16:15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0.35519607905407646" table:style-name="c13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6:3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3-30 17:0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1:45</text:p>
          </table:table-cell>
          <table:table-cell office:value-type="float" office:value="5.932965e-06" table:style-name="c1">
            <text:p>0.000005933</text:p>
          </table:table-cell>
          <table:table-cell office:value-type="string" table:style-name="c1">
            <text:p>2026-03-31 12:15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-0.6359077283449421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30</text:p>
          </table:table-cell>
          <table:table-cell office:value-type="float" office:value="5.92296e-06" table:style-name="c1">
            <text:p>0.000005923</text:p>
          </table:table-cell>
          <table:table-cell office:value-type="string" table:style-name="c1">
            <text:p>2026-03-31 13:00</text:p>
          </table:table-cell>
          <table:table-cell office:value-type="float" office:value="5.887055000000001e-06" table:style-name="c1">
            <text:p>0.0000058871</text:p>
          </table:table-cell>
          <table:table-cell office:value-type="float" office:value="-0.8048884838830261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15</text:p>
          </table:table-cell>
          <table:table-cell office:value-type="float" office:value="5.942969999999999e-06" table:style-name="c1">
            <text:p>0.000005943</text:p>
          </table:table-cell>
          <table:table-cell office:value-type="string" table:style-name="c1">
            <text:p>2026-03-31 14:45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3-31 17:45</text:p>
          </table:table-cell>
          <table:table-cell office:value-type="float" office:value="5.927035e-06" table:style-name="c1">
            <text:p>0.000005927</text:p>
          </table:table-cell>
          <table:table-cell office:value-type="float" office:value="-1.4628209722638563" table:style-name="c12">
            <text:p>-1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6.063029999999999e-06" table:style-name="c1">
            <text:p>0.000006063</text:p>
          </table:table-cell>
          <table:table-cell office:value-type="string" table:style-name="c1">
            <text:p>2026-04-01 13:15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0.7932163128831382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7:15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01 17:45</text:p>
          </table:table-cell>
          <table:table-cell office:value-type="float" office:value="6.07696e-06" table:style-name="c1">
            <text:p>0.000006077</text:p>
          </table:table-cell>
          <table:table-cell office:value-type="float" office:value="-0.6265366175928544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2 01:15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1.123620057739727" table:style-name="c12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4 19:45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-1.2884140243101472" table:style-name="c12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4-07 23:30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0.0245785548689037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4-11 19:15</text:p>
          </table:table-cell>
          <table:table-cell office:value-type="float" office:value="6.026985e-06" table:style-name="c1">
            <text:p>0.000006027</text:p>
          </table:table-cell>
          <table:table-cell office:value-type="float" office:value="-0.1340350259255607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30</text:p>
          </table:table-cell>
          <table:table-cell office:value-type="float" office:value="6.043019999999999e-06" table:style-name="c1">
            <text:p>0.000006043</text:p>
          </table:table-cell>
          <table:table-cell office:value-type="string" table:style-name="c1">
            <text:p>2026-04-11 20:00</text:p>
          </table:table-cell>
          <table:table-cell office:value-type="float" office:value="6.046975e-06" table:style-name="c1">
            <text:p>0.000006047</text:p>
          </table:table-cell>
          <table:table-cell office:value-type="float" office:value="-0.13458342062411255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6.013004999999999e-06" table:style-name="c1">
            <text:p>0.000006013</text:p>
          </table:table-cell>
          <table:table-cell office:value-type="string" table:style-name="c1">
            <text:p>2026-04-14 00:30</text:p>
          </table:table-cell>
          <table:table-cell office:value-type="float" office:value="5.947025e-06" table:style-name="c1">
            <text:p>0.000005947</text:p>
          </table:table-cell>
          <table:table-cell office:value-type="float" office:value="-1.2949948149885149" table:style-name="c12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1:15</text:p>
          </table:table-cell>
          <table:table-cell office:value-type="float" office:value="5.962979999999999e-06" table:style-name="c1">
            <text:p>0.000005963</text:p>
          </table:table-cell>
          <table:table-cell office:value-type="string" table:style-name="c1">
            <text:p>2026-04-14 11:45</text:p>
          </table:table-cell>
          <table:table-cell office:value-type="float" office:value="5.9370300000000005e-06" table:style-name="c1">
            <text:p>0.000005937</text:p>
          </table:table-cell>
          <table:table-cell office:value-type="float" office:value="-0.6342151570187804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4 14:30</text:p>
          </table:table-cell>
          <table:table-cell office:value-type="float" office:value="5.987005000000001e-06" table:style-name="c1">
            <text:p>0.000005987</text:p>
          </table:table-cell>
          <table:table-cell office:value-type="float" office:value="-0.4658174745127308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5.892945e-06" table:style-name="c1">
            <text:p>0.0000058929</text:p>
          </table:table-cell>
          <table:table-cell office:value-type="string" table:style-name="c1">
            <text:p>2026-04-15 12:45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0.03889086093624705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5 20:15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0.7981519737631171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6 02:45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1.1958550217391561" table:style-name="c13">
            <text:p>+1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0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16 03:30</text:p>
          </table:table-cell>
          <table:table-cell office:value-type="float" office:value="6.05697e-06" table:style-name="c1">
            <text:p>0.000006057</text:p>
          </table:table-cell>
          <table:table-cell office:value-type="float" office:value="-0.13485625831709536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0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6 04:30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0.19067936417038744" table:style-name="c13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6 13:0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0.027236167817745738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6.133064999999999e-06" table:style-name="c1">
            <text:p>0.0000061331</text:p>
          </table:table-cell>
          <table:table-cell office:value-type="string" table:style-name="c1">
            <text:p>2026-04-16 16:15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0.6762096424055786" table:style-name="c13">
            <text:p>+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00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4-16 19:30</text:p>
          </table:table-cell>
          <table:table-cell office:value-type="float" office:value="6.35682e-06" table:style-name="c1">
            <text:p>0.0000063568</text:p>
          </table:table-cell>
          <table:table-cell office:value-type="float" office:value="0.01486191951343141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6.333165e-06" table:style-name="c1">
            <text:p>0.0000063332</text:p>
          </table:table-cell>
          <table:table-cell office:value-type="string" table:style-name="c1">
            <text:p>2026-04-17 13:30</text:p>
          </table:table-cell>
          <table:table-cell office:value-type="float" office:value="6.416790000000001e-06" table:style-name="c1">
            <text:p>0.0000064168</text:p>
          </table:table-cell>
          <table:table-cell office:value-type="float" office:value="1.1178902932420076" table:style-name="c13">
            <text:p>+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4-17 14:15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-0.14435372991072892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4-18 07:15</text:p>
          </table:table-cell>
          <table:table-cell office:value-type="float" office:value="6.286855e-06" table:style-name="c1">
            <text:p>0.0000062869</text:p>
          </table:table-cell>
          <table:table-cell office:value-type="float" office:value="-0.4579047483400988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3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21 21:00</text:p>
          </table:table-cell>
          <table:table-cell office:value-type="float" office:value="6.046975e-06" table:style-name="c1">
            <text:p>0.000006047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15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2 02:45</text:p>
          </table:table-cell>
          <table:table-cell office:value-type="float" office:value="6.176910000000001e-06" table:style-name="c1">
            <text:p>0.0000061769</text:p>
          </table:table-cell>
          <table:table-cell office:value-type="float" office:value="0.6778041846724037" table:style-name="c13">
            <text:p>+0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4-22 03:30</text:p>
          </table:table-cell>
          <table:table-cell office:value-type="float" office:value="6.156920000000001e-06" table:style-name="c1">
            <text:p>0.0000061569</text:p>
          </table:table-cell>
          <table:table-cell office:value-type="float" office:value="-0.6223050785286732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22 06:00</text:p>
          </table:table-cell>
          <table:table-cell office:value-type="float" office:value="6.1969e-06" table:style-name="c1">
            <text:p>0.0000061969</text:p>
          </table:table-cell>
          <table:table-cell office:value-type="float" office:value="-0.6202301277014155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9:00</text:p>
          </table:table-cell>
          <table:table-cell office:value-type="float" office:value="6.233114999999999e-06" table:style-name="c1">
            <text:p>0.0000062331</text:p>
          </table:table-cell>
          <table:table-cell office:value-type="string" table:style-name="c1">
            <text:p>2026-04-22 09:30</text:p>
          </table:table-cell>
          <table:table-cell office:value-type="float" office:value="6.236880000000001e-06" table:style-name="c1">
            <text:p>0.0000062369</text:p>
          </table:table-cell>
          <table:table-cell office:value-type="float" office:value="-0.13961756072200515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3 07:00</text:p>
          </table:table-cell>
          <table:table-cell office:value-type="float" office:value="6.11694e-06" table:style-name="c1">
            <text:p>0.0000061169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5:30</text:p>
          </table:table-cell>
          <table:table-cell office:value-type="float" office:value="6.1830899999999994e-06" table:style-name="c1">
            <text:p>0.0000061831</text:p>
          </table:table-cell>
          <table:table-cell office:value-type="string" table:style-name="c1">
            <text:p>2026-04-23 16:00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-0.1383227980669699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24 01:15</text:p>
          </table:table-cell>
          <table:table-cell office:value-type="float" office:value="6.156920000000001e-06" table:style-name="c1">
            <text:p>0.0000061569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6.213104999999999e-06" table:style-name="c1">
            <text:p>0.0000062131</text:p>
          </table:table-cell>
          <table:table-cell office:value-type="string" table:style-name="c1">
            <text:p>2026-04-24 11:45</text:p>
          </table:table-cell>
          <table:table-cell office:value-type="float" office:value="6.21689e-06" table:style-name="c1">
            <text:p>0.0000062169</text:p>
          </table:table-cell>
          <table:table-cell office:value-type="float" office:value="-0.13910215761684386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6.2031e-06" table:style-name="c1">
            <text:p>0.0000062031</text:p>
          </table:table-cell>
          <table:table-cell office:value-type="string" table:style-name="c1">
            <text:p>2026-04-26 19:15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0.13884320912123105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3:0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4-27 03:30</text:p>
          </table:table-cell>
          <table:table-cell office:value-type="float" office:value="6.31684e-06" table:style-name="c1">
            <text:p>0.0000063168</text:p>
          </table:table-cell>
          <table:table-cell office:value-type="float" office:value="0.016858822017584707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29 05:15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0.45994017629447104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7:45</text:p>
          </table:table-cell>
          <table:table-cell office:value-type="float" office:value="6.24312e-06" table:style-name="c1">
            <text:p>0.0000062431</text:p>
          </table:table-cell>
          <table:table-cell office:value-type="string" table:style-name="c1">
            <text:p>2026-04-29 08:15</text:p>
          </table:table-cell>
          <table:table-cell office:value-type="float" office:value="6.226885e-06" table:style-name="c1">
            <text:p>0.0000062269</text:p>
          </table:table-cell>
          <table:table-cell office:value-type="float" office:value="-0.4594264264502379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9:30</text:p>
          </table:table-cell>
          <table:table-cell office:value-type="float" office:value="6.36318e-06" table:style-name="c1">
            <text:p>0.0000063632</text:p>
          </table:table-cell>
          <table:table-cell office:value-type="string" table:style-name="c1">
            <text:p>2026-04-29 10:00</text:p>
          </table:table-cell>
          <table:table-cell office:value-type="float" office:value="6.45677e-06" table:style-name="c1">
            <text:p>0.0000064568</text:p>
          </table:table-cell>
          <table:table-cell office:value-type="float" office:value="1.2679653376142186" table:style-name="c13">
            <text:p>+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6.54327e-06" table:style-name="c1">
            <text:p>0.0000065433</text:p>
          </table:table-cell>
          <table:table-cell office:value-type="string" table:style-name="c1">
            <text:p>2026-04-29 10:45</text:p>
          </table:table-cell>
          <table:table-cell office:value-type="float" office:value="6.446775000000001e-06" table:style-name="c1">
            <text:p>0.0000064468</text:p>
          </table:table-cell>
          <table:table-cell office:value-type="float" office:value="-1.6716733869303835" table:style-name="c12">
            <text:p>-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21:45</text:p>
          </table:table-cell>
          <table:table-cell office:value-type="float" office:value="6.16308e-06" table:style-name="c1">
            <text:p>0.0000061631</text:p>
          </table:table-cell>
          <table:table-cell office:value-type="string" table:style-name="c1">
            <text:p>2026-04-29 22:15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-0.6233526592223426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01:00</text:p>
          </table:table-cell>
          <table:table-cell office:value-type="float" office:value="6.26313e-06" table:style-name="c1">
            <text:p>0.0000062631</text:p>
          </table:table-cell>
          <table:table-cell office:value-type="string" table:style-name="c1">
            <text:p>2026-04-30 01:30</text:p>
          </table:table-cell>
          <table:table-cell office:value-type="float" office:value="6.256870000000001e-06" table:style-name="c1">
            <text:p>0.0000062569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1:45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1 02:15</text:p>
          </table:table-cell>
          <table:table-cell office:value-type="float" office:value="6.306845e-06" table:style-name="c1">
            <text:p>0.0000063068</text:p>
          </table:table-cell>
          <table:table-cell office:value-type="float" office:value="0.017362016050803675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5-01 04:00</text:p>
          </table:table-cell>
          <table:table-cell office:value-type="float" office:value="6.346825000000001e-06" table:style-name="c1">
            <text:p>0.0000063468</text:p>
          </table:table-cell>
          <table:table-cell office:value-type="float" office:value="-0.14239415268706423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6.34317e-06" table:style-name="c1">
            <text:p>0.0000063432</text:p>
          </table:table-cell>
          <table:table-cell office:value-type="string" table:style-name="c1">
            <text:p>2026-05-01 13:15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0.17211799171392705" table:style-name="c13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30</text:p>
          </table:table-cell>
          <table:table-cell office:value-type="float" office:value="6.36318e-06" table:style-name="c1">
            <text:p>0.0000063632</text:p>
          </table:table-cell>
          <table:table-cell office:value-type="string" table:style-name="c1">
            <text:p>2026-05-01 14:00</text:p>
          </table:table-cell>
          <table:table-cell office:value-type="float" office:value="6.37681e-06" table:style-name="c1">
            <text:p>0.0000063768</text:p>
          </table:table-cell>
          <table:table-cell office:value-type="float" office:value="0.013872887612809137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3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5-02 15:00</text:p>
          </table:table-cell>
          <table:table-cell office:value-type="float" office:value="6.2968500000000005e-06" table:style-name="c1">
            <text:p>0.0000062969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22:00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2 22:30</text:p>
          </table:table-cell>
          <table:table-cell office:value-type="float" office:value="6.266865e-06" table:style-name="c1">
            <text:p>0.0000062669</text:p>
          </table:table-cell>
          <table:table-cell office:value-type="float" office:value="-0.6166624658259123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6.403199999999999e-06" table:style-name="c1">
            <text:p>0.0000064032</text:p>
          </table:table-cell>
          <table:table-cell office:value-type="string" table:style-name="c1">
            <text:p>2026-05-05 22:3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7669956144583656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2:00</text:p>
          </table:table-cell>
          <table:table-cell office:value-type="float" office:value="6.413204999999999e-06" table:style-name="c1">
            <text:p>0.0000064132</text:p>
          </table:table-cell>
          <table:table-cell office:value-type="string" table:style-name="c1">
            <text:p>2026-05-06 02:3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9218052936869836" table:style-name="c12">
            <text:p>-0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6.433215e-06" table:style-name="c1">
            <text:p>0.0000064332</text:p>
          </table:table-cell>
          <table:table-cell office:value-type="string" table:style-name="c1">
            <text:p>2026-05-06 04:15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6.4832399999999994e-06" table:style-name="c1">
            <text:p>0.0000064832</text:p>
          </table:table-cell>
          <table:table-cell office:value-type="string" table:style-name="c1">
            <text:p>2026-05-06 09:30</text:p>
          </table:table-cell>
          <table:table-cell office:value-type="float" office:value="6.47676e-06" table:style-name="c1">
            <text:p>0.000006476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0:15</text:p>
          </table:table-cell>
          <table:table-cell office:value-type="float" office:value="6.52326e-06" table:style-name="c1">
            <text:p>0.0000065233</text:p>
          </table:table-cell>
          <table:table-cell office:value-type="string" table:style-name="c1">
            <text:p>2026-05-06 10:45</text:p>
          </table:table-cell>
          <table:table-cell office:value-type="float" office:value="6.49675e-06" table:style-name="c1">
            <text:p>0.0000064968</text:p>
          </table:table-cell>
          <table:table-cell office:value-type="float" office:value="-0.605479518676233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6.44322e-06" table:style-name="c1">
            <text:p>0.0000064432</text:p>
          </table:table-cell>
          <table:table-cell office:value-type="string" table:style-name="c1">
            <text:p>2026-05-06 22:15</text:p>
          </table:table-cell>
          <table:table-cell office:value-type="float" office:value="6.406795e-06" table:style-name="c1">
            <text:p>0.0000064068</text:p>
          </table:table-cell>
          <table:table-cell office:value-type="float" office:value="-0.7640928480635578" table:style-name="c12">
            <text:p>-0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6.373185e-06" table:style-name="c1">
            <text:p>0.0000063732</text:p>
          </table:table-cell>
          <table:table-cell office:value-type="string" table:style-name="c1">
            <text:p>2026-05-07 07:3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8 18:15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-0.14435372991072892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0:30</text:p>
          </table:table-cell>
          <table:table-cell office:value-type="float" office:value="6.46323e-06" table:style-name="c1">
            <text:p>0.0000064632</text:p>
          </table:table-cell>
          <table:table-cell office:value-type="string" table:style-name="c1">
            <text:p>2026-05-08 21:00</text:p>
          </table:table-cell>
          <table:table-cell office:value-type="float" office:value="6.446775000000001e-06" table:style-name="c1">
            <text:p>0.0000064468</text:p>
          </table:table-cell>
          <table:table-cell office:value-type="float" office:value="-0.45398513166016174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9 18:00</text:p>
          </table:table-cell>
          <table:table-cell office:value-type="float" office:value="6.416790000000001e-06" table:style-name="c1">
            <text:p>0.0000064168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2:30</text:p>
          </table:table-cell>
          <table:table-cell office:value-type="float" office:value="6.393195e-06" table:style-name="c1">
            <text:p>0.0000063932</text:p>
          </table:table-cell>
          <table:table-cell office:value-type="string" table:style-name="c1">
            <text:p>2026-05-10 03:00</text:p>
          </table:table-cell>
          <table:table-cell office:value-type="float" office:value="6.366815e-06" table:style-name="c1">
            <text:p>0.0000063668</text:p>
          </table:table-cell>
          <table:table-cell office:value-type="float" office:value="-0.6117013978926167" table:style-name="c12">
            <text:p>-0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6.413204999999999e-06" table:style-name="c1">
            <text:p>0.0000064132</text:p>
          </table:table-cell>
          <table:table-cell office:value-type="string" table:style-name="c1">
            <text:p>2026-05-10 06:30</text:p>
          </table:table-cell>
          <table:table-cell office:value-type="float" office:value="6.3968e-06" table:style-name="c1">
            <text:p>0.0000063968</text:p>
          </table:table-cell>
          <table:table-cell office:value-type="float" office:value="-0.4551889920874186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4:45</text:p>
          </table:table-cell>
          <table:table-cell office:value-type="float" office:value="6.54327e-06" table:style-name="c1">
            <text:p>0.0000065433</text:p>
          </table:table-cell>
          <table:table-cell office:value-type="string" table:style-name="c1">
            <text:p>2026-05-10 15:15</text:p>
          </table:table-cell>
          <table:table-cell office:value-type="float" office:value="6.586705e-06" table:style-name="c1">
            <text:p>0.0000065867</text:p>
          </table:table-cell>
          <table:table-cell office:value-type="float" office:value="0.46258486513623964" table:style-name="c13">
            <text:p>+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6.6033e-06" table:style-name="c1">
            <text:p>0.0000066033</text:p>
          </table:table-cell>
          <table:table-cell office:value-type="string" table:style-name="c1">
            <text:p>2026-05-10 23:45</text:p>
          </table:table-cell>
          <table:table-cell office:value-type="float" office:value="6.626685e-06" table:style-name="c1">
            <text:p>0.0000066267</text:p>
          </table:table-cell>
          <table:table-cell office:value-type="float" office:value="0.15353318318114262" table:style-name="c13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0:45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5-21 01:15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0.04355235609390107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30</text:p>
          </table:table-cell>
          <table:table-cell office:value-type="float" office:value="5.8529249999999995e-06" table:style-name="c1">
            <text:p>0.0000058529</text:p>
          </table:table-cell>
          <table:table-cell office:value-type="string" table:style-name="c1">
            <text:p>2026-05-21 04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0.4700781732210557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09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0.47037000189971145" table:style-name="c12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1 18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45</text:p>
          </table:table-cell>
          <table:table-cell office:value-type="float" office:value="5.492745e-06" table:style-name="c1">
            <text:p>0.0000054927</text:p>
          </table:table-cell>
          <table:table-cell office:value-type="string" table:style-name="c1">
            <text:p>2026-05-30 02:15</text:p>
          </table:table-cell>
          <table:table-cell office:value-type="float" office:value="5.527235000000001e-06" table:style-name="c1">
            <text:p>0.0000055272</text:p>
          </table:table-cell>
          <table:table-cell office:value-type="float" office:value="0.426763981124223" table:style-name="c13">
            <text:p>+0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2:15</text:p>
          </table:table-cell>
          <table:table-cell office:value-type="float" office:value="5.512754999999999e-06" table:style-name="c1">
            <text:p>0.0000055128</text:p>
          </table:table-cell>
          <table:table-cell office:value-type="string" table:style-name="c1">
            <text:p>2026-05-31 22:45</text:p>
          </table:table-cell>
          <table:table-cell office:value-type="float" office:value="5.51724e-06" table:style-name="c1">
            <text:p>0.0000055172</text:p>
          </table:table-cell>
          <table:table-cell office:value-type="float" office:value="-0.11870585143000101" table:style-name="c12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8:00</text:p>
          </table:table-cell>
          <table:table-cell office:value-type="float" office:value="5.54277e-06" table:style-name="c1">
            <text:p>0.0000055428</text:p>
          </table:table-cell>
          <table:table-cell office:value-type="string" table:style-name="c1">
            <text:p>2026-06-01 18:30</text:p>
          </table:table-cell>
          <table:table-cell office:value-type="float" office:value="5.5572200000000005e-06" table:style-name="c1">
            <text:p>0.0000055572</text:p>
          </table:table-cell>
          <table:table-cell office:value-type="float" office:value="0.06027883567243375" table:style-name="c13">
            <text:p>+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21:30</text:p>
          </table:table-cell>
          <table:table-cell office:value-type="float" office:value="89.80488" table:style-name="c9">
            <text:p>89.805</text:p>
          </table:table-cell>
          <table:table-cell office:value-type="string" table:style-name="c9">
            <text:p>2026-03-05 22:00</text:p>
          </table:table-cell>
          <table:table-cell office:value-type="float" office:value="89.07544000000001" table:style-name="c9">
            <text:p>89.075</text:p>
          </table:table-cell>
          <table:table-cell office:value-type="float" office:value="-1.0105261591129344" table:style-name="c10">
            <text:p>-1.0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6 08:00</text:p>
          </table:table-cell>
          <table:table-cell office:value-type="float" office:value="88.74435" table:style-name="c9">
            <text:p>88.744</text:p>
          </table:table-cell>
          <table:table-cell office:value-type="string" table:style-name="c9">
            <text:p>2026-03-06 08:30</text:p>
          </table:table-cell>
          <table:table-cell office:value-type="float" office:value="88.37579000000001" table:style-name="c9">
            <text:p>88.376</text:p>
          </table:table-cell>
          <table:table-cell office:value-type="float" office:value="-0.61437511707505" table:style-name="c10">
            <text:p>-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5:00</text:p>
          </table:table-cell>
          <table:table-cell office:value-type="float" office:value="88.14405" table:style-name="c9">
            <text:p>88.144</text:p>
          </table:table-cell>
          <table:table-cell office:value-type="string" table:style-name="c9">
            <text:p>2026-03-10 15:30</text:p>
          </table:table-cell>
          <table:table-cell office:value-type="float" office:value="87.72611500000001" table:style-name="c9">
            <text:p>87.726</text:p>
          </table:table-cell>
          <table:table-cell office:value-type="float" office:value="-0.673102159345973" table:style-name="c10">
            <text:p>-0.7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3:30</text:p>
          </table:table-cell>
          <table:table-cell office:value-type="float" office:value="86.28312" table:style-name="c9">
            <text:p>86.283</text:p>
          </table:table-cell>
          <table:table-cell office:value-type="string" table:style-name="c9">
            <text:p>2026-03-11 14:00</text:p>
          </table:table-cell>
          <table:table-cell office:value-type="float" office:value="85.927015" table:style-name="c9">
            <text:p>85.927</text:p>
          </table:table-cell>
          <table:table-cell office:value-type="float" office:value="-0.6117918579960913" table:style-name="c10">
            <text:p>-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4:30</text:p>
          </table:table-cell>
          <table:table-cell office:value-type="float" office:value="86.67331499999999" table:style-name="c9">
            <text:p>86.673</text:p>
          </table:table-cell>
          <table:table-cell office:value-type="string" table:style-name="c9">
            <text:p>2026-03-11 15:00</text:p>
          </table:table-cell>
          <table:table-cell office:value-type="float" office:value="86.49673000000001" table:style-name="c9">
            <text:p>86.497</text:p>
          </table:table-cell>
          <table:table-cell office:value-type="float" office:value="-0.40322902530030014" table:style-name="c10">
            <text:p>-0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7:00</text:p>
          </table:table-cell>
          <table:table-cell office:value-type="float" office:value="86.493225" table:style-name="c9">
            <text:p>86.493</text:p>
          </table:table-cell>
          <table:table-cell office:value-type="string" table:style-name="c9">
            <text:p>2026-03-11 17:30</text:p>
          </table:table-cell>
          <table:table-cell office:value-type="float" office:value="87.626165" table:style-name="c9">
            <text:p>87.626</text:p>
          </table:table-cell>
          <table:table-cell office:value-type="float" office:value="1.1073414087230615" table:style-name="c11">
            <text:p>+1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8:45</text:p>
          </table:table-cell>
          <table:table-cell office:value-type="float" office:value="85.94295" table:style-name="c9">
            <text:p>85.943</text:p>
          </table:table-cell>
          <table:table-cell office:value-type="string" table:style-name="c9">
            <text:p>2026-03-12 09:15</text:p>
          </table:table-cell>
          <table:table-cell office:value-type="float" office:value="85.60717500000001" table:style-name="c9">
            <text:p>85.607</text:p>
          </table:table-cell>
          <table:table-cell office:value-type="float" office:value="-0.5898142230688852" table:style-name="c10">
            <text:p>-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2:30</text:p>
          </table:table-cell>
          <table:table-cell office:value-type="float" office:value="87.22359" table:style-name="c9">
            <text:p>87.224</text:p>
          </table:table-cell>
          <table:table-cell office:value-type="string" table:style-name="c9">
            <text:p>2026-03-12 13:00</text:p>
          </table:table-cell>
          <table:table-cell office:value-type="float" office:value="87.20637500000001" table:style-name="c9">
            <text:p>87.206</text:p>
          </table:table-cell>
          <table:table-cell office:value-type="float" office:value="-0.21959717964484815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0:45</text:p>
          </table:table-cell>
          <table:table-cell office:value-type="float" office:value="90.02499" table:style-name="c9">
            <text:p>90.025</text:p>
          </table:table-cell>
          <table:table-cell office:value-type="string" table:style-name="c9">
            <text:p>2026-03-13 01:15</text:p>
          </table:table-cell>
          <table:table-cell office:value-type="float" office:value="89.955" table:style-name="c9">
            <text:p>89.955</text:p>
          </table:table-cell>
          <table:table-cell office:value-type="float" office:value="-0.2774896670358018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1:15</text:p>
          </table:table-cell>
          <table:table-cell office:value-type="float" office:value="90.20508" table:style-name="c9">
            <text:p>90.205</text:p>
          </table:table-cell>
          <table:table-cell office:value-type="string" table:style-name="c9">
            <text:p>2026-03-13 11:45</text:p>
          </table:table-cell>
          <table:table-cell office:value-type="float" office:value="90.07494000000001" table:style-name="c9">
            <text:p>90.075</text:p>
          </table:table-cell>
          <table:table-cell office:value-type="float" office:value="-0.3438828556661999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30</text:p>
          </table:table-cell>
          <table:table-cell office:value-type="float" office:value="91.46571" table:style-name="c9">
            <text:p>91.466</text:p>
          </table:table-cell>
          <table:table-cell office:value-type="string" table:style-name="c9">
            <text:p>2026-03-13 14:00</text:p>
          </table:table-cell>
          <table:table-cell office:value-type="float" office:value="91.83406" table:style-name="c9">
            <text:p>91.834</text:p>
          </table:table-cell>
          <table:table-cell office:value-type="float" office:value="0.20201419095744466" table:style-name="c11">
            <text:p>+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4:15</text:p>
          </table:table-cell>
          <table:table-cell office:value-type="float" office:value="92.496225" table:style-name="c9">
            <text:p>92.496</text:p>
          </table:table-cell>
          <table:table-cell office:value-type="string" table:style-name="c9">
            <text:p>2026-03-13 14:45</text:p>
          </table:table-cell>
          <table:table-cell office:value-type="float" office:value="91.67414000000001" table:style-name="c9">
            <text:p>91.674</text:p>
          </table:table-cell>
          <table:table-cell office:value-type="float" office:value="-1.0869001473951756" table:style-name="c10">
            <text:p>-1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8:00</text:p>
          </table:table-cell>
          <table:table-cell office:value-type="float" office:value="88.48422" table:style-name="c9">
            <text:p>88.484</text:p>
          </table:table-cell>
          <table:table-cell office:value-type="string" table:style-name="c9">
            <text:p>2026-03-15 18:30</text:p>
          </table:table-cell>
          <table:table-cell office:value-type="float" office:value="88.505725" table:style-name="c9">
            <text:p>88.506</text:p>
          </table:table-cell>
          <table:table-cell office:value-type="float" office:value="-0.1756448147194889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1:45</text:p>
          </table:table-cell>
          <table:table-cell office:value-type="float" office:value="89.78486999999998" table:style-name="c9">
            <text:p>89.785</text:p>
          </table:table-cell>
          <table:table-cell office:value-type="string" table:style-name="c9">
            <text:p>2026-03-15 22:15</text:p>
          </table:table-cell>
          <table:table-cell office:value-type="float" office:value="90.07494000000001" table:style-name="c9">
            <text:p>90.075</text:p>
          </table:table-cell>
          <table:table-cell office:value-type="float" office:value="0.12252642894066135" table:style-name="c11">
            <text:p>+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30</text:p>
          </table:table-cell>
          <table:table-cell office:value-type="float" office:value="90.48522" table:style-name="c9">
            <text:p>90.485</text:p>
          </table:table-cell>
          <table:table-cell office:value-type="string" table:style-name="c9">
            <text:p>2026-03-15 23:00</text:p>
          </table:table-cell>
          <table:table-cell office:value-type="float" office:value="92.60367500000001" table:style-name="c9">
            <text:p>92.604</text:p>
          </table:table-cell>
          <table:table-cell office:value-type="float" office:value="2.1366365177374114" table:style-name="c11">
            <text:p>+2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3:15</text:p>
          </table:table-cell>
          <table:table-cell office:value-type="float" office:value="92.74634999999999" table:style-name="c9">
            <text:p>92.746</text:p>
          </table:table-cell>
          <table:table-cell office:value-type="string" table:style-name="c9">
            <text:p>2026-03-15 23:45</text:p>
          </table:table-cell>
          <table:table-cell office:value-type="float" office:value="92.21387000000001" table:style-name="c9">
            <text:p>92.214</text:p>
          </table:table-cell>
          <table:table-cell office:value-type="float" office:value="-0.7728773435611958" table:style-name="c10">
            <text:p>-0.8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93.31663499999999" table:style-name="c9">
            <text:p>93.317</text:p>
          </table:table-cell>
          <table:table-cell office:value-type="string" table:style-name="c9">
            <text:p>2026-03-16 04:15</text:p>
          </table:table-cell>
          <table:table-cell office:value-type="float" office:value="93.303325" table:style-name="c9">
            <text:p>93.303</text:p>
          </table:table-cell>
          <table:table-cell office:value-type="float" office:value="-0.21413475386781178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2:30</text:p>
          </table:table-cell>
          <table:table-cell office:value-type="float" office:value="94.08702" table:style-name="c9">
            <text:p>94.087</text:p>
          </table:table-cell>
          <table:table-cell office:value-type="string" table:style-name="c9">
            <text:p>2026-03-16 13:00</text:p>
          </table:table-cell>
          <table:table-cell office:value-type="float" office:value="93.73311000000001" table:style-name="c9">
            <text:p>93.733</text:p>
          </table:table-cell>
          <table:table-cell office:value-type="float" office:value="-0.5752998520837327" table:style-name="c10">
            <text:p>-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7 16:30</text:p>
          </table:table-cell>
          <table:table-cell office:value-type="float" office:value="94.56725999999999" table:style-name="c9">
            <text:p>94.567</text:p>
          </table:table-cell>
          <table:table-cell office:value-type="string" table:style-name="c9">
            <text:p>2026-03-17 17:00</text:p>
          </table:table-cell>
          <table:table-cell office:value-type="float" office:value="94.34280500000001" table:style-name="c9">
            <text:p>94.343</text:p>
          </table:table-cell>
          <table:table-cell office:value-type="float" office:value="-0.43677512407039876" table:style-name="c10">
            <text:p>-0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07:30</text:p>
          </table:table-cell>
          <table:table-cell office:value-type="float" office:value="91.23559499999999" table:style-name="c9">
            <text:p>91.236</text:p>
          </table:table-cell>
          <table:table-cell office:value-type="string" table:style-name="c9">
            <text:p>2026-03-24 08:00</text:p>
          </table:table-cell>
          <table:table-cell office:value-type="float" office:value="91.664145" table:style-name="c9">
            <text:p>91.664</text:p>
          </table:table-cell>
          <table:table-cell office:value-type="float" office:value="0.2688790204580016" table:style-name="c11">
            <text:p>+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0:45</text:p>
          </table:table-cell>
          <table:table-cell office:value-type="float" office:value="90.00497999999999" table:style-name="c9">
            <text:p>90.005</text:p>
          </table:table-cell>
          <table:table-cell office:value-type="string" table:style-name="c9">
            <text:p>2026-03-24 21:15</text:p>
          </table:table-cell>
          <table:table-cell office:value-type="float" office:value="89.945005" table:style-name="c9">
            <text:p>89.945</text:p>
          </table:table-cell>
          <table:table-cell office:value-type="float" office:value="-0.266401997972765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1:30</text:p>
          </table:table-cell>
          <table:table-cell office:value-type="float" office:value="90.055005" table:style-name="c9">
            <text:p>90.055</text:p>
          </table:table-cell>
          <table:table-cell office:value-type="string" table:style-name="c9">
            <text:p>2026-03-24 22:00</text:p>
          </table:table-cell>
          <table:table-cell office:value-type="float" office:value="90.34480500000001" table:style-name="c9">
            <text:p>90.345</text:p>
          </table:table-cell>
          <table:table-cell office:value-type="float" office:value="0.12126003968910837" table:style-name="c11">
            <text:p>+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4:00</text:p>
          </table:table-cell>
          <table:table-cell office:value-type="float" office:value="91.735845" table:style-name="c9">
            <text:p>91.736</text:p>
          </table:table-cell>
          <table:table-cell office:value-type="string" table:style-name="c9">
            <text:p>2026-03-25 04:30</text:p>
          </table:table-cell>
          <table:table-cell office:value-type="float" office:value="91.724115" table:style-name="c9">
            <text:p>91.724</text:p>
          </table:table-cell>
          <table:table-cell office:value-type="float" office:value="-0.21266115321114665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5:15</text:p>
          </table:table-cell>
          <table:table-cell office:value-type="float" office:value="92.636295" table:style-name="c9">
            <text:p>92.636</text:p>
          </table:table-cell>
          <table:table-cell office:value-type="string" table:style-name="c9">
            <text:p>2026-03-25 05:45</text:p>
          </table:table-cell>
          <table:table-cell office:value-type="float" office:value="92.48373500000001" table:style-name="c9">
            <text:p>92.484</text:p>
          </table:table-cell>
          <table:table-cell office:value-type="float" office:value="-0.3642578605556168" table:style-name="c10">
            <text:p>-0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6:30</text:p>
          </table:table-cell>
          <table:table-cell office:value-type="float" office:value="92.876415" table:style-name="c9">
            <text:p>92.876</text:p>
          </table:table-cell>
          <table:table-cell office:value-type="string" table:style-name="c9">
            <text:p>2026-03-25 07:00</text:p>
          </table:table-cell>
          <table:table-cell office:value-type="float" office:value="92.3538" table:style-name="c9">
            <text:p>92.354</text:p>
          </table:table-cell>
          <table:table-cell office:value-type="float" office:value="-0.761474531720463" table:style-name="c10">
            <text:p>-0.8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1:45</text:p>
          </table:table-cell>
          <table:table-cell office:value-type="float" office:value="93.156555" table:style-name="c9">
            <text:p>93.157</text:p>
          </table:table-cell>
          <table:table-cell office:value-type="string" table:style-name="c9">
            <text:p>2026-03-25 12:15</text:p>
          </table:table-cell>
          <table:table-cell office:value-type="float" office:value="93.143405" table:style-name="c9">
            <text:p>93.143</text:p>
          </table:table-cell>
          <table:table-cell office:value-type="float" office:value="-0.21398780428815156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22:45</text:p>
          </table:table-cell>
          <table:table-cell office:value-type="float" office:value="91.80588" table:style-name="c9">
            <text:p>91.806</text:p>
          </table:table-cell>
          <table:table-cell office:value-type="string" table:style-name="c9">
            <text:p>2026-03-25 23:15</text:p>
          </table:table-cell>
          <table:table-cell office:value-type="float" office:value="91.61417" table:style-name="c9">
            <text:p>91.614</text:p>
          </table:table-cell>
          <table:table-cell office:value-type="float" office:value="-0.40830361391884784" table:style-name="c10">
            <text:p>-0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01:30</text:p>
          </table:table-cell>
          <table:table-cell office:value-type="float" office:value="83.79187499999999" table:style-name="c9">
            <text:p>83.792</text:p>
          </table:table-cell>
          <table:table-cell office:value-type="string" table:style-name="c9">
            <text:p>2026-03-31 02:00</text:p>
          </table:table-cell>
          <table:table-cell office:value-type="float" office:value="83.808075" table:style-name="c9">
            <text:p>83.808</text:p>
          </table:table-cell>
          <table:table-cell office:value-type="float" office:value="-0.18060503112620196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16:00</text:p>
          </table:table-cell>
          <table:table-cell office:value-type="float" office:value="83.66181" table:style-name="c9">
            <text:p>83.662</text:p>
          </table:table-cell>
          <table:table-cell office:value-type="string" table:style-name="c9">
            <text:p>2026-04-01 16:30</text:p>
          </table:table-cell>
          <table:table-cell office:value-type="float" office:value="84.33781" table:style-name="c9">
            <text:p>84.338</text:p>
          </table:table-cell>
          <table:table-cell office:value-type="float" office:value="0.6064998089450713" table:style-name="c11">
            <text:p>+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16:45</text:p>
          </table:table-cell>
          <table:table-cell office:value-type="float" office:value="85.28262" table:style-name="c9">
            <text:p>85.283</text:p>
          </table:table-cell>
          <table:table-cell office:value-type="string" table:style-name="c9">
            <text:p>2026-04-01 17:15</text:p>
          </table:table-cell>
          <table:table-cell office:value-type="float" office:value="85.707125" table:style-name="c9">
            <text:p>85.707</text:p>
          </table:table-cell>
          <table:table-cell office:value-type="float" office:value="0.2968675881733107" table:style-name="c11">
            <text:p>+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5:15</text:p>
          </table:table-cell>
          <table:table-cell office:value-type="float" office:value="81.190575" table:style-name="c9">
            <text:p>81.191</text:p>
          </table:table-cell>
          <table:table-cell office:value-type="string" table:style-name="c9">
            <text:p>2026-04-04 15:45</text:p>
          </table:table-cell>
          <table:table-cell office:value-type="float" office:value="80.84955500000001" table:style-name="c9">
            <text:p>80.85</text:p>
          </table:table-cell>
          <table:table-cell office:value-type="float" office:value="-0.619084494037625" table:style-name="c10">
            <text:p>-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0:00</text:p>
          </table:table-cell>
          <table:table-cell office:value-type="float" office:value="81.930945" table:style-name="c9">
            <text:p>81.931</text:p>
          </table:table-cell>
          <table:table-cell office:value-type="string" table:style-name="c9">
            <text:p>2026-04-06 00:30</text:p>
          </table:table-cell>
          <table:table-cell office:value-type="float" office:value="82.43876" table:style-name="c9">
            <text:p>82.439</text:p>
          </table:table-cell>
          <table:table-cell office:value-type="float" office:value="0.4186695500216553" table:style-name="c11">
            <text:p>+0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15</text:p>
          </table:table-cell>
          <table:table-cell office:value-type="float" office:value="82.48122" table:style-name="c9">
            <text:p>82.481</text:p>
          </table:table-cell>
          <table:table-cell office:value-type="string" table:style-name="c9">
            <text:p>2026-04-06 09:45</text:p>
          </table:table-cell>
          <table:table-cell office:value-type="float" office:value="82.488735" table:style-name="c9">
            <text:p>82.489</text:p>
          </table:table-cell>
          <table:table-cell office:value-type="float" office:value="-0.1908070482771529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00</text:p>
          </table:table-cell>
          <table:table-cell office:value-type="float" office:value="85.28262" table:style-name="c9">
            <text:p>85.283</text:p>
          </table:table-cell>
          <table:table-cell office:value-type="string" table:style-name="c9">
            <text:p>2026-04-07 23:30</text:p>
          </table:table-cell>
          <table:table-cell office:value-type="float" office:value="86.89653" table:style-name="c9">
            <text:p>86.897</text:p>
          </table:table-cell>
          <table:table-cell office:value-type="float" office:value="1.6887424853152977" table:style-name="c11">
            <text:p>+1.7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7 23:45</text:p>
          </table:table-cell>
          <table:table-cell office:value-type="float" office:value="85.78286999999999" table:style-name="c9">
            <text:p>85.783</text:p>
          </table:table-cell>
          <table:table-cell office:value-type="string" table:style-name="c9">
            <text:p>2026-04-08 00:15</text:p>
          </table:table-cell>
          <table:table-cell office:value-type="float" office:value="85.33731" table:style-name="c9">
            <text:p>85.337</text:p>
          </table:table-cell>
          <table:table-cell office:value-type="float" office:value="-0.7182661091777232" table:style-name="c10">
            <text:p>-0.7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15:45</text:p>
          </table:table-cell>
          <table:table-cell office:value-type="float" office:value="83.411685" table:style-name="c9">
            <text:p>83.412</text:p>
          </table:table-cell>
          <table:table-cell office:value-type="string" table:style-name="c9">
            <text:p>2026-04-09 16:15</text:p>
          </table:table-cell>
          <table:table-cell office:value-type="float" office:value="83.70812500000001" table:style-name="c9">
            <text:p>83.708</text:p>
          </table:table-cell>
          <table:table-cell office:value-type="float" office:value="0.1547834192835218" table:style-name="c11">
            <text:p>+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9 22:30</text:p>
          </table:table-cell>
          <table:table-cell office:value-type="float" office:value="84.95245499999999" table:style-name="c9">
            <text:p>84.952</text:p>
          </table:table-cell>
          <table:table-cell office:value-type="string" table:style-name="c9">
            <text:p>2026-04-09 23:00</text:p>
          </table:table-cell>
          <table:table-cell office:value-type="float" office:value="83.948005" table:style-name="c9">
            <text:p>83.948</text:p>
          </table:table-cell>
          <table:table-cell office:value-type="float" office:value="-1.3799036908291762" table:style-name="c10">
            <text:p>-1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19:15</text:p>
          </table:table-cell>
          <table:table-cell office:value-type="float" office:value="85.50272999999999" table:style-name="c9">
            <text:p>85.503</text:p>
          </table:table-cell>
          <table:table-cell office:value-type="string" table:style-name="c9">
            <text:p>2026-04-10 19:45</text:p>
          </table:table-cell>
          <table:table-cell office:value-type="float" office:value="85.11742" table:style-name="c9">
            <text:p>85.117</text:p>
          </table:table-cell>
          <table:table-cell office:value-type="float" office:value="-0.6496397513623076" table:style-name="c10">
            <text:p>-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45</text:p>
          </table:table-cell>
          <table:table-cell office:value-type="float" office:value="85.50272999999999" table:style-name="c9">
            <text:p>85.503</text:p>
          </table:table-cell>
          <table:table-cell office:value-type="string" table:style-name="c9">
            <text:p>2026-04-11 19:15</text:p>
          </table:table-cell>
          <table:table-cell office:value-type="float" office:value="85.587185" table:style-name="c9">
            <text:p>85.587</text:p>
          </table:table-cell>
          <table:table-cell office:value-type="float" office:value="-0.10132282655183067" table:style-name="c10">
            <text:p>-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0:00</text:p>
          </table:table-cell>
          <table:table-cell office:value-type="float" office:value="84.132045" table:style-name="c9">
            <text:p>84.132</text:p>
          </table:table-cell>
          <table:table-cell office:value-type="string" table:style-name="c9">
            <text:p>2026-04-13 20:30</text:p>
          </table:table-cell>
          <table:table-cell office:value-type="float" office:value="84.007975" table:style-name="c9">
            <text:p>84.008</text:p>
          </table:table-cell>
          <table:table-cell office:value-type="float" office:value="-0.34707576884051017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30</text:p>
          </table:table-cell>
          <table:table-cell office:value-type="float" office:value="85.72284" table:style-name="c9">
            <text:p>85.723</text:p>
          </table:table-cell>
          <table:table-cell office:value-type="string" table:style-name="c9">
            <text:p>2026-04-13 23:00</text:p>
          </table:table-cell>
          <table:table-cell office:value-type="float" office:value="86.17689" table:style-name="c9">
            <text:p>86.177</text:p>
          </table:table-cell>
          <table:table-cell office:value-type="float" office:value="0.32871332411523735" table:style-name="c11">
            <text:p>+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30</text:p>
          </table:table-cell>
          <table:table-cell office:value-type="float" office:value="86.633295" table:style-name="c9">
            <text:p>86.633</text:p>
          </table:table-cell>
          <table:table-cell office:value-type="string" table:style-name="c9">
            <text:p>2026-04-14 00:00</text:p>
          </table:table-cell>
          <table:table-cell office:value-type="float" office:value="86.466745" table:style-name="c9">
            <text:p>86.467</text:p>
          </table:table-cell>
          <table:table-cell office:value-type="float" office:value="-0.3917628011897767" table:style-name="c10">
            <text:p>-0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15</text:p>
          </table:table-cell>
          <table:table-cell office:value-type="float" office:value="86.173065" table:style-name="c9">
            <text:p>86.173</text:p>
          </table:table-cell>
          <table:table-cell office:value-type="string" table:style-name="c9">
            <text:p>2026-04-16 15:45</text:p>
          </table:table-cell>
          <table:table-cell office:value-type="float" office:value="86.67664" table:style-name="c9">
            <text:p>86.677</text:p>
          </table:table-cell>
          <table:table-cell office:value-type="float" office:value="0.3833081678596528" table:style-name="c11">
            <text:p>+0.4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6:00</text:p>
          </table:table-cell>
          <table:table-cell office:value-type="float" office:value="86.66331" table:style-name="c9">
            <text:p>86.663</text:p>
          </table:table-cell>
          <table:table-cell office:value-type="string" table:style-name="c9">
            <text:p>2026-04-16 16:30</text:p>
          </table:table-cell>
          <table:table-cell office:value-type="float" office:value="86.586685" table:style-name="c9">
            <text:p>86.587</text:p>
          </table:table-cell>
          <table:table-cell office:value-type="float" office:value="-0.2881401406373607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9:00</text:p>
          </table:table-cell>
          <table:table-cell office:value-type="float" office:value="89.054505" table:style-name="c9">
            <text:p>89.055</text:p>
          </table:table-cell>
          <table:table-cell office:value-type="string" table:style-name="c9">
            <text:p>2026-04-16 19:30</text:p>
          </table:table-cell>
          <table:table-cell office:value-type="float" office:value="89.145405" table:style-name="c9">
            <text:p>89.145</text:p>
          </table:table-cell>
          <table:table-cell office:value-type="float" office:value="-0.09803172180341546" table:style-name="c10">
            <text:p>-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9:00</text:p>
          </table:table-cell>
          <table:table-cell office:value-type="float" office:value="88.98446999999999" table:style-name="c9">
            <text:p>88.984</text:p>
          </table:table-cell>
          <table:table-cell office:value-type="string" table:style-name="c9">
            <text:p>2026-04-17 09:30</text:p>
          </table:table-cell>
          <table:table-cell office:value-type="float" office:value="89.39528" table:style-name="c9">
            <text:p>89.395</text:p>
          </table:table-cell>
          <table:table-cell office:value-type="float" office:value="0.2608419595913958" table:style-name="c11">
            <text:p>+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45</text:p>
          </table:table-cell>
          <table:table-cell office:value-type="float" office:value="89.854905" table:style-name="c9">
            <text:p>89.855</text:p>
          </table:table-cell>
          <table:table-cell office:value-type="string" table:style-name="c9">
            <text:p>2026-04-17 14:15</text:p>
          </table:table-cell>
          <table:table-cell office:value-type="float" office:value="89.73511" table:style-name="c9">
            <text:p>89.735</text:p>
          </table:table-cell>
          <table:table-cell office:value-type="float" office:value="-0.33295398274584276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2:30</text:p>
          </table:table-cell>
          <table:table-cell office:value-type="float" office:value="87.29362499999999" table:style-name="c9">
            <text:p>87.294</text:p>
          </table:table-cell>
          <table:table-cell office:value-type="string" table:style-name="c9">
            <text:p>2026-04-22 03:00</text:p>
          </table:table-cell>
          <table:table-cell office:value-type="float" office:value="87.37629000000001" table:style-name="c9">
            <text:p>87.376</text:p>
          </table:table-cell>
          <table:table-cell office:value-type="float" office:value="-0.10539166372112163" table:style-name="c10">
            <text:p>-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3:15</text:p>
          </table:table-cell>
          <table:table-cell office:value-type="float" office:value="87.64379999999998" table:style-name="c9">
            <text:p>87.644</text:p>
          </table:table-cell>
          <table:table-cell office:value-type="string" table:style-name="c9">
            <text:p>2026-04-22 03:45</text:p>
          </table:table-cell>
          <table:table-cell office:value-type="float" office:value="87.25635" table:style-name="c9">
            <text:p>87.256</text:p>
          </table:table-cell>
          <table:table-cell office:value-type="float" office:value="-0.6410897789118963" table:style-name="c10">
            <text:p>-0.6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88.08402" table:style-name="c9">
            <text:p>88.084</text:p>
          </table:table-cell>
          <table:table-cell office:value-type="string" table:style-name="c9">
            <text:p>2026-04-22 06:00</text:p>
          </table:table-cell>
          <table:table-cell office:value-type="float" office:value="87.97599" table:style-name="c9">
            <text:p>87.976</text:p>
          </table:table-cell>
          <table:table-cell office:value-type="float" office:value="-0.32229910034760056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9:15</text:p>
          </table:table-cell>
          <table:table-cell office:value-type="float" office:value="88.4442" table:style-name="c9">
            <text:p>88.444</text:p>
          </table:table-cell>
          <table:table-cell office:value-type="string" table:style-name="c9">
            <text:p>2026-04-22 09:45</text:p>
          </table:table-cell>
          <table:table-cell office:value-type="float" office:value="88.41577" table:style-name="c9">
            <text:p>88.416</text:p>
          </table:table-cell>
          <table:table-cell office:value-type="float" office:value="-0.2319803042257318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3:45</text:p>
          </table:table-cell>
          <table:table-cell office:value-type="float" office:value="89.02449" table:style-name="c9">
            <text:p>89.024</text:p>
          </table:table-cell>
          <table:table-cell office:value-type="string" table:style-name="c9">
            <text:p>2026-04-22 14:15</text:p>
          </table:table-cell>
          <table:table-cell office:value-type="float" office:value="89.25535" table:style-name="c9">
            <text:p>89.255</text:p>
          </table:table-cell>
          <table:table-cell office:value-type="float" office:value="0.0589035167177121" table:style-name="c11">
            <text:p>+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21:45</text:p>
          </table:table-cell>
          <table:table-cell office:value-type="float" office:value="84.68231999999999" table:style-name="c9">
            <text:p>84.682</text:p>
          </table:table-cell>
          <table:table-cell office:value-type="string" table:style-name="c9">
            <text:p>2026-05-02 22:15</text:p>
          </table:table-cell>
          <table:table-cell office:value-type="float" office:value="84.38778500000001" table:style-name="c9">
            <text:p>84.388</text:p>
          </table:table-cell>
          <table:table-cell office:value-type="float" office:value="-0.547016404622569" table:style-name="c10">
            <text:p>-0.5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07:45</text:p>
          </table:table-cell>
          <table:table-cell office:value-type="float" office:value="83.98196999999999" table:style-name="c9">
            <text:p>83.982</text:p>
          </table:table-cell>
          <table:table-cell office:value-type="string" table:style-name="c9">
            <text:p>2026-05-03 08:15</text:p>
          </table:table-cell>
          <table:table-cell office:value-type="float" office:value="83.93801" table:style-name="c9">
            <text:p>83.938</text:p>
          </table:table-cell>
          <table:table-cell office:value-type="float" office:value="-0.25213993192821915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22:15</text:p>
          </table:table-cell>
          <table:table-cell office:value-type="float" office:value="84.79237499999999" table:style-name="c9">
            <text:p>84.792</text:p>
          </table:table-cell>
          <table:table-cell office:value-type="string" table:style-name="c9">
            <text:p>2026-05-03 22:45</text:p>
          </table:table-cell>
          <table:table-cell office:value-type="float" office:value="84.69763" table:style-name="c9">
            <text:p>84.698</text:p>
          </table:table-cell>
          <table:table-cell office:value-type="float" office:value="-0.3114142779583551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00</text:p>
          </table:table-cell>
          <table:table-cell office:value-type="float" office:value="84.81238499999999" table:style-name="c9">
            <text:p>84.812</text:p>
          </table:table-cell>
          <table:table-cell office:value-type="string" table:style-name="c9">
            <text:p>2026-05-04 02:30</text:p>
          </table:table-cell>
          <table:table-cell office:value-type="float" office:value="85.007475" table:style-name="c9">
            <text:p>85.007</text:p>
          </table:table-cell>
          <table:table-cell office:value-type="float" office:value="0.029665546458823577" table:style-name="c11">
            <text:p>+0.0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45</text:p>
          </table:table-cell>
          <table:table-cell office:value-type="float" office:value="85.552755" table:style-name="c9">
            <text:p>85.553</text:p>
          </table:table-cell>
          <table:table-cell office:value-type="string" table:style-name="c9">
            <text:p>2026-05-04 03:15</text:p>
          </table:table-cell>
          <table:table-cell office:value-type="float" office:value="85.527215" table:style-name="c9">
            <text:p>85.527</text:p>
          </table:table-cell>
          <table:table-cell office:value-type="float" office:value="-0.22969324925306012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00</text:p>
          </table:table-cell>
          <table:table-cell office:value-type="float" office:value="85.032495" table:style-name="c9">
            <text:p>85.032</text:p>
          </table:table-cell>
          <table:table-cell office:value-type="string" table:style-name="c9">
            <text:p>2026-05-04 15:30</text:p>
          </table:table-cell>
          <table:table-cell office:value-type="float" office:value="84.43776000000001" table:style-name="c9">
            <text:p>84.438</text:p>
          </table:table-cell>
          <table:table-cell office:value-type="float" office:value="-0.8979227085362917" table:style-name="c10">
            <text:p>-0.9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3:15</text:p>
          </table:table-cell>
          <table:table-cell office:value-type="float" office:value="85.94295" table:style-name="c9">
            <text:p>85.943</text:p>
          </table:table-cell>
          <table:table-cell office:value-type="string" table:style-name="c9">
            <text:p>2026-05-05 13:45</text:p>
          </table:table-cell>
          <table:table-cell office:value-type="float" office:value="85.507225" table:style-name="c9">
            <text:p>85.507</text:p>
          </table:table-cell>
          <table:table-cell office:value-type="float" office:value="-0.7058798223414375" table:style-name="c10">
            <text:p>-0.7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9:45</text:p>
          </table:table-cell>
          <table:table-cell office:value-type="float" office:value="86.52324" table:style-name="c9">
            <text:p>86.523</text:p>
          </table:table-cell>
          <table:table-cell office:value-type="string" table:style-name="c9">
            <text:p>2026-05-05 20:15</text:p>
          </table:table-cell>
          <table:table-cell office:value-type="float" office:value="86.68663500000001" table:style-name="c9">
            <text:p>86.687</text:p>
          </table:table-cell>
          <table:table-cell office:value-type="float" office:value="-0.011432284973367235" table:style-name="c10">
            <text:p>-0.0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3:30</text:p>
          </table:table-cell>
          <table:table-cell office:value-type="float" office:value="87.26361" table:style-name="c9">
            <text:p>87.264</text:p>
          </table:table-cell>
          <table:table-cell office:value-type="string" table:style-name="c9">
            <text:p>2026-05-06 04:00</text:p>
          </table:table-cell>
          <table:table-cell office:value-type="float" office:value="87.29633000000001" table:style-name="c9">
            <text:p>87.296</text:p>
          </table:table-cell>
          <table:table-cell office:value-type="float" office:value="-0.16247936988854628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4:15</text:p>
          </table:table-cell>
          <table:table-cell office:value-type="float" office:value="87.353655" table:style-name="c9">
            <text:p>87.354</text:p>
          </table:table-cell>
          <table:table-cell office:value-type="string" table:style-name="c9">
            <text:p>2026-05-06 04:45</text:p>
          </table:table-cell>
          <table:table-cell office:value-type="float" office:value="86.906525" table:style-name="c9">
            <text:p>86.907</text:p>
          </table:table-cell>
          <table:table-cell office:value-type="float" office:value="-0.710738598716909" table:style-name="c10">
            <text:p>-0.7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00</text:p>
          </table:table-cell>
          <table:table-cell office:value-type="float" office:value="89.06450999999998" table:style-name="c9">
            <text:p>89.065</text:p>
          </table:table-cell>
          <table:table-cell office:value-type="string" table:style-name="c9">
            <text:p>2026-05-06 09:30</text:p>
          </table:table-cell>
          <table:table-cell office:value-type="float" office:value="88.77559" table:style-name="c9">
            <text:p>88.776</text:p>
          </table:table-cell>
          <table:table-cell office:value-type="float" office:value="-0.5236456186757166" table:style-name="c10">
            <text:p>-0.5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45</text:p>
          </table:table-cell>
          <table:table-cell office:value-type="float" office:value="89.294625" table:style-name="c9">
            <text:p>89.295</text:p>
          </table:table-cell>
          <table:table-cell office:value-type="string" table:style-name="c9">
            <text:p>2026-05-06 10:15</text:p>
          </table:table-cell>
          <table:table-cell office:value-type="float" office:value="89.47524" table:style-name="c9">
            <text:p>89.475</text:p>
          </table:table-cell>
          <table:table-cell office:value-type="float" office:value="0.00196427863379256" table:style-name="c11">
            <text:p>+0.0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6:45</text:p>
          </table:table-cell>
          <table:table-cell office:value-type="float" office:value="89.28461999999999" table:style-name="c9">
            <text:p>89.285</text:p>
          </table:table-cell>
          <table:table-cell office:value-type="string" table:style-name="c9">
            <text:p>2026-05-06 17:15</text:p>
          </table:table-cell>
          <table:table-cell office:value-type="float" office:value="89.18538500000001" table:style-name="c9">
            <text:p>89.185</text:p>
          </table:table-cell>
          <table:table-cell office:value-type="float" office:value="-0.3108223842079205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7:45</text:p>
          </table:table-cell>
          <table:table-cell office:value-type="float" office:value="90.23509499999999" table:style-name="c9">
            <text:p>90.235</text:p>
          </table:table-cell>
          <table:table-cell office:value-type="string" table:style-name="c9">
            <text:p>2026-05-07 08:15</text:p>
          </table:table-cell>
          <table:table-cell office:value-type="float" office:value="90.10492500000001" table:style-name="c9">
            <text:p>90.105</text:p>
          </table:table-cell>
          <table:table-cell office:value-type="float" office:value="-0.34386814251703424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7:30</text:p>
          </table:table-cell>
          <table:table-cell office:value-type="float" office:value="90.36515999999999" table:style-name="c9">
            <text:p>90.365</text:p>
          </table:table-cell>
          <table:table-cell office:value-type="string" table:style-name="c9">
            <text:p>2026-05-08 18:00</text:p>
          </table:table-cell>
          <table:table-cell office:value-type="float" office:value="91.61417" table:style-name="c9">
            <text:p>91.614</text:p>
          </table:table-cell>
          <table:table-cell office:value-type="float" office:value="1.1795179405093892" table:style-name="c11">
            <text:p>+1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45</text:p>
          </table:table-cell>
          <table:table-cell office:value-type="float" office:value="93.236595" table:style-name="c9">
            <text:p>93.237</text:p>
          </table:table-cell>
          <table:table-cell office:value-type="string" table:style-name="c9">
            <text:p>2026-05-09 02:15</text:p>
          </table:table-cell>
          <table:table-cell office:value-type="float" office:value="93.53321" table:style-name="c9">
            <text:p>93.533</text:p>
          </table:table-cell>
          <table:table-cell office:value-type="float" office:value="0.1175955784421312" table:style-name="c11">
            <text:p>+0.1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9:15</text:p>
          </table:table-cell>
          <table:table-cell office:value-type="float" office:value="94.517235" table:style-name="c9">
            <text:p>94.517</text:p>
          </table:table-cell>
          <table:table-cell office:value-type="string" table:style-name="c9">
            <text:p>2026-05-10 09:45</text:p>
          </table:table-cell>
          <table:table-cell office:value-type="float" office:value="94.26284500000001" table:style-name="c9">
            <text:p>94.263</text:p>
          </table:table-cell>
          <table:table-cell office:value-type="float" office:value="-0.4685086557546847" table:style-name="c10">
            <text:p>-0.5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7:15</text:p>
          </table:table-cell>
          <table:table-cell office:value-type="float" office:value="95.26760999999999" table:style-name="c9">
            <text:p>95.268</text:p>
          </table:table-cell>
          <table:table-cell office:value-type="string" table:style-name="c9">
            <text:p>2026-05-10 17:45</text:p>
          </table:table-cell>
          <table:table-cell office:value-type="float" office:value="95.90202500000001" table:style-name="c9">
            <text:p>95.902</text:p>
          </table:table-cell>
          <table:table-cell office:value-type="float" office:value="0.4646981823360763" table:style-name="c11">
            <text:p>+0.5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23:00</text:p>
          </table:table-cell>
          <table:table-cell office:value-type="float" office:value="96.28811999999999" table:style-name="c9">
            <text:p>96.288</text:p>
          </table:table-cell>
          <table:table-cell office:value-type="string" table:style-name="c9">
            <text:p>2026-05-10 23:30</text:p>
          </table:table-cell>
          <table:table-cell office:value-type="float" office:value="96.29183" table:style-name="c9">
            <text:p>96.292</text:p>
          </table:table-cell>
          <table:table-cell office:value-type="float" office:value="-0.19605468272718696" table:style-name="c10">
            <text:p>-0.2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15:30</text:p>
          </table:table-cell>
          <table:table-cell office:value-type="float" office:value="96.26811" table:style-name="c9">
            <text:p>96.268</text:p>
          </table:table-cell>
          <table:table-cell office:value-type="string" table:style-name="c9">
            <text:p>2026-05-11 16:00</text:p>
          </table:table-cell>
          <table:table-cell office:value-type="float" office:value="96.741605" table:style-name="c9">
            <text:p>96.742</text:p>
          </table:table-cell>
          <table:table-cell office:value-type="float" office:value="0.29096710385714264" table:style-name="c11">
            <text:p>+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16:15</text:p>
          </table:table-cell>
          <table:table-cell office:value-type="float" office:value="97.998975" table:style-name="c9">
            <text:p>97.999</text:p>
          </table:table-cell>
          <table:table-cell office:value-type="string" table:style-name="c9">
            <text:p>2026-05-11 16:45</text:p>
          </table:table-cell>
          <table:table-cell office:value-type="float" office:value="97.25135" table:style-name="c9">
            <text:p>97.251</text:p>
          </table:table-cell>
          <table:table-cell office:value-type="float" office:value="-0.9612656139005527" table:style-name="c10">
            <text:p>-1.0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20:00</text:p>
          </table:table-cell>
          <table:table-cell office:value-type="float" office:value="98.23909499999999" table:style-name="c9">
            <text:p>98.239</text:p>
          </table:table-cell>
          <table:table-cell office:value-type="string" table:style-name="c9">
            <text:p>2026-05-11 20:30</text:p>
          </table:table-cell>
          <table:table-cell office:value-type="float" office:value="97.76109500000001" table:style-name="c9">
            <text:p>97.761</text:p>
          </table:table-cell>
          <table:table-cell office:value-type="float" office:value="-0.6854953508122152" table:style-name="c10">
            <text:p>-0.7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2 20:00</text:p>
          </table:table-cell>
          <table:table-cell office:value-type="float" office:value="94.96746" table:style-name="c9">
            <text:p>94.967</text:p>
          </table:table-cell>
          <table:table-cell office:value-type="string" table:style-name="c9">
            <text:p>2026-05-12 20:30</text:p>
          </table:table-cell>
          <table:table-cell office:value-type="float" office:value="94.90252500000001" table:style-name="c9">
            <text:p>94.903</text:p>
          </table:table-cell>
          <table:table-cell office:value-type="float" office:value="-0.2681393684478728" table:style-name="c10">
            <text:p>-0.3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17:00</text:p>
          </table:table-cell>
          <table:table-cell office:value-type="float" office:value="86.533245" table:style-name="c9">
            <text:p>86.533</text:p>
          </table:table-cell>
          <table:table-cell office:value-type="string" table:style-name="c9">
            <text:p>2026-05-20 17:30</text:p>
          </table:table-cell>
          <table:table-cell office:value-type="float" office:value="86.74660500000002" table:style-name="c9">
            <text:p>86.747</text:p>
          </table:table-cell>
          <table:table-cell office:value-type="float" office:value="0.04617131439486055" table:style-name="c11">
            <text:p>+0.0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8:30</text:p>
          </table:table-cell>
          <table:table-cell office:value-type="float" office:value="87.09352499999999" table:style-name="c9">
            <text:p>87.094</text:p>
          </table:table-cell>
          <table:table-cell office:value-type="string" table:style-name="c9">
            <text:p>2026-05-21 09:00</text:p>
          </table:table-cell>
          <table:table-cell office:value-type="float" office:value="86.81657" table:style-name="c9">
            <text:p>86.817</text:p>
          </table:table-cell>
          <table:table-cell office:value-type="float" office:value="-0.517261556964177" table:style-name="c10">
            <text:p>-0.5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5:30</text:p>
          </table:table-cell>
          <table:table-cell office:value-type="float" office:value="86.86340999999999" table:style-name="c9">
            <text:p>86.863</text:p>
          </table:table-cell>
          <table:table-cell office:value-type="string" table:style-name="c9">
            <text:p>2026-05-21 16:00</text:p>
          </table:table-cell>
          <table:table-cell office:value-type="float" office:value="86.41677" table:style-name="c9">
            <text:p>86.417</text:p>
          </table:table-cell>
          <table:table-cell office:value-type="float" office:value="-0.7130587243005748" table:style-name="c10">
            <text:p>-0.7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30</text:p>
          </table:table-cell>
          <table:table-cell office:value-type="float" office:value="87.853905" table:style-name="c9">
            <text:p>87.854</text:p>
          </table:table-cell>
          <table:table-cell office:value-type="string" table:style-name="c9">
            <text:p>2026-05-21 18:00</text:p>
          </table:table-cell>
          <table:table-cell office:value-type="float" office:value="87.54620500000001" table:style-name="c9">
            <text:p>87.546</text:p>
          </table:table-cell>
          <table:table-cell office:value-type="float" office:value="-0.5494404190627411" table:style-name="c10">
            <text:p>-0.5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4 06:00</text:p>
          </table:table-cell>
          <table:table-cell office:value-type="float" office:value="86.20307999999999" table:style-name="c9">
            <text:p>86.203</text:p>
          </table:table-cell>
          <table:table-cell office:value-type="string" table:style-name="c9">
            <text:p>2026-05-24 06:30</text:p>
          </table:table-cell>
          <table:table-cell office:value-type="float" office:value="85.91702" table:style-name="c9">
            <text:p>85.917</text:p>
          </table:table-cell>
          <table:table-cell office:value-type="float" office:value="-0.5310809346719347" table:style-name="c10">
            <text:p>-0.5</text:p>
          </table:table-cell>
        </table:table-row>
        <table:table-row>
          <table:table-cell office:value-type="string" table:style-name="c8">
            <text:p>SOL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4 07:00</text:p>
          </table:table-cell>
          <table:table-cell office:value-type="float" office:value="86.50322999999999" table:style-name="c9">
            <text:p>86.503</text:p>
          </table:table-cell>
          <table:table-cell office:value-type="string" table:style-name="c9">
            <text:p>2026-05-24 07:30</text:p>
          </table:table-cell>
          <table:table-cell office:value-type="float" office:value="86.17689" table:style-name="c9">
            <text:p>86.177</text:p>
          </table:table-cell>
          <table:table-cell office:value-type="float" office:value="-0.5764034511890226" table:style-name="c10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0.9312653999999999" table:style-name="c1">
            <text:p>0.93127</text:p>
          </table:table-cell>
          <table:table-cell office:value-type="string" table:style-name="c1">
            <text:p>2026-03-09 14:15</text:p>
          </table:table-cell>
          <table:table-cell office:value-type="float" office:value="0.9230382500000001" table:style-name="c1">
            <text:p>0.92304</text:p>
          </table:table-cell>
          <table:table-cell office:value-type="float" office:value="-1.081571747618859" table:style-name="c12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30</text:p>
          </table:table-cell>
          <table:table-cell office:value-type="float" office:value="0.9300647999999999" table:style-name="c1">
            <text:p>0.93006</text:p>
          </table:table-cell>
          <table:table-cell office:value-type="string" table:style-name="c1">
            <text:p>2026-03-09 15:00</text:p>
          </table:table-cell>
          <table:table-cell office:value-type="float" office:value="0.9293351" table:style-name="c1">
            <text:p>0.92934</text:p>
          </table:table-cell>
          <table:table-cell office:value-type="float" office:value="-0.2782000635762172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7:30</text:p>
          </table:table-cell>
          <table:table-cell office:value-type="float" office:value="0.9392693999999999" table:style-name="c1">
            <text:p>0.93927</text:p>
          </table:table-cell>
          <table:table-cell office:value-type="string" table:style-name="c1">
            <text:p>2026-03-09 18:00</text:p>
          </table:table-cell>
          <table:table-cell office:value-type="float" office:value="0.9339328" table:style-name="c1">
            <text:p>0.93393</text:p>
          </table:table-cell>
          <table:table-cell office:value-type="float" office:value="-0.7669292395983351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9839917499999999" table:style-name="c1">
            <text:p>0.98399</text:p>
          </table:table-cell>
          <table:table-cell office:value-type="string" table:style-name="c1">
            <text:p>2026-03-09 20:00</text:p>
          </table:table-cell>
          <table:table-cell office:value-type="float" office:value="0.9717139" table:style-name="c1">
            <text:p>0.97171</text:p>
          </table:table-cell>
          <table:table-cell office:value-type="float" office:value="-1.4451651740068017" table:style-name="c12">
            <text:p>-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2:45</text:p>
          </table:table-cell>
          <table:table-cell office:value-type="float" office:value="0.9598797" table:style-name="c1">
            <text:p>0.95988</text:p>
          </table:table-cell>
          <table:table-cell office:value-type="string" table:style-name="c1">
            <text:p>2026-03-10 03:15</text:p>
          </table:table-cell>
          <table:table-cell office:value-type="float" office:value="0.9528233500000001" table:style-name="c1">
            <text:p>0.95282</text:p>
          </table:table-cell>
          <table:table-cell office:value-type="float" office:value="-0.9335590571037167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0041018" table:style-name="c1">
            <text:p>1.0041</text:p>
          </table:table-cell>
          <table:table-cell office:value-type="string" table:style-name="c1">
            <text:p>2026-03-10 15:30</text:p>
          </table:table-cell>
          <table:table-cell office:value-type="float" office:value="0.9940027500000002" table:style-name="c1">
            <text:p>0.994</text:p>
          </table:table-cell>
          <table:table-cell office:value-type="float" office:value="-1.2036689404649747" table:style-name="c12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0:45</text:p>
          </table:table-cell>
          <table:table-cell office:value-type="float" office:value="0.9578787" table:style-name="c1">
            <text:p>0.95788</text:p>
          </table:table-cell>
          <table:table-cell office:value-type="string" table:style-name="c1">
            <text:p>2026-03-11 11:15</text:p>
          </table:table-cell>
          <table:table-cell office:value-type="float" office:value="0.95562195" table:style-name="c1">
            <text:p>0.95562</text:p>
          </table:table-cell>
          <table:table-cell office:value-type="float" office:value="-0.43502776270626375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30</text:p>
          </table:table-cell>
          <table:table-cell office:value-type="float" office:value="0.9759877499999999" table:style-name="c1">
            <text:p>0.97599</text:p>
          </table:table-cell>
          <table:table-cell office:value-type="string" table:style-name="c1">
            <text:p>2026-03-11 14:00</text:p>
          </table:table-cell>
          <table:table-cell office:value-type="float" office:value="0.9712141500000001" table:style-name="c1">
            <text:p>0.97121</text:p>
          </table:table-cell>
          <table:table-cell office:value-type="float" office:value="-0.688026779624018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98419185" table:style-name="c1">
            <text:p>0.98419</text:p>
          </table:table-cell>
          <table:table-cell office:value-type="string" table:style-name="c1">
            <text:p>2026-03-11 17:45</text:p>
          </table:table-cell>
          <table:table-cell office:value-type="float" office:value="0.98180885" table:style-name="c1">
            <text:p>0.98181</text:p>
          </table:table-cell>
          <table:table-cell office:value-type="float" office:value="-0.44154357619911044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00</text:p>
          </table:table-cell>
          <table:table-cell office:value-type="float" office:value="0.9918956999999999" table:style-name="c1">
            <text:p>0.9919</text:p>
          </table:table-cell>
          <table:table-cell office:value-type="string" table:style-name="c1">
            <text:p>2026-03-11 19:30</text:p>
          </table:table-cell>
          <table:table-cell office:value-type="float" office:value="0.9939028" table:style-name="c1">
            <text:p>0.9939</text:p>
          </table:table-cell>
          <table:table-cell office:value-type="float" office:value="0.0020454068709208073" table:style-name="c13">
            <text:p>+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7:45</text:p>
          </table:table-cell>
          <table:table-cell office:value-type="float" office:value="0.97738845" table:style-name="c1">
            <text:p>0.97739</text:p>
          </table:table-cell>
          <table:table-cell office:value-type="string" table:style-name="c1">
            <text:p>2026-03-12 08:15</text:p>
          </table:table-cell>
          <table:table-cell office:value-type="float" office:value="0.9773111000000001" table:style-name="c1">
            <text:p>0.97731</text:p>
          </table:table-cell>
          <table:table-cell office:value-type="float" office:value="-0.20779812661996244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2:30</text:p>
          </table:table-cell>
          <table:table-cell office:value-type="float" office:value="0.9857926499999999" table:style-name="c1">
            <text:p>0.98579</text:p>
          </table:table-cell>
          <table:table-cell office:value-type="string" table:style-name="c1">
            <text:p>2026-03-12 13:00</text:p>
          </table:table-cell>
          <table:table-cell office:value-type="float" office:value="0.987506" table:style-name="c1">
            <text:p>0.98751</text:p>
          </table:table-cell>
          <table:table-cell office:value-type="float" office:value="-0.026443136292397806" table:style-name="c12">
            <text:p>-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15</text:p>
          </table:table-cell>
          <table:table-cell office:value-type="float" office:value="0.9990993" table:style-name="c1">
            <text:p>0.9991</text:p>
          </table:table-cell>
          <table:table-cell office:value-type="string" table:style-name="c1">
            <text:p>2026-03-13 00:45</text:p>
          </table:table-cell>
          <table:table-cell office:value-type="float" office:value="1.0086954000000001" table:style-name="c1">
            <text:p>1.0087</text:p>
          </table:table-cell>
          <table:table-cell office:value-type="float" office:value="0.7586551101977701" table:style-name="c13">
            <text:p>+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5:30</text:p>
          </table:table-cell>
          <table:table-cell office:value-type="float" office:value="1.0397195999999997" table:style-name="c1">
            <text:p>1.0397</text:p>
          </table:table-cell>
          <table:table-cell office:value-type="string" table:style-name="c1">
            <text:p>2026-03-13 06:00</text:p>
          </table:table-cell>
          <table:table-cell office:value-type="float" office:value="1.03598175" table:style-name="c1">
            <text:p>1.036</text:p>
          </table:table-cell>
          <table:table-cell office:value-type="float" office:value="-0.5586869304233466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00</text:p>
          </table:table-cell>
          <table:table-cell office:value-type="float" office:value="1.04742345" table:style-name="c1">
            <text:p>1.0474</text:p>
          </table:table-cell>
          <table:table-cell office:value-type="string" table:style-name="c1">
            <text:p>2026-03-13 10:30</text:p>
          </table:table-cell>
          <table:table-cell office:value-type="float" office:value="1.0442776" table:style-name="c1">
            <text:p>1.0443</text:p>
          </table:table-cell>
          <table:table-cell office:value-type="float" office:value="-0.4996413744985384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1.02461205" table:style-name="c1">
            <text:p>1.0246</text:p>
          </table:table-cell>
          <table:table-cell office:value-type="string" table:style-name="c1">
            <text:p>2026-03-15 23:15</text:p>
          </table:table-cell>
          <table:table-cell office:value-type="float" office:value="1.0246874" table:style-name="c1">
            <text:p>1.0247</text:p>
          </table:table-cell>
          <table:table-cell office:value-type="float" office:value="-0.19256069773923024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1.0317155999999998" table:style-name="c1">
            <text:p>1.0317</text:p>
          </table:table-cell>
          <table:table-cell office:value-type="string" table:style-name="c1">
            <text:p>2026-03-16 04:00</text:p>
          </table:table-cell>
          <table:table-cell office:value-type="float" office:value="1.0406794" table:style-name="c1">
            <text:p>1.0407</text:p>
          </table:table-cell>
          <table:table-cell office:value-type="float" office:value="0.667187922660073" table:style-name="c13">
            <text:p>+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.0811403" table:style-name="c1">
            <text:p>1.0811</text:p>
          </table:table-cell>
          <table:table-cell office:value-type="string" table:style-name="c1">
            <text:p>2026-03-17 00:45</text:p>
          </table:table-cell>
          <table:table-cell office:value-type="float" office:value="1.0557718500000002" table:style-name="c1">
            <text:p>1.0558</text:p>
          </table:table-cell>
          <table:table-cell office:value-type="float" office:value="-2.5416625324344855" table:style-name="c12">
            <text:p>-2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5:15</text:p>
          </table:table-cell>
          <table:table-cell office:value-type="float" office:value="1.0479237000000001" table:style-name="c1">
            <text:p>1.0479</text:p>
          </table:table-cell>
          <table:table-cell office:value-type="string" table:style-name="c1">
            <text:p>2026-03-18 05:45</text:p>
          </table:table-cell>
          <table:table-cell office:value-type="float" office:value="1.0382806" table:style-name="c1">
            <text:p>1.0383</text:p>
          </table:table-cell>
          <table:table-cell office:value-type="float" office:value="-1.118270625943496" table:style-name="c12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15</text:p>
          </table:table-cell>
          <table:table-cell office:value-type="float" office:value="0.95297625" table:style-name="c1">
            <text:p>0.95298</text:p>
          </table:table-cell>
          <table:table-cell office:value-type="string" table:style-name="c1">
            <text:p>2026-03-24 07:45</text:p>
          </table:table-cell>
          <table:table-cell office:value-type="float" office:value="0.95102425" table:style-name="c1">
            <text:p>0.95102</text:p>
          </table:table-cell>
          <table:table-cell office:value-type="float" office:value="-0.40432250811600623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486741" table:style-name="c1">
            <text:p>0.94867</text:p>
          </table:table-cell>
          <table:table-cell office:value-type="string" table:style-name="c1">
            <text:p>2026-03-24 21:00</text:p>
          </table:table-cell>
          <table:table-cell office:value-type="float" office:value="0.9473261000000001" table:style-name="c1">
            <text:p>0.94733</text:p>
          </table:table-cell>
          <table:table-cell office:value-type="float" office:value="-0.3417090098591147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6:45</text:p>
          </table:table-cell>
          <table:table-cell office:value-type="float" office:value="0.96178065" table:style-name="c1">
            <text:p>0.96178</text:p>
          </table:table-cell>
          <table:table-cell office:value-type="string" table:style-name="c1">
            <text:p>2026-03-25 07:15</text:p>
          </table:table-cell>
          <table:table-cell office:value-type="float" office:value="0.9598198500000001" table:style-name="c1">
            <text:p>0.95982</text:p>
          </table:table-cell>
          <table:table-cell office:value-type="float" office:value="-0.403364309746701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30</text:p>
          </table:table-cell>
          <table:table-cell office:value-type="float" office:value="0.9696845999999999" table:style-name="c1">
            <text:p>0.96968</text:p>
          </table:table-cell>
          <table:table-cell office:value-type="string" table:style-name="c1">
            <text:p>2026-03-25 12:00</text:p>
          </table:table-cell>
          <table:table-cell office:value-type="float" office:value="0.9671162000000001" table:style-name="c1">
            <text:p>0.96712</text:p>
          </table:table-cell>
          <table:table-cell office:value-type="float" office:value="-0.46424015435532207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8886440999999999" table:style-name="c1">
            <text:p>0.88864</text:p>
          </table:table-cell>
          <table:table-cell office:value-type="string" table:style-name="c1">
            <text:p>2026-04-01 06:15</text:p>
          </table:table-cell>
          <table:table-cell office:value-type="float" office:value="0.8983506000000001" table:style-name="c1">
            <text:p>0.89835</text:p>
          </table:table-cell>
          <table:table-cell office:value-type="float" office:value="0.8901985790036981" table:style-name="c13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30</text:p>
          </table:table-cell>
          <table:table-cell office:value-type="float" office:value="0.8996495999999999" table:style-name="c1">
            <text:p>0.89965</text:p>
          </table:table-cell>
          <table:table-cell office:value-type="string" table:style-name="c1">
            <text:p>2026-04-01 07:00</text:p>
          </table:table-cell>
          <table:table-cell office:value-type="float" office:value="0.90104925" table:style-name="c1">
            <text:p>0.90105</text:p>
          </table:table-cell>
          <table:table-cell office:value-type="float" office:value="-0.04463376082753934" table:style-name="c12">
            <text:p>-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0:45</text:p>
          </table:table-cell>
          <table:table-cell office:value-type="float" office:value="0.8940467999999999" table:style-name="c1">
            <text:p>0.89405</text:p>
          </table:table-cell>
          <table:table-cell office:value-type="string" table:style-name="c1">
            <text:p>2026-04-02 01:15</text:p>
          </table:table-cell>
          <table:table-cell office:value-type="float" office:value="0.8867564" table:style-name="c1">
            <text:p>0.88676</text:p>
          </table:table-cell>
          <table:table-cell office:value-type="float" office:value="-1.013708235810451" table:style-name="c12">
            <text:p>-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4-06 10:00</text:p>
          </table:table-cell>
          <table:table-cell office:value-type="float" office:value="0.9001497" table:style-name="c1">
            <text:p>0.90015</text:p>
          </table:table-cell>
          <table:table-cell office:value-type="float" office:value="-0.23318332503747818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30</text:p>
          </table:table-cell>
          <table:table-cell office:value-type="float" office:value="0.9158576999999999" table:style-name="c1">
            <text:p>0.91586</text:p>
          </table:table-cell>
          <table:table-cell office:value-type="string" table:style-name="c1">
            <text:p>2026-04-06 11:00</text:p>
          </table:table-cell>
          <table:table-cell office:value-type="float" office:value="0.9094450500000001" table:style-name="c1">
            <text:p>0.90945</text:p>
          </table:table-cell>
          <table:table-cell office:value-type="float" office:value="-0.8986800738749912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89174565" table:style-name="c1">
            <text:p>0.89175</text:p>
          </table:table-cell>
          <table:table-cell office:value-type="string" table:style-name="c1">
            <text:p>2026-04-07 20:30</text:p>
          </table:table-cell>
          <table:table-cell office:value-type="float" office:value="0.89365295" table:style-name="c1">
            <text:p>0.89365</text:p>
          </table:table-cell>
          <table:table-cell office:value-type="float" office:value="0.013556304193906854" table:style-name="c13">
            <text:p>+0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0.9094544999999999" table:style-name="c1">
            <text:p>0.90945</text:p>
          </table:table-cell>
          <table:table-cell office:value-type="string" table:style-name="c1">
            <text:p>2026-04-07 21:45</text:p>
          </table:table-cell>
          <table:table-cell office:value-type="float" office:value="0.9083456000000001" table:style-name="c1">
            <text:p>0.90835</text:p>
          </table:table-cell>
          <table:table-cell office:value-type="float" office:value="-0.3215864954651315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9302649" table:style-name="c1">
            <text:p>0.93026</text:p>
          </table:table-cell>
          <table:table-cell office:value-type="string" table:style-name="c1">
            <text:p>2026-04-07 23:15</text:p>
          </table:table-cell>
          <table:table-cell office:value-type="float" office:value="0.95822065" table:style-name="c1">
            <text:p>0.95822</text:p>
          </table:table-cell>
          <table:table-cell office:value-type="float" office:value="2.7992313716931783" table:style-name="c13">
            <text:p>+2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30</text:p>
          </table:table-cell>
          <table:table-cell office:value-type="float" office:value="0.9764879999999999" table:style-name="c1">
            <text:p>0.97649</text:p>
          </table:table-cell>
          <table:table-cell office:value-type="string" table:style-name="c1">
            <text:p>2026-04-08 00:00</text:p>
          </table:table-cell>
          <table:table-cell office:value-type="float" office:value="0.9593201" table:style-name="c1">
            <text:p>0.95932</text:p>
          </table:table-cell>
          <table:table-cell office:value-type="float" office:value="-1.954512587958046" table:style-name="c12">
            <text:p>-2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0.9348672" table:style-name="c1">
            <text:p>0.93487</text:p>
          </table:table-cell>
          <table:table-cell office:value-type="string" table:style-name="c1">
            <text:p>2026-04-09 16:15</text:p>
          </table:table-cell>
          <table:table-cell office:value-type="float" office:value="0.93543205" table:style-name="c1">
            <text:p>0.93543</text:p>
          </table:table-cell>
          <table:table-cell office:value-type="float" office:value="-0.1396004339386358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30</text:p>
          </table:table-cell>
          <table:table-cell office:value-type="float" office:value="0.9340668" table:style-name="c1">
            <text:p>0.93407</text:p>
          </table:table-cell>
          <table:table-cell office:value-type="string" table:style-name="c1">
            <text:p>2026-04-09 17:00</text:p>
          </table:table-cell>
          <table:table-cell office:value-type="float" office:value="0.9319338" table:style-name="c1">
            <text:p>0.93193</text:p>
          </table:table-cell>
          <table:table-cell office:value-type="float" office:value="-0.42779977472702235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95597775" table:style-name="c1">
            <text:p>0.95598</text:p>
          </table:table-cell>
          <table:table-cell office:value-type="string" table:style-name="c1">
            <text:p>2026-04-09 23:00</text:p>
          </table:table-cell>
          <table:table-cell office:value-type="float" office:value="0.9379308000000001" table:style-name="c1">
            <text:p>0.93793</text:p>
          </table:table-cell>
          <table:table-cell office:value-type="float" office:value="-2.083926500297717" table:style-name="c12">
            <text:p>-2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6:15</text:p>
          </table:table-cell>
          <table:table-cell office:value-type="float" office:value="0.9447721499999999" table:style-name="c1">
            <text:p>0.94477</text:p>
          </table:table-cell>
          <table:table-cell office:value-type="string" table:style-name="c1">
            <text:p>2026-04-10 06:45</text:p>
          </table:table-cell>
          <table:table-cell office:value-type="float" office:value="0.93223365" table:style-name="c1">
            <text:p>0.93223</text:p>
          </table:table-cell>
          <table:table-cell office:value-type="float" office:value="-1.5243924226968297" table:style-name="c12">
            <text:p>-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09:45</text:p>
          </table:table-cell>
          <table:table-cell office:value-type="float" office:value="0.9376686" table:style-name="c1">
            <text:p>0.93767</text:p>
          </table:table-cell>
          <table:table-cell office:value-type="string" table:style-name="c1">
            <text:p>2026-04-10 10:15</text:p>
          </table:table-cell>
          <table:table-cell office:value-type="float" office:value="0.9343326000000001" table:style-name="c1">
            <text:p>0.93433</text:p>
          </table:table-cell>
          <table:table-cell office:value-type="float" office:value="-0.5549648209825842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0.9462729" table:style-name="c1">
            <text:p>0.94627</text:p>
          </table:table-cell>
          <table:table-cell office:value-type="string" table:style-name="c1">
            <text:p>2026-04-10 15:00</text:p>
          </table:table-cell>
          <table:table-cell office:value-type="float" office:value="0.9476259500000002" table:style-name="c1">
            <text:p>0.94763</text:p>
          </table:table-cell>
          <table:table-cell office:value-type="float" office:value="-0.05719853903135563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8:30</text:p>
          </table:table-cell>
          <table:table-cell office:value-type="float" office:value="0.95597775" table:style-name="c1">
            <text:p>0.95598</text:p>
          </table:table-cell>
          <table:table-cell office:value-type="string" table:style-name="c1">
            <text:p>2026-04-10 19:00</text:p>
          </table:table-cell>
          <table:table-cell office:value-type="float" office:value="0.9585205" table:style-name="c1">
            <text:p>0.95852</text:p>
          </table:table-cell>
          <table:table-cell office:value-type="float" office:value="0.06555252154143432" table:style-name="c13">
            <text:p>+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0.94697325" table:style-name="c1">
            <text:p>0.94697</text:p>
          </table:table-cell>
          <table:table-cell office:value-type="string" table:style-name="c1">
            <text:p>2026-04-11 17:30</text:p>
          </table:table-cell>
          <table:table-cell office:value-type="float" office:value="0.9436279500000001" table:style-name="c1">
            <text:p>0.94363</text:p>
          </table:table-cell>
          <table:table-cell office:value-type="float" office:value="-0.5524561831128705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0.9552773999999999" table:style-name="c1">
            <text:p>0.95528</text:p>
          </table:table-cell>
          <table:table-cell office:value-type="string" table:style-name="c1">
            <text:p>2026-04-11 19:15</text:p>
          </table:table-cell>
          <table:table-cell office:value-type="float" office:value="0.9563216" table:style-name="c1">
            <text:p>0.95632</text:p>
          </table:table-cell>
          <table:table-cell office:value-type="float" office:value="-0.09080994467156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9:45</text:p>
          </table:table-cell>
          <table:table-cell office:value-type="float" office:value="0.9620808" table:style-name="c1">
            <text:p>0.96208</text:p>
          </table:table-cell>
          <table:table-cell office:value-type="string" table:style-name="c1">
            <text:p>2026-04-11 20:15</text:p>
          </table:table-cell>
          <table:table-cell office:value-type="float" office:value="0.9608193500000001" table:style-name="c1">
            <text:p>0.96082</text:p>
          </table:table-cell>
          <table:table-cell office:value-type="float" office:value="-0.33075474332819876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0.9390692999999999" table:style-name="c1">
            <text:p>0.93907</text:p>
          </table:table-cell>
          <table:table-cell office:value-type="string" table:style-name="c1">
            <text:p>2026-04-13 22:45</text:p>
          </table:table-cell>
          <table:table-cell office:value-type="float" office:value="0.9563216" table:style-name="c1">
            <text:p>0.95632</text:p>
          </table:table-cell>
          <table:table-cell office:value-type="float" office:value="1.6335975546852621" table:style-name="c13">
            <text:p>+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0.9588791999999999" table:style-name="c1">
            <text:p>0.95888</text:p>
          </table:table-cell>
          <table:table-cell office:value-type="string" table:style-name="c1">
            <text:p>2026-04-14 00:00</text:p>
          </table:table-cell>
          <table:table-cell office:value-type="float" office:value="0.9593201" table:style-name="c1">
            <text:p>0.95932</text:p>
          </table:table-cell>
          <table:table-cell office:value-type="float" office:value="-0.15401114967348306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9610803" table:style-name="c1">
            <text:p>0.96108</text:p>
          </table:table-cell>
          <table:table-cell office:value-type="string" table:style-name="c1">
            <text:p>2026-04-14 14:30</text:p>
          </table:table-cell>
          <table:table-cell office:value-type="float" office:value="0.9580207500000001" table:style-name="c1">
            <text:p>0.95802</text:p>
          </table:table-cell>
          <table:table-cell office:value-type="float" office:value="-0.5176085160886079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9393694499999999" table:style-name="c1">
            <text:p>0.93937</text:p>
          </table:table-cell>
          <table:table-cell office:value-type="string" table:style-name="c1">
            <text:p>2026-04-15 00:45</text:p>
          </table:table-cell>
          <table:table-cell office:value-type="float" office:value="0.93743105" table:style-name="c1">
            <text:p>0.93743</text:p>
          </table:table-cell>
          <table:table-cell office:value-type="float" office:value="-0.40583868987329463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0.94577265" table:style-name="c1">
            <text:p>0.94577</text:p>
          </table:table-cell>
          <table:table-cell office:value-type="string" table:style-name="c1">
            <text:p>2026-04-15 12:30</text:p>
          </table:table-cell>
          <table:table-cell office:value-type="float" office:value="0.9467264000000001" table:style-name="c1">
            <text:p>0.94673</text:p>
          </table:table-cell>
          <table:table-cell office:value-type="float" office:value="-0.09925811172483145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45</text:p>
          </table:table-cell>
          <table:table-cell office:value-type="float" office:value="0.9513754499999999" table:style-name="c1">
            <text:p>0.95138</text:p>
          </table:table-cell>
          <table:table-cell office:value-type="string" table:style-name="c1">
            <text:p>2026-04-15 13:15</text:p>
          </table:table-cell>
          <table:table-cell office:value-type="float" office:value="0.94962495" table:style-name="c1">
            <text:p>0.94962</text:p>
          </table:table-cell>
          <table:table-cell office:value-type="float" office:value="-0.3835289501163741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9716855999999999" table:style-name="c1">
            <text:p>0.97169</text:p>
          </table:table-cell>
          <table:table-cell office:value-type="string" table:style-name="c1">
            <text:p>2026-04-15 20:15</text:p>
          </table:table-cell>
          <table:table-cell office:value-type="float" office:value="0.96501725" table:style-name="c1">
            <text:p>0.96502</text:p>
          </table:table-cell>
          <table:table-cell office:value-type="float" office:value="-0.8847943699844873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9721858499999999" table:style-name="c1">
            <text:p>0.97219</text:p>
          </table:table-cell>
          <table:table-cell office:value-type="string" table:style-name="c1">
            <text:p>2026-04-16 03:15</text:p>
          </table:table-cell>
          <table:table-cell office:value-type="float" office:value="0.9691152000000001" table:style-name="c1">
            <text:p>0.96912</text:p>
          </table:table-cell>
          <table:table-cell office:value-type="float" office:value="-0.515118717763674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45</text:p>
          </table:table-cell>
          <table:table-cell office:value-type="float" office:value="0.9732864" table:style-name="c1">
            <text:p>0.97329</text:p>
          </table:table-cell>
          <table:table-cell office:value-type="string" table:style-name="c1">
            <text:p>2026-04-16 04:15</text:p>
          </table:table-cell>
          <table:table-cell office:value-type="float" office:value="0.9784105500000001" table:style-name="c1">
            <text:p>0.97841</text:p>
          </table:table-cell>
          <table:table-cell office:value-type="float" office:value="0.32552672168748575" table:style-name="c13">
            <text:p>+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7:00</text:p>
          </table:table-cell>
          <table:table-cell office:value-type="float" office:value="0.9828912" table:style-name="c1">
            <text:p>0.98289</text:p>
          </table:table-cell>
          <table:table-cell office:value-type="string" table:style-name="c1">
            <text:p>2026-04-16 07:30</text:p>
          </table:table-cell>
          <table:table-cell office:value-type="float" office:value="0.9769113000000001" table:style-name="c1">
            <text:p>0.97691</text:p>
          </table:table-cell>
          <table:table-cell office:value-type="float" office:value="-0.8070827868537078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0.9904949999999999" table:style-name="c1">
            <text:p>0.99049</text:p>
          </table:table-cell>
          <table:table-cell office:value-type="string" table:style-name="c1">
            <text:p>2026-04-16 14:00</text:p>
          </table:table-cell>
          <table:table-cell office:value-type="float" office:value="0.9681157" table:style-name="c1">
            <text:p>0.96812</text:p>
          </table:table-cell>
          <table:table-cell office:value-type="float" office:value="-2.454789098814203" table:style-name="c12">
            <text:p>-2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9862928999999999" table:style-name="c1">
            <text:p>0.98629</text:p>
          </table:table-cell>
          <table:table-cell office:value-type="string" table:style-name="c1">
            <text:p>2026-04-17 07:45</text:p>
          </table:table-cell>
          <table:table-cell office:value-type="float" office:value="0.9941027000000001" table:style-name="c1">
            <text:p>0.9941</text:p>
          </table:table-cell>
          <table:table-cell office:value-type="float" office:value="0.5903508686618375" table:style-name="c13">
            <text:p>+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00</text:p>
          </table:table-cell>
          <table:table-cell office:value-type="float" office:value="0.99319635" table:style-name="c1">
            <text:p>0.9932</text:p>
          </table:table-cell>
          <table:table-cell office:value-type="string" table:style-name="c1">
            <text:p>2026-04-17 08:30</text:p>
          </table:table-cell>
          <table:table-cell office:value-type="float" office:value="0.99280335" table:style-name="c1">
            <text:p>0.9928</text:p>
          </table:table-cell>
          <table:table-cell office:value-type="float" office:value="-0.23939011622928774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9:00</text:p>
          </table:table-cell>
          <table:table-cell office:value-type="float" office:value="0.99999975" table:style-name="c1">
            <text:p>1</text:p>
          </table:table-cell>
          <table:table-cell office:value-type="string" table:style-name="c1">
            <text:p>2026-04-17 09:30</text:p>
          </table:table-cell>
          <table:table-cell office:value-type="float" office:value="1.00379785" table:style-name="c1">
            <text:p>1.0038</text:p>
          </table:table-cell>
          <table:table-cell office:value-type="float" office:value="0.1791508545727183" table:style-name="c13">
            <text:p>+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2:00</text:p>
          </table:table-cell>
          <table:table-cell office:value-type="float" office:value="1.00100025" table:style-name="c1">
            <text:p>1.001</text:p>
          </table:table-cell>
          <table:table-cell office:value-type="string" table:style-name="c1">
            <text:p>2026-04-17 12:30</text:p>
          </table:table-cell>
          <table:table-cell office:value-type="float" office:value="0.9996999000000001" table:style-name="c1">
            <text:p>0.9997</text:p>
          </table:table-cell>
          <table:table-cell office:value-type="float" office:value="-0.32954538224139185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1.0107051" table:style-name="c1">
            <text:p>1.0107</text:p>
          </table:table-cell>
          <table:table-cell office:value-type="string" table:style-name="c1">
            <text:p>2026-04-17 13:30</text:p>
          </table:table-cell>
          <table:table-cell office:value-type="float" office:value="1.0278858" table:style-name="c1">
            <text:p>1.0279</text:p>
          </table:table-cell>
          <table:table-cell office:value-type="float" office:value="1.4965746473229569" table:style-name="c13">
            <text:p>+1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1.03921935" table:style-name="c1">
            <text:p>1.0392</text:p>
          </table:table-cell>
          <table:table-cell office:value-type="string" table:style-name="c1">
            <text:p>2026-04-17 14:15</text:p>
          </table:table-cell>
          <table:table-cell office:value-type="float" office:value="1.03658145" table:style-name="c1">
            <text:p>1.0366</text:p>
          </table:table-cell>
          <table:table-cell office:value-type="float" office:value="-0.45322734979387214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742869" table:style-name="c1">
            <text:p>0.97429</text:p>
          </table:table-cell>
          <table:table-cell office:value-type="string" table:style-name="c1">
            <text:p>2026-04-22 06:00</text:p>
          </table:table-cell>
          <table:table-cell office:value-type="float" office:value="0.9682156500000001" table:style-name="c1">
            <text:p>0.96822</text:p>
          </table:table-cell>
          <table:table-cell office:value-type="float" office:value="-0.8218023956136244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92176065" table:style-name="c1">
            <text:p>0.92176</text:p>
          </table:table-cell>
          <table:table-cell office:value-type="string" table:style-name="c1">
            <text:p>2026-05-01 13:45</text:p>
          </table:table-cell>
          <table:table-cell office:value-type="float" office:value="0.9197399" table:style-name="c1">
            <text:p>0.91974</text:p>
          </table:table-cell>
          <table:table-cell office:value-type="float" office:value="-0.4186889579306685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0.9256626" table:style-name="c1">
            <text:p>0.92566</text:p>
          </table:table-cell>
          <table:table-cell office:value-type="string" table:style-name="c1">
            <text:p>2026-05-01 14:30</text:p>
          </table:table-cell>
          <table:table-cell office:value-type="float" office:value="0.9216389500000001" table:style-name="c1">
            <text:p>0.92164</text:p>
          </table:table-cell>
          <table:table-cell office:value-type="float" office:value="-0.633708897934282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9273634499999999" table:style-name="c1">
            <text:p>0.92736</text:p>
          </table:table-cell>
          <table:table-cell office:value-type="string" table:style-name="c1">
            <text:p>2026-05-02 16:30</text:p>
          </table:table-cell>
          <table:table-cell office:value-type="float" office:value="0.9248373500000001" table:style-name="c1">
            <text:p>0.92484</text:p>
          </table:table-cell>
          <table:table-cell office:value-type="float" office:value="-0.47175137888493257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28464" table:style-name="c1">
            <text:p>0.92846</text:p>
          </table:table-cell>
          <table:table-cell office:value-type="string" table:style-name="c1">
            <text:p>2026-05-03 22:45</text:p>
          </table:table-cell>
          <table:table-cell office:value-type="float" office:value="0.9279358000000001" table:style-name="c1">
            <text:p>0.92794</text:p>
          </table:table-cell>
          <table:table-cell office:value-type="float" office:value="-0.2566759361913751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308652" table:style-name="c1">
            <text:p>0.93087</text:p>
          </table:table-cell>
          <table:table-cell office:value-type="string" table:style-name="c1">
            <text:p>2026-05-04 02:30</text:p>
          </table:table-cell>
          <table:table-cell office:value-type="float" office:value="0.9349323" table:style-name="c1">
            <text:p>0.93493</text:p>
          </table:table-cell>
          <table:table-cell office:value-type="float" office:value="0.23614271242498042" table:style-name="c13">
            <text:p>+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3:15</text:p>
          </table:table-cell>
          <table:table-cell office:value-type="float" office:value="0.94077015" table:style-name="c1">
            <text:p>0.94077</text:p>
          </table:table-cell>
          <table:table-cell office:value-type="string" table:style-name="c1">
            <text:p>2026-05-04 03:45</text:p>
          </table:table-cell>
          <table:table-cell office:value-type="float" office:value="0.9370312500000001" table:style-name="c1">
            <text:p>0.93703</text:p>
          </table:table-cell>
          <table:table-cell office:value-type="float" office:value="-0.5965352396385071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0.9488742" table:style-name="c1">
            <text:p>0.94887</text:p>
          </table:table-cell>
          <table:table-cell office:value-type="string" table:style-name="c1">
            <text:p>2026-05-04 04:45</text:p>
          </table:table-cell>
          <table:table-cell office:value-type="float" office:value="0.9485255" table:style-name="c1">
            <text:p>0.94853</text:p>
          </table:table-cell>
          <table:table-cell office:value-type="float" office:value="-0.236575351558721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0.9546771" table:style-name="c1">
            <text:p>0.95468</text:p>
          </table:table-cell>
          <table:table-cell office:value-type="string" table:style-name="c1">
            <text:p>2026-05-05 11:15</text:p>
          </table:table-cell>
          <table:table-cell office:value-type="float" office:value="0.9527234000000001" table:style-name="c1">
            <text:p>0.95272</text:p>
          </table:table-cell>
          <table:table-cell office:value-type="float" office:value="-0.40413602427459283" table:style-name="c12">
            <text:p>-0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2:30</text:p>
          </table:table-cell>
          <table:table-cell office:value-type="float" office:value="0.9638817" table:style-name="c1">
            <text:p>0.96388</text:p>
          </table:table-cell>
          <table:table-cell office:value-type="string" table:style-name="c1">
            <text:p>2026-05-05 13:00</text:p>
          </table:table-cell>
          <table:table-cell office:value-type="float" office:value="0.97061445" table:style-name="c1">
            <text:p>0.97061</text:p>
          </table:table-cell>
          <table:table-cell office:value-type="float" office:value="0.4972074596343079" table:style-name="c13">
            <text:p>+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0.9812903999999999" table:style-name="c1">
            <text:p>0.98129</text:p>
          </table:table-cell>
          <table:table-cell office:value-type="string" table:style-name="c1">
            <text:p>2026-05-05 13:45</text:p>
          </table:table-cell>
          <table:table-cell office:value-type="float" office:value="0.975512" table:style-name="c1">
            <text:p>0.97551</text:p>
          </table:table-cell>
          <table:table-cell office:value-type="float" office:value="-0.7875801585340958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7:15</text:p>
          </table:table-cell>
          <table:table-cell office:value-type="float" office:value="0.99339645" table:style-name="c1">
            <text:p>0.9934</text:p>
          </table:table-cell>
          <table:table-cell office:value-type="string" table:style-name="c1">
            <text:p>2026-05-06 07:45</text:p>
          </table:table-cell>
          <table:table-cell office:value-type="float" office:value="0.9944025500000001" table:style-name="c1">
            <text:p>0.9944</text:p>
          </table:table-cell>
          <table:table-cell office:value-type="float" office:value="-0.09882365670320636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1.00240095" table:style-name="c1">
            <text:p>1.0024</text:p>
          </table:table-cell>
          <table:table-cell office:value-type="string" table:style-name="c1">
            <text:p>2026-05-06 09:00</text:p>
          </table:table-cell>
          <table:table-cell office:value-type="float" office:value="1.01299325" table:style-name="c1">
            <text:p>1.013</text:p>
          </table:table-cell>
          <table:table-cell office:value-type="float" office:value="0.8546806039290145" table:style-name="c13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1.0014004499999998" table:style-name="c1">
            <text:p>1.0014</text:p>
          </table:table-cell>
          <table:table-cell office:value-type="string" table:style-name="c1">
            <text:p>2026-05-06 22:15</text:p>
          </table:table-cell>
          <table:table-cell office:value-type="float" office:value="0.9956019500000001" table:style-name="c1">
            <text:p>0.9956</text:p>
          </table:table-cell>
          <table:table-cell office:value-type="float" office:value="-0.777781585583448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45</text:p>
          </table:table-cell>
          <table:table-cell office:value-type="float" office:value="0.9852924" table:style-name="c1">
            <text:p>0.98529</text:p>
          </table:table-cell>
          <table:table-cell office:value-type="string" table:style-name="c1">
            <text:p>2026-05-07 06:15</text:p>
          </table:table-cell>
          <table:table-cell office:value-type="float" office:value="0.97881035" table:style-name="c1">
            <text:p>0.97881</text:p>
          </table:table-cell>
          <table:table-cell office:value-type="float" office:value="-0.8564657445495283" table:style-name="c12">
            <text:p>-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45</text:p>
          </table:table-cell>
          <table:table-cell office:value-type="float" office:value="0.99759855" table:style-name="c1">
            <text:p>0.9976</text:p>
          </table:table-cell>
          <table:table-cell office:value-type="string" table:style-name="c1">
            <text:p>2026-05-07 07:15</text:p>
          </table:table-cell>
          <table:table-cell office:value-type="float" office:value="1.0087953500000002" table:style-name="c1">
            <text:p>1.0088</text:p>
          </table:table-cell>
          <table:table-cell office:value-type="float" office:value="0.9202316999508575" table:style-name="c13">
            <text:p>+0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00980465" table:style-name="c1">
            <text:p>1.0098</text:p>
          </table:table-cell>
          <table:table-cell office:value-type="string" table:style-name="c1">
            <text:p>2026-05-08 15:30</text:p>
          </table:table-cell>
          <table:table-cell office:value-type="float" office:value="0.9995" table:style-name="c1">
            <text:p>0.9995</text:p>
          </table:table-cell>
          <table:table-cell office:value-type="float" office:value="-1.2183198502799475" table:style-name="c12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1.02661305" table:style-name="c1">
            <text:p>1.0266</text:p>
          </table:table-cell>
          <table:table-cell office:value-type="string" table:style-name="c1">
            <text:p>2026-05-08 18:15</text:p>
          </table:table-cell>
          <table:table-cell office:value-type="float" office:value="1.0258868" table:style-name="c1">
            <text:p>1.0259</text:p>
          </table:table-cell>
          <table:table-cell office:value-type="float" office:value="-0.27050091689364564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15</text:p>
          </table:table-cell>
          <table:table-cell office:value-type="float" office:value="1.02601275" table:style-name="c1">
            <text:p>1.026</text:p>
          </table:table-cell>
          <table:table-cell office:value-type="string" table:style-name="c1">
            <text:p>2026-05-08 19:45</text:p>
          </table:table-cell>
          <table:table-cell office:value-type="float" office:value="1.02258845" table:style-name="c1">
            <text:p>1.0226</text:p>
          </table:table-cell>
          <table:table-cell office:value-type="float" office:value="-0.5329811263602768" table:style-name="c12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0:30</text:p>
          </table:table-cell>
          <table:table-cell office:value-type="float" office:value="1.0421208" table:style-name="c1">
            <text:p>1.0421</text:p>
          </table:table-cell>
          <table:table-cell office:value-type="string" table:style-name="c1">
            <text:p>2026-05-09 01:00</text:p>
          </table:table-cell>
          <table:table-cell office:value-type="float" office:value="1.0839577500000002" table:style-name="c1">
            <text:p>1.084</text:p>
          </table:table-cell>
          <table:table-cell office:value-type="float" office:value="3.806671784859317" table:style-name="c13">
            <text:p>+3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.0937465999999998" table:style-name="c1">
            <text:p>1.0937</text:p>
          </table:table-cell>
          <table:table-cell office:value-type="string" table:style-name="c1">
            <text:p>2026-05-09 01:45</text:p>
          </table:table-cell>
          <table:table-cell office:value-type="float" office:value="1.07836055" table:style-name="c1">
            <text:p>1.0784</text:p>
          </table:table-cell>
          <table:table-cell office:value-type="float" office:value="-1.6038168931862273" table:style-name="c12">
            <text:p>-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1.06503225" table:style-name="c1">
            <text:p>1.065</text:p>
          </table:table-cell>
          <table:table-cell office:value-type="string" table:style-name="c1">
            <text:p>2026-05-09 18:00</text:p>
          </table:table-cell>
          <table:table-cell office:value-type="float" office:value="1.0636679" table:style-name="c1">
            <text:p>1.0637</text:p>
          </table:table-cell>
          <table:table-cell office:value-type="float" office:value="-0.3277480219120221" table:style-name="c12">
            <text:p>-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1.0799397" table:style-name="c1">
            <text:p>1.0799</text:p>
          </table:table-cell>
          <table:table-cell office:value-type="string" table:style-name="c1">
            <text:p>2026-05-10 00:45</text:p>
          </table:table-cell>
          <table:table-cell office:value-type="float" office:value="1.08535705" table:style-name="c1">
            <text:p>1.0854</text:p>
          </table:table-cell>
          <table:table-cell office:value-type="float" office:value="0.3007317220628192" table:style-name="c13">
            <text:p>+0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3:15</text:p>
          </table:table-cell>
          <table:table-cell office:value-type="float" office:value="1.0935465" table:style-name="c1">
            <text:p>1.0935</text:p>
          </table:table-cell>
          <table:table-cell office:value-type="string" table:style-name="c1">
            <text:p>2026-05-10 03:45</text:p>
          </table:table-cell>
          <table:table-cell office:value-type="float" office:value="1.0882556" table:style-name="c1">
            <text:p>1.0883</text:p>
          </table:table-cell>
          <table:table-cell office:value-type="float" office:value="-0.6827622734286942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30</text:p>
          </table:table-cell>
          <table:table-cell office:value-type="float" office:value="1.09064505" table:style-name="c1">
            <text:p>1.0906</text:p>
          </table:table-cell>
          <table:table-cell office:value-type="string" table:style-name="c1">
            <text:p>2026-05-10 08:00</text:p>
          </table:table-cell>
          <table:table-cell office:value-type="float" office:value="1.0915539500000002" table:style-name="c1">
            <text:p>1.0916</text:p>
          </table:table-cell>
          <table:table-cell office:value-type="float" office:value="-0.11673058490018207" table:style-name="c12">
            <text:p>-0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15</text:p>
          </table:table-cell>
          <table:table-cell office:value-type="float" office:value="1.10525235" table:style-name="c1">
            <text:p>1.1053</text:p>
          </table:table-cell>
          <table:table-cell office:value-type="string" table:style-name="c1">
            <text:p>2026-05-10 08:45</text:p>
          </table:table-cell>
          <table:table-cell office:value-type="float" office:value="1.12473735" table:style-name="c1">
            <text:p>1.1247</text:p>
          </table:table-cell>
          <table:table-cell office:value-type="float" office:value="1.5595216818448554" table:style-name="c13">
            <text:p>+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00</text:p>
          </table:table-cell>
          <table:table-cell office:value-type="float" office:value="1.1276635499999998" table:style-name="c1">
            <text:p>1.1277</text:p>
          </table:table-cell>
          <table:table-cell office:value-type="string" table:style-name="c1">
            <text:p>2026-05-10 09:30</text:p>
          </table:table-cell>
          <table:table-cell office:value-type="float" office:value="1.1228383" table:style-name="c1">
            <text:p>1.1228</text:p>
          </table:table-cell>
          <table:table-cell office:value-type="float" office:value="-0.6269426516180121" table:style-name="c12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0:30</text:p>
          </table:table-cell>
          <table:table-cell office:value-type="float" office:value="1.14567255" table:style-name="c1">
            <text:p>1.1457</text:p>
          </table:table-cell>
          <table:table-cell office:value-type="string" table:style-name="c1">
            <text:p>2026-05-10 11:00</text:p>
          </table:table-cell>
          <table:table-cell office:value-type="float" office:value="1.1404295" table:style-name="c1">
            <text:p>1.1404</text:p>
          </table:table-cell>
          <table:table-cell office:value-type="float" office:value="-0.6566246673624154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15</text:p>
          </table:table-cell>
          <table:table-cell office:value-type="float" office:value="1.1717856" table:style-name="c1">
            <text:p>1.1718</text:p>
          </table:table-cell>
          <table:table-cell office:value-type="string" table:style-name="c1">
            <text:p>2026-05-10 15:45</text:p>
          </table:table-cell>
          <table:table-cell office:value-type="float" office:value="1.19550195" table:style-name="c1">
            <text:p>1.1955</text:p>
          </table:table-cell>
          <table:table-cell office:value-type="float" office:value="1.8200037278107928" table:style-name="c13">
            <text:p>+1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00</text:p>
          </table:table-cell>
          <table:table-cell office:value-type="float" office:value="1.2256125" table:style-name="c1">
            <text:p>1.2256</text:p>
          </table:table-cell>
          <table:table-cell office:value-type="string" table:style-name="c1">
            <text:p>2026-05-10 16:30</text:p>
          </table:table-cell>
          <table:table-cell office:value-type="float" office:value="1.2565714000000001" table:style-name="c1">
            <text:p>1.2566</text:p>
          </table:table-cell>
          <table:table-cell office:value-type="float" office:value="2.3210446834868614" table:style-name="c13">
            <text:p>+2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15</text:p>
          </table:table-cell>
          <table:table-cell office:value-type="float" office:value="1.29834885" table:style-name="c1">
            <text:p>1.2983</text:p>
          </table:table-cell>
          <table:table-cell office:value-type="string" table:style-name="c1">
            <text:p>2026-05-10 17:45</text:p>
          </table:table-cell>
          <table:table-cell office:value-type="float" office:value="1.3471261" table:style-name="c1">
            <text:p>1.3471</text:p>
          </table:table-cell>
          <table:table-cell office:value-type="float" office:value="3.549457830697844" table:style-name="c13">
            <text:p>+3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6:30</text:p>
          </table:table-cell>
          <table:table-cell office:value-type="float" office:value="1.3128560999999999" table:style-name="c1">
            <text:p>1.3129</text:p>
          </table:table-cell>
          <table:table-cell office:value-type="string" table:style-name="c1">
            <text:p>2026-05-11 07:00</text:p>
          </table:table-cell>
          <table:table-cell office:value-type="float" office:value="1.2769612000000001" table:style-name="c1">
            <text:p>1.277</text:p>
          </table:table-cell>
          <table:table-cell office:value-type="float" office:value="-2.9285422399911054" table:style-name="c12">
            <text:p>-2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3:00</text:p>
          </table:table-cell>
          <table:table-cell office:value-type="float" office:value="1.26853395" table:style-name="c1">
            <text:p>1.2685</text:p>
          </table:table-cell>
          <table:table-cell office:value-type="string" table:style-name="c1">
            <text:p>2026-05-12 13:30</text:p>
          </table:table-cell>
          <table:table-cell office:value-type="float" office:value="1.2687653" table:style-name="c1">
            <text:p>1.2688</text:p>
          </table:table-cell>
          <table:table-cell office:value-type="float" office:value="-0.18169886857972717" table:style-name="c12">
            <text:p>-0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00</text:p>
          </table:table-cell>
          <table:table-cell office:value-type="float" office:value="1.1229612" table:style-name="c1">
            <text:p>1.123</text:p>
          </table:table-cell>
          <table:table-cell office:value-type="string" table:style-name="c1">
            <text:p>2026-05-21 01:30</text:p>
          </table:table-cell>
          <table:table-cell office:value-type="float" office:value="1.1002496000000002" table:style-name="c1">
            <text:p>1.1002</text:p>
          </table:table-cell>
          <table:table-cell office:value-type="float" office:value="-2.2183312255490084" table:style-name="c12">
            <text:p>-2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00</text:p>
          </table:table-cell>
          <table:table-cell office:value-type="float" office:value="1.114557" table:style-name="c1">
            <text:p>1.1146</text:p>
          </table:table-cell>
          <table:table-cell office:value-type="string" table:style-name="c1">
            <text:p>2026-05-21 02:30</text:p>
          </table:table-cell>
          <table:table-cell office:value-type="float" office:value="1.1372311" table:style-name="c1">
            <text:p>1.1372</text:p>
          </table:table-cell>
          <table:table-cell office:value-type="float" office:value="1.8303931545089247" table:style-name="c13">
            <text:p>+1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45</text:p>
          </table:table-cell>
          <table:table-cell office:value-type="float" office:value="1.1207601" table:style-name="c1">
            <text:p>1.1208</text:p>
          </table:table-cell>
          <table:table-cell office:value-type="string" table:style-name="c1">
            <text:p>2026-05-21 03:15</text:p>
          </table:table-cell>
          <table:table-cell office:value-type="float" office:value="1.11074435" table:style-name="c1">
            <text:p>1.1107</text:p>
          </table:table-cell>
          <table:table-cell office:value-type="float" office:value="-1.0917704828758534" table:style-name="c12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1331663" table:style-name="c1">
            <text:p>1.1332</text:p>
          </table:table-cell>
          <table:table-cell office:value-type="string" table:style-name="c1">
            <text:p>2026-05-21 09:00</text:p>
          </table:table-cell>
          <table:table-cell office:value-type="float" office:value="1.11953995" table:style-name="c1">
            <text:p>1.1195</text:p>
          </table:table-cell>
          <table:table-cell office:value-type="float" office:value="-1.399998425654736" table:style-name="c12">
            <text:p>-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15</text:p>
          </table:table-cell>
          <table:table-cell office:value-type="float" office:value="1.11105525" table:style-name="c1">
            <text:p>1.1111</text:p>
          </table:table-cell>
          <table:table-cell office:value-type="string" table:style-name="c1">
            <text:p>2026-05-21 15:45</text:p>
          </table:table-cell>
          <table:table-cell office:value-type="float" office:value="1.1050472" table:style-name="c1">
            <text:p>1.105</text:p>
          </table:table-cell>
          <table:table-cell office:value-type="float" office:value="-0.7395707236701132" table:style-name="c12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1.15247595" table:style-name="c1">
            <text:p>1.1525</text:p>
          </table:table-cell>
          <table:table-cell office:value-type="string" table:style-name="c1">
            <text:p>2026-05-21 18:00</text:p>
          </table:table-cell>
          <table:table-cell office:value-type="float" office:value="1.14432755" table:style-name="c1">
            <text:p>1.1443</text:p>
          </table:table-cell>
          <table:table-cell office:value-type="float" office:value="-0.9055209154212651" table:style-name="c12">
            <text:p>-0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02:15</text:p>
          </table:table-cell>
          <table:table-cell office:value-type="float" office:value="1.3336664999999999" table:style-name="c9">
            <text:p>1.3337</text:p>
          </table:table-cell>
          <table:table-cell office:value-type="string" table:style-name="c9">
            <text:p>2026-03-05 02:45</text:p>
          </table:table-cell>
          <table:table-cell office:value-type="float" office:value="1.3163415" table:style-name="c9">
            <text:p>1.3163</text:p>
          </table:table-cell>
          <table:table-cell office:value-type="float" office:value="-1.4963535980321852" table:style-name="c10">
            <text:p>-1.5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08:45</text:p>
          </table:table-cell>
          <table:table-cell office:value-type="float" office:value="1.34067" table:style-name="c9">
            <text:p>1.3407</text:p>
          </table:table-cell>
          <table:table-cell office:value-type="string" table:style-name="c9">
            <text:p>2026-03-05 09:15</text:p>
          </table:table-cell>
          <table:table-cell office:value-type="float" office:value="1.3503245000000001" table:style-name="c9">
            <text:p>1.3503</text:p>
          </table:table-cell>
          <table:table-cell office:value-type="float" office:value="0.5187854822215732" table:style-name="c11">
            <text:p>+0.5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15:00</text:p>
          </table:table-cell>
          <table:table-cell office:value-type="float" office:value="1.3946969999999999" table:style-name="c9">
            <text:p>1.3947</text:p>
          </table:table-cell>
          <table:table-cell office:value-type="string" table:style-name="c9">
            <text:p>2026-03-05 15:30</text:p>
          </table:table-cell>
          <table:table-cell office:value-type="float" office:value="1.3803095" table:style-name="c9">
            <text:p>1.3803</text:p>
          </table:table-cell>
          <table:table-cell office:value-type="float" office:value="-1.2294239315421063" table:style-name="c10">
            <text:p>-1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6 18:00</text:p>
          </table:table-cell>
          <table:table-cell office:value-type="float" office:value="1.3236614999999998" table:style-name="c9">
            <text:p>1.3237</text:p>
          </table:table-cell>
          <table:table-cell office:value-type="string" table:style-name="c9">
            <text:p>2026-03-06 18:30</text:p>
          </table:table-cell>
          <table:table-cell office:value-type="float" office:value="1.3313340000000002" table:style-name="c9">
            <text:p>1.3313</text:p>
          </table:table-cell>
          <table:table-cell office:value-type="float" office:value="0.37858344705203884" table:style-name="c11">
            <text:p>+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8 13:00</text:p>
          </table:table-cell>
          <table:table-cell office:value-type="float" office:value="1.3536765" table:style-name="c9">
            <text:p>1.3537</text:p>
          </table:table-cell>
          <table:table-cell office:value-type="string" table:style-name="c9">
            <text:p>2026-03-08 13:30</text:p>
          </table:table-cell>
          <table:table-cell office:value-type="float" office:value="1.3443275000000001" table:style-name="c9">
            <text:p>1.3443</text:p>
          </table:table-cell>
          <table:table-cell office:value-type="float" office:value="-0.8891570971720109" table:style-name="c10">
            <text:p>-0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1:30</text:p>
          </table:table-cell>
          <table:table-cell office:value-type="float" office:value="1.318659" table:style-name="c9">
            <text:p>1.3187</text:p>
          </table:table-cell>
          <table:table-cell office:value-type="string" table:style-name="c9">
            <text:p>2026-03-16 02:00</text:p>
          </table:table-cell>
          <table:table-cell office:value-type="float" office:value="1.3183405" table:style-name="c9">
            <text:p>1.3183</text:p>
          </table:table-cell>
          <table:table-cell office:value-type="float" office:value="-0.22400504296410384" table:style-name="c10">
            <text:p>-0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03:45</text:p>
          </table:table-cell>
          <table:table-cell office:value-type="float" office:value="1.330665" table:style-name="c9">
            <text:p>1.3307</text:p>
          </table:table-cell>
          <table:table-cell office:value-type="string" table:style-name="c9">
            <text:p>2026-03-16 04:15</text:p>
          </table:table-cell>
          <table:table-cell office:value-type="float" office:value="1.3313340000000002" table:style-name="c9">
            <text:p>1.3313</text:p>
          </table:table-cell>
          <table:table-cell office:value-type="float" office:value="-0.14972488687986507" table:style-name="c10">
            <text:p>-0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2 01:15</text:p>
          </table:table-cell>
          <table:table-cell office:value-type="float" office:value="1.2696344999999998" table:style-name="c9">
            <text:p>1.2696</text:p>
          </table:table-cell>
          <table:table-cell office:value-type="string" table:style-name="c9">
            <text:p>2026-03-22 01:45</text:p>
          </table:table-cell>
          <table:table-cell office:value-type="float" office:value="1.2483755" table:style-name="c9">
            <text:p>1.2484</text:p>
          </table:table-cell>
          <table:table-cell office:value-type="float" office:value="-1.8709717343455723" table:style-name="c10">
            <text:p>-1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2 23:15</text:p>
          </table:table-cell>
          <table:table-cell office:value-type="float" office:value="1.2566279999999999" table:style-name="c9">
            <text:p>1.2566</text:p>
          </table:table-cell>
          <table:table-cell office:value-type="string" table:style-name="c9">
            <text:p>2026-03-22 23:45</text:p>
          </table:table-cell>
          <table:table-cell office:value-type="float" office:value="1.2543725" table:style-name="c9">
            <text:p>1.2544</text:p>
          </table:table-cell>
          <table:table-cell office:value-type="float" office:value="-0.3790294842626385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11:15</text:p>
          </table:table-cell>
          <table:table-cell office:value-type="float" office:value="1.2956474999999998" table:style-name="c9">
            <text:p>1.2956</text:p>
          </table:table-cell>
          <table:table-cell office:value-type="string" table:style-name="c9">
            <text:p>2026-03-23 11:45</text:p>
          </table:table-cell>
          <table:table-cell office:value-type="float" office:value="1.2973510000000001" table:style-name="c9">
            <text:p>1.2974</text:p>
          </table:table-cell>
          <table:table-cell office:value-type="float" office:value="-0.06868416363245977" table:style-name="c10">
            <text:p>-0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21:30</text:p>
          </table:table-cell>
          <table:table-cell office:value-type="float" office:value="1.312656" table:style-name="c9">
            <text:p>1.3127</text:p>
          </table:table-cell>
          <table:table-cell office:value-type="string" table:style-name="c9">
            <text:p>2026-03-23 22:00</text:p>
          </table:table-cell>
          <table:table-cell office:value-type="float" office:value="1.3103445" table:style-name="c9">
            <text:p>1.3103</text:p>
          </table:table-cell>
          <table:table-cell office:value-type="float" office:value="-0.375641345142963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01:30</text:p>
          </table:table-cell>
          <table:table-cell office:value-type="float" office:value="1.3256625" table:style-name="c9">
            <text:p>1.3257</text:p>
          </table:table-cell>
          <table:table-cell office:value-type="string" table:style-name="c9">
            <text:p>2026-03-24 02:00</text:p>
          </table:table-cell>
          <table:table-cell office:value-type="float" office:value="1.321339" table:style-name="c9">
            <text:p>1.3213</text:p>
          </table:table-cell>
          <table:table-cell office:value-type="float" office:value="-0.5253868658878114" table:style-name="c10">
            <text:p>-0.5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2 01:00</text:p>
          </table:table-cell>
          <table:table-cell office:value-type="float" office:value="1.2416205" table:style-name="c9">
            <text:p>1.2416</text:p>
          </table:table-cell>
          <table:table-cell office:value-type="string" table:style-name="c9">
            <text:p>2026-04-02 01:30</text:p>
          </table:table-cell>
          <table:table-cell office:value-type="float" office:value="1.2303845000000002" table:style-name="c9">
            <text:p>1.2304</text:p>
          </table:table-cell>
          <table:table-cell office:value-type="float" office:value="-1.1030374108272012" table:style-name="c10">
            <text:p>-1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3 05:15</text:p>
          </table:table-cell>
          <table:table-cell office:value-type="float" office:value="1.252626" table:style-name="c9">
            <text:p>1.2526</text:p>
          </table:table-cell>
          <table:table-cell office:value-type="string" table:style-name="c9">
            <text:p>2026-04-03 05:45</text:p>
          </table:table-cell>
          <table:table-cell office:value-type="float" office:value="1.2523735" table:style-name="c9">
            <text:p>1.2524</text:p>
          </table:table-cell>
          <table:table-cell office:value-type="float" office:value="-0.2200173576550335" table:style-name="c10">
            <text:p>-0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4 13:00</text:p>
          </table:table-cell>
          <table:table-cell office:value-type="float" office:value="1.2346169999999999" table:style-name="c9">
            <text:p>1.2346</text:p>
          </table:table-cell>
          <table:table-cell office:value-type="string" table:style-name="c9">
            <text:p>2026-04-04 13:30</text:p>
          </table:table-cell>
          <table:table-cell office:value-type="float" office:value="1.2363815000000002" table:style-name="c9">
            <text:p>1.2364</text:p>
          </table:table-cell>
          <table:table-cell office:value-type="float" office:value="-0.05726687859469726" table:style-name="c10">
            <text:p>-0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5 03:15</text:p>
          </table:table-cell>
          <table:table-cell office:value-type="float" office:value="1.242621" table:style-name="c9">
            <text:p>1.2426</text:p>
          </table:table-cell>
          <table:table-cell office:value-type="string" table:style-name="c9">
            <text:p>2026-04-05 03:45</text:p>
          </table:table-cell>
          <table:table-cell office:value-type="float" office:value="1.2403795000000002" table:style-name="c9">
            <text:p>1.2404</text:p>
          </table:table-cell>
          <table:table-cell office:value-type="float" office:value="-0.37992425852290124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07:45</text:p>
          </table:table-cell>
          <table:table-cell office:value-type="float" office:value="1.284642" table:style-name="c9">
            <text:p>1.2846</text:p>
          </table:table-cell>
          <table:table-cell office:value-type="string" table:style-name="c9">
            <text:p>2026-04-10 08:15</text:p>
          </table:table-cell>
          <table:table-cell office:value-type="float" office:value="1.2823585" table:style-name="c9">
            <text:p>1.2824</text:p>
          </table:table-cell>
          <table:table-cell office:value-type="float" office:value="-0.37729847237596426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0 20:45</text:p>
          </table:table-cell>
          <table:table-cell office:value-type="float" office:value="1.30065" table:style-name="c9">
            <text:p>1.3007</text:p>
          </table:table-cell>
          <table:table-cell office:value-type="string" table:style-name="c9">
            <text:p>2026-04-10 21:15</text:p>
          </table:table-cell>
          <table:table-cell office:value-type="float" office:value="1.29935" table:style-name="c9">
            <text:p>1.2994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04:45</text:p>
          </table:table-cell>
          <table:table-cell office:value-type="float" office:value="1.3196595" table:style-name="c9">
            <text:p>1.3197</text:p>
          </table:table-cell>
          <table:table-cell office:value-type="string" table:style-name="c9">
            <text:p>2026-04-11 05:15</text:p>
          </table:table-cell>
          <table:table-cell office:value-type="float" office:value="1.3103445" table:style-name="c9">
            <text:p>1.3103</text:p>
          </table:table-cell>
          <table:table-cell office:value-type="float" office:value="-0.9043528770489639" table:style-name="c10">
            <text:p>-0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07:30</text:p>
          </table:table-cell>
          <table:table-cell office:value-type="float" office:value="1.3196595" table:style-name="c9">
            <text:p>1.3197</text:p>
          </table:table-cell>
          <table:table-cell office:value-type="string" table:style-name="c9">
            <text:p>2026-04-11 08:00</text:p>
          </table:table-cell>
          <table:table-cell office:value-type="float" office:value="1.3363315" table:style-name="c9">
            <text:p>1.3363</text:p>
          </table:table-cell>
          <table:table-cell office:value-type="float" office:value="1.0609307424756187" table:style-name="c11">
            <text:p>+1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08:15</text:p>
          </table:table-cell>
          <table:table-cell office:value-type="float" office:value="1.3376685" table:style-name="c9">
            <text:p>1.3377</text:p>
          </table:table-cell>
          <table:table-cell office:value-type="string" table:style-name="c9">
            <text:p>2026-04-11 08:45</text:p>
          </table:table-cell>
          <table:table-cell office:value-type="float" office:value="1.337331" table:style-name="c9">
            <text:p>1.3373</text:p>
          </table:table-cell>
          <table:table-cell office:value-type="float" office:value="-0.22508003059052983" table:style-name="c10">
            <text:p>-0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1:00</text:p>
          </table:table-cell>
          <table:table-cell office:value-type="float" office:value="1.3786889999999998" table:style-name="c9">
            <text:p>1.3787</text:p>
          </table:table-cell>
          <table:table-cell office:value-type="string" table:style-name="c9">
            <text:p>2026-04-11 11:30</text:p>
          </table:table-cell>
          <table:table-cell office:value-type="float" office:value="1.3993" table:style-name="c9">
            <text:p>1.3993</text:p>
          </table:table-cell>
          <table:table-cell office:value-type="float" office:value="1.2920825001142555" table:style-name="c11">
            <text:p>+1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1:45</text:p>
          </table:table-cell>
          <table:table-cell office:value-type="float" office:value="1.4127059999999998" table:style-name="c9">
            <text:p>1.4127</text:p>
          </table:table-cell>
          <table:table-cell office:value-type="string" table:style-name="c9">
            <text:p>2026-04-11 12:15</text:p>
          </table:table-cell>
          <table:table-cell office:value-type="float" office:value="1.3923035000000001" table:style-name="c9">
            <text:p>1.3923</text:p>
          </table:table-cell>
          <table:table-cell office:value-type="float" office:value="-1.6412271694534852" table:style-name="c10">
            <text:p>-1.6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7:15</text:p>
          </table:table-cell>
          <table:table-cell office:value-type="float" office:value="1.4337165" table:style-name="c9">
            <text:p>1.4337</text:p>
          </table:table-cell>
          <table:table-cell office:value-type="string" table:style-name="c9">
            <text:p>2026-04-11 17:45</text:p>
          </table:table-cell>
          <table:table-cell office:value-type="float" office:value="1.4562715000000002" table:style-name="c9">
            <text:p>1.4563</text:p>
          </table:table-cell>
          <table:table-cell office:value-type="float" office:value="1.3701393037954146" table:style-name="c11">
            <text:p>+1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00</text:p>
          </table:table-cell>
          <table:table-cell office:value-type="float" office:value="1.4737365" table:style-name="c9">
            <text:p>1.4737</text:p>
          </table:table-cell>
          <table:table-cell office:value-type="string" table:style-name="c9">
            <text:p>2026-04-11 18:30</text:p>
          </table:table-cell>
          <table:table-cell office:value-type="float" office:value="1.4902545000000003" table:style-name="c9">
            <text:p>1.4903</text:p>
          </table:table-cell>
          <table:table-cell office:value-type="float" office:value="0.9186839882502795" table:style-name="c11">
            <text:p>+0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45</text:p>
          </table:table-cell>
          <table:table-cell office:value-type="float" office:value="1.4957475" table:style-name="c9">
            <text:p>1.4957</text:p>
          </table:table-cell>
          <table:table-cell office:value-type="string" table:style-name="c9">
            <text:p>2026-04-11 19:15</text:p>
          </table:table-cell>
          <table:table-cell office:value-type="float" office:value="1.49925" table:style-name="c9">
            <text:p>1.4992</text:p>
          </table:table-cell>
          <table:table-cell office:value-type="float" office:value="0.03379576098236914" table:style-name="c11">
            <text:p>+0.0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2 16:15</text:p>
          </table:table-cell>
          <table:table-cell office:value-type="float" office:value="1.4677335" table:style-name="c9">
            <text:p>1.4677</text:p>
          </table:table-cell>
          <table:table-cell office:value-type="string" table:style-name="c9">
            <text:p>2026-04-12 16:45</text:p>
          </table:table-cell>
          <table:table-cell office:value-type="float" office:value="1.4382805" table:style-name="c9">
            <text:p>1.4383</text:p>
          </table:table-cell>
          <table:table-cell office:value-type="float" office:value="-2.2025880529060737" table:style-name="c10">
            <text:p>-2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2 18:30</text:p>
          </table:table-cell>
          <table:table-cell office:value-type="float" office:value="1.4607299999999999" table:style-name="c9">
            <text:p>1.4607</text:p>
          </table:table-cell>
          <table:table-cell office:value-type="string" table:style-name="c9">
            <text:p>2026-04-12 19:00</text:p>
          </table:table-cell>
          <table:table-cell office:value-type="float" office:value="1.4622685000000002" table:style-name="c9">
            <text:p>1.4623</text:p>
          </table:table-cell>
          <table:table-cell office:value-type="float" office:value="-0.09478649247290916" table:style-name="c10">
            <text:p>-0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13:45</text:p>
          </table:table-cell>
          <table:table-cell office:value-type="float" office:value="1.4287139999999998" table:style-name="c9">
            <text:p>1.4287</text:p>
          </table:table-cell>
          <table:table-cell office:value-type="string" table:style-name="c9">
            <text:p>2026-04-13 14:15</text:p>
          </table:table-cell>
          <table:table-cell office:value-type="float" office:value="1.4362815000000002" table:style-name="c9">
            <text:p>1.4363</text:p>
          </table:table-cell>
          <table:table-cell office:value-type="float" office:value="0.32871332411525955" table:style-name="c11">
            <text:p>+0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45</text:p>
          </table:table-cell>
          <table:table-cell office:value-type="float" office:value="1.4417205" table:style-name="c9">
            <text:p>1.4417</text:p>
          </table:table-cell>
          <table:table-cell office:value-type="string" table:style-name="c9">
            <text:p>2026-04-13 23:15</text:p>
          </table:table-cell>
          <table:table-cell office:value-type="float" office:value="1.4342825000000001" table:style-name="c9">
            <text:p>1.4343</text:p>
          </table:table-cell>
          <table:table-cell office:value-type="float" office:value="-0.7147800643397817" table:style-name="c10">
            <text:p>-0.7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0:15</text:p>
          </table:table-cell>
          <table:table-cell office:value-type="float" office:value="1.356678" table:style-name="c9">
            <text:p>1.3567</text:p>
          </table:table-cell>
          <table:table-cell office:value-type="string" table:style-name="c9">
            <text:p>2026-04-21 00:45</text:p>
          </table:table-cell>
          <table:table-cell office:value-type="float" office:value="1.3693150000000003" table:style-name="c9">
            <text:p>1.3693</text:p>
          </table:table-cell>
          <table:table-cell office:value-type="float" office:value="0.7297044188083079" table:style-name="c11">
            <text:p>+0.7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7:30</text:p>
          </table:table-cell>
          <table:table-cell office:value-type="float" office:value="1.3846919999999998" table:style-name="c9">
            <text:p>1.3847</text:p>
          </table:table-cell>
          <table:table-cell office:value-type="string" table:style-name="c9">
            <text:p>2026-04-21 08:00</text:p>
          </table:table-cell>
          <table:table-cell office:value-type="float" office:value="1.3763115000000001" table:style-name="c9">
            <text:p>1.3763</text:p>
          </table:table-cell>
          <table:table-cell office:value-type="float" office:value="-0.803914999761679" table:style-name="c10">
            <text:p>-0.8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0:30</text:p>
          </table:table-cell>
          <table:table-cell office:value-type="float" office:value="1.3656825" table:style-name="c9">
            <text:p>1.3657</text:p>
          </table:table-cell>
          <table:table-cell office:value-type="string" table:style-name="c9">
            <text:p>2026-04-22 01:00</text:p>
          </table:table-cell>
          <table:table-cell office:value-type="float" office:value="1.35932" table:style-name="c9">
            <text:p>1.3593</text:p>
          </table:table-cell>
          <table:table-cell office:value-type="float" office:value="-0.6648529713165319" table:style-name="c10">
            <text:p>-0.7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5 07:00</text:p>
          </table:table-cell>
          <table:table-cell office:value-type="float" office:value="1.350675" table:style-name="c9">
            <text:p>1.3507</text:p>
          </table:table-cell>
          <table:table-cell office:value-type="string" table:style-name="c9">
            <text:p>2026-04-25 07:30</text:p>
          </table:table-cell>
          <table:table-cell office:value-type="float" office:value="1.3483255" table:style-name="c9">
            <text:p>1.3483</text:p>
          </table:table-cell>
          <table:table-cell office:value-type="float" office:value="-0.3735023358320877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30</text:p>
          </table:table-cell>
          <table:table-cell office:value-type="float" office:value="1.332666" table:style-name="c9">
            <text:p>1.3327</text:p>
          </table:table-cell>
          <table:table-cell office:value-type="string" table:style-name="c9">
            <text:p>2026-04-29 11:00</text:p>
          </table:table-cell>
          <table:table-cell office:value-type="float" office:value="1.327336" table:style-name="c9">
            <text:p>1.3273</text:p>
          </table:table-cell>
          <table:table-cell office:value-type="float" office:value="-0.59905067466266" table:style-name="c10">
            <text:p>-0.6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1:15</text:p>
          </table:table-cell>
          <table:table-cell office:value-type="float" office:value="1.334667" table:style-name="c9">
            <text:p>1.3347</text:p>
          </table:table-cell>
          <table:table-cell office:value-type="string" table:style-name="c9">
            <text:p>2026-04-29 11:45</text:p>
          </table:table-cell>
          <table:table-cell office:value-type="float" office:value="1.3523235" table:style-name="c9">
            <text:p>1.3523</text:p>
          </table:table-cell>
          <table:table-cell office:value-type="float" office:value="1.1203697494206244" table:style-name="c11">
            <text:p>+1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21:45</text:p>
          </table:table-cell>
          <table:table-cell office:value-type="float" office:value="1.3236614999999998" table:style-name="c9">
            <text:p>1.3237</text:p>
          </table:table-cell>
          <table:table-cell office:value-type="string" table:style-name="c9">
            <text:p>2026-04-29 22:15</text:p>
          </table:table-cell>
          <table:table-cell office:value-type="float" office:value="1.3193400000000002" table:style-name="c9">
            <text:p>1.3193</text:p>
          </table:table-cell>
          <table:table-cell office:value-type="float" office:value="-0.525728115534041" table:style-name="c10">
            <text:p>-0.5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00:15</text:p>
          </table:table-cell>
          <table:table-cell office:value-type="float" office:value="1.3476735" table:style-name="c9">
            <text:p>1.3477</text:p>
          </table:table-cell>
          <table:table-cell office:value-type="string" table:style-name="c9">
            <text:p>2026-05-01 00:45</text:p>
          </table:table-cell>
          <table:table-cell office:value-type="float" office:value="1.3523235" table:style-name="c9">
            <text:p>1.3523</text:p>
          </table:table-cell>
          <table:table-cell office:value-type="float" office:value="0.14444932867641036" table:style-name="c11">
            <text:p>+0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08:30</text:p>
          </table:table-cell>
          <table:table-cell office:value-type="float" office:value="1.3336664999999999" table:style-name="c9">
            <text:p>1.3337</text:p>
          </table:table-cell>
          <table:table-cell office:value-type="string" table:style-name="c9">
            <text:p>2026-05-02 09:00</text:p>
          </table:table-cell>
          <table:table-cell office:value-type="float" office:value="1.3283355000000001" table:style-name="c9">
            <text:p>1.3283</text:p>
          </table:table-cell>
          <table:table-cell office:value-type="float" office:value="-0.5988260681736857" table:style-name="c10">
            <text:p>-0.6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2 11:15</text:p>
          </table:table-cell>
          <table:table-cell office:value-type="float" office:value="1.3396694999999998" table:style-name="c9">
            <text:p>1.3397</text:p>
          </table:table-cell>
          <table:table-cell office:value-type="string" table:style-name="c9">
            <text:p>2026-05-02 11:45</text:p>
          </table:table-cell>
          <table:table-cell office:value-type="float" office:value="1.3383305" table:style-name="c9">
            <text:p>1.3383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0:45</text:p>
          </table:table-cell>
          <table:table-cell office:value-type="float" office:value="1.3656825" table:style-name="c9">
            <text:p>1.3657</text:p>
          </table:table-cell>
          <table:table-cell office:value-type="string" table:style-name="c9">
            <text:p>2026-05-04 01:15</text:p>
          </table:table-cell>
          <table:table-cell office:value-type="float" office:value="1.3633180000000003" table:style-name="c9">
            <text:p>1.3633</text:p>
          </table:table-cell>
          <table:table-cell office:value-type="float" office:value="-0.3726907741733343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2:00</text:p>
          </table:table-cell>
          <table:table-cell office:value-type="float" office:value="1.368684" table:style-name="c9">
            <text:p>1.3687</text:p>
          </table:table-cell>
          <table:table-cell office:value-type="string" table:style-name="c9">
            <text:p>2026-05-04 02:30</text:p>
          </table:table-cell>
          <table:table-cell office:value-type="float" office:value="1.3743125" table:style-name="c9">
            <text:p>1.3743</text:p>
          </table:table-cell>
          <table:table-cell office:value-type="float" office:value="0.21051238361082802" table:style-name="c11">
            <text:p>+0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4:30</text:p>
          </table:table-cell>
          <table:table-cell office:value-type="float" office:value="1.3796895" table:style-name="c9">
            <text:p>1.3797</text:p>
          </table:table-cell>
          <table:table-cell office:value-type="string" table:style-name="c9">
            <text:p>2026-05-04 05:00</text:p>
          </table:table-cell>
          <table:table-cell office:value-type="float" office:value="1.37931" table:style-name="c9">
            <text:p>1.3793</text:p>
          </table:table-cell>
          <table:table-cell office:value-type="float" office:value="-0.22735120402089803" table:style-name="c10">
            <text:p>-0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5:15</text:p>
          </table:table-cell>
          <table:table-cell office:value-type="float" office:value="1.382691" table:style-name="c9">
            <text:p>1.3827</text:p>
          </table:table-cell>
          <table:table-cell office:value-type="string" table:style-name="c9">
            <text:p>2026-05-04 05:45</text:p>
          </table:table-cell>
          <table:table-cell office:value-type="float" office:value="1.3923035000000001" table:style-name="c9">
            <text:p>1.3923</text:p>
          </table:table-cell>
          <table:table-cell office:value-type="float" office:value="0.49391261702724787" table:style-name="c11">
            <text:p>+0.5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00</text:p>
          </table:table-cell>
          <table:table-cell office:value-type="float" office:value="1.4537265" table:style-name="c9">
            <text:p>1.4537</text:p>
          </table:table-cell>
          <table:table-cell office:value-type="string" table:style-name="c9">
            <text:p>2026-05-04 15:45</text:p>
          </table:table-cell>
          <table:table-cell office:value-type="float" office:value="1.437281" table:style-name="c9">
            <text:p>1.4373</text:p>
          </table:table-cell>
          <table:table-cell office:value-type="float" office:value="-1.3289036637221363" table:style-name="c10">
            <text:p>-1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6:00</text:p>
          </table:table-cell>
          <table:table-cell office:value-type="float" office:value="1.4447219999999998" table:style-name="c9">
            <text:p>1.4447</text:p>
          </table:table-cell>
          <table:table-cell office:value-type="string" table:style-name="c9">
            <text:p>2026-05-04 16:30</text:p>
          </table:table-cell>
          <table:table-cell office:value-type="float" office:value="1.4362815000000002" table:style-name="c9">
            <text:p>1.4363</text:p>
          </table:table-cell>
          <table:table-cell office:value-type="float" office:value="-0.7829621697807432" table:style-name="c10">
            <text:p>-0.8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20:45</text:p>
          </table:table-cell>
          <table:table-cell office:value-type="float" office:value="1.4777385" table:style-name="c9">
            <text:p>1.4777</text:p>
          </table:table-cell>
          <table:table-cell office:value-type="string" table:style-name="c9">
            <text:p>2026-05-04 21:15</text:p>
          </table:table-cell>
          <table:table-cell office:value-type="float" office:value="1.5182404999999999" table:style-name="c9">
            <text:p>1.5182</text:p>
          </table:table-cell>
          <table:table-cell office:value-type="float" office:value="2.535430811371553" table:style-name="c11">
            <text:p>+2.5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21:30</text:p>
          </table:table-cell>
          <table:table-cell office:value-type="float" office:value="1.56078" table:style-name="c9">
            <text:p>1.5608</text:p>
          </table:table-cell>
          <table:table-cell office:value-type="string" table:style-name="c9">
            <text:p>2026-05-04 22:00</text:p>
          </table:table-cell>
          <table:table-cell office:value-type="float" office:value="1.5842075" table:style-name="c9">
            <text:p>1.5842</text:p>
          </table:table-cell>
          <table:table-cell office:value-type="float" office:value="1.2981117907392425" table:style-name="c11">
            <text:p>+1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23:00</text:p>
          </table:table-cell>
          <table:table-cell office:value-type="float" office:value="1.606803" table:style-name="c9">
            <text:p>1.6068</text:p>
          </table:table-cell>
          <table:table-cell office:value-type="string" table:style-name="c9">
            <text:p>2026-05-04 23:30</text:p>
          </table:table-cell>
          <table:table-cell office:value-type="float" office:value="1.641179" table:style-name="c9">
            <text:p>1.6412</text:p>
          </table:table-cell>
          <table:table-cell office:value-type="float" office:value="1.9352268559991392" table:style-name="c11">
            <text:p>+1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7:45</text:p>
          </table:table-cell>
          <table:table-cell office:value-type="float" office:value="1.7958975" table:style-name="c9">
            <text:p>1.7959</text:p>
          </table:table-cell>
          <table:table-cell office:value-type="string" table:style-name="c9">
            <text:p>2026-05-05 08:15</text:p>
          </table:table-cell>
          <table:table-cell office:value-type="float" office:value="1.845077" table:style-name="c9">
            <text:p>1.8451</text:p>
          </table:table-cell>
          <table:table-cell office:value-type="float" office:value="2.533061662873304" table:style-name="c11">
            <text:p>+2.5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1:00</text:p>
          </table:table-cell>
          <table:table-cell office:value-type="float" office:value="1.8739365" table:style-name="c9">
            <text:p>1.8739</text:p>
          </table:table-cell>
          <table:table-cell office:value-type="string" table:style-name="c9">
            <text:p>2026-05-05 11:30</text:p>
          </table:table-cell>
          <table:table-cell office:value-type="float" office:value="1.8740625000000002" table:style-name="c9">
            <text:p>1.8741</text:p>
          </table:table-cell>
          <table:table-cell office:value-type="float" office:value="-0.19318962715650922" table:style-name="c10">
            <text:p>-0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2:45</text:p>
          </table:table-cell>
          <table:table-cell office:value-type="float" office:value="1.8999495" table:style-name="c9">
            <text:p>1.8999</text:p>
          </table:table-cell>
          <table:table-cell office:value-type="string" table:style-name="c9">
            <text:p>2026-05-05 13:15</text:p>
          </table:table-cell>
          <table:table-cell office:value-type="float" office:value="1.8610690000000003" table:style-name="c9">
            <text:p>1.8611</text:p>
          </table:table-cell>
          <table:table-cell office:value-type="float" office:value="-2.2422057497317405" table:style-name="c10">
            <text:p>-2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0:45</text:p>
          </table:table-cell>
          <table:table-cell office:value-type="float" office:value="1.950975" table:style-name="c9">
            <text:p>1.951</text:p>
          </table:table-cell>
          <table:table-cell office:value-type="string" table:style-name="c9">
            <text:p>2026-05-05 21:15</text:p>
          </table:table-cell>
          <table:table-cell office:value-type="float" office:value="2.004997" table:style-name="c9">
            <text:p>2.005</text:p>
          </table:table-cell>
          <table:table-cell office:value-type="float" office:value="2.563539307115681" table:style-name="c11">
            <text:p>+2.6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21:30</text:p>
          </table:table-cell>
          <table:table-cell office:value-type="float" office:value="1.9659825" table:style-name="c9">
            <text:p>1.966</text:p>
          </table:table-cell>
          <table:table-cell office:value-type="string" table:style-name="c9">
            <text:p>2026-05-05 22:00</text:p>
          </table:table-cell>
          <table:table-cell office:value-type="float" office:value="1.977011" table:style-name="c9">
            <text:p>1.977</text:p>
          </table:table-cell>
          <table:table-cell office:value-type="float" office:value="0.35994496446432045" table:style-name="c11">
            <text:p>+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1:45</text:p>
          </table:table-cell>
          <table:table-cell office:value-type="float" office:value="2.0270129999999997" table:style-name="c9">
            <text:p>2.027</text:p>
          </table:table-cell>
          <table:table-cell office:value-type="string" table:style-name="c9">
            <text:p>2026-05-06 02:15</text:p>
          </table:table-cell>
          <table:table-cell office:value-type="float" office:value="2.010994" table:style-name="c9">
            <text:p>2.011</text:p>
          </table:table-cell>
          <table:table-cell office:value-type="float" office:value="-0.9885963733828773" table:style-name="c10">
            <text:p>-1.0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3:45</text:p>
          </table:table-cell>
          <table:table-cell office:value-type="float" office:value="2.0660325" table:style-name="c9">
            <text:p>2.066</text:p>
          </table:table-cell>
          <table:table-cell office:value-type="string" table:style-name="c9">
            <text:p>2026-05-06 04:15</text:p>
          </table:table-cell>
          <table:table-cell office:value-type="float" office:value="2.1319335" table:style-name="c9">
            <text:p>2.1319</text:p>
          </table:table-cell>
          <table:table-cell office:value-type="float" office:value="2.983460566738416" table:style-name="c11">
            <text:p>+3.0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4:30</text:p>
          </table:table-cell>
          <table:table-cell office:value-type="float" office:value="2.1740865" table:style-name="c9">
            <text:p>2.1741</text:p>
          </table:table-cell>
          <table:table-cell office:value-type="string" table:style-name="c9">
            <text:p>2026-05-06 05:00</text:p>
          </table:table-cell>
          <table:table-cell office:value-type="float" office:value="2.1819085" table:style-name="c9">
            <text:p>2.1819</text:p>
          </table:table-cell>
          <table:table-cell office:value-type="float" office:value="0.15916408608858124" table:style-name="c11">
            <text:p>+0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8:45</text:p>
          </table:table-cell>
          <table:table-cell office:value-type="float" office:value="2.235117" table:style-name="c9">
            <text:p>2.2351</text:p>
          </table:table-cell>
          <table:table-cell office:value-type="string" table:style-name="c9">
            <text:p>2026-05-06 09:15</text:p>
          </table:table-cell>
          <table:table-cell office:value-type="float" office:value="2.222888" table:style-name="c9">
            <text:p>2.2229</text:p>
          </table:table-cell>
          <table:table-cell office:value-type="float" office:value="-0.745936481714371" table:style-name="c10">
            <text:p>-0.7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0:45</text:p>
          </table:table-cell>
          <table:table-cell office:value-type="float" office:value="2.2781385" table:style-name="c9">
            <text:p>2.2781</text:p>
          </table:table-cell>
          <table:table-cell office:value-type="string" table:style-name="c9">
            <text:p>2026-05-06 11:15</text:p>
          </table:table-cell>
          <table:table-cell office:value-type="float" office:value="2.3338325" table:style-name="c9">
            <text:p>2.3338</text:p>
          </table:table-cell>
          <table:table-cell office:value-type="float" office:value="2.2399282937582754" table:style-name="c11">
            <text:p>+2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3:45</text:p>
          </table:table-cell>
          <table:table-cell office:value-type="float" office:value="2.5142564999999997" table:style-name="c9">
            <text:p>2.5143</text:p>
          </table:table-cell>
          <table:table-cell office:value-type="string" table:style-name="c9">
            <text:p>2026-05-06 14:15</text:p>
          </table:table-cell>
          <table:table-cell office:value-type="float" office:value="2.2638675000000004" table:style-name="c9">
            <text:p>2.2639</text:p>
          </table:table-cell>
          <table:table-cell office:value-type="float" office:value="-10.138761543720754" table:style-name="c10">
            <text:p>-10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17:00</text:p>
          </table:table-cell>
          <table:table-cell office:value-type="float" office:value="2.4282135" table:style-name="c9">
            <text:p>2.4282</text:p>
          </table:table-cell>
          <table:table-cell office:value-type="string" table:style-name="c9">
            <text:p>2026-05-06 17:30</text:p>
          </table:table-cell>
          <table:table-cell office:value-type="float" office:value="2.37881" table:style-name="c9">
            <text:p>2.3788</text:p>
          </table:table-cell>
          <table:table-cell office:value-type="float" office:value="-2.230394534500335" table:style-name="c10">
            <text:p>-2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22:15</text:p>
          </table:table-cell>
          <table:table-cell office:value-type="float" office:value="2.465232" table:style-name="c9">
            <text:p>2.4652</text:p>
          </table:table-cell>
          <table:table-cell office:value-type="string" table:style-name="c9">
            <text:p>2026-05-06 22:45</text:p>
          </table:table-cell>
          <table:table-cell office:value-type="float" office:value="2.4367810000000003" table:style-name="c9">
            <text:p>2.4368</text:p>
          </table:table-cell>
          <table:table-cell office:value-type="float" office:value="-1.3516831364755788" table:style-name="c10">
            <text:p>-1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23:30</text:p>
          </table:table-cell>
          <table:table-cell office:value-type="float" office:value="2.4492239999999996" table:style-name="c9">
            <text:p>2.4492</text:p>
          </table:table-cell>
          <table:table-cell office:value-type="string" table:style-name="c9">
            <text:p>2026-05-07 00:00</text:p>
          </table:table-cell>
          <table:table-cell office:value-type="float" office:value="2.450774" table:style-name="c9">
            <text:p>2.4508</text:p>
          </table:table-cell>
          <table:table-cell office:value-type="float" office:value="-0.13674115662756225" table:style-name="c10">
            <text:p>-0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1:30</text:p>
          </table:table-cell>
          <table:table-cell office:value-type="float" office:value="2.493246" table:style-name="c9">
            <text:p>2.4932</text:p>
          </table:table-cell>
          <table:table-cell office:value-type="string" table:style-name="c9">
            <text:p>2026-05-07 02:00</text:p>
          </table:table-cell>
          <table:table-cell office:value-type="float" office:value="2.576711" table:style-name="c9">
            <text:p>2.5767</text:p>
          </table:table-cell>
          <table:table-cell office:value-type="float" office:value="3.141052054670901" table:style-name="c11">
            <text:p>+3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17:45</text:p>
          </table:table-cell>
          <table:table-cell office:value-type="float" office:value="2.5392689999999996" table:style-name="c9">
            <text:p>2.5393</text:p>
          </table:table-cell>
          <table:table-cell office:value-type="string" table:style-name="c9">
            <text:p>2026-05-07 18:15</text:p>
          </table:table-cell>
          <table:table-cell office:value-type="float" office:value="2.6356815" table:style-name="c9">
            <text:p>2.6357</text:p>
          </table:table-cell>
          <table:table-cell office:value-type="float" office:value="3.589370511021106" table:style-name="c11">
            <text:p>+3.6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18:30</text:p>
          </table:table-cell>
          <table:table-cell office:value-type="float" office:value="2.729364" table:style-name="c9">
            <text:p>2.7294</text:p>
          </table:table-cell>
          <table:table-cell office:value-type="string" table:style-name="c9">
            <text:p>2026-05-07 19:00</text:p>
          </table:table-cell>
          <table:table-cell office:value-type="float" office:value="2.672663" table:style-name="c9">
            <text:p>2.6727</text:p>
          </table:table-cell>
          <table:table-cell office:value-type="float" office:value="-2.273190872928643" table:style-name="c10">
            <text:p>-2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8:45</text:p>
          </table:table-cell>
          <table:table-cell office:value-type="float" office:value="2.775387" table:style-name="c9">
            <text:p>2.7754</text:p>
          </table:table-cell>
          <table:table-cell office:value-type="string" table:style-name="c9">
            <text:p>2026-05-08 09:15</text:p>
          </table:table-cell>
          <table:table-cell office:value-type="float" office:value="2.7356315" table:style-name="c9">
            <text:p>2.7356</text:p>
          </table:table-cell>
          <table:table-cell office:value-type="float" office:value="-1.6294674352982041" table:style-name="c10">
            <text:p>-1.6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22:45</text:p>
          </table:table-cell>
          <table:table-cell office:value-type="float" office:value="2.5602795" table:style-name="c9">
            <text:p>2.5603</text:p>
          </table:table-cell>
          <table:table-cell office:value-type="string" table:style-name="c9">
            <text:p>2026-05-08 23:15</text:p>
          </table:table-cell>
          <table:table-cell office:value-type="float" office:value="2.5477255" table:style-name="c9">
            <text:p>2.5477</text:p>
          </table:table-cell>
          <table:table-cell office:value-type="float" office:value="-0.6892569063065235" table:style-name="c10">
            <text:p>-0.7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8 13:00</text:p>
          </table:table-cell>
          <table:table-cell office:value-type="float" office:value="2.0510249999999997" table:style-name="c9">
            <text:p>2.051</text:p>
          </table:table-cell>
          <table:table-cell office:value-type="string" table:style-name="c9">
            <text:p>2026-05-18 13:30</text:p>
          </table:table-cell>
          <table:table-cell office:value-type="float" office:value="1.991004" table:style-name="c9">
            <text:p>1.991</text:p>
          </table:table-cell>
          <table:table-cell office:value-type="float" office:value="-3.120440608768771" table:style-name="c10">
            <text:p>-3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04:15</text:p>
          </table:table-cell>
          <table:table-cell office:value-type="float" office:value="2.0460225" table:style-name="c9">
            <text:p>2.046</text:p>
          </table:table-cell>
          <table:table-cell office:value-type="string" table:style-name="c9">
            <text:p>2026-05-19 04:45</text:p>
          </table:table-cell>
          <table:table-cell office:value-type="float" office:value="2.028985" table:style-name="c9">
            <text:p>2.029</text:p>
          </table:table-cell>
          <table:table-cell office:value-type="float" office:value="-1.030948633995965" table:style-name="c10">
            <text:p>-1.0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9 17:00</text:p>
          </table:table-cell>
          <table:table-cell office:value-type="float" office:value="2.0500244999999997" table:style-name="c9">
            <text:p>2.05</text:p>
          </table:table-cell>
          <table:table-cell office:value-type="string" table:style-name="c9">
            <text:p>2026-05-19 17:30</text:p>
          </table:table-cell>
          <table:table-cell office:value-type="float" office:value="2.0179905000000002" table:style-name="c9">
            <text:p>2.018</text:p>
          </table:table-cell>
          <table:table-cell office:value-type="float" office:value="-1.7593918028540267" table:style-name="c10">
            <text:p>-1.8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0:45</text:p>
          </table:table-cell>
          <table:table-cell office:value-type="float" office:value="2.0860425" table:style-name="c9">
            <text:p>2.086</text:p>
          </table:table-cell>
          <table:table-cell office:value-type="string" table:style-name="c9">
            <text:p>2026-05-21 01:15</text:p>
          </table:table-cell>
          <table:table-cell office:value-type="float" office:value="2.080959" table:style-name="c9">
            <text:p>2.081</text:p>
          </table:table-cell>
          <table:table-cell office:value-type="float" office:value="-0.4431039655711566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15</text:p>
          </table:table-cell>
          <table:table-cell office:value-type="float" office:value="2.0340165" table:style-name="c9">
            <text:p>2.034</text:p>
          </table:table-cell>
          <table:table-cell office:value-type="string" table:style-name="c9">
            <text:p>2026-05-21 17:45</text:p>
          </table:table-cell>
          <table:table-cell office:value-type="float" office:value="2.056971" table:style-name="c9">
            <text:p>2.057</text:p>
          </table:table-cell>
          <table:table-cell office:value-type="float" office:value="0.9263747354556928" table:style-name="c11">
            <text:p>+0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6:00</text:p>
          </table:table-cell>
          <table:table-cell office:value-type="float" office:value="1.976988" table:style-name="c9">
            <text:p>1.977</text:p>
          </table:table-cell>
          <table:table-cell office:value-type="string" table:style-name="c9">
            <text:p>2026-05-25 16:30</text:p>
          </table:table-cell>
          <table:table-cell office:value-type="float" office:value="2.0579705" table:style-name="c9">
            <text:p>2.058</text:p>
          </table:table-cell>
          <table:table-cell office:value-type="float" office:value="3.8881681108079658" table:style-name="c11">
            <text:p>+3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6:45</text:p>
          </table:table-cell>
          <table:table-cell office:value-type="float" office:value="2.0600295" table:style-name="c9">
            <text:p>2.06</text:p>
          </table:table-cell>
          <table:table-cell office:value-type="string" table:style-name="c9">
            <text:p>2026-05-25 17:15</text:p>
          </table:table-cell>
          <table:table-cell office:value-type="float" office:value="2.1519235" table:style-name="c9">
            <text:p>2.1519</text:p>
          </table:table-cell>
          <table:table-cell office:value-type="float" office:value="4.25199274687571" table:style-name="c11">
            <text:p>+4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17:30</text:p>
          </table:table-cell>
          <table:table-cell office:value-type="float" office:value="2.177088" table:style-name="c9">
            <text:p>2.1771</text:p>
          </table:table-cell>
          <table:table-cell office:value-type="string" table:style-name="c9">
            <text:p>2026-05-25 18:00</text:p>
          </table:table-cell>
          <table:table-cell office:value-type="float" office:value="2.050974" table:style-name="c9">
            <text:p>2.051</text:p>
          </table:table-cell>
          <table:table-cell office:value-type="float" office:value="-5.981103980454616" table:style-name="c10">
            <text:p>-6.0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0:45</text:p>
          </table:table-cell>
          <table:table-cell office:value-type="float" office:value="1.850925" table:style-name="c9">
            <text:p>1.8509</text:p>
          </table:table-cell>
          <table:table-cell office:value-type="string" table:style-name="c9">
            <text:p>2026-05-31 01:15</text:p>
          </table:table-cell>
          <table:table-cell office:value-type="float" office:value="1.875062" table:style-name="c9">
            <text:p>1.8751</text:p>
          </table:table-cell>
          <table:table-cell office:value-type="float" office:value="1.1015438800599853" table:style-name="c11">
            <text:p>+1.1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6:15</text:p>
          </table:table-cell>
          <table:table-cell office:value-type="float" office:value="1.8919454999999998" table:style-name="c9">
            <text:p>1.8919</text:p>
          </table:table-cell>
          <table:table-cell office:value-type="string" table:style-name="c9">
            <text:p>2026-05-31 06:45</text:p>
          </table:table-cell>
          <table:table-cell office:value-type="float" office:value="1.877061" table:style-name="c9">
            <text:p>1.8771</text:p>
          </table:table-cell>
          <table:table-cell office:value-type="float" office:value="-0.9850571773341144" table:style-name="c10">
            <text:p>-1.0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9:30</text:p>
          </table:table-cell>
          <table:table-cell office:value-type="float" office:value="1.8939465" table:style-name="c9">
            <text:p>1.8939</text:p>
          </table:table-cell>
          <table:table-cell office:value-type="string" table:style-name="c9">
            <text:p>2026-05-31 10:00</text:p>
          </table:table-cell>
          <table:table-cell office:value-type="float" office:value="1.87906" table:style-name="c9">
            <text:p>1.8791</text:p>
          </table:table-cell>
          <table:table-cell office:value-type="float" office:value="-0.9843330284144747" table:style-name="c10">
            <text:p>-1.0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12:30</text:p>
          </table:table-cell>
          <table:table-cell office:value-type="float" office:value="1.9159575" table:style-name="c9">
            <text:p>1.916</text:p>
          </table:table-cell>
          <table:table-cell office:value-type="string" table:style-name="c9">
            <text:p>2026-05-31 13:00</text:p>
          </table:table-cell>
          <table:table-cell office:value-type="float" office:value="1.903048" table:style-name="c9">
            <text:p>1.903</text:p>
          </table:table-cell>
          <table:table-cell office:value-type="float" office:value="-0.8723415290787906" table:style-name="c10">
            <text:p>-0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15:15</text:p>
          </table:table-cell>
          <table:table-cell office:value-type="float" office:value="1.9049519999999998" table:style-name="c9">
            <text:p>1.905</text:p>
          </table:table-cell>
          <table:table-cell office:value-type="string" table:style-name="c9">
            <text:p>2026-05-31 15:45</text:p>
          </table:table-cell>
          <table:table-cell office:value-type="float" office:value="1.9020485" table:style-name="c9">
            <text:p>1.902</text:p>
          </table:table-cell>
          <table:table-cell office:value-type="float" office:value="-0.3520138539711226" table:style-name="c10">
            <text:p>-0.4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01:00</text:p>
          </table:table-cell>
          <table:table-cell office:value-type="float" office:value="1.9379685" table:style-name="c9">
            <text:p>1.938</text:p>
          </table:table-cell>
          <table:table-cell office:value-type="string" table:style-name="c9">
            <text:p>2026-06-01 01:30</text:p>
          </table:table-cell>
          <table:table-cell office:value-type="float" office:value="1.917041" table:style-name="c9">
            <text:p>1.917</text:p>
          </table:table-cell>
          <table:table-cell office:value-type="float" office:value="-1.2776092572712061" table:style-name="c10">
            <text:p>-1.3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04:00</text:p>
          </table:table-cell>
          <table:table-cell office:value-type="float" office:value="2.0020005" table:style-name="c9">
            <text:p>2.002</text:p>
          </table:table-cell>
          <table:table-cell office:value-type="string" table:style-name="c9">
            <text:p>2026-06-01 04:30</text:p>
          </table:table-cell>
          <table:table-cell office:value-type="float" office:value="1.961019" table:style-name="c9">
            <text:p>1.961</text:p>
          </table:table-cell>
          <table:table-cell office:value-type="float" office:value="-2.2428354528882366" table:style-name="c10">
            <text:p>-2.2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16:30</text:p>
          </table:table-cell>
          <table:table-cell office:value-type="float" office:value="2.1800895" table:style-name="c9">
            <text:p>2.1801</text:p>
          </table:table-cell>
          <table:table-cell office:value-type="string" table:style-name="c9">
            <text:p>2026-06-01 17:00</text:p>
          </table:table-cell>
          <table:table-cell office:value-type="float" office:value="2.2478755" table:style-name="c9">
            <text:p>2.2479</text:p>
          </table:table-cell>
          <table:table-cell office:value-type="float" office:value="2.9032063534777164" table:style-name="c11">
            <text:p>+2.9</text:p>
          </table:table-cell>
        </table:table-row>
        <table:table-row>
          <table:table-cell office:value-type="string" table:style-name="c8">
            <text:p>TON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17:15</text:p>
          </table:table-cell>
          <table:table-cell office:value-type="float" office:value="2.1720854999999997" table:style-name="c9">
            <text:p>2.1721</text:p>
          </table:table-cell>
          <table:table-cell office:value-type="string" table:style-name="c9">
            <text:p>2026-06-01 17:45</text:p>
          </table:table-cell>
          <table:table-cell office:value-type="float" office:value="2.1869060000000005" table:style-name="c9">
            <text:p>2.1869</text:p>
          </table:table-cell>
          <table:table-cell office:value-type="float" office:value="0.4810526522091685" table:style-name="c11">
            <text:p>+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30</text:p>
          </table:table-cell>
          <table:table-cell office:value-type="float" office:value="0.28454219999999997" table:style-name="c1">
            <text:p>0.28454</text:p>
          </table:table-cell>
          <table:table-cell office:value-type="string" table:style-name="c1">
            <text:p>2026-03-05 22:00</text:p>
          </table:table-cell>
          <table:table-cell office:value-type="float" office:value="0.2842578" table:style-name="c1">
            <text:p>0.28426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16:15</text:p>
          </table:table-cell>
          <table:table-cell office:value-type="float" office:value="0.2893446" table:style-name="c1">
            <text:p>0.28934</text:p>
          </table:table-cell>
          <table:table-cell office:value-type="string" table:style-name="c1">
            <text:p>2026-03-08 16:45</text:p>
          </table:table-cell>
          <table:table-cell office:value-type="float" office:value="0.2882558" table:style-name="c1">
            <text:p>0.28826</text:p>
          </table:table-cell>
          <table:table-cell office:value-type="float" office:value="-0.5754464898256373" table:style-name="c12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3:15</text:p>
          </table:table-cell>
          <table:table-cell office:value-type="float" office:value="0.29044515" table:style-name="c1">
            <text:p>0.29045</text:p>
          </table:table-cell>
          <table:table-cell office:value-type="string" table:style-name="c1">
            <text:p>2026-03-09 03:45</text:p>
          </table:table-cell>
          <table:table-cell office:value-type="float" office:value="0.29055465" table:style-name="c1">
            <text:p>0.29055</text:p>
          </table:table-cell>
          <table:table-cell office:value-type="float" office:value="-0.16227461376095986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29164575" table:style-name="c1">
            <text:p>0.29165</text:p>
          </table:table-cell>
          <table:table-cell office:value-type="string" table:style-name="c1">
            <text:p>2026-03-11 17:45</text:p>
          </table:table-cell>
          <table:table-cell office:value-type="float" office:value="0.29095445000000003" table:style-name="c1">
            <text:p>0.29095</text:p>
          </table:table-cell>
          <table:table-cell office:value-type="float" office:value="-0.43646031034223487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290145" table:style-name="c1">
            <text:p>0.29014</text:p>
          </table:table-cell>
          <table:table-cell office:value-type="string" table:style-name="c1">
            <text:p>2026-03-13 01:00</text:p>
          </table:table-cell>
          <table:table-cell office:value-type="float" office:value="0.2900549" table:style-name="c1">
            <text:p>0.29005</text:p>
          </table:table-cell>
          <table:table-cell office:value-type="float" office:value="-0.23089136297367308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4:30</text:p>
          </table:table-cell>
          <table:table-cell office:value-type="float" office:value="0.2903451" table:style-name="c1">
            <text:p>0.29035</text:p>
          </table:table-cell>
          <table:table-cell office:value-type="string" table:style-name="c1">
            <text:p>2026-03-13 15:00</text:p>
          </table:table-cell>
          <table:table-cell office:value-type="float" office:value="0.28975505" table:style-name="c1">
            <text:p>0.28976</text:p>
          </table:table-cell>
          <table:table-cell office:value-type="float" office:value="-0.40271743692247286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3:00</text:p>
          </table:table-cell>
          <table:table-cell office:value-type="float" office:value="0.29724854999999994" table:style-name="c1">
            <text:p>0.29725</text:p>
          </table:table-cell>
          <table:table-cell office:value-type="string" table:style-name="c1">
            <text:p>2026-03-14 13:30</text:p>
          </table:table-cell>
          <table:table-cell office:value-type="float" office:value="0.2970514" table:style-name="c1">
            <text:p>0.29705</text:p>
          </table:table-cell>
          <table:table-cell office:value-type="float" office:value="-0.2660923824859385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30</text:p>
          </table:table-cell>
          <table:table-cell office:value-type="float" office:value="0.2973486" table:style-name="c1">
            <text:p>0.29735</text:p>
          </table:table-cell>
          <table:table-cell office:value-type="string" table:style-name="c1">
            <text:p>2026-03-15 10:00</text:p>
          </table:table-cell>
          <table:table-cell office:value-type="float" office:value="0.2970514" table:style-name="c1">
            <text:p>0.29705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2:45</text:p>
          </table:table-cell>
          <table:table-cell office:value-type="float" office:value="0.2965482" table:style-name="c1">
            <text:p>0.29655</text:p>
          </table:table-cell>
          <table:table-cell office:value-type="string" table:style-name="c1">
            <text:p>2026-03-17 03:15</text:p>
          </table:table-cell>
          <table:table-cell office:value-type="float" office:value="0.29605190000000003" table:style-name="c1">
            <text:p>0.29605</text:p>
          </table:table-cell>
          <table:table-cell office:value-type="float" office:value="-0.3669244150192097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15</text:p>
          </table:table-cell>
          <table:table-cell office:value-type="float" office:value="0.2995497" table:style-name="c1">
            <text:p>0.29955</text:p>
          </table:table-cell>
          <table:table-cell office:value-type="string" table:style-name="c1">
            <text:p>2026-03-17 08:45</text:p>
          </table:table-cell>
          <table:table-cell office:value-type="float" office:value="0.29975005" table:style-name="c1">
            <text:p>0.29975</text:p>
          </table:table-cell>
          <table:table-cell office:value-type="float" office:value="-0.13314997476212564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00</text:p>
          </table:table-cell>
          <table:table-cell office:value-type="float" office:value="0.2999499" table:style-name="c1">
            <text:p>0.29995</text:p>
          </table:table-cell>
          <table:table-cell office:value-type="string" table:style-name="c1">
            <text:p>2026-03-17 09:30</text:p>
          </table:table-cell>
          <table:table-cell office:value-type="float" office:value="0.30154915000000004" table:style-name="c1">
            <text:p>0.30155</text:p>
          </table:table-cell>
          <table:table-cell office:value-type="float" office:value="0.3322065615458003" table:style-name="c13">
            <text:p>+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5:00</text:p>
          </table:table-cell>
          <table:table-cell office:value-type="float" office:value="0.3047523" table:style-name="c1">
            <text:p>0.30475</text:p>
          </table:table-cell>
          <table:table-cell office:value-type="string" table:style-name="c1">
            <text:p>2026-03-17 15:30</text:p>
          </table:table-cell>
          <table:table-cell office:value-type="float" office:value="0.30364810000000003" table:style-name="c1">
            <text:p>0.30365</text:p>
          </table:table-cell>
          <table:table-cell office:value-type="float" office:value="-0.5615027522023475" table:style-name="c12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0:15</text:p>
          </table:table-cell>
          <table:table-cell office:value-type="float" office:value="0.30665325" table:style-name="c1">
            <text:p>0.30665</text:p>
          </table:table-cell>
          <table:table-cell office:value-type="string" table:style-name="c1">
            <text:p>2026-03-17 20:45</text:p>
          </table:table-cell>
          <table:table-cell office:value-type="float" office:value="0.3054472" table:style-name="c1">
            <text:p>0.30545</text:p>
          </table:table-cell>
          <table:table-cell office:value-type="float" office:value="-0.5924081850754881" table:style-name="c12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0:15</text:p>
          </table:table-cell>
          <table:table-cell office:value-type="float" office:value="0.30845415" table:style-name="c1">
            <text:p>0.30845</text:p>
          </table:table-cell>
          <table:table-cell office:value-type="string" table:style-name="c1">
            <text:p>2026-03-18 00:45</text:p>
          </table:table-cell>
          <table:table-cell office:value-type="float" office:value="0.307846" table:style-name="c1">
            <text:p>0.30785</text:p>
          </table:table-cell>
          <table:table-cell office:value-type="float" office:value="-0.39666645885619856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9 22:45</text:p>
          </table:table-cell>
          <table:table-cell office:value-type="float" office:value="0.30425204999999994" table:style-name="c1">
            <text:p>0.30425</text:p>
          </table:table-cell>
          <table:table-cell office:value-type="string" table:style-name="c1">
            <text:p>2026-03-19 23:15</text:p>
          </table:table-cell>
          <table:table-cell office:value-type="float" office:value="0.30454765000000006" table:style-name="c1">
            <text:p>0.30455</text:p>
          </table:table-cell>
          <table:table-cell office:value-type="float" office:value="-0.10293792674522795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0:30</text:p>
          </table:table-cell>
          <table:table-cell office:value-type="float" office:value="0.3069534" table:style-name="c1">
            <text:p>0.30695</text:p>
          </table:table-cell>
          <table:table-cell office:value-type="string" table:style-name="c1">
            <text:p>2026-03-20 11:00</text:p>
          </table:table-cell>
          <table:table-cell office:value-type="float" office:value="0.3070464" table:style-name="c1">
            <text:p>0.30705</text:p>
          </table:table-cell>
          <table:table-cell office:value-type="float" office:value="-0.16966280666707023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4:15</text:p>
          </table:table-cell>
          <table:table-cell office:value-type="float" office:value="0.30965475" table:style-name="c1">
            <text:p>0.30965</text:p>
          </table:table-cell>
          <table:table-cell office:value-type="string" table:style-name="c1">
            <text:p>2026-03-21 04:45</text:p>
          </table:table-cell>
          <table:table-cell office:value-type="float" office:value="0.30874555000000004" table:style-name="c1">
            <text:p>0.30875</text:p>
          </table:table-cell>
          <table:table-cell office:value-type="float" office:value="-0.49293038600246586" table:style-name="c12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6:45</text:p>
          </table:table-cell>
          <table:table-cell office:value-type="float" office:value="0.31245615" table:style-name="c1">
            <text:p>0.31246</text:p>
          </table:table-cell>
          <table:table-cell office:value-type="string" table:style-name="c1">
            <text:p>2026-03-21 07:15</text:p>
          </table:table-cell>
          <table:table-cell office:value-type="float" office:value="0.31214385000000006" table:style-name="c1">
            <text:p>0.31214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23:45</text:p>
          </table:table-cell>
          <table:table-cell office:value-type="float" office:value="0.3133566" table:style-name="c1">
            <text:p>0.31336</text:p>
          </table:table-cell>
          <table:table-cell office:value-type="string" table:style-name="c1">
            <text:p>2026-03-22 00:15</text:p>
          </table:table-cell>
          <table:table-cell office:value-type="float" office:value="0.3108445" table:style-name="c1">
            <text:p>0.31084</text:p>
          </table:table-cell>
          <table:table-cell office:value-type="float" office:value="-0.9999719666028972" table:style-name="c12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1:15</text:p>
          </table:table-cell>
          <table:table-cell office:value-type="float" office:value="0.3099549" table:style-name="c1">
            <text:p>0.30995</text:p>
          </table:table-cell>
          <table:table-cell office:value-type="string" table:style-name="c1">
            <text:p>2026-03-23 11:45</text:p>
          </table:table-cell>
          <table:table-cell office:value-type="float" office:value="0.30914535000000004" table:style-name="c1">
            <text:p>0.30915</text:p>
          </table:table-cell>
          <table:table-cell office:value-type="float" office:value="-0.4605610540920346" table:style-name="c12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4 12:00</text:p>
          </table:table-cell>
          <table:table-cell office:value-type="float" office:value="0.31034475" table:style-name="c1">
            <text:p>0.31034</text:p>
          </table:table-cell>
          <table:table-cell office:value-type="float" office:value="-0.4919363382436148" table:style-name="c12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6:15</text:p>
          </table:table-cell>
          <table:table-cell office:value-type="float" office:value="0.312156" table:style-name="c1">
            <text:p>0.31216</text:p>
          </table:table-cell>
          <table:table-cell office:value-type="string" table:style-name="c1">
            <text:p>2026-03-25 16:45</text:p>
          </table:table-cell>
          <table:table-cell office:value-type="float" office:value="0.31254365" table:style-name="c1">
            <text:p>0.31254</text:p>
          </table:table-cell>
          <table:table-cell office:value-type="float" office:value="-0.07596354269980843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04:30</text:p>
          </table:table-cell>
          <table:table-cell office:value-type="float" office:value="0.31545765000000003" table:style-name="c1">
            <text:p>0.31546</text:p>
          </table:table-cell>
          <table:table-cell office:value-type="string" table:style-name="c1">
            <text:p>2026-03-26 05:00</text:p>
          </table:table-cell>
          <table:table-cell office:value-type="float" office:value="0.3154422" table:style-name="c1">
            <text:p>0.31544</text:p>
          </table:table-cell>
          <table:table-cell office:value-type="float" office:value="-0.20478785592933368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2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6 22:00</text:p>
          </table:table-cell>
          <table:table-cell office:value-type="float" office:value="0.31094445" table:style-name="c1">
            <text:p>0.31094</text:p>
          </table:table-cell>
          <table:table-cell office:value-type="float" office:value="-0.2996502248875599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4:45</text:p>
          </table:table-cell>
          <table:table-cell office:value-type="float" office:value="0.31365675" table:style-name="c1">
            <text:p>0.31366</text:p>
          </table:table-cell>
          <table:table-cell office:value-type="string" table:style-name="c1">
            <text:p>2026-03-27 05:15</text:p>
          </table:table-cell>
          <table:table-cell office:value-type="float" office:value="0.3148425" table:style-name="c1">
            <text:p>0.31484</text:p>
          </table:table-cell>
          <table:table-cell office:value-type="float" office:value="0.17738494150056905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5:30</text:p>
          </table:table-cell>
          <table:table-cell office:value-type="float" office:value="0.3149574" table:style-name="c1">
            <text:p>0.31496</text:p>
          </table:table-cell>
          <table:table-cell office:value-type="string" table:style-name="c1">
            <text:p>2026-03-27 06:00</text:p>
          </table:table-cell>
          <table:table-cell office:value-type="float" office:value="0.31454265" table:style-name="c1">
            <text:p>0.31454</text:p>
          </table:table-cell>
          <table:table-cell office:value-type="float" office:value="-0.33132123815792225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11:45</text:p>
          </table:table-cell>
          <table:table-cell office:value-type="float" office:value="0.31405695" table:style-name="c1">
            <text:p>0.31406</text:p>
          </table:table-cell>
          <table:table-cell office:value-type="string" table:style-name="c1">
            <text:p>2026-03-28 12:15</text:p>
          </table:table-cell>
          <table:table-cell office:value-type="float" office:value="0.3144427" table:style-name="c1">
            <text:p>0.31444</text:p>
          </table:table-cell>
          <table:table-cell office:value-type="float" office:value="-0.0773174920344899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12:30</text:p>
          </table:table-cell>
          <table:table-cell office:value-type="float" office:value="0.3159579" table:style-name="c1">
            <text:p>0.31596</text:p>
          </table:table-cell>
          <table:table-cell office:value-type="string" table:style-name="c1">
            <text:p>2026-03-28 13:00</text:p>
          </table:table-cell>
          <table:table-cell office:value-type="float" office:value="0.31464260000000005" table:style-name="c1">
            <text:p>0.31464</text:p>
          </table:table-cell>
          <table:table-cell office:value-type="float" office:value="-0.6153574756003866" table:style-name="c12">
            <text:p>-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09:00</text:p>
          </table:table-cell>
          <table:table-cell office:value-type="float" office:value="0.31965974999999996" table:style-name="c1">
            <text:p>0.31966</text:p>
          </table:table-cell>
          <table:table-cell office:value-type="string" table:style-name="c1">
            <text:p>2026-03-29 09:30</text:p>
          </table:table-cell>
          <table:table-cell office:value-type="float" office:value="0.3196401" table:style-name="c1">
            <text:p>0.31964</text:p>
          </table:table-cell>
          <table:table-cell office:value-type="float" office:value="-0.2060348729860162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20:15</text:p>
          </table:table-cell>
          <table:table-cell office:value-type="float" office:value="0.32306145000000003" table:style-name="c1">
            <text:p>0.32306</text:p>
          </table:table-cell>
          <table:table-cell office:value-type="string" table:style-name="c1">
            <text:p>2026-03-29 20:45</text:p>
          </table:table-cell>
          <table:table-cell office:value-type="float" office:value="0.32323830000000003" table:style-name="c1">
            <text:p>0.32324</text:p>
          </table:table-cell>
          <table:table-cell office:value-type="float" office:value="-0.1452675216123911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8:45</text:p>
          </table:table-cell>
          <table:table-cell office:value-type="float" office:value="0.3211605" table:style-name="c1">
            <text:p>0.32116</text:p>
          </table:table-cell>
          <table:table-cell office:value-type="string" table:style-name="c1">
            <text:p>2026-03-30 19:15</text:p>
          </table:table-cell>
          <table:table-cell office:value-type="float" office:value="0.31954015" table:style-name="c1">
            <text:p>0.31954</text:p>
          </table:table-cell>
          <table:table-cell office:value-type="float" office:value="-0.7034211118272626" table:style-name="c12">
            <text:p>-0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30</text:p>
          </table:table-cell>
          <table:table-cell office:value-type="float" office:value="0.31825905" table:style-name="c1">
            <text:p>0.31826</text:p>
          </table:table-cell>
          <table:table-cell office:value-type="string" table:style-name="c1">
            <text:p>2026-04-06 12:00</text:p>
          </table:table-cell>
          <table:table-cell office:value-type="float" office:value="0.31824080000000005" table:style-name="c1">
            <text:p>0.31824</text:p>
          </table:table-cell>
          <table:table-cell office:value-type="float" office:value="-0.20562285949132786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02:45</text:p>
          </table:table-cell>
          <table:table-cell office:value-type="float" office:value="0.32005995" table:style-name="c1">
            <text:p>0.32006</text:p>
          </table:table-cell>
          <table:table-cell office:value-type="string" table:style-name="c1">
            <text:p>2026-04-12 03:15</text:p>
          </table:table-cell>
          <table:table-cell office:value-type="float" office:value="0.31984" table:style-name="c1">
            <text:p>0.31984</text:p>
          </table:table-cell>
          <table:table-cell office:value-type="float" office:value="-0.26848412617698214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08:00</text:p>
          </table:table-cell>
          <table:table-cell office:value-type="float" office:value="0.32176079999999996" table:style-name="c1">
            <text:p>0.32176</text:p>
          </table:table-cell>
          <table:table-cell office:value-type="string" table:style-name="c1">
            <text:p>2026-04-13 08:30</text:p>
          </table:table-cell>
          <table:table-cell office:value-type="float" office:value="0.32183900000000004" table:style-name="c1">
            <text:p>0.32184</text:p>
          </table:table-cell>
          <table:table-cell office:value-type="float" office:value="-0.1756448147194667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0.32646315" table:style-name="c1">
            <text:p>0.32646</text:p>
          </table:table-cell>
          <table:table-cell office:value-type="string" table:style-name="c1">
            <text:p>2026-04-15 13:00</text:p>
          </table:table-cell>
          <table:table-cell office:value-type="float" office:value="0.32673655" table:style-name="c1">
            <text:p>0.32674</text:p>
          </table:table-cell>
          <table:table-cell office:value-type="float" office:value="-0.11632135616223005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7:00</text:p>
          </table:table-cell>
          <table:table-cell office:value-type="float" office:value="0.3275637" table:style-name="c1">
            <text:p>0.32756</text:p>
          </table:table-cell>
          <table:table-cell office:value-type="string" table:style-name="c1">
            <text:p>2026-04-18 07:30</text:p>
          </table:table-cell>
          <table:table-cell office:value-type="float" office:value="0.32693645000000005" table:style-name="c1">
            <text:p>0.32694</text:p>
          </table:table-cell>
          <table:table-cell office:value-type="float" office:value="-0.39100668466924837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06:15</text:p>
          </table:table-cell>
          <table:table-cell office:value-type="float" office:value="0.32916449999999997" table:style-name="c1">
            <text:p>0.32916</text:p>
          </table:table-cell>
          <table:table-cell office:value-type="string" table:style-name="c1">
            <text:p>2026-04-19 06:45</text:p>
          </table:table-cell>
          <table:table-cell office:value-type="float" office:value="0.32923530000000006" table:style-name="c1">
            <text:p>0.32924</text:p>
          </table:table-cell>
          <table:table-cell office:value-type="float" office:value="-0.1784339941579005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08:30</text:p>
          </table:table-cell>
          <table:table-cell office:value-type="float" office:value="0.33146564999999995" table:style-name="c1">
            <text:p>0.33147</text:p>
          </table:table-cell>
          <table:table-cell office:value-type="string" table:style-name="c1">
            <text:p>2026-04-19 09:00</text:p>
          </table:table-cell>
          <table:table-cell office:value-type="float" office:value="0.33353315" table:style-name="c1">
            <text:p>0.33353</text:p>
          </table:table-cell>
          <table:table-cell office:value-type="float" office:value="0.4225980077121383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15:00</text:p>
          </table:table-cell>
          <table:table-cell office:value-type="float" office:value="0.332166" table:style-name="c1">
            <text:p>0.33217</text:p>
          </table:table-cell>
          <table:table-cell office:value-type="string" table:style-name="c1">
            <text:p>2026-04-19 15:30</text:p>
          </table:table-cell>
          <table:table-cell office:value-type="float" office:value="0.3336331" table:style-name="c1">
            <text:p>0.33363</text:p>
          </table:table-cell>
          <table:table-cell office:value-type="float" office:value="0.24089384015821835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02:15</text:p>
          </table:table-cell>
          <table:table-cell office:value-type="float" office:value="0.33186584999999996" table:style-name="c1">
            <text:p>0.33187</text:p>
          </table:table-cell>
          <table:table-cell office:value-type="string" table:style-name="c1">
            <text:p>2026-04-20 02:45</text:p>
          </table:table-cell>
          <table:table-cell office:value-type="float" office:value="0.33133425000000005" table:style-name="c1">
            <text:p>0.33133</text:p>
          </table:table-cell>
          <table:table-cell office:value-type="float" office:value="-0.35976499713660237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45</text:p>
          </table:table-cell>
          <table:table-cell office:value-type="float" office:value="0.3343671" table:style-name="c1">
            <text:p>0.33437</text:p>
          </table:table-cell>
          <table:table-cell office:value-type="string" table:style-name="c1">
            <text:p>2026-04-21 21:15</text:p>
          </table:table-cell>
          <table:table-cell office:value-type="float" office:value="0.33513235" table:style-name="c1">
            <text:p>0.33513</text:p>
          </table:table-cell>
          <table:table-cell office:value-type="float" office:value="0.02850771871696356" table:style-name="c13">
            <text:p>+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0.32696339999999996" table:style-name="c1">
            <text:p>0.32696</text:p>
          </table:table-cell>
          <table:table-cell office:value-type="string" table:style-name="c1">
            <text:p>2026-05-01 13:15</text:p>
          </table:table-cell>
          <table:table-cell office:value-type="float" office:value="0.3266366" table:style-name="c1">
            <text:p>0.3266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3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3 06:15</text:p>
          </table:table-cell>
          <table:table-cell office:value-type="float" office:value="0.33873055" table:style-name="c1">
            <text:p>0.33873</text:p>
          </table:table-cell>
          <table:table-cell office:value-type="float" office:value="0.23271592638864913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7:30</text:p>
          </table:table-cell>
          <table:table-cell office:value-type="float" office:value="0.34077029999999997" table:style-name="c1">
            <text:p>0.34077</text:p>
          </table:table-cell>
          <table:table-cell office:value-type="string" table:style-name="c1">
            <text:p>2026-05-05 08:00</text:p>
          </table:table-cell>
          <table:table-cell office:value-type="float" office:value="0.34062960000000003" table:style-name="c1">
            <text:p>0.34063</text:p>
          </table:table-cell>
          <table:table-cell office:value-type="float" office:value="-0.24110627316992206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4:30</text:p>
          </table:table-cell>
          <table:table-cell office:value-type="float" office:value="0.34097039999999995" table:style-name="c1">
            <text:p>0.34097</text:p>
          </table:table-cell>
          <table:table-cell office:value-type="string" table:style-name="c1">
            <text:p>2026-05-05 15:00</text:p>
          </table:table-cell>
          <table:table-cell office:value-type="float" office:value="0.34102940000000004" table:style-name="c1">
            <text:p>0.34103</text:p>
          </table:table-cell>
          <table:table-cell office:value-type="float" office:value="-0.1826310350106386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7:15</text:p>
          </table:table-cell>
          <table:table-cell office:value-type="float" office:value="0.3505752" table:style-name="c1">
            <text:p>0.35058</text:p>
          </table:table-cell>
          <table:table-cell office:value-type="string" table:style-name="c1">
            <text:p>2026-05-08 07:45</text:p>
          </table:table-cell>
          <table:table-cell office:value-type="float" office:value="0.3514242" table:style-name="c1">
            <text:p>0.35142</text:p>
          </table:table-cell>
          <table:table-cell office:value-type="float" office:value="0.04178932913680988" table:style-name="c13">
            <text:p>+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00</text:p>
          </table:table-cell>
          <table:table-cell office:value-type="float" office:value="0.35167574999999995" table:style-name="c1">
            <text:p>0.35168</text:p>
          </table:table-cell>
          <table:table-cell office:value-type="string" table:style-name="c1">
            <text:p>2026-05-08 08:30</text:p>
          </table:table-cell>
          <table:table-cell office:value-type="float" office:value="0.35092445000000005" table:style-name="c1">
            <text:p>0.35092</text:p>
          </table:table-cell>
          <table:table-cell office:value-type="float" office:value="-0.4131072374338962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5:30</text:p>
          </table:table-cell>
          <table:table-cell office:value-type="float" office:value="0.3533766" table:style-name="c1">
            <text:p>0.35338</text:p>
          </table:table-cell>
          <table:table-cell office:value-type="string" table:style-name="c1">
            <text:p>2026-05-09 06:00</text:p>
          </table:table-cell>
          <table:table-cell office:value-type="float" office:value="0.35262360000000004" table:style-name="c1">
            <text:p>0.35262</text:p>
          </table:table-cell>
          <table:table-cell office:value-type="float" office:value="-0.4125611532851847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1:30</text:p>
          </table:table-cell>
          <table:table-cell office:value-type="float" office:value="0.35007495" table:style-name="c1">
            <text:p>0.35007</text:p>
          </table:table-cell>
          <table:table-cell office:value-type="string" table:style-name="c1">
            <text:p>2026-05-10 12:00</text:p>
          </table:table-cell>
          <table:table-cell office:value-type="float" office:value="0.3502248" table:style-name="c1">
            <text:p>0.35022</text:p>
          </table:table-cell>
          <table:table-cell office:value-type="float" office:value="-0.15718044812974563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2:45</text:p>
          </table:table-cell>
          <table:table-cell office:value-type="float" office:value="0.35067524999999994" table:style-name="c1">
            <text:p>0.35068</text:p>
          </table:table-cell>
          <table:table-cell office:value-type="string" table:style-name="c1">
            <text:p>2026-05-14 03:15</text:p>
          </table:table-cell>
          <table:table-cell office:value-type="float" office:value="0.3502248" table:style-name="c1">
            <text:p>0.35022</text:p>
          </table:table-cell>
          <table:table-cell office:value-type="float" office:value="-0.3280954031400607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0:15</text:p>
          </table:table-cell>
          <table:table-cell office:value-type="float" office:value="0.35427705" table:style-name="c1">
            <text:p>0.35428</text:p>
          </table:table-cell>
          <table:table-cell office:value-type="string" table:style-name="c1">
            <text:p>2026-05-14 10:45</text:p>
          </table:table-cell>
          <table:table-cell office:value-type="float" office:value="0.3546226" table:style-name="c1">
            <text:p>0.35462</text:p>
          </table:table-cell>
          <table:table-cell office:value-type="float" office:value="-0.1025583162668875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7:00</text:p>
          </table:table-cell>
          <table:table-cell office:value-type="float" office:value="0.35467724999999994" table:style-name="c1">
            <text:p>0.35468</text:p>
          </table:table-cell>
          <table:table-cell office:value-type="string" table:style-name="c1">
            <text:p>2026-05-16 17:30</text:p>
          </table:table-cell>
          <table:table-cell office:value-type="float" office:value="0.353823" table:style-name="c1">
            <text:p>0.35382</text:p>
          </table:table-cell>
          <table:table-cell office:value-type="float" office:value="-0.44027131060700997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11:00</text:p>
          </table:table-cell>
          <table:table-cell office:value-type="float" office:value="0.35727855" table:style-name="c1">
            <text:p>0.35728</text:p>
          </table:table-cell>
          <table:table-cell office:value-type="string" table:style-name="c1">
            <text:p>2026-05-18 11:30</text:p>
          </table:table-cell>
          <table:table-cell office:value-type="float" office:value="0.35632175" table:style-name="c1">
            <text:p>0.35632</text:p>
          </table:table-cell>
          <table:table-cell office:value-type="float" office:value="-0.4671669145125068" table:style-name="c12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2:30</text:p>
          </table:table-cell>
          <table:table-cell office:value-type="float" office:value="0.36368174999999997" table:style-name="c1">
            <text:p>0.36368</text:p>
          </table:table-cell>
          <table:table-cell office:value-type="string" table:style-name="c1">
            <text:p>2026-05-21 13:00</text:p>
          </table:table-cell>
          <table:table-cell office:value-type="float" office:value="0.3630184" table:style-name="c1">
            <text:p>0.36302</text:p>
          </table:table-cell>
          <table:table-cell office:value-type="float" office:value="-0.38193386981886235" table:style-name="c12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10:30</text:p>
          </table:table-cell>
          <table:table-cell office:value-type="float" office:value="0.3619809" table:style-name="c1">
            <text:p>0.36198</text:p>
          </table:table-cell>
          <table:table-cell office:value-type="string" table:style-name="c1">
            <text:p>2026-05-23 11:00</text:p>
          </table:table-cell>
          <table:table-cell office:value-type="float" office:value="0.3592203" table:style-name="c1">
            <text:p>0.35922</text:p>
          </table:table-cell>
          <table:table-cell office:value-type="float" office:value="-0.9610124124504904" table:style-name="c12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9:15</text:p>
          </table:table-cell>
          <table:table-cell office:value-type="float" office:value="0.36348165" table:style-name="c1">
            <text:p>0.36348</text:p>
          </table:table-cell>
          <table:table-cell office:value-type="string" table:style-name="c1">
            <text:p>2026-05-24 09:45</text:p>
          </table:table-cell>
          <table:table-cell office:value-type="float" office:value="0.36351815000000004" table:style-name="c1">
            <text:p>0.36352</text:p>
          </table:table-cell>
          <table:table-cell office:value-type="float" office:value="-0.18987830110541726" table:style-name="c12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5:45</text:p>
          </table:table-cell>
          <table:table-cell office:value-type="float" office:value="0.36608294999999996" table:style-name="c1">
            <text:p>0.36608</text:p>
          </table:table-cell>
          <table:table-cell office:value-type="string" table:style-name="c1">
            <text:p>2026-05-25 06:15</text:p>
          </table:table-cell>
          <table:table-cell office:value-type="float" office:value="0.3666166" table:style-name="c1">
            <text:p>0.36662</text:p>
          </table:table-cell>
          <table:table-cell office:value-type="float" office:value="-0.05441842713513889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30</text:p>
          </table:table-cell>
          <table:table-cell office:value-type="float" office:value="0.36828405" table:style-name="c1">
            <text:p>0.36828</text:p>
          </table:table-cell>
          <table:table-cell office:value-type="string" table:style-name="c1">
            <text:p>2026-05-25 13:00</text:p>
          </table:table-cell>
          <table:table-cell office:value-type="float" office:value="0.36971505000000005" table:style-name="c1">
            <text:p>0.36972</text:p>
          </table:table-cell>
          <table:table-cell office:value-type="float" office:value="0.1878820478514065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15</text:p>
          </table:table-cell>
          <table:table-cell office:value-type="float" office:value="0.37238609999999994" table:style-name="c1">
            <text:p>0.37239</text:p>
          </table:table-cell>
          <table:table-cell office:value-type="string" table:style-name="c1">
            <text:p>2026-05-25 14:45</text:p>
          </table:table-cell>
          <table:table-cell office:value-type="float" office:value="0.37291345000000004" table:style-name="c1">
            <text:p>0.37291</text:p>
          </table:table-cell>
          <table:table-cell office:value-type="float" office:value="-0.058569314630685376" table:style-name="c12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2:00</text:p>
          </table:table-cell>
          <table:table-cell office:value-type="float" office:value="0.37608795" table:style-name="c1">
            <text:p>0.37609</text:p>
          </table:table-cell>
          <table:table-cell office:value-type="string" table:style-name="c1">
            <text:p>2026-05-26 12:30</text:p>
          </table:table-cell>
          <table:table-cell office:value-type="float" office:value="0.37581200000000003" table:style-name="c1">
            <text:p>0.37581</text:p>
          </table:table-cell>
          <table:table-cell office:value-type="float" office:value="-0.2731271203982977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12:00</text:p>
          </table:table-cell>
          <table:table-cell office:value-type="float" office:value="0.37428704999999995" table:style-name="c1">
            <text:p>0.37429</text:p>
          </table:table-cell>
          <table:table-cell office:value-type="string" table:style-name="c1">
            <text:p>2026-05-27 12:30</text:p>
          </table:table-cell>
          <table:table-cell office:value-type="float" office:value="0.373813" table:style-name="c1">
            <text:p>0.37381</text:p>
          </table:table-cell>
          <table:table-cell office:value-type="float" office:value="-0.32630094655957675" table:style-name="c12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5:15</text:p>
          </table:table-cell>
          <table:table-cell office:value-type="float" office:value="0.35167574999999995" table:style-name="c1">
            <text:p>0.35168</text:p>
          </table:table-cell>
          <table:table-cell office:value-type="string" table:style-name="c1">
            <text:p>2026-06-01 05:45</text:p>
          </table:table-cell>
          <table:table-cell office:value-type="float" office:value="0.35232375" table:style-name="c1">
            <text:p>0.35232</text:p>
          </table:table-cell>
          <table:table-cell office:value-type="float" office:value="-0.016007693521646882" table:style-name="c12">
            <text:p>-0.0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01:15</text:p>
          </table:table-cell>
          <table:table-cell office:value-type="float" office:value="4.016007" table:style-name="c9">
            <text:p>4.016</text:p>
          </table:table-cell>
          <table:table-cell office:value-type="string" table:style-name="c9">
            <text:p>2026-03-05 01:45</text:p>
          </table:table-cell>
          <table:table-cell office:value-type="float" office:value="3.9670155" table:style-name="c9">
            <text:p>3.967</text:p>
          </table:table-cell>
          <table:table-cell office:value-type="float" office:value="-1.4173671506175212" table:style-name="c10">
            <text:p>-1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19:15</text:p>
          </table:table-cell>
          <table:table-cell office:value-type="float" office:value="4.020009" table:style-name="c9">
            <text:p>4.02</text:p>
          </table:table-cell>
          <table:table-cell office:value-type="string" table:style-name="c9">
            <text:p>2026-03-05 19:45</text:p>
          </table:table-cell>
          <table:table-cell office:value-type="float" office:value="3.9850065000000003" table:style-name="c9">
            <text:p>3.985</text:p>
          </table:table-cell>
          <table:table-cell office:value-type="float" office:value="-1.06886646257508" table:style-name="c10">
            <text:p>-1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6 08:00</text:p>
          </table:table-cell>
          <table:table-cell office:value-type="float" office:value="4.014005999999999" table:style-name="c9">
            <text:p>4.014</text:p>
          </table:table-cell>
          <table:table-cell office:value-type="string" table:style-name="c9">
            <text:p>2026-03-06 08:30</text:p>
          </table:table-cell>
          <table:table-cell office:value-type="float" office:value="3.982008" table:style-name="c9">
            <text:p>3.982</text:p>
          </table:table-cell>
          <table:table-cell office:value-type="float" office:value="-0.9954652283030829" table:style-name="c10">
            <text:p>-1.0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3:45</text:p>
          </table:table-cell>
          <table:table-cell office:value-type="float" office:value="3.9149564999999997" table:style-name="c9">
            <text:p>3.915</text:p>
          </table:table-cell>
          <table:table-cell office:value-type="string" table:style-name="c9">
            <text:p>2026-03-09 14:15</text:p>
          </table:table-cell>
          <table:table-cell office:value-type="float" office:value="3.8970505" table:style-name="c9">
            <text:p>3.8971</text:p>
          </table:table-cell>
          <table:table-cell office:value-type="float" office:value="-0.6563598841902718" table:style-name="c10">
            <text:p>-0.7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4:30</text:p>
          </table:table-cell>
          <table:table-cell office:value-type="float" office:value="3.919959" table:style-name="c9">
            <text:p>3.92</text:p>
          </table:table-cell>
          <table:table-cell office:value-type="string" table:style-name="c9">
            <text:p>2026-03-09 15:00</text:p>
          </table:table-cell>
          <table:table-cell office:value-type="float" office:value="3.9370305" table:style-name="c9">
            <text:p>3.937</text:p>
          </table:table-cell>
          <table:table-cell office:value-type="float" office:value="0.23473143546910435" table:style-name="c11">
            <text:p>+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9 19:30</text:p>
          </table:table-cell>
          <table:table-cell office:value-type="float" office:value="3.9769875" table:style-name="c9">
            <text:p>3.977</text:p>
          </table:table-cell>
          <table:table-cell office:value-type="string" table:style-name="c9">
            <text:p>2026-03-09 20:00</text:p>
          </table:table-cell>
          <table:table-cell office:value-type="float" office:value="3.9250365000000005" table:style-name="c9">
            <text:p>3.925</text:p>
          </table:table-cell>
          <table:table-cell office:value-type="float" office:value="-1.5035789768888974" table:style-name="c10">
            <text:p>-1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5:00</text:p>
          </table:table-cell>
          <table:table-cell office:value-type="float" office:value="3.9729855" table:style-name="c9">
            <text:p>3.973</text:p>
          </table:table-cell>
          <table:table-cell office:value-type="string" table:style-name="c9">
            <text:p>2026-03-10 15:30</text:p>
          </table:table-cell>
          <table:table-cell office:value-type="float" office:value="3.9310335" table:style-name="c9">
            <text:p>3.931</text:p>
          </table:table-cell>
          <table:table-cell office:value-type="float" office:value="-1.2537205576637511" table:style-name="c10">
            <text:p>-1.3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6:00</text:p>
          </table:table-cell>
          <table:table-cell office:value-type="float" office:value="3.943971" table:style-name="c9">
            <text:p>3.944</text:p>
          </table:table-cell>
          <table:table-cell office:value-type="string" table:style-name="c9">
            <text:p>2026-03-10 16:30</text:p>
          </table:table-cell>
          <table:table-cell office:value-type="float" office:value="3.930034" table:style-name="c9">
            <text:p>3.93</text:p>
          </table:table-cell>
          <table:table-cell office:value-type="float" office:value="-0.5525684130537445" table:style-name="c10">
            <text:p>-0.6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1 13:45</text:p>
          </table:table-cell>
          <table:table-cell office:value-type="float" office:value="3.9259619999999997" table:style-name="c9">
            <text:p>3.926</text:p>
          </table:table-cell>
          <table:table-cell office:value-type="string" table:style-name="c9">
            <text:p>2026-03-11 14:15</text:p>
          </table:table-cell>
          <table:table-cell office:value-type="float" office:value="3.91804" table:style-name="c9">
            <text:p>3.918</text:p>
          </table:table-cell>
          <table:table-cell office:value-type="float" office:value="-0.40128157022405464" table:style-name="c10">
            <text:p>-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7:45</text:p>
          </table:table-cell>
          <table:table-cell office:value-type="float" office:value="3.887943" table:style-name="c9">
            <text:p>3.8879</text:p>
          </table:table-cell>
          <table:table-cell office:value-type="string" table:style-name="c9">
            <text:p>2026-03-12 08:15</text:p>
          </table:table-cell>
          <table:table-cell office:value-type="float" office:value="3.8820580000000002" table:style-name="c9">
            <text:p>3.8821</text:p>
          </table:table-cell>
          <table:table-cell office:value-type="float" office:value="-0.3509628084053751" table:style-name="c10">
            <text:p>-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9:45</text:p>
          </table:table-cell>
          <table:table-cell office:value-type="float" office:value="3.923961" table:style-name="c9">
            <text:p>3.924</text:p>
          </table:table-cell>
          <table:table-cell office:value-type="string" table:style-name="c9">
            <text:p>2026-03-12 10:15</text:p>
          </table:table-cell>
          <table:table-cell office:value-type="float" office:value="3.902048" table:style-name="c9">
            <text:p>3.902</text:p>
          </table:table-cell>
          <table:table-cell office:value-type="float" office:value="-0.7572244971853603" table:style-name="c10">
            <text:p>-0.8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0:45</text:p>
          </table:table-cell>
          <table:table-cell office:value-type="float" office:value="3.9409695" table:style-name="c9">
            <text:p>3.941</text:p>
          </table:table-cell>
          <table:table-cell office:value-type="string" table:style-name="c9">
            <text:p>2026-03-12 11:15</text:p>
          </table:table-cell>
          <table:table-cell office:value-type="float" office:value="3.930034" table:style-name="c9">
            <text:p>3.93</text:p>
          </table:table-cell>
          <table:table-cell office:value-type="float" office:value="-0.47682779493726235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0:15</text:p>
          </table:table-cell>
          <table:table-cell office:value-type="float" office:value="4.100048999999999" table:style-name="c9">
            <text:p>4.1</text:p>
          </table:table-cell>
          <table:table-cell office:value-type="string" table:style-name="c9">
            <text:p>2026-03-13 10:45</text:p>
          </table:table-cell>
          <table:table-cell office:value-type="float" office:value="4.0849565" table:style-name="c9">
            <text:p>4.085</text:p>
          </table:table-cell>
          <table:table-cell office:value-type="float" office:value="-0.567269514181401" table:style-name="c10">
            <text:p>-0.6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13:45</text:p>
          </table:table-cell>
          <table:table-cell office:value-type="float" office:value="3.9489734999999997" table:style-name="c9">
            <text:p>3.949</text:p>
          </table:table-cell>
          <table:table-cell office:value-type="string" table:style-name="c9">
            <text:p>2026-03-14 14:15</text:p>
          </table:table-cell>
          <table:table-cell office:value-type="float" office:value="3.9370305" table:style-name="c9">
            <text:p>3.937</text:p>
          </table:table-cell>
          <table:table-cell office:value-type="float" office:value="-0.5017284610671524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1:00</text:p>
          </table:table-cell>
          <table:table-cell office:value-type="float" office:value="3.987993" table:style-name="c9">
            <text:p>3.988</text:p>
          </table:table-cell>
          <table:table-cell office:value-type="string" table:style-name="c9">
            <text:p>2026-03-15 11:30</text:p>
          </table:table-cell>
          <table:table-cell office:value-type="float" office:value="3.9850065000000003" table:style-name="c9">
            <text:p>3.985</text:p>
          </table:table-cell>
          <table:table-cell office:value-type="float" office:value="-0.27463759323297365" table:style-name="c10">
            <text:p>-0.3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45</text:p>
          </table:table-cell>
          <table:table-cell office:value-type="float" office:value="4.068033" table:style-name="c9">
            <text:p>4.068</text:p>
          </table:table-cell>
          <table:table-cell office:value-type="string" table:style-name="c9">
            <text:p>2026-03-15 23:15</text:p>
          </table:table-cell>
          <table:table-cell office:value-type="float" office:value="4.0969505" table:style-name="c9">
            <text:p>4.097</text:p>
          </table:table-cell>
          <table:table-cell office:value-type="float" office:value="0.5095262489389851" table:style-name="c11">
            <text:p>+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3:30</text:p>
          </table:table-cell>
          <table:table-cell office:value-type="float" office:value="3.6178079999999997" table:style-name="c9">
            <text:p>3.6178</text:p>
          </table:table-cell>
          <table:table-cell office:value-type="string" table:style-name="c9">
            <text:p>2026-03-25 00:00</text:p>
          </table:table-cell>
          <table:table-cell office:value-type="float" office:value="3.6071955" table:style-name="c9">
            <text:p>3.6072</text:p>
          </table:table-cell>
          <table:table-cell office:value-type="float" office:value="-0.4926542205805129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7:15</text:p>
          </table:table-cell>
          <table:table-cell office:value-type="float" office:value="3.647823" table:style-name="c9">
            <text:p>3.6478</text:p>
          </table:table-cell>
          <table:table-cell office:value-type="string" table:style-name="c9">
            <text:p>2026-03-25 07:45</text:p>
          </table:table-cell>
          <table:table-cell office:value-type="float" office:value="3.6461760000000005" table:style-name="c9">
            <text:p>3.6462</text:p>
          </table:table-cell>
          <table:table-cell office:value-type="float" office:value="-0.2449599617086573" table:style-name="c10">
            <text:p>-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8:45</text:p>
          </table:table-cell>
          <table:table-cell office:value-type="float" office:value="3.7088534999999996" table:style-name="c9">
            <text:p>3.7089</text:p>
          </table:table-cell>
          <table:table-cell office:value-type="string" table:style-name="c9">
            <text:p>2026-03-25 09:15</text:p>
          </table:table-cell>
          <table:table-cell office:value-type="float" office:value="3.6791595000000004" table:style-name="c9">
            <text:p>3.6792</text:p>
          </table:table-cell>
          <table:table-cell office:value-type="float" office:value="-0.9989243263585079" table:style-name="c10">
            <text:p>-1.0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3:15</text:p>
          </table:table-cell>
          <table:table-cell office:value-type="float" office:value="3.7508745" table:style-name="c9">
            <text:p>3.7509</text:p>
          </table:table-cell>
          <table:table-cell office:value-type="string" table:style-name="c9">
            <text:p>2026-03-25 13:45</text:p>
          </table:table-cell>
          <table:table-cell office:value-type="float" office:value="3.744127" table:style-name="c9">
            <text:p>3.7441</text:p>
          </table:table-cell>
          <table:table-cell office:value-type="float" office:value="-0.3794317797889635" table:style-name="c10">
            <text:p>-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17:15</text:p>
          </table:table-cell>
          <table:table-cell office:value-type="float" office:value="3.7348665" table:style-name="c9">
            <text:p>3.7349</text:p>
          </table:table-cell>
          <table:table-cell office:value-type="string" table:style-name="c9">
            <text:p>2026-03-25 17:45</text:p>
          </table:table-cell>
          <table:table-cell office:value-type="float" office:value="3.7171405" table:style-name="c9">
            <text:p>3.7171</text:p>
          </table:table-cell>
          <table:table-cell office:value-type="float" office:value="-0.6735599213385512" table:style-name="c10">
            <text:p>-0.7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8:00</text:p>
          </table:table-cell>
          <table:table-cell office:value-type="float" office:value="3.5367675" table:style-name="c9">
            <text:p>3.5368</text:p>
          </table:table-cell>
          <table:table-cell office:value-type="string" table:style-name="c9">
            <text:p>2026-03-30 08:30</text:p>
          </table:table-cell>
          <table:table-cell office:value-type="float" office:value="3.5512235000000003" table:style-name="c9">
            <text:p>3.5512</text:p>
          </table:table-cell>
          <table:table-cell office:value-type="float" office:value="0.20801775133652" table:style-name="c11">
            <text:p>+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08:45</text:p>
          </table:table-cell>
          <table:table-cell office:value-type="float" office:value="3.5707845" table:style-name="c9">
            <text:p>3.5708</text:p>
          </table:table-cell>
          <table:table-cell office:value-type="string" table:style-name="c9">
            <text:p>2026-03-30 09:15</text:p>
          </table:table-cell>
          <table:table-cell office:value-type="float" office:value="3.5332325000000004" table:style-name="c9">
            <text:p>3.5332</text:p>
          </table:table-cell>
          <table:table-cell office:value-type="float" office:value="-1.2494434141152921" table:style-name="c10">
            <text:p>-1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0 13:15</text:p>
          </table:table-cell>
          <table:table-cell office:value-type="float" office:value="3.5557769999999995" table:style-name="c9">
            <text:p>3.5558</text:p>
          </table:table-cell>
          <table:table-cell office:value-type="string" table:style-name="c9">
            <text:p>2026-03-30 13:45</text:p>
          </table:table-cell>
          <table:table-cell office:value-type="float" office:value="3.5462260000000003" table:style-name="c9">
            <text:p>3.5462</text:p>
          </table:table-cell>
          <table:table-cell office:value-type="float" office:value="-0.4679682042489919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14:30</text:p>
          </table:table-cell>
          <table:table-cell office:value-type="float" office:value="3.547773" table:style-name="c9">
            <text:p>3.5478</text:p>
          </table:table-cell>
          <table:table-cell office:value-type="string" table:style-name="c9">
            <text:p>2026-03-31 15:00</text:p>
          </table:table-cell>
          <table:table-cell office:value-type="float" office:value="3.4942520000000004" table:style-name="c9">
            <text:p>3.4943</text:p>
          </table:table-cell>
          <table:table-cell office:value-type="float" office:value="-1.705464519516875" table:style-name="c10">
            <text:p>-1.7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30</text:p>
          </table:table-cell>
          <table:table-cell office:value-type="float" office:value="3.6278129999999997" table:style-name="c9">
            <text:p>3.6278</text:p>
          </table:table-cell>
          <table:table-cell office:value-type="string" table:style-name="c9">
            <text:p>2026-04-01 07:00</text:p>
          </table:table-cell>
          <table:table-cell office:value-type="float" office:value="3.648175" table:style-name="c9">
            <text:p>3.6482</text:p>
          </table:table-cell>
          <table:table-cell office:value-type="float" office:value="0.3602528072698563" table:style-name="c11">
            <text:p>+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7:15</text:p>
          </table:table-cell>
          <table:table-cell office:value-type="float" office:value="3.6608294999999997" table:style-name="c9">
            <text:p>3.6608</text:p>
          </table:table-cell>
          <table:table-cell office:value-type="string" table:style-name="c9">
            <text:p>2026-04-01 07:45</text:p>
          </table:table-cell>
          <table:table-cell office:value-type="float" office:value="3.6371805" table:style-name="c9">
            <text:p>3.6372</text:p>
          </table:table-cell>
          <table:table-cell office:value-type="float" office:value="-0.8446097754484239" table:style-name="c10">
            <text:p>-0.8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12:45</text:p>
          </table:table-cell>
          <table:table-cell office:value-type="float" office:value="3.6318149999999996" table:style-name="c9">
            <text:p>3.6318</text:p>
          </table:table-cell>
          <table:table-cell office:value-type="string" table:style-name="c9">
            <text:p>2026-04-01 13:15</text:p>
          </table:table-cell>
          <table:table-cell office:value-type="float" office:value="3.5982000000000003" table:style-name="c9">
            <text:p>3.5982</text:p>
          </table:table-cell>
          <table:table-cell office:value-type="float" office:value="-1.1236200577397049" table:style-name="c10">
            <text:p>-1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6 09:15</text:p>
          </table:table-cell>
          <table:table-cell office:value-type="float" office:value="3.1785885" table:style-name="c9">
            <text:p>3.1786</text:p>
          </table:table-cell>
          <table:table-cell office:value-type="string" table:style-name="c9">
            <text:p>2026-04-06 09:45</text:p>
          </table:table-cell>
          <table:table-cell office:value-type="float" office:value="3.192403" table:style-name="c9">
            <text:p>3.1924</text:p>
          </table:table-cell>
          <table:table-cell office:value-type="float" office:value="0.23384236125563174" table:style-name="c11">
            <text:p>+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8 08:15</text:p>
          </table:table-cell>
          <table:table-cell office:value-type="float" office:value="3.2546265" table:style-name="c9">
            <text:p>3.2546</text:p>
          </table:table-cell>
          <table:table-cell office:value-type="string" table:style-name="c9">
            <text:p>2026-04-08 08:45</text:p>
          </table:table-cell>
          <table:table-cell office:value-type="float" office:value="3.250374" table:style-name="c9">
            <text:p>3.2504</text:p>
          </table:table-cell>
          <table:table-cell office:value-type="float" office:value="-0.33029896444338736" table:style-name="c10">
            <text:p>-0.3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7:00</text:p>
          </table:table-cell>
          <table:table-cell office:value-type="float" office:value="3.1685834999999996" table:style-name="c9">
            <text:p>3.1686</text:p>
          </table:table-cell>
          <table:table-cell office:value-type="string" table:style-name="c9">
            <text:p>2026-04-11 17:30</text:p>
          </table:table-cell>
          <table:table-cell office:value-type="float" office:value="3.1574205" table:style-name="c9">
            <text:p>3.1574</text:p>
          </table:table-cell>
          <table:table-cell office:value-type="float" office:value="-0.5514982824186054" table:style-name="c10">
            <text:p>-0.6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1 18:45</text:p>
          </table:table-cell>
          <table:table-cell office:value-type="float" office:value="3.1965974999999998" table:style-name="c9">
            <text:p>3.1966</text:p>
          </table:table-cell>
          <table:table-cell office:value-type="string" table:style-name="c9">
            <text:p>2026-04-11 19:15</text:p>
          </table:table-cell>
          <table:table-cell office:value-type="float" office:value="3.1964010000000003" table:style-name="c9">
            <text:p>3.1964</text:p>
          </table:table-cell>
          <table:table-cell office:value-type="float" office:value="-0.2060348729860162" table:style-name="c10">
            <text:p>-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15</text:p>
          </table:table-cell>
          <table:table-cell office:value-type="float" office:value="3.16158" table:style-name="c9">
            <text:p>3.1616</text:p>
          </table:table-cell>
          <table:table-cell office:value-type="string" table:style-name="c9">
            <text:p>2026-04-13 22:45</text:p>
          </table:table-cell>
          <table:table-cell office:value-type="float" office:value="3.2163910000000002" table:style-name="c9">
            <text:p>3.2164</text:p>
          </table:table-cell>
          <table:table-cell office:value-type="float" office:value="1.5302929038961466" table:style-name="c11">
            <text:p>+1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00</text:p>
          </table:table-cell>
          <table:table-cell office:value-type="float" office:value="3.2146065" table:style-name="c9">
            <text:p>3.2146</text:p>
          </table:table-cell>
          <table:table-cell office:value-type="string" table:style-name="c9">
            <text:p>2026-04-13 23:30</text:p>
          </table:table-cell>
          <table:table-cell office:value-type="float" office:value="3.2523730000000004" table:style-name="c9">
            <text:p>3.2524</text:p>
          </table:table-cell>
          <table:table-cell office:value-type="float" office:value="0.9725920224761486" table:style-name="c11">
            <text:p>+1.0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45</text:p>
          </table:table-cell>
          <table:table-cell office:value-type="float" office:value="3.249624" table:style-name="c9">
            <text:p>3.2496</text:p>
          </table:table-cell>
          <table:table-cell office:value-type="string" table:style-name="c9">
            <text:p>2026-04-14 00:15</text:p>
          </table:table-cell>
          <table:table-cell office:value-type="float" office:value="3.2213885" table:style-name="c9">
            <text:p>3.2214</text:p>
          </table:table-cell>
          <table:table-cell office:value-type="float" office:value="-1.0670482373191348" table:style-name="c10">
            <text:p>-1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00:30</text:p>
          </table:table-cell>
          <table:table-cell office:value-type="float" office:value="3.145572" table:style-name="c9">
            <text:p>3.1456</text:p>
          </table:table-cell>
          <table:table-cell office:value-type="string" table:style-name="c9">
            <text:p>2026-04-15 01:00</text:p>
          </table:table-cell>
          <table:table-cell office:value-type="float" office:value="3.142428" table:style-name="c9">
            <text:p>3.1424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2:15</text:p>
          </table:table-cell>
          <table:table-cell office:value-type="float" office:value="3.1865924999999997" table:style-name="c9">
            <text:p>3.1866</text:p>
          </table:table-cell>
          <table:table-cell office:value-type="string" table:style-name="c9">
            <text:p>2026-04-15 12:45</text:p>
          </table:table-cell>
          <table:table-cell office:value-type="float" office:value="3.188405" table:style-name="c9">
            <text:p>3.1884</text:p>
          </table:table-cell>
          <table:table-cell office:value-type="float" office:value="-0.14313476213226872" table:style-name="c10">
            <text:p>-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4:30</text:p>
          </table:table-cell>
          <table:table-cell office:value-type="float" office:value="3.2106045" table:style-name="c9">
            <text:p>3.2106</text:p>
          </table:table-cell>
          <table:table-cell office:value-type="string" table:style-name="c9">
            <text:p>2026-04-15 15:00</text:p>
          </table:table-cell>
          <table:table-cell office:value-type="float" office:value="3.2133925" table:style-name="c9">
            <text:p>3.2134</text:p>
          </table:table-cell>
          <table:table-cell office:value-type="float" office:value="-0.11323635805967625" table:style-name="c10">
            <text:p>-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19:45</text:p>
          </table:table-cell>
          <table:table-cell office:value-type="float" office:value="3.2466225" table:style-name="c9">
            <text:p>3.2466</text:p>
          </table:table-cell>
          <table:table-cell office:value-type="string" table:style-name="c9">
            <text:p>2026-04-15 20:15</text:p>
          </table:table-cell>
          <table:table-cell office:value-type="float" office:value="3.2233875000000003" table:style-name="c9">
            <text:p>3.2234</text:p>
          </table:table-cell>
          <table:table-cell office:value-type="float" office:value="-0.9141362019298604" table:style-name="c10">
            <text:p>-0.9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45</text:p>
          </table:table-cell>
          <table:table-cell office:value-type="float" office:value="3.249624" table:style-name="c9">
            <text:p>3.2496</text:p>
          </table:table-cell>
          <table:table-cell office:value-type="string" table:style-name="c9">
            <text:p>2026-04-16 03:15</text:p>
          </table:table-cell>
          <table:table-cell office:value-type="float" office:value="3.2303840000000004" table:style-name="c9">
            <text:p>3.2304</text:p>
          </table:table-cell>
          <table:table-cell office:value-type="float" office:value="-0.7907849528437705" table:style-name="c10">
            <text:p>-0.8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2:15</text:p>
          </table:table-cell>
          <table:table-cell office:value-type="float" office:value="3.2896439999999996" table:style-name="c9">
            <text:p>3.2896</text:p>
          </table:table-cell>
          <table:table-cell office:value-type="string" table:style-name="c9">
            <text:p>2026-04-16 12:45</text:p>
          </table:table-cell>
          <table:table-cell office:value-type="float" office:value="3.290354" table:style-name="c9">
            <text:p>3.2904</text:p>
          </table:table-cell>
          <table:table-cell office:value-type="float" office:value="-0.1783602616574842" table:style-name="c10">
            <text:p>-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15</text:p>
          </table:table-cell>
          <table:table-cell office:value-type="float" office:value="3.3386685" table:style-name="c9">
            <text:p>3.3387</text:p>
          </table:table-cell>
          <table:table-cell office:value-type="string" table:style-name="c9">
            <text:p>2026-04-16 13:45</text:p>
          </table:table-cell>
          <table:table-cell office:value-type="float" office:value="3.3693145" table:style-name="c9">
            <text:p>3.3693</text:p>
          </table:table-cell>
          <table:table-cell office:value-type="float" office:value="0.7161759340437834" table:style-name="c11">
            <text:p>+0.7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3.3806895" table:style-name="c9">
            <text:p>3.3807</text:p>
          </table:table-cell>
          <table:table-cell office:value-type="string" table:style-name="c9">
            <text:p>2026-04-16 16:15</text:p>
          </table:table-cell>
          <table:table-cell office:value-type="float" office:value="3.3683150000000004" table:style-name="c9">
            <text:p>3.3683</text:p>
          </table:table-cell>
          <table:table-cell office:value-type="float" office:value="-0.5652030949603426" table:style-name="c10">
            <text:p>-0.6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8:00</text:p>
          </table:table-cell>
          <table:table-cell office:value-type="float" office:value="3.3736859999999997" table:style-name="c9">
            <text:p>3.3737</text:p>
          </table:table-cell>
          <table:table-cell office:value-type="string" table:style-name="c9">
            <text:p>2026-04-16 18:30</text:p>
          </table:table-cell>
          <table:table-cell office:value-type="float" office:value="3.382308" table:style-name="c9">
            <text:p>3.3823</text:p>
          </table:table-cell>
          <table:table-cell office:value-type="float" office:value="0.055155290326358575" table:style-name="c11">
            <text:p>+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7:45</text:p>
          </table:table-cell>
          <table:table-cell office:value-type="float" office:value="3.3976979999999997" table:style-name="c9">
            <text:p>3.3977</text:p>
          </table:table-cell>
          <table:table-cell office:value-type="string" table:style-name="c9">
            <text:p>2026-04-17 08:15</text:p>
          </table:table-cell>
          <table:table-cell office:value-type="float" office:value="3.402298" table:style-name="c9">
            <text:p>3.4023</text:p>
          </table:table-cell>
          <table:table-cell office:value-type="float" office:value="-0.06478485439257442" table:style-name="c10">
            <text:p>-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45</text:p>
          </table:table-cell>
          <table:table-cell office:value-type="float" office:value="3.4227104999999995" table:style-name="c9">
            <text:p>3.4227</text:p>
          </table:table-cell>
          <table:table-cell office:value-type="string" table:style-name="c9">
            <text:p>2026-04-17 09:15</text:p>
          </table:table-cell>
          <table:table-cell office:value-type="float" office:value="3.4282850000000002" table:style-name="c9">
            <text:p>3.4283</text:p>
          </table:table-cell>
          <table:table-cell office:value-type="float" office:value="-0.03735757713073662" table:style-name="c10">
            <text:p>-0.0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1:45</text:p>
          </table:table-cell>
          <table:table-cell office:value-type="float" office:value="3.443721" table:style-name="c9">
            <text:p>3.4437</text:p>
          </table:table-cell>
          <table:table-cell office:value-type="string" table:style-name="c9">
            <text:p>2026-04-17 12:15</text:p>
          </table:table-cell>
          <table:table-cell office:value-type="float" office:value="3.4532725" table:style-name="c9">
            <text:p>3.4533</text:p>
          </table:table-cell>
          <table:table-cell office:value-type="float" office:value="0.07690542504750209" table:style-name="c11">
            <text:p>+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00</text:p>
          </table:table-cell>
          <table:table-cell office:value-type="float" office:value="3.475737" table:style-name="c9">
            <text:p>3.4757</text:p>
          </table:table-cell>
          <table:table-cell office:value-type="string" table:style-name="c9">
            <text:p>2026-04-17 13:30</text:p>
          </table:table-cell>
          <table:table-cell office:value-type="float" office:value="3.4972505000000003" table:style-name="c9">
            <text:p>3.4973</text:p>
          </table:table-cell>
          <table:table-cell office:value-type="float" office:value="0.41782494620563604" table:style-name="c11">
            <text:p>+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45</text:p>
          </table:table-cell>
          <table:table-cell office:value-type="float" office:value="3.5177579999999997" table:style-name="c9">
            <text:p>3.5178</text:p>
          </table:table-cell>
          <table:table-cell office:value-type="string" table:style-name="c9">
            <text:p>2026-04-17 14:15</text:p>
          </table:table-cell>
          <table:table-cell office:value-type="float" office:value="3.508245" table:style-name="c9">
            <text:p>3.5082</text:p>
          </table:table-cell>
          <table:table-cell office:value-type="float" office:value="-0.46978734054475835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7:00</text:p>
          </table:table-cell>
          <table:table-cell office:value-type="float" office:value="3.577788" table:style-name="c9">
            <text:p>3.5778</text:p>
          </table:table-cell>
          <table:table-cell office:value-type="string" table:style-name="c9">
            <text:p>2026-04-17 17:30</text:p>
          </table:table-cell>
          <table:table-cell office:value-type="float" office:value="3.5152415" table:style-name="c9">
            <text:p>3.5152</text:p>
          </table:table-cell>
          <table:table-cell office:value-type="float" office:value="-1.9445944745328458" table:style-name="c10">
            <text:p>-1.9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3.383691" table:style-name="c9">
            <text:p>3.3837</text:p>
          </table:table-cell>
          <table:table-cell office:value-type="string" table:style-name="c9">
            <text:p>2026-04-22 06:00</text:p>
          </table:table-cell>
          <table:table-cell office:value-type="float" office:value="3.3763110000000003" table:style-name="c9">
            <text:p>3.3763</text:p>
          </table:table-cell>
          <table:table-cell office:value-type="float" office:value="-0.4175690300621371" table:style-name="c10">
            <text:p>-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4:00</text:p>
          </table:table-cell>
          <table:table-cell office:value-type="float" office:value="3.4107044999999996" table:style-name="c9">
            <text:p>3.4107</text:p>
          </table:table-cell>
          <table:table-cell office:value-type="string" table:style-name="c9">
            <text:p>2026-04-22 14:30</text:p>
          </table:table-cell>
          <table:table-cell office:value-type="float" office:value="3.4182900000000003" table:style-name="c9">
            <text:p>3.4183</text:p>
          </table:table-cell>
          <table:table-cell office:value-type="float" office:value="0.022058149276804606" table:style-name="c11">
            <text:p>+0.0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15:45</text:p>
          </table:table-cell>
          <table:table-cell office:value-type="float" office:value="3.4307144999999997" table:style-name="c9">
            <text:p>3.4307</text:p>
          </table:table-cell>
          <table:table-cell office:value-type="string" table:style-name="c9">
            <text:p>2026-04-22 16:15</text:p>
          </table:table-cell>
          <table:table-cell office:value-type="float" office:value="3.4112935" table:style-name="c9">
            <text:p>3.4113</text:p>
          </table:table-cell>
          <table:table-cell office:value-type="float" office:value="-0.7648603725696201" table:style-name="c10">
            <text:p>-0.8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7 03:45</text:p>
          </table:table-cell>
          <table:table-cell office:value-type="float" office:value="3.3586785" table:style-name="c9">
            <text:p>3.3587</text:p>
          </table:table-cell>
          <table:table-cell office:value-type="string" table:style-name="c9">
            <text:p>2026-04-27 04:15</text:p>
          </table:table-cell>
          <table:table-cell office:value-type="float" office:value="3.3493245000000003" table:style-name="c9">
            <text:p>3.3493</text:p>
          </table:table-cell>
          <table:table-cell office:value-type="float" office:value="-0.4778456668448561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7 14:45</text:p>
          </table:table-cell>
          <table:table-cell office:value-type="float" office:value="3.2866425" table:style-name="c9">
            <text:p>3.2866</text:p>
          </table:table-cell>
          <table:table-cell office:value-type="string" table:style-name="c9">
            <text:p>2026-04-27 15:15</text:p>
          </table:table-cell>
          <table:table-cell office:value-type="float" office:value="3.2373805" table:style-name="c9">
            <text:p>3.2374</text:p>
          </table:table-cell>
          <table:table-cell office:value-type="float" office:value="-1.6957586235649247" table:style-name="c10">
            <text:p>-1.7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04:45</text:p>
          </table:table-cell>
          <table:table-cell office:value-type="float" office:value="3.2966474999999997" table:style-name="c9">
            <text:p>3.2966</text:p>
          </table:table-cell>
          <table:table-cell office:value-type="string" table:style-name="c9">
            <text:p>2026-04-29 05:15</text:p>
          </table:table-cell>
          <table:table-cell office:value-type="float" office:value="3.2893545" table:style-name="c9">
            <text:p>3.2894</text:p>
          </table:table-cell>
          <table:table-cell office:value-type="float" office:value="-0.4206825159650873" table:style-name="c10">
            <text:p>-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9 10:00</text:p>
          </table:table-cell>
          <table:table-cell office:value-type="float" office:value="3.3186585" table:style-name="c9">
            <text:p>3.3187</text:p>
          </table:table-cell>
          <table:table-cell office:value-type="string" table:style-name="c9">
            <text:p>2026-04-29 10:30</text:p>
          </table:table-cell>
          <table:table-cell office:value-type="float" office:value="3.3253365" table:style-name="c9">
            <text:p>3.3253</text:p>
          </table:table-cell>
          <table:table-cell office:value-type="float" office:value="0.0009236363578857265" table:style-name="c11">
            <text:p>+0.0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1 14:00</text:p>
          </table:table-cell>
          <table:table-cell office:value-type="float" office:value="3.2686334999999995" table:style-name="c9">
            <text:p>3.2686</text:p>
          </table:table-cell>
          <table:table-cell office:value-type="string" table:style-name="c9">
            <text:p>2026-05-01 14:30</text:p>
          </table:table-cell>
          <table:table-cell office:value-type="float" office:value="3.2603690000000003" table:style-name="c9">
            <text:p>3.2604</text:p>
          </table:table-cell>
          <table:table-cell office:value-type="float" office:value="-0.4522372309712641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3 07:45</text:p>
          </table:table-cell>
          <table:table-cell office:value-type="float" office:value="3.2306144999999997" table:style-name="c9">
            <text:p>3.2306</text:p>
          </table:table-cell>
          <table:table-cell office:value-type="string" table:style-name="c9">
            <text:p>2026-05-03 08:15</text:p>
          </table:table-cell>
          <table:table-cell office:value-type="float" office:value="3.232383" table:style-name="c9">
            <text:p>3.2324</text:p>
          </table:table-cell>
          <table:table-cell office:value-type="float" office:value="-0.1452675216123689" table:style-name="c10">
            <text:p>-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05:00</text:p>
          </table:table-cell>
          <table:table-cell office:value-type="float" office:value="3.4467224999999995" table:style-name="c9">
            <text:p>3.4467</text:p>
          </table:table-cell>
          <table:table-cell office:value-type="string" table:style-name="c9">
            <text:p>2026-05-04 05:30</text:p>
          </table:table-cell>
          <table:table-cell office:value-type="float" office:value="3.4112935" table:style-name="c9">
            <text:p>3.4113</text:p>
          </table:table-cell>
          <table:table-cell office:value-type="float" office:value="-1.225749264888576" table:style-name="c10">
            <text:p>-1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4 15:00</text:p>
          </table:table-cell>
          <table:table-cell office:value-type="float" office:value="3.335667" table:style-name="c9">
            <text:p>3.3357</text:p>
          </table:table-cell>
          <table:table-cell office:value-type="string" table:style-name="c9">
            <text:p>2026-05-04 15:30</text:p>
          </table:table-cell>
          <table:table-cell office:value-type="float" office:value="3.2993495000000004" table:style-name="c9">
            <text:p>3.2993</text:p>
          </table:table-cell>
          <table:table-cell office:value-type="float" office:value="-1.2864863204420263" table:style-name="c10">
            <text:p>-1.3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07:45</text:p>
          </table:table-cell>
          <table:table-cell office:value-type="float" office:value="3.3526754999999997" table:style-name="c9">
            <text:p>3.3527</text:p>
          </table:table-cell>
          <table:table-cell office:value-type="string" table:style-name="c9">
            <text:p>2026-05-05 08:15</text:p>
          </table:table-cell>
          <table:table-cell office:value-type="float" office:value="3.3473255" table:style-name="c9">
            <text:p>3.3473</text:p>
          </table:table-cell>
          <table:table-cell office:value-type="float" office:value="-0.359155059131111" table:style-name="c10">
            <text:p>-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00</text:p>
          </table:table-cell>
          <table:table-cell office:value-type="float" office:value="3.475737" table:style-name="c9">
            <text:p>3.4757</text:p>
          </table:table-cell>
          <table:table-cell office:value-type="string" table:style-name="c9">
            <text:p>2026-05-06 09:30</text:p>
          </table:table-cell>
          <table:table-cell office:value-type="float" office:value="3.4772605000000003" table:style-name="c9">
            <text:p>3.4773</text:p>
          </table:table-cell>
          <table:table-cell office:value-type="float" office:value="-0.15615519066891625" table:style-name="c10">
            <text:p>-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45</text:p>
          </table:table-cell>
          <table:table-cell office:value-type="float" office:value="3.5187584999999997" table:style-name="c9">
            <text:p>3.5188</text:p>
          </table:table-cell>
          <table:table-cell office:value-type="string" table:style-name="c9">
            <text:p>2026-05-06 10:15</text:p>
          </table:table-cell>
          <table:table-cell office:value-type="float" office:value="3.5382300000000004" table:style-name="c9">
            <text:p>3.5382</text:p>
          </table:table-cell>
          <table:table-cell office:value-type="float" office:value="0.35235661185617495" table:style-name="c11">
            <text:p>+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5:45</text:p>
          </table:table-cell>
          <table:table-cell office:value-type="float" office:value="3.4567275" table:style-name="c9">
            <text:p>3.4567</text:p>
          </table:table-cell>
          <table:table-cell office:value-type="string" table:style-name="c9">
            <text:p>2026-05-07 06:15</text:p>
          </table:table-cell>
          <table:table-cell office:value-type="float" office:value="3.4312835" table:style-name="c9">
            <text:p>3.4313</text:p>
          </table:table-cell>
          <table:table-cell office:value-type="float" office:value="-0.9345004984193772" table:style-name="c10">
            <text:p>-0.9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00:15</text:p>
          </table:table-cell>
          <table:table-cell office:value-type="float" office:value="3.4447215" table:style-name="c9">
            <text:p>3.4447</text:p>
          </table:table-cell>
          <table:table-cell office:value-type="string" table:style-name="c9">
            <text:p>2026-05-08 00:45</text:p>
          </table:table-cell>
          <table:table-cell office:value-type="float" office:value="3.426286" table:style-name="c9">
            <text:p>3.4263</text:p>
          </table:table-cell>
          <table:table-cell office:value-type="float" office:value="-0.7340113188830988" table:style-name="c10">
            <text:p>-0.7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4:30</text:p>
          </table:table-cell>
          <table:table-cell office:value-type="float" office:value="3.5367675" table:style-name="c9">
            <text:p>3.5368</text:p>
          </table:table-cell>
          <table:table-cell office:value-type="string" table:style-name="c9">
            <text:p>2026-05-08 15:00</text:p>
          </table:table-cell>
          <table:table-cell office:value-type="float" office:value="3.5832075000000003" table:style-name="c9">
            <text:p>3.5832</text:p>
          </table:table-cell>
          <table:table-cell office:value-type="float" office:value="1.1105385979570448" table:style-name="c11">
            <text:p>+1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6:30</text:p>
          </table:table-cell>
          <table:table-cell office:value-type="float" office:value="3.6528254999999996" table:style-name="c9">
            <text:p>3.6528</text:p>
          </table:table-cell>
          <table:table-cell office:value-type="string" table:style-name="c9">
            <text:p>2026-05-08 17:00</text:p>
          </table:table-cell>
          <table:table-cell office:value-type="float" office:value="3.6771605" table:style-name="c9">
            <text:p>3.6772</text:p>
          </table:table-cell>
          <table:table-cell office:value-type="float" office:value="0.46496489253318174" table:style-name="c11">
            <text:p>+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0:45</text:p>
          </table:table-cell>
          <table:table-cell office:value-type="float" office:value="3.7858919999999996" table:style-name="c9">
            <text:p>3.7859</text:p>
          </table:table-cell>
          <table:table-cell office:value-type="string" table:style-name="c9">
            <text:p>2026-05-09 01:15</text:p>
          </table:table-cell>
          <table:table-cell office:value-type="float" office:value="3.774112" table:style-name="c9">
            <text:p>3.7741</text:p>
          </table:table-cell>
          <table:table-cell office:value-type="float" office:value="-0.5104332053845972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17:15</text:p>
          </table:table-cell>
          <table:table-cell office:value-type="float" office:value="3.679839" table:style-name="c9">
            <text:p>3.6798</text:p>
          </table:table-cell>
          <table:table-cell office:value-type="string" table:style-name="c9">
            <text:p>2026-05-09 17:45</text:p>
          </table:table-cell>
          <table:table-cell office:value-type="float" office:value="3.6921530000000002" table:style-name="c9">
            <text:p>3.6922</text:p>
          </table:table-cell>
          <table:table-cell office:value-type="float" office:value="0.1340652716871782" table:style-name="c11">
            <text:p>+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22:45</text:p>
          </table:table-cell>
          <table:table-cell office:value-type="float" office:value="3.7828904999999997" table:style-name="c9">
            <text:p>3.7829</text:p>
          </table:table-cell>
          <table:table-cell office:value-type="string" table:style-name="c9">
            <text:p>2026-05-09 23:15</text:p>
          </table:table-cell>
          <table:table-cell office:value-type="float" office:value="3.774112" table:style-name="c9">
            <text:p>3.7741</text:p>
          </table:table-cell>
          <table:table-cell office:value-type="float" office:value="-0.43149411509531" table:style-name="c10">
            <text:p>-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23:30</text:p>
          </table:table-cell>
          <table:table-cell office:value-type="float" office:value="3.7788885" table:style-name="c9">
            <text:p>3.7789</text:p>
          </table:table-cell>
          <table:table-cell office:value-type="string" table:style-name="c9">
            <text:p>2026-05-10 00:00</text:p>
          </table:table-cell>
          <table:table-cell office:value-type="float" office:value="3.8080950000000002" table:style-name="c9">
            <text:p>3.8081</text:p>
          </table:table-cell>
          <table:table-cell office:value-type="float" office:value="0.5714409963405886" table:style-name="c11">
            <text:p>+0.6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0:15</text:p>
          </table:table-cell>
          <table:table-cell office:value-type="float" office:value="3.8219099999999995" table:style-name="c9">
            <text:p>3.8219</text:p>
          </table:table-cell>
          <table:table-cell office:value-type="string" table:style-name="c9">
            <text:p>2026-05-10 00:45</text:p>
          </table:table-cell>
          <table:table-cell office:value-type="float" office:value="3.77811" table:style-name="c9">
            <text:p>3.7781</text:p>
          </table:table-cell>
          <table:table-cell office:value-type="float" office:value="-1.3436329450458029" table:style-name="c10">
            <text:p>-1.3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5:15</text:p>
          </table:table-cell>
          <table:table-cell office:value-type="float" office:value="3.7768874999999995" table:style-name="c9">
            <text:p>3.7769</text:p>
          </table:table-cell>
          <table:table-cell office:value-type="string" table:style-name="c9">
            <text:p>2026-05-10 05:45</text:p>
          </table:table-cell>
          <table:table-cell office:value-type="float" office:value="3.9290345" table:style-name="c9">
            <text:p>3.929</text:p>
          </table:table-cell>
          <table:table-cell office:value-type="float" office:value="3.8204172095277045" table:style-name="c11">
            <text:p>+3.8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6:15</text:p>
          </table:table-cell>
          <table:table-cell office:value-type="float" office:value="3.9369674999999997" table:style-name="c9">
            <text:p>3.937</text:p>
          </table:table-cell>
          <table:table-cell office:value-type="string" table:style-name="c9">
            <text:p>2026-05-10 06:45</text:p>
          </table:table-cell>
          <table:table-cell office:value-type="float" office:value="3.9390295" table:style-name="c9">
            <text:p>3.939</text:p>
          </table:table-cell>
          <table:table-cell office:value-type="float" office:value="-0.14762936118978276" table:style-name="c10">
            <text:p>-0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07:15</text:p>
          </table:table-cell>
          <table:table-cell office:value-type="float" office:value="3.989994" table:style-name="c9">
            <text:p>3.99</text:p>
          </table:table-cell>
          <table:table-cell office:value-type="string" table:style-name="c9">
            <text:p>2026-05-10 07:45</text:p>
          </table:table-cell>
          <table:table-cell office:value-type="float" office:value="4.031983" table:style-name="c9">
            <text:p>4.032</text:p>
          </table:table-cell>
          <table:table-cell office:value-type="float" office:value="0.8503538096297891" table:style-name="c11">
            <text:p>+0.9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3:15</text:p>
          </table:table-cell>
          <table:table-cell office:value-type="float" office:value="4.0930455" table:style-name="c9">
            <text:p>4.093</text:p>
          </table:table-cell>
          <table:table-cell office:value-type="string" table:style-name="c9">
            <text:p>2026-05-10 13:45</text:p>
          </table:table-cell>
          <table:table-cell office:value-type="float" office:value="4.1089445" table:style-name="c9">
            <text:p>4.1089</text:p>
          </table:table-cell>
          <table:table-cell office:value-type="float" office:value="0.18776287594408636" table:style-name="c11">
            <text:p>+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16:15</text:p>
          </table:table-cell>
          <table:table-cell office:value-type="float" office:value="3.9259619999999997" table:style-name="c9">
            <text:p>3.926</text:p>
          </table:table-cell>
          <table:table-cell office:value-type="string" table:style-name="c9">
            <text:p>2026-05-11 16:45</text:p>
          </table:table-cell>
          <table:table-cell office:value-type="float" office:value="3.8680650000000005" table:style-name="c9">
            <text:p>3.8681</text:p>
          </table:table-cell>
          <table:table-cell office:value-type="float" office:value="-1.6716733869303724" table:style-name="c10">
            <text:p>-1.7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5 08:45</text:p>
          </table:table-cell>
          <table:table-cell office:value-type="float" office:value="3.72186" table:style-name="c9">
            <text:p>3.7219</text:p>
          </table:table-cell>
          <table:table-cell office:value-type="string" table:style-name="c9">
            <text:p>2026-05-15 09:15</text:p>
          </table:table-cell>
          <table:table-cell office:value-type="float" office:value="3.700149" table:style-name="c9">
            <text:p>3.7001</text:p>
          </table:table-cell>
          <table:table-cell office:value-type="float" office:value="-0.7820712721864798" table:style-name="c10">
            <text:p>-0.8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07:00</text:p>
          </table:table-cell>
          <table:table-cell office:value-type="float" office:value="3.5797889999999994" table:style-name="c9">
            <text:p>3.5798</text:p>
          </table:table-cell>
          <table:table-cell office:value-type="string" table:style-name="c9">
            <text:p>2026-05-20 07:30</text:p>
          </table:table-cell>
          <table:table-cell office:value-type="float" office:value="3.5812085000000002" table:style-name="c9">
            <text:p>3.5812</text:p>
          </table:table-cell>
          <table:table-cell office:value-type="float" office:value="-0.160326091607621" table:style-name="c10">
            <text:p>-0.2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08:45</text:p>
          </table:table-cell>
          <table:table-cell office:value-type="float" office:value="3.6278129999999997" table:style-name="c9">
            <text:p>3.6278</text:p>
          </table:table-cell>
          <table:table-cell office:value-type="string" table:style-name="c9">
            <text:p>2026-05-20 09:15</text:p>
          </table:table-cell>
          <table:table-cell office:value-type="float" office:value="3.594202" table:style-name="c9">
            <text:p>3.5942</text:p>
          </table:table-cell>
          <table:table-cell office:value-type="float" office:value="-1.1245290150842746" table:style-name="c10">
            <text:p>-1.1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0 16:00</text:p>
          </table:table-cell>
          <table:table-cell office:value-type="float" office:value="3.6408194999999997" table:style-name="c9">
            <text:p>3.6408</text:p>
          </table:table-cell>
          <table:table-cell office:value-type="string" table:style-name="c9">
            <text:p>2026-05-20 16:30</text:p>
          </table:table-cell>
          <table:table-cell office:value-type="float" office:value="3.5952015000000004" table:style-name="c9">
            <text:p>3.5952</text:p>
          </table:table-cell>
          <table:table-cell office:value-type="float" office:value="-1.4503550038253432" table:style-name="c10">
            <text:p>-1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08:15</text:p>
          </table:table-cell>
          <table:table-cell office:value-type="float" office:value="3.6868425" table:style-name="c9">
            <text:p>3.6868</text:p>
          </table:table-cell>
          <table:table-cell office:value-type="string" table:style-name="c9">
            <text:p>2026-05-21 08:45</text:p>
          </table:table-cell>
          <table:table-cell office:value-type="float" office:value="3.6611685" table:style-name="c9">
            <text:p>3.6612</text:p>
          </table:table-cell>
          <table:table-cell office:value-type="float" office:value="-0.8948761936941829" table:style-name="c10">
            <text:p>-0.9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7:45</text:p>
          </table:table-cell>
          <table:table-cell office:value-type="float" office:value="3.6178079999999997" table:style-name="c9">
            <text:p>3.6178</text:p>
          </table:table-cell>
          <table:table-cell office:value-type="string" table:style-name="c9">
            <text:p>2026-05-21 18:15</text:p>
          </table:table-cell>
          <table:table-cell office:value-type="float" office:value="3.6081950000000003" table:style-name="c9">
            <text:p>3.6082</text:p>
          </table:table-cell>
          <table:table-cell office:value-type="float" office:value="-0.46508222119582276" table:style-name="c10">
            <text:p>-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1:45</text:p>
          </table:table-cell>
          <table:table-cell office:value-type="float" office:value="3.6248115" table:style-name="c9">
            <text:p>3.6248</text:p>
          </table:table-cell>
          <table:table-cell office:value-type="string" table:style-name="c9">
            <text:p>2026-05-22 12:15</text:p>
          </table:table-cell>
          <table:table-cell office:value-type="float" office:value="3.6451765" table:style-name="c9">
            <text:p>3.6452</text:p>
          </table:table-cell>
          <table:table-cell office:value-type="float" office:value="0.36079923539471537" table:style-name="c11">
            <text:p>+0.4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2:30</text:p>
          </table:table-cell>
          <table:table-cell office:value-type="float" office:value="3.6518249999999997" table:style-name="c9">
            <text:p>3.6518</text:p>
          </table:table-cell>
          <table:table-cell office:value-type="string" table:style-name="c9">
            <text:p>2026-05-22 13:00</text:p>
          </table:table-cell>
          <table:table-cell office:value-type="float" office:value="3.676161" table:style-name="c9">
            <text:p>3.6762</text:p>
          </table:table-cell>
          <table:table-cell office:value-type="float" office:value="0.46517437612700885" table:style-name="c11">
            <text:p>+0.5</text:p>
          </table:table-cell>
        </table:table-row>
        <table:table-row>
          <table:table-cell office:value-type="string" table:style-name="c8">
            <text:p>UNI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7:45</text:p>
          </table:table-cell>
          <table:table-cell office:value-type="float" office:value="3.653826" table:style-name="c9">
            <text:p>3.6538</text:p>
          </table:table-cell>
          <table:table-cell office:value-type="string" table:style-name="c9">
            <text:p>2026-05-22 18:15</text:p>
          </table:table-cell>
          <table:table-cell office:value-type="float" office:value="3.596201" table:style-name="c9">
            <text:p>3.5962</text:p>
          </table:table-cell>
          <table:table-cell office:value-type="float" office:value="-1.7738613113760904" table:style-name="c10">
            <text:p>-1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0073216589999999995" table:style-name="c1">
            <text:p>0.0073217</text:p>
          </table:table-cell>
          <table:table-cell office:value-type="string" table:style-name="c1">
            <text:p>2026-03-05 19:45</text:p>
          </table:table-cell>
          <table:table-cell office:value-type="float" office:value="0.0072843560000000005" table:style-name="c1">
            <text:p>0.0072844</text:p>
          </table:table-cell>
          <table:table-cell office:value-type="float" office:value="-0.7083698878082134" table:style-name="c12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45</text:p>
          </table:table-cell>
          <table:table-cell office:value-type="float" office:value="0.00734367" table:style-name="c1">
            <text:p>0.0073437</text:p>
          </table:table-cell>
          <table:table-cell office:value-type="string" table:style-name="c1">
            <text:p>2026-03-05 21:15</text:p>
          </table:table-cell>
          <table:table-cell office:value-type="float" office:value="0.007337329500000001" table:style-name="c1">
            <text:p>0.0073373</text:p>
          </table:table-cell>
          <table:table-cell office:value-type="float" office:value="-0.28606707096722195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071465715" table:style-name="c1">
            <text:p>0.0071466</text:p>
          </table:table-cell>
          <table:table-cell office:value-type="string" table:style-name="c1">
            <text:p>2026-03-10 15:15</text:p>
          </table:table-cell>
          <table:table-cell office:value-type="float" office:value="0.007178409" table:style-name="c1">
            <text:p>0.0071784</text:p>
          </table:table-cell>
          <table:table-cell office:value-type="float" office:value="0.24470279782409232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6:45</text:p>
          </table:table-cell>
          <table:table-cell office:value-type="float" office:value="0.0072926445" table:style-name="c1">
            <text:p>0.0072926</text:p>
          </table:table-cell>
          <table:table-cell office:value-type="string" table:style-name="c1">
            <text:p>2026-03-10 17:15</text:p>
          </table:table-cell>
          <table:table-cell office:value-type="float" office:value="0.007258369000000001" table:style-name="c1">
            <text:p>0.0072584</text:p>
          </table:table-cell>
          <table:table-cell office:value-type="float" office:value="-0.6689614395847698" table:style-name="c12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0.0071525745" table:style-name="c1">
            <text:p>0.0071526</text:p>
          </table:table-cell>
          <table:table-cell office:value-type="string" table:style-name="c1">
            <text:p>2026-03-11 14:15</text:p>
          </table:table-cell>
          <table:table-cell office:value-type="float" office:value="0.0071354305000000005" table:style-name="c1">
            <text:p>0.0071354</text:p>
          </table:table-cell>
          <table:table-cell office:value-type="float" office:value="-0.43911077849658753" table:style-name="c12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0.0073046505" table:style-name="c1">
            <text:p>0.0073047</text:p>
          </table:table-cell>
          <table:table-cell office:value-type="string" table:style-name="c1">
            <text:p>2026-03-13 01:15</text:p>
          </table:table-cell>
          <table:table-cell office:value-type="float" office:value="0.0073253355" table:style-name="c1">
            <text:p>0.0073253</text:p>
          </table:table-cell>
          <table:table-cell office:value-type="float" office:value="0.08270969754817781" table:style-name="c13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0.0074067015" table:style-name="c1">
            <text:p>0.0074067</text:p>
          </table:table-cell>
          <table:table-cell office:value-type="string" table:style-name="c1">
            <text:p>2026-03-13 10:45</text:p>
          </table:table-cell>
          <table:table-cell office:value-type="float" office:value="0.007428284" table:style-name="c1">
            <text:p>0.0074283</text:p>
          </table:table-cell>
          <table:table-cell office:value-type="float" office:value="0.09090902723702943" table:style-name="c13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0.007517756999999999" table:style-name="c1">
            <text:p>0.0075178</text:p>
          </table:table-cell>
          <table:table-cell office:value-type="string" table:style-name="c1">
            <text:p>2026-03-13 14:00</text:p>
          </table:table-cell>
          <table:table-cell office:value-type="float" office:value="0.007526235000000001" table:style-name="c1">
            <text:p>0.0075262</text:p>
          </table:table-cell>
          <table:table-cell office:value-type="float" office:value="-0.08735243457588249" table:style-name="c12">
            <text:p>-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073586775" table:style-name="c1">
            <text:p>0.0073587</text:p>
          </table:table-cell>
          <table:table-cell office:value-type="string" table:style-name="c1">
            <text:p>2026-03-15 11:30</text:p>
          </table:table-cell>
          <table:table-cell office:value-type="float" office:value="0.007432282" table:style-name="c1">
            <text:p>0.0074323</text:p>
          </table:table-cell>
          <table:table-cell office:value-type="float" office:value="0.7983413905827463" table:style-name="c13">
            <text:p>+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45</text:p>
          </table:table-cell>
          <table:table-cell office:value-type="float" office:value="0.0074687325" table:style-name="c1">
            <text:p>0.0074687</text:p>
          </table:table-cell>
          <table:table-cell office:value-type="string" table:style-name="c1">
            <text:p>2026-03-15 12:15</text:p>
          </table:table-cell>
          <table:table-cell office:value-type="float" office:value="0.007331332500000001" table:style-name="c1">
            <text:p>0.0073313</text:p>
          </table:table-cell>
          <table:table-cell office:value-type="float" office:value="-2.0358920829939953" table:style-name="c12">
            <text:p>-2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07453725" table:style-name="c1">
            <text:p>0.0074537</text:p>
          </table:table-cell>
          <table:table-cell office:value-type="string" table:style-name="c1">
            <text:p>2026-03-16 04:00</text:p>
          </table:table-cell>
          <table:table-cell office:value-type="float" office:value="0.0074922520000000005" table:style-name="c1">
            <text:p>0.0074923</text:p>
          </table:table-cell>
          <table:table-cell office:value-type="float" office:value="0.31594925023394893" table:style-name="c13">
            <text:p>+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00</text:p>
          </table:table-cell>
          <table:table-cell office:value-type="float" office:value="0.007577787" table:style-name="c1">
            <text:p>0.0075778</text:p>
          </table:table-cell>
          <table:table-cell office:value-type="string" table:style-name="c1">
            <text:p>2026-03-16 05:30</text:p>
          </table:table-cell>
          <table:table-cell office:value-type="float" office:value="0.007612192000000001" table:style-name="c1">
            <text:p>0.0076122</text:p>
          </table:table-cell>
          <table:table-cell office:value-type="float" office:value="0.253216779410681" table:style-name="c13">
            <text:p>+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5:45</text:p>
          </table:table-cell>
          <table:table-cell office:value-type="float" office:value="0.0076448205" table:style-name="c1">
            <text:p>0.0076448</text:p>
          </table:table-cell>
          <table:table-cell office:value-type="string" table:style-name="c1">
            <text:p>2026-03-16 06:15</text:p>
          </table:table-cell>
          <table:table-cell office:value-type="float" office:value="0.007631182500000001" table:style-name="c1">
            <text:p>0.0076312</text:p>
          </table:table-cell>
          <table:table-cell office:value-type="float" office:value="-0.3779386817192032" table:style-name="c12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0.007831913999999999" table:style-name="c1">
            <text:p>0.0078319</text:p>
          </table:table-cell>
          <table:table-cell office:value-type="string" table:style-name="c1">
            <text:p>2026-03-17 00:45</text:p>
          </table:table-cell>
          <table:table-cell office:value-type="float" office:value="0.0077881040000000006" table:style-name="c1">
            <text:p>0.0077881</text:p>
          </table:table-cell>
          <table:table-cell office:value-type="float" office:value="-0.7581597537459905" table:style-name="c12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9:45</text:p>
          </table:table-cell>
          <table:table-cell office:value-type="float" office:value="0.0076588275" table:style-name="c1">
            <text:p>0.0076588</text:p>
          </table:table-cell>
          <table:table-cell office:value-type="string" table:style-name="c1">
            <text:p>2026-03-17 10:15</text:p>
          </table:table-cell>
          <table:table-cell office:value-type="float" office:value="0.007634181" table:style-name="c1">
            <text:p>0.0076342</text:p>
          </table:table-cell>
          <table:table-cell office:value-type="float" office:value="-0.5210618442444304" table:style-name="c12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2:30</text:p>
          </table:table-cell>
          <table:table-cell office:value-type="float" office:value="0.007110553499999999" table:style-name="c1">
            <text:p>0.0071106</text:p>
          </table:table-cell>
          <table:table-cell office:value-type="string" table:style-name="c1">
            <text:p>2026-03-24 13:00</text:p>
          </table:table-cell>
          <table:table-cell office:value-type="float" office:value="0.007130433" table:style-name="c1">
            <text:p>0.0071304</text:p>
          </table:table-cell>
          <table:table-cell office:value-type="float" office:value="0.0791185163433683" table:style-name="c13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007159578" table:style-name="c1">
            <text:p>0.0071596</text:p>
          </table:table-cell>
          <table:table-cell office:value-type="string" table:style-name="c1">
            <text:p>2026-03-24 21:00</text:p>
          </table:table-cell>
          <table:table-cell office:value-type="float" office:value="0.0071964" table:style-name="c1">
            <text:p>0.0071964</text:p>
          </table:table-cell>
          <table:table-cell office:value-type="float" office:value="0.3133759615441045" table:style-name="c13">
            <text:p>+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2:00</text:p>
          </table:table-cell>
          <table:table-cell office:value-type="float" office:value="0.00676338" table:style-name="c1">
            <text:p>0.0067634</text:p>
          </table:table-cell>
          <table:table-cell office:value-type="string" table:style-name="c1">
            <text:p>2026-03-30 22:30</text:p>
          </table:table-cell>
          <table:table-cell office:value-type="float" office:value="0.006724636" table:style-name="c1">
            <text:p>0.0067246</text:p>
          </table:table-cell>
          <table:table-cell office:value-type="float" office:value="-0.7716045433496355" table:style-name="c12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30</text:p>
          </table:table-cell>
          <table:table-cell office:value-type="float" office:value="0.006747372" table:style-name="c1">
            <text:p>0.0067474</text:p>
          </table:table-cell>
          <table:table-cell office:value-type="string" table:style-name="c1">
            <text:p>2026-03-31 02:00</text:p>
          </table:table-cell>
          <table:table-cell office:value-type="float" office:value="0.006758619" table:style-name="c1">
            <text:p>0.0067586</text:p>
          </table:table-cell>
          <table:table-cell office:value-type="float" office:value="-0.03354608847708773" table:style-name="c12">
            <text:p>-0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068464215" table:style-name="c1">
            <text:p>0.0068464</text:p>
          </table:table-cell>
          <table:table-cell office:value-type="string" table:style-name="c1">
            <text:p>2026-04-01 06:00</text:p>
          </table:table-cell>
          <table:table-cell office:value-type="float" office:value="0.006847574500000001" table:style-name="c1">
            <text:p>0.0068476</text:p>
          </table:table-cell>
          <table:table-cell office:value-type="float" office:value="-0.1830927503586932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0.0069154559999999995" table:style-name="c1">
            <text:p>0.0069155</text:p>
          </table:table-cell>
          <table:table-cell office:value-type="string" table:style-name="c1">
            <text:p>2026-04-01 06:45</text:p>
          </table:table-cell>
          <table:table-cell office:value-type="float" office:value="0.0069155405" table:style-name="c1">
            <text:p>0.0069155</text:p>
          </table:table-cell>
          <table:table-cell office:value-type="float" office:value="-0.19868054195556484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0069804885" table:style-name="c1">
            <text:p>0.0069805</text:p>
          </table:table-cell>
          <table:table-cell office:value-type="string" table:style-name="c1">
            <text:p>2026-04-01 13:15</text:p>
          </table:table-cell>
          <table:table-cell office:value-type="float" office:value="0.0069215375" table:style-name="c1">
            <text:p>0.0069215</text:p>
          </table:table-cell>
          <table:table-cell office:value-type="float" office:value="-1.0427229192125909" table:style-name="c12">
            <text:p>-1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6:30</text:p>
          </table:table-cell>
          <table:table-cell office:value-type="float" office:value="0.006971484" table:style-name="c1">
            <text:p>0.0069715</text:p>
          </table:table-cell>
          <table:table-cell office:value-type="string" table:style-name="c1">
            <text:p>2026-04-01 17:00</text:p>
          </table:table-cell>
          <table:table-cell office:value-type="float" office:value="0.006943526500000001" table:style-name="c1">
            <text:p>0.0069435</text:p>
          </table:table-cell>
          <table:table-cell office:value-type="float" office:value="-0.6001248726024477" table:style-name="c12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5:45</text:p>
          </table:table-cell>
          <table:table-cell office:value-type="float" office:value="0.0070145055" table:style-name="c1">
            <text:p>0.0070145</text:p>
          </table:table-cell>
          <table:table-cell office:value-type="string" table:style-name="c1">
            <text:p>2026-04-03 06:15</text:p>
          </table:table-cell>
          <table:table-cell office:value-type="float" office:value="0.007004496000000001" table:style-name="c1">
            <text:p>0.0070045</text:p>
          </table:table-cell>
          <table:table-cell office:value-type="float" office:value="-0.34231190643444487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6:30</text:p>
          </table:table-cell>
          <table:table-cell office:value-type="float" office:value="0.006996496499999999" table:style-name="c1">
            <text:p>0.0069965</text:p>
          </table:table-cell>
          <table:table-cell office:value-type="string" table:style-name="c1">
            <text:p>2026-04-03 07:00</text:p>
          </table:table-cell>
          <table:table-cell office:value-type="float" office:value="0.0069875045" table:style-name="c1">
            <text:p>0.0069875</text:p>
          </table:table-cell>
          <table:table-cell office:value-type="float" office:value="-0.3281645534375377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8:15</text:p>
          </table:table-cell>
          <table:table-cell office:value-type="float" office:value="0.0069684824999999995" table:style-name="c1">
            <text:p>0.0069685</text:p>
          </table:table-cell>
          <table:table-cell office:value-type="string" table:style-name="c1">
            <text:p>2026-04-03 18:45</text:p>
          </table:table-cell>
          <table:table-cell office:value-type="float" office:value="0.0069595185" table:style-name="c1">
            <text:p>0.0069595</text:p>
          </table:table-cell>
          <table:table-cell office:value-type="float" office:value="-0.32827918390407884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1:00</text:p>
          </table:table-cell>
          <table:table-cell office:value-type="float" office:value="0.007039517999999999" table:style-name="c1">
            <text:p>0.0070395</text:p>
          </table:table-cell>
          <table:table-cell office:value-type="string" table:style-name="c1">
            <text:p>2026-04-04 01:30</text:p>
          </table:table-cell>
          <table:table-cell office:value-type="float" office:value="0.0070694635" table:style-name="c1">
            <text:p>0.0070695</text:p>
          </table:table-cell>
          <table:table-cell office:value-type="float" office:value="0.22464098342387384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3:15</text:p>
          </table:table-cell>
          <table:table-cell office:value-type="float" office:value="0.007311654" table:style-name="c1">
            <text:p>0.0073117</text:p>
          </table:table-cell>
          <table:table-cell office:value-type="string" table:style-name="c1">
            <text:p>2026-04-04 03:45</text:p>
          </table:table-cell>
          <table:table-cell office:value-type="float" office:value="0.007240378" table:style-name="c1">
            <text:p>0.0072404</text:p>
          </table:table-cell>
          <table:table-cell office:value-type="float" office:value="-1.1727786301430454" table:style-name="c12">
            <text:p>-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4:45</text:p>
          </table:table-cell>
          <table:table-cell office:value-type="float" office:value="0.0074006984999999996" table:style-name="c1">
            <text:p>0.0074007</text:p>
          </table:table-cell>
          <table:table-cell office:value-type="string" table:style-name="c1">
            <text:p>2026-04-04 05:15</text:p>
          </table:table-cell>
          <table:table-cell office:value-type="float" office:value="0.007378309" table:style-name="c1">
            <text:p>0.0073783</text:p>
          </table:table-cell>
          <table:table-cell office:value-type="float" office:value="-0.5018274922427679" table:style-name="c12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7:15</text:p>
          </table:table-cell>
          <table:table-cell office:value-type="float" office:value="0.007541769" table:style-name="c1">
            <text:p>0.0075418</text:p>
          </table:table-cell>
          <table:table-cell office:value-type="string" table:style-name="c1">
            <text:p>2026-04-04 07:45</text:p>
          </table:table-cell>
          <table:table-cell office:value-type="float" office:value="0.0075732115000000004" table:style-name="c1">
            <text:p>0.0075732</text:p>
          </table:table-cell>
          <table:table-cell office:value-type="float" office:value="0.2161780639462929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0.0074037" table:style-name="c1">
            <text:p>0.0074037</text:p>
          </table:table-cell>
          <table:table-cell office:value-type="string" table:style-name="c1">
            <text:p>2026-04-05 23:45</text:p>
          </table:table-cell>
          <table:table-cell office:value-type="float" office:value="0.007424286" table:style-name="c1">
            <text:p>0.0074243</text:p>
          </table:table-cell>
          <table:table-cell office:value-type="float" office:value="0.07759434182910141" table:style-name="c13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0.007099548" table:style-name="c1">
            <text:p>0.0070995</text:p>
          </table:table-cell>
          <table:table-cell office:value-type="string" table:style-name="c1">
            <text:p>2026-04-14 00:30</text:p>
          </table:table-cell>
          <table:table-cell office:value-type="float" office:value="0.0070564700000000005" table:style-name="c1">
            <text:p>0.0070565</text:p>
          </table:table-cell>
          <table:table-cell office:value-type="float" office:value="-0.8054580873317452" table:style-name="c12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007017507" table:style-name="c1">
            <text:p>0.0070175</text:p>
          </table:table-cell>
          <table:table-cell office:value-type="string" table:style-name="c1">
            <text:p>2026-04-14 14:30</text:p>
          </table:table-cell>
          <table:table-cell office:value-type="float" office:value="0.007009493500000001" table:style-name="c1">
            <text:p>0.0070095</text:p>
          </table:table-cell>
          <table:table-cell office:value-type="float" office:value="-0.3138647030419661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0070555259999999995" table:style-name="c1">
            <text:p>0.0070555</text:p>
          </table:table-cell>
          <table:table-cell office:value-type="string" table:style-name="c1">
            <text:p>2026-04-15 20:15</text:p>
          </table:table-cell>
          <table:table-cell office:value-type="float" office:value="0.007020488" table:style-name="c1">
            <text:p>0.0070205</text:p>
          </table:table-cell>
          <table:table-cell office:value-type="float" office:value="-0.6955109443576468" table:style-name="c12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22:30</text:p>
          </table:table-cell>
          <table:table-cell office:value-type="float" office:value="0.0070705335" table:style-name="c1">
            <text:p>0.0070705</text:p>
          </table:table-cell>
          <table:table-cell office:value-type="string" table:style-name="c1">
            <text:p>2026-04-15 23:00</text:p>
          </table:table-cell>
          <table:table-cell office:value-type="float" office:value="0.0070594685" table:style-name="c1">
            <text:p>0.0070595</text:p>
          </table:table-cell>
          <table:table-cell office:value-type="float" office:value="-0.35608172327448173" table:style-name="c12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30</text:p>
          </table:table-cell>
          <table:table-cell office:value-type="float" office:value="0.0070925445" table:style-name="c1">
            <text:p>0.0070925</text:p>
          </table:table-cell>
          <table:table-cell office:value-type="string" table:style-name="c1">
            <text:p>2026-04-16 03:00</text:p>
          </table:table-cell>
          <table:table-cell office:value-type="float" office:value="0.007096450000000001" table:style-name="c1">
            <text:p>0.0070965</text:p>
          </table:table-cell>
          <table:table-cell office:value-type="float" office:value="-0.14494521042482944" table:style-name="c12">
            <text:p>-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3:15</text:p>
          </table:table-cell>
          <table:table-cell office:value-type="float" office:value="0.007138567499999999" table:style-name="c1">
            <text:p>0.0071386</text:p>
          </table:table-cell>
          <table:table-cell office:value-type="string" table:style-name="c1">
            <text:p>2026-04-16 03:45</text:p>
          </table:table-cell>
          <table:table-cell office:value-type="float" office:value="0.0071514225" table:style-name="c1">
            <text:p>0.0071514</text:p>
          </table:table-cell>
          <table:table-cell office:value-type="float" office:value="-0.02018183028316134" table:style-name="c12">
            <text:p>-0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45</text:p>
          </table:table-cell>
          <table:table-cell office:value-type="float" office:value="0.0071605785" table:style-name="c1">
            <text:p>0.0071606</text:p>
          </table:table-cell>
          <table:table-cell office:value-type="string" table:style-name="c1">
            <text:p>2026-04-16 13:15</text:p>
          </table:table-cell>
          <table:table-cell office:value-type="float" office:value="0.007210393000000001" table:style-name="c1">
            <text:p>0.0072104</text:p>
          </table:table-cell>
          <table:table-cell office:value-type="float" office:value="0.4943863738523513" table:style-name="c13">
            <text:p>+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30</text:p>
          </table:table-cell>
          <table:table-cell office:value-type="float" office:value="0.007242619499999999" table:style-name="c1">
            <text:p>0.0072426</text:p>
          </table:table-cell>
          <table:table-cell office:value-type="string" table:style-name="c1">
            <text:p>2026-04-16 14:00</text:p>
          </table:table-cell>
          <table:table-cell office:value-type="float" office:value="0.0071354305000000005" table:style-name="c1">
            <text:p>0.0071354</text:p>
          </table:table-cell>
          <table:table-cell office:value-type="float" office:value="-1.6769171094725976" table:style-name="c12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07210603499999999" table:style-name="c1">
            <text:p>0.0072106</text:p>
          </table:table-cell>
          <table:table-cell office:value-type="string" table:style-name="c1">
            <text:p>2026-04-16 16:30</text:p>
          </table:table-cell>
          <table:table-cell office:value-type="float" office:value="0.007224386" table:style-name="c1">
            <text:p>0.0072244</text:p>
          </table:table-cell>
          <table:table-cell office:value-type="float" office:value="-0.009139978560712692" table:style-name="c12">
            <text:p>-0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9:15</text:p>
          </table:table-cell>
          <table:table-cell office:value-type="float" office:value="0.0074487225" table:style-name="c1">
            <text:p>0.0074487</text:p>
          </table:table-cell>
          <table:table-cell office:value-type="string" table:style-name="c1">
            <text:p>2026-04-16 19:45</text:p>
          </table:table-cell>
          <table:table-cell office:value-type="float" office:value="0.007487254500000001" table:style-name="c1">
            <text:p>0.0074873</text:p>
          </table:table-cell>
          <table:table-cell office:value-type="float" office:value="0.3163626817149101" table:style-name="c13">
            <text:p>+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0.007315655999999999" table:style-name="c1">
            <text:p>0.0073157</text:p>
          </table:table-cell>
          <table:table-cell office:value-type="string" table:style-name="c1">
            <text:p>2026-04-17 08:45</text:p>
          </table:table-cell>
          <table:table-cell office:value-type="float" office:value="0.007302347000000001" table:style-name="c1">
            <text:p>0.0073023</text:p>
          </table:table-cell>
          <table:table-cell office:value-type="float" office:value="-0.381461234002789" table:style-name="c12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30</text:p>
          </table:table-cell>
          <table:table-cell office:value-type="float" office:value="0.007429713" table:style-name="c1">
            <text:p>0.0074297</text:p>
          </table:table-cell>
          <table:table-cell office:value-type="string" table:style-name="c1">
            <text:p>2026-04-17 14:00</text:p>
          </table:table-cell>
          <table:table-cell office:value-type="float" office:value="0.007488254000000001" table:style-name="c1">
            <text:p>0.0074883</text:p>
          </table:table-cell>
          <table:table-cell office:value-type="float" office:value="0.5864557655726355" table:style-name="c13">
            <text:p>+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0.00734367" table:style-name="c1">
            <text:p>0.0073437</text:p>
          </table:table-cell>
          <table:table-cell office:value-type="string" table:style-name="c1">
            <text:p>2026-04-18 07:15</text:p>
          </table:table-cell>
          <table:table-cell office:value-type="float" office:value="0.0073453255" table:style-name="c1">
            <text:p>0.0073453</text:p>
          </table:table-cell>
          <table:table-cell office:value-type="float" office:value="-0.17740183960471834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0.007235615999999999" table:style-name="c1">
            <text:p>0.0072356</text:p>
          </table:table-cell>
          <table:table-cell office:value-type="string" table:style-name="c1">
            <text:p>2026-04-22 03:15</text:p>
          </table:table-cell>
          <table:table-cell office:value-type="float" office:value="0.007234381" table:style-name="c1">
            <text:p>0.0072344</text:p>
          </table:table-cell>
          <table:table-cell office:value-type="float" office:value="-0.21693422673341178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45</text:p>
          </table:table-cell>
          <table:table-cell office:value-type="float" office:value="0.0072406185" table:style-name="c1">
            <text:p>0.0072406</text:p>
          </table:table-cell>
          <table:table-cell office:value-type="string" table:style-name="c1">
            <text:p>2026-04-22 04:15</text:p>
          </table:table-cell>
          <table:table-cell office:value-type="float" office:value="0.007226385000000001" table:style-name="c1">
            <text:p>0.0072264</text:p>
          </table:table-cell>
          <table:table-cell office:value-type="float" office:value="-0.39608555008109336" table:style-name="c12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0073476719999999995" table:style-name="c1">
            <text:p>0.0073477</text:p>
          </table:table-cell>
          <table:table-cell office:value-type="string" table:style-name="c1">
            <text:p>2026-04-22 06:00</text:p>
          </table:table-cell>
          <table:table-cell office:value-type="float" office:value="0.0073133415" table:style-name="c1">
            <text:p>0.0073133</text:p>
          </table:table-cell>
          <table:table-cell office:value-type="float" office:value="-0.6661956284725323" table:style-name="c12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0.0073076519999999996" table:style-name="c1">
            <text:p>0.0073077</text:p>
          </table:table-cell>
          <table:table-cell office:value-type="string" table:style-name="c1">
            <text:p>2026-04-23 21:15</text:p>
          </table:table-cell>
          <table:table-cell office:value-type="float" office:value="0.0071954005" table:style-name="c1">
            <text:p>0.0071954</text:p>
          </table:table-cell>
          <table:table-cell office:value-type="float" office:value="-1.7329110034180584" table:style-name="c12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8:30</text:p>
          </table:table-cell>
          <table:table-cell office:value-type="float" office:value="0.0072866415" table:style-name="c1">
            <text:p>0.0072866</text:p>
          </table:table-cell>
          <table:table-cell office:value-type="string" table:style-name="c1">
            <text:p>2026-04-24 09:00</text:p>
          </table:table-cell>
          <table:table-cell office:value-type="float" office:value="0.007298349000000001" table:style-name="c1">
            <text:p>0.0072983</text:p>
          </table:table-cell>
          <table:table-cell office:value-type="float" office:value="-0.03955045202923557" table:style-name="c12">
            <text:p>-0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30</text:p>
          </table:table-cell>
          <table:table-cell office:value-type="float" office:value="0.007373685" table:style-name="c1">
            <text:p>0.0073737</text:p>
          </table:table-cell>
          <table:table-cell office:value-type="string" table:style-name="c1">
            <text:p>2026-04-24 12:00</text:p>
          </table:table-cell>
          <table:table-cell office:value-type="float" office:value="0.0073653155000000005" table:style-name="c1">
            <text:p>0.0073653</text:p>
          </table:table-cell>
          <table:table-cell office:value-type="float" office:value="-0.31317808781498035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00</text:p>
          </table:table-cell>
          <table:table-cell office:value-type="float" office:value="0.0074067015" table:style-name="c1">
            <text:p>0.0074067</text:p>
          </table:table-cell>
          <table:table-cell office:value-type="string" table:style-name="c1">
            <text:p>2026-04-25 04:30</text:p>
          </table:table-cell>
          <table:table-cell office:value-type="float" office:value="0.0074332815000000005" table:style-name="c1">
            <text:p>0.0074333</text:p>
          </table:table-cell>
          <table:table-cell office:value-type="float" office:value="0.1582468293274797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45</text:p>
          </table:table-cell>
          <table:table-cell office:value-type="float" office:value="0.007389693" table:style-name="c1">
            <text:p>0.0073897</text:p>
          </table:table-cell>
          <table:table-cell office:value-type="string" table:style-name="c1">
            <text:p>2026-04-26 00:15</text:p>
          </table:table-cell>
          <table:table-cell office:value-type="float" office:value="0.0073303330000000005" table:style-name="c1">
            <text:p>0.0073303</text:p>
          </table:table-cell>
          <table:table-cell office:value-type="float" office:value="-1.001575243612951" table:style-name="c12">
            <text:p>-1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5:30</text:p>
          </table:table-cell>
          <table:table-cell office:value-type="float" office:value="0.007409703" table:style-name="c1">
            <text:p>0.0074097</text:p>
          </table:table-cell>
          <table:table-cell office:value-type="string" table:style-name="c1">
            <text:p>2026-04-26 16:00</text:p>
          </table:table-cell>
          <table:table-cell office:value-type="float" office:value="0.0073992985" table:style-name="c1">
            <text:p>0.0073993</text:p>
          </table:table-cell>
          <table:table-cell office:value-type="float" office:value="-0.3400365399463312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074207084999999996" table:style-name="c1">
            <text:p>0.0074207</text:p>
          </table:table-cell>
          <table:table-cell office:value-type="string" table:style-name="c1">
            <text:p>2026-04-27 01:30</text:p>
          </table:table-cell>
          <table:table-cell office:value-type="float" office:value="0.0074152905" table:style-name="c1">
            <text:p>0.0074153</text:p>
          </table:table-cell>
          <table:table-cell office:value-type="float" office:value="-0.2727659455899589" table:style-name="c12">
            <text:p>-0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6:00</text:p>
          </table:table-cell>
          <table:table-cell office:value-type="float" office:value="0.0072386175" table:style-name="c1">
            <text:p>0.0072386</text:p>
          </table:table-cell>
          <table:table-cell office:value-type="string" table:style-name="c1">
            <text:p>2026-05-01 16:30</text:p>
          </table:table-cell>
          <table:table-cell office:value-type="float" office:value="0.0071914025" table:style-name="c1">
            <text:p>0.0071914</text:p>
          </table:table-cell>
          <table:table-cell office:value-type="float" office:value="-0.8508615574382872" table:style-name="c12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4:45</text:p>
          </table:table-cell>
          <table:table-cell office:value-type="float" office:value="0.007181589" table:style-name="c1">
            <text:p>0.0071816</text:p>
          </table:table-cell>
          <table:table-cell office:value-type="string" table:style-name="c1">
            <text:p>2026-05-03 05:15</text:p>
          </table:table-cell>
          <table:table-cell office:value-type="float" office:value="0.007178409" table:style-name="c1">
            <text:p>0.0071784</text:p>
          </table:table-cell>
          <table:table-cell office:value-type="float" office:value="-0.24409137853753649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45</text:p>
          </table:table-cell>
          <table:table-cell office:value-type="float" office:value="0.0073346654999999995" table:style-name="c1">
            <text:p>0.0073347</text:p>
          </table:table-cell>
          <table:table-cell office:value-type="string" table:style-name="c1">
            <text:p>2026-05-04 03:15</text:p>
          </table:table-cell>
          <table:table-cell office:value-type="float" office:value="0.007348324000000001" table:style-name="c1">
            <text:p>0.0073483</text:p>
          </table:table-cell>
          <table:table-cell office:value-type="float" office:value="-0.014053806216496323" table:style-name="c12">
            <text:p>-0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6:15</text:p>
          </table:table-cell>
          <table:table-cell office:value-type="float" office:value="0.007417706999999999" table:style-name="c1">
            <text:p>0.0074177</text:p>
          </table:table-cell>
          <table:table-cell office:value-type="string" table:style-name="c1">
            <text:p>2026-05-04 06:45</text:p>
          </table:table-cell>
          <table:table-cell office:value-type="float" office:value="0.007396300000000001" table:style-name="c1">
            <text:p>0.0073963</text:p>
          </table:table-cell>
          <table:table-cell office:value-type="float" office:value="-0.4879163291297228" table:style-name="c12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7:45</text:p>
          </table:table-cell>
          <table:table-cell office:value-type="float" office:value="0.007219608" table:style-name="c1">
            <text:p>0.0072196</text:p>
          </table:table-cell>
          <table:table-cell office:value-type="string" table:style-name="c1">
            <text:p>2026-05-04 18:15</text:p>
          </table:table-cell>
          <table:table-cell office:value-type="float" office:value="0.007245375500000001" table:style-name="c1">
            <text:p>0.0072454</text:p>
          </table:table-cell>
          <table:table-cell office:value-type="float" office:value="0.156296496644992" table:style-name="c13">
            <text:p>+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3:45</text:p>
          </table:table-cell>
          <table:table-cell office:value-type="float" office:value="0.007247622" table:style-name="c1">
            <text:p>0.0072476</text:p>
          </table:table-cell>
          <table:table-cell office:value-type="string" table:style-name="c1">
            <text:p>2026-05-05 04:15</text:p>
          </table:table-cell>
          <table:table-cell office:value-type="float" office:value="0.007193401500000001" table:style-name="c1">
            <text:p>0.0071934</text:p>
          </table:table-cell>
          <table:table-cell office:value-type="float" office:value="-0.9465188664433466" table:style-name="c12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1:00</text:p>
          </table:table-cell>
          <table:table-cell office:value-type="float" office:value="0.007306651499999999" table:style-name="c1">
            <text:p>0.0073067</text:p>
          </table:table-cell>
          <table:table-cell office:value-type="string" table:style-name="c1">
            <text:p>2026-05-05 11:30</text:p>
          </table:table-cell>
          <table:table-cell office:value-type="float" office:value="0.007271362500000001" table:style-name="c1">
            <text:p>0.0072714</text:p>
          </table:table-cell>
          <table:table-cell office:value-type="float" office:value="-0.6819054342128816" table:style-name="c12">
            <text:p>-0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0.007353675" table:style-name="c1">
            <text:p>0.0073537</text:p>
          </table:table-cell>
          <table:table-cell office:value-type="string" table:style-name="c1">
            <text:p>2026-05-05 13:45</text:p>
          </table:table-cell>
          <table:table-cell office:value-type="float" office:value="0.0073073445" table:style-name="c1">
            <text:p>0.0073073</text:p>
          </table:table-cell>
          <table:table-cell office:value-type="float" office:value="-0.8286724890003927" table:style-name="c12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0.007483739999999999" table:style-name="c1">
            <text:p>0.0074837</text:p>
          </table:table-cell>
          <table:table-cell office:value-type="string" table:style-name="c1">
            <text:p>2026-05-05 20:45</text:p>
          </table:table-cell>
          <table:table-cell office:value-type="float" office:value="0.007458269" table:style-name="c1">
            <text:p>0.0074583</text:p>
          </table:table-cell>
          <table:table-cell office:value-type="float" office:value="-0.53957085268862" table:style-name="c12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15</text:p>
          </table:table-cell>
          <table:table-cell office:value-type="float" office:value="0.0075387675" table:style-name="c1">
            <text:p>0.0075388</text:p>
          </table:table-cell>
          <table:table-cell office:value-type="string" table:style-name="c1">
            <text:p>2026-05-05 21:45</text:p>
          </table:table-cell>
          <table:table-cell office:value-type="float" office:value="0.007519238500000001" table:style-name="c1">
            <text:p>0.0075192</text:p>
          </table:table-cell>
          <table:table-cell office:value-type="float" office:value="-0.4584298131159792" table:style-name="c12">
            <text:p>-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4:00</text:p>
          </table:table-cell>
          <table:table-cell office:value-type="float" office:value="0.00766383" table:style-name="c1">
            <text:p>0.0076638</text:p>
          </table:table-cell>
          <table:table-cell office:value-type="string" table:style-name="c1">
            <text:p>2026-05-06 04:30</text:p>
          </table:table-cell>
          <table:table-cell office:value-type="float" office:value="0.007664166000000001" table:style-name="c1">
            <text:p>0.0076642</text:p>
          </table:table-cell>
          <table:table-cell office:value-type="float" office:value="-0.19552453321639574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0.0076908435" table:style-name="c1">
            <text:p>0.0076908</text:p>
          </table:table-cell>
          <table:table-cell office:value-type="string" table:style-name="c1">
            <text:p>2026-05-06 09:00</text:p>
          </table:table-cell>
          <table:table-cell office:value-type="float" office:value="0.007738129" table:style-name="c1">
            <text:p>0.0077381</text:p>
          </table:table-cell>
          <table:table-cell office:value-type="float" office:value="0.41369948730591855" table:style-name="c13">
            <text:p>+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7:30</text:p>
          </table:table-cell>
          <table:table-cell office:value-type="float" office:value="0.007679838" table:style-name="c1">
            <text:p>0.0076798</text:p>
          </table:table-cell>
          <table:table-cell office:value-type="string" table:style-name="c1">
            <text:p>2026-05-06 18:00</text:p>
          </table:table-cell>
          <table:table-cell office:value-type="float" office:value="0.007648174000000001" table:style-name="c1">
            <text:p>0.0076482</text:p>
          </table:table-cell>
          <table:table-cell office:value-type="float" office:value="-0.611376175200562" table:style-name="c12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30</text:p>
          </table:table-cell>
          <table:table-cell office:value-type="float" office:value="0.007651824" table:style-name="c1">
            <text:p>0.0076518</text:p>
          </table:table-cell>
          <table:table-cell office:value-type="string" table:style-name="c1">
            <text:p>2026-05-07 05:00</text:p>
          </table:table-cell>
          <table:table-cell office:value-type="float" office:value="0.007648174000000001" table:style-name="c1">
            <text:p>0.0076482</text:p>
          </table:table-cell>
          <table:table-cell office:value-type="float" office:value="-0.2475056904863382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0.007687841999999999" table:style-name="c1">
            <text:p>0.0076878</text:p>
          </table:table-cell>
          <table:table-cell office:value-type="string" table:style-name="c1">
            <text:p>2026-05-07 05:45</text:p>
          </table:table-cell>
          <table:table-cell office:value-type="float" office:value="0.0076911525" table:style-name="c1">
            <text:p>0.0076912</text:p>
          </table:table-cell>
          <table:table-cell office:value-type="float" office:value="-0.15692458101373985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0:15</text:p>
          </table:table-cell>
          <table:table-cell office:value-type="float" office:value="0.007791894" table:style-name="c1">
            <text:p>0.0077919</text:p>
          </table:table-cell>
          <table:table-cell office:value-type="string" table:style-name="c1">
            <text:p>2026-05-08 20:45</text:p>
          </table:table-cell>
          <table:table-cell office:value-type="float" office:value="0.0078130915" table:style-name="c1">
            <text:p>0.0078131</text:p>
          </table:table-cell>
          <table:table-cell office:value-type="float" office:value="0.0716017195754759" table:style-name="c13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2:15</text:p>
          </table:table-cell>
          <table:table-cell office:value-type="float" office:value="0.0080670315" table:style-name="c1">
            <text:p>0.008067</text:p>
          </table:table-cell>
          <table:table-cell office:value-type="string" table:style-name="c1">
            <text:p>2026-05-08 22:45</text:p>
          </table:table-cell>
          <table:table-cell office:value-type="float" office:value="0.0079870045" table:style-name="c1">
            <text:p>0.007987</text:p>
          </table:table-cell>
          <table:table-cell office:value-type="float" office:value="-1.1899423225941397" table:style-name="c12">
            <text:p>-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30</text:p>
          </table:table-cell>
          <table:table-cell office:value-type="float" office:value="0.008076035999999998" table:style-name="c1">
            <text:p>0.008076</text:p>
          </table:table-cell>
          <table:table-cell office:value-type="string" table:style-name="c1">
            <text:p>2026-05-09 02:00</text:p>
          </table:table-cell>
          <table:table-cell office:value-type="float" office:value="0.008073961000000001" table:style-name="c1">
            <text:p>0.008074</text:p>
          </table:table-cell>
          <table:table-cell office:value-type="float" office:value="-0.2255419371458678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00</text:p>
          </table:table-cell>
          <table:table-cell office:value-type="float" office:value="0.007909952999999999" table:style-name="c1">
            <text:p>0.00791</text:p>
          </table:table-cell>
          <table:table-cell office:value-type="string" table:style-name="c1">
            <text:p>2026-05-10 13:30</text:p>
          </table:table-cell>
          <table:table-cell office:value-type="float" office:value="0.00783608" table:style-name="c1">
            <text:p>0.0078361</text:p>
          </table:table-cell>
          <table:table-cell office:value-type="float" office:value="-1.131957723642596" table:style-name="c12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0.0079489725" table:style-name="c1">
            <text:p>0.007949</text:p>
          </table:table-cell>
          <table:table-cell office:value-type="string" table:style-name="c1">
            <text:p>2026-05-10 23:45</text:p>
          </table:table-cell>
          <table:table-cell office:value-type="float" office:value="0.007946025" table:style-name="c1">
            <text:p>0.007946</text:p>
          </table:table-cell>
          <table:table-cell office:value-type="float" office:value="-0.23690614069931115" table:style-name="c12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0:15</text:p>
          </table:table-cell>
          <table:table-cell office:value-type="float" office:value="0.0078489225" table:style-name="c1">
            <text:p>0.0078489</text:p>
          </table:table-cell>
          <table:table-cell office:value-type="string" table:style-name="c1">
            <text:p>2026-05-11 10:45</text:p>
          </table:table-cell>
          <table:table-cell office:value-type="float" office:value="0.007814091" table:style-name="c1">
            <text:p>0.0078141</text:p>
          </table:table-cell>
          <table:table-cell office:value-type="float" office:value="-0.6427871839605803" table:style-name="c12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0:45</text:p>
          </table:table-cell>
          <table:table-cell office:value-type="float" office:value="0.006661329" table:style-name="c1">
            <text:p>0.0066613</text:p>
          </table:table-cell>
          <table:table-cell office:value-type="string" table:style-name="c1">
            <text:p>2026-05-25 01:15</text:p>
          </table:table-cell>
          <table:table-cell office:value-type="float" office:value="0.006645675500000001" table:style-name="c1">
            <text:p>0.0066457</text:p>
          </table:table-cell>
          <table:table-cell office:value-type="float" office:value="-0.4344208989602416" table:style-name="c12">
            <text:p>-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4:15</text:p>
          </table:table-cell>
          <table:table-cell office:value-type="float" office:value="0.0066763364999999995" table:style-name="c1">
            <text:p>0.0066763</text:p>
          </table:table-cell>
          <table:table-cell office:value-type="string" table:style-name="c1">
            <text:p>2026-05-26 04:45</text:p>
          </table:table-cell>
          <table:table-cell office:value-type="float" office:value="0.0067216375000000005" table:style-name="c1">
            <text:p>0.0067216</text:p>
          </table:table-cell>
          <table:table-cell office:value-type="float" office:value="0.4772744249410099" table:style-name="c13">
            <text:p>+0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7:00</text:p>
          </table:table-cell>
          <table:table-cell office:value-type="float" office:value="0.0062831399999999996" table:style-name="c1">
            <text:p>0.0062831</text:p>
          </table:table-cell>
          <table:table-cell office:value-type="string" table:style-name="c1">
            <text:p>2026-05-30 07:30</text:p>
          </table:table-cell>
          <table:table-cell office:value-type="float" office:value="0.0062478745" table:style-name="c1">
            <text:p>0.0062479</text:p>
          </table:table-cell>
          <table:table-cell office:value-type="float" office:value="-0.7600499292630736" table:style-name="c12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9:30</text:p>
          </table:table-cell>
          <table:table-cell office:value-type="float" office:value="0.006367182" table:style-name="c1">
            <text:p>0.0063672</text:p>
          </table:table-cell>
          <table:table-cell office:value-type="string" table:style-name="c1">
            <text:p>2026-05-30 10:00</text:p>
          </table:table-cell>
          <table:table-cell office:value-type="float" office:value="0.0064037965" table:style-name="c1">
            <text:p>0.0064038</text:p>
          </table:table-cell>
          <table:table-cell office:value-type="float" office:value="0.37400078710645435" table:style-name="c13">
            <text:p>+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05 20:30</text:p>
          </table:table-cell>
          <table:table-cell office:value-type="float" office:value="0.1582791" table:style-name="c9">
            <text:p>0.15828</text:p>
          </table:table-cell>
          <table:table-cell office:value-type="string" table:style-name="c9">
            <text:p>2026-03-05 21:00</text:p>
          </table:table-cell>
          <table:table-cell office:value-type="float" office:value="0.1581209" table:style-name="c9">
            <text:p>0.15812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3:00</text:p>
          </table:table-cell>
          <table:table-cell office:value-type="float" office:value="0.15417704999999998" table:style-name="c9">
            <text:p>0.15418</text:p>
          </table:table-cell>
          <table:table-cell office:value-type="string" table:style-name="c9">
            <text:p>2026-03-10 03:30</text:p>
          </table:table-cell>
          <table:table-cell office:value-type="float" office:value="0.15422285" table:style-name="c9">
            <text:p>0.15422</text:p>
          </table:table-cell>
          <table:table-cell office:value-type="float" office:value="-0.17025327514698096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09:30</text:p>
          </table:table-cell>
          <table:table-cell office:value-type="float" office:value="0.16078035" table:style-name="c9">
            <text:p>0.16078</text:p>
          </table:table-cell>
          <table:table-cell office:value-type="string" table:style-name="c9">
            <text:p>2026-03-10 10:00</text:p>
          </table:table-cell>
          <table:table-cell office:value-type="float" office:value="0.16161915000000002" table:style-name="c9">
            <text:p>0.16162</text:p>
          </table:table-cell>
          <table:table-cell office:value-type="float" office:value="0.3207626548580089" table:style-name="c11">
            <text:p>+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0 14:45</text:p>
          </table:table-cell>
          <table:table-cell office:value-type="float" office:value="0.16378185" table:style-name="c9">
            <text:p>0.16378</text:p>
          </table:table-cell>
          <table:table-cell office:value-type="string" table:style-name="c9">
            <text:p>2026-03-10 15:15</text:p>
          </table:table-cell>
          <table:table-cell office:value-type="float" office:value="0.16631680000000001" table:style-name="c9">
            <text:p>0.16632</text:p>
          </table:table-cell>
          <table:table-cell office:value-type="float" office:value="1.3447660511833437" table:style-name="c11">
            <text:p>+1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8:00</text:p>
          </table:table-cell>
          <table:table-cell office:value-type="float" office:value="0.15857925" table:style-name="c9">
            <text:p>0.15858</text:p>
          </table:table-cell>
          <table:table-cell office:value-type="string" table:style-name="c9">
            <text:p>2026-03-12 08:30</text:p>
          </table:table-cell>
          <table:table-cell office:value-type="float" office:value="0.15902045" table:style-name="c9">
            <text:p>0.15902</text:p>
          </table:table-cell>
          <table:table-cell office:value-type="float" office:value="0.07776434839363855" table:style-name="c11">
            <text:p>+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09:45</text:p>
          </table:table-cell>
          <table:table-cell office:value-type="float" office:value="0.1598799" table:style-name="c9">
            <text:p>0.15988</text:p>
          </table:table-cell>
          <table:table-cell office:value-type="string" table:style-name="c9">
            <text:p>2026-03-12 10:15</text:p>
          </table:table-cell>
          <table:table-cell office:value-type="float" office:value="0.1595202" table:style-name="c9">
            <text:p>0.15952</text:p>
          </table:table-cell>
          <table:table-cell office:value-type="float" office:value="-0.4244316388739233" table:style-name="c10">
            <text:p>-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2 10:45</text:p>
          </table:table-cell>
          <table:table-cell office:value-type="float" office:value="0.16018005" table:style-name="c9">
            <text:p>0.16018</text:p>
          </table:table-cell>
          <table:table-cell office:value-type="string" table:style-name="c9">
            <text:p>2026-03-12 11:15</text:p>
          </table:table-cell>
          <table:table-cell office:value-type="float" office:value="0.15992" table:style-name="c9">
            <text:p>0.15992</text:p>
          </table:table-cell>
          <table:table-cell office:value-type="float" office:value="-0.3619240223735498" table:style-name="c10">
            <text:p>-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06:00</text:p>
          </table:table-cell>
          <table:table-cell office:value-type="float" office:value="0.16378185" table:style-name="c9">
            <text:p>0.16378</text:p>
          </table:table-cell>
          <table:table-cell office:value-type="string" table:style-name="c9">
            <text:p>2026-03-13 06:30</text:p>
          </table:table-cell>
          <table:table-cell office:value-type="float" office:value="0.1621189" table:style-name="c9">
            <text:p>0.16212</text:p>
          </table:table-cell>
          <table:table-cell office:value-type="float" office:value="-1.2132148227047224" table:style-name="c10">
            <text:p>-1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00</text:p>
          </table:table-cell>
          <table:table-cell office:value-type="float" office:value="0.16668329999999998" table:style-name="c9">
            <text:p>0.16668</text:p>
          </table:table-cell>
          <table:table-cell office:value-type="string" table:style-name="c9">
            <text:p>2026-03-13 13:30</text:p>
          </table:table-cell>
          <table:table-cell office:value-type="float" office:value="0.16701645" table:style-name="c9">
            <text:p>0.16702</text:p>
          </table:table-cell>
          <table:table-cell office:value-type="float" office:value="-0.00042948726716174335" table:style-name="c10">
            <text:p>-0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13:45</text:p>
          </table:table-cell>
          <table:table-cell office:value-type="float" office:value="0.1678839" table:style-name="c9">
            <text:p>0.16788</text:p>
          </table:table-cell>
          <table:table-cell office:value-type="string" table:style-name="c9">
            <text:p>2026-03-13 14:15</text:p>
          </table:table-cell>
          <table:table-cell office:value-type="float" office:value="0.16721635" table:style-name="c9">
            <text:p>0.16722</text:p>
          </table:table-cell>
          <table:table-cell office:value-type="float" office:value="-0.5967311240982487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21:15</text:p>
          </table:table-cell>
          <table:table-cell office:value-type="float" office:value="0.16478235" table:style-name="c9">
            <text:p>0.16478</text:p>
          </table:table-cell>
          <table:table-cell office:value-type="string" table:style-name="c9">
            <text:p>2026-03-13 21:45</text:p>
          </table:table-cell>
          <table:table-cell office:value-type="float" office:value="0.16481755" table:style-name="c9">
            <text:p>0.16482</text:p>
          </table:table-cell>
          <table:table-cell office:value-type="float" office:value="-0.17858119055225163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3 22:00</text:p>
          </table:table-cell>
          <table:table-cell office:value-type="float" office:value="0.166083" table:style-name="c9">
            <text:p>0.16608</text:p>
          </table:table-cell>
          <table:table-cell office:value-type="string" table:style-name="c9">
            <text:p>2026-03-13 22:30</text:p>
          </table:table-cell>
          <table:table-cell office:value-type="float" office:value="0.16401795" table:style-name="c9">
            <text:p>0.16402</text:p>
          </table:table-cell>
          <table:table-cell office:value-type="float" office:value="-1.4407988066509114" table:style-name="c10">
            <text:p>-1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00:30</text:p>
          </table:table-cell>
          <table:table-cell office:value-type="float" office:value="0.16668329999999998" table:style-name="c9">
            <text:p>0.16668</text:p>
          </table:table-cell>
          <table:table-cell office:value-type="string" table:style-name="c9">
            <text:p>2026-03-14 01:00</text:p>
          </table:table-cell>
          <table:table-cell office:value-type="float" office:value="0.16421785" table:style-name="c9">
            <text:p>0.16422</text:p>
          </table:table-cell>
          <table:table-cell office:value-type="float" office:value="-1.6760656179413136" table:style-name="c10">
            <text:p>-1.7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4 03:15</text:p>
          </table:table-cell>
          <table:table-cell office:value-type="float" office:value="0.1658829" table:style-name="c9">
            <text:p>0.16588</text:p>
          </table:table-cell>
          <table:table-cell office:value-type="string" table:style-name="c9">
            <text:p>2026-03-14 03:45</text:p>
          </table:table-cell>
          <table:table-cell office:value-type="float" office:value="0.16491750000000002" table:style-name="c9">
            <text:p>0.16492</text:p>
          </table:table-cell>
          <table:table-cell office:value-type="float" office:value="-0.7807134324876008" table:style-name="c10">
            <text:p>-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2:15</text:p>
          </table:table-cell>
          <table:table-cell office:value-type="float" office:value="0.1676838" table:style-name="c9">
            <text:p>0.16768</text:p>
          </table:table-cell>
          <table:table-cell office:value-type="string" table:style-name="c9">
            <text:p>2026-03-15 02:45</text:p>
          </table:table-cell>
          <table:table-cell office:value-type="float" office:value="0.1677161" table:style-name="c9">
            <text:p>0.16772</text:p>
          </table:table-cell>
          <table:table-cell office:value-type="float" office:value="-0.18067606047810214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3:30</text:p>
          </table:table-cell>
          <table:table-cell office:value-type="float" office:value="0.16858425" table:style-name="c9">
            <text:p>0.16858</text:p>
          </table:table-cell>
          <table:table-cell office:value-type="string" table:style-name="c9">
            <text:p>2026-03-15 04:00</text:p>
          </table:table-cell>
          <table:table-cell office:value-type="float" office:value="0.1677161" table:style-name="c9">
            <text:p>0.16772</text:p>
          </table:table-cell>
          <table:table-cell office:value-type="float" office:value="-0.7138356542203628" table:style-name="c10">
            <text:p>-0.7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09:30</text:p>
          </table:table-cell>
          <table:table-cell office:value-type="float" office:value="0.1678839" table:style-name="c9">
            <text:p>0.16788</text:p>
          </table:table-cell>
          <table:table-cell office:value-type="string" table:style-name="c9">
            <text:p>2026-03-15 10:00</text:p>
          </table:table-cell>
          <table:table-cell office:value-type="float" office:value="0.16741625000000002" table:style-name="c9">
            <text:p>0.16742</text:p>
          </table:table-cell>
          <table:table-cell office:value-type="float" office:value="-0.4778987644139754" table:style-name="c10">
            <text:p>-0.5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13:00</text:p>
          </table:table-cell>
          <table:table-cell office:value-type="float" office:value="0.16838414999999998" table:style-name="c9">
            <text:p>0.16838</text:p>
          </table:table-cell>
          <table:table-cell office:value-type="string" table:style-name="c9">
            <text:p>2026-03-15 13:30</text:p>
          </table:table-cell>
          <table:table-cell office:value-type="float" office:value="0.16741625000000002" table:style-name="c9">
            <text:p>0.16742</text:p>
          </table:table-cell>
          <table:table-cell office:value-type="float" office:value="-0.7735675143711318" table:style-name="c10">
            <text:p>-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00</text:p>
          </table:table-cell>
          <table:table-cell office:value-type="float" office:value="0.1688844" table:style-name="c9">
            <text:p>0.16888</text:p>
          </table:table-cell>
          <table:table-cell office:value-type="string" table:style-name="c9">
            <text:p>2026-03-15 22:30</text:p>
          </table:table-cell>
          <table:table-cell office:value-type="float" office:value="0.16821585000000003" table:style-name="c9">
            <text:p>0.16822</text:p>
          </table:table-cell>
          <table:table-cell office:value-type="float" office:value="-0.5949711661645152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5 22:45</text:p>
          </table:table-cell>
          <table:table-cell office:value-type="float" office:value="0.16998495" table:style-name="c9">
            <text:p>0.16998</text:p>
          </table:table-cell>
          <table:table-cell office:value-type="string" table:style-name="c9">
            <text:p>2026-03-15 23:15</text:p>
          </table:table-cell>
          <table:table-cell office:value-type="float" office:value="0.1697151" table:style-name="c9">
            <text:p>0.16972</text:p>
          </table:table-cell>
          <table:table-cell office:value-type="float" office:value="-0.3583320081571917" table:style-name="c10">
            <text:p>-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2:45</text:p>
          </table:table-cell>
          <table:table-cell office:value-type="float" office:value="0.17278634999999998" table:style-name="c9">
            <text:p>0.17279</text:p>
          </table:table-cell>
          <table:table-cell office:value-type="string" table:style-name="c9">
            <text:p>2026-03-16 13:15</text:p>
          </table:table-cell>
          <table:table-cell office:value-type="float" office:value="0.17271360000000002" table:style-name="c9">
            <text:p>0.17271</text:p>
          </table:table-cell>
          <table:table-cell office:value-type="float" office:value="-0.24191985443290376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5:00</text:p>
          </table:table-cell>
          <table:table-cell office:value-type="float" office:value="0.1746873" table:style-name="c9">
            <text:p>0.17469</text:p>
          </table:table-cell>
          <table:table-cell office:value-type="string" table:style-name="c9">
            <text:p>2026-03-16 15:30</text:p>
          </table:table-cell>
          <table:table-cell office:value-type="float" office:value="0.17411290000000001" table:style-name="c9">
            <text:p>0.17411</text:p>
          </table:table-cell>
          <table:table-cell office:value-type="float" office:value="-0.5280588154376264" table:style-name="c10">
            <text:p>-0.5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17:15</text:p>
          </table:table-cell>
          <table:table-cell office:value-type="float" office:value="0.17458724999999997" table:style-name="c9">
            <text:p>0.17459</text:p>
          </table:table-cell>
          <table:table-cell office:value-type="string" table:style-name="c9">
            <text:p>2026-03-16 17:45</text:p>
          </table:table-cell>
          <table:table-cell office:value-type="float" office:value="0.17451270000000002" table:style-name="c9">
            <text:p>0.17451</text:p>
          </table:table-cell>
          <table:table-cell office:value-type="float" office:value="-0.2425153539562297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6 22:30</text:p>
          </table:table-cell>
          <table:table-cell office:value-type="float" office:value="0.17608799999999997" table:style-name="c9">
            <text:p>0.17609</text:p>
          </table:table-cell>
          <table:table-cell office:value-type="string" table:style-name="c9">
            <text:p>2026-03-16 23:00</text:p>
          </table:table-cell>
          <table:table-cell office:value-type="float" office:value="0.17621185000000003" table:style-name="c9">
            <text:p>0.17621</text:p>
          </table:table-cell>
          <table:table-cell office:value-type="float" office:value="-0.1297064468617437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18 03:30</text:p>
          </table:table-cell>
          <table:table-cell office:value-type="float" office:value="0.17738865" table:style-name="c9">
            <text:p>0.17739</text:p>
          </table:table-cell>
          <table:table-cell office:value-type="string" table:style-name="c9">
            <text:p>2026-03-18 04:00</text:p>
          </table:table-cell>
          <table:table-cell office:value-type="float" office:value="0.17651170000000002" table:style-name="c9">
            <text:p>0.17651</text:p>
          </table:table-cell>
          <table:table-cell office:value-type="float" office:value="-0.6932782273837534" table:style-name="c10">
            <text:p>-0.7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3 21:00</text:p>
          </table:table-cell>
          <table:table-cell office:value-type="float" office:value="0.16678334999999997" table:style-name="c9">
            <text:p>0.16678</text:p>
          </table:table-cell>
          <table:table-cell office:value-type="string" table:style-name="c9">
            <text:p>2026-03-23 21:30</text:p>
          </table:table-cell>
          <table:table-cell office:value-type="float" office:value="0.16681655" table:style-name="c9">
            <text:p>0.16682</text:p>
          </table:table-cell>
          <table:table-cell office:value-type="float" office:value="-0.18003372845667442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19:30</text:p>
          </table:table-cell>
          <table:table-cell office:value-type="float" office:value="0.16758375" table:style-name="c9">
            <text:p>0.16758</text:p>
          </table:table-cell>
          <table:table-cell office:value-type="string" table:style-name="c9">
            <text:p>2026-03-24 20:00</text:p>
          </table:table-cell>
          <table:table-cell office:value-type="float" office:value="0.16651670000000002" table:style-name="c9">
            <text:p>0.16652</text:p>
          </table:table-cell>
          <table:table-cell office:value-type="float" office:value="-0.8353535968135151" table:style-name="c10">
            <text:p>-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0:30</text:p>
          </table:table-cell>
          <table:table-cell office:value-type="float" office:value="0.16958475" table:style-name="c9">
            <text:p>0.16958</text:p>
          </table:table-cell>
          <table:table-cell office:value-type="string" table:style-name="c9">
            <text:p>2026-03-24 21:00</text:p>
          </table:table-cell>
          <table:table-cell office:value-type="float" office:value="0.17001495" table:style-name="c9">
            <text:p>0.17001</text:p>
          </table:table-cell>
          <table:table-cell office:value-type="float" office:value="0.0532713672367402" table:style-name="c11">
            <text:p>+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4 23:30</text:p>
          </table:table-cell>
          <table:table-cell office:value-type="float" office:value="0.17498745" table:style-name="c9">
            <text:p>0.17499</text:p>
          </table:table-cell>
          <table:table-cell office:value-type="string" table:style-name="c9">
            <text:p>2026-03-25 00:00</text:p>
          </table:table-cell>
          <table:table-cell office:value-type="float" office:value="0.17381305" table:style-name="c9">
            <text:p>0.17381</text:p>
          </table:table-cell>
          <table:table-cell office:value-type="float" office:value="-0.8696922476154612" table:style-name="c10">
            <text:p>-0.9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1:45</text:p>
          </table:table-cell>
          <table:table-cell office:value-type="float" office:value="0.18039014999999997" table:style-name="c9">
            <text:p>0.18039</text:p>
          </table:table-cell>
          <table:table-cell office:value-type="string" table:style-name="c9">
            <text:p>2026-03-25 02:15</text:p>
          </table:table-cell>
          <table:table-cell office:value-type="float" office:value="0.1789105" table:style-name="c9">
            <text:p>0.17891</text:p>
          </table:table-cell>
          <table:table-cell office:value-type="float" office:value="-1.0185102066271212" table:style-name="c10">
            <text:p>-1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5 07:00</text:p>
          </table:table-cell>
          <table:table-cell office:value-type="float" office:value="0.17938964999999998" table:style-name="c9">
            <text:p>0.17939</text:p>
          </table:table-cell>
          <table:table-cell office:value-type="string" table:style-name="c9">
            <text:p>2026-03-25 07:30</text:p>
          </table:table-cell>
          <table:table-cell office:value-type="float" office:value="0.17961015" table:style-name="c9">
            <text:p>0.17961</text:p>
          </table:table-cell>
          <table:table-cell office:value-type="float" office:value="-0.07722892031394313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6 14:15</text:p>
          </table:table-cell>
          <table:table-cell office:value-type="float" office:value="0.1754877" table:style-name="c9">
            <text:p>0.17549</text:p>
          </table:table-cell>
          <table:table-cell office:value-type="string" table:style-name="c9">
            <text:p>2026-03-26 14:45</text:p>
          </table:table-cell>
          <table:table-cell office:value-type="float" office:value="0.1751124" table:style-name="c9">
            <text:p>0.17511</text:p>
          </table:table-cell>
          <table:table-cell office:value-type="float" office:value="-0.4133336339811722" table:style-name="c10">
            <text:p>-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26 20:15</text:p>
          </table:table-cell>
          <table:table-cell office:value-type="float" office:value="0.17378685" table:style-name="c9">
            <text:p>0.17379</text:p>
          </table:table-cell>
          <table:table-cell office:value-type="string" table:style-name="c9">
            <text:p>2026-03-26 20:45</text:p>
          </table:table-cell>
          <table:table-cell office:value-type="float" office:value="0.17361315" table:style-name="c9">
            <text:p>0.17361</text:p>
          </table:table-cell>
          <table:table-cell office:value-type="float" office:value="-0.2996502248875488" table:style-name="c10">
            <text:p>-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3-31 01:45</text:p>
          </table:table-cell>
          <table:table-cell office:value-type="float" office:value="0.16958475" table:style-name="c9">
            <text:p>0.16958</text:p>
          </table:table-cell>
          <table:table-cell office:value-type="string" table:style-name="c9">
            <text:p>2026-03-31 02:15</text:p>
          </table:table-cell>
          <table:table-cell office:value-type="float" office:value="0.16981505" table:style-name="c9">
            <text:p>0.16982</text:p>
          </table:table-cell>
          <table:table-cell office:value-type="float" office:value="-0.06436916347137833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6:15</text:p>
          </table:table-cell>
          <table:table-cell office:value-type="float" office:value="0.172086" table:style-name="c9">
            <text:p>0.17209</text:p>
          </table:table-cell>
          <table:table-cell office:value-type="string" table:style-name="c9">
            <text:p>2026-04-01 06:45</text:p>
          </table:table-cell>
          <table:table-cell office:value-type="float" office:value="0.17191399999999998" table:style-name="c9">
            <text:p>0.17191</text:p>
          </table:table-cell>
          <table:table-cell office:value-type="float" office:value="-0.299650224887571" table:style-name="c10">
            <text:p>-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07:00</text:p>
          </table:table-cell>
          <table:table-cell office:value-type="float" office:value="0.1718859" table:style-name="c9">
            <text:p>0.17189</text:p>
          </table:table-cell>
          <table:table-cell office:value-type="string" table:style-name="c9">
            <text:p>2026-04-01 07:30</text:p>
          </table:table-cell>
          <table:table-cell office:value-type="float" office:value="0.17191399999999998" table:style-name="c9">
            <text:p>0.17191</text:p>
          </table:table-cell>
          <table:table-cell office:value-type="float" office:value="-0.18358462561504085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01 12:45</text:p>
          </table:table-cell>
          <table:table-cell office:value-type="float" office:value="0.1746873" table:style-name="c9">
            <text:p>0.17469</text:p>
          </table:table-cell>
          <table:table-cell office:value-type="string" table:style-name="c9">
            <text:p>2026-04-01 13:15</text:p>
          </table:table-cell>
          <table:table-cell office:value-type="float" office:value="0.17341325" table:style-name="c9">
            <text:p>0.17341</text:p>
          </table:table-cell>
          <table:table-cell office:value-type="float" office:value="-0.9277738489002929" table:style-name="c10">
            <text:p>-0.9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2:30</text:p>
          </table:table-cell>
          <table:table-cell office:value-type="float" office:value="0.1554777" table:style-name="c9">
            <text:p>0.15548</text:p>
          </table:table-cell>
          <table:table-cell office:value-type="string" table:style-name="c9">
            <text:p>2026-04-13 23:00</text:p>
          </table:table-cell>
          <table:table-cell office:value-type="float" office:value="0.15542225" table:style-name="c9">
            <text:p>0.15542</text:p>
          </table:table-cell>
          <table:table-cell office:value-type="float" office:value="-0.23549298565002097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3 23:30</text:p>
          </table:table-cell>
          <table:table-cell office:value-type="float" office:value="0.15637815" table:style-name="c9">
            <text:p>0.15638</text:p>
          </table:table-cell>
          <table:table-cell office:value-type="string" table:style-name="c9">
            <text:p>2026-04-14 00:00</text:p>
          </table:table-cell>
          <table:table-cell office:value-type="float" office:value="0.15622185" table:style-name="c9">
            <text:p>0.15622</text:p>
          </table:table-cell>
          <table:table-cell office:value-type="float" office:value="-0.2996502248875599" table:style-name="c10">
            <text:p>-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08:45</text:p>
          </table:table-cell>
          <table:table-cell office:value-type="float" office:value="0.1564782" table:style-name="c9">
            <text:p>0.15648</text:p>
          </table:table-cell>
          <table:table-cell office:value-type="string" table:style-name="c9">
            <text:p>2026-04-14 09:15</text:p>
          </table:table-cell>
          <table:table-cell office:value-type="float" office:value="0.15682155000000003" table:style-name="c9">
            <text:p>0.15682</text:p>
          </table:table-cell>
          <table:table-cell office:value-type="float" office:value="0.019084908664601663" table:style-name="c11">
            <text:p>+0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4 13:45</text:p>
          </table:table-cell>
          <table:table-cell office:value-type="float" office:value="0.15707849999999998" table:style-name="c9">
            <text:p>0.15708</text:p>
          </table:table-cell>
          <table:table-cell office:value-type="string" table:style-name="c9">
            <text:p>2026-04-14 14:15</text:p>
          </table:table-cell>
          <table:table-cell office:value-type="float" office:value="0.157921" table:style-name="c9">
            <text:p>0.15792</text:p>
          </table:table-cell>
          <table:table-cell office:value-type="float" office:value="0.33538385011315786" table:style-name="c11">
            <text:p>+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02:15</text:p>
          </table:table-cell>
          <table:table-cell office:value-type="float" office:value="0.1572786" table:style-name="c9">
            <text:p>0.15728</text:p>
          </table:table-cell>
          <table:table-cell office:value-type="string" table:style-name="c9">
            <text:p>2026-04-15 02:45</text:p>
          </table:table-cell>
          <table:table-cell office:value-type="float" office:value="0.15562215000000001" table:style-name="c9">
            <text:p>0.15562</text:p>
          </table:table-cell>
          <table:table-cell office:value-type="float" office:value="-1.250989440298922" table:style-name="c10">
            <text:p>-1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5 22:15</text:p>
          </table:table-cell>
          <table:table-cell office:value-type="float" office:value="0.1586793" table:style-name="c9">
            <text:p>0.15868</text:p>
          </table:table-cell>
          <table:table-cell office:value-type="string" table:style-name="c9">
            <text:p>2026-04-15 22:45</text:p>
          </table:table-cell>
          <table:table-cell office:value-type="float" office:value="0.15802095" table:style-name="c9">
            <text:p>0.15802</text:p>
          </table:table-cell>
          <table:table-cell office:value-type="float" office:value="-0.6139640640272392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2:45</text:p>
          </table:table-cell>
          <table:table-cell office:value-type="float" office:value="0.16008" table:style-name="c9">
            <text:p>0.16008</text:p>
          </table:table-cell>
          <table:table-cell office:value-type="string" table:style-name="c9">
            <text:p>2026-04-16 03:15</text:p>
          </table:table-cell>
          <table:table-cell office:value-type="float" office:value="0.1601199" table:style-name="c9">
            <text:p>0.16012</text:p>
          </table:table-cell>
          <table:table-cell office:value-type="float" office:value="-0.17502478766866503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3:30</text:p>
          </table:table-cell>
          <table:table-cell office:value-type="float" office:value="0.16088039999999998" table:style-name="c9">
            <text:p>0.16088</text:p>
          </table:table-cell>
          <table:table-cell office:value-type="string" table:style-name="c9">
            <text:p>2026-04-16 04:00</text:p>
          </table:table-cell>
          <table:table-cell office:value-type="float" office:value="0.15982005" table:style-name="c9">
            <text:p>0.15982</text:p>
          </table:table-cell>
          <table:table-cell office:value-type="float" office:value="-0.8576745706437627" table:style-name="c10">
            <text:p>-0.9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08:45</text:p>
          </table:table-cell>
          <table:table-cell office:value-type="float" office:value="0.16178085" table:style-name="c9">
            <text:p>0.16178</text:p>
          </table:table-cell>
          <table:table-cell office:value-type="string" table:style-name="c9">
            <text:p>2026-04-16 09:15</text:p>
          </table:table-cell>
          <table:table-cell office:value-type="float" office:value="0.1617191" table:style-name="c9">
            <text:p>0.16172</text:p>
          </table:table-cell>
          <table:table-cell office:value-type="float" office:value="-0.23799261834759333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2:30</text:p>
          </table:table-cell>
          <table:table-cell office:value-type="float" office:value="0.16158075" table:style-name="c9">
            <text:p>0.16158</text:p>
          </table:table-cell>
          <table:table-cell office:value-type="string" table:style-name="c9">
            <text:p>2026-04-16 13:00</text:p>
          </table:table-cell>
          <table:table-cell office:value-type="float" office:value="0.1615192" table:style-name="c9">
            <text:p>0.16152</text:p>
          </table:table-cell>
          <table:table-cell office:value-type="float" office:value="-0.2379162621785169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3:30</text:p>
          </table:table-cell>
          <table:table-cell office:value-type="float" office:value="0.16268129999999997" table:style-name="c9">
            <text:p>0.16268</text:p>
          </table:table-cell>
          <table:table-cell office:value-type="string" table:style-name="c9">
            <text:p>2026-04-16 14:00</text:p>
          </table:table-cell>
          <table:table-cell office:value-type="float" office:value="0.16071960000000002" table:style-name="c9">
            <text:p>0.16072</text:p>
          </table:table-cell>
          <table:table-cell office:value-type="float" office:value="-1.4033441338371033" table:style-name="c10">
            <text:p>-1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5:45</text:p>
          </table:table-cell>
          <table:table-cell office:value-type="float" office:value="0.16288139999999998" table:style-name="c9">
            <text:p>0.16288</text:p>
          </table:table-cell>
          <table:table-cell office:value-type="string" table:style-name="c9">
            <text:p>2026-04-16 16:15</text:p>
          </table:table-cell>
          <table:table-cell office:value-type="float" office:value="0.16521735" table:style-name="c9">
            <text:p>0.16522</text:p>
          </table:table-cell>
          <table:table-cell office:value-type="float" office:value="1.2313748023715654" table:style-name="c11">
            <text:p>+1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16:30</text:p>
          </table:table-cell>
          <table:table-cell office:value-type="float" office:value="0.16478235" table:style-name="c9">
            <text:p>0.16478</text:p>
          </table:table-cell>
          <table:table-cell office:value-type="string" table:style-name="c9">
            <text:p>2026-04-16 17:00</text:p>
          </table:table-cell>
          <table:table-cell office:value-type="float" office:value="0.1633183" table:style-name="c9">
            <text:p>0.16332</text:p>
          </table:table-cell>
          <table:table-cell office:value-type="float" office:value="-1.0865989480669636" table:style-name="c10">
            <text:p>-1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6 23:15</text:p>
          </table:table-cell>
          <table:table-cell office:value-type="float" office:value="0.16878434999999997" table:style-name="c9">
            <text:p>0.16878</text:p>
          </table:table-cell>
          <table:table-cell office:value-type="string" table:style-name="c9">
            <text:p>2026-04-16 23:45</text:p>
          </table:table-cell>
          <table:table-cell office:value-type="float" office:value="0.16941525000000002" table:style-name="c9">
            <text:p>0.16942</text:p>
          </table:table-cell>
          <table:table-cell office:value-type="float" office:value="0.17314337214915376" table:style-name="c11">
            <text:p>+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8:00</text:p>
          </table:table-cell>
          <table:table-cell office:value-type="float" office:value="0.16728359999999998" table:style-name="c9">
            <text:p>0.16728</text:p>
          </table:table-cell>
          <table:table-cell office:value-type="string" table:style-name="c9">
            <text:p>2026-04-17 08:30</text:p>
          </table:table-cell>
          <table:table-cell office:value-type="float" office:value="0.16691650000000002" table:style-name="c9">
            <text:p>0.16692</text:p>
          </table:table-cell>
          <table:table-cell office:value-type="float" office:value="-0.4189090164845477" table:style-name="c10">
            <text:p>-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09:15</text:p>
          </table:table-cell>
          <table:table-cell office:value-type="float" office:value="0.16798395" table:style-name="c9">
            <text:p>0.16798</text:p>
          </table:table-cell>
          <table:table-cell office:value-type="string" table:style-name="c9">
            <text:p>2026-04-17 09:45</text:p>
          </table:table-cell>
          <table:table-cell office:value-type="float" office:value="0.16851570000000002" table:style-name="c9">
            <text:p>0.16852</text:p>
          </table:table-cell>
          <table:table-cell office:value-type="float" office:value="0.11601531914211538" table:style-name="c11">
            <text:p>+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00</text:p>
          </table:table-cell>
          <table:table-cell office:value-type="float" office:value="0.17078534999999997" table:style-name="c9">
            <text:p>0.17079</text:p>
          </table:table-cell>
          <table:table-cell office:value-type="string" table:style-name="c9">
            <text:p>2026-04-17 13:30</text:p>
          </table:table-cell>
          <table:table-cell office:value-type="float" office:value="0.17251370000000002" table:style-name="c9">
            <text:p>0.17251</text:p>
          </table:table-cell>
          <table:table-cell office:value-type="float" office:value="0.8100783314845428" table:style-name="c11">
            <text:p>+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7 13:45</text:p>
          </table:table-cell>
          <table:table-cell office:value-type="float" office:value="0.1728864" table:style-name="c9">
            <text:p>0.17289</text:p>
          </table:table-cell>
          <table:table-cell office:value-type="string" table:style-name="c9">
            <text:p>2026-04-17 14:15</text:p>
          </table:table-cell>
          <table:table-cell office:value-type="float" office:value="0.17321335000000002" table:style-name="c9">
            <text:p>0.17321</text:p>
          </table:table-cell>
          <table:table-cell office:value-type="float" office:value="-0.011165416510472426" table:style-name="c10">
            <text:p>-0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9 11:45</text:p>
          </table:table-cell>
          <table:table-cell office:value-type="float" office:value="0.17028509999999997" table:style-name="c9">
            <text:p>0.17029</text:p>
          </table:table-cell>
          <table:table-cell office:value-type="string" table:style-name="c9">
            <text:p>2026-04-19 12:15</text:p>
          </table:table-cell>
          <table:table-cell office:value-type="float" office:value="0.17061465" table:style-name="c9">
            <text:p>0.17061</text:p>
          </table:table-cell>
          <table:table-cell office:value-type="float" office:value="-0.006758480542334855" table:style-name="c10">
            <text:p>-0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9 13:30</text:p>
          </table:table-cell>
          <table:table-cell office:value-type="float" office:value="0.1714857" table:style-name="c9">
            <text:p>0.17149</text:p>
          </table:table-cell>
          <table:table-cell office:value-type="string" table:style-name="c9">
            <text:p>2026-04-19 14:00</text:p>
          </table:table-cell>
          <table:table-cell office:value-type="float" office:value="0.17081455" table:style-name="c9">
            <text:p>0.17081</text:p>
          </table:table-cell>
          <table:table-cell office:value-type="float" office:value="-0.5904913852583515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19 19:45</text:p>
          </table:table-cell>
          <table:table-cell office:value-type="float" office:value="0.17138565" table:style-name="c9">
            <text:p>0.17139</text:p>
          </table:table-cell>
          <table:table-cell office:value-type="string" table:style-name="c9">
            <text:p>2026-04-19 20:15</text:p>
          </table:table-cell>
          <table:table-cell office:value-type="float" office:value="0.16981505" table:style-name="c9">
            <text:p>0.16982</text:p>
          </table:table-cell>
          <table:table-cell office:value-type="float" office:value="-1.1144808710355947" table:style-name="c10">
            <text:p>-1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0 18:00</text:p>
          </table:table-cell>
          <table:table-cell office:value-type="float" office:value="0.1726863" table:style-name="c9">
            <text:p>0.17269</text:p>
          </table:table-cell>
          <table:table-cell office:value-type="string" table:style-name="c9">
            <text:p>2026-04-20 18:30</text:p>
          </table:table-cell>
          <table:table-cell office:value-type="float" office:value="0.17411290000000001" table:style-name="c9">
            <text:p>0.17411</text:p>
          </table:table-cell>
          <table:table-cell office:value-type="float" office:value="0.6245708622514057" table:style-name="c11">
            <text:p>+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1:15</text:p>
          </table:table-cell>
          <table:table-cell office:value-type="float" office:value="0.17538765" table:style-name="c9">
            <text:p>0.17539</text:p>
          </table:table-cell>
          <table:table-cell office:value-type="string" table:style-name="c9">
            <text:p>2026-04-21 01:45</text:p>
          </table:table-cell>
          <table:table-cell office:value-type="float" office:value="0.17431280000000002" table:style-name="c9">
            <text:p>0.17431</text:p>
          </table:table-cell>
          <table:table-cell office:value-type="float" office:value="-0.8115173942977227" table:style-name="c10">
            <text:p>-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5:00</text:p>
          </table:table-cell>
          <table:table-cell office:value-type="float" office:value="0.1758879" table:style-name="c9">
            <text:p>0.17589</text:p>
          </table:table-cell>
          <table:table-cell office:value-type="string" table:style-name="c9">
            <text:p>2026-04-21 05:30</text:p>
          </table:table-cell>
          <table:table-cell office:value-type="float" office:value="0.175912" table:style-name="c9">
            <text:p>0.17591</text:p>
          </table:table-cell>
          <table:table-cell office:value-type="float" office:value="-0.18622548111609794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08:15</text:p>
          </table:table-cell>
          <table:table-cell office:value-type="float" office:value="0.18079035" table:style-name="c9">
            <text:p>0.18079</text:p>
          </table:table-cell>
          <table:table-cell office:value-type="string" table:style-name="c9">
            <text:p>2026-04-21 08:45</text:p>
          </table:table-cell>
          <table:table-cell office:value-type="float" office:value="0.1815092" table:style-name="c9">
            <text:p>0.18151</text:p>
          </table:table-cell>
          <table:table-cell office:value-type="float" office:value="0.19692041594034926" table:style-name="c11">
            <text:p>+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1 11:00</text:p>
          </table:table-cell>
          <table:table-cell office:value-type="float" office:value="0.18379184999999998" table:style-name="c9">
            <text:p>0.18379</text:p>
          </table:table-cell>
          <table:table-cell office:value-type="string" table:style-name="c9">
            <text:p>2026-04-21 11:30</text:p>
          </table:table-cell>
          <table:table-cell office:value-type="float" office:value="0.18080955" table:style-name="c9">
            <text:p>0.18081</text:p>
          </table:table-cell>
          <table:table-cell office:value-type="float" office:value="-1.8193071621238843" table:style-name="c10">
            <text:p>-1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2 05:30</text:p>
          </table:table-cell>
          <table:table-cell office:value-type="float" office:value="0.1812906" table:style-name="c9">
            <text:p>0.18129</text:p>
          </table:table-cell>
          <table:table-cell office:value-type="string" table:style-name="c9">
            <text:p>2026-04-22 06:00</text:p>
          </table:table-cell>
          <table:table-cell office:value-type="float" office:value="0.18120935" table:style-name="c9">
            <text:p>0.18121</text:p>
          </table:table-cell>
          <table:table-cell office:value-type="float" office:value="-0.2446279567997478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06:30</text:p>
          </table:table-cell>
          <table:table-cell office:value-type="float" office:value="0.17778885" table:style-name="c9">
            <text:p>0.17779</text:p>
          </table:table-cell>
          <table:table-cell office:value-type="string" table:style-name="c9">
            <text:p>2026-04-23 07:00</text:p>
          </table:table-cell>
          <table:table-cell office:value-type="float" office:value="0.1773113" table:style-name="c9">
            <text:p>0.17731</text:p>
          </table:table-cell>
          <table:table-cell office:value-type="float" office:value="-0.4679682042490363" table:style-name="c10">
            <text:p>-0.5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2:30</text:p>
          </table:table-cell>
          <table:table-cell office:value-type="float" office:value="0.17758875" table:style-name="c9">
            <text:p>0.17759</text:p>
          </table:table-cell>
          <table:table-cell office:value-type="string" table:style-name="c9">
            <text:p>2026-04-23 13:00</text:p>
          </table:table-cell>
          <table:table-cell office:value-type="float" office:value="0.1775112" table:style-name="c9">
            <text:p>0.17751</text:p>
          </table:table-cell>
          <table:table-cell office:value-type="float" office:value="-0.2434810137466381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3:15</text:p>
          </table:table-cell>
          <table:table-cell office:value-type="float" office:value="0.17808899999999997" table:style-name="c9">
            <text:p>0.17809</text:p>
          </table:table-cell>
          <table:table-cell office:value-type="string" table:style-name="c9">
            <text:p>2026-04-23 13:45</text:p>
          </table:table-cell>
          <table:table-cell office:value-type="float" office:value="0.1771114" table:style-name="c9">
            <text:p>0.17711</text:p>
          </table:table-cell>
          <table:table-cell office:value-type="float" office:value="-0.747741684550951" table:style-name="c10">
            <text:p>-0.7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4-23 15:00</text:p>
          </table:table-cell>
          <table:table-cell office:value-type="float" office:value="0.17888939999999998" table:style-name="c9">
            <text:p>0.17889</text:p>
          </table:table-cell>
          <table:table-cell office:value-type="string" table:style-name="c9">
            <text:p>2026-04-23 15:30</text:p>
          </table:table-cell>
          <table:table-cell office:value-type="float" office:value="0.17821085" table:style-name="c9">
            <text:p>0.17821</text:p>
          </table:table-cell>
          <table:table-cell office:value-type="float" office:value="-0.5784543349969251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5 12:45</text:p>
          </table:table-cell>
          <table:table-cell office:value-type="float" office:value="0.1604802" table:style-name="c9">
            <text:p>0.16048</text:p>
          </table:table-cell>
          <table:table-cell office:value-type="string" table:style-name="c9">
            <text:p>2026-05-05 13:15</text:p>
          </table:table-cell>
          <table:table-cell office:value-type="float" office:value="0.16071960000000002" table:style-name="c9">
            <text:p>0.16072</text:p>
          </table:table-cell>
          <table:table-cell office:value-type="float" office:value="-0.051020923702704835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1:30</text:p>
          </table:table-cell>
          <table:table-cell office:value-type="float" office:value="0.16148069999999998" table:style-name="c9">
            <text:p>0.16148</text:p>
          </table:table-cell>
          <table:table-cell office:value-type="string" table:style-name="c9">
            <text:p>2026-05-06 02:00</text:p>
          </table:table-cell>
          <table:table-cell office:value-type="float" office:value="0.1617191" table:style-name="c9">
            <text:p>0.16172</text:p>
          </table:table-cell>
          <table:table-cell office:value-type="float" office:value="-0.05256137786125992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3:30</text:p>
          </table:table-cell>
          <table:table-cell office:value-type="float" office:value="0.1618809" table:style-name="c9">
            <text:p>0.16188</text:p>
          </table:table-cell>
          <table:table-cell office:value-type="string" table:style-name="c9">
            <text:p>2026-05-06 04:00</text:p>
          </table:table-cell>
          <table:table-cell office:value-type="float" office:value="0.16231879999999999" table:style-name="c9">
            <text:p>0.16232</text:p>
          </table:table-cell>
          <table:table-cell office:value-type="float" office:value="0.0700667705701985" table:style-name="c11">
            <text:p>+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7:30</text:p>
          </table:table-cell>
          <table:table-cell office:value-type="float" office:value="0.16288139999999998" table:style-name="c9">
            <text:p>0.16288</text:p>
          </table:table-cell>
          <table:table-cell office:value-type="string" table:style-name="c9">
            <text:p>2026-05-06 08:00</text:p>
          </table:table-cell>
          <table:table-cell office:value-type="float" office:value="0.16291850000000002" table:style-name="c9">
            <text:p>0.16292</text:p>
          </table:table-cell>
          <table:table-cell office:value-type="float" office:value="-0.17716822270681387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09:00</text:p>
          </table:table-cell>
          <table:table-cell office:value-type="float" office:value="0.16578284999999998" table:style-name="c9">
            <text:p>0.16578</text:p>
          </table:table-cell>
          <table:table-cell office:value-type="string" table:style-name="c9">
            <text:p>2026-05-06 09:30</text:p>
          </table:table-cell>
          <table:table-cell office:value-type="float" office:value="0.16471760000000002" table:style-name="c9">
            <text:p>0.16472</text:p>
          </table:table-cell>
          <table:table-cell office:value-type="float" office:value="-0.8411729454524175" table:style-name="c10">
            <text:p>-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6 21:45</text:p>
          </table:table-cell>
          <table:table-cell office:value-type="float" office:value="0.1624812" table:style-name="c9">
            <text:p>0.16248</text:p>
          </table:table-cell>
          <table:table-cell office:value-type="string" table:style-name="c9">
            <text:p>2026-05-06 22:15</text:p>
          </table:table-cell>
          <table:table-cell office:value-type="float" office:value="0.161919" table:style-name="c9">
            <text:p>0.16192</text:p>
          </table:table-cell>
          <table:table-cell office:value-type="float" office:value="-0.5452175888656652" table:style-name="c10">
            <text:p>-0.5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7 05:15</text:p>
          </table:table-cell>
          <table:table-cell office:value-type="float" office:value="0.16168079999999999" table:style-name="c9">
            <text:p>0.16168</text:p>
          </table:table-cell>
          <table:table-cell office:value-type="string" table:style-name="c9">
            <text:p>2026-05-07 05:45</text:p>
          </table:table-cell>
          <table:table-cell office:value-type="float" office:value="0.16101945" table:style-name="c9">
            <text:p>0.16102</text:p>
          </table:table-cell>
          <table:table-cell office:value-type="float" office:value="-0.6081290298848185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8:00</text:p>
          </table:table-cell>
          <table:table-cell office:value-type="float" office:value="0.1638819" table:style-name="c9">
            <text:p>0.16388</text:p>
          </table:table-cell>
          <table:table-cell office:value-type="string" table:style-name="c9">
            <text:p>2026-05-08 18:30</text:p>
          </table:table-cell>
          <table:table-cell office:value-type="float" office:value="0.16541725000000002" table:style-name="c9">
            <text:p>0.16542</text:p>
          </table:table-cell>
          <table:table-cell office:value-type="float" office:value="0.735090889994594" table:style-name="c11">
            <text:p>+0.7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8 18:45</text:p>
          </table:table-cell>
          <table:table-cell office:value-type="float" office:value="0.16438215" table:style-name="c9">
            <text:p>0.16438</text:p>
          </table:table-cell>
          <table:table-cell office:value-type="string" table:style-name="c9">
            <text:p>2026-05-08 19:15</text:p>
          </table:table-cell>
          <table:table-cell office:value-type="float" office:value="0.16451770000000002" table:style-name="c9">
            <text:p>0.16452</text:p>
          </table:table-cell>
          <table:table-cell office:value-type="float" office:value="-0.11760454666152054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00</text:p>
          </table:table-cell>
          <table:table-cell office:value-type="float" office:value="0.16488239999999998" table:style-name="c9">
            <text:p>0.16488</text:p>
          </table:table-cell>
          <table:table-cell office:value-type="string" table:style-name="c9">
            <text:p>2026-05-09 01:30</text:p>
          </table:table-cell>
          <table:table-cell office:value-type="float" office:value="0.1653173" table:style-name="c9">
            <text:p>0.16532</text:p>
          </table:table-cell>
          <table:table-cell office:value-type="float" office:value="0.0633364854587315" table:style-name="c11">
            <text:p>+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1:45</text:p>
          </table:table-cell>
          <table:table-cell office:value-type="float" office:value="0.166083" table:style-name="c9">
            <text:p>0.16608</text:p>
          </table:table-cell>
          <table:table-cell office:value-type="string" table:style-name="c9">
            <text:p>2026-05-09 02:15</text:p>
          </table:table-cell>
          <table:table-cell office:value-type="float" office:value="0.1671164" table:style-name="c9">
            <text:p>0.16712</text:p>
          </table:table-cell>
          <table:table-cell office:value-type="float" office:value="0.42107519517347036" table:style-name="c11">
            <text:p>+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09 02:30</text:p>
          </table:table-cell>
          <table:table-cell office:value-type="float" office:value="0.16698344999999998" table:style-name="c9">
            <text:p>0.16698</text:p>
          </table:table-cell>
          <table:table-cell office:value-type="string" table:style-name="c9">
            <text:p>2026-05-09 03:00</text:p>
          </table:table-cell>
          <table:table-cell office:value-type="float" office:value="0.1671164" table:style-name="c9">
            <text:p>0.16712</text:p>
          </table:table-cell>
          <table:table-cell office:value-type="float" office:value="-0.12044048892269066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00</text:p>
          </table:table-cell>
          <table:table-cell office:value-type="float" office:value="0.16778384999999998" table:style-name="c9">
            <text:p>0.16778</text:p>
          </table:table-cell>
          <table:table-cell office:value-type="string" table:style-name="c9">
            <text:p>2026-05-10 16:30</text:p>
          </table:table-cell>
          <table:table-cell office:value-type="float" office:value="0.16881555" table:style-name="c9">
            <text:p>0.16882</text:p>
          </table:table-cell>
          <table:table-cell office:value-type="float" office:value="0.4137690937179084" table:style-name="c11">
            <text:p>+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6:45</text:p>
          </table:table-cell>
          <table:table-cell office:value-type="float" office:value="0.16978485" table:style-name="c9">
            <text:p>0.16978</text:p>
          </table:table-cell>
          <table:table-cell office:value-type="string" table:style-name="c9">
            <text:p>2026-05-10 17:15</text:p>
          </table:table-cell>
          <table:table-cell office:value-type="float" office:value="0.17231380000000002" table:style-name="c9">
            <text:p>0.17231</text:p>
          </table:table-cell>
          <table:table-cell office:value-type="float" office:value="1.286625228222671" table:style-name="c11">
            <text:p>+1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7:30</text:p>
          </table:table-cell>
          <table:table-cell office:value-type="float" office:value="0.1726863" table:style-name="c9">
            <text:p>0.17269</text:p>
          </table:table-cell>
          <table:table-cell office:value-type="string" table:style-name="c9">
            <text:p>2026-05-10 18:00</text:p>
          </table:table-cell>
          <table:table-cell office:value-type="float" office:value="0.17281355" table:style-name="c9">
            <text:p>0.17281</text:p>
          </table:table-cell>
          <table:table-cell office:value-type="float" office:value="-0.1263587710489955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0 18:15</text:p>
          </table:table-cell>
          <table:table-cell office:value-type="float" office:value="0.1726863" table:style-name="c9">
            <text:p>0.17269</text:p>
          </table:table-cell>
          <table:table-cell office:value-type="string" table:style-name="c9">
            <text:p>2026-05-10 18:45</text:p>
          </table:table-cell>
          <table:table-cell office:value-type="float" office:value="0.1713143" table:style-name="c9">
            <text:p>0.17131</text:p>
          </table:table-cell>
          <table:table-cell office:value-type="float" office:value="-0.9928160402417396" table:style-name="c10">
            <text:p>-1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11 08:15</text:p>
          </table:table-cell>
          <table:table-cell office:value-type="float" office:value="0.16748369999999999" table:style-name="c9">
            <text:p>0.16748</text:p>
          </table:table-cell>
          <table:table-cell office:value-type="string" table:style-name="c9">
            <text:p>2026-05-11 08:45</text:p>
          </table:table-cell>
          <table:table-cell office:value-type="float" office:value="0.1673163" table:style-name="c9">
            <text:p>0.16732</text:p>
          </table:table-cell>
          <table:table-cell office:value-type="float" office:value="-0.2996502248875377" table:style-name="c10">
            <text:p>-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1 18:15</text:p>
          </table:table-cell>
          <table:table-cell office:value-type="float" office:value="0.1482741" table:style-name="c9">
            <text:p>0.14827</text:p>
          </table:table-cell>
          <table:table-cell office:value-type="string" table:style-name="c9">
            <text:p>2026-05-21 18:45</text:p>
          </table:table-cell>
          <table:table-cell office:value-type="float" office:value="0.1485257" table:style-name="c9">
            <text:p>0.14853</text:p>
          </table:table-cell>
          <table:table-cell office:value-type="float" office:value="-0.03055346436093842" table:style-name="c10">
            <text:p>-0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2 13:00</text:p>
          </table:table-cell>
          <table:table-cell office:value-type="float" office:value="0.15057525" table:style-name="c9">
            <text:p>0.15058</text:p>
          </table:table-cell>
          <table:table-cell office:value-type="string" table:style-name="c9">
            <text:p>2026-05-22 13:30</text:p>
          </table:table-cell>
          <table:table-cell office:value-type="float" office:value="0.14962515" table:style-name="c9">
            <text:p>0.14963</text:p>
          </table:table-cell>
          <table:table-cell office:value-type="float" office:value="-0.829618861565895" table:style-name="c10">
            <text:p>-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07:00</text:p>
          </table:table-cell>
          <table:table-cell office:value-type="float" office:value="0.1506753" table:style-name="c9">
            <text:p>0.15068</text:p>
          </table:table-cell>
          <table:table-cell office:value-type="string" table:style-name="c9">
            <text:p>2026-05-25 07:30</text:p>
          </table:table-cell>
          <table:table-cell office:value-type="float" office:value="0.15092450000000002" table:style-name="c9">
            <text:p>0.15092</text:p>
          </table:table-cell>
          <table:table-cell office:value-type="float" office:value="-0.034841858950995785" table:style-name="c10">
            <text:p>-0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07:45</text:p>
          </table:table-cell>
          <table:table-cell office:value-type="float" office:value="0.1524762" table:style-name="c9">
            <text:p>0.15248</text:p>
          </table:table-cell>
          <table:table-cell office:value-type="string" table:style-name="c9">
            <text:p>2026-05-25 08:15</text:p>
          </table:table-cell>
          <table:table-cell office:value-type="float" office:value="0.15312340000000002" table:style-name="c9">
            <text:p>0.15312</text:p>
          </table:table-cell>
          <table:table-cell office:value-type="float" office:value="0.2237111912547718" table:style-name="c11">
            <text:p>+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5 08:30</text:p>
          </table:table-cell>
          <table:table-cell office:value-type="float" office:value="0.15367679999999997" table:style-name="c9">
            <text:p>0.15368</text:p>
          </table:table-cell>
          <table:table-cell office:value-type="string" table:style-name="c9">
            <text:p>2026-05-25 09:00</text:p>
          </table:table-cell>
          <table:table-cell office:value-type="float" office:value="0.15342325" table:style-name="c9">
            <text:p>0.15342</text:p>
          </table:table-cell>
          <table:table-cell office:value-type="float" office:value="-0.3645593067723718" table:style-name="c10">
            <text:p>-0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07:00</text:p>
          </table:table-cell>
          <table:table-cell office:value-type="float" office:value="0.14937464999999997" table:style-name="c9">
            <text:p>0.14937</text:p>
          </table:table-cell>
          <table:table-cell office:value-type="string" table:style-name="c9">
            <text:p>2026-05-26 07:30</text:p>
          </table:table-cell>
          <table:table-cell office:value-type="float" office:value="0.1485257" table:style-name="c9">
            <text:p>0.14853</text:p>
          </table:table-cell>
          <table:table-cell office:value-type="float" office:value="-0.7670999559161951" table:style-name="c10">
            <text:p>-0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6 11:00</text:p>
          </table:table-cell>
          <table:table-cell office:value-type="float" office:value="0.1504752" table:style-name="c9">
            <text:p>0.15048</text:p>
          </table:table-cell>
          <table:table-cell office:value-type="string" table:style-name="c9">
            <text:p>2026-05-26 11:30</text:p>
          </table:table-cell>
          <table:table-cell office:value-type="float" office:value="0.14982505000000002" table:style-name="c9">
            <text:p>0.14983</text:p>
          </table:table-cell>
          <table:table-cell office:value-type="float" office:value="-0.6311008557888576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7 14:00</text:p>
          </table:table-cell>
          <table:table-cell office:value-type="float" office:value="0.15157574999999998" table:style-name="c9">
            <text:p>0.15158</text:p>
          </table:table-cell>
          <table:table-cell office:value-type="string" table:style-name="c9">
            <text:p>2026-05-27 14:30</text:p>
          </table:table-cell>
          <table:table-cell office:value-type="float" office:value="0.15702145" table:style-name="c9">
            <text:p>0.15702</text:p>
          </table:table-cell>
          <table:table-cell office:value-type="float" office:value="3.385643232146318" table:style-name="c11">
            <text:p>+3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7 14:45</text:p>
          </table:table-cell>
          <table:table-cell office:value-type="float" office:value="0.16058025" table:style-name="c9">
            <text:p>0.16058</text:p>
          </table:table-cell>
          <table:table-cell office:value-type="string" table:style-name="c9">
            <text:p>2026-05-27 15:15</text:p>
          </table:table-cell>
          <table:table-cell office:value-type="float" office:value="0.15992" table:style-name="c9">
            <text:p>0.15992</text:p>
          </table:table-cell>
          <table:table-cell office:value-type="float" office:value="-0.6102432148411774" table:style-name="c10">
            <text:p>-0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7 19:15</text:p>
          </table:table-cell>
          <table:table-cell office:value-type="float" office:value="0.1696848" table:style-name="c9">
            <text:p>0.16968</text:p>
          </table:table-cell>
          <table:table-cell office:value-type="string" table:style-name="c9">
            <text:p>2026-05-27 19:45</text:p>
          </table:table-cell>
          <table:table-cell office:value-type="float" office:value="0.16321835" table:style-name="c9">
            <text:p>0.16322</text:p>
          </table:table-cell>
          <table:table-cell office:value-type="float" office:value="-4.003141991297965" table:style-name="c10">
            <text:p>-4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8 00:15</text:p>
          </table:table-cell>
          <table:table-cell office:value-type="float" office:value="0.1676838" table:style-name="c9">
            <text:p>0.16768</text:p>
          </table:table-cell>
          <table:table-cell office:value-type="string" table:style-name="c9">
            <text:p>2026-05-28 00:45</text:p>
          </table:table-cell>
          <table:table-cell office:value-type="float" office:value="0.17181405" table:style-name="c9">
            <text:p>0.17181</text:p>
          </table:table-cell>
          <table:table-cell office:value-type="float" office:value="2.258294309915465" table:style-name="c11">
            <text:p>+2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8 12:30</text:p>
          </table:table-cell>
          <table:table-cell office:value-type="float" office:value="0.18259124999999998" table:style-name="c9">
            <text:p>0.18259</text:p>
          </table:table-cell>
          <table:table-cell office:value-type="string" table:style-name="c9">
            <text:p>2026-05-28 13:00</text:p>
          </table:table-cell>
          <table:table-cell office:value-type="float" office:value="0.19020485" table:style-name="c9">
            <text:p>0.1902</text:p>
          </table:table-cell>
          <table:table-cell office:value-type="float" office:value="3.961515409336447" table:style-name="c11">
            <text:p>+4.0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8 13:15</text:p>
          </table:table-cell>
          <table:table-cell office:value-type="float" office:value="0.1946973" table:style-name="c9">
            <text:p>0.1947</text:p>
          </table:table-cell>
          <table:table-cell office:value-type="string" table:style-name="c9">
            <text:p>2026-05-28 13:45</text:p>
          </table:table-cell>
          <table:table-cell office:value-type="float" office:value="0.20349820000000002" table:style-name="c9">
            <text:p>0.2035</text:p>
          </table:table-cell>
          <table:table-cell office:value-type="float" office:value="4.311362868514368" table:style-name="c11">
            <text:p>+4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8 17:15</text:p>
          </table:table-cell>
          <table:table-cell office:value-type="float" office:value="0.21220605" table:style-name="c9">
            <text:p>0.21221</text:p>
          </table:table-cell>
          <table:table-cell office:value-type="string" table:style-name="c9">
            <text:p>2026-05-28 17:45</text:p>
          </table:table-cell>
          <table:table-cell office:value-type="float" office:value="0.20729630000000002" table:style-name="c9">
            <text:p>0.2073</text:p>
          </table:table-cell>
          <table:table-cell office:value-type="float" office:value="-2.508946047344074" table:style-name="c10">
            <text:p>-2.5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9 08:30</text:p>
          </table:table-cell>
          <table:table-cell office:value-type="float" office:value="0.21460724999999997" table:style-name="c9">
            <text:p>0.21461</text:p>
          </table:table-cell>
          <table:table-cell office:value-type="string" table:style-name="c9">
            <text:p>2026-05-29 09:00</text:p>
          </table:table-cell>
          <table:table-cell office:value-type="float" office:value="0.22268860000000001" table:style-name="c9">
            <text:p>0.22269</text:p>
          </table:table-cell>
          <table:table-cell office:value-type="float" office:value="3.5582187873895554" table:style-name="c11">
            <text:p>+3.6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29 19:45</text:p>
          </table:table-cell>
          <table:table-cell office:value-type="float" office:value="0.23581784999999997" table:style-name="c9">
            <text:p>0.23582</text:p>
          </table:table-cell>
          <table:table-cell office:value-type="string" table:style-name="c9">
            <text:p>2026-05-29 20:15</text:p>
          </table:table-cell>
          <table:table-cell office:value-type="float" office:value="0.23578205000000002" table:style-name="c9">
            <text:p>0.23578</text:p>
          </table:table-cell>
          <table:table-cell office:value-type="float" office:value="-0.21505086148058128" table:style-name="c10">
            <text:p>-0.2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2:45</text:p>
          </table:table-cell>
          <table:table-cell office:value-type="float" office:value="0.24192089999999997" table:style-name="c9">
            <text:p>0.24192</text:p>
          </table:table-cell>
          <table:table-cell office:value-type="string" table:style-name="c9">
            <text:p>2026-05-31 03:15</text:p>
          </table:table-cell>
          <table:table-cell office:value-type="float" office:value="0.24177905000000002" table:style-name="c9">
            <text:p>0.24178</text:p>
          </table:table-cell>
          <table:table-cell office:value-type="float" office:value="-0.25841765674232686" table:style-name="c10">
            <text:p>-0.3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09:15</text:p>
          </table:table-cell>
          <table:table-cell office:value-type="float" office:value="0.2411205" table:style-name="c9">
            <text:p>0.24112</text:p>
          </table:table-cell>
          <table:table-cell office:value-type="string" table:style-name="c9">
            <text:p>2026-05-31 09:45</text:p>
          </table:table-cell>
          <table:table-cell office:value-type="float" office:value="0.2484757" table:style-name="c9">
            <text:p>0.24848</text:p>
          </table:table-cell>
          <table:table-cell office:value-type="float" office:value="2.8444271954064737" table:style-name="c11">
            <text:p>+2.8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10:15</text:p>
          </table:table-cell>
          <table:table-cell office:value-type="float" office:value="0.2457228" table:style-name="c9">
            <text:p>0.24572</text:p>
          </table:table-cell>
          <table:table-cell office:value-type="string" table:style-name="c9">
            <text:p>2026-05-31 10:45</text:p>
          </table:table-cell>
          <table:table-cell office:value-type="float" office:value="0.24607690000000002" table:style-name="c9">
            <text:p>0.24608</text:p>
          </table:table-cell>
          <table:table-cell office:value-type="float" office:value="-0.056082595143780445" table:style-name="c10">
            <text:p>-0.1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5-31 11:30</text:p>
          </table:table-cell>
          <table:table-cell office:value-type="float" office:value="0.2571285" table:style-name="c9">
            <text:p>0.25713</text:p>
          </table:table-cell>
          <table:table-cell office:value-type="string" table:style-name="c9">
            <text:p>2026-05-31 12:00</text:p>
          </table:table-cell>
          <table:table-cell office:value-type="float" office:value="0.26386800000000005" table:style-name="c9">
            <text:p>0.26387</text:p>
          </table:table-cell>
          <table:table-cell office:value-type="float" office:value="2.4159235043957006" table:style-name="c11">
            <text:p>+2.4</text:p>
          </table:table-cell>
        </table:table-row>
        <table:table-row>
          <table:table-cell office:value-type="string" table:style-name="c8">
            <text:p>XLM/USDT</text:p>
          </table:table-cell>
          <table:table-cell office:value-type="string" table:style-name="c9">
            <text:p>LONG</text:p>
          </table:table-cell>
          <table:table-cell office:value-type="string" table:style-name="c9">
            <text:p>2026-06-01 11:30</text:p>
          </table:table-cell>
          <table:table-cell office:value-type="float" office:value="0.26383185" table:style-name="c9">
            <text:p>0.26383</text:p>
          </table:table-cell>
          <table:table-cell office:value-type="string" table:style-name="c9">
            <text:p>2026-06-01 12:00</text:p>
          </table:table-cell>
          <table:table-cell office:value-type="float" office:value="0.26086950000000003" table:style-name="c9">
            <text:p>0.26087</text:p>
          </table:table-cell>
          <table:table-cell office:value-type="float" office:value="-1.3204729188306619" table:style-name="c10">
            <text:p>-1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00</text:p>
          </table:table-cell>
          <table:table-cell office:value-type="float" office:value="1.44862395" table:style-name="c1">
            <text:p>1.4486</text:p>
          </table:table-cell>
          <table:table-cell office:value-type="string" table:style-name="c1">
            <text:p>2026-03-05 11:30</text:p>
          </table:table-cell>
          <table:table-cell office:value-type="float" office:value="1.4448772" table:style-name="c1">
            <text:p>1.4449</text:p>
          </table:table-cell>
          <table:table-cell office:value-type="float" office:value="-0.4580249776209966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6 08:00</text:p>
          </table:table-cell>
          <table:table-cell office:value-type="float" office:value="1.4084038499999998" table:style-name="c1">
            <text:p>1.4084</text:p>
          </table:table-cell>
          <table:table-cell office:value-type="string" table:style-name="c1">
            <text:p>2026-03-06 08:30</text:p>
          </table:table-cell>
          <table:table-cell office:value-type="float" office:value="1.40219855" table:style-name="c1">
            <text:p>1.4022</text:p>
          </table:table-cell>
          <table:table-cell office:value-type="float" office:value="-0.6396102155961758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1.40800365" table:style-name="c1">
            <text:p>1.408</text:p>
          </table:table-cell>
          <table:table-cell office:value-type="string" table:style-name="c1">
            <text:p>2026-03-10 09:15</text:p>
          </table:table-cell>
          <table:table-cell office:value-type="float" office:value="1.405297" table:style-name="c1">
            <text:p>1.4053</text:p>
          </table:table-cell>
          <table:table-cell office:value-type="float" office:value="-0.3917488923412926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1.4191092" table:style-name="c1">
            <text:p>1.4191</text:p>
          </table:table-cell>
          <table:table-cell office:value-type="string" table:style-name="c1">
            <text:p>2026-03-10 15:15</text:p>
          </table:table-cell>
          <table:table-cell office:value-type="float" office:value="1.42638645" table:style-name="c1">
            <text:p>1.4264</text:p>
          </table:table-cell>
          <table:table-cell office:value-type="float" office:value="0.3118789932762045" table:style-name="c13">
            <text:p>+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1.3992993" table:style-name="c1">
            <text:p>1.3993</text:p>
          </table:table-cell>
          <table:table-cell office:value-type="string" table:style-name="c1">
            <text:p>2026-03-11 14:15</text:p>
          </table:table-cell>
          <table:table-cell office:value-type="float" office:value="1.3905044" table:style-name="c1">
            <text:p>1.3905</text:p>
          </table:table-cell>
          <table:table-cell office:value-type="float" office:value="-0.827165303062749" table:style-name="c12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6:00</text:p>
          </table:table-cell>
          <table:table-cell office:value-type="float" office:value="1.4241116999999999" table:style-name="c1">
            <text:p>1.4241</text:p>
          </table:table-cell>
          <table:table-cell office:value-type="string" table:style-name="c1">
            <text:p>2026-03-13 06:30</text:p>
          </table:table-cell>
          <table:table-cell office:value-type="float" office:value="1.4123934500000002" table:style-name="c1">
            <text:p>1.4124</text:p>
          </table:table-cell>
          <table:table-cell office:value-type="float" office:value="-1.0211014000200636" table:style-name="c12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1.4309150999999998" table:style-name="c1">
            <text:p>1.4309</text:p>
          </table:table-cell>
          <table:table-cell office:value-type="string" table:style-name="c1">
            <text:p>2026-03-13 09:15</text:p>
          </table:table-cell>
          <table:table-cell office:value-type="float" office:value="1.4330831" table:style-name="c1">
            <text:p>1.4331</text:p>
          </table:table-cell>
          <table:table-cell office:value-type="float" office:value="-0.0486914364730473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1.43861895" table:style-name="c1">
            <text:p>1.4386</text:p>
          </table:table-cell>
          <table:table-cell office:value-type="string" table:style-name="c1">
            <text:p>2026-03-13 14:00</text:p>
          </table:table-cell>
          <table:table-cell office:value-type="float" office:value="1.44297815" table:style-name="c1">
            <text:p>1.443</text:p>
          </table:table-cell>
          <table:table-cell office:value-type="float" office:value="0.10250710781685157" table:style-name="c13">
            <text:p>+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1.4160076499999998" table:style-name="c1">
            <text:p>1.416</text:p>
          </table:table-cell>
          <table:table-cell office:value-type="string" table:style-name="c1">
            <text:p>2026-03-15 02:45</text:p>
          </table:table-cell>
          <table:table-cell office:value-type="float" office:value="1.41699115" table:style-name="c1">
            <text:p>1.417</text:p>
          </table:table-cell>
          <table:table-cell office:value-type="float" office:value="-0.13058300277190016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3:00</text:p>
          </table:table-cell>
          <table:table-cell office:value-type="float" office:value="1.4245119" table:style-name="c1">
            <text:p>1.4245</text:p>
          </table:table-cell>
          <table:table-cell office:value-type="string" table:style-name="c1">
            <text:p>2026-03-15 13:30</text:p>
          </table:table-cell>
          <table:table-cell office:value-type="float" office:value="1.4230881" table:style-name="c1">
            <text:p>1.4231</text:p>
          </table:table-cell>
          <table:table-cell office:value-type="float" office:value="-0.2996502248875377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1.42801365" table:style-name="c1">
            <text:p>1.428</text:p>
          </table:table-cell>
          <table:table-cell office:value-type="string" table:style-name="c1">
            <text:p>2026-03-15 22:30</text:p>
          </table:table-cell>
          <table:table-cell office:value-type="float" office:value="1.4286853000000002" table:style-name="c1">
            <text:p>1.4287</text:p>
          </table:table-cell>
          <table:table-cell office:value-type="float" office:value="-0.15296015655732464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1.4523258" table:style-name="c1">
            <text:p>1.4523</text:p>
          </table:table-cell>
          <table:table-cell office:value-type="string" table:style-name="c1">
            <text:p>2026-03-15 23:15</text:p>
          </table:table-cell>
          <table:table-cell office:value-type="float" office:value="1.4496748" table:style-name="c1">
            <text:p>1.4497</text:p>
          </table:table-cell>
          <table:table-cell office:value-type="float" office:value="-0.3820699133210925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4711351999999998" table:style-name="c1">
            <text:p>1.4711</text:p>
          </table:table-cell>
          <table:table-cell office:value-type="string" table:style-name="c1">
            <text:p>2026-03-16 04:15</text:p>
          </table:table-cell>
          <table:table-cell office:value-type="float" office:value="1.47376275" table:style-name="c1">
            <text:p>1.4738</text:p>
          </table:table-cell>
          <table:table-cell office:value-type="float" office:value="-0.02165006569416761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3:45</text:p>
          </table:table-cell>
          <table:table-cell office:value-type="float" office:value="1.4852422499999998" table:style-name="c1">
            <text:p>1.4852</text:p>
          </table:table-cell>
          <table:table-cell office:value-type="string" table:style-name="c1">
            <text:p>2026-03-16 14:15</text:p>
          </table:table-cell>
          <table:table-cell office:value-type="float" office:value="1.48735595" table:style-name="c1">
            <text:p>1.4874</text:p>
          </table:table-cell>
          <table:table-cell office:value-type="float" office:value="-0.057871000104514625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5:00</text:p>
          </table:table-cell>
          <table:table-cell office:value-type="float" office:value="1.51005465" table:style-name="c1">
            <text:p>1.5101</text:p>
          </table:table-cell>
          <table:table-cell office:value-type="string" table:style-name="c1">
            <text:p>2026-03-16 15:30</text:p>
          </table:table-cell>
          <table:table-cell office:value-type="float" office:value="1.5102445" table:style-name="c1">
            <text:p>1.5102</text:p>
          </table:table-cell>
          <table:table-cell office:value-type="float" office:value="-0.18735273955152731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8:30</text:p>
          </table:table-cell>
          <table:table-cell office:value-type="float" office:value="1.54227075" table:style-name="c1">
            <text:p>1.5423</text:p>
          </table:table-cell>
          <table:table-cell office:value-type="string" table:style-name="c1">
            <text:p>2026-03-16 19:00</text:p>
          </table:table-cell>
          <table:table-cell office:value-type="float" office:value="1.5348322" table:style-name="c1">
            <text:p>1.5348</text:p>
          </table:table-cell>
          <table:table-cell office:value-type="float" office:value="-0.6812474118308764" table:style-name="c12">
            <text:p>-0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3:00</text:p>
          </table:table-cell>
          <table:table-cell office:value-type="float" office:value="1.5521756999999998" table:style-name="c1">
            <text:p>1.5522</text:p>
          </table:table-cell>
          <table:table-cell office:value-type="string" table:style-name="c1">
            <text:p>2026-03-16 23:30</text:p>
          </table:table-cell>
          <table:table-cell office:value-type="float" office:value="1.5458267" table:style-name="c1">
            <text:p>1.5458</text:p>
          </table:table-cell>
          <table:table-cell office:value-type="float" office:value="-0.6081210763252853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1:15</text:p>
          </table:table-cell>
          <table:table-cell office:value-type="float" office:value="1.56568245" table:style-name="c1">
            <text:p>1.5657</text:p>
          </table:table-cell>
          <table:table-cell office:value-type="string" table:style-name="c1">
            <text:p>2026-03-17 01:45</text:p>
          </table:table-cell>
          <table:table-cell office:value-type="float" office:value="1.5644174" table:style-name="c1">
            <text:p>1.5644</text:p>
          </table:table-cell>
          <table:table-cell office:value-type="float" office:value="-0.2805371154667946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30</text:p>
          </table:table-cell>
          <table:table-cell office:value-type="float" office:value="1.4230111499999998" table:style-name="c1">
            <text:p>1.423</text:p>
          </table:table-cell>
          <table:table-cell office:value-type="string" table:style-name="c1">
            <text:p>2026-03-24 08:00</text:p>
          </table:table-cell>
          <table:table-cell office:value-type="float" office:value="1.4304844" table:style-name="c1">
            <text:p>1.4305</text:p>
          </table:table-cell>
          <table:table-cell office:value-type="float" office:value="0.32422175219080085" table:style-name="c13">
            <text:p>+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30</text:p>
          </table:table-cell>
          <table:table-cell office:value-type="float" office:value="1.4221107" table:style-name="c1">
            <text:p>1.4221</text:p>
          </table:table-cell>
          <table:table-cell office:value-type="string" table:style-name="c1">
            <text:p>2026-03-25 06:00</text:p>
          </table:table-cell>
          <table:table-cell office:value-type="float" office:value="1.4168912" table:style-name="c1">
            <text:p>1.4169</text:p>
          </table:table-cell>
          <table:table-cell office:value-type="float" office:value="-0.5661911909389361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15</text:p>
          </table:table-cell>
          <table:table-cell office:value-type="float" office:value="1.4317155" table:style-name="c1">
            <text:p>1.4317</text:p>
          </table:table-cell>
          <table:table-cell office:value-type="string" table:style-name="c1">
            <text:p>2026-03-25 11:45</text:p>
          </table:table-cell>
          <table:table-cell office:value-type="float" office:value="1.43098415" table:style-name="c1">
            <text:p>1.431</text:p>
          </table:table-cell>
          <table:table-cell office:value-type="float" office:value="-0.25087996294305137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1.3448721" table:style-name="c1">
            <text:p>1.3449</text:p>
          </table:table-cell>
          <table:table-cell office:value-type="string" table:style-name="c1">
            <text:p>2026-04-06 02:45</text:p>
          </table:table-cell>
          <table:table-cell office:value-type="float" office:value="1.3399297000000001" table:style-name="c1">
            <text:p>1.3399</text:p>
          </table:table-cell>
          <table:table-cell office:value-type="float" office:value="-0.5666649988723793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1.3532762999999999" table:style-name="c1">
            <text:p>1.3533</text:p>
          </table:table-cell>
          <table:table-cell office:value-type="string" table:style-name="c1">
            <text:p>2026-04-06 10:00</text:p>
          </table:table-cell>
          <table:table-cell office:value-type="float" office:value="1.3519237000000002" table:style-name="c1">
            <text:p>1.3519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9:00</text:p>
          </table:table-cell>
          <table:table-cell office:value-type="float" office:value="1.3202598" table:style-name="c1">
            <text:p>1.3203</text:p>
          </table:table-cell>
          <table:table-cell office:value-type="string" table:style-name="c1">
            <text:p>2026-04-07 09:30</text:p>
          </table:table-cell>
          <table:table-cell office:value-type="float" office:value="1.31884025" table:style-name="c1">
            <text:p>1.3188</text:p>
          </table:table-cell>
          <table:table-cell office:value-type="float" office:value="-0.3072055711875965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1.3742868" table:style-name="c1">
            <text:p>1.3743</text:p>
          </table:table-cell>
          <table:table-cell office:value-type="string" table:style-name="c1">
            <text:p>2026-04-07 23:30</text:p>
          </table:table-cell>
          <table:table-cell office:value-type="float" office:value="1.39540195" table:style-name="c1">
            <text:p>1.3954</text:p>
          </table:table-cell>
          <table:table-cell office:value-type="float" office:value="1.3334728603920043" table:style-name="c13">
            <text:p>+1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45</text:p>
          </table:table-cell>
          <table:table-cell office:value-type="float" office:value="1.3858925999999998" table:style-name="c1">
            <text:p>1.3859</text:p>
          </table:table-cell>
          <table:table-cell office:value-type="string" table:style-name="c1">
            <text:p>2026-04-08 00:15</text:p>
          </table:table-cell>
          <table:table-cell office:value-type="float" office:value="1.3744124500000001" table:style-name="c1">
            <text:p>1.3744</text:p>
          </table:table-cell>
          <table:table-cell office:value-type="float" office:value="-1.0266019522399916" table:style-name="c12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1.364682" table:style-name="c1">
            <text:p>1.3647</text:p>
          </table:table-cell>
          <table:table-cell office:value-type="string" table:style-name="c1">
            <text:p>2026-04-11 19:15</text:p>
          </table:table-cell>
          <table:table-cell office:value-type="float" office:value="1.36701615" table:style-name="c1">
            <text:p>1.367</text:p>
          </table:table-cell>
          <table:table-cell office:value-type="float" office:value="-0.029202062007860352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1.3722857999999998" table:style-name="c1">
            <text:p>1.3723</text:p>
          </table:table-cell>
          <table:table-cell office:value-type="string" table:style-name="c1">
            <text:p>2026-04-13 23:00</text:p>
          </table:table-cell>
          <table:table-cell office:value-type="float" office:value="1.37401265" table:style-name="c1">
            <text:p>1.374</text:p>
          </table:table-cell>
          <table:table-cell office:value-type="float" office:value="-0.07431405960401927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30</text:p>
          </table:table-cell>
          <table:table-cell office:value-type="float" office:value="1.3806899999999998" table:style-name="c1">
            <text:p>1.3807</text:p>
          </table:table-cell>
          <table:table-cell office:value-type="string" table:style-name="c1">
            <text:p>2026-04-14 00:00</text:p>
          </table:table-cell>
          <table:table-cell office:value-type="float" office:value="1.37501215" table:style-name="c1">
            <text:p>1.375</text:p>
          </table:table-cell>
          <table:table-cell office:value-type="float" office:value="-0.6103107350563519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1.39339635" table:style-name="c1">
            <text:p>1.3934</text:p>
          </table:table-cell>
          <table:table-cell office:value-type="string" table:style-name="c1">
            <text:p>2026-04-14 14:30</text:p>
          </table:table-cell>
          <table:table-cell office:value-type="float" office:value="1.3875059" table:style-name="c1">
            <text:p>1.3875</text:p>
          </table:table-cell>
          <table:table-cell office:value-type="float" office:value="-0.6217953918208341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1.3641817499999997" table:style-name="c1">
            <text:p>1.3642</text:p>
          </table:table-cell>
          <table:table-cell office:value-type="string" table:style-name="c1">
            <text:p>2026-04-15 12:30</text:p>
          </table:table-cell>
          <table:table-cell office:value-type="float" office:value="1.36121905" table:style-name="c1">
            <text:p>1.3612</text:p>
          </table:table-cell>
          <table:table-cell office:value-type="float" office:value="-0.41664366796795305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1.37518725" table:style-name="c1">
            <text:p>1.3752</text:p>
          </table:table-cell>
          <table:table-cell office:value-type="string" table:style-name="c1">
            <text:p>2026-04-15 15:00</text:p>
          </table:table-cell>
          <table:table-cell office:value-type="float" office:value="1.3758117500000002" table:style-name="c1">
            <text:p>1.3758</text:p>
          </table:table-cell>
          <table:table-cell office:value-type="float" office:value="-0.15457878105324951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1.4024008499999998" table:style-name="c1">
            <text:p>1.4024</text:p>
          </table:table-cell>
          <table:table-cell office:value-type="string" table:style-name="c1">
            <text:p>2026-04-15 20:15</text:p>
          </table:table-cell>
          <table:table-cell office:value-type="float" office:value="1.3913039999999999" table:style-name="c1">
            <text:p>1.3913</text:p>
          </table:table-cell>
          <table:table-cell office:value-type="float" office:value="-0.9895934315784172" table:style-name="c12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1:45</text:p>
          </table:table-cell>
          <table:table-cell office:value-type="float" office:value="1.4017005" table:style-name="c1">
            <text:p>1.4017</text:p>
          </table:table-cell>
          <table:table-cell office:value-type="string" table:style-name="c1">
            <text:p>2026-04-16 02:15</text:p>
          </table:table-cell>
          <table:table-cell office:value-type="float" office:value="1.3981006" table:style-name="c1">
            <text:p>1.3981</text:p>
          </table:table-cell>
          <table:table-cell office:value-type="float" office:value="-0.4562103744273349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9:15</text:p>
          </table:table-cell>
          <table:table-cell office:value-type="float" office:value="1.4150071499999999" table:style-name="c1">
            <text:p>1.415</text:p>
          </table:table-cell>
          <table:table-cell office:value-type="string" table:style-name="c1">
            <text:p>2026-04-16 09:45</text:p>
          </table:table-cell>
          <table:table-cell office:value-type="float" office:value="1.4104944000000001" table:style-name="c1">
            <text:p>1.4105</text:p>
          </table:table-cell>
          <table:table-cell office:value-type="float" office:value="-0.5181831275976156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15</text:p>
          </table:table-cell>
          <table:table-cell office:value-type="float" office:value="1.4235114" table:style-name="c1">
            <text:p>1.4235</text:p>
          </table:table-cell>
          <table:table-cell office:value-type="string" table:style-name="c1">
            <text:p>2026-04-16 15:45</text:p>
          </table:table-cell>
          <table:table-cell office:value-type="float" office:value="1.42658635" table:style-name="c1">
            <text:p>1.4266</text:p>
          </table:table-cell>
          <table:table-cell office:value-type="float" office:value="0.015679810245972092" table:style-name="c13">
            <text:p>+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1.42981455" table:style-name="c1">
            <text:p>1.4298</text:p>
          </table:table-cell>
          <table:table-cell office:value-type="string" table:style-name="c1">
            <text:p>2026-04-16 16:30</text:p>
          </table:table-cell>
          <table:table-cell office:value-type="float" office:value="1.4324834000000002" table:style-name="c1">
            <text:p>1.4325</text:p>
          </table:table-cell>
          <table:table-cell office:value-type="float" office:value="-0.013616053676313022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1.45962945" table:style-name="c1">
            <text:p>1.4596</text:p>
          </table:table-cell>
          <table:table-cell office:value-type="string" table:style-name="c1">
            <text:p>2026-04-17 13:30</text:p>
          </table:table-cell>
          <table:table-cell office:value-type="float" office:value="1.4699646499999999" table:style-name="c1">
            <text:p>1.47</text:p>
          </table:table-cell>
          <table:table-cell office:value-type="float" office:value="0.5067546879552021" table:style-name="c13">
            <text:p>+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45</text:p>
          </table:table-cell>
          <table:table-cell office:value-type="float" office:value="1.4863427999999999" table:style-name="c1">
            <text:p>1.4863</text:p>
          </table:table-cell>
          <table:table-cell office:value-type="string" table:style-name="c1">
            <text:p>2026-04-17 14:15</text:p>
          </table:table-cell>
          <table:table-cell office:value-type="float" office:value="1.4863564500000002" table:style-name="c1">
            <text:p>1.4864</text:p>
          </table:table-cell>
          <table:table-cell office:value-type="float" office:value="-0.19898347430684638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7:00</text:p>
          </table:table-cell>
          <table:table-cell office:value-type="float" office:value="1.4377185" table:style-name="c1">
            <text:p>1.4377</text:p>
          </table:table-cell>
          <table:table-cell office:value-type="string" table:style-name="c1">
            <text:p>2026-04-21 07:30</text:p>
          </table:table-cell>
          <table:table-cell office:value-type="float" office:value="1.4389801500000001" table:style-name="c1">
            <text:p>1.439</text:p>
          </table:table-cell>
          <table:table-cell office:value-type="float" office:value="-0.11232180151050652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1.44942435" table:style-name="c1">
            <text:p>1.4494</text:p>
          </table:table-cell>
          <table:table-cell office:value-type="string" table:style-name="c1">
            <text:p>2026-04-22 03:30</text:p>
          </table:table-cell>
          <table:table-cell office:value-type="float" office:value="1.4456768" table:style-name="c1">
            <text:p>1.4457</text:p>
          </table:table-cell>
          <table:table-cell office:value-type="float" office:value="-0.45793752003683297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1.46002965" table:style-name="c1">
            <text:p>1.46</text:p>
          </table:table-cell>
          <table:table-cell office:value-type="string" table:style-name="c1">
            <text:p>2026-04-22 06:00</text:p>
          </table:table-cell>
          <table:table-cell office:value-type="float" office:value="1.4536728" table:style-name="c1">
            <text:p>1.4537</text:p>
          </table:table-cell>
          <table:table-cell office:value-type="float" office:value="-0.6344214946045756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2:15</text:p>
          </table:table-cell>
          <table:table-cell office:value-type="float" office:value="1.43161545" table:style-name="c1">
            <text:p>1.4316</text:p>
          </table:table-cell>
          <table:table-cell office:value-type="string" table:style-name="c1">
            <text:p>2026-04-26 22:45</text:p>
          </table:table-cell>
          <table:table-cell office:value-type="float" office:value="1.4262865000000002" table:style-name="c1">
            <text:p>1.4263</text:p>
          </table:table-cell>
          <table:table-cell office:value-type="float" office:value="-0.5713892451705394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1.3898945999999999" table:style-name="c1">
            <text:p>1.3899</text:p>
          </table:table-cell>
          <table:table-cell office:value-type="string" table:style-name="c1">
            <text:p>2026-05-01 13:45</text:p>
          </table:table-cell>
          <table:table-cell office:value-type="float" office:value="1.39120405" table:style-name="c1">
            <text:p>1.3912</text:p>
          </table:table-cell>
          <table:table-cell office:value-type="float" office:value="-0.10587615031744102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4:00</text:p>
          </table:table-cell>
          <table:table-cell office:value-type="float" office:value="1.39919925" table:style-name="c1">
            <text:p>1.3992</text:p>
          </table:table-cell>
          <table:table-cell office:value-type="string" table:style-name="c1">
            <text:p>2026-05-01 14:30</text:p>
          </table:table-cell>
          <table:table-cell office:value-type="float" office:value="1.3911041" table:style-name="c1">
            <text:p>1.3911</text:p>
          </table:table-cell>
          <table:table-cell office:value-type="float" office:value="-0.7772993800489791" table:style-name="c12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1.4023008" table:style-name="c1">
            <text:p>1.4023</text:p>
          </table:table-cell>
          <table:table-cell office:value-type="string" table:style-name="c1">
            <text:p>2026-05-03 22:45</text:p>
          </table:table-cell>
          <table:table-cell office:value-type="float" office:value="1.39939995" table:style-name="c1">
            <text:p>1.3994</text:p>
          </table:table-cell>
          <table:table-cell office:value-type="float" office:value="-0.4063500855201463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1.4057024999999999" table:style-name="c1">
            <text:p>1.4057</text:p>
          </table:table-cell>
          <table:table-cell office:value-type="string" table:style-name="c1">
            <text:p>2026-05-04 02:30</text:p>
          </table:table-cell>
          <table:table-cell office:value-type="float" office:value="1.4046973" table:style-name="c1">
            <text:p>1.4047</text:p>
          </table:table-cell>
          <table:table-cell office:value-type="float" office:value="-0.27126578367042686" table:style-name="c12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15</text:p>
          </table:table-cell>
          <table:table-cell office:value-type="float" office:value="1.40740335" table:style-name="c1">
            <text:p>1.4074</text:p>
          </table:table-cell>
          <table:table-cell office:value-type="string" table:style-name="c1">
            <text:p>2026-05-04 15:45</text:p>
          </table:table-cell>
          <table:table-cell office:value-type="float" office:value="1.39820055" table:style-name="c1">
            <text:p>1.3982</text:p>
          </table:table-cell>
          <table:table-cell office:value-type="float" office:value="-0.8524779267755855" table:style-name="c12">
            <text:p>-0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1.4187089999999998" table:style-name="c1">
            <text:p>1.4187</text:p>
          </table:table-cell>
          <table:table-cell office:value-type="string" table:style-name="c1">
            <text:p>2026-05-05 13:45</text:p>
          </table:table-cell>
          <table:table-cell office:value-type="float" office:value="1.4137927500000003" table:style-name="c1">
            <text:p>1.4138</text:p>
          </table:table-cell>
          <table:table-cell office:value-type="float" office:value="-0.5457371248966059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06 09:30</text:p>
          </table:table-cell>
          <table:table-cell office:value-type="float" office:value="1.4396798" table:style-name="c1">
            <text:p>1.4397</text:p>
          </table:table-cell>
          <table:table-cell office:value-type="float" office:value="-0.4723932247058249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15</text:p>
          </table:table-cell>
          <table:table-cell office:value-type="float" office:value="1.4195094" table:style-name="c1">
            <text:p>1.4195</text:p>
          </table:table-cell>
          <table:table-cell office:value-type="string" table:style-name="c1">
            <text:p>2026-05-07 07:45</text:p>
          </table:table-cell>
          <table:table-cell office:value-type="float" office:value="1.4198897000000001" table:style-name="c1">
            <text:p>1.4199</text:p>
          </table:table-cell>
          <table:table-cell office:value-type="float" office:value="-0.17316260887738633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.4293143" table:style-name="c1">
            <text:p>1.4293</text:p>
          </table:table-cell>
          <table:table-cell office:value-type="string" table:style-name="c1">
            <text:p>2026-05-09 01:45</text:p>
          </table:table-cell>
          <table:table-cell office:value-type="float" office:value="1.42958485" table:style-name="c1">
            <text:p>1.4296</text:p>
          </table:table-cell>
          <table:table-cell office:value-type="float" office:value="-0.18100918147603284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45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10 16:15</text:p>
          </table:table-cell>
          <table:table-cell office:value-type="float" office:value="1.4508742000000001" table:style-name="c1">
            <text:p>1.4509</text:p>
          </table:table-cell>
          <table:table-cell office:value-type="float" office:value="0.30149541448003525" table:style-name="c13">
            <text:p>+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30</text:p>
          </table:table-cell>
          <table:table-cell office:value-type="float" office:value="1.4697345" table:style-name="c1">
            <text:p>1.4697</text:p>
          </table:table-cell>
          <table:table-cell office:value-type="string" table:style-name="c1">
            <text:p>2026-05-10 17:00</text:p>
          </table:table-cell>
          <table:table-cell office:value-type="float" office:value="1.4712640000000001" table:style-name="c1">
            <text:p>1.4713</text:p>
          </table:table-cell>
          <table:table-cell office:value-type="float" office:value="-0.09604161404660472" table:style-name="c12">
            <text:p>-0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15</text:p>
          </table:table-cell>
          <table:table-cell office:value-type="float" office:value="1.48624275" table:style-name="c1">
            <text:p>1.4862</text:p>
          </table:table-cell>
          <table:table-cell office:value-type="string" table:style-name="c1">
            <text:p>2026-05-10 17:45</text:p>
          </table:table-cell>
          <table:table-cell office:value-type="float" office:value="1.49615155" table:style-name="c1">
            <text:p>1.4962</text:p>
          </table:table-cell>
          <table:table-cell office:value-type="float" office:value="0.46546858186862217" table:style-name="c13">
            <text:p>+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8:00</text:p>
          </table:table-cell>
          <table:table-cell office:value-type="float" office:value="1.5052522499999998" table:style-name="c1">
            <text:p>1.5053</text:p>
          </table:table-cell>
          <table:table-cell office:value-type="string" table:style-name="c1">
            <text:p>2026-05-10 18:30</text:p>
          </table:table-cell>
          <table:table-cell office:value-type="float" office:value="1.4990501" table:style-name="c1">
            <text:p>1.4991</text:p>
          </table:table-cell>
          <table:table-cell office:value-type="float" office:value="-0.6111102740354646" table:style-name="c12">
            <text:p>-0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1.4717355" table:style-name="c1">
            <text:p>1.4717</text:p>
          </table:table-cell>
          <table:table-cell office:value-type="string" table:style-name="c1">
            <text:p>2026-05-14 15:30</text:p>
          </table:table-cell>
          <table:table-cell office:value-type="float" office:value="1.467266" table:style-name="c1">
            <text:p>1.4673</text:p>
          </table:table-cell>
          <table:table-cell office:value-type="float" office:value="-0.5029820055302059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8:30</text:p>
          </table:table-cell>
          <table:table-cell office:value-type="float" office:value="1.5351671999999998" table:style-name="c1">
            <text:p>1.5352</text:p>
          </table:table-cell>
          <table:table-cell office:value-type="string" table:style-name="c1">
            <text:p>2026-05-14 19:00</text:p>
          </table:table-cell>
          <table:table-cell office:value-type="float" office:value="1.5354319" table:style-name="c1">
            <text:p>1.5354</text:p>
          </table:table-cell>
          <table:table-cell office:value-type="float" office:value="-0.18269204605855238" table:style-name="c12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3839916499999998" table:style-name="c1">
            <text:p>1.384</text:p>
          </table:table-cell>
          <table:table-cell office:value-type="string" table:style-name="c1">
            <text:p>2026-05-21 09:00</text:p>
          </table:table-cell>
          <table:table-cell office:value-type="float" office:value="1.3796098500000002" table:style-name="c1">
            <text:p>1.3796</text:p>
          </table:table-cell>
          <table:table-cell office:value-type="float" office:value="-0.5158730610946738" table:style-name="c12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1.3543768499999997" table:style-name="c1">
            <text:p>1.3544</text:p>
          </table:table-cell>
          <table:table-cell office:value-type="string" table:style-name="c1">
            <text:p>2026-05-25 00:15</text:p>
          </table:table-cell>
          <table:table-cell office:value-type="float" office:value="1.3522235500000002" table:style-name="c1">
            <text:p>1.3522</text:p>
          </table:table-cell>
          <table:table-cell office:value-type="float" office:value="-0.3585704286402813" table:style-name="c12">
            <text:p>-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15</text:p>
          </table:table-cell>
          <table:table-cell office:value-type="float" office:value="1.3560777" table:style-name="c1">
            <text:p>1.3561</text:p>
          </table:table-cell>
          <table:table-cell office:value-type="string" table:style-name="c1">
            <text:p>2026-05-30 01:45</text:p>
          </table:table-cell>
          <table:table-cell office:value-type="float" office:value="1.35862035" table:style-name="c1">
            <text:p>1.3586</text:p>
          </table:table-cell>
          <table:table-cell office:value-type="float" office:value="-0.01277449512295803" table:style-name="c12">
            <text:p>-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45</text:p>
          </table:table-cell>
          <table:table-cell office:value-type="float" office:value="1.3421707499999997" table:style-name="c1">
            <text:p>1.3422</text:p>
          </table:table-cell>
          <table:table-cell office:value-type="string" table:style-name="c1">
            <text:p>2026-05-31 10:15</text:p>
          </table:table-cell>
          <table:table-cell office:value-type="float" office:value="1.3377308" table:style-name="c1">
            <text:p>1.3377</text:p>
          </table:table-cell>
          <table:table-cell office:value-type="float" office:value="-0.5300423861270609" table:style-name="c12">
            <text:p>-0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