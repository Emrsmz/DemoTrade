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50.3133126551794" table:style-name="c3">
            <text:p>+50.3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80.96094348971062" table:style-name="c4">
            <text:p>-81.0</text:p>
          </table:table-cell>
          <table:table-cell office:value-type="float" office:value="21" table:style-name="c1">
            <text:p>21</text:p>
          </table:table-cell>
          <table:table-cell office:value-type="float" office:value="57.14285714285714" table:style-name="c1">
            <text:p>57.1</text:p>
          </table:table-cell>
          <table:table-cell office:value-type="float" office:value="24.939505619586523" table:style-name="c1">
            <text:p>24.9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45.79974898873599" table:style-name="c3">
            <text:p>+45.8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12.346969157982166" table:style-name="c4">
            <text:p>-12.3</text:p>
          </table:table-cell>
          <table:table-cell office:value-type="float" office:value="10" table:style-name="c1">
            <text:p>10</text:p>
          </table:table-cell>
          <table:table-cell office:value-type="float" office:value="60.0" table:style-name="c1">
            <text:p>60.0</text:p>
          </table:table-cell>
          <table:table-cell office:value-type="float" office:value="20.405820789937426" table:style-name="c1">
            <text:p>20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32.585273842789775" table:style-name="c3">
            <text:p>+32.6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3.30637401274069" table:style-name="c4">
            <text:p>-3.3</text:p>
          </table:table-cell>
          <table:table-cell office:value-type="float" office:value="15" table:style-name="c1">
            <text:p>15</text:p>
          </table:table-cell>
          <table:table-cell office:value-type="float" office:value="53.333333333333336" table:style-name="c1">
            <text:p>53.3</text:p>
          </table:table-cell>
          <table:table-cell office:value-type="float" office:value="12.947000498165675" table:style-name="c1">
            <text:p>12.9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19.282040729956954" table:style-name="c3">
            <text:p>+19.3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30.0091963834451" table:style-name="c4">
            <text:p>-30.0</text:p>
          </table:table-cell>
          <table:table-cell office:value-type="float" office:value="16" table:style-name="c1">
            <text:p>16</text:p>
          </table:table-cell>
          <table:table-cell office:value-type="float" office:value="31.25" table:style-name="c1">
            <text:p>31.2</text:p>
          </table:table-cell>
          <table:table-cell office:value-type="float" office:value="19.981404319748012" table:style-name="c1">
            <text:p>20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14.321458938781825" table:style-name="c3">
            <text:p>+14.3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82.52604839259646" table:style-name="c4">
            <text:p>-82.5</text:p>
          </table:table-cell>
          <table:table-cell office:value-type="float" office:value="20" table:style-name="c1">
            <text:p>20</text:p>
          </table:table-cell>
          <table:table-cell office:value-type="float" office:value="40.0" table:style-name="c1">
            <text:p>40.0</text:p>
          </table:table-cell>
          <table:table-cell office:value-type="float" office:value="24.021588930312742" table:style-name="c1">
            <text:p>24.0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9.113602658301852" table:style-name="c3">
            <text:p>+9.1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19.2426989840218" table:style-name="c5">
            <text:p>+19.2</text:p>
          </table:table-cell>
          <table:table-cell office:value-type="float" office:value="14" table:style-name="c1">
            <text:p>14</text:p>
          </table:table-cell>
          <table:table-cell office:value-type="float" office:value="57.14285714285714" table:style-name="c1">
            <text:p>57.1</text:p>
          </table:table-cell>
          <table:table-cell office:value-type="float" office:value="11.583165565677048" table:style-name="c1">
            <text:p>1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4.492981555805932" table:style-name="c3">
            <text:p>+4.5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15.269526722208465" table:style-name="c5">
            <text:p>+15.3</text:p>
          </table:table-cell>
          <table:table-cell office:value-type="float" office:value="15" table:style-name="c1">
            <text:p>15</text:p>
          </table:table-cell>
          <table:table-cell office:value-type="float" office:value="46.666666666666664" table:style-name="c1">
            <text:p>46.7</text:p>
          </table:table-cell>
          <table:table-cell office:value-type="float" office:value="19.03589805680595" table:style-name="c1">
            <text:p>19.0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1.8626514351906167" table:style-name="c3">
            <text:p>+1.9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6.968751911933185" table:style-name="c5">
            <text:p>+7.0</text:p>
          </table:table-cell>
          <table:table-cell office:value-type="float" office:value="13" table:style-name="c1">
            <text:p>13</text:p>
          </table:table-cell>
          <table:table-cell office:value-type="float" office:value="46.15384615384615" table:style-name="c1">
            <text:p>46.2</text:p>
          </table:table-cell>
          <table:table-cell office:value-type="float" office:value="9.850142232749828" table:style-name="c1">
            <text:p>9.9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0.6000642008826731" table:style-name="c3">
            <text:p>+0.6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28.021037607806917" table:style-name="c5">
            <text:p>+28.0</text:p>
          </table:table-cell>
          <table:table-cell office:value-type="float" office:value="9" table:style-name="c1">
            <text:p>9</text:p>
          </table:table-cell>
          <table:table-cell office:value-type="float" office:value="44.44444444444444" table:style-name="c1">
            <text:p>44.4</text:p>
          </table:table-cell>
          <table:table-cell office:value-type="float" office:value="12.056298095657207" table:style-name="c1">
            <text:p>12.1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0.46770873063428553" table:style-name="c3">
            <text:p>+0.5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38.4790229168832" table:style-name="c5">
            <text:p>+38.5</text:p>
          </table:table-cell>
          <table:table-cell office:value-type="float" office:value="4" table:style-name="c1">
            <text:p>4</text:p>
          </table:table-cell>
          <table:table-cell office:value-type="float" office:value="25.0" table:style-name="c1">
            <text:p>25.0</text:p>
          </table:table-cell>
          <table:table-cell office:value-type="float" office:value="4.658708356072346" table:style-name="c1">
            <text:p>4.7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3.2148594580598227" table:style-name="c6">
            <text:p>-3.2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0.9835654705864405" table:style-name="c5">
            <text:p>+1.0</text:p>
          </table:table-cell>
          <table:table-cell office:value-type="float" office:value="10" table:style-name="c1">
            <text:p>10</text:p>
          </table:table-cell>
          <table:table-cell office:value-type="float" office:value="50.0" table:style-name="c1">
            <text:p>50.0</text:p>
          </table:table-cell>
          <table:table-cell office:value-type="float" office:value="7.455900191774381" table:style-name="c1">
            <text:p>7.5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3.2159254244263593" table:style-name="c6">
            <text:p>-3.2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7.868295291933759" table:style-name="c5">
            <text:p>+7.9</text:p>
          </table:table-cell>
          <table:table-cell office:value-type="float" office:value="5" table:style-name="c1">
            <text:p>5</text:p>
          </table:table-cell>
          <table:table-cell office:value-type="float" office:value="40.0" table:style-name="c1">
            <text:p>40.0</text:p>
          </table:table-cell>
          <table:table-cell office:value-type="float" office:value="5.263972318753559" table:style-name="c1">
            <text:p>5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3.2759970348172143" table:style-name="c6">
            <text:p>-3.3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6.9365550972539065" table:style-name="c4">
            <text:p>-6.9</text:p>
          </table:table-cell>
          <table:table-cell office:value-type="float" office:value="6" table:style-name="c1">
            <text:p>6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8.868224474431557" table:style-name="c1">
            <text:p>8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3.5984968961729917" table:style-name="c6">
            <text:p>-3.6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23.064413972771728" table:style-name="c4">
            <text:p>-23.1</text:p>
          </table:table-cell>
          <table:table-cell office:value-type="float" office:value="13" table:style-name="c1">
            <text:p>13</text:p>
          </table:table-cell>
          <table:table-cell office:value-type="float" office:value="38.46153846153847" table:style-name="c1">
            <text:p>38.5</text:p>
          </table:table-cell>
          <table:table-cell office:value-type="float" office:value="5.983353873780796" table:style-name="c1">
            <text:p>6.0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5.198812635565924" table:style-name="c6">
            <text:p>-5.2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7.366342072208278" table:style-name="c5">
            <text:p>+7.4</text:p>
          </table:table-cell>
          <table:table-cell office:value-type="float" office:value="13" table:style-name="c1">
            <text:p>13</text:p>
          </table:table-cell>
          <table:table-cell office:value-type="float" office:value="46.15384615384615" table:style-name="c1">
            <text:p>46.2</text:p>
          </table:table-cell>
          <table:table-cell office:value-type="float" office:value="12.050603208645667" table:style-name="c1">
            <text:p>12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6.093339593098074" table:style-name="c6">
            <text:p>-6.1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15.57785605907584" table:style-name="c5">
            <text:p>+15.6</text:p>
          </table:table-cell>
          <table:table-cell office:value-type="float" office:value="10" table:style-name="c1">
            <text:p>10</text:p>
          </table:table-cell>
          <table:table-cell office:value-type="float" office:value="40.0" table:style-name="c1">
            <text:p>40.0</text:p>
          </table:table-cell>
          <table:table-cell office:value-type="float" office:value="13.673780451859768" table:style-name="c1">
            <text:p>13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6.964799341607193" table:style-name="c6">
            <text:p>-7.0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2.475635254919877" table:style-name="c4">
            <text:p>-2.5</text:p>
          </table:table-cell>
          <table:table-cell office:value-type="float" office:value="12" table:style-name="c1">
            <text:p>12</text:p>
          </table:table-cell>
          <table:table-cell office:value-type="float" office:value="50.0" table:style-name="c1">
            <text:p>50.0</text:p>
          </table:table-cell>
          <table:table-cell office:value-type="float" office:value="25.036697926856682" table:style-name="c1">
            <text:p>25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8.678626010569303" table:style-name="c6">
            <text:p>-8.7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-2.983645315588606" table:style-name="c4">
            <text:p>-3.0</text:p>
          </table:table-cell>
          <table:table-cell office:value-type="float" office:value="14" table:style-name="c1">
            <text:p>14</text:p>
          </table:table-cell>
          <table:table-cell office:value-type="float" office:value="42.857142857142854" table:style-name="c1">
            <text:p>42.9</text:p>
          </table:table-cell>
          <table:table-cell office:value-type="float" office:value="19.68990949216171" table:style-name="c1">
            <text:p>19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8.933302010871728" table:style-name="c6">
            <text:p>-8.9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1.6699627158848358" table:style-name="c5">
            <text:p>+1.7</text:p>
          </table:table-cell>
          <table:table-cell office:value-type="float" office:value="9" table:style-name="c1">
            <text:p>9</text:p>
          </table:table-cell>
          <table:table-cell office:value-type="float" office:value="22.22222222222222" table:style-name="c1">
            <text:p>22.2</text:p>
          </table:table-cell>
          <table:table-cell office:value-type="float" office:value="14.403937372132367" table:style-name="c1">
            <text:p>14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9.073073707750268" table:style-name="c6">
            <text:p>-9.1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-0.952424055778117" table:style-name="c4">
            <text:p>-1.0</text:p>
          </table:table-cell>
          <table:table-cell office:value-type="float" office:value="10" table:style-name="c1">
            <text:p>10</text:p>
          </table:table-cell>
          <table:table-cell office:value-type="float" office:value="40.0" table:style-name="c1">
            <text:p>40.0</text:p>
          </table:table-cell>
          <table:table-cell office:value-type="float" office:value="14.456491579474005" table:style-name="c1">
            <text:p>14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9.197924526528197" table:style-name="c6">
            <text:p>-9.2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2.888612215828317" table:style-name="c5">
            <text:p>+2.9</text:p>
          </table:table-cell>
          <table:table-cell office:value-type="float" office:value="5" table:style-name="c1">
            <text:p>5</text:p>
          </table:table-cell>
          <table:table-cell office:value-type="float" office:value="20.0" table:style-name="c1">
            <text:p>20.0</text:p>
          </table:table-cell>
          <table:table-cell office:value-type="float" office:value="10.31725081321108" table:style-name="c1">
            <text:p>10.3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10.01339963187163" table:style-name="c6">
            <text:p>-10.0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5.4314235189508855" table:style-name="c4">
            <text:p>-5.4</text:p>
          </table:table-cell>
          <table:table-cell office:value-type="float" office:value="10" table:style-name="c1">
            <text:p>10</text:p>
          </table:table-cell>
          <table:table-cell office:value-type="float" office:value="50.0" table:style-name="c1">
            <text:p>50.0</text:p>
          </table:table-cell>
          <table:table-cell office:value-type="float" office:value="16.748623961466695" table:style-name="c1">
            <text:p>16.7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10.30737001681224" table:style-name="c6">
            <text:p>-10.3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10.520817188637201" table:style-name="c4">
            <text:p>-10.5</text:p>
          </table:table-cell>
          <table:table-cell office:value-type="float" office:value="13" table:style-name="c1">
            <text:p>13</text:p>
          </table:table-cell>
          <table:table-cell office:value-type="float" office:value="53.84615384615385" table:style-name="c1">
            <text:p>53.8</text:p>
          </table:table-cell>
          <table:table-cell office:value-type="float" office:value="16.26875051831396" table:style-name="c1">
            <text:p>16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15.137038224328272" table:style-name="c6">
            <text:p>-15.1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-6.624318067772503" table:style-name="c4">
            <text:p>-6.6</text:p>
          </table:table-cell>
          <table:table-cell office:value-type="float" office:value="17" table:style-name="c1">
            <text:p>17</text:p>
          </table:table-cell>
          <table:table-cell office:value-type="float" office:value="35.294117647058826" table:style-name="c1">
            <text:p>35.3</text:p>
          </table:table-cell>
          <table:table-cell office:value-type="float" office:value="30.931626043744192" table:style-name="c1">
            <text:p>30.9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18.37417895858666" table:style-name="c6">
            <text:p>-18.4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7.132684036981303" table:style-name="c4">
            <text:p>-7.1</text:p>
          </table:table-cell>
          <table:table-cell office:value-type="float" office:value="11" table:style-name="c1">
            <text:p>11</text:p>
          </table:table-cell>
          <table:table-cell office:value-type="float" office:value="27.27272727272727" table:style-name="c1">
            <text:p>27.3</text:p>
          </table:table-cell>
          <table:table-cell office:value-type="float" office:value="18.784060284300676" table:style-name="c1">
            <text:p>18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0.028362270772742" table:style-name="c6">
            <text:p>-20.0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-12.381929895905863" table:style-name="c4">
            <text:p>-12.4</text:p>
          </table:table-cell>
          <table:table-cell office:value-type="float" office:value="12" table:style-name="c1">
            <text:p>12</text:p>
          </table:table-cell>
          <table:table-cell office:value-type="float" office:value="41.66666666666667" table:style-name="c1">
            <text:p>41.7</text:p>
          </table:table-cell>
          <table:table-cell office:value-type="float" office:value="25.319566735502868" table:style-name="c1">
            <text:p>25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0.79442162554424" table:style-name="c6">
            <text:p>-20.8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24.480132893893597" table:style-name="c4">
            <text:p>-24.5</text:p>
          </table:table-cell>
          <table:table-cell office:value-type="float" office:value="16" table:style-name="c1">
            <text:p>16</text:p>
          </table:table-cell>
          <table:table-cell office:value-type="float" office:value="25.0" table:style-name="c1">
            <text:p>25.0</text:p>
          </table:table-cell>
          <table:table-cell office:value-type="float" office:value="24.950672776815047" table:style-name="c1">
            <text:p>25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22.236625738371277" table:style-name="c6">
            <text:p>-22.2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19.022340024085562" table:style-name="c4">
            <text:p>-19.0</text:p>
          </table:table-cell>
          <table:table-cell office:value-type="float" office:value="11" table:style-name="c1">
            <text:p>11</text:p>
          </table:table-cell>
          <table:table-cell office:value-type="float" office:value="18.181818181818183" table:style-name="c1">
            <text:p>18.2</text:p>
          </table:table-cell>
          <table:table-cell office:value-type="float" office:value="25.969812955651012" table:style-name="c1">
            <text:p>26.0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22.270044667965237" table:style-name="c6">
            <text:p>-22.3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3.6292359075743263" table:style-name="c5">
            <text:p>+3.6</text:p>
          </table:table-cell>
          <table:table-cell office:value-type="float" office:value="9" table:style-name="c1">
            <text:p>9</text:p>
          </table:table-cell>
          <table:table-cell office:value-type="float" office:value="22.22222222222222" table:style-name="c1">
            <text:p>22.2</text:p>
          </table:table-cell>
          <table:table-cell office:value-type="float" office:value="28.941685907389676" table:style-name="c1">
            <text:p>28.9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24.99836720399602" table:style-name="c6">
            <text:p>-25.0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-6.493420337011777" table:style-name="c4">
            <text:p>-6.5</text:p>
          </table:table-cell>
          <table:table-cell office:value-type="float" office:value="15" table:style-name="c1">
            <text:p>15</text:p>
          </table:table-cell>
          <table:table-cell office:value-type="float" office:value="20.0" table:style-name="c1">
            <text:p>20.0</text:p>
          </table:table-cell>
          <table:table-cell office:value-type="float" office:value="28.01279002327454" table:style-name="c1">
            <text:p>28.0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1.7588707080485362" table:style-name="c8">
            <text:p>-1.8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6.32281210733602" table:style-name="c8">
            <text:p>-6.3</text:p>
          </table:table-cell>
          <table:table-cell office:value-type="float" office:value="358" table:style-name="c7">
            <text:p>358</text:p>
          </table:table-cell>
          <table:table-cell office:value-type="float" office:value="39.2548597916245" table:style-name="c7">
            <text:p>39.3</text:p>
          </table:table-cell>
          <table:table-cell office:value-type="float" office:value="17.0869081124751" table:style-name="c7">
            <text:p>17.1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45</text:p>
          </table:table-cell>
          <table:table-cell office:value-type="float" office:value="0.26723355" table:style-name="c10">
            <text:p>0.26723</text:p>
          </table:table-cell>
          <table:table-cell office:value-type="string" table:style-name="c10">
            <text:p>2026-03-11 09:45</text:p>
          </table:table-cell>
          <table:table-cell office:value-type="float" office:value="0.25757115" table:style-name="c10">
            <text:p>0.25757</text:p>
          </table:table-cell>
          <table:table-cell office:value-type="float" office:value="-3.8083858590547415" table:style-name="c11">
            <text:p>-3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0.2785392" table:style-name="c10">
            <text:p>0.27854</text:p>
          </table:table-cell>
          <table:table-cell office:value-type="string" table:style-name="c10">
            <text:p>2026-03-14 09:00</text:p>
          </table:table-cell>
          <table:table-cell office:value-type="float" office:value="0.2610694" table:style-name="c10">
            <text:p>0.26107</text:p>
          </table:table-cell>
          <table:table-cell office:value-type="float" office:value="-6.459298271338476" table:style-name="c11">
            <text:p>-6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2783391" table:style-name="c10">
            <text:p>0.27834</text:p>
          </table:table-cell>
          <table:table-cell office:value-type="string" table:style-name="c10">
            <text:p>2026-03-17 03:45</text:p>
          </table:table-cell>
          <table:table-cell office:value-type="float" office:value="0.28515735000000003" table:style-name="c10">
            <text:p>0.28516</text:p>
          </table:table-cell>
          <table:table-cell office:value-type="float" office:value="2.2448231158863408" table:style-name="c12">
            <text:p>+2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8:15</text:p>
          </table:table-cell>
          <table:table-cell office:value-type="float" office:value="0.26783385" table:style-name="c10">
            <text:p>0.26783</text:p>
          </table:table-cell>
          <table:table-cell office:value-type="string" table:style-name="c10">
            <text:p>2026-03-25 08:15</text:p>
          </table:table-cell>
          <table:table-cell office:value-type="float" office:value="0.27076455" table:style-name="c10">
            <text:p>0.27076</text:p>
          </table:table-cell>
          <table:table-cell office:value-type="float" office:value="0.8921358015613112" table:style-name="c12">
            <text:p>+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5:15</text:p>
          </table:table-cell>
          <table:table-cell office:value-type="float" office:value="0.24962474999999998" table:style-name="c10">
            <text:p>0.24962</text:p>
          </table:table-cell>
          <table:table-cell office:value-type="string" table:style-name="c10">
            <text:p>2026-04-04 15:15</text:p>
          </table:table-cell>
          <table:table-cell office:value-type="float" office:value="0.24627680000000002" table:style-name="c10">
            <text:p>0.24628</text:p>
          </table:table-cell>
          <table:table-cell office:value-type="float" office:value="-1.5384120858208061" table:style-name="c11">
            <text:p>-1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30</text:p>
          </table:table-cell>
          <table:table-cell office:value-type="float" office:value="0.24582284999999998" table:style-name="c10">
            <text:p>0.24582</text:p>
          </table:table-cell>
          <table:table-cell office:value-type="string" table:style-name="c10">
            <text:p>2026-04-05 11:00</text:p>
          </table:table-cell>
          <table:table-cell office:value-type="float" office:value="0.24047970000000002" table:style-name="c10">
            <text:p>0.24048</text:p>
          </table:table-cell>
          <table:table-cell office:value-type="float" office:value="-2.369132454651768" table:style-name="c11">
            <text:p>-2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4-07 00:15</text:p>
          </table:table-cell>
          <table:table-cell office:value-type="float" office:value="0.24537725000000002" table:style-name="c10">
            <text:p>0.24538</text:p>
          </table:table-cell>
          <table:table-cell office:value-type="float" office:value="-3.900919239143663" table:style-name="c11">
            <text:p>-3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0.26283134999999996" table:style-name="c10">
            <text:p>0.26283</text:p>
          </table:table-cell>
          <table:table-cell office:value-type="string" table:style-name="c10">
            <text:p>2026-04-08 23:00</text:p>
          </table:table-cell>
          <table:table-cell office:value-type="float" office:value="0.2516741" table:style-name="c10">
            <text:p>0.25167</text:p>
          </table:table-cell>
          <table:table-cell office:value-type="float" office:value="-4.436436721076065" table:style-name="c11">
            <text:p>-4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0.24982485" table:style-name="c10">
            <text:p>0.24982</text:p>
          </table:table-cell>
          <table:table-cell office:value-type="string" table:style-name="c10">
            <text:p>2026-04-16 19:45</text:p>
          </table:table-cell>
          <table:table-cell office:value-type="float" office:value="0.25957015" table:style-name="c10">
            <text:p>0.25957</text:p>
          </table:table-cell>
          <table:table-cell office:value-type="float" office:value="3.6931551325458667" table:style-name="c12">
            <text:p>+3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15</text:p>
          </table:table-cell>
          <table:table-cell office:value-type="float" office:value="0.2633316" table:style-name="c10">
            <text:p>0.26333</text:p>
          </table:table-cell>
          <table:table-cell office:value-type="string" table:style-name="c10">
            <text:p>2026-04-18 13:15</text:p>
          </table:table-cell>
          <table:table-cell office:value-type="float" office:value="0.25097445" table:style-name="c10">
            <text:p>0.25097</text:p>
          </table:table-cell>
          <table:table-cell office:value-type="float" office:value="-4.883138949351318" table:style-name="c11">
            <text:p>-4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0.25382685" table:style-name="c10">
            <text:p>0.25383</text:p>
          </table:table-cell>
          <table:table-cell office:value-type="string" table:style-name="c10">
            <text:p>2026-04-23 02:30</text:p>
          </table:table-cell>
          <table:table-cell office:value-type="float" office:value="0.24647670000000002" table:style-name="c10">
            <text:p>0.24648</text:p>
          </table:table-cell>
          <table:table-cell office:value-type="float" office:value="-3.0898452718063574" table:style-name="c11">
            <text:p>-3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0.25272629999999996" table:style-name="c10">
            <text:p>0.25273</text:p>
          </table:table-cell>
          <table:table-cell office:value-type="string" table:style-name="c10">
            <text:p>2026-05-05 02:15</text:p>
          </table:table-cell>
          <table:table-cell office:value-type="float" office:value="0.25137425" table:style-name="c10">
            <text:p>0.25137</text:p>
          </table:table-cell>
          <table:table-cell office:value-type="float" office:value="-0.733816435309631" table:style-name="c11">
            <text:p>-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0.272136" table:style-name="c10">
            <text:p>0.27214</text:p>
          </table:table-cell>
          <table:table-cell office:value-type="string" table:style-name="c10">
            <text:p>2026-05-07 09:00</text:p>
          </table:table-cell>
          <table:table-cell office:value-type="float" office:value="0.26786600000000005" table:style-name="c10">
            <text:p>0.26787</text:p>
          </table:table-cell>
          <table:table-cell office:value-type="float" office:value="-1.7658318392274386" table:style-name="c11">
            <text:p>-1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00</text:p>
          </table:table-cell>
          <table:table-cell office:value-type="float" office:value="0.27623805" table:style-name="c10">
            <text:p>0.27624</text:p>
          </table:table-cell>
          <table:table-cell office:value-type="string" table:style-name="c10">
            <text:p>2026-05-09 22:00</text:p>
          </table:table-cell>
          <table:table-cell office:value-type="float" office:value="0.27186400000000005" table:style-name="c10">
            <text:p>0.27186</text:p>
          </table:table-cell>
          <table:table-cell office:value-type="float" office:value="-1.7801697253509996" table:style-name="c11">
            <text:p>-1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0.2817408" table:style-name="c10">
            <text:p>0.28174</text:p>
          </table:table-cell>
          <table:table-cell office:value-type="string" table:style-name="c10">
            <text:p>2026-05-11 16:00</text:p>
          </table:table-cell>
          <table:table-cell office:value-type="float" office:value="0.2822588" table:style-name="c10">
            <text:p>0.28226</text:p>
          </table:table-cell>
          <table:table-cell office:value-type="float" office:value="-0.016410594844629145" table:style-name="c11">
            <text:p>-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0912456" table:style-name="c1">
            <text:p>0.091246</text:p>
          </table:table-cell>
          <table:table-cell office:value-type="string" table:style-name="c1">
            <text:p>2026-03-14 00:30</text:p>
          </table:table-cell>
          <table:table-cell office:value-type="float" office:value="0.0937531" table:style-name="c1">
            <text:p>0.093753</text:p>
          </table:table-cell>
          <table:table-cell office:value-type="float" office:value="2.5426843081748807" table:style-name="c13">
            <text:p>+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4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5 04:45</text:p>
          </table:table-cell>
          <table:table-cell office:value-type="float" office:value="0.08945525" table:style-name="c1">
            <text:p>0.089455</text:p>
          </table:table-cell>
          <table:table-cell office:value-type="float" office:value="-7.339757997169638" table:style-name="c14">
            <text:p>-7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8:15</text:p>
          </table:table-cell>
          <table:table-cell office:value-type="float" office:value="0.086043" table:style-name="c1">
            <text:p>0.086043</text:p>
          </table:table-cell>
          <table:table-cell office:value-type="string" table:style-name="c1">
            <text:p>2026-04-01 08:15</text:p>
          </table:table-cell>
          <table:table-cell office:value-type="float" office:value="0.10074960000000001" table:style-name="c1">
            <text:p>0.10075</text:p>
          </table:table-cell>
          <table:table-cell office:value-type="float" office:value="16.85808438757366" table:style-name="c13">
            <text:p>+16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07:30</text:p>
          </table:table-cell>
          <table:table-cell office:value-type="float" office:value="0.10195095" table:style-name="c1">
            <text:p>0.10195</text:p>
          </table:table-cell>
          <table:table-cell office:value-type="string" table:style-name="c1">
            <text:p>2026-04-03 07:30</text:p>
          </table:table-cell>
          <table:table-cell office:value-type="float" office:value="0.12003995" table:style-name="c1">
            <text:p>0.12004</text:p>
          </table:table-cell>
          <table:table-cell office:value-type="float" office:value="17.507477997948982" table:style-name="c13">
            <text:p>+17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0.12236115" table:style-name="c1">
            <text:p>0.12236</text:p>
          </table:table-cell>
          <table:table-cell office:value-type="string" table:style-name="c1">
            <text:p>2026-04-06 21:00</text:p>
          </table:table-cell>
          <table:table-cell office:value-type="float" office:value="0.12113940000000001" table:style-name="c1">
            <text:p>0.12114</text:p>
          </table:table-cell>
          <table:table-cell office:value-type="float" office:value="-1.1963827249090064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4:4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5 04:45</text:p>
          </table:table-cell>
          <table:table-cell office:value-type="float" office:value="0.10944525000000001" table:style-name="c1">
            <text:p>0.10945</text:p>
          </table:table-cell>
          <table:table-cell office:value-type="float" office:value="-4.40290455013298" table:style-name="c14">
            <text:p>-4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1:15</text:p>
          </table:table-cell>
          <table:table-cell office:value-type="float" office:value="0.11535764999999999" table:style-name="c1">
            <text:p>0.11536</text:p>
          </table:table-cell>
          <table:table-cell office:value-type="string" table:style-name="c1">
            <text:p>2026-04-17 21:15</text:p>
          </table:table-cell>
          <table:table-cell office:value-type="float" office:value="0.1121439" table:style-name="c1">
            <text:p>0.11214</text:p>
          </table:table-cell>
          <table:table-cell office:value-type="float" office:value="-2.9802320488497958" table:style-name="c14">
            <text:p>-3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0915455" table:style-name="c1">
            <text:p>0.10915</text:p>
          </table:table-cell>
          <table:table-cell office:value-type="string" table:style-name="c1">
            <text:p>2026-04-25 16:00</text:p>
          </table:table-cell>
          <table:table-cell office:value-type="float" office:value="0.11504245" table:style-name="c1">
            <text:p>0.11504</text:p>
          </table:table-cell>
          <table:table-cell office:value-type="float" office:value="5.1834120908839765" table:style-name="c13">
            <text:p>+5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5:15</text:p>
          </table:table-cell>
          <table:table-cell office:value-type="float" office:value="0.11935965" table:style-name="c1">
            <text:p>0.11936</text:p>
          </table:table-cell>
          <table:table-cell office:value-type="string" table:style-name="c1">
            <text:p>2026-05-06 05:15</text:p>
          </table:table-cell>
          <table:table-cell office:value-type="float" office:value="0.11884055000000002" table:style-name="c1">
            <text:p>0.11884</text:p>
          </table:table-cell>
          <table:table-cell office:value-type="float" office:value="-0.6339347170086107" table:style-name="c14">
            <text:p>-0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30</text:p>
          </table:table-cell>
          <table:table-cell office:value-type="float" office:value="0.1258629" table:style-name="c1">
            <text:p>0.12586</text:p>
          </table:table-cell>
          <table:table-cell office:value-type="string" table:style-name="c1">
            <text:p>2026-05-08 04:30</text:p>
          </table:table-cell>
          <table:table-cell office:value-type="float" office:value="0.12903545" table:style-name="c1">
            <text:p>0.12904</text:p>
          </table:table-cell>
          <table:table-cell office:value-type="float" office:value="2.315700762853856" table:style-name="c13">
            <text:p>+2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3:4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20 13:45</text:p>
          </table:table-cell>
          <table:table-cell office:value-type="float" office:value="0.11384305" table:style-name="c1">
            <text:p>0.11384</text:p>
          </table:table-cell>
          <table:table-cell office:value-type="float" office:value="0.31687137266172005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45</text:p>
          </table:table-cell>
          <table:table-cell office:value-type="float" office:value="0.11875935" table:style-name="c1">
            <text:p>0.11876</text:p>
          </table:table-cell>
          <table:table-cell office:value-type="string" table:style-name="c1">
            <text:p>2026-05-21 17:45</text:p>
          </table:table-cell>
          <table:table-cell office:value-type="float" office:value="0.1165417" table:style-name="c1">
            <text:p>0.11654</text:p>
          </table:table-cell>
          <table:table-cell office:value-type="float" office:value="-2.0635148797126246" table:style-name="c14">
            <text:p>-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1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29 23:15</text:p>
          </table:table-cell>
          <table:table-cell office:value-type="float" office:value="0.12123935000000001" table:style-name="c1">
            <text:p>0.12124</text:p>
          </table:table-cell>
          <table:table-cell office:value-type="float" office:value="6.834385403897025" table:style-name="c13">
            <text:p>+6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30</text:p>
          </table:table-cell>
          <table:table-cell office:value-type="float" office:value="0.12306149999999999" table:style-name="c1">
            <text:p>0.12306</text:p>
          </table:table-cell>
          <table:table-cell office:value-type="string" table:style-name="c1">
            <text:p>2026-05-30 23:30</text:p>
          </table:table-cell>
          <table:table-cell office:value-type="float" office:value="0.12413790000000001" table:style-name="c1">
            <text:p>0.12414</text:p>
          </table:table-cell>
          <table:table-cell office:value-type="float" office:value="0.6730361143818309" table:style-name="c13">
            <text:p>+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3:00</text:p>
          </table:table-cell>
          <table:table-cell office:value-type="float" office:value="0.1253373" table:style-name="c1">
            <text:p>0.12534</text:p>
          </table:table-cell>
          <table:table-cell office:value-type="float" office:value="-1.8648048524403382" table:style-name="c14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0.9544769999999999" table:style-name="c10">
            <text:p>0.95448</text:p>
          </table:table-cell>
          <table:table-cell office:value-type="string" table:style-name="c10">
            <text:p>2026-03-17 03:45</text:p>
          </table:table-cell>
          <table:table-cell office:value-type="float" office:value="0.9905045" table:style-name="c10">
            <text:p>0.9905</text:p>
          </table:table-cell>
          <table:table-cell office:value-type="float" office:value="3.5671348292834804" table:style-name="c12">
            <text:p>+3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00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4 19:00</text:p>
          </table:table-cell>
          <table:table-cell office:value-type="float" office:value="1.0434780000000001" table:style-name="c10">
            <text:p>1.0435</text:p>
          </table:table-cell>
          <table:table-cell office:value-type="float" office:value="2.8529300051555406" table:style-name="c12">
            <text:p>+2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0:00</text:p>
          </table:table-cell>
          <table:table-cell office:value-type="float" office:value="1.116558" table:style-name="c10">
            <text:p>1.1166</text:p>
          </table:table-cell>
          <table:table-cell office:value-type="string" table:style-name="c10">
            <text:p>2026-03-26 00:00</text:p>
          </table:table-cell>
          <table:table-cell office:value-type="float" office:value="1.0584705" table:style-name="c10">
            <text:p>1.0585</text:p>
          </table:table-cell>
          <table:table-cell office:value-type="float" office:value="-5.391872390820707" table:style-name="c11">
            <text:p>-5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45</text:p>
          </table:table-cell>
          <table:table-cell office:value-type="float" office:value="0.872436" table:style-name="c10">
            <text:p>0.87244</text:p>
          </table:table-cell>
          <table:table-cell office:value-type="string" table:style-name="c10">
            <text:p>2026-04-14 22:45</text:p>
          </table:table-cell>
          <table:table-cell office:value-type="float" office:value="0.8585705" table:style-name="c10">
            <text:p>0.85857</text:p>
          </table:table-cell>
          <table:table-cell office:value-type="float" office:value="-1.7860086504339456" table:style-name="c11">
            <text:p>-1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45</text:p>
          </table:table-cell>
          <table:table-cell office:value-type="float" office:value="0.8874434999999999" table:style-name="c10">
            <text:p>0.88744</text:p>
          </table:table-cell>
          <table:table-cell office:value-type="string" table:style-name="c10">
            <text:p>2026-04-16 12:45</text:p>
          </table:table-cell>
          <table:table-cell office:value-type="float" office:value="0.9365315000000001" table:style-name="c10">
            <text:p>0.93653</text:p>
          </table:table-cell>
          <table:table-cell office:value-type="float" office:value="5.320437135603573" table:style-name="c12">
            <text:p>+5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30</text:p>
          </table:table-cell>
          <table:table-cell office:value-type="float" office:value="0.9504749999999998" table:style-name="c10">
            <text:p>0.95047</text:p>
          </table:table-cell>
          <table:table-cell office:value-type="string" table:style-name="c10">
            <text:p>2026-04-17 15:30</text:p>
          </table:table-cell>
          <table:table-cell office:value-type="float" office:value="0.9965015" table:style-name="c10">
            <text:p>0.9965</text:p>
          </table:table-cell>
          <table:table-cell office:value-type="float" office:value="4.632893395565385" table:style-name="c12">
            <text:p>+4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22:30</text:p>
          </table:table-cell>
          <table:table-cell office:value-type="float" office:value="0.9674834999999999" table:style-name="c10">
            <text:p>0.96748</text:p>
          </table:table-cell>
          <table:table-cell office:value-type="string" table:style-name="c10">
            <text:p>2026-04-26 22:30</text:p>
          </table:table-cell>
          <table:table-cell office:value-type="float" office:value="0.985507" table:style-name="c10">
            <text:p>0.98551</text:p>
          </table:table-cell>
          <table:table-cell office:value-type="float" office:value="1.6593018389460923" table:style-name="c12">
            <text:p>+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00</text:p>
          </table:table-cell>
          <table:table-cell office:value-type="float" office:value="0.9924959999999999" table:style-name="c10">
            <text:p>0.9925</text:p>
          </table:table-cell>
          <table:table-cell office:value-type="string" table:style-name="c10">
            <text:p>2026-04-30 04:00</text:p>
          </table:table-cell>
          <table:table-cell office:value-type="float" office:value="1.0364815" table:style-name="c10">
            <text:p>1.0365</text:p>
          </table:table-cell>
          <table:table-cell office:value-type="float" office:value="4.223047093539933" table:style-name="c12">
            <text:p>+4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1:15</text:p>
          </table:table-cell>
          <table:table-cell office:value-type="float" office:value="1.0095044999999998" table:style-name="c10">
            <text:p>1.0095</text:p>
          </table:table-cell>
          <table:table-cell office:value-type="string" table:style-name="c10">
            <text:p>2026-05-02 12:00</text:p>
          </table:table-cell>
          <table:table-cell office:value-type="float" office:value="0.9925035000000001" table:style-name="c10">
            <text:p>0.9925</text:p>
          </table:table-cell>
          <table:table-cell office:value-type="float" office:value="-1.880627030042925" table:style-name="c11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1.0115055" table:style-name="c10">
            <text:p>1.0115</text:p>
          </table:table-cell>
          <table:table-cell office:value-type="string" table:style-name="c10">
            <text:p>2026-05-07 02:00</text:p>
          </table:table-cell>
          <table:table-cell office:value-type="float" office:value="1.0024985" table:style-name="c10">
            <text:p>1.0025</text:p>
          </table:table-cell>
          <table:table-cell office:value-type="float" office:value="-1.0885748521881289" table:style-name="c11">
            <text:p>-1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6:00</text:p>
          </table:table-cell>
          <table:table-cell office:value-type="float" office:value="1.0775385" table:style-name="c10">
            <text:p>1.0775</text:p>
          </table:table-cell>
          <table:table-cell office:value-type="string" table:style-name="c10">
            <text:p>2026-05-09 16:00</text:p>
          </table:table-cell>
          <table:table-cell office:value-type="float" office:value="1.09945" table:style-name="c10">
            <text:p>1.0995</text:p>
          </table:table-cell>
          <table:table-cell office:value-type="float" office:value="1.8295123051287998" table:style-name="c12">
            <text:p>+1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15</text:p>
          </table:table-cell>
          <table:table-cell office:value-type="float" office:value="1.1705849999999998" table:style-name="c10">
            <text:p>1.1706</text:p>
          </table:table-cell>
          <table:table-cell office:value-type="string" table:style-name="c10">
            <text:p>2026-05-11 17:15</text:p>
          </table:table-cell>
          <table:table-cell office:value-type="float" office:value="1.1274359999999999" table:style-name="c10">
            <text:p>1.1274</text:p>
          </table:table-cell>
          <table:table-cell office:value-type="float" office:value="-3.878637139891583" table:style-name="c11">
            <text:p>-3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0.9734864999999999" table:style-name="c10">
            <text:p>0.97349</text:p>
          </table:table-cell>
          <table:table-cell office:value-type="string" table:style-name="c10">
            <text:p>2026-05-22 17:30</text:p>
          </table:table-cell>
          <table:table-cell office:value-type="float" office:value="0.985507" table:style-name="c10">
            <text:p>0.98551</text:p>
          </table:table-cell>
          <table:table-cell office:value-type="float" office:value="1.0324202243174652" table:style-name="c12">
            <text:p>+1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5:45</text:p>
          </table:table-cell>
          <table:table-cell office:value-type="float" office:value="0.9794894999999999" table:style-name="c10">
            <text:p>0.97949</text:p>
          </table:table-cell>
          <table:table-cell office:value-type="string" table:style-name="c10">
            <text:p>2026-05-27 05:45</text:p>
          </table:table-cell>
          <table:table-cell office:value-type="float" office:value="0.9655170000000001" table:style-name="c10">
            <text:p>0.96552</text:p>
          </table:table-cell>
          <table:table-cell office:value-type="float" office:value="-1.6235568102567766" table:style-name="c11">
            <text:p>-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10095045" table:style-name="c1">
            <text:p>0.10095</text:p>
          </table:table-cell>
          <table:table-cell office:value-type="string" table:style-name="c1">
            <text:p>2026-03-10 19:30</text:p>
          </table:table-cell>
          <table:table-cell office:value-type="float" office:value="0.09795100000000001" table:style-name="c1">
            <text:p>0.097951</text:p>
          </table:table-cell>
          <table:table-cell office:value-type="float" office:value="-3.1651706842316996" table:style-name="c14">
            <text:p>-3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0.10635315" table:style-name="c1">
            <text:p>0.10635</text:p>
          </table:table-cell>
          <table:table-cell office:value-type="string" table:style-name="c1">
            <text:p>2026-03-17 03:45</text:p>
          </table:table-cell>
          <table:table-cell office:value-type="float" office:value="0.10824585" table:style-name="c1">
            <text:p>0.10825</text:p>
          </table:table-cell>
          <table:table-cell office:value-type="float" office:value="1.5761794980684751" table:style-name="c13">
            <text:p>+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5:00</text:p>
          </table:table-cell>
          <table:table-cell office:value-type="float" office:value="0.10845419999999999" table:style-name="c1">
            <text:p>0.10845</text:p>
          </table:table-cell>
          <table:table-cell office:value-type="string" table:style-name="c1">
            <text:p>2026-03-18 14:00</text:p>
          </table:table-cell>
          <table:table-cell office:value-type="float" office:value="0.10324835" table:style-name="c1">
            <text:p>0.10325</text:p>
          </table:table-cell>
          <table:table-cell office:value-type="float" office:value="-4.990349337923283" table:style-name="c14">
            <text:p>-5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0970485" table:style-name="c1">
            <text:p>0.097048</text:p>
          </table:table-cell>
          <table:table-cell office:value-type="string" table:style-name="c1">
            <text:p>2026-04-08 20:00</text:p>
          </table:table-cell>
          <table:table-cell office:value-type="float" office:value="0.10144925000000002" table:style-name="c1">
            <text:p>0.10145</text:p>
          </table:table-cell>
          <table:table-cell office:value-type="float" office:value="4.325623733751693" table:style-name="c13">
            <text:p>+4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10495244999999999" table:style-name="c1">
            <text:p>0.10495</text:p>
          </table:table-cell>
          <table:table-cell office:value-type="string" table:style-name="c1">
            <text:p>2026-04-09 21:30</text:p>
          </table:table-cell>
          <table:table-cell office:value-type="float" office:value="0.10384805000000001" table:style-name="c1">
            <text:p>0.10385</text:p>
          </table:table-cell>
          <table:table-cell office:value-type="float" office:value="-1.2500825392356085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1:45</text:p>
          </table:table-cell>
          <table:table-cell office:value-type="float" office:value="0.1070535" table:style-name="c1">
            <text:p>0.10705</text:p>
          </table:table-cell>
          <table:table-cell office:value-type="string" table:style-name="c1">
            <text:p>2026-04-10 21:45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5.8500909761941555" table:style-name="c13">
            <text:p>+5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02:45</text:p>
          </table:table-cell>
          <table:table-cell office:value-type="float" office:value="0.1176588" table:style-name="c1">
            <text:p>0.11766</text:p>
          </table:table-cell>
          <table:table-cell office:value-type="string" table:style-name="c1">
            <text:p>2026-04-12 02:45</text:p>
          </table:table-cell>
          <table:table-cell office:value-type="float" office:value="0.11364315" table:style-name="c1">
            <text:p>0.11364</text:p>
          </table:table-cell>
          <table:table-cell office:value-type="float" office:value="-3.6060393755928177" table:style-name="c14">
            <text:p>-3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3:15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17 13:15</text:p>
          </table:table-cell>
          <table:table-cell office:value-type="float" office:value="0.13573210000000002" table:style-name="c1">
            <text:p>0.13573</text:p>
          </table:table-cell>
          <table:table-cell office:value-type="float" office:value="9.099979850606532" table:style-name="c13">
            <text:p>+9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15</text:p>
          </table:table-cell>
          <table:table-cell office:value-type="float" office:value="0.1342671" table:style-name="c1">
            <text:p>0.13427</text:p>
          </table:table-cell>
          <table:table-cell office:value-type="string" table:style-name="c1">
            <text:p>2026-04-19 07:15</text:p>
          </table:table-cell>
          <table:table-cell office:value-type="float" office:value="0.12543725" table:style-name="c1">
            <text:p>0.12544</text:p>
          </table:table-cell>
          <table:table-cell office:value-type="float" office:value="-6.763085717014827" table:style-name="c14">
            <text:p>-6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18:00</text:p>
          </table:table-cell>
          <table:table-cell office:value-type="float" office:value="0.13186589999999998" table:style-name="c1">
            <text:p>0.13187</text:p>
          </table:table-cell>
          <table:table-cell office:value-type="string" table:style-name="c1">
            <text:p>2026-04-23 10:00</text:p>
          </table:table-cell>
          <table:table-cell office:value-type="float" office:value="0.12503745" table:style-name="c1">
            <text:p>0.12504</text:p>
          </table:table-cell>
          <table:table-cell office:value-type="float" office:value="-5.36787741375897" table:style-name="c14">
            <text:p>-5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0.13216604999999998" table:style-name="c1">
            <text:p>0.13217</text:p>
          </table:table-cell>
          <table:table-cell office:value-type="string" table:style-name="c1">
            <text:p>2026-04-29 20:00</text:p>
          </table:table-cell>
          <table:table-cell office:value-type="float" office:value="0.12313840000000001" table:style-name="c1">
            <text:p>0.12314</text:p>
          </table:table-cell>
          <table:table-cell office:value-type="float" office:value="-7.016782041681635" table:style-name="c14">
            <text:p>-7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0:30</text:p>
          </table:table-cell>
          <table:table-cell office:value-type="float" office:value="0.12516254999999998" table:style-name="c1">
            <text:p>0.12516</text:p>
          </table:table-cell>
          <table:table-cell office:value-type="string" table:style-name="c1">
            <text:p>2026-05-07 20:30</text:p>
          </table:table-cell>
          <table:table-cell office:value-type="float" office:value="0.1269365" table:style-name="c1">
            <text:p>0.12694</text:p>
          </table:table-cell>
          <table:table-cell office:value-type="float" office:value="1.2145837045506092" table:style-name="c13">
            <text:p>+1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0.1346673" table:style-name="c1">
            <text:p>0.13467</text:p>
          </table:table-cell>
          <table:table-cell office:value-type="string" table:style-name="c1">
            <text:p>2026-05-09 09:30</text:p>
          </table:table-cell>
          <table:table-cell office:value-type="float" office:value="0.14302845" table:style-name="c1">
            <text:p>0.14303</text:p>
          </table:table-cell>
          <table:table-cell office:value-type="float" office:value="5.996434270569018" table:style-name="c13">
            <text:p>+6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15</text:p>
          </table:table-cell>
          <table:table-cell office:value-type="float" office:value="0.14497245" table:style-name="c1">
            <text:p>0.14497</text:p>
          </table:table-cell>
          <table:table-cell office:value-type="string" table:style-name="c1">
            <text:p>2026-05-11 23:15</text:p>
          </table:table-cell>
          <table:table-cell office:value-type="float" office:value="0.14062965" table:style-name="c1">
            <text:p>0.14063</text:p>
          </table:table-cell>
          <table:table-cell office:value-type="float" office:value="-3.1895154357603928" table:style-name="c14">
            <text:p>-3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1.858929" table:style-name="c10">
            <text:p>1.8589</text:p>
          </table:table-cell>
          <table:table-cell office:value-type="string" table:style-name="c10">
            <text:p>2026-03-14 10:15</text:p>
          </table:table-cell>
          <table:table-cell office:value-type="float" office:value="1.8630680000000002" table:style-name="c10">
            <text:p>1.8631</text:p>
          </table:table-cell>
          <table:table-cell office:value-type="float" office:value="0.022310000435754596" table:style-name="c12">
            <text:p>+0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9:30</text:p>
          </table:table-cell>
          <table:table-cell office:value-type="float" office:value="2.02101" table:style-name="c10">
            <text:p>2.021</text:p>
          </table:table-cell>
          <table:table-cell office:value-type="string" table:style-name="c10">
            <text:p>2026-03-18 20:00</text:p>
          </table:table-cell>
          <table:table-cell office:value-type="float" office:value="1.877061" table:style-name="c10">
            <text:p>1.8771</text:p>
          </table:table-cell>
          <table:table-cell office:value-type="float" office:value="-7.308288674425157" table:style-name="c11">
            <text:p>-7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30</text:p>
          </table:table-cell>
          <table:table-cell office:value-type="float" office:value="1.7178585" table:style-name="c10">
            <text:p>1.7179</text:p>
          </table:table-cell>
          <table:table-cell office:value-type="string" table:style-name="c10">
            <text:p>2026-04-04 16:30</text:p>
          </table:table-cell>
          <table:table-cell office:value-type="float" office:value="1.707146" table:style-name="c10">
            <text:p>1.7071</text:p>
          </table:table-cell>
          <table:table-cell office:value-type="float" office:value="-0.8222496121769951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30</text:p>
          </table:table-cell>
          <table:table-cell office:value-type="float" office:value="1.7398695" table:style-name="c10">
            <text:p>1.7399</text:p>
          </table:table-cell>
          <table:table-cell office:value-type="string" table:style-name="c10">
            <text:p>2026-04-08 21:30</text:p>
          </table:table-cell>
          <table:table-cell office:value-type="float" office:value="1.787106" table:style-name="c10">
            <text:p>1.7871</text:p>
          </table:table-cell>
          <table:table-cell office:value-type="float" office:value="2.509617825130017" table:style-name="c12">
            <text:p>+2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10 15:45</text:p>
          </table:table-cell>
          <table:table-cell office:value-type="float" office:value="1.8300845000000001" table:style-name="c10">
            <text:p>1.8301</text:p>
          </table:table-cell>
          <table:table-cell office:value-type="float" office:value="0.24785306877039837" table:style-name="c12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5:45</text:p>
          </table:table-cell>
          <table:table-cell office:value-type="float" office:value="1.8319154999999998" table:style-name="c10">
            <text:p>1.8319</text:p>
          </table:table-cell>
          <table:table-cell office:value-type="string" table:style-name="c10">
            <text:p>2026-04-22 15:45</text:p>
          </table:table-cell>
          <table:table-cell office:value-type="float" office:value="1.887056" table:style-name="c10">
            <text:p>1.8871</text:p>
          </table:table-cell>
          <table:table-cell office:value-type="float" office:value="2.804074481383001" table:style-name="c12">
            <text:p>+2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6:15</text:p>
          </table:table-cell>
          <table:table-cell office:value-type="float" office:value="1.9919955" table:style-name="c10">
            <text:p>1.992</text:p>
          </table:table-cell>
          <table:table-cell office:value-type="string" table:style-name="c10">
            <text:p>2026-04-25 16:15</text:p>
          </table:table-cell>
          <table:table-cell office:value-type="float" office:value="2.0379805" table:style-name="c10">
            <text:p>2.038</text:p>
          </table:table-cell>
          <table:table-cell office:value-type="float" office:value="2.1039744808911687" table:style-name="c12">
            <text:p>+2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5:30</text:p>
          </table:table-cell>
          <table:table-cell office:value-type="float" office:value="1.9969979999999998" table:style-name="c10">
            <text:p>1.997</text:p>
          </table:table-cell>
          <table:table-cell office:value-type="string" table:style-name="c10">
            <text:p>2026-05-11 15:30</text:p>
          </table:table-cell>
          <table:table-cell office:value-type="float" office:value="2.0029980000000003" table:style-name="c10">
            <text:p>2.003</text:p>
          </table:table-cell>
          <table:table-cell office:value-type="float" office:value="0.0999503754135267" table:style-name="c12">
            <text:p>+0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7:15</text:p>
          </table:table-cell>
          <table:table-cell office:value-type="float" office:value="2.0620304999999997" table:style-name="c10">
            <text:p>2.062</text:p>
          </table:table-cell>
          <table:table-cell office:value-type="string" table:style-name="c10">
            <text:p>2026-05-13 17:15</text:p>
          </table:table-cell>
          <table:table-cell office:value-type="float" office:value="2.062968" table:style-name="c10">
            <text:p>2.063</text:p>
          </table:table-cell>
          <table:table-cell office:value-type="float" office:value="-0.15452598940701723" table:style-name="c11">
            <text:p>-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4:00</text:p>
          </table:table-cell>
          <table:table-cell office:value-type="float" office:value="2.067033" table:style-name="c10">
            <text:p>2.067</text:p>
          </table:table-cell>
          <table:table-cell office:value-type="string" table:style-name="c10">
            <text:p>2026-05-18 04:00</text:p>
          </table:table-cell>
          <table:table-cell office:value-type="float" office:value="2.036981" table:style-name="c10">
            <text:p>2.037</text:p>
          </table:table-cell>
          <table:table-cell office:value-type="float" office:value="-1.6508650330691266" table:style-name="c11">
            <text:p>-1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45</text:p>
          </table:table-cell>
          <table:table-cell office:value-type="float" office:value="2.0780385" table:style-name="c10">
            <text:p>2.078</text:p>
          </table:table-cell>
          <table:table-cell office:value-type="string" table:style-name="c10">
            <text:p>2026-05-20 03:00</text:p>
          </table:table-cell>
          <table:table-cell office:value-type="float" office:value="2.008995" table:style-name="c10">
            <text:p>2.009</text:p>
          </table:table-cell>
          <table:table-cell office:value-type="float" office:value="-3.51579054021377" table:style-name="c11">
            <text:p>-3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3:30</text:p>
          </table:table-cell>
          <table:table-cell office:value-type="float" office:value="2.1220605" table:style-name="c10">
            <text:p>2.1221</text:p>
          </table:table-cell>
          <table:table-cell office:value-type="string" table:style-name="c10">
            <text:p>2026-05-23 03:30</text:p>
          </table:table-cell>
          <table:table-cell office:value-type="float" office:value="2.132933" table:style-name="c10">
            <text:p>2.1329</text:p>
          </table:table-cell>
          <table:table-cell office:value-type="float" office:value="0.31143159834510215" table:style-name="c12">
            <text:p>+0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21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4 18:00</text:p>
          </table:table-cell>
          <table:table-cell office:value-type="float" office:value="2.044977" table:style-name="c10">
            <text:p>2.045</text:p>
          </table:table-cell>
          <table:table-cell office:value-type="float" office:value="-4.9455192731220565" table:style-name="c11">
            <text:p>-4.9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3-10 19:45</text:p>
          </table:table-cell>
          <table:table-cell office:value-type="float" office:value="9.5952" table:style-name="c1">
            <text:p>9.5952</text:p>
          </table:table-cell>
          <table:table-cell office:value-type="float" office:value="1.8216338128807852" table:style-name="c13">
            <text:p>+1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45</text:p>
          </table:table-cell>
          <table:table-cell office:value-type="float" office:value="10.275134999999999" table:style-name="c1">
            <text:p>10.275</text:p>
          </table:table-cell>
          <table:table-cell office:value-type="string" table:style-name="c1">
            <text:p>2026-03-14 10:00</text:p>
          </table:table-cell>
          <table:table-cell office:value-type="float" office:value="9.55522" table:style-name="c1">
            <text:p>9.5552</text:p>
          </table:table-cell>
          <table:table-cell office:value-type="float" office:value="-7.19227421128773" table:style-name="c14">
            <text:p>-7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0.30515" table:style-name="c1">
            <text:p>10.305</text:p>
          </table:table-cell>
          <table:table-cell office:value-type="string" table:style-name="c1">
            <text:p>2026-03-17 03:45</text:p>
          </table:table-cell>
          <table:table-cell office:value-type="float" office:value="10.294850000000002" table:style-name="c1">
            <text:p>10.295</text:p>
          </table:table-cell>
          <table:table-cell office:value-type="float" office:value="-0.2996502248875488" table:style-name="c14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9.544769999999998" table:style-name="c1">
            <text:p>9.5448</text:p>
          </table:table-cell>
          <table:table-cell office:value-type="string" table:style-name="c1">
            <text:p>2026-03-25 20:45</text:p>
          </table:table-cell>
          <table:table-cell office:value-type="float" office:value="9.635180000000002" table:style-name="c1">
            <text:p>9.6352</text:p>
          </table:table-cell>
          <table:table-cell office:value-type="float" office:value="0.7454268167803368" table:style-name="c13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9.254624999999999" table:style-name="c1">
            <text:p>9.2546</text:p>
          </table:table-cell>
          <table:table-cell office:value-type="string" table:style-name="c1">
            <text:p>2026-04-02 06:15</text:p>
          </table:table-cell>
          <table:table-cell office:value-type="float" office:value="8.685655" table:style-name="c1">
            <text:p>8.6857</text:p>
          </table:table-cell>
          <table:table-cell office:value-type="float" office:value="-6.335563292353807" table:style-name="c14">
            <text:p>-6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9.194595" table:style-name="c1">
            <text:p>9.1946</text:p>
          </table:table-cell>
          <table:table-cell office:value-type="string" table:style-name="c1">
            <text:p>2026-04-07 00:15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-3.554286234956505" table:style-name="c14">
            <text:p>-3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9.344669999999999" table:style-name="c1">
            <text:p>9.3447</text:p>
          </table:table-cell>
          <table:table-cell office:value-type="string" table:style-name="c1">
            <text:p>2026-04-10 16:00</text:p>
          </table:table-cell>
          <table:table-cell office:value-type="float" office:value="9.41529" table:style-name="c1">
            <text:p>9.4153</text:p>
          </table:table-cell>
          <table:table-cell office:value-type="float" office:value="0.5543142271476897" table:style-name="c13">
            <text:p>+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4 22:30</text:p>
          </table:table-cell>
          <table:table-cell office:value-type="float" office:value="9.325335" table:style-name="c1">
            <text:p>9.3253</text:p>
          </table:table-cell>
          <table:table-cell office:value-type="float" office:value="-2.186723091293452" table:style-name="c14">
            <text:p>-2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9.514755" table:style-name="c1">
            <text:p>9.5148</text:p>
          </table:table-cell>
          <table:table-cell office:value-type="string" table:style-name="c1">
            <text:p>2026-04-17 12:30</text:p>
          </table:table-cell>
          <table:table-cell office:value-type="float" office:value="9.645175" table:style-name="c1">
            <text:p>9.6452</text:p>
          </table:table-cell>
          <table:table-cell office:value-type="float" office:value="1.168073115650392" table:style-name="c13">
            <text:p>+1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4-27 10:0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-3.1272861954001696" table:style-name="c14">
            <text:p>-3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9.42471" table:style-name="c1">
            <text:p>9.4247</text:p>
          </table:table-cell>
          <table:table-cell office:value-type="string" table:style-name="c1">
            <text:p>2026-04-29 17:00</text:p>
          </table:table-cell>
          <table:table-cell office:value-type="float" office:value="9.11544" table:style-name="c1">
            <text:p>9.1154</text:p>
          </table:table-cell>
          <table:table-cell office:value-type="float" office:value="-3.4748205998911486" table:style-name="c14">
            <text:p>-3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9.214605" table:style-name="c1">
            <text:p>9.2146</text:p>
          </table:table-cell>
          <table:table-cell office:value-type="string" table:style-name="c1">
            <text:p>2026-05-05 02:15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0.2416111745430216" table:style-name="c13">
            <text:p>+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6:00</text:p>
          </table:table-cell>
          <table:table-cell office:value-type="float" office:value="461.73075" table:style-name="c10">
            <text:p>461.73</text:p>
          </table:table-cell>
          <table:table-cell office:value-type="string" table:style-name="c10">
            <text:p>2026-03-15 16:00</text:p>
          </table:table-cell>
          <table:table-cell office:value-type="float" office:value="462.36870000000005" table:style-name="c10">
            <text:p>462.37</text:p>
          </table:table-cell>
          <table:table-cell office:value-type="float" office:value="-0.062011254676008765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7:15</text:p>
          </table:table-cell>
          <table:table-cell office:value-type="float" office:value="445.52265" table:style-name="c10">
            <text:p>445.52</text:p>
          </table:table-cell>
          <table:table-cell office:value-type="string" table:style-name="c10">
            <text:p>2026-04-10 07:15</text:p>
          </table:table-cell>
          <table:table-cell office:value-type="float" office:value="438.98040000000003" table:style-name="c10">
            <text:p>438.98</text:p>
          </table:table-cell>
          <table:table-cell office:value-type="float" office:value="-1.6654084409849834" table:style-name="c11">
            <text:p>-1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442.32105" table:style-name="c10">
            <text:p>442.32</text:p>
          </table:table-cell>
          <table:table-cell office:value-type="string" table:style-name="c10">
            <text:p>2026-04-17 13:30</text:p>
          </table:table-cell>
          <table:table-cell office:value-type="float" office:value="454.07285" table:style-name="c10">
            <text:p>454.07</text:p>
          </table:table-cell>
          <table:table-cell office:value-type="float" office:value="2.4516374187595114" table:style-name="c12">
            <text:p>+2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3:15</text:p>
          </table:table-cell>
          <table:table-cell office:value-type="float" office:value="464.53215" table:style-name="c10">
            <text:p>464.53</text:p>
          </table:table-cell>
          <table:table-cell office:value-type="string" table:style-name="c10">
            <text:p>2026-05-06 23:15</text:p>
          </table:table-cell>
          <table:table-cell office:value-type="float" office:value="464.46765" table:style-name="c10">
            <text:p>464.47</text:p>
          </table:table-cell>
          <table:table-cell office:value-type="float" office:value="-0.21375718179033054" table:style-name="c11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22.55112" table:style-name="c1">
            <text:p>622.55</text:p>
          </table:table-cell>
          <table:table-cell office:value-type="string" table:style-name="c1">
            <text:p>2026-04-15 14:00</text:p>
          </table:table-cell>
          <table:table-cell office:value-type="float" office:value="618.67051" table:style-name="c1">
            <text:p>618.67</text:p>
          </table:table-cell>
          <table:table-cell office:value-type="float" office:value="-0.8219939190680425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5 02:15</text:p>
          </table:table-cell>
          <table:table-cell office:value-type="float" office:value="625.14727" table:style-name="c1">
            <text:p>625.15</text:p>
          </table:table-cell>
          <table:table-cell office:value-type="float" office:value="0.01055422495161995" table:style-name="c13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1 22:30</text:p>
          </table:table-cell>
          <table:table-cell office:value-type="float" office:value="663.318175" table:style-name="c1">
            <text:p>663.32</text:p>
          </table:table-cell>
          <table:table-cell office:value-type="float" office:value="-0.5020494311979484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30</text:p>
          </table:table-cell>
          <table:table-cell office:value-type="float" office:value="676.6181399999999" table:style-name="c1">
            <text:p>676.62</text:p>
          </table:table-cell>
          <table:table-cell office:value-type="string" table:style-name="c1">
            <text:p>2026-05-14 01:30</text:p>
          </table:table-cell>
          <table:table-cell office:value-type="float" office:value="674.8823900000001" table:style-name="c1">
            <text:p>674.88</text:p>
          </table:table-cell>
          <table:table-cell office:value-type="float" office:value="-0.45592036560087035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14:45</text:p>
          </table:table-cell>
          <table:table-cell office:value-type="float" office:value="687.213435" table:style-name="c1">
            <text:p>687.21</text:p>
          </table:table-cell>
          <table:table-cell office:value-type="string" table:style-name="c1">
            <text:p>2026-05-31 14:45</text:p>
          </table:table-cell>
          <table:table-cell office:value-type="float" office:value="720.109765" table:style-name="c1">
            <text:p>720.11</text:p>
          </table:table-cell>
          <table:table-cell office:value-type="float" office:value="4.5774469731903356" table:style-name="c13">
            <text:p>+4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6:00</text:p>
          </table:table-cell>
          <table:table-cell office:value-type="float" office:value="677.251205" table:style-name="c1">
            <text:p>677.25</text:p>
          </table:table-cell>
          <table:table-cell office:value-type="float" office:value="-5.853224811697332" table:style-name="c14">
            <text:p>-5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2:45</text:p>
          </table:table-cell>
          <table:table-cell office:value-type="float" office:value="70355.32008" table:style-name="c10">
            <text:p>70355</text:p>
          </table:table-cell>
          <table:table-cell office:value-type="string" table:style-name="c10">
            <text:p>2026-03-11 02:45</text:p>
          </table:table-cell>
          <table:table-cell office:value-type="float" office:value="69655.155" table:style-name="c10">
            <text:p>69655</text:p>
          </table:table-cell>
          <table:table-cell office:value-type="float" office:value="-1.1930948987092016" table:style-name="c11">
            <text:p>-1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70477.231005" table:style-name="c10">
            <text:p>70477</text:p>
          </table:table-cell>
          <table:table-cell office:value-type="string" table:style-name="c10">
            <text:p>2026-03-12 13:45</text:p>
          </table:table-cell>
          <table:table-cell office:value-type="float" office:value="70044.30033" table:style-name="c10">
            <text:p>70044</text:p>
          </table:table-cell>
          <table:table-cell office:value-type="float" office:value="-0.8129565012550244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4:00</text:p>
          </table:table-cell>
          <table:table-cell office:value-type="float" office:value="73610.09665499999" table:style-name="c10">
            <text:p>73610</text:p>
          </table:table-cell>
          <table:table-cell office:value-type="string" table:style-name="c10">
            <text:p>2026-03-17 04:00</text:p>
          </table:table-cell>
          <table:table-cell office:value-type="float" office:value="74426.74801" table:style-name="c10">
            <text:p>74427</text:p>
          </table:table-cell>
          <table:table-cell office:value-type="float" office:value="0.9073107033920058" table:style-name="c12">
            <text:p>+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15:30</text:p>
          </table:table-cell>
          <table:table-cell office:value-type="float" office:value="67533.75" table:style-name="c10">
            <text:p>67534</text:p>
          </table:table-cell>
          <table:table-cell office:value-type="string" table:style-name="c10">
            <text:p>2026-04-06 15:30</text:p>
          </table:table-cell>
          <table:table-cell office:value-type="float" office:value="69708.038545" table:style-name="c10">
            <text:p>69708</text:p>
          </table:table-cell>
          <table:table-cell office:value-type="float" office:value="3.013222538284266" table:style-name="c12">
            <text:p>+3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45</text:p>
          </table:table-cell>
          <table:table-cell office:value-type="float" office:value="70797.17089499999" table:style-name="c10">
            <text:p>70797</text:p>
          </table:table-cell>
          <table:table-cell office:value-type="string" table:style-name="c10">
            <text:p>2026-04-08 22:45</text:p>
          </table:table-cell>
          <table:table-cell office:value-type="float" office:value="71204.250065" table:style-name="c10">
            <text:p>71204</text:p>
          </table:table-cell>
          <table:table-cell office:value-type="float" office:value="0.3739441432097923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72111.77787" table:style-name="c10">
            <text:p>72112</text:p>
          </table:table-cell>
          <table:table-cell office:value-type="string" table:style-name="c10">
            <text:p>2026-04-10 15:45</text:p>
          </table:table-cell>
          <table:table-cell office:value-type="float" office:value="72709.4271" table:style-name="c10">
            <text:p>72709</text:p>
          </table:table-cell>
          <table:table-cell office:value-type="float" office:value="0.6272249812540709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15</text:p>
          </table:table-cell>
          <table:table-cell office:value-type="float" office:value="72908.97626999998" table:style-name="c10">
            <text:p>72909</text:p>
          </table:table-cell>
          <table:table-cell office:value-type="string" table:style-name="c10">
            <text:p>2026-04-12 09:00</text:p>
          </table:table-cell>
          <table:table-cell office:value-type="float" office:value="71593.39539500001" table:style-name="c10">
            <text:p>71593</text:p>
          </table:table-cell>
          <table:table-cell office:value-type="float" office:value="-2.0007084820292453" table:style-name="c11">
            <text:p>-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3:45</text:p>
          </table:table-cell>
          <table:table-cell office:value-type="float" office:value="75226.09425" table:style-name="c10">
            <text:p>75226</text:p>
          </table:table-cell>
          <table:table-cell office:value-type="string" table:style-name="c10">
            <text:p>2026-04-15 13:45</text:p>
          </table:table-cell>
          <table:table-cell office:value-type="float" office:value="73842.24041" table:style-name="c10">
            <text:p>73842</text:p>
          </table:table-cell>
          <table:table-cell office:value-type="float" office:value="-2.035815489090864" table:style-name="c11">
            <text:p>-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79809.31471499999" table:style-name="c10">
            <text:p>79809</text:p>
          </table:table-cell>
          <table:table-cell office:value-type="string" table:style-name="c10">
            <text:p>2026-05-05 02:00</text:p>
          </table:table-cell>
          <table:table-cell office:value-type="float" office:value="80311.81400500001" table:style-name="c10">
            <text:p>80312</text:p>
          </table:table-cell>
          <table:table-cell office:value-type="float" office:value="0.4284662448551968" table:style-name="c12">
            <text:p>+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45</text:p>
          </table:table-cell>
          <table:table-cell office:value-type="float" office:value="77543.96260500001" table:style-name="c10">
            <text:p>77544</text:p>
          </table:table-cell>
          <table:table-cell office:value-type="string" table:style-name="c10">
            <text:p>2026-05-26 19:00</text:p>
          </table:table-cell>
          <table:table-cell office:value-type="float" office:value="75802.629725" table:style-name="c10">
            <text:p>75803</text:p>
          </table:table-cell>
          <table:table-cell office:value-type="float" office:value="-2.441018324614519" table:style-name="c11">
            <text:p>-2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97938945" table:style-name="c1">
            <text:p>0.097939</text:p>
          </table:table-cell>
          <table:table-cell office:value-type="string" table:style-name="c1">
            <text:p>2026-03-11 14:45</text:p>
          </table:table-cell>
          <table:table-cell office:value-type="float" office:value="0.09390302500000001" table:style-name="c1">
            <text:p>0.093903</text:p>
          </table:table-cell>
          <table:table-cell office:value-type="float" office:value="-4.312515462541477" table:style-name="c14">
            <text:p>-4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9940968" table:style-name="c1">
            <text:p>0.09941</text:p>
          </table:table-cell>
          <table:table-cell office:value-type="string" table:style-name="c1">
            <text:p>2026-03-17 03:30</text:p>
          </table:table-cell>
          <table:table-cell office:value-type="float" office:value="0.10260867000000001" table:style-name="c1">
            <text:p>0.10261</text:p>
          </table:table-cell>
          <table:table-cell office:value-type="float" office:value="3.011653662570901" table:style-name="c13">
            <text:p>+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15</text:p>
          </table:table-cell>
          <table:table-cell office:value-type="float" office:value="0.096658305" table:style-name="c1">
            <text:p>0.096658</text:p>
          </table:table-cell>
          <table:table-cell office:value-type="string" table:style-name="c1">
            <text:p>2026-03-26 05:15</text:p>
          </table:table-cell>
          <table:table-cell office:value-type="float" office:value="0.09381307" table:style-name="c1">
            <text:p>0.093813</text:p>
          </table:table-cell>
          <table:table-cell office:value-type="float" office:value="-3.1376169144803456" table:style-name="c14">
            <text:p>-3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0.09222609" table:style-name="c1">
            <text:p>0.092226</text:p>
          </table:table-cell>
          <table:table-cell office:value-type="string" table:style-name="c1">
            <text:p>2026-03-31 10:00</text:p>
          </table:table-cell>
          <table:table-cell office:value-type="float" office:value="0.08967514" table:style-name="c1">
            <text:p>0.089675</text:p>
          </table:table-cell>
          <table:table-cell office:value-type="float" office:value="-2.960345174407797" table:style-name="c14">
            <text:p>-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4-07 04:00</text:p>
          </table:table-cell>
          <table:table-cell office:value-type="float" office:value="0.09047474000000001" table:style-name="c1">
            <text:p>0.090475</text:p>
          </table:table-cell>
          <table:table-cell office:value-type="float" office:value="-2.979190909017637" table:style-name="c14">
            <text:p>-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0.09505750499999999" table:style-name="c1">
            <text:p>0.095058</text:p>
          </table:table-cell>
          <table:table-cell office:value-type="string" table:style-name="c1">
            <text:p>2026-04-08 23:00</text:p>
          </table:table-cell>
          <table:table-cell office:value-type="float" office:value="0.092763595" table:style-name="c1">
            <text:p>0.092764</text:p>
          </table:table-cell>
          <table:table-cell office:value-type="float" office:value="-2.608257418922344" table:style-name="c14">
            <text:p>-2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9:30</text:p>
          </table:table-cell>
          <table:table-cell office:value-type="float" office:value="0.094997475" table:style-name="c1">
            <text:p>0.094997</text:p>
          </table:table-cell>
          <table:table-cell office:value-type="string" table:style-name="c1">
            <text:p>2026-04-11 19:30</text:p>
          </table:table-cell>
          <table:table-cell office:value-type="float" office:value="0.094362795" table:style-name="c1">
            <text:p>0.094363</text:p>
          </table:table-cell>
          <table:table-cell office:value-type="float" office:value="-0.8666664321393847" table:style-name="c14">
            <text:p>-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9711853499999999" table:style-name="c1">
            <text:p>0.097119</text:p>
          </table:table-cell>
          <table:table-cell office:value-type="string" table:style-name="c1">
            <text:p>2026-04-15 14:00</text:p>
          </table:table-cell>
          <table:table-cell office:value-type="float" office:value="0.09338328500000001" table:style-name="c1">
            <text:p>0.093383</text:p>
          </table:table-cell>
          <table:table-cell office:value-type="float" office:value="-4.0382849542726085" table:style-name="c14">
            <text:p>-4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9640818" table:style-name="c1">
            <text:p>0.096408</text:p>
          </table:table-cell>
          <table:table-cell office:value-type="string" table:style-name="c1">
            <text:p>2026-04-16 19:45</text:p>
          </table:table-cell>
          <table:table-cell office:value-type="float" office:value="0.09934030500000002" table:style-name="c1">
            <text:p>0.09934</text:p>
          </table:table-cell>
          <table:table-cell office:value-type="float" office:value="2.835385680245195" table:style-name="c13">
            <text:p>+2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0.10137065999999999" table:style-name="c1">
            <text:p>0.10137</text:p>
          </table:table-cell>
          <table:table-cell office:value-type="string" table:style-name="c1">
            <text:p>2026-04-18 13:15</text:p>
          </table:table-cell>
          <table:table-cell office:value-type="float" office:value="0.095902025" table:style-name="c1">
            <text:p>0.095902</text:p>
          </table:table-cell>
          <table:table-cell office:value-type="float" office:value="-5.58380812354875" table:style-name="c14">
            <text:p>-5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1:15</text:p>
          </table:table-cell>
          <table:table-cell office:value-type="float" office:value="0.09584789999999999" table:style-name="c1">
            <text:p>0.095848</text:p>
          </table:table-cell>
          <table:table-cell office:value-type="string" table:style-name="c1">
            <text:p>2026-04-21 20:00</text:p>
          </table:table-cell>
          <table:table-cell office:value-type="float" office:value="0.093823065" table:style-name="c1">
            <text:p>0.093823</text:p>
          </table:table-cell>
          <table:table-cell office:value-type="float" office:value="-2.308227208874669" table:style-name="c14">
            <text:p>-2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7:45</text:p>
          </table:table-cell>
          <table:table-cell office:value-type="float" office:value="0.10453224" table:style-name="c1">
            <text:p>0.10453</text:p>
          </table:table-cell>
          <table:table-cell office:value-type="string" table:style-name="c1">
            <text:p>2026-04-30 07:45</text:p>
          </table:table-cell>
          <table:table-cell office:value-type="float" office:value="0.10668663" table:style-name="c1">
            <text:p>0.10669</text:p>
          </table:table-cell>
          <table:table-cell office:value-type="float" office:value="1.8569614758375153" table:style-name="c13">
            <text:p>+1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4 22:30</text:p>
          </table:table-cell>
          <table:table-cell office:value-type="float" office:value="0.110414765" table:style-name="c1">
            <text:p>0.11041</text:p>
          </table:table-cell>
          <table:table-cell office:value-type="float" office:value="0.8968270397276656" table:style-name="c13">
            <text:p>+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1193593999999998" table:style-name="c1">
            <text:p>0.11194</text:p>
          </table:table-cell>
          <table:table-cell office:value-type="string" table:style-name="c1">
            <text:p>2026-05-11 23:00</text:p>
          </table:table-cell>
          <table:table-cell office:value-type="float" office:value="0.11138428" table:style-name="c1">
            <text:p>0.11138</text:p>
          </table:table-cell>
          <table:table-cell office:value-type="float" office:value="-0.6917502776319973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0.11429711999999999" table:style-name="c1">
            <text:p>0.1143</text:p>
          </table:table-cell>
          <table:table-cell office:value-type="string" table:style-name="c1">
            <text:p>2026-05-14 09:45</text:p>
          </table:table-cell>
          <table:table-cell office:value-type="float" office:value="0.113033455" table:style-name="c1">
            <text:p>0.11303</text:p>
          </table:table-cell>
          <table:table-cell office:value-type="float" office:value="-1.3032864489892493" table:style-name="c14">
            <text:p>-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0.10639317" table:style-name="c1">
            <text:p>0.10639</text:p>
          </table:table-cell>
          <table:table-cell office:value-type="string" table:style-name="c1">
            <text:p>2026-05-22 17:30</text:p>
          </table:table-cell>
          <table:table-cell office:value-type="float" office:value="0.106116915" table:style-name="c1">
            <text:p>0.10612</text:p>
          </table:table-cell>
          <table:table-cell office:value-type="float" office:value="-0.459035775590666" table:style-name="c14">
            <text:p>-0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5:00</text:p>
          </table:table-cell>
          <table:table-cell office:value-type="float" office:value="1.5257625" table:style-name="c10">
            <text:p>1.5258</text:p>
          </table:table-cell>
          <table:table-cell office:value-type="string" table:style-name="c10">
            <text:p>2026-03-17 05:00</text:p>
          </table:table-cell>
          <table:table-cell office:value-type="float" office:value="1.5982005000000001" table:style-name="c10">
            <text:p>1.5982</text:p>
          </table:table-cell>
          <table:table-cell office:value-type="float" office:value="4.538268387150701" table:style-name="c12">
            <text:p>+4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45</text:p>
          </table:table-cell>
          <table:table-cell office:value-type="float" office:value="1.3016504999999998" table:style-name="c10">
            <text:p>1.3017</text:p>
          </table:table-cell>
          <table:table-cell office:value-type="string" table:style-name="c10">
            <text:p>2026-04-02 03:00</text:p>
          </table:table-cell>
          <table:table-cell office:value-type="float" office:value="1.2283855000000001" table:style-name="c10">
            <text:p>1.2284</text:p>
          </table:table-cell>
          <table:table-cell office:value-type="float" office:value="-5.817271426892223" table:style-name="c11">
            <text:p>-5.8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1.336668" table:style-name="c10">
            <text:p>1.3367</text:p>
          </table:table-cell>
          <table:table-cell office:value-type="string" table:style-name="c10">
            <text:p>2026-04-10 22:30</text:p>
          </table:table-cell>
          <table:table-cell office:value-type="float" office:value="1.3103445" table:style-name="c10">
            <text:p>1.3103</text:p>
          </table:table-cell>
          <table:table-cell office:value-type="float" office:value="-2.1653004826553746" table:style-name="c11">
            <text:p>-2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1.2946469999999999" table:style-name="c10">
            <text:p>1.2946</text:p>
          </table:table-cell>
          <table:table-cell office:value-type="string" table:style-name="c10">
            <text:p>2026-04-17 13:30</text:p>
          </table:table-cell>
          <table:table-cell office:value-type="float" office:value="1.3353320000000002" table:style-name="c10">
            <text:p>1.3353</text:p>
          </table:table-cell>
          <table:table-cell office:value-type="float" office:value="2.936373492697264" table:style-name="c12">
            <text:p>+2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4-23 04:00</text:p>
          </table:table-cell>
          <table:table-cell office:value-type="float" office:value="1.2543725" table:style-name="c10">
            <text:p>1.2544</text:p>
          </table:table-cell>
          <table:table-cell office:value-type="float" office:value="-5.424082412875187" table:style-name="c11">
            <text:p>-5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1.2536264999999998" table:style-name="c10">
            <text:p>1.2536</text:p>
          </table:table-cell>
          <table:table-cell office:value-type="string" table:style-name="c10">
            <text:p>2026-04-29 16:00</text:p>
          </table:table-cell>
          <table:table-cell office:value-type="float" office:value="1.205397" table:style-name="c10">
            <text:p>1.2054</text:p>
          </table:table-cell>
          <table:table-cell office:value-type="float" office:value="-4.039407957872577" table:style-name="c11">
            <text:p>-4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30</text:p>
          </table:table-cell>
          <table:table-cell office:value-type="float" office:value="1.404702" table:style-name="c10">
            <text:p>1.4047</text:p>
          </table:table-cell>
          <table:table-cell office:value-type="string" table:style-name="c10">
            <text:p>2026-05-11 17:30</text:p>
          </table:table-cell>
          <table:table-cell office:value-type="float" office:value="1.3713140000000001" table:style-name="c10">
            <text:p>1.3713</text:p>
          </table:table-cell>
          <table:table-cell office:value-type="float" office:value="-2.572022869334556" table:style-name="c11">
            <text:p>-2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0:00</text:p>
          </table:table-cell>
          <table:table-cell office:value-type="float" office:value="1.4317155" table:style-name="c10">
            <text:p>1.4317</text:p>
          </table:table-cell>
          <table:table-cell office:value-type="string" table:style-name="c10">
            <text:p>2026-05-13 20:00</text:p>
          </table:table-cell>
          <table:table-cell office:value-type="float" office:value="1.321339" table:style-name="c10">
            <text:p>1.3213</text:p>
          </table:table-cell>
          <table:table-cell office:value-type="float" office:value="-7.893876727673888" table:style-name="c11">
            <text:p>-7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7:00</text:p>
          </table:table-cell>
          <table:table-cell office:value-type="float" office:value="1.3906949999999998" table:style-name="c10">
            <text:p>1.3907</text:p>
          </table:table-cell>
          <table:table-cell office:value-type="string" table:style-name="c10">
            <text:p>2026-05-15 11:00</text:p>
          </table:table-cell>
          <table:table-cell office:value-type="float" office:value="1.3413290000000002" table:style-name="c10">
            <text:p>1.3413</text:p>
          </table:table-cell>
          <table:table-cell office:value-type="float" office:value="-3.742540001294292" table:style-name="c11">
            <text:p>-3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9031632380540722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3:30</text:p>
          </table:table-cell>
          <table:table-cell office:value-type="float" office:value="8.754375" table:style-name="c1">
            <text:p>8.7544</text:p>
          </table:table-cell>
          <table:table-cell office:value-type="string" table:style-name="c1">
            <text:p>2026-03-14 13:00</text:p>
          </table:table-cell>
          <table:table-cell office:value-type="float" office:value="8.23588" table:style-name="c1">
            <text:p>8.2359</text:p>
          </table:table-cell>
          <table:table-cell office:value-type="float" office:value="-6.110756326065536" table:style-name="c14">
            <text:p>-6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3-17 03:45</text:p>
          </table:table-cell>
          <table:table-cell office:value-type="float" office:value="8.865565" table:style-name="c1">
            <text:p>8.8656</text:p>
          </table:table-cell>
          <table:table-cell office:value-type="float" office:value="2.11802569344659" table:style-name="c13">
            <text:p>+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8.704349999999998" table:style-name="c1">
            <text:p>8.7043</text:p>
          </table:table-cell>
          <table:table-cell office:value-type="string" table:style-name="c1">
            <text:p>2026-03-25 20:45</text:p>
          </table:table-cell>
          <table:table-cell office:value-type="float" office:value="8.625685" table:style-name="c1">
            <text:p>8.6257</text:p>
          </table:table-cell>
          <table:table-cell office:value-type="float" office:value="-1.1018369472160172" table:style-name="c14">
            <text:p>-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8.34417" table:style-name="c1">
            <text:p>8.3442</text:p>
          </table:table-cell>
          <table:table-cell office:value-type="string" table:style-name="c1">
            <text:p>2026-04-02 04:00</text:p>
          </table:table-cell>
          <table:table-cell office:value-type="float" office:value="7.936030000000001" table:style-name="c1">
            <text:p>7.936</text:p>
          </table:table-cell>
          <table:table-cell office:value-type="float" office:value="-5.081441581008061" table:style-name="c14">
            <text:p>-5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15</text:p>
          </table:table-cell>
          <table:table-cell office:value-type="float" office:value="8.66433" table:style-name="c1">
            <text:p>8.6643</text:p>
          </table:table-cell>
          <table:table-cell office:value-type="string" table:style-name="c1">
            <text:p>2026-04-05 17:15</text:p>
          </table:table-cell>
          <table:table-cell office:value-type="float" office:value="8.495750000000001" table:style-name="c1">
            <text:p>8.4958</text:p>
          </table:table-cell>
          <table:table-cell office:value-type="float" office:value="-2.14168901980879" table:style-name="c14">
            <text:p>-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17 12:45</text:p>
          </table:table-cell>
          <table:table-cell office:value-type="float" office:value="8.645675" table:style-name="c1">
            <text:p>8.6457</text:p>
          </table:table-cell>
          <table:table-cell office:value-type="float" office:value="0.7486011162059159" table:style-name="c13">
            <text:p>+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5 02:15</text:p>
          </table:table-cell>
          <table:table-cell office:value-type="float" office:value="8.805595" table:style-name="c1">
            <text:p>8.8056</text:p>
          </table:table-cell>
          <table:table-cell office:value-type="float" office:value="2.1348931998535825" table:style-name="c13">
            <text:p>+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6:00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5-07 16:00</text:p>
          </table:table-cell>
          <table:table-cell office:value-type="float" office:value="9.205395000000001" table:style-name="c1">
            <text:p>9.2054</text:p>
          </table:table-cell>
          <table:table-cell office:value-type="float" office:value="-2.8317226001284723" table:style-name="c14">
            <text:p>-2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6:30</text:p>
          </table:table-cell>
          <table:table-cell office:value-type="float" office:value="9.32466" table:style-name="c1">
            <text:p>9.3247</text:p>
          </table:table-cell>
          <table:table-cell office:value-type="string" table:style-name="c1">
            <text:p>2026-05-08 16:30</text:p>
          </table:table-cell>
          <table:table-cell office:value-type="float" office:value="9.735130000000002" table:style-name="c1">
            <text:p>9.7351</text:p>
          </table:table-cell>
          <table:table-cell office:value-type="float" office:value="4.193283992445851" table:style-name="c13">
            <text:p>+4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30</text:p>
          </table:table-cell>
          <table:table-cell office:value-type="float" office:value="2070.144555" table:style-name="c10">
            <text:p>2070.1</text:p>
          </table:table-cell>
          <table:table-cell office:value-type="string" table:style-name="c10">
            <text:p>2026-03-11 15:30</text:p>
          </table:table-cell>
          <table:table-cell office:value-type="float" office:value="2048.1754" table:style-name="c10">
            <text:p>2048.2</text:p>
          </table:table-cell>
          <table:table-cell office:value-type="float" office:value="-1.2590163117666697" table:style-name="c11">
            <text:p>-1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45</text:p>
          </table:table-cell>
          <table:table-cell office:value-type="float" office:value="2127.78336" table:style-name="c10">
            <text:p>2127.8</text:p>
          </table:table-cell>
          <table:table-cell office:value-type="string" table:style-name="c10">
            <text:p>2026-03-14 00:45</text:p>
          </table:table-cell>
          <table:table-cell office:value-type="float" office:value="2082.388285" table:style-name="c10">
            <text:p>2082.4</text:p>
          </table:table-cell>
          <table:table-cell office:value-type="float" office:value="-2.329079647549981" table:style-name="c11">
            <text:p>-2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2173.2760949999997" table:style-name="c10">
            <text:p>2173.3</text:p>
          </table:table-cell>
          <table:table-cell office:value-type="string" table:style-name="c10">
            <text:p>2026-03-16 22:45</text:p>
          </table:table-cell>
          <table:table-cell office:value-type="float" office:value="2364.727045" table:style-name="c10">
            <text:p>2364.7</text:p>
          </table:table-cell>
          <table:table-cell office:value-type="float" office:value="8.591814959297439" table:style-name="c12">
            <text:p>+8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2074.97697" table:style-name="c10">
            <text:p>2075</text:p>
          </table:table-cell>
          <table:table-cell office:value-type="string" table:style-name="c10">
            <text:p>2026-04-01 01:45</text:p>
          </table:table-cell>
          <table:table-cell office:value-type="float" office:value="2095.681635" table:style-name="c10">
            <text:p>2095.7</text:p>
          </table:table-cell>
          <table:table-cell office:value-type="float" office:value="0.795931600707589" table:style-name="c12">
            <text:p>+0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15</text:p>
          </table:table-cell>
          <table:table-cell office:value-type="float" office:value="2098.238595" table:style-name="c10">
            <text:p>2098.2</text:p>
          </table:table-cell>
          <table:table-cell office:value-type="string" table:style-name="c10">
            <text:p>2026-04-06 23:15</text:p>
          </table:table-cell>
          <table:table-cell office:value-type="float" office:value="2097.2608450000002" table:style-name="c10">
            <text:p>2097.3</text:p>
          </table:table-cell>
          <table:table-cell office:value-type="float" office:value="-0.24640545843905848" table:style-name="c11">
            <text:p>-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15</text:p>
          </table:table-cell>
          <table:table-cell office:value-type="float" office:value="2143.37115" table:style-name="c10">
            <text:p>2143.4</text:p>
          </table:table-cell>
          <table:table-cell office:value-type="string" table:style-name="c10">
            <text:p>2026-04-08 21:15</text:p>
          </table:table-cell>
          <table:table-cell office:value-type="float" office:value="2213.4827050000004" table:style-name="c10">
            <text:p>2213.5</text:p>
          </table:table-cell>
          <table:table-cell office:value-type="float" office:value="3.064649026031052" table:style-name="c12">
            <text:p>+3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2214.116505" table:style-name="c10">
            <text:p>2214.1</text:p>
          </table:table-cell>
          <table:table-cell office:value-type="string" table:style-name="c10">
            <text:p>2026-04-10 15:45</text:p>
          </table:table-cell>
          <table:table-cell office:value-type="float" office:value="2231.693595" table:style-name="c10">
            <text:p>2231.7</text:p>
          </table:table-cell>
          <table:table-cell office:value-type="float" office:value="0.5923777937600017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9:45</text:p>
          </table:table-cell>
          <table:table-cell office:value-type="float" office:value="2243.751315" table:style-name="c10">
            <text:p>2243.8</text:p>
          </table:table-cell>
          <table:table-cell office:value-type="string" table:style-name="c10">
            <text:p>2026-04-12 09:45</text:p>
          </table:table-cell>
          <table:table-cell office:value-type="float" office:value="2212.59315" table:style-name="c10">
            <text:p>2212.6</text:p>
          </table:table-cell>
          <table:table-cell office:value-type="float" office:value="-1.585787982339304" table:style-name="c11">
            <text:p>-1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2296.56771" table:style-name="c10">
            <text:p>2296.6</text:p>
          </table:table-cell>
          <table:table-cell office:value-type="string" table:style-name="c10">
            <text:p>2026-04-14 22:15</text:p>
          </table:table-cell>
          <table:table-cell office:value-type="float" office:value="2327.045895" table:style-name="c10">
            <text:p>2327</text:p>
          </table:table-cell>
          <table:table-cell office:value-type="float" office:value="1.1245660270950752" table:style-name="c12">
            <text:p>+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15</text:p>
          </table:table-cell>
          <table:table-cell office:value-type="float" office:value="2408.04342" table:style-name="c10">
            <text:p>2408</text:p>
          </table:table-cell>
          <table:table-cell office:value-type="string" table:style-name="c10">
            <text:p>2026-04-18 13:15</text:p>
          </table:table-cell>
          <table:table-cell office:value-type="float" office:value="2354.4222" table:style-name="c10">
            <text:p>2354.4</text:p>
          </table:table-cell>
          <table:table-cell office:value-type="float" office:value="-2.422203415991575" table:style-name="c11">
            <text:p>-2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2349.07395" table:style-name="c10">
            <text:p>2349.1</text:p>
          </table:table-cell>
          <table:table-cell office:value-type="string" table:style-name="c10">
            <text:p>2026-05-04 22:15</text:p>
          </table:table-cell>
          <table:table-cell office:value-type="float" office:value="2362.808005" table:style-name="c10">
            <text:p>2362.8</text:p>
          </table:table-cell>
          <table:table-cell office:value-type="float" office:value="0.38358953314368005" table:style-name="c12">
            <text:p>+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00</text:p>
          </table:table-cell>
          <table:table-cell office:value-type="float" office:value="2374.96689" table:style-name="c10">
            <text:p>2375</text:p>
          </table:table-cell>
          <table:table-cell office:value-type="string" table:style-name="c10">
            <text:p>2026-05-11 23:00</text:p>
          </table:table-cell>
          <table:table-cell office:value-type="float" office:value="2340.259285" table:style-name="c10">
            <text:p>2340.3</text:p>
          </table:table-cell>
          <table:table-cell office:value-type="float" office:value="-1.6583718904272682" table:style-name="c11">
            <text:p>-1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2122.350645" table:style-name="c10">
            <text:p>2122.4</text:p>
          </table:table-cell>
          <table:table-cell office:value-type="string" table:style-name="c10">
            <text:p>2026-05-26 18:00</text:p>
          </table:table-cell>
          <table:table-cell office:value-type="float" office:value="2069.8045800000004" table:style-name="c10">
            <text:p>2069.8</text:p>
          </table:table-cell>
          <table:table-cell office:value-type="float" office:value="-2.6707935603835886" table:style-name="c11">
            <text:p>-2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30</text:p>
          </table:table-cell>
          <table:table-cell office:value-type="float" office:value="0.8814405" table:style-name="c1">
            <text:p>0.88144</text:p>
          </table:table-cell>
          <table:table-cell office:value-type="string" table:style-name="c1">
            <text:p>2026-03-16 02:30</text:p>
          </table:table-cell>
          <table:table-cell office:value-type="float" office:value="0.8925535000000001" table:style-name="c1">
            <text:p>0.89255</text:p>
          </table:table-cell>
          <table:table-cell office:value-type="float" office:value="1.058356809506722" table:style-name="c13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7 16:3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1.0603755328002507" table:style-name="c13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6:00</text:p>
          </table:table-cell>
          <table:table-cell office:value-type="float" office:value="0.9734864999999999" table:style-name="c1">
            <text:p>0.97349</text:p>
          </table:table-cell>
          <table:table-cell office:value-type="string" table:style-name="c1">
            <text:p>2026-03-22 04:00</text:p>
          </table:table-cell>
          <table:table-cell office:value-type="float" office:value="0.8845575000000001" table:style-name="c1">
            <text:p>0.88456</text:p>
          </table:table-cell>
          <table:table-cell office:value-type="float" office:value="-9.316742496429043" table:style-name="c14">
            <text:p>-9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4 19:00</text:p>
          </table:table-cell>
          <table:table-cell office:value-type="float" office:value="0.9105445000000001" table:style-name="c1">
            <text:p>0.91054</text:p>
          </table:table-cell>
          <table:table-cell office:value-type="float" office:value="-2.336539091260814" table:style-name="c14">
            <text:p>-2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32466" table:style-name="c1">
            <text:p>0.93247</text:p>
          </table:table-cell>
          <table:table-cell office:value-type="string" table:style-name="c1">
            <text:p>2026-03-25 20:30</text:p>
          </table:table-cell>
          <table:table-cell office:value-type="float" office:value="0.9285355000000001" table:style-name="c1">
            <text:p>0.92854</text:p>
          </table:table-cell>
          <table:table-cell office:value-type="float" office:value="-0.6205740975542273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0.8414204999999999" table:style-name="c1">
            <text:p>0.84142</text:p>
          </table:table-cell>
          <table:table-cell office:value-type="string" table:style-name="c1">
            <text:p>2026-04-05 07:00</text:p>
          </table:table-cell>
          <table:table-cell office:value-type="float" office:value="0.8205895" table:style-name="c1">
            <text:p>0.82059</text:p>
          </table:table-cell>
          <table:table-cell office:value-type="float" office:value="-2.6706454632968946" table:style-name="c14">
            <text:p>-2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872436" table:style-name="c1">
            <text:p>0.87244</text:p>
          </table:table-cell>
          <table:table-cell office:value-type="string" table:style-name="c1">
            <text:p>2026-04-07 09:30</text:p>
          </table:table-cell>
          <table:table-cell office:value-type="float" office:value="0.8685655" table:style-name="c1">
            <text:p>0.86857</text:p>
          </table:table-cell>
          <table:table-cell office:value-type="float" office:value="-0.6426560153982797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30</text:p>
          </table:table-cell>
          <table:table-cell office:value-type="float" office:value="0.9034515" table:style-name="c1">
            <text:p>0.90345</text:p>
          </table:table-cell>
          <table:table-cell office:value-type="string" table:style-name="c1">
            <text:p>2026-04-08 22:30</text:p>
          </table:table-cell>
          <table:table-cell office:value-type="float" office:value="0.8905545" table:style-name="c1">
            <text:p>0.89055</text:p>
          </table:table-cell>
          <table:table-cell office:value-type="float" office:value="-1.6245718165833867" table:style-name="c14">
            <text:p>-1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4:45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4-17 04:45</text:p>
          </table:table-cell>
          <table:table-cell office:value-type="float" office:value="0.977511" table:style-name="c1">
            <text:p>0.97751</text:p>
          </table:table-cell>
          <table:table-cell office:value-type="float" office:value="0.6263592157481623" table:style-name="c13">
            <text:p>+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8 07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-1.1987515755649158" table:style-name="c14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4-23 05:00</text:p>
          </table:table-cell>
          <table:table-cell office:value-type="float" office:value="0.9185405000000001" table:style-name="c1">
            <text:p>0.91854</text:p>
          </table:table-cell>
          <table:table-cell office:value-type="float" office:value="-4.756110765770938" table:style-name="c14">
            <text:p>-4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9 20:00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5.774220645485051" table:style-name="c14">
            <text:p>-5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5 02:00</text:p>
          </table:table-cell>
          <table:table-cell office:value-type="float" office:value="0.9385305" table:style-name="c1">
            <text:p>0.93853</text:p>
          </table:table-cell>
          <table:table-cell office:value-type="float" office:value="-1.2461725328790973" table:style-name="c14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1:00</text:p>
          </table:table-cell>
          <table:table-cell office:value-type="float" office:value="0.9894944999999999" table:style-name="c1">
            <text:p>0.98949</text:p>
          </table:table-cell>
          <table:table-cell office:value-type="string" table:style-name="c1">
            <text:p>2026-05-06 21:00</text:p>
          </table:table-cell>
          <table:table-cell office:value-type="float" office:value="1.0754620000000001" table:style-name="c1">
            <text:p>1.0755</text:p>
          </table:table-cell>
          <table:table-cell office:value-type="float" office:value="8.470754659273005" table:style-name="c13">
            <text:p>+8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1.108554" table:style-name="c1">
            <text:p>1.1086</text:p>
          </table:table-cell>
          <table:table-cell office:value-type="string" table:style-name="c1">
            <text:p>2026-05-08 07:00</text:p>
          </table:table-cell>
          <table:table-cell office:value-type="float" office:value="1.105447" table:style-name="c1">
            <text:p>1.1054</text:p>
          </table:table-cell>
          <table:table-cell office:value-type="float" office:value="-0.4796147551675456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1935965" table:style-name="c1">
            <text:p>1.1936</text:p>
          </table:table-cell>
          <table:table-cell office:value-type="string" table:style-name="c1">
            <text:p>2026-05-09 15:45</text:p>
          </table:table-cell>
          <table:table-cell office:value-type="float" office:value="1.2083955000000002" table:style-name="c1">
            <text:p>1.2084</text:p>
          </table:table-cell>
          <table:table-cell office:value-type="float" office:value="1.0374877435967766" table:style-name="c13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00</text:p>
          </table:table-cell>
          <table:table-cell office:value-type="float" office:value="1.036518" table:style-name="c1">
            <text:p>1.0365</text:p>
          </table:table-cell>
          <table:table-cell office:value-type="string" table:style-name="c1">
            <text:p>2026-05-27 14:00</text:p>
          </table:table-cell>
          <table:table-cell office:value-type="float" office:value="1.0724635" table:style-name="c1">
            <text:p>1.0725</text:p>
          </table:table-cell>
          <table:table-cell office:value-type="float" office:value="3.261076552795039" table:style-name="c13">
            <text:p>+3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0.09878936999999999" table:style-name="c10">
            <text:p>0.098789</text:p>
          </table:table-cell>
          <table:table-cell office:value-type="string" table:style-name="c10">
            <text:p>2026-03-11 06:00</text:p>
          </table:table-cell>
          <table:table-cell office:value-type="float" office:value="0.09407294" table:style-name="c10">
            <text:p>0.094073</text:p>
          </table:table-cell>
          <table:table-cell office:value-type="float" office:value="-4.964584557083396" table:style-name="c11">
            <text:p>-5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0.093716835" table:style-name="c10">
            <text:p>0.093717</text:p>
          </table:table-cell>
          <table:table-cell office:value-type="string" table:style-name="c10">
            <text:p>2026-03-25 20:30</text:p>
          </table:table-cell>
          <table:table-cell office:value-type="float" office:value="0.09405295000000001" table:style-name="c10">
            <text:p>0.094053</text:p>
          </table:table-cell>
          <table:table-cell office:value-type="float" office:value="0.1580326020933276" table:style-name="c12">
            <text:p>+0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4:00</text:p>
          </table:table-cell>
          <table:table-cell office:value-type="float" office:value="0.089754855" table:style-name="c10">
            <text:p>0.089755</text:p>
          </table:table-cell>
          <table:table-cell office:value-type="string" table:style-name="c10">
            <text:p>2026-04-09 12:00</text:p>
          </table:table-cell>
          <table:table-cell office:value-type="float" office:value="0.08807594" table:style-name="c10">
            <text:p>0.088076</text:p>
          </table:table-cell>
          <table:table-cell office:value-type="float" office:value="-2.0667169525926954" table:style-name="c11">
            <text:p>-2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087573765" table:style-name="c10">
            <text:p>0.087574</text:p>
          </table:table-cell>
          <table:table-cell office:value-type="string" table:style-name="c10">
            <text:p>2026-04-14 20:00</text:p>
          </table:table-cell>
          <table:table-cell office:value-type="float" office:value="0.084987485" table:style-name="c10">
            <text:p>0.084987</text:p>
          </table:table-cell>
          <table:table-cell office:value-type="float" office:value="-3.1472553252849145" table:style-name="c11">
            <text:p>-3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45</text:p>
          </table:table-cell>
          <table:table-cell office:value-type="float" office:value="0.09098546999999998" table:style-name="c10">
            <text:p>0.090985</text:p>
          </table:table-cell>
          <table:table-cell office:value-type="string" table:style-name="c10">
            <text:p>2026-04-18 07:45</text:p>
          </table:table-cell>
          <table:table-cell office:value-type="float" office:value="0.090184885" table:style-name="c10">
            <text:p>0.090185</text:p>
          </table:table-cell>
          <table:table-cell office:value-type="float" office:value="-1.0780453023048198" table:style-name="c11">
            <text:p>-1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0.09300648" table:style-name="c10">
            <text:p>0.093006</text:p>
          </table:table-cell>
          <table:table-cell office:value-type="string" table:style-name="c10">
            <text:p>2026-04-23 15:45</text:p>
          </table:table-cell>
          <table:table-cell office:value-type="float" office:value="0.09087454" table:style-name="c10">
            <text:p>0.090875</text:p>
          </table:table-cell>
          <table:table-cell office:value-type="float" office:value="-2.4875666786443262" table:style-name="c11">
            <text:p>-2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4:30</text:p>
          </table:table-cell>
          <table:table-cell office:value-type="float" office:value="0.091455705" table:style-name="c10">
            <text:p>0.091456</text:p>
          </table:table-cell>
          <table:table-cell office:value-type="string" table:style-name="c10">
            <text:p>2026-05-09 14:30</text:p>
          </table:table-cell>
          <table:table-cell office:value-type="float" office:value="0.09204395500000001" table:style-name="c10">
            <text:p>0.092044</text:p>
          </table:table-cell>
          <table:table-cell office:value-type="float" office:value="0.44202177869057113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06:15</text:p>
          </table:table-cell>
          <table:table-cell office:value-type="float" office:value="0.096278115" table:style-name="c10">
            <text:p>0.096278</text:p>
          </table:table-cell>
          <table:table-cell office:value-type="string" table:style-name="c10">
            <text:p>2026-05-12 15:00</text:p>
          </table:table-cell>
          <table:table-cell office:value-type="float" office:value="0.09319338" table:style-name="c10">
            <text:p>0.093193</text:p>
          </table:table-cell>
          <table:table-cell office:value-type="float" office:value="-3.397478821246136" table:style-name="c11">
            <text:p>-3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23:15</text:p>
          </table:table-cell>
          <table:table-cell office:value-type="float" office:value="0.09216606" table:style-name="c10">
            <text:p>0.092166</text:p>
          </table:table-cell>
          <table:table-cell office:value-type="string" table:style-name="c10">
            <text:p>2026-05-29 23:15</text:p>
          </table:table-cell>
          <table:table-cell office:value-type="float" office:value="0.09625185" table:style-name="c10">
            <text:p>0.096252</text:p>
          </table:table-cell>
          <table:table-cell office:value-type="float" office:value="4.224312671985753" table:style-name="c12">
            <text:p>+4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23:30</text:p>
          </table:table-cell>
          <table:table-cell office:value-type="float" office:value="0.09730863" table:style-name="c10">
            <text:p>0.097309</text:p>
          </table:table-cell>
          <table:table-cell office:value-type="string" table:style-name="c10">
            <text:p>2026-05-30 23:30</text:p>
          </table:table-cell>
          <table:table-cell office:value-type="float" office:value="0.09499248" table:style-name="c10">
            <text:p>0.094992</text:p>
          </table:table-cell>
          <table:table-cell office:value-type="float" office:value="-2.57535222468962" table:style-name="c11">
            <text:p>-2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11:45</text:p>
          </table:table-cell>
          <table:table-cell office:value-type="float" office:value="0.098879415" table:style-name="c10">
            <text:p>0.098879</text:p>
          </table:table-cell>
          <table:table-cell office:value-type="string" table:style-name="c10">
            <text:p>2026-06-01 11:45</text:p>
          </table:table-cell>
          <table:table-cell office:value-type="float" office:value="0.09425285" table:style-name="c10">
            <text:p>0.094253</text:p>
          </table:table-cell>
          <table:table-cell office:value-type="float" office:value="-4.869543824819367" table:style-name="c11">
            <text:p>-4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1 15:00</text:p>
          </table:table-cell>
          <table:table-cell office:value-type="float" office:value="2.9895045000000002" table:style-name="c1">
            <text:p>2.9895</text:p>
          </table:table-cell>
          <table:table-cell office:value-type="float" office:value="-1.4202491975665033" table:style-name="c14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3.0505245" table:style-name="c1">
            <text:p>3.0505</text:p>
          </table:table-cell>
          <table:table-cell office:value-type="string" table:style-name="c1">
            <text:p>2026-03-25 20:45</text:p>
          </table:table-cell>
          <table:table-cell office:value-type="float" office:value="3.068465" table:style-name="c1">
            <text:p>3.0685</text:p>
          </table:table-cell>
          <table:table-cell office:value-type="float" office:value="0.3870363429305357" table:style-name="c13">
            <text:p>+0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7 02:15</text:p>
          </table:table-cell>
          <table:table-cell office:value-type="float" office:value="2.8195895" table:style-name="c1">
            <text:p>2.8196</text:p>
          </table:table-cell>
          <table:table-cell office:value-type="float" office:value="-2.308201904969709" table:style-name="c14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30</text:p>
          </table:table-cell>
          <table:table-cell office:value-type="float" office:value="2.8684334999999996" table:style-name="c1">
            <text:p>2.8684</text:p>
          </table:table-cell>
          <table:table-cell office:value-type="string" table:style-name="c1">
            <text:p>2026-04-07 17:00</text:p>
          </table:table-cell>
          <table:table-cell office:value-type="float" office:value="2.806596" table:style-name="c1">
            <text:p>2.8066</text:p>
          </table:table-cell>
          <table:table-cell office:value-type="float" office:value="-2.3513839663356184" table:style-name="c14">
            <text:p>-2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10 06:15</text:p>
          </table:table-cell>
          <table:table-cell office:value-type="float" office:value="2.9955015" table:style-name="c1">
            <text:p>2.9955</text:p>
          </table:table-cell>
          <table:table-cell office:value-type="float" office:value="2.7163796067418478" table:style-name="c13">
            <text:p>+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6:30</text:p>
          </table:table-cell>
          <table:table-cell office:value-type="float" office:value="3.1405695" table:style-name="c1">
            <text:p>3.1406</text:p>
          </table:table-cell>
          <table:table-cell office:value-type="string" table:style-name="c1">
            <text:p>2026-04-16 16:30</text:p>
          </table:table-cell>
          <table:table-cell office:value-type="float" office:value="3.346326" table:style-name="c1">
            <text:p>3.3463</text:p>
          </table:table-cell>
          <table:table-cell office:value-type="float" office:value="6.338569941725547" table:style-name="c13">
            <text:p>+6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15</text:p>
          </table:table-cell>
          <table:table-cell office:value-type="float" office:value="3.3246615" table:style-name="c1">
            <text:p>3.3247</text:p>
          </table:table-cell>
          <table:table-cell office:value-type="string" table:style-name="c1">
            <text:p>2026-04-24 20:15</text:p>
          </table:table-cell>
          <table:table-cell office:value-type="float" office:value="3.4442770000000005" table:style-name="c1">
            <text:p>3.4443</text:p>
          </table:table-cell>
          <table:table-cell office:value-type="float" office:value="3.390732869406432" table:style-name="c13">
            <text:p>+3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4-27 05:30</text:p>
          </table:table-cell>
          <table:table-cell office:value-type="float" office:value="3.802098" table:style-name="c1">
            <text:p>3.8021</text:p>
          </table:table-cell>
          <table:table-cell office:value-type="float" office:value="3.9638515747060676" table:style-name="c13">
            <text:p>+4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30</text:p>
          </table:table-cell>
          <table:table-cell office:value-type="float" office:value="3.6638309999999996" table:style-name="c1">
            <text:p>3.6638</text:p>
          </table:table-cell>
          <table:table-cell office:value-type="string" table:style-name="c1">
            <text:p>2026-05-02 13:30</text:p>
          </table:table-cell>
          <table:table-cell office:value-type="float" office:value="3.764117" table:style-name="c1">
            <text:p>3.7641</text:p>
          </table:table-cell>
          <table:table-cell office:value-type="float" office:value="2.5318179282013853" table:style-name="c13">
            <text:p>+2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7 03:00</text:p>
          </table:table-cell>
          <table:table-cell office:value-type="float" office:value="3.8170905" table:style-name="c1">
            <text:p>3.8171</text:p>
          </table:table-cell>
          <table:table-cell office:value-type="float" office:value="-1.6643502605489635" table:style-name="c14">
            <text:p>-1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3:30</text:p>
          </table:table-cell>
          <table:table-cell office:value-type="float" office:value="3.8769375" table:style-name="c1">
            <text:p>3.8769</text:p>
          </table:table-cell>
          <table:table-cell office:value-type="string" table:style-name="c1">
            <text:p>2026-05-09 03:30</text:p>
          </table:table-cell>
          <table:table-cell office:value-type="float" office:value="4.353822" table:style-name="c1">
            <text:p>4.3538</text:p>
          </table:table-cell>
          <table:table-cell office:value-type="float" office:value="12.076057708487674" table:style-name="c13">
            <text:p>+12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45</text:p>
          </table:table-cell>
          <table:table-cell office:value-type="float" office:value="4.4722349999999995" table:style-name="c1">
            <text:p>4.4722</text:p>
          </table:table-cell>
          <table:table-cell office:value-type="string" table:style-name="c1">
            <text:p>2026-05-12 11:45</text:p>
          </table:table-cell>
          <table:table-cell office:value-type="float" office:value="4.853572" table:style-name="c1">
            <text:p>4.8536</text:p>
          </table:table-cell>
          <table:table-cell office:value-type="float" office:value="8.309820695289915" table:style-name="c13">
            <text:p>+8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3 17:45</text:p>
          </table:table-cell>
          <table:table-cell office:value-type="float" office:value="5.2703635" table:style-name="c1">
            <text:p>5.2704</text:p>
          </table:table-cell>
          <table:table-cell office:value-type="float" office:value="8.373519761733238" table:style-name="c13">
            <text:p>+8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5 05:00</text:p>
          </table:table-cell>
          <table:table-cell office:value-type="float" office:value="5.085456000000001" table:style-name="c1">
            <text:p>5.0855</text:p>
          </table:table-cell>
          <table:table-cell office:value-type="float" office:value="-3.6696962294393787" table:style-name="c14">
            <text:p>-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30</text:p>
          </table:table-cell>
          <table:table-cell office:value-type="float" office:value="5.3216595" table:style-name="c1">
            <text:p>5.3217</text:p>
          </table:table-cell>
          <table:table-cell office:value-type="string" table:style-name="c1">
            <text:p>2026-05-20 00:30</text:p>
          </table:table-cell>
          <table:table-cell office:value-type="float" office:value="4.9485244999999995" table:style-name="c1">
            <text:p>4.9485</text:p>
          </table:table-cell>
          <table:table-cell office:value-type="float" office:value="-7.19751236386883" table:style-name="c14">
            <text:p>-7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3:45</text:p>
          </table:table-cell>
          <table:table-cell office:value-type="float" office:value="4.917457499999999" table:style-name="c1">
            <text:p>4.9175</text:p>
          </table:table-cell>
          <table:table-cell office:value-type="string" table:style-name="c1">
            <text:p>2026-05-22 03:45</text:p>
          </table:table-cell>
          <table:table-cell office:value-type="float" office:value="5.1324325" table:style-name="c1">
            <text:p>5.1324</text:p>
          </table:table-cell>
          <table:table-cell office:value-type="float" office:value="4.1630307416485435" table:style-name="c13">
            <text:p>+4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1:00</text:p>
          </table:table-cell>
          <table:table-cell office:value-type="float" office:value="5.4877425" table:style-name="c1">
            <text:p>5.4877</text:p>
          </table:table-cell>
          <table:table-cell office:value-type="string" table:style-name="c1">
            <text:p>2026-05-24 21:00</text:p>
          </table:table-cell>
          <table:table-cell office:value-type="float" office:value="5.1504235" table:style-name="c1">
            <text:p>5.1504</text:p>
          </table:table-cell>
          <table:table-cell office:value-type="float" office:value="-6.334384249561664" table:style-name="c14">
            <text:p>-6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45</text:p>
          </table:table-cell>
          <table:table-cell office:value-type="float" office:value="5.328663" table:style-name="c1">
            <text:p>5.3287</text:p>
          </table:table-cell>
          <table:table-cell office:value-type="string" table:style-name="c1">
            <text:p>2026-05-26 10:45</text:p>
          </table:table-cell>
          <table:table-cell office:value-type="float" office:value="5.6261855" table:style-name="c1">
            <text:p>5.6262</text:p>
          </table:table-cell>
          <table:table-cell office:value-type="float" office:value="5.372374931300783" table:style-name="c13">
            <text:p>+5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30 06:30</text:p>
          </table:table-cell>
          <table:table-cell office:value-type="float" office:value="7.01649" table:style-name="c1">
            <text:p>7.0165</text:p>
          </table:table-cell>
          <table:table-cell office:value-type="float" office:value="15.038865125129753" table:style-name="c13">
            <text:p>+15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6:00</text:p>
          </table:table-cell>
          <table:table-cell office:value-type="float" office:value="6.655326" table:style-name="c1">
            <text:p>6.6553</text:p>
          </table:table-cell>
          <table:table-cell office:value-type="string" table:style-name="c1">
            <text:p>2026-06-01 06:00</text:p>
          </table:table-cell>
          <table:table-cell office:value-type="float" office:value="6.578709" table:style-name="c1">
            <text:p>6.5787</text:p>
          </table:table-cell>
          <table:table-cell office:value-type="float" office:value="-1.3488120535492865" table:style-name="c14">
            <text:p>-1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9:45</text:p>
          </table:table-cell>
          <table:table-cell office:value-type="float" office:value="7.2766364999999995" table:style-name="c1">
            <text:p>7.2766</text:p>
          </table:table-cell>
          <table:table-cell office:value-type="string" table:style-name="c1">
            <text:p>2026-06-02 14:00</text:p>
          </table:table-cell>
          <table:table-cell office:value-type="float" office:value="7.1474245000000005" table:style-name="c1">
            <text:p>7.1474</text:p>
          </table:table-cell>
          <table:table-cell office:value-type="float" office:value="-1.972060876965609" table:style-name="c14">
            <text:p>-2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30</text:p>
          </table:table-cell>
          <table:table-cell office:value-type="float" office:value="9.514755" table:style-name="c10">
            <text:p>9.5148</text:p>
          </table:table-cell>
          <table:table-cell office:value-type="string" table:style-name="c10">
            <text:p>2026-03-14 09:00</text:p>
          </table:table-cell>
          <table:table-cell office:value-type="float" office:value="8.965515000000002" table:style-name="c10">
            <text:p>8.9655</text:p>
          </table:table-cell>
          <table:table-cell office:value-type="float" office:value="-5.96086882410527" table:style-name="c11">
            <text:p>-6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9.434714999999999" table:style-name="c10">
            <text:p>9.4347</text:p>
          </table:table-cell>
          <table:table-cell office:value-type="string" table:style-name="c10">
            <text:p>2026-03-16 22:45</text:p>
          </table:table-cell>
          <table:table-cell office:value-type="float" office:value="10.004995000000001" table:style-name="c10">
            <text:p>10.005</text:p>
          </table:table-cell>
          <table:table-cell office:value-type="float" office:value="5.83250278354992" table:style-name="c12">
            <text:p>+5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45</text:p>
          </table:table-cell>
          <table:table-cell office:value-type="float" office:value="9.094545" table:style-name="c10">
            <text:p>9.0945</text:p>
          </table:table-cell>
          <table:table-cell office:value-type="string" table:style-name="c10">
            <text:p>2026-04-02 06:45</text:p>
          </table:table-cell>
          <table:table-cell office:value-type="float" office:value="8.53573" table:style-name="c10">
            <text:p>8.5357</text:p>
          </table:table-cell>
          <table:table-cell office:value-type="float" office:value="-6.332124633722747" table:style-name="c11">
            <text:p>-6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3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07 09:30</text:p>
          </table:table-cell>
          <table:table-cell office:value-type="float" office:value="8.85557" table:style-name="c10">
            <text:p>8.8556</text:p>
          </table:table-cell>
          <table:table-cell office:value-type="float" office:value="-2.929109999176216" table:style-name="c11">
            <text:p>-2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4-08 23:00</text:p>
          </table:table-cell>
          <table:table-cell office:value-type="float" office:value="8.925535" table:style-name="c10">
            <text:p>8.9255</text:p>
          </table:table-cell>
          <table:table-cell office:value-type="float" office:value="-3.225638750896276" table:style-name="c11">
            <text:p>-3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9.264629999999999" table:style-name="c10">
            <text:p>9.2646</text:p>
          </table:table-cell>
          <table:table-cell office:value-type="string" table:style-name="c10">
            <text:p>2026-04-14 22:30</text:p>
          </table:table-cell>
          <table:table-cell office:value-type="float" office:value="8.985505" table:style-name="c10">
            <text:p>8.9855</text:p>
          </table:table-cell>
          <table:table-cell office:value-type="float" office:value="-3.206679861958861" table:style-name="c11">
            <text:p>-3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9.464730000000001" table:style-name="c10">
            <text:p>9.4647</text:p>
          </table:table-cell>
          <table:table-cell office:value-type="string" table:style-name="c10">
            <text:p>2026-04-17 16:00</text:p>
          </table:table-cell>
          <table:table-cell office:value-type="float" office:value="9.75512" table:style-name="c10">
            <text:p>9.7551</text:p>
          </table:table-cell>
          <table:table-cell office:value-type="float" office:value="2.8620944825684225" table:style-name="c12">
            <text:p>+2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9.194595" table:style-name="c10">
            <text:p>9.1946</text:p>
          </table:table-cell>
          <table:table-cell office:value-type="string" table:style-name="c10">
            <text:p>2026-05-04 22:15</text:p>
          </table:table-cell>
          <table:table-cell office:value-type="float" office:value="9.3953" table:style-name="c10">
            <text:p>9.3953</text:p>
          </table:table-cell>
          <table:table-cell office:value-type="float" office:value="1.9785949821607307" table:style-name="c12">
            <text:p>+2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10.26513" table:style-name="c10">
            <text:p>10.265</text:p>
          </table:table-cell>
          <table:table-cell office:value-type="string" table:style-name="c10">
            <text:p>2026-05-09 17:45</text:p>
          </table:table-cell>
          <table:table-cell office:value-type="float" office:value="10.404795" table:style-name="c10">
            <text:p>10.405</text:p>
          </table:table-cell>
          <table:table-cell office:value-type="float" office:value="1.1579572279649675" table:style-name="c12">
            <text:p>+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9.8079015" table:style-name="c10">
            <text:p>9.8079</text:p>
          </table:table-cell>
          <table:table-cell office:value-type="string" table:style-name="c10">
            <text:p>2026-05-22 17:30</text:p>
          </table:table-cell>
          <table:table-cell office:value-type="float" office:value="9.832081500000001" table:style-name="c10">
            <text:p>9.8321</text:p>
          </table:table-cell>
          <table:table-cell office:value-type="float" office:value="0.0461430927043871" table:style-name="c12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55.04751" table:style-name="c1">
            <text:p>55.048</text:p>
          </table:table-cell>
          <table:table-cell office:value-type="string" table:style-name="c1">
            <text:p>2026-04-08 23:00</text:p>
          </table:table-cell>
          <table:table-cell office:value-type="float" office:value="54.042965" table:style-name="c1">
            <text:p>54.043</text:p>
          </table:table-cell>
          <table:table-cell office:value-type="float" office:value="-2.0211211861081435" table:style-name="c14">
            <text:p>-2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55.897935" table:style-name="c1">
            <text:p>55.898</text:p>
          </table:table-cell>
          <table:table-cell office:value-type="string" table:style-name="c1">
            <text:p>2026-04-17 16:00</text:p>
          </table:table-cell>
          <table:table-cell office:value-type="float" office:value="56.521725" table:style-name="c1">
            <text:p>56.522</text:p>
          </table:table-cell>
          <table:table-cell office:value-type="float" office:value="0.9138138496976866" table:style-name="c13">
            <text:p>+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23:00</text:p>
          </table:table-cell>
          <table:table-cell office:value-type="float" office:value="55.24236500000001" table:style-name="c1">
            <text:p>55.242</text:p>
          </table:table-cell>
          <table:table-cell office:value-type="float" office:value="-3.8150055494769575" table:style-name="c14">
            <text:p>-3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55.957964999999994" table:style-name="c1">
            <text:p>55.958</text:p>
          </table:table-cell>
          <table:table-cell office:value-type="string" table:style-name="c1">
            <text:p>2026-05-05 00:00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-2.0287641044129945" table:style-name="c14">
            <text:p>-2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59.989979999999996" table:style-name="c1">
            <text:p>59.99</text:p>
          </table:table-cell>
          <table:table-cell office:value-type="string" table:style-name="c1">
            <text:p>2026-05-11 23:00</text:p>
          </table:table-cell>
          <table:table-cell office:value-type="float" office:value="58.580695000000006" table:style-name="c1">
            <text:p>58.581</text:p>
          </table:table-cell>
          <table:table-cell office:value-type="float" office:value="-2.544404597742811" table:style-name="c14">
            <text:p>-2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1.382691" table:style-name="c10">
            <text:p>1.3827</text:p>
          </table:table-cell>
          <table:table-cell office:value-type="string" table:style-name="c10">
            <text:p>2026-03-14 00:30</text:p>
          </table:table-cell>
          <table:table-cell office:value-type="float" office:value="1.3293350000000002" table:style-name="c10">
            <text:p>1.3293</text:p>
          </table:table-cell>
          <table:table-cell office:value-type="float" office:value="-4.051038204848356" table:style-name="c11">
            <text:p>-4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1.3966979999999998" table:style-name="c10">
            <text:p>1.3967</text:p>
          </table:table-cell>
          <table:table-cell office:value-type="string" table:style-name="c10">
            <text:p>2026-03-17 03:45</text:p>
          </table:table-cell>
          <table:table-cell office:value-type="float" office:value="1.4502745000000001" table:style-name="c10">
            <text:p>1.4503</text:p>
          </table:table-cell>
          <table:table-cell office:value-type="float" office:value="3.6283721516391143" table:style-name="c12">
            <text:p>+3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8:15</text:p>
          </table:table-cell>
          <table:table-cell office:value-type="float" office:value="1.4737365" table:style-name="c10">
            <text:p>1.4737</text:p>
          </table:table-cell>
          <table:table-cell office:value-type="string" table:style-name="c10">
            <text:p>2026-03-18 08:15</text:p>
          </table:table-cell>
          <table:table-cell office:value-type="float" office:value="1.4422785000000002" table:style-name="c10">
            <text:p>1.4423</text:p>
          </table:table-cell>
          <table:table-cell office:value-type="float" office:value="-2.330207246783922" table:style-name="c11">
            <text:p>-2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45</text:p>
          </table:table-cell>
          <table:table-cell office:value-type="float" office:value="1.2196095" table:style-name="c10">
            <text:p>1.2196</text:p>
          </table:table-cell>
          <table:table-cell office:value-type="string" table:style-name="c10">
            <text:p>2026-03-30 21:00</text:p>
          </table:table-cell>
          <table:table-cell office:value-type="float" office:value="1.155422" table:style-name="c10">
            <text:p>1.1554</text:p>
          </table:table-cell>
          <table:table-cell office:value-type="float" office:value="-5.45233442163251" table:style-name="c11">
            <text:p>-5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1.2276135" table:style-name="c10">
            <text:p>1.2276</text:p>
          </table:table-cell>
          <table:table-cell office:value-type="string" table:style-name="c10">
            <text:p>2026-04-02 05:00</text:p>
          </table:table-cell>
          <table:table-cell office:value-type="float" office:value="1.153423" table:style-name="c10">
            <text:p>1.1534</text:p>
          </table:table-cell>
          <table:table-cell office:value-type="float" office:value="-6.231292876544603" table:style-name="c11">
            <text:p>-6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30</text:p>
          </table:table-cell>
          <table:table-cell office:value-type="float" office:value="1.2636314999999998" table:style-name="c10">
            <text:p>1.2636</text:p>
          </table:table-cell>
          <table:table-cell office:value-type="string" table:style-name="c10">
            <text:p>2026-04-05 15:30</text:p>
          </table:table-cell>
          <table:table-cell office:value-type="float" office:value="1.2563715" table:style-name="c10">
            <text:p>1.2564</text:p>
          </table:table-cell>
          <table:table-cell office:value-type="float" office:value="-0.7732860908025718" table:style-name="c11">
            <text:p>-0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30</text:p>
          </table:table-cell>
          <table:table-cell office:value-type="float" office:value="1.2436215" table:style-name="c10">
            <text:p>1.2436</text:p>
          </table:table-cell>
          <table:table-cell office:value-type="string" table:style-name="c10">
            <text:p>2026-04-06 23:30</text:p>
          </table:table-cell>
          <table:table-cell office:value-type="float" office:value="1.241379" table:style-name="c10">
            <text:p>1.2414</text:p>
          </table:table-cell>
          <table:table-cell office:value-type="float" office:value="-0.3798596776430574" table:style-name="c11">
            <text:p>-0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45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4-08 22:45</text:p>
          </table:table-cell>
          <table:table-cell office:value-type="float" office:value="1.3363315" table:style-name="c10">
            <text:p>1.3363</text:p>
          </table:table-cell>
          <table:table-cell office:value-type="float" office:value="1.1376082316580716" table:style-name="c12">
            <text:p>+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1.3866929999999997" table:style-name="c10">
            <text:p>1.3867</text:p>
          </table:table-cell>
          <table:table-cell office:value-type="string" table:style-name="c10">
            <text:p>2026-04-10 15:45</text:p>
          </table:table-cell>
          <table:table-cell office:value-type="float" office:value="1.3703145" table:style-name="c10">
            <text:p>1.3703</text:p>
          </table:table-cell>
          <table:table-cell office:value-type="float" office:value="-1.3786583393368024" table:style-name="c11">
            <text:p>-1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15</text:p>
          </table:table-cell>
          <table:table-cell office:value-type="float" office:value="1.3866929999999997" table:style-name="c10">
            <text:p>1.3867</text:p>
          </table:table-cell>
          <table:table-cell office:value-type="string" table:style-name="c10">
            <text:p>2026-04-12 10:00</text:p>
          </table:table-cell>
          <table:table-cell office:value-type="float" office:value="1.327336" table:style-name="c10">
            <text:p>1.3273</text:p>
          </table:table-cell>
          <table:table-cell office:value-type="float" office:value="-4.471814934091379" table:style-name="c11">
            <text:p>-4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3:45</text:p>
          </table:table-cell>
          <table:table-cell office:value-type="float" office:value="1.4227109999999998" table:style-name="c10">
            <text:p>1.4227</text:p>
          </table:table-cell>
          <table:table-cell office:value-type="string" table:style-name="c10">
            <text:p>2026-04-18 13:00</text:p>
          </table:table-cell>
          <table:table-cell office:value-type="float" office:value="1.3843075" table:style-name="c10">
            <text:p>1.3843</text:p>
          </table:table-cell>
          <table:table-cell office:value-type="float" office:value="-2.893822476420016" table:style-name="c11">
            <text:p>-2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15</text:p>
          </table:table-cell>
          <table:table-cell office:value-type="float" office:value="1.3816905" table:style-name="c10">
            <text:p>1.3817</text:p>
          </table:table-cell>
          <table:table-cell office:value-type="string" table:style-name="c10">
            <text:p>2026-05-07 08:15</text:p>
          </table:table-cell>
          <table:table-cell office:value-type="float" office:value="1.497251" table:style-name="c10">
            <text:p>1.4973</text:p>
          </table:table-cell>
          <table:table-cell office:value-type="float" office:value="8.14708469451013" table:style-name="c12">
            <text:p>+8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00</text:p>
          </table:table-cell>
          <table:table-cell office:value-type="float" office:value="1.5357674999999997" table:style-name="c10">
            <text:p>1.5358</text:p>
          </table:table-cell>
          <table:table-cell office:value-type="string" table:style-name="c10">
            <text:p>2026-05-09 08:00</text:p>
          </table:table-cell>
          <table:table-cell office:value-type="float" office:value="1.5732130000000002" table:style-name="c10">
            <text:p>1.5732</text:p>
          </table:table-cell>
          <table:table-cell office:value-type="float" office:value="2.233453124447582" table:style-name="c12">
            <text:p>+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45</text:p>
          </table:table-cell>
          <table:table-cell office:value-type="float" office:value="1.552776" table:style-name="c10">
            <text:p>1.5528</text:p>
          </table:table-cell>
          <table:table-cell office:value-type="string" table:style-name="c10">
            <text:p>2026-05-11 13:00</text:p>
          </table:table-cell>
          <table:table-cell office:value-type="float" office:value="1.53923" table:style-name="c10">
            <text:p>1.5392</text:p>
          </table:table-cell>
          <table:table-cell office:value-type="float" office:value="-1.0705292179940873" table:style-name="c11">
            <text:p>-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9:00</text:p>
          </table:table-cell>
          <table:table-cell office:value-type="float" office:value="1.6238115" table:style-name="c10">
            <text:p>1.6238</text:p>
          </table:table-cell>
          <table:table-cell office:value-type="string" table:style-name="c10">
            <text:p>2026-05-13 19:00</text:p>
          </table:table-cell>
          <table:table-cell office:value-type="float" office:value="1.6011990000000003" table:style-name="c10">
            <text:p>1.6012</text:p>
          </table:table-cell>
          <table:table-cell office:value-type="float" office:value="-1.5896732349167109" table:style-name="c11">
            <text:p>-1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15</text:p>
          </table:table-cell>
          <table:table-cell office:value-type="float" office:value="1.6438214999999998" table:style-name="c10">
            <text:p>1.6438</text:p>
          </table:table-cell>
          <table:table-cell office:value-type="string" table:style-name="c10">
            <text:p>2026-05-20 07:15</text:p>
          </table:table-cell>
          <table:table-cell office:value-type="float" office:value="1.6561715000000001" table:style-name="c10">
            <text:p>1.6562</text:p>
          </table:table-cell>
          <table:table-cell office:value-type="float" office:value="0.5498962735005275" table:style-name="c12">
            <text:p>+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3:30</text:p>
          </table:table-cell>
          <table:table-cell office:value-type="float" office:value="1.6538264999999999" table:style-name="c10">
            <text:p>1.6538</text:p>
          </table:table-cell>
          <table:table-cell office:value-type="string" table:style-name="c10">
            <text:p>2026-05-21 13:30</text:p>
          </table:table-cell>
          <table:table-cell office:value-type="float" office:value="1.743128" table:style-name="c10">
            <text:p>1.7431</text:p>
          </table:table-cell>
          <table:table-cell office:value-type="float" office:value="5.188995769991611" table:style-name="c12">
            <text:p>+5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45</text:p>
          </table:table-cell>
          <table:table-cell office:value-type="float" office:value="1.8079034999999999" table:style-name="c10">
            <text:p>1.8079</text:p>
          </table:table-cell>
          <table:table-cell office:value-type="string" table:style-name="c10">
            <text:p>2026-05-22 15:45</text:p>
          </table:table-cell>
          <table:table-cell office:value-type="float" office:value="2.190904" table:style-name="c10">
            <text:p>2.1909</text:p>
          </table:table-cell>
          <table:table-cell office:value-type="float" office:value="20.94253829941699" table:style-name="c12">
            <text:p>+2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5:15</text:p>
          </table:table-cell>
          <table:table-cell office:value-type="float" office:value="2.4682334999999997" table:style-name="c10">
            <text:p>2.4682</text:p>
          </table:table-cell>
          <table:table-cell office:value-type="string" table:style-name="c10">
            <text:p>2026-05-25 15:15</text:p>
          </table:table-cell>
          <table:table-cell office:value-type="float" office:value="2.6466760000000003" table:style-name="c10">
            <text:p>2.6467</text:p>
          </table:table-cell>
          <table:table-cell office:value-type="float" office:value="7.0152112705706315" table:style-name="c12">
            <text:p>+7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2 03:30</text:p>
          </table:table-cell>
          <table:table-cell office:value-type="float" office:value="2.7183585" table:style-name="c10">
            <text:p>2.7184</text:p>
          </table:table-cell>
          <table:table-cell office:value-type="string" table:style-name="c10">
            <text:p>2026-06-02 14:00</text:p>
          </table:table-cell>
          <table:table-cell office:value-type="float" office:value="2.6836575000000003" table:style-name="c10">
            <text:p>2.6837</text:p>
          </table:table-cell>
          <table:table-cell office:value-type="float" office:value="-1.4738906344582414" table:style-name="c11">
            <text:p>-1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7:00</text:p>
          </table:table-cell>
          <table:table-cell office:value-type="float" office:value="0.1322661" table:style-name="c1">
            <text:p>0.13227</text:p>
          </table:table-cell>
          <table:table-cell office:value-type="string" table:style-name="c1">
            <text:p>2026-03-17 17:00</text:p>
          </table:table-cell>
          <table:table-cell office:value-type="float" office:value="0.13483255" table:style-name="c1">
            <text:p>0.13483</text:p>
          </table:table-cell>
          <table:table-cell office:value-type="float" office:value="1.7365898991124729" table:style-name="c13">
            <text:p>+1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1635815" table:style-name="c1">
            <text:p>0.11636</text:p>
          </table:table-cell>
          <table:table-cell office:value-type="string" table:style-name="c1">
            <text:p>2026-04-08 22:45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0.6425577047675546" table:style-name="c14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45</text:p>
          </table:table-cell>
          <table:table-cell office:value-type="float" office:value="0.13046519999999998" table:style-name="c1">
            <text:p>0.13047</text:p>
          </table:table-cell>
          <table:table-cell office:value-type="string" table:style-name="c1">
            <text:p>2026-04-17 15:45</text:p>
          </table:table-cell>
          <table:table-cell office:value-type="float" office:value="0.1325337" table:style-name="c1">
            <text:p>0.13253</text:p>
          </table:table-cell>
          <table:table-cell office:value-type="float" office:value="1.3824108909502586" table:style-name="c13">
            <text:p>+1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4-23 02:00</text:p>
          </table:table-cell>
          <table:table-cell office:value-type="float" office:value="0.12023985000000001" table:style-name="c1">
            <text:p>0.12024</text:p>
          </table:table-cell>
          <table:table-cell office:value-type="float" office:value="-6.44343152928214" table:style-name="c14">
            <text:p>-6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9:00</text:p>
          </table:table-cell>
          <table:table-cell office:value-type="float" office:value="0.13246619999999998" table:style-name="c1">
            <text:p>0.13247</text:p>
          </table:table-cell>
          <table:table-cell office:value-type="string" table:style-name="c1">
            <text:p>2026-04-26 09:00</text:p>
          </table:table-cell>
          <table:table-cell office:value-type="float" office:value="0.12583705" table:style-name="c1">
            <text:p>0.12584</text:p>
          </table:table-cell>
          <table:table-cell office:value-type="float" office:value="-5.194304858862098" table:style-name="c14">
            <text:p>-5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0.12576285" table:style-name="c1">
            <text:p>0.12576</text:p>
          </table:table-cell>
          <table:table-cell office:value-type="string" table:style-name="c1">
            <text:p>2026-04-29 16:00</text:p>
          </table:table-cell>
          <table:table-cell office:value-type="float" office:value="0.11844075" table:style-name="c1">
            <text:p>0.11844</text:p>
          </table:table-cell>
          <table:table-cell office:value-type="float" office:value="-6.010410116540788" table:style-name="c14">
            <text:p>-6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9:15</text:p>
          </table:table-cell>
          <table:table-cell office:value-type="float" office:value="0.1256628" table:style-name="c1">
            <text:p>0.12566</text:p>
          </table:table-cell>
          <table:table-cell office:value-type="string" table:style-name="c1">
            <text:p>2026-05-03 19:15</text:p>
          </table:table-cell>
          <table:table-cell office:value-type="float" office:value="0.12243875" table:style-name="c1">
            <text:p>0.12244</text:p>
          </table:table-cell>
          <table:table-cell office:value-type="float" office:value="-2.76040726551533" table:style-name="c14">
            <text:p>-2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5-05 04:15</text:p>
          </table:table-cell>
          <table:table-cell office:value-type="float" office:value="0.12743625" table:style-name="c1">
            <text:p>0.12744</text:p>
          </table:table-cell>
          <table:table-cell office:value-type="float" office:value="0.09287083721920553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0.12956475" table:style-name="c1">
            <text:p>0.12956</text:p>
          </table:table-cell>
          <table:table-cell office:value-type="string" table:style-name="c1">
            <text:p>2026-05-06 20:30</text:p>
          </table:table-cell>
          <table:table-cell office:value-type="float" office:value="0.1403298" table:style-name="c1">
            <text:p>0.14033</text:p>
          </table:table-cell>
          <table:table-cell office:value-type="float" office:value="8.092116667380589" table:style-name="c13">
            <text:p>+8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30</text:p>
          </table:table-cell>
          <table:table-cell office:value-type="float" office:value="0.1450725" table:style-name="c1">
            <text:p>0.14507</text:p>
          </table:table-cell>
          <table:table-cell office:value-type="string" table:style-name="c1">
            <text:p>2026-05-07 21:30</text:p>
          </table:table-cell>
          <table:table-cell office:value-type="float" office:value="0.14872559999999999" table:style-name="c1">
            <text:p>0.14873</text:p>
          </table:table-cell>
          <table:table-cell office:value-type="float" office:value="2.313186527839517" table:style-name="c13">
            <text:p>+2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5897945" table:style-name="c1">
            <text:p>0.15898</text:p>
          </table:table-cell>
          <table:table-cell office:value-type="string" table:style-name="c1">
            <text:p>2026-05-09 17:45</text:p>
          </table:table-cell>
          <table:table-cell office:value-type="float" office:value="0.1657171" table:style-name="c1">
            <text:p>0.16572</text:p>
          </table:table-cell>
          <table:table-cell office:value-type="float" office:value="4.029691584100981" table:style-name="c13">
            <text:p>+4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5:45</text:p>
          </table:table-cell>
          <table:table-cell office:value-type="float" office:value="0.1302651" table:style-name="c1">
            <text:p>0.13027</text:p>
          </table:table-cell>
          <table:table-cell office:value-type="string" table:style-name="c1">
            <text:p>2026-05-27 04:00</text:p>
          </table:table-cell>
          <table:table-cell office:value-type="float" office:value="0.1269365" table:style-name="c1">
            <text:p>0.12694</text:p>
          </table:table-cell>
          <table:table-cell office:value-type="float" office:value="-2.750042846088463" table:style-name="c14">
            <text:p>-2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15</text:p>
          </table:table-cell>
          <table:table-cell office:value-type="float" office:value="0.0992496" table:style-name="c10">
            <text:p>0.09925</text:p>
          </table:table-cell>
          <table:table-cell office:value-type="string" table:style-name="c10">
            <text:p>2026-03-21 11:15</text:p>
          </table:table-cell>
          <table:table-cell office:value-type="float" office:value="0.09625185" table:style-name="c10">
            <text:p>0.096252</text:p>
          </table:table-cell>
          <table:table-cell office:value-type="float" office:value="-3.2142773856519313" table:style-name="c11">
            <text:p>-3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534764999999999" table:style-name="c10">
            <text:p>0.095348</text:p>
          </table:table-cell>
          <table:table-cell office:value-type="string" table:style-name="c10">
            <text:p>2026-03-25 20:45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1.7926970946321452" table:style-name="c12">
            <text:p>+1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1:15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5-01 01:15</text:p>
          </table:table-cell>
          <table:table-cell office:value-type="float" office:value="0.09395300000000001" table:style-name="c10">
            <text:p>0.093953</text:p>
          </table:table-cell>
          <table:table-cell office:value-type="float" office:value="-1.141003387546713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15</text:p>
          </table:table-cell>
          <table:table-cell office:value-type="float" office:value="0.09119557499999999" table:style-name="c10">
            <text:p>0.091196</text:p>
          </table:table-cell>
          <table:table-cell office:value-type="string" table:style-name="c10">
            <text:p>2026-06-01 02:15</text:p>
          </table:table-cell>
          <table:table-cell office:value-type="float" office:value="0.09257369" table:style-name="c10">
            <text:p>0.092574</text:p>
          </table:table-cell>
          <table:table-cell office:value-type="float" office:value="1.3082435125717495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6:00</text:p>
          </table:table-cell>
          <table:table-cell office:value-type="float" office:value="0.09340667999999999" table:style-name="c10">
            <text:p>0.093407</text:p>
          </table:table-cell>
          <table:table-cell office:value-type="string" table:style-name="c10">
            <text:p>2026-06-02 14:00</text:p>
          </table:table-cell>
          <table:table-cell office:value-type="float" office:value="0.09180407500000001" table:style-name="c10">
            <text:p>0.091804</text:p>
          </table:table-cell>
          <table:table-cell office:value-type="float" office:value="-1.9121987270342644" table:style-name="c11">
            <text:p>-1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6 16:00</text:p>
          </table:table-cell>
          <table:table-cell office:value-type="float" office:value="5.33733e-06" table:style-name="c1">
            <text:p>0.0000053373</text:p>
          </table:table-cell>
          <table:table-cell office:value-type="float" office:value="-5.098062780909007" table:style-name="c14">
            <text:p>-5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15</text:p>
          </table:table-cell>
          <table:table-cell office:value-type="float" office:value="5.86293e-06" table:style-name="c1">
            <text:p>0.0000058629</text:p>
          </table:table-cell>
          <table:table-cell office:value-type="string" table:style-name="c1">
            <text:p>2026-03-11 13:15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1.1503358031734967" table:style-name="c14">
            <text:p>-1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1:45</text:p>
          </table:table-cell>
          <table:table-cell office:value-type="float" office:value="6.193095e-06" table:style-name="c1">
            <text:p>0.0000061931</text:p>
          </table:table-cell>
          <table:table-cell office:value-type="string" table:style-name="c1">
            <text:p>2026-03-14 11:45</text:p>
          </table:table-cell>
          <table:table-cell office:value-type="float" office:value="5.887055000000001e-06" table:style-name="c1">
            <text:p>0.0000058871</text:p>
          </table:table-cell>
          <table:table-cell office:value-type="float" office:value="-5.13165425276052" table:style-name="c14">
            <text:p>-5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30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18 13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5.333381239591917" table:style-name="c14">
            <text:p>-5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7:15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01 17:15</text:p>
          </table:table-cell>
          <table:table-cell office:value-type="float" office:value="6.09695e-06" table:style-name="c1">
            <text:p>0.000006097</text:p>
          </table:table-cell>
          <table:table-cell office:value-type="float" office:value="1.362022271364327" table:style-name="c13">
            <text:p>+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5 07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3.7603235228666487" table:style-name="c14">
            <text:p>-3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8 23:0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3.217709242695721" table:style-name="c14">
            <text:p>-3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6.003e-06" table:style-name="c1">
            <text:p>0.000006003</text:p>
          </table:table-cell>
          <table:table-cell office:value-type="string" table:style-name="c1">
            <text:p>2026-04-15 11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2.958326218890539" table:style-name="c14">
            <text:p>-3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4-17 02:45</text:p>
          </table:table-cell>
          <table:table-cell office:value-type="float" office:value="6.186905e-06" table:style-name="c1">
            <text:p>0.0000061869</text:p>
          </table:table-cell>
          <table:table-cell office:value-type="float" office:value="1.3374655349665199" table:style-name="c13">
            <text:p>+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9:30</text:p>
          </table:table-cell>
          <table:table-cell office:value-type="float" office:value="6.36318e-06" table:style-name="c1">
            <text:p>0.0000063632</text:p>
          </table:table-cell>
          <table:table-cell office:value-type="string" table:style-name="c1">
            <text:p>2026-04-30 09:30</text:p>
          </table:table-cell>
          <table:table-cell office:value-type="float" office:value="6.346825000000001e-06" table:style-name="c1">
            <text:p>0.0000063468</text:p>
          </table:table-cell>
          <table:table-cell office:value-type="float" office:value="-0.4564117811377111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30</text:p>
          </table:table-cell>
          <table:table-cell office:value-type="float" office:value="5.842919999999999e-06" table:style-name="c1">
            <text:p>0.0000058429</text:p>
          </table:table-cell>
          <table:table-cell office:value-type="string" table:style-name="c1">
            <text:p>2026-05-22 17:30</text:p>
          </table:table-cell>
          <table:table-cell office:value-type="float" office:value="5.847075e-06" table:style-name="c1">
            <text:p>0.0000058471</text:p>
          </table:table-cell>
          <table:table-cell office:value-type="float" office:value="-0.1289304478753639" table:style-name="c14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1 15:00</text:p>
          </table:table-cell>
          <table:table-cell office:value-type="float" office:value="86.49673000000001" table:style-name="c10">
            <text:p>86.497</text:p>
          </table:table-cell>
          <table:table-cell office:value-type="float" office:value="-2.0650593696000863" table:style-name="c11">
            <text:p>-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45</text:p>
          </table:table-cell>
          <table:table-cell office:value-type="float" office:value="90.02499" table:style-name="c10">
            <text:p>90.025</text:p>
          </table:table-cell>
          <table:table-cell office:value-type="string" table:style-name="c10">
            <text:p>2026-03-14 00:45</text:p>
          </table:table-cell>
          <table:table-cell office:value-type="float" office:value="87.83606" table:style-name="c10">
            <text:p>87.836</text:p>
          </table:table-cell>
          <table:table-cell office:value-type="float" office:value="-2.6265087993233793" table:style-name="c11">
            <text:p>-2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92.056005" table:style-name="c10">
            <text:p>92.056</text:p>
          </table:table-cell>
          <table:table-cell office:value-type="string" table:style-name="c10">
            <text:p>2026-03-16 22:45</text:p>
          </table:table-cell>
          <table:table-cell office:value-type="float" office:value="96.661645" table:style-name="c10">
            <text:p>96.662</text:p>
          </table:table-cell>
          <table:table-cell office:value-type="float" office:value="4.793183640377396" table:style-name="c12">
            <text:p>+4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6:45</text:p>
          </table:table-cell>
          <table:table-cell office:value-type="float" office:value="85.28262" table:style-name="c10">
            <text:p>85.283</text:p>
          </table:table-cell>
          <table:table-cell office:value-type="string" table:style-name="c10">
            <text:p>2026-04-02 01:00</text:p>
          </table:table-cell>
          <table:table-cell office:value-type="float" office:value="81.589185" table:style-name="c10">
            <text:p>81.589</text:p>
          </table:table-cell>
          <table:table-cell office:value-type="float" office:value="-4.522060627141844" table:style-name="c11">
            <text:p>-4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81.190575" table:style-name="c10">
            <text:p>81.191</text:p>
          </table:table-cell>
          <table:table-cell office:value-type="string" table:style-name="c10">
            <text:p>2026-04-05 12:00</text:p>
          </table:table-cell>
          <table:table-cell office:value-type="float" office:value="79.870045" table:style-name="c10">
            <text:p>79.87</text:p>
          </table:table-cell>
          <table:table-cell office:value-type="float" office:value="-1.8231059700648533" table:style-name="c11">
            <text:p>-1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82.311135" table:style-name="c10">
            <text:p>82.311</text:p>
          </table:table-cell>
          <table:table-cell office:value-type="string" table:style-name="c10">
            <text:p>2026-04-07 00:15</text:p>
          </table:table-cell>
          <table:table-cell office:value-type="float" office:value="79.84006" table:style-name="c10">
            <text:p>79.84</text:p>
          </table:table-cell>
          <table:table-cell office:value-type="float" office:value="-3.196013856375568" table:style-name="c11">
            <text:p>-3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83.411685" table:style-name="c10">
            <text:p>83.412</text:p>
          </table:table-cell>
          <table:table-cell office:value-type="string" table:style-name="c10">
            <text:p>2026-04-10 15:45</text:p>
          </table:table-cell>
          <table:table-cell office:value-type="float" office:value="84.63766000000001" table:style-name="c10">
            <text:p>84.638</text:p>
          </table:table-cell>
          <table:table-cell office:value-type="float" office:value="1.266949969491682" table:style-name="c12">
            <text:p>+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85.72284" table:style-name="c10">
            <text:p>85.723</text:p>
          </table:table-cell>
          <table:table-cell office:value-type="string" table:style-name="c10">
            <text:p>2026-04-14 22:30</text:p>
          </table:table-cell>
          <table:table-cell office:value-type="float" office:value="83.37829" table:style-name="c10">
            <text:p>83.378</text:p>
          </table:table-cell>
          <table:table-cell office:value-type="float" office:value="-2.929468041084504" table:style-name="c11">
            <text:p>-2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30</text:p>
          </table:table-cell>
          <table:table-cell office:value-type="float" office:value="86.273115" table:style-name="c10">
            <text:p>86.273</text:p>
          </table:table-cell>
          <table:table-cell office:value-type="string" table:style-name="c10">
            <text:p>2026-04-17 15:30</text:p>
          </table:table-cell>
          <table:table-cell office:value-type="float" office:value="89.78508500000001" table:style-name="c10">
            <text:p>89.785</text:p>
          </table:table-cell>
          <table:table-cell office:value-type="float" office:value="3.8627208662687096" table:style-name="c12">
            <text:p>+3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83.98196999999999" table:style-name="c10">
            <text:p>83.982</text:p>
          </table:table-cell>
          <table:table-cell office:value-type="string" table:style-name="c10">
            <text:p>2026-05-04 07:45</text:p>
          </table:table-cell>
          <table:table-cell office:value-type="float" office:value="84.83756" table:style-name="c10">
            <text:p>84.838</text:p>
          </table:table-cell>
          <table:table-cell office:value-type="float" office:value="0.8168416596562533" table:style-name="c12">
            <text:p>+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91.56576" table:style-name="c10">
            <text:p>91.566</text:p>
          </table:table-cell>
          <table:table-cell office:value-type="string" table:style-name="c10">
            <text:p>2026-05-09 17:45</text:p>
          </table:table-cell>
          <table:table-cell office:value-type="float" office:value="93.33331" table:style-name="c10">
            <text:p>93.333</text:p>
          </table:table-cell>
          <table:table-cell office:value-type="float" office:value="1.7266025131118745" table:style-name="c12">
            <text:p>+1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7:30</text:p>
          </table:table-cell>
          <table:table-cell office:value-type="float" office:value="95.977965" table:style-name="c10">
            <text:p>95.978</text:p>
          </table:table-cell>
          <table:table-cell office:value-type="string" table:style-name="c10">
            <text:p>2026-05-11 17:30</text:p>
          </table:table-cell>
          <table:table-cell office:value-type="float" office:value="97.181385" table:style-name="c10">
            <text:p>97.181</text:p>
          </table:table-cell>
          <table:table-cell office:value-type="float" office:value="1.0514438510808244" table:style-name="c12">
            <text:p>+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87.853905" table:style-name="c10">
            <text:p>87.854</text:p>
          </table:table-cell>
          <table:table-cell office:value-type="string" table:style-name="c10">
            <text:p>2026-05-22 17:30</text:p>
          </table:table-cell>
          <table:table-cell office:value-type="float" office:value="86.97649" table:style-name="c10">
            <text:p>86.976</text:p>
          </table:table-cell>
          <table:table-cell office:value-type="float" office:value="-1.1966241039712555" table:style-name="c11">
            <text:p>-1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0.9839917499999999" table:style-name="c1">
            <text:p>0.98399</text:p>
          </table:table-cell>
          <table:table-cell office:value-type="string" table:style-name="c1">
            <text:p>2026-03-10 19:30</text:p>
          </table:table-cell>
          <table:table-cell office:value-type="float" office:value="0.9600197500000001" table:style-name="c1">
            <text:p>0.96002</text:p>
          </table:table-cell>
          <table:table-cell office:value-type="float" office:value="-2.631229324864748" table:style-name="c14">
            <text:p>-2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1.0118056500000001" table:style-name="c1">
            <text:p>1.0118</text:p>
          </table:table-cell>
          <table:table-cell office:value-type="string" table:style-name="c1">
            <text:p>2026-03-14 00:30</text:p>
          </table:table-cell>
          <table:table-cell office:value-type="float" office:value="0.9960017500000001" table:style-name="c1">
            <text:p>0.996</text:p>
          </table:table-cell>
          <table:table-cell office:value-type="float" office:value="-1.7587278246815385" table:style-name="c14">
            <text:p>-1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0401198" table:style-name="c1">
            <text:p>1.0401</text:p>
          </table:table-cell>
          <table:table-cell office:value-type="string" table:style-name="c1">
            <text:p>2026-03-17 03:45</text:p>
          </table:table-cell>
          <table:table-cell office:value-type="float" office:value="1.03638155" table:style-name="c1">
            <text:p>1.0364</text:p>
          </table:table-cell>
          <table:table-cell office:value-type="float" office:value="-0.5585872625874511" table:style-name="c14">
            <text:p>-0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8992494" table:style-name="c1">
            <text:p>0.89925</text:p>
          </table:table-cell>
          <table:table-cell office:value-type="string" table:style-name="c1">
            <text:p>2026-04-02 06:00</text:p>
          </table:table-cell>
          <table:table-cell office:value-type="float" office:value="0.86126915" table:style-name="c1">
            <text:p>0.86127</text:p>
          </table:table-cell>
          <table:table-cell office:value-type="float" office:value="-4.415007341773025" table:style-name="c14">
            <text:p>-4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30</text:p>
          </table:table-cell>
          <table:table-cell office:value-type="float" office:value="0.9158576999999999" table:style-name="c1">
            <text:p>0.91586</text:p>
          </table:table-cell>
          <table:table-cell office:value-type="string" table:style-name="c1">
            <text:p>2026-04-07 10:30</text:p>
          </table:table-cell>
          <table:table-cell office:value-type="float" office:value="0.8727634000000001" table:style-name="c1">
            <text:p>0.87276</text:p>
          </table:table-cell>
          <table:table-cell office:value-type="float" office:value="-4.8958428843913" table:style-name="c14">
            <text:p>-4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8 20:00</text:p>
          </table:table-cell>
          <table:table-cell office:value-type="float" office:value="0.9217389" table:style-name="c1">
            <text:p>0.92174</text:p>
          </table:table-cell>
          <table:table-cell office:value-type="float" office:value="3.1568075424758257" table:style-name="c13">
            <text:p>+3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10 15:45</text:p>
          </table:table-cell>
          <table:table-cell office:value-type="float" office:value="0.94642655" table:style-name="c1">
            <text:p>0.94643</text:p>
          </table:table-cell>
          <table:table-cell office:value-type="float" office:value="1.034098033020081" table:style-name="c13">
            <text:p>+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575785499999999" table:style-name="c1">
            <text:p>0.95758</text:p>
          </table:table-cell>
          <table:table-cell office:value-type="string" table:style-name="c1">
            <text:p>2026-04-14 22:30</text:p>
          </table:table-cell>
          <table:table-cell office:value-type="float" office:value="0.9283356" table:style-name="c1">
            <text:p>0.92834</text:p>
          </table:table-cell>
          <table:table-cell office:value-type="float" office:value="-3.247638834892441" table:style-name="c14">
            <text:p>-3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9716855999999999" table:style-name="c1">
            <text:p>0.97169</text:p>
          </table:table-cell>
          <table:table-cell office:value-type="string" table:style-name="c1">
            <text:p>2026-04-16 19:45</text:p>
          </table:table-cell>
          <table:table-cell office:value-type="float" office:value="0.9990002500000001" table:style-name="c1">
            <text:p>0.999</text:p>
          </table:table-cell>
          <table:table-cell office:value-type="float" office:value="2.6055391270849437" table:style-name="c13">
            <text:p>+2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30</text:p>
          </table:table-cell>
          <table:table-cell office:value-type="float" office:value="1.0289142" table:style-name="c1">
            <text:p>1.0289</text:p>
          </table:table-cell>
          <table:table-cell office:value-type="string" table:style-name="c1">
            <text:p>2026-04-18 13:30</text:p>
          </table:table-cell>
          <table:table-cell office:value-type="float" office:value="0.9679158000000001" table:style-name="c1">
            <text:p>0.96792</text:p>
          </table:table-cell>
          <table:table-cell office:value-type="float" office:value="-6.116473432303682" table:style-name="c14">
            <text:p>-6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4 22:15</text:p>
          </table:table-cell>
          <table:table-cell office:value-type="float" office:value="0.9377309" table:style-name="c1">
            <text:p>0.93773</text:p>
          </table:table-cell>
          <table:table-cell office:value-type="float" office:value="0.7961941368647585" table:style-name="c13">
            <text:p>+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0.9812903999999999" table:style-name="c1">
            <text:p>0.98129</text:p>
          </table:table-cell>
          <table:table-cell office:value-type="string" table:style-name="c1">
            <text:p>2026-05-06 13:15</text:p>
          </table:table-cell>
          <table:table-cell office:value-type="float" office:value="1.0118938" table:style-name="c1">
            <text:p>1.0119</text:p>
          </table:table-cell>
          <table:table-cell office:value-type="float" office:value="2.9125551716189246" table:style-name="c13">
            <text:p>+2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9 15:00</text:p>
          </table:table-cell>
          <table:table-cell office:value-type="float" office:value="1.0489752500000002" table:style-name="c1">
            <text:p>1.049</text:p>
          </table:table-cell>
          <table:table-cell office:value-type="float" office:value="3.67137331713121" table:style-name="c13">
            <text:p>+3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30</text:p>
          </table:table-cell>
          <table:table-cell office:value-type="float" office:value="1.1003499" table:style-name="c1">
            <text:p>1.1003</text:p>
          </table:table-cell>
          <table:table-cell office:value-type="string" table:style-name="c1">
            <text:p>2026-05-11 00:30</text:p>
          </table:table-cell>
          <table:table-cell office:value-type="float" office:value="1.3092450500000001" table:style-name="c1">
            <text:p>1.3092</text:p>
          </table:table-cell>
          <table:table-cell office:value-type="float" office:value="18.74657953302401" table:style-name="c13">
            <text:p>+18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2 01:00</text:p>
          </table:table-cell>
          <table:table-cell office:value-type="float" office:value="1.0961516500000001" table:style-name="c1">
            <text:p>1.0962</text:p>
          </table:table-cell>
          <table:table-cell office:value-type="float" office:value="-2.5825253043782914" table:style-name="c14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09 02:00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-3.910379817629972" table:style-name="c11">
            <text:p>-3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1:30</text:p>
          </table:table-cell>
          <table:table-cell office:value-type="float" office:value="1.3016504999999998" table:style-name="c10">
            <text:p>1.3017</text:p>
          </table:table-cell>
          <table:table-cell office:value-type="string" table:style-name="c10">
            <text:p>2026-03-24 11:30</text:p>
          </table:table-cell>
          <table:table-cell office:value-type="float" office:value="1.3243375" table:style-name="c10">
            <text:p>1.3243</text:p>
          </table:table-cell>
          <table:table-cell office:value-type="float" office:value="1.5395568424473316" table:style-name="c12">
            <text:p>+1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8:00</text:p>
          </table:table-cell>
          <table:table-cell office:value-type="float" office:value="1.3376685" table:style-name="c10">
            <text:p>1.3377</text:p>
          </table:table-cell>
          <table:table-cell office:value-type="string" table:style-name="c10">
            <text:p>2026-04-12 08:00</text:p>
          </table:table-cell>
          <table:table-cell office:value-type="float" office:value="1.4162915" table:style-name="c10">
            <text:p>1.4163</text:p>
          </table:table-cell>
          <table:table-cell office:value-type="float" office:value="5.665965318873867" table:style-name="c12">
            <text:p>+5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1.4537265" table:style-name="c10">
            <text:p>1.4537</text:p>
          </table:table-cell>
          <table:table-cell office:value-type="string" table:style-name="c10">
            <text:p>2026-05-05 15:00</text:p>
          </table:table-cell>
          <table:table-cell office:value-type="float" office:value="1.7861065" table:style-name="c10">
            <text:p>1.7861</text:p>
          </table:table-cell>
          <table:table-cell office:value-type="float" office:value="22.618393013163086" table:style-name="c12">
            <text:p>+2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2:00</text:p>
          </table:table-cell>
          <table:table-cell office:value-type="float" office:value="2.0340165" table:style-name="c10">
            <text:p>2.034</text:p>
          </table:table-cell>
          <table:table-cell office:value-type="string" table:style-name="c10">
            <text:p>2026-05-07 02:00</text:p>
          </table:table-cell>
          <table:table-cell office:value-type="float" office:value="2.576711" table:style-name="c10">
            <text:p>2.5767</text:p>
          </table:table-cell>
          <table:table-cell office:value-type="float" office:value="26.427693910595117" table:style-name="c12">
            <text:p>+26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7:45</text:p>
          </table:table-cell>
          <table:table-cell office:value-type="float" office:value="2.5392689999999996" table:style-name="c10">
            <text:p>2.5393</text:p>
          </table:table-cell>
          <table:table-cell office:value-type="string" table:style-name="c10">
            <text:p>2026-05-08 17:45</text:p>
          </table:table-cell>
          <table:table-cell office:value-type="float" office:value="2.6096945000000003" table:style-name="c10">
            <text:p>2.6097</text:p>
          </table:table-cell>
          <table:table-cell office:value-type="float" office:value="2.568011529873382" table:style-name="c12">
            <text:p>+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4:15</text:p>
          </table:table-cell>
          <table:table-cell office:value-type="float" office:value="2.0460225" table:style-name="c10">
            <text:p>2.046</text:p>
          </table:table-cell>
          <table:table-cell office:value-type="string" table:style-name="c10">
            <text:p>2026-05-20 04:15</text:p>
          </table:table-cell>
          <table:table-cell office:value-type="float" office:value="1.935032" table:style-name="c10">
            <text:p>1.935</text:p>
          </table:table-cell>
          <table:table-cell office:value-type="float" office:value="-5.613751997741945" table:style-name="c11">
            <text:p>-5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0:45</text:p>
          </table:table-cell>
          <table:table-cell office:value-type="float" office:value="2.0860425" table:style-name="c10">
            <text:p>2.086</text:p>
          </table:table-cell>
          <table:table-cell office:value-type="string" table:style-name="c10">
            <text:p>2026-05-22 00:45</text:p>
          </table:table-cell>
          <table:table-cell office:value-type="float" office:value="2.0559715" table:style-name="c10">
            <text:p>2.056</text:p>
          </table:table-cell>
          <table:table-cell office:value-type="float" office:value="-1.6385518046012848" table:style-name="c11">
            <text:p>-1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15</text:p>
          </table:table-cell>
          <table:table-cell office:value-type="float" office:value="2.0310149999999996" table:style-name="c10">
            <text:p>2.031</text:p>
          </table:table-cell>
          <table:table-cell office:value-type="string" table:style-name="c10">
            <text:p>2026-05-26 16:15</text:p>
          </table:table-cell>
          <table:table-cell office:value-type="float" office:value="1.9100445000000001" table:style-name="c10">
            <text:p>1.91</text:p>
          </table:table-cell>
          <table:table-cell office:value-type="float" office:value="-6.144153487566539" table:style-name="c11">
            <text:p>-6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1:00</text:p>
          </table:table-cell>
          <table:table-cell office:value-type="float" office:value="1.8929459999999998" table:style-name="c10">
            <text:p>1.8929</text:p>
          </table:table-cell>
          <table:table-cell office:value-type="string" table:style-name="c10">
            <text:p>2026-06-01 01:00</text:p>
          </table:table-cell>
          <table:table-cell office:value-type="float" office:value="1.9360315000000001" table:style-name="c10">
            <text:p>1.936</text:p>
          </table:table-cell>
          <table:table-cell office:value-type="float" office:value="2.07165830570446" table:style-name="c12">
            <text:p>+2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30</text:p>
          </table:table-cell>
          <table:table-cell office:value-type="float" office:value="0.28454219999999997" table:style-name="c1">
            <text:p>0.28454</text:p>
          </table:table-cell>
          <table:table-cell office:value-type="string" table:style-name="c1">
            <text:p>2026-03-06 21:30</text:p>
          </table:table-cell>
          <table:table-cell office:value-type="float" office:value="0.28445770000000004" table:style-name="c1">
            <text:p>0.28446</text:p>
          </table:table-cell>
          <table:table-cell office:value-type="float" office:value="-0.22953746133259623" table:style-name="c14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03:15</text:p>
          </table:table-cell>
          <table:table-cell office:value-type="float" office:value="0.29044515" table:style-name="c1">
            <text:p>0.29045</text:p>
          </table:table-cell>
          <table:table-cell office:value-type="string" table:style-name="c1">
            <text:p>2026-03-09 21:00</text:p>
          </table:table-cell>
          <table:table-cell office:value-type="float" office:value="0.28585699999999997" table:style-name="c1">
            <text:p>0.28586</text:p>
          </table:table-cell>
          <table:table-cell office:value-type="float" office:value="-1.776438044498252" table:style-name="c14">
            <text:p>-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290145" table:style-name="c1">
            <text:p>0.29014</text:p>
          </table:table-cell>
          <table:table-cell office:value-type="string" table:style-name="c1">
            <text:p>2026-03-14 00:30</text:p>
          </table:table-cell>
          <table:table-cell office:value-type="float" office:value="0.29335325" table:style-name="c1">
            <text:p>0.29335</text:p>
          </table:table-cell>
          <table:table-cell office:value-type="float" office:value="0.9036298586051927" table:style-name="c13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30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2:00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-0.7823827125010507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7 04:45</text:p>
          </table:table-cell>
          <table:table-cell office:value-type="float" office:value="0.31365675" table:style-name="c1">
            <text:p>0.31366</text:p>
          </table:table-cell>
          <table:table-cell office:value-type="string" table:style-name="c1">
            <text:p>2026-03-27 19:00</text:p>
          </table:table-cell>
          <table:table-cell office:value-type="float" office:value="0.30934525" table:style-name="c1">
            <text:p>0.30935</text:p>
          </table:table-cell>
          <table:table-cell office:value-type="float" office:value="-1.5717440019224704" table:style-name="c14">
            <text:p>-1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45</text:p>
          </table:table-cell>
          <table:table-cell office:value-type="float" office:value="0.31845915" table:style-name="c1">
            <text:p>0.31846</text:p>
          </table:table-cell>
          <table:table-cell office:value-type="string" table:style-name="c1">
            <text:p>2026-04-07 00:00</text:p>
          </table:table-cell>
          <table:table-cell office:value-type="float" office:value="0.31634175000000003" table:style-name="c1">
            <text:p>0.31634</text:p>
          </table:table-cell>
          <table:table-cell office:value-type="float" office:value="-0.8634599314386149" table:style-name="c14">
            <text:p>-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02:45</text:p>
          </table:table-cell>
          <table:table-cell office:value-type="float" office:value="0.32005995" table:style-name="c1">
            <text:p>0.32006</text:p>
          </table:table-cell>
          <table:table-cell office:value-type="string" table:style-name="c1">
            <text:p>2026-04-13 02:45</text:p>
          </table:table-cell>
          <table:table-cell office:value-type="float" office:value="0.3204397" table:style-name="c1">
            <text:p>0.32044</text:p>
          </table:table-cell>
          <table:table-cell office:value-type="float" office:value="-0.08148753391357122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08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4 08:00</text:p>
          </table:table-cell>
          <table:table-cell office:value-type="float" office:value="0.32123930000000006" table:style-name="c1">
            <text:p>0.32124</text:p>
          </table:table-cell>
          <table:table-cell office:value-type="float" office:value="-0.3616529299715343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6 12:15</text:p>
          </table:table-cell>
          <table:table-cell office:value-type="float" office:value="0.32733625000000005" table:style-name="c1">
            <text:p>0.32734</text:p>
          </table:table-cell>
          <table:table-cell office:value-type="float" office:value="0.06700751256309978" table:style-name="c13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5-02 12:45</text:p>
          </table:table-cell>
          <table:table-cell office:value-type="float" office:value="0.3304347" table:style-name="c1">
            <text:p>0.33043</text:p>
          </table:table-cell>
          <table:table-cell office:value-type="float" office:value="0.8596561678463344" table:style-name="c13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4 05:30</text:p>
          </table:table-cell>
          <table:table-cell office:value-type="float" office:value="0.33853065000000004" table:style-name="c1">
            <text:p>0.33853</text:p>
          </table:table-cell>
          <table:table-cell office:value-type="float" office:value="0.1735641318024061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0.36828405" table:style-name="c1">
            <text:p>0.36828</text:p>
          </table:table-cell>
          <table:table-cell office:value-type="string" table:style-name="c1">
            <text:p>2026-05-26 12:30</text:p>
          </table:table-cell>
          <table:table-cell office:value-type="float" office:value="0.37581200000000003" table:style-name="c1">
            <text:p>0.37581</text:p>
          </table:table-cell>
          <table:table-cell office:value-type="float" office:value="1.8400747499111247" table:style-name="c13">
            <text:p>+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23:00</text:p>
          </table:table-cell>
          <table:table-cell office:value-type="float" office:value="0.3684157" table:style-name="c1">
            <text:p>0.36842</text:p>
          </table:table-cell>
          <table:table-cell office:value-type="float" office:value="-1.765439916849909" table:style-name="c14">
            <text:p>-1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8:45</text:p>
          </table:table-cell>
          <table:table-cell office:value-type="float" office:value="3.7088534999999996" table:style-name="c10">
            <text:p>3.7089</text:p>
          </table:table-cell>
          <table:table-cell office:value-type="string" table:style-name="c10">
            <text:p>2026-03-26 08:45</text:p>
          </table:table-cell>
          <table:table-cell office:value-type="float" office:value="3.5932025000000003" table:style-name="c10">
            <text:p>3.5932</text:p>
          </table:table-cell>
          <table:table-cell office:value-type="float" office:value="-3.3119078927625334" table:style-name="c11">
            <text:p>-3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15</text:p>
          </table:table-cell>
          <table:table-cell office:value-type="float" office:value="3.5497739999999998" table:style-name="c10">
            <text:p>3.5498</text:p>
          </table:table-cell>
          <table:table-cell office:value-type="string" table:style-name="c10">
            <text:p>2026-03-31 08:15</text:p>
          </table:table-cell>
          <table:table-cell office:value-type="float" office:value="3.5032475" table:style-name="c10">
            <text:p>3.5032</text:p>
          </table:table-cell>
          <table:table-cell office:value-type="float" office:value="-1.5079690073931395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3.2116049999999996" table:style-name="c10">
            <text:p>3.2116</text:p>
          </table:table-cell>
          <table:table-cell office:value-type="string" table:style-name="c10">
            <text:p>2026-04-14 22:30</text:p>
          </table:table-cell>
          <table:table-cell office:value-type="float" office:value="3.1134425000000006" table:style-name="c10">
            <text:p>3.1134</text:p>
          </table:table-cell>
          <table:table-cell office:value-type="float" office:value="-3.2502836294469373" table:style-name="c11">
            <text:p>-3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3:30</text:p>
          </table:table-cell>
          <table:table-cell office:value-type="float" office:value="3.379689" table:style-name="c10">
            <text:p>3.3797</text:p>
          </table:table-cell>
          <table:table-cell office:value-type="string" table:style-name="c10">
            <text:p>2026-04-17 13:30</text:p>
          </table:table-cell>
          <table:table-cell office:value-type="float" office:value="3.4972505000000003" table:style-name="c10">
            <text:p>3.4973</text:p>
          </table:table-cell>
          <table:table-cell office:value-type="float" office:value="3.2716174846413315" table:style-name="c12">
            <text:p>+3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3.2866425" table:style-name="c10">
            <text:p>3.2866</text:p>
          </table:table-cell>
          <table:table-cell office:value-type="string" table:style-name="c10">
            <text:p>2026-04-27 16:00</text:p>
          </table:table-cell>
          <table:table-cell office:value-type="float" office:value="3.1934025" table:style-name="c10">
            <text:p>3.1934</text:p>
          </table:table-cell>
          <table:table-cell office:value-type="float" office:value="-3.031166657082418" table:style-name="c11">
            <text:p>-3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3.2306144999999997" table:style-name="c10">
            <text:p>3.2306</text:p>
          </table:table-cell>
          <table:table-cell office:value-type="string" table:style-name="c10">
            <text:p>2026-05-04 07:45</text:p>
          </table:table-cell>
          <table:table-cell office:value-type="float" office:value="3.3803090000000005" table:style-name="c10">
            <text:p>3.3803</text:p>
          </table:table-cell>
          <table:table-cell office:value-type="float" office:value="4.424460495333027" table:style-name="c12">
            <text:p>+4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3.6948464999999997" table:style-name="c10">
            <text:p>3.6948</text:p>
          </table:table-cell>
          <table:table-cell office:value-type="string" table:style-name="c10">
            <text:p>2026-05-10 17:30</text:p>
          </table:table-cell>
          <table:table-cell office:value-type="float" office:value="4.01799" table:style-name="c10">
            <text:p>4.018</text:p>
          </table:table-cell>
          <table:table-cell office:value-type="float" office:value="8.52840674138966" table:style-name="c12">
            <text:p>+8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8:45</text:p>
          </table:table-cell>
          <table:table-cell office:value-type="float" office:value="3.6278129999999997" table:style-name="c10">
            <text:p>3.6278</text:p>
          </table:table-cell>
          <table:table-cell office:value-type="string" table:style-name="c10">
            <text:p>2026-05-21 08:45</text:p>
          </table:table-cell>
          <table:table-cell office:value-type="float" office:value="3.6611685" table:style-name="c10">
            <text:p>3.6612</text:p>
          </table:table-cell>
          <table:table-cell office:value-type="float" office:value="0.7177002830217605" table:style-name="c12">
            <text:p>+0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45</text:p>
          </table:table-cell>
          <table:table-cell office:value-type="float" office:value="3.653826" table:style-name="c10">
            <text:p>3.6538</text:p>
          </table:table-cell>
          <table:table-cell office:value-type="string" table:style-name="c10">
            <text:p>2026-05-22 21:00</text:p>
          </table:table-cell>
          <table:table-cell office:value-type="float" office:value="3.4972505000000003" table:style-name="c10">
            <text:p>3.4973</text:p>
          </table:table-cell>
          <table:table-cell office:value-type="float" office:value="-4.476581636605015" table:style-name="c11">
            <text:p>-4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007227612" table:style-name="c1">
            <text:p>0.0072276</text:p>
          </table:table-cell>
          <table:table-cell office:value-type="string" table:style-name="c1">
            <text:p>2026-03-11 15:00</text:p>
          </table:table-cell>
          <table:table-cell office:value-type="float" office:value="0.007134431000000001" table:style-name="c1">
            <text:p>0.0071344</text:p>
          </table:table-cell>
          <table:table-cell office:value-type="float" office:value="-1.48655915078173" table:style-name="c14">
            <text:p>-1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15</text:p>
          </table:table-cell>
          <table:table-cell office:value-type="float" office:value="0.007409703" table:style-name="c1">
            <text:p>0.0074097</text:p>
          </table:table-cell>
          <table:table-cell office:value-type="string" table:style-name="c1">
            <text:p>2026-03-16 11:15</text:p>
          </table:table-cell>
          <table:table-cell office:value-type="float" office:value="0.0075772095" table:style-name="c1">
            <text:p>0.0075772</text:p>
          </table:table-cell>
          <table:table-cell office:value-type="float" office:value="2.056218153541378" table:style-name="c13">
            <text:p>+2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3:15</text:p>
          </table:table-cell>
          <table:table-cell office:value-type="float" office:value="0.007311654" table:style-name="c1">
            <text:p>0.0073117</text:p>
          </table:table-cell>
          <table:table-cell office:value-type="string" table:style-name="c1">
            <text:p>2026-04-05 03:15</text:p>
          </table:table-cell>
          <table:table-cell office:value-type="float" office:value="0.007500248000000001" table:style-name="c1">
            <text:p>0.0075002</text:p>
          </table:table-cell>
          <table:table-cell office:value-type="float" office:value="2.374305516207431" table:style-name="c13">
            <text:p>+2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07017507" table:style-name="c1">
            <text:p>0.0070175</text:p>
          </table:table-cell>
          <table:table-cell office:value-type="string" table:style-name="c1">
            <text:p>2026-04-15 14:00</text:p>
          </table:table-cell>
          <table:table-cell office:value-type="float" office:value="0.0069755105000000005" table:style-name="c1">
            <text:p>0.0069755</text:p>
          </table:table-cell>
          <table:table-cell office:value-type="float" office:value="-0.7971569602923112" table:style-name="c14">
            <text:p>-0.8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15</text:p>
          </table:table-cell>
          <table:table-cell office:value-type="float" office:value="0.0072446205" table:style-name="c1">
            <text:p>0.0072446</text:p>
          </table:table-cell>
          <table:table-cell office:value-type="string" table:style-name="c1">
            <text:p>2026-04-17 16:15</text:p>
          </table:table-cell>
          <table:table-cell office:value-type="float" office:value="0.007410293" table:style-name="c1">
            <text:p>0.0074103</text:p>
          </table:table-cell>
          <table:table-cell office:value-type="float" office:value="2.082363379738128" table:style-name="c13">
            <text:p>+2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1:00</text:p>
          </table:table-cell>
          <table:table-cell office:value-type="float" office:value="0.0072746354999999995" table:style-name="c1">
            <text:p>0.0072746</text:p>
          </table:table-cell>
          <table:table-cell office:value-type="string" table:style-name="c1">
            <text:p>2026-04-24 21:00</text:p>
          </table:table-cell>
          <table:table-cell office:value-type="float" office:value="0.007331332500000001" table:style-name="c1">
            <text:p>0.0073313</text:p>
          </table:table-cell>
          <table:table-cell office:value-type="float" office:value="0.577921276365001" table:style-name="c13">
            <text:p>+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0.007629812999999999" table:style-name="c1">
            <text:p>0.0076298</text:p>
          </table:table-cell>
          <table:table-cell office:value-type="string" table:style-name="c1">
            <text:p>2026-05-08 04:45</text:p>
          </table:table-cell>
          <table:table-cell office:value-type="float" office:value="0.007600198" table:style-name="c1">
            <text:p>0.0076002</text:p>
          </table:table-cell>
          <table:table-cell office:value-type="float" office:value="-0.5872725295102188" table:style-name="c14">
            <text:p>-0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2:15</text:p>
          </table:table-cell>
          <table:table-cell office:value-type="float" office:value="0.0080670315" table:style-name="c1">
            <text:p>0.008067</text:p>
          </table:table-cell>
          <table:table-cell office:value-type="string" table:style-name="c1">
            <text:p>2026-05-09 21:00</text:p>
          </table:table-cell>
          <table:table-cell office:value-type="float" office:value="0.007599198500000001" table:style-name="c1">
            <text:p>0.0075992</text:p>
          </table:table-cell>
          <table:table-cell office:value-type="float" office:value="-5.9876275157906615" table:style-name="c14">
            <text:p>-6.0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1 13:00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1.737272268191714" table:style-name="c14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30</text:p>
          </table:table-cell>
          <table:table-cell office:value-type="float" office:value="0.006737367" table:style-name="c1">
            <text:p>0.0067374</text:p>
          </table:table-cell>
          <table:table-cell office:value-type="string" table:style-name="c1">
            <text:p>2026-05-26 07:00</text:p>
          </table:table-cell>
          <table:table-cell office:value-type="float" office:value="0.006584706" table:style-name="c1">
            <text:p>0.0065847</text:p>
          </table:table-cell>
          <table:table-cell office:value-type="float" office:value="-2.4612556699672106" table:style-name="c14">
            <text:p>-2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0:30</text:p>
          </table:table-cell>
          <table:table-cell office:value-type="float" office:value="0.1582791" table:style-name="c10">
            <text:p>0.15828</text:p>
          </table:table-cell>
          <table:table-cell office:value-type="string" table:style-name="c10">
            <text:p>2026-03-06 16:00</text:p>
          </table:table-cell>
          <table:table-cell office:value-type="float" office:value="0.15182405000000002" table:style-name="c10">
            <text:p>0.15182</text:p>
          </table:table-cell>
          <table:table-cell office:value-type="float" office:value="-4.270018136285825" table:style-name="c11">
            <text:p>-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4:45</text:p>
          </table:table-cell>
          <table:table-cell office:value-type="float" office:value="0.16378185" table:style-name="c10">
            <text:p>0.16378</text:p>
          </table:table-cell>
          <table:table-cell office:value-type="string" table:style-name="c10">
            <text:p>2026-03-11 14:45</text:p>
          </table:table-cell>
          <table:table-cell office:value-type="float" office:value="0.16101945" table:style-name="c10">
            <text:p>0.16102</text:p>
          </table:table-cell>
          <table:table-cell office:value-type="float" office:value="-1.8831621944372823" table:style-name="c11">
            <text:p>-1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21:15</text:p>
          </table:table-cell>
          <table:table-cell office:value-type="float" office:value="0.16478235" table:style-name="c10">
            <text:p>0.16478</text:p>
          </table:table-cell>
          <table:table-cell office:value-type="string" table:style-name="c10">
            <text:p>2026-03-14 21:15</text:p>
          </table:table-cell>
          <table:table-cell office:value-type="float" office:value="0.16361815000000002" table:style-name="c10">
            <text:p>0.16362</text:p>
          </table:table-cell>
          <table:table-cell office:value-type="float" office:value="-0.9049953965640012" table:style-name="c11">
            <text:p>-0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15</text:p>
          </table:table-cell>
          <table:table-cell office:value-type="float" office:value="0.1748874" table:style-name="c10">
            <text:p>0.17489</text:p>
          </table:table-cell>
          <table:table-cell office:value-type="string" table:style-name="c10">
            <text:p>2026-03-17 15:15</text:p>
          </table:table-cell>
          <table:table-cell office:value-type="float" office:value="0.17321335000000002" table:style-name="c10">
            <text:p>0.17321</text:p>
          </table:table-cell>
          <table:table-cell office:value-type="float" office:value="-1.1552024254748994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20:30</text:p>
          </table:table-cell>
          <table:table-cell office:value-type="float" office:value="0.17378685" table:style-name="c10">
            <text:p>0.17379</text:p>
          </table:table-cell>
          <table:table-cell office:value-type="string" table:style-name="c10">
            <text:p>2026-03-27 12:00</text:p>
          </table:table-cell>
          <table:table-cell office:value-type="float" office:value="0.16881555" table:style-name="c10">
            <text:p>0.16882</text:p>
          </table:table-cell>
          <table:table-cell office:value-type="float" office:value="-3.0547548818854686" table:style-name="c11">
            <text:p>-3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1554777" table:style-name="c10">
            <text:p>0.15548</text:p>
          </table:table-cell>
          <table:table-cell office:value-type="string" table:style-name="c10">
            <text:p>2026-04-14 22:30</text:p>
          </table:table-cell>
          <table:table-cell office:value-type="float" office:value="0.1541229" table:style-name="c10">
            <text:p>0.15412</text:p>
          </table:table-cell>
          <table:table-cell office:value-type="float" office:value="-1.069537095737838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6:00</text:p>
          </table:table-cell>
          <table:table-cell office:value-type="float" office:value="0.1644822" table:style-name="c10">
            <text:p>0.16448</text:p>
          </table:table-cell>
          <table:table-cell office:value-type="string" table:style-name="c10">
            <text:p>2026-04-17 16:00</text:p>
          </table:table-cell>
          <table:table-cell office:value-type="float" office:value="0.17471260000000002" table:style-name="c10">
            <text:p>0.17471</text:p>
          </table:table-cell>
          <table:table-cell office:value-type="float" office:value="6.007427863075754" table:style-name="c12">
            <text:p>+6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15</text:p>
          </table:table-cell>
          <table:table-cell office:value-type="float" office:value="0.18079035" table:style-name="c10">
            <text:p>0.18079</text:p>
          </table:table-cell>
          <table:table-cell office:value-type="string" table:style-name="c10">
            <text:p>2026-04-22 08:15</text:p>
          </table:table-cell>
          <table:table-cell office:value-type="float" office:value="0.18010990000000002" table:style-name="c10">
            <text:p>0.18011</text:p>
          </table:table-cell>
          <table:table-cell office:value-type="float" office:value="-0.5755228031252502" table:style-name="c11">
            <text:p>-0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17778885" table:style-name="c10">
            <text:p>0.17779</text:p>
          </table:table-cell>
          <table:table-cell office:value-type="string" table:style-name="c10">
            <text:p>2026-04-23 21:00</text:p>
          </table:table-cell>
          <table:table-cell office:value-type="float" office:value="0.1755122" table:style-name="c10">
            <text:p>0.17551</text:p>
          </table:table-cell>
          <table:table-cell office:value-type="float" office:value="-1.4778760804178614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00</text:p>
          </table:table-cell>
          <table:table-cell office:value-type="float" office:value="0.1638819" table:style-name="c10">
            <text:p>0.16388</text:p>
          </table:table-cell>
          <table:table-cell office:value-type="string" table:style-name="c10">
            <text:p>2026-05-09 18:00</text:p>
          </table:table-cell>
          <table:table-cell office:value-type="float" office:value="0.16231879999999999" table:style-name="c10">
            <text:p>0.16232</text:p>
          </table:table-cell>
          <table:table-cell office:value-type="float" office:value="-1.1517899665551834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0.16778384999999998" table:style-name="c10">
            <text:p>0.16778</text:p>
          </table:table-cell>
          <table:table-cell office:value-type="string" table:style-name="c10">
            <text:p>2026-05-11 16:00</text:p>
          </table:table-cell>
          <table:table-cell office:value-type="float" office:value="0.16921535000000001" table:style-name="c10">
            <text:p>0.16922</text:p>
          </table:table-cell>
          <table:table-cell office:value-type="float" office:value="0.6515755332530793" table:style-name="c12">
            <text:p>+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14:15</text:p>
          </table:table-cell>
          <table:table-cell office:value-type="float" office:value="0.15367679999999997" table:style-name="c10">
            <text:p>0.15368</text:p>
          </table:table-cell>
          <table:table-cell office:value-type="string" table:style-name="c10">
            <text:p>2026-05-28 14:15</text:p>
          </table:table-cell>
          <table:table-cell office:value-type="float" office:value="0.19400295" table:style-name="c10">
            <text:p>0.194</text:p>
          </table:table-cell>
          <table:table-cell office:value-type="float" office:value="25.988527938472174" table:style-name="c12">
            <text:p>+26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17:15</text:p>
          </table:table-cell>
          <table:table-cell office:value-type="float" office:value="0.21220605" table:style-name="c10">
            <text:p>0.21221</text:p>
          </table:table-cell>
          <table:table-cell office:value-type="string" table:style-name="c10">
            <text:p>2026-05-29 17:15</text:p>
          </table:table-cell>
          <table:table-cell office:value-type="float" office:value="0.21199395000000001" table:style-name="c10">
            <text:p>0.21199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9:45</text:p>
          </table:table-cell>
          <table:table-cell office:value-type="float" office:value="0.23581784999999997" table:style-name="c10">
            <text:p>0.23582</text:p>
          </table:table-cell>
          <table:table-cell office:value-type="string" table:style-name="c10">
            <text:p>2026-05-30 19:45</text:p>
          </table:table-cell>
          <table:table-cell office:value-type="float" office:value="0.24717635000000002" table:style-name="c10">
            <text:p>0.24718</text:p>
          </table:table-cell>
          <table:table-cell office:value-type="float" office:value="4.607112852716644" table:style-name="c12">
            <text:p>+4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45</text:p>
          </table:table-cell>
          <table:table-cell office:value-type="float" office:value="0.24192089999999997" table:style-name="c10">
            <text:p>0.24192</text:p>
          </table:table-cell>
          <table:table-cell office:value-type="string" table:style-name="c10">
            <text:p>2026-06-01 02:45</text:p>
          </table:table-cell>
          <table:table-cell office:value-type="float" office:value="0.27076455" table:style-name="c10">
            <text:p>0.27076</text:p>
          </table:table-cell>
          <table:table-cell office:value-type="float" office:value="11.699027105367943" table:style-name="c12">
            <text:p>+1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30</text:p>
          </table:table-cell>
          <table:table-cell office:value-type="float" office:value="0.26383185" table:style-name="c10">
            <text:p>0.26383</text:p>
          </table:table-cell>
          <table:table-cell office:value-type="string" table:style-name="c10">
            <text:p>2026-06-02 04:00</text:p>
          </table:table-cell>
          <table:table-cell office:value-type="float" office:value="0.23568210000000003" table:style-name="c10">
            <text:p>0.23568</text:p>
          </table:table-cell>
          <table:table-cell office:value-type="float" office:value="-10.848151395633232" table:style-name="c11">
            <text:p>-1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4350171499999997" table:style-name="c1">
            <text:p>1.435</text:p>
          </table:table-cell>
          <table:table-cell office:value-type="string" table:style-name="c1">
            <text:p>2026-03-11 15:00</text:p>
          </table:table-cell>
          <table:table-cell office:value-type="float" office:value="1.3915039000000002" table:style-name="c1">
            <text:p>1.3915</text:p>
          </table:table-cell>
          <table:table-cell office:value-type="float" office:value="-3.2260845311918085" table:style-name="c14">
            <text:p>-3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4:00</text:p>
          </table:table-cell>
          <table:table-cell office:value-type="float" office:value="1.46823375" table:style-name="c1">
            <text:p>1.4682</text:p>
          </table:table-cell>
          <table:table-cell office:value-type="string" table:style-name="c1">
            <text:p>2026-03-17 04:00</text:p>
          </table:table-cell>
          <table:table-cell office:value-type="float" office:value="1.54352785" table:style-name="c1">
            <text:p>1.5435</text:p>
          </table:table-cell>
          <table:table-cell office:value-type="float" office:value="4.918058029101302" table:style-name="c13">
            <text:p>+4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8 23:00</text:p>
          </table:table-cell>
          <table:table-cell office:value-type="float" office:value="1.3439277" table:style-name="c1">
            <text:p>1.3439</text:p>
          </table:table-cell>
          <table:table-cell office:value-type="float" office:value="-2.4045644236923236" table:style-name="c14">
            <text:p>-2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1.39339635" table:style-name="c1">
            <text:p>1.3934</text:p>
          </table:table-cell>
          <table:table-cell office:value-type="string" table:style-name="c1">
            <text:p>2026-04-15 14:00</text:p>
          </table:table-cell>
          <table:table-cell office:value-type="float" office:value="1.3665164" table:style-name="c1">
            <text:p>1.3665</text:p>
          </table:table-cell>
          <table:table-cell office:value-type="float" office:value="-2.125139504176232" table:style-name="c14">
            <text:p>-2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1.47783855" table:style-name="c1">
            <text:p>1.4778</text:p>
          </table:table-cell>
          <table:table-cell office:value-type="string" table:style-name="c1">
            <text:p>2026-04-18 13:15</text:p>
          </table:table-cell>
          <table:table-cell office:value-type="float" office:value="1.4348822" table:style-name="c1">
            <text:p>1.4349</text:p>
          </table:table-cell>
          <table:table-cell office:value-type="float" office:value="-3.1007906457576118" table:style-name="c14">
            <text:p>-3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7 11:00</text:p>
          </table:table-cell>
          <table:table-cell office:value-type="float" office:value="1.4144924" table:style-name="c1">
            <text:p>1.4145</text:p>
          </table:table-cell>
          <table:table-cell office:value-type="float" office:value="-1.3935739732062746" table:style-name="c14">
            <text:p>-1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1.4069030999999999" table:style-name="c1">
            <text:p>1.4069</text:p>
          </table:table-cell>
          <table:table-cell office:value-type="string" table:style-name="c1">
            <text:p>2026-05-05 02:15</text:p>
          </table:table-cell>
          <table:table-cell office:value-type="float" office:value="1.3978007500000003" table:style-name="c1">
            <text:p>1.3978</text:p>
          </table:table-cell>
          <table:table-cell office:value-type="float" office:value="-0.845584439983782" table:style-name="c14">
            <text:p>-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6:30</text:p>
          </table:table-cell>
          <table:table-cell office:value-type="float" office:value="1.4697345" table:style-name="c1">
            <text:p>1.4697</text:p>
          </table:table-cell>
          <table:table-cell office:value-type="string" table:style-name="c1">
            <text:p>2026-05-11 16:30</text:p>
          </table:table-cell>
          <table:table-cell office:value-type="float" office:value="1.4785603500000002" table:style-name="c1">
            <text:p>1.4786</text:p>
          </table:table-cell>
          <table:table-cell office:value-type="float" office:value="0.3994060056663251" table:style-name="c13">
            <text:p>+0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1 01:15</text:p>
          </table:table-cell>
          <table:table-cell office:value-type="float" office:value="1.3413290000000002" table:style-name="c1">
            <text:p>1.3413</text:p>
          </table:table-cell>
          <table:table-cell office:value-type="float" office:value="-1.2853258092069275" table:style-name="c14">
            <text:p>-1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