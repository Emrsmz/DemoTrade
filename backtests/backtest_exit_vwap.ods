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9" style:family="table-cell" style:display-name="c9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C00000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107C41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6.350059925711571" table:style-name="c3">
            <text:p>+6.4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17.126605092114104" table:style-name="c4">
            <text:p>+17.1</text:p>
          </table:table-cell>
          <table:table-cell office:value-type="float" office:value="57" table:style-name="c1">
            <text:p>57</text:p>
          </table:table-cell>
          <table:table-cell office:value-type="float" office:value="42.10526315789473" table:style-name="c1">
            <text:p>42.1</text:p>
          </table:table-cell>
          <table:table-cell office:value-type="float" office:value="13.732136931662334" table:style-name="c1">
            <text:p>13.7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5.633469670865134" table:style-name="c3">
            <text:p>+5.6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43.65776744253692" table:style-name="c5">
            <text:p>-43.7</text:p>
          </table:table-cell>
          <table:table-cell office:value-type="float" office:value="68" table:style-name="c1">
            <text:p>68</text:p>
          </table:table-cell>
          <table:table-cell office:value-type="float" office:value="23.52941176470588" table:style-name="c1">
            <text:p>23.5</text:p>
          </table:table-cell>
          <table:table-cell office:value-type="float" office:value="24.028279808846715" table:style-name="c1">
            <text:p>24.0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-9.997387942963451" table:style-name="c6">
            <text:p>-10.0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68.14410608968161" table:style-name="c5">
            <text:p>-68.1</text:p>
          </table:table-cell>
          <table:table-cell office:value-type="float" office:value="59" table:style-name="c1">
            <text:p>59</text:p>
          </table:table-cell>
          <table:table-cell office:value-type="float" office:value="23.728813559322035" table:style-name="c1">
            <text:p>23.7</text:p>
          </table:table-cell>
          <table:table-cell office:value-type="float" office:value="24.66328184775924" table:style-name="c1">
            <text:p>24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10.067534983008795" table:style-name="c6">
            <text:p>-10.1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29.53345205960753" table:style-name="c5">
            <text:p>-29.5</text:p>
          </table:table-cell>
          <table:table-cell office:value-type="float" office:value="51" table:style-name="c1">
            <text:p>51</text:p>
          </table:table-cell>
          <table:table-cell office:value-type="float" office:value="25.49019607843137" table:style-name="c1">
            <text:p>25.5</text:p>
          </table:table-cell>
          <table:table-cell office:value-type="float" office:value="11.366111535406876" table:style-name="c1">
            <text:p>1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-10.134786933852489" table:style-name="c6">
            <text:p>-10.1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46.026434789382954" table:style-name="c5">
            <text:p>-46.0</text:p>
          </table:table-cell>
          <table:table-cell office:value-type="float" office:value="78" table:style-name="c1">
            <text:p>78</text:p>
          </table:table-cell>
          <table:table-cell office:value-type="float" office:value="32.05128205128205" table:style-name="c1">
            <text:p>32.1</text:p>
          </table:table-cell>
          <table:table-cell office:value-type="float" office:value="20.778042407588217" table:style-name="c1">
            <text:p>20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-12.219531175906742" table:style-name="c6">
            <text:p>-12.2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109.06703850728503" table:style-name="c5">
            <text:p>-109.1</text:p>
          </table:table-cell>
          <table:table-cell office:value-type="float" office:value="73" table:style-name="c1">
            <text:p>73</text:p>
          </table:table-cell>
          <table:table-cell office:value-type="float" office:value="26.027397260273972" table:style-name="c1">
            <text:p>26.0</text:p>
          </table:table-cell>
          <table:table-cell office:value-type="float" office:value="33.552617801032184" table:style-name="c1">
            <text:p>33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13.645213993153948" table:style-name="c6">
            <text:p>-13.6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-5.132493836598179" table:style-name="c5">
            <text:p>-5.1</text:p>
          </table:table-cell>
          <table:table-cell office:value-type="float" office:value="69" table:style-name="c1">
            <text:p>69</text:p>
          </table:table-cell>
          <table:table-cell office:value-type="float" office:value="23.18840579710145" table:style-name="c1">
            <text:p>23.2</text:p>
          </table:table-cell>
          <table:table-cell office:value-type="float" office:value="22.046723565964438" table:style-name="c1">
            <text:p>22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14.273754298962626" table:style-name="c6">
            <text:p>-14.3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17.934312361399318" table:style-name="c5">
            <text:p>-17.9</text:p>
          </table:table-cell>
          <table:table-cell office:value-type="float" office:value="52" table:style-name="c1">
            <text:p>52</text:p>
          </table:table-cell>
          <table:table-cell office:value-type="float" office:value="25.0" table:style-name="c1">
            <text:p>25.0</text:p>
          </table:table-cell>
          <table:table-cell office:value-type="float" office:value="15.870699020471363" table:style-name="c1">
            <text:p>15.9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14.991395369071553" table:style-name="c6">
            <text:p>-15.0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3.5135514979126885" table:style-name="c4">
            <text:p>+3.5</text:p>
          </table:table-cell>
          <table:table-cell office:value-type="float" office:value="51" table:style-name="c1">
            <text:p>51</text:p>
          </table:table-cell>
          <table:table-cell office:value-type="float" office:value="31.372549019607842" table:style-name="c1">
            <text:p>31.4</text:p>
          </table:table-cell>
          <table:table-cell office:value-type="float" office:value="16.022314738673796" table:style-name="c1">
            <text:p>16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15.09157641168796" table:style-name="c6">
            <text:p>-15.1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-3.0050396693314454" table:style-name="c5">
            <text:p>-3.0</text:p>
          </table:table-cell>
          <table:table-cell office:value-type="float" office:value="43" table:style-name="c1">
            <text:p>43</text:p>
          </table:table-cell>
          <table:table-cell office:value-type="float" office:value="23.25581395348837" table:style-name="c1">
            <text:p>23.3</text:p>
          </table:table-cell>
          <table:table-cell office:value-type="float" office:value="15.536562415621635" table:style-name="c1">
            <text:p>15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16.341183291616378" table:style-name="c6">
            <text:p>-16.3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9.558097283923185" table:style-name="c4">
            <text:p>+9.6</text:p>
          </table:table-cell>
          <table:table-cell office:value-type="float" office:value="47" table:style-name="c1">
            <text:p>47</text:p>
          </table:table-cell>
          <table:table-cell office:value-type="float" office:value="31.914893617021278" table:style-name="c1">
            <text:p>31.9</text:p>
          </table:table-cell>
          <table:table-cell office:value-type="float" office:value="16.897164773318927" table:style-name="c1">
            <text:p>16.9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-18.729792752080403" table:style-name="c6">
            <text:p>-18.7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-13.623692275337834" table:style-name="c5">
            <text:p>-13.6</text:p>
          </table:table-cell>
          <table:table-cell office:value-type="float" office:value="64" table:style-name="c1">
            <text:p>64</text:p>
          </table:table-cell>
          <table:table-cell office:value-type="float" office:value="21.875" table:style-name="c1">
            <text:p>21.9</text:p>
          </table:table-cell>
          <table:table-cell office:value-type="float" office:value="18.729792752080403" table:style-name="c1">
            <text:p>18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18.839671012012786" table:style-name="c6">
            <text:p>-18.8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-8.236406285256223" table:style-name="c5">
            <text:p>-8.2</text:p>
          </table:table-cell>
          <table:table-cell office:value-type="float" office:value="48" table:style-name="c1">
            <text:p>48</text:p>
          </table:table-cell>
          <table:table-cell office:value-type="float" office:value="12.5" table:style-name="c1">
            <text:p>12.5</text:p>
          </table:table-cell>
          <table:table-cell office:value-type="float" office:value="20.076338786315045" table:style-name="c1">
            <text:p>2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18.886744250995218" table:style-name="c6">
            <text:p>-18.9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2.7844514011786963" table:style-name="c4">
            <text:p>+2.8</text:p>
          </table:table-cell>
          <table:table-cell office:value-type="float" office:value="56" table:style-name="c1">
            <text:p>56</text:p>
          </table:table-cell>
          <table:table-cell office:value-type="float" office:value="26.785714285714285" table:style-name="c1">
            <text:p>26.8</text:p>
          </table:table-cell>
          <table:table-cell office:value-type="float" office:value="20.706886136973043" table:style-name="c1">
            <text:p>20.7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18.90366958781916" table:style-name="c6">
            <text:p>-18.9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19.107644598429758" table:style-name="c4">
            <text:p>+19.1</text:p>
          </table:table-cell>
          <table:table-cell office:value-type="float" office:value="38" table:style-name="c1">
            <text:p>38</text:p>
          </table:table-cell>
          <table:table-cell office:value-type="float" office:value="15.789473684210526" table:style-name="c1">
            <text:p>15.8</text:p>
          </table:table-cell>
          <table:table-cell office:value-type="float" office:value="20.08984101093837" table:style-name="c1">
            <text:p>2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19.214818385029346" table:style-name="c6">
            <text:p>-19.2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-11.094168733057195" table:style-name="c5">
            <text:p>-11.1</text:p>
          </table:table-cell>
          <table:table-cell office:value-type="float" office:value="61" table:style-name="c1">
            <text:p>61</text:p>
          </table:table-cell>
          <table:table-cell office:value-type="float" office:value="21.311475409836063" table:style-name="c1">
            <text:p>21.3</text:p>
          </table:table-cell>
          <table:table-cell office:value-type="float" office:value="23.693617152748566" table:style-name="c1">
            <text:p>23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19.263716014236355" table:style-name="c6">
            <text:p>-19.3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-13.568735319255659" table:style-name="c5">
            <text:p>-13.6</text:p>
          </table:table-cell>
          <table:table-cell office:value-type="float" office:value="71" table:style-name="c1">
            <text:p>71</text:p>
          </table:table-cell>
          <table:table-cell office:value-type="float" office:value="22.535211267605636" table:style-name="c1">
            <text:p>22.5</text:p>
          </table:table-cell>
          <table:table-cell office:value-type="float" office:value="23.70557349795148" table:style-name="c1">
            <text:p>23.7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19.917162148709952" table:style-name="c6">
            <text:p>-19.9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-7.3520074409357505" table:style-name="c5">
            <text:p>-7.4</text:p>
          </table:table-cell>
          <table:table-cell office:value-type="float" office:value="57" table:style-name="c1">
            <text:p>57</text:p>
          </table:table-cell>
          <table:table-cell office:value-type="float" office:value="21.052631578947366" table:style-name="c1">
            <text:p>21.1</text:p>
          </table:table-cell>
          <table:table-cell office:value-type="float" office:value="20.83511192293017" table:style-name="c1">
            <text:p>2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21.249392877397327" table:style-name="c6">
            <text:p>-21.2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-16.76022879071001" table:style-name="c5">
            <text:p>-16.8</text:p>
          </table:table-cell>
          <table:table-cell office:value-type="float" office:value="61" table:style-name="c1">
            <text:p>61</text:p>
          </table:table-cell>
          <table:table-cell office:value-type="float" office:value="22.950819672131146" table:style-name="c1">
            <text:p>23.0</text:p>
          </table:table-cell>
          <table:table-cell office:value-type="float" office:value="23.215443752218835" table:style-name="c1">
            <text:p>23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21.524098688098537" table:style-name="c6">
            <text:p>-21.5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21.737545859923497" table:style-name="c5">
            <text:p>-21.7</text:p>
          </table:table-cell>
          <table:table-cell office:value-type="float" office:value="64" table:style-name="c1">
            <text:p>64</text:p>
          </table:table-cell>
          <table:table-cell office:value-type="float" office:value="28.125" table:style-name="c1">
            <text:p>28.1</text:p>
          </table:table-cell>
          <table:table-cell office:value-type="float" office:value="23.446362533891676" table:style-name="c1">
            <text:p>23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-22.11567172722217" table:style-name="c6">
            <text:p>-22.1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53.3899278721122" table:style-name="c5">
            <text:p>-153.4</text:p>
          </table:table-cell>
          <table:table-cell office:value-type="float" office:value="94" table:style-name="c1">
            <text:p>94</text:p>
          </table:table-cell>
          <table:table-cell office:value-type="float" office:value="24.46808510638298" table:style-name="c1">
            <text:p>24.5</text:p>
          </table:table-cell>
          <table:table-cell office:value-type="float" office:value="25.973119896732577" table:style-name="c1">
            <text:p>26.0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23.005474869596174" table:style-name="c6">
            <text:p>-23.0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-11.763979947990816" table:style-name="c5">
            <text:p>-11.8</text:p>
          </table:table-cell>
          <table:table-cell office:value-type="float" office:value="55" table:style-name="c1">
            <text:p>55</text:p>
          </table:table-cell>
          <table:table-cell office:value-type="float" office:value="20.0" table:style-name="c1">
            <text:p>20.0</text:p>
          </table:table-cell>
          <table:table-cell office:value-type="float" office:value="23.56700819742151" table:style-name="c1">
            <text:p>23.6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24.474811820623497" table:style-name="c6">
            <text:p>-24.5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-20.276386891977232" table:style-name="c5">
            <text:p>-20.3</text:p>
          </table:table-cell>
          <table:table-cell office:value-type="float" office:value="65" table:style-name="c1">
            <text:p>65</text:p>
          </table:table-cell>
          <table:table-cell office:value-type="float" office:value="18.461538461538463" table:style-name="c1">
            <text:p>18.5</text:p>
          </table:table-cell>
          <table:table-cell office:value-type="float" office:value="24.474811820623497" table:style-name="c1">
            <text:p>24.5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24.870353458023942" table:style-name="c6">
            <text:p>-24.9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-14.741257132303994" table:style-name="c5">
            <text:p>-14.7</text:p>
          </table:table-cell>
          <table:table-cell office:value-type="float" office:value="73" table:style-name="c1">
            <text:p>73</text:p>
          </table:table-cell>
          <table:table-cell office:value-type="float" office:value="28.767123287671232" table:style-name="c1">
            <text:p>28.8</text:p>
          </table:table-cell>
          <table:table-cell office:value-type="float" office:value="24.870353458023942" table:style-name="c1">
            <text:p>24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6.555400000213407" table:style-name="c6">
            <text:p>-26.6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-18.908967625346527" table:style-name="c5">
            <text:p>-18.9</text:p>
          </table:table-cell>
          <table:table-cell office:value-type="float" office:value="59" table:style-name="c1">
            <text:p>59</text:p>
          </table:table-cell>
          <table:table-cell office:value-type="float" office:value="20.33898305084746" table:style-name="c1">
            <text:p>20.3</text:p>
          </table:table-cell>
          <table:table-cell office:value-type="float" office:value="26.839307588186422" table:style-name="c1">
            <text:p>26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28.158333470447687" table:style-name="c6">
            <text:p>-28.2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31.844044738797045" table:style-name="c5">
            <text:p>-31.8</text:p>
          </table:table-cell>
          <table:table-cell office:value-type="float" office:value="72" table:style-name="c1">
            <text:p>72</text:p>
          </table:table-cell>
          <table:table-cell office:value-type="float" office:value="15.277777777777779" table:style-name="c1">
            <text:p>15.3</text:p>
          </table:table-cell>
          <table:table-cell office:value-type="float" office:value="28.29351097802817" table:style-name="c1">
            <text:p>28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28.65012236890229" table:style-name="c6">
            <text:p>-28.7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-25.435836654616576" table:style-name="c5">
            <text:p>-25.4</text:p>
          </table:table-cell>
          <table:table-cell office:value-type="float" office:value="70" table:style-name="c1">
            <text:p>70</text:p>
          </table:table-cell>
          <table:table-cell office:value-type="float" office:value="24.285714285714285" table:style-name="c1">
            <text:p>24.3</text:p>
          </table:table-cell>
          <table:table-cell office:value-type="float" office:value="29.774479634932888" table:style-name="c1">
            <text:p>29.8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30.145441942950868" table:style-name="c6">
            <text:p>-30.1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-19.06122122659075" table:style-name="c5">
            <text:p>-19.1</text:p>
          </table:table-cell>
          <table:table-cell office:value-type="float" office:value="68" table:style-name="c1">
            <text:p>68</text:p>
          </table:table-cell>
          <table:table-cell office:value-type="float" office:value="19.11764705882353" table:style-name="c1">
            <text:p>19.1</text:p>
          </table:table-cell>
          <table:table-cell office:value-type="float" office:value="30.606492723714684" table:style-name="c1">
            <text:p>30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32.290909770425536" table:style-name="c6">
            <text:p>-32.3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-4.869936363501292" table:style-name="c5">
            <text:p>-4.9</text:p>
          </table:table-cell>
          <table:table-cell office:value-type="float" office:value="63" table:style-name="c1">
            <text:p>63</text:p>
          </table:table-cell>
          <table:table-cell office:value-type="float" office:value="20.634920634920633" table:style-name="c1">
            <text:p>20.6</text:p>
          </table:table-cell>
          <table:table-cell office:value-type="float" office:value="32.290909770425536" table:style-name="c1">
            <text:p>32.3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32.42302318826241" table:style-name="c6">
            <text:p>-32.4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-27.841047075341667" table:style-name="c5">
            <text:p>-27.8</text:p>
          </table:table-cell>
          <table:table-cell office:value-type="float" office:value="73" table:style-name="c1">
            <text:p>73</text:p>
          </table:table-cell>
          <table:table-cell office:value-type="float" office:value="20.54794520547945" table:style-name="c1">
            <text:p>20.5</text:p>
          </table:table-cell>
          <table:table-cell office:value-type="float" office:value="32.46710129642211" table:style-name="c1">
            <text:p>32.5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-18.46658143788981" table:style-name="c8">
            <text:p>-18.5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23.030522837177294" table:style-name="c8">
            <text:p>-23.0</text:p>
          </table:table-cell>
          <table:table-cell office:value-type="float" office:value="1860" table:style-name="c7">
            <text:p>1860</text:p>
          </table:table-cell>
          <table:table-cell office:value-type="float" office:value="23.74963623422433" table:style-name="c7">
            <text:p>23.7</text:p>
          </table:table-cell>
          <table:table-cell office:value-type="float" office:value="22.93833325856349" table:style-name="c7">
            <text:p>22.9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0:45</text:p>
          </table:table-cell>
          <table:table-cell office:value-type="float" office:value="0.27593789999999996" table:style-name="c10">
            <text:p>0.27594</text:p>
          </table:table-cell>
          <table:table-cell office:value-type="string" table:style-name="c10">
            <text:p>2026-03-05 11:45</text:p>
          </table:table-cell>
          <table:table-cell office:value-type="float" office:value="0.27336325000000006" table:style-name="c10">
            <text:p>0.27336</text:p>
          </table:table-cell>
          <table:table-cell office:value-type="float" office:value="-1.1310889648540212" table:style-name="c11">
            <text:p>-1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3:45</text:p>
          </table:table-cell>
          <table:table-cell office:value-type="float" office:value="0.26793389999999995" table:style-name="c10">
            <text:p>0.26793</text:p>
          </table:table-cell>
          <table:table-cell office:value-type="string" table:style-name="c10">
            <text:p>2026-03-06 14:00</text:p>
          </table:table-cell>
          <table:table-cell office:value-type="float" office:value="0.26396795" table:style-name="c10">
            <text:p>0.26397</text:p>
          </table:table-cell>
          <table:table-cell office:value-type="float" office:value="-1.6771382538939505" table:style-name="c11">
            <text:p>-1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0.26603295" table:style-name="c10">
            <text:p>0.26603</text:p>
          </table:table-cell>
          <table:table-cell office:value-type="string" table:style-name="c10">
            <text:p>2026-03-10 11:45</text:p>
          </table:table-cell>
          <table:table-cell office:value-type="float" office:value="0.26426780000000005" table:style-name="c10">
            <text:p>0.26427</text:p>
          </table:table-cell>
          <table:table-cell office:value-type="float" office:value="-0.8620816828140754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4:45</text:p>
          </table:table-cell>
          <table:table-cell office:value-type="float" office:value="0.2669334" table:style-name="c10">
            <text:p>0.26693</text:p>
          </table:table-cell>
          <table:table-cell office:value-type="string" table:style-name="c10">
            <text:p>2026-03-10 17:45</text:p>
          </table:table-cell>
          <table:table-cell office:value-type="float" office:value="0.26836575" table:style-name="c10">
            <text:p>0.26837</text:p>
          </table:table-cell>
          <table:table-cell office:value-type="float" office:value="0.335621868881919" table:style-name="c12">
            <text:p>+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1:15</text:p>
          </table:table-cell>
          <table:table-cell office:value-type="float" office:value="0.25992989999999994" table:style-name="c10">
            <text:p>0.25993</text:p>
          </table:table-cell>
          <table:table-cell office:value-type="string" table:style-name="c10">
            <text:p>2026-03-11 15:15</text:p>
          </table:table-cell>
          <table:table-cell office:value-type="float" office:value="0.26156915000000003" table:style-name="c10">
            <text:p>0.26157</text:p>
          </table:table-cell>
          <table:table-cell office:value-type="float" office:value="0.42949013143547266" table:style-name="c12">
            <text:p>+0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7:30</text:p>
          </table:table-cell>
          <table:table-cell office:value-type="float" office:value="0.26583284999999995" table:style-name="c10">
            <text:p>0.26583</text:p>
          </table:table-cell>
          <table:table-cell office:value-type="string" table:style-name="c10">
            <text:p>2026-03-11 20:30</text:p>
          </table:table-cell>
          <table:table-cell office:value-type="float" office:value="0.26376805000000003" table:style-name="c10">
            <text:p>0.26377</text:p>
          </table:table-cell>
          <table:table-cell office:value-type="float" office:value="-0.9750760043199747" table:style-name="c11">
            <text:p>-1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30</text:p>
          </table:table-cell>
          <table:table-cell office:value-type="float" office:value="0.2615307" table:style-name="c10">
            <text:p>0.26153</text:p>
          </table:table-cell>
          <table:table-cell office:value-type="string" table:style-name="c10">
            <text:p>2026-03-12 13:30</text:p>
          </table:table-cell>
          <table:table-cell office:value-type="float" office:value="0.26176905000000006" table:style-name="c10">
            <text:p>0.26177</text:p>
          </table:table-cell>
          <table:table-cell office:value-type="float" office:value="-0.1089456537798239" table:style-name="c11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0.26953469999999996" table:style-name="c10">
            <text:p>0.26953</text:p>
          </table:table-cell>
          <table:table-cell office:value-type="string" table:style-name="c10">
            <text:p>2026-03-13 07:00</text:p>
          </table:table-cell>
          <table:table-cell office:value-type="float" office:value="0.2720639" table:style-name="c10">
            <text:p>0.27206</text:p>
          </table:table-cell>
          <table:table-cell office:value-type="float" office:value="0.7365820667617484" table:style-name="c12">
            <text:p>+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2:45</text:p>
          </table:table-cell>
          <table:table-cell office:value-type="float" office:value="0.2767383" table:style-name="c10">
            <text:p>0.27674</text:p>
          </table:table-cell>
          <table:table-cell office:value-type="string" table:style-name="c10">
            <text:p>2026-03-13 14:45</text:p>
          </table:table-cell>
          <table:table-cell office:value-type="float" office:value="0.27546220000000005" table:style-name="c10">
            <text:p>0.27546</text:p>
          </table:table-cell>
          <table:table-cell office:value-type="float" office:value="-0.6600997902350136" table:style-name="c11">
            <text:p>-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4:45</text:p>
          </table:table-cell>
          <table:table-cell office:value-type="float" office:value="0.2665332" table:style-name="c10">
            <text:p>0.26653</text:p>
          </table:table-cell>
          <table:table-cell office:value-type="string" table:style-name="c10">
            <text:p>2026-03-14 05:15</text:p>
          </table:table-cell>
          <table:table-cell office:value-type="float" office:value="0.2646676" table:style-name="c10">
            <text:p>0.26467</text:p>
          </table:table-cell>
          <table:table-cell office:value-type="float" office:value="-0.8984511244377824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0.26683334999999997" table:style-name="c10">
            <text:p>0.26683</text:p>
          </table:table-cell>
          <table:table-cell office:value-type="string" table:style-name="c10">
            <text:p>2026-03-16 01:15</text:p>
          </table:table-cell>
          <table:table-cell office:value-type="float" office:value="0.2692653" table:style-name="c10">
            <text:p>0.26927</text:p>
          </table:table-cell>
          <table:table-cell office:value-type="float" office:value="0.7096896491012306" table:style-name="c12">
            <text:p>+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2783391" table:style-name="c10">
            <text:p>0.27834</text:p>
          </table:table-cell>
          <table:table-cell office:value-type="string" table:style-name="c10">
            <text:p>2026-03-16 08:45</text:p>
          </table:table-cell>
          <table:table-cell office:value-type="float" office:value="0.2854572" table:style-name="c10">
            <text:p>0.28546</text:p>
          </table:table-cell>
          <table:table-cell office:value-type="float" office:value="2.3523360739472254" table:style-name="c12">
            <text:p>+2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30</text:p>
          </table:table-cell>
          <table:table-cell office:value-type="float" office:value="0.2877438" table:style-name="c10">
            <text:p>0.28774</text:p>
          </table:table-cell>
          <table:table-cell office:value-type="string" table:style-name="c10">
            <text:p>2026-03-17 12:15</text:p>
          </table:table-cell>
          <table:table-cell office:value-type="float" office:value="0.2862568" table:style-name="c10">
            <text:p>0.28626</text:p>
          </table:table-cell>
          <table:table-cell office:value-type="float" office:value="-0.7156461210285014" table:style-name="c11">
            <text:p>-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5:15</text:p>
          </table:table-cell>
          <table:table-cell office:value-type="float" office:value="0.29444715" table:style-name="c10">
            <text:p>0.29445</text:p>
          </table:table-cell>
          <table:table-cell office:value-type="string" table:style-name="c10">
            <text:p>2026-03-18 05:45</text:p>
          </table:table-cell>
          <table:table-cell office:value-type="float" office:value="0.29095445000000003" table:style-name="c10">
            <text:p>0.29095</text:p>
          </table:table-cell>
          <table:table-cell office:value-type="float" office:value="-1.3837179084769446" table:style-name="c11">
            <text:p>-1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45</text:p>
          </table:table-cell>
          <table:table-cell office:value-type="float" office:value="0.264132" table:style-name="c10">
            <text:p>0.26413</text:p>
          </table:table-cell>
          <table:table-cell office:value-type="string" table:style-name="c10">
            <text:p>2026-03-23 22:30</text:p>
          </table:table-cell>
          <table:table-cell office:value-type="float" office:value="0.26156915000000003" table:style-name="c10">
            <text:p>0.26157</text:p>
          </table:table-cell>
          <table:table-cell office:value-type="float" office:value="-1.168251757019212" table:style-name="c11">
            <text:p>-1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8:15</text:p>
          </table:table-cell>
          <table:table-cell office:value-type="float" office:value="0.26783385" table:style-name="c10">
            <text:p>0.26783</text:p>
          </table:table-cell>
          <table:table-cell office:value-type="string" table:style-name="c10">
            <text:p>2026-03-24 10:30</text:p>
          </table:table-cell>
          <table:table-cell office:value-type="float" office:value="0.26416785" table:style-name="c10">
            <text:p>0.26417</text:p>
          </table:table-cell>
          <table:table-cell office:value-type="float" office:value="-1.5659228779894674" table:style-name="c11">
            <text:p>-1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0:15</text:p>
          </table:table-cell>
          <table:table-cell office:value-type="float" office:value="0.26843415" table:style-name="c10">
            <text:p>0.26843</text:p>
          </table:table-cell>
          <table:table-cell office:value-type="string" table:style-name="c10">
            <text:p>2026-03-25 02:45</text:p>
          </table:table-cell>
          <table:table-cell office:value-type="float" office:value="0.26676655000000005" table:style-name="c10">
            <text:p>0.26677</text:p>
          </table:table-cell>
          <table:table-cell office:value-type="float" office:value="-0.8198905889768349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6:30</text:p>
          </table:table-cell>
          <table:table-cell office:value-type="float" office:value="0.2703351" table:style-name="c10">
            <text:p>0.27034</text:p>
          </table:table-cell>
          <table:table-cell office:value-type="string" table:style-name="c10">
            <text:p>2026-03-25 13:45</text:p>
          </table:table-cell>
          <table:table-cell office:value-type="float" office:value="0.27296345000000005" table:style-name="c10">
            <text:p>0.27296</text:p>
          </table:table-cell>
          <table:table-cell office:value-type="float" office:value="0.7704127445714803" table:style-name="c12">
            <text:p>+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3:00</text:p>
          </table:table-cell>
          <table:table-cell office:value-type="float" office:value="0.27083535" table:style-name="c10">
            <text:p>0.27084</text:p>
          </table:table-cell>
          <table:table-cell office:value-type="string" table:style-name="c10">
            <text:p>2026-03-25 23:45</text:p>
          </table:table-cell>
          <table:table-cell office:value-type="float" office:value="0.2696651" table:style-name="c10">
            <text:p>0.26967</text:p>
          </table:table-cell>
          <table:table-cell office:value-type="float" office:value="-0.6311253441989684" table:style-name="c11">
            <text:p>-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5:00</text:p>
          </table:table-cell>
          <table:table-cell office:value-type="float" office:value="0.24772379999999997" table:style-name="c10">
            <text:p>0.24772</text:p>
          </table:table-cell>
          <table:table-cell office:value-type="string" table:style-name="c10">
            <text:p>2026-04-03 15:45</text:p>
          </table:table-cell>
          <table:table-cell office:value-type="float" office:value="0.2466766" table:style-name="c10">
            <text:p>0.24668</text:p>
          </table:table-cell>
          <table:table-cell office:value-type="float" office:value="-0.6217838267457476" table:style-name="c11">
            <text:p>-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0.2465232" table:style-name="c10">
            <text:p>0.24652</text:p>
          </table:table-cell>
          <table:table-cell office:value-type="string" table:style-name="c10">
            <text:p>2026-04-04 21:00</text:p>
          </table:table-cell>
          <table:table-cell office:value-type="float" office:value="0.24727630000000003" table:style-name="c10">
            <text:p>0.24728</text:p>
          </table:table-cell>
          <table:table-cell office:value-type="float" office:value="0.10497781803093797" table:style-name="c12">
            <text:p>+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4-06 06:30</text:p>
          </table:table-cell>
          <table:table-cell office:value-type="float" office:value="0.25617185" table:style-name="c10">
            <text:p>0.25617</text:p>
          </table:table-cell>
          <table:table-cell office:value-type="float" office:value="0.32665742976569767" table:style-name="c12">
            <text:p>+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0:30</text:p>
          </table:table-cell>
          <table:table-cell office:value-type="float" office:value="0.25842914999999994" table:style-name="c10">
            <text:p>0.25843</text:p>
          </table:table-cell>
          <table:table-cell office:value-type="string" table:style-name="c10">
            <text:p>2026-04-06 11:00</text:p>
          </table:table-cell>
          <table:table-cell office:value-type="float" office:value="0.25657165" table:style-name="c10">
            <text:p>0.25657</text:p>
          </table:table-cell>
          <table:table-cell office:value-type="float" office:value="-0.9172288529950889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0.26283134999999996" table:style-name="c10">
            <text:p>0.26283</text:p>
          </table:table-cell>
          <table:table-cell office:value-type="string" table:style-name="c10">
            <text:p>2026-04-08 03:00</text:p>
          </table:table-cell>
          <table:table-cell office:value-type="float" office:value="0.26096945" table:style-name="c10">
            <text:p>0.26097</text:p>
          </table:table-cell>
          <table:table-cell office:value-type="float" office:value="-0.9068849399243906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0.2583291" table:style-name="c10">
            <text:p>0.25833</text:p>
          </table:table-cell>
          <table:table-cell office:value-type="string" table:style-name="c10">
            <text:p>2026-04-09 23:00</text:p>
          </table:table-cell>
          <table:table-cell office:value-type="float" office:value="0.25597195" table:style-name="c10">
            <text:p>0.25597</text:p>
          </table:table-cell>
          <table:table-cell office:value-type="float" office:value="-1.1105361060948948" table:style-name="c11">
            <text:p>-1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0.2549274" table:style-name="c10">
            <text:p>0.25493</text:p>
          </table:table-cell>
          <table:table-cell office:value-type="string" table:style-name="c10">
            <text:p>2026-04-10 17:45</text:p>
          </table:table-cell>
          <table:table-cell office:value-type="float" office:value="0.25397295000000003" table:style-name="c10">
            <text:p>0.25397</text:p>
          </table:table-cell>
          <table:table-cell office:value-type="float" office:value="-0.5735522847093" table:style-name="c11">
            <text:p>-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0.25782884999999994" table:style-name="c10">
            <text:p>0.25783</text:p>
          </table:table-cell>
          <table:table-cell office:value-type="string" table:style-name="c10">
            <text:p>2026-04-10 21:15</text:p>
          </table:table-cell>
          <table:table-cell office:value-type="float" office:value="0.25587200000000004" table:style-name="c10">
            <text:p>0.25587</text:p>
          </table:table-cell>
          <table:table-cell office:value-type="float" office:value="-0.9573552874319047" table:style-name="c11">
            <text:p>-1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7:00</text:p>
          </table:table-cell>
          <table:table-cell office:value-type="float" office:value="0.24532259999999997" table:style-name="c10">
            <text:p>0.24532</text:p>
          </table:table-cell>
          <table:table-cell office:value-type="string" table:style-name="c10">
            <text:p>2026-04-15 23:00</text:p>
          </table:table-cell>
          <table:table-cell office:value-type="float" office:value="0.24707640000000003" table:style-name="c10">
            <text:p>0.24708</text:p>
          </table:table-cell>
          <table:table-cell office:value-type="float" office:value="0.5135663311900407" table:style-name="c12">
            <text:p>+0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2491245" table:style-name="c10">
            <text:p>0.24912</text:p>
          </table:table-cell>
          <table:table-cell office:value-type="string" table:style-name="c10">
            <text:p>2026-04-16 06:45</text:p>
          </table:table-cell>
          <table:table-cell office:value-type="float" office:value="0.24897545000000001" table:style-name="c10">
            <text:p>0.24898</text:p>
          </table:table-cell>
          <table:table-cell office:value-type="float" office:value="-0.25960992377305203" table:style-name="c11">
            <text:p>-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0.25282635" table:style-name="c10">
            <text:p>0.25283</text:p>
          </table:table-cell>
          <table:table-cell office:value-type="string" table:style-name="c10">
            <text:p>2026-04-16 14:00</text:p>
          </table:table-cell>
          <table:table-cell office:value-type="float" office:value="0.24917535000000002" table:style-name="c10">
            <text:p>0.24918</text:p>
          </table:table-cell>
          <table:table-cell office:value-type="float" office:value="-1.641087459693169" table:style-name="c11">
            <text:p>-1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9:00</text:p>
          </table:table-cell>
          <table:table-cell office:value-type="float" office:value="0.2591295" table:style-name="c10">
            <text:p>0.25913</text:p>
          </table:table-cell>
          <table:table-cell office:value-type="string" table:style-name="c10">
            <text:p>2026-04-17 00:15</text:p>
          </table:table-cell>
          <table:table-cell office:value-type="float" office:value="0.25877055000000004" table:style-name="c10">
            <text:p>0.25877</text:p>
          </table:table-cell>
          <table:table-cell office:value-type="float" office:value="-0.33814456843007656" table:style-name="c11">
            <text:p>-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15</text:p>
          </table:table-cell>
          <table:table-cell office:value-type="float" office:value="0.25582784999999997" table:style-name="c10">
            <text:p>0.25583</text:p>
          </table:table-cell>
          <table:table-cell office:value-type="string" table:style-name="c10">
            <text:p>2026-04-17 10:30</text:p>
          </table:table-cell>
          <table:table-cell office:value-type="float" office:value="0.25557215" table:style-name="c10">
            <text:p>0.25557</text:p>
          </table:table-cell>
          <table:table-cell office:value-type="float" office:value="-0.2996502248875266" table:style-name="c11">
            <text:p>-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2:15</text:p>
          </table:table-cell>
          <table:table-cell office:value-type="float" office:value="0.25842914999999994" table:style-name="c10">
            <text:p>0.25843</text:p>
          </table:table-cell>
          <table:table-cell office:value-type="string" table:style-name="c10">
            <text:p>2026-04-17 15:45</text:p>
          </table:table-cell>
          <table:table-cell office:value-type="float" office:value="0.26256865" table:style-name="c10">
            <text:p>0.26257</text:p>
          </table:table-cell>
          <table:table-cell office:value-type="float" office:value="1.3986910024082366" table:style-name="c12">
            <text:p>+1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45</text:p>
          </table:table-cell>
          <table:table-cell office:value-type="float" office:value="0.2511255" table:style-name="c10">
            <text:p>0.25113</text:p>
          </table:table-cell>
          <table:table-cell office:value-type="string" table:style-name="c10">
            <text:p>2026-04-21 11:15</text:p>
          </table:table-cell>
          <table:table-cell office:value-type="float" office:value="0.249875" table:style-name="c10">
            <text:p>0.24988</text:p>
          </table:table-cell>
          <table:table-cell office:value-type="float" office:value="-0.6968627737923727" table:style-name="c11">
            <text:p>-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0.25382685" table:style-name="c10">
            <text:p>0.25383</text:p>
          </table:table-cell>
          <table:table-cell office:value-type="string" table:style-name="c10">
            <text:p>2026-04-22 07:30</text:p>
          </table:table-cell>
          <table:table-cell office:value-type="float" office:value="0.2546726" table:style-name="c10">
            <text:p>0.25467</text:p>
          </table:table-cell>
          <table:table-cell office:value-type="float" office:value="0.1326335147759483" table:style-name="c12">
            <text:p>+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3:30</text:p>
          </table:table-cell>
          <table:table-cell office:value-type="float" office:value="0.2553276" table:style-name="c10">
            <text:p>0.25533</text:p>
          </table:table-cell>
          <table:table-cell office:value-type="string" table:style-name="c10">
            <text:p>2026-04-22 14:00</text:p>
          </table:table-cell>
          <table:table-cell office:value-type="float" office:value="0.2548725" table:style-name="c10">
            <text:p>0.25487</text:p>
          </table:table-cell>
          <table:table-cell office:value-type="float" office:value="-0.3777852952442151" table:style-name="c11">
            <text:p>-0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6:45</text:p>
          </table:table-cell>
          <table:table-cell office:value-type="float" office:value="0.25192590000000004" table:style-name="c10">
            <text:p>0.25193</text:p>
          </table:table-cell>
          <table:table-cell office:value-type="string" table:style-name="c10">
            <text:p>2026-04-26 13:30</text:p>
          </table:table-cell>
          <table:table-cell office:value-type="float" office:value="0.25217385000000003" table:style-name="c10">
            <text:p>0.25217</text:p>
          </table:table-cell>
          <table:table-cell office:value-type="float" office:value="-0.10167494733571703" table:style-name="c11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0.25302645" table:style-name="c10">
            <text:p>0.25303</text:p>
          </table:table-cell>
          <table:table-cell office:value-type="string" table:style-name="c10">
            <text:p>2026-04-29 12:00</text:p>
          </table:table-cell>
          <table:table-cell office:value-type="float" office:value="0.25117435000000005" table:style-name="c10">
            <text:p>0.25117</text:p>
          </table:table-cell>
          <table:table-cell office:value-type="float" office:value="-0.930415585267852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0.25062524999999997" table:style-name="c10">
            <text:p>0.25063</text:p>
          </table:table-cell>
          <table:table-cell office:value-type="string" table:style-name="c10">
            <text:p>2026-05-01 16:30</text:p>
          </table:table-cell>
          <table:table-cell office:value-type="float" office:value="0.24907540000000003" table:style-name="c10">
            <text:p>0.24908</text:p>
          </table:table-cell>
          <table:table-cell office:value-type="float" office:value="-0.8170572297084733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0.25232609999999994" table:style-name="c10">
            <text:p>0.25233</text:p>
          </table:table-cell>
          <table:table-cell office:value-type="string" table:style-name="c10">
            <text:p>2026-05-04 05:30</text:p>
          </table:table-cell>
          <table:table-cell office:value-type="float" office:value="0.2524737" table:style-name="c10">
            <text:p>0.25247</text:p>
          </table:table-cell>
          <table:table-cell office:value-type="float" office:value="-0.14152120066053264" table:style-name="c11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0.25262625" table:style-name="c10">
            <text:p>0.25263</text:p>
          </table:table-cell>
          <table:table-cell office:value-type="string" table:style-name="c10">
            <text:p>2026-05-04 16:15</text:p>
          </table:table-cell>
          <table:table-cell office:value-type="float" office:value="0.24977505000000003" table:style-name="c10">
            <text:p>0.24978</text:p>
          </table:table-cell>
          <table:table-cell office:value-type="float" office:value="-1.3262676879184032" table:style-name="c11">
            <text:p>-1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00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5-05 13:45</text:p>
          </table:table-cell>
          <table:table-cell office:value-type="float" office:value="0.25817085" table:style-name="c10">
            <text:p>0.25817</text:p>
          </table:table-cell>
          <table:table-cell office:value-type="float" office:value="1.1095419980822419" table:style-name="c12">
            <text:p>+1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1:00</text:p>
          </table:table-cell>
          <table:table-cell office:value-type="float" office:value="0.26133059999999997" table:style-name="c10">
            <text:p>0.26133</text:p>
          </table:table-cell>
          <table:table-cell office:value-type="string" table:style-name="c10">
            <text:p>2026-05-05 23:30</text:p>
          </table:table-cell>
          <table:table-cell office:value-type="float" office:value="0.26216885" table:style-name="c10">
            <text:p>0.26217</text:p>
          </table:table-cell>
          <table:table-cell office:value-type="float" office:value="0.12022107967839535" table:style-name="c12">
            <text:p>+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15</text:p>
          </table:table-cell>
          <table:table-cell office:value-type="float" office:value="0.26583284999999995" table:style-name="c10">
            <text:p>0.26583</text:p>
          </table:table-cell>
          <table:table-cell office:value-type="string" table:style-name="c10">
            <text:p>2026-05-06 13:15</text:p>
          </table:table-cell>
          <table:table-cell office:value-type="float" office:value="0.2696651" table:style-name="c10">
            <text:p>0.26967</text:p>
          </table:table-cell>
          <table:table-cell office:value-type="float" office:value="1.2388196060419299" table:style-name="c12">
            <text:p>+1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0.27173579999999997" table:style-name="c10">
            <text:p>0.27174</text:p>
          </table:table-cell>
          <table:table-cell office:value-type="string" table:style-name="c10">
            <text:p>2026-05-08 23:15</text:p>
          </table:table-cell>
          <table:table-cell office:value-type="float" office:value="0.2742628" table:style-name="c10">
            <text:p>0.27426</text:p>
          </table:table-cell>
          <table:table-cell office:value-type="float" office:value="0.7281884325878396" table:style-name="c12">
            <text:p>+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2:00</text:p>
          </table:table-cell>
          <table:table-cell office:value-type="float" office:value="0.2777388" table:style-name="c10">
            <text:p>0.27774</text:p>
          </table:table-cell>
          <table:table-cell office:value-type="string" table:style-name="c10">
            <text:p>2026-05-09 04:45</text:p>
          </table:table-cell>
          <table:table-cell office:value-type="float" office:value="0.2756621" table:style-name="c10">
            <text:p>0.27566</text:p>
          </table:table-cell>
          <table:table-cell office:value-type="float" office:value="-0.9461222335158115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0.27303645" table:style-name="c10">
            <text:p>0.27304</text:p>
          </table:table-cell>
          <table:table-cell office:value-type="string" table:style-name="c10">
            <text:p>2026-05-09 21:45</text:p>
          </table:table-cell>
          <table:table-cell office:value-type="float" office:value="0.27196395" table:style-name="c10">
            <text:p>0.27196</text:p>
          </table:table-cell>
          <table:table-cell office:value-type="float" office:value="-0.5919194803660877" table:style-name="c11">
            <text:p>-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8:30</text:p>
          </table:table-cell>
          <table:table-cell office:value-type="float" office:value="0.27293639999999997" table:style-name="c10">
            <text:p>0.27294</text:p>
          </table:table-cell>
          <table:table-cell office:value-type="string" table:style-name="c10">
            <text:p>2026-05-10 11:30</text:p>
          </table:table-cell>
          <table:table-cell office:value-type="float" office:value="0.27176405" table:style-name="c10">
            <text:p>0.27176</text:p>
          </table:table-cell>
          <table:table-cell office:value-type="float" office:value="-0.6285736662277275" table:style-name="c11">
            <text:p>-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5:45</text:p>
          </table:table-cell>
          <table:table-cell office:value-type="float" office:value="0.27743864999999995" table:style-name="c10">
            <text:p>0.27744</text:p>
          </table:table-cell>
          <table:table-cell office:value-type="string" table:style-name="c10">
            <text:p>2026-05-10 20:45</text:p>
          </table:table-cell>
          <table:table-cell office:value-type="float" office:value="0.28155915000000004" table:style-name="c10">
            <text:p>0.28156</text:p>
          </table:table-cell>
          <table:table-cell office:value-type="float" office:value="1.28232431175328" table:style-name="c12">
            <text:p>+1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0:15</text:p>
          </table:table-cell>
          <table:table-cell office:value-type="float" office:value="0.27983985" table:style-name="c10">
            <text:p>0.27984</text:p>
          </table:table-cell>
          <table:table-cell office:value-type="string" table:style-name="c10">
            <text:p>2026-05-11 12:15</text:p>
          </table:table-cell>
          <table:table-cell office:value-type="float" office:value="0.27796095000000004" table:style-name="c10">
            <text:p>0.27796</text:p>
          </table:table-cell>
          <table:table-cell office:value-type="float" office:value="-0.8699775743340243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45</text:p>
          </table:table-cell>
          <table:table-cell office:value-type="float" office:value="0.24732359999999998" table:style-name="c10">
            <text:p>0.24732</text:p>
          </table:table-cell>
          <table:table-cell office:value-type="string" table:style-name="c10">
            <text:p>2026-05-25 19:00</text:p>
          </table:table-cell>
          <table:table-cell office:value-type="float" office:value="0.24617685" table:style-name="c10">
            <text:p>0.24618</text:p>
          </table:table-cell>
          <table:table-cell office:value-type="float" office:value="-0.662636935233829" table:style-name="c11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0:45</text:p>
          </table:table-cell>
          <table:table-cell office:value-type="float" office:value="0.08394195" table:style-name="c1">
            <text:p>0.083942</text:p>
          </table:table-cell>
          <table:table-cell office:value-type="string" table:style-name="c1">
            <text:p>2026-03-10 01:30</text:p>
          </table:table-cell>
          <table:table-cell office:value-type="float" office:value="0.08365815" table:style-name="c1">
            <text:p>0.083658</text:p>
          </table:table-cell>
          <table:table-cell office:value-type="float" office:value="-0.5373149442561176" table:style-name="c13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0848424" table:style-name="c1">
            <text:p>0.084842</text:p>
          </table:table-cell>
          <table:table-cell office:value-type="string" table:style-name="c1">
            <text:p>2026-03-10 12:15</text:p>
          </table:table-cell>
          <table:table-cell office:value-type="float" office:value="0.08685655" table:style-name="c1">
            <text:p>0.086857</text:p>
          </table:table-cell>
          <table:table-cell office:value-type="float" office:value="2.1693442860527323" table:style-name="c14">
            <text:p>+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0.08944469999999999" table:style-name="c1">
            <text:p>0.089445</text:p>
          </table:table-cell>
          <table:table-cell office:value-type="string" table:style-name="c1">
            <text:p>2026-03-10 17:45</text:p>
          </table:table-cell>
          <table:table-cell office:value-type="float" office:value="0.08745625" table:style-name="c1">
            <text:p>0.087456</text:p>
          </table:table-cell>
          <table:table-cell office:value-type="float" office:value="-2.4185614617187934" table:style-name="c13">
            <text:p>-2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1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1 15:15</text:p>
          </table:table-cell>
          <table:table-cell office:value-type="float" office:value="0.08615690000000001" table:style-name="c1">
            <text:p>0.086157</text:p>
          </table:table-cell>
          <table:table-cell office:value-type="float" office:value="-0.8746234069816117" table:style-name="c13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4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2 13:45</text:p>
          </table:table-cell>
          <table:table-cell office:value-type="float" office:value="0.08635680000000001" table:style-name="c1">
            <text:p>0.086357</text:p>
          </table:table-cell>
          <table:table-cell office:value-type="float" office:value="-0.6446341341439732" table:style-name="c13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7:45</text:p>
          </table:table-cell>
          <table:table-cell office:value-type="float" office:value="0.08774385" table:style-name="c1">
            <text:p>0.087744</text:p>
          </table:table-cell>
          <table:table-cell office:value-type="string" table:style-name="c1">
            <text:p>2026-03-13 05:15</text:p>
          </table:table-cell>
          <table:table-cell office:value-type="float" office:value="0.09095450000000001" table:style-name="c1">
            <text:p>0.090955</text:p>
          </table:table-cell>
          <table:table-cell office:value-type="float" office:value="3.451902275202201" table:style-name="c14">
            <text:p>+3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45</text:p>
          </table:table-cell>
          <table:table-cell office:value-type="float" office:value="0.0916458" table:style-name="c1">
            <text:p>0.091646</text:p>
          </table:table-cell>
          <table:table-cell office:value-type="string" table:style-name="c1">
            <text:p>2026-03-13 14:45</text:p>
          </table:table-cell>
          <table:table-cell office:value-type="float" office:value="0.09425285" table:style-name="c1">
            <text:p>0.094253</text:p>
          </table:table-cell>
          <table:table-cell office:value-type="float" office:value="2.639115543592818" table:style-name="c14">
            <text:p>+2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4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4 05:15</text:p>
          </table:table-cell>
          <table:table-cell office:value-type="float" office:value="0.09415290000000001" table:style-name="c1">
            <text:p>0.094153</text:p>
          </table:table-cell>
          <table:table-cell office:value-type="float" office:value="-2.4738011545628713" table:style-name="c13">
            <text:p>-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23:45</text:p>
          </table:table-cell>
          <table:table-cell office:value-type="float" office:value="0.09104549999999999" table:style-name="c1">
            <text:p>0.091045</text:p>
          </table:table-cell>
          <table:table-cell office:value-type="string" table:style-name="c1">
            <text:p>2026-03-15 00:15</text:p>
          </table:table-cell>
          <table:table-cell office:value-type="float" office:value="0.09015490000000001" table:style-name="c1">
            <text:p>0.090155</text:p>
          </table:table-cell>
          <table:table-cell office:value-type="float" office:value="-1.176136816317097" table:style-name="c13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9204599999999999" table:style-name="c1">
            <text:p>0.092046</text:p>
          </table:table-cell>
          <table:table-cell office:value-type="string" table:style-name="c1">
            <text:p>2026-03-15 13:15</text:p>
          </table:table-cell>
          <table:table-cell office:value-type="float" office:value="0.0915542" table:style-name="c1">
            <text:p>0.091554</text:p>
          </table:table-cell>
          <table:table-cell office:value-type="float" office:value="-0.7331300065184565" table:style-name="c13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0.09234614999999999" table:style-name="c1">
            <text:p>0.092346</text:p>
          </table:table-cell>
          <table:table-cell office:value-type="string" table:style-name="c1">
            <text:p>2026-03-15 23:30</text:p>
          </table:table-cell>
          <table:table-cell office:value-type="float" office:value="0.09195400000000001" table:style-name="c1">
            <text:p>0.091954</text:p>
          </table:table-cell>
          <table:table-cell office:value-type="float" office:value="-0.623703366085071" table:style-name="c13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00</text:p>
          </table:table-cell>
          <table:table-cell office:value-type="float" office:value="0.09354675" table:style-name="c1">
            <text:p>0.093547</text:p>
          </table:table-cell>
          <table:table-cell office:value-type="string" table:style-name="c1">
            <text:p>2026-03-16 08:45</text:p>
          </table:table-cell>
          <table:table-cell office:value-type="float" office:value="0.09445275" table:style-name="c1">
            <text:p>0.094453</text:p>
          </table:table-cell>
          <table:table-cell office:value-type="float" office:value="0.7666636764505741" table:style-name="c14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45</text:p>
          </table:table-cell>
          <table:table-cell office:value-type="float" office:value="0.09714855" table:style-name="c1">
            <text:p>0.097149</text:p>
          </table:table-cell>
          <table:table-cell office:value-type="string" table:style-name="c1">
            <text:p>2026-03-17 02:00</text:p>
          </table:table-cell>
          <table:table-cell office:value-type="float" office:value="0.0971514" table:style-name="c1">
            <text:p>0.097151</text:p>
          </table:table-cell>
          <table:table-cell office:value-type="float" office:value="-0.19697221276075982" table:style-name="c13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956478" table:style-name="c1">
            <text:p>0.095648</text:p>
          </table:table-cell>
          <table:table-cell office:value-type="string" table:style-name="c1">
            <text:p>2026-03-17 12:00</text:p>
          </table:table-cell>
          <table:table-cell office:value-type="float" office:value="0.09525235" table:style-name="c1">
            <text:p>0.095252</text:p>
          </table:table-cell>
          <table:table-cell office:value-type="float" office:value="-0.6125174312948234" table:style-name="c13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45</text:p>
          </table:table-cell>
          <table:table-cell office:value-type="float" office:value="0.09614805" table:style-name="c1">
            <text:p>0.096148</text:p>
          </table:table-cell>
          <table:table-cell office:value-type="string" table:style-name="c1">
            <text:p>2026-03-18 04:15</text:p>
          </table:table-cell>
          <table:table-cell office:value-type="float" office:value="0.09525235" table:style-name="c1">
            <text:p>0.095252</text:p>
          </table:table-cell>
          <table:table-cell office:value-type="float" office:value="-1.1296219191652912" table:style-name="c13">
            <text:p>-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0.0884442" table:style-name="c1">
            <text:p>0.088444</text:p>
          </table:table-cell>
          <table:table-cell office:value-type="string" table:style-name="c1">
            <text:p>2026-03-25 15:15</text:p>
          </table:table-cell>
          <table:table-cell office:value-type="float" office:value="0.08785605" table:style-name="c1">
            <text:p>0.087856</text:p>
          </table:table-cell>
          <table:table-cell office:value-type="float" office:value="-0.8635662304028902" table:style-name="c13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8374184999999999" table:style-name="c1">
            <text:p>0.083742</text:p>
          </table:table-cell>
          <table:table-cell office:value-type="string" table:style-name="c1">
            <text:p>2026-03-30 09:15</text:p>
          </table:table-cell>
          <table:table-cell office:value-type="float" office:value="0.08345825000000001" table:style-name="c1">
            <text:p>0.083458</text:p>
          </table:table-cell>
          <table:table-cell office:value-type="float" office:value="-0.5378828408376224" table:style-name="c13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45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3-30 23:15</text:p>
          </table:table-cell>
          <table:table-cell office:value-type="float" office:value="0.08205895" table:style-name="c1">
            <text:p>0.082059</text:p>
          </table:table-cell>
          <table:table-cell office:value-type="float" office:value="-1.3807383549791497" table:style-name="c13">
            <text:p>-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3-31 09:15</text:p>
          </table:table-cell>
          <table:table-cell office:value-type="float" office:value="0.0849575" table:style-name="c1">
            <text:p>0.084958</text:p>
          </table:table-cell>
          <table:table-cell office:value-type="float" office:value="2.1027678419826223" table:style-name="c14">
            <text:p>+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0:00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31 10:45</text:p>
          </table:table-cell>
          <table:table-cell office:value-type="float" office:value="0.08615690000000001" table:style-name="c1">
            <text:p>0.086157</text:p>
          </table:table-cell>
          <table:table-cell office:value-type="float" office:value="-0.8746234069816228" table:style-name="c13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45</text:p>
          </table:table-cell>
          <table:table-cell office:value-type="float" office:value="0.08774385" table:style-name="c1">
            <text:p>0.087744</text:p>
          </table:table-cell>
          <table:table-cell office:value-type="string" table:style-name="c1">
            <text:p>2026-03-31 22:15</text:p>
          </table:table-cell>
          <table:table-cell office:value-type="float" office:value="0.09145425" table:style-name="c1">
            <text:p>0.091454</text:p>
          </table:table-cell>
          <table:table-cell office:value-type="float" office:value="4.020319320670329" table:style-name="c14">
            <text:p>+4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0:30</text:p>
          </table:table-cell>
          <table:table-cell office:value-type="float" office:value="0.09474735000000001" table:style-name="c1">
            <text:p>0.094747</text:p>
          </table:table-cell>
          <table:table-cell office:value-type="string" table:style-name="c1">
            <text:p>2026-04-01 07:30</text:p>
          </table:table-cell>
          <table:table-cell office:value-type="float" office:value="0.1005497" table:style-name="c1">
            <text:p>0.10055</text:p>
          </table:table-cell>
          <table:table-cell office:value-type="float" office:value="5.9118815984827044" table:style-name="c14">
            <text:p>+5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0:45</text:p>
          </table:table-cell>
          <table:table-cell office:value-type="float" office:value="0.10515255" table:style-name="c1">
            <text:p>0.10515</text:p>
          </table:table-cell>
          <table:table-cell office:value-type="string" table:style-name="c1">
            <text:p>2026-04-01 13:45</text:p>
          </table:table-cell>
          <table:table-cell office:value-type="float" office:value="0.10544725" table:style-name="c1">
            <text:p>0.10545</text:p>
          </table:table-cell>
          <table:table-cell office:value-type="float" office:value="0.07979925094541152" table:style-name="c14">
            <text:p>+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7:30</text:p>
          </table:table-cell>
          <table:table-cell office:value-type="float" office:value="0.10195095" table:style-name="c1">
            <text:p>0.10195</text:p>
          </table:table-cell>
          <table:table-cell office:value-type="string" table:style-name="c1">
            <text:p>2026-04-02 12:00</text:p>
          </table:table-cell>
          <table:table-cell office:value-type="float" office:value="0.10274860000000001" table:style-name="c1">
            <text:p>0.10275</text:p>
          </table:table-cell>
          <table:table-cell office:value-type="float" office:value="0.5809220498681045" table:style-name="c14">
            <text:p>+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14:00</text:p>
          </table:table-cell>
          <table:table-cell office:value-type="float" office:value="0.10435215" table:style-name="c1">
            <text:p>0.10435</text:p>
          </table:table-cell>
          <table:table-cell office:value-type="string" table:style-name="c1">
            <text:p>2026-04-02 20:00</text:p>
          </table:table-cell>
          <table:table-cell office:value-type="float" office:value="0.10664665000000001" table:style-name="c1">
            <text:p>0.10665</text:p>
          </table:table-cell>
          <table:table-cell office:value-type="float" office:value="1.994509309726733" table:style-name="c14">
            <text:p>+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0.12516254999999998" table:style-name="c1">
            <text:p>0.12516</text:p>
          </table:table-cell>
          <table:table-cell office:value-type="string" table:style-name="c1">
            <text:p>2026-04-03 23:00</text:p>
          </table:table-cell>
          <table:table-cell office:value-type="float" office:value="0.12183905" table:style-name="c1">
            <text:p>0.12184</text:p>
          </table:table-cell>
          <table:table-cell office:value-type="float" office:value="-2.84993894815182" table:style-name="c13">
            <text:p>-2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1:00</text:p>
          </table:table-cell>
          <table:table-cell office:value-type="float" office:value="0.12236115" table:style-name="c1">
            <text:p>0.12236</text:p>
          </table:table-cell>
          <table:table-cell office:value-type="string" table:style-name="c1">
            <text:p>2026-04-05 23:30</text:p>
          </table:table-cell>
          <table:table-cell office:value-type="float" office:value="0.12163915000000002" table:style-name="c1">
            <text:p>0.12164</text:p>
          </table:table-cell>
          <table:table-cell office:value-type="float" office:value="-0.788777043081057" table:style-name="c13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4:00</text:p>
          </table:table-cell>
          <table:table-cell office:value-type="float" office:value="0.12176084999999999" table:style-name="c1">
            <text:p>0.12176</text:p>
          </table:table-cell>
          <table:table-cell office:value-type="string" table:style-name="c1">
            <text:p>2026-04-06 08:30</text:p>
          </table:table-cell>
          <table:table-cell office:value-type="float" office:value="0.12363815000000002" table:style-name="c1">
            <text:p>0.12364</text:p>
          </table:table-cell>
          <table:table-cell office:value-type="float" office:value="1.3388107410140515" table:style-name="c14">
            <text:p>+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45</text:p>
          </table:table-cell>
          <table:table-cell office:value-type="float" office:value="0.12616304999999997" table:style-name="c1">
            <text:p>0.12616</text:p>
          </table:table-cell>
          <table:table-cell office:value-type="string" table:style-name="c1">
            <text:p>2026-04-06 12:45</text:p>
          </table:table-cell>
          <table:table-cell office:value-type="float" office:value="0.12443775" table:style-name="c1">
            <text:p>0.12444</text:p>
          </table:table-cell>
          <table:table-cell office:value-type="float" office:value="-1.5646824187033892" table:style-name="c13">
            <text:p>-1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6:00</text:p>
          </table:table-cell>
          <table:table-cell office:value-type="float" office:value="0.12356175" table:style-name="c1">
            <text:p>0.12356</text:p>
          </table:table-cell>
          <table:table-cell office:value-type="string" table:style-name="c1">
            <text:p>2026-04-08 09:15</text:p>
          </table:table-cell>
          <table:table-cell office:value-type="float" office:value="0.12223885000000001" table:style-name="c1">
            <text:p>0.12224</text:p>
          </table:table-cell>
          <table:table-cell office:value-type="float" office:value="-1.2683985627833794" table:style-name="c13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11735865" table:style-name="c1">
            <text:p>0.11736</text:p>
          </table:table-cell>
          <table:table-cell office:value-type="string" table:style-name="c1">
            <text:p>2026-04-08 22:45</text:p>
          </table:table-cell>
          <table:table-cell office:value-type="float" office:value="0.11644175000000001" table:style-name="c1">
            <text:p>0.11644</text:p>
          </table:table-cell>
          <table:table-cell office:value-type="float" office:value="-0.9796185097987853" table:style-name="c13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4:3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14 06:00</text:p>
          </table:table-cell>
          <table:table-cell office:value-type="float" office:value="0.11124435" table:style-name="c1">
            <text:p>0.11124</text:p>
          </table:table-cell>
          <table:table-cell office:value-type="float" office:value="-1.8863931921307087" table:style-name="c13">
            <text:p>-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4-15 03:45</text:p>
          </table:table-cell>
          <table:table-cell office:value-type="float" office:value="0.10804595" table:style-name="c1">
            <text:p>0.10805</text:p>
          </table:table-cell>
          <table:table-cell office:value-type="float" office:value="-0.575573702124943" table:style-name="c13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4:30</text:p>
          </table:table-cell>
          <table:table-cell office:value-type="float" office:value="0.10945469999999999" table:style-name="c1">
            <text:p>0.10945</text:p>
          </table:table-cell>
          <table:table-cell office:value-type="string" table:style-name="c1">
            <text:p>2026-04-15 10:30</text:p>
          </table:table-cell>
          <table:table-cell office:value-type="float" office:value="0.11164415" table:style-name="c1">
            <text:p>0.11164</text:p>
          </table:table-cell>
          <table:table-cell office:value-type="float" office:value="1.7964265985380257" table:style-name="c14">
            <text:p>+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00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5 17:15</text:p>
          </table:table-cell>
          <table:table-cell office:value-type="float" office:value="0.11144425000000001" table:style-name="c1">
            <text:p>0.11144</text:p>
          </table:table-cell>
          <table:table-cell office:value-type="float" office:value="-0.6560411088021523" table:style-name="c13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00</text:p>
          </table:table-cell>
          <table:table-cell office:value-type="float" office:value="0.11295645" table:style-name="c1">
            <text:p>0.11296</text:p>
          </table:table-cell>
          <table:table-cell office:value-type="string" table:style-name="c1">
            <text:p>2026-04-15 20:45</text:p>
          </table:table-cell>
          <table:table-cell office:value-type="float" office:value="0.11264365" table:style-name="c1">
            <text:p>0.11264</text:p>
          </table:table-cell>
          <table:table-cell office:value-type="float" office:value="-0.47626731926331267" table:style-name="c13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2:30</text:p>
          </table:table-cell>
          <table:table-cell office:value-type="float" office:value="0.11415704999999998" table:style-name="c1">
            <text:p>0.11416</text:p>
          </table:table-cell>
          <table:table-cell office:value-type="string" table:style-name="c1">
            <text:p>2026-04-15 23:00</text:p>
          </table:table-cell>
          <table:table-cell office:value-type="float" office:value="0.11304345000000002" table:style-name="c1">
            <text:p>0.11304</text:p>
          </table:table-cell>
          <table:table-cell office:value-type="float" office:value="-1.1734482071409258" table:style-name="c13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0:1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17 01:30</text:p>
          </table:table-cell>
          <table:table-cell office:value-type="float" office:value="0.1155422" table:style-name="c1">
            <text:p>0.11554</text:p>
          </table:table-cell>
          <table:table-cell office:value-type="float" office:value="0.9225957443344868" table:style-name="c14">
            <text:p>+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45</text:p>
          </table:table-cell>
          <table:table-cell office:value-type="float" office:value="0.11675835" table:style-name="c1">
            <text:p>0.11676</text:p>
          </table:table-cell>
          <table:table-cell office:value-type="string" table:style-name="c1">
            <text:p>2026-04-17 10:30</text:p>
          </table:table-cell>
          <table:table-cell office:value-type="float" office:value="0.11544225000000001" table:style-name="c1">
            <text:p>0.11544</text:p>
          </table:table-cell>
          <table:table-cell office:value-type="float" office:value="-1.3248466236033596" table:style-name="c13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7:00</text:p>
          </table:table-cell>
          <table:table-cell office:value-type="float" office:value="0.10665329999999999" table:style-name="c1">
            <text:p>0.10665</text:p>
          </table:table-cell>
          <table:table-cell office:value-type="string" table:style-name="c1">
            <text:p>2026-04-22 09:30</text:p>
          </table:table-cell>
          <table:table-cell office:value-type="float" office:value="0.105947" table:style-name="c1">
            <text:p>0.10595</text:p>
          </table:table-cell>
          <table:table-cell office:value-type="float" office:value="-0.860815420619887" table:style-name="c13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0.10695344999999999" table:style-name="c1">
            <text:p>0.10695</text:p>
          </table:table-cell>
          <table:table-cell office:value-type="string" table:style-name="c1">
            <text:p>2026-04-24 03:15</text:p>
          </table:table-cell>
          <table:table-cell office:value-type="float" office:value="0.10554720000000001" table:style-name="c1">
            <text:p>0.10555</text:p>
          </table:table-cell>
          <table:table-cell office:value-type="float" office:value="-1.512096012611075" table:style-name="c13">
            <text:p>-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30</text:p>
          </table:table-cell>
          <table:table-cell office:value-type="float" office:value="0.1062531" table:style-name="c1">
            <text:p>0.10625</text:p>
          </table:table-cell>
          <table:table-cell office:value-type="string" table:style-name="c1">
            <text:p>2026-04-24 09:15</text:p>
          </table:table-cell>
          <table:table-cell office:value-type="float" office:value="0.10544725" table:style-name="c1">
            <text:p>0.10545</text:p>
          </table:table-cell>
          <table:table-cell office:value-type="float" office:value="-0.9568088392244545" table:style-name="c13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0:00</text:p>
          </table:table-cell>
          <table:table-cell office:value-type="float" office:value="0.10635315" table:style-name="c1">
            <text:p>0.10635</text:p>
          </table:table-cell>
          <table:table-cell office:value-type="string" table:style-name="c1">
            <text:p>2026-04-24 13:45</text:p>
          </table:table-cell>
          <table:table-cell office:value-type="float" office:value="0.1069465" table:style-name="c1">
            <text:p>0.10695</text:p>
          </table:table-cell>
          <table:table-cell office:value-type="float" office:value="0.35689017814706236" table:style-name="c14">
            <text:p>+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5:45</text:p>
          </table:table-cell>
          <table:table-cell office:value-type="float" office:value="0.108054" table:style-name="c1">
            <text:p>0.10805</text:p>
          </table:table-cell>
          <table:table-cell office:value-type="string" table:style-name="c1">
            <text:p>2026-04-24 18:15</text:p>
          </table:table-cell>
          <table:table-cell office:value-type="float" office:value="0.1073463" table:style-name="c1">
            <text:p>0.10735</text:p>
          </table:table-cell>
          <table:table-cell office:value-type="float" office:value="-0.8535410569715074" table:style-name="c13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2:00</text:p>
          </table:table-cell>
          <table:table-cell office:value-type="float" office:value="0.1092546" table:style-name="c1">
            <text:p>0.10925</text:p>
          </table:table-cell>
          <table:table-cell office:value-type="string" table:style-name="c1">
            <text:p>2026-04-25 00:15</text:p>
          </table:table-cell>
          <table:table-cell office:value-type="float" office:value="0.1083458" table:style-name="c1">
            <text:p>0.10835</text:p>
          </table:table-cell>
          <table:table-cell office:value-type="float" office:value="-1.030055717745515" table:style-name="c13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5:30</text:p>
          </table:table-cell>
          <table:table-cell office:value-type="float" office:value="0.11305649999999999" table:style-name="c1">
            <text:p>0.11306</text:p>
          </table:table-cell>
          <table:table-cell office:value-type="string" table:style-name="c1">
            <text:p>2026-04-25 10:45</text:p>
          </table:table-cell>
          <table:table-cell office:value-type="float" office:value="0.1155422" table:style-name="c1">
            <text:p>0.11554</text:p>
          </table:table-cell>
          <table:table-cell office:value-type="float" office:value="1.9943401239203462" table:style-name="c14">
            <text:p>+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4:3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25 16:00</text:p>
          </table:table-cell>
          <table:table-cell office:value-type="float" office:value="0.11504245" table:style-name="c1">
            <text:p>0.11504</text:p>
          </table:table-cell>
          <table:table-cell office:value-type="float" office:value="-1.4131421038192205" table:style-name="c13">
            <text:p>-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0:00</text:p>
          </table:table-cell>
          <table:table-cell office:value-type="float" office:value="0.11785889999999999" table:style-name="c1">
            <text:p>0.11786</text:p>
          </table:table-cell>
          <table:table-cell office:value-type="string" table:style-name="c1">
            <text:p>2026-04-25 20:30</text:p>
          </table:table-cell>
          <table:table-cell office:value-type="float" office:value="0.11594200000000002" table:style-name="c1">
            <text:p>0.11594</text:p>
          </table:table-cell>
          <table:table-cell office:value-type="float" office:value="-1.82308511109468" table:style-name="c13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6:30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4-27 18:00</text:p>
          </table:table-cell>
          <table:table-cell office:value-type="float" office:value="0.11724135000000001" table:style-name="c1">
            <text:p>0.11724</text:p>
          </table:table-cell>
          <table:table-cell office:value-type="float" office:value="-2.2169646436397183" table:style-name="c13">
            <text:p>-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03 01:15</text:p>
          </table:table-cell>
          <table:table-cell office:value-type="float" office:value="0.111944" table:style-name="c1">
            <text:p>0.11194</text:p>
          </table:table-cell>
          <table:table-cell office:value-type="float" office:value="-1.2693264826472483" table:style-name="c13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3:30</text:p>
          </table:table-cell>
          <table:table-cell office:value-type="float" office:value="0.1128564" table:style-name="c1">
            <text:p>0.11286</text:p>
          </table:table-cell>
          <table:table-cell office:value-type="string" table:style-name="c1">
            <text:p>2026-05-03 09:15</text:p>
          </table:table-cell>
          <table:table-cell office:value-type="float" office:value="0.1161419" table:style-name="c1">
            <text:p>0.11614</text:p>
          </table:table-cell>
          <table:table-cell office:value-type="float" office:value="2.7055021619509345" table:style-name="c14">
            <text:p>+2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1415704999999998" table:style-name="c1">
            <text:p>0.11416</text:p>
          </table:table-cell>
          <table:table-cell office:value-type="string" table:style-name="c1">
            <text:p>2026-05-04 19:15</text:p>
          </table:table-cell>
          <table:table-cell office:value-type="float" office:value="0.1137431" table:style-name="c1">
            <text:p>0.11374</text:p>
          </table:table-cell>
          <table:table-cell office:value-type="float" office:value="-0.5617896195635685" table:style-name="c13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15</text:p>
          </table:table-cell>
          <table:table-cell office:value-type="float" office:value="0.11495745" table:style-name="c1">
            <text:p>0.11496</text:p>
          </table:table-cell>
          <table:table-cell office:value-type="string" table:style-name="c1">
            <text:p>2026-05-05 08:30</text:p>
          </table:table-cell>
          <table:table-cell office:value-type="float" office:value="0.1189405" table:style-name="c1">
            <text:p>0.11894</text:p>
          </table:table-cell>
          <table:table-cell office:value-type="float" office:value="3.2579775738762473" table:style-name="c14">
            <text:p>+3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12176084999999999" table:style-name="c1">
            <text:p>0.12176</text:p>
          </table:table-cell>
          <table:table-cell office:value-type="string" table:style-name="c1">
            <text:p>2026-05-05 13:15</text:p>
          </table:table-cell>
          <table:table-cell office:value-type="float" office:value="0.12003995" table:style-name="c1">
            <text:p>0.12004</text:p>
          </table:table-cell>
          <table:table-cell office:value-type="float" office:value="-1.6104189976088312" table:style-name="c13">
            <text:p>-1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0.11905949999999998" table:style-name="c1">
            <text:p>0.11906</text:p>
          </table:table-cell>
          <table:table-cell office:value-type="string" table:style-name="c1">
            <text:p>2026-05-05 23:30</text:p>
          </table:table-cell>
          <table:table-cell office:value-type="float" office:value="0.11964015" table:style-name="c1">
            <text:p>0.11964</text:p>
          </table:table-cell>
          <table:table-cell office:value-type="float" office:value="0.28682242084843157" table:style-name="c14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0.12396194999999999" table:style-name="c1">
            <text:p>0.12396</text:p>
          </table:table-cell>
          <table:table-cell office:value-type="string" table:style-name="c1">
            <text:p>2026-05-06 12:00</text:p>
          </table:table-cell>
          <table:table-cell office:value-type="float" office:value="0.12253870000000001" table:style-name="c1">
            <text:p>0.12254</text:p>
          </table:table-cell>
          <table:table-cell office:value-type="float" office:value="-1.3457394477095486" table:style-name="c13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3:00</text:p>
          </table:table-cell>
          <table:table-cell office:value-type="float" office:value="0.1212606" table:style-name="c1">
            <text:p>0.12126</text:p>
          </table:table-cell>
          <table:table-cell office:value-type="string" table:style-name="c1">
            <text:p>2026-05-07 10:00</text:p>
          </table:table-cell>
          <table:table-cell office:value-type="float" office:value="0.12783605000000003" table:style-name="c1">
            <text:p>0.12784</text:p>
          </table:table-cell>
          <table:table-cell office:value-type="float" office:value="5.211837757730087" table:style-name="c14">
            <text:p>+5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5-08 23:45</text:p>
          </table:table-cell>
          <table:table-cell office:value-type="float" office:value="0.13303345" table:style-name="c1">
            <text:p>0.13303</text:p>
          </table:table-cell>
          <table:table-cell office:value-type="float" office:value="1.1441810599654323" table:style-name="c14">
            <text:p>+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5-10 11:30</text:p>
          </table:table-cell>
          <table:table-cell office:value-type="float" office:value="0.12863565000000002" table:style-name="c1">
            <text:p>0.12864</text:p>
          </table:table-cell>
          <table:table-cell office:value-type="float" office:value="0.16733033612004178" table:style-name="c14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3:45</text:p>
          </table:table-cell>
          <table:table-cell office:value-type="float" office:value="0.11325659999999999" table:style-name="c1">
            <text:p>0.11326</text:p>
          </table:table-cell>
          <table:table-cell office:value-type="string" table:style-name="c1">
            <text:p>2026-05-19 14:30</text:p>
          </table:table-cell>
          <table:table-cell office:value-type="float" office:value="0.11184405" table:style-name="c1">
            <text:p>0.11184</text:p>
          </table:table-cell>
          <table:table-cell office:value-type="float" office:value="-1.44461890605051" table:style-name="c13">
            <text:p>-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2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19 22:00</text:p>
          </table:table-cell>
          <table:table-cell office:value-type="float" office:value="0.1127436" table:style-name="c1">
            <text:p>0.11274</text:p>
          </table:table-cell>
          <table:table-cell office:value-type="float" office:value="-0.5641073860947365" table:style-name="c13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0:45</text:p>
          </table:table-cell>
          <table:table-cell office:value-type="float" office:value="0.1148574" table:style-name="c1">
            <text:p>0.11486</text:p>
          </table:table-cell>
          <table:table-cell office:value-type="string" table:style-name="c1">
            <text:p>2026-05-20 03:45</text:p>
          </table:table-cell>
          <table:table-cell office:value-type="float" office:value="0.11464265" table:style-name="c1">
            <text:p>0.11464</text:p>
          </table:table-cell>
          <table:table-cell office:value-type="float" office:value="-0.3864972194651872" table:style-name="c13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45</text:p>
          </table:table-cell>
          <table:table-cell office:value-type="float" office:value="0.11875935" table:style-name="c1">
            <text:p>0.11876</text:p>
          </table:table-cell>
          <table:table-cell office:value-type="string" table:style-name="c1">
            <text:p>2026-05-20 21:30</text:p>
          </table:table-cell>
          <table:table-cell office:value-type="float" office:value="0.11724135000000001" table:style-name="c1">
            <text:p>0.11724</text:p>
          </table:table-cell>
          <table:table-cell office:value-type="float" office:value="-1.4755599947709364" table:style-name="c13">
            <text:p>-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45</text:p>
          </table:table-cell>
          <table:table-cell office:value-type="float" office:value="0.11595794999999999" table:style-name="c1">
            <text:p>0.11596</text:p>
          </table:table-cell>
          <table:table-cell office:value-type="string" table:style-name="c1">
            <text:p>2026-05-21 19:15</text:p>
          </table:table-cell>
          <table:table-cell office:value-type="float" office:value="0.11584205000000002" table:style-name="c1">
            <text:p>0.11584</text:p>
          </table:table-cell>
          <table:table-cell office:value-type="float" office:value="-0.2996502248875266" table:style-name="c13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5-22 06:30</text:p>
          </table:table-cell>
          <table:table-cell office:value-type="float" office:value="0.1141429" table:style-name="c1">
            <text:p>0.11414</text:p>
          </table:table-cell>
          <table:table-cell office:value-type="float" office:value="-1.4218186639147978" table:style-name="c13">
            <text:p>-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0:0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5-22 13:30</text:p>
          </table:table-cell>
          <table:table-cell office:value-type="float" office:value="0.11734130000000001" table:style-name="c1">
            <text:p>0.11734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8:00</text:p>
          </table:table-cell>
          <table:table-cell office:value-type="float" office:value="0.116058" table:style-name="c1">
            <text:p>0.11606</text:p>
          </table:table-cell>
          <table:table-cell office:value-type="string" table:style-name="c1">
            <text:p>2026-05-25 09:15</text:p>
          </table:table-cell>
          <table:table-cell office:value-type="float" office:value="0.1145427" table:style-name="c1">
            <text:p>0.11454</text:p>
          </table:table-cell>
          <table:table-cell office:value-type="float" office:value="-1.5029303083802792" table:style-name="c13">
            <text:p>-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23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29 01:15</text:p>
          </table:table-cell>
          <table:table-cell office:value-type="float" office:value="0.1147426" table:style-name="c1">
            <text:p>0.11474</text:p>
          </table:table-cell>
          <table:table-cell office:value-type="float" office:value="1.1989403552865596" table:style-name="c14">
            <text:p>+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5:3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5-29 07:45</text:p>
          </table:table-cell>
          <table:table-cell office:value-type="float" office:value="0.11584205000000002" table:style-name="c1">
            <text:p>0.11584</text:p>
          </table:table-cell>
          <table:table-cell office:value-type="float" office:value="-1.573504779084045" table:style-name="c13">
            <text:p>-1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8:45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5-29 10:30</text:p>
          </table:table-cell>
          <table:table-cell office:value-type="float" office:value="0.1175412" table:style-name="c1">
            <text:p>0.11754</text:p>
          </table:table-cell>
          <table:table-cell office:value-type="float" office:value="-1.9668801542372716" table:style-name="c13">
            <text:p>-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30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5-29 21:30</text:p>
          </table:table-cell>
          <table:table-cell office:value-type="float" office:value="0.11814090000000001" table:style-name="c1">
            <text:p>0.11814</text:p>
          </table:table-cell>
          <table:table-cell office:value-type="float" office:value="2.0310073023228625" table:style-name="c14">
            <text:p>+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1:45</text:p>
          </table:table-cell>
          <table:table-cell office:value-type="float" office:value="0.1202601" table:style-name="c1">
            <text:p>0.12026</text:p>
          </table:table-cell>
          <table:table-cell office:value-type="string" table:style-name="c1">
            <text:p>2026-05-29 22:00</text:p>
          </table:table-cell>
          <table:table-cell office:value-type="float" office:value="0.11774110000000002" table:style-name="c1">
            <text:p>0.11774</text:p>
          </table:table-cell>
          <table:table-cell office:value-type="float" office:value="-2.2903394050894477" table:style-name="c13">
            <text:p>-2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3:00</text:p>
          </table:table-cell>
          <table:table-cell office:value-type="float" office:value="0.12076034999999999" table:style-name="c1">
            <text:p>0.12076</text:p>
          </table:table-cell>
          <table:table-cell office:value-type="string" table:style-name="c1">
            <text:p>2026-05-30 04:45</text:p>
          </table:table-cell>
          <table:table-cell office:value-type="float" office:value="0.13043475000000002" table:style-name="c1">
            <text:p>0.13043</text:p>
          </table:table-cell>
          <table:table-cell office:value-type="float" office:value="7.795324321890451" table:style-name="c14">
            <text:p>+7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5-31 07:15</text:p>
          </table:table-cell>
          <table:table-cell office:value-type="float" office:value="0.12703645" table:style-name="c1">
            <text:p>0.12704</text:p>
          </table:table-cell>
          <table:table-cell office:value-type="float" office:value="-0.5344234190204911" table:style-name="c13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30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5-31 10:00</text:p>
          </table:table-cell>
          <table:table-cell office:value-type="float" office:value="0.12813590000000002" table:style-name="c1">
            <text:p>0.12814</text:p>
          </table:table-cell>
          <table:table-cell office:value-type="float" office:value="-2.3561127488967104" table:style-name="c13">
            <text:p>-2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1:15</text:p>
          </table:table-cell>
          <table:table-cell office:value-type="float" office:value="0.1302651" table:style-name="c1">
            <text:p>0.13027</text:p>
          </table:table-cell>
          <table:table-cell office:value-type="string" table:style-name="c1">
            <text:p>2026-05-31 14:15</text:p>
          </table:table-cell>
          <table:table-cell office:value-type="float" office:value="0.1307346" table:style-name="c1">
            <text:p>0.13073</text:p>
          </table:table-cell>
          <table:table-cell office:value-type="float" office:value="0.15979839158761777" table:style-name="c14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1:15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5-31 23:45</text:p>
          </table:table-cell>
          <table:table-cell office:value-type="float" office:value="0.1265367" table:style-name="c1">
            <text:p>0.12654</text:p>
          </table:table-cell>
          <table:table-cell office:value-type="float" office:value="-1.7738188207841454" table:style-name="c13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3:3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6-01 04:00</text:p>
          </table:table-cell>
          <table:table-cell office:value-type="float" office:value="0.12603695" table:style-name="c1">
            <text:p>0.12604</text:p>
          </table:table-cell>
          <table:table-cell office:value-type="float" office:value="-1.317000732796858" table:style-name="c13">
            <text:p>-1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7:15</text:p>
          </table:table-cell>
          <table:table-cell office:value-type="float" office:value="1.0075034999999999" table:style-name="c10">
            <text:p>1.0075</text:p>
          </table:table-cell>
          <table:table-cell office:value-type="string" table:style-name="c10">
            <text:p>2026-03-05 07:45</text:p>
          </table:table-cell>
          <table:table-cell office:value-type="float" office:value="0.9985005" table:style-name="c10">
            <text:p>0.9985</text:p>
          </table:table-cell>
          <table:table-cell office:value-type="float" office:value="-1.091708614362119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9:15</text:p>
          </table:table-cell>
          <table:table-cell office:value-type="float" office:value="0.9974985" table:style-name="c10">
            <text:p>0.9975</text:p>
          </table:table-cell>
          <table:table-cell office:value-type="string" table:style-name="c10">
            <text:p>2026-03-06 00:00</text:p>
          </table:table-cell>
          <table:table-cell office:value-type="float" office:value="0.9965015" table:style-name="c10">
            <text:p>0.9965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1.0235115" table:style-name="c10">
            <text:p>1.0235</text:p>
          </table:table-cell>
          <table:table-cell office:value-type="string" table:style-name="c10">
            <text:p>2026-03-06 08:45</text:p>
          </table:table-cell>
          <table:table-cell office:value-type="float" office:value="1.0074960000000002" table:style-name="c10">
            <text:p>1.0075</text:p>
          </table:table-cell>
          <table:table-cell office:value-type="float" office:value="-1.7615321863994393" table:style-name="c11">
            <text:p>-1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30</text:p>
          </table:table-cell>
          <table:table-cell office:value-type="float" office:value="0.9664829999999999" table:style-name="c10">
            <text:p>0.96648</text:p>
          </table:table-cell>
          <table:table-cell office:value-type="string" table:style-name="c10">
            <text:p>2026-03-09 18:15</text:p>
          </table:table-cell>
          <table:table-cell office:value-type="float" office:value="0.95952" table:style-name="c10">
            <text:p>0.95952</text:p>
          </table:table-cell>
          <table:table-cell office:value-type="float" office:value="-0.9189070557888535" table:style-name="c11">
            <text:p>-0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15</text:p>
          </table:table-cell>
          <table:table-cell office:value-type="float" office:value="0.9904949999999999" table:style-name="c10">
            <text:p>0.99049</text:p>
          </table:table-cell>
          <table:table-cell office:value-type="string" table:style-name="c10">
            <text:p>2026-03-10 17:30</text:p>
          </table:table-cell>
          <table:table-cell office:value-type="float" office:value="0.9825085" table:style-name="c10">
            <text:p>0.98251</text:p>
          </table:table-cell>
          <table:table-cell office:value-type="float" office:value="-1.0046021929944082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5:00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3-13 15:45</text:p>
          </table:table-cell>
          <table:table-cell office:value-type="float" office:value="0.951524" table:style-name="c10">
            <text:p>0.95152</text:p>
          </table:table-cell>
          <table:table-cell office:value-type="float" office:value="-1.0273900042679251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0.934467" table:style-name="c10">
            <text:p>0.93447</text:p>
          </table:table-cell>
          <table:table-cell office:value-type="string" table:style-name="c10">
            <text:p>2026-03-15 23:30</text:p>
          </table:table-cell>
          <table:table-cell office:value-type="float" office:value="0.9265365000000001" table:style-name="c10">
            <text:p>0.92654</text:p>
          </table:table-cell>
          <table:table-cell office:value-type="float" office:value="-1.046869120418381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30</text:p>
          </table:table-cell>
          <table:table-cell office:value-type="float" office:value="0.942471" table:style-name="c10">
            <text:p>0.94247</text:p>
          </table:table-cell>
          <table:table-cell office:value-type="string" table:style-name="c10">
            <text:p>2026-03-16 10:15</text:p>
          </table:table-cell>
          <table:table-cell office:value-type="float" office:value="0.9815090000000001" table:style-name="c10">
            <text:p>0.98151</text:p>
          </table:table-cell>
          <table:table-cell office:value-type="float" office:value="3.933910275117225" table:style-name="c12">
            <text:p>+3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45</text:p>
          </table:table-cell>
          <table:table-cell office:value-type="float" office:value="0.9974985" table:style-name="c10">
            <text:p>0.9975</text:p>
          </table:table-cell>
          <table:table-cell office:value-type="string" table:style-name="c10">
            <text:p>2026-03-16 14:45</text:p>
          </table:table-cell>
          <table:table-cell office:value-type="float" office:value="0.9975010000000001" table:style-name="c10">
            <text:p>0.9975</text:p>
          </table:table-cell>
          <table:table-cell office:value-type="float" office:value="-0.19964987405994838" table:style-name="c11">
            <text:p>-0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6:45</text:p>
          </table:table-cell>
          <table:table-cell office:value-type="float" office:value="1.0155074999999998" table:style-name="c10">
            <text:p>1.0155</text:p>
          </table:table-cell>
          <table:table-cell office:value-type="string" table:style-name="c10">
            <text:p>2026-03-16 17:30</text:p>
          </table:table-cell>
          <table:table-cell office:value-type="float" office:value="1.0024985" table:style-name="c10">
            <text:p>1.0025</text:p>
          </table:table-cell>
          <table:table-cell office:value-type="float" office:value="-1.478373571982472" table:style-name="c11">
            <text:p>-1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8:30</text:p>
          </table:table-cell>
          <table:table-cell office:value-type="float" office:value="1.0095044999999998" table:style-name="c10">
            <text:p>1.0095</text:p>
          </table:table-cell>
          <table:table-cell office:value-type="string" table:style-name="c10">
            <text:p>2026-03-16 19:00</text:p>
          </table:table-cell>
          <table:table-cell office:value-type="float" office:value="1.0004994999999999" table:style-name="c10">
            <text:p>1.0005</text:p>
          </table:table-cell>
          <table:table-cell office:value-type="float" office:value="-1.0901386274652425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21:00</text:p>
          </table:table-cell>
          <table:table-cell office:value-type="float" office:value="1.0175085" table:style-name="c10">
            <text:p>1.0175</text:p>
          </table:table-cell>
          <table:table-cell office:value-type="string" table:style-name="c10">
            <text:p>2026-03-16 23:15</text:p>
          </table:table-cell>
          <table:table-cell office:value-type="float" office:value="1.015492" table:style-name="c10">
            <text:p>1.0155</text:p>
          </table:table-cell>
          <table:table-cell office:value-type="float" office:value="-0.3976840004776272" table:style-name="c11">
            <text:p>-0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8:15</text:p>
          </table:table-cell>
          <table:table-cell office:value-type="float" office:value="1.0025009999999999" table:style-name="c10">
            <text:p>1.0025</text:p>
          </table:table-cell>
          <table:table-cell office:value-type="string" table:style-name="c10">
            <text:p>2026-03-17 10:45</text:p>
          </table:table-cell>
          <table:table-cell office:value-type="float" office:value="0.9945025000000001" table:style-name="c10">
            <text:p>0.9945</text:p>
          </table:table-cell>
          <table:table-cell office:value-type="float" office:value="-0.9961596544541873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23:15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17 23:45</text:p>
          </table:table-cell>
          <table:table-cell office:value-type="float" office:value="1.005497" table:style-name="c10">
            <text:p>1.0055</text:p>
          </table:table-cell>
          <table:table-cell office:value-type="float" office:value="-0.890759018020626" table:style-name="c11">
            <text:p>-0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3:45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0 14:45</text:p>
          </table:table-cell>
          <table:table-cell office:value-type="float" office:value="1.0014990000000001" table:style-name="c10">
            <text:p>1.0015</text:p>
          </table:table-cell>
          <table:table-cell office:value-type="float" office:value="-1.2848315467759996" table:style-name="c11">
            <text:p>-1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6:00</text:p>
          </table:table-cell>
          <table:table-cell office:value-type="float" office:value="1.006503" table:style-name="c10">
            <text:p>1.0065</text:p>
          </table:table-cell>
          <table:table-cell office:value-type="string" table:style-name="c10">
            <text:p>2026-03-20 16:15</text:p>
          </table:table-cell>
          <table:table-cell office:value-type="float" office:value="1.0004994999999999" table:style-name="c10">
            <text:p>1.0005</text:p>
          </table:table-cell>
          <table:table-cell office:value-type="float" office:value="-0.7951788022986572" table:style-name="c11">
            <text:p>-0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1 09:15</text:p>
          </table:table-cell>
          <table:table-cell office:value-type="float" office:value="1.0245119999999999" table:style-name="c10">
            <text:p>1.0245</text:p>
          </table:table-cell>
          <table:table-cell office:value-type="string" table:style-name="c10">
            <text:p>2026-03-21 10:15</text:p>
          </table:table-cell>
          <table:table-cell office:value-type="float" office:value="1.0074960000000002" table:style-name="c10">
            <text:p>1.0075</text:p>
          </table:table-cell>
          <table:table-cell office:value-type="float" office:value="-1.8574681901236678" table:style-name="c11">
            <text:p>-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00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3 23:15</text:p>
          </table:table-cell>
          <table:table-cell office:value-type="float" office:value="1.0334830000000002" table:style-name="c10">
            <text:p>1.0335</text:p>
          </table:table-cell>
          <table:table-cell office:value-type="float" office:value="1.8677486832670898" table:style-name="c12">
            <text:p>+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6:15</text:p>
          </table:table-cell>
          <table:table-cell office:value-type="float" office:value="1.0835415" table:style-name="c10">
            <text:p>1.0835</text:p>
          </table:table-cell>
          <table:table-cell office:value-type="string" table:style-name="c10">
            <text:p>2026-03-24 06:30</text:p>
          </table:table-cell>
          <table:table-cell office:value-type="float" office:value="1.0494750000000002" table:style-name="c10">
            <text:p>1.0495</text:p>
          </table:table-cell>
          <table:table-cell office:value-type="float" office:value="-3.3376110213591104" table:style-name="c11">
            <text:p>-3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9:00</text:p>
          </table:table-cell>
          <table:table-cell office:value-type="float" office:value="1.074537" table:style-name="c10">
            <text:p>1.0745</text:p>
          </table:table-cell>
          <table:table-cell office:value-type="string" table:style-name="c10">
            <text:p>2026-03-24 10:30</text:p>
          </table:table-cell>
          <table:table-cell office:value-type="float" office:value="1.0564715" table:style-name="c10">
            <text:p>1.0565</text:p>
          </table:table-cell>
          <table:table-cell office:value-type="float" office:value="-1.877774941998278" table:style-name="c11">
            <text:p>-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6:30</text:p>
          </table:table-cell>
          <table:table-cell office:value-type="float" office:value="1.048524" table:style-name="c10">
            <text:p>1.0485</text:p>
          </table:table-cell>
          <table:table-cell office:value-type="string" table:style-name="c10">
            <text:p>2026-03-24 18:15</text:p>
          </table:table-cell>
          <table:table-cell office:value-type="float" office:value="1.035482" table:style-name="c10">
            <text:p>1.0355</text:p>
          </table:table-cell>
          <table:table-cell office:value-type="float" office:value="-1.4412572833812032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1.108554" table:style-name="c10">
            <text:p>1.1086</text:p>
          </table:table-cell>
          <table:table-cell office:value-type="string" table:style-name="c10">
            <text:p>2026-03-25 00:30</text:p>
          </table:table-cell>
          <table:table-cell office:value-type="float" office:value="1.0874560000000002" table:style-name="c10">
            <text:p>1.0875</text:p>
          </table:table-cell>
          <table:table-cell office:value-type="float" office:value="-2.099295527687406" table:style-name="c11">
            <text:p>-2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8:15</text:p>
          </table:table-cell>
          <table:table-cell office:value-type="float" office:value="0.8614305" table:style-name="c10">
            <text:p>0.86143</text:p>
          </table:table-cell>
          <table:table-cell office:value-type="string" table:style-name="c10">
            <text:p>2026-04-06 12:45</text:p>
          </table:table-cell>
          <table:table-cell office:value-type="float" office:value="0.8685655" table:style-name="c10">
            <text:p>0.86857</text:p>
          </table:table-cell>
          <table:table-cell office:value-type="float" office:value="0.6267177172737615" table:style-name="c12">
            <text:p>+0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5:45</text:p>
          </table:table-cell>
          <table:table-cell office:value-type="float" office:value="0.8824409999999999" table:style-name="c10">
            <text:p>0.88244</text:p>
          </table:table-cell>
          <table:table-cell office:value-type="string" table:style-name="c10">
            <text:p>2026-04-08 07:45</text:p>
          </table:table-cell>
          <table:table-cell office:value-type="float" office:value="0.8745625" table:style-name="c10">
            <text:p>0.87456</text:p>
          </table:table-cell>
          <table:table-cell office:value-type="float" office:value="-1.0909228421503325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6:45</text:p>
          </table:table-cell>
          <table:table-cell office:value-type="float" office:value="0.8684339999999999" table:style-name="c10">
            <text:p>0.86843</text:p>
          </table:table-cell>
          <table:table-cell office:value-type="string" table:style-name="c10">
            <text:p>2026-04-10 17:45</text:p>
          </table:table-cell>
          <table:table-cell office:value-type="float" office:value="0.8595700000000001" table:style-name="c10">
            <text:p>0.85957</text:p>
          </table:table-cell>
          <table:table-cell office:value-type="float" office:value="-1.218547457837893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0.8744369999999999" table:style-name="c10">
            <text:p>0.87444</text:p>
          </table:table-cell>
          <table:table-cell office:value-type="string" table:style-name="c10">
            <text:p>2026-04-10 21:15</text:p>
          </table:table-cell>
          <table:table-cell office:value-type="float" office:value="0.8665665" table:style-name="c10">
            <text:p>0.86657</text:p>
          </table:table-cell>
          <table:table-cell office:value-type="float" office:value="-1.0981656121024086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2:15</text:p>
          </table:table-cell>
          <table:table-cell office:value-type="float" office:value="0.8544269999999999" table:style-name="c10">
            <text:p>0.85443</text:p>
          </table:table-cell>
          <table:table-cell office:value-type="string" table:style-name="c10">
            <text:p>2026-04-11 13:00</text:p>
          </table:table-cell>
          <table:table-cell office:value-type="float" office:value="0.8505745" table:style-name="c10">
            <text:p>0.85057</text:p>
          </table:table-cell>
          <table:table-cell office:value-type="float" office:value="-0.6498856456432223" table:style-name="c11">
            <text:p>-0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45</text:p>
          </table:table-cell>
          <table:table-cell office:value-type="float" office:value="0.8674335" table:style-name="c10">
            <text:p>0.86743</text:p>
          </table:table-cell>
          <table:table-cell office:value-type="string" table:style-name="c10">
            <text:p>2026-04-11 21:15</text:p>
          </table:table-cell>
          <table:table-cell office:value-type="float" office:value="0.871564" table:style-name="c10">
            <text:p>0.87156</text:p>
          </table:table-cell>
          <table:table-cell office:value-type="float" office:value="0.2753229572065141" table:style-name="c12">
            <text:p>+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8714354999999999" table:style-name="c10">
            <text:p>0.87144</text:p>
          </table:table-cell>
          <table:table-cell office:value-type="string" table:style-name="c10">
            <text:p>2026-04-14 02:30</text:p>
          </table:table-cell>
          <table:table-cell office:value-type="float" office:value="0.869565" table:style-name="c10">
            <text:p>0.86957</text:p>
          </table:table-cell>
          <table:table-cell office:value-type="float" office:value="-0.414116757350369" table:style-name="c11">
            <text:p>-0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00</text:p>
          </table:table-cell>
          <table:table-cell office:value-type="float" office:value="0.8774384999999999" table:style-name="c10">
            <text:p>0.87744</text:p>
          </table:table-cell>
          <table:table-cell office:value-type="string" table:style-name="c10">
            <text:p>2026-04-15 18:15</text:p>
          </table:table-cell>
          <table:table-cell office:value-type="float" office:value="0.895552" table:style-name="c10">
            <text:p>0.89555</text:p>
          </table:table-cell>
          <table:table-cell office:value-type="float" office:value="1.8603345478914068" table:style-name="c12">
            <text:p>+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30</text:p>
          </table:table-cell>
          <table:table-cell office:value-type="float" office:value="0.8974485" table:style-name="c10">
            <text:p>0.89745</text:p>
          </table:table-cell>
          <table:table-cell office:value-type="string" table:style-name="c10">
            <text:p>2026-04-16 09:45</text:p>
          </table:table-cell>
          <table:table-cell office:value-type="float" office:value="0.9245375000000001" table:style-name="c10">
            <text:p>0.92454</text:p>
          </table:table-cell>
          <table:table-cell office:value-type="float" office:value="2.812512309898585" table:style-name="c12">
            <text:p>+2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15</text:p>
          </table:table-cell>
          <table:table-cell office:value-type="float" office:value="0.9384689999999999" table:style-name="c10">
            <text:p>0.93847</text:p>
          </table:table-cell>
          <table:table-cell office:value-type="string" table:style-name="c10">
            <text:p>2026-04-16 14:15</text:p>
          </table:table-cell>
          <table:table-cell office:value-type="float" office:value="0.9245375000000001" table:style-name="c10">
            <text:p>0.92454</text:p>
          </table:table-cell>
          <table:table-cell office:value-type="float" office:value="-1.681424795331532" table:style-name="c11">
            <text:p>-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15</text:p>
          </table:table-cell>
          <table:table-cell office:value-type="float" office:value="0.942471" table:style-name="c10">
            <text:p>0.94247</text:p>
          </table:table-cell>
          <table:table-cell office:value-type="string" table:style-name="c10">
            <text:p>2026-04-17 00:15</text:p>
          </table:table-cell>
          <table:table-cell office:value-type="float" office:value="0.9895050000000001" table:style-name="c10">
            <text:p>0.98951</text:p>
          </table:table-cell>
          <table:table-cell office:value-type="float" office:value="4.780622375118182" table:style-name="c12">
            <text:p>+4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9:45</text:p>
          </table:table-cell>
          <table:table-cell office:value-type="float" office:value="1.0015005" table:style-name="c10">
            <text:p>1.0015</text:p>
          </table:table-cell>
          <table:table-cell office:value-type="string" table:style-name="c10">
            <text:p>2026-04-17 10:30</text:p>
          </table:table-cell>
          <table:table-cell office:value-type="float" office:value="0.9805095" table:style-name="c10">
            <text:p>0.98051</text:p>
          </table:table-cell>
          <table:table-cell office:value-type="float" office:value="-2.2916652054092768" table:style-name="c11">
            <text:p>-2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0.9604799999999999" table:style-name="c10">
            <text:p>0.96048</text:p>
          </table:table-cell>
          <table:table-cell office:value-type="string" table:style-name="c10">
            <text:p>2026-04-22 06:30</text:p>
          </table:table-cell>
          <table:table-cell office:value-type="float" office:value="0.9485255" table:style-name="c10">
            <text:p>0.94853</text:p>
          </table:table-cell>
          <table:table-cell office:value-type="float" office:value="-1.442050066060696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8:15</text:p>
          </table:table-cell>
          <table:table-cell office:value-type="float" office:value="0.9664829999999999" table:style-name="c10">
            <text:p>0.96648</text:p>
          </table:table-cell>
          <table:table-cell office:value-type="string" table:style-name="c10">
            <text:p>2026-04-22 11:45</text:p>
          </table:table-cell>
          <table:table-cell office:value-type="float" office:value="0.975512" table:style-name="c10">
            <text:p>0.97551</text:p>
          </table:table-cell>
          <table:table-cell office:value-type="float" office:value="0.7324444932813368" table:style-name="c12">
            <text:p>+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2:00</text:p>
          </table:table-cell>
          <table:table-cell office:value-type="float" office:value="0.986493" table:style-name="c10">
            <text:p>0.98649</text:p>
          </table:table-cell>
          <table:table-cell office:value-type="string" table:style-name="c10">
            <text:p>2026-04-22 12:30</text:p>
          </table:table-cell>
          <table:table-cell office:value-type="float" office:value="0.977511" table:style-name="c10">
            <text:p>0.97751</text:p>
          </table:table-cell>
          <table:table-cell office:value-type="float" office:value="-1.1085780121095512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15</text:p>
          </table:table-cell>
          <table:table-cell office:value-type="float" office:value="0.9534765" table:style-name="c10">
            <text:p>0.95348</text:p>
          </table:table-cell>
          <table:table-cell office:value-type="string" table:style-name="c10">
            <text:p>2026-04-23 08:45</text:p>
          </table:table-cell>
          <table:table-cell office:value-type="float" office:value="0.943528" table:style-name="c10">
            <text:p>0.94353</text:p>
          </table:table-cell>
          <table:table-cell office:value-type="float" office:value="-1.2412065186713894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45</text:p>
          </table:table-cell>
          <table:table-cell office:value-type="float" office:value="0.9494744999999999" table:style-name="c10">
            <text:p>0.94947</text:p>
          </table:table-cell>
          <table:table-cell office:value-type="string" table:style-name="c10">
            <text:p>2026-04-23 17:00</text:p>
          </table:table-cell>
          <table:table-cell office:value-type="float" office:value="0.9505245" table:style-name="c10">
            <text:p>0.95052</text:p>
          </table:table-cell>
          <table:table-cell office:value-type="float" office:value="-0.08953357625718361" table:style-name="c11">
            <text:p>-0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1:15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4-24 14:15</text:p>
          </table:table-cell>
          <table:table-cell office:value-type="float" office:value="0.9585205" table:style-name="c10">
            <text:p>0.95852</text:p>
          </table:table-cell>
          <table:table-cell office:value-type="float" office:value="-0.2996502248875377" table:style-name="c11">
            <text:p>-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20:00</text:p>
          </table:table-cell>
          <table:table-cell office:value-type="float" office:value="0.9714854999999999" table:style-name="c10">
            <text:p>0.97149</text:p>
          </table:table-cell>
          <table:table-cell office:value-type="string" table:style-name="c10">
            <text:p>2026-04-25 02:45</text:p>
          </table:table-cell>
          <table:table-cell office:value-type="float" office:value="0.9845075000000001" table:style-name="c10">
            <text:p>0.98451</text:p>
          </table:table-cell>
          <table:table-cell office:value-type="float" office:value="1.1378419448875299" table:style-name="c12">
            <text:p>+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04:15</text:p>
          </table:table-cell>
          <table:table-cell office:value-type="float" office:value="0.9954974999999999" table:style-name="c10">
            <text:p>0.9955</text:p>
          </table:table-cell>
          <table:table-cell office:value-type="string" table:style-name="c10">
            <text:p>2026-04-25 04:30</text:p>
          </table:table-cell>
          <table:table-cell office:value-type="float" office:value="0.985507" table:style-name="c10">
            <text:p>0.98551</text:p>
          </table:table-cell>
          <table:table-cell office:value-type="float" office:value="-1.2014624339086732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22:30</text:p>
          </table:table-cell>
          <table:table-cell office:value-type="float" office:value="0.9674834999999999" table:style-name="c10">
            <text:p>0.96748</text:p>
          </table:table-cell>
          <table:table-cell office:value-type="string" table:style-name="c10">
            <text:p>2026-04-26 00:30</text:p>
          </table:table-cell>
          <table:table-cell office:value-type="float" office:value="0.963518" table:style-name="c10">
            <text:p>0.96352</text:p>
          </table:table-cell>
          <table:table-cell office:value-type="float" office:value="-0.6089584454928576" table:style-name="c11">
            <text:p>-0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4:45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4-26 12:30</text:p>
          </table:table-cell>
          <table:table-cell office:value-type="float" office:value="0.9865065000000001" table:style-name="c10">
            <text:p>0.98651</text:p>
          </table:table-cell>
          <table:table-cell office:value-type="float" office:value="1.6572781281363635" table:style-name="c12">
            <text:p>+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6:00</text:p>
          </table:table-cell>
          <table:table-cell office:value-type="float" office:value="0.9934964999999999" table:style-name="c10">
            <text:p>0.9935</text:p>
          </table:table-cell>
          <table:table-cell office:value-type="string" table:style-name="c10">
            <text:p>2026-04-26 17:15</text:p>
          </table:table-cell>
          <table:table-cell office:value-type="float" office:value="0.985507" table:style-name="c10">
            <text:p>0.98551</text:p>
          </table:table-cell>
          <table:table-cell office:value-type="float" office:value="-1.0024724287403197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8:30</text:p>
          </table:table-cell>
          <table:table-cell office:value-type="float" office:value="0.9934964999999999" table:style-name="c10">
            <text:p>0.9935</text:p>
          </table:table-cell>
          <table:table-cell office:value-type="string" table:style-name="c10">
            <text:p>2026-04-26 19:45</text:p>
          </table:table-cell>
          <table:table-cell office:value-type="float" office:value="0.9885055" table:style-name="c10">
            <text:p>0.98851</text:p>
          </table:table-cell>
          <table:table-cell office:value-type="float" office:value="-0.701262912803402" table:style-name="c11">
            <text:p>-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3:45</text:p>
          </table:table-cell>
          <table:table-cell office:value-type="float" office:value="0.9874934999999999" table:style-name="c10">
            <text:p>0.98749</text:p>
          </table:table-cell>
          <table:table-cell office:value-type="string" table:style-name="c10">
            <text:p>2026-04-29 08:15</text:p>
          </table:table-cell>
          <table:table-cell office:value-type="float" office:value="0.9905045" table:style-name="c10">
            <text:p>0.9905</text:p>
          </table:table-cell>
          <table:table-cell office:value-type="float" office:value="0.10440387754451219" table:style-name="c12">
            <text:p>+0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45</text:p>
          </table:table-cell>
          <table:table-cell office:value-type="float" office:value="1.0035014999999998" table:style-name="c10">
            <text:p>1.0035</text:p>
          </table:table-cell>
          <table:table-cell office:value-type="string" table:style-name="c10">
            <text:p>2026-04-29 11:45</text:p>
          </table:table-cell>
          <table:table-cell office:value-type="float" office:value="0.9905045" table:style-name="c10">
            <text:p>0.9905</text:p>
          </table:table-cell>
          <table:table-cell office:value-type="float" office:value="-1.4924759450284597" table:style-name="c11">
            <text:p>-1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8:00</text:p>
          </table:table-cell>
          <table:table-cell office:value-type="float" office:value="0.9844919999999999" table:style-name="c10">
            <text:p>0.98449</text:p>
          </table:table-cell>
          <table:table-cell office:value-type="string" table:style-name="c10">
            <text:p>2026-04-29 18:15</text:p>
          </table:table-cell>
          <table:table-cell office:value-type="float" office:value="0.955522" table:style-name="c10">
            <text:p>0.95552</text:p>
          </table:table-cell>
          <table:table-cell office:value-type="float" office:value="-3.136652047756605" table:style-name="c11">
            <text:p>-3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20:45</text:p>
          </table:table-cell>
          <table:table-cell office:value-type="float" office:value="0.9834915" table:style-name="c10">
            <text:p>0.98349</text:p>
          </table:table-cell>
          <table:table-cell office:value-type="string" table:style-name="c10">
            <text:p>2026-04-30 02:45</text:p>
          </table:table-cell>
          <table:table-cell office:value-type="float" office:value="1.0074960000000002" table:style-name="c10">
            <text:p>1.0075</text:p>
          </table:table-cell>
          <table:table-cell office:value-type="float" office:value="2.235963960644316" table:style-name="c12">
            <text:p>+2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2:00</text:p>
          </table:table-cell>
          <table:table-cell office:value-type="float" office:value="1.022511" table:style-name="c10">
            <text:p>1.0225</text:p>
          </table:table-cell>
          <table:table-cell office:value-type="string" table:style-name="c10">
            <text:p>2026-05-01 06:30</text:p>
          </table:table-cell>
          <table:table-cell office:value-type="float" office:value="1.0264865" table:style-name="c10">
            <text:p>1.0265</text:p>
          </table:table-cell>
          <table:table-cell office:value-type="float" office:value="0.18812056657582232" table:style-name="c12">
            <text:p>+0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1:15</text:p>
          </table:table-cell>
          <table:table-cell office:value-type="float" office:value="1.0095044999999998" table:style-name="c10">
            <text:p>1.0095</text:p>
          </table:table-cell>
          <table:table-cell office:value-type="string" table:style-name="c10">
            <text:p>2026-05-02 02:45</text:p>
          </table:table-cell>
          <table:table-cell office:value-type="float" office:value="1.0024985" table:style-name="c10">
            <text:p>1.0025</text:p>
          </table:table-cell>
          <table:table-cell office:value-type="float" office:value="-0.8925165268207969" table:style-name="c11">
            <text:p>-0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1:45</text:p>
          </table:table-cell>
          <table:table-cell office:value-type="float" office:value="1.0005" table:style-name="c10">
            <text:p>1.0005</text:p>
          </table:table-cell>
          <table:table-cell office:value-type="string" table:style-name="c10">
            <text:p>2026-05-06 05:15</text:p>
          </table:table-cell>
          <table:table-cell office:value-type="float" office:value="1.005497" table:style-name="c10">
            <text:p>1.0055</text:p>
          </table:table-cell>
          <table:table-cell office:value-type="float" office:value="0.29855187376313097" table:style-name="c12">
            <text:p>+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15</text:p>
          </table:table-cell>
          <table:table-cell office:value-type="float" office:value="1.0275134999999997" table:style-name="c10">
            <text:p>1.0275</text:p>
          </table:table-cell>
          <table:table-cell office:value-type="string" table:style-name="c10">
            <text:p>2026-05-06 11:15</text:p>
          </table:table-cell>
          <table:table-cell office:value-type="float" office:value="1.0444775" table:style-name="c10">
            <text:p>1.0445</text:p>
          </table:table-cell>
          <table:table-cell office:value-type="float" office:value="1.4477755744815468" table:style-name="c12">
            <text:p>+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4:30</text:p>
          </table:table-cell>
          <table:table-cell office:value-type="float" office:value="1.0155074999999998" table:style-name="c10">
            <text:p>1.0155</text:p>
          </table:table-cell>
          <table:table-cell office:value-type="string" table:style-name="c10">
            <text:p>2026-05-07 09:00</text:p>
          </table:table-cell>
          <table:table-cell office:value-type="float" office:value="1.0204895" table:style-name="c10">
            <text:p>1.0205</text:p>
          </table:table-cell>
          <table:table-cell office:value-type="float" office:value="0.28971144865992393" table:style-name="c12">
            <text:p>+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18:15</text:p>
          </table:table-cell>
          <table:table-cell office:value-type="float" office:value="1.0245119999999999" table:style-name="c10">
            <text:p>1.0245</text:p>
          </table:table-cell>
          <table:table-cell office:value-type="string" table:style-name="c10">
            <text:p>2026-05-07 21:00</text:p>
          </table:table-cell>
          <table:table-cell office:value-type="float" office:value="1.0184905" table:style-name="c10">
            <text:p>1.0185</text:p>
          </table:table-cell>
          <table:table-cell office:value-type="float" office:value="-0.7864683390238381" table:style-name="c11">
            <text:p>-0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2:00</text:p>
          </table:table-cell>
          <table:table-cell office:value-type="float" office:value="1.062531" table:style-name="c10">
            <text:p>1.0625</text:p>
          </table:table-cell>
          <table:table-cell office:value-type="string" table:style-name="c10">
            <text:p>2026-05-08 13:15</text:p>
          </table:table-cell>
          <table:table-cell office:value-type="float" office:value="1.0494750000000002" table:style-name="c10">
            <text:p>1.0495</text:p>
          </table:table-cell>
          <table:table-cell office:value-type="float" office:value="-1.4262078494650776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5:00</text:p>
          </table:table-cell>
          <table:table-cell office:value-type="float" office:value="1.062531" table:style-name="c10">
            <text:p>1.0625</text:p>
          </table:table-cell>
          <table:table-cell office:value-type="string" table:style-name="c10">
            <text:p>2026-05-08 15:30</text:p>
          </table:table-cell>
          <table:table-cell office:value-type="float" office:value="1.053473" table:style-name="c10">
            <text:p>1.0535</text:p>
          </table:table-cell>
          <table:table-cell office:value-type="float" office:value="-1.050688641272557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5:45</text:p>
          </table:table-cell>
          <table:table-cell office:value-type="float" office:value="1.0675335" table:style-name="c10">
            <text:p>1.0675</text:p>
          </table:table-cell>
          <table:table-cell office:value-type="string" table:style-name="c10">
            <text:p>2026-05-08 23:15</text:p>
          </table:table-cell>
          <table:table-cell office:value-type="float" office:value="1.1194400000000002" table:style-name="c10">
            <text:p>1.1194</text:p>
          </table:table-cell>
          <table:table-cell office:value-type="float" office:value="4.652663306584803" table:style-name="c12">
            <text:p>+4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1.1155575" table:style-name="c10">
            <text:p>1.1156</text:p>
          </table:table-cell>
          <table:table-cell office:value-type="string" table:style-name="c10">
            <text:p>2026-05-09 22:00</text:p>
          </table:table-cell>
          <table:table-cell office:value-type="float" office:value="1.1124435000000001" table:style-name="c10">
            <text:p>1.1124</text:p>
          </table:table-cell>
          <table:table-cell office:value-type="float" office:value="-0.4784849330043417" table:style-name="c11">
            <text:p>-0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45</text:p>
          </table:table-cell>
          <table:table-cell office:value-type="float" office:value="1.1415705" table:style-name="c10">
            <text:p>1.1416</text:p>
          </table:table-cell>
          <table:table-cell office:value-type="string" table:style-name="c10">
            <text:p>2026-05-10 21:00</text:p>
          </table:table-cell>
          <table:table-cell office:value-type="float" office:value="1.1764115000000002" table:style-name="c10">
            <text:p>1.1764</text:p>
          </table:table-cell>
          <table:table-cell office:value-type="float" office:value="2.8460225112246773" table:style-name="c12">
            <text:p>+2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6:30</text:p>
          </table:table-cell>
          <table:table-cell office:value-type="float" office:value="1.1375685" table:style-name="c10">
            <text:p>1.1376</text:p>
          </table:table-cell>
          <table:table-cell office:value-type="string" table:style-name="c10">
            <text:p>2026-05-11 08:15</text:p>
          </table:table-cell>
          <table:table-cell office:value-type="float" office:value="1.1194400000000002" table:style-name="c10">
            <text:p>1.1194</text:p>
          </table:table-cell>
          <table:table-cell office:value-type="float" office:value="-1.7903326753509585" table:style-name="c11">
            <text:p>-1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0:15</text:p>
          </table:table-cell>
          <table:table-cell office:value-type="float" office:value="1.1335665" table:style-name="c10">
            <text:p>1.1336</text:p>
          </table:table-cell>
          <table:table-cell office:value-type="string" table:style-name="c10">
            <text:p>2026-05-11 11:00</text:p>
          </table:table-cell>
          <table:table-cell office:value-type="float" office:value="1.1244375" table:style-name="c10">
            <text:p>1.1244</text:p>
          </table:table-cell>
          <table:table-cell office:value-type="float" office:value="-1.0036244510136627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30</text:p>
          </table:table-cell>
          <table:table-cell office:value-type="float" office:value="0.9624809999999999" table:style-name="c10">
            <text:p>0.96248</text:p>
          </table:table-cell>
          <table:table-cell office:value-type="string" table:style-name="c10">
            <text:p>2026-05-21 05:45</text:p>
          </table:table-cell>
          <table:table-cell office:value-type="float" office:value="0.95952" table:style-name="c10">
            <text:p>0.95952</text:p>
          </table:table-cell>
          <table:table-cell office:value-type="float" office:value="-0.5069274593472395" table:style-name="c11">
            <text:p>-0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15</text:p>
          </table:table-cell>
          <table:table-cell office:value-type="float" office:value="0.9704849999999999" table:style-name="c10">
            <text:p>0.97048</text:p>
          </table:table-cell>
          <table:table-cell office:value-type="string" table:style-name="c10">
            <text:p>2026-05-21 09:45</text:p>
          </table:table-cell>
          <table:table-cell office:value-type="float" office:value="0.9605195" table:style-name="c10">
            <text:p>0.96052</text:p>
          </table:table-cell>
          <table:table-cell office:value-type="float" office:value="-1.2247050166154128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0.9614805" table:style-name="c10">
            <text:p>0.96148</text:p>
          </table:table-cell>
          <table:table-cell office:value-type="string" table:style-name="c10">
            <text:p>2026-05-21 22:45</text:p>
          </table:table-cell>
          <table:table-cell office:value-type="float" office:value="0.975512" table:style-name="c10">
            <text:p>0.97551</text:p>
          </table:table-cell>
          <table:table-cell office:value-type="float" office:value="1.2565467018831988" table:style-name="c12">
            <text:p>+1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4:30</text:p>
          </table:table-cell>
          <table:table-cell office:value-type="float" office:value="0.9894944999999999" table:style-name="c10">
            <text:p>0.98949</text:p>
          </table:table-cell>
          <table:table-cell office:value-type="string" table:style-name="c10">
            <text:p>2026-05-22 06:15</text:p>
          </table:table-cell>
          <table:table-cell office:value-type="float" office:value="0.97951" table:style-name="c10">
            <text:p>0.97951</text:p>
          </table:table-cell>
          <table:table-cell office:value-type="float" office:value="-1.2069334887662486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1:00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5-25 11:45</text:p>
          </table:table-cell>
          <table:table-cell office:value-type="float" office:value="0.961519" table:style-name="c10">
            <text:p>0.96152</text:p>
          </table:table-cell>
          <table:table-cell office:value-type="float" office:value="-0.9176275995266825" table:style-name="c11">
            <text:p>-0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15</text:p>
          </table:table-cell>
          <table:table-cell office:value-type="float" office:value="0.9734864999999999" table:style-name="c10">
            <text:p>0.97349</text:p>
          </table:table-cell>
          <table:table-cell office:value-type="string" table:style-name="c10">
            <text:p>2026-05-25 19:00</text:p>
          </table:table-cell>
          <table:table-cell office:value-type="float" office:value="0.9785105000000001" table:style-name="c10">
            <text:p>0.97851</text:p>
          </table:table-cell>
          <table:table-cell office:value-type="float" office:value="0.3151515208993816" table:style-name="c12">
            <text:p>+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4:30</text:p>
          </table:table-cell>
          <table:table-cell office:value-type="float" office:value="0.9654824999999999" table:style-name="c10">
            <text:p>0.96548</text:p>
          </table:table-cell>
          <table:table-cell office:value-type="string" table:style-name="c10">
            <text:p>2026-05-26 07:45</text:p>
          </table:table-cell>
          <table:table-cell office:value-type="float" office:value="0.9725135" table:style-name="c10">
            <text:p>0.97251</text:p>
          </table:table-cell>
          <table:table-cell office:value-type="float" office:value="0.5268811722118238" table:style-name="c12">
            <text:p>+0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0.996498" table:style-name="c10">
            <text:p>0.9965</text:p>
          </table:table-cell>
          <table:table-cell office:value-type="string" table:style-name="c10">
            <text:p>2026-05-26 12:45</text:p>
          </table:table-cell>
          <table:table-cell office:value-type="float" office:value="0.991504" table:style-name="c10">
            <text:p>0.9915</text:p>
          </table:table-cell>
          <table:table-cell office:value-type="float" office:value="-0.7000532360325828" table:style-name="c11">
            <text:p>-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4:30</text:p>
          </table:table-cell>
          <table:table-cell office:value-type="float" office:value="1.0095044999999998" table:style-name="c10">
            <text:p>1.0095</text:p>
          </table:table-cell>
          <table:table-cell office:value-type="string" table:style-name="c10">
            <text:p>2026-05-26 14:45</text:p>
          </table:table-cell>
          <table:table-cell office:value-type="float" office:value="0.991504" table:style-name="c10">
            <text:p>0.9915</text:p>
          </table:table-cell>
          <table:table-cell office:value-type="float" office:value="-1.979438080365148" table:style-name="c11">
            <text:p>-2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30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6-01 04:30</text:p>
          </table:table-cell>
          <table:table-cell office:value-type="float" office:value="0.943528" table:style-name="c10">
            <text:p>0.94353</text:p>
          </table:table-cell>
          <table:table-cell office:value-type="float" office:value="-1.8590926092740712" table:style-name="c11">
            <text:p>-1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30</text:p>
          </table:table-cell>
          <table:table-cell office:value-type="float" office:value="0.1042521" table:style-name="c1">
            <text:p>0.10425</text:p>
          </table:table-cell>
          <table:table-cell office:value-type="string" table:style-name="c1">
            <text:p>2026-03-05 11:45</text:p>
          </table:table-cell>
          <table:table-cell office:value-type="float" office:value="0.10344825" table:style-name="c1">
            <text:p>0.10345</text:p>
          </table:table-cell>
          <table:table-cell office:value-type="float" office:value="-0.9694222483288106" table:style-name="c13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10355174999999998" table:style-name="c1">
            <text:p>0.10355</text:p>
          </table:table-cell>
          <table:table-cell office:value-type="string" table:style-name="c1">
            <text:p>2026-03-05 23:15</text:p>
          </table:table-cell>
          <table:table-cell office:value-type="float" office:value="0.1031484" table:style-name="c1">
            <text:p>0.10315</text:p>
          </table:table-cell>
          <table:table-cell office:value-type="float" office:value="-0.5886367459748243" table:style-name="c13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6:30</text:p>
          </table:table-cell>
          <table:table-cell office:value-type="float" office:value="0.09954975" table:style-name="c1">
            <text:p>0.09955</text:p>
          </table:table-cell>
          <table:table-cell office:value-type="string" table:style-name="c1">
            <text:p>2026-03-09 17:00</text:p>
          </table:table-cell>
          <table:table-cell office:value-type="float" office:value="0.0985507" table:style-name="c1">
            <text:p>0.098551</text:p>
          </table:table-cell>
          <table:table-cell office:value-type="float" office:value="-1.2014624339086732" table:style-name="c13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10095045" table:style-name="c1">
            <text:p>0.10095</text:p>
          </table:table-cell>
          <table:table-cell office:value-type="string" table:style-name="c1">
            <text:p>2026-03-09 20:15</text:p>
          </table:table-cell>
          <table:table-cell office:value-type="float" office:value="0.09895050000000001" table:style-name="c1">
            <text:p>0.098951</text:p>
          </table:table-cell>
          <table:table-cell office:value-type="float" office:value="-2.1770601810095824" table:style-name="c13">
            <text:p>-2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1004502" table:style-name="c1">
            <text:p>0.10045</text:p>
          </table:table-cell>
          <table:table-cell office:value-type="string" table:style-name="c1">
            <text:p>2026-03-10 04:00</text:p>
          </table:table-cell>
          <table:table-cell office:value-type="float" office:value="0.09885055000000001" table:style-name="c1">
            <text:p>0.098851</text:p>
          </table:table-cell>
          <table:table-cell office:value-type="float" office:value="-1.7891972832806635" table:style-name="c13">
            <text:p>-1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15</text:p>
          </table:table-cell>
          <table:table-cell office:value-type="float" office:value="0.1004502" table:style-name="c1">
            <text:p>0.10045</text:p>
          </table:table-cell>
          <table:table-cell office:value-type="string" table:style-name="c1">
            <text:p>2026-03-10 10:15</text:p>
          </table:table-cell>
          <table:table-cell office:value-type="float" office:value="0.10004995" table:style-name="c1">
            <text:p>0.10005</text:p>
          </table:table-cell>
          <table:table-cell office:value-type="float" office:value="-0.5975596365661806" table:style-name="c13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15</text:p>
          </table:table-cell>
          <table:table-cell office:value-type="float" office:value="0.09864929999999998" table:style-name="c1">
            <text:p>0.098649</text:p>
          </table:table-cell>
          <table:table-cell office:value-type="string" table:style-name="c1">
            <text:p>2026-03-11 15:15</text:p>
          </table:table-cell>
          <table:table-cell office:value-type="float" office:value="0.10064965000000001" table:style-name="c1">
            <text:p>0.10065</text:p>
          </table:table-cell>
          <table:table-cell office:value-type="float" office:value="1.8237852165702506" table:style-name="c14">
            <text:p>+1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00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3-12 12:00</text:p>
          </table:table-cell>
          <table:table-cell office:value-type="float" office:value="0.09885055000000001" table:style-name="c1">
            <text:p>0.098851</text:p>
          </table:table-cell>
          <table:table-cell office:value-type="float" office:value="-0.801161038645648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1024512" table:style-name="c1">
            <text:p>0.10245</text:p>
          </table:table-cell>
          <table:table-cell office:value-type="string" table:style-name="c1">
            <text:p>2026-03-13 06:30</text:p>
          </table:table-cell>
          <table:table-cell office:value-type="float" office:value="0.10344825" table:style-name="c1">
            <text:p>0.10345</text:p>
          </table:table-cell>
          <table:table-cell office:value-type="float" office:value="0.7713496262123032" table:style-name="c14">
            <text:p>+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0.10515255" table:style-name="c1">
            <text:p>0.10515</text:p>
          </table:table-cell>
          <table:table-cell office:value-type="string" table:style-name="c1">
            <text:p>2026-03-13 11:30</text:p>
          </table:table-cell>
          <table:table-cell office:value-type="float" office:value="0.1041479" table:style-name="c1">
            <text:p>0.10415</text:p>
          </table:table-cell>
          <table:table-cell office:value-type="float" office:value="-1.1534115455117289" table:style-name="c13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0.10595294999999999" table:style-name="c1">
            <text:p>0.10595</text:p>
          </table:table-cell>
          <table:table-cell office:value-type="string" table:style-name="c1">
            <text:p>2026-03-13 16:00</text:p>
          </table:table-cell>
          <table:table-cell office:value-type="float" office:value="0.10484755" table:style-name="c1">
            <text:p>0.10485</text:p>
          </table:table-cell>
          <table:table-cell office:value-type="float" office:value="-1.2411077298461248" table:style-name="c13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0:30</text:p>
          </table:table-cell>
          <table:table-cell office:value-type="float" office:value="0.10235115" table:style-name="c1">
            <text:p>0.10235</text:p>
          </table:table-cell>
          <table:table-cell office:value-type="string" table:style-name="c1">
            <text:p>2026-03-15 13:15</text:p>
          </table:table-cell>
          <table:table-cell office:value-type="float" office:value="0.1015492" table:style-name="c1">
            <text:p>0.10155</text:p>
          </table:table-cell>
          <table:table-cell office:value-type="float" office:value="-0.981861806926454" table:style-name="c13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15</text:p>
          </table:table-cell>
          <table:table-cell office:value-type="float" office:value="0.1022511" table:style-name="c1">
            <text:p>0.10225</text:p>
          </table:table-cell>
          <table:table-cell office:value-type="string" table:style-name="c1">
            <text:p>2026-03-15 19:00</text:p>
          </table:table-cell>
          <table:table-cell office:value-type="float" office:value="0.1015492" table:style-name="c1">
            <text:p>0.10155</text:p>
          </table:table-cell>
          <table:table-cell office:value-type="float" office:value="-0.8849751746435874" table:style-name="c13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10375184999999999" table:style-name="c1">
            <text:p>0.10375</text:p>
          </table:table-cell>
          <table:table-cell office:value-type="string" table:style-name="c1">
            <text:p>2026-03-15 23:30</text:p>
          </table:table-cell>
          <table:table-cell office:value-type="float" office:value="0.10324835" table:style-name="c1">
            <text:p>0.10325</text:p>
          </table:table-cell>
          <table:table-cell office:value-type="float" office:value="-0.6842224515996587" table:style-name="c13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1050525" table:style-name="c1">
            <text:p>0.10505</text:p>
          </table:table-cell>
          <table:table-cell office:value-type="string" table:style-name="c1">
            <text:p>2026-03-16 09:45</text:p>
          </table:table-cell>
          <table:table-cell office:value-type="float" office:value="0.10814590000000002" table:style-name="c1">
            <text:p>0.10815</text:p>
          </table:table-cell>
          <table:table-cell office:value-type="float" office:value="2.7388366254015972" table:style-name="c14">
            <text:p>+2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3-17 01:30</text:p>
          </table:table-cell>
          <table:table-cell office:value-type="float" office:value="0.1103448" table:style-name="c1">
            <text:p>0.11034</text:p>
          </table:table-cell>
          <table:table-cell office:value-type="float" office:value="-0.1187058514299677" table:style-name="c13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4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3-17 15:15</text:p>
          </table:table-cell>
          <table:table-cell office:value-type="float" office:value="0.10744625000000001" table:style-name="c1">
            <text:p>0.10745</text:p>
          </table:table-cell>
          <table:table-cell office:value-type="float" office:value="-1.1274206565997313" table:style-name="c13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9274635" table:style-name="c1">
            <text:p>0.092746</text:p>
          </table:table-cell>
          <table:table-cell office:value-type="string" table:style-name="c1">
            <text:p>2026-03-30 09:30</text:p>
          </table:table-cell>
          <table:table-cell office:value-type="float" office:value="0.09215390000000001" table:style-name="c1">
            <text:p>0.092154</text:p>
          </table:table-cell>
          <table:table-cell office:value-type="float" office:value="-0.8374083142894451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2:30</text:p>
          </table:table-cell>
          <table:table-cell office:value-type="float" office:value="0.09334664999999999" table:style-name="c1">
            <text:p>0.093347</text:p>
          </table:table-cell>
          <table:table-cell office:value-type="string" table:style-name="c1">
            <text:p>2026-03-30 14:00</text:p>
          </table:table-cell>
          <table:table-cell office:value-type="float" office:value="0.09265365" table:style-name="c1">
            <text:p>0.092654</text:p>
          </table:table-cell>
          <table:table-cell office:value-type="float" office:value="-0.9408100305152711" table:style-name="c13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15</text:p>
          </table:table-cell>
          <table:table-cell office:value-type="float" office:value="0.0912456" table:style-name="c1">
            <text:p>0.091246</text:p>
          </table:table-cell>
          <table:table-cell office:value-type="string" table:style-name="c1">
            <text:p>2026-03-30 23:00</text:p>
          </table:table-cell>
          <table:table-cell office:value-type="float" office:value="0.09085455" table:style-name="c1">
            <text:p>0.090855</text:p>
          </table:table-cell>
          <table:table-cell office:value-type="float" office:value="-0.6276119017793791" table:style-name="c13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0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3-31 15:00</text:p>
          </table:table-cell>
          <table:table-cell office:value-type="float" office:value="0.0917541" table:style-name="c1">
            <text:p>0.091754</text:p>
          </table:table-cell>
          <table:table-cell office:value-type="float" office:value="-0.9470550935571032" table:style-name="c13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474735000000001" table:style-name="c1">
            <text:p>0.094747</text:p>
          </table:table-cell>
          <table:table-cell office:value-type="string" table:style-name="c1">
            <text:p>2026-04-01 09:15</text:p>
          </table:table-cell>
          <table:table-cell office:value-type="float" office:value="0.09485255000000001" table:style-name="c1">
            <text:p>0.094853</text:p>
          </table:table-cell>
          <table:table-cell office:value-type="float" office:value="-0.08908982409534527" table:style-name="c13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9674834999999998" table:style-name="c1">
            <text:p>0.096748</text:p>
          </table:table-cell>
          <table:table-cell office:value-type="string" table:style-name="c1">
            <text:p>2026-04-01 13:15</text:p>
          </table:table-cell>
          <table:table-cell office:value-type="float" office:value="0.09545225" table:style-name="c1">
            <text:p>0.095452</text:p>
          </table:table-cell>
          <table:table-cell office:value-type="float" office:value="-1.5368831073087952" table:style-name="c13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9:15</text:p>
          </table:table-cell>
          <table:table-cell office:value-type="float" office:value="0.09434714999999999" table:style-name="c1">
            <text:p>0.094347</text:p>
          </table:table-cell>
          <table:table-cell office:value-type="string" table:style-name="c1">
            <text:p>2026-04-03 10:30</text:p>
          </table:table-cell>
          <table:table-cell office:value-type="float" office:value="0.0937531" table:style-name="c1">
            <text:p>0.093753</text:p>
          </table:table-cell>
          <table:table-cell office:value-type="float" office:value="-0.8282841049252476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0.09374685" table:style-name="c1">
            <text:p>0.093747</text:p>
          </table:table-cell>
          <table:table-cell office:value-type="string" table:style-name="c1">
            <text:p>2026-04-04 19:45</text:p>
          </table:table-cell>
          <table:table-cell office:value-type="float" office:value="0.09285355" table:style-name="c1">
            <text:p>0.092854</text:p>
          </table:table-cell>
          <table:table-cell office:value-type="float" office:value="-1.1508805324658922" table:style-name="c13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4-06 13:15</text:p>
          </table:table-cell>
          <table:table-cell office:value-type="float" office:value="0.09765115" table:style-name="c1">
            <text:p>0.097651</text:p>
          </table:table-cell>
          <table:table-cell office:value-type="float" office:value="1.1497837282293588" table:style-name="c14">
            <text:p>+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6:00</text:p>
          </table:table-cell>
          <table:table-cell office:value-type="float" office:value="0.0942471" table:style-name="c1">
            <text:p>0.094247</text:p>
          </table:table-cell>
          <table:table-cell office:value-type="string" table:style-name="c1">
            <text:p>2026-04-07 10:30</text:p>
          </table:table-cell>
          <table:table-cell office:value-type="float" office:value="0.09425285" table:style-name="c1">
            <text:p>0.094253</text:p>
          </table:table-cell>
          <table:table-cell office:value-type="float" office:value="-0.19381121238741805" table:style-name="c13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09484739999999998" table:style-name="c1">
            <text:p>0.094847</text:p>
          </table:table-cell>
          <table:table-cell office:value-type="string" table:style-name="c1">
            <text:p>2026-04-08 06:15</text:p>
          </table:table-cell>
          <table:table-cell office:value-type="float" office:value="0.10264865000000001" table:style-name="c1">
            <text:p>0.10265</text:p>
          </table:table-cell>
          <table:table-cell office:value-type="float" office:value="8.00871225637183" table:style-name="c14">
            <text:p>+8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15</text:p>
          </table:table-cell>
          <table:table-cell office:value-type="float" office:value="0.1038519" table:style-name="c1">
            <text:p>0.10385</text:p>
          </table:table-cell>
          <table:table-cell office:value-type="string" table:style-name="c1">
            <text:p>2026-04-09 00:15</text:p>
          </table:table-cell>
          <table:table-cell office:value-type="float" office:value="0.10374810000000001" table:style-name="c1">
            <text:p>0.10375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0.10395195" table:style-name="c1">
            <text:p>0.10395</text:p>
          </table:table-cell>
          <table:table-cell office:value-type="string" table:style-name="c1">
            <text:p>2026-04-09 17:30</text:p>
          </table:table-cell>
          <table:table-cell office:value-type="float" office:value="0.10274860000000001" table:style-name="c1">
            <text:p>0.10275</text:p>
          </table:table-cell>
          <table:table-cell office:value-type="float" office:value="-1.3551880954614015" table:style-name="c13">
            <text:p>-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1:45</text:p>
          </table:table-cell>
          <table:table-cell office:value-type="float" office:value="0.1070535" table:style-name="c1">
            <text:p>0.10705</text:p>
          </table:table-cell>
          <table:table-cell office:value-type="string" table:style-name="c1">
            <text:p>2026-04-10 06:30</text:p>
          </table:table-cell>
          <table:table-cell office:value-type="float" office:value="0.10864565000000001" table:style-name="c1">
            <text:p>0.10865</text:p>
          </table:table-cell>
          <table:table-cell office:value-type="float" office:value="1.2843740238759338" table:style-name="c14">
            <text:p>+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21:45</text:p>
          </table:table-cell>
          <table:table-cell office:value-type="float" office:value="0.1136568" table:style-name="c1">
            <text:p>0.11366</text:p>
          </table:table-cell>
          <table:table-cell office:value-type="string" table:style-name="c1">
            <text:p>2026-04-11 00:45</text:p>
          </table:table-cell>
          <table:table-cell office:value-type="float" office:value="0.11394300000000002" table:style-name="c1">
            <text:p>0.11394</text:p>
          </table:table-cell>
          <table:table-cell office:value-type="float" office:value="0.05140734474313735" table:style-name="c14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02:3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4-11 04:45</text:p>
          </table:table-cell>
          <table:table-cell office:value-type="float" office:value="0.11734130000000001" table:style-name="c1">
            <text:p>0.11734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30</text:p>
          </table:table-cell>
          <table:table-cell office:value-type="float" office:value="0.11665829999999999" table:style-name="c1">
            <text:p>0.11666</text:p>
          </table:table-cell>
          <table:table-cell office:value-type="string" table:style-name="c1">
            <text:p>2026-04-11 22:45</text:p>
          </table:table-cell>
          <table:table-cell office:value-type="float" office:value="0.11604195" table:style-name="c1">
            <text:p>0.11604</text:p>
          </table:table-cell>
          <table:table-cell office:value-type="float" office:value="-0.7271817419334803" table:style-name="c13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3:15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2 14:45</text:p>
          </table:table-cell>
          <table:table-cell office:value-type="float" office:value="0.11104445000000002" table:style-name="c1">
            <text:p>0.11104</text:p>
          </table:table-cell>
          <table:table-cell office:value-type="float" office:value="-1.0124319927167669" table:style-name="c13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8:15</text:p>
          </table:table-cell>
          <table:table-cell office:value-type="float" office:value="0.11295645" table:style-name="c1">
            <text:p>0.11296</text:p>
          </table:table-cell>
          <table:table-cell office:value-type="string" table:style-name="c1">
            <text:p>2026-04-12 21:15</text:p>
          </table:table-cell>
          <table:table-cell office:value-type="float" office:value="0.11144425000000001" table:style-name="c1">
            <text:p>0.11144</text:p>
          </table:table-cell>
          <table:table-cell office:value-type="float" office:value="-1.5359698855178183" table:style-name="c13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6:45</text:p>
          </table:table-cell>
          <table:table-cell office:value-type="float" office:value="0.11135564999999999" table:style-name="c1">
            <text:p>0.11136</text:p>
          </table:table-cell>
          <table:table-cell office:value-type="string" table:style-name="c1">
            <text:p>2026-04-14 18:30</text:p>
          </table:table-cell>
          <table:table-cell office:value-type="float" office:value="0.11064465000000001" table:style-name="c1">
            <text:p>0.11064</text:p>
          </table:table-cell>
          <table:table-cell office:value-type="float" office:value="-0.8371184177452862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1:15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15 18:30</text:p>
          </table:table-cell>
          <table:table-cell office:value-type="float" office:value="0.11504245" table:style-name="c1">
            <text:p>0.11504</text:p>
          </table:table-cell>
          <table:table-cell office:value-type="float" office:value="1.2842917838962409" table:style-name="c14">
            <text:p>+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30</text:p>
          </table:table-cell>
          <table:table-cell office:value-type="float" office:value="0.11785889999999999" table:style-name="c1">
            <text:p>0.11786</text:p>
          </table:table-cell>
          <table:table-cell office:value-type="string" table:style-name="c1">
            <text:p>2026-04-16 09:00</text:p>
          </table:table-cell>
          <table:table-cell office:value-type="float" office:value="0.11804095" table:style-name="c1">
            <text:p>0.11804</text:p>
          </table:table-cell>
          <table:table-cell office:value-type="float" office:value="-0.04574441051968803" table:style-name="c13">
            <text:p>-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1202601" table:style-name="c1">
            <text:p>0.12026</text:p>
          </table:table-cell>
          <table:table-cell office:value-type="string" table:style-name="c1">
            <text:p>2026-04-16 14:15</text:p>
          </table:table-cell>
          <table:table-cell office:value-type="float" office:value="0.1215392" table:style-name="c1">
            <text:p>0.12154</text:p>
          </table:table-cell>
          <table:table-cell office:value-type="float" office:value="0.8615851302302246" table:style-name="c14">
            <text:p>+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0.1244622" table:style-name="c1">
            <text:p>0.12446</text:p>
          </table:table-cell>
          <table:table-cell office:value-type="string" table:style-name="c1">
            <text:p>2026-04-16 16:30</text:p>
          </table:table-cell>
          <table:table-cell office:value-type="float" office:value="0.12243875" table:style-name="c1">
            <text:p>0.12244</text:p>
          </table:table-cell>
          <table:table-cell office:value-type="float" office:value="-1.8224047632534268" table:style-name="c13">
            <text:p>-1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8:15</text:p>
          </table:table-cell>
          <table:table-cell office:value-type="float" office:value="0.12466229999999999" table:style-name="c1">
            <text:p>0.12466</text:p>
          </table:table-cell>
          <table:table-cell office:value-type="string" table:style-name="c1">
            <text:p>2026-04-16 21:30</text:p>
          </table:table-cell>
          <table:table-cell office:value-type="float" office:value="0.1269365" table:style-name="c1">
            <text:p>0.12694</text:p>
          </table:table-cell>
          <table:table-cell office:value-type="float" office:value="1.6207417450985862" table:style-name="c14">
            <text:p>+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00</text:p>
          </table:table-cell>
          <table:table-cell office:value-type="float" office:value="0.13396694999999997" table:style-name="c1">
            <text:p>0.13397</text:p>
          </table:table-cell>
          <table:table-cell office:value-type="string" table:style-name="c1">
            <text:p>2026-04-17 15:00</text:p>
          </table:table-cell>
          <table:table-cell office:value-type="float" office:value="0.13283355" table:style-name="c1">
            <text:p>0.13283</text:p>
          </table:table-cell>
          <table:table-cell office:value-type="float" office:value="-1.0442383486747864" table:style-name="c13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15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18 08:30</text:p>
          </table:table-cell>
          <table:table-cell office:value-type="float" office:value="0.13183405" table:style-name="c1">
            <text:p>0.13183</text:p>
          </table:table-cell>
          <table:table-cell office:value-type="float" office:value="-0.22400504296408164" table:style-name="c13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22:30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4-19 00:30</text:p>
          </table:table-cell>
          <table:table-cell office:value-type="float" office:value="0.12793600000000002" table:style-name="c1">
            <text:p>0.12794</text:p>
          </table:table-cell>
          <table:table-cell office:value-type="float" office:value="-0.687589329070859" table:style-name="c13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6:00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2 07:30</text:p>
          </table:table-cell>
          <table:table-cell office:value-type="float" office:value="0.1285357" table:style-name="c1">
            <text:p>0.12854</text:p>
          </table:table-cell>
          <table:table-cell office:value-type="float" office:value="-0.6857863587958035" table:style-name="c13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8:00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22 19:45</text:p>
          </table:table-cell>
          <table:table-cell office:value-type="float" office:value="0.1303348" table:style-name="c1">
            <text:p>0.13033</text:p>
          </table:table-cell>
          <table:table-cell office:value-type="float" office:value="-1.358682771815889" table:style-name="c13">
            <text:p>-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7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3 08:1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1.084692349101024" table:style-name="c13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15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4-24 02:15</text:p>
          </table:table-cell>
          <table:table-cell office:value-type="float" office:value="0.1291354" table:style-name="c1">
            <text:p>0.12914</text:p>
          </table:table-cell>
          <table:table-cell office:value-type="float" office:value="0.00997819056314242" table:style-name="c14">
            <text:p>+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2:15</text:p>
          </table:table-cell>
          <table:table-cell office:value-type="float" office:value="0.1308654" table:style-name="c1">
            <text:p>0.13087</text:p>
          </table:table-cell>
          <table:table-cell office:value-type="string" table:style-name="c1">
            <text:p>2026-04-24 13:45</text:p>
          </table:table-cell>
          <table:table-cell office:value-type="float" office:value="0.13003495" table:style-name="c1">
            <text:p>0.13003</text:p>
          </table:table-cell>
          <table:table-cell office:value-type="float" office:value="-0.8332147879042129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2:15</text:p>
          </table:table-cell>
          <table:table-cell office:value-type="float" office:value="0.132066" table:style-name="c1">
            <text:p>0.13207</text:p>
          </table:table-cell>
          <table:table-cell office:value-type="string" table:style-name="c1">
            <text:p>2026-04-25 05:15</text:p>
          </table:table-cell>
          <table:table-cell office:value-type="float" office:value="0.13143425" table:style-name="c1">
            <text:p>0.13143</text:p>
          </table:table-cell>
          <table:table-cell office:value-type="float" office:value="-0.6773030649447898" table:style-name="c13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6 01:15</text:p>
          </table:table-cell>
          <table:table-cell office:value-type="float" office:value="0.1283358" table:style-name="c1">
            <text:p>0.12834</text:p>
          </table:table-cell>
          <table:table-cell office:value-type="float" office:value="-0.8402408123591165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30</text:p>
          </table:table-cell>
          <table:table-cell office:value-type="float" office:value="0.1314657" table:style-name="c1">
            <text:p>0.13147</text:p>
          </table:table-cell>
          <table:table-cell office:value-type="string" table:style-name="c1">
            <text:p>2026-04-26 11:15</text:p>
          </table:table-cell>
          <table:table-cell office:value-type="float" office:value="0.13143425" table:style-name="c1">
            <text:p>0.13143</text:p>
          </table:table-cell>
          <table:table-cell office:value-type="float" office:value="-0.22377476843770117" table:style-name="c13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4-27 05:15</text:p>
          </table:table-cell>
          <table:table-cell office:value-type="float" office:value="0.12963515" table:style-name="c1">
            <text:p>0.12964</text:p>
          </table:table-cell>
          <table:table-cell office:value-type="float" office:value="-1.2136335688916366" table:style-name="c13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310655" table:style-name="c1">
            <text:p>0.13107</text:p>
          </table:table-cell>
          <table:table-cell office:value-type="string" table:style-name="c1">
            <text:p>2026-04-29 11:45</text:p>
          </table:table-cell>
          <table:table-cell office:value-type="float" office:value="0.1303348" table:style-name="c1">
            <text:p>0.13033</text:p>
          </table:table-cell>
          <table:table-cell office:value-type="float" office:value="-0.7562930482850283" table:style-name="c13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11:15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4-30 13:00</text:p>
          </table:table-cell>
          <table:table-cell office:value-type="float" office:value="0.12703645" table:style-name="c1">
            <text:p>0.12704</text:p>
          </table:table-cell>
          <table:table-cell office:value-type="float" office:value="-1.0779511599001146" table:style-name="c13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5-06 13:15</text:p>
          </table:table-cell>
          <table:table-cell office:value-type="float" office:value="0.123938" table:style-name="c1">
            <text:p>0.12394</text:p>
          </table:table-cell>
          <table:table-cell office:value-type="float" office:value="-0.379988943481524" table:style-name="c13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45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6 18:00</text:p>
          </table:table-cell>
          <table:table-cell office:value-type="float" office:value="0.12383805" table:style-name="c1">
            <text:p>0.12384</text:p>
          </table:table-cell>
          <table:table-cell office:value-type="float" office:value="-1.0186431319195943" table:style-name="c13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5-07 00:45</text:p>
          </table:table-cell>
          <table:table-cell office:value-type="float" office:value="0.12623685" table:style-name="c1">
            <text:p>0.12624</text:p>
          </table:table-cell>
          <table:table-cell office:value-type="float" office:value="0.09661507628540011" table:style-name="c14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0.1346673" table:style-name="c1">
            <text:p>0.13467</text:p>
          </table:table-cell>
          <table:table-cell office:value-type="string" table:style-name="c1">
            <text:p>2026-05-08 11:00</text:p>
          </table:table-cell>
          <table:table-cell office:value-type="float" office:value="0.1315342" table:style-name="c1">
            <text:p>0.13153</text:p>
          </table:table-cell>
          <table:table-cell office:value-type="float" office:value="-2.5217976938722297" table:style-name="c13">
            <text:p>-2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1:45</text:p>
          </table:table-cell>
          <table:table-cell office:value-type="float" office:value="0.13416704999999998" table:style-name="c1">
            <text:p>0.13417</text:p>
          </table:table-cell>
          <table:table-cell office:value-type="string" table:style-name="c1">
            <text:p>2026-05-08 13:00</text:p>
          </table:table-cell>
          <table:table-cell office:value-type="float" office:value="0.13283355" table:style-name="c1">
            <text:p>0.13283</text:p>
          </table:table-cell>
          <table:table-cell office:value-type="float" office:value="-1.1918233772375553" table:style-name="c13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0.1352676" table:style-name="c1">
            <text:p>0.13527</text:p>
          </table:table-cell>
          <table:table-cell office:value-type="string" table:style-name="c1">
            <text:p>2026-05-08 22:45</text:p>
          </table:table-cell>
          <table:table-cell office:value-type="float" office:value="0.1445277" table:style-name="c1">
            <text:p>0.14453</text:p>
          </table:table-cell>
          <table:table-cell office:value-type="float" office:value="6.632178827524116" table:style-name="c14">
            <text:p>+6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2:30</text:p>
          </table:table-cell>
          <table:table-cell office:value-type="float" office:value="0.1450725" table:style-name="c1">
            <text:p>0.14507</text:p>
          </table:table-cell>
          <table:table-cell office:value-type="string" table:style-name="c1">
            <text:p>2026-05-09 03:45</text:p>
          </table:table-cell>
          <table:table-cell office:value-type="float" office:value="0.14372810000000003" table:style-name="c1">
            <text:p>0.14373</text:p>
          </table:table-cell>
          <table:table-cell office:value-type="float" office:value="-1.1247565678539906" table:style-name="c13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6:45</text:p>
          </table:table-cell>
          <table:table-cell office:value-type="float" office:value="0.14557274999999997" table:style-name="c1">
            <text:p>0.14557</text:p>
          </table:table-cell>
          <table:table-cell office:value-type="string" table:style-name="c1">
            <text:p>2026-05-09 09:00</text:p>
          </table:table-cell>
          <table:table-cell office:value-type="float" office:value="0.14642675" table:style-name="c1">
            <text:p>0.14643</text:p>
          </table:table-cell>
          <table:table-cell office:value-type="float" office:value="0.38557554676270644" table:style-name="c14">
            <text:p>+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45</text:p>
          </table:table-cell>
          <table:table-cell office:value-type="float" office:value="0.14117055" table:style-name="c1">
            <text:p>0.14117</text:p>
          </table:table-cell>
          <table:table-cell office:value-type="string" table:style-name="c1">
            <text:p>2026-05-10 10:15</text:p>
          </table:table-cell>
          <table:table-cell office:value-type="float" office:value="0.14122935" table:style-name="c1">
            <text:p>0.14123</text:p>
          </table:table-cell>
          <table:table-cell office:value-type="float" office:value="-0.15833151507167464" table:style-name="c13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0:45</text:p>
          </table:table-cell>
          <table:table-cell office:value-type="float" office:value="0.14337165" table:style-name="c1">
            <text:p>0.14337</text:p>
          </table:table-cell>
          <table:table-cell office:value-type="string" table:style-name="c1">
            <text:p>2026-05-10 13:30</text:p>
          </table:table-cell>
          <table:table-cell office:value-type="float" office:value="0.14292849999999999" table:style-name="c1">
            <text:p>0.14293</text:p>
          </table:table-cell>
          <table:table-cell office:value-type="float" office:value="-0.508373915972915" table:style-name="c13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0.1438719" table:style-name="c1">
            <text:p>0.14387</text:p>
          </table:table-cell>
          <table:table-cell office:value-type="string" table:style-name="c1">
            <text:p>2026-05-10 20:15</text:p>
          </table:table-cell>
          <table:table-cell office:value-type="float" office:value="0.1443278" table:style-name="c1">
            <text:p>0.14433</text:p>
          </table:table-cell>
          <table:table-cell office:value-type="float" office:value="0.11634567125338169" table:style-name="c14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0.1448724" table:style-name="c1">
            <text:p>0.14487</text:p>
          </table:table-cell>
          <table:table-cell office:value-type="string" table:style-name="c1">
            <text:p>2026-05-11 00:30</text:p>
          </table:table-cell>
          <table:table-cell office:value-type="float" office:value="0.14292849999999999" table:style-name="c1">
            <text:p>0.14293</text:p>
          </table:table-cell>
          <table:table-cell office:value-type="float" office:value="-1.5390192138047265" table:style-name="c13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0.1428714" table:style-name="c1">
            <text:p>0.14287</text:p>
          </table:table-cell>
          <table:table-cell office:value-type="string" table:style-name="c1">
            <text:p>2026-05-11 11:00</text:p>
          </table:table-cell>
          <table:table-cell office:value-type="float" office:value="0.1421289" table:style-name="c1">
            <text:p>0.14213</text:p>
          </table:table-cell>
          <table:table-cell office:value-type="float" office:value="-0.7185592575560951" table:style-name="c13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0.10995495" table:style-name="c1">
            <text:p>0.10995</text:p>
          </table:table-cell>
          <table:table-cell office:value-type="string" table:style-name="c1">
            <text:p>2026-05-25 19:15</text:p>
          </table:table-cell>
          <table:table-cell office:value-type="float" office:value="0.10964515000000001" table:style-name="c1">
            <text:p>0.10965</text:p>
          </table:table-cell>
          <table:table-cell office:value-type="float" office:value="-0.48108853203060464" table:style-name="c13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5-26 13:45</text:p>
          </table:table-cell>
          <table:table-cell office:value-type="float" office:value="0.11134430000000001" table:style-name="c1">
            <text:p>0.11134</text:p>
          </table:table-cell>
          <table:table-cell office:value-type="float" office:value="2.4595845474864264" table:style-name="c14">
            <text:p>+2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9:15</text:p>
          </table:table-cell>
          <table:table-cell office:value-type="float" office:value="1.8789389999999997" table:style-name="c10">
            <text:p>1.8789</text:p>
          </table:table-cell>
          <table:table-cell office:value-type="string" table:style-name="c10">
            <text:p>2026-03-05 11:45</text:p>
          </table:table-cell>
          <table:table-cell office:value-type="float" office:value="1.8730630000000001" table:style-name="c10">
            <text:p>1.8731</text:p>
          </table:table-cell>
          <table:table-cell office:value-type="float" office:value="-0.5120045375075821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7858924999999999" table:style-name="c10">
            <text:p>1.7859</text:p>
          </table:table-cell>
          <table:table-cell office:value-type="string" table:style-name="c10">
            <text:p>2026-03-10 18:15</text:p>
          </table:table-cell>
          <table:table-cell office:value-type="float" office:value="1.8120935" table:style-name="c10">
            <text:p>1.8121</text:p>
          </table:table-cell>
          <table:table-cell office:value-type="float" office:value="1.2642768304083285" table:style-name="c12">
            <text:p>+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3:45</text:p>
          </table:table-cell>
          <table:table-cell office:value-type="float" office:value="1.812906" table:style-name="c10">
            <text:p>1.8129</text:p>
          </table:table-cell>
          <table:table-cell office:value-type="string" table:style-name="c10">
            <text:p>2026-03-11 06:30</text:p>
          </table:table-cell>
          <table:table-cell office:value-type="float" office:value="1.8070960000000003" table:style-name="c10">
            <text:p>1.8071</text:p>
          </table:table-cell>
          <table:table-cell office:value-type="float" office:value="-0.5197392972387971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9:00</text:p>
          </table:table-cell>
          <table:table-cell office:value-type="float" office:value="1.846923" table:style-name="c10">
            <text:p>1.8469</text:p>
          </table:table-cell>
          <table:table-cell office:value-type="string" table:style-name="c10">
            <text:p>2026-03-11 20:15</text:p>
          </table:table-cell>
          <table:table-cell office:value-type="float" office:value="1.8340825" table:style-name="c10">
            <text:p>1.8341</text:p>
          </table:table-cell>
          <table:table-cell office:value-type="float" office:value="-0.8937476504164099" table:style-name="c11">
            <text:p>-0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23:15</text:p>
          </table:table-cell>
          <table:table-cell office:value-type="float" office:value="1.8499245" table:style-name="c10">
            <text:p>1.8499</text:p>
          </table:table-cell>
          <table:table-cell office:value-type="string" table:style-name="c10">
            <text:p>2026-03-11 23:45</text:p>
          </table:table-cell>
          <table:table-cell office:value-type="float" office:value="1.8390800000000003" table:style-name="c10">
            <text:p>1.8391</text:p>
          </table:table-cell>
          <table:table-cell office:value-type="float" office:value="-0.784941273008688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1.858929" table:style-name="c10">
            <text:p>1.8589</text:p>
          </table:table-cell>
          <table:table-cell office:value-type="string" table:style-name="c10">
            <text:p>2026-03-13 15:45</text:p>
          </table:table-cell>
          <table:table-cell office:value-type="float" office:value="1.8720635" table:style-name="c10">
            <text:p>1.8721</text:p>
          </table:table-cell>
          <table:table-cell office:value-type="float" office:value="0.5052503384206819" table:style-name="c12">
            <text:p>+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4:00</text:p>
          </table:table-cell>
          <table:table-cell office:value-type="float" office:value="1.884942" table:style-name="c10">
            <text:p>1.8849</text:p>
          </table:table-cell>
          <table:table-cell office:value-type="string" table:style-name="c10">
            <text:p>2026-03-14 05:00</text:p>
          </table:table-cell>
          <table:table-cell office:value-type="float" office:value="1.8730630000000001" table:style-name="c10">
            <text:p>1.8731</text:p>
          </table:table-cell>
          <table:table-cell office:value-type="float" office:value="-0.8288452873881469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1:30</text:p>
          </table:table-cell>
          <table:table-cell office:value-type="float" office:value="1.872936" table:style-name="c10">
            <text:p>1.8729</text:p>
          </table:table-cell>
          <table:table-cell office:value-type="string" table:style-name="c10">
            <text:p>2026-03-15 13:15</text:p>
          </table:table-cell>
          <table:table-cell office:value-type="float" office:value="1.8570710000000001" table:style-name="c10">
            <text:p>1.8571</text:p>
          </table:table-cell>
          <table:table-cell office:value-type="float" office:value="-1.0452724988467055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1.8919454999999998" table:style-name="c10">
            <text:p>1.8919</text:p>
          </table:table-cell>
          <table:table-cell office:value-type="string" table:style-name="c10">
            <text:p>2026-03-16 10:30</text:p>
          </table:table-cell>
          <table:table-cell office:value-type="float" office:value="1.8990500000000001" table:style-name="c10">
            <text:p>1.8991</text:p>
          </table:table-cell>
          <table:table-cell office:value-type="float" office:value="0.17486228065239917" table:style-name="c12">
            <text:p>+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6:30</text:p>
          </table:table-cell>
          <table:table-cell office:value-type="float" office:value="1.9249619999999998" table:style-name="c10">
            <text:p>1.925</text:p>
          </table:table-cell>
          <table:table-cell office:value-type="string" table:style-name="c10">
            <text:p>2026-03-16 23:15</text:p>
          </table:table-cell>
          <table:table-cell office:value-type="float" office:value="1.9730130000000001" table:style-name="c10">
            <text:p>1.973</text:p>
          </table:table-cell>
          <table:table-cell office:value-type="float" office:value="2.291315205858613" table:style-name="c12">
            <text:p>+2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1:15</text:p>
          </table:table-cell>
          <table:table-cell office:value-type="float" office:value="1.9709849999999998" table:style-name="c10">
            <text:p>1.971</text:p>
          </table:table-cell>
          <table:table-cell office:value-type="string" table:style-name="c10">
            <text:p>2026-03-18 06:30</text:p>
          </table:table-cell>
          <table:table-cell office:value-type="float" office:value="1.991004" table:style-name="c10">
            <text:p>1.991</text:p>
          </table:table-cell>
          <table:table-cell office:value-type="float" office:value="0.8137546964588793" table:style-name="c12">
            <text:p>+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9:15</text:p>
          </table:table-cell>
          <table:table-cell office:value-type="float" office:value="2.0150069999999998" table:style-name="c10">
            <text:p>2.015</text:p>
          </table:table-cell>
          <table:table-cell office:value-type="string" table:style-name="c10">
            <text:p>2026-03-18 11:30</text:p>
          </table:table-cell>
          <table:table-cell office:value-type="float" office:value="2.0079955" table:style-name="c10">
            <text:p>2.008</text:p>
          </table:table-cell>
          <table:table-cell office:value-type="float" office:value="-0.5471684715983582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7:00</text:p>
          </table:table-cell>
          <table:table-cell office:value-type="float" office:value="1.706853" table:style-name="c10">
            <text:p>1.7069</text:p>
          </table:table-cell>
          <table:table-cell office:value-type="string" table:style-name="c10">
            <text:p>2026-03-31 08:00</text:p>
          </table:table-cell>
          <table:table-cell office:value-type="float" office:value="1.697151" table:style-name="c10">
            <text:p>1.6972</text:p>
          </table:table-cell>
          <table:table-cell office:value-type="float" office:value="-0.7671782425903051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5:15</text:p>
          </table:table-cell>
          <table:table-cell office:value-type="float" office:value="1.6918455" table:style-name="c10">
            <text:p>1.6918</text:p>
          </table:table-cell>
          <table:table-cell office:value-type="string" table:style-name="c10">
            <text:p>2026-03-31 22:30</text:p>
          </table:table-cell>
          <table:table-cell office:value-type="float" office:value="1.703148" table:style-name="c10">
            <text:p>1.7031</text:p>
          </table:table-cell>
          <table:table-cell office:value-type="float" office:value="0.46682200874725854" table:style-name="c12">
            <text:p>+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1.722861" table:style-name="c10">
            <text:p>1.7229</text:p>
          </table:table-cell>
          <table:table-cell office:value-type="string" table:style-name="c10">
            <text:p>2026-04-01 09:15</text:p>
          </table:table-cell>
          <table:table-cell office:value-type="float" office:value="1.7241375" table:style-name="c10">
            <text:p>1.7241</text:p>
          </table:table-cell>
          <table:table-cell office:value-type="float" office:value="-0.1259562357323052" table:style-name="c11">
            <text:p>-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30</text:p>
          </table:table-cell>
          <table:table-cell office:value-type="float" office:value="1.7178585" table:style-name="c10">
            <text:p>1.7179</text:p>
          </table:table-cell>
          <table:table-cell office:value-type="string" table:style-name="c10">
            <text:p>2026-04-03 18:45</text:p>
          </table:table-cell>
          <table:table-cell office:value-type="float" office:value="1.701149" table:style-name="c10">
            <text:p>1.7011</text:p>
          </table:table-cell>
          <table:table-cell office:value-type="float" office:value="-1.1706492037033223" table:style-name="c11">
            <text:p>-1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7:30</text:p>
          </table:table-cell>
          <table:table-cell office:value-type="float" office:value="1.7298645" table:style-name="c10">
            <text:p>1.7299</text:p>
          </table:table-cell>
          <table:table-cell office:value-type="string" table:style-name="c10">
            <text:p>2026-04-06 11:45</text:p>
          </table:table-cell>
          <table:table-cell office:value-type="float" office:value="1.7381305000000002" table:style-name="c10">
            <text:p>1.7381</text:p>
          </table:table-cell>
          <table:table-cell office:value-type="float" office:value="0.27698569052665434" table:style-name="c12">
            <text:p>+0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15</text:p>
          </table:table-cell>
          <table:table-cell office:value-type="float" office:value="1.7398695" table:style-name="c10">
            <text:p>1.7399</text:p>
          </table:table-cell>
          <table:table-cell office:value-type="string" table:style-name="c10">
            <text:p>2026-04-08 04:00</text:p>
          </table:table-cell>
          <table:table-cell office:value-type="float" office:value="1.7921035" table:style-name="c10">
            <text:p>1.7921</text:p>
          </table:table-cell>
          <table:table-cell office:value-type="float" office:value="2.7962778302338176" table:style-name="c12">
            <text:p>+2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5:45</text:p>
          </table:table-cell>
          <table:table-cell office:value-type="float" office:value="1.788894" table:style-name="c10">
            <text:p>1.7889</text:p>
          </table:table-cell>
          <table:table-cell office:value-type="string" table:style-name="c10">
            <text:p>2026-04-08 20:30</text:p>
          </table:table-cell>
          <table:table-cell office:value-type="float" office:value="1.7791100000000002" table:style-name="c10">
            <text:p>1.7791</text:p>
          </table:table-cell>
          <table:table-cell office:value-type="float" office:value="-0.7457368010625465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09 17:30</text:p>
          </table:table-cell>
          <table:table-cell office:value-type="float" office:value="1.8000995" table:style-name="c10">
            <text:p>1.8001</text:p>
          </table:table-cell>
          <table:table-cell office:value-type="float" office:value="-1.394656812203443" table:style-name="c11">
            <text:p>-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1.8419204999999998" table:style-name="c10">
            <text:p>1.8419</text:p>
          </table:table-cell>
          <table:table-cell office:value-type="string" table:style-name="c10">
            <text:p>2026-04-10 15:30</text:p>
          </table:table-cell>
          <table:table-cell office:value-type="float" office:value="1.8300845000000001" table:style-name="c10">
            <text:p>1.8301</text:p>
          </table:table-cell>
          <table:table-cell office:value-type="float" office:value="-0.8412056283373714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6:00</text:p>
          </table:table-cell>
          <table:table-cell office:value-type="float" office:value="1.7968979999999999" table:style-name="c10">
            <text:p>1.7969</text:p>
          </table:table-cell>
          <table:table-cell office:value-type="string" table:style-name="c10">
            <text:p>2026-04-16 08:15</text:p>
          </table:table-cell>
          <table:table-cell office:value-type="float" office:value="1.7951020000000002" table:style-name="c10">
            <text:p>1.7951</text:p>
          </table:table-cell>
          <table:table-cell office:value-type="float" office:value="-0.2996502248875377" table:style-name="c11">
            <text:p>-0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1.8179085" table:style-name="c10">
            <text:p>1.8179</text:p>
          </table:table-cell>
          <table:table-cell office:value-type="string" table:style-name="c10">
            <text:p>2026-04-16 14:15</text:p>
          </table:table-cell>
          <table:table-cell office:value-type="float" office:value="1.7951020000000002" table:style-name="c10">
            <text:p>1.7951</text:p>
          </table:table-cell>
          <table:table-cell office:value-type="float" office:value="-1.4519382520077229" table:style-name="c11">
            <text:p>-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1.864932" table:style-name="c10">
            <text:p>1.8649</text:p>
          </table:table-cell>
          <table:table-cell office:value-type="string" table:style-name="c10">
            <text:p>2026-04-17 15:45</text:p>
          </table:table-cell>
          <table:table-cell office:value-type="float" office:value="1.8240875" table:style-name="c10">
            <text:p>1.8241</text:p>
          </table:table-cell>
          <table:table-cell office:value-type="float" office:value="-2.3856553972209205" table:style-name="c11">
            <text:p>-2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0:30</text:p>
          </table:table-cell>
          <table:table-cell office:value-type="float" office:value="1.8059024999999997" table:style-name="c10">
            <text:p>1.8059</text:p>
          </table:table-cell>
          <table:table-cell office:value-type="string" table:style-name="c10">
            <text:p>2026-04-21 12:45</text:p>
          </table:table-cell>
          <table:table-cell office:value-type="float" office:value="1.803098" table:style-name="c10">
            <text:p>1.8031</text:p>
          </table:table-cell>
          <table:table-cell office:value-type="float" office:value="-0.3548858757324913" table:style-name="c11">
            <text:p>-0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5:30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21 17:30</text:p>
          </table:table-cell>
          <table:table-cell office:value-type="float" office:value="1.8040975000000001" table:style-name="c10">
            <text:p>1.8041</text:p>
          </table:table-cell>
          <table:table-cell office:value-type="float" office:value="-1.1756554947402464" table:style-name="c11">
            <text:p>-1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0:30</text:p>
          </table:table-cell>
          <table:table-cell office:value-type="float" office:value="1.862931" table:style-name="c10">
            <text:p>1.8629</text:p>
          </table:table-cell>
          <table:table-cell office:value-type="string" table:style-name="c10">
            <text:p>2026-04-22 07:30</text:p>
          </table:table-cell>
          <table:table-cell office:value-type="float" office:value="1.9020485" table:style-name="c10">
            <text:p>1.902</text:p>
          </table:table-cell>
          <table:table-cell office:value-type="float" office:value="1.8956850816535864" table:style-name="c12">
            <text:p>+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7:15</text:p>
          </table:table-cell>
          <table:table-cell office:value-type="float" office:value="1.8599294999999998" table:style-name="c10">
            <text:p>1.8599</text:p>
          </table:table-cell>
          <table:table-cell office:value-type="string" table:style-name="c10">
            <text:p>2026-04-23 09:15</text:p>
          </table:table-cell>
          <table:table-cell office:value-type="float" office:value="1.8540725" table:style-name="c10">
            <text:p>1.8541</text:p>
          </table:table-cell>
          <table:table-cell office:value-type="float" office:value="-0.5141749150975761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45</text:p>
          </table:table-cell>
          <table:table-cell office:value-type="float" office:value="1.8759374999999998" table:style-name="c10">
            <text:p>1.8759</text:p>
          </table:table-cell>
          <table:table-cell office:value-type="string" table:style-name="c10">
            <text:p>2026-04-23 17:45</text:p>
          </table:table-cell>
          <table:table-cell office:value-type="float" office:value="1.8610690000000003" table:style-name="c10">
            <text:p>1.8611</text:p>
          </table:table-cell>
          <table:table-cell office:value-type="float" office:value="-0.9909059833283163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0:30</text:p>
          </table:table-cell>
          <table:table-cell office:value-type="float" office:value="1.8869429999999998" table:style-name="c10">
            <text:p>1.8869</text:p>
          </table:table-cell>
          <table:table-cell office:value-type="string" table:style-name="c10">
            <text:p>2026-04-24 03:15</text:p>
          </table:table-cell>
          <table:table-cell office:value-type="float" office:value="1.91904" table:style-name="c10">
            <text:p>1.919</text:p>
          </table:table-cell>
          <table:table-cell office:value-type="float" office:value="1.4977049672406872" table:style-name="c12">
            <text:p>+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8:15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4-24 13:30</text:p>
          </table:table-cell>
          <table:table-cell office:value-type="float" office:value="1.9540225000000002" table:style-name="c10">
            <text:p>1.954</text:p>
          </table:table-cell>
          <table:table-cell office:value-type="float" office:value="0.6268372794759225" table:style-name="c12">
            <text:p>+0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6:00</text:p>
          </table:table-cell>
          <table:table-cell office:value-type="float" office:value="1.9939965" table:style-name="c10">
            <text:p>1.994</text:p>
          </table:table-cell>
          <table:table-cell office:value-type="string" table:style-name="c10">
            <text:p>2026-04-24 19:15</text:p>
          </table:table-cell>
          <table:table-cell office:value-type="float" office:value="1.9790100000000002" table:style-name="c10">
            <text:p>1.979</text:p>
          </table:table-cell>
          <table:table-cell office:value-type="float" office:value="-0.9499786479063466" table:style-name="c11">
            <text:p>-0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00:30</text:p>
          </table:table-cell>
          <table:table-cell office:value-type="float" office:value="1.998999" table:style-name="c10">
            <text:p>1.999</text:p>
          </table:table-cell>
          <table:table-cell office:value-type="string" table:style-name="c10">
            <text:p>2026-04-25 05:30</text:p>
          </table:table-cell>
          <table:table-cell office:value-type="float" office:value="2.012993" table:style-name="c10">
            <text:p>2.013</text:p>
          </table:table-cell>
          <table:table-cell office:value-type="float" office:value="0.49875097451272943" table:style-name="c12">
            <text:p>+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10:30</text:p>
          </table:table-cell>
          <table:table-cell office:value-type="float" office:value="2.0480235" table:style-name="c10">
            <text:p>2.048</text:p>
          </table:table-cell>
          <table:table-cell office:value-type="string" table:style-name="c10">
            <text:p>2026-04-25 12:15</text:p>
          </table:table-cell>
          <table:table-cell office:value-type="float" office:value="2.03898" table:style-name="c10">
            <text:p>2.039</text:p>
          </table:table-cell>
          <table:table-cell office:value-type="float" office:value="-0.640589378979306" table:style-name="c11">
            <text:p>-0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1.9129559999999999" table:style-name="c10">
            <text:p>1.913</text:p>
          </table:table-cell>
          <table:table-cell office:value-type="string" table:style-name="c10">
            <text:p>2026-05-04 06:30</text:p>
          </table:table-cell>
          <table:table-cell office:value-type="float" office:value="1.9080455" table:style-name="c10">
            <text:p>1.908</text:p>
          </table:table-cell>
          <table:table-cell office:value-type="float" office:value="-0.45608382809118053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1:15</text:p>
          </table:table-cell>
          <table:table-cell office:value-type="float" office:value="1.9079534999999999" table:style-name="c10">
            <text:p>1.908</text:p>
          </table:table-cell>
          <table:table-cell office:value-type="string" table:style-name="c10">
            <text:p>2026-05-05 04:15</text:p>
          </table:table-cell>
          <table:table-cell office:value-type="float" office:value="1.903048" table:style-name="c10">
            <text:p>1.903</text:p>
          </table:table-cell>
          <table:table-cell office:value-type="float" office:value="-0.4564939843659799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00</text:p>
          </table:table-cell>
          <table:table-cell office:value-type="float" office:value="1.9209599999999998" table:style-name="c10">
            <text:p>1.921</text:p>
          </table:table-cell>
          <table:table-cell office:value-type="string" table:style-name="c10">
            <text:p>2026-05-06 05:45</text:p>
          </table:table-cell>
          <table:table-cell office:value-type="float" office:value="1.9140425" table:style-name="c10">
            <text:p>1.914</text:p>
          </table:table-cell>
          <table:table-cell office:value-type="float" office:value="-0.5592865524268964" table:style-name="c11">
            <text:p>-0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45</text:p>
          </table:table-cell>
          <table:table-cell office:value-type="float" office:value="1.9589789999999998" table:style-name="c10">
            <text:p>1.959</text:p>
          </table:table-cell>
          <table:table-cell office:value-type="string" table:style-name="c10">
            <text:p>2026-05-06 10:30</text:p>
          </table:table-cell>
          <table:table-cell office:value-type="float" office:value="1.9460265" table:style-name="c10">
            <text:p>1.946</text:p>
          </table:table-cell>
          <table:table-cell office:value-type="float" office:value="-0.8597645494668349" table:style-name="c11">
            <text:p>-0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2:45</text:p>
          </table:table-cell>
          <table:table-cell office:value-type="float" office:value="1.9699845" table:style-name="c10">
            <text:p>1.97</text:p>
          </table:table-cell>
          <table:table-cell office:value-type="string" table:style-name="c10">
            <text:p>2026-05-06 14:00</text:p>
          </table:table-cell>
          <table:table-cell office:value-type="float" office:value="1.9600195000000002" table:style-name="c10">
            <text:p>1.96</text:p>
          </table:table-cell>
          <table:table-cell office:value-type="float" office:value="-0.7047303661779969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45</text:p>
          </table:table-cell>
          <table:table-cell office:value-type="float" office:value="1.9089539999999998" table:style-name="c10">
            <text:p>1.909</text:p>
          </table:table-cell>
          <table:table-cell office:value-type="string" table:style-name="c10">
            <text:p>2026-05-07 10:30</text:p>
          </table:table-cell>
          <table:table-cell office:value-type="float" office:value="1.9150420000000001" table:style-name="c10">
            <text:p>1.915</text:p>
          </table:table-cell>
          <table:table-cell office:value-type="float" office:value="0.11838059177959881" table:style-name="c12">
            <text:p>+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00</text:p>
          </table:table-cell>
          <table:table-cell office:value-type="float" office:value="1.9499745" table:style-name="c10">
            <text:p>1.95</text:p>
          </table:table-cell>
          <table:table-cell office:value-type="string" table:style-name="c10">
            <text:p>2026-05-09 05:00</text:p>
          </table:table-cell>
          <table:table-cell office:value-type="float" office:value="1.977011" table:style-name="c10">
            <text:p>1.977</text:p>
          </table:table-cell>
          <table:table-cell office:value-type="float" office:value="1.1838336865943822" table:style-name="c12">
            <text:p>+1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30</text:p>
          </table:table-cell>
          <table:table-cell office:value-type="float" office:value="1.9329659999999997" table:style-name="c10">
            <text:p>1.933</text:p>
          </table:table-cell>
          <table:table-cell office:value-type="string" table:style-name="c10">
            <text:p>2026-05-10 07:15</text:p>
          </table:table-cell>
          <table:table-cell office:value-type="float" office:value="1.921039" table:style-name="c10">
            <text:p>1.921</text:p>
          </table:table-cell>
          <table:table-cell office:value-type="float" office:value="-0.8156975839719749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5:15</text:p>
          </table:table-cell>
          <table:table-cell office:value-type="float" office:value="1.9749869999999998" table:style-name="c10">
            <text:p>1.975</text:p>
          </table:table-cell>
          <table:table-cell office:value-type="string" table:style-name="c10">
            <text:p>2026-05-10 20:30</text:p>
          </table:table-cell>
          <table:table-cell office:value-type="float" office:value="2.01899" table:style-name="c10">
            <text:p>2.019</text:p>
          </table:table-cell>
          <table:table-cell office:value-type="float" office:value="2.0236608640968434" table:style-name="c12">
            <text:p>+2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9:45</text:p>
          </table:table-cell>
          <table:table-cell office:value-type="float" office:value="2.0490239999999997" table:style-name="c10">
            <text:p>2.049</text:p>
          </table:table-cell>
          <table:table-cell office:value-type="string" table:style-name="c10">
            <text:p>2026-05-11 11:00</text:p>
          </table:table-cell>
          <table:table-cell office:value-type="float" office:value="2.052973" table:style-name="c10">
            <text:p>2.053</text:p>
          </table:table-cell>
          <table:table-cell office:value-type="float" office:value="-0.007559356405750783" table:style-name="c11">
            <text:p>-0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23:30</text:p>
          </table:table-cell>
          <table:table-cell office:value-type="float" office:value="2.0420205" table:style-name="c10">
            <text:p>2.042</text:p>
          </table:table-cell>
          <table:table-cell office:value-type="string" table:style-name="c10">
            <text:p>2026-05-12 00:15</text:p>
          </table:table-cell>
          <table:table-cell office:value-type="float" office:value="2.0239875" table:style-name="c10">
            <text:p>2.024</text:p>
          </table:table-cell>
          <table:table-cell office:value-type="float" office:value="-1.0812306248884296" table:style-name="c11">
            <text:p>-1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06:45</text:p>
          </table:table-cell>
          <table:table-cell office:value-type="float" office:value="2.057028" table:style-name="c10">
            <text:p>2.057</text:p>
          </table:table-cell>
          <table:table-cell office:value-type="string" table:style-name="c10">
            <text:p>2026-05-12 10:45</text:p>
          </table:table-cell>
          <table:table-cell office:value-type="float" office:value="2.0469760000000004" table:style-name="c10">
            <text:p>2.047</text:p>
          </table:table-cell>
          <table:table-cell office:value-type="float" office:value="-0.6875893290708479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7:15</text:p>
          </table:table-cell>
          <table:table-cell office:value-type="float" office:value="2.0620304999999997" table:style-name="c10">
            <text:p>2.062</text:p>
          </table:table-cell>
          <table:table-cell office:value-type="string" table:style-name="c10">
            <text:p>2026-05-12 21:15</text:p>
          </table:table-cell>
          <table:table-cell office:value-type="float" office:value="2.1099445" table:style-name="c10">
            <text:p>2.1099</text:p>
          </table:table-cell>
          <table:table-cell office:value-type="float" office:value="2.1190870331210254" table:style-name="c12">
            <text:p>+2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2:00</text:p>
          </table:table-cell>
          <table:table-cell office:value-type="float" office:value="2.157078" table:style-name="c10">
            <text:p>2.1571</text:p>
          </table:table-cell>
          <table:table-cell office:value-type="string" table:style-name="c10">
            <text:p>2026-05-13 03:30</text:p>
          </table:table-cell>
          <table:table-cell office:value-type="float" office:value="2.146926" table:style-name="c10">
            <text:p>2.1469</text:p>
          </table:table-cell>
          <table:table-cell office:value-type="float" office:value="-0.6695958641272926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5:15</text:p>
          </table:table-cell>
          <table:table-cell office:value-type="float" office:value="2.2011000000000003" table:style-name="c10">
            <text:p>2.2011</text:p>
          </table:table-cell>
          <table:table-cell office:value-type="string" table:style-name="c10">
            <text:p>2026-05-13 06:00</text:p>
          </table:table-cell>
          <table:table-cell office:value-type="float" office:value="2.1679155000000003" table:style-name="c10">
            <text:p>2.1679</text:p>
          </table:table-cell>
          <table:table-cell office:value-type="float" office:value="-1.704518789900511" table:style-name="c11">
            <text:p>-1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20:15</text:p>
          </table:table-cell>
          <table:table-cell office:value-type="float" office:value="2.0840415" table:style-name="c10">
            <text:p>2.084</text:p>
          </table:table-cell>
          <table:table-cell office:value-type="string" table:style-name="c10">
            <text:p>2026-05-13 21:15</text:p>
          </table:table-cell>
          <table:table-cell office:value-type="float" office:value="2.05897" table:style-name="c10">
            <text:p>2.059</text:p>
          </table:table-cell>
          <table:table-cell office:value-type="float" office:value="-1.4005182252848636" table:style-name="c11">
            <text:p>-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03:45</text:p>
          </table:table-cell>
          <table:table-cell office:value-type="float" office:value="2.053026" table:style-name="c10">
            <text:p>2.053</text:p>
          </table:table-cell>
          <table:table-cell office:value-type="string" table:style-name="c10">
            <text:p>2026-05-17 05:45</text:p>
          </table:table-cell>
          <table:table-cell office:value-type="float" office:value="2.03898" table:style-name="c10">
            <text:p>2.039</text:p>
          </table:table-cell>
          <table:table-cell office:value-type="float" office:value="-0.882693206028573" table:style-name="c11">
            <text:p>-0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10:15</text:p>
          </table:table-cell>
          <table:table-cell office:value-type="float" office:value="2.125062" table:style-name="c10">
            <text:p>2.1251</text:p>
          </table:table-cell>
          <table:table-cell office:value-type="string" table:style-name="c10">
            <text:p>2026-05-17 11:30</text:p>
          </table:table-cell>
          <table:table-cell office:value-type="float" office:value="2.082958" table:style-name="c10">
            <text:p>2.083</text:p>
          </table:table-cell>
          <table:table-cell office:value-type="float" office:value="-2.177246265850108" table:style-name="c11">
            <text:p>-2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03:00</text:p>
          </table:table-cell>
          <table:table-cell office:value-type="float" office:value="2.053026" table:style-name="c10">
            <text:p>2.053</text:p>
          </table:table-cell>
          <table:table-cell office:value-type="string" table:style-name="c10">
            <text:p>2026-05-18 06:30</text:p>
          </table:table-cell>
          <table:table-cell office:value-type="float" office:value="2.0519735" table:style-name="c10">
            <text:p>2.052</text:p>
          </table:table-cell>
          <table:table-cell office:value-type="float" office:value="-0.2510633097924875" table:style-name="c11">
            <text:p>-0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0:15</text:p>
          </table:table-cell>
          <table:table-cell office:value-type="float" office:value="2.0870429999999995" table:style-name="c10">
            <text:p>2.087</text:p>
          </table:table-cell>
          <table:table-cell office:value-type="string" table:style-name="c10">
            <text:p>2026-05-19 01:15</text:p>
          </table:table-cell>
          <table:table-cell office:value-type="float" office:value="2.0619685000000003" table:style-name="c10">
            <text:p>2.062</text:p>
          </table:table-cell>
          <table:table-cell office:value-type="float" office:value="-1.3989350018902003" table:style-name="c11">
            <text:p>-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45</text:p>
          </table:table-cell>
          <table:table-cell office:value-type="float" office:value="2.0780385" table:style-name="c10">
            <text:p>2.078</text:p>
          </table:table-cell>
          <table:table-cell office:value-type="string" table:style-name="c10">
            <text:p>2026-05-19 08:30</text:p>
          </table:table-cell>
          <table:table-cell office:value-type="float" office:value="2.060969" table:style-name="c10">
            <text:p>2.061</text:p>
          </table:table-cell>
          <table:table-cell office:value-type="float" office:value="-1.0196816387665564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11:00</text:p>
          </table:table-cell>
          <table:table-cell office:value-type="float" office:value="2.08104" table:style-name="c10">
            <text:p>2.081</text:p>
          </table:table-cell>
          <table:table-cell office:value-type="string" table:style-name="c10">
            <text:p>2026-05-19 11:30</text:p>
          </table:table-cell>
          <table:table-cell office:value-type="float" office:value="2.0599695000000002" table:style-name="c10">
            <text:p>2.06</text:p>
          </table:table-cell>
          <table:table-cell office:value-type="float" office:value="-1.2103745737948035" table:style-name="c11">
            <text:p>-1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17:00</text:p>
          </table:table-cell>
          <table:table-cell office:value-type="float" office:value="2.08104" table:style-name="c10">
            <text:p>2.081</text:p>
          </table:table-cell>
          <table:table-cell office:value-type="string" table:style-name="c10">
            <text:p>2026-05-19 19:30</text:p>
          </table:table-cell>
          <table:table-cell office:value-type="float" office:value="2.0549720000000002" table:style-name="c10">
            <text:p>2.055</text:p>
          </table:table-cell>
          <table:table-cell office:value-type="float" office:value="-1.4500388761388372" table:style-name="c11">
            <text:p>-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15</text:p>
          </table:table-cell>
          <table:table-cell office:value-type="float" office:value="2.0310149999999996" table:style-name="c10">
            <text:p>2.031</text:p>
          </table:table-cell>
          <table:table-cell office:value-type="string" table:style-name="c10">
            <text:p>2026-05-22 00:15</text:p>
          </table:table-cell>
          <table:table-cell office:value-type="float" office:value="2.0419785000000004" table:style-name="c10">
            <text:p>2.042</text:p>
          </table:table-cell>
          <table:table-cell office:value-type="float" office:value="0.33882492145556053" table:style-name="c12">
            <text:p>+0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3:15</text:p>
          </table:table-cell>
          <table:table-cell office:value-type="float" office:value="2.089044" table:style-name="c10">
            <text:p>2.089</text:p>
          </table:table-cell>
          <table:table-cell office:value-type="string" table:style-name="c10">
            <text:p>2026-05-22 07:30</text:p>
          </table:table-cell>
          <table:table-cell office:value-type="float" office:value="2.1279355" table:style-name="c10">
            <text:p>2.1279</text:p>
          </table:table-cell>
          <table:table-cell office:value-type="float" office:value="1.6580673712712546" table:style-name="c12">
            <text:p>+1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1:30</text:p>
          </table:table-cell>
          <table:table-cell office:value-type="float" office:value="2.1780885" table:style-name="c10">
            <text:p>2.1781</text:p>
          </table:table-cell>
          <table:table-cell office:value-type="string" table:style-name="c10">
            <text:p>2026-05-22 12:30</text:p>
          </table:table-cell>
          <table:table-cell office:value-type="float" office:value="2.148925" table:style-name="c10">
            <text:p>2.1489</text:p>
          </table:table-cell>
          <table:table-cell office:value-type="float" office:value="-1.5361727071695808" table:style-name="c11">
            <text:p>-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01:45</text:p>
          </table:table-cell>
          <table:table-cell office:value-type="float" office:value="2.117058" table:style-name="c10">
            <text:p>2.1171</text:p>
          </table:table-cell>
          <table:table-cell office:value-type="string" table:style-name="c10">
            <text:p>2026-05-23 05:00</text:p>
          </table:table-cell>
          <table:table-cell office:value-type="float" office:value="2.0999495" table:style-name="c10">
            <text:p>2.0999</text:p>
          </table:table-cell>
          <table:table-cell office:value-type="float" office:value="-1.0064107384162413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21:00</text:p>
          </table:table-cell>
          <table:table-cell office:value-type="float" office:value="2.147073" table:style-name="c10">
            <text:p>2.1471</text:p>
          </table:table-cell>
          <table:table-cell office:value-type="string" table:style-name="c10">
            <text:p>2026-05-23 22:45</text:p>
          </table:table-cell>
          <table:table-cell office:value-type="float" office:value="2.1099445" table:style-name="c10">
            <text:p>2.1099</text:p>
          </table:table-cell>
          <table:table-cell office:value-type="float" office:value="-1.9257043917696337" table:style-name="c11">
            <text:p>-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00</text:p>
          </table:table-cell>
          <table:table-cell office:value-type="float" office:value="2.1820904999999997" table:style-name="c10">
            <text:p>2.1821</text:p>
          </table:table-cell>
          <table:table-cell office:value-type="string" table:style-name="c10">
            <text:p>2026-05-25 09:30</text:p>
          </table:table-cell>
          <table:table-cell office:value-type="float" office:value="2.1419285" table:style-name="c10">
            <text:p>2.1419</text:p>
          </table:table-cell>
          <table:table-cell office:value-type="float" office:value="-2.036749395659776" table:style-name="c11">
            <text:p>-2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3:45</text:p>
          </table:table-cell>
          <table:table-cell office:value-type="float" office:value="2.2541265" table:style-name="c10">
            <text:p>2.2541</text:p>
          </table:table-cell>
          <table:table-cell office:value-type="string" table:style-name="c10">
            <text:p>2026-05-26 15:45</text:p>
          </table:table-cell>
          <table:table-cell office:value-type="float" office:value="2.2338825" table:style-name="c10">
            <text:p>2.2339</text:p>
          </table:table-cell>
          <table:table-cell office:value-type="float" office:value="-1.0961909687632887" table:style-name="c11">
            <text:p>-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3-09 17:45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-0.5145216683683729" table:style-name="c13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3-10 04:00</text:p>
          </table:table-cell>
          <table:table-cell office:value-type="float" office:value="9.325335" table:style-name="c1">
            <text:p>9.3253</text:p>
          </table:table-cell>
          <table:table-cell office:value-type="float" office:value="-1.8771874048735149" table:style-name="c13">
            <text:p>-1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9.56478" table:style-name="c1">
            <text:p>9.5648</text:p>
          </table:table-cell>
          <table:table-cell office:value-type="string" table:style-name="c1">
            <text:p>2026-03-10 12:15</text:p>
          </table:table-cell>
          <table:table-cell office:value-type="float" office:value="9.425285" table:style-name="c1">
            <text:p>9.4253</text:p>
          </table:table-cell>
          <table:table-cell office:value-type="float" office:value="-1.6554081193190018" table:style-name="c13">
            <text:p>-1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3-10 18:30</text:p>
          </table:table-cell>
          <table:table-cell office:value-type="float" office:value="9.725135000000002" table:style-name="c1">
            <text:p>9.7251</text:p>
          </table:table-cell>
          <table:table-cell office:value-type="float" office:value="0.6311621692784541" table:style-name="c14">
            <text:p>+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9.714855" table:style-name="c1">
            <text:p>9.7149</text:p>
          </table:table-cell>
          <table:table-cell office:value-type="string" table:style-name="c1">
            <text:p>2026-03-11 15:15</text:p>
          </table:table-cell>
          <table:table-cell office:value-type="float" office:value="9.5952" table:style-name="c1">
            <text:p>9.5952</text:p>
          </table:table-cell>
          <table:table-cell office:value-type="float" office:value="-1.4291083582822273" table:style-name="c13">
            <text:p>-1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3-11 17:45</text:p>
          </table:table-cell>
          <table:table-cell office:value-type="float" office:value="9.65517" table:style-name="c1">
            <text:p>9.6552</text:p>
          </table:table-cell>
          <table:table-cell office:value-type="float" office:value="-0.9150844827586213" table:style-name="c13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3-12 09:30</text:p>
          </table:table-cell>
          <table:table-cell office:value-type="float" office:value="9.525235" table:style-name="c1">
            <text:p>9.5252</text:p>
          </table:table-cell>
          <table:table-cell office:value-type="float" office:value="-0.7163706001231285" table:style-name="c13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45</text:p>
          </table:table-cell>
          <table:table-cell office:value-type="float" office:value="9.634815" table:style-name="c1">
            <text:p>9.6348</text:p>
          </table:table-cell>
          <table:table-cell office:value-type="string" table:style-name="c1">
            <text:p>2026-03-12 11:15</text:p>
          </table:table-cell>
          <table:table-cell office:value-type="float" office:value="9.565215" table:style-name="c1">
            <text:p>9.5652</text:p>
          </table:table-cell>
          <table:table-cell office:value-type="float" office:value="-0.9208362047947838" table:style-name="c13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3:15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3-13 06:15</text:p>
          </table:table-cell>
          <table:table-cell office:value-type="float" office:value="9.905045000000001" table:style-name="c1">
            <text:p>9.905</text:p>
          </table:table-cell>
          <table:table-cell office:value-type="float" office:value="1.5447550124732201" table:style-name="c14">
            <text:p>+1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3-13 14:45</text:p>
          </table:table-cell>
          <table:table-cell office:value-type="float" office:value="10.07496" table:style-name="c1">
            <text:p>10.075</text:p>
          </table:table-cell>
          <table:table-cell office:value-type="float" office:value="1.0029674103651853" table:style-name="c14">
            <text:p>+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15</text:p>
          </table:table-cell>
          <table:table-cell office:value-type="float" office:value="9.82491" table:style-name="c1">
            <text:p>9.8249</text:p>
          </table:table-cell>
          <table:table-cell office:value-type="string" table:style-name="c1">
            <text:p>2026-03-15 13:15</text:p>
          </table:table-cell>
          <table:table-cell office:value-type="float" office:value="9.745125" table:style-name="c1">
            <text:p>9.7451</text:p>
          </table:table-cell>
          <table:table-cell office:value-type="float" office:value="-1.0103451825512755" table:style-name="c13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9.94497" table:style-name="c1">
            <text:p>9.945</text:p>
          </table:table-cell>
          <table:table-cell office:value-type="string" table:style-name="c1">
            <text:p>2026-03-16 00:30</text:p>
          </table:table-cell>
          <table:table-cell office:value-type="float" office:value="9.905045000000001" table:style-name="c1">
            <text:p>9.905</text:p>
          </table:table-cell>
          <table:table-cell office:value-type="float" office:value="-0.6005567131423972" table:style-name="c13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2:00</text:p>
          </table:table-cell>
          <table:table-cell office:value-type="float" office:value="10.004999999999999" table:style-name="c1">
            <text:p>10.005</text:p>
          </table:table-cell>
          <table:table-cell office:value-type="string" table:style-name="c1">
            <text:p>2026-03-16 02:30</text:p>
          </table:table-cell>
          <table:table-cell office:value-type="float" office:value="9.905045000000001" table:style-name="c1">
            <text:p>9.905</text:p>
          </table:table-cell>
          <table:table-cell office:value-type="float" office:value="-1.1969533728635628" table:style-name="c13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10.105049999999999" table:style-name="c1">
            <text:p>10.105</text:p>
          </table:table-cell>
          <table:table-cell office:value-type="string" table:style-name="c1">
            <text:p>2026-03-16 08:30</text:p>
          </table:table-cell>
          <table:table-cell office:value-type="float" office:value="10.324835" table:style-name="c1">
            <text:p>10.325</text:p>
          </table:table-cell>
          <table:table-cell office:value-type="float" office:value="1.9707537798922647" table:style-name="c14">
            <text:p>+2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0.52526" table:style-name="c1">
            <text:p>10.525</text:p>
          </table:table-cell>
          <table:table-cell office:value-type="string" table:style-name="c1">
            <text:p>2026-03-17 02:30</text:p>
          </table:table-cell>
          <table:table-cell office:value-type="float" office:value="10.464765000000002" table:style-name="c1">
            <text:p>10.465</text:p>
          </table:table-cell>
          <table:table-cell office:value-type="float" office:value="-0.7735112029061297" table:style-name="c13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1:30</text:p>
          </table:table-cell>
          <table:table-cell office:value-type="float" office:value="10.295144999999998" table:style-name="c1">
            <text:p>10.295</text:p>
          </table:table-cell>
          <table:table-cell office:value-type="string" table:style-name="c1">
            <text:p>2026-03-17 22:30</text:p>
          </table:table-cell>
          <table:table-cell office:value-type="float" office:value="10.27486" table:style-name="c1">
            <text:p>10.275</text:p>
          </table:table-cell>
          <table:table-cell office:value-type="float" office:value="-0.3965407494503248" table:style-name="c13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45</text:p>
          </table:table-cell>
          <table:table-cell office:value-type="float" office:value="10.285139999999998" table:style-name="c1">
            <text:p>10.285</text:p>
          </table:table-cell>
          <table:table-cell office:value-type="string" table:style-name="c1">
            <text:p>2026-03-18 04:45</text:p>
          </table:table-cell>
          <table:table-cell office:value-type="float" office:value="10.23488" table:style-name="c1">
            <text:p>10.235</text:p>
          </table:table-cell>
          <table:table-cell office:value-type="float" office:value="-0.6875893290708479" table:style-name="c13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3-25 02:30</text:p>
          </table:table-cell>
          <table:table-cell office:value-type="float" office:value="9.585205" table:style-name="c1">
            <text:p>9.5852</text:p>
          </table:table-cell>
          <table:table-cell office:value-type="float" office:value="0.4334405822824072" table:style-name="c14">
            <text:p>+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3-25 12:30</text:p>
          </table:table-cell>
          <table:table-cell office:value-type="float" office:value="9.69515" table:style-name="c1">
            <text:p>9.6951</text:p>
          </table:table-cell>
          <table:table-cell office:value-type="float" office:value="-0.5047949775112359" table:style-name="c13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8.98449" table:style-name="c1">
            <text:p>8.9845</text:p>
          </table:table-cell>
          <table:table-cell office:value-type="string" table:style-name="c1">
            <text:p>2026-03-31 04:30</text:p>
          </table:table-cell>
          <table:table-cell office:value-type="float" office:value="8.93553" table:style-name="c1">
            <text:p>8.9355</text:p>
          </table:table-cell>
          <table:table-cell office:value-type="float" office:value="-0.7437497784515301" table:style-name="c13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8.874434999999998" table:style-name="c1">
            <text:p>8.8744</text:p>
          </table:table-cell>
          <table:table-cell office:value-type="string" table:style-name="c1">
            <text:p>2026-03-31 15:00</text:p>
          </table:table-cell>
          <table:table-cell office:value-type="float" office:value="8.77561" table:style-name="c1">
            <text:p>8.7756</text:p>
          </table:table-cell>
          <table:table-cell office:value-type="float" office:value="-1.3112659497759305" table:style-name="c13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6:45</text:p>
          </table:table-cell>
          <table:table-cell office:value-type="float" office:value="8.864429999999999" table:style-name="c1">
            <text:p>8.8644</text:p>
          </table:table-cell>
          <table:table-cell office:value-type="string" table:style-name="c1">
            <text:p>2026-03-31 18:00</text:p>
          </table:table-cell>
          <table:table-cell office:value-type="float" office:value="8.825585" table:style-name="c1">
            <text:p>8.8256</text:p>
          </table:table-cell>
          <table:table-cell office:value-type="float" office:value="-0.637236059340518" table:style-name="c13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9.084539999999999" table:style-name="c1">
            <text:p>9.0845</text:p>
          </table:table-cell>
          <table:table-cell office:value-type="string" table:style-name="c1">
            <text:p>2026-04-01 09:00</text:p>
          </table:table-cell>
          <table:table-cell office:value-type="float" office:value="9.235380000000001" table:style-name="c1">
            <text:p>9.2354</text:p>
          </table:table-cell>
          <table:table-cell office:value-type="float" office:value="1.4571841323831602" table:style-name="c14">
            <text:p>+1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00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4-03 17:45</text:p>
          </table:table-cell>
          <table:table-cell office:value-type="float" office:value="9.01549" table:style-name="c1">
            <text:p>9.0155</text:p>
          </table:table-cell>
          <table:table-cell office:value-type="float" office:value="-0.41006035752887415" table:style-name="c13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9.194595" table:style-name="c1">
            <text:p>9.1946</text:p>
          </table:table-cell>
          <table:table-cell office:value-type="string" table:style-name="c1">
            <text:p>2026-04-06 04:30</text:p>
          </table:table-cell>
          <table:table-cell office:value-type="float" office:value="9.425285" table:style-name="c1">
            <text:p>9.4253</text:p>
          </table:table-cell>
          <table:table-cell office:value-type="float" office:value="2.304058583167623" table:style-name="c14">
            <text:p>+2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9.344669999999999" table:style-name="c1">
            <text:p>9.3447</text:p>
          </table:table-cell>
          <table:table-cell office:value-type="string" table:style-name="c1">
            <text:p>2026-04-09 18:45</text:p>
          </table:table-cell>
          <table:table-cell office:value-type="float" office:value="9.265365000000001" table:style-name="c1">
            <text:p>9.2654</text:p>
          </table:table-cell>
          <table:table-cell office:value-type="float" office:value="-1.046869120418359" table:style-name="c13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00</text:p>
          </table:table-cell>
          <table:table-cell office:value-type="float" office:value="9.42471" table:style-name="c1">
            <text:p>9.4247</text:p>
          </table:table-cell>
          <table:table-cell office:value-type="string" table:style-name="c1">
            <text:p>2026-04-09 23:30</text:p>
          </table:table-cell>
          <table:table-cell office:value-type="float" office:value="9.3953" table:style-name="c1">
            <text:p>9.3953</text:p>
          </table:table-cell>
          <table:table-cell office:value-type="float" office:value="-0.5113282498877769" table:style-name="c13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5:15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10 06:30</text:p>
          </table:table-cell>
          <table:table-cell office:value-type="float" office:value="9.345325" table:style-name="c1">
            <text:p>9.3453</text:p>
          </table:table-cell>
          <table:table-cell office:value-type="float" office:value="-0.8299712343296295" table:style-name="c13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4-11 20:45</text:p>
          </table:table-cell>
          <table:table-cell office:value-type="float" office:value="9.45527" table:style-name="c1">
            <text:p>9.4553</text:p>
          </table:table-cell>
          <table:table-cell office:value-type="float" office:value="-0.19414720925249318" table:style-name="c13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4-13 21:15</text:p>
          </table:table-cell>
          <table:table-cell office:value-type="float" office:value="9.285355" table:style-name="c1">
            <text:p>9.2854</text:p>
          </table:table-cell>
          <table:table-cell office:value-type="float" office:value="-1.5710680753672102" table:style-name="c13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4 01:00</text:p>
          </table:table-cell>
          <table:table-cell office:value-type="float" office:value="9.505245" table:style-name="c1">
            <text:p>9.5052</text:p>
          </table:table-cell>
          <table:table-cell office:value-type="float" office:value="-0.2996502248875266" table:style-name="c13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9.534764999999998" table:style-name="c1">
            <text:p>9.5348</text:p>
          </table:table-cell>
          <table:table-cell office:value-type="string" table:style-name="c1">
            <text:p>2026-04-15 21:00</text:p>
          </table:table-cell>
          <table:table-cell office:value-type="float" office:value="9.465265" table:style-name="c1">
            <text:p>9.4653</text:p>
          </table:table-cell>
          <table:table-cell office:value-type="float" office:value="-0.9273544207434536" table:style-name="c13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6 14:00</text:p>
          </table:table-cell>
          <table:table-cell office:value-type="float" office:value="9.405295" table:style-name="c1">
            <text:p>9.4053</text:p>
          </table:table-cell>
          <table:table-cell office:value-type="float" office:value="-1.3480240395574938" table:style-name="c13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4-16 17:00</text:p>
          </table:table-cell>
          <table:table-cell office:value-type="float" office:value="9.45527" table:style-name="c1">
            <text:p>9.4553</text:p>
          </table:table-cell>
          <table:table-cell office:value-type="float" office:value="-1.4456312567854068" table:style-name="c13">
            <text:p>-1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4-17 10:30</text:p>
          </table:table-cell>
          <table:table-cell office:value-type="float" office:value="9.57521" table:style-name="c1">
            <text:p>9.5752</text:p>
          </table:table-cell>
          <table:table-cell office:value-type="float" office:value="-0.5073592869190291" table:style-name="c13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4-17 15:45</text:p>
          </table:table-cell>
          <table:table-cell office:value-type="float" office:value="9.77511" table:style-name="c1">
            <text:p>9.7751</text:p>
          </table:table-cell>
          <table:table-cell office:value-type="float" office:value="0.21268456326821727" table:style-name="c14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1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4-21 12:15</text:p>
          </table:table-cell>
          <table:table-cell office:value-type="float" office:value="9.345325" table:style-name="c1">
            <text:p>9.3453</text:p>
          </table:table-cell>
          <table:table-cell office:value-type="float" office:value="-1.5630126296408253" table:style-name="c13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9.594795" table:style-name="c1">
            <text:p>9.5948</text:p>
          </table:table-cell>
          <table:table-cell office:value-type="string" table:style-name="c1">
            <text:p>2026-04-22 07:30</text:p>
          </table:table-cell>
          <table:table-cell office:value-type="float" office:value="9.55522" table:style-name="c1">
            <text:p>9.5552</text:p>
          </table:table-cell>
          <table:table-cell office:value-type="float" office:value="-0.6115387017648577" table:style-name="c13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1:45</text:p>
          </table:table-cell>
          <table:table-cell office:value-type="float" office:value="9.494745" table:style-name="c1">
            <text:p>9.4947</text:p>
          </table:table-cell>
          <table:table-cell office:value-type="string" table:style-name="c1">
            <text:p>2026-04-26 12:45</text:p>
          </table:table-cell>
          <table:table-cell office:value-type="float" office:value="9.445275" table:style-name="c1">
            <text:p>9.4453</text:p>
          </table:table-cell>
          <table:table-cell office:value-type="float" office:value="-0.7198835221482902" table:style-name="c13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4-26 19:30</text:p>
          </table:table-cell>
          <table:table-cell office:value-type="float" office:value="9.45527" table:style-name="c1">
            <text:p>9.4553</text:p>
          </table:table-cell>
          <table:table-cell office:value-type="float" office:value="-0.928013773890346" table:style-name="c13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29 11:30</text:p>
          </table:table-cell>
          <table:table-cell office:value-type="float" office:value="9.345325" table:style-name="c1">
            <text:p>9.3453</text:p>
          </table:table-cell>
          <table:table-cell office:value-type="float" office:value="-0.8299712343296406" table:style-name="c13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9.2046" table:style-name="c1">
            <text:p>9.2046</text:p>
          </table:table-cell>
          <table:table-cell office:value-type="string" table:style-name="c1">
            <text:p>2026-05-04 06:30</text:p>
          </table:table-cell>
          <table:table-cell office:value-type="float" office:value="9.245375000000001" table:style-name="c1">
            <text:p>9.2454</text:p>
          </table:table-cell>
          <table:table-cell office:value-type="float" office:value="0.24219950215111918" table:style-name="c14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5 14:45</text:p>
          </table:table-cell>
          <table:table-cell office:value-type="float" office:value="9.425285" table:style-name="c1">
            <text:p>9.4253</text:p>
          </table:table-cell>
          <table:table-cell office:value-type="float" office:value="-0.08774724980759041" table:style-name="c13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5-06 05:15</text:p>
          </table:table-cell>
          <table:table-cell office:value-type="float" office:value="9.49525" table:style-name="c1">
            <text:p>9.4953</text:p>
          </table:table-cell>
          <table:table-cell office:value-type="float" office:value="-1.028910881549816" table:style-name="c13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9.624809999999998" table:style-name="c1">
            <text:p>9.6248</text:p>
          </table:table-cell>
          <table:table-cell office:value-type="string" table:style-name="c1">
            <text:p>2026-05-06 13:15</text:p>
          </table:table-cell>
          <table:table-cell office:value-type="float" office:value="9.67516" table:style-name="c1">
            <text:p>9.6752</text:p>
          </table:table-cell>
          <table:table-cell office:value-type="float" office:value="0.32218147849154555" table:style-name="c14">
            <text:p>+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5-07 09:30</text:p>
          </table:table-cell>
          <table:table-cell office:value-type="float" office:value="9.57521" table:style-name="c1">
            <text:p>9.5752</text:p>
          </table:table-cell>
          <table:table-cell office:value-type="float" office:value="-0.507359286919018" table:style-name="c13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30</text:p>
          </table:table-cell>
          <table:table-cell office:value-type="float" office:value="9.88494" table:style-name="c1">
            <text:p>9.8849</text:p>
          </table:table-cell>
          <table:table-cell office:value-type="string" table:style-name="c1">
            <text:p>2026-05-08 23:30</text:p>
          </table:table-cell>
          <table:table-cell office:value-type="float" office:value="9.905045000000001" table:style-name="c1">
            <text:p>9.905</text:p>
          </table:table-cell>
          <table:table-cell office:value-type="float" office:value="0.0030836307048920375" table:style-name="c14">
            <text:p>+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0.06503" table:style-name="c1">
            <text:p>10.065</text:p>
          </table:table-cell>
          <table:table-cell office:value-type="string" table:style-name="c1">
            <text:p>2026-05-09 03:45</text:p>
          </table:table-cell>
          <table:table-cell office:value-type="float" office:value="9.975010000000001" table:style-name="c1">
            <text:p>9.975</text:p>
          </table:table-cell>
          <table:table-cell office:value-type="float" office:value="-1.0924959487452979" table:style-name="c13">
            <text:p>-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5-09 21:45</text:p>
          </table:table-cell>
          <table:table-cell office:value-type="float" office:value="9.945025" table:style-name="c1">
            <text:p>9.945</text:p>
          </table:table-cell>
          <table:table-cell office:value-type="float" office:value="-0.2996502248875599" table:style-name="c13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10.14507" table:style-name="c1">
            <text:p>10.145</text:p>
          </table:table-cell>
          <table:table-cell office:value-type="string" table:style-name="c1">
            <text:p>2026-05-11 11:15</text:p>
          </table:table-cell>
          <table:table-cell office:value-type="float" office:value="10.09495" table:style-name="c1">
            <text:p>10.095</text:p>
          </table:table-cell>
          <table:table-cell office:value-type="float" office:value="-0.6929454902726007" table:style-name="c13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0:00</text:p>
          </table:table-cell>
          <table:table-cell office:value-type="float" office:value="10.155075" table:style-name="c1">
            <text:p>10.155</text:p>
          </table:table-cell>
          <table:table-cell office:value-type="string" table:style-name="c1">
            <text:p>2026-05-13 10:45</text:p>
          </table:table-cell>
          <table:table-cell office:value-type="float" office:value="10.064965" table:style-name="c1">
            <text:p>10.065</text:p>
          </table:table-cell>
          <table:table-cell office:value-type="float" office:value="-1.085465789617479" table:style-name="c13">
            <text:p>-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4:45</text:p>
          </table:table-cell>
          <table:table-cell office:value-type="float" office:value="9.2896425" table:style-name="c1">
            <text:p>9.2896</text:p>
          </table:table-cell>
          <table:table-cell office:value-type="string" table:style-name="c1">
            <text:p>2026-05-20 18:30</text:p>
          </table:table-cell>
          <table:table-cell office:value-type="float" office:value="9.297349" table:style-name="c1">
            <text:p>9.2973</text:p>
          </table:table-cell>
          <table:table-cell office:value-type="float" office:value="-0.11710785050123018" table:style-name="c13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00</text:p>
          </table:table-cell>
          <table:table-cell office:value-type="float" office:value="9.476735999999999" table:style-name="c1">
            <text:p>9.4767</text:p>
          </table:table-cell>
          <table:table-cell office:value-type="string" table:style-name="c1">
            <text:p>2026-05-21 09:00</text:p>
          </table:table-cell>
          <table:table-cell office:value-type="float" office:value="9.4062945" table:style-name="c1">
            <text:p>9.4063</text:p>
          </table:table-cell>
          <table:table-cell office:value-type="float" office:value="-0.9417238456943311" table:style-name="c13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30</text:p>
          </table:table-cell>
          <table:table-cell office:value-type="float" office:value="9.403699499999998" table:style-name="c1">
            <text:p>9.4037</text:p>
          </table:table-cell>
          <table:table-cell office:value-type="string" table:style-name="c1">
            <text:p>2026-05-21 22:00</text:p>
          </table:table-cell>
          <table:table-cell office:value-type="float" office:value="9.466264500000001" table:style-name="c1">
            <text:p>9.4663</text:p>
          </table:table-cell>
          <table:table-cell office:value-type="float" office:value="0.46409327801788525" table:style-name="c14">
            <text:p>+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4957455" table:style-name="c1">
            <text:p>9.4957</text:p>
          </table:table-cell>
          <table:table-cell office:value-type="string" table:style-name="c1">
            <text:p>2026-05-25 15:30</text:p>
          </table:table-cell>
          <table:table-cell office:value-type="float" office:value="9.414290500000002" table:style-name="c1">
            <text:p>9.4143</text:p>
          </table:table-cell>
          <table:table-cell office:value-type="float" office:value="-1.0559904613018367" table:style-name="c13">
            <text:p>-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45</text:p>
          </table:table-cell>
          <table:table-cell office:value-type="float" office:value="9.319657499999998" table:style-name="c1">
            <text:p>9.3197</text:p>
          </table:table-cell>
          <table:table-cell office:value-type="string" table:style-name="c1">
            <text:p>2026-05-26 07:45</text:p>
          </table:table-cell>
          <table:table-cell office:value-type="float" office:value="9.253371" table:style-name="c1">
            <text:p>9.2534</text:p>
          </table:table-cell>
          <table:table-cell office:value-type="float" office:value="-0.9097328805162563" table:style-name="c13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45</text:p>
          </table:table-cell>
          <table:table-cell office:value-type="float" office:value="9.448722" table:style-name="c1">
            <text:p>9.4487</text:p>
          </table:table-cell>
          <table:table-cell office:value-type="string" table:style-name="c1">
            <text:p>2026-05-26 13:30</text:p>
          </table:table-cell>
          <table:table-cell office:value-type="float" office:value="9.35532" table:style-name="c1">
            <text:p>9.3553</text:p>
          </table:table-cell>
          <table:table-cell office:value-type="float" office:value="-1.1864385964577728" table:style-name="c13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9.482738999999999" table:style-name="c1">
            <text:p>9.4827</text:p>
          </table:table-cell>
          <table:table-cell office:value-type="string" table:style-name="c1">
            <text:p>2026-05-26 14:45</text:p>
          </table:table-cell>
          <table:table-cell office:value-type="float" office:value="9.346324500000001" table:style-name="c1">
            <text:p>9.3463</text:p>
          </table:table-cell>
          <table:table-cell office:value-type="float" office:value="-1.6355802123784624" table:style-name="c13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15</text:p>
          </table:table-cell>
          <table:table-cell office:value-type="float" office:value="9.0195075" table:style-name="c1">
            <text:p>9.0195</text:p>
          </table:table-cell>
          <table:table-cell office:value-type="string" table:style-name="c1">
            <text:p>2026-06-01 01:30</text:p>
          </table:table-cell>
          <table:table-cell office:value-type="float" office:value="8.9585185" table:style-name="c1">
            <text:p>8.9585</text:p>
          </table:table-cell>
          <table:table-cell office:value-type="float" office:value="-0.8747382102792134" table:style-name="c13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00</text:p>
          </table:table-cell>
          <table:table-cell office:value-type="float" office:value="454.62719999999996" table:style-name="c10">
            <text:p>454.63</text:p>
          </table:table-cell>
          <table:table-cell office:value-type="string" table:style-name="c10">
            <text:p>2026-03-09 14:15</text:p>
          </table:table-cell>
          <table:table-cell office:value-type="float" office:value="448.1758" table:style-name="c10">
            <text:p>448.18</text:p>
          </table:table-cell>
          <table:table-cell office:value-type="float" office:value="-1.6161161110025968" table:style-name="c11">
            <text:p>-1.6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6:45</text:p>
          </table:table-cell>
          <table:table-cell office:value-type="float" office:value="453.02639999999997" table:style-name="c10">
            <text:p>453.03</text:p>
          </table:table-cell>
          <table:table-cell office:value-type="string" table:style-name="c10">
            <text:p>2026-03-11 07:45</text:p>
          </table:table-cell>
          <table:table-cell office:value-type="float" office:value="448.5756" table:style-name="c10">
            <text:p>448.58</text:p>
          </table:table-cell>
          <table:table-cell office:value-type="float" office:value="-1.1803953642436582" table:style-name="c11">
            <text:p>-1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1:30</text:p>
          </table:table-cell>
          <table:table-cell office:value-type="float" office:value="469.33455" table:style-name="c10">
            <text:p>469.33</text:p>
          </table:table-cell>
          <table:table-cell office:value-type="string" table:style-name="c10">
            <text:p>2026-03-13 02:15</text:p>
          </table:table-cell>
          <table:table-cell office:value-type="float" office:value="463.86795000000006" table:style-name="c10">
            <text:p>463.87</text:p>
          </table:table-cell>
          <table:table-cell office:value-type="float" office:value="-1.3623271570460616" table:style-name="c11">
            <text:p>-1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9:15</text:p>
          </table:table-cell>
          <table:table-cell office:value-type="float" office:value="470.23499999999996" table:style-name="c10">
            <text:p>470.23</text:p>
          </table:table-cell>
          <table:table-cell office:value-type="string" table:style-name="c10">
            <text:p>2026-03-13 12:30</text:p>
          </table:table-cell>
          <table:table-cell office:value-type="float" office:value="467.36620000000005" table:style-name="c10">
            <text:p>467.37</text:p>
          </table:table-cell>
          <table:table-cell office:value-type="float" office:value="-0.808758393951925" table:style-name="c11">
            <text:p>-0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45</text:p>
          </table:table-cell>
          <table:table-cell office:value-type="float" office:value="472.93634999999995" table:style-name="c10">
            <text:p>472.94</text:p>
          </table:table-cell>
          <table:table-cell office:value-type="string" table:style-name="c10">
            <text:p>2026-03-13 14:00</text:p>
          </table:table-cell>
          <table:table-cell office:value-type="float" office:value="469.1653" table:style-name="c10">
            <text:p>469.17</text:p>
          </table:table-cell>
          <table:table-cell office:value-type="float" office:value="-0.9956755141997453" table:style-name="c11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1:30</text:p>
          </table:table-cell>
          <table:table-cell office:value-type="float" office:value="458.62919999999997" table:style-name="c10">
            <text:p>458.63</text:p>
          </table:table-cell>
          <table:table-cell office:value-type="string" table:style-name="c10">
            <text:p>2026-03-14 12:45</text:p>
          </table:table-cell>
          <table:table-cell office:value-type="float" office:value="457.97090000000003" table:style-name="c10">
            <text:p>457.97</text:p>
          </table:table-cell>
          <table:table-cell office:value-type="float" office:value="-0.34314950489413576" table:style-name="c11">
            <text:p>-0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6:00</text:p>
          </table:table-cell>
          <table:table-cell office:value-type="float" office:value="461.73075" table:style-name="c10">
            <text:p>461.73</text:p>
          </table:table-cell>
          <table:table-cell office:value-type="string" table:style-name="c10">
            <text:p>2026-03-15 00:30</text:p>
          </table:table-cell>
          <table:table-cell office:value-type="float" office:value="463.9679" table:style-name="c10">
            <text:p>463.97</text:p>
          </table:table-cell>
          <table:table-cell office:value-type="float" office:value="0.28364542926802017" table:style-name="c12">
            <text:p>+0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465.0324" table:style-name="c10">
            <text:p>465.03</text:p>
          </table:table-cell>
          <table:table-cell office:value-type="string" table:style-name="c10">
            <text:p>2026-03-16 01:15</text:p>
          </table:table-cell>
          <table:table-cell office:value-type="float" office:value="465.1673" table:style-name="c10">
            <text:p>465.17</text:p>
          </table:table-cell>
          <table:table-cell office:value-type="float" office:value="-0.1709492570195037" table:style-name="c11">
            <text:p>-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473.2365" table:style-name="c10">
            <text:p>473.24</text:p>
          </table:table-cell>
          <table:table-cell office:value-type="string" table:style-name="c10">
            <text:p>2026-03-16 05:00</text:p>
          </table:table-cell>
          <table:table-cell office:value-type="float" office:value="470.46465" table:style-name="c10">
            <text:p>470.46</text:p>
          </table:table-cell>
          <table:table-cell office:value-type="float" office:value="-0.7844510800308013" table:style-name="c11">
            <text:p>-0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9:15</text:p>
          </table:table-cell>
          <table:table-cell office:value-type="float" office:value="481.8408" table:style-name="c10">
            <text:p>481.84</text:p>
          </table:table-cell>
          <table:table-cell office:value-type="string" table:style-name="c10">
            <text:p>2026-03-16 23:15</text:p>
          </table:table-cell>
          <table:table-cell office:value-type="float" office:value="477.761" table:style-name="c10">
            <text:p>477.76</text:p>
          </table:table-cell>
          <table:table-cell office:value-type="float" office:value="-1.044918620216484" table:style-name="c11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08:15</text:p>
          </table:table-cell>
          <table:table-cell office:value-type="float" office:value="468.8343" table:style-name="c10">
            <text:p>468.83</text:p>
          </table:table-cell>
          <table:table-cell office:value-type="string" table:style-name="c10">
            <text:p>2026-03-20 09:30</text:p>
          </table:table-cell>
          <table:table-cell office:value-type="float" office:value="461.66905" table:style-name="c10">
            <text:p>461.67</text:p>
          </table:table-cell>
          <table:table-cell office:value-type="float" office:value="-1.7251567197515194" table:style-name="c11">
            <text:p>-1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15</text:p>
          </table:table-cell>
          <table:table-cell office:value-type="float" office:value="467.93384999999995" table:style-name="c10">
            <text:p>467.93</text:p>
          </table:table-cell>
          <table:table-cell office:value-type="string" table:style-name="c10">
            <text:p>2026-03-20 16:15</text:p>
          </table:table-cell>
          <table:table-cell office:value-type="float" office:value="467.26625" table:style-name="c10">
            <text:p>467.27</text:p>
          </table:table-cell>
          <table:table-cell office:value-type="float" office:value="-0.34228454166114197" table:style-name="c11">
            <text:p>-0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23:45</text:p>
          </table:table-cell>
          <table:table-cell office:value-type="float" office:value="474.83729999999997" table:style-name="c10">
            <text:p>474.84</text:p>
          </table:table-cell>
          <table:table-cell office:value-type="string" table:style-name="c10">
            <text:p>2026-03-21 01:00</text:p>
          </table:table-cell>
          <table:table-cell office:value-type="float" office:value="472.36370000000005" table:style-name="c10">
            <text:p>472.36</text:p>
          </table:table-cell>
          <table:table-cell office:value-type="float" office:value="-0.7197949774164658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4:15</text:p>
          </table:table-cell>
          <table:table-cell office:value-type="float" office:value="466.8333" table:style-name="c10">
            <text:p>466.83</text:p>
          </table:table-cell>
          <table:table-cell office:value-type="string" table:style-name="c10">
            <text:p>2026-03-22 07:45</text:p>
          </table:table-cell>
          <table:table-cell office:value-type="float" office:value="464.9674" table:style-name="c10">
            <text:p>464.97</text:p>
          </table:table-cell>
          <table:table-cell office:value-type="float" office:value="-0.5987940090392052" table:style-name="c11">
            <text:p>-0.6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22:45</text:p>
          </table:table-cell>
          <table:table-cell office:value-type="float" office:value="468.43409999999994" table:style-name="c10">
            <text:p>468.43</text:p>
          </table:table-cell>
          <table:table-cell office:value-type="string" table:style-name="c10">
            <text:p>2026-03-23 00:45</text:p>
          </table:table-cell>
          <table:table-cell office:value-type="float" office:value="465.3672" table:style-name="c10">
            <text:p>465.37</text:p>
          </table:table-cell>
          <table:table-cell office:value-type="float" office:value="-0.8533044526006894" table:style-name="c11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5:45</text:p>
          </table:table-cell>
          <table:table-cell office:value-type="float" office:value="474.83729999999997" table:style-name="c10">
            <text:p>474.84</text:p>
          </table:table-cell>
          <table:table-cell office:value-type="string" table:style-name="c10">
            <text:p>2026-03-24 17:45</text:p>
          </table:table-cell>
          <table:table-cell office:value-type="float" office:value="471.764" table:style-name="c10">
            <text:p>471.76</text:p>
          </table:table-cell>
          <table:table-cell office:value-type="float" office:value="-0.8458384031751365" table:style-name="c11">
            <text:p>-0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473.43659999999994" table:style-name="c10">
            <text:p>473.44</text:p>
          </table:table-cell>
          <table:table-cell office:value-type="string" table:style-name="c10">
            <text:p>2026-03-31 19:15</text:p>
          </table:table-cell>
          <table:table-cell office:value-type="float" office:value="471.56410000000005" table:style-name="c10">
            <text:p>471.56</text:p>
          </table:table-cell>
          <table:table-cell office:value-type="float" office:value="-0.5946216739263321" table:style-name="c11">
            <text:p>-0.6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30</text:p>
          </table:table-cell>
          <table:table-cell office:value-type="float" office:value="465.23249999999996" table:style-name="c10">
            <text:p>465.23</text:p>
          </table:table-cell>
          <table:table-cell office:value-type="string" table:style-name="c10">
            <text:p>2026-04-01 08:00</text:p>
          </table:table-cell>
          <table:table-cell office:value-type="float" office:value="460.26975000000004" table:style-name="c10">
            <text:p>460.27</text:p>
          </table:table-cell>
          <table:table-cell office:value-type="float" office:value="-1.2644923194854107" table:style-name="c11">
            <text:p>-1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45</text:p>
          </table:table-cell>
          <table:table-cell office:value-type="float" office:value="442.52115" table:style-name="c10">
            <text:p>442.52</text:p>
          </table:table-cell>
          <table:table-cell office:value-type="string" table:style-name="c10">
            <text:p>2026-04-08 01:00</text:p>
          </table:table-cell>
          <table:table-cell office:value-type="float" office:value="442.27875" table:style-name="c10">
            <text:p>442.28</text:p>
          </table:table-cell>
          <table:table-cell office:value-type="float" office:value="-0.2545675435512984" table:style-name="c11">
            <text:p>-0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2:45</text:p>
          </table:table-cell>
          <table:table-cell office:value-type="float" office:value="449.32455" table:style-name="c10">
            <text:p>449.32</text:p>
          </table:table-cell>
          <table:table-cell office:value-type="string" table:style-name="c10">
            <text:p>2026-04-08 14:30</text:p>
          </table:table-cell>
          <table:table-cell office:value-type="float" office:value="445.67705" table:style-name="c10">
            <text:p>445.68</text:p>
          </table:table-cell>
          <table:table-cell office:value-type="float" office:value="-1.01005129208942" table:style-name="c11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7:15</text:p>
          </table:table-cell>
          <table:table-cell office:value-type="float" office:value="445.52265" table:style-name="c10">
            <text:p>445.52</text:p>
          </table:table-cell>
          <table:table-cell office:value-type="string" table:style-name="c10">
            <text:p>2026-04-09 08:15</text:p>
          </table:table-cell>
          <table:table-cell office:value-type="float" office:value="442.1788" table:style-name="c10">
            <text:p>442.18</text:p>
          </table:table-cell>
          <table:table-cell office:value-type="float" office:value="-0.9489451145076377" table:style-name="c11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440.62019999999995" table:style-name="c10">
            <text:p>440.62</text:p>
          </table:table-cell>
          <table:table-cell office:value-type="string" table:style-name="c10">
            <text:p>2026-04-09 21:30</text:p>
          </table:table-cell>
          <table:table-cell office:value-type="float" office:value="443.1783" table:style-name="c10">
            <text:p>443.18</text:p>
          </table:table-cell>
          <table:table-cell office:value-type="float" office:value="0.37950747112820427" table:style-name="c12">
            <text:p>+0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1:30</text:p>
          </table:table-cell>
          <table:table-cell office:value-type="float" office:value="442.42109999999997" table:style-name="c10">
            <text:p>442.42</text:p>
          </table:table-cell>
          <table:table-cell office:value-type="string" table:style-name="c10">
            <text:p>2026-04-10 16:00</text:p>
          </table:table-cell>
          <table:table-cell office:value-type="float" office:value="442.57860000000005" table:style-name="c10">
            <text:p>442.58</text:p>
          </table:table-cell>
          <table:table-cell office:value-type="float" office:value="-0.1643715956132885" table:style-name="c11">
            <text:p>-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443.2215" table:style-name="c10">
            <text:p>443.22</text:p>
          </table:table-cell>
          <table:table-cell office:value-type="string" table:style-name="c10">
            <text:p>2026-04-14 15:30</text:p>
          </table:table-cell>
          <table:table-cell office:value-type="float" office:value="438.68055" table:style-name="c10">
            <text:p>438.68</text:p>
          </table:table-cell>
          <table:table-cell office:value-type="float" office:value="-1.2223848390590208" table:style-name="c11">
            <text:p>-1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0:15</text:p>
          </table:table-cell>
          <table:table-cell office:value-type="float" office:value="434.8173" table:style-name="c10">
            <text:p>434.82</text:p>
          </table:table-cell>
          <table:table-cell office:value-type="string" table:style-name="c10">
            <text:p>2026-04-15 13:45</text:p>
          </table:table-cell>
          <table:table-cell office:value-type="float" office:value="432.7835" table:style-name="c10">
            <text:p>432.78</text:p>
          </table:table-cell>
          <table:table-cell office:value-type="float" office:value="-0.6667016736684572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5:15</text:p>
          </table:table-cell>
          <table:table-cell office:value-type="float" office:value="436.61819999999994" table:style-name="c10">
            <text:p>436.62</text:p>
          </table:table-cell>
          <table:table-cell office:value-type="string" table:style-name="c10">
            <text:p>2026-04-15 15:30</text:p>
          </table:table-cell>
          <table:table-cell office:value-type="float" office:value="435.1823" table:style-name="c10">
            <text:p>435.18</text:p>
          </table:table-cell>
          <table:table-cell office:value-type="float" office:value="-0.5281111547113526" table:style-name="c11">
            <text:p>-0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444.02189999999996" table:style-name="c10">
            <text:p>444.02</text:p>
          </table:table-cell>
          <table:table-cell office:value-type="string" table:style-name="c10">
            <text:p>2026-04-16 04:30</text:p>
          </table:table-cell>
          <table:table-cell office:value-type="float" office:value="441.9789" table:style-name="c10">
            <text:p>441.98</text:p>
          </table:table-cell>
          <table:table-cell office:value-type="float" office:value="-0.659092675631523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442.32105" table:style-name="c10">
            <text:p>442.32</text:p>
          </table:table-cell>
          <table:table-cell office:value-type="string" table:style-name="c10">
            <text:p>2026-04-16 14:00</text:p>
          </table:table-cell>
          <table:table-cell office:value-type="float" office:value="437.1813" table:style-name="c10">
            <text:p>437.18</text:p>
          </table:table-cell>
          <table:table-cell office:value-type="float" office:value="-1.3595725138335624" table:style-name="c11">
            <text:p>-1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441.92085" table:style-name="c10">
            <text:p>441.92</text:p>
          </table:table-cell>
          <table:table-cell office:value-type="string" table:style-name="c10">
            <text:p>2026-04-16 17:15</text:p>
          </table:table-cell>
          <table:table-cell office:value-type="float" office:value="438.88045000000005" table:style-name="c10">
            <text:p>438.88</text:p>
          </table:table-cell>
          <table:table-cell office:value-type="float" office:value="-0.8865211993391853" table:style-name="c11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2:30</text:p>
          </table:table-cell>
          <table:table-cell office:value-type="float" office:value="448.6242" table:style-name="c10">
            <text:p>448.62</text:p>
          </table:table-cell>
          <table:table-cell office:value-type="string" table:style-name="c10">
            <text:p>2026-04-17 01:30</text:p>
          </table:table-cell>
          <table:table-cell office:value-type="float" office:value="452.37370000000004" table:style-name="c10">
            <text:p>452.37</text:p>
          </table:table-cell>
          <table:table-cell office:value-type="float" office:value="0.6342067533807061" table:style-name="c12">
            <text:p>+0.6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00</text:p>
          </table:table-cell>
          <table:table-cell office:value-type="float" office:value="452.32605" table:style-name="c10">
            <text:p>452.33</text:p>
          </table:table-cell>
          <table:table-cell office:value-type="string" table:style-name="c10">
            <text:p>2026-04-17 17:30</text:p>
          </table:table-cell>
          <table:table-cell office:value-type="float" office:value="454.9724" table:style-name="c10">
            <text:p>454.97</text:p>
          </table:table-cell>
          <table:table-cell office:value-type="float" office:value="0.38398411331823645" table:style-name="c12">
            <text:p>+0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452.6261999999999" table:style-name="c10">
            <text:p>452.63</text:p>
          </table:table-cell>
          <table:table-cell office:value-type="string" table:style-name="c10">
            <text:p>2026-04-22 11:15</text:p>
          </table:table-cell>
          <table:table-cell office:value-type="float" office:value="467.86595000000005" table:style-name="c10">
            <text:p>467.87</text:p>
          </table:table-cell>
          <table:table-cell office:value-type="float" office:value="3.160330967573266" table:style-name="c12">
            <text:p>+3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455.0274" table:style-name="c10">
            <text:p>455.03</text:p>
          </table:table-cell>
          <table:table-cell office:value-type="string" table:style-name="c10">
            <text:p>2026-04-29 12:15</text:p>
          </table:table-cell>
          <table:table-cell office:value-type="float" office:value="451.774" table:style-name="c10">
            <text:p>451.77</text:p>
          </table:table-cell>
          <table:table-cell office:value-type="float" office:value="-0.9134606456666194" table:style-name="c11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8:30</text:p>
          </table:table-cell>
          <table:table-cell office:value-type="float" office:value="451.92584999999997" table:style-name="c10">
            <text:p>451.93</text:p>
          </table:table-cell>
          <table:table-cell office:value-type="string" table:style-name="c10">
            <text:p>2026-05-05 14:15</text:p>
          </table:table-cell>
          <table:table-cell office:value-type="float" office:value="455.9719" table:style-name="c10">
            <text:p>455.97</text:p>
          </table:table-cell>
          <table:table-cell office:value-type="float" office:value="0.6936009904943363" table:style-name="c12">
            <text:p>+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3:15</text:p>
          </table:table-cell>
          <table:table-cell office:value-type="float" office:value="464.53215" table:style-name="c10">
            <text:p>464.53</text:p>
          </table:table-cell>
          <table:table-cell office:value-type="string" table:style-name="c10">
            <text:p>2026-05-06 02:30</text:p>
          </table:table-cell>
          <table:table-cell office:value-type="float" office:value="461.06935000000004" table:style-name="c10">
            <text:p>461.07</text:p>
          </table:table-cell>
          <table:table-cell office:value-type="float" office:value="-0.943848048116791" table:style-name="c11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45</text:p>
          </table:table-cell>
          <table:table-cell office:value-type="float" office:value="474.4371" table:style-name="c10">
            <text:p>474.44</text:p>
          </table:table-cell>
          <table:table-cell office:value-type="string" table:style-name="c10">
            <text:p>2026-05-06 08:00</text:p>
          </table:table-cell>
          <table:table-cell office:value-type="float" office:value="472.06385000000006" table:style-name="c10">
            <text:p>472.06</text:p>
          </table:table-cell>
          <table:table-cell office:value-type="float" office:value="-0.6991244226368432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00</text:p>
          </table:table-cell>
          <table:table-cell office:value-type="float" office:value="460.93035" table:style-name="c10">
            <text:p>460.93</text:p>
          </table:table-cell>
          <table:table-cell office:value-type="string" table:style-name="c10">
            <text:p>2026-05-10 21:15</text:p>
          </table:table-cell>
          <table:table-cell office:value-type="float" office:value="458.37070000000006" table:style-name="c10">
            <text:p>458.37</text:p>
          </table:table-cell>
          <table:table-cell office:value-type="float" office:value="-0.7541124226903007" table:style-name="c11">
            <text:p>-0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3:15</text:p>
          </table:table-cell>
          <table:table-cell office:value-type="float" office:value="378.88935" table:style-name="c10">
            <text:p>378.89</text:p>
          </table:table-cell>
          <table:table-cell office:value-type="string" table:style-name="c10">
            <text:p>2026-05-21 19:15</text:p>
          </table:table-cell>
          <table:table-cell office:value-type="float" office:value="379.51015" table:style-name="c10">
            <text:p>379.51</text:p>
          </table:table-cell>
          <table:table-cell office:value-type="float" office:value="-0.03638022284077058" table:style-name="c11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00</text:p>
          </table:table-cell>
          <table:table-cell office:value-type="float" office:value="644.432055" table:style-name="c1">
            <text:p>644.43</text:p>
          </table:table-cell>
          <table:table-cell office:value-type="string" table:style-name="c1">
            <text:p>2026-03-10 04:00</text:p>
          </table:table-cell>
          <table:table-cell office:value-type="float" office:value="639.450115" table:style-name="c1">
            <text:p>639.45</text:p>
          </table:table-cell>
          <table:table-cell office:value-type="float" office:value="-0.9714291415694798" table:style-name="c13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648.213945" table:style-name="c1">
            <text:p>648.21</text:p>
          </table:table-cell>
          <table:table-cell office:value-type="string" table:style-name="c1">
            <text:p>2026-03-10 11:45</text:p>
          </table:table-cell>
          <table:table-cell office:value-type="float" office:value="645.207235" table:style-name="c1">
            <text:p>645.21</text:p>
          </table:table-cell>
          <table:table-cell office:value-type="float" office:value="-0.662818085896788" table:style-name="c13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651.2154449999999" table:style-name="c1">
            <text:p>651.22</text:p>
          </table:table-cell>
          <table:table-cell office:value-type="string" table:style-name="c1">
            <text:p>2026-03-10 17:45</text:p>
          </table:table-cell>
          <table:table-cell office:value-type="float" office:value="645.1372700000001" table:style-name="c1">
            <text:p>645.14</text:p>
          </table:table-cell>
          <table:table-cell office:value-type="float" office:value="-1.1313927609210683" table:style-name="c13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649.08438" table:style-name="c1">
            <text:p>649.08</text:p>
          </table:table-cell>
          <table:table-cell office:value-type="string" table:style-name="c1">
            <text:p>2026-03-11 22:30</text:p>
          </table:table-cell>
          <table:table-cell office:value-type="float" office:value="652.33367" table:style-name="c1">
            <text:p>652.33</text:p>
          </table:table-cell>
          <table:table-cell office:value-type="float" office:value="0.29969524049706653" table:style-name="c14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650.70519" table:style-name="c1">
            <text:p>650.71</text:p>
          </table:table-cell>
          <table:table-cell office:value-type="string" table:style-name="c1">
            <text:p>2026-03-12 14:30</text:p>
          </table:table-cell>
          <table:table-cell office:value-type="float" office:value="649.61503" table:style-name="c1">
            <text:p>649.62</text:p>
          </table:table-cell>
          <table:table-cell office:value-type="float" office:value="-0.36710026009935115" table:style-name="c13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667.7136899999999" table:style-name="c1">
            <text:p>667.71</text:p>
          </table:table-cell>
          <table:table-cell office:value-type="string" table:style-name="c1">
            <text:p>2026-03-13 15:00</text:p>
          </table:table-cell>
          <table:table-cell office:value-type="float" office:value="667.656005" table:style-name="c1">
            <text:p>667.66</text:p>
          </table:table-cell>
          <table:table-cell office:value-type="float" office:value="-0.2085219121379489" table:style-name="c13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00</text:p>
          </table:table-cell>
          <table:table-cell office:value-type="float" office:value="662.280975" table:style-name="c1">
            <text:p>662.28</text:p>
          </table:table-cell>
          <table:table-cell office:value-type="string" table:style-name="c1">
            <text:p>2026-03-15 19:00</text:p>
          </table:table-cell>
          <table:table-cell office:value-type="float" office:value="658.0408150000001" table:style-name="c1">
            <text:p>658.04</text:p>
          </table:table-cell>
          <table:table-cell office:value-type="float" office:value="-0.8388559839250798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668.29398" table:style-name="c1">
            <text:p>668.29</text:p>
          </table:table-cell>
          <table:table-cell office:value-type="string" table:style-name="c1">
            <text:p>2026-03-16 00:30</text:p>
          </table:table-cell>
          <table:table-cell office:value-type="float" office:value="671.48409" table:style-name="c1">
            <text:p>671.48</text:p>
          </table:table-cell>
          <table:table-cell office:value-type="float" office:value="0.27649707454944217" table:style-name="c14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82.030845" table:style-name="c1">
            <text:p>682.03</text:p>
          </table:table-cell>
          <table:table-cell office:value-type="string" table:style-name="c1">
            <text:p>2026-03-16 06:30</text:p>
          </table:table-cell>
          <table:table-cell office:value-type="float" office:value="680.4795900000001" table:style-name="c1">
            <text:p>680.48</text:p>
          </table:table-cell>
          <table:table-cell office:value-type="float" office:value="-0.42689179261531374" table:style-name="c13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45</text:p>
          </table:table-cell>
          <table:table-cell office:value-type="float" office:value="635.59764" table:style-name="c1">
            <text:p>635.6</text:p>
          </table:table-cell>
          <table:table-cell office:value-type="string" table:style-name="c1">
            <text:p>2026-03-24 13:30</text:p>
          </table:table-cell>
          <table:table-cell office:value-type="float" office:value="635.5220800000001" table:style-name="c1">
            <text:p>635.52</text:p>
          </table:table-cell>
          <table:table-cell office:value-type="float" office:value="-0.21176425984210656" table:style-name="c13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616.938315" table:style-name="c1">
            <text:p>616.94</text:p>
          </table:table-cell>
          <table:table-cell office:value-type="string" table:style-name="c1">
            <text:p>2026-03-31 03:45</text:p>
          </table:table-cell>
          <table:table-cell office:value-type="float" office:value="612.85342" table:style-name="c1">
            <text:p>612.85</text:p>
          </table:table-cell>
          <table:table-cell office:value-type="float" office:value="-0.8607001474012721" table:style-name="c13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45</text:p>
          </table:table-cell>
          <table:table-cell office:value-type="float" office:value="622.000845" table:style-name="c1">
            <text:p>622</text:p>
          </table:table-cell>
          <table:table-cell office:value-type="string" table:style-name="c1">
            <text:p>2026-04-01 07:30</text:p>
          </table:table-cell>
          <table:table-cell office:value-type="float" office:value="617.9008950000001" table:style-name="c1">
            <text:p>617.9</text:p>
          </table:table-cell>
          <table:table-cell office:value-type="float" office:value="-0.8577374021260353" table:style-name="c13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5:30</text:p>
          </table:table-cell>
          <table:table-cell office:value-type="float" office:value="594.51711" table:style-name="c1">
            <text:p>594.52</text:p>
          </table:table-cell>
          <table:table-cell office:value-type="string" table:style-name="c1">
            <text:p>2026-04-05 19:00</text:p>
          </table:table-cell>
          <table:table-cell office:value-type="float" office:value="591.9039" table:style-name="c1">
            <text:p>591.9</text:p>
          </table:table-cell>
          <table:table-cell office:value-type="float" office:value="-0.6385730254424349" table:style-name="c13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600.1099049999999" table:style-name="c1">
            <text:p>600.11</text:p>
          </table:table-cell>
          <table:table-cell office:value-type="string" table:style-name="c1">
            <text:p>2026-04-06 03:30</text:p>
          </table:table-cell>
          <table:table-cell office:value-type="float" office:value="601.589055" table:style-name="c1">
            <text:p>601.59</text:p>
          </table:table-cell>
          <table:table-cell office:value-type="float" office:value="0.04608713783107454" table:style-name="c14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607.7237099999999" table:style-name="c1">
            <text:p>607.72</text:p>
          </table:table-cell>
          <table:table-cell office:value-type="string" table:style-name="c1">
            <text:p>2026-04-06 12:00</text:p>
          </table:table-cell>
          <table:table-cell office:value-type="float" office:value="605.05732" table:style-name="c1">
            <text:p>605.06</text:p>
          </table:table-cell>
          <table:table-cell office:value-type="float" office:value="-0.6377733037073563" table:style-name="c13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6:30</text:p>
          </table:table-cell>
          <table:table-cell office:value-type="float" office:value="600.62016" table:style-name="c1">
            <text:p>600.62</text:p>
          </table:table-cell>
          <table:table-cell office:value-type="string" table:style-name="c1">
            <text:p>2026-04-08 01:30</text:p>
          </table:table-cell>
          <table:table-cell office:value-type="float" office:value="615.83193" table:style-name="c1">
            <text:p>615.83</text:p>
          </table:table-cell>
          <table:table-cell office:value-type="float" office:value="2.327714403047998" table:style-name="c14">
            <text:p>+2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10.775235" table:style-name="c1">
            <text:p>610.78</text:p>
          </table:table-cell>
          <table:table-cell office:value-type="string" table:style-name="c1">
            <text:p>2026-04-11 20:45</text:p>
          </table:table-cell>
          <table:table-cell office:value-type="float" office:value="609.8949000000001" table:style-name="c1">
            <text:p>609.89</text:p>
          </table:table-cell>
          <table:table-cell office:value-type="float" office:value="-0.3437459125368414" table:style-name="c13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612.38604" table:style-name="c1">
            <text:p>612.39</text:p>
          </table:table-cell>
          <table:table-cell office:value-type="string" table:style-name="c1">
            <text:p>2026-04-14 00:30</text:p>
          </table:table-cell>
          <table:table-cell office:value-type="float" office:value="612.6735100000001" table:style-name="c1">
            <text:p>612.67</text:p>
          </table:table-cell>
          <table:table-cell office:value-type="float" office:value="-0.15305122672127913" table:style-name="c13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8:45</text:p>
          </table:table-cell>
          <table:table-cell office:value-type="float" office:value="618.5091" table:style-name="c1">
            <text:p>618.51</text:p>
          </table:table-cell>
          <table:table-cell office:value-type="string" table:style-name="c1">
            <text:p>2026-04-14 11:30</text:p>
          </table:table-cell>
          <table:table-cell office:value-type="float" office:value="615.8919000000001" table:style-name="c1">
            <text:p>615.89</text:p>
          </table:table-cell>
          <table:table-cell office:value-type="float" office:value="-0.6222006932638413" table:style-name="c13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22.55112" table:style-name="c1">
            <text:p>622.55</text:p>
          </table:table-cell>
          <table:table-cell office:value-type="string" table:style-name="c1">
            <text:p>2026-04-14 17:00</text:p>
          </table:table-cell>
          <table:table-cell office:value-type="float" office:value="618.65052" table:style-name="c1">
            <text:p>618.65</text:p>
          </table:table-cell>
          <table:table-cell office:value-type="float" office:value="-0.8251984816090241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26.93331" table:style-name="c1">
            <text:p>626.93</text:p>
          </table:table-cell>
          <table:table-cell office:value-type="string" table:style-name="c1">
            <text:p>2026-04-15 21:15</text:p>
          </table:table-cell>
          <table:table-cell office:value-type="float" office:value="622.22873" table:style-name="c1">
            <text:p>622.23</text:p>
          </table:table-cell>
          <table:table-cell office:value-type="float" office:value="-0.9488114822404303" table:style-name="c13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626.262975" table:style-name="c1">
            <text:p>626.26</text:p>
          </table:table-cell>
          <table:table-cell office:value-type="string" table:style-name="c1">
            <text:p>2026-04-16 05:15</text:p>
          </table:table-cell>
          <table:table-cell office:value-type="float" office:value="622.42863" table:style-name="c1">
            <text:p>622.43</text:p>
          </table:table-cell>
          <table:table-cell office:value-type="float" office:value="-0.8109340698881251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25.3525199999999" table:style-name="c1">
            <text:p>625.35</text:p>
          </table:table-cell>
          <table:table-cell office:value-type="string" table:style-name="c1">
            <text:p>2026-04-16 22:30</text:p>
          </table:table-cell>
          <table:table-cell office:value-type="float" office:value="632.113785" table:style-name="c1">
            <text:p>632.11</text:p>
          </table:table-cell>
          <table:table-cell office:value-type="float" office:value="0.879131268837785" table:style-name="c14">
            <text:p>+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640.1098949999999" table:style-name="c1">
            <text:p>640.11</text:p>
          </table:table-cell>
          <table:table-cell office:value-type="string" table:style-name="c1">
            <text:p>2026-04-17 17:30</text:p>
          </table:table-cell>
          <table:table-cell office:value-type="float" office:value="640.59954" table:style-name="c1">
            <text:p>640.6</text:p>
          </table:table-cell>
          <table:table-cell office:value-type="float" office:value="-0.12355901488758647" table:style-name="c13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638.028855" table:style-name="c1">
            <text:p>638.03</text:p>
          </table:table-cell>
          <table:table-cell office:value-type="string" table:style-name="c1">
            <text:p>2026-04-22 08:30</text:p>
          </table:table-cell>
          <table:table-cell office:value-type="float" office:value="641.3991400000001" table:style-name="c1">
            <text:p>641.4</text:p>
          </table:table-cell>
          <table:table-cell office:value-type="float" office:value="0.3272780067509862" table:style-name="c14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3:45</text:p>
          </table:table-cell>
          <table:table-cell office:value-type="float" office:value="651.035355" table:style-name="c1">
            <text:p>651.04</text:p>
          </table:table-cell>
          <table:table-cell office:value-type="string" table:style-name="c1">
            <text:p>2026-04-22 16:30</text:p>
          </table:table-cell>
          <table:table-cell office:value-type="float" office:value="647.186245" table:style-name="c1">
            <text:p>647.19</text:p>
          </table:table-cell>
          <table:table-cell office:value-type="float" office:value="-0.7899471609733033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638.509095" table:style-name="c1">
            <text:p>638.51</text:p>
          </table:table-cell>
          <table:table-cell office:value-type="string" table:style-name="c1">
            <text:p>2026-04-24 01:30</text:p>
          </table:table-cell>
          <table:table-cell office:value-type="float" office:value="637.86091" table:style-name="c1">
            <text:p>637.86</text:p>
          </table:table-cell>
          <table:table-cell office:value-type="float" office:value="-0.3012124610519473" table:style-name="c13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4 06:30</text:p>
          </table:table-cell>
          <table:table-cell office:value-type="float" office:value="628.6855" table:style-name="c1">
            <text:p>628.69</text:p>
          </table:table-cell>
          <table:table-cell office:value-type="float" office:value="0.5765973963076432" table:style-name="c14">
            <text:p>+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627.743715" table:style-name="c1">
            <text:p>627.74</text:p>
          </table:table-cell>
          <table:table-cell office:value-type="string" table:style-name="c1">
            <text:p>2026-05-04 16:15</text:p>
          </table:table-cell>
          <table:table-cell office:value-type="float" office:value="623.688" table:style-name="c1">
            <text:p>623.69</text:p>
          </table:table-cell>
          <table:table-cell office:value-type="float" office:value="-0.8446866428603039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633.3565199999999" table:style-name="c1">
            <text:p>633.36</text:p>
          </table:table-cell>
          <table:table-cell office:value-type="string" table:style-name="c1">
            <text:p>2026-05-05 14:45</text:p>
          </table:table-cell>
          <table:table-cell office:value-type="float" office:value="629.24522" table:style-name="c1">
            <text:p>629.25</text:p>
          </table:table-cell>
          <table:table-cell office:value-type="float" office:value="-0.8477312580250973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45</text:p>
          </table:table-cell>
          <table:table-cell office:value-type="float" office:value="633.67668" table:style-name="c1">
            <text:p>633.68</text:p>
          </table:table-cell>
          <table:table-cell office:value-type="string" table:style-name="c1">
            <text:p>2026-05-06 03:15</text:p>
          </table:table-cell>
          <table:table-cell office:value-type="float" office:value="631.174255" table:style-name="c1">
            <text:p>631.17</text:p>
          </table:table-cell>
          <table:table-cell office:value-type="float" office:value="-0.5940162317074615" table:style-name="c13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644.50209" table:style-name="c1">
            <text:p>644.5</text:p>
          </table:table-cell>
          <table:table-cell office:value-type="string" table:style-name="c1">
            <text:p>2026-05-06 13:30</text:p>
          </table:table-cell>
          <table:table-cell office:value-type="float" office:value="649.8749" table:style-name="c1">
            <text:p>649.87</text:p>
          </table:table-cell>
          <table:table-cell office:value-type="float" office:value="0.6320708866747182" table:style-name="c14">
            <text:p>+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45</text:p>
          </table:table-cell>
          <table:table-cell office:value-type="float" office:value="655.817745" table:style-name="c1">
            <text:p>655.82</text:p>
          </table:table-cell>
          <table:table-cell office:value-type="string" table:style-name="c1">
            <text:p>2026-05-09 05:00</text:p>
          </table:table-cell>
          <table:table-cell office:value-type="float" office:value="652.843415" table:style-name="c1">
            <text:p>652.84</text:p>
          </table:table-cell>
          <table:table-cell office:value-type="float" office:value="-0.6525233602187597" table:style-name="c13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1 00:45</text:p>
          </table:table-cell>
          <table:table-cell office:value-type="float" office:value="659.17025" table:style-name="c1">
            <text:p>659.17</text:p>
          </table:table-cell>
          <table:table-cell office:value-type="float" office:value="-1.1242395839298425" table:style-name="c13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00</text:p>
          </table:table-cell>
          <table:table-cell office:value-type="float" office:value="670.405035" table:style-name="c1">
            <text:p>670.41</text:p>
          </table:table-cell>
          <table:table-cell office:value-type="string" table:style-name="c1">
            <text:p>2026-05-12 01:15</text:p>
          </table:table-cell>
          <table:table-cell office:value-type="float" office:value="666.036815" table:style-name="c1">
            <text:p>666.04</text:p>
          </table:table-cell>
          <table:table-cell office:value-type="float" office:value="-0.8501767283393025" table:style-name="c13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8:45</text:p>
          </table:table-cell>
          <table:table-cell office:value-type="float" office:value="660.5100899999999" table:style-name="c1">
            <text:p>660.51</text:p>
          </table:table-cell>
          <table:table-cell office:value-type="string" table:style-name="c1">
            <text:p>2026-05-12 23:45</text:p>
          </table:table-cell>
          <table:table-cell office:value-type="float" office:value="664.12777" table:style-name="c1">
            <text:p>664.13</text:p>
          </table:table-cell>
          <table:table-cell office:value-type="float" office:value="0.3467151558230075" table:style-name="c14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674.87727" table:style-name="c1">
            <text:p>674.88</text:p>
          </table:table-cell>
          <table:table-cell office:value-type="string" table:style-name="c1">
            <text:p>2026-05-13 06:15</text:p>
          </table:table-cell>
          <table:table-cell office:value-type="float" office:value="677.950855" table:style-name="c1">
            <text:p>677.95</text:p>
          </table:table-cell>
          <table:table-cell office:value-type="float" office:value="0.2546183309529937" table:style-name="c14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7:15</text:p>
          </table:table-cell>
          <table:table-cell office:value-type="float" office:value="684.28197" table:style-name="c1">
            <text:p>684.28</text:p>
          </table:table-cell>
          <table:table-cell office:value-type="string" table:style-name="c1">
            <text:p>2026-05-14 19:30</text:p>
          </table:table-cell>
          <table:table-cell office:value-type="float" office:value="680.1097750000001" table:style-name="c1">
            <text:p>680.11</text:p>
          </table:table-cell>
          <table:table-cell office:value-type="float" office:value="-0.8083998530934333" table:style-name="c13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15</text:p>
          </table:table-cell>
          <table:table-cell office:value-type="float" office:value="654.34701" table:style-name="c1">
            <text:p>654.35</text:p>
          </table:table-cell>
          <table:table-cell office:value-type="string" table:style-name="c1">
            <text:p>2026-05-21 05:15</text:p>
          </table:table-cell>
          <table:table-cell office:value-type="float" office:value="653.4830949999999" table:style-name="c1">
            <text:p>653.48</text:p>
          </table:table-cell>
          <table:table-cell office:value-type="float" office:value="-0.3316631196809472" table:style-name="c13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655.58763" table:style-name="c1">
            <text:p>655.59</text:p>
          </table:table-cell>
          <table:table-cell office:value-type="string" table:style-name="c1">
            <text:p>2026-05-21 10:30</text:p>
          </table:table-cell>
          <table:table-cell office:value-type="float" office:value="650.0148300000001" table:style-name="c1">
            <text:p>650.01</text:p>
          </table:table-cell>
          <table:table-cell office:value-type="float" office:value="-1.0482473022210392" table:style-name="c13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659.80974" table:style-name="c1">
            <text:p>659.81</text:p>
          </table:table-cell>
          <table:table-cell office:value-type="string" table:style-name="c1">
            <text:p>2026-05-21 22:15</text:p>
          </table:table-cell>
          <table:table-cell office:value-type="float" office:value="657.1212750000001" table:style-name="c1">
            <text:p>657.12</text:p>
          </table:table-cell>
          <table:table-cell office:value-type="float" office:value="-0.6065461277860229" table:style-name="c13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15</text:p>
          </table:table-cell>
          <table:table-cell office:value-type="float" office:value="659.8797749999999" table:style-name="c1">
            <text:p>659.88</text:p>
          </table:table-cell>
          <table:table-cell office:value-type="string" table:style-name="c1">
            <text:p>2026-05-22 09:15</text:p>
          </table:table-cell>
          <table:table-cell office:value-type="float" office:value="657.840915" table:style-name="c1">
            <text:p>657.84</text:p>
          </table:table-cell>
          <table:table-cell office:value-type="float" office:value="-0.5082568243715002" table:style-name="c13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30</text:p>
          </table:table-cell>
          <table:table-cell office:value-type="float" office:value="659.0793749999999" table:style-name="c1">
            <text:p>659.08</text:p>
          </table:table-cell>
          <table:table-cell office:value-type="string" table:style-name="c1">
            <text:p>2026-05-22 14:30</text:p>
          </table:table-cell>
          <table:table-cell office:value-type="float" office:value="657.7809450000001" table:style-name="c1">
            <text:p>657.78</text:p>
          </table:table-cell>
          <table:table-cell office:value-type="float" office:value="-0.3965128037961785" table:style-name="c13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657.78873" table:style-name="c1">
            <text:p>657.79</text:p>
          </table:table-cell>
          <table:table-cell office:value-type="string" table:style-name="c1">
            <text:p>2026-05-25 03:15</text:p>
          </table:table-cell>
          <table:table-cell office:value-type="float" office:value="656.03182" table:style-name="c1">
            <text:p>656.03</text:p>
          </table:table-cell>
          <table:table-cell office:value-type="float" office:value="-0.466459437239064" table:style-name="c13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15</text:p>
          </table:table-cell>
          <table:table-cell office:value-type="float" office:value="666.1429049999999" table:style-name="c1">
            <text:p>666.14</text:p>
          </table:table-cell>
          <table:table-cell office:value-type="string" table:style-name="c1">
            <text:p>2026-05-25 15:45</text:p>
          </table:table-cell>
          <table:table-cell office:value-type="float" office:value="667.4661" table:style-name="c1">
            <text:p>667.47</text:p>
          </table:table-cell>
          <table:table-cell office:value-type="float" office:value="-0.0016617656386830326" table:style-name="c13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662.25096" table:style-name="c1">
            <text:p>662.25</text:p>
          </table:table-cell>
          <table:table-cell office:value-type="string" table:style-name="c1">
            <text:p>2026-05-26 14:45</text:p>
          </table:table-cell>
          <table:table-cell office:value-type="float" office:value="661.12927" table:style-name="c1">
            <text:p>661.13</text:p>
          </table:table-cell>
          <table:table-cell office:value-type="float" office:value="-0.3689367865514326" table:style-name="c13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659.179425" table:style-name="c1">
            <text:p>659.18</text:p>
          </table:table-cell>
          <table:table-cell office:value-type="string" table:style-name="c1">
            <text:p>2026-05-27 02:15</text:p>
          </table:table-cell>
          <table:table-cell office:value-type="float" office:value="655.721975" table:style-name="c1">
            <text:p>655.72</text:p>
          </table:table-cell>
          <table:table-cell office:value-type="float" office:value="-0.7233596873908676" table:style-name="c13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00</text:p>
          </table:table-cell>
          <table:table-cell office:value-type="float" office:value="653.5766249999999" table:style-name="c1">
            <text:p>653.58</text:p>
          </table:table-cell>
          <table:table-cell office:value-type="string" table:style-name="c1">
            <text:p>2026-05-30 11:15</text:p>
          </table:table-cell>
          <table:table-cell office:value-type="float" office:value="671.0243200000001" table:style-name="c1">
            <text:p>671.02</text:p>
          </table:table-cell>
          <table:table-cell office:value-type="float" office:value="2.4643349789812863" table:style-name="c14">
            <text:p>+2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4:30</text:p>
          </table:table-cell>
          <table:table-cell office:value-type="float" office:value="682.8512549999999" table:style-name="c1">
            <text:p>682.85</text:p>
          </table:table-cell>
          <table:table-cell office:value-type="string" table:style-name="c1">
            <text:p>2026-05-30 22:15</text:p>
          </table:table-cell>
          <table:table-cell office:value-type="float" office:value="708.415615" table:style-name="c1">
            <text:p>708.42</text:p>
          </table:table-cell>
          <table:table-cell office:value-type="float" office:value="3.5363832179842847" table:style-name="c14">
            <text:p>+3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2:15</text:p>
          </table:table-cell>
          <table:table-cell office:value-type="float" office:value="733.2964649999999" table:style-name="c1">
            <text:p>733.3</text:p>
          </table:table-cell>
          <table:table-cell office:value-type="string" table:style-name="c1">
            <text:p>2026-05-31 06:15</text:p>
          </table:table-cell>
          <table:table-cell office:value-type="float" office:value="735.562035" table:style-name="c1">
            <text:p>735.56</text:p>
          </table:table-cell>
          <table:table-cell office:value-type="float" office:value="0.1084392916083532" table:style-name="c14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3:30</text:p>
          </table:table-cell>
          <table:table-cell office:value-type="float" office:value="732.06585" table:style-name="c1">
            <text:p>732.07</text:p>
          </table:table-cell>
          <table:table-cell office:value-type="string" table:style-name="c1">
            <text:p>2026-05-31 14:30</text:p>
          </table:table-cell>
          <table:table-cell office:value-type="float" office:value="722.5985200000001" table:style-name="c1">
            <text:p>722.6</text:p>
          </table:table-cell>
          <table:table-cell office:value-type="float" office:value="-1.4905495784948708" table:style-name="c13">
            <text:p>-1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0:30</text:p>
          </table:table-cell>
          <table:table-cell office:value-type="float" office:value="699.1102700000001" table:style-name="c1">
            <text:p>699.11</text:p>
          </table:table-cell>
          <table:table-cell office:value-type="float" office:value="-2.814528884413603" table:style-name="c13">
            <text:p>-2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71091.96822" table:style-name="c10">
            <text:p>71092</text:p>
          </table:table-cell>
          <table:table-cell office:value-type="string" table:style-name="c10">
            <text:p>2026-03-06 09:15</text:p>
          </table:table-cell>
          <table:table-cell office:value-type="float" office:value="70537.95338" table:style-name="c10">
            <text:p>70538</text:p>
          </table:table-cell>
          <table:table-cell office:value-type="float" office:value="-0.9776353450446251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30</text:p>
          </table:table-cell>
          <table:table-cell office:value-type="float" office:value="69398.14173" table:style-name="c10">
            <text:p>69398</text:p>
          </table:table-cell>
          <table:table-cell office:value-type="string" table:style-name="c10">
            <text:p>2026-03-09 22:45</text:p>
          </table:table-cell>
          <table:table-cell office:value-type="float" office:value="68705.460085" table:style-name="c10">
            <text:p>68705</text:p>
          </table:table-cell>
          <table:table-cell office:value-type="float" office:value="-1.1960318230698541" table:style-name="c11">
            <text:p>-1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1:00</text:p>
          </table:table-cell>
          <table:table-cell office:value-type="float" office:value="69191.93867999999" table:style-name="c10">
            <text:p>69192</text:p>
          </table:table-cell>
          <table:table-cell office:value-type="string" table:style-name="c10">
            <text:p>2026-03-10 04:00</text:p>
          </table:table-cell>
          <table:table-cell office:value-type="float" office:value="69395.13507500001" table:style-name="c10">
            <text:p>69395</text:p>
          </table:table-cell>
          <table:table-cell office:value-type="float" office:value="0.09318357198124794" table:style-name="c12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8:15</text:p>
          </table:table-cell>
          <table:table-cell office:value-type="float" office:value="70934.80967999999" table:style-name="c10">
            <text:p>70935</text:p>
          </table:table-cell>
          <table:table-cell office:value-type="string" table:style-name="c10">
            <text:p>2026-03-10 11:15</text:p>
          </table:table-cell>
          <table:table-cell office:value-type="float" office:value="70582.77096000001" table:style-name="c10">
            <text:p>70583</text:p>
          </table:table-cell>
          <table:table-cell office:value-type="float" office:value="-0.6951927852821949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71503.543905" table:style-name="c10">
            <text:p>71504</text:p>
          </table:table-cell>
          <table:table-cell office:value-type="string" table:style-name="c10">
            <text:p>2026-03-10 17:45</text:p>
          </table:table-cell>
          <table:table-cell office:value-type="float" office:value="70653.29568000001" table:style-name="c10">
            <text:p>70653</text:p>
          </table:table-cell>
          <table:table-cell office:value-type="float" office:value="-1.3866224090677282" table:style-name="c11">
            <text:p>-1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70477.231005" table:style-name="c10">
            <text:p>70477</text:p>
          </table:table-cell>
          <table:table-cell office:value-type="string" table:style-name="c10">
            <text:p>2026-03-11 15:45</text:p>
          </table:table-cell>
          <table:table-cell office:value-type="float" office:value="70030.29733500001" table:style-name="c10">
            <text:p>70030</text:p>
          </table:table-cell>
          <table:table-cell office:value-type="float" office:value="-0.8327856046600468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71518.27126499999" table:style-name="c10">
            <text:p>71518</text:p>
          </table:table-cell>
          <table:table-cell office:value-type="string" table:style-name="c10">
            <text:p>2026-03-13 02:45</text:p>
          </table:table-cell>
          <table:table-cell office:value-type="float" office:value="71139.4125" table:style-name="c10">
            <text:p>71139</text:p>
          </table:table-cell>
          <table:table-cell office:value-type="float" office:value="-0.7285780841328582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72821.12236499999" table:style-name="c10">
            <text:p>72821</text:p>
          </table:table-cell>
          <table:table-cell office:value-type="string" table:style-name="c10">
            <text:p>2026-03-13 14:45</text:p>
          </table:table-cell>
          <table:table-cell office:value-type="float" office:value="72910.21665500001" table:style-name="c10">
            <text:p>72910</text:p>
          </table:table-cell>
          <table:table-cell office:value-type="float" office:value="-0.07779780268885039" table:style-name="c11">
            <text:p>-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30</text:p>
          </table:table-cell>
          <table:table-cell office:value-type="float" office:value="71303.92414499998" table:style-name="c10">
            <text:p>71304</text:p>
          </table:table-cell>
          <table:table-cell office:value-type="string" table:style-name="c10">
            <text:p>2026-03-15 06:30</text:p>
          </table:table-cell>
          <table:table-cell office:value-type="float" office:value="71430.42692000001" table:style-name="c10">
            <text:p>71430</text:p>
          </table:table-cell>
          <table:table-cell office:value-type="float" office:value="-0.022841167030196452" table:style-name="c11">
            <text:p>-0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71855.86998" table:style-name="c10">
            <text:p>71856</text:p>
          </table:table-cell>
          <table:table-cell office:value-type="string" table:style-name="c10">
            <text:p>2026-03-15 19:00</text:p>
          </table:table-cell>
          <table:table-cell office:value-type="float" office:value="71354.834735" table:style-name="c10">
            <text:p>71355</text:p>
          </table:table-cell>
          <table:table-cell office:value-type="float" office:value="-0.8957842411683736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72145.64479499999" table:style-name="c10">
            <text:p>72146</text:p>
          </table:table-cell>
          <table:table-cell office:value-type="string" table:style-name="c10">
            <text:p>2026-03-16 01:15</text:p>
          </table:table-cell>
          <table:table-cell office:value-type="float" office:value="72281.031405" table:style-name="c10">
            <text:p>72281</text:p>
          </table:table-cell>
          <table:table-cell office:value-type="float" office:value="-0.012617770351142088" table:style-name="c11">
            <text:p>-0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73806.885" table:style-name="c10">
            <text:p>73807</text:p>
          </table:table-cell>
          <table:table-cell office:value-type="string" table:style-name="c10">
            <text:p>2026-03-16 07:45</text:p>
          </table:table-cell>
          <table:table-cell office:value-type="float" office:value="73448.11757" table:style-name="c10">
            <text:p>73448</text:p>
          </table:table-cell>
          <table:table-cell office:value-type="float" office:value="-0.6850176877433944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45</text:p>
          </table:table-cell>
          <table:table-cell office:value-type="float" office:value="74116.689825" table:style-name="c10">
            <text:p>74117</text:p>
          </table:table-cell>
          <table:table-cell office:value-type="string" table:style-name="c10">
            <text:p>2026-03-16 14:30</text:p>
          </table:table-cell>
          <table:table-cell office:value-type="float" office:value="73581.68075500001" table:style-name="c10">
            <text:p>73582</text:p>
          </table:table-cell>
          <table:table-cell office:value-type="float" office:value="-0.9203039847566985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21:15</text:p>
          </table:table-cell>
          <table:table-cell office:value-type="float" office:value="74405.11396499998" table:style-name="c10">
            <text:p>74405</text:p>
          </table:table-cell>
          <table:table-cell office:value-type="string" table:style-name="c10">
            <text:p>2026-03-17 03:15</text:p>
          </table:table-cell>
          <table:table-cell office:value-type="float" office:value="74906.318105" table:style-name="c10">
            <text:p>74906</text:p>
          </table:table-cell>
          <table:table-cell office:value-type="float" office:value="0.4723686200836408" table:style-name="c12">
            <text:p>+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1:00</text:p>
          </table:table-cell>
          <table:table-cell office:value-type="float" office:value="70128.236595" table:style-name="c10">
            <text:p>70128</text:p>
          </table:table-cell>
          <table:table-cell office:value-type="string" table:style-name="c10">
            <text:p>2026-03-25 02:30</text:p>
          </table:table-cell>
          <table:table-cell office:value-type="float" office:value="70559.752475" table:style-name="c10">
            <text:p>70560</text:p>
          </table:table-cell>
          <table:table-cell office:value-type="float" office:value="0.41419398077833236" table:style-name="c12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5:15</text:p>
          </table:table-cell>
          <table:table-cell office:value-type="float" office:value="71280.952665" table:style-name="c10">
            <text:p>71281</text:p>
          </table:table-cell>
          <table:table-cell office:value-type="string" table:style-name="c10">
            <text:p>2026-03-25 08:00</text:p>
          </table:table-cell>
          <table:table-cell office:value-type="float" office:value="70891.41656000001" table:style-name="c10">
            <text:p>70891</text:p>
          </table:table-cell>
          <table:table-cell office:value-type="float" office:value="-0.7452875233025402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8:45</text:p>
          </table:table-cell>
          <table:table-cell office:value-type="float" office:value="71514.05916" table:style-name="c10">
            <text:p>71514</text:p>
          </table:table-cell>
          <table:table-cell office:value-type="string" table:style-name="c10">
            <text:p>2026-03-25 12:30</text:p>
          </table:table-cell>
          <table:table-cell office:value-type="float" office:value="71305.999165" table:style-name="c10">
            <text:p>71306</text:p>
          </table:table-cell>
          <table:table-cell office:value-type="float" office:value="-0.4902542121772546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15</text:p>
          </table:table-cell>
          <table:table-cell office:value-type="float" office:value="67927.86696" table:style-name="c10">
            <text:p>67928</text:p>
          </table:table-cell>
          <table:table-cell office:value-type="string" table:style-name="c10">
            <text:p>2026-03-30 09:15</text:p>
          </table:table-cell>
          <table:table-cell office:value-type="float" office:value="67546.80970000001" table:style-name="c10">
            <text:p>67547</text:p>
          </table:table-cell>
          <table:table-cell office:value-type="float" office:value="-0.7597520070727004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00</text:p>
          </table:table-cell>
          <table:table-cell office:value-type="float" office:value="67242.34437" table:style-name="c10">
            <text:p>67242</text:p>
          </table:table-cell>
          <table:table-cell office:value-type="string" table:style-name="c10">
            <text:p>2026-03-31 04:45</text:p>
          </table:table-cell>
          <table:table-cell office:value-type="float" office:value="67567.129535" table:style-name="c10">
            <text:p>67567</text:p>
          </table:table-cell>
          <table:table-cell office:value-type="float" office:value="0.2821413721324273" table:style-name="c12">
            <text:p>+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00</text:p>
          </table:table-cell>
          <table:table-cell office:value-type="float" office:value="67335.93114" table:style-name="c10">
            <text:p>67336</text:p>
          </table:table-cell>
          <table:table-cell office:value-type="string" table:style-name="c10">
            <text:p>2026-03-31 15:00</text:p>
          </table:table-cell>
          <table:table-cell office:value-type="float" office:value="66554.16627000002" table:style-name="c10">
            <text:p>66554</text:p>
          </table:table-cell>
          <table:table-cell office:value-type="float" office:value="-1.3585713197783233" table:style-name="c11">
            <text:p>-1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67809.92801999999" table:style-name="c10">
            <text:p>67810</text:p>
          </table:table-cell>
          <table:table-cell office:value-type="string" table:style-name="c10">
            <text:p>2026-04-01 00:15</text:p>
          </table:table-cell>
          <table:table-cell office:value-type="float" office:value="68011.977" table:style-name="c10">
            <text:p>68012</text:p>
          </table:table-cell>
          <table:table-cell office:value-type="float" office:value="0.09746808455173284" table:style-name="c12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15:30</text:p>
          </table:table-cell>
          <table:table-cell office:value-type="float" office:value="67533.75" table:style-name="c10">
            <text:p>67534</text:p>
          </table:table-cell>
          <table:table-cell office:value-type="string" table:style-name="c10">
            <text:p>2026-04-05 19:45</text:p>
          </table:table-cell>
          <table:table-cell office:value-type="float" office:value="67275.135605" table:style-name="c10">
            <text:p>67275</text:p>
          </table:table-cell>
          <table:table-cell office:value-type="float" office:value="-0.5820754675616158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2:45</text:p>
          </table:table-cell>
          <table:table-cell office:value-type="float" office:value="67998.29215499999" table:style-name="c10">
            <text:p>67998</text:p>
          </table:table-cell>
          <table:table-cell office:value-type="string" table:style-name="c10">
            <text:p>2026-04-06 04:15</text:p>
          </table:table-cell>
          <table:table-cell office:value-type="float" office:value="69041.392035" table:style-name="c10">
            <text:p>69041</text:p>
          </table:table-cell>
          <table:table-cell office:value-type="float" office:value="1.331042455094189" table:style-name="c12">
            <text:p>+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69668.40679499999" table:style-name="c10">
            <text:p>69668</text:p>
          </table:table-cell>
          <table:table-cell office:value-type="string" table:style-name="c10">
            <text:p>2026-04-06 12:00</text:p>
          </table:table-cell>
          <table:table-cell office:value-type="float" office:value="69580.102545" table:style-name="c10">
            <text:p>69580</text:p>
          </table:table-cell>
          <table:table-cell office:value-type="float" office:value="-0.3263959740841482" table:style-name="c11">
            <text:p>-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17:45</text:p>
          </table:table-cell>
          <table:table-cell office:value-type="float" office:value="68728.517085" table:style-name="c10">
            <text:p>68729</text:p>
          </table:table-cell>
          <table:table-cell office:value-type="string" table:style-name="c10">
            <text:p>2026-04-08 02:30</text:p>
          </table:table-cell>
          <table:table-cell office:value-type="float" office:value="71429.40743" table:style-name="c10">
            <text:p>71429</text:p>
          </table:table-cell>
          <table:table-cell office:value-type="float" office:value="3.7220400905547013" table:style-name="c12">
            <text:p>+3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00</text:p>
          </table:table-cell>
          <table:table-cell office:value-type="float" office:value="72107.98597499999" table:style-name="c10">
            <text:p>72108</text:p>
          </table:table-cell>
          <table:table-cell office:value-type="string" table:style-name="c10">
            <text:p>2026-04-08 13:45</text:p>
          </table:table-cell>
          <table:table-cell office:value-type="float" office:value="71640.351905" table:style-name="c10">
            <text:p>71640</text:p>
          </table:table-cell>
          <table:table-cell office:value-type="float" office:value="-0.847122721843685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72111.77787" table:style-name="c10">
            <text:p>72112</text:p>
          </table:table-cell>
          <table:table-cell office:value-type="string" table:style-name="c10">
            <text:p>2026-04-09 19:00</text:p>
          </table:table-cell>
          <table:table-cell office:value-type="float" office:value="71852.745655" table:style-name="c10">
            <text:p>71853</text:p>
          </table:table-cell>
          <table:table-cell office:value-type="float" office:value="-0.5583912440631278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2:45</text:p>
          </table:table-cell>
          <table:table-cell office:value-type="float" office:value="72351.507675" table:style-name="c10">
            <text:p>72352</text:p>
          </table:table-cell>
          <table:table-cell office:value-type="string" table:style-name="c10">
            <text:p>2026-04-10 13:45</text:p>
          </table:table-cell>
          <table:table-cell office:value-type="float" office:value="72023.69014" table:style-name="c10">
            <text:p>72024</text:p>
          </table:table-cell>
          <table:table-cell office:value-type="float" office:value="-0.6520843956827171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15</text:p>
          </table:table-cell>
          <table:table-cell office:value-type="float" office:value="72745.664655" table:style-name="c10">
            <text:p>72746</text:p>
          </table:table-cell>
          <table:table-cell office:value-type="string" table:style-name="c10">
            <text:p>2026-04-10 16:00</text:p>
          </table:table-cell>
          <table:table-cell office:value-type="float" office:value="72424.28974000001" table:style-name="c10">
            <text:p>72424</text:p>
          </table:table-cell>
          <table:table-cell office:value-type="float" office:value="-0.6407956713310625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15</text:p>
          </table:table-cell>
          <table:table-cell office:value-type="float" office:value="72908.97626999998" table:style-name="c10">
            <text:p>72909</text:p>
          </table:table-cell>
          <table:table-cell office:value-type="string" table:style-name="c10">
            <text:p>2026-04-11 21:00</text:p>
          </table:table-cell>
          <table:table-cell office:value-type="float" office:value="73253.784785" table:style-name="c10">
            <text:p>73254</text:p>
          </table:table-cell>
          <table:table-cell office:value-type="float" office:value="0.27208474095172797" table:style-name="c12">
            <text:p>+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9:45</text:p>
          </table:table-cell>
          <table:table-cell office:value-type="float" office:value="73052.257875" table:style-name="c10">
            <text:p>73052</text:p>
          </table:table-cell>
          <table:table-cell office:value-type="string" table:style-name="c10">
            <text:p>2026-04-14 03:15</text:p>
          </table:table-cell>
          <table:table-cell office:value-type="float" office:value="74305.92845" table:style-name="c10">
            <text:p>74306</text:p>
          </table:table-cell>
          <table:table-cell office:value-type="float" office:value="1.512797901359142" table:style-name="c12">
            <text:p>+1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75226.09425" table:style-name="c10">
            <text:p>75226</text:p>
          </table:table-cell>
          <table:table-cell office:value-type="string" table:style-name="c10">
            <text:p>2026-04-14 15:00</text:p>
          </table:table-cell>
          <table:table-cell office:value-type="float" office:value="74976.103195" table:style-name="c10">
            <text:p>74976</text:p>
          </table:table-cell>
          <table:table-cell office:value-type="float" office:value="-0.5315552924466838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74622.24247499999" table:style-name="c10">
            <text:p>74622</text:p>
          </table:table-cell>
          <table:table-cell office:value-type="string" table:style-name="c10">
            <text:p>2026-04-15 02:45</text:p>
          </table:table-cell>
          <table:table-cell office:value-type="float" office:value="74239.46170000001" table:style-name="c10">
            <text:p>74239</text:p>
          </table:table-cell>
          <table:table-cell office:value-type="float" office:value="-0.7118326136020814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0:00</text:p>
          </table:table-cell>
          <table:table-cell office:value-type="float" office:value="75040.1013" table:style-name="c10">
            <text:p>75040</text:p>
          </table:table-cell>
          <table:table-cell office:value-type="string" table:style-name="c10">
            <text:p>2026-04-15 23:15</text:p>
          </table:table-cell>
          <table:table-cell office:value-type="float" office:value="74711.54554" table:style-name="c10">
            <text:p>74712</text:p>
          </table:table-cell>
          <table:table-cell office:value-type="float" office:value="-0.636864997854758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75235.52896499999" table:style-name="c10">
            <text:p>75236</text:p>
          </table:table-cell>
          <table:table-cell office:value-type="string" table:style-name="c10">
            <text:p>2026-04-16 06:45</text:p>
          </table:table-cell>
          <table:table-cell office:value-type="float" office:value="74903.44954" table:style-name="c10">
            <text:p>74903</text:p>
          </table:table-cell>
          <table:table-cell office:value-type="float" office:value="-0.6404041112737957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75012.98775" table:style-name="c10">
            <text:p>75013</text:p>
          </table:table-cell>
          <table:table-cell office:value-type="string" table:style-name="c10">
            <text:p>2026-04-16 14:00</text:p>
          </table:table-cell>
          <table:table-cell office:value-type="float" office:value="73751.135985" table:style-name="c10">
            <text:p>73751</text:p>
          </table:table-cell>
          <table:table-cell office:value-type="float" office:value="-1.8787150440278455" table:style-name="c11">
            <text:p>-1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74734.5486" table:style-name="c10">
            <text:p>74735</text:p>
          </table:table-cell>
          <table:table-cell office:value-type="string" table:style-name="c10">
            <text:p>2026-04-16 17:00</text:p>
          </table:table-cell>
          <table:table-cell office:value-type="float" office:value="74138.49221000001" table:style-name="c10">
            <text:p>74138</text:p>
          </table:table-cell>
          <table:table-cell office:value-type="float" office:value="-0.9958703837381289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45</text:p>
          </table:table-cell>
          <table:table-cell office:value-type="float" office:value="75376.999665" table:style-name="c10">
            <text:p>75377</text:p>
          </table:table-cell>
          <table:table-cell office:value-type="string" table:style-name="c10">
            <text:p>2026-04-17 10:30</text:p>
          </table:table-cell>
          <table:table-cell office:value-type="float" office:value="75187.10764" table:style-name="c10">
            <text:p>75187</text:p>
          </table:table-cell>
          <table:table-cell office:value-type="float" office:value="-0.45131944052466677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15</text:p>
          </table:table-cell>
          <table:table-cell office:value-type="float" office:value="76948.444995" table:style-name="c10">
            <text:p>76948</text:p>
          </table:table-cell>
          <table:table-cell office:value-type="string" table:style-name="c10">
            <text:p>2026-04-17 17:30</text:p>
          </table:table-cell>
          <table:table-cell office:value-type="float" office:value="77203.9787" table:style-name="c10">
            <text:p>77204</text:p>
          </table:table-cell>
          <table:table-cell office:value-type="float" office:value="0.13152046358479996" table:style-name="c12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77278.18978500001" table:style-name="c10">
            <text:p>77278</text:p>
          </table:table-cell>
          <table:table-cell office:value-type="string" table:style-name="c10">
            <text:p>2026-04-22 08:45</text:p>
          </table:table-cell>
          <table:table-cell office:value-type="float" office:value="77905.2279" table:style-name="c10">
            <text:p>77905</text:p>
          </table:table-cell>
          <table:table-cell office:value-type="float" office:value="0.6098817347289565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4:00</text:p>
          </table:table-cell>
          <table:table-cell office:value-type="float" office:value="78880.36047" table:style-name="c10">
            <text:p>78880</text:p>
          </table:table-cell>
          <table:table-cell office:value-type="string" table:style-name="c10">
            <text:p>2026-04-22 17:00</text:p>
          </table:table-cell>
          <table:table-cell office:value-type="float" office:value="78704.22820000001" table:style-name="c10">
            <text:p>78704</text:p>
          </table:table-cell>
          <table:table-cell office:value-type="float" office:value="-0.42274403943504124" table:style-name="c11">
            <text:p>-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5:00</text:p>
          </table:table-cell>
          <table:table-cell office:value-type="float" office:value="78219.87039" table:style-name="c10">
            <text:p>78220</text:p>
          </table:table-cell>
          <table:table-cell office:value-type="string" table:style-name="c10">
            <text:p>2026-04-23 17:15</text:p>
          </table:table-cell>
          <table:table-cell office:value-type="float" office:value="77803.029025" table:style-name="c10">
            <text:p>77803</text:p>
          </table:table-cell>
          <table:table-cell office:value-type="float" office:value="-0.7317445262529421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78105.002985" table:style-name="c10">
            <text:p>78105</text:p>
          </table:table-cell>
          <table:table-cell office:value-type="string" table:style-name="c10">
            <text:p>2026-04-26 17:00</text:p>
          </table:table-cell>
          <table:table-cell office:value-type="float" office:value="77880.470285" table:style-name="c10">
            <text:p>77880</text:p>
          </table:table-cell>
          <table:table-cell office:value-type="float" office:value="-0.4868007753264125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22:15</text:p>
          </table:table-cell>
          <table:table-cell office:value-type="float" office:value="78608.80476" table:style-name="c10">
            <text:p>78609</text:p>
          </table:table-cell>
          <table:table-cell office:value-type="string" table:style-name="c10">
            <text:p>2026-04-26 22:45</text:p>
          </table:table-cell>
          <table:table-cell office:value-type="float" office:value="78242.37924000001" table:style-name="c10">
            <text:p>78242</text:p>
          </table:table-cell>
          <table:table-cell office:value-type="float" office:value="-0.665106202412058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00</text:p>
          </table:table-cell>
          <table:table-cell office:value-type="float" office:value="79348.65449999999" table:style-name="c10">
            <text:p>79349</text:p>
          </table:table-cell>
          <table:table-cell office:value-type="string" table:style-name="c10">
            <text:p>2026-04-27 05:00</text:p>
          </table:table-cell>
          <table:table-cell office:value-type="float" office:value="78884.74789500001" table:style-name="c10">
            <text:p>78885</text:p>
          </table:table-cell>
          <table:table-cell office:value-type="float" office:value="-0.7833746141745701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78217.46919" table:style-name="c10">
            <text:p>78217</text:p>
          </table:table-cell>
          <table:table-cell office:value-type="string" table:style-name="c10">
            <text:p>2026-04-27 15:00</text:p>
          </table:table-cell>
          <table:table-cell office:value-type="float" office:value="77776.35237" table:style-name="c10">
            <text:p>77776</text:p>
          </table:table-cell>
          <table:table-cell office:value-type="float" office:value="-0.7627346608958252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3:45</text:p>
          </table:table-cell>
          <table:table-cell office:value-type="float" office:value="77196.97919999999" table:style-name="c10">
            <text:p>77197</text:p>
          </table:table-cell>
          <table:table-cell office:value-type="string" table:style-name="c10">
            <text:p>2026-05-01 07:00</text:p>
          </table:table-cell>
          <table:table-cell office:value-type="float" office:value="76954.99325500001" table:style-name="c10">
            <text:p>76955</text:p>
          </table:table-cell>
          <table:table-cell office:value-type="float" office:value="-0.5127389447341479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2:30</text:p>
          </table:table-cell>
          <table:table-cell office:value-type="float" office:value="77801.92151999999" table:style-name="c10">
            <text:p>77802</text:p>
          </table:table-cell>
          <table:table-cell office:value-type="string" table:style-name="c10">
            <text:p>2026-05-01 16:45</text:p>
          </table:table-cell>
          <table:table-cell office:value-type="float" office:value="78239.07089500001" table:style-name="c10">
            <text:p>78239</text:p>
          </table:table-cell>
          <table:table-cell office:value-type="float" office:value="0.3608515918321453" table:style-name="c12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78846.073335" table:style-name="c10">
            <text:p>78846</text:p>
          </table:table-cell>
          <table:table-cell office:value-type="string" table:style-name="c10">
            <text:p>2026-05-02 22:30</text:p>
          </table:table-cell>
          <table:table-cell office:value-type="float" office:value="78580.68000500002" table:style-name="c10">
            <text:p>78581</text:p>
          </table:table-cell>
          <table:table-cell office:value-type="float" office:value="-0.5358239053135261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30</text:p>
          </table:table-cell>
          <table:table-cell office:value-type="float" office:value="78451.96637999998" table:style-name="c10">
            <text:p>78452</text:p>
          </table:table-cell>
          <table:table-cell office:value-type="string" table:style-name="c10">
            <text:p>2026-05-03 13:45</text:p>
          </table:table-cell>
          <table:table-cell office:value-type="float" office:value="78580.68000500002" table:style-name="c10">
            <text:p>78581</text:p>
          </table:table-cell>
          <table:table-cell office:value-type="float" office:value="-0.03616117688185483" table:style-name="c11">
            <text:p>-0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0:45</text:p>
          </table:table-cell>
          <table:table-cell office:value-type="float" office:value="79047.293895" table:style-name="c10">
            <text:p>79047</text:p>
          </table:table-cell>
          <table:table-cell office:value-type="string" table:style-name="c10">
            <text:p>2026-05-03 21:45</text:p>
          </table:table-cell>
          <table:table-cell office:value-type="float" office:value="78660.65000000001" table:style-name="c10">
            <text:p>78661</text:p>
          </table:table-cell>
          <table:table-cell office:value-type="float" office:value="-0.6880520604189755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79298.979675" table:style-name="c10">
            <text:p>79299</text:p>
          </table:table-cell>
          <table:table-cell office:value-type="string" table:style-name="c10">
            <text:p>2026-05-03 23:30</text:p>
          </table:table-cell>
          <table:table-cell office:value-type="float" office:value="78618.13127000001" table:style-name="c10">
            <text:p>78618</text:p>
          </table:table-cell>
          <table:table-cell office:value-type="float" office:value="-1.0567677577229762" table:style-name="c11">
            <text:p>-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79809.31471499999" table:style-name="c10">
            <text:p>79809</text:p>
          </table:table-cell>
          <table:table-cell office:value-type="string" table:style-name="c10">
            <text:p>2026-05-04 06:15</text:p>
          </table:table-cell>
          <table:table-cell office:value-type="float" office:value="79878.050995" table:style-name="c10">
            <text:p>79878</text:p>
          </table:table-cell>
          <table:table-cell office:value-type="float" office:value="-0.11394652900320601" table:style-name="c11">
            <text:p>-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80256.25807499999" table:style-name="c10">
            <text:p>80256</text:p>
          </table:table-cell>
          <table:table-cell office:value-type="string" table:style-name="c10">
            <text:p>2026-05-04 19:30</text:p>
          </table:table-cell>
          <table:table-cell office:value-type="float" office:value="79890.035" table:style-name="c10">
            <text:p>79890</text:p>
          </table:table-cell>
          <table:table-cell office:value-type="float" office:value="-0.6553049788011522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45</text:p>
          </table:table-cell>
          <table:table-cell office:value-type="float" office:value="80950.99526999998" table:style-name="c10">
            <text:p>80951</text:p>
          </table:table-cell>
          <table:table-cell office:value-type="string" table:style-name="c10">
            <text:p>2026-05-05 06:45</text:p>
          </table:table-cell>
          <table:table-cell office:value-type="float" office:value="80771.104245" table:style-name="c10">
            <text:p>80771</text:p>
          </table:table-cell>
          <table:table-cell office:value-type="float" office:value="-0.4216779067968468" table:style-name="c11">
            <text:p>-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3:15</text:p>
          </table:table-cell>
          <table:table-cell office:value-type="float" office:value="81662.800995" table:style-name="c10">
            <text:p>81663</text:p>
          </table:table-cell>
          <table:table-cell office:value-type="string" table:style-name="c10">
            <text:p>2026-05-05 14:15</text:p>
          </table:table-cell>
          <table:table-cell office:value-type="float" office:value="81063.52796" table:style-name="c10">
            <text:p>81064</text:p>
          </table:table-cell>
          <table:table-cell office:value-type="float" office:value="-0.9322715093236122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1:30</text:p>
          </table:table-cell>
          <table:table-cell office:value-type="float" office:value="82725.34199999999" table:style-name="c10">
            <text:p>82725</text:p>
          </table:table-cell>
          <table:table-cell office:value-type="string" table:style-name="c10">
            <text:p>2026-05-06 13:15</text:p>
          </table:table-cell>
          <table:table-cell office:value-type="float" office:value="82068.66514000001" table:style-name="c10">
            <text:p>82069</text:p>
          </table:table-cell>
          <table:table-cell office:value-type="float" office:value="-0.9921169278633402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7:00</text:p>
          </table:table-cell>
          <table:table-cell office:value-type="float" office:value="81479.33931" table:style-name="c10">
            <text:p>81479</text:p>
          </table:table-cell>
          <table:table-cell office:value-type="string" table:style-name="c10">
            <text:p>2026-05-07 08:45</text:p>
          </table:table-cell>
          <table:table-cell office:value-type="float" office:value="81215.901735" table:style-name="c10">
            <text:p>81216</text:p>
          </table:table-cell>
          <table:table-cell office:value-type="float" office:value="-0.5225719380814731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30</text:p>
          </table:table-cell>
          <table:table-cell office:value-type="float" office:value="81544.461855" table:style-name="c10">
            <text:p>81544</text:p>
          </table:table-cell>
          <table:table-cell office:value-type="string" table:style-name="c10">
            <text:p>2026-05-11 01:00</text:p>
          </table:table-cell>
          <table:table-cell office:value-type="float" office:value="81430.39443500001" table:style-name="c10">
            <text:p>81430</text:p>
          </table:table-cell>
          <table:table-cell office:value-type="float" office:value="-0.3395040842477215" table:style-name="c11">
            <text:p>-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5:30</text:p>
          </table:table-cell>
          <table:table-cell office:value-type="float" office:value="77592.246735" table:style-name="c10">
            <text:p>77592</text:p>
          </table:table-cell>
          <table:table-cell office:value-type="string" table:style-name="c10">
            <text:p>2026-05-20 16:30</text:p>
          </table:table-cell>
          <table:table-cell office:value-type="float" office:value="77049.456" table:style-name="c10">
            <text:p>77049</text:p>
          </table:table-cell>
          <table:table-cell office:value-type="float" office:value="-0.8980441047464538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78094.377675" table:style-name="c10">
            <text:p>78094</text:p>
          </table:table-cell>
          <table:table-cell office:value-type="string" table:style-name="c10">
            <text:p>2026-05-21 09:45</text:p>
          </table:table-cell>
          <table:table-cell office:value-type="float" office:value="77651.56479500001" table:style-name="c10">
            <text:p>77652</text:p>
          </table:table-cell>
          <table:table-cell office:value-type="float" office:value="-0.7657892614421069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78019.53026999999" table:style-name="c10">
            <text:p>78020</text:p>
          </table:table-cell>
          <table:table-cell office:value-type="string" table:style-name="c10">
            <text:p>2026-05-21 19:00</text:p>
          </table:table-cell>
          <table:table-cell office:value-type="float" office:value="77349.04613" table:style-name="c10">
            <text:p>77349</text:p>
          </table:table-cell>
          <table:table-cell office:value-type="float" office:value="-1.0575619724425889" table:style-name="c11">
            <text:p>-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22:15</text:p>
          </table:table-cell>
          <table:table-cell office:value-type="float" office:value="77023.19235" table:style-name="c10">
            <text:p>77023</text:p>
          </table:table-cell>
          <table:table-cell office:value-type="string" table:style-name="c10">
            <text:p>2026-05-25 03:15</text:p>
          </table:table-cell>
          <table:table-cell office:value-type="float" office:value="77055.203125" table:style-name="c10">
            <text:p>77055</text:p>
          </table:table-cell>
          <table:table-cell office:value-type="float" office:value="-0.15842316102973042" table:style-name="c11">
            <text:p>-0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77268.35487" table:style-name="c10">
            <text:p>77268</text:p>
          </table:table-cell>
          <table:table-cell office:value-type="string" table:style-name="c10">
            <text:p>2026-05-26 12:30</text:p>
          </table:table-cell>
          <table:table-cell office:value-type="float" office:value="76978.221635" table:style-name="c10">
            <text:p>76978</text:p>
          </table:table-cell>
          <table:table-cell office:value-type="float" office:value="-0.574637185941651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4:30</text:p>
          </table:table-cell>
          <table:table-cell office:value-type="float" office:value="77997.3792" table:style-name="c10">
            <text:p>77997</text:p>
          </table:table-cell>
          <table:table-cell office:value-type="string" table:style-name="c10">
            <text:p>2026-05-26 14:45</text:p>
          </table:table-cell>
          <table:table-cell office:value-type="float" office:value="76781.599995" table:style-name="c10">
            <text:p>76782</text:p>
          </table:table-cell>
          <table:table-cell office:value-type="float" office:value="-1.755527733667761" table:style-name="c11">
            <text:p>-1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0:45</text:p>
          </table:table-cell>
          <table:table-cell office:value-type="float" office:value="0.09740868" table:style-name="c1">
            <text:p>0.097409</text:p>
          </table:table-cell>
          <table:table-cell office:value-type="string" table:style-name="c1">
            <text:p>2026-03-05 11:45</text:p>
          </table:table-cell>
          <table:table-cell office:value-type="float" office:value="0.09589203" table:style-name="c1">
            <text:p>0.095892</text:p>
          </table:table-cell>
          <table:table-cell office:value-type="float" office:value="-1.753784332125219" table:style-name="c13">
            <text:p>-1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00</text:p>
          </table:table-cell>
          <table:table-cell office:value-type="float" office:value="0.09438716999999999" table:style-name="c1">
            <text:p>0.094387</text:p>
          </table:table-cell>
          <table:table-cell office:value-type="string" table:style-name="c1">
            <text:p>2026-03-05 22:15</text:p>
          </table:table-cell>
          <table:table-cell office:value-type="float" office:value="0.093643155" table:style-name="c1">
            <text:p>0.093643</text:p>
          </table:table-cell>
          <table:table-cell office:value-type="float" office:value="-0.9865828871074234" table:style-name="c13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00</text:p>
          </table:table-cell>
          <table:table-cell office:value-type="float" office:value="0.09196596" table:style-name="c1">
            <text:p>0.091966</text:p>
          </table:table-cell>
          <table:table-cell office:value-type="string" table:style-name="c1">
            <text:p>2026-03-09 15:30</text:p>
          </table:table-cell>
          <table:table-cell office:value-type="float" office:value="0.09125435000000001" table:style-name="c1">
            <text:p>0.091254</text:p>
          </table:table-cell>
          <table:table-cell office:value-type="float" office:value="-0.9721286502636373" table:style-name="c13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30</text:p>
          </table:table-cell>
          <table:table-cell office:value-type="float" office:value="0.09667831499999999" table:style-name="c1">
            <text:p>0.096678</text:p>
          </table:table-cell>
          <table:table-cell office:value-type="string" table:style-name="c1">
            <text:p>2026-03-10 18:15</text:p>
          </table:table-cell>
          <table:table-cell office:value-type="float" office:value="0.09625185" table:style-name="c1">
            <text:p>0.096252</text:p>
          </table:table-cell>
          <table:table-cell office:value-type="float" office:value="-0.6401357410397379" table:style-name="c13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0.09286641" table:style-name="c1">
            <text:p>0.092866</text:p>
          </table:table-cell>
          <table:table-cell office:value-type="string" table:style-name="c1">
            <text:p>2026-03-11 14:15</text:p>
          </table:table-cell>
          <table:table-cell office:value-type="float" office:value="0.09297349" table:style-name="c1">
            <text:p>0.092973</text:p>
          </table:table-cell>
          <table:table-cell office:value-type="float" office:value="-0.0848250799293293" table:style-name="c13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0.093916935" table:style-name="c1">
            <text:p>0.093917</text:p>
          </table:table-cell>
          <table:table-cell office:value-type="string" table:style-name="c1">
            <text:p>2026-03-11 21:30</text:p>
          </table:table-cell>
          <table:table-cell office:value-type="float" office:value="0.09348323500000001" table:style-name="c1">
            <text:p>0.093483</text:p>
          </table:table-cell>
          <table:table-cell office:value-type="float" office:value="-0.6607679294101554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1:00</text:p>
          </table:table-cell>
          <table:table-cell office:value-type="float" office:value="0.09436715999999999" table:style-name="c1">
            <text:p>0.094367</text:p>
          </table:table-cell>
          <table:table-cell office:value-type="string" table:style-name="c1">
            <text:p>2026-03-12 14:30</text:p>
          </table:table-cell>
          <table:table-cell office:value-type="float" office:value="0.09445275" table:style-name="c1">
            <text:p>0.094453</text:p>
          </table:table-cell>
          <table:table-cell office:value-type="float" office:value="-0.10938238180526749" table:style-name="c13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00</text:p>
          </table:table-cell>
          <table:table-cell office:value-type="float" office:value="0.09686841" table:style-name="c1">
            <text:p>0.096868</text:p>
          </table:table-cell>
          <table:table-cell office:value-type="string" table:style-name="c1">
            <text:p>2026-03-13 02:30</text:p>
          </table:table-cell>
          <table:table-cell office:value-type="float" office:value="0.096241855" table:style-name="c1">
            <text:p>0.096242</text:p>
          </table:table-cell>
          <table:table-cell office:value-type="float" office:value="-0.8454174773231182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45</text:p>
          </table:table-cell>
          <table:table-cell office:value-type="float" office:value="0.09854925" table:style-name="c1">
            <text:p>0.098549</text:p>
          </table:table-cell>
          <table:table-cell office:value-type="string" table:style-name="c1">
            <text:p>2026-03-13 14:30</text:p>
          </table:table-cell>
          <table:table-cell office:value-type="float" office:value="0.09979008" table:style-name="c1">
            <text:p>0.09979</text:p>
          </table:table-cell>
          <table:table-cell office:value-type="float" office:value="1.0566794065708152" table:style-name="c14">
            <text:p>+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1:15</text:p>
          </table:table-cell>
          <table:table-cell office:value-type="float" office:value="0.09478737" table:style-name="c1">
            <text:p>0.094787</text:p>
          </table:table-cell>
          <table:table-cell office:value-type="string" table:style-name="c1">
            <text:p>2026-03-14 14:45</text:p>
          </table:table-cell>
          <table:table-cell office:value-type="float" office:value="0.09449273000000001" table:style-name="c1">
            <text:p>0.094493</text:p>
          </table:table-cell>
          <table:table-cell office:value-type="float" office:value="-0.5101217253627666" table:style-name="c13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5 03:30</text:p>
          </table:table-cell>
          <table:table-cell office:value-type="float" office:value="0.096081935" table:style-name="c1">
            <text:p>0.096082</text:p>
          </table:table-cell>
          <table:table-cell office:value-type="float" office:value="-0.4756529191946024" table:style-name="c13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00</text:p>
          </table:table-cell>
          <table:table-cell office:value-type="float" office:value="0.09650823" table:style-name="c1">
            <text:p>0.096508</text:p>
          </table:table-cell>
          <table:table-cell office:value-type="string" table:style-name="c1">
            <text:p>2026-03-15 12:15</text:p>
          </table:table-cell>
          <table:table-cell office:value-type="float" office:value="0.09606194500000001" table:style-name="c1">
            <text:p>0.096062</text:p>
          </table:table-cell>
          <table:table-cell office:value-type="float" office:value="-0.6614076623879472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09692843999999999" table:style-name="c1">
            <text:p>0.096928</text:p>
          </table:table-cell>
          <table:table-cell office:value-type="string" table:style-name="c1">
            <text:p>2026-03-16 08:45</text:p>
          </table:table-cell>
          <table:table-cell office:value-type="float" office:value="0.1005497" table:style-name="c1">
            <text:p>0.10055</text:p>
          </table:table-cell>
          <table:table-cell office:value-type="float" office:value="3.528645617013959" table:style-name="c14">
            <text:p>+3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15</text:p>
          </table:table-cell>
          <table:table-cell office:value-type="float" office:value="0.10132063499999999" table:style-name="c1">
            <text:p>0.10132</text:p>
          </table:table-cell>
          <table:table-cell office:value-type="string" table:style-name="c1">
            <text:p>2026-03-16 15:45</text:p>
          </table:table-cell>
          <table:table-cell office:value-type="float" office:value="0.10053970500000001" table:style-name="c1">
            <text:p>0.10054</text:p>
          </table:table-cell>
          <table:table-cell office:value-type="float" office:value="-0.9691104583927967" table:style-name="c13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0.102981465" table:style-name="c1">
            <text:p>0.10298</text:p>
          </table:table-cell>
          <table:table-cell office:value-type="string" table:style-name="c1">
            <text:p>2026-03-17 02:15</text:p>
          </table:table-cell>
          <table:table-cell office:value-type="float" office:value="0.10240877" table:style-name="c1">
            <text:p>0.10241</text:p>
          </table:table-cell>
          <table:table-cell office:value-type="float" office:value="-0.7549029635867011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2:45</text:p>
          </table:table-cell>
          <table:table-cell office:value-type="float" office:value="0.10427210999999999" table:style-name="c1">
            <text:p>0.10427</text:p>
          </table:table-cell>
          <table:table-cell office:value-type="string" table:style-name="c1">
            <text:p>2026-03-17 03:15</text:p>
          </table:table-cell>
          <table:table-cell office:value-type="float" office:value="0.102678635" table:style-name="c1">
            <text:p>0.10268</text:p>
          </table:table-cell>
          <table:table-cell office:value-type="float" office:value="-1.725034231459377" table:style-name="c13">
            <text:p>-1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0.09532764" table:style-name="c1">
            <text:p>0.095328</text:p>
          </table:table-cell>
          <table:table-cell office:value-type="string" table:style-name="c1">
            <text:p>2026-03-24 10:15</text:p>
          </table:table-cell>
          <table:table-cell office:value-type="float" office:value="0.094502725" table:style-name="c1">
            <text:p>0.094503</text:p>
          </table:table-cell>
          <table:table-cell office:value-type="float" office:value="-1.0635173043988089" table:style-name="c13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94437195" table:style-name="c1">
            <text:p>0.094437</text:p>
          </table:table-cell>
          <table:table-cell office:value-type="string" table:style-name="c1">
            <text:p>2026-03-25 02:30</text:p>
          </table:table-cell>
          <table:table-cell office:value-type="float" office:value="0.09484255500000001" table:style-name="c1">
            <text:p>0.094843</text:p>
          </table:table-cell>
          <table:table-cell office:value-type="float" office:value="0.22847960759000419" table:style-name="c14">
            <text:p>+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15</text:p>
          </table:table-cell>
          <table:table-cell office:value-type="float" office:value="0.096658305" table:style-name="c1">
            <text:p>0.096658</text:p>
          </table:table-cell>
          <table:table-cell office:value-type="string" table:style-name="c1">
            <text:p>2026-03-25 09:45</text:p>
          </table:table-cell>
          <table:table-cell office:value-type="float" office:value="0.09663166000000001" table:style-name="c1">
            <text:p>0.096632</text:p>
          </table:table-cell>
          <table:table-cell office:value-type="float" office:value="-0.227411072788819" table:style-name="c13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1:30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3-30 12:00</text:p>
          </table:table-cell>
          <table:table-cell office:value-type="float" office:value="0.09284355500000001" table:style-name="c1">
            <text:p>0.092844</text:p>
          </table:table-cell>
          <table:table-cell office:value-type="float" office:value="-0.43898634046231066" table:style-name="c13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0.09200598" table:style-name="c1">
            <text:p>0.092006</text:p>
          </table:table-cell>
          <table:table-cell office:value-type="string" table:style-name="c1">
            <text:p>2026-03-31 04:30</text:p>
          </table:table-cell>
          <table:table-cell office:value-type="float" office:value="0.09147424000000001" table:style-name="c1">
            <text:p>0.091474</text:p>
          </table:table-cell>
          <table:table-cell office:value-type="float" office:value="-0.7766853912756444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308651999999999" table:style-name="c1">
            <text:p>0.093087</text:p>
          </table:table-cell>
          <table:table-cell office:value-type="string" table:style-name="c1">
            <text:p>2026-04-01 08:00</text:p>
          </table:table-cell>
          <table:table-cell office:value-type="float" office:value="0.09321337" table:style-name="c1">
            <text:p>0.093213</text:p>
          </table:table-cell>
          <table:table-cell office:value-type="float" office:value="-0.06390133247002883" table:style-name="c13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15</text:p>
          </table:table-cell>
          <table:table-cell office:value-type="float" office:value="0.09188592" table:style-name="c1">
            <text:p>0.091886</text:p>
          </table:table-cell>
          <table:table-cell office:value-type="string" table:style-name="c1">
            <text:p>2026-04-03 19:00</text:p>
          </table:table-cell>
          <table:table-cell office:value-type="float" office:value="0.0917541" table:style-name="c1">
            <text:p>0.091754</text:p>
          </table:table-cell>
          <table:table-cell office:value-type="float" office:value="-0.343073722176368" table:style-name="c13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3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4-04 20:15</text:p>
          </table:table-cell>
          <table:table-cell office:value-type="float" office:value="0.09216389500000001" table:style-name="c1">
            <text:p>0.092164</text:p>
          </table:table-cell>
          <table:table-cell office:value-type="float" office:value="-0.5046617666328967" table:style-name="c13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00</text:p>
          </table:table-cell>
          <table:table-cell office:value-type="float" office:value="0.09282639" table:style-name="c1">
            <text:p>0.092826</text:p>
          </table:table-cell>
          <table:table-cell office:value-type="string" table:style-name="c1">
            <text:p>2026-04-06 01:15</text:p>
          </table:table-cell>
          <table:table-cell office:value-type="float" office:value="0.091884035" table:style-name="c1">
            <text:p>0.091884</text:p>
          </table:table-cell>
          <table:table-cell office:value-type="float" office:value="-1.2130507132346757" table:style-name="c13">
            <text:p>-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0.09316656" table:style-name="c1">
            <text:p>0.093167</text:p>
          </table:table-cell>
          <table:table-cell office:value-type="string" table:style-name="c1">
            <text:p>2026-04-06 03:45</text:p>
          </table:table-cell>
          <table:table-cell office:value-type="float" office:value="0.09239378" table:style-name="c1">
            <text:p>0.092394</text:p>
          </table:table-cell>
          <table:table-cell office:value-type="float" office:value="-1.0277026072659678" table:style-name="c13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4-06 12:45</text:p>
          </table:table-cell>
          <table:table-cell office:value-type="float" office:value="0.092563695" table:style-name="c1">
            <text:p>0.092564</text:p>
          </table:table-cell>
          <table:table-cell office:value-type="float" office:value="-0.7390948970849021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0.093436695" table:style-name="c1">
            <text:p>0.093437</text:p>
          </table:table-cell>
          <table:table-cell office:value-type="string" table:style-name="c1">
            <text:p>2026-04-08 01:30</text:p>
          </table:table-cell>
          <table:table-cell office:value-type="float" office:value="0.09415290000000001" table:style-name="c1">
            <text:p>0.094153</text:p>
          </table:table-cell>
          <table:table-cell office:value-type="float" office:value="0.5650813664802801" table:style-name="c14">
            <text:p>+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09388692" table:style-name="c1">
            <text:p>0.093887</text:p>
          </table:table-cell>
          <table:table-cell office:value-type="string" table:style-name="c1">
            <text:p>2026-04-10 16:00</text:p>
          </table:table-cell>
          <table:table-cell office:value-type="float" office:value="0.09329333000000001" table:style-name="c1">
            <text:p>0.093293</text:p>
          </table:table-cell>
          <table:table-cell office:value-type="float" office:value="-0.8308754474744551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0.0952476" table:style-name="c1">
            <text:p>0.095248</text:p>
          </table:table-cell>
          <table:table-cell office:value-type="string" table:style-name="c1">
            <text:p>2026-04-10 20:45</text:p>
          </table:table-cell>
          <table:table-cell office:value-type="float" office:value="0.09425285" table:style-name="c1">
            <text:p>0.094253</text:p>
          </table:table-cell>
          <table:table-cell office:value-type="float" office:value="-1.242195548391789" table:style-name="c13">
            <text:p>-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0.09350673" table:style-name="c1">
            <text:p>0.093507</text:p>
          </table:table-cell>
          <table:table-cell office:value-type="string" table:style-name="c1">
            <text:p>2026-04-11 20:45</text:p>
          </table:table-cell>
          <table:table-cell office:value-type="float" office:value="0.09372311500000001" table:style-name="c1">
            <text:p>0.093723</text:p>
          </table:table-cell>
          <table:table-cell office:value-type="float" office:value="0.03104855994324751" table:style-name="c14">
            <text:p>+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094016985" table:style-name="c1">
            <text:p>0.094017</text:p>
          </table:table-cell>
          <table:table-cell office:value-type="string" table:style-name="c1">
            <text:p>2026-04-14 00:30</text:p>
          </table:table-cell>
          <table:table-cell office:value-type="float" office:value="0.09349323" table:style-name="c1">
            <text:p>0.093493</text:p>
          </table:table-cell>
          <table:table-cell office:value-type="float" office:value="-0.7558718956686472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9:00</text:p>
          </table:table-cell>
          <table:table-cell office:value-type="float" office:value="0.09441718499999999" table:style-name="c1">
            <text:p>0.094417</text:p>
          </table:table-cell>
          <table:table-cell office:value-type="string" table:style-name="c1">
            <text:p>2026-04-14 11:30</text:p>
          </table:table-cell>
          <table:table-cell office:value-type="float" office:value="0.09407294" table:style-name="c1">
            <text:p>0.094073</text:p>
          </table:table-cell>
          <table:table-cell office:value-type="float" office:value="-0.5637711048682492" table:style-name="c13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0.09549772499999999" table:style-name="c1">
            <text:p>0.095498</text:p>
          </table:table-cell>
          <table:table-cell office:value-type="string" table:style-name="c1">
            <text:p>2026-04-14 15:15</text:p>
          </table:table-cell>
          <table:table-cell office:value-type="float" office:value="0.095562195" table:style-name="c1">
            <text:p>0.095562</text:p>
          </table:table-cell>
          <table:table-cell office:value-type="float" office:value="-0.1325254898009276" table:style-name="c13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0.09409702499999999" table:style-name="c1">
            <text:p>0.094097</text:p>
          </table:table-cell>
          <table:table-cell office:value-type="string" table:style-name="c1">
            <text:p>2026-04-15 15:45</text:p>
          </table:table-cell>
          <table:table-cell office:value-type="float" office:value="0.093283335" table:style-name="c1">
            <text:p>0.093283</text:p>
          </table:table-cell>
          <table:table-cell office:value-type="float" office:value="-1.0629064911085062" table:style-name="c13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15</text:p>
          </table:table-cell>
          <table:table-cell office:value-type="float" office:value="0.094317135" table:style-name="c1">
            <text:p>0.094317</text:p>
          </table:table-cell>
          <table:table-cell office:value-type="string" table:style-name="c1">
            <text:p>2026-04-15 20:45</text:p>
          </table:table-cell>
          <table:table-cell office:value-type="float" office:value="0.09519238000000001" table:style-name="c1">
            <text:p>0.095192</text:p>
          </table:table-cell>
          <table:table-cell office:value-type="float" office:value="0.7262258680567735" table:style-name="c14">
            <text:p>+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09646821" table:style-name="c1">
            <text:p>0.096468</text:p>
          </table:table-cell>
          <table:table-cell office:value-type="string" table:style-name="c1">
            <text:p>2026-04-16 05:15</text:p>
          </table:table-cell>
          <table:table-cell office:value-type="float" office:value="0.09629183" table:style-name="c1">
            <text:p>0.096292</text:p>
          </table:table-cell>
          <table:table-cell office:value-type="float" office:value="-0.38237194218697645" table:style-name="c13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9735865499999999" table:style-name="c1">
            <text:p>0.097359</text:p>
          </table:table-cell>
          <table:table-cell office:value-type="string" table:style-name="c1">
            <text:p>2026-04-16 20:45</text:p>
          </table:table-cell>
          <table:table-cell office:value-type="float" office:value="0.09818088500000001" table:style-name="c1">
            <text:p>0.098181</text:p>
          </table:table-cell>
          <table:table-cell office:value-type="float" office:value="0.6429489097656838" table:style-name="c14">
            <text:p>+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098179065" table:style-name="c1">
            <text:p>0.098179</text:p>
          </table:table-cell>
          <table:table-cell office:value-type="string" table:style-name="c1">
            <text:p>2026-04-17 10:30</text:p>
          </table:table-cell>
          <table:table-cell office:value-type="float" office:value="0.098000975" table:style-name="c1">
            <text:p>0.098001</text:p>
          </table:table-cell>
          <table:table-cell office:value-type="float" office:value="-0.3809304448203821" table:style-name="c13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0.10017005999999999" table:style-name="c1">
            <text:p>0.10017</text:p>
          </table:table-cell>
          <table:table-cell office:value-type="string" table:style-name="c1">
            <text:p>2026-04-17 15:45</text:p>
          </table:table-cell>
          <table:table-cell office:value-type="float" office:value="0.09991002" table:style-name="c1">
            <text:p>0.09991</text:p>
          </table:table-cell>
          <table:table-cell office:value-type="float" office:value="-0.45897958929044247" table:style-name="c13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0.102020985" table:style-name="c1">
            <text:p>0.10202</text:p>
          </table:table-cell>
          <table:table-cell office:value-type="string" table:style-name="c1">
            <text:p>2026-04-17 17:30</text:p>
          </table:table-cell>
          <table:table-cell office:value-type="float" office:value="0.100459745" table:style-name="c1">
            <text:p>0.10046</text:p>
          </table:table-cell>
          <table:table-cell office:value-type="float" office:value="-1.7271535167543983" table:style-name="c13">
            <text:p>-1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1:15</text:p>
          </table:table-cell>
          <table:table-cell office:value-type="float" office:value="0.09584789999999999" table:style-name="c1">
            <text:p>0.095848</text:p>
          </table:table-cell>
          <table:table-cell office:value-type="string" table:style-name="c1">
            <text:p>2026-04-21 02:00</text:p>
          </table:table-cell>
          <table:table-cell office:value-type="float" office:value="0.09537229000000001" table:style-name="c1">
            <text:p>0.095372</text:p>
          </table:table-cell>
          <table:table-cell office:value-type="float" office:value="-0.6951213409057244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0.096598275" table:style-name="c1">
            <text:p>0.096598</text:p>
          </table:table-cell>
          <table:table-cell office:value-type="string" table:style-name="c1">
            <text:p>2026-04-22 12:30</text:p>
          </table:table-cell>
          <table:table-cell office:value-type="float" office:value="0.097401275" table:style-name="c1">
            <text:p>0.097401</text:p>
          </table:table-cell>
          <table:table-cell office:value-type="float" office:value="0.6297160599141094" table:style-name="c14">
            <text:p>+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4:45</text:p>
          </table:table-cell>
          <table:table-cell office:value-type="float" office:value="0.09592794" table:style-name="c1">
            <text:p>0.095928</text:p>
          </table:table-cell>
          <table:table-cell office:value-type="string" table:style-name="c1">
            <text:p>2026-04-23 05:00</text:p>
          </table:table-cell>
          <table:table-cell office:value-type="float" office:value="0.095882035" table:style-name="c1">
            <text:p>0.095882</text:p>
          </table:table-cell>
          <table:table-cell office:value-type="float" office:value="-0.24765796905990012" table:style-name="c13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45</text:p>
          </table:table-cell>
          <table:table-cell office:value-type="float" office:value="0.09760877999999999" table:style-name="c1">
            <text:p>0.097609</text:p>
          </table:table-cell>
          <table:table-cell office:value-type="string" table:style-name="c1">
            <text:p>2026-04-23 16:30</text:p>
          </table:table-cell>
          <table:table-cell office:value-type="float" office:value="0.09693151" table:style-name="c1">
            <text:p>0.096932</text:p>
          </table:table-cell>
          <table:table-cell office:value-type="float" office:value="-0.8923747315456643" table:style-name="c13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2:00</text:p>
          </table:table-cell>
          <table:table-cell office:value-type="float" office:value="0.097978965" table:style-name="c1">
            <text:p>0.097979</text:p>
          </table:table-cell>
          <table:table-cell office:value-type="string" table:style-name="c1">
            <text:p>2026-04-24 03:30</text:p>
          </table:table-cell>
          <table:table-cell office:value-type="float" office:value="0.0971514" table:style-name="c1">
            <text:p>0.097151</text:p>
          </table:table-cell>
          <table:table-cell office:value-type="float" office:value="-1.042846950465337" table:style-name="c13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00</text:p>
          </table:table-cell>
          <table:table-cell office:value-type="float" office:value="0.097898925" table:style-name="c1">
            <text:p>0.097899</text:p>
          </table:table-cell>
          <table:table-cell office:value-type="string" table:style-name="c1">
            <text:p>2026-04-24 13:45</text:p>
          </table:table-cell>
          <table:table-cell office:value-type="float" office:value="0.097821065" table:style-name="c1">
            <text:p>0.097821</text:p>
          </table:table-cell>
          <table:table-cell office:value-type="float" office:value="-0.2792720236049595" table:style-name="c13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9999997499999999" table:style-name="c1">
            <text:p>0.1</text:p>
          </table:table-cell>
          <table:table-cell office:value-type="string" table:style-name="c1">
            <text:p>2026-04-27 04:45</text:p>
          </table:table-cell>
          <table:table-cell office:value-type="float" office:value="0.09996999000000001" table:style-name="c1">
            <text:p>0.09997</text:p>
          </table:table-cell>
          <table:table-cell office:value-type="float" office:value="-0.22982506746623832" table:style-name="c13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4:45</text:p>
          </table:table-cell>
          <table:table-cell office:value-type="float" office:value="0.099139545" table:style-name="c1">
            <text:p>0.09914</text:p>
          </table:table-cell>
          <table:table-cell office:value-type="string" table:style-name="c1">
            <text:p>2026-04-27 15:15</text:p>
          </table:table-cell>
          <table:table-cell office:value-type="float" office:value="0.098100925" table:style-name="c1">
            <text:p>0.098101</text:p>
          </table:table-cell>
          <table:table-cell office:value-type="float" office:value="-1.245440201561343" table:style-name="c13">
            <text:p>-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1:15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4-28 02:45</text:p>
          </table:table-cell>
          <table:table-cell office:value-type="float" office:value="0.09883056" table:style-name="c1">
            <text:p>0.098831</text:p>
          </table:table-cell>
          <table:table-cell office:value-type="float" office:value="-0.8212214711959986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4:15</text:p>
          </table:table-cell>
          <table:table-cell office:value-type="float" office:value="0.100120035" table:style-name="c1">
            <text:p>0.10012</text:p>
          </table:table-cell>
          <table:table-cell office:value-type="string" table:style-name="c1">
            <text:p>2026-04-28 04:45</text:p>
          </table:table-cell>
          <table:table-cell office:value-type="float" office:value="0.09945025" table:style-name="c1">
            <text:p>0.09945</text:p>
          </table:table-cell>
          <table:table-cell office:value-type="float" office:value="-0.8675446924783725" table:style-name="c13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0.10143068999999999" table:style-name="c1">
            <text:p>0.10143</text:p>
          </table:table-cell>
          <table:table-cell office:value-type="string" table:style-name="c1">
            <text:p>2026-04-29 12:15</text:p>
          </table:table-cell>
          <table:table-cell office:value-type="float" office:value="0.107016465" table:style-name="c1">
            <text:p>0.10702</text:p>
          </table:table-cell>
          <table:table-cell office:value-type="float" office:value="5.296078619267042" table:style-name="c14">
            <text:p>+5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0:30</text:p>
          </table:table-cell>
          <table:table-cell office:value-type="float" office:value="0.10570282499999999" table:style-name="c1">
            <text:p>0.1057</text:p>
          </table:table-cell>
          <table:table-cell office:value-type="string" table:style-name="c1">
            <text:p>2026-04-30 02:45</text:p>
          </table:table-cell>
          <table:table-cell office:value-type="float" office:value="0.105257345" table:style-name="c1">
            <text:p>0.10526</text:p>
          </table:table-cell>
          <table:table-cell office:value-type="float" office:value="-0.6205032199044558" table:style-name="c13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10959477" table:style-name="c1">
            <text:p>0.10959</text:p>
          </table:table-cell>
          <table:table-cell office:value-type="string" table:style-name="c1">
            <text:p>2026-05-01 04:30</text:p>
          </table:table-cell>
          <table:table-cell office:value-type="float" office:value="0.1083458" table:style-name="c1">
            <text:p>0.10835</text:p>
          </table:table-cell>
          <table:table-cell office:value-type="float" office:value="-1.3372474381761035" table:style-name="c13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11030512499999999" table:style-name="c1">
            <text:p>0.11031</text:p>
          </table:table-cell>
          <table:table-cell office:value-type="string" table:style-name="c1">
            <text:p>2026-05-01 16:15</text:p>
          </table:table-cell>
          <table:table-cell office:value-type="float" office:value="0.109055445" table:style-name="c1">
            <text:p>0.10906</text:p>
          </table:table-cell>
          <table:table-cell office:value-type="float" office:value="-1.330565406235651" table:style-name="c13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45</text:p>
          </table:table-cell>
          <table:table-cell office:value-type="float" office:value="0.10893444" table:style-name="c1">
            <text:p>0.10893</text:p>
          </table:table-cell>
          <table:table-cell office:value-type="string" table:style-name="c1">
            <text:p>2026-05-02 18:00</text:p>
          </table:table-cell>
          <table:table-cell office:value-type="float" office:value="0.10870562" table:style-name="c1">
            <text:p>0.10871</text:p>
          </table:table-cell>
          <table:table-cell office:value-type="float" office:value="-0.40953304976827365" table:style-name="c13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12:15</text:p>
          </table:table-cell>
          <table:table-cell office:value-type="float" office:value="0.109324635" table:style-name="c1">
            <text:p>0.10932</text:p>
          </table:table-cell>
          <table:table-cell office:value-type="string" table:style-name="c1">
            <text:p>2026-05-03 16:00</text:p>
          </table:table-cell>
          <table:table-cell office:value-type="float" office:value="0.10842576" table:style-name="c1">
            <text:p>0.10843</text:p>
          </table:table-cell>
          <table:table-cell office:value-type="float" office:value="-1.0204635892358649" table:style-name="c13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30</text:p>
          </table:table-cell>
          <table:table-cell office:value-type="float" office:value="0.10921457999999999" table:style-name="c1">
            <text:p>0.10921</text:p>
          </table:table-cell>
          <table:table-cell office:value-type="string" table:style-name="c1">
            <text:p>2026-05-03 23:30</text:p>
          </table:table-cell>
          <table:table-cell office:value-type="float" office:value="0.10846574" table:style-name="c1">
            <text:p>0.10847</text:p>
          </table:table-cell>
          <table:table-cell office:value-type="float" office:value="-0.8841887358445932" table:style-name="c13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1:45</text:p>
          </table:table-cell>
          <table:table-cell office:value-type="float" office:value="0.11153574" table:style-name="c1">
            <text:p>0.11154</text:p>
          </table:table-cell>
          <table:table-cell office:value-type="string" table:style-name="c1">
            <text:p>2026-05-04 06:15</text:p>
          </table:table-cell>
          <table:table-cell office:value-type="float" office:value="0.111714115" table:style-name="c1">
            <text:p>0.11171</text:p>
          </table:table-cell>
          <table:table-cell office:value-type="float" office:value="-0.040293376710442974" table:style-name="c13">
            <text:p>-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3:15</text:p>
          </table:table-cell>
          <table:table-cell office:value-type="float" office:value="0.11093544" table:style-name="c1">
            <text:p>0.11094</text:p>
          </table:table-cell>
          <table:table-cell office:value-type="string" table:style-name="c1">
            <text:p>2026-05-04 15:30</text:p>
          </table:table-cell>
          <table:table-cell office:value-type="float" office:value="0.1103448" table:style-name="c1">
            <text:p>0.11034</text:p>
          </table:table-cell>
          <table:table-cell office:value-type="float" office:value="-0.731253470667248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30</text:p>
          </table:table-cell>
          <table:table-cell office:value-type="float" office:value="0.11257625999999998" table:style-name="c1">
            <text:p>0.11258</text:p>
          </table:table-cell>
          <table:table-cell office:value-type="string" table:style-name="c1">
            <text:p>2026-05-05 16:45</text:p>
          </table:table-cell>
          <table:table-cell office:value-type="float" office:value="0.112033955" table:style-name="c1">
            <text:p>0.11203</text:p>
          </table:table-cell>
          <table:table-cell office:value-type="float" office:value="-0.6806593823999507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0.115487715" table:style-name="c1">
            <text:p>0.11549</text:p>
          </table:table-cell>
          <table:table-cell office:value-type="string" table:style-name="c1">
            <text:p>2026-05-05 23:45</text:p>
          </table:table-cell>
          <table:table-cell office:value-type="float" office:value="0.11444275000000001" table:style-name="c1">
            <text:p>0.11444</text:p>
          </table:table-cell>
          <table:table-cell office:value-type="float" office:value="-1.102919091654031" table:style-name="c13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0.11575785" table:style-name="c1">
            <text:p>0.11576</text:p>
          </table:table-cell>
          <table:table-cell office:value-type="string" table:style-name="c1">
            <text:p>2026-05-06 05:00</text:p>
          </table:table-cell>
          <table:table-cell office:value-type="float" office:value="0.114932505" table:style-name="c1">
            <text:p>0.11493</text:p>
          </table:table-cell>
          <table:table-cell office:value-type="float" office:value="-0.9114674101972309" table:style-name="c13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0.109584765" table:style-name="c1">
            <text:p>0.10958</text:p>
          </table:table-cell>
          <table:table-cell office:value-type="string" table:style-name="c1">
            <text:p>2026-05-09 21:30</text:p>
          </table:table-cell>
          <table:table-cell office:value-type="float" office:value="0.10929532500000001" table:style-name="c1">
            <text:p>0.1093</text:p>
          </table:table-cell>
          <table:table-cell office:value-type="float" office:value="-0.4634963214776966" table:style-name="c13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45</text:p>
          </table:table-cell>
          <table:table-cell office:value-type="float" office:value="0.11103548999999999" table:style-name="c1">
            <text:p>0.11104</text:p>
          </table:table-cell>
          <table:table-cell office:value-type="string" table:style-name="c1">
            <text:p>2026-05-11 01:00</text:p>
          </table:table-cell>
          <table:table-cell office:value-type="float" office:value="0.110414765" table:style-name="c1">
            <text:p>0.11041</text:p>
          </table:table-cell>
          <table:table-cell office:value-type="float" office:value="-0.757815465339029" table:style-name="c13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0.11139566999999999" table:style-name="c1">
            <text:p>0.1114</text:p>
          </table:table-cell>
          <table:table-cell office:value-type="string" table:style-name="c1">
            <text:p>2026-05-13 07:00</text:p>
          </table:table-cell>
          <table:table-cell office:value-type="float" office:value="0.11178408000000001" table:style-name="c1">
            <text:p>0.11178</text:p>
          </table:table-cell>
          <table:table-cell office:value-type="float" office:value="0.14807902684190744" table:style-name="c14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0.11429711999999999" table:style-name="c1">
            <text:p>0.1143</text:p>
          </table:table-cell>
          <table:table-cell office:value-type="string" table:style-name="c1">
            <text:p>2026-05-13 11:15</text:p>
          </table:table-cell>
          <table:table-cell office:value-type="float" office:value="0.11326334" table:style-name="c1">
            <text:p>0.11326</text:p>
          </table:table-cell>
          <table:table-cell office:value-type="float" office:value="-1.102559204168918" table:style-name="c13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7:30</text:p>
          </table:table-cell>
          <table:table-cell office:value-type="float" office:value="0.11281638" table:style-name="c1">
            <text:p>0.11282</text:p>
          </table:table-cell>
          <table:table-cell office:value-type="string" table:style-name="c1">
            <text:p>2026-05-13 21:15</text:p>
          </table:table-cell>
          <table:table-cell office:value-type="float" office:value="0.112713615" table:style-name="c1">
            <text:p>0.11271</text:p>
          </table:table-cell>
          <table:table-cell office:value-type="float" office:value="-0.29080840600007596" table:style-name="c13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06283115" table:style-name="c1">
            <text:p>0.10628</text:p>
          </table:table-cell>
          <table:table-cell office:value-type="string" table:style-name="c1">
            <text:p>2026-05-21 09:30</text:p>
          </table:table-cell>
          <table:table-cell office:value-type="float" office:value="0.105577185" table:style-name="c1">
            <text:p>0.10558</text:p>
          </table:table-cell>
          <table:table-cell office:value-type="float" office:value="-0.8627699638037556" table:style-name="c13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15</text:p>
          </table:table-cell>
          <table:table-cell office:value-type="float" office:value="0.10518256499999999" table:style-name="c1">
            <text:p>0.10518</text:p>
          </table:table-cell>
          <table:table-cell office:value-type="string" table:style-name="c1">
            <text:p>2026-05-21 21:15</text:p>
          </table:table-cell>
          <table:table-cell office:value-type="float" office:value="0.105597175" table:style-name="c1">
            <text:p>0.1056</text:p>
          </table:table-cell>
          <table:table-cell office:value-type="float" office:value="0.19349332959792687" table:style-name="c14">
            <text:p>+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30</text:p>
          </table:table-cell>
          <table:table-cell office:value-type="float" office:value="0.10129062" table:style-name="c1">
            <text:p>0.10129</text:p>
          </table:table-cell>
          <table:table-cell office:value-type="string" table:style-name="c1">
            <text:p>2026-05-30 04:30</text:p>
          </table:table-cell>
          <table:table-cell office:value-type="float" office:value="0.10041976500000001" table:style-name="c1">
            <text:p>0.10042</text:p>
          </table:table-cell>
          <table:table-cell office:value-type="float" office:value="-1.0579401234141694" table:style-name="c13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15</text:p>
          </table:table-cell>
          <table:table-cell office:value-type="float" office:value="0.101380665" table:style-name="c1">
            <text:p>0.10138</text:p>
          </table:table-cell>
          <table:table-cell office:value-type="string" table:style-name="c1">
            <text:p>2026-05-31 05:45</text:p>
          </table:table-cell>
          <table:table-cell office:value-type="float" office:value="0.100899525" table:style-name="c1">
            <text:p>0.1009</text:p>
          </table:table-cell>
          <table:table-cell office:value-type="float" office:value="-0.6735388355116667" table:style-name="c13">
            <text:p>-0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5397694999999998" table:style-name="c10">
            <text:p>1.5398</text:p>
          </table:table-cell>
          <table:table-cell office:value-type="string" table:style-name="c10">
            <text:p>2026-03-10 10:15</text:p>
          </table:table-cell>
          <table:table-cell office:value-type="float" office:value="1.523238" table:style-name="c10">
            <text:p>1.5232</text:p>
          </table:table-cell>
          <table:table-cell office:value-type="float" office:value="-1.2713885267892078" table:style-name="c11">
            <text:p>-1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5:00</text:p>
          </table:table-cell>
          <table:table-cell office:value-type="float" office:value="1.4957475" table:style-name="c10">
            <text:p>1.4957</text:p>
          </table:table-cell>
          <table:table-cell office:value-type="string" table:style-name="c10">
            <text:p>2026-03-11 05:45</text:p>
          </table:table-cell>
          <table:table-cell office:value-type="float" office:value="1.4772610000000002" table:style-name="c10">
            <text:p>1.4773</text:p>
          </table:table-cell>
          <table:table-cell office:value-type="float" office:value="-1.4333665768453518" table:style-name="c11">
            <text:p>-1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2:45</text:p>
          </table:table-cell>
          <table:table-cell office:value-type="float" office:value="1.534767" table:style-name="c10">
            <text:p>1.5348</text:p>
          </table:table-cell>
          <table:table-cell office:value-type="string" table:style-name="c10">
            <text:p>2026-03-11 15:15</text:p>
          </table:table-cell>
          <table:table-cell office:value-type="float" office:value="1.5192400000000001" table:style-name="c10">
            <text:p>1.5192</text:p>
          </table:table-cell>
          <table:table-cell office:value-type="float" office:value="-1.209562152430943" table:style-name="c11">
            <text:p>-1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15</text:p>
          </table:table-cell>
          <table:table-cell office:value-type="float" office:value="1.5107549999999998" table:style-name="c10">
            <text:p>1.5108</text:p>
          </table:table-cell>
          <table:table-cell office:value-type="string" table:style-name="c10">
            <text:p>2026-03-12 11:30</text:p>
          </table:table-cell>
          <table:table-cell office:value-type="float" office:value="1.5102445" table:style-name="c10">
            <text:p>1.5102</text:p>
          </table:table-cell>
          <table:table-cell office:value-type="float" office:value="-0.23362350318216762" table:style-name="c11">
            <text:p>-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1.5377684999999999" table:style-name="c10">
            <text:p>1.5378</text:p>
          </table:table-cell>
          <table:table-cell office:value-type="string" table:style-name="c10">
            <text:p>2026-03-13 03:45</text:p>
          </table:table-cell>
          <table:table-cell office:value-type="float" office:value="1.5252370000000002" table:style-name="c10">
            <text:p>1.5252</text:p>
          </table:table-cell>
          <table:table-cell office:value-type="float" office:value="-1.0131855843710902" table:style-name="c11">
            <text:p>-1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30</text:p>
          </table:table-cell>
          <table:table-cell office:value-type="float" office:value="1.522761" table:style-name="c10">
            <text:p>1.5228</text:p>
          </table:table-cell>
          <table:table-cell office:value-type="string" table:style-name="c10">
            <text:p>2026-03-13 14:45</text:p>
          </table:table-cell>
          <table:table-cell office:value-type="float" office:value="1.5262365" table:style-name="c10">
            <text:p>1.5262</text:p>
          </table:table-cell>
          <table:table-cell office:value-type="float" office:value="0.027880490536613678" table:style-name="c12">
            <text:p>+0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5:00</text:p>
          </table:table-cell>
          <table:table-cell office:value-type="float" office:value="1.5257625" table:style-name="c10">
            <text:p>1.5258</text:p>
          </table:table-cell>
          <table:table-cell office:value-type="string" table:style-name="c10">
            <text:p>2026-03-16 10:45</text:p>
          </table:table-cell>
          <table:table-cell office:value-type="float" office:value="1.575212" table:style-name="c10">
            <text:p>1.5752</text:p>
          </table:table-cell>
          <table:table-cell office:value-type="float" office:value="3.0345909807063753" table:style-name="c12">
            <text:p>+3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1:15</text:p>
          </table:table-cell>
          <table:table-cell office:value-type="float" office:value="1.6058024999999998" table:style-name="c10">
            <text:p>1.6058</text:p>
          </table:table-cell>
          <table:table-cell office:value-type="string" table:style-name="c10">
            <text:p>2026-03-16 11:30</text:p>
          </table:table-cell>
          <table:table-cell office:value-type="float" office:value="1.5862065" table:style-name="c10">
            <text:p>1.5862</text:p>
          </table:table-cell>
          <table:table-cell office:value-type="float" office:value="-1.4177849887205718" table:style-name="c11">
            <text:p>-1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7:15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3-17 00:30</text:p>
          </table:table-cell>
          <table:table-cell office:value-type="float" office:value="1.6281855" table:style-name="c10">
            <text:p>1.6282</text:p>
          </table:table-cell>
          <table:table-cell office:value-type="float" office:value="1.9534650242675422" table:style-name="c12">
            <text:p>+2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2:45</text:p>
          </table:table-cell>
          <table:table-cell office:value-type="float" office:value="1.6478234999999999" table:style-name="c10">
            <text:p>1.6478</text:p>
          </table:table-cell>
          <table:table-cell office:value-type="string" table:style-name="c10">
            <text:p>2026-03-18 05:30</text:p>
          </table:table-cell>
          <table:table-cell office:value-type="float" office:value="1.633183" table:style-name="c10">
            <text:p>1.6332</text:p>
          </table:table-cell>
          <table:table-cell office:value-type="float" office:value="-1.0865989480669414" table:style-name="c11">
            <text:p>-1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10:00</text:p>
          </table:table-cell>
          <table:table-cell office:value-type="float" office:value="1.6348169999999997" table:style-name="c10">
            <text:p>1.6348</text:p>
          </table:table-cell>
          <table:table-cell office:value-type="string" table:style-name="c10">
            <text:p>2026-03-18 11:30</text:p>
          </table:table-cell>
          <table:table-cell office:value-type="float" office:value="1.6231880000000003" table:style-name="c10">
            <text:p>1.6232</text:p>
          </table:table-cell>
          <table:table-cell office:value-type="float" office:value="-0.9098114842211458" table:style-name="c11">
            <text:p>-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1.296648" table:style-name="c10">
            <text:p>1.2966</text:p>
          </table:table-cell>
          <table:table-cell office:value-type="string" table:style-name="c10">
            <text:p>2026-04-01 08:00</text:p>
          </table:table-cell>
          <table:table-cell office:value-type="float" office:value="1.2873560000000002" table:style-name="c10">
            <text:p>1.2874</text:p>
          </table:table-cell>
          <table:table-cell office:value-type="float" office:value="-0.9150844827586213" table:style-name="c11">
            <text:p>-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0:45</text:p>
          </table:table-cell>
          <table:table-cell office:value-type="float" office:value="1.2696344999999998" table:style-name="c10">
            <text:p>1.2696</text:p>
          </table:table-cell>
          <table:table-cell office:value-type="string" table:style-name="c10">
            <text:p>2026-04-02 01:15</text:p>
          </table:table-cell>
          <table:table-cell office:value-type="float" office:value="1.2563715" table:style-name="c10">
            <text:p>1.2564</text:p>
          </table:table-cell>
          <table:table-cell office:value-type="float" office:value="-1.242443130562354" table:style-name="c11">
            <text:p>-1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1:45</text:p>
          </table:table-cell>
          <table:table-cell office:value-type="float" office:value="1.2506249999999999" table:style-name="c10">
            <text:p>1.2506</text:p>
          </table:table-cell>
          <table:table-cell office:value-type="string" table:style-name="c10">
            <text:p>2026-04-04 14:00</text:p>
          </table:table-cell>
          <table:table-cell office:value-type="float" office:value="1.2483755" table:style-name="c10">
            <text:p>1.2484</text:p>
          </table:table-cell>
          <table:table-cell office:value-type="float" office:value="-0.3794105047076335" table:style-name="c11">
            <text:p>-0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7:30</text:p>
          </table:table-cell>
          <table:table-cell office:value-type="float" office:value="1.264632" table:style-name="c10">
            <text:p>1.2646</text:p>
          </table:table-cell>
          <table:table-cell office:value-type="string" table:style-name="c10">
            <text:p>2026-04-04 19:30</text:p>
          </table:table-cell>
          <table:table-cell office:value-type="float" office:value="1.2563715" table:style-name="c10">
            <text:p>1.2564</text:p>
          </table:table-cell>
          <table:table-cell office:value-type="float" office:value="-0.8517882378826336" table:style-name="c11">
            <text:p>-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6:15</text:p>
          </table:table-cell>
          <table:table-cell office:value-type="float" office:value="1.270635" table:style-name="c10">
            <text:p>1.2706</text:p>
          </table:table-cell>
          <table:table-cell office:value-type="string" table:style-name="c10">
            <text:p>2026-04-06 13:15</text:p>
          </table:table-cell>
          <table:table-cell office:value-type="float" office:value="1.2903545" table:style-name="c10">
            <text:p>1.2904</text:p>
          </table:table-cell>
          <table:table-cell office:value-type="float" office:value="1.3489382359607838" table:style-name="c12">
            <text:p>+1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1.336668" table:style-name="c10">
            <text:p>1.3367</text:p>
          </table:table-cell>
          <table:table-cell office:value-type="string" table:style-name="c10">
            <text:p>2026-04-09 23:15</text:p>
          </table:table-cell>
          <table:table-cell office:value-type="float" office:value="1.3153420000000002" table:style-name="c10">
            <text:p>1.3153</text:p>
          </table:table-cell>
          <table:table-cell office:value-type="float" office:value="-1.7921704311017916" table:style-name="c11">
            <text:p>-1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5:00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4-10 17:15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-0.9809737996605117" table:style-name="c11">
            <text:p>-1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1.32066" table:style-name="c10">
            <text:p>1.3207</text:p>
          </table:table-cell>
          <table:table-cell office:value-type="string" table:style-name="c10">
            <text:p>2026-04-10 20:45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-1.2060170410249316" table:style-name="c11">
            <text:p>-1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9:0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1 20:45</text:p>
          </table:table-cell>
          <table:table-cell office:value-type="float" office:value="1.2923535" table:style-name="c10">
            <text:p>1.2924</text:p>
          </table:table-cell>
          <table:table-cell office:value-type="float" office:value="-0.9888231496003264" table:style-name="c11">
            <text:p>-1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45</text:p>
          </table:table-cell>
          <table:table-cell office:value-type="float" office:value="1.216608" table:style-name="c10">
            <text:p>1.2166</text:p>
          </table:table-cell>
          <table:table-cell office:value-type="string" table:style-name="c10">
            <text:p>2026-04-16 10:15</text:p>
          </table:table-cell>
          <table:table-cell office:value-type="float" office:value="1.2543725" table:style-name="c10">
            <text:p>1.2544</text:p>
          </table:table-cell>
          <table:table-cell office:value-type="float" office:value="2.8979761248076663" table:style-name="c12">
            <text:p>+2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1.2976484999999998" table:style-name="c10">
            <text:p>1.2976</text:p>
          </table:table-cell>
          <table:table-cell office:value-type="string" table:style-name="c10">
            <text:p>2026-04-16 14:15</text:p>
          </table:table-cell>
          <table:table-cell office:value-type="float" office:value="1.273363" table:style-name="c10">
            <text:p>1.2734</text:p>
          </table:table-cell>
          <table:table-cell office:value-type="float" office:value="-2.06765951157033" table:style-name="c11">
            <text:p>-2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1.3166579999999999" table:style-name="c10">
            <text:p>1.3167</text:p>
          </table:table-cell>
          <table:table-cell office:value-type="string" table:style-name="c10">
            <text:p>2026-04-16 17:00</text:p>
          </table:table-cell>
          <table:table-cell office:value-type="float" office:value="1.2913540000000001" table:style-name="c10">
            <text:p>1.2914</text:p>
          </table:table-cell>
          <table:table-cell office:value-type="float" office:value="-2.117893685831851" table:style-name="c11">
            <text:p>-2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8:30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6 22:15</text:p>
          </table:table-cell>
          <table:table-cell office:value-type="float" office:value="1.3253370000000002" table:style-name="c10">
            <text:p>1.3253</text:p>
          </table:table-cell>
          <table:table-cell office:value-type="float" office:value="0.22946459575370337" table:style-name="c12">
            <text:p>+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7 10:15</text:p>
          </table:table-cell>
          <table:table-cell office:value-type="float" office:value="1.3123435" table:style-name="c10">
            <text:p>1.3123</text:p>
          </table:table-cell>
          <table:table-cell office:value-type="float" office:value="-0.7531772140086046" table:style-name="c11">
            <text:p>-0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6:3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8 17:00</text:p>
          </table:table-cell>
          <table:table-cell office:value-type="float" office:value="1.289355" table:style-name="c10">
            <text:p>1.2894</text:p>
          </table:table-cell>
          <table:table-cell office:value-type="float" office:value="-1.218547457837893" table:style-name="c11">
            <text:p>-1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30</text:p>
          </table:table-cell>
          <table:table-cell office:value-type="float" office:value="1.2916454999999998" table:style-name="c10">
            <text:p>1.2916</text:p>
          </table:table-cell>
          <table:table-cell office:value-type="string" table:style-name="c10">
            <text:p>2026-04-22 07:30</text:p>
          </table:table-cell>
          <table:table-cell office:value-type="float" office:value="1.305347" table:style-name="c10">
            <text:p>1.3053</text:p>
          </table:table-cell>
          <table:table-cell office:value-type="float" office:value="0.8587581768372266" table:style-name="c12">
            <text:p>+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15</text:p>
          </table:table-cell>
          <table:table-cell office:value-type="float" office:value="1.266633" table:style-name="c10">
            <text:p>1.2666</text:p>
          </table:table-cell>
          <table:table-cell office:value-type="string" table:style-name="c10">
            <text:p>2026-04-27 01:30</text:p>
          </table:table-cell>
          <table:table-cell office:value-type="float" office:value="1.263368" table:style-name="c10">
            <text:p>1.2634</text:p>
          </table:table-cell>
          <table:table-cell office:value-type="float" office:value="-0.4571547269019316" table:style-name="c11">
            <text:p>-0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1.2536264999999998" table:style-name="c10">
            <text:p>1.2536</text:p>
          </table:table-cell>
          <table:table-cell office:value-type="string" table:style-name="c10">
            <text:p>2026-04-29 11:45</text:p>
          </table:table-cell>
          <table:table-cell office:value-type="float" office:value="1.2443775000000001" table:style-name="c10">
            <text:p>1.2444</text:p>
          </table:table-cell>
          <table:table-cell office:value-type="float" office:value="-0.936204732629653" table:style-name="c11">
            <text:p>-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19:15</text:p>
          </table:table-cell>
          <table:table-cell office:value-type="float" office:value="1.22061" table:style-name="c10">
            <text:p>1.2206</text:p>
          </table:table-cell>
          <table:table-cell office:value-type="string" table:style-name="c10">
            <text:p>2026-05-02 23:15</text:p>
          </table:table-cell>
          <table:table-cell office:value-type="float" office:value="1.225387" table:style-name="c10">
            <text:p>1.2254</text:p>
          </table:table-cell>
          <table:table-cell office:value-type="float" office:value="0.19067936417038744" table:style-name="c12">
            <text:p>+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1.2156075" table:style-name="c10">
            <text:p>1.2156</text:p>
          </table:table-cell>
          <table:table-cell office:value-type="string" table:style-name="c10">
            <text:p>2026-05-03 09:15</text:p>
          </table:table-cell>
          <table:table-cell office:value-type="float" office:value="1.2073960000000001" table:style-name="c10">
            <text:p>1.2074</text:p>
          </table:table-cell>
          <table:table-cell office:value-type="float" office:value="-0.874055532233875" table:style-name="c11">
            <text:p>-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1.2576284999999998" table:style-name="c10">
            <text:p>1.2576</text:p>
          </table:table-cell>
          <table:table-cell office:value-type="string" table:style-name="c10">
            <text:p>2026-05-05 14:45</text:p>
          </table:table-cell>
          <table:table-cell office:value-type="float" office:value="1.2713640000000002" table:style-name="c10">
            <text:p>1.2714</text:p>
          </table:table-cell>
          <table:table-cell office:value-type="float" office:value="0.8900914192068843" table:style-name="c12">
            <text:p>+0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1:15</text:p>
          </table:table-cell>
          <table:table-cell office:value-type="float" office:value="1.2896444999999999" table:style-name="c10">
            <text:p>1.2896</text:p>
          </table:table-cell>
          <table:table-cell office:value-type="string" table:style-name="c10">
            <text:p>2026-05-05 22:45</text:p>
          </table:table-cell>
          <table:table-cell office:value-type="float" office:value="1.2763615" table:style-name="c10">
            <text:p>1.2764</text:p>
          </table:table-cell>
          <table:table-cell office:value-type="float" office:value="-1.2278148465332817" table:style-name="c11">
            <text:p>-1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2:00</text:p>
          </table:table-cell>
          <table:table-cell office:value-type="float" office:value="1.296648" table:style-name="c10">
            <text:p>1.2966</text:p>
          </table:table-cell>
          <table:table-cell office:value-type="string" table:style-name="c10">
            <text:p>2026-05-06 12:15</text:p>
          </table:table-cell>
          <table:table-cell office:value-type="float" office:value="1.3183405" table:style-name="c10">
            <text:p>1.3183</text:p>
          </table:table-cell>
          <table:table-cell office:value-type="float" office:value="1.4697232664917514" table:style-name="c12">
            <text:p>+1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0:15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5-06 20:45</text:p>
          </table:table-cell>
          <table:table-cell office:value-type="float" office:value="1.3033480000000002" table:style-name="c10">
            <text:p>1.3033</text:p>
          </table:table-cell>
          <table:table-cell office:value-type="float" office:value="-1.2837842773373964" table:style-name="c11">
            <text:p>-1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5-07 09:30</text:p>
          </table:table-cell>
          <table:table-cell office:value-type="float" office:value="1.317341" table:style-name="c10">
            <text:p>1.3173</text:p>
          </table:table-cell>
          <table:table-cell office:value-type="float" office:value="-0.2996502248875377" table:style-name="c11">
            <text:p>-0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6:00</text:p>
          </table:table-cell>
          <table:table-cell office:value-type="float" office:value="1.3596795" table:style-name="c10">
            <text:p>1.3597</text:p>
          </table:table-cell>
          <table:table-cell office:value-type="string" table:style-name="c10">
            <text:p>2026-05-08 23:15</text:p>
          </table:table-cell>
          <table:table-cell office:value-type="float" office:value="1.3733130000000002" table:style-name="c10">
            <text:p>1.3733</text:p>
          </table:table-cell>
          <table:table-cell office:value-type="float" office:value="0.8007951368686594" table:style-name="c12">
            <text:p>+0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45</text:p>
          </table:table-cell>
          <table:table-cell office:value-type="float" office:value="1.348674" table:style-name="c10">
            <text:p>1.3487</text:p>
          </table:table-cell>
          <table:table-cell office:value-type="string" table:style-name="c10">
            <text:p>2026-05-10 14:30</text:p>
          </table:table-cell>
          <table:table-cell office:value-type="float" office:value="1.3573210000000002" table:style-name="c10">
            <text:p>1.3573</text:p>
          </table:table-cell>
          <table:table-cell office:value-type="float" office:value="0.439966613206777" table:style-name="c12">
            <text:p>+0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1.3736865" table:style-name="c10">
            <text:p>1.3737</text:p>
          </table:table-cell>
          <table:table-cell office:value-type="string" table:style-name="c10">
            <text:p>2026-05-10 20:45</text:p>
          </table:table-cell>
          <table:table-cell office:value-type="float" office:value="1.3753119999999999" table:style-name="c10">
            <text:p>1.3753</text:p>
          </table:table-cell>
          <table:table-cell office:value-type="float" office:value="-0.08180532370378746" table:style-name="c11">
            <text:p>-0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1.3716855" table:style-name="c10">
            <text:p>1.3717</text:p>
          </table:table-cell>
          <table:table-cell office:value-type="string" table:style-name="c10">
            <text:p>2026-05-11 20:15</text:p>
          </table:table-cell>
          <table:table-cell office:value-type="float" office:value="1.3693150000000003" table:style-name="c10">
            <text:p>1.3693</text:p>
          </table:table-cell>
          <table:table-cell office:value-type="float" office:value="-0.372371121878845" table:style-name="c11">
            <text:p>-0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9:45</text:p>
          </table:table-cell>
          <table:table-cell office:value-type="float" office:value="1.4217104999999999" table:style-name="c10">
            <text:p>1.4217</text:p>
          </table:table-cell>
          <table:table-cell office:value-type="string" table:style-name="c10">
            <text:p>2026-05-13 10:45</text:p>
          </table:table-cell>
          <table:table-cell office:value-type="float" office:value="1.405297" table:style-name="c10">
            <text:p>1.4053</text:p>
          </table:table-cell>
          <table:table-cell office:value-type="float" office:value="-1.352081784793735" table:style-name="c11">
            <text:p>-1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7:00</text:p>
          </table:table-cell>
          <table:table-cell office:value-type="float" office:value="1.3906949999999998" table:style-name="c10">
            <text:p>1.3907</text:p>
          </table:table-cell>
          <table:table-cell office:value-type="string" table:style-name="c10">
            <text:p>2026-05-14 20:15</text:p>
          </table:table-cell>
          <table:table-cell office:value-type="float" office:value="1.393303" table:style-name="c10">
            <text:p>1.3933</text:p>
          </table:table-cell>
          <table:table-cell office:value-type="float" office:value="-0.012742743520322009" table:style-name="c11">
            <text:p>-0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30</text:p>
          </table:table-cell>
          <table:table-cell office:value-type="float" office:value="1.2656325" table:style-name="c10">
            <text:p>1.2656</text:p>
          </table:table-cell>
          <table:table-cell office:value-type="string" table:style-name="c10">
            <text:p>2026-05-21 05:30</text:p>
          </table:table-cell>
          <table:table-cell office:value-type="float" office:value="1.2743625" table:style-name="c10">
            <text:p>1.2744</text:p>
          </table:table-cell>
          <table:table-cell office:value-type="float" office:value="0.4884948326232319" table:style-name="c12">
            <text:p>+0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45</text:p>
          </table:table-cell>
          <table:table-cell office:value-type="float" office:value="1.2786389999999999" table:style-name="c10">
            <text:p>1.2786</text:p>
          </table:table-cell>
          <table:table-cell office:value-type="string" table:style-name="c10">
            <text:p>2026-05-21 23:15</text:p>
          </table:table-cell>
          <table:table-cell office:value-type="float" office:value="1.2883555" table:style-name="c10">
            <text:p>1.2884</text:p>
          </table:table-cell>
          <table:table-cell office:value-type="float" office:value="0.5584905008763297" table:style-name="c12">
            <text:p>+0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3:15</text:p>
          </table:table-cell>
          <table:table-cell office:value-type="float" office:value="1.3076534999999998" table:style-name="c10">
            <text:p>1.3077</text:p>
          </table:table-cell>
          <table:table-cell office:value-type="string" table:style-name="c10">
            <text:p>2026-05-22 06:45</text:p>
          </table:table-cell>
          <table:table-cell office:value-type="float" office:value="1.3123435" table:style-name="c10">
            <text:p>1.3123</text:p>
          </table:table-cell>
          <table:table-cell office:value-type="float" office:value="0.15804074577097094" table:style-name="c12">
            <text:p>+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00</text:p>
          </table:table-cell>
          <table:table-cell office:value-type="float" office:value="1.3476735" table:style-name="c10">
            <text:p>1.3477</text:p>
          </table:table-cell>
          <table:table-cell office:value-type="string" table:style-name="c10">
            <text:p>2026-05-22 14:15</text:p>
          </table:table-cell>
          <table:table-cell office:value-type="float" office:value="1.3253370000000002" table:style-name="c10">
            <text:p>1.3253</text:p>
          </table:table-cell>
          <table:table-cell office:value-type="float" office:value="-1.8539986623614446" table:style-name="c11">
            <text:p>-1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8:15</text:p>
          </table:table-cell>
          <table:table-cell office:value-type="float" office:value="1.2916454999999998" table:style-name="c10">
            <text:p>1.2916</text:p>
          </table:table-cell>
          <table:table-cell office:value-type="string" table:style-name="c10">
            <text:p>2026-05-25 18:45</text:p>
          </table:table-cell>
          <table:table-cell office:value-type="float" office:value="1.2813590000000001" table:style-name="c10">
            <text:p>1.2814</text:p>
          </table:table-cell>
          <table:table-cell office:value-type="float" office:value="-0.9946952659223851" table:style-name="c11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3-09 20:15</text:p>
          </table:table-cell>
          <table:table-cell office:value-type="float" office:value="8.225885000000002" table:style-name="c1">
            <text:p>8.2259</text:p>
          </table:table-cell>
          <table:table-cell office:value-type="float" office:value="-0.5413480425241701" table:style-name="c13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15</text:p>
          </table:table-cell>
          <table:table-cell office:value-type="float" office:value="8.334165" table:style-name="c1">
            <text:p>8.3342</text:p>
          </table:table-cell>
          <table:table-cell office:value-type="string" table:style-name="c1">
            <text:p>2026-03-10 12:15</text:p>
          </table:table-cell>
          <table:table-cell office:value-type="float" office:value="8.325835" table:style-name="c1">
            <text:p>8.3258</text:p>
          </table:table-cell>
          <table:table-cell office:value-type="float" office:value="-0.2996502248875599" table:style-name="c13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3-10 18:15</text:p>
          </table:table-cell>
          <table:table-cell office:value-type="float" office:value="8.35582" table:style-name="c1">
            <text:p>8.3558</text:p>
          </table:table-cell>
          <table:table-cell office:value-type="float" office:value="-2.171957262917834" table:style-name="c13">
            <text:p>-2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00</text:p>
          </table:table-cell>
          <table:table-cell office:value-type="float" office:value="8.234115" table:style-name="c1">
            <text:p>8.2341</text:p>
          </table:table-cell>
          <table:table-cell office:value-type="string" table:style-name="c1">
            <text:p>2026-03-11 07:30</text:p>
          </table:table-cell>
          <table:table-cell office:value-type="float" office:value="8.17591" table:style-name="c1">
            <text:p>8.1759</text:p>
          </table:table-cell>
          <table:table-cell office:value-type="float" office:value="-0.9053631639830084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3-12 10:15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0.9031632380540722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30</text:p>
          </table:table-cell>
          <table:table-cell office:value-type="float" office:value="8.434215" table:style-name="c1">
            <text:p>8.4342</text:p>
          </table:table-cell>
          <table:table-cell office:value-type="string" table:style-name="c1">
            <text:p>2026-03-13 15:00</text:p>
          </table:table-cell>
          <table:table-cell office:value-type="float" office:value="8.615689999999999" table:style-name="c1">
            <text:p>8.6157</text:p>
          </table:table-cell>
          <table:table-cell office:value-type="float" office:value="1.9474513714673014" table:style-name="c14">
            <text:p>+1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8.394195" table:style-name="c1">
            <text:p>8.3942</text:p>
          </table:table-cell>
          <table:table-cell office:value-type="string" table:style-name="c1">
            <text:p>2026-03-16 09:00</text:p>
          </table:table-cell>
          <table:table-cell office:value-type="float" office:value="8.945525" table:style-name="c1">
            <text:p>8.9455</text:p>
          </table:table-cell>
          <table:table-cell office:value-type="float" office:value="6.354961917432234" table:style-name="c14">
            <text:p>+6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00</text:p>
          </table:table-cell>
          <table:table-cell office:value-type="float" office:value="8.944469999999999" table:style-name="c1">
            <text:p>8.9445</text:p>
          </table:table-cell>
          <table:table-cell office:value-type="string" table:style-name="c1">
            <text:p>2026-03-16 14:30</text:p>
          </table:table-cell>
          <table:table-cell office:value-type="float" office:value="8.85557" table:style-name="c1">
            <text:p>8.8556</text:p>
          </table:table-cell>
          <table:table-cell office:value-type="float" office:value="-1.1918233772375442" table:style-name="c13">
            <text:p>-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3-16 23:15</text:p>
          </table:table-cell>
          <table:table-cell office:value-type="float" office:value="9.01549" table:style-name="c1">
            <text:p>9.0155</text:p>
          </table:table-cell>
          <table:table-cell office:value-type="float" office:value="-0.41006035752887415" table:style-name="c13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15</text:p>
          </table:table-cell>
          <table:table-cell office:value-type="float" office:value="8.84442" table:style-name="c1">
            <text:p>8.8444</text:p>
          </table:table-cell>
          <table:table-cell office:value-type="string" table:style-name="c1">
            <text:p>2026-03-17 15:45</text:p>
          </table:table-cell>
          <table:table-cell office:value-type="float" office:value="8.805595" table:style-name="c1">
            <text:p>8.8056</text:p>
          </table:table-cell>
          <table:table-cell office:value-type="float" office:value="-0.6379998281967558" table:style-name="c13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3-23 22:30</text:p>
          </table:table-cell>
          <table:table-cell office:value-type="float" office:value="8.565715" table:style-name="c1">
            <text:p>8.5657</text:p>
          </table:table-cell>
          <table:table-cell office:value-type="float" office:value="-0.41585109875131865" table:style-name="c13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8.704349999999998" table:style-name="c1">
            <text:p>8.7043</text:p>
          </table:table-cell>
          <table:table-cell office:value-type="string" table:style-name="c1">
            <text:p>2026-03-24 23:00</text:p>
          </table:table-cell>
          <table:table-cell office:value-type="float" office:value="8.5957" table:style-name="c1">
            <text:p>8.5957</text:p>
          </table:table-cell>
          <table:table-cell office:value-type="float" office:value="-1.4456312567853735" table:style-name="c13">
            <text:p>-1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8.794394999999998" table:style-name="c1">
            <text:p>8.7944</text:p>
          </table:table-cell>
          <table:table-cell office:value-type="string" table:style-name="c1">
            <text:p>2026-03-25 13:45</text:p>
          </table:table-cell>
          <table:table-cell office:value-type="float" office:value="8.71564" table:style-name="c1">
            <text:p>8.7156</text:p>
          </table:table-cell>
          <table:table-cell office:value-type="float" office:value="-1.0936234312877269" table:style-name="c13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8.32416" table:style-name="c1">
            <text:p>8.3242</text:p>
          </table:table-cell>
          <table:table-cell office:value-type="string" table:style-name="c1">
            <text:p>2026-03-30 09:15</text:p>
          </table:table-cell>
          <table:table-cell office:value-type="float" office:value="8.265865" table:style-name="c1">
            <text:p>8.2659</text:p>
          </table:table-cell>
          <table:table-cell office:value-type="float" office:value="-0.8988109807475997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4-01 08:30</text:p>
          </table:table-cell>
          <table:table-cell office:value-type="float" office:value="8.285855" table:style-name="c1">
            <text:p>8.2859</text:p>
          </table:table-cell>
          <table:table-cell office:value-type="float" office:value="0.18374541038570502" table:style-name="c14">
            <text:p>+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8.174085" table:style-name="c1">
            <text:p>8.1741</text:p>
          </table:table-cell>
          <table:table-cell office:value-type="string" table:style-name="c1">
            <text:p>2026-04-03 22:00</text:p>
          </table:table-cell>
          <table:table-cell office:value-type="float" office:value="8.125935000000002" table:style-name="c1">
            <text:p>8.1259</text:p>
          </table:table-cell>
          <table:table-cell office:value-type="float" office:value="-0.7877792323544242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2:15</text:p>
          </table:table-cell>
          <table:table-cell office:value-type="float" office:value="8.14407" table:style-name="c1">
            <text:p>8.1441</text:p>
          </table:table-cell>
          <table:table-cell office:value-type="string" table:style-name="c1">
            <text:p>2026-04-04 06:15</text:p>
          </table:table-cell>
          <table:table-cell office:value-type="float" office:value="8.15592" table:style-name="c1">
            <text:p>8.1559</text:p>
          </table:table-cell>
          <table:table-cell office:value-type="float" office:value="-0.05468622052610117" table:style-name="c13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7:1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4-04 13:45</text:p>
          </table:table-cell>
          <table:table-cell office:value-type="float" office:value="8.395800000000001" table:style-name="c1">
            <text:p>8.3958</text:p>
          </table:table-cell>
          <table:table-cell office:value-type="float" office:value="1.3901862119787722" table:style-name="c14">
            <text:p>+1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6:30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4-04 21:00</text:p>
          </table:table-cell>
          <table:table-cell office:value-type="float" office:value="8.75562" table:style-name="c1">
            <text:p>8.7556</text:p>
          </table:table-cell>
          <table:table-cell office:value-type="float" office:value="2.5088103321578625" table:style-name="c14">
            <text:p>+2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9:3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06 01:00</text:p>
          </table:table-cell>
          <table:table-cell office:value-type="float" office:value="8.69565" table:style-name="c1">
            <text:p>8.6957</text:p>
          </table:table-cell>
          <table:table-cell office:value-type="float" office:value="1.0947602614776564" table:style-name="c14">
            <text:p>+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30</text:p>
          </table:table-cell>
          <table:table-cell office:value-type="float" office:value="8.784389999999998" table:style-name="c1">
            <text:p>8.7844</text:p>
          </table:table-cell>
          <table:table-cell office:value-type="string" table:style-name="c1">
            <text:p>2026-04-06 01:45</text:p>
          </table:table-cell>
          <table:table-cell office:value-type="float" office:value="8.705645" table:style-name="c1">
            <text:p>8.7056</text:p>
          </table:table-cell>
          <table:table-cell office:value-type="float" office:value="-1.0945277287893407" table:style-name="c13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8.74437" table:style-name="c1">
            <text:p>8.7444</text:p>
          </table:table-cell>
          <table:table-cell office:value-type="string" table:style-name="c1">
            <text:p>2026-04-06 10:45</text:p>
          </table:table-cell>
          <table:table-cell office:value-type="float" office:value="8.71564" table:style-name="c1">
            <text:p>8.7156</text:p>
          </table:table-cell>
          <table:table-cell office:value-type="float" office:value="-0.5277974783775119" table:style-name="c13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45</text:p>
          </table:table-cell>
          <table:table-cell office:value-type="float" office:value="8.614304999999998" table:style-name="c1">
            <text:p>8.6143</text:p>
          </table:table-cell>
          <table:table-cell office:value-type="string" table:style-name="c1">
            <text:p>2026-04-10 15:45</text:p>
          </table:table-cell>
          <table:table-cell office:value-type="float" office:value="8.495750000000001" table:style-name="c1">
            <text:p>8.4958</text:p>
          </table:table-cell>
          <table:table-cell office:value-type="float" office:value="-1.5734061453593462" table:style-name="c13">
            <text:p>-1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8.514254999999999" table:style-name="c1">
            <text:p>8.5143</text:p>
          </table:table-cell>
          <table:table-cell office:value-type="string" table:style-name="c1">
            <text:p>2026-04-14 02:45</text:p>
          </table:table-cell>
          <table:table-cell office:value-type="float" office:value="8.505745000000001" table:style-name="c1">
            <text:p>8.5057</text:p>
          </table:table-cell>
          <table:table-cell office:value-type="float" office:value="-0.29965022488751547" table:style-name="c13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9:15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4-14 09:45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-0.7677269843951229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8.454225" table:style-name="c1">
            <text:p>8.4542</text:p>
          </table:table-cell>
          <table:table-cell office:value-type="string" table:style-name="c1">
            <text:p>2026-04-15 15:45</text:p>
          </table:table-cell>
          <table:table-cell office:value-type="float" office:value="8.385805000000001" table:style-name="c1">
            <text:p>8.3858</text:p>
          </table:table-cell>
          <table:table-cell office:value-type="float" office:value="-1.00758170258064" table:style-name="c13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30</text:p>
          </table:table-cell>
          <table:table-cell office:value-type="float" office:value="8.46423" table:style-name="c1">
            <text:p>8.4642</text:p>
          </table:table-cell>
          <table:table-cell office:value-type="string" table:style-name="c1">
            <text:p>2026-04-15 21:15</text:p>
          </table:table-cell>
          <table:table-cell office:value-type="float" office:value="8.455770000000001" table:style-name="c1">
            <text:p>8.4558</text:p>
          </table:table-cell>
          <table:table-cell office:value-type="float" office:value="-0.2996502248875599" table:style-name="c13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8.494245" table:style-name="c1">
            <text:p>8.4942</text:p>
          </table:table-cell>
          <table:table-cell office:value-type="string" table:style-name="c1">
            <text:p>2026-04-16 08:15</text:p>
          </table:table-cell>
          <table:table-cell office:value-type="float" office:value="8.51574" table:style-name="c1">
            <text:p>8.5157</text:p>
          </table:table-cell>
          <table:table-cell office:value-type="float" office:value="0.052647830854901656" table:style-name="c14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8.554275" table:style-name="c1">
            <text:p>8.5543</text:p>
          </table:table-cell>
          <table:table-cell office:value-type="string" table:style-name="c1">
            <text:p>2026-04-16 14:00</text:p>
          </table:table-cell>
          <table:table-cell office:value-type="float" office:value="8.51574" table:style-name="c1">
            <text:p>8.5157</text:p>
          </table:table-cell>
          <table:table-cell office:value-type="float" office:value="-0.64947601357217" table:style-name="c13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8.62431" table:style-name="c1">
            <text:p>8.6243</text:p>
          </table:table-cell>
          <table:table-cell office:value-type="string" table:style-name="c1">
            <text:p>2026-04-16 17:00</text:p>
          </table:table-cell>
          <table:table-cell office:value-type="float" office:value="8.525735" table:style-name="c1">
            <text:p>8.5257</text:p>
          </table:table-cell>
          <table:table-cell office:value-type="float" office:value="-1.3406051529339713" table:style-name="c13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8.674335" table:style-name="c1">
            <text:p>8.6743</text:p>
          </table:table-cell>
          <table:table-cell office:value-type="string" table:style-name="c1">
            <text:p>2026-04-17 10:30</text:p>
          </table:table-cell>
          <table:table-cell office:value-type="float" office:value="8.615689999999999" table:style-name="c1">
            <text:p>8.6157</text:p>
          </table:table-cell>
          <table:table-cell office:value-type="float" office:value="-0.8746234069816228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4-17 18:00</text:p>
          </table:table-cell>
          <table:table-cell office:value-type="float" office:value="8.825585" table:style-name="c1">
            <text:p>8.8256</text:p>
          </table:table-cell>
          <table:table-cell office:value-type="float" office:value="-0.9725434742133943" table:style-name="c13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5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1 16:30</text:p>
          </table:table-cell>
          <table:table-cell office:value-type="float" office:value="8.445775" table:style-name="c1">
            <text:p>8.4458</text:p>
          </table:table-cell>
          <table:table-cell office:value-type="float" office:value="-0.5350701771310473" table:style-name="c13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4-22 12:30</text:p>
          </table:table-cell>
          <table:table-cell office:value-type="float" office:value="8.685655" table:style-name="c1">
            <text:p>8.6857</text:p>
          </table:table-cell>
          <table:table-cell office:value-type="float" office:value="1.2144906011363643" table:style-name="c14">
            <text:p>+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3 08:45</text:p>
          </table:table-cell>
          <table:table-cell office:value-type="float" office:value="8.425785" table:style-name="c1">
            <text:p>8.4258</text:p>
          </table:table-cell>
          <table:table-cell office:value-type="float" office:value="-0.7704901293745348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30</text:p>
          </table:table-cell>
          <table:table-cell office:value-type="float" office:value="8.54427" table:style-name="c1">
            <text:p>8.5443</text:p>
          </table:table-cell>
          <table:table-cell office:value-type="string" table:style-name="c1">
            <text:p>2026-04-24 01:30</text:p>
          </table:table-cell>
          <table:table-cell office:value-type="float" office:value="8.485755000000001" table:style-name="c1">
            <text:p>8.4858</text:p>
          </table:table-cell>
          <table:table-cell office:value-type="float" office:value="-0.8833759261469787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9 07:00</text:p>
          </table:table-cell>
          <table:table-cell office:value-type="float" office:value="8.455770000000001" table:style-name="c1">
            <text:p>8.4558</text:p>
          </table:table-cell>
          <table:table-cell office:value-type="float" office:value="-0.41736020100928695" table:style-name="c13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29 11:30</text:p>
          </table:table-cell>
          <table:table-cell office:value-type="float" office:value="8.53573" table:style-name="c1">
            <text:p>8.5357</text:p>
          </table:table-cell>
          <table:table-cell office:value-type="float" office:value="-0.7644537203426172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4 06:30</text:p>
          </table:table-cell>
          <table:table-cell office:value-type="float" office:value="8.63568" table:style-name="c1">
            <text:p>8.6357</text:p>
          </table:table-cell>
          <table:table-cell office:value-type="float" office:value="0.16407233220601114" table:style-name="c14">
            <text:p>+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2:45</text:p>
          </table:table-cell>
          <table:table-cell office:value-type="float" office:value="8.654325" table:style-name="c1">
            <text:p>8.6543</text:p>
          </table:table-cell>
          <table:table-cell office:value-type="string" table:style-name="c1">
            <text:p>2026-05-04 15:15</text:p>
          </table:table-cell>
          <table:table-cell office:value-type="float" office:value="8.67566" table:style-name="c1">
            <text:p>8.6757</text:p>
          </table:table-cell>
          <table:table-cell office:value-type="float" office:value="0.04613133502613387" table:style-name="c14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30</text:p>
          </table:table-cell>
          <table:table-cell office:value-type="float" office:value="8.82441" table:style-name="c1">
            <text:p>8.8244</text:p>
          </table:table-cell>
          <table:table-cell office:value-type="string" table:style-name="c1">
            <text:p>2026-05-05 05:45</text:p>
          </table:table-cell>
          <table:table-cell office:value-type="float" office:value="8.77561" table:style-name="c1">
            <text:p>8.7756</text:p>
          </table:table-cell>
          <table:table-cell office:value-type="float" office:value="-0.7518060061805776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8:15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5-05 13:30</text:p>
          </table:table-cell>
          <table:table-cell office:value-type="float" office:value="8.885555000000002" table:style-name="c1">
            <text:p>8.8856</text:p>
          </table:table-cell>
          <table:table-cell office:value-type="float" office:value="-0.29965022488751547" table:style-name="c13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8.994495" table:style-name="c1">
            <text:p>8.9945</text:p>
          </table:table-cell>
          <table:table-cell office:value-type="string" table:style-name="c1">
            <text:p>2026-05-05 22:45</text:p>
          </table:table-cell>
          <table:table-cell office:value-type="float" office:value="8.9955" table:style-name="c1">
            <text:p>8.9955</text:p>
          </table:table-cell>
          <table:table-cell office:value-type="float" office:value="-0.18874883470390014" table:style-name="c13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6 06:30</text:p>
          </table:table-cell>
          <table:table-cell office:value-type="float" office:value="9.245375000000001" table:style-name="c1">
            <text:p>9.2454</text:p>
          </table:table-cell>
          <table:table-cell office:value-type="float" office:value="-0.9421873877776377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15</text:p>
          </table:table-cell>
          <table:table-cell office:value-type="float" office:value="9.394695" table:style-name="c1">
            <text:p>9.3947</text:p>
          </table:table-cell>
          <table:table-cell office:value-type="string" table:style-name="c1">
            <text:p>2026-05-06 11:30</text:p>
          </table:table-cell>
          <table:table-cell office:value-type="float" office:value="9.305345" table:style-name="c1">
            <text:p>9.3053</text:p>
          </table:table-cell>
          <table:table-cell office:value-type="float" office:value="-1.1490674753677377" table:style-name="c13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5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6 17:00</text:p>
          </table:table-cell>
          <table:table-cell office:value-type="float" office:value="9.33533" table:style-name="c1">
            <text:p>9.3353</text:p>
          </table:table-cell>
          <table:table-cell office:value-type="float" office:value="-1.0413106376673253" table:style-name="c13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7 09:30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-0.8350978606292969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6:30</text:p>
          </table:table-cell>
          <table:table-cell office:value-type="float" office:value="9.32466" table:style-name="c1">
            <text:p>9.3247</text:p>
          </table:table-cell>
          <table:table-cell office:value-type="string" table:style-name="c1">
            <text:p>2026-05-07 19:30</text:p>
          </table:table-cell>
          <table:table-cell office:value-type="float" office:value="9.1954" table:style-name="c1">
            <text:p>9.1954</text:p>
          </table:table-cell>
          <table:table-cell office:value-type="float" office:value="-1.5833457155542519" table:style-name="c13">
            <text:p>-1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15</text:p>
          </table:table-cell>
          <table:table-cell office:value-type="float" office:value="9.38469" table:style-name="c1">
            <text:p>9.3847</text:p>
          </table:table-cell>
          <table:table-cell office:value-type="string" table:style-name="c1">
            <text:p>2026-05-08 11:00</text:p>
          </table:table-cell>
          <table:table-cell office:value-type="float" office:value="9.405295" table:style-name="c1">
            <text:p>9.4053</text:p>
          </table:table-cell>
          <table:table-cell office:value-type="float" office:value="0.01922082983027984" table:style-name="c14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5-08 22:45</text:p>
          </table:table-cell>
          <table:table-cell office:value-type="float" office:value="9.785105" table:style-name="c1">
            <text:p>9.7851</text:p>
          </table:table-cell>
          <table:table-cell office:value-type="float" office:value="3.0693161877878294" table:style-name="c14">
            <text:p>+3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10 01:15</text:p>
          </table:table-cell>
          <table:table-cell office:value-type="float" office:value="9.55522" table:style-name="c1">
            <text:p>9.5552</text:p>
          </table:table-cell>
          <table:table-cell office:value-type="float" office:value="-1.1270390197017477" table:style-name="c13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5-10 09:30</text:p>
          </table:table-cell>
          <table:table-cell office:value-type="float" office:value="9.65517" table:style-name="c1">
            <text:p>9.6552</text:p>
          </table:table-cell>
          <table:table-cell office:value-type="float" office:value="-0.9150844827585991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9.784889999999999" table:style-name="c1">
            <text:p>9.7849</text:p>
          </table:table-cell>
          <table:table-cell office:value-type="string" table:style-name="c1">
            <text:p>2026-05-10 20:45</text:p>
          </table:table-cell>
          <table:table-cell office:value-type="float" office:value="9.77511" table:style-name="c1">
            <text:p>9.7751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9.914954999999999" table:style-name="c1">
            <text:p>9.915</text:p>
          </table:table-cell>
          <table:table-cell office:value-type="string" table:style-name="c1">
            <text:p>2026-05-11 00:45</text:p>
          </table:table-cell>
          <table:table-cell office:value-type="float" office:value="9.85507" table:style-name="c1">
            <text:p>9.8551</text:p>
          </table:table-cell>
          <table:table-cell office:value-type="float" office:value="-0.80267923485281" table:style-name="c13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6:3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0 10:45</text:p>
          </table:table-cell>
          <table:table-cell office:value-type="float" office:value="8.9955" table:style-name="c1">
            <text:p>8.9955</text:p>
          </table:table-cell>
          <table:table-cell office:value-type="float" office:value="-0.41030544106415157" table:style-name="c13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9.074535" table:style-name="c1">
            <text:p>9.0745</text:p>
          </table:table-cell>
          <table:table-cell office:value-type="string" table:style-name="c1">
            <text:p>2026-05-20 18:00</text:p>
          </table:table-cell>
          <table:table-cell office:value-type="float" office:value="9.045475000000001" table:style-name="c1">
            <text:p>9.0455</text:p>
          </table:table-cell>
          <table:table-cell office:value-type="float" office:value="-0.5194966411501967" table:style-name="c13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9.174584999999999" table:style-name="c1">
            <text:p>9.1746</text:p>
          </table:table-cell>
          <table:table-cell office:value-type="string" table:style-name="c1">
            <text:p>2026-05-22 04:45</text:p>
          </table:table-cell>
          <table:table-cell office:value-type="float" office:value="9.075460000000001" table:style-name="c1">
            <text:p>9.0755</text:p>
          </table:table-cell>
          <table:table-cell office:value-type="float" office:value="-1.2781705607392335" table:style-name="c13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30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5-22 13:30</text:p>
          </table:table-cell>
          <table:table-cell office:value-type="float" office:value="9.31534" table:style-name="c1">
            <text:p>9.3153</text:p>
          </table:table-cell>
          <table:table-cell office:value-type="float" office:value="0.13009266207413273" table:style-name="c14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7:0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5 12:30</text:p>
          </table:table-cell>
          <table:table-cell office:value-type="float" office:value="9.01549" table:style-name="c1">
            <text:p>9.0155</text:p>
          </table:table-cell>
          <table:table-cell office:value-type="float" office:value="-0.1889950087109571" table:style-name="c13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114555" table:style-name="c1">
            <text:p>9.1146</text:p>
          </table:table-cell>
          <table:table-cell office:value-type="string" table:style-name="c1">
            <text:p>2026-05-25 16:00</text:p>
          </table:table-cell>
          <table:table-cell office:value-type="float" office:value="9.03548" table:style-name="c1">
            <text:p>9.0355</text:p>
          </table:table-cell>
          <table:table-cell office:value-type="float" office:value="-1.0657341419301303" table:style-name="c13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9.134565" table:style-name="c1">
            <text:p>9.1346</text:p>
          </table:table-cell>
          <table:table-cell office:value-type="string" table:style-name="c1">
            <text:p>2026-05-25 18:45</text:p>
          </table:table-cell>
          <table:table-cell office:value-type="float" office:value="9.055470000000001" table:style-name="c1">
            <text:p>9.0555</text:p>
          </table:table-cell>
          <table:table-cell office:value-type="float" office:value="-1.064055973437139" table:style-name="c13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15</text:p>
          </table:table-cell>
          <table:table-cell office:value-type="float" office:value="2094.2766149999998" table:style-name="c10">
            <text:p>2094.3</text:p>
          </table:table-cell>
          <table:table-cell office:value-type="string" table:style-name="c10">
            <text:p>2026-03-05 23:00</text:p>
          </table:table-cell>
          <table:table-cell office:value-type="float" office:value="2079.069945" table:style-name="c10">
            <text:p>2079.1</text:p>
          </table:table-cell>
          <table:table-cell office:value-type="float" office:value="-0.9245546018788242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3:30</text:p>
          </table:table-cell>
          <table:table-cell office:value-type="float" office:value="2019.2391149999999" table:style-name="c10">
            <text:p>2019.2</text:p>
          </table:table-cell>
          <table:table-cell office:value-type="string" table:style-name="c10">
            <text:p>2026-03-09 17:30</text:p>
          </table:table-cell>
          <table:table-cell office:value-type="float" office:value="2019.4297800000002" table:style-name="c10">
            <text:p>2019.4</text:p>
          </table:table-cell>
          <table:table-cell office:value-type="float" office:value="-0.1904764572778106" table:style-name="c11">
            <text:p>-0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45</text:p>
          </table:table-cell>
          <table:table-cell office:value-type="float" office:value="2032.65582" table:style-name="c10">
            <text:p>2032.7</text:p>
          </table:table-cell>
          <table:table-cell office:value-type="string" table:style-name="c10">
            <text:p>2026-03-09 20:45</text:p>
          </table:table-cell>
          <table:table-cell office:value-type="float" office:value="2022.098445" table:style-name="c10">
            <text:p>2022.1</text:p>
          </table:table-cell>
          <table:table-cell office:value-type="float" office:value="-0.7182499687307997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2076.227595" table:style-name="c10">
            <text:p>2076.2</text:p>
          </table:table-cell>
          <table:table-cell office:value-type="string" table:style-name="c10">
            <text:p>2026-03-10 18:15</text:p>
          </table:table-cell>
          <table:table-cell office:value-type="float" office:value="2048.5252250000003" table:style-name="c10">
            <text:p>2048.5</text:p>
          </table:table-cell>
          <table:table-cell office:value-type="float" office:value="-1.5314974139323478" table:style-name="c11">
            <text:p>-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2064.15156" table:style-name="c10">
            <text:p>2064.2</text:p>
          </table:table-cell>
          <table:table-cell office:value-type="string" table:style-name="c10">
            <text:p>2026-03-11 15:15</text:p>
          </table:table-cell>
          <table:table-cell office:value-type="float" office:value="2044.847065" table:style-name="c10">
            <text:p>2044.8</text:p>
          </table:table-cell>
          <table:table-cell office:value-type="float" office:value="-1.13325710845259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6:45</text:p>
          </table:table-cell>
          <table:table-cell office:value-type="float" office:value="2069.444205" table:style-name="c10">
            <text:p>2069.4</text:p>
          </table:table-cell>
          <table:table-cell office:value-type="string" table:style-name="c10">
            <text:p>2026-03-11 21:00</text:p>
          </table:table-cell>
          <table:table-cell office:value-type="float" office:value="2067.375795" table:style-name="c10">
            <text:p>2067.4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00</text:p>
          </table:table-cell>
          <table:table-cell office:value-type="float" office:value="2041.710345" table:style-name="c10">
            <text:p>2041.7</text:p>
          </table:table-cell>
          <table:table-cell office:value-type="string" table:style-name="c10">
            <text:p>2026-03-12 13:30</text:p>
          </table:table-cell>
          <table:table-cell office:value-type="float" office:value="2055.781595" table:style-name="c10">
            <text:p>2055.8</text:p>
          </table:table-cell>
          <table:table-cell office:value-type="float" office:value="0.48791164799604214" table:style-name="c12">
            <text:p>+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4:15</text:p>
          </table:table-cell>
          <table:table-cell office:value-type="float" office:value="2081.250105" table:style-name="c10">
            <text:p>2081.3</text:p>
          </table:table-cell>
          <table:table-cell office:value-type="string" table:style-name="c10">
            <text:p>2026-03-12 14:30</text:p>
          </table:table-cell>
          <table:table-cell office:value-type="float" office:value="2057.5207250000003" table:style-name="c10">
            <text:p>2057.5</text:p>
          </table:table-cell>
          <table:table-cell office:value-type="float" office:value="-1.3377711723538743" table:style-name="c11">
            <text:p>-1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2147.71332" table:style-name="c10">
            <text:p>2147.7</text:p>
          </table:table-cell>
          <table:table-cell office:value-type="string" table:style-name="c10">
            <text:p>2026-03-13 15:00</text:p>
          </table:table-cell>
          <table:table-cell office:value-type="float" office:value="2150.0744250000002" table:style-name="c10">
            <text:p>2150.1</text:p>
          </table:table-cell>
          <table:table-cell office:value-type="float" office:value="-0.09018399977025471" table:style-name="c11">
            <text:p>-0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45</text:p>
          </table:table-cell>
          <table:table-cell office:value-type="float" office:value="2104.93194" table:style-name="c10">
            <text:p>2104.9</text:p>
          </table:table-cell>
          <table:table-cell office:value-type="string" table:style-name="c10">
            <text:p>2026-03-15 07:45</text:p>
          </table:table-cell>
          <table:table-cell office:value-type="float" office:value="2103.877535" table:style-name="c10">
            <text:p>2103.9</text:p>
          </table:table-cell>
          <table:table-cell office:value-type="float" office:value="-0.24989198427313175" table:style-name="c11">
            <text:p>-0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2118.7988699999996" table:style-name="c10">
            <text:p>2118.8</text:p>
          </table:table-cell>
          <table:table-cell office:value-type="string" table:style-name="c10">
            <text:p>2026-03-15 12:45</text:p>
          </table:table-cell>
          <table:table-cell office:value-type="float" office:value="2108.44525" table:style-name="c10">
            <text:p>2108.4</text:p>
          </table:table-cell>
          <table:table-cell office:value-type="float" office:value="-0.6875783379452716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2111.8253849999996" table:style-name="c10">
            <text:p>2111.8</text:p>
          </table:table-cell>
          <table:table-cell office:value-type="string" table:style-name="c10">
            <text:p>2026-03-15 19:00</text:p>
          </table:table-cell>
          <table:table-cell office:value-type="float" office:value="2098.100425" table:style-name="c10">
            <text:p>2098.1</text:p>
          </table:table-cell>
          <table:table-cell office:value-type="float" office:value="-0.8485106238825924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0:45</text:p>
          </table:table-cell>
          <table:table-cell office:value-type="float" office:value="2131.975455" table:style-name="c10">
            <text:p>2132</text:p>
          </table:table-cell>
          <table:table-cell office:value-type="string" table:style-name="c10">
            <text:p>2026-03-16 01:15</text:p>
          </table:table-cell>
          <table:table-cell office:value-type="float" office:value="2164.73709" table:style-name="c10">
            <text:p>2164.7</text:p>
          </table:table-cell>
          <table:table-cell office:value-type="float" office:value="1.333707922875238" table:style-name="c12">
            <text:p>+1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2239.5192" table:style-name="c10">
            <text:p>2239.5</text:p>
          </table:table-cell>
          <table:table-cell office:value-type="string" table:style-name="c10">
            <text:p>2026-03-16 08:00</text:p>
          </table:table-cell>
          <table:table-cell office:value-type="float" office:value="2247.8255249999997" table:style-name="c10">
            <text:p>2247.8</text:p>
          </table:table-cell>
          <table:table-cell office:value-type="float" office:value="0.17025626641309355" table:style-name="c12">
            <text:p>+0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2:30</text:p>
          </table:table-cell>
          <table:table-cell office:value-type="float" office:value="2301.15" table:style-name="c10">
            <text:p>2301.2</text:p>
          </table:table-cell>
          <table:table-cell office:value-type="string" table:style-name="c10">
            <text:p>2026-03-16 14:30</text:p>
          </table:table-cell>
          <table:table-cell office:value-type="float" office:value="2279.969445" table:style-name="c10">
            <text:p>2280</text:p>
          </table:table-cell>
          <table:table-cell office:value-type="float" office:value="-1.118493532388365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7:30</text:p>
          </table:table-cell>
          <table:table-cell office:value-type="float" office:value="2301.780315" table:style-name="c10">
            <text:p>2301.8</text:p>
          </table:table-cell>
          <table:table-cell office:value-type="string" table:style-name="c10">
            <text:p>2026-03-16 23:15</text:p>
          </table:table-cell>
          <table:table-cell office:value-type="float" office:value="2338.320255" table:style-name="c10">
            <text:p>2338.3</text:p>
          </table:table-cell>
          <table:table-cell office:value-type="float" office:value="1.384390925693313" table:style-name="c12">
            <text:p>+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30</text:p>
          </table:table-cell>
          <table:table-cell office:value-type="float" office:value="2336.58771" table:style-name="c10">
            <text:p>2336.6</text:p>
          </table:table-cell>
          <table:table-cell office:value-type="string" table:style-name="c10">
            <text:p>2026-03-17 09:15</text:p>
          </table:table-cell>
          <table:table-cell office:value-type="float" office:value="2309.434705" table:style-name="c10">
            <text:p>2309.4</text:p>
          </table:table-cell>
          <table:table-cell office:value-type="float" office:value="-1.3596564271620926" table:style-name="c11">
            <text:p>-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30</text:p>
          </table:table-cell>
          <table:table-cell office:value-type="float" office:value="2142.840885" table:style-name="c10">
            <text:p>2142.8</text:p>
          </table:table-cell>
          <table:table-cell office:value-type="string" table:style-name="c10">
            <text:p>2026-03-25 02:15</text:p>
          </table:table-cell>
          <table:table-cell office:value-type="float" office:value="2153.38277" table:style-name="c10">
            <text:p>2153.4</text:p>
          </table:table-cell>
          <table:table-cell office:value-type="float" office:value="0.2910749410481861" table:style-name="c12">
            <text:p>+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5:15</text:p>
          </table:table-cell>
          <table:table-cell office:value-type="float" office:value="2175.597255" table:style-name="c10">
            <text:p>2175.6</text:p>
          </table:table-cell>
          <table:table-cell office:value-type="string" table:style-name="c10">
            <text:p>2026-03-25 07:00</text:p>
          </table:table-cell>
          <table:table-cell office:value-type="float" office:value="2162.7380900000003" table:style-name="c10">
            <text:p>2162.7</text:p>
          </table:table-cell>
          <table:table-cell office:value-type="float" office:value="-0.789782134649264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8:45</text:p>
          </table:table-cell>
          <table:table-cell office:value-type="float" office:value="2184.841875" table:style-name="c10">
            <text:p>2184.8</text:p>
          </table:table-cell>
          <table:table-cell office:value-type="string" table:style-name="c10">
            <text:p>2026-03-25 12:30</text:p>
          </table:table-cell>
          <table:table-cell office:value-type="float" office:value="2170.85403" table:style-name="c10">
            <text:p>2170.9</text:p>
          </table:table-cell>
          <table:table-cell office:value-type="float" office:value="-0.8388425000308231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2060.60979" table:style-name="c10">
            <text:p>2060.6</text:p>
          </table:table-cell>
          <table:table-cell office:value-type="string" table:style-name="c10">
            <text:p>2026-03-30 10:00</text:p>
          </table:table-cell>
          <table:table-cell office:value-type="float" office:value="2054.13242" table:style-name="c10">
            <text:p>2054.1</text:p>
          </table:table-cell>
          <table:table-cell office:value-type="float" office:value="-0.5136140165373115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2062.240605" table:style-name="c10">
            <text:p>2062.2</text:p>
          </table:table-cell>
          <table:table-cell office:value-type="string" table:style-name="c10">
            <text:p>2026-03-31 04:30</text:p>
          </table:table-cell>
          <table:table-cell office:value-type="float" office:value="2059.419775" table:style-name="c10">
            <text:p>2059.4</text:p>
          </table:table-cell>
          <table:table-cell office:value-type="float" office:value="-0.33641128554080524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2:45</text:p>
          </table:table-cell>
          <table:table-cell office:value-type="float" office:value="2057.2681199999997" table:style-name="c10">
            <text:p>2057.3</text:p>
          </table:table-cell>
          <table:table-cell office:value-type="string" table:style-name="c10">
            <text:p>2026-03-31 15:00</text:p>
          </table:table-cell>
          <table:table-cell office:value-type="float" office:value="2044.91703" table:style-name="c10">
            <text:p>2044.9</text:p>
          </table:table-cell>
          <table:table-cell office:value-type="float" office:value="-0.7990635242512645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2128.56375" table:style-name="c10">
            <text:p>2128.6</text:p>
          </table:table-cell>
          <table:table-cell office:value-type="string" table:style-name="c10">
            <text:p>2026-04-01 08:00</text:p>
          </table:table-cell>
          <table:table-cell office:value-type="float" office:value="2129.9345000000003" table:style-name="c10">
            <text:p>2129.9</text:p>
          </table:table-cell>
          <table:table-cell office:value-type="float" office:value="-0.13563084805420234" table:style-name="c11">
            <text:p>-0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00</text:p>
          </table:table-cell>
          <table:table-cell office:value-type="float" office:value="2086.82289" table:style-name="c10">
            <text:p>2086.8</text:p>
          </table:table-cell>
          <table:table-cell office:value-type="string" table:style-name="c10">
            <text:p>2026-04-06 06:30</text:p>
          </table:table-cell>
          <table:table-cell office:value-type="float" office:value="2120.4692350000005" table:style-name="c10">
            <text:p>2120.5</text:p>
          </table:table-cell>
          <table:table-cell office:value-type="float" office:value="1.4092009024894159" table:style-name="c12">
            <text:p>+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2149.6342799999998" table:style-name="c10">
            <text:p>2149.6</text:p>
          </table:table-cell>
          <table:table-cell office:value-type="string" table:style-name="c10">
            <text:p>2026-04-06 12:15</text:p>
          </table:table-cell>
          <table:table-cell office:value-type="float" office:value="2147.58567" table:style-name="c10">
            <text:p>2147.6</text:p>
          </table:table-cell>
          <table:table-cell office:value-type="float" office:value="-0.29500989137232203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5:15</text:p>
          </table:table-cell>
          <table:table-cell office:value-type="float" office:value="2168.2835999999998" table:style-name="c10">
            <text:p>2168.3</text:p>
          </table:table-cell>
          <table:table-cell office:value-type="string" table:style-name="c10">
            <text:p>2026-04-06 17:00</text:p>
          </table:table-cell>
          <table:table-cell office:value-type="float" office:value="2139.54969" table:style-name="c10">
            <text:p>2139.5</text:p>
          </table:table-cell>
          <table:table-cell office:value-type="float" office:value="-1.5224424438901818" table:style-name="c11">
            <text:p>-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20:45</text:p>
          </table:table-cell>
          <table:table-cell office:value-type="float" office:value="2151.4651949999998" table:style-name="c10">
            <text:p>2151.5</text:p>
          </table:table-cell>
          <table:table-cell office:value-type="string" table:style-name="c10">
            <text:p>2026-04-06 21:45</text:p>
          </table:table-cell>
          <table:table-cell office:value-type="float" office:value="2137.97048" table:style-name="c10">
            <text:p>2138</text:p>
          </table:table-cell>
          <table:table-cell office:value-type="float" office:value="-0.8258798715783944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0:00</text:p>
          </table:table-cell>
          <table:table-cell office:value-type="float" office:value="2114.4466949999996" table:style-name="c10">
            <text:p>2114.4</text:p>
          </table:table-cell>
          <table:table-cell office:value-type="string" table:style-name="c10">
            <text:p>2026-04-08 03:45</text:p>
          </table:table-cell>
          <table:table-cell office:value-type="float" office:value="2236.071405" table:style-name="c10">
            <text:p>2236.1</text:p>
          </table:table-cell>
          <table:table-cell office:value-type="float" office:value="5.540683694625148" table:style-name="c12">
            <text:p>+5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30</text:p>
          </table:table-cell>
          <table:table-cell office:value-type="float" office:value="2261.7703199999996" table:style-name="c10">
            <text:p>2261.8</text:p>
          </table:table-cell>
          <table:table-cell office:value-type="string" table:style-name="c10">
            <text:p>2026-04-08 13:45</text:p>
          </table:table-cell>
          <table:table-cell office:value-type="float" office:value="2234.232325" table:style-name="c10">
            <text:p>2234.2</text:p>
          </table:table-cell>
          <table:table-cell office:value-type="float" office:value="-1.4150077545307393" table:style-name="c11">
            <text:p>-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2214.116505" table:style-name="c10">
            <text:p>2214.1</text:p>
          </table:table-cell>
          <table:table-cell office:value-type="string" table:style-name="c10">
            <text:p>2026-04-09 21:00</text:p>
          </table:table-cell>
          <table:table-cell office:value-type="float" office:value="2211.97346" table:style-name="c10">
            <text:p>2212</text:p>
          </table:table-cell>
          <table:table-cell office:value-type="float" office:value="-0.2964965904782013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1:30</text:p>
          </table:table-cell>
          <table:table-cell office:value-type="float" office:value="2218.26858" table:style-name="c10">
            <text:p>2218.3</text:p>
          </table:table-cell>
          <table:table-cell office:value-type="string" table:style-name="c10">
            <text:p>2026-04-10 16:00</text:p>
          </table:table-cell>
          <table:table-cell office:value-type="float" office:value="2223.1678600000005" table:style-name="c10">
            <text:p>2223.2</text:p>
          </table:table-cell>
          <table:table-cell office:value-type="float" office:value="0.020519041380473446" table:style-name="c12">
            <text:p>+0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9:45</text:p>
          </table:table-cell>
          <table:table-cell office:value-type="float" office:value="2243.751315" table:style-name="c10">
            <text:p>2243.8</text:p>
          </table:table-cell>
          <table:table-cell office:value-type="string" table:style-name="c10">
            <text:p>2026-04-11 13:15</text:p>
          </table:table-cell>
          <table:table-cell office:value-type="float" office:value="2234.632125" table:style-name="c10">
            <text:p>2234.6</text:p>
          </table:table-cell>
          <table:table-cell office:value-type="float" office:value="-0.6055136113814363" table:style-name="c11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45</text:p>
          </table:table-cell>
          <table:table-cell office:value-type="float" office:value="2264.7518099999998" table:style-name="c10">
            <text:p>2264.8</text:p>
          </table:table-cell>
          <table:table-cell office:value-type="string" table:style-name="c10">
            <text:p>2026-04-11 21:45</text:p>
          </table:table-cell>
          <table:table-cell office:value-type="float" office:value="2296.641105" table:style-name="c10">
            <text:p>2296.6</text:p>
          </table:table-cell>
          <table:table-cell office:value-type="float" office:value="1.2053554526624044" table:style-name="c12">
            <text:p>+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2263.4611649999997" table:style-name="c10">
            <text:p>2263.5</text:p>
          </table:table-cell>
          <table:table-cell office:value-type="string" table:style-name="c10">
            <text:p>2026-04-14 03:30</text:p>
          </table:table-cell>
          <table:table-cell office:value-type="float" office:value="2362.11835" table:style-name="c10">
            <text:p>2362.1</text:p>
          </table:table-cell>
          <table:table-cell office:value-type="float" office:value="4.150073872301263" table:style-name="c12">
            <text:p>+4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7:15</text:p>
          </table:table-cell>
          <table:table-cell office:value-type="float" office:value="2383.761285" table:style-name="c10">
            <text:p>2383.8</text:p>
          </table:table-cell>
          <table:table-cell office:value-type="string" table:style-name="c10">
            <text:p>2026-04-14 10:45</text:p>
          </table:table-cell>
          <table:table-cell office:value-type="float" office:value="2374.4022050000003" table:style-name="c10">
            <text:p>2374.4</text:p>
          </table:table-cell>
          <table:table-cell office:value-type="float" office:value="-0.5917333290273108" table:style-name="c11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2391.2050050000003" table:style-name="c10">
            <text:p>2391.2</text:p>
          </table:table-cell>
          <table:table-cell office:value-type="string" table:style-name="c10">
            <text:p>2026-04-14 14:45</text:p>
          </table:table-cell>
          <table:table-cell office:value-type="float" office:value="2370.164325" table:style-name="c10">
            <text:p>2370.2</text:p>
          </table:table-cell>
          <table:table-cell office:value-type="float" office:value="-1.0780605774817098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4:30</text:p>
          </table:table-cell>
          <table:table-cell office:value-type="float" office:value="2341.17" table:style-name="c10">
            <text:p>2341.2</text:p>
          </table:table-cell>
          <table:table-cell office:value-type="string" table:style-name="c10">
            <text:p>2026-04-15 14:45</text:p>
          </table:table-cell>
          <table:table-cell office:value-type="float" office:value="2327.685575" table:style-name="c10">
            <text:p>2327.7</text:p>
          </table:table-cell>
          <table:table-cell office:value-type="float" office:value="-0.7747181308672468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2376.617715" table:style-name="c10">
            <text:p>2376.6</text:p>
          </table:table-cell>
          <table:table-cell office:value-type="string" table:style-name="c10">
            <text:p>2026-04-15 21:15</text:p>
          </table:table-cell>
          <table:table-cell office:value-type="float" office:value="2352.6031100000005" table:style-name="c10">
            <text:p>2352.6</text:p>
          </table:table-cell>
          <table:table-cell office:value-type="float" office:value="-1.2083331044635104" table:style-name="c11">
            <text:p>-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2339.8693499999995" table:style-name="c10">
            <text:p>2339.9</text:p>
          </table:table-cell>
          <table:table-cell office:value-type="string" table:style-name="c10">
            <text:p>2026-04-16 17:00</text:p>
          </table:table-cell>
          <table:table-cell office:value-type="float" office:value="2315.6116150000003" table:style-name="c10">
            <text:p>2315.6</text:p>
          </table:table-cell>
          <table:table-cell office:value-type="float" office:value="-1.2345408352985365" table:style-name="c11">
            <text:p>-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9:30</text:p>
          </table:table-cell>
          <table:table-cell office:value-type="float" office:value="2372.8658399999995" table:style-name="c10">
            <text:p>2372.9</text:p>
          </table:table-cell>
          <table:table-cell office:value-type="string" table:style-name="c10">
            <text:p>2026-04-17 10:30</text:p>
          </table:table-cell>
          <table:table-cell office:value-type="float" office:value="2341.2288000000003" table:style-name="c10">
            <text:p>2341.2</text:p>
          </table:table-cell>
          <table:table-cell office:value-type="float" office:value="-1.5305187406296605" table:style-name="c11">
            <text:p>-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00</text:p>
          </table:table-cell>
          <table:table-cell office:value-type="float" office:value="2373.155985" table:style-name="c10">
            <text:p>2373.2</text:p>
          </table:table-cell>
          <table:table-cell office:value-type="string" table:style-name="c10">
            <text:p>2026-04-17 18:15</text:p>
          </table:table-cell>
          <table:table-cell office:value-type="float" office:value="2418.260265" table:style-name="c10">
            <text:p>2418.3</text:p>
          </table:table-cell>
          <table:table-cell office:value-type="float" office:value="1.6969039534190156" table:style-name="c12">
            <text:p>+1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00</text:p>
          </table:table-cell>
          <table:table-cell office:value-type="float" office:value="2371.535175" table:style-name="c10">
            <text:p>2371.5</text:p>
          </table:table-cell>
          <table:table-cell office:value-type="string" table:style-name="c10">
            <text:p>2026-04-22 08:30</text:p>
          </table:table-cell>
          <table:table-cell office:value-type="float" office:value="2384.617095" table:style-name="c10">
            <text:p>2384.6</text:p>
          </table:table-cell>
          <table:table-cell office:value-type="float" office:value="0.35061973841878924" table:style-name="c12">
            <text:p>+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3:30</text:p>
          </table:table-cell>
          <table:table-cell office:value-type="float" office:value="2410.6847399999997" table:style-name="c10">
            <text:p>2410.7</text:p>
          </table:table-cell>
          <table:table-cell office:value-type="string" table:style-name="c10">
            <text:p>2026-04-22 14:45</text:p>
          </table:table-cell>
          <table:table-cell office:value-type="float" office:value="2394.7420300000003" table:style-name="c10">
            <text:p>2394.7</text:p>
          </table:table-cell>
          <table:table-cell office:value-type="float" office:value="-0.859913325620898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2351.1649949999996" table:style-name="c10">
            <text:p>2351.2</text:p>
          </table:table-cell>
          <table:table-cell office:value-type="string" table:style-name="c10">
            <text:p>2026-04-26 21:45</text:p>
          </table:table-cell>
          <table:table-cell office:value-type="float" office:value="2356.1313450000002" table:style-name="c10">
            <text:p>2356.1</text:p>
          </table:table-cell>
          <table:table-cell office:value-type="float" office:value="0.01090707976221239" table:style-name="c12">
            <text:p>+0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00</text:p>
          </table:table-cell>
          <table:table-cell office:value-type="float" office:value="2391.75528" table:style-name="c10">
            <text:p>2391.8</text:p>
          </table:table-cell>
          <table:table-cell office:value-type="string" table:style-name="c10">
            <text:p>2026-04-27 05:00</text:p>
          </table:table-cell>
          <table:table-cell office:value-type="float" office:value="2381.6485800000005" table:style-name="c10">
            <text:p>2381.6</text:p>
          </table:table-cell>
          <table:table-cell office:value-type="float" office:value="-0.6216194288664378" table:style-name="c11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2345.172" table:style-name="c10">
            <text:p>2345.2</text:p>
          </table:table-cell>
          <table:table-cell office:value-type="string" table:style-name="c10">
            <text:p>2026-04-29 11:30</text:p>
          </table:table-cell>
          <table:table-cell office:value-type="float" office:value="2328.8549900000003" table:style-name="c10">
            <text:p>2328.9</text:p>
          </table:table-cell>
          <table:table-cell office:value-type="float" office:value="-0.8942794441094248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2:30</text:p>
          </table:table-cell>
          <table:table-cell office:value-type="float" office:value="2305.9524" table:style-name="c10">
            <text:p>2306</text:p>
          </table:table-cell>
          <table:table-cell office:value-type="string" table:style-name="c10">
            <text:p>2026-05-01 16:15</text:p>
          </table:table-cell>
          <table:table-cell office:value-type="float" office:value="2304.0573950000003" table:style-name="c10">
            <text:p>2304.1</text:p>
          </table:table-cell>
          <table:table-cell office:value-type="float" office:value="-0.2819145673867762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2329.48416" table:style-name="c10">
            <text:p>2329.5</text:p>
          </table:table-cell>
          <table:table-cell office:value-type="string" table:style-name="c10">
            <text:p>2026-05-02 22:30</text:p>
          </table:table-cell>
          <table:table-cell office:value-type="float" office:value="2317.3807300000003" table:style-name="c10">
            <text:p>2317.4</text:p>
          </table:table-cell>
          <table:table-cell office:value-type="float" office:value="-0.7184369126283174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12:15</text:p>
          </table:table-cell>
          <table:table-cell office:value-type="float" office:value="2330.62473" table:style-name="c10">
            <text:p>2330.6</text:p>
          </table:table-cell>
          <table:table-cell office:value-type="string" table:style-name="c10">
            <text:p>2026-05-03 16:15</text:p>
          </table:table-cell>
          <table:table-cell office:value-type="float" office:value="2324.227305" table:style-name="c10">
            <text:p>2324.2</text:p>
          </table:table-cell>
          <table:table-cell office:value-type="float" office:value="-0.473845284508545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2349.07395" table:style-name="c10">
            <text:p>2349.1</text:p>
          </table:table-cell>
          <table:table-cell office:value-type="string" table:style-name="c10">
            <text:p>2026-05-03 23:30</text:p>
          </table:table-cell>
          <table:table-cell office:value-type="float" office:value="2325.486675" table:style-name="c10">
            <text:p>2325.5</text:p>
          </table:table-cell>
          <table:table-cell office:value-type="float" office:value="-1.2020022981109157" table:style-name="c11">
            <text:p>-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2352.385605" table:style-name="c10">
            <text:p>2352.4</text:p>
          </table:table-cell>
          <table:table-cell office:value-type="string" table:style-name="c10">
            <text:p>2026-05-04 06:15</text:p>
          </table:table-cell>
          <table:table-cell office:value-type="float" office:value="2370.89396" table:style-name="c10">
            <text:p>2370.9</text:p>
          </table:table-cell>
          <table:table-cell office:value-type="float" office:value="0.5853180679517012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2372.5857" table:style-name="c10">
            <text:p>2372.6</text:p>
          </table:table-cell>
          <table:table-cell office:value-type="string" table:style-name="c10">
            <text:p>2026-05-04 15:30</text:p>
          </table:table-cell>
          <table:table-cell office:value-type="float" office:value="2347.275775" table:style-name="c10">
            <text:p>2347.3</text:p>
          </table:table-cell>
          <table:table-cell office:value-type="float" office:value="-1.2645330060880533" table:style-name="c11">
            <text:p>-1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45</text:p>
          </table:table-cell>
          <table:table-cell office:value-type="float" office:value="2386.77279" table:style-name="c10">
            <text:p>2386.8</text:p>
          </table:table-cell>
          <table:table-cell office:value-type="string" table:style-name="c10">
            <text:p>2026-05-05 06:15</text:p>
          </table:table-cell>
          <table:table-cell office:value-type="float" office:value="2376.721045" table:style-name="c10">
            <text:p>2376.7</text:p>
          </table:table-cell>
          <table:table-cell office:value-type="float" office:value="-0.620201907402973" table:style-name="c11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45</text:p>
          </table:table-cell>
          <table:table-cell office:value-type="float" office:value="2418.96888" table:style-name="c10">
            <text:p>2419</text:p>
          </table:table-cell>
          <table:table-cell office:value-type="string" table:style-name="c10">
            <text:p>2026-05-06 12:15</text:p>
          </table:table-cell>
          <table:table-cell office:value-type="float" office:value="2401.808495" table:style-name="c10">
            <text:p>2401.8</text:p>
          </table:table-cell>
          <table:table-cell office:value-type="float" office:value="-0.9078909763198251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2333.035935" table:style-name="c10">
            <text:p>2333</text:p>
          </table:table-cell>
          <table:table-cell office:value-type="string" table:style-name="c10">
            <text:p>2026-05-09 22:15</text:p>
          </table:table-cell>
          <table:table-cell office:value-type="float" office:value="2328.984925" table:style-name="c10">
            <text:p>2329</text:p>
          </table:table-cell>
          <table:table-cell office:value-type="float" office:value="-0.3731897453638777" table:style-name="c11">
            <text:p>-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2348.73378" table:style-name="c10">
            <text:p>2348.7</text:p>
          </table:table-cell>
          <table:table-cell office:value-type="string" table:style-name="c10">
            <text:p>2026-05-10 20:45</text:p>
          </table:table-cell>
          <table:table-cell office:value-type="float" office:value="2334.15234" table:style-name="c10">
            <text:p>2334.2</text:p>
          </table:table-cell>
          <table:table-cell office:value-type="float" office:value="-0.8194802957898428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45</text:p>
          </table:table-cell>
          <table:table-cell office:value-type="float" office:value="2367.693255" table:style-name="c10">
            <text:p>2367.7</text:p>
          </table:table-cell>
          <table:table-cell office:value-type="string" table:style-name="c10">
            <text:p>2026-05-11 01:00</text:p>
          </table:table-cell>
          <table:table-cell office:value-type="float" office:value="2351.18382" table:style-name="c10">
            <text:p>2351.2</text:p>
          </table:table-cell>
          <table:table-cell office:value-type="float" office:value="-0.895785440592467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2136.937935" table:style-name="c10">
            <text:p>2136.9</text:p>
          </table:table-cell>
          <table:table-cell office:value-type="string" table:style-name="c10">
            <text:p>2026-05-21 19:00</text:p>
          </table:table-cell>
          <table:table-cell office:value-type="float" office:value="2125.806565" table:style-name="c10">
            <text:p>2125.8</text:p>
          </table:table-cell>
          <table:table-cell office:value-type="float" office:value="-0.719761536894381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0:00</text:p>
          </table:table-cell>
          <table:table-cell office:value-type="float" office:value="2100.90993" table:style-name="c10">
            <text:p>2100.9</text:p>
          </table:table-cell>
          <table:table-cell office:value-type="string" table:style-name="c10">
            <text:p>2026-05-25 03:15</text:p>
          </table:table-cell>
          <table:table-cell office:value-type="float" office:value="2094.9819850000003" table:style-name="c10">
            <text:p>2095</text:p>
          </table:table-cell>
          <table:table-cell office:value-type="float" office:value="-0.4814967954392291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45</text:p>
          </table:table-cell>
          <table:table-cell office:value-type="float" office:value="2125.612275" table:style-name="c10">
            <text:p>2125.6</text:p>
          </table:table-cell>
          <table:table-cell office:value-type="string" table:style-name="c10">
            <text:p>2026-05-25 18:45</text:p>
          </table:table-cell>
          <table:table-cell office:value-type="float" office:value="2127.31581" table:style-name="c10">
            <text:p>2127.3</text:p>
          </table:table-cell>
          <table:table-cell office:value-type="float" office:value="-0.11991694506890971" table:style-name="c11">
            <text:p>-0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2122.350645" table:style-name="c10">
            <text:p>2122.4</text:p>
          </table:table-cell>
          <table:table-cell office:value-type="string" table:style-name="c10">
            <text:p>2026-05-26 13:30</text:p>
          </table:table-cell>
          <table:table-cell office:value-type="float" office:value="2114.7820800000004" table:style-name="c10">
            <text:p>2114.8</text:p>
          </table:table-cell>
          <table:table-cell office:value-type="float" office:value="-0.5557995049361719" table:style-name="c11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4:30</text:p>
          </table:table-cell>
          <table:table-cell office:value-type="float" office:value="2139.0990150000002" table:style-name="c10">
            <text:p>2139.1</text:p>
          </table:table-cell>
          <table:table-cell office:value-type="string" table:style-name="c10">
            <text:p>2026-05-26 14:45</text:p>
          </table:table-cell>
          <table:table-cell office:value-type="float" office:value="2110.60417" table:style-name="c10">
            <text:p>2110.6</text:p>
          </table:table-cell>
          <table:table-cell office:value-type="float" office:value="-1.5293327941544699" table:style-name="c11">
            <text:p>-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1:30</text:p>
          </table:table-cell>
          <table:table-cell office:value-type="float" office:value="2031.0750299999997" table:style-name="c10">
            <text:p>2031.1</text:p>
          </table:table-cell>
          <table:table-cell office:value-type="string" table:style-name="c10">
            <text:p>2026-05-31 05:45</text:p>
          </table:table-cell>
          <table:table-cell office:value-type="float" office:value="2029.554715" table:style-name="c10">
            <text:p>2029.6</text:p>
          </table:table-cell>
          <table:table-cell office:value-type="float" office:value="-0.27460309407105754" table:style-name="c11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3-05 22:15</text:p>
          </table:table-cell>
          <table:table-cell office:value-type="float" office:value="1.0104944999999999" table:style-name="c1">
            <text:p>1.0105</text:p>
          </table:table-cell>
          <table:table-cell office:value-type="float" office:value="-1.5653773216419253" table:style-name="c13">
            <text:p>-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30</text:p>
          </table:table-cell>
          <table:table-cell office:value-type="float" office:value="0.8814405" table:style-name="c1">
            <text:p>0.88144</text:p>
          </table:table-cell>
          <table:table-cell office:value-type="string" table:style-name="c1">
            <text:p>2026-03-15 03:30</text:p>
          </table:table-cell>
          <table:table-cell office:value-type="float" office:value="0.87956" table:style-name="c1">
            <text:p>0.87956</text:p>
          </table:table-cell>
          <table:table-cell office:value-type="float" office:value="-0.41281747775374633" table:style-name="c13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3-15 23:30</text:p>
          </table:table-cell>
          <table:table-cell office:value-type="float" office:value="0.8915540000000001" table:style-name="c1">
            <text:p>0.89155</text:p>
          </table:table-cell>
          <table:table-cell office:value-type="float" office:value="-1.1858755562218604" table:style-name="c13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9044519999999999" table:style-name="c1">
            <text:p>0.90445</text:p>
          </table:table-cell>
          <table:table-cell office:value-type="string" table:style-name="c1">
            <text:p>2026-03-16 09:00</text:p>
          </table:table-cell>
          <table:table-cell office:value-type="float" office:value="0.93953" table:style-name="c1">
            <text:p>0.93953</text:p>
          </table:table-cell>
          <table:table-cell office:value-type="float" office:value="3.670717686510727" table:style-name="c14">
            <text:p>+3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3-16 23:30</text:p>
          </table:table-cell>
          <table:table-cell office:value-type="float" office:value="0.9885055" table:style-name="c1">
            <text:p>0.98851</text:p>
          </table:table-cell>
          <table:table-cell office:value-type="float" office:value="3.4665749502478693" table:style-name="c14">
            <text:p>+3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1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3-17 12:15</text:p>
          </table:table-cell>
          <table:table-cell office:value-type="float" office:value="0.971514" table:style-name="c1">
            <text:p>0.97151</text:p>
          </table:table-cell>
          <table:table-cell office:value-type="float" office:value="-0.09408249339248886" table:style-name="c13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5:0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3-21 17:30</text:p>
          </table:table-cell>
          <table:table-cell office:value-type="float" office:value="0.945527" table:style-name="c1">
            <text:p>0.94553</text:p>
          </table:table-cell>
          <table:table-cell office:value-type="float" office:value="1.9638171754122968" table:style-name="c14">
            <text:p>+2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0.930465" table:style-name="c1">
            <text:p>0.93046</text:p>
          </table:table-cell>
          <table:table-cell office:value-type="string" table:style-name="c1">
            <text:p>2026-03-23 22:30</text:p>
          </table:table-cell>
          <table:table-cell office:value-type="float" office:value="0.9265365000000001" table:style-name="c1">
            <text:p>0.92654</text:p>
          </table:table-cell>
          <table:table-cell office:value-type="float" office:value="-0.6212642564201731" table:style-name="c13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32466" table:style-name="c1">
            <text:p>0.93247</text:p>
          </table:table-cell>
          <table:table-cell office:value-type="string" table:style-name="c1">
            <text:p>2026-03-24 22:45</text:p>
          </table:table-cell>
          <table:table-cell office:value-type="float" office:value="0.9225385" table:style-name="c1">
            <text:p>0.92254</text:p>
          </table:table-cell>
          <table:table-cell office:value-type="float" office:value="-1.262421842887551" table:style-name="c13">
            <text:p>-1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0:45</text:p>
          </table:table-cell>
          <table:table-cell office:value-type="float" office:value="0.9314655" table:style-name="c1">
            <text:p>0.93147</text:p>
          </table:table-cell>
          <table:table-cell office:value-type="string" table:style-name="c1">
            <text:p>2026-03-25 15:15</text:p>
          </table:table-cell>
          <table:table-cell office:value-type="float" office:value="0.9325335000000001" table:style-name="c1">
            <text:p>0.93253</text:p>
          </table:table-cell>
          <table:table-cell office:value-type="float" office:value="-0.08547117059082288" table:style-name="c13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0.8294144999999999" table:style-name="c1">
            <text:p>0.82941</text:p>
          </table:table-cell>
          <table:table-cell office:value-type="string" table:style-name="c1">
            <text:p>2026-03-31 08:45</text:p>
          </table:table-cell>
          <table:table-cell office:value-type="float" office:value="0.8285855" table:style-name="c1">
            <text:p>0.82859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0.8314154999999999" table:style-name="c1">
            <text:p>0.83142</text:p>
          </table:table-cell>
          <table:table-cell office:value-type="string" table:style-name="c1">
            <text:p>2026-03-31 15:00</text:p>
          </table:table-cell>
          <table:table-cell office:value-type="float" office:value="0.823588" table:style-name="c1">
            <text:p>0.82359</text:p>
          </table:table-cell>
          <table:table-cell office:value-type="float" office:value="-1.139484699527482" table:style-name="c13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8464229999999999" table:style-name="c1">
            <text:p>0.84642</text:p>
          </table:table-cell>
          <table:table-cell office:value-type="string" table:style-name="c1">
            <text:p>2026-04-01 09:15</text:p>
          </table:table-cell>
          <table:table-cell office:value-type="float" office:value="0.8425785" table:style-name="c1">
            <text:p>0.84258</text:p>
          </table:table-cell>
          <table:table-cell office:value-type="float" office:value="-0.6531975645156174" table:style-name="c13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8554274999999999" table:style-name="c1">
            <text:p>0.85543</text:p>
          </table:table-cell>
          <table:table-cell office:value-type="string" table:style-name="c1">
            <text:p>2026-04-01 13:45</text:p>
          </table:table-cell>
          <table:table-cell office:value-type="float" office:value="0.8405795" table:style-name="c1">
            <text:p>0.84058</text:p>
          </table:table-cell>
          <table:table-cell office:value-type="float" office:value="-1.932170572082359" table:style-name="c13">
            <text:p>-1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2:00</text:p>
          </table:table-cell>
          <table:table-cell office:value-type="float" office:value="0.8504249999999999" table:style-name="c1">
            <text:p>0.85042</text:p>
          </table:table-cell>
          <table:table-cell office:value-type="string" table:style-name="c1">
            <text:p>2026-04-03 12:45</text:p>
          </table:table-cell>
          <table:table-cell office:value-type="float" office:value="0.843578" table:style-name="c1">
            <text:p>0.84358</text:p>
          </table:table-cell>
          <table:table-cell office:value-type="float" office:value="-1.0034173997706786" table:style-name="c13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0.8414204999999999" table:style-name="c1">
            <text:p>0.84142</text:p>
          </table:table-cell>
          <table:table-cell office:value-type="string" table:style-name="c1">
            <text:p>2026-04-04 14:00</text:p>
          </table:table-cell>
          <table:table-cell office:value-type="float" office:value="0.8385805000000001" table:style-name="c1">
            <text:p>0.83858</text:p>
          </table:table-cell>
          <table:table-cell office:value-type="float" office:value="-0.53674974872846" table:style-name="c13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30</text:p>
          </table:table-cell>
          <table:table-cell office:value-type="float" office:value="0.8514255" table:style-name="c1">
            <text:p>0.85143</text:p>
          </table:table-cell>
          <table:table-cell office:value-type="string" table:style-name="c1">
            <text:p>2026-04-06 06:30</text:p>
          </table:table-cell>
          <table:table-cell office:value-type="float" office:value="0.847576" table:style-name="c1">
            <text:p>0.84758</text:p>
          </table:table-cell>
          <table:table-cell office:value-type="float" office:value="-0.6511203181018166" table:style-name="c13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45</text:p>
          </table:table-cell>
          <table:table-cell office:value-type="float" office:value="0.8584289999999999" table:style-name="c1">
            <text:p>0.85843</text:p>
          </table:table-cell>
          <table:table-cell office:value-type="string" table:style-name="c1">
            <text:p>2026-04-06 14:00</text:p>
          </table:table-cell>
          <table:table-cell office:value-type="float" office:value="0.8885555" table:style-name="c1">
            <text:p>0.88856</text:p>
          </table:table-cell>
          <table:table-cell office:value-type="float" office:value="3.3025768648892617" table:style-name="c14">
            <text:p>+3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5:15</text:p>
          </table:table-cell>
          <table:table-cell office:value-type="float" office:value="0.8634314999999999" table:style-name="c1">
            <text:p>0.86343</text:p>
          </table:table-cell>
          <table:table-cell office:value-type="string" table:style-name="c1">
            <text:p>2026-04-07 06:15</text:p>
          </table:table-cell>
          <table:table-cell office:value-type="float" office:value="0.8565715" table:style-name="c1">
            <text:p>0.85657</text:p>
          </table:table-cell>
          <table:table-cell office:value-type="float" office:value="-0.9928160402417396" table:style-name="c13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8604299999999999" table:style-name="c1">
            <text:p>0.86043</text:p>
          </table:table-cell>
          <table:table-cell office:value-type="string" table:style-name="c1">
            <text:p>2026-04-08 01:00</text:p>
          </table:table-cell>
          <table:table-cell office:value-type="float" office:value="0.9065465" table:style-name="c1">
            <text:p>0.90655</text:p>
          </table:table-cell>
          <table:table-cell office:value-type="float" office:value="5.149089820961628" table:style-name="c14">
            <text:p>+5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8984489999999999" table:style-name="c1">
            <text:p>0.89845</text:p>
          </table:table-cell>
          <table:table-cell office:value-type="string" table:style-name="c1">
            <text:p>2026-04-08 22:15</text:p>
          </table:table-cell>
          <table:table-cell office:value-type="float" office:value="0.895552" table:style-name="c1">
            <text:p>0.89555</text:p>
          </table:table-cell>
          <table:table-cell office:value-type="float" office:value="-0.5217000016695339" table:style-name="c13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18459" table:style-name="c1">
            <text:p>0.91846</text:p>
          </table:table-cell>
          <table:table-cell office:value-type="string" table:style-name="c1">
            <text:p>2026-04-09 23:15</text:p>
          </table:table-cell>
          <table:table-cell office:value-type="float" office:value="0.9085455000000001" table:style-name="c1">
            <text:p>0.90855</text:p>
          </table:table-cell>
          <table:table-cell office:value-type="float" office:value="-1.277104634447479" table:style-name="c13">
            <text:p>-1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5:30</text:p>
          </table:table-cell>
          <table:table-cell office:value-type="float" office:value="0.8954475" table:style-name="c1">
            <text:p>0.89545</text:p>
          </table:table-cell>
          <table:table-cell office:value-type="string" table:style-name="c1">
            <text:p>2026-04-11 22:45</text:p>
          </table:table-cell>
          <table:table-cell office:value-type="float" office:value="0.9065465" table:style-name="c1">
            <text:p>0.90655</text:p>
          </table:table-cell>
          <table:table-cell office:value-type="float" office:value="1.0371142413709622" table:style-name="c14">
            <text:p>+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4 00:30</text:p>
          </table:table-cell>
          <table:table-cell office:value-type="float" office:value="0.9105445000000001" table:style-name="c1">
            <text:p>0.91054</text:p>
          </table:table-cell>
          <table:table-cell office:value-type="float" office:value="-1.3821730237487118" table:style-name="c13">
            <text:p>-1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1:45</text:p>
          </table:table-cell>
          <table:table-cell office:value-type="float" office:value="0.896448" table:style-name="c1">
            <text:p>0.89645</text:p>
          </table:table-cell>
          <table:table-cell office:value-type="string" table:style-name="c1">
            <text:p>2026-04-15 05:45</text:p>
          </table:table-cell>
          <table:table-cell office:value-type="float" office:value="0.8945525000000001" table:style-name="c1">
            <text:p>0.89455</text:p>
          </table:table-cell>
          <table:table-cell office:value-type="float" office:value="-0.4109229366901168" table:style-name="c13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08454" table:style-name="c1">
            <text:p>0.90845</text:p>
          </table:table-cell>
          <table:table-cell office:value-type="string" table:style-name="c1">
            <text:p>2026-04-15 14:45</text:p>
          </table:table-cell>
          <table:table-cell office:value-type="float" office:value="0.9055470000000001" table:style-name="c1">
            <text:p>0.90555</text:p>
          </table:table-cell>
          <table:table-cell office:value-type="float" office:value="-0.519254519546386" table:style-name="c13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15</text:p>
          </table:table-cell>
          <table:table-cell office:value-type="float" office:value="0.9124559999999999" table:style-name="c1">
            <text:p>0.91246</text:p>
          </table:table-cell>
          <table:table-cell office:value-type="string" table:style-name="c1">
            <text:p>2026-04-15 15:30</text:p>
          </table:table-cell>
          <table:table-cell office:value-type="float" office:value="0.9045475000000001" table:style-name="c1">
            <text:p>0.90455</text:p>
          </table:table-cell>
          <table:table-cell office:value-type="float" office:value="-1.0648941376351195" table:style-name="c13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7:00</text:p>
          </table:table-cell>
          <table:table-cell office:value-type="float" office:value="0.914457" table:style-name="c1">
            <text:p>0.91446</text:p>
          </table:table-cell>
          <table:table-cell office:value-type="string" table:style-name="c1">
            <text:p>2026-04-15 18:30</text:p>
          </table:table-cell>
          <table:table-cell office:value-type="float" office:value="0.909545" table:style-name="c1">
            <text:p>0.90955</text:p>
          </table:table-cell>
          <table:table-cell office:value-type="float" office:value="-0.735975606835515" table:style-name="c13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9194595" table:style-name="c1">
            <text:p>0.91946</text:p>
          </table:table-cell>
          <table:table-cell office:value-type="string" table:style-name="c1">
            <text:p>2026-04-15 21:15</text:p>
          </table:table-cell>
          <table:table-cell office:value-type="float" office:value="0.9115440000000001" table:style-name="c1">
            <text:p>0.91154</text:p>
          </table:table-cell>
          <table:table-cell office:value-type="float" office:value="-1.0590652939036271" table:style-name="c13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6 09:00</text:p>
          </table:table-cell>
          <table:table-cell office:value-type="float" office:value="0.971514" table:style-name="c1">
            <text:p>0.97151</text:p>
          </table:table-cell>
          <table:table-cell office:value-type="float" office:value="5.2212160493043225" table:style-name="c14">
            <text:p>+5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9974985" table:style-name="c1">
            <text:p>0.9975</text:p>
          </table:table-cell>
          <table:table-cell office:value-type="string" table:style-name="c1">
            <text:p>2026-04-16 14:15</text:p>
          </table:table-cell>
          <table:table-cell office:value-type="float" office:value="0.9785105000000001" table:style-name="c1">
            <text:p>0.97851</text:p>
          </table:table-cell>
          <table:table-cell office:value-type="float" office:value="-2.099656539784256" table:style-name="c13">
            <text:p>-2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1.0155074999999998" table:style-name="c1">
            <text:p>1.0155</text:p>
          </table:table-cell>
          <table:table-cell office:value-type="string" table:style-name="c1">
            <text:p>2026-04-16 17:15</text:p>
          </table:table-cell>
          <table:table-cell office:value-type="float" office:value="0.991504" table:style-name="c1">
            <text:p>0.9915</text:p>
          </table:table-cell>
          <table:table-cell office:value-type="float" office:value="-2.558869973486144" table:style-name="c13">
            <text:p>-2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4-17 09:00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-1.098851425489633" table:style-name="c13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15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4-18 08:30</text:p>
          </table:table-cell>
          <table:table-cell office:value-type="float" office:value="0.9805095" table:style-name="c1">
            <text:p>0.98051</text:p>
          </table:table-cell>
          <table:table-cell office:value-type="float" office:value="-0.7045247417407974" table:style-name="c13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624809999999999" table:style-name="c1">
            <text:p>0.96248</text:p>
          </table:table-cell>
          <table:table-cell office:value-type="string" table:style-name="c1">
            <text:p>2026-04-22 07:30</text:p>
          </table:table-cell>
          <table:table-cell office:value-type="float" office:value="0.9485255" table:style-name="c1">
            <text:p>0.94853</text:p>
          </table:table-cell>
          <table:table-cell office:value-type="float" office:value="-1.646952248875555" table:style-name="c13">
            <text:p>-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0.9394694999999998" table:style-name="c1">
            <text:p>0.93947</text:p>
          </table:table-cell>
          <table:table-cell office:value-type="string" table:style-name="c1">
            <text:p>2026-04-24 14:15</text:p>
          </table:table-cell>
          <table:table-cell office:value-type="float" office:value="0.9365315000000001" table:style-name="c1">
            <text:p>0.93653</text:p>
          </table:table-cell>
          <table:table-cell office:value-type="float" office:value="-0.512004537507571" table:style-name="c13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9464729999999999" table:style-name="c1">
            <text:p>0.94647</text:p>
          </table:table-cell>
          <table:table-cell office:value-type="string" table:style-name="c1">
            <text:p>2026-04-24 19:15</text:p>
          </table:table-cell>
          <table:table-cell office:value-type="float" office:value="0.941529" table:style-name="c1">
            <text:p>0.94153</text:p>
          </table:table-cell>
          <table:table-cell office:value-type="float" office:value="-0.7212161858816901" table:style-name="c13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15</text:p>
          </table:table-cell>
          <table:table-cell office:value-type="float" office:value="0.9564779999999999" table:style-name="c1">
            <text:p>0.95648</text:p>
          </table:table-cell>
          <table:table-cell office:value-type="string" table:style-name="c1">
            <text:p>2026-04-25 06:45</text:p>
          </table:table-cell>
          <table:table-cell office:value-type="float" office:value="0.9505245" table:style-name="c1">
            <text:p>0.95052</text:p>
          </table:table-cell>
          <table:table-cell office:value-type="float" office:value="-0.8210955688996435" table:style-name="c13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2:45</text:p>
          </table:table-cell>
          <table:table-cell office:value-type="float" office:value="0.9384689999999999" table:style-name="c1">
            <text:p>0.93847</text:p>
          </table:table-cell>
          <table:table-cell office:value-type="string" table:style-name="c1">
            <text:p>2026-04-26 01:00</text:p>
          </table:table-cell>
          <table:table-cell office:value-type="float" office:value="0.9325335000000001" table:style-name="c1">
            <text:p>0.93253</text:p>
          </table:table-cell>
          <table:table-cell office:value-type="float" office:value="-0.8311019827506039" table:style-name="c13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0.9494744999999999" table:style-name="c1">
            <text:p>0.94947</text:p>
          </table:table-cell>
          <table:table-cell office:value-type="string" table:style-name="c1">
            <text:p>2026-04-26 09:15</text:p>
          </table:table-cell>
          <table:table-cell office:value-type="float" office:value="0.9485255" table:style-name="c1">
            <text:p>0.94853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9 08:15</text:p>
          </table:table-cell>
          <table:table-cell office:value-type="float" office:value="0.9385305" table:style-name="c1">
            <text:p>0.93853</text:p>
          </table:table-cell>
          <table:table-cell office:value-type="float" office:value="-1.141891828056396" table:style-name="c13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9554774999999999" table:style-name="c1">
            <text:p>0.95548</text:p>
          </table:table-cell>
          <table:table-cell office:value-type="string" table:style-name="c1">
            <text:p>2026-04-29 12:15</text:p>
          </table:table-cell>
          <table:table-cell office:value-type="float" office:value="0.953523" table:style-name="c1">
            <text:p>0.95352</text:p>
          </table:table-cell>
          <table:table-cell office:value-type="float" office:value="-0.4040484969033753" table:style-name="c13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9334665" table:style-name="c1">
            <text:p>0.93347</text:p>
          </table:table-cell>
          <table:table-cell office:value-type="string" table:style-name="c1">
            <text:p>2026-05-01 06:00</text:p>
          </table:table-cell>
          <table:table-cell office:value-type="float" office:value="0.9275360000000001" table:style-name="c1">
            <text:p>0.92754</text:p>
          </table:table-cell>
          <table:table-cell office:value-type="float" office:value="-0.8339500629106489" table:style-name="c13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3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5-01 17:30</text:p>
          </table:table-cell>
          <table:table-cell office:value-type="float" office:value="0.9275360000000001" table:style-name="c1">
            <text:p>0.92754</text:p>
          </table:table-cell>
          <table:table-cell office:value-type="float" office:value="0.023702260869584713" table:style-name="c14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5-03 23:30</text:p>
          </table:table-cell>
          <table:table-cell office:value-type="float" office:value="0.9265365000000001" table:style-name="c1">
            <text:p>0.92654</text:p>
          </table:table-cell>
          <table:table-cell office:value-type="float" office:value="-1.04686912041837" table:style-name="c13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484739999999999" table:style-name="c1">
            <text:p>0.94847</text:p>
          </table:table-cell>
          <table:table-cell office:value-type="string" table:style-name="c1">
            <text:p>2026-05-04 05:15</text:p>
          </table:table-cell>
          <table:table-cell office:value-type="float" office:value="0.9545225" table:style-name="c1">
            <text:p>0.95452</text:p>
          </table:table-cell>
          <table:table-cell office:value-type="float" office:value="0.43653379243924206" table:style-name="c14">
            <text:p>+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4 16:00</text:p>
          </table:table-cell>
          <table:table-cell office:value-type="float" office:value="0.9325335000000001" table:style-name="c1">
            <text:p>0.93253</text:p>
          </table:table-cell>
          <table:table-cell office:value-type="float" office:value="-1.565686412508005" table:style-name="c13">
            <text:p>-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4:30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5 09:45</text:p>
          </table:table-cell>
          <table:table-cell office:value-type="float" office:value="0.9505245" table:style-name="c1">
            <text:p>0.95052</text:p>
          </table:table-cell>
          <table:table-cell office:value-type="float" office:value="0.3333678689226627" table:style-name="c14">
            <text:p>+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45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5-05 22:45</text:p>
          </table:table-cell>
          <table:table-cell office:value-type="float" office:value="0.9725135" table:style-name="c1">
            <text:p>0.97251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30</text:p>
          </table:table-cell>
          <table:table-cell office:value-type="float" office:value="0.9914955" table:style-name="c1">
            <text:p>0.9915</text:p>
          </table:table-cell>
          <table:table-cell office:value-type="string" table:style-name="c1">
            <text:p>2026-05-06 02:30</text:p>
          </table:table-cell>
          <table:table-cell office:value-type="float" office:value="1.0114940000000001" table:style-name="c1">
            <text:p>1.0115</text:p>
          </table:table-cell>
          <table:table-cell office:value-type="float" office:value="1.8130716169664884" table:style-name="c14">
            <text:p>+1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4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5-06 07:00</text:p>
          </table:table-cell>
          <table:table-cell office:value-type="float" office:value="1.0844575" table:style-name="c1">
            <text:p>1.0845</text:p>
          </table:table-cell>
          <table:table-cell office:value-type="float" office:value="5.639530767575218" table:style-name="c14">
            <text:p>+5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45</text:p>
          </table:table-cell>
          <table:table-cell office:value-type="float" office:value="1.094547" table:style-name="c1">
            <text:p>1.0945</text:p>
          </table:table-cell>
          <table:table-cell office:value-type="string" table:style-name="c1">
            <text:p>2026-05-07 06:15</text:p>
          </table:table-cell>
          <table:table-cell office:value-type="float" office:value="1.0724635" table:style-name="c1">
            <text:p>1.0725</text:p>
          </table:table-cell>
          <table:table-cell office:value-type="float" office:value="-2.213459498450032" table:style-name="c13">
            <text:p>-2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1.108554" table:style-name="c1">
            <text:p>1.1086</text:p>
          </table:table-cell>
          <table:table-cell office:value-type="string" table:style-name="c1">
            <text:p>2026-05-07 09:45</text:p>
          </table:table-cell>
          <table:table-cell office:value-type="float" office:value="1.0934530000000002" table:style-name="c1">
            <text:p>1.0935</text:p>
          </table:table-cell>
          <table:table-cell office:value-type="float" office:value="-1.5594019368474377" table:style-name="c13">
            <text:p>-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2:15</text:p>
          </table:table-cell>
          <table:table-cell office:value-type="float" office:value="1.118559" table:style-name="c1">
            <text:p>1.1186</text:p>
          </table:table-cell>
          <table:table-cell office:value-type="string" table:style-name="c1">
            <text:p>2026-05-07 13:15</text:p>
          </table:table-cell>
          <table:table-cell office:value-type="float" office:value="1.0984505" table:style-name="c1">
            <text:p>1.0985</text:p>
          </table:table-cell>
          <table:table-cell office:value-type="float" office:value="-1.9940211065755165" table:style-name="c13">
            <text:p>-2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20:00</text:p>
          </table:table-cell>
          <table:table-cell office:value-type="float" office:value="1.08054" table:style-name="c1">
            <text:p>1.0805</text:p>
          </table:table-cell>
          <table:table-cell office:value-type="string" table:style-name="c1">
            <text:p>2026-05-07 22:15</text:p>
          </table:table-cell>
          <table:table-cell office:value-type="float" office:value="1.0754620000000001" table:style-name="c1">
            <text:p>1.0755</text:p>
          </table:table-cell>
          <table:table-cell office:value-type="float" office:value="-0.6689107796101879" table:style-name="c13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1.1935965" table:style-name="c1">
            <text:p>1.1936</text:p>
          </table:table-cell>
          <table:table-cell office:value-type="string" table:style-name="c1">
            <text:p>2026-05-08 18:45</text:p>
          </table:table-cell>
          <table:table-cell office:value-type="float" office:value="1.1884055000000002" table:style-name="c1">
            <text:p>1.1884</text:p>
          </table:table-cell>
          <table:table-cell office:value-type="float" office:value="-0.6339347170086107" table:style-name="c13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1:45</text:p>
          </table:table-cell>
          <table:table-cell office:value-type="float" office:value="1.2596294999999997" table:style-name="c1">
            <text:p>1.2596</text:p>
          </table:table-cell>
          <table:table-cell office:value-type="string" table:style-name="c1">
            <text:p>2026-05-09 00:45</text:p>
          </table:table-cell>
          <table:table-cell office:value-type="float" office:value="1.2653670000000001" table:style-name="c1">
            <text:p>1.2654</text:p>
          </table:table-cell>
          <table:table-cell office:value-type="float" office:value="0.25468055225765784" table:style-name="c14">
            <text:p>+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6:30</text:p>
          </table:table-cell>
          <table:table-cell office:value-type="float" office:value="1.2876435" table:style-name="c1">
            <text:p>1.2876</text:p>
          </table:table-cell>
          <table:table-cell office:value-type="string" table:style-name="c1">
            <text:p>2026-05-09 06:45</text:p>
          </table:table-cell>
          <table:table-cell office:value-type="float" office:value="1.2773610000000002" table:style-name="c1">
            <text:p>1.2774</text:p>
          </table:table-cell>
          <table:table-cell office:value-type="float" office:value="-0.9968554680701569" table:style-name="c13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9:00</text:p>
          </table:table-cell>
          <table:table-cell office:value-type="float" office:value="1.2216105" table:style-name="c1">
            <text:p>1.2216</text:p>
          </table:table-cell>
          <table:table-cell office:value-type="string" table:style-name="c1">
            <text:p>2026-05-09 21:15</text:p>
          </table:table-cell>
          <table:table-cell office:value-type="float" office:value="1.2163915" table:style-name="c1">
            <text:p>1.2164</text:p>
          </table:table-cell>
          <table:table-cell office:value-type="float" office:value="-0.6262688973694974" table:style-name="c13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1.1845919999999999" table:style-name="c1">
            <text:p>1.1846</text:p>
          </table:table-cell>
          <table:table-cell office:value-type="string" table:style-name="c1">
            <text:p>2026-05-10 20:15</text:p>
          </table:table-cell>
          <table:table-cell office:value-type="float" office:value="1.1824085000000002" table:style-name="c1">
            <text:p>1.1824</text:p>
          </table:table-cell>
          <table:table-cell office:value-type="float" office:value="-0.38385660138678945" table:style-name="c13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0.9694845" table:style-name="c1">
            <text:p>0.96948</text:p>
          </table:table-cell>
          <table:table-cell office:value-type="string" table:style-name="c1">
            <text:p>2026-05-20 18:15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-0.6083200384327858" table:style-name="c13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15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5-21 09:45</text:p>
          </table:table-cell>
          <table:table-cell office:value-type="float" office:value="0.987506" table:style-name="c1">
            <text:p>0.98751</text:p>
          </table:table-cell>
          <table:table-cell office:value-type="float" office:value="-1.2986517256401875" table:style-name="c13">
            <text:p>-1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4:15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1 22:45</text:p>
          </table:table-cell>
          <table:table-cell office:value-type="float" office:value="1.0074960000000002" table:style-name="c1">
            <text:p>1.0075</text:p>
          </table:table-cell>
          <table:table-cell office:value-type="float" office:value="2.0283782470186473" table:style-name="c14">
            <text:p>+2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7:30</text:p>
          </table:table-cell>
          <table:table-cell office:value-type="float" office:value="1.022511" table:style-name="c1">
            <text:p>1.0225</text:p>
          </table:table-cell>
          <table:table-cell office:value-type="string" table:style-name="c1">
            <text:p>2026-05-22 08:00</text:p>
          </table:table-cell>
          <table:table-cell office:value-type="float" office:value="1.0144925" table:style-name="c1">
            <text:p>1.0145</text:p>
          </table:table-cell>
          <table:table-cell office:value-type="float" office:value="-0.9825293329362661" table:style-name="c13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5 19:45</text:p>
          </table:table-cell>
          <table:table-cell office:value-type="float" office:value="0.991504" table:style-name="c1">
            <text:p>0.9915</text:p>
          </table:table-cell>
          <table:table-cell office:value-type="float" office:value="0.4088801796056529" table:style-name="c14">
            <text:p>+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00</text:p>
          </table:table-cell>
          <table:table-cell office:value-type="float" office:value="0.986493" table:style-name="c1">
            <text:p>0.98649</text:p>
          </table:table-cell>
          <table:table-cell office:value-type="string" table:style-name="c1">
            <text:p>2026-05-26 07:15</text:p>
          </table:table-cell>
          <table:table-cell office:value-type="float" office:value="0.983508" table:style-name="c1">
            <text:p>0.98351</text:p>
          </table:table-cell>
          <table:table-cell office:value-type="float" office:value="-0.5018821716930466" table:style-name="c13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8:15</text:p>
          </table:table-cell>
          <table:table-cell office:value-type="float" office:value="0.994497" table:style-name="c1">
            <text:p>0.9945</text:p>
          </table:table-cell>
          <table:table-cell office:value-type="string" table:style-name="c1">
            <text:p>2026-05-26 14:45</text:p>
          </table:table-cell>
          <table:table-cell office:value-type="float" office:value="1.0224885" table:style-name="c1">
            <text:p>1.0225</text:p>
          </table:table-cell>
          <table:table-cell office:value-type="float" office:value="2.6091124949094935" table:style-name="c14">
            <text:p>+2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1.0355174999999999" table:style-name="c1">
            <text:p>1.0355</text:p>
          </table:table-cell>
          <table:table-cell office:value-type="string" table:style-name="c1">
            <text:p>2026-05-27 02:00</text:p>
          </table:table-cell>
          <table:table-cell office:value-type="float" office:value="1.0184905" table:style-name="c1">
            <text:p>1.0185</text:p>
          </table:table-cell>
          <table:table-cell office:value-type="float" office:value="-1.840911670686396" table:style-name="c13">
            <text:p>-1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30</text:p>
          </table:table-cell>
          <table:table-cell office:value-type="float" office:value="0.9784889999999999" table:style-name="c1">
            <text:p>0.97849</text:p>
          </table:table-cell>
          <table:table-cell office:value-type="string" table:style-name="c1">
            <text:p>2026-05-31 05:45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-0.7074226166057906" table:style-name="c13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0:00</text:p>
          </table:table-cell>
          <table:table-cell office:value-type="float" office:value="0.096938445" table:style-name="c10">
            <text:p>0.096938</text:p>
          </table:table-cell>
          <table:table-cell office:value-type="string" table:style-name="c10">
            <text:p>2026-03-10 12:30</text:p>
          </table:table-cell>
          <table:table-cell office:value-type="float" office:value="0.09593201" table:style-name="c10">
            <text:p>0.095932</text:p>
          </table:table-cell>
          <table:table-cell office:value-type="float" office:value="-1.236045294506205" table:style-name="c11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4:45</text:p>
          </table:table-cell>
          <table:table-cell office:value-type="float" office:value="0.09741868499999999" table:style-name="c10">
            <text:p>0.097419</text:p>
          </table:table-cell>
          <table:table-cell office:value-type="string" table:style-name="c10">
            <text:p>2026-03-10 17:45</text:p>
          </table:table-cell>
          <table:table-cell office:value-type="float" office:value="0.09738128500000001" table:style-name="c10">
            <text:p>0.097381</text:p>
          </table:table-cell>
          <table:table-cell office:value-type="float" office:value="-0.23821424885275277" table:style-name="c11">
            <text:p>-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9:45</text:p>
          </table:table-cell>
          <table:table-cell office:value-type="float" office:value="0.097438695" table:style-name="c10">
            <text:p>0.097439</text:p>
          </table:table-cell>
          <table:table-cell office:value-type="string" table:style-name="c10">
            <text:p>2026-03-13 14:45</text:p>
          </table:table-cell>
          <table:table-cell office:value-type="float" office:value="0.09864065500000001" table:style-name="c10">
            <text:p>0.098641</text:p>
          </table:table-cell>
          <table:table-cell office:value-type="float" office:value="1.0311892320140403" table:style-name="c12">
            <text:p>+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00</text:p>
          </table:table-cell>
          <table:table-cell office:value-type="float" office:value="0.09600797999999999" table:style-name="c10">
            <text:p>0.096008</text:p>
          </table:table-cell>
          <table:table-cell office:value-type="string" table:style-name="c10">
            <text:p>2026-03-15 12:15</text:p>
          </table:table-cell>
          <table:table-cell office:value-type="float" office:value="0.096141905" table:style-name="c10">
            <text:p>0.096142</text:p>
          </table:table-cell>
          <table:table-cell office:value-type="float" office:value="-0.060685234805479826" table:style-name="c11">
            <text:p>-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3:00</text:p>
          </table:table-cell>
          <table:table-cell office:value-type="float" office:value="0.096618285" table:style-name="c10">
            <text:p>0.096618</text:p>
          </table:table-cell>
          <table:table-cell office:value-type="string" table:style-name="c10">
            <text:p>2026-03-15 23:30</text:p>
          </table:table-cell>
          <table:table-cell office:value-type="float" office:value="0.095722115" table:style-name="c10">
            <text:p>0.095722</text:p>
          </table:table-cell>
          <table:table-cell office:value-type="float" office:value="-1.1255825001292519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097178565" table:style-name="c10">
            <text:p>0.097179</text:p>
          </table:table-cell>
          <table:table-cell office:value-type="string" table:style-name="c10">
            <text:p>2026-03-16 08:45</text:p>
          </table:table-cell>
          <table:table-cell office:value-type="float" office:value="0.09737129000000001" table:style-name="c10">
            <text:p>0.097371</text:p>
          </table:table-cell>
          <table:table-cell office:value-type="float" office:value="-0.00197595911196613" table:style-name="c11">
            <text:p>-0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15</text:p>
          </table:table-cell>
          <table:table-cell office:value-type="float" office:value="0.099239595" table:style-name="c10">
            <text:p>0.09924</text:p>
          </table:table-cell>
          <table:table-cell office:value-type="string" table:style-name="c10">
            <text:p>2026-03-16 15:45</text:p>
          </table:table-cell>
          <table:table-cell office:value-type="float" office:value="0.098560695" table:style-name="c10">
            <text:p>0.098561</text:p>
          </table:table-cell>
          <table:table-cell office:value-type="float" office:value="-0.8826344256090413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5:15</text:p>
          </table:table-cell>
          <table:table-cell office:value-type="float" office:value="0.10067031" table:style-name="c10">
            <text:p>0.10067</text:p>
          </table:table-cell>
          <table:table-cell office:value-type="string" table:style-name="c10">
            <text:p>2026-03-18 05:45</text:p>
          </table:table-cell>
          <table:table-cell office:value-type="float" office:value="0.09987004000000001" table:style-name="c10">
            <text:p>0.09987</text:p>
          </table:table-cell>
          <table:table-cell office:value-type="float" office:value="-0.9932523401984028" table:style-name="c11">
            <text:p>-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0:30</text:p>
          </table:table-cell>
          <table:table-cell office:value-type="float" office:value="0.093396675" table:style-name="c10">
            <text:p>0.093397</text:p>
          </table:table-cell>
          <table:table-cell office:value-type="string" table:style-name="c10">
            <text:p>2026-03-23 23:15</text:p>
          </table:table-cell>
          <table:table-cell office:value-type="float" office:value="0.09287354" table:style-name="c10">
            <text:p>0.092874</text:p>
          </table:table-cell>
          <table:table-cell office:value-type="float" office:value="-0.7589019699684063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30</text:p>
          </table:table-cell>
          <table:table-cell office:value-type="float" office:value="0.093716835" table:style-name="c10">
            <text:p>0.093717</text:p>
          </table:table-cell>
          <table:table-cell office:value-type="string" table:style-name="c10">
            <text:p>2026-03-25 03:00</text:p>
          </table:table-cell>
          <table:table-cell office:value-type="float" office:value="0.094182885" table:style-name="c10">
            <text:p>0.094183</text:p>
          </table:table-cell>
          <table:table-cell office:value-type="float" office:value="0.29640182885497524" table:style-name="c12">
            <text:p>+0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6:45</text:p>
          </table:table-cell>
          <table:table-cell office:value-type="float" office:value="0.09538767" table:style-name="c10">
            <text:p>0.095388</text:p>
          </table:table-cell>
          <table:table-cell office:value-type="string" table:style-name="c10">
            <text:p>2026-03-25 09:45</text:p>
          </table:table-cell>
          <table:table-cell office:value-type="float" office:value="0.09503246" table:style-name="c10">
            <text:p>0.095032</text:p>
          </table:table-cell>
          <table:table-cell office:value-type="float" office:value="-0.5715412563699118" table:style-name="c11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0.09100548" table:style-name="c10">
            <text:p>0.091005</text:p>
          </table:table-cell>
          <table:table-cell office:value-type="string" table:style-name="c10">
            <text:p>2026-04-01 13:45</text:p>
          </table:table-cell>
          <table:table-cell office:value-type="float" office:value="0.089885035" table:style-name="c10">
            <text:p>0.089885</text:p>
          </table:table-cell>
          <table:table-cell office:value-type="float" office:value="-1.4286229631061853" table:style-name="c11">
            <text:p>-1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2:15</text:p>
          </table:table-cell>
          <table:table-cell office:value-type="float" office:value="0.08902449" table:style-name="c10">
            <text:p>0.089024</text:p>
          </table:table-cell>
          <table:table-cell office:value-type="string" table:style-name="c10">
            <text:p>2026-04-06 06:00</text:p>
          </table:table-cell>
          <table:table-cell office:value-type="float" office:value="0.08863566" table:style-name="c10">
            <text:p>0.088636</text:p>
          </table:table-cell>
          <table:table-cell office:value-type="float" office:value="-0.6357943576424607" table:style-name="c11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0:00</text:p>
          </table:table-cell>
          <table:table-cell office:value-type="float" office:value="0.08962479" table:style-name="c10">
            <text:p>0.089625</text:p>
          </table:table-cell>
          <table:table-cell office:value-type="string" table:style-name="c10">
            <text:p>2026-04-06 12:45</text:p>
          </table:table-cell>
          <table:table-cell office:value-type="float" office:value="0.08914540500000001" table:style-name="c10">
            <text:p>0.089145</text:p>
          </table:table-cell>
          <table:table-cell office:value-type="float" office:value="-0.7337106894141465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4:00</text:p>
          </table:table-cell>
          <table:table-cell office:value-type="float" office:value="0.089754855" table:style-name="c10">
            <text:p>0.089755</text:p>
          </table:table-cell>
          <table:table-cell office:value-type="string" table:style-name="c10">
            <text:p>2026-04-09 06:30</text:p>
          </table:table-cell>
          <table:table-cell office:value-type="float" office:value="0.089185385" table:style-name="c10">
            <text:p>0.089185</text:p>
          </table:table-cell>
          <table:table-cell office:value-type="float" office:value="-0.8331043313645536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0.09032514" table:style-name="c10">
            <text:p>0.090325</text:p>
          </table:table-cell>
          <table:table-cell office:value-type="string" table:style-name="c10">
            <text:p>2026-04-10 22:15</text:p>
          </table:table-cell>
          <table:table-cell office:value-type="float" office:value="0.08977509" table:style-name="c10">
            <text:p>0.089775</text:p>
          </table:table-cell>
          <table:table-cell office:value-type="float" office:value="-0.8076493486863123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0.087573765" table:style-name="c10">
            <text:p>0.087574</text:p>
          </table:table-cell>
          <table:table-cell office:value-type="string" table:style-name="c10">
            <text:p>2026-04-14 15:00</text:p>
          </table:table-cell>
          <table:table-cell office:value-type="float" office:value="0.08671662000000001" table:style-name="c10">
            <text:p>0.086717</text:p>
          </table:table-cell>
          <table:table-cell office:value-type="float" office:value="-1.1767125958099256" table:style-name="c11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2:15</text:p>
          </table:table-cell>
          <table:table-cell office:value-type="float" office:value="0.08729362499999999" table:style-name="c10">
            <text:p>0.087294</text:p>
          </table:table-cell>
          <table:table-cell office:value-type="string" table:style-name="c10">
            <text:p>2026-04-15 23:15</text:p>
          </table:table-cell>
          <table:table-cell office:value-type="float" office:value="0.086706625" table:style-name="c10">
            <text:p>0.086707</text:p>
          </table:table-cell>
          <table:table-cell office:value-type="float" office:value="-0.8709989342005064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08754374999999999" table:style-name="c10">
            <text:p>0.087544</text:p>
          </table:table-cell>
          <table:table-cell office:value-type="string" table:style-name="c10">
            <text:p>2026-04-16 10:15</text:p>
          </table:table-cell>
          <table:table-cell office:value-type="float" office:value="0.08777609" table:style-name="c10">
            <text:p>0.087776</text:p>
          </table:table-cell>
          <table:table-cell office:value-type="float" office:value="0.06496819714716384" table:style-name="c12">
            <text:p>+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0.08906451" table:style-name="c10">
            <text:p>0.089065</text:p>
          </table:table-cell>
          <table:table-cell office:value-type="string" table:style-name="c10">
            <text:p>2026-04-16 14:00</text:p>
          </table:table-cell>
          <table:table-cell office:value-type="float" office:value="0.08792601500000001" table:style-name="c10">
            <text:p>0.087926</text:p>
          </table:table-cell>
          <table:table-cell office:value-type="float" office:value="-1.4756260422754242" table:style-name="c11">
            <text:p>-1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0:15</text:p>
          </table:table-cell>
          <table:table-cell office:value-type="float" office:value="0.09120558" table:style-name="c10">
            <text:p>0.091206</text:p>
          </table:table-cell>
          <table:table-cell office:value-type="string" table:style-name="c10">
            <text:p>2026-04-16 22:45</text:p>
          </table:table-cell>
          <table:table-cell office:value-type="float" office:value="0.09015490000000001" table:style-name="c10">
            <text:p>0.090155</text:p>
          </table:table-cell>
          <table:table-cell office:value-type="float" office:value="-1.349588090004994" table:style-name="c11">
            <text:p>-1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0.08946470999999999" table:style-name="c10">
            <text:p>0.089465</text:p>
          </table:table-cell>
          <table:table-cell office:value-type="string" table:style-name="c10">
            <text:p>2026-04-17 10:30</text:p>
          </table:table-cell>
          <table:table-cell office:value-type="float" office:value="0.09041477" table:style-name="c10">
            <text:p>0.090415</text:p>
          </table:table-cell>
          <table:table-cell office:value-type="float" office:value="0.8599154624991501" table:style-name="c12">
            <text:p>+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2:30</text:p>
          </table:table-cell>
          <table:table-cell office:value-type="float" office:value="0.091715835" table:style-name="c10">
            <text:p>0.091716</text:p>
          </table:table-cell>
          <table:table-cell office:value-type="string" table:style-name="c10">
            <text:p>2026-04-17 15:15</text:p>
          </table:table-cell>
          <table:table-cell office:value-type="float" office:value="0.09227384000000001" table:style-name="c10">
            <text:p>0.092274</text:p>
          </table:table-cell>
          <table:table-cell office:value-type="float" office:value="0.4072901847756327" table:style-name="c12">
            <text:p>+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00</text:p>
          </table:table-cell>
          <table:table-cell office:value-type="float" office:value="0.08939467499999999" table:style-name="c10">
            <text:p>0.089395</text:p>
          </table:table-cell>
          <table:table-cell office:value-type="string" table:style-name="c10">
            <text:p>2026-04-18 17:15</text:p>
          </table:table-cell>
          <table:table-cell office:value-type="float" office:value="0.08859568" table:style-name="c10">
            <text:p>0.088596</text:p>
          </table:table-cell>
          <table:table-cell office:value-type="float" office:value="-1.0918969886293595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00</text:p>
          </table:table-cell>
          <table:table-cell office:value-type="float" office:value="0.090595275" table:style-name="c10">
            <text:p>0.090595</text:p>
          </table:table-cell>
          <table:table-cell office:value-type="string" table:style-name="c10">
            <text:p>2026-04-21 12:45</text:p>
          </table:table-cell>
          <table:table-cell office:value-type="float" office:value="0.09015490000000001" table:style-name="c10">
            <text:p>0.090155</text:p>
          </table:table-cell>
          <table:table-cell office:value-type="float" office:value="-0.6850187773037697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30</text:p>
          </table:table-cell>
          <table:table-cell office:value-type="float" office:value="0.09192594" table:style-name="c10">
            <text:p>0.091926</text:p>
          </table:table-cell>
          <table:table-cell office:value-type="string" table:style-name="c10">
            <text:p>2026-04-22 17:00</text:p>
          </table:table-cell>
          <table:table-cell office:value-type="float" office:value="0.092103925" table:style-name="c10">
            <text:p>0.092104</text:p>
          </table:table-cell>
          <table:table-cell office:value-type="float" office:value="-0.006669223153987769" table:style-name="c11">
            <text:p>-0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00</text:p>
          </table:table-cell>
          <table:table-cell office:value-type="float" office:value="0.090695325" table:style-name="c10">
            <text:p>0.090695</text:p>
          </table:table-cell>
          <table:table-cell office:value-type="string" table:style-name="c10">
            <text:p>2026-04-23 16:30</text:p>
          </table:table-cell>
          <table:table-cell office:value-type="float" office:value="0.09073461000000001" table:style-name="c10">
            <text:p>0.090735</text:p>
          </table:table-cell>
          <table:table-cell office:value-type="float" office:value="-0.15667123458676935" table:style-name="c11">
            <text:p>-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1:45</text:p>
          </table:table-cell>
          <table:table-cell office:value-type="float" office:value="0.090895425" table:style-name="c10">
            <text:p>0.090895</text:p>
          </table:table-cell>
          <table:table-cell office:value-type="string" table:style-name="c10">
            <text:p>2026-04-24 01:30</text:p>
          </table:table-cell>
          <table:table-cell office:value-type="float" office:value="0.09077459" table:style-name="c10">
            <text:p>0.090775</text:p>
          </table:table-cell>
          <table:table-cell office:value-type="float" office:value="-0.33257273994813374" table:style-name="c11">
            <text:p>-0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1:30</text:p>
          </table:table-cell>
          <table:table-cell office:value-type="float" office:value="0.09151573499999999" table:style-name="c10">
            <text:p>0.091516</text:p>
          </table:table-cell>
          <table:table-cell office:value-type="string" table:style-name="c10">
            <text:p>2026-04-24 12:45</text:p>
          </table:table-cell>
          <table:table-cell office:value-type="float" office:value="0.090864545" table:style-name="c10">
            <text:p>0.090865</text:p>
          </table:table-cell>
          <table:table-cell office:value-type="float" office:value="-0.9100382851702893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5:00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4-26 12:45</text:p>
          </table:table-cell>
          <table:table-cell office:value-type="float" office:value="0.09219388" table:style-name="c10">
            <text:p>0.092194</text:p>
          </table:table-cell>
          <table:table-cell office:value-type="float" office:value="0.28746197662348205" table:style-name="c12">
            <text:p>+0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15</text:p>
          </table:table-cell>
          <table:table-cell office:value-type="float" office:value="0.08861428499999999" table:style-name="c10">
            <text:p>0.088614</text:p>
          </table:table-cell>
          <table:table-cell office:value-type="string" table:style-name="c10">
            <text:p>2026-05-04 15:30</text:p>
          </table:table-cell>
          <table:table-cell office:value-type="float" office:value="0.08801597" table:style-name="c10">
            <text:p>0.088016</text:p>
          </table:table-cell>
          <table:table-cell office:value-type="float" office:value="-0.8737405306943447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0.08994495" table:style-name="c10">
            <text:p>0.089945</text:p>
          </table:table-cell>
          <table:table-cell office:value-type="string" table:style-name="c10">
            <text:p>2026-05-05 14:45</text:p>
          </table:table-cell>
          <table:table-cell office:value-type="float" office:value="0.09004495500000001" table:style-name="c10">
            <text:p>0.090045</text:p>
          </table:table-cell>
          <table:table-cell office:value-type="float" office:value="-0.08893758353858416" table:style-name="c11">
            <text:p>-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15</text:p>
          </table:table-cell>
          <table:table-cell office:value-type="float" office:value="0.09072533999999999" table:style-name="c10">
            <text:p>0.090725</text:p>
          </table:table-cell>
          <table:table-cell office:value-type="string" table:style-name="c10">
            <text:p>2026-05-05 22:45</text:p>
          </table:table-cell>
          <table:table-cell office:value-type="float" office:value="0.09016489500000001" table:style-name="c10">
            <text:p>0.090165</text:p>
          </table:table-cell>
          <table:table-cell office:value-type="float" office:value="-0.8164032508502839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00</text:p>
          </table:table-cell>
          <table:table-cell office:value-type="float" office:value="0.09136565999999999" table:style-name="c10">
            <text:p>0.091366</text:p>
          </table:table-cell>
          <table:table-cell office:value-type="string" table:style-name="c10">
            <text:p>2026-05-06 05:15</text:p>
          </table:table-cell>
          <table:table-cell office:value-type="float" office:value="0.090764595" table:style-name="c10">
            <text:p>0.090765</text:p>
          </table:table-cell>
          <table:table-cell office:value-type="float" office:value="-0.8564524411085905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0.092456205" table:style-name="c10">
            <text:p>0.092456</text:p>
          </table:table-cell>
          <table:table-cell office:value-type="string" table:style-name="c10">
            <text:p>2026-05-06 13:15</text:p>
          </table:table-cell>
          <table:table-cell office:value-type="float" office:value="0.09187404" table:style-name="c10">
            <text:p>0.091874</text:p>
          </table:table-cell>
          <table:table-cell office:value-type="float" office:value="-0.8283069870324011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6:45</text:p>
          </table:table-cell>
          <table:table-cell office:value-type="float" office:value="0.09090543" table:style-name="c10">
            <text:p>0.090905</text:p>
          </table:table-cell>
          <table:table-cell office:value-type="string" table:style-name="c10">
            <text:p>2026-05-07 09:45</text:p>
          </table:table-cell>
          <table:table-cell office:value-type="float" office:value="0.090744605" table:style-name="c10">
            <text:p>0.090745</text:p>
          </table:table-cell>
          <table:table-cell office:value-type="float" office:value="-0.3764609720178336" table:style-name="c11">
            <text:p>-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1:00</text:p>
          </table:table-cell>
          <table:table-cell office:value-type="float" office:value="0.09104549999999999" table:style-name="c10">
            <text:p>0.091045</text:p>
          </table:table-cell>
          <table:table-cell office:value-type="string" table:style-name="c10">
            <text:p>2026-05-08 13:00</text:p>
          </table:table-cell>
          <table:table-cell office:value-type="float" office:value="0.09059468" table:style-name="c10">
            <text:p>0.090595</text:p>
          </table:table-cell>
          <table:table-cell office:value-type="float" office:value="-0.6940691910308439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0.091455705" table:style-name="c10">
            <text:p>0.091456</text:p>
          </table:table-cell>
          <table:table-cell office:value-type="string" table:style-name="c10">
            <text:p>2026-05-08 21:00</text:p>
          </table:table-cell>
          <table:table-cell office:value-type="float" office:value="0.0923538" table:style-name="c10">
            <text:p>0.092354</text:p>
          </table:table-cell>
          <table:table-cell office:value-type="float" office:value="0.7801369567923544" table:style-name="c12">
            <text:p>+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00</text:p>
          </table:table-cell>
          <table:table-cell office:value-type="float" office:value="0.093636795" table:style-name="c10">
            <text:p>0.093637</text:p>
          </table:table-cell>
          <table:table-cell office:value-type="string" table:style-name="c10">
            <text:p>2026-05-09 04:30</text:p>
          </table:table-cell>
          <table:table-cell office:value-type="float" office:value="0.09396299500000001" table:style-name="c10">
            <text:p>0.093963</text:p>
          </table:table-cell>
          <table:table-cell office:value-type="float" office:value="0.14777094089455378" table:style-name="c12">
            <text:p>+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0.092996475" table:style-name="c10">
            <text:p>0.092996</text:p>
          </table:table-cell>
          <table:table-cell office:value-type="string" table:style-name="c10">
            <text:p>2026-05-09 23:30</text:p>
          </table:table-cell>
          <table:table-cell office:value-type="float" office:value="0.0927536" table:style-name="c10">
            <text:p>0.092754</text:p>
          </table:table-cell>
          <table:table-cell office:value-type="float" office:value="-0.4605437425450609" table:style-name="c11">
            <text:p>-0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30</text:p>
          </table:table-cell>
          <table:table-cell office:value-type="float" office:value="0.09409702499999999" table:style-name="c10">
            <text:p>0.094097</text:p>
          </table:table-cell>
          <table:table-cell office:value-type="string" table:style-name="c10">
            <text:p>2026-05-10 14:30</text:p>
          </table:table-cell>
          <table:table-cell office:value-type="float" office:value="0.095022465" table:style-name="c10">
            <text:p>0.095022</text:p>
          </table:table-cell>
          <table:table-cell office:value-type="float" office:value="0.7816294855921502" table:style-name="c12">
            <text:p>+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15</text:p>
          </table:table-cell>
          <table:table-cell office:value-type="float" office:value="0.09636816" table:style-name="c10">
            <text:p>0.096368</text:p>
          </table:table-cell>
          <table:table-cell office:value-type="string" table:style-name="c10">
            <text:p>2026-05-10 20:30</text:p>
          </table:table-cell>
          <table:table-cell office:value-type="float" office:value="0.09762116500000001" table:style-name="c10">
            <text:p>0.097621</text:p>
          </table:table-cell>
          <table:table-cell office:value-type="float" office:value="1.0977280163541714" table:style-name="c12">
            <text:p>+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00</text:p>
          </table:table-cell>
          <table:table-cell office:value-type="float" office:value="0.096338145" table:style-name="c10">
            <text:p>0.096338</text:p>
          </table:table-cell>
          <table:table-cell office:value-type="string" table:style-name="c10">
            <text:p>2026-05-11 08:30</text:p>
          </table:table-cell>
          <table:table-cell office:value-type="float" office:value="0.09557219" table:style-name="c10">
            <text:p>0.095572</text:p>
          </table:table-cell>
          <table:table-cell office:value-type="float" office:value="-0.9933799408427424" table:style-name="c11">
            <text:p>-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06:15</text:p>
          </table:table-cell>
          <table:table-cell office:value-type="float" office:value="0.096278115" table:style-name="c10">
            <text:p>0.096278</text:p>
          </table:table-cell>
          <table:table-cell office:value-type="string" table:style-name="c10">
            <text:p>2026-05-12 07:00</text:p>
          </table:table-cell>
          <table:table-cell office:value-type="float" office:value="0.09593201" table:style-name="c10">
            <text:p>0.095932</text:p>
          </table:table-cell>
          <table:table-cell office:value-type="float" office:value="-0.5586659938138561" table:style-name="c11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8:30</text:p>
          </table:table-cell>
          <table:table-cell office:value-type="float" office:value="0.09750873" table:style-name="c10">
            <text:p>0.097509</text:p>
          </table:table-cell>
          <table:table-cell office:value-type="string" table:style-name="c10">
            <text:p>2026-05-14 19:45</text:p>
          </table:table-cell>
          <table:table-cell office:value-type="float" office:value="0.096221865" table:style-name="c10">
            <text:p>0.096222</text:p>
          </table:table-cell>
          <table:table-cell office:value-type="float" office:value="-1.517005203672528" table:style-name="c11">
            <text:p>-1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30</text:p>
          </table:table-cell>
          <table:table-cell office:value-type="float" office:value="0.090075015" table:style-name="c10">
            <text:p>0.090075</text:p>
          </table:table-cell>
          <table:table-cell office:value-type="string" table:style-name="c10">
            <text:p>2026-05-22 18:00</text:p>
          </table:table-cell>
          <table:table-cell office:value-type="float" office:value="0.08953521000000002" table:style-name="c10">
            <text:p>0.089535</text:p>
          </table:table-cell>
          <table:table-cell office:value-type="float" office:value="-0.7979858618840985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22:15</text:p>
          </table:table-cell>
          <table:table-cell office:value-type="float" office:value="0.09120558" table:style-name="c10">
            <text:p>0.091206</text:p>
          </table:table-cell>
          <table:table-cell office:value-type="string" table:style-name="c10">
            <text:p>2026-05-29 01:00</text:p>
          </table:table-cell>
          <table:table-cell office:value-type="float" office:value="0.09032481500000002" table:style-name="c10">
            <text:p>0.090325</text:p>
          </table:table-cell>
          <table:table-cell office:value-type="float" office:value="-1.163661593057097" table:style-name="c11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03:45</text:p>
          </table:table-cell>
          <table:table-cell office:value-type="float" office:value="0.09184590000000001" table:style-name="c10">
            <text:p>0.091846</text:p>
          </table:table-cell>
          <table:table-cell office:value-type="string" table:style-name="c10">
            <text:p>2026-05-29 04:15</text:p>
          </table:table-cell>
          <table:table-cell office:value-type="float" office:value="0.08979508000000001" table:style-name="c10">
            <text:p>0.089795</text:p>
          </table:table-cell>
          <table:table-cell office:value-type="float" office:value="-2.428328716818051" table:style-name="c11">
            <text:p>-2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5:15</text:p>
          </table:table-cell>
          <table:table-cell office:value-type="float" office:value="0.090955455" table:style-name="c10">
            <text:p>0.090955</text:p>
          </table:table-cell>
          <table:table-cell office:value-type="string" table:style-name="c10">
            <text:p>2026-05-29 19:30</text:p>
          </table:table-cell>
          <table:table-cell office:value-type="float" office:value="0.09103446" table:style-name="c10">
            <text:p>0.091034</text:p>
          </table:table-cell>
          <table:table-cell office:value-type="float" office:value="-0.11321243518599422" table:style-name="c11">
            <text:p>-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23:15</text:p>
          </table:table-cell>
          <table:table-cell office:value-type="float" office:value="0.09634815" table:style-name="c10">
            <text:p>0.096348</text:p>
          </table:table-cell>
          <table:table-cell office:value-type="string" table:style-name="c10">
            <text:p>2026-05-30 03:00</text:p>
          </table:table-cell>
          <table:table-cell office:value-type="float" office:value="0.10223885500000002" table:style-name="c10">
            <text:p>0.10224</text:p>
          </table:table-cell>
          <table:table-cell office:value-type="float" office:value="5.901856474519773" table:style-name="c12">
            <text:p>+5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5:15</text:p>
          </table:table-cell>
          <table:table-cell office:value-type="float" office:value="0.096037995" table:style-name="c10">
            <text:p>0.096038</text:p>
          </table:table-cell>
          <table:table-cell office:value-type="string" table:style-name="c10">
            <text:p>2026-05-31 07:15</text:p>
          </table:table-cell>
          <table:table-cell office:value-type="float" office:value="0.095602175" table:style-name="c10">
            <text:p>0.095602</text:p>
          </table:table-cell>
          <table:table-cell office:value-type="float" office:value="-0.6527924159859921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8:45</text:p>
          </table:table-cell>
          <table:table-cell office:value-type="float" office:value="0.09795895499999999" table:style-name="c10">
            <text:p>0.097959</text:p>
          </table:table-cell>
          <table:table-cell office:value-type="string" table:style-name="c10">
            <text:p>2026-05-31 10:30</text:p>
          </table:table-cell>
          <table:table-cell office:value-type="float" office:value="0.096361795" table:style-name="c10">
            <text:p>0.096362</text:p>
          </table:table-cell>
          <table:table-cell office:value-type="float" office:value="-1.8270787272128386" table:style-name="c11">
            <text:p>-1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11:30</text:p>
          </table:table-cell>
          <table:table-cell office:value-type="float" office:value="0.09898947" table:style-name="c10">
            <text:p>0.098989</text:p>
          </table:table-cell>
          <table:table-cell office:value-type="string" table:style-name="c10">
            <text:p>2026-05-31 13:45</text:p>
          </table:table-cell>
          <table:table-cell office:value-type="float" office:value="0.09779108" table:style-name="c10">
            <text:p>0.097791</text:p>
          </table:table-cell>
          <table:table-cell office:value-type="float" office:value="-1.4081036790276613" table:style-name="c11">
            <text:p>-1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20:30</text:p>
          </table:table-cell>
          <table:table-cell office:value-type="float" office:value="0.09649822499999999" table:style-name="c10">
            <text:p>0.096498</text:p>
          </table:table-cell>
          <table:table-cell office:value-type="string" table:style-name="c10">
            <text:p>2026-05-31 23:45</text:p>
          </table:table-cell>
          <table:table-cell office:value-type="float" office:value="0.09630182500000001" table:style-name="c10">
            <text:p>0.096302</text:p>
          </table:table-cell>
          <table:table-cell office:value-type="float" office:value="-0.4030202091022783" table:style-name="c11">
            <text:p>-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30</text:p>
          </table:table-cell>
          <table:table-cell office:value-type="float" office:value="0.09792893999999999" table:style-name="c10">
            <text:p>0.097929</text:p>
          </table:table-cell>
          <table:table-cell office:value-type="string" table:style-name="c10">
            <text:p>2026-06-01 04:30</text:p>
          </table:table-cell>
          <table:table-cell office:value-type="float" office:value="0.096001975" table:style-name="c10">
            <text:p>0.096002</text:p>
          </table:table-cell>
          <table:table-cell office:value-type="float" office:value="-2.163684144875855" table:style-name="c11">
            <text:p>-2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2.923461" table:style-name="c1">
            <text:p>2.9235</text:p>
          </table:table-cell>
          <table:table-cell office:value-type="string" table:style-name="c1">
            <text:p>2026-03-09 14:15</text:p>
          </table:table-cell>
          <table:table-cell office:value-type="float" office:value="2.8925530000000004" table:style-name="c1">
            <text:p>2.8926</text:p>
          </table:table-cell>
          <table:table-cell office:value-type="float" office:value="-1.2550266087695383" table:style-name="c13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21:15</text:p>
          </table:table-cell>
          <table:table-cell office:value-type="float" office:value="2.955477" table:style-name="c1">
            <text:p>2.9555</text:p>
          </table:table-cell>
          <table:table-cell office:value-type="string" table:style-name="c1">
            <text:p>2026-03-09 22:15</text:p>
          </table:table-cell>
          <table:table-cell office:value-type="float" office:value="2.9215385" table:style-name="c1">
            <text:p>2.9215</text:p>
          </table:table-cell>
          <table:table-cell office:value-type="float" office:value="-1.3459301311260385" table:style-name="c13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2.9824904999999995" table:style-name="c1">
            <text:p>2.9825</text:p>
          </table:table-cell>
          <table:table-cell office:value-type="string" table:style-name="c1">
            <text:p>2026-03-10 10:15</text:p>
          </table:table-cell>
          <table:table-cell office:value-type="float" office:value="2.9605190000000006" table:style-name="c1">
            <text:p>2.9605</text:p>
          </table:table-cell>
          <table:table-cell office:value-type="float" office:value="-0.9351103542827421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0 18:15</text:p>
          </table:table-cell>
          <table:table-cell office:value-type="float" office:value="2.9635175" table:style-name="c1">
            <text:p>2.9635</text:p>
          </table:table-cell>
          <table:table-cell office:value-type="float" office:value="-2.2771778237327456" table:style-name="c13">
            <text:p>-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5:00</text:p>
          </table:table-cell>
          <table:table-cell office:value-type="float" office:value="2.9454719999999996" table:style-name="c1">
            <text:p>2.9455</text:p>
          </table:table-cell>
          <table:table-cell office:value-type="string" table:style-name="c1">
            <text:p>2026-03-11 05:30</text:p>
          </table:table-cell>
          <table:table-cell office:value-type="float" office:value="2.9165410000000005" table:style-name="c1">
            <text:p>2.9165</text:p>
          </table:table-cell>
          <table:table-cell office:value-type="float" office:value="-1.1801560313253412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45</text:p>
          </table:table-cell>
          <table:table-cell office:value-type="float" office:value="3.0105044999999997" table:style-name="c1">
            <text:p>3.0105</text:p>
          </table:table-cell>
          <table:table-cell office:value-type="string" table:style-name="c1">
            <text:p>2026-03-11 20:45</text:p>
          </table:table-cell>
          <table:table-cell office:value-type="float" office:value="2.994502" table:style-name="c1">
            <text:p>2.9945</text:p>
          </table:table-cell>
          <table:table-cell office:value-type="float" office:value="-0.7303928460495546" table:style-name="c13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3.1005495" table:style-name="c1">
            <text:p>3.1005</text:p>
          </table:table-cell>
          <table:table-cell office:value-type="string" table:style-name="c1">
            <text:p>2026-03-13 08:15</text:p>
          </table:table-cell>
          <table:table-cell office:value-type="float" office:value="3.112443" table:style-name="c1">
            <text:p>3.1124</text:p>
          </table:table-cell>
          <table:table-cell office:value-type="float" office:value="0.18292649232014568" table:style-name="c14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3.1405695" table:style-name="c1">
            <text:p>3.1406</text:p>
          </table:table-cell>
          <table:table-cell office:value-type="string" table:style-name="c1">
            <text:p>2026-03-13 11:30</text:p>
          </table:table-cell>
          <table:table-cell office:value-type="float" office:value="3.110444" table:style-name="c1">
            <text:p>3.1104</text:p>
          </table:table-cell>
          <table:table-cell office:value-type="float" office:value="-1.1572193373208028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15</text:p>
          </table:table-cell>
          <table:table-cell office:value-type="float" office:value="3.1445714999999996" table:style-name="c1">
            <text:p>3.1446</text:p>
          </table:table-cell>
          <table:table-cell office:value-type="string" table:style-name="c1">
            <text:p>2026-03-13 14:45</text:p>
          </table:table-cell>
          <table:table-cell office:value-type="float" office:value="3.1254365" table:style-name="c1">
            <text:p>3.1254</text:p>
          </table:table-cell>
          <table:table-cell office:value-type="float" office:value="-0.8071925718178052" table:style-name="c13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0:45</text:p>
          </table:table-cell>
          <table:table-cell office:value-type="float" office:value="3.10155" table:style-name="c1">
            <text:p>3.1016</text:p>
          </table:table-cell>
          <table:table-cell office:value-type="string" table:style-name="c1">
            <text:p>2026-03-15 23:30</text:p>
          </table:table-cell>
          <table:table-cell office:value-type="float" office:value="3.092453" table:style-name="c1">
            <text:p>3.0925</text:p>
          </table:table-cell>
          <table:table-cell office:value-type="float" office:value="-0.49261864380714115" table:style-name="c13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3.1345665" table:style-name="c1">
            <text:p>3.1346</text:p>
          </table:table-cell>
          <table:table-cell office:value-type="string" table:style-name="c1">
            <text:p>2026-03-16 08:45</text:p>
          </table:table-cell>
          <table:table-cell office:value-type="float" office:value="3.1854065" table:style-name="c1">
            <text:p>3.1854</text:p>
          </table:table-cell>
          <table:table-cell office:value-type="float" office:value="1.4187726566496472" table:style-name="c14">
            <text:p>+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3.323661" table:style-name="c1">
            <text:p>3.3237</text:p>
          </table:table-cell>
          <table:table-cell office:value-type="string" table:style-name="c1">
            <text:p>2026-03-17 00:45</text:p>
          </table:table-cell>
          <table:table-cell office:value-type="float" office:value="3.3013485" table:style-name="c1">
            <text:p>3.3013</text:p>
          </table:table-cell>
          <table:table-cell office:value-type="float" office:value="-0.8698810032521598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30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3-17 23:45</text:p>
          </table:table-cell>
          <table:table-cell office:value-type="float" office:value="3.226386" table:style-name="c1">
            <text:p>3.2264</text:p>
          </table:table-cell>
          <table:table-cell office:value-type="float" office:value="-0.9135686348328065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3.0665324999999997" table:style-name="c1">
            <text:p>3.0665</text:p>
          </table:table-cell>
          <table:table-cell office:value-type="string" table:style-name="c1">
            <text:p>2026-03-23 23:15</text:p>
          </table:table-cell>
          <table:table-cell office:value-type="float" office:value="3.0624680000000004" table:style-name="c1">
            <text:p>3.0625</text:p>
          </table:table-cell>
          <table:table-cell office:value-type="float" office:value="-0.3321788871306186" table:style-name="c13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3.0565275" table:style-name="c1">
            <text:p>3.0565</text:p>
          </table:table-cell>
          <table:table-cell office:value-type="string" table:style-name="c1">
            <text:p>2026-03-25 03:00</text:p>
          </table:table-cell>
          <table:table-cell office:value-type="float" office:value="3.0614685" table:style-name="c1">
            <text:p>3.0615</text:p>
          </table:table-cell>
          <table:table-cell office:value-type="float" office:value="-0.038569112546837925" table:style-name="c13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0:30</text:p>
          </table:table-cell>
          <table:table-cell office:value-type="float" office:value="3.089544" table:style-name="c1">
            <text:p>3.0895</text:p>
          </table:table-cell>
          <table:table-cell office:value-type="string" table:style-name="c1">
            <text:p>2026-03-25 14:00</text:p>
          </table:table-cell>
          <table:table-cell office:value-type="float" office:value="3.0854565000000003" table:style-name="c1">
            <text:p>3.0855</text:p>
          </table:table-cell>
          <table:table-cell office:value-type="float" office:value="-0.331936607586758" table:style-name="c13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22:4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3-25 23:45</text:p>
          </table:table-cell>
          <table:table-cell office:value-type="float" office:value="3.072463" table:style-name="c1">
            <text:p>3.0725</text:p>
          </table:table-cell>
          <table:table-cell office:value-type="float" office:value="-0.6551457994503518" table:style-name="c13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2.939469" table:style-name="c1">
            <text:p>2.9395</text:p>
          </table:table-cell>
          <table:table-cell office:value-type="string" table:style-name="c1">
            <text:p>2026-03-30 10:00</text:p>
          </table:table-cell>
          <table:table-cell office:value-type="float" office:value="2.908545" table:style-name="c1">
            <text:p>2.9085</text:p>
          </table:table-cell>
          <table:table-cell office:value-type="float" office:value="-1.2498237421452507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2.9004494999999997" table:style-name="c1">
            <text:p>2.9004</text:p>
          </table:table-cell>
          <table:table-cell office:value-type="string" table:style-name="c1">
            <text:p>2026-03-31 05:15</text:p>
          </table:table-cell>
          <table:table-cell office:value-type="float" office:value="2.8805590000000003" table:style-name="c1">
            <text:p>2.8806</text:p>
          </table:table-cell>
          <table:table-cell office:value-type="float" office:value="-0.8843021552693564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2.8824404999999995" table:style-name="c1">
            <text:p>2.8824</text:p>
          </table:table-cell>
          <table:table-cell office:value-type="string" table:style-name="c1">
            <text:p>2026-03-31 15:00</text:p>
          </table:table-cell>
          <table:table-cell office:value-type="float" office:value="2.8555715000000004" table:style-name="c1">
            <text:p>2.8556</text:p>
          </table:table-cell>
          <table:table-cell office:value-type="float" office:value="-1.1301980883386409" table:style-name="c13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2.96148" table:style-name="c1">
            <text:p>2.9615</text:p>
          </table:table-cell>
          <table:table-cell office:value-type="string" table:style-name="c1">
            <text:p>2026-04-01 13:45</text:p>
          </table:table-cell>
          <table:table-cell office:value-type="float" office:value="2.928535" table:style-name="c1">
            <text:p>2.9285</text:p>
          </table:table-cell>
          <table:table-cell office:value-type="float" office:value="-1.310126742878559" table:style-name="c13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2.8804395" table:style-name="c1">
            <text:p>2.8804</text:p>
          </table:table-cell>
          <table:table-cell office:value-type="string" table:style-name="c1">
            <text:p>2026-04-06 06:30</text:p>
          </table:table-cell>
          <table:table-cell office:value-type="float" office:value="2.8605690000000004" table:style-name="c1">
            <text:p>2.8606</text:p>
          </table:table-cell>
          <table:table-cell office:value-type="float" office:value="-0.8883636483598911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2.9164575" table:style-name="c1">
            <text:p>2.9165</text:p>
          </table:table-cell>
          <table:table-cell office:value-type="string" table:style-name="c1">
            <text:p>2026-04-06 14:30</text:p>
          </table:table-cell>
          <table:table-cell office:value-type="float" office:value="2.940529" table:style-name="c1">
            <text:p>2.9405</text:p>
          </table:table-cell>
          <table:table-cell office:value-type="float" office:value="0.623817851931685" table:style-name="c14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7:15</text:p>
          </table:table-cell>
          <table:table-cell office:value-type="float" office:value="2.8554269999999997" table:style-name="c1">
            <text:p>2.8554</text:p>
          </table:table-cell>
          <table:table-cell office:value-type="string" table:style-name="c1">
            <text:p>2026-04-07 08:30</text:p>
          </table:table-cell>
          <table:table-cell office:value-type="float" office:value="2.8455765" table:style-name="c1">
            <text:p>2.8456</text:p>
          </table:table-cell>
          <table:table-cell office:value-type="float" office:value="-0.5441850701663808" table:style-name="c13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2.905452" table:style-name="c1">
            <text:p>2.9055</text:p>
          </table:table-cell>
          <table:table-cell office:value-type="string" table:style-name="c1">
            <text:p>2026-04-08 06:15</text:p>
          </table:table-cell>
          <table:table-cell office:value-type="float" office:value="3.0194895" table:style-name="c1">
            <text:p>3.0195</text:p>
          </table:table-cell>
          <table:table-cell office:value-type="float" office:value="3.717202710266787" table:style-name="c14">
            <text:p>+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06:15</text:p>
          </table:table-cell>
          <table:table-cell office:value-type="float" office:value="2.9104544999999997" table:style-name="c1">
            <text:p>2.9105</text:p>
          </table:table-cell>
          <table:table-cell office:value-type="string" table:style-name="c1">
            <text:p>2026-04-09 09:15</text:p>
          </table:table-cell>
          <table:table-cell office:value-type="float" office:value="2.908545" table:style-name="c1">
            <text:p>2.9085</text:p>
          </table:table-cell>
          <table:table-cell office:value-type="float" office:value="-0.2653771586190401" table:style-name="c13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9:45</text:p>
          </table:table-cell>
          <table:table-cell office:value-type="float" office:value="2.979489" table:style-name="c1">
            <text:p>2.9795</text:p>
          </table:table-cell>
          <table:table-cell office:value-type="string" table:style-name="c1">
            <text:p>2026-04-09 23:15</text:p>
          </table:table-cell>
          <table:table-cell office:value-type="float" office:value="2.9765110000000004" table:style-name="c1">
            <text:p>2.9765</text:p>
          </table:table-cell>
          <table:table-cell office:value-type="float" office:value="-0.2996502248875488" table:style-name="c13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0:00</text:p>
          </table:table-cell>
          <table:table-cell office:value-type="float" office:value="3.0085034999999998" table:style-name="c1">
            <text:p>3.0085</text:p>
          </table:table-cell>
          <table:table-cell office:value-type="string" table:style-name="c1">
            <text:p>2026-04-10 11:00</text:p>
          </table:table-cell>
          <table:table-cell office:value-type="float" office:value="2.9885050000000004" table:style-name="c1">
            <text:p>2.9885</text:p>
          </table:table-cell>
          <table:table-cell office:value-type="float" office:value="-0.863303682212746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3.0225104999999997" table:style-name="c1">
            <text:p>3.0225</text:p>
          </table:table-cell>
          <table:table-cell office:value-type="string" table:style-name="c1">
            <text:p>2026-04-10 21:15</text:p>
          </table:table-cell>
          <table:table-cell office:value-type="float" office:value="3.044477" table:style-name="c1">
            <text:p>3.0445</text:p>
          </table:table-cell>
          <table:table-cell office:value-type="float" office:value="0.5254105974818124" table:style-name="c14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3.0325155" table:style-name="c1">
            <text:p>3.0325</text:p>
          </table:table-cell>
          <table:table-cell office:value-type="string" table:style-name="c1">
            <text:p>2026-04-11 20:45</text:p>
          </table:table-cell>
          <table:table-cell office:value-type="float" office:value="3.044477" table:style-name="c1">
            <text:p>3.0445</text:p>
          </table:table-cell>
          <table:table-cell office:value-type="float" office:value="0.1937530237520635" table:style-name="c14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8:45</text:p>
          </table:table-cell>
          <table:table-cell office:value-type="float" office:value="3.025512" table:style-name="c1">
            <text:p>3.0255</text:p>
          </table:table-cell>
          <table:table-cell office:value-type="string" table:style-name="c1">
            <text:p>2026-04-15 09:30</text:p>
          </table:table-cell>
          <table:table-cell office:value-type="float" office:value="3.0044969999999998" table:style-name="c1">
            <text:p>3.0045</text:p>
          </table:table-cell>
          <table:table-cell office:value-type="float" office:value="-0.8931046878346449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3.0535259999999997" table:style-name="c1">
            <text:p>3.0535</text:p>
          </table:table-cell>
          <table:table-cell office:value-type="string" table:style-name="c1">
            <text:p>2026-04-15 22:30</text:p>
          </table:table-cell>
          <table:table-cell office:value-type="float" office:value="3.3053465" table:style-name="c1">
            <text:p>3.3053</text:p>
          </table:table-cell>
          <table:table-cell office:value-type="float" office:value="8.030490401801082" table:style-name="c14">
            <text:p>+8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15</text:p>
          </table:table-cell>
          <table:table-cell office:value-type="float" office:value="3.311655" table:style-name="c1">
            <text:p>3.3117</text:p>
          </table:table-cell>
          <table:table-cell office:value-type="string" table:style-name="c1">
            <text:p>2026-04-16 06:00</text:p>
          </table:table-cell>
          <table:table-cell office:value-type="float" office:value="3.2973505000000003" table:style-name="c1">
            <text:p>3.2974</text:p>
          </table:table-cell>
          <table:table-cell office:value-type="float" office:value="-0.630980692418126" table:style-name="c13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8:00</text:p>
          </table:table-cell>
          <table:table-cell office:value-type="float" office:value="3.3706845" table:style-name="c1">
            <text:p>3.3707</text:p>
          </table:table-cell>
          <table:table-cell office:value-type="string" table:style-name="c1">
            <text:p>2026-04-16 09:45</text:p>
          </table:table-cell>
          <table:table-cell office:value-type="float" office:value="3.3253365" table:style-name="c1">
            <text:p>3.3253</text:p>
          </table:table-cell>
          <table:table-cell office:value-type="float" office:value="-1.5425753333929482" table:style-name="c13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16 14:00</text:p>
          </table:table-cell>
          <table:table-cell office:value-type="float" office:value="3.346326" table:style-name="c1">
            <text:p>3.3463</text:p>
          </table:table-cell>
          <table:table-cell office:value-type="float" office:value="-0.5076688384272776" table:style-name="c13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3.3966974999999997" table:style-name="c1">
            <text:p>3.3967</text:p>
          </table:table-cell>
          <table:table-cell office:value-type="string" table:style-name="c1">
            <text:p>2026-04-16 16:30</text:p>
          </table:table-cell>
          <table:table-cell office:value-type="float" office:value="3.346326" table:style-name="c1">
            <text:p>3.3463</text:p>
          </table:table-cell>
          <table:table-cell office:value-type="float" office:value="-1.6798907077830716" table:style-name="c13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3.405702" table:style-name="c1">
            <text:p>3.4057</text:p>
          </table:table-cell>
          <table:table-cell office:value-type="string" table:style-name="c1">
            <text:p>2026-04-17 10:30</text:p>
          </table:table-cell>
          <table:table-cell office:value-type="float" office:value="3.3763110000000003" table:style-name="c1">
            <text:p>3.3763</text:p>
          </table:table-cell>
          <table:table-cell office:value-type="float" office:value="-1.061168760185105" table:style-name="c13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3.38169" table:style-name="c1">
            <text:p>3.3817</text:p>
          </table:table-cell>
          <table:table-cell office:value-type="string" table:style-name="c1">
            <text:p>2026-04-18 08:30</text:p>
          </table:table-cell>
          <table:table-cell office:value-type="float" office:value="3.33833" table:style-name="c1">
            <text:p>3.3383</text:p>
          </table:table-cell>
          <table:table-cell office:value-type="float" office:value="-1.4795360210427377" table:style-name="c13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7:15</text:p>
          </table:table-cell>
          <table:table-cell office:value-type="float" office:value="3.3306645" table:style-name="c1">
            <text:p>3.3307</text:p>
          </table:table-cell>
          <table:table-cell office:value-type="string" table:style-name="c1">
            <text:p>2026-04-20 21:15</text:p>
          </table:table-cell>
          <table:table-cell office:value-type="float" office:value="3.326336" table:style-name="c1">
            <text:p>3.3263</text:p>
          </table:table-cell>
          <table:table-cell office:value-type="float" office:value="-0.3295992635703793" table:style-name="c13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22 10:15</text:p>
          </table:table-cell>
          <table:table-cell office:value-type="float" office:value="3.3373305" table:style-name="c1">
            <text:p>3.3373</text:p>
          </table:table-cell>
          <table:table-cell office:value-type="float" office:value="-0.7751213415497893" table:style-name="c13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15</text:p>
          </table:table-cell>
          <table:table-cell office:value-type="float" office:value="3.3536759999999997" table:style-name="c1">
            <text:p>3.3537</text:p>
          </table:table-cell>
          <table:table-cell office:value-type="string" table:style-name="c1">
            <text:p>2026-04-22 19:15</text:p>
          </table:table-cell>
          <table:table-cell office:value-type="float" office:value="3.3493245000000003" table:style-name="c1">
            <text:p>3.3493</text:p>
          </table:table-cell>
          <table:table-cell office:value-type="float" office:value="-0.3293937659898938" table:style-name="c13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3.3006494999999996" table:style-name="c1">
            <text:p>3.3006</text:p>
          </table:table-cell>
          <table:table-cell office:value-type="string" table:style-name="c1">
            <text:p>2026-04-23 08:45</text:p>
          </table:table-cell>
          <table:table-cell office:value-type="float" office:value="3.2753615000000003" table:style-name="c1">
            <text:p>3.2754</text:p>
          </table:table-cell>
          <table:table-cell office:value-type="float" office:value="-0.964520699289606" table:style-name="c13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23 17:30</text:p>
          </table:table-cell>
          <table:table-cell office:value-type="float" office:value="3.302348" table:style-name="c1">
            <text:p>3.3023</text:p>
          </table:table-cell>
          <table:table-cell office:value-type="float" office:value="-1.6686699531428317" table:style-name="c13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15</text:p>
          </table:table-cell>
          <table:table-cell office:value-type="float" office:value="3.3246615" table:style-name="c1">
            <text:p>3.3247</text:p>
          </table:table-cell>
          <table:table-cell office:value-type="string" table:style-name="c1">
            <text:p>2026-04-24 01:45</text:p>
          </table:table-cell>
          <table:table-cell office:value-type="float" office:value="3.374312" table:style-name="c1">
            <text:p>3.3743</text:p>
          </table:table-cell>
          <table:table-cell office:value-type="float" office:value="1.290514848263502" table:style-name="c14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15</text:p>
          </table:table-cell>
          <table:table-cell office:value-type="float" office:value="3.431715" table:style-name="c1">
            <text:p>3.4317</text:p>
          </table:table-cell>
          <table:table-cell office:value-type="string" table:style-name="c1">
            <text:p>2026-04-24 12:45</text:p>
          </table:table-cell>
          <table:table-cell office:value-type="float" office:value="3.448275" table:style-name="c1">
            <text:p>3.4483</text:p>
          </table:table-cell>
          <table:table-cell office:value-type="float" office:value="0.2816929224891851" table:style-name="c14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5:15</text:p>
          </table:table-cell>
          <table:table-cell office:value-type="float" office:value="3.6228105" table:style-name="c1">
            <text:p>3.6228</text:p>
          </table:table-cell>
          <table:table-cell office:value-type="string" table:style-name="c1">
            <text:p>2026-04-25 16:30</text:p>
          </table:table-cell>
          <table:table-cell office:value-type="float" office:value="3.588205" table:style-name="c1">
            <text:p>3.5882</text:p>
          </table:table-cell>
          <table:table-cell office:value-type="float" office:value="-1.1532019628131218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3.6328154999999995" table:style-name="c1">
            <text:p>3.6328</text:p>
          </table:table-cell>
          <table:table-cell office:value-type="string" table:style-name="c1">
            <text:p>2026-04-26 08:00</text:p>
          </table:table-cell>
          <table:table-cell office:value-type="float" office:value="3.8240870000000005" table:style-name="c1">
            <text:p>3.8241</text:p>
          </table:table-cell>
          <table:table-cell office:value-type="float" office:value="5.054678666918266" table:style-name="c14">
            <text:p>+5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9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4-26 21:15</text:p>
          </table:table-cell>
          <table:table-cell office:value-type="float" office:value="3.7451265" table:style-name="c1">
            <text:p>3.7451</text:p>
          </table:table-cell>
          <table:table-cell office:value-type="float" office:value="-0.16643222679146863" table:style-name="c13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2:30</text:p>
          </table:table-cell>
          <table:table-cell office:value-type="float" office:value="3.8089034999999996" table:style-name="c1">
            <text:p>3.8089</text:p>
          </table:table-cell>
          <table:table-cell office:value-type="string" table:style-name="c1">
            <text:p>2026-04-27 05:30</text:p>
          </table:table-cell>
          <table:table-cell office:value-type="float" office:value="3.802098" table:style-name="c1">
            <text:p>3.8021</text:p>
          </table:table-cell>
          <table:table-cell office:value-type="float" office:value="-0.3782163003604566" table:style-name="c13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3.6498239999999997" table:style-name="c1">
            <text:p>3.6498</text:p>
          </table:table-cell>
          <table:table-cell office:value-type="string" table:style-name="c1">
            <text:p>2026-05-01 14:45</text:p>
          </table:table-cell>
          <table:table-cell office:value-type="float" office:value="3.6131925000000003" table:style-name="c1">
            <text:p>3.6132</text:p>
          </table:table-cell>
          <table:table-cell office:value-type="float" office:value="-1.2015448363400294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9:15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5-01 23:30</text:p>
          </table:table-cell>
          <table:table-cell office:value-type="float" office:value="3.6311835" table:style-name="c1">
            <text:p>3.6312</text:p>
          </table:table-cell>
          <table:table-cell office:value-type="float" office:value="-0.6006117637257113" table:style-name="c13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2:00</text:p>
          </table:table-cell>
          <table:table-cell office:value-type="float" office:value="3.6908445" table:style-name="c1">
            <text:p>3.6908</text:p>
          </table:table-cell>
          <table:table-cell office:value-type="string" table:style-name="c1">
            <text:p>2026-05-02 08:00</text:p>
          </table:table-cell>
          <table:table-cell office:value-type="float" office:value="3.7591195" table:style-name="c1">
            <text:p>3.7591</text:p>
          </table:table-cell>
          <table:table-cell office:value-type="float" office:value="1.6462497978308344" table:style-name="c14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9:30</text:p>
          </table:table-cell>
          <table:table-cell office:value-type="float" office:value="3.8349165" table:style-name="c1">
            <text:p>3.8349</text:p>
          </table:table-cell>
          <table:table-cell office:value-type="string" table:style-name="c1">
            <text:p>2026-05-02 11:30</text:p>
          </table:table-cell>
          <table:table-cell office:value-type="float" office:value="3.7981000000000003" table:style-name="c1">
            <text:p>3.7981</text:p>
          </table:table-cell>
          <table:table-cell office:value-type="float" office:value="-1.1580148329174533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5-04 06:00</text:p>
          </table:table-cell>
          <table:table-cell office:value-type="float" office:value="3.7731125000000003" table:style-name="c1">
            <text:p>3.7731</text:p>
          </table:table-cell>
          <table:table-cell office:value-type="float" office:value="-0.929502395090942" table:style-name="c13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7:15</text:p>
          </table:table-cell>
          <table:table-cell office:value-type="float" office:value="3.811905" table:style-name="c1">
            <text:p>3.8119</text:p>
          </table:table-cell>
          <table:table-cell office:value-type="string" table:style-name="c1">
            <text:p>2026-05-04 08:30</text:p>
          </table:table-cell>
          <table:table-cell office:value-type="float" office:value="3.7681150000000003" table:style-name="c1">
            <text:p>3.7681</text:p>
          </table:table-cell>
          <table:table-cell office:value-type="float" office:value="-1.34637305717219" table:style-name="c13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3.8569275" table:style-name="c1">
            <text:p>3.8569</text:p>
          </table:table-cell>
          <table:table-cell office:value-type="string" table:style-name="c1">
            <text:p>2026-05-05 22:00</text:p>
          </table:table-cell>
          <table:table-cell office:value-type="float" office:value="3.804097" table:style-name="c1">
            <text:p>3.8041</text:p>
          </table:table-cell>
          <table:table-cell office:value-type="float" office:value="-1.5669179652197274" table:style-name="c13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6 05:15</text:p>
          </table:table-cell>
          <table:table-cell office:value-type="float" office:value="3.836081" table:style-name="c1">
            <text:p>3.8361</text:p>
          </table:table-cell>
          <table:table-cell office:value-type="float" office:value="-1.0473383923243818" table:style-name="c13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00</text:p>
          </table:table-cell>
          <table:table-cell office:value-type="float" office:value="3.8739359999999996" table:style-name="c1">
            <text:p>3.8739</text:p>
          </table:table-cell>
          <table:table-cell office:value-type="string" table:style-name="c1">
            <text:p>2026-05-07 09:30</text:p>
          </table:table-cell>
          <table:table-cell office:value-type="float" office:value="3.866066" table:style-name="c1">
            <text:p>3.8661</text:p>
          </table:table-cell>
          <table:table-cell office:value-type="float" office:value="-0.40264645399405996" table:style-name="c13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9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7 21:00</text:p>
          </table:table-cell>
          <table:table-cell office:value-type="float" office:value="3.83808" table:style-name="c1">
            <text:p>3.8381</text:p>
          </table:table-cell>
          <table:table-cell office:value-type="float" office:value="-0.9957736911218373" table:style-name="c13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3:30</text:p>
          </table:table-cell>
          <table:table-cell office:value-type="float" office:value="3.8769375" table:style-name="c1">
            <text:p>3.8769</text:p>
          </table:table-cell>
          <table:table-cell office:value-type="string" table:style-name="c1">
            <text:p>2026-05-08 07:15</text:p>
          </table:table-cell>
          <table:table-cell office:value-type="float" office:value="3.8610685" table:style-name="c1">
            <text:p>3.8611</text:p>
          </table:table-cell>
          <table:table-cell office:value-type="float" office:value="-0.6083996951588677" table:style-name="c13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4.036016999999999" table:style-name="c1">
            <text:p>4.036</text:p>
          </table:table-cell>
          <table:table-cell office:value-type="string" table:style-name="c1">
            <text:p>2026-05-08 09:45</text:p>
          </table:table-cell>
          <table:table-cell office:value-type="float" office:value="3.9650165000000004" table:style-name="c1">
            <text:p>3.965</text:p>
          </table:table-cell>
          <table:table-cell office:value-type="float" office:value="-1.9555558855054223" table:style-name="c13">
            <text:p>-2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0:15</text:p>
          </table:table-cell>
          <table:table-cell office:value-type="float" office:value="4.050024" table:style-name="c1">
            <text:p>4.05</text:p>
          </table:table-cell>
          <table:table-cell office:value-type="string" table:style-name="c1">
            <text:p>2026-05-08 14:00</text:p>
          </table:table-cell>
          <table:table-cell office:value-type="float" office:value="4.0429775" table:style-name="c1">
            <text:p>4.043</text:p>
          </table:table-cell>
          <table:table-cell office:value-type="float" office:value="-0.3735388240291737" table:style-name="c13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4.1650815" table:style-name="c1">
            <text:p>4.1651</text:p>
          </table:table-cell>
          <table:table-cell office:value-type="string" table:style-name="c1">
            <text:p>2026-05-08 22:45</text:p>
          </table:table-cell>
          <table:table-cell office:value-type="float" office:value="4.221888000000001" table:style-name="c1">
            <text:p>4.2219</text:p>
          </table:table-cell>
          <table:table-cell office:value-type="float" office:value="1.1612484866862838" table:style-name="c14">
            <text:p>+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4.312155" table:style-name="c1">
            <text:p>4.3122</text:p>
          </table:table-cell>
          <table:table-cell office:value-type="string" table:style-name="c1">
            <text:p>2026-05-09 05:00</text:p>
          </table:table-cell>
          <table:table-cell office:value-type="float" office:value="4.2788595" table:style-name="c1">
            <text:p>4.2789</text:p>
          </table:table-cell>
          <table:table-cell office:value-type="float" office:value="-0.9704878451841203" table:style-name="c13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15</text:p>
          </table:table-cell>
          <table:table-cell office:value-type="float" office:value="4.144071" table:style-name="c1">
            <text:p>4.1441</text:p>
          </table:table-cell>
          <table:table-cell office:value-type="string" table:style-name="c1">
            <text:p>2026-05-10 12:00</text:p>
          </table:table-cell>
          <table:table-cell office:value-type="float" office:value="4.121938" table:style-name="c1">
            <text:p>4.1219</text:p>
          </table:table-cell>
          <table:table-cell office:value-type="float" office:value="-0.7329206971116164" table:style-name="c13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45</text:p>
          </table:table-cell>
          <table:table-cell office:value-type="float" office:value="4.210104" table:style-name="c1">
            <text:p>4.2101</text:p>
          </table:table-cell>
          <table:table-cell office:value-type="string" table:style-name="c1">
            <text:p>2026-05-10 20:45</text:p>
          </table:table-cell>
          <table:table-cell office:value-type="float" office:value="4.2748615" table:style-name="c1">
            <text:p>4.2749</text:p>
          </table:table-cell>
          <table:table-cell office:value-type="float" office:value="1.3351701492765766" table:style-name="c14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5:30</text:p>
          </table:table-cell>
          <table:table-cell office:value-type="float" office:value="4.2691335" table:style-name="c1">
            <text:p>4.2691</text:p>
          </table:table-cell>
          <table:table-cell office:value-type="string" table:style-name="c1">
            <text:p>2026-05-11 13:45</text:p>
          </table:table-cell>
          <table:table-cell office:value-type="float" office:value="4.4087945" table:style-name="c1">
            <text:p>4.4088</text:p>
          </table:table-cell>
          <table:table-cell office:value-type="float" office:value="3.0649737187768977" table:style-name="c14">
            <text:p>+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7:15</text:p>
          </table:table-cell>
          <table:table-cell office:value-type="float" office:value="4.4212095" table:style-name="c1">
            <text:p>4.4212</text:p>
          </table:table-cell>
          <table:table-cell office:value-type="string" table:style-name="c1">
            <text:p>2026-05-11 19:15</text:p>
          </table:table-cell>
          <table:table-cell office:value-type="float" office:value="4.4727625" table:style-name="c1">
            <text:p>4.4728</text:p>
          </table:table-cell>
          <table:table-cell office:value-type="float" office:value="0.9638074776257666" table:style-name="c14">
            <text:p>+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1:15</text:p>
          </table:table-cell>
          <table:table-cell office:value-type="float" office:value="4.703350499999999" table:style-name="c1">
            <text:p>4.7034</text:p>
          </table:table-cell>
          <table:table-cell office:value-type="string" table:style-name="c1">
            <text:p>2026-05-11 23:15</text:p>
          </table:table-cell>
          <table:table-cell office:value-type="float" office:value="4.5927025" table:style-name="c1">
            <text:p>4.5927</text:p>
          </table:table-cell>
          <table:table-cell office:value-type="float" office:value="-2.5477329894401657" table:style-name="c13">
            <text:p>-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5:45</text:p>
          </table:table-cell>
          <table:table-cell office:value-type="float" office:value="4.743370499999999" table:style-name="c1">
            <text:p>4.7434</text:p>
          </table:table-cell>
          <table:table-cell office:value-type="string" table:style-name="c1">
            <text:p>2026-05-12 12:45</text:p>
          </table:table-cell>
          <table:table-cell office:value-type="float" office:value="4.7426275" table:style-name="c1">
            <text:p>4.7426</text:p>
          </table:table-cell>
          <table:table-cell office:value-type="float" office:value="-0.21553265494439477" table:style-name="c13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4:15</text:p>
          </table:table-cell>
          <table:table-cell office:value-type="float" office:value="4.9114545" table:style-name="c1">
            <text:p>4.9115</text:p>
          </table:table-cell>
          <table:table-cell office:value-type="string" table:style-name="c1">
            <text:p>2026-05-12 14:30</text:p>
          </table:table-cell>
          <table:table-cell office:value-type="float" office:value="4.7366305" table:style-name="c1">
            <text:p>4.7366</text:p>
          </table:table-cell>
          <table:table-cell office:value-type="float" office:value="-3.7523003495094853" table:style-name="c13">
            <text:p>-3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2 20:45</text:p>
          </table:table-cell>
          <table:table-cell office:value-type="float" office:value="4.727635" table:style-name="c1">
            <text:p>4.7276</text:p>
          </table:table-cell>
          <table:table-cell office:value-type="float" office:value="-2.786507021999185" table:style-name="c13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30</text:p>
          </table:table-cell>
          <table:table-cell office:value-type="float" office:value="4.969483499999999" table:style-name="c1">
            <text:p>4.9695</text:p>
          </table:table-cell>
          <table:table-cell office:value-type="string" table:style-name="c1">
            <text:p>2026-05-13 12:45</text:p>
          </table:table-cell>
          <table:table-cell office:value-type="float" office:value="5.779109" table:style-name="c1">
            <text:p>5.7791</text:p>
          </table:table-cell>
          <table:table-cell office:value-type="float" office:value="16.059477028327017" table:style-name="c14">
            <text:p>+16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4 05:45</text:p>
          </table:table-cell>
          <table:table-cell office:value-type="float" office:value="5.095451" table:style-name="c1">
            <text:p>5.0955</text:p>
          </table:table-cell>
          <table:table-cell office:value-type="float" office:value="-3.4803678022173767" table:style-name="c13">
            <text:p>-3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0:15</text:p>
          </table:table-cell>
          <table:table-cell office:value-type="float" office:value="5.2576275" table:style-name="c1">
            <text:p>5.2576</text:p>
          </table:table-cell>
          <table:table-cell office:value-type="string" table:style-name="c1">
            <text:p>2026-05-14 12:00</text:p>
          </table:table-cell>
          <table:table-cell office:value-type="float" office:value="5.1524225" table:style-name="c1">
            <text:p>5.1524</text:p>
          </table:table-cell>
          <table:table-cell office:value-type="float" office:value="-2.1968976040523946" table:style-name="c13">
            <text:p>-2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00</text:p>
          </table:table-cell>
          <table:table-cell office:value-type="float" office:value="5.148573" table:style-name="c1">
            <text:p>5.1486</text:p>
          </table:table-cell>
          <table:table-cell office:value-type="string" table:style-name="c1">
            <text:p>2026-05-19 02:15</text:p>
          </table:table-cell>
          <table:table-cell office:value-type="float" office:value="5.171413" table:style-name="c1">
            <text:p>5.1714</text:p>
          </table:table-cell>
          <table:table-cell office:value-type="float" office:value="0.24283127408315508" table:style-name="c14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6:15</text:p>
          </table:table-cell>
          <table:table-cell office:value-type="float" office:value="4.94247" table:style-name="c1">
            <text:p>4.9425</text:p>
          </table:table-cell>
          <table:table-cell office:value-type="string" table:style-name="c1">
            <text:p>2026-05-19 18:30</text:p>
          </table:table-cell>
          <table:table-cell office:value-type="float" office:value="4.9545215" table:style-name="c1">
            <text:p>4.9545</text:p>
          </table:table-cell>
          <table:table-cell office:value-type="float" office:value="0.043448144783875264" table:style-name="c14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5.171584499999999" table:style-name="c1">
            <text:p>5.1716</text:p>
          </table:table-cell>
          <table:table-cell office:value-type="string" table:style-name="c1">
            <text:p>2026-05-20 16:15</text:p>
          </table:table-cell>
          <table:table-cell office:value-type="float" office:value="5.0614680000000005" table:style-name="c1">
            <text:p>5.0615</text:p>
          </table:table-cell>
          <table:table-cell office:value-type="float" office:value="-2.3249039928091353" table:style-name="c13">
            <text:p>-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45</text:p>
          </table:table-cell>
          <table:table-cell office:value-type="float" office:value="4.917457499999999" table:style-name="c1">
            <text:p>4.9175</text:p>
          </table:table-cell>
          <table:table-cell office:value-type="string" table:style-name="c1">
            <text:p>2026-05-21 06:45</text:p>
          </table:table-cell>
          <table:table-cell office:value-type="float" office:value="4.9365305" table:style-name="c1">
            <text:p>4.9365</text:p>
          </table:table-cell>
          <table:table-cell office:value-type="float" office:value="0.18718769873458108" table:style-name="c14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5.224611" table:style-name="c1">
            <text:p>5.2246</text:p>
          </table:table-cell>
          <table:table-cell office:value-type="string" table:style-name="c1">
            <text:p>2026-05-22 00:15</text:p>
          </table:table-cell>
          <table:table-cell office:value-type="float" office:value="5.215391" table:style-name="c1">
            <text:p>5.2154</text:p>
          </table:table-cell>
          <table:table-cell office:value-type="float" office:value="-0.37601970001212015" table:style-name="c13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9:30</text:p>
          </table:table-cell>
          <table:table-cell office:value-type="float" office:value="5.316657" table:style-name="c1">
            <text:p>5.3167</text:p>
          </table:table-cell>
          <table:table-cell office:value-type="string" table:style-name="c1">
            <text:p>2026-05-22 13:30</text:p>
          </table:table-cell>
          <table:table-cell office:value-type="float" office:value="5.373312" table:style-name="c1">
            <text:p>5.3733</text:p>
          </table:table-cell>
          <table:table-cell office:value-type="float" office:value="0.8635830619127871" table:style-name="c14">
            <text:p>+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45</text:p>
          </table:table-cell>
          <table:table-cell office:value-type="float" office:value="5.508753" table:style-name="c1">
            <text:p>5.5088</text:p>
          </table:table-cell>
          <table:table-cell office:value-type="string" table:style-name="c1">
            <text:p>2026-05-22 14:15</text:p>
          </table:table-cell>
          <table:table-cell office:value-type="float" office:value="5.415291000000001" table:style-name="c1">
            <text:p>5.4153</text:p>
          </table:table-cell>
          <table:table-cell office:value-type="float" office:value="-1.8931174933600858" table:style-name="c13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0:45</text:p>
          </table:table-cell>
          <table:table-cell office:value-type="float" office:value="5.489743499999999" table:style-name="c1">
            <text:p>5.4897</text:p>
          </table:table-cell>
          <table:table-cell office:value-type="string" table:style-name="c1">
            <text:p>2026-05-23 22:30</text:p>
          </table:table-cell>
          <table:table-cell office:value-type="float" office:value="5.3483245" table:style-name="c1">
            <text:p>5.3483</text:p>
          </table:table-cell>
          <table:table-cell office:value-type="float" office:value="-2.7708088852511747" table:style-name="c13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6:45</text:p>
          </table:table-cell>
          <table:table-cell office:value-type="float" office:value="5.216607" table:style-name="c1">
            <text:p>5.2166</text:p>
          </table:table-cell>
          <table:table-cell office:value-type="string" table:style-name="c1">
            <text:p>2026-05-24 08:30</text:p>
          </table:table-cell>
          <table:table-cell office:value-type="float" office:value="5.1704135" table:style-name="c1">
            <text:p>5.1704</text:p>
          </table:table-cell>
          <table:table-cell office:value-type="float" office:value="-1.0836383991835952" table:style-name="c13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16:15</text:p>
          </table:table-cell>
          <table:table-cell office:value-type="float" office:value="5.1955965" table:style-name="c1">
            <text:p>5.1956</text:p>
          </table:table-cell>
          <table:table-cell office:value-type="string" table:style-name="c1">
            <text:p>2026-05-24 19:30</text:p>
          </table:table-cell>
          <table:table-cell office:value-type="float" office:value="5.178409500000001" table:style-name="c1">
            <text:p>5.1784</text:p>
          </table:table-cell>
          <table:table-cell office:value-type="float" office:value="-0.5300380926521076" table:style-name="c13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0:30</text:p>
          </table:table-cell>
          <table:table-cell office:value-type="float" office:value="5.3276625" table:style-name="c1">
            <text:p>5.3277</text:p>
          </table:table-cell>
          <table:table-cell office:value-type="string" table:style-name="c1">
            <text:p>2026-05-25 16:30</text:p>
          </table:table-cell>
          <table:table-cell office:value-type="float" office:value="5.612192500000001" table:style-name="c1">
            <text:p>5.6122</text:p>
          </table:table-cell>
          <table:table-cell office:value-type="float" office:value="5.130040185400286" table:style-name="c14">
            <text:p>+5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23:30</text:p>
          </table:table-cell>
          <table:table-cell office:value-type="float" office:value="5.711854499999999" table:style-name="c1">
            <text:p>5.7119</text:p>
          </table:table-cell>
          <table:table-cell office:value-type="string" table:style-name="c1">
            <text:p>2026-05-25 23:45</text:p>
          </table:table-cell>
          <table:table-cell office:value-type="float" office:value="5.662167500000001" table:style-name="c1">
            <text:p>5.6622</text:p>
          </table:table-cell>
          <table:table-cell office:value-type="float" office:value="-1.0680536913624028" table:style-name="c13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5.960979" table:style-name="c1">
            <text:p>5.961</text:p>
          </table:table-cell>
          <table:table-cell office:value-type="string" table:style-name="c1">
            <text:p>2026-05-26 15:45</text:p>
          </table:table-cell>
          <table:table-cell office:value-type="float" office:value="5.8340815" table:style-name="c1">
            <text:p>5.8341</text:p>
          </table:table-cell>
          <table:table-cell office:value-type="float" office:value="-2.324447526463358" table:style-name="c13">
            <text:p>-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6:30</text:p>
          </table:table-cell>
          <table:table-cell office:value-type="float" office:value="6.087041999999999" table:style-name="c1">
            <text:p>6.087</text:p>
          </table:table-cell>
          <table:table-cell office:value-type="string" table:style-name="c1">
            <text:p>2026-05-29 09:00</text:p>
          </table:table-cell>
          <table:table-cell office:value-type="float" office:value="6.058969" table:style-name="c1">
            <text:p>6.059</text:p>
          </table:table-cell>
          <table:table-cell office:value-type="float" office:value="-0.6601708848238519" table:style-name="c13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15</text:p>
          </table:table-cell>
          <table:table-cell office:value-type="float" office:value="6.353174999999999" table:style-name="c1">
            <text:p>6.3532</text:p>
          </table:table-cell>
          <table:table-cell office:value-type="string" table:style-name="c1">
            <text:p>2026-05-29 18:30</text:p>
          </table:table-cell>
          <table:table-cell office:value-type="float" office:value="6.386805" table:style-name="c1">
            <text:p>6.3868</text:p>
          </table:table-cell>
          <table:table-cell office:value-type="float" office:value="0.32838347448322924" table:style-name="c14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5:00</text:p>
          </table:table-cell>
          <table:table-cell office:value-type="float" office:value="6.749373" table:style-name="c1">
            <text:p>6.7494</text:p>
          </table:table-cell>
          <table:table-cell office:value-type="string" table:style-name="c1">
            <text:p>2026-05-30 07:15</text:p>
          </table:table-cell>
          <table:table-cell office:value-type="float" office:value="6.734631000000001" table:style-name="c1">
            <text:p>6.7346</text:p>
          </table:table-cell>
          <table:table-cell office:value-type="float" office:value="-0.41788366666057897" table:style-name="c13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00</text:p>
          </table:table-cell>
          <table:table-cell office:value-type="float" office:value="6.5912939999999995" table:style-name="c1">
            <text:p>6.5913</text:p>
          </table:table-cell>
          <table:table-cell office:value-type="string" table:style-name="c1">
            <text:p>2026-05-31 06:15</text:p>
          </table:table-cell>
          <table:table-cell office:value-type="float" office:value="6.524736" table:style-name="c1">
            <text:p>6.5247</text:p>
          </table:table-cell>
          <table:table-cell office:value-type="float" office:value="-1.2076679824022385" table:style-name="c13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00</text:p>
          </table:table-cell>
          <table:table-cell office:value-type="float" office:value="6.545271" table:style-name="c1">
            <text:p>6.5453</text:p>
          </table:table-cell>
          <table:table-cell office:value-type="string" table:style-name="c1">
            <text:p>2026-06-01 01:00</text:p>
          </table:table-cell>
          <table:table-cell office:value-type="float" office:value="6.489753500000001" table:style-name="c1">
            <text:p>6.4898</text:p>
          </table:table-cell>
          <table:table-cell office:value-type="float" office:value="-1.046412245520456" table:style-name="c13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2:30</text:p>
          </table:table-cell>
          <table:table-cell office:value-type="float" office:value="6.78339" table:style-name="c1">
            <text:p>6.7834</text:p>
          </table:table-cell>
          <table:table-cell office:value-type="string" table:style-name="c1">
            <text:p>2026-06-01 20:30</text:p>
          </table:table-cell>
          <table:table-cell office:value-type="float" office:value="7.0814575" table:style-name="c1">
            <text:p>7.0815</text:p>
          </table:table-cell>
          <table:table-cell office:value-type="float" office:value="4.185395008358639" table:style-name="c14">
            <text:p>+4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00</text:p>
          </table:table-cell>
          <table:table-cell office:value-type="float" office:value="9.28464" table:style-name="c10">
            <text:p>9.2846</text:p>
          </table:table-cell>
          <table:table-cell office:value-type="string" table:style-name="c10">
            <text:p>2026-03-05 23:00</text:p>
          </table:table-cell>
          <table:table-cell office:value-type="float" office:value="9.215390000000001" table:style-name="c10">
            <text:p>9.2154</text:p>
          </table:table-cell>
          <table:table-cell office:value-type="float" office:value="-0.9442645553300655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30</text:p>
          </table:table-cell>
          <table:table-cell office:value-type="float" office:value="8.92446" table:style-name="c10">
            <text:p>8.9245</text:p>
          </table:table-cell>
          <table:table-cell office:value-type="string" table:style-name="c10">
            <text:p>2026-03-09 17:45</text:p>
          </table:table-cell>
          <table:table-cell office:value-type="float" office:value="8.89555" table:style-name="c10">
            <text:p>8.8956</text:p>
          </table:table-cell>
          <table:table-cell office:value-type="float" office:value="-0.5231936100335455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20:00</text:p>
          </table:table-cell>
          <table:table-cell office:value-type="float" office:value="9.014505" table:style-name="c10">
            <text:p>9.0145</text:p>
          </table:table-cell>
          <table:table-cell office:value-type="string" table:style-name="c10">
            <text:p>2026-03-09 22:15</text:p>
          </table:table-cell>
          <table:table-cell office:value-type="float" office:value="8.965515000000002" table:style-name="c10">
            <text:p>8.9655</text:p>
          </table:table-cell>
          <table:table-cell office:value-type="float" office:value="-0.7422710895939155" table:style-name="c11">
            <text:p>-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5:00</text:p>
          </table:table-cell>
          <table:table-cell office:value-type="float" office:value="9.02451" table:style-name="c10">
            <text:p>9.0245</text:p>
          </table:table-cell>
          <table:table-cell office:value-type="string" table:style-name="c10">
            <text:p>2026-03-11 05:30</text:p>
          </table:table-cell>
          <table:table-cell office:value-type="float" office:value="8.955520000000002" table:style-name="c10">
            <text:p>8.9555</text:p>
          </table:table-cell>
          <table:table-cell office:value-type="float" office:value="-0.9628454562075728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9.074535" table:style-name="c10">
            <text:p>9.0745</text:p>
          </table:table-cell>
          <table:table-cell office:value-type="string" table:style-name="c10">
            <text:p>2026-03-11 15:15</text:p>
          </table:table-cell>
          <table:table-cell office:value-type="float" office:value="8.9955" table:style-name="c10">
            <text:p>8.9955</text:p>
          </table:table-cell>
          <table:table-cell office:value-type="float" office:value="-1.0691126818068386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7:30</text:p>
          </table:table-cell>
          <table:table-cell office:value-type="float" office:value="9.14457" table:style-name="c10">
            <text:p>9.1446</text:p>
          </table:table-cell>
          <table:table-cell office:value-type="string" table:style-name="c10">
            <text:p>2026-03-11 20:15</text:p>
          </table:table-cell>
          <table:table-cell office:value-type="float" office:value="9.045475000000001" table:style-name="c10">
            <text:p>9.0455</text:p>
          </table:table-cell>
          <table:table-cell office:value-type="float" office:value="-1.2813823342704755" table:style-name="c11">
            <text:p>-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7:45</text:p>
          </table:table-cell>
          <table:table-cell office:value-type="float" office:value="8.944469999999999" table:style-name="c10">
            <text:p>8.9445</text:p>
          </table:table-cell>
          <table:table-cell office:value-type="string" table:style-name="c10">
            <text:p>2026-03-12 13:00</text:p>
          </table:table-cell>
          <table:table-cell office:value-type="float" office:value="9.03548" table:style-name="c10">
            <text:p>9.0355</text:p>
          </table:table-cell>
          <table:table-cell office:value-type="float" office:value="0.8155662155499677" table:style-name="c12">
            <text:p>+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00</text:p>
          </table:table-cell>
          <table:table-cell office:value-type="float" office:value="9.28464" table:style-name="c10">
            <text:p>9.2846</text:p>
          </table:table-cell>
          <table:table-cell office:value-type="string" table:style-name="c10">
            <text:p>2026-03-13 15:00</text:p>
          </table:table-cell>
          <table:table-cell office:value-type="float" office:value="9.365314999999999" table:style-name="c10">
            <text:p>9.3653</text:p>
          </table:table-cell>
          <table:table-cell office:value-type="float" office:value="0.6672712707762596" table:style-name="c12">
            <text:p>+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15</text:p>
          </table:table-cell>
          <table:table-cell office:value-type="float" office:value="9.294645" table:style-name="c10">
            <text:p>9.2946</text:p>
          </table:table-cell>
          <table:table-cell office:value-type="string" table:style-name="c10">
            <text:p>2026-03-15 12:15</text:p>
          </table:table-cell>
          <table:table-cell office:value-type="float" office:value="9.255370000000001" table:style-name="c10">
            <text:p>9.2554</text:p>
          </table:table-cell>
          <table:table-cell office:value-type="float" office:value="-0.62161045021083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1:45</text:p>
          </table:table-cell>
          <table:table-cell office:value-type="float" office:value="9.314655" table:style-name="c10">
            <text:p>9.3147</text:p>
          </table:table-cell>
          <table:table-cell office:value-type="string" table:style-name="c10">
            <text:p>2026-03-16 02:30</text:p>
          </table:table-cell>
          <table:table-cell office:value-type="float" office:value="9.43528" table:style-name="c10">
            <text:p>9.4353</text:p>
          </table:table-cell>
          <table:table-cell office:value-type="float" office:value="1.0925136280409697" table:style-name="c12">
            <text:p>+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9.734865" table:style-name="c10">
            <text:p>9.7349</text:p>
          </table:table-cell>
          <table:table-cell office:value-type="string" table:style-name="c10">
            <text:p>2026-03-16 06:15</text:p>
          </table:table-cell>
          <table:table-cell office:value-type="float" office:value="9.685155" table:style-name="c10">
            <text:p>9.6852</text:p>
          </table:table-cell>
          <table:table-cell office:value-type="float" office:value="-0.7095180554121616" table:style-name="c11">
            <text:p>-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1:00</text:p>
          </table:table-cell>
          <table:table-cell office:value-type="float" office:value="9.734865" table:style-name="c10">
            <text:p>9.7349</text:p>
          </table:table-cell>
          <table:table-cell office:value-type="string" table:style-name="c10">
            <text:p>2026-03-16 11:30</text:p>
          </table:table-cell>
          <table:table-cell office:value-type="float" office:value="9.645175" table:style-name="c10">
            <text:p>9.6452</text:p>
          </table:table-cell>
          <table:table-cell office:value-type="float" office:value="-1.1193858859367856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45</text:p>
          </table:table-cell>
          <table:table-cell office:value-type="float" office:value="9.754875" table:style-name="c10">
            <text:p>9.7549</text:p>
          </table:table-cell>
          <table:table-cell office:value-type="string" table:style-name="c10">
            <text:p>2026-03-16 14:30</text:p>
          </table:table-cell>
          <table:table-cell office:value-type="float" office:value="9.685155" table:style-name="c10">
            <text:p>9.6852</text:p>
          </table:table-cell>
          <table:table-cell office:value-type="float" office:value="-0.9131908388882337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3-25 02:30</text:p>
          </table:table-cell>
          <table:table-cell office:value-type="float" office:value="9.215390000000001" table:style-name="c10">
            <text:p>9.2154</text:p>
          </table:table-cell>
          <table:table-cell office:value-type="float" office:value="-0.08291033407207271" table:style-name="c11">
            <text:p>-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5:15</text:p>
          </table:table-cell>
          <table:table-cell office:value-type="float" office:value="9.30465" table:style-name="c10">
            <text:p>9.3047</text:p>
          </table:table-cell>
          <table:table-cell office:value-type="string" table:style-name="c10">
            <text:p>2026-03-25 08:00</text:p>
          </table:table-cell>
          <table:table-cell office:value-type="float" office:value="9.285355" table:style-name="c10">
            <text:p>9.2854</text:p>
          </table:table-cell>
          <table:table-cell office:value-type="float" office:value="-0.40685490206511243" table:style-name="c11">
            <text:p>-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8:45</text:p>
          </table:table-cell>
          <table:table-cell office:value-type="float" office:value="9.394695" table:style-name="c10">
            <text:p>9.3947</text:p>
          </table:table-cell>
          <table:table-cell office:value-type="string" table:style-name="c10">
            <text:p>2026-03-25 12:30</text:p>
          </table:table-cell>
          <table:table-cell office:value-type="float" office:value="9.365314999999999" table:style-name="c10">
            <text:p>9.3653</text:p>
          </table:table-cell>
          <table:table-cell office:value-type="float" office:value="-0.5120045375076376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2:45</text:p>
          </table:table-cell>
          <table:table-cell office:value-type="float" office:value="9.38469" table:style-name="c10">
            <text:p>9.3847</text:p>
          </table:table-cell>
          <table:table-cell office:value-type="string" table:style-name="c10">
            <text:p>2026-03-26 01:45</text:p>
          </table:table-cell>
          <table:table-cell office:value-type="float" office:value="9.345325" table:style-name="c10">
            <text:p>9.3453</text:p>
          </table:table-cell>
          <table:table-cell office:value-type="float" office:value="-0.6185212796053996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8.754375" table:style-name="c10">
            <text:p>8.7544</text:p>
          </table:table-cell>
          <table:table-cell office:value-type="string" table:style-name="c10">
            <text:p>2026-03-30 10:45</text:p>
          </table:table-cell>
          <table:table-cell office:value-type="float" office:value="8.725635" table:style-name="c10">
            <text:p>8.7256</text:p>
          </table:table-cell>
          <table:table-cell office:value-type="float" office:value="-0.5275367386592178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11:30</text:p>
          </table:table-cell>
          <table:table-cell office:value-type="float" office:value="8.834415" table:style-name="c10">
            <text:p>8.8344</text:p>
          </table:table-cell>
          <table:table-cell office:value-type="string" table:style-name="c10">
            <text:p>2026-03-30 14:00</text:p>
          </table:table-cell>
          <table:table-cell office:value-type="float" office:value="8.845575" table:style-name="c10">
            <text:p>8.8456</text:p>
          </table:table-cell>
          <table:table-cell office:value-type="float" office:value="-0.07382836809228799" table:style-name="c11">
            <text:p>-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8.76438" table:style-name="c10">
            <text:p>8.7644</text:p>
          </table:table-cell>
          <table:table-cell office:value-type="string" table:style-name="c10">
            <text:p>2026-03-31 05:15</text:p>
          </table:table-cell>
          <table:table-cell office:value-type="float" office:value="8.69565" table:style-name="c10">
            <text:p>8.6957</text:p>
          </table:table-cell>
          <table:table-cell office:value-type="float" office:value="-0.9825293329362661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3:15</text:p>
          </table:table-cell>
          <table:table-cell office:value-type="float" office:value="8.684339999999999" table:style-name="c10">
            <text:p>8.6843</text:p>
          </table:table-cell>
          <table:table-cell office:value-type="string" table:style-name="c10">
            <text:p>2026-03-31 15:00</text:p>
          </table:table-cell>
          <table:table-cell office:value-type="float" office:value="8.625685" table:style-name="c10">
            <text:p>8.6257</text:p>
          </table:table-cell>
          <table:table-cell office:value-type="float" office:value="-0.8739609954815042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8.784389999999998" table:style-name="c10">
            <text:p>8.7844</text:p>
          </table:table-cell>
          <table:table-cell office:value-type="string" table:style-name="c10">
            <text:p>2026-03-31 20:00</text:p>
          </table:table-cell>
          <table:table-cell office:value-type="float" office:value="8.77561" table:style-name="c10">
            <text:p>8.7756</text:p>
          </table:table-cell>
          <table:table-cell office:value-type="float" office:value="-0.2996502248875377" table:style-name="c11">
            <text:p>-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8.92446" table:style-name="c10">
            <text:p>8.9245</text:p>
          </table:table-cell>
          <table:table-cell office:value-type="string" table:style-name="c10">
            <text:p>2026-04-01 09:15</text:p>
          </table:table-cell>
          <table:table-cell office:value-type="float" office:value="9.005495" table:style-name="c10">
            <text:p>9.0055</text:p>
          </table:table-cell>
          <table:table-cell office:value-type="float" office:value="0.7062950082693975" table:style-name="c12">
            <text:p>+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9:15</text:p>
          </table:table-cell>
          <table:table-cell office:value-type="float" office:value="8.774384999999999" table:style-name="c10">
            <text:p>8.7744</text:p>
          </table:table-cell>
          <table:table-cell office:value-type="string" table:style-name="c10">
            <text:p>2026-04-04 20:15</text:p>
          </table:table-cell>
          <table:table-cell office:value-type="float" office:value="8.69565" table:style-name="c10">
            <text:p>8.6957</text:p>
          </table:table-cell>
          <table:table-cell office:value-type="float" office:value="-1.0954340885429348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8.894445" table:style-name="c10">
            <text:p>8.8944</text:p>
          </table:table-cell>
          <table:table-cell office:value-type="string" table:style-name="c10">
            <text:p>2026-04-06 05:15</text:p>
          </table:table-cell>
          <table:table-cell office:value-type="float" office:value="8.925535" table:style-name="c10">
            <text:p>8.9255</text:p>
          </table:table-cell>
          <table:table-cell office:value-type="float" office:value="0.14894527466300378" table:style-name="c12">
            <text:p>+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6:15</text:p>
          </table:table-cell>
          <table:table-cell office:value-type="float" office:value="9.0045" table:style-name="c10">
            <text:p>9.0045</text:p>
          </table:table-cell>
          <table:table-cell office:value-type="string" table:style-name="c10">
            <text:p>2026-04-06 06:30</text:p>
          </table:table-cell>
          <table:table-cell office:value-type="float" office:value="8.91554" table:style-name="c10">
            <text:p>8.9155</text:p>
          </table:table-cell>
          <table:table-cell office:value-type="float" office:value="-1.1858755562218937" table:style-name="c11">
            <text:p>-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9.044519999999999" table:style-name="c10">
            <text:p>9.0445</text:p>
          </table:table-cell>
          <table:table-cell office:value-type="string" table:style-name="c10">
            <text:p>2026-04-06 12:15</text:p>
          </table:table-cell>
          <table:table-cell office:value-type="float" office:value="9.03548" table:style-name="c10">
            <text:p>9.0355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08:45</text:p>
          </table:table-cell>
          <table:table-cell office:value-type="float" office:value="8.834415" table:style-name="c10">
            <text:p>8.8344</text:p>
          </table:table-cell>
          <table:table-cell office:value-type="string" table:style-name="c10">
            <text:p>2026-04-07 10:15</text:p>
          </table:table-cell>
          <table:table-cell office:value-type="float" office:value="8.7956" table:style-name="c10">
            <text:p>8.7956</text:p>
          </table:table-cell>
          <table:table-cell office:value-type="float" office:value="-0.6383830100804677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4-08 03:00</text:p>
          </table:table-cell>
          <table:table-cell office:value-type="float" office:value="9.1954" table:style-name="c10">
            <text:p>9.1954</text:p>
          </table:table-cell>
          <table:table-cell office:value-type="float" office:value="-0.2996502248875599" table:style-name="c11">
            <text:p>-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09 23:00</text:p>
          </table:table-cell>
          <table:table-cell office:value-type="float" office:value="9.01549" table:style-name="c10">
            <text:p>9.0155</text:p>
          </table:table-cell>
          <table:table-cell office:value-type="float" office:value="-1.1761368163171082" table:style-name="c11">
            <text:p>-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9.124559999999999" table:style-name="c10">
            <text:p>9.1246</text:p>
          </table:table-cell>
          <table:table-cell office:value-type="string" table:style-name="c10">
            <text:p>2026-04-10 16:00</text:p>
          </table:table-cell>
          <table:table-cell office:value-type="float" office:value="9.055470000000001" table:style-name="c10">
            <text:p>9.0555</text:p>
          </table:table-cell>
          <table:table-cell office:value-type="float" office:value="-0.955573578671165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11 21:30</text:p>
          </table:table-cell>
          <table:table-cell office:value-type="float" office:value="9.155420000000001" table:style-name="c10">
            <text:p>9.1554</text:p>
          </table:table-cell>
          <table:table-cell office:value-type="float" office:value="0.3577147186846208" table:style-name="c12">
            <text:p>+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9.124559999999999" table:style-name="c10">
            <text:p>9.1246</text:p>
          </table:table-cell>
          <table:table-cell office:value-type="string" table:style-name="c10">
            <text:p>2026-04-14 01:00</text:p>
          </table:table-cell>
          <table:table-cell office:value-type="float" office:value="9.215390000000001" table:style-name="c10">
            <text:p>9.2154</text:p>
          </table:table-cell>
          <table:table-cell office:value-type="float" office:value="0.7935553647518523" table:style-name="c12">
            <text:p>+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9.06453" table:style-name="c10">
            <text:p>9.0645</text:p>
          </table:table-cell>
          <table:table-cell office:value-type="string" table:style-name="c10">
            <text:p>2026-04-15 02:45</text:p>
          </table:table-cell>
          <table:table-cell office:value-type="float" office:value="9.03548" table:style-name="c10">
            <text:p>9.0355</text:p>
          </table:table-cell>
          <table:table-cell office:value-type="float" office:value="-0.519739297238786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7:30</text:p>
          </table:table-cell>
          <table:table-cell office:value-type="float" office:value="9.24462" table:style-name="c10">
            <text:p>9.2446</text:p>
          </table:table-cell>
          <table:table-cell office:value-type="string" table:style-name="c10">
            <text:p>2026-04-15 20:45</text:p>
          </table:table-cell>
          <table:table-cell office:value-type="float" office:value="9.265365000000001" table:style-name="c10">
            <text:p>9.2654</text:p>
          </table:table-cell>
          <table:table-cell office:value-type="float" office:value="0.024052209447256168" table:style-name="c12">
            <text:p>+0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9.334665" table:style-name="c10">
            <text:p>9.3347</text:p>
          </table:table-cell>
          <table:table-cell office:value-type="string" table:style-name="c10">
            <text:p>2026-04-16 06:15</text:p>
          </table:table-cell>
          <table:table-cell office:value-type="float" office:value="9.295350000000001" table:style-name="c10">
            <text:p>9.2954</text:p>
          </table:table-cell>
          <table:table-cell office:value-type="float" office:value="-0.6202301277014044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9.414705" table:style-name="c10">
            <text:p>9.4147</text:p>
          </table:table-cell>
          <table:table-cell office:value-type="string" table:style-name="c10">
            <text:p>2026-04-16 14:00</text:p>
          </table:table-cell>
          <table:table-cell office:value-type="float" office:value="9.235380000000001" table:style-name="c10">
            <text:p>9.2354</text:p>
          </table:table-cell>
          <table:table-cell office:value-type="float" office:value="-2.1008255130670395" table:style-name="c11">
            <text:p>-2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9.42471" table:style-name="c10">
            <text:p>9.4247</text:p>
          </table:table-cell>
          <table:table-cell office:value-type="string" table:style-name="c10">
            <text:p>2026-04-16 21:30</text:p>
          </table:table-cell>
          <table:table-cell office:value-type="float" office:value="9.47526" table:style-name="c10">
            <text:p>9.4753</text:p>
          </table:table-cell>
          <table:table-cell office:value-type="float" office:value="0.33538385011318006" table:style-name="c12">
            <text:p>+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15</text:p>
          </table:table-cell>
          <table:table-cell office:value-type="float" office:value="9.454724999999998" table:style-name="c10">
            <text:p>9.4547</text:p>
          </table:table-cell>
          <table:table-cell office:value-type="string" table:style-name="c10">
            <text:p>2026-04-17 10:30</text:p>
          </table:table-cell>
          <table:table-cell office:value-type="float" office:value="9.485255" table:style-name="c10">
            <text:p>9.4853</text:p>
          </table:table-cell>
          <table:table-cell office:value-type="float" office:value="0.1223618376526181" table:style-name="c12">
            <text:p>+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30</text:p>
          </table:table-cell>
          <table:table-cell office:value-type="float" office:value="9.72486" table:style-name="c10">
            <text:p>9.7249</text:p>
          </table:table-cell>
          <table:table-cell office:value-type="string" table:style-name="c10">
            <text:p>2026-04-17 17:30</text:p>
          </table:table-cell>
          <table:table-cell office:value-type="float" office:value="9.69515" table:style-name="c10">
            <text:p>9.6951</text:p>
          </table:table-cell>
          <table:table-cell office:value-type="float" office:value="-0.5047949775112581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5:30</text:p>
          </table:table-cell>
          <table:table-cell office:value-type="float" office:value="9.414705" table:style-name="c10">
            <text:p>9.4147</text:p>
          </table:table-cell>
          <table:table-cell office:value-type="string" table:style-name="c10">
            <text:p>2026-04-26 13:00</text:p>
          </table:table-cell>
          <table:table-cell office:value-type="float" office:value="9.43528" table:style-name="c10">
            <text:p>9.4353</text:p>
          </table:table-cell>
          <table:table-cell office:value-type="float" office:value="0.01820423773237767" table:style-name="c12">
            <text:p>+0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22:15</text:p>
          </table:table-cell>
          <table:table-cell office:value-type="float" office:value="9.494745" table:style-name="c10">
            <text:p>9.4947</text:p>
          </table:table-cell>
          <table:table-cell office:value-type="string" table:style-name="c10">
            <text:p>2026-04-26 22:30</text:p>
          </table:table-cell>
          <table:table-cell office:value-type="float" office:value="9.465265" table:style-name="c10">
            <text:p>9.4653</text:p>
          </table:table-cell>
          <table:table-cell office:value-type="float" office:value="-0.509766873517925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9.394695" table:style-name="c10">
            <text:p>9.3947</text:p>
          </table:table-cell>
          <table:table-cell office:value-type="string" table:style-name="c10">
            <text:p>2026-04-29 12:15</text:p>
          </table:table-cell>
          <table:table-cell office:value-type="float" office:value="9.27536" table:style-name="c10">
            <text:p>9.2754</text:p>
          </table:table-cell>
          <table:table-cell office:value-type="float" office:value="-1.467598944297832" table:style-name="c11">
            <text:p>-1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9.264629999999999" table:style-name="c10">
            <text:p>9.2646</text:p>
          </table:table-cell>
          <table:table-cell office:value-type="string" table:style-name="c10">
            <text:p>2026-05-01 16:30</text:p>
          </table:table-cell>
          <table:table-cell office:value-type="float" office:value="9.185405" table:style-name="c10">
            <text:p>9.1854</text:p>
          </table:table-cell>
          <table:table-cell office:value-type="float" office:value="-1.0533245752393672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9.214605" table:style-name="c10">
            <text:p>9.2146</text:p>
          </table:table-cell>
          <table:table-cell office:value-type="string" table:style-name="c10">
            <text:p>2026-05-02 23:15</text:p>
          </table:table-cell>
          <table:table-cell office:value-type="float" office:value="9.17541" table:style-name="c10">
            <text:p>9.1754</text:p>
          </table:table-cell>
          <table:table-cell office:value-type="float" office:value="-0.6244070645458955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11:45</text:p>
          </table:table-cell>
          <table:table-cell office:value-type="float" office:value="9.18459" table:style-name="c10">
            <text:p>9.1846</text:p>
          </table:table-cell>
          <table:table-cell office:value-type="string" table:style-name="c10">
            <text:p>2026-05-03 13:30</text:p>
          </table:table-cell>
          <table:table-cell office:value-type="float" office:value="9.135430000000001" table:style-name="c10">
            <text:p>9.1354</text:p>
          </table:table-cell>
          <table:table-cell office:value-type="float" office:value="-0.7340744069141758" table:style-name="c11">
            <text:p>-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9.194595" table:style-name="c10">
            <text:p>9.1946</text:p>
          </table:table-cell>
          <table:table-cell office:value-type="string" table:style-name="c10">
            <text:p>2026-05-03 23:30</text:p>
          </table:table-cell>
          <table:table-cell office:value-type="float" office:value="9.145425000000001" table:style-name="c10">
            <text:p>9.1454</text:p>
          </table:table-cell>
          <table:table-cell office:value-type="float" office:value="-0.7336016928967237" table:style-name="c11">
            <text:p>-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9.274634999999998" table:style-name="c10">
            <text:p>9.2746</text:p>
          </table:table-cell>
          <table:table-cell office:value-type="string" table:style-name="c10">
            <text:p>2026-05-04 06:30</text:p>
          </table:table-cell>
          <table:table-cell office:value-type="float" office:value="9.27536" table:style-name="c10">
            <text:p>9.2754</text:p>
          </table:table-cell>
          <table:table-cell office:value-type="float" office:value="-0.19209860700717396" table:style-name="c11">
            <text:p>-0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9:00</text:p>
          </table:table-cell>
          <table:table-cell office:value-type="float" office:value="9.4047" table:style-name="c10">
            <text:p>9.4047</text:p>
          </table:table-cell>
          <table:table-cell office:value-type="string" table:style-name="c10">
            <text:p>2026-05-04 10:15</text:p>
          </table:table-cell>
          <table:table-cell office:value-type="float" office:value="9.345325" table:style-name="c10">
            <text:p>9.3453</text:p>
          </table:table-cell>
          <table:table-cell office:value-type="float" office:value="-0.8299712343296295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0:45</text:p>
          </table:table-cell>
          <table:table-cell office:value-type="float" office:value="9.48474" table:style-name="c10">
            <text:p>9.4847</text:p>
          </table:table-cell>
          <table:table-cell office:value-type="string" table:style-name="c10">
            <text:p>2026-05-04 11:00</text:p>
          </table:table-cell>
          <table:table-cell office:value-type="float" office:value="9.41529" table:style-name="c10">
            <text:p>9.4153</text:p>
          </table:table-cell>
          <table:table-cell office:value-type="float" office:value="-0.930665096881933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9.524759999999999" table:style-name="c10">
            <text:p>9.5248</text:p>
          </table:table-cell>
          <table:table-cell office:value-type="string" table:style-name="c10">
            <text:p>2026-05-04 16:00</text:p>
          </table:table-cell>
          <table:table-cell office:value-type="float" office:value="9.41529" table:style-name="c10">
            <text:p>9.4153</text:p>
          </table:table-cell>
          <table:table-cell office:value-type="float" office:value="-1.3469228065588923" table:style-name="c11">
            <text:p>-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2:45</text:p>
          </table:table-cell>
          <table:table-cell office:value-type="float" office:value="9.50475" table:style-name="c10">
            <text:p>9.5047</text:p>
          </table:table-cell>
          <table:table-cell office:value-type="string" table:style-name="c10">
            <text:p>2026-05-05 06:30</text:p>
          </table:table-cell>
          <table:table-cell office:value-type="float" office:value="9.505245" table:style-name="c10">
            <text:p>9.5052</text:p>
          </table:table-cell>
          <table:table-cell office:value-type="float" office:value="-0.1947024882821613" table:style-name="c11">
            <text:p>-0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9.624809999999998" table:style-name="c10">
            <text:p>9.6248</text:p>
          </table:table-cell>
          <table:table-cell office:value-type="string" table:style-name="c10">
            <text:p>2026-05-05 09:15</text:p>
          </table:table-cell>
          <table:table-cell office:value-type="float" office:value="9.545225000000002" table:style-name="c10">
            <text:p>9.5452</text:p>
          </table:table-cell>
          <table:table-cell office:value-type="float" office:value="-1.0251205454964496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0:00</text:p>
          </table:table-cell>
          <table:table-cell office:value-type="float" office:value="9.624809999999998" table:style-name="c10">
            <text:p>9.6248</text:p>
          </table:table-cell>
          <table:table-cell office:value-type="string" table:style-name="c10">
            <text:p>2026-05-05 14:15</text:p>
          </table:table-cell>
          <table:table-cell office:value-type="float" office:value="9.65517" table:style-name="c10">
            <text:p>9.6552</text:p>
          </table:table-cell>
          <table:table-cell office:value-type="float" office:value="0.11490424403184374" table:style-name="c12">
            <text:p>+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1:00</text:p>
          </table:table-cell>
          <table:table-cell office:value-type="float" office:value="9.794894999999999" table:style-name="c10">
            <text:p>9.7949</text:p>
          </table:table-cell>
          <table:table-cell office:value-type="string" table:style-name="c10">
            <text:p>2026-05-05 22:45</text:p>
          </table:table-cell>
          <table:table-cell office:value-type="float" office:value="9.765115" table:style-name="c10">
            <text:p>9.7651</text:p>
          </table:table-cell>
          <table:table-cell office:value-type="float" office:value="-0.5033281610981821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10.025009999999998" table:style-name="c10">
            <text:p>10.025</text:p>
          </table:table-cell>
          <table:table-cell office:value-type="string" table:style-name="c10">
            <text:p>2026-05-07 09:30</text:p>
          </table:table-cell>
          <table:table-cell office:value-type="float" office:value="9.995000000000001" table:style-name="c10">
            <text:p>9.995</text:p>
          </table:table-cell>
          <table:table-cell office:value-type="float" office:value="-0.4986529190494249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4:30</text:p>
          </table:table-cell>
          <table:table-cell office:value-type="float" office:value="9.894945" table:style-name="c10">
            <text:p>9.8949</text:p>
          </table:table-cell>
          <table:table-cell office:value-type="string" table:style-name="c10">
            <text:p>2026-05-08 06:00</text:p>
          </table:table-cell>
          <table:table-cell office:value-type="float" office:value="9.825085000000001" table:style-name="c10">
            <text:p>9.8251</text:p>
          </table:table-cell>
          <table:table-cell office:value-type="float" office:value="-0.9045057341400042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10.26513" table:style-name="c10">
            <text:p>10.265</text:p>
          </table:table-cell>
          <table:table-cell office:value-type="string" table:style-name="c10">
            <text:p>2026-05-08 21:00</text:p>
          </table:table-cell>
          <table:table-cell office:value-type="float" office:value="10.304845" table:style-name="c10">
            <text:p>10.305</text:p>
          </table:table-cell>
          <table:table-cell office:value-type="float" office:value="0.18621892606329737" table:style-name="c12">
            <text:p>+0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45</text:p>
          </table:table-cell>
          <table:table-cell office:value-type="float" office:value="10.515255" table:style-name="c10">
            <text:p>10.515</text:p>
          </table:table-cell>
          <table:table-cell office:value-type="string" table:style-name="c10">
            <text:p>2026-05-09 05:00</text:p>
          </table:table-cell>
          <table:table-cell office:value-type="float" office:value="10.51474" table:style-name="c10">
            <text:p>10.515</text:p>
          </table:table-cell>
          <table:table-cell office:value-type="float" office:value="-0.20478785592931148" table:style-name="c11">
            <text:p>-0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15</text:p>
          </table:table-cell>
          <table:table-cell office:value-type="float" office:value="10.42521" table:style-name="c10">
            <text:p>10.425</text:p>
          </table:table-cell>
          <table:table-cell office:value-type="string" table:style-name="c10">
            <text:p>2026-05-09 22:15</text:p>
          </table:table-cell>
          <table:table-cell office:value-type="float" office:value="10.384805000000002" table:style-name="c10">
            <text:p>10.385</text:p>
          </table:table-cell>
          <table:table-cell office:value-type="float" office:value="-0.5866953777909356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45</text:p>
          </table:table-cell>
          <table:table-cell office:value-type="float" office:value="10.46523" table:style-name="c10">
            <text:p>10.465</text:p>
          </table:table-cell>
          <table:table-cell office:value-type="string" table:style-name="c10">
            <text:p>2026-05-10 11:30</text:p>
          </table:table-cell>
          <table:table-cell office:value-type="float" office:value="10.454770000000002" table:style-name="c10">
            <text:p>10.455</text:p>
          </table:table-cell>
          <table:table-cell office:value-type="float" office:value="-0.2996502248875266" table:style-name="c11">
            <text:p>-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3:30</text:p>
          </table:table-cell>
          <table:table-cell office:value-type="float" office:value="10.56528" table:style-name="c10">
            <text:p>10.565</text:p>
          </table:table-cell>
          <table:table-cell office:value-type="string" table:style-name="c10">
            <text:p>2026-05-10 20:45</text:p>
          </table:table-cell>
          <table:table-cell office:value-type="float" office:value="10.61469" table:style-name="c10">
            <text:p>10.615</text:p>
          </table:table-cell>
          <table:table-cell office:value-type="float" office:value="0.2668290351983238" table:style-name="c12">
            <text:p>+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15</text:p>
          </table:table-cell>
          <table:table-cell office:value-type="float" office:value="10.74537" table:style-name="c10">
            <text:p>10.745</text:p>
          </table:table-cell>
          <table:table-cell office:value-type="string" table:style-name="c10">
            <text:p>2026-05-11 02:15</text:p>
          </table:table-cell>
          <table:table-cell office:value-type="float" office:value="10.624685000000001" table:style-name="c10">
            <text:p>10.625</text:p>
          </table:table-cell>
          <table:table-cell office:value-type="float" office:value="-1.3207897477238828" table:style-name="c11">
            <text:p>-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6:15</text:p>
          </table:table-cell>
          <table:table-cell office:value-type="float" office:value="10.64532" table:style-name="c10">
            <text:p>10.645</text:p>
          </table:table-cell>
          <table:table-cell office:value-type="string" table:style-name="c10">
            <text:p>2026-05-11 20:30</text:p>
          </table:table-cell>
          <table:table-cell office:value-type="float" office:value="10.604695" table:style-name="c10">
            <text:p>10.605</text:p>
          </table:table-cell>
          <table:table-cell office:value-type="float" office:value="-0.5807602336519668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9:15</text:p>
          </table:table-cell>
          <table:table-cell office:value-type="float" office:value="10.72536" table:style-name="c10">
            <text:p>10.725</text:p>
          </table:table-cell>
          <table:table-cell office:value-type="string" table:style-name="c10">
            <text:p>2026-05-13 11:15</text:p>
          </table:table-cell>
          <table:table-cell office:value-type="float" office:value="10.544725000000001" table:style-name="c10">
            <text:p>10.545</text:p>
          </table:table-cell>
          <table:table-cell office:value-type="float" office:value="-1.8807192045302012" table:style-name="c11">
            <text:p>-1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9.741868499999999" table:style-name="c10">
            <text:p>9.7419</text:p>
          </table:table-cell>
          <table:table-cell office:value-type="string" table:style-name="c10">
            <text:p>2026-05-21 09:00</text:p>
          </table:table-cell>
          <table:table-cell office:value-type="float" office:value="9.673161000000002" table:style-name="c10">
            <text:p>9.6732</text:p>
          </table:table-cell>
          <table:table-cell office:value-type="float" office:value="-0.9037706558962078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9.6838395" table:style-name="c10">
            <text:p>9.6838</text:p>
          </table:table-cell>
          <table:table-cell office:value-type="string" table:style-name="c10">
            <text:p>2026-05-21 22:00</text:p>
          </table:table-cell>
          <table:table-cell office:value-type="float" office:value="9.771112" table:style-name="c10">
            <text:p>9.7711</text:p>
          </table:table-cell>
          <table:table-cell office:value-type="float" office:value="0.6995164171401447" table:style-name="c12">
            <text:p>+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15</text:p>
          </table:table-cell>
          <table:table-cell office:value-type="float" office:value="10.0140045" table:style-name="c10">
            <text:p>10.014</text:p>
          </table:table-cell>
          <table:table-cell office:value-type="string" table:style-name="c10">
            <text:p>2026-05-22 14:15</text:p>
          </table:table-cell>
          <table:table-cell office:value-type="float" office:value="9.899048" table:style-name="c10">
            <text:p>9.899</text:p>
          </table:table-cell>
          <table:table-cell office:value-type="float" office:value="-1.3455625764098644" table:style-name="c11">
            <text:p>-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30</text:p>
          </table:table-cell>
          <table:table-cell office:value-type="float" office:value="9.64482" table:style-name="c10">
            <text:p>9.6448</text:p>
          </table:table-cell>
          <table:table-cell office:value-type="string" table:style-name="c10">
            <text:p>2026-05-25 16:15</text:p>
          </table:table-cell>
          <table:table-cell office:value-type="float" office:value="9.571212000000001" table:style-name="c10">
            <text:p>9.5712</text:p>
          </table:table-cell>
          <table:table-cell office:value-type="float" office:value="-0.961561260738919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6:00</text:p>
          </table:table-cell>
          <table:table-cell office:value-type="float" office:value="9.530762999999999" table:style-name="c10">
            <text:p>9.5308</text:p>
          </table:table-cell>
          <table:table-cell office:value-type="string" table:style-name="c10">
            <text:p>2026-05-26 07:15</text:p>
          </table:table-cell>
          <table:table-cell office:value-type="float" office:value="9.4702625" table:style-name="c10">
            <text:p>9.4703</text:p>
          </table:table-cell>
          <table:table-cell office:value-type="float" office:value="-0.8334228302340319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8:30</text:p>
          </table:table-cell>
          <table:table-cell office:value-type="float" office:value="9.542769" table:style-name="c10">
            <text:p>9.5428</text:p>
          </table:table-cell>
          <table:table-cell office:value-type="string" table:style-name="c10">
            <text:p>2026-05-26 09:30</text:p>
          </table:table-cell>
          <table:table-cell office:value-type="float" office:value="9.5022465" table:style-name="c10">
            <text:p>9.5022</text:p>
          </table:table-cell>
          <table:table-cell office:value-type="float" office:value="-0.6236920410993996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9.606800999999999" table:style-name="c10">
            <text:p>9.6068</text:p>
          </table:table-cell>
          <table:table-cell office:value-type="string" table:style-name="c10">
            <text:p>2026-05-26 13:30</text:p>
          </table:table-cell>
          <table:table-cell office:value-type="float" office:value="9.545225000000002" table:style-name="c10">
            <text:p>9.5452</text:p>
          </table:table-cell>
          <table:table-cell office:value-type="float" office:value="-0.8395813005286246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15</text:p>
          </table:table-cell>
          <table:table-cell office:value-type="float" office:value="9.186591" table:style-name="c10">
            <text:p>9.1866</text:p>
          </table:table-cell>
          <table:table-cell office:value-type="string" table:style-name="c10">
            <text:p>2026-06-01 04:15</text:p>
          </table:table-cell>
          <table:table-cell office:value-type="float" office:value="9.1404275" table:style-name="c10">
            <text:p>9.1404</text:p>
          </table:table-cell>
          <table:table-cell office:value-type="float" office:value="-0.7014050649745918" table:style-name="c11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54.617295" table:style-name="c1">
            <text:p>54.617</text:p>
          </table:table-cell>
          <table:table-cell office:value-type="string" table:style-name="c1">
            <text:p>2026-03-11 15:45</text:p>
          </table:table-cell>
          <table:table-cell office:value-type="float" office:value="54.442765" table:style-name="c1">
            <text:p>54.443</text:p>
          </table:table-cell>
          <table:table-cell office:value-type="float" office:value="-0.5188120122664452" table:style-name="c13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54.64731" table:style-name="c1">
            <text:p>54.647</text:p>
          </table:table-cell>
          <table:table-cell office:value-type="string" table:style-name="c1">
            <text:p>2026-03-12 12:00</text:p>
          </table:table-cell>
          <table:table-cell office:value-type="float" office:value="54.312830000000005" table:style-name="c1">
            <text:p>54.313</text:p>
          </table:table-cell>
          <table:table-cell office:value-type="float" office:value="-0.8107468550052954" table:style-name="c13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55.237604999999995" table:style-name="c1">
            <text:p>55.238</text:p>
          </table:table-cell>
          <table:table-cell office:value-type="string" table:style-name="c1">
            <text:p>2026-03-13 05:15</text:p>
          </table:table-cell>
          <table:table-cell office:value-type="float" office:value="55.09244" table:style-name="c1">
            <text:p>55.092</text:p>
          </table:table-cell>
          <table:table-cell office:value-type="float" office:value="-0.46217569997829555" table:style-name="c13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55.927949999999996" table:style-name="c1">
            <text:p>55.928</text:p>
          </table:table-cell>
          <table:table-cell office:value-type="string" table:style-name="c1">
            <text:p>2026-03-13 14:45</text:p>
          </table:table-cell>
          <table:table-cell office:value-type="float" office:value="55.87205" table:style-name="c1">
            <text:p>55.872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3-16 02:30</text:p>
          </table:table-cell>
          <table:table-cell office:value-type="float" office:value="55.83207" table:style-name="c1">
            <text:p>55.832</text:p>
          </table:table-cell>
          <table:table-cell office:value-type="float" office:value="-0.06708167167088774" table:style-name="c13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56.798385" table:style-name="c1">
            <text:p>56.798</text:p>
          </table:table-cell>
          <table:table-cell office:value-type="string" table:style-name="c1">
            <text:p>2026-03-16 08:45</text:p>
          </table:table-cell>
          <table:table-cell office:value-type="float" office:value="57.111430000000006" table:style-name="c1">
            <text:p>57.111</text:p>
          </table:table-cell>
          <table:table-cell office:value-type="float" office:value="0.3501494830002727" table:style-name="c14">
            <text:p>+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57.92894999999999" table:style-name="c1">
            <text:p>57.929</text:p>
          </table:table-cell>
          <table:table-cell office:value-type="string" table:style-name="c1">
            <text:p>2026-03-16 14:45</text:p>
          </table:table-cell>
          <table:table-cell office:value-type="float" office:value="57.621175" table:style-name="c1">
            <text:p>57.621</text:p>
          </table:table-cell>
          <table:table-cell office:value-type="float" office:value="-0.7301353275434797" table:style-name="c13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58.259114999999994" table:style-name="c1">
            <text:p>58.259</text:p>
          </table:table-cell>
          <table:table-cell office:value-type="string" table:style-name="c1">
            <text:p>2026-03-16 16:00</text:p>
          </table:table-cell>
          <table:table-cell office:value-type="float" office:value="57.811080000000004" table:style-name="c1">
            <text:p>57.811</text:p>
          </table:table-cell>
          <table:table-cell office:value-type="float" office:value="-0.9674011507383673" table:style-name="c13">
            <text:p>-1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58.34916" table:style-name="c1">
            <text:p>58.349</text:p>
          </table:table-cell>
          <table:table-cell office:value-type="string" table:style-name="c1">
            <text:p>2026-03-16 23:15</text:p>
          </table:table-cell>
          <table:table-cell office:value-type="float" office:value="58.51073" table:style-name="c1">
            <text:p>58.511</text:p>
          </table:table-cell>
          <table:table-cell office:value-type="float" office:value="0.0764484882558758" table:style-name="c14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9:15</text:p>
          </table:table-cell>
          <table:table-cell office:value-type="float" office:value="56.108039999999995" table:style-name="c1">
            <text:p>56.108</text:p>
          </table:table-cell>
          <table:table-cell office:value-type="string" table:style-name="c1">
            <text:p>2026-03-21 20:00</text:p>
          </table:table-cell>
          <table:table-cell office:value-type="float" office:value="55.802085" table:style-name="c1">
            <text:p>55.802</text:p>
          </table:table-cell>
          <table:table-cell office:value-type="float" office:value="-0.7441061350833111" table:style-name="c13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5:45</text:p>
          </table:table-cell>
          <table:table-cell office:value-type="float" office:value="55.837905" table:style-name="c1">
            <text:p>55.838</text:p>
          </table:table-cell>
          <table:table-cell office:value-type="string" table:style-name="c1">
            <text:p>2026-03-24 17:30</text:p>
          </table:table-cell>
          <table:table-cell office:value-type="float" office:value="55.542215000000006" table:style-name="c1">
            <text:p>55.542</text:p>
          </table:table-cell>
          <table:table-cell office:value-type="float" office:value="-0.7283920981365544" table:style-name="c13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56.71834499999999" table:style-name="c1">
            <text:p>56.718</text:p>
          </table:table-cell>
          <table:table-cell office:value-type="string" table:style-name="c1">
            <text:p>2026-03-25 09:00</text:p>
          </table:table-cell>
          <table:table-cell office:value-type="float" office:value="56.45176" table:style-name="c1">
            <text:p>56.452</text:p>
          </table:table-cell>
          <table:table-cell office:value-type="float" office:value="-0.6689759164164588" table:style-name="c13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54.687329999999996" table:style-name="c1">
            <text:p>54.687</text:p>
          </table:table-cell>
          <table:table-cell office:value-type="string" table:style-name="c1">
            <text:p>2026-04-01 08:00</text:p>
          </table:table-cell>
          <table:table-cell office:value-type="float" office:value="54.282845" table:style-name="c1">
            <text:p>54.283</text:p>
          </table:table-cell>
          <table:table-cell office:value-type="float" office:value="-0.9380534890896852" table:style-name="c13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53.446709999999996" table:style-name="c1">
            <text:p>53.447</text:p>
          </table:table-cell>
          <table:table-cell office:value-type="string" table:style-name="c1">
            <text:p>2026-04-03 22:45</text:p>
          </table:table-cell>
          <table:table-cell office:value-type="float" office:value="53.243365000000004" table:style-name="c1">
            <text:p>53.243</text:p>
          </table:table-cell>
          <table:table-cell office:value-type="float" office:value="-0.5796025361243018" table:style-name="c13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53.916945" table:style-name="c1">
            <text:p>53.917</text:p>
          </table:table-cell>
          <table:table-cell office:value-type="string" table:style-name="c1">
            <text:p>2026-04-06 05:30</text:p>
          </table:table-cell>
          <table:table-cell office:value-type="float" office:value="54.13292" table:style-name="c1">
            <text:p>54.133</text:p>
          </table:table-cell>
          <table:table-cell office:value-type="float" office:value="0.19986906327871257" table:style-name="c14">
            <text:p>+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54.657315" table:style-name="c1">
            <text:p>54.657</text:p>
          </table:table-cell>
          <table:table-cell office:value-type="string" table:style-name="c1">
            <text:p>2026-04-08 03:15</text:p>
          </table:table-cell>
          <table:table-cell office:value-type="float" office:value="54.992490000000004" table:style-name="c1">
            <text:p>54.992</text:p>
          </table:table-cell>
          <table:table-cell office:value-type="float" office:value="0.4121040568678014" table:style-name="c14">
            <text:p>+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3:15</text:p>
          </table:table-cell>
          <table:table-cell office:value-type="float" office:value="55.32764999999999" table:style-name="c1">
            <text:p>55.328</text:p>
          </table:table-cell>
          <table:table-cell office:value-type="string" table:style-name="c1">
            <text:p>2026-04-08 14:15</text:p>
          </table:table-cell>
          <table:table-cell office:value-type="float" office:value="55.00248500000001" table:style-name="c1">
            <text:p>55.002</text:p>
          </table:table-cell>
          <table:table-cell office:value-type="float" office:value="-0.786433126140329" table:style-name="c13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54.737355" table:style-name="c1">
            <text:p>54.737</text:p>
          </table:table-cell>
          <table:table-cell office:value-type="string" table:style-name="c1">
            <text:p>2026-04-09 23:00</text:p>
          </table:table-cell>
          <table:table-cell office:value-type="float" office:value="54.702635" table:style-name="c1">
            <text:p>54.703</text:p>
          </table:table-cell>
          <table:table-cell office:value-type="float" office:value="-0.2632033779582543" table:style-name="c13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2:45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0 16:00</text:p>
          </table:table-cell>
          <table:table-cell office:value-type="float" office:value="54.882545" table:style-name="c1">
            <text:p>54.883</text:p>
          </table:table-cell>
          <table:table-cell office:value-type="float" office:value="-0.31780396665286315" table:style-name="c13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1 22:00</text:p>
          </table:table-cell>
          <table:table-cell office:value-type="float" office:value="55.29234" table:style-name="c1">
            <text:p>55.292</text:p>
          </table:table-cell>
          <table:table-cell office:value-type="float" office:value="0.42649944572505927" table:style-name="c14">
            <text:p>+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4 15:15</text:p>
          </table:table-cell>
          <table:table-cell office:value-type="float" office:value="54.59269" table:style-name="c1">
            <text:p>54.593</text:p>
          </table:table-cell>
          <table:table-cell office:value-type="float" office:value="-1.1861167716087695" table:style-name="c13">
            <text:p>-1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3:15</text:p>
          </table:table-cell>
          <table:table-cell office:value-type="float" office:value="54.74735999999999" table:style-name="c1">
            <text:p>54.747</text:p>
          </table:table-cell>
          <table:table-cell office:value-type="string" table:style-name="c1">
            <text:p>2026-04-15 20:30</text:p>
          </table:table-cell>
          <table:table-cell office:value-type="float" office:value="55.15241" table:style-name="c1">
            <text:p>55.152</text:p>
          </table:table-cell>
          <table:table-cell office:value-type="float" office:value="0.5384740605026694" table:style-name="c14">
            <text:p>+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55.897935" table:style-name="c1">
            <text:p>55.898</text:p>
          </table:table-cell>
          <table:table-cell office:value-type="string" table:style-name="c1">
            <text:p>2026-04-16 16:45</text:p>
          </table:table-cell>
          <table:table-cell office:value-type="float" office:value="55.39229" table:style-name="c1">
            <text:p>55.392</text:p>
          </table:table-cell>
          <table:table-cell office:value-type="float" office:value="-1.1026779213042293" table:style-name="c13">
            <text:p>-1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56.04801" table:style-name="c1">
            <text:p>56.048</text:p>
          </table:table-cell>
          <table:table-cell office:value-type="string" table:style-name="c1">
            <text:p>2026-04-17 10:30</text:p>
          </table:table-cell>
          <table:table-cell office:value-type="float" office:value="55.922025000000005" table:style-name="c1">
            <text:p>55.922</text:p>
          </table:table-cell>
          <table:table-cell office:value-type="float" office:value="-0.42423116891212587" table:style-name="c13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56.668319999999994" table:style-name="c1">
            <text:p>56.668</text:p>
          </table:table-cell>
          <table:table-cell office:value-type="string" table:style-name="c1">
            <text:p>2026-04-17 15:15</text:p>
          </table:table-cell>
          <table:table-cell office:value-type="float" office:value="56.79159000000001" table:style-name="c1">
            <text:p>56.792</text:p>
          </table:table-cell>
          <table:table-cell office:value-type="float" office:value="0.01719410702489821" table:style-name="c14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56.058015" table:style-name="c1">
            <text:p>56.058</text:p>
          </table:table-cell>
          <table:table-cell office:value-type="string" table:style-name="c1">
            <text:p>2026-04-22 09:30</text:p>
          </table:table-cell>
          <table:table-cell office:value-type="float" office:value="56.13192" table:style-name="c1">
            <text:p>56.132</text:p>
          </table:table-cell>
          <table:table-cell office:value-type="float" office:value="-0.06832690754388082" table:style-name="c13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56.498234999999994" table:style-name="c1">
            <text:p>56.498</text:p>
          </table:table-cell>
          <table:table-cell office:value-type="string" table:style-name="c1">
            <text:p>2026-04-24 12:30</text:p>
          </table:table-cell>
          <table:table-cell office:value-type="float" office:value="56.17190000000001" table:style-name="c1">
            <text:p>56.172</text:p>
          </table:table-cell>
          <table:table-cell office:value-type="float" office:value="-0.776347487846285" table:style-name="c13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56.158065" table:style-name="c1">
            <text:p>56.158</text:p>
          </table:table-cell>
          <table:table-cell office:value-type="string" table:style-name="c1">
            <text:p>2026-04-26 12:45</text:p>
          </table:table-cell>
          <table:table-cell office:value-type="float" office:value="56.141915000000004" table:style-name="c1">
            <text:p>56.142</text:p>
          </table:table-cell>
          <table:table-cell office:value-type="float" office:value="-0.22860062590296382" table:style-name="c13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11:15</text:p>
          </table:table-cell>
          <table:table-cell office:value-type="float" office:value="56.79159000000001" table:style-name="c1">
            <text:p>56.792</text:p>
          </table:table-cell>
          <table:table-cell office:value-type="float" office:value="-1.1175794340741674" table:style-name="c13">
            <text:p>-1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5-04 06:15</text:p>
          </table:table-cell>
          <table:table-cell office:value-type="float" office:value="55.981995" table:style-name="c1">
            <text:p>55.982</text:p>
          </table:table-cell>
          <table:table-cell office:value-type="float" office:value="0.20126665896371687" table:style-name="c14">
            <text:p>+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56.20809" table:style-name="c1">
            <text:p>56.208</text:p>
          </table:table-cell>
          <table:table-cell office:value-type="string" table:style-name="c1">
            <text:p>2026-05-06 00:45</text:p>
          </table:table-cell>
          <table:table-cell office:value-type="float" office:value="56.23187" table:style-name="c1">
            <text:p>56.232</text:p>
          </table:table-cell>
          <table:table-cell office:value-type="float" office:value="-0.15767749469871584" table:style-name="c13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57.178574999999995" table:style-name="c1">
            <text:p>57.179</text:p>
          </table:table-cell>
          <table:table-cell office:value-type="string" table:style-name="c1">
            <text:p>2026-05-06 13:15</text:p>
          </table:table-cell>
          <table:table-cell office:value-type="float" office:value="57.581195" table:style-name="c1">
            <text:p>57.581</text:p>
          </table:table-cell>
          <table:table-cell office:value-type="float" office:value="0.5028372798640213" table:style-name="c14">
            <text:p>+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30</text:p>
          </table:table-cell>
          <table:table-cell office:value-type="float" office:value="56.76837" table:style-name="c1">
            <text:p>56.768</text:p>
          </table:table-cell>
          <table:table-cell office:value-type="string" table:style-name="c1">
            <text:p>2026-05-07 09:30</text:p>
          </table:table-cell>
          <table:table-cell office:value-type="float" office:value="56.801585" table:style-name="c1">
            <text:p>56.802</text:p>
          </table:table-cell>
          <table:table-cell office:value-type="float" office:value="-0.1415072661325234" table:style-name="c13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8:15</text:p>
          </table:table-cell>
          <table:table-cell office:value-type="float" office:value="56.72835" table:style-name="c1">
            <text:p>56.728</text:p>
          </table:table-cell>
          <table:table-cell office:value-type="string" table:style-name="c1">
            <text:p>2026-05-07 19:30</text:p>
          </table:table-cell>
          <table:table-cell office:value-type="float" office:value="56.35181000000001" table:style-name="c1">
            <text:p>56.352</text:p>
          </table:table-cell>
          <table:table-cell office:value-type="float" office:value="-0.8623329749410824" table:style-name="c13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57.348659999999995" table:style-name="c1">
            <text:p>57.349</text:p>
          </table:table-cell>
          <table:table-cell office:value-type="string" table:style-name="c1">
            <text:p>2026-05-08 20:45</text:p>
          </table:table-cell>
          <table:table-cell office:value-type="float" office:value="58.10093500000001" table:style-name="c1">
            <text:p>58.101</text:p>
          </table:table-cell>
          <table:table-cell office:value-type="float" office:value="1.1092346899387318" table:style-name="c14">
            <text:p>+1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30</text:p>
          </table:table-cell>
          <table:table-cell office:value-type="float" office:value="58.82939999999999" table:style-name="c1">
            <text:p>58.829</text:p>
          </table:table-cell>
          <table:table-cell office:value-type="string" table:style-name="c1">
            <text:p>2026-05-09 03:45</text:p>
          </table:table-cell>
          <table:table-cell office:value-type="float" office:value="58.63067" table:style-name="c1">
            <text:p>58.631</text:p>
          </table:table-cell>
          <table:table-cell office:value-type="float" office:value="-0.5370320100663628" table:style-name="c13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58.749359999999996" table:style-name="c1">
            <text:p>58.749</text:p>
          </table:table-cell>
          <table:table-cell office:value-type="string" table:style-name="c1">
            <text:p>2026-05-10 10:15</text:p>
          </table:table-cell>
          <table:table-cell office:value-type="float" office:value="58.27085" table:style-name="c1">
            <text:p>58.271</text:p>
          </table:table-cell>
          <table:table-cell office:value-type="float" office:value="-1.0127658057040745" table:style-name="c13">
            <text:p>-1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59.489729999999994" table:style-name="c1">
            <text:p>59.49</text:p>
          </table:table-cell>
          <table:table-cell office:value-type="string" table:style-name="c1">
            <text:p>2026-05-10 20:30</text:p>
          </table:table-cell>
          <table:table-cell office:value-type="float" office:value="59.460255000000004" table:style-name="c1">
            <text:p>59.46</text:p>
          </table:table-cell>
          <table:table-cell office:value-type="float" office:value="-0.24934732389101377" table:style-name="c13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59.68982999999999" table:style-name="c1">
            <text:p>59.69</text:p>
          </table:table-cell>
          <table:table-cell office:value-type="string" table:style-name="c1">
            <text:p>2026-05-11 02:00</text:p>
          </table:table-cell>
          <table:table-cell office:value-type="float" office:value="59.560205" table:style-name="c1">
            <text:p>59.56</text:p>
          </table:table-cell>
          <table:table-cell office:value-type="float" office:value="-0.41663018607187574" table:style-name="c13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58.90944" table:style-name="c1">
            <text:p>58.909</text:p>
          </table:table-cell>
          <table:table-cell office:value-type="string" table:style-name="c1">
            <text:p>2026-05-13 10:45</text:p>
          </table:table-cell>
          <table:table-cell office:value-type="float" office:value="58.500735000000006" table:style-name="c1">
            <text:p>58.501</text:p>
          </table:table-cell>
          <table:table-cell office:value-type="float" office:value="-0.8922983638360527" table:style-name="c13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15</text:p>
          </table:table-cell>
          <table:table-cell office:value-type="float" office:value="58.81939499999999" table:style-name="c1">
            <text:p>58.819</text:p>
          </table:table-cell>
          <table:table-cell office:value-type="string" table:style-name="c1">
            <text:p>2026-05-14 20:15</text:p>
          </table:table-cell>
          <table:table-cell office:value-type="float" office:value="58.580695000000006" table:style-name="c1">
            <text:p>58.581</text:p>
          </table:table-cell>
          <table:table-cell office:value-type="float" office:value="-0.6049072917274856" table:style-name="c13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7:15</text:p>
          </table:table-cell>
          <table:table-cell office:value-type="float" office:value="58.18907999999999" table:style-name="c1">
            <text:p>58.189</text:p>
          </table:table-cell>
          <table:table-cell office:value-type="string" table:style-name="c1">
            <text:p>2026-05-15 10:15</text:p>
          </table:table-cell>
          <table:table-cell office:value-type="float" office:value="57.980995" table:style-name="c1">
            <text:p>57.981</text:p>
          </table:table-cell>
          <table:table-cell office:value-type="float" office:value="-0.5567866152978995" table:style-name="c13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7:45</text:p>
          </table:table-cell>
          <table:table-cell office:value-type="float" office:value="54.417195" table:style-name="c1">
            <text:p>54.417</text:p>
          </table:table-cell>
          <table:table-cell office:value-type="string" table:style-name="c1">
            <text:p>2026-05-22 18:15</text:p>
          </table:table-cell>
          <table:table-cell office:value-type="float" office:value="54.042965" table:style-name="c1">
            <text:p>54.043</text:p>
          </table:table-cell>
          <table:table-cell office:value-type="float" office:value="-0.8862306979163459" table:style-name="c13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6:45</text:p>
          </table:table-cell>
          <table:table-cell office:value-type="float" office:value="1.2876435" table:style-name="c10">
            <text:p>1.2876</text:p>
          </table:table-cell>
          <table:table-cell office:value-type="string" table:style-name="c10">
            <text:p>2026-03-05 09:45</text:p>
          </table:table-cell>
          <table:table-cell office:value-type="float" office:value="1.295352" table:style-name="c10">
            <text:p>1.2954</text:p>
          </table:table-cell>
          <table:table-cell office:value-type="float" office:value="0.39755501829505935" table:style-name="c12">
            <text:p>+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9:15</text:p>
          </table:table-cell>
          <table:table-cell office:value-type="float" office:value="1.282641" table:style-name="c10">
            <text:p>1.2826</text:p>
          </table:table-cell>
          <table:table-cell office:value-type="string" table:style-name="c10">
            <text:p>2026-03-05 19:30</text:p>
          </table:table-cell>
          <table:table-cell office:value-type="float" office:value="1.2683655" table:style-name="c10">
            <text:p>1.2684</text:p>
          </table:table-cell>
          <table:table-cell office:value-type="float" office:value="-1.3106522116866692" table:style-name="c11">
            <text:p>-1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3:45</text:p>
          </table:table-cell>
          <table:table-cell office:value-type="float" office:value="1.26063" table:style-name="c10">
            <text:p>1.2606</text:p>
          </table:table-cell>
          <table:table-cell office:value-type="string" table:style-name="c10">
            <text:p>2026-03-06 14:00</text:p>
          </table:table-cell>
          <table:table-cell office:value-type="float" office:value="1.2403795000000002" table:style-name="c10">
            <text:p>1.2404</text:p>
          </table:table-cell>
          <table:table-cell office:value-type="float" office:value="-1.8030681976868412" table:style-name="c11">
            <text:p>-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1.328664" table:style-name="c10">
            <text:p>1.3287</text:p>
          </table:table-cell>
          <table:table-cell office:value-type="string" table:style-name="c10">
            <text:p>2026-03-10 15:45</text:p>
          </table:table-cell>
          <table:table-cell office:value-type="float" office:value="1.301349" table:style-name="c10">
            <text:p>1.3013</text:p>
          </table:table-cell>
          <table:table-cell office:value-type="float" office:value="-2.25161490421959" table:style-name="c11">
            <text:p>-2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1:15</text:p>
          </table:table-cell>
          <table:table-cell office:value-type="float" office:value="1.298649" table:style-name="c10">
            <text:p>1.2986</text:p>
          </table:table-cell>
          <table:table-cell office:value-type="string" table:style-name="c10">
            <text:p>2026-03-11 01:30</text:p>
          </table:table-cell>
          <table:table-cell office:value-type="float" office:value="1.2783605" table:style-name="c10">
            <text:p>1.2784</text:p>
          </table:table-cell>
          <table:table-cell office:value-type="float" office:value="-1.7590544203630043" table:style-name="c11">
            <text:p>-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7:45</text:p>
          </table:table-cell>
          <table:table-cell office:value-type="float" office:value="1.338669" table:style-name="c10">
            <text:p>1.3387</text:p>
          </table:table-cell>
          <table:table-cell office:value-type="string" table:style-name="c10">
            <text:p>2026-03-12 20:15</text:p>
          </table:table-cell>
          <table:table-cell office:value-type="float" office:value="1.3293350000000002" table:style-name="c10">
            <text:p>1.3293</text:p>
          </table:table-cell>
          <table:table-cell office:value-type="float" office:value="-0.8957659186101807" table:style-name="c11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21:45</text:p>
          </table:table-cell>
          <table:table-cell office:value-type="float" office:value="1.3516754999999998" table:style-name="c10">
            <text:p>1.3517</text:p>
          </table:table-cell>
          <table:table-cell office:value-type="string" table:style-name="c10">
            <text:p>2026-03-13 02:45</text:p>
          </table:table-cell>
          <table:table-cell office:value-type="float" office:value="1.3783105" table:style-name="c10">
            <text:p>1.3783</text:p>
          </table:table-cell>
          <table:table-cell office:value-type="float" office:value="1.7666782678608994" table:style-name="c12">
            <text:p>+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30</text:p>
          </table:table-cell>
          <table:table-cell office:value-type="float" office:value="1.352676" table:style-name="c10">
            <text:p>1.3527</text:p>
          </table:table-cell>
          <table:table-cell office:value-type="string" table:style-name="c10">
            <text:p>2026-03-13 15:00</text:p>
          </table:table-cell>
          <table:table-cell office:value-type="float" office:value="1.3483255" table:style-name="c10">
            <text:p>1.3483</text:p>
          </table:table-cell>
          <table:table-cell office:value-type="float" office:value="-0.5208788116666363" table:style-name="c11">
            <text:p>-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1.3516754999999998" table:style-name="c10">
            <text:p>1.3517</text:p>
          </table:table-cell>
          <table:table-cell office:value-type="string" table:style-name="c10">
            <text:p>2026-03-15 13:15</text:p>
          </table:table-cell>
          <table:table-cell office:value-type="float" office:value="1.3423285" table:style-name="c10">
            <text:p>1.3423</text:p>
          </table:table-cell>
          <table:table-cell office:value-type="float" office:value="-0.8900297942442403" table:style-name="c11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30</text:p>
          </table:table-cell>
          <table:table-cell office:value-type="float" office:value="1.3816905" table:style-name="c10">
            <text:p>1.3817</text:p>
          </table:table-cell>
          <table:table-cell office:value-type="string" table:style-name="c10">
            <text:p>2026-03-16 08:00</text:p>
          </table:table-cell>
          <table:table-cell office:value-type="float" office:value="1.393303" table:style-name="c10">
            <text:p>1.3933</text:p>
          </table:table-cell>
          <table:table-cell office:value-type="float" office:value="0.6388758772677416" table:style-name="c12">
            <text:p>+0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30</text:p>
          </table:table-cell>
          <table:table-cell office:value-type="float" office:value="1.4127059999999998" table:style-name="c10">
            <text:p>1.4127</text:p>
          </table:table-cell>
          <table:table-cell office:value-type="string" table:style-name="c10">
            <text:p>2026-03-16 15:45</text:p>
          </table:table-cell>
          <table:table-cell office:value-type="float" office:value="1.403298" table:style-name="c10">
            <text:p>1.4033</text:p>
          </table:table-cell>
          <table:table-cell office:value-type="float" office:value="-0.8645247278626811" table:style-name="c11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6:30</text:p>
          </table:table-cell>
          <table:table-cell office:value-type="float" office:value="1.4397195" table:style-name="c10">
            <text:p>1.4397</text:p>
          </table:table-cell>
          <table:table-cell office:value-type="string" table:style-name="c10">
            <text:p>2026-03-17 01:15</text:p>
          </table:table-cell>
          <table:table-cell office:value-type="float" office:value="1.4842575000000002" table:style-name="c10">
            <text:p>1.4843</text:p>
          </table:table-cell>
          <table:table-cell office:value-type="float" office:value="2.8874353134412667" table:style-name="c12">
            <text:p>+2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15</text:p>
          </table:table-cell>
          <table:table-cell office:value-type="float" office:value="1.4627309999999998" table:style-name="c10">
            <text:p>1.4627</text:p>
          </table:table-cell>
          <table:table-cell office:value-type="string" table:style-name="c10">
            <text:p>2026-03-17 10:15</text:p>
          </table:table-cell>
          <table:table-cell office:value-type="float" office:value="1.4482755" table:style-name="c10">
            <text:p>1.4483</text:p>
          </table:table-cell>
          <table:table-cell office:value-type="float" office:value="-1.1861786428604915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00</text:p>
          </table:table-cell>
          <table:table-cell office:value-type="float" office:value="1.322661" table:style-name="c10">
            <text:p>1.3227</text:p>
          </table:table-cell>
          <table:table-cell office:value-type="string" table:style-name="c10">
            <text:p>2026-03-23 22:45</text:p>
          </table:table-cell>
          <table:table-cell office:value-type="float" office:value="1.311344" table:style-name="c10">
            <text:p>1.3113</text:p>
          </table:table-cell>
          <table:table-cell office:value-type="float" office:value="-1.0538132337764683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30</text:p>
          </table:table-cell>
          <table:table-cell office:value-type="float" office:value="1.214607" table:style-name="c10">
            <text:p>1.2146</text:p>
          </table:table-cell>
          <table:table-cell office:value-type="string" table:style-name="c10">
            <text:p>2026-03-30 09:30</text:p>
          </table:table-cell>
          <table:table-cell office:value-type="float" office:value="1.2043975000000002" table:style-name="c10">
            <text:p>1.2044</text:p>
          </table:table-cell>
          <table:table-cell office:value-type="float" office:value="-1.0387796713257513" table:style-name="c11">
            <text:p>-1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30</text:p>
          </table:table-cell>
          <table:table-cell office:value-type="float" office:value="1.1965979999999998" table:style-name="c10">
            <text:p>1.1966</text:p>
          </table:table-cell>
          <table:table-cell office:value-type="string" table:style-name="c10">
            <text:p>2026-03-31 15:00</text:p>
          </table:table-cell>
          <table:table-cell office:value-type="float" office:value="1.1764115000000002" table:style-name="c10">
            <text:p>1.1764</text:p>
          </table:table-cell>
          <table:table-cell office:value-type="float" office:value="-1.883518657769745" table:style-name="c11">
            <text:p>-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7:15</text:p>
          </table:table-cell>
          <table:table-cell office:value-type="float" office:value="1.2026009999999998" table:style-name="c10">
            <text:p>1.2026</text:p>
          </table:table-cell>
          <table:table-cell office:value-type="string" table:style-name="c10">
            <text:p>2026-03-31 17:45</text:p>
          </table:table-cell>
          <table:table-cell office:value-type="float" office:value="1.1864065000000001" table:style-name="c10">
            <text:p>1.1864</text:p>
          </table:table-cell>
          <table:table-cell office:value-type="float" office:value="-1.5438309625137259" table:style-name="c11">
            <text:p>-1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1.2086039999999998" table:style-name="c10">
            <text:p>1.2086</text:p>
          </table:table-cell>
          <table:table-cell office:value-type="string" table:style-name="c10">
            <text:p>2026-04-01 09:15</text:p>
          </table:table-cell>
          <table:table-cell office:value-type="float" office:value="1.2073960000000001" table:style-name="c10">
            <text:p>1.2074</text:p>
          </table:table-cell>
          <table:table-cell office:value-type="float" office:value="-0.29965022488751547" table:style-name="c11">
            <text:p>-0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1.2276135" table:style-name="c10">
            <text:p>1.2276</text:p>
          </table:table-cell>
          <table:table-cell office:value-type="string" table:style-name="c10">
            <text:p>2026-04-01 13:15</text:p>
          </table:table-cell>
          <table:table-cell office:value-type="float" office:value="1.209395" table:style-name="c10">
            <text:p>1.2094</text:p>
          </table:table-cell>
          <table:table-cell office:value-type="float" office:value="-1.680991664314535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0:45</text:p>
          </table:table-cell>
          <table:table-cell office:value-type="float" office:value="1.2056025" table:style-name="c10">
            <text:p>1.2056</text:p>
          </table:table-cell>
          <table:table-cell office:value-type="string" table:style-name="c10">
            <text:p>2026-04-02 01:15</text:p>
          </table:table-cell>
          <table:table-cell office:value-type="float" office:value="1.191404" table:style-name="c10">
            <text:p>1.1914</text:p>
          </table:table-cell>
          <table:table-cell office:value-type="float" office:value="-1.375255658146024" table:style-name="c11">
            <text:p>-1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1:15</text:p>
          </table:table-cell>
          <table:table-cell office:value-type="float" office:value="1.236618" table:style-name="c10">
            <text:p>1.2366</text:p>
          </table:table-cell>
          <table:table-cell office:value-type="string" table:style-name="c10">
            <text:p>2026-04-04 14:15</text:p>
          </table:table-cell>
          <table:table-cell office:value-type="float" office:value="1.241379" table:style-name="c10">
            <text:p>1.2414</text:p>
          </table:table-cell>
          <table:table-cell office:value-type="float" office:value="0.18433205557415455" table:style-name="c12">
            <text:p>+0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1.2626309999999998" table:style-name="c10">
            <text:p>1.2626</text:p>
          </table:table-cell>
          <table:table-cell office:value-type="string" table:style-name="c10">
            <text:p>2026-04-04 17:00</text:p>
          </table:table-cell>
          <table:table-cell office:value-type="float" office:value="1.2553720000000002" table:style-name="c10">
            <text:p>1.2554</text:p>
          </table:table-cell>
          <table:table-cell office:value-type="float" office:value="-0.7736613965600214" table:style-name="c11">
            <text:p>-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7:30</text:p>
          </table:table-cell>
          <table:table-cell office:value-type="float" office:value="1.276638" table:style-name="c10">
            <text:p>1.2766</text:p>
          </table:table-cell>
          <table:table-cell office:value-type="string" table:style-name="c10">
            <text:p>2026-04-04 20:15</text:p>
          </table:table-cell>
          <table:table-cell office:value-type="float" office:value="1.267366" table:style-name="c10">
            <text:p>1.2674</text:p>
          </table:table-cell>
          <table:table-cell office:value-type="float" office:value="-0.924730787740935" table:style-name="c11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2:45</text:p>
          </table:table-cell>
          <table:table-cell office:value-type="float" office:value="1.238619" table:style-name="c10">
            <text:p>1.2386</text:p>
          </table:table-cell>
          <table:table-cell office:value-type="string" table:style-name="c10">
            <text:p>2026-04-06 06:30</text:p>
          </table:table-cell>
          <table:table-cell office:value-type="float" office:value="1.2683655" table:style-name="c10">
            <text:p>1.2684</text:p>
          </table:table-cell>
          <table:table-cell office:value-type="float" office:value="2.196885189513509" table:style-name="c12">
            <text:p>+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00</text:p>
          </table:table-cell>
          <table:table-cell office:value-type="float" office:value="1.3076534999999998" table:style-name="c10">
            <text:p>1.3077</text:p>
          </table:table-cell>
          <table:table-cell office:value-type="string" table:style-name="c10">
            <text:p>2026-04-08 00:45</text:p>
          </table:table-cell>
          <table:table-cell office:value-type="float" office:value="1.2943525" table:style-name="c10">
            <text:p>1.2944</text:p>
          </table:table-cell>
          <table:table-cell office:value-type="float" office:value="-1.215032166204555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5:3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4-08 11:15</text:p>
          </table:table-cell>
          <table:table-cell office:value-type="float" office:value="1.3513240000000002" table:style-name="c10">
            <text:p>1.3513</text:p>
          </table:table-cell>
          <table:table-cell office:value-type="float" office:value="1.885769384695446" table:style-name="c12">
            <text:p>+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30</text:p>
          </table:table-cell>
          <table:table-cell office:value-type="float" office:value="1.3896944999999998" table:style-name="c10">
            <text:p>1.3897</text:p>
          </table:table-cell>
          <table:table-cell office:value-type="string" table:style-name="c10">
            <text:p>2026-04-08 13:45</text:p>
          </table:table-cell>
          <table:table-cell office:value-type="float" office:value="1.3683155" table:style-name="c10">
            <text:p>1.3683</text:p>
          </table:table-cell>
          <table:table-cell office:value-type="float" office:value="-1.735220416033867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30</text:p>
          </table:table-cell>
          <table:table-cell office:value-type="float" office:value="1.362681" table:style-name="c10">
            <text:p>1.3627</text:p>
          </table:table-cell>
          <table:table-cell office:value-type="string" table:style-name="c10">
            <text:p>2026-04-09 17:30</text:p>
          </table:table-cell>
          <table:table-cell office:value-type="float" office:value="1.3583205" table:style-name="c10">
            <text:p>1.3583</text:p>
          </table:table-cell>
          <table:table-cell office:value-type="float" office:value="-0.5192545195464082" table:style-name="c11">
            <text:p>-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5:30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4-11 20:45</text:p>
          </table:table-cell>
          <table:table-cell office:value-type="float" office:value="1.395302" table:style-name="c10">
            <text:p>1.3953</text:p>
          </table:table-cell>
          <table:table-cell office:value-type="float" office:value="1.9646068029721464" table:style-name="c12">
            <text:p>+2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1:15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4 03:15</text:p>
          </table:table-cell>
          <table:table-cell office:value-type="float" office:value="1.407296" table:style-name="c10">
            <text:p>1.4073</text:p>
          </table:table-cell>
          <table:table-cell office:value-type="float" office:value="-1.072521153376771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00</text:p>
          </table:table-cell>
          <table:table-cell office:value-type="float" office:value="1.4297145" table:style-name="c10">
            <text:p>1.4297</text:p>
          </table:table-cell>
          <table:table-cell office:value-type="string" table:style-name="c10">
            <text:p>2026-04-16 08:15</text:p>
          </table:table-cell>
          <table:table-cell office:value-type="float" office:value="1.425287" table:style-name="c10">
            <text:p>1.4253</text:p>
          </table:table-cell>
          <table:table-cell office:value-type="float" office:value="-0.5089581670326471" table:style-name="c11">
            <text:p>-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1.4137065" table:style-name="c10">
            <text:p>1.4137</text:p>
          </table:table-cell>
          <table:table-cell office:value-type="string" table:style-name="c10">
            <text:p>2026-04-16 17:00</text:p>
          </table:table-cell>
          <table:table-cell office:value-type="float" office:value="1.389305" table:style-name="c10">
            <text:p>1.3893</text:p>
          </table:table-cell>
          <table:table-cell office:value-type="float" office:value="-1.922515083222709" table:style-name="c11">
            <text:p>-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7 10:45</text:p>
          </table:table-cell>
          <table:table-cell office:value-type="float" office:value="1.3763115000000001" table:style-name="c10">
            <text:p>1.3763</text:p>
          </table:table-cell>
          <table:table-cell office:value-type="float" office:value="-3.2506119518464605" table:style-name="c11">
            <text:p>-3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15</text:p>
          </table:table-cell>
          <table:table-cell office:value-type="float" office:value="1.4127059999999998" table:style-name="c10">
            <text:p>1.4127</text:p>
          </table:table-cell>
          <table:table-cell office:value-type="string" table:style-name="c10">
            <text:p>2026-04-17 16:00</text:p>
          </table:table-cell>
          <table:table-cell office:value-type="float" office:value="1.411294" table:style-name="c10">
            <text:p>1.4113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5:15</text:p>
          </table:table-cell>
          <table:table-cell office:value-type="float" office:value="1.368684" table:style-name="c10">
            <text:p>1.3687</text:p>
          </table:table-cell>
          <table:table-cell office:value-type="string" table:style-name="c10">
            <text:p>2026-04-21 12:45</text:p>
          </table:table-cell>
          <table:table-cell office:value-type="float" office:value="1.3683155" table:style-name="c10">
            <text:p>1.3683</text:p>
          </table:table-cell>
          <table:table-cell office:value-type="float" office:value="-0.22676985224494572" table:style-name="c11">
            <text:p>-0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1.4006999999999998" table:style-name="c10">
            <text:p>1.4007</text:p>
          </table:table-cell>
          <table:table-cell office:value-type="string" table:style-name="c10">
            <text:p>2026-04-22 12:45</text:p>
          </table:table-cell>
          <table:table-cell office:value-type="float" office:value="1.415292" table:style-name="c10">
            <text:p>1.4153</text:p>
          </table:table-cell>
          <table:table-cell office:value-type="float" office:value="0.8397823439708851" table:style-name="c12">
            <text:p>+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45</text:p>
          </table:table-cell>
          <table:table-cell office:value-type="float" office:value="1.4287139999999998" table:style-name="c10">
            <text:p>1.4287</text:p>
          </table:table-cell>
          <table:table-cell office:value-type="string" table:style-name="c10">
            <text:p>2026-04-22 16:15</text:p>
          </table:table-cell>
          <table:table-cell office:value-type="float" office:value="1.4182905000000001" table:style-name="c10">
            <text:p>1.4183</text:p>
          </table:table-cell>
          <table:table-cell office:value-type="float" office:value="-0.9280137738903571" table:style-name="c11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15</text:p>
          </table:table-cell>
          <table:table-cell office:value-type="float" office:value="1.3946969999999999" table:style-name="c10">
            <text:p>1.3947</text:p>
          </table:table-cell>
          <table:table-cell office:value-type="string" table:style-name="c10">
            <text:p>2026-04-23 17:15</text:p>
          </table:table-cell>
          <table:table-cell office:value-type="float" office:value="1.397301" table:style-name="c10">
            <text:p>1.3973</text:p>
          </table:table-cell>
          <table:table-cell office:value-type="float" office:value="-0.013566007455378948" table:style-name="c11">
            <text:p>-0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1:15</text:p>
          </table:table-cell>
          <table:table-cell office:value-type="float" office:value="1.4006999999999998" table:style-name="c10">
            <text:p>1.4007</text:p>
          </table:table-cell>
          <table:table-cell office:value-type="string" table:style-name="c10">
            <text:p>2026-04-24 03:15</text:p>
          </table:table-cell>
          <table:table-cell office:value-type="float" office:value="1.403298" table:style-name="c10">
            <text:p>1.4033</text:p>
          </table:table-cell>
          <table:table-cell office:value-type="float" office:value="-0.014792082672931972" table:style-name="c11">
            <text:p>-0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15</text:p>
          </table:table-cell>
          <table:table-cell office:value-type="float" office:value="1.2946469999999999" table:style-name="c10">
            <text:p>1.2946</text:p>
          </table:table-cell>
          <table:table-cell office:value-type="string" table:style-name="c10">
            <text:p>2026-05-05 22:45</text:p>
          </table:table-cell>
          <table:table-cell office:value-type="float" office:value="1.295352" table:style-name="c10">
            <text:p>1.2954</text:p>
          </table:table-cell>
          <table:table-cell office:value-type="float" office:value="-0.1455538573835069" table:style-name="c11">
            <text:p>-0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2:00</text:p>
          </table:table-cell>
          <table:table-cell office:value-type="float" office:value="1.3116554999999999" table:style-name="c10">
            <text:p>1.3117</text:p>
          </table:table-cell>
          <table:table-cell office:value-type="string" table:style-name="c10">
            <text:p>2026-05-06 02:30</text:p>
          </table:table-cell>
          <table:table-cell office:value-type="float" office:value="1.3003495" table:style-name="c10">
            <text:p>1.3003</text:p>
          </table:table-cell>
          <table:table-cell office:value-type="float" office:value="-1.0601410698540814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5:45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5-06 14:15</text:p>
          </table:table-cell>
          <table:table-cell office:value-type="float" office:value="1.4522735000000002" table:style-name="c10">
            <text:p>1.4523</text:p>
          </table:table-cell>
          <table:table-cell office:value-type="float" office:value="9.995906016126344" table:style-name="c12">
            <text:p>+10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6:15</text:p>
          </table:table-cell>
          <table:table-cell office:value-type="float" office:value="1.52076" table:style-name="c10">
            <text:p>1.5208</text:p>
          </table:table-cell>
          <table:table-cell office:value-type="string" table:style-name="c10">
            <text:p>2026-05-06 19:30</text:p>
          </table:table-cell>
          <table:table-cell office:value-type="float" office:value="1.4982505000000002" table:style-name="c10">
            <text:p>1.4983</text:p>
          </table:table-cell>
          <table:table-cell office:value-type="float" office:value="-1.6770892678331761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8:00</text:p>
          </table:table-cell>
          <table:table-cell office:value-type="float" office:value="1.5357674999999997" table:style-name="c10">
            <text:p>1.5358</text:p>
          </table:table-cell>
          <table:table-cell office:value-type="string" table:style-name="c10">
            <text:p>2026-05-08 12:45</text:p>
          </table:table-cell>
          <table:table-cell office:value-type="float" office:value="1.5502245000000001" table:style-name="c10">
            <text:p>1.5502</text:p>
          </table:table-cell>
          <table:table-cell office:value-type="float" office:value="0.7395716620191894" table:style-name="c12">
            <text:p>+0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5:00</text:p>
          </table:table-cell>
          <table:table-cell office:value-type="float" office:value="1.5757875" table:style-name="c10">
            <text:p>1.5758</text:p>
          </table:table-cell>
          <table:table-cell office:value-type="string" table:style-name="c10">
            <text:p>2026-05-08 17:45</text:p>
          </table:table-cell>
          <table:table-cell office:value-type="float" office:value="1.5382305" table:style-name="c10">
            <text:p>1.5382</text:p>
          </table:table-cell>
          <table:table-cell office:value-type="float" office:value="-2.5785153626043833" table:style-name="c11">
            <text:p>-2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3:00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5-09 01:15</text:p>
          </table:table-cell>
          <table:table-cell office:value-type="float" office:value="1.5842075" table:style-name="c10">
            <text:p>1.5842</text:p>
          </table:table-cell>
          <table:table-cell office:value-type="float" office:value="-0.8003425024775579" table:style-name="c11">
            <text:p>-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45</text:p>
          </table:table-cell>
          <table:table-cell office:value-type="float" office:value="1.6078035" table:style-name="c10">
            <text:p>1.6078</text:p>
          </table:table-cell>
          <table:table-cell office:value-type="string" table:style-name="c10">
            <text:p>2026-05-09 02:45</text:p>
          </table:table-cell>
          <table:table-cell office:value-type="float" office:value="1.5962015" table:style-name="c10">
            <text:p>1.5962</text:p>
          </table:table-cell>
          <table:table-cell office:value-type="float" office:value="-0.9200631046331065" table:style-name="c11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1.574787" table:style-name="c10">
            <text:p>1.5748</text:p>
          </table:table-cell>
          <table:table-cell office:value-type="string" table:style-name="c10">
            <text:p>2026-05-09 19:00</text:p>
          </table:table-cell>
          <table:table-cell office:value-type="float" office:value="1.5582205" table:style-name="c10">
            <text:p>1.5582</text:p>
          </table:table-cell>
          <table:table-cell office:value-type="float" office:value="-1.2497806229985198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45</text:p>
          </table:table-cell>
          <table:table-cell office:value-type="float" office:value="1.604802" table:style-name="c10">
            <text:p>1.6048</text:p>
          </table:table-cell>
          <table:table-cell office:value-type="string" table:style-name="c10">
            <text:p>2026-05-10 20:45</text:p>
          </table:table-cell>
          <table:table-cell office:value-type="float" office:value="1.5682155" table:style-name="c10">
            <text:p>1.5682</text:p>
          </table:table-cell>
          <table:table-cell office:value-type="float" office:value="-2.4751566102547473" table:style-name="c11">
            <text:p>-2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45</text:p>
          </table:table-cell>
          <table:table-cell office:value-type="float" office:value="1.552776" table:style-name="c10">
            <text:p>1.5528</text:p>
          </table:table-cell>
          <table:table-cell office:value-type="string" table:style-name="c10">
            <text:p>2026-05-11 11:30</text:p>
          </table:table-cell>
          <table:table-cell office:value-type="float" office:value="1.549225" table:style-name="c10">
            <text:p>1.5492</text:p>
          </table:table-cell>
          <table:table-cell office:value-type="float" office:value="-0.4281300570719626" table:style-name="c11">
            <text:p>-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5:15</text:p>
          </table:table-cell>
          <table:table-cell office:value-type="float" office:value="1.576788" table:style-name="c10">
            <text:p>1.5768</text:p>
          </table:table-cell>
          <table:table-cell office:value-type="string" table:style-name="c10">
            <text:p>2026-05-12 15:30</text:p>
          </table:table-cell>
          <table:table-cell office:value-type="float" office:value="1.549225" table:style-name="c10">
            <text:p>1.5492</text:p>
          </table:table-cell>
          <table:table-cell office:value-type="float" office:value="-1.944452949603881" table:style-name="c11">
            <text:p>-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9:00</text:p>
          </table:table-cell>
          <table:table-cell office:value-type="float" office:value="1.6238115" table:style-name="c10">
            <text:p>1.6238</text:p>
          </table:table-cell>
          <table:table-cell office:value-type="string" table:style-name="c10">
            <text:p>2026-05-12 19:45</text:p>
          </table:table-cell>
          <table:table-cell office:value-type="float" office:value="1.5882055000000002" table:style-name="c10">
            <text:p>1.5882</text:p>
          </table:table-cell>
          <table:table-cell office:value-type="float" office:value="-2.3882589077919403" table:style-name="c11">
            <text:p>-2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1:15</text:p>
          </table:table-cell>
          <table:table-cell office:value-type="float" office:value="1.6638315" table:style-name="c10">
            <text:p>1.6638</text:p>
          </table:table-cell>
          <table:table-cell office:value-type="string" table:style-name="c10">
            <text:p>2026-05-13 04:30</text:p>
          </table:table-cell>
          <table:table-cell office:value-type="float" office:value="1.6581705000000002" table:style-name="c10">
            <text:p>1.6582</text:p>
          </table:table-cell>
          <table:table-cell office:value-type="float" office:value="-0.5394586428673631" table:style-name="c11">
            <text:p>-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18:15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5-13 21:00</text:p>
          </table:table-cell>
          <table:table-cell office:value-type="float" office:value="1.581209" table:style-name="c10">
            <text:p>1.5812</text:p>
          </table:table-cell>
          <table:table-cell office:value-type="float" office:value="-0.9881021065738183" table:style-name="c11">
            <text:p>-1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02:15</text:p>
          </table:table-cell>
          <table:table-cell office:value-type="float" office:value="1.610805" table:style-name="c10">
            <text:p>1.6108</text:p>
          </table:table-cell>
          <table:table-cell office:value-type="string" table:style-name="c10">
            <text:p>2026-05-14 02:45</text:p>
          </table:table-cell>
          <table:table-cell office:value-type="float" office:value="1.5852070000000003" table:style-name="c10">
            <text:p>1.5852</text:p>
          </table:table-cell>
          <table:table-cell office:value-type="float" office:value="-1.7858666190507133" table:style-name="c11">
            <text:p>-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6:15</text:p>
          </table:table-cell>
          <table:table-cell office:value-type="float" office:value="1.6278134999999998" table:style-name="c10">
            <text:p>1.6278</text:p>
          </table:table-cell>
          <table:table-cell office:value-type="string" table:style-name="c10">
            <text:p>2026-05-14 17:15</text:p>
          </table:table-cell>
          <table:table-cell office:value-type="float" office:value="1.597201" table:style-name="c10">
            <text:p>1.5972</text:p>
          </table:table-cell>
          <table:table-cell office:value-type="float" office:value="-2.076730829360962" table:style-name="c11">
            <text:p>-2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21:15</text:p>
          </table:table-cell>
          <table:table-cell office:value-type="float" office:value="1.538769" table:style-name="c10">
            <text:p>1.5388</text:p>
          </table:table-cell>
          <table:table-cell office:value-type="string" table:style-name="c10">
            <text:p>2026-05-17 22:15</text:p>
          </table:table-cell>
          <table:table-cell office:value-type="float" office:value="1.5152420000000002" table:style-name="c10">
            <text:p>1.5152</text:p>
          </table:table-cell>
          <table:table-cell office:value-type="float" office:value="-1.725793069525039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15</text:p>
          </table:table-cell>
          <table:table-cell office:value-type="float" office:value="1.6438214999999998" table:style-name="c10">
            <text:p>1.6438</text:p>
          </table:table-cell>
          <table:table-cell office:value-type="string" table:style-name="c10">
            <text:p>2026-05-19 09:30</text:p>
          </table:table-cell>
          <table:table-cell office:value-type="float" office:value="1.6261865000000002" table:style-name="c10">
            <text:p>1.6262</text:p>
          </table:table-cell>
          <table:table-cell office:value-type="float" office:value="-1.2705605087595884" table:style-name="c11">
            <text:p>-1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5:30</text:p>
          </table:table-cell>
          <table:table-cell office:value-type="float" office:value="1.622811" table:style-name="c10">
            <text:p>1.6228</text:p>
          </table:table-cell>
          <table:table-cell office:value-type="string" table:style-name="c10">
            <text:p>2026-05-20 09:15</text:p>
          </table:table-cell>
          <table:table-cell office:value-type="float" office:value="1.641179" table:style-name="c10">
            <text:p>1.6412</text:p>
          </table:table-cell>
          <table:table-cell office:value-type="float" office:value="0.9297005738191366" table:style-name="c12">
            <text:p>+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3:30</text:p>
          </table:table-cell>
          <table:table-cell office:value-type="float" office:value="1.6538264999999999" table:style-name="c10">
            <text:p>1.6538</text:p>
          </table:table-cell>
          <table:table-cell office:value-type="string" table:style-name="c10">
            <text:p>2026-05-20 16:30</text:p>
          </table:table-cell>
          <table:table-cell office:value-type="float" office:value="1.6661665" table:style-name="c10">
            <text:p>1.6662</text:p>
          </table:table-cell>
          <table:table-cell office:value-type="float" office:value="0.5447568512477075" table:style-name="c12">
            <text:p>+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45</text:p>
          </table:table-cell>
          <table:table-cell office:value-type="float" office:value="1.7308649999999999" table:style-name="c10">
            <text:p>1.7309</text:p>
          </table:table-cell>
          <table:table-cell office:value-type="string" table:style-name="c10">
            <text:p>2026-05-21 06:15</text:p>
          </table:table-cell>
          <table:table-cell office:value-type="float" office:value="1.7381305000000002" table:style-name="c10">
            <text:p>1.7381</text:p>
          </table:table-cell>
          <table:table-cell office:value-type="float" office:value="0.21902211498299184" table:style-name="c12">
            <text:p>+0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1.7648819999999998" table:style-name="c10">
            <text:p>1.7649</text:p>
          </table:table-cell>
          <table:table-cell office:value-type="string" table:style-name="c10">
            <text:p>2026-05-21 10:30</text:p>
          </table:table-cell>
          <table:table-cell office:value-type="float" office:value="1.7381305000000002" table:style-name="c10">
            <text:p>1.7381</text:p>
          </table:table-cell>
          <table:table-cell office:value-type="float" office:value="-1.7126370414282555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45</text:p>
          </table:table-cell>
          <table:table-cell office:value-type="float" office:value="1.8079034999999999" table:style-name="c10">
            <text:p>1.8079</text:p>
          </table:table-cell>
          <table:table-cell office:value-type="string" table:style-name="c10">
            <text:p>2026-05-21 16:45</text:p>
          </table:table-cell>
          <table:table-cell office:value-type="float" office:value="1.771114" table:style-name="c10">
            <text:p>1.7711</text:p>
          </table:table-cell>
          <table:table-cell office:value-type="float" office:value="-2.230758272551603" table:style-name="c11">
            <text:p>-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00</text:p>
          </table:table-cell>
          <table:table-cell office:value-type="float" office:value="1.8579284999999999" table:style-name="c10">
            <text:p>1.8579</text:p>
          </table:table-cell>
          <table:table-cell office:value-type="string" table:style-name="c10">
            <text:p>2026-05-22 00:00</text:p>
          </table:table-cell>
          <table:table-cell office:value-type="float" office:value="1.9260365000000002" table:style-name="c10">
            <text:p>1.926</text:p>
          </table:table-cell>
          <table:table-cell office:value-type="float" office:value="3.4585751301247747" table:style-name="c12">
            <text:p>+3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1:15</text:p>
          </table:table-cell>
          <table:table-cell office:value-type="float" office:value="2.0100045" table:style-name="c10">
            <text:p>2.01</text:p>
          </table:table-cell>
          <table:table-cell office:value-type="string" table:style-name="c10">
            <text:p>2026-05-22 10:15</text:p>
          </table:table-cell>
          <table:table-cell office:value-type="float" office:value="2.2078955000000002" table:style-name="c10">
            <text:p>2.2079</text:p>
          </table:table-cell>
          <table:table-cell office:value-type="float" office:value="9.625720583983766" table:style-name="c12">
            <text:p>+9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15</text:p>
          </table:table-cell>
          <table:table-cell office:value-type="float" office:value="2.3141565" table:style-name="c10">
            <text:p>2.3142</text:p>
          </table:table-cell>
          <table:table-cell office:value-type="string" table:style-name="c10">
            <text:p>2026-05-22 14:45</text:p>
          </table:table-cell>
          <table:table-cell office:value-type="float" office:value="2.2478755" table:style-name="c10">
            <text:p>2.2479</text:p>
          </table:table-cell>
          <table:table-cell office:value-type="float" office:value="-3.0583282990800265" table:style-name="c11">
            <text:p>-3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15:15</text:p>
          </table:table-cell>
          <table:table-cell office:value-type="float" office:value="2.2121055" table:style-name="c10">
            <text:p>2.2121</text:p>
          </table:table-cell>
          <table:table-cell office:value-type="string" table:style-name="c10">
            <text:p>2026-05-23 22:30</text:p>
          </table:table-cell>
          <table:table-cell office:value-type="float" office:value="2.3618185" table:style-name="c10">
            <text:p>2.3618</text:p>
          </table:table-cell>
          <table:table-cell office:value-type="float" office:value="6.554466991673791" table:style-name="c12">
            <text:p>+6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15:15</text:p>
          </table:table-cell>
          <table:table-cell office:value-type="float" office:value="2.4682334999999997" table:style-name="c10">
            <text:p>2.4682</text:p>
          </table:table-cell>
          <table:table-cell office:value-type="string" table:style-name="c10">
            <text:p>2026-05-24 15:30</text:p>
          </table:table-cell>
          <table:table-cell office:value-type="float" office:value="2.4077954999999998" table:style-name="c10">
            <text:p>2.4078</text:p>
          </table:table-cell>
          <table:table-cell office:value-type="float" office:value="-2.6436389913879643" table:style-name="c11">
            <text:p>-2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5:15</text:p>
          </table:table-cell>
          <table:table-cell office:value-type="float" office:value="2.3881935" table:style-name="c10">
            <text:p>2.3882</text:p>
          </table:table-cell>
          <table:table-cell office:value-type="string" table:style-name="c10">
            <text:p>2026-05-25 05:45</text:p>
          </table:table-cell>
          <table:table-cell office:value-type="float" office:value="2.3658165" table:style-name="c10">
            <text:p>2.3658</text:p>
          </table:table-cell>
          <table:table-cell office:value-type="float" office:value="-1.1350113457514799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2:15</text:p>
          </table:table-cell>
          <table:table-cell office:value-type="float" office:value="2.5072529999999995" table:style-name="c10">
            <text:p>2.5073</text:p>
          </table:table-cell>
          <table:table-cell office:value-type="string" table:style-name="c10">
            <text:p>2026-05-25 20:45</text:p>
          </table:table-cell>
          <table:table-cell office:value-type="float" office:value="2.7346320000000004" table:style-name="c10">
            <text:p>2.7346</text:p>
          </table:table-cell>
          <table:table-cell office:value-type="float" office:value="8.850820823905714" table:style-name="c12">
            <text:p>+8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08:30</text:p>
          </table:table-cell>
          <table:table-cell office:value-type="float" office:value="2.5512749999999995" table:style-name="c10">
            <text:p>2.5513</text:p>
          </table:table-cell>
          <table:table-cell office:value-type="string" table:style-name="c10">
            <text:p>2026-05-27 09:00</text:p>
          </table:table-cell>
          <table:table-cell office:value-type="float" office:value="2.5227380000000004" table:style-name="c10">
            <text:p>2.5227</text:p>
          </table:table-cell>
          <table:table-cell office:value-type="float" office:value="-1.3162028108298474" table:style-name="c11">
            <text:p>-1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5:45</text:p>
          </table:table-cell>
          <table:table-cell office:value-type="float" office:value="2.4302144999999995" table:style-name="c10">
            <text:p>2.4302</text:p>
          </table:table-cell>
          <table:table-cell office:value-type="string" table:style-name="c10">
            <text:p>2026-06-01 23:30</text:p>
          </table:table-cell>
          <table:table-cell office:value-type="float" office:value="2.632683" table:style-name="c10">
            <text:p>2.6327</text:p>
          </table:table-cell>
          <table:table-cell office:value-type="float" office:value="8.114747347734141" table:style-name="c12">
            <text:p>+8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2 03:00</text:p>
          </table:table-cell>
          <table:table-cell office:value-type="float" office:value="2.6673329999999997" table:style-name="c10">
            <text:p>2.6673</text:p>
          </table:table-cell>
          <table:table-cell office:value-type="string" table:style-name="c10">
            <text:p>2026-06-02 05:15</text:p>
          </table:table-cell>
          <table:table-cell office:value-type="float" office:value="2.6116935000000003" table:style-name="c10">
            <text:p>2.6117</text:p>
          </table:table-cell>
          <table:table-cell office:value-type="float" office:value="-2.281690186658347" table:style-name="c11">
            <text:p>-2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15</text:p>
          </table:table-cell>
          <table:table-cell office:value-type="float" office:value="0.1296648" table:style-name="c1">
            <text:p>0.12966</text:p>
          </table:table-cell>
          <table:table-cell office:value-type="string" table:style-name="c1">
            <text:p>2026-03-05 11:30</text:p>
          </table:table-cell>
          <table:table-cell office:value-type="float" office:value="0.12843575000000002" table:style-name="c1">
            <text:p>0.12844</text:p>
          </table:table-cell>
          <table:table-cell office:value-type="float" office:value="-1.1458723294602513" table:style-name="c13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0.12056025" table:style-name="c1">
            <text:p>0.12056</text:p>
          </table:table-cell>
          <table:table-cell office:value-type="string" table:style-name="c1">
            <text:p>2026-03-09 20:15</text:p>
          </table:table-cell>
          <table:table-cell office:value-type="float" office:value="0.11974010000000002" table:style-name="c1">
            <text:p>0.11974</text:p>
          </table:table-cell>
          <table:table-cell office:value-type="float" office:value="-0.8788223812574825" table:style-name="c13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0.12116054999999999" table:style-name="c1">
            <text:p>0.12116</text:p>
          </table:table-cell>
          <table:table-cell office:value-type="string" table:style-name="c1">
            <text:p>2026-03-11 15:15</text:p>
          </table:table-cell>
          <table:table-cell office:value-type="float" office:value="0.12003995" table:style-name="c1">
            <text:p>0.12004</text:p>
          </table:table-cell>
          <table:table-cell office:value-type="float" office:value="-1.122939653253463" table:style-name="c13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30</text:p>
          </table:table-cell>
          <table:table-cell office:value-type="float" office:value="0.11995995" table:style-name="c1">
            <text:p>0.11996</text:p>
          </table:table-cell>
          <table:table-cell office:value-type="string" table:style-name="c1">
            <text:p>2026-03-12 11:30</text:p>
          </table:table-cell>
          <table:table-cell office:value-type="float" office:value="0.11884055000000002" table:style-name="c1">
            <text:p>0.11884</text:p>
          </table:table-cell>
          <table:table-cell office:value-type="float" office:value="-1.1311794140044018" table:style-name="c13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0.12556275" table:style-name="c1">
            <text:p>0.12556</text:p>
          </table:table-cell>
          <table:table-cell office:value-type="string" table:style-name="c1">
            <text:p>2026-03-13 14:45</text:p>
          </table:table-cell>
          <table:table-cell office:value-type="float" office:value="0.12563715" table:style-name="c1">
            <text:p>0.12564</text:p>
          </table:table-cell>
          <table:table-cell office:value-type="float" office:value="-0.14076520532562142" table:style-name="c13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5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3-13 15:4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0.928674513689487" table:style-name="c13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3-14 05:15</text:p>
          </table:table-cell>
          <table:table-cell office:value-type="float" office:value="0.12403795000000001" table:style-name="c1">
            <text:p>0.12404</text:p>
          </table:table-cell>
          <table:table-cell office:value-type="float" office:value="-1.6469522488755661" table:style-name="c13">
            <text:p>-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4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3-15 06:1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0.9286745136895092" table:style-name="c13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12756375" table:style-name="c1">
            <text:p>0.12756</text:p>
          </table:table-cell>
          <table:table-cell office:value-type="string" table:style-name="c1">
            <text:p>2026-03-15 12:15</text:p>
          </table:table-cell>
          <table:table-cell office:value-type="float" office:value="0.1267366" table:style-name="c1">
            <text:p>0.12674</text:p>
          </table:table-cell>
          <table:table-cell office:value-type="float" office:value="-0.8470246942411164" table:style-name="c13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3-16 06:15</text:p>
          </table:table-cell>
          <table:table-cell office:value-type="float" office:value="0.12943525" table:style-name="c1">
            <text:p>0.12944</text:p>
          </table:table-cell>
          <table:table-cell office:value-type="float" office:value="0.24219950215109698" table:style-name="c14">
            <text:p>+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7:30</text:p>
          </table:table-cell>
          <table:table-cell office:value-type="float" office:value="0.13196594999999997" table:style-name="c1">
            <text:p>0.13197</text:p>
          </table:table-cell>
          <table:table-cell office:value-type="string" table:style-name="c1">
            <text:p>2026-03-16 10:15</text:p>
          </table:table-cell>
          <table:table-cell office:value-type="float" office:value="0.13083455" table:style-name="c1">
            <text:p>0.13083</text:p>
          </table:table-cell>
          <table:table-cell office:value-type="float" office:value="-1.0555285400893122" table:style-name="c13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3-16 15:15</text:p>
          </table:table-cell>
          <table:table-cell office:value-type="float" office:value="0.13083455" table:style-name="c1">
            <text:p>0.13083</text:p>
          </table:table-cell>
          <table:table-cell office:value-type="float" office:value="-0.5276235856538358" table:style-name="c13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0.13236615" table:style-name="c1">
            <text:p>0.13237</text:p>
          </table:table-cell>
          <table:table-cell office:value-type="string" table:style-name="c1">
            <text:p>2026-03-17 00:45</text:p>
          </table:table-cell>
          <table:table-cell office:value-type="float" office:value="0.1369315" table:style-name="c1">
            <text:p>0.13693</text:p>
          </table:table-cell>
          <table:table-cell office:value-type="float" office:value="3.24223672857451" table:style-name="c14">
            <text:p>+3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30</text:p>
          </table:table-cell>
          <table:table-cell office:value-type="float" office:value="0.13596794999999998" table:style-name="c1">
            <text:p>0.13597</text:p>
          </table:table-cell>
          <table:table-cell office:value-type="string" table:style-name="c1">
            <text:p>2026-03-17 12:00</text:p>
          </table:table-cell>
          <table:table-cell office:value-type="float" office:value="0.1349325" table:style-name="c1">
            <text:p>0.13493</text:p>
          </table:table-cell>
          <table:table-cell office:value-type="float" office:value="-0.9599174419412604" table:style-name="c13">
            <text:p>-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1086543" table:style-name="c1">
            <text:p>0.10865</text:p>
          </table:table-cell>
          <table:table-cell office:value-type="string" table:style-name="c1">
            <text:p>2026-03-30 09:30</text:p>
          </table:table-cell>
          <table:table-cell office:value-type="float" office:value="0.10754620000000001" table:style-name="c1">
            <text:p>0.10755</text:p>
          </table:table-cell>
          <table:table-cell office:value-type="float" office:value="-1.2177013277891335" table:style-name="c13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2:30</text:p>
          </table:table-cell>
          <table:table-cell office:value-type="float" office:value="0.10885439999999999" table:style-name="c1">
            <text:p>0.10885</text:p>
          </table:table-cell>
          <table:table-cell office:value-type="string" table:style-name="c1">
            <text:p>2026-03-30 13:45</text:p>
          </table:table-cell>
          <table:table-cell office:value-type="float" office:value="0.10824585" table:style-name="c1">
            <text:p>0.10825</text:p>
          </table:table-cell>
          <table:table-cell office:value-type="float" office:value="-0.7578319793687616" table:style-name="c13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7:00</text:p>
          </table:table-cell>
          <table:table-cell office:value-type="float" office:value="0.1090545" table:style-name="c1">
            <text:p>0.10905</text:p>
          </table:table-cell>
          <table:table-cell office:value-type="string" table:style-name="c1">
            <text:p>2026-03-31 07:30</text:p>
          </table:table-cell>
          <table:table-cell office:value-type="float" office:value="0.107946" table:style-name="c1">
            <text:p>0.10795</text:p>
          </table:table-cell>
          <table:table-cell office:value-type="float" office:value="-1.2143323329161126" table:style-name="c13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112056" table:style-name="c1">
            <text:p>0.11206</text:p>
          </table:table-cell>
          <table:table-cell office:value-type="string" table:style-name="c1">
            <text:p>2026-04-01 09:15</text:p>
          </table:table-cell>
          <table:table-cell office:value-type="float" office:value="0.1117441" table:style-name="c1">
            <text:p>0.11174</text:p>
          </table:table-cell>
          <table:table-cell office:value-type="float" office:value="-0.4776865637716843" table:style-name="c13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01 13:15</text:p>
          </table:table-cell>
          <table:table-cell office:value-type="float" office:value="0.111944" table:style-name="c1">
            <text:p>0.11194</text:p>
          </table:table-cell>
          <table:table-cell office:value-type="float" office:value="-1.2693264826472817" table:style-name="c13">
            <text:p>-1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0.11075535" table:style-name="c1">
            <text:p>0.11076</text:p>
          </table:table-cell>
          <table:table-cell office:value-type="string" table:style-name="c1">
            <text:p>2026-04-03 23:00</text:p>
          </table:table-cell>
          <table:table-cell office:value-type="float" office:value="0.11024485" table:style-name="c1">
            <text:p>0.11024</text:p>
          </table:table-cell>
          <table:table-cell office:value-type="float" office:value="-0.6599044246169417" table:style-name="c13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00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06 13:15</text:p>
          </table:table-cell>
          <table:table-cell office:value-type="float" office:value="0.11364315" table:style-name="c1">
            <text:p>0.11364</text:p>
          </table:table-cell>
          <table:table-cell office:value-type="float" office:value="0.05233688817549709" table:style-name="c14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8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4-07 10:15</text:p>
          </table:table-cell>
          <table:table-cell office:value-type="float" office:value="0.1093453" table:style-name="c1">
            <text:p>0.10935</text:p>
          </table:table-cell>
          <table:table-cell office:value-type="float" office:value="-1.0234277187177732" table:style-name="c13">
            <text:p>-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11635815" table:style-name="c1">
            <text:p>0.11636</text:p>
          </table:table-cell>
          <table:table-cell office:value-type="string" table:style-name="c1">
            <text:p>2026-04-08 05:00</text:p>
          </table:table-cell>
          <table:table-cell office:value-type="float" office:value="0.1195402" table:style-name="c1">
            <text:p>0.11954</text:p>
          </table:table-cell>
          <table:table-cell office:value-type="float" office:value="2.529336484122524" table:style-name="c14">
            <text:p>+2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7:15</text:p>
          </table:table-cell>
          <table:table-cell office:value-type="float" office:value="0.1176588" table:style-name="c1">
            <text:p>0.11766</text:p>
          </table:table-cell>
          <table:table-cell office:value-type="string" table:style-name="c1">
            <text:p>2026-04-08 17:30</text:p>
          </table:table-cell>
          <table:table-cell office:value-type="float" office:value="0.1165417" table:style-name="c1">
            <text:p>0.11654</text:p>
          </table:table-cell>
          <table:table-cell office:value-type="float" office:value="-1.147442314811975" table:style-name="c13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14 01:30</text:p>
          </table:table-cell>
          <table:table-cell office:value-type="float" office:value="0.1145427" table:style-name="c1">
            <text:p>0.11454</text:p>
          </table:table-cell>
          <table:table-cell office:value-type="float" office:value="-1.841408211100648" table:style-name="c13">
            <text:p>-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45</text:p>
          </table:table-cell>
          <table:table-cell office:value-type="float" office:value="0.11535764999999999" table:style-name="c1">
            <text:p>0.11536</text:p>
          </table:table-cell>
          <table:table-cell office:value-type="string" table:style-name="c1">
            <text:p>2026-04-14 15:15</text:p>
          </table:table-cell>
          <table:table-cell office:value-type="float" office:value="0.1131434" table:style-name="c1">
            <text:p>0.11314</text:p>
          </table:table-cell>
          <table:table-cell office:value-type="float" office:value="-2.115528234668429" table:style-name="c13">
            <text:p>-2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0:15</text:p>
          </table:table-cell>
          <table:table-cell office:value-type="float" office:value="0.11395695" table:style-name="c1">
            <text:p>0.11396</text:p>
          </table:table-cell>
          <table:table-cell office:value-type="string" table:style-name="c1">
            <text:p>2026-04-15 21:30</text:p>
          </table:table-cell>
          <table:table-cell office:value-type="float" office:value="0.12013990000000001" table:style-name="c1">
            <text:p>0.12014</text:p>
          </table:table-cell>
          <table:table-cell office:value-type="float" office:value="5.214943309644582" table:style-name="c14">
            <text:p>+5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1206603" table:style-name="c1">
            <text:p>0.12066</text:p>
          </table:table-cell>
          <table:table-cell office:value-type="string" table:style-name="c1">
            <text:p>2026-04-16 08:30</text:p>
          </table:table-cell>
          <table:table-cell office:value-type="float" office:value="0.12213890000000001" table:style-name="c1">
            <text:p>0.12214</text:p>
          </table:table-cell>
          <table:table-cell office:value-type="float" office:value="1.0230741502383234" table:style-name="c14">
            <text:p>+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00</text:p>
          </table:table-cell>
          <table:table-cell office:value-type="float" office:value="0.1232616" table:style-name="c1">
            <text:p>0.12326</text:p>
          </table:table-cell>
          <table:table-cell office:value-type="string" table:style-name="c1">
            <text:p>2026-04-16 14:30</text:p>
          </table:table-cell>
          <table:table-cell office:value-type="float" office:value="0.123938" table:style-name="c1">
            <text:p>0.12394</text:p>
          </table:table-cell>
          <table:table-cell office:value-type="float" office:value="0.3477546437820056" table:style-name="c14">
            <text:p>+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30</text:p>
          </table:table-cell>
          <table:table-cell office:value-type="float" office:value="0.1276638" table:style-name="c1">
            <text:p>0.12766</text:p>
          </table:table-cell>
          <table:table-cell office:value-type="string" table:style-name="c1">
            <text:p>2026-04-16 16:45</text:p>
          </table:table-cell>
          <table:table-cell office:value-type="float" office:value="0.1269365" table:style-name="c1">
            <text:p>0.12694</text:p>
          </table:table-cell>
          <table:table-cell office:value-type="float" office:value="-0.7684606470275801" table:style-name="c13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15</text:p>
          </table:table-cell>
          <table:table-cell office:value-type="float" office:value="0.13116555" table:style-name="c1">
            <text:p>0.13117</text:p>
          </table:table-cell>
          <table:table-cell office:value-type="string" table:style-name="c1">
            <text:p>2026-04-17 00:15</text:p>
          </table:table-cell>
          <table:table-cell office:value-type="float" office:value="0.13143425" table:style-name="c1">
            <text:p>0.13143</text:p>
          </table:table-cell>
          <table:table-cell office:value-type="float" office:value="0.004546113099057614" table:style-name="c14">
            <text:p>+0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4-22 07:30</text:p>
          </table:table-cell>
          <table:table-cell office:value-type="float" office:value="0.1269365" table:style-name="c1">
            <text:p>0.12694</text:p>
          </table:table-cell>
          <table:table-cell office:value-type="float" office:value="-1.2328828280867343" table:style-name="c13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24 18:15</text:p>
          </table:table-cell>
          <table:table-cell office:value-type="float" office:value="0.1229385" table:style-name="c1">
            <text:p>0.12294</text:p>
          </table:table-cell>
          <table:table-cell office:value-type="float" office:value="-1.1833761294211875" table:style-name="c13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0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4 22:45</text:p>
          </table:table-cell>
          <table:table-cell office:value-type="float" office:value="0.12483755" table:style-name="c1">
            <text:p>0.12484</text:p>
          </table:table-cell>
          <table:table-cell office:value-type="float" office:value="-0.5385488265850946" table:style-name="c13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1:4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5 07:15</text:p>
          </table:table-cell>
          <table:table-cell office:value-type="float" office:value="0.12843575000000002" table:style-name="c1">
            <text:p>0.12844</text:p>
          </table:table-cell>
          <table:table-cell office:value-type="float" office:value="0.8779129614326919" table:style-name="c14">
            <text:p>+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9:00</text:p>
          </table:table-cell>
          <table:table-cell office:value-type="float" office:value="0.13246619999999998" table:style-name="c1">
            <text:p>0.13247</text:p>
          </table:table-cell>
          <table:table-cell office:value-type="string" table:style-name="c1">
            <text:p>2026-04-25 11:00</text:p>
          </table:table-cell>
          <table:table-cell office:value-type="float" office:value="0.13083455" table:style-name="c1">
            <text:p>0.13083</text:p>
          </table:table-cell>
          <table:table-cell office:value-type="float" office:value="-1.4291859096509096" table:style-name="c13">
            <text:p>-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6 00:30</text:p>
          </table:table-cell>
          <table:table-cell office:value-type="float" office:value="0.12443775" table:style-name="c1">
            <text:p>0.12444</text:p>
          </table:table-cell>
          <table:table-cell office:value-type="float" office:value="-0.857080295515189" table:style-name="c13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0.1256628" table:style-name="c1">
            <text:p>0.12566</text:p>
          </table:table-cell>
          <table:table-cell office:value-type="string" table:style-name="c1">
            <text:p>2026-04-26 09:30</text:p>
          </table:table-cell>
          <table:table-cell office:value-type="float" office:value="0.12563715" table:style-name="c1">
            <text:p>0.12564</text:p>
          </table:table-cell>
          <table:table-cell office:value-type="float" office:value="-0.22027096551247016" table:style-name="c13">
            <text:p>-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45</text:p>
          </table:table-cell>
          <table:table-cell office:value-type="float" office:value="0.1264632" table:style-name="c1">
            <text:p>0.12646</text:p>
          </table:table-cell>
          <table:table-cell office:value-type="string" table:style-name="c1">
            <text:p>2026-04-26 21:00</text:p>
          </table:table-cell>
          <table:table-cell office:value-type="float" office:value="0.12643675000000001" table:style-name="c1">
            <text:p>0.12644</text:p>
          </table:table-cell>
          <table:table-cell office:value-type="float" office:value="-0.22077336588826046" table:style-name="c13">
            <text:p>-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4-27 05:15</text:p>
          </table:table-cell>
          <table:table-cell office:value-type="float" office:value="0.12603695" table:style-name="c1">
            <text:p>0.12604</text:p>
          </table:table-cell>
          <table:table-cell office:value-type="float" office:value="-0.8500464775892613" table:style-name="c13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9 11:15</text:p>
          </table:table-cell>
          <table:table-cell office:value-type="float" office:value="0.12443775" table:style-name="c1">
            <text:p>0.12444</text:p>
          </table:table-cell>
          <table:table-cell office:value-type="float" office:value="-0.857080295515189" table:style-name="c13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1234617" table:style-name="c1">
            <text:p>0.12346</text:p>
          </table:table-cell>
          <table:table-cell office:value-type="string" table:style-name="c1">
            <text:p>2026-05-02 18:15</text:p>
          </table:table-cell>
          <table:table-cell office:value-type="float" office:value="0.1229385" table:style-name="c1">
            <text:p>0.12294</text:p>
          </table:table-cell>
          <table:table-cell office:value-type="float" office:value="-0.6228280199446323" table:style-name="c13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9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5-02 23:15</text:p>
          </table:table-cell>
          <table:table-cell office:value-type="float" office:value="0.1253373" table:style-name="c1">
            <text:p>0.12534</text:p>
          </table:table-cell>
          <table:table-cell office:value-type="float" office:value="-0.14038449042251822" table:style-name="c13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5-04 06:30</text:p>
          </table:table-cell>
          <table:table-cell office:value-type="float" office:value="0.1251374" table:style-name="c1">
            <text:p>0.12514</text:p>
          </table:table-cell>
          <table:table-cell office:value-type="float" office:value="-1.7127260484718354" table:style-name="c13">
            <text:p>-1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4 16:15</text:p>
          </table:table-cell>
          <table:table-cell office:value-type="float" office:value="0.12163915000000002" table:style-name="c1">
            <text:p>0.12164</text:p>
          </table:table-cell>
          <table:table-cell office:value-type="float" office:value="-2.7761813491090748" table:style-name="c13">
            <text:p>-2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15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5-05 05:45</text:p>
          </table:table-cell>
          <table:table-cell office:value-type="float" office:value="0.1269365" table:style-name="c1">
            <text:p>0.12694</text:p>
          </table:table-cell>
          <table:table-cell office:value-type="float" office:value="-0.6126811503981311" table:style-name="c13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9:00</text:p>
          </table:table-cell>
          <table:table-cell office:value-type="float" office:value="0.12836414999999998" table:style-name="c1">
            <text:p>0.12836</text:p>
          </table:table-cell>
          <table:table-cell office:value-type="string" table:style-name="c1">
            <text:p>2026-05-05 13:15</text:p>
          </table:table-cell>
          <table:table-cell office:value-type="float" office:value="0.12903545" table:style-name="c1">
            <text:p>0.12904</text:p>
          </table:table-cell>
          <table:table-cell office:value-type="float" office:value="0.32201992180063144" table:style-name="c14">
            <text:p>+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0.12936465" table:style-name="c1">
            <text:p>0.12936</text:p>
          </table:table-cell>
          <table:table-cell office:value-type="string" table:style-name="c1">
            <text:p>2026-05-05 22:15</text:p>
          </table:table-cell>
          <table:table-cell office:value-type="float" office:value="0.12863565000000002" table:style-name="c1">
            <text:p>0.12864</text:p>
          </table:table-cell>
          <table:table-cell office:value-type="float" office:value="-0.7622968595748403" table:style-name="c13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0.134067" table:style-name="c1">
            <text:p>0.13407</text:p>
          </table:table-cell>
          <table:table-cell office:value-type="string" table:style-name="c1">
            <text:p>2026-05-06 13:30</text:p>
          </table:table-cell>
          <table:table-cell office:value-type="float" office:value="0.13513239999999999" table:style-name="c1">
            <text:p>0.13513</text:p>
          </table:table-cell>
          <table:table-cell office:value-type="float" office:value="0.5931887283224135" table:style-name="c14">
            <text:p>+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00</text:p>
          </table:table-cell>
          <table:table-cell office:value-type="float" office:value="0.13626809999999998" table:style-name="c1">
            <text:p>0.13627</text:p>
          </table:table-cell>
          <table:table-cell office:value-type="string" table:style-name="c1">
            <text:p>2026-05-06 22:30</text:p>
          </table:table-cell>
          <table:table-cell office:value-type="float" office:value="0.1411294" table:style-name="c1">
            <text:p>0.14113</text:p>
          </table:table-cell>
          <table:table-cell office:value-type="float" office:value="3.360421352759757" table:style-name="c14">
            <text:p>+3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00</text:p>
          </table:table-cell>
          <table:table-cell office:value-type="float" office:value="0.1496748" table:style-name="c1">
            <text:p>0.14967</text:p>
          </table:table-cell>
          <table:table-cell office:value-type="string" table:style-name="c1">
            <text:p>2026-05-07 08:00</text:p>
          </table:table-cell>
          <table:table-cell office:value-type="float" office:value="0.1447276" table:style-name="c1">
            <text:p>0.14473</text:p>
          </table:table-cell>
          <table:table-cell office:value-type="float" office:value="-3.498591928901851" table:style-name="c13">
            <text:p>-3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1:45</text:p>
          </table:table-cell>
          <table:table-cell office:value-type="float" office:value="0.14717355000000001" table:style-name="c1">
            <text:p>0.14717</text:p>
          </table:table-cell>
          <table:table-cell office:value-type="string" table:style-name="c1">
            <text:p>2026-05-07 13:45</text:p>
          </table:table-cell>
          <table:table-cell office:value-type="float" office:value="0.14562715" table:style-name="c1">
            <text:p>0.14563</text:p>
          </table:table-cell>
          <table:table-cell office:value-type="float" office:value="-1.248531867886582" table:style-name="c13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0.15897945" table:style-name="c1">
            <text:p>0.15898</text:p>
          </table:table-cell>
          <table:table-cell office:value-type="string" table:style-name="c1">
            <text:p>2026-05-08 23:15</text:p>
          </table:table-cell>
          <table:table-cell office:value-type="float" office:value="0.17101445" table:style-name="c1">
            <text:p>0.17101</text:p>
          </table:table-cell>
          <table:table-cell office:value-type="float" office:value="7.355128046077675" table:style-name="c14">
            <text:p>+7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45</text:p>
          </table:table-cell>
          <table:table-cell office:value-type="float" office:value="0.16398195" table:style-name="c1">
            <text:p>0.16398</text:p>
          </table:table-cell>
          <table:table-cell office:value-type="string" table:style-name="c1">
            <text:p>2026-05-11 02:15</text:p>
          </table:table-cell>
          <table:table-cell office:value-type="float" office:value="0.1613193" table:style-name="c1">
            <text:p>0.16132</text:p>
          </table:table-cell>
          <table:table-cell office:value-type="float" office:value="-1.8203999163932116" table:style-name="c13">
            <text:p>-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0.16038015" table:style-name="c1">
            <text:p>0.16038</text:p>
          </table:table-cell>
          <table:table-cell office:value-type="string" table:style-name="c1">
            <text:p>2026-05-11 11:00</text:p>
          </table:table-cell>
          <table:table-cell office:value-type="float" office:value="0.15842075" table:style-name="c1">
            <text:p>0.15842</text:p>
          </table:table-cell>
          <table:table-cell office:value-type="float" office:value="-1.4191800414515066" table:style-name="c13">
            <text:p>-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5-21 05:15</text:p>
          </table:table-cell>
          <table:table-cell office:value-type="float" office:value="0.1305347" table:style-name="c1">
            <text:p>0.13053</text:p>
          </table:table-cell>
          <table:table-cell office:value-type="float" office:value="-0.528146060888568" table:style-name="c13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1 09:45</text:p>
          </table:table-cell>
          <table:table-cell office:value-type="float" office:value="0.12963515" table:style-name="c1">
            <text:p>0.12964</text:p>
          </table:table-cell>
          <table:table-cell office:value-type="float" office:value="-0.9867123596318139" table:style-name="c13">
            <text:p>-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30</text:p>
          </table:table-cell>
          <table:table-cell office:value-type="float" office:value="0.1348674" table:style-name="c1">
            <text:p>0.13487</text:p>
          </table:table-cell>
          <table:table-cell office:value-type="string" table:style-name="c1">
            <text:p>2026-05-22 10:15</text:p>
          </table:table-cell>
          <table:table-cell office:value-type="float" office:value="0.1335332" table:style-name="c1">
            <text:p>0.13353</text:p>
          </table:table-cell>
          <table:table-cell office:value-type="float" office:value="-1.1871904306007375" table:style-name="c13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30</text:p>
          </table:table-cell>
          <table:table-cell office:value-type="float" office:value="0.13626809999999998" table:style-name="c1">
            <text:p>0.13627</text:p>
          </table:table-cell>
          <table:table-cell office:value-type="string" table:style-name="c1">
            <text:p>2026-05-22 14:15</text:p>
          </table:table-cell>
          <table:table-cell office:value-type="float" office:value="0.1347326" table:style-name="c1">
            <text:p>0.13473</text:p>
          </table:table-cell>
          <table:table-cell office:value-type="float" office:value="-1.3244702666287744" table:style-name="c13">
            <text:p>-1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0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5 19:15</text:p>
          </table:table-cell>
          <table:table-cell office:value-type="float" office:value="0.13083455" table:style-name="c1">
            <text:p>0.13083</text:p>
          </table:table-cell>
          <table:table-cell office:value-type="float" office:value="-0.07062951330611966" table:style-name="c13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30</text:p>
          </table:table-cell>
          <table:table-cell office:value-type="float" office:value="0.12996494999999997" table:style-name="c1">
            <text:p>0.12996</text:p>
          </table:table-cell>
          <table:table-cell office:value-type="string" table:style-name="c1">
            <text:p>2026-05-26 12:45</text:p>
          </table:table-cell>
          <table:table-cell office:value-type="float" office:value="0.1325337" table:style-name="c1">
            <text:p>0.13253</text:p>
          </table:table-cell>
          <table:table-cell office:value-type="float" office:value="1.7726434193988894" table:style-name="c14">
            <text:p>+1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0:45</text:p>
          </table:table-cell>
          <table:table-cell office:value-type="float" office:value="0.1038519" table:style-name="c10">
            <text:p>0.10385</text:p>
          </table:table-cell>
          <table:table-cell office:value-type="string" table:style-name="c10">
            <text:p>2026-03-05 11:45</text:p>
          </table:table-cell>
          <table:table-cell office:value-type="float" office:value="0.10274860000000001" table:style-name="c10">
            <text:p>0.10275</text:p>
          </table:table-cell>
          <table:table-cell office:value-type="float" office:value="-1.260154557981108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1:30</text:p>
          </table:table-cell>
          <table:table-cell office:value-type="float" office:value="0.09834915" table:style-name="c10">
            <text:p>0.098349</text:p>
          </table:table-cell>
          <table:table-cell office:value-type="string" table:style-name="c10">
            <text:p>2026-03-10 12:15</text:p>
          </table:table-cell>
          <table:table-cell office:value-type="float" office:value="0.09725135" table:style-name="c10">
            <text:p>0.097251</text:p>
          </table:table-cell>
          <table:table-cell office:value-type="float" office:value="-1.3138958991002814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09874934999999999" table:style-name="c10">
            <text:p>0.098749</text:p>
          </table:table-cell>
          <table:table-cell office:value-type="string" table:style-name="c10">
            <text:p>2026-03-10 18:15</text:p>
          </table:table-cell>
          <table:table-cell office:value-type="float" office:value="0.0971514" table:style-name="c10">
            <text:p>0.097151</text:p>
          </table:table-cell>
          <table:table-cell office:value-type="float" office:value="-1.8148531090077968" table:style-name="c11">
            <text:p>-1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4:00</text:p>
          </table:table-cell>
          <table:table-cell office:value-type="float" office:value="0.0966483" table:style-name="c10">
            <text:p>0.096648</text:p>
          </table:table-cell>
          <table:table-cell office:value-type="string" table:style-name="c10">
            <text:p>2026-03-11 05:45</text:p>
          </table:table-cell>
          <table:table-cell office:value-type="float" office:value="0.09565215" table:style-name="c10">
            <text:p>0.095652</text:p>
          </table:table-cell>
          <table:table-cell office:value-type="float" office:value="-1.2285354712395447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1:00</text:p>
          </table:table-cell>
          <table:table-cell office:value-type="float" office:value="0.09914954999999999" table:style-name="c10">
            <text:p>0.09915</text:p>
          </table:table-cell>
          <table:table-cell office:value-type="string" table:style-name="c10">
            <text:p>2026-03-12 11:30</text:p>
          </table:table-cell>
          <table:table-cell office:value-type="float" office:value="0.09845075" table:style-name="c10">
            <text:p>0.098451</text:p>
          </table:table-cell>
          <table:table-cell office:value-type="float" office:value="-0.9032850368458467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30</text:p>
          </table:table-cell>
          <table:table-cell office:value-type="float" office:value="0.09854925" table:style-name="c10">
            <text:p>0.098549</text:p>
          </table:table-cell>
          <table:table-cell office:value-type="string" table:style-name="c10">
            <text:p>2026-03-16 08:45</text:p>
          </table:table-cell>
          <table:table-cell office:value-type="float" office:value="0.09965015" table:style-name="c10">
            <text:p>0.09965</text:p>
          </table:table-cell>
          <table:table-cell office:value-type="float" office:value="0.9149733256721859" table:style-name="c12">
            <text:p>+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1:30</text:p>
          </table:table-cell>
          <table:table-cell office:value-type="float" office:value="0.10095045" table:style-name="c10">
            <text:p>0.10095</text:p>
          </table:table-cell>
          <table:table-cell office:value-type="string" table:style-name="c10">
            <text:p>2026-03-16 13:15</text:p>
          </table:table-cell>
          <table:table-cell office:value-type="float" office:value="0.10044975000000002" table:style-name="c10">
            <text:p>0.10045</text:p>
          </table:table-cell>
          <table:table-cell office:value-type="float" office:value="-0.6948944261763623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7:00</text:p>
          </table:table-cell>
          <table:table-cell office:value-type="float" office:value="0.10085039999999999" table:style-name="c10">
            <text:p>0.10085</text:p>
          </table:table-cell>
          <table:table-cell office:value-type="string" table:style-name="c10">
            <text:p>2026-03-16 23:15</text:p>
          </table:table-cell>
          <table:table-cell office:value-type="float" office:value="0.10144925000000002" table:style-name="c10">
            <text:p>0.10145</text:p>
          </table:table-cell>
          <table:table-cell office:value-type="float" office:value="0.3927133152173967" table:style-name="c12">
            <text:p>+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1:15</text:p>
          </table:table-cell>
          <table:table-cell office:value-type="float" office:value="0.10075034999999999" table:style-name="c10">
            <text:p>0.10075</text:p>
          </table:table-cell>
          <table:table-cell office:value-type="string" table:style-name="c10">
            <text:p>2026-03-17 12:30</text:p>
          </table:table-cell>
          <table:table-cell office:value-type="float" office:value="0.09985005000000001" table:style-name="c10">
            <text:p>0.09985</text:p>
          </table:table-cell>
          <table:table-cell office:value-type="float" office:value="-1.091708614362108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00</text:p>
          </table:table-cell>
          <table:table-cell office:value-type="float" office:value="0.0984492" table:style-name="c10">
            <text:p>0.098449</text:p>
          </table:table-cell>
          <table:table-cell office:value-type="string" table:style-name="c10">
            <text:p>2026-03-20 13:30</text:p>
          </table:table-cell>
          <table:table-cell office:value-type="float" office:value="0.09785105000000001" table:style-name="c10">
            <text:p>0.097851</text:p>
          </table:table-cell>
          <table:table-cell office:value-type="float" office:value="-0.8062576932570176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6:45</text:p>
          </table:table-cell>
          <table:table-cell office:value-type="float" office:value="0.09974984999999999" table:style-name="c10">
            <text:p>0.09975</text:p>
          </table:table-cell>
          <table:table-cell office:value-type="string" table:style-name="c10">
            <text:p>2026-03-20 18:15</text:p>
          </table:table-cell>
          <table:table-cell office:value-type="float" office:value="0.09905045" table:style-name="c10">
            <text:p>0.09905</text:p>
          </table:table-cell>
          <table:table-cell office:value-type="float" office:value="-0.8996523298531067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15</text:p>
          </table:table-cell>
          <table:table-cell office:value-type="float" office:value="0.0966483" table:style-name="c10">
            <text:p>0.096648</text:p>
          </table:table-cell>
          <table:table-cell office:value-type="string" table:style-name="c10">
            <text:p>2026-03-23 22:15</text:p>
          </table:table-cell>
          <table:table-cell office:value-type="float" office:value="0.0961519" table:style-name="c10">
            <text:p>0.096152</text:p>
          </table:table-cell>
          <table:table-cell office:value-type="float" office:value="-0.7124881121551185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0.09534764999999999" table:style-name="c10">
            <text:p>0.095348</text:p>
          </table:table-cell>
          <table:table-cell office:value-type="string" table:style-name="c10">
            <text:p>2026-03-24 21:15</text:p>
          </table:table-cell>
          <table:table-cell office:value-type="float" office:value="0.09485255000000001" table:style-name="c10">
            <text:p>0.094853</text:p>
          </table:table-cell>
          <table:table-cell office:value-type="float" office:value="-0.7181196887914743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1:45</text:p>
          </table:table-cell>
          <table:table-cell office:value-type="float" office:value="0.0970485" table:style-name="c10">
            <text:p>0.097048</text:p>
          </table:table-cell>
          <table:table-cell office:value-type="string" table:style-name="c10">
            <text:p>2026-03-25 12:45</text:p>
          </table:table-cell>
          <table:table-cell office:value-type="float" office:value="0.09665165" table:style-name="c10">
            <text:p>0.096652</text:p>
          </table:table-cell>
          <table:table-cell office:value-type="float" office:value="-0.6080018221301664" table:style-name="c11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5:45</text:p>
          </table:table-cell>
          <table:table-cell office:value-type="float" office:value="0.09774884999999998" table:style-name="c10">
            <text:p>0.097749</text:p>
          </table:table-cell>
          <table:table-cell office:value-type="string" table:style-name="c10">
            <text:p>2026-03-25 17:00</text:p>
          </table:table-cell>
          <table:table-cell office:value-type="float" office:value="0.09775110000000001" table:style-name="c10">
            <text:p>0.097751</text:p>
          </table:table-cell>
          <table:table-cell office:value-type="float" office:value="-0.19760278397134012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0.0944472" table:style-name="c10">
            <text:p>0.094447</text:p>
          </table:table-cell>
          <table:table-cell office:value-type="string" table:style-name="c10">
            <text:p>2026-03-30 09:15</text:p>
          </table:table-cell>
          <table:table-cell office:value-type="float" office:value="0.0937531" table:style-name="c10">
            <text:p>0.093753</text:p>
          </table:table-cell>
          <table:table-cell office:value-type="float" office:value="-0.9333388887124094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0.09474735000000001" table:style-name="c10">
            <text:p>0.094747</text:p>
          </table:table-cell>
          <table:table-cell office:value-type="string" table:style-name="c10">
            <text:p>2026-04-01 09:45</text:p>
          </table:table-cell>
          <table:table-cell office:value-type="float" office:value="0.09415290000000001" table:style-name="c10">
            <text:p>0.094153</text:p>
          </table:table-cell>
          <table:table-cell office:value-type="float" office:value="-0.8260512268680742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7:30</text:p>
          </table:table-cell>
          <table:table-cell office:value-type="float" office:value="0.0916458" table:style-name="c10">
            <text:p>0.091646</text:p>
          </table:table-cell>
          <table:table-cell office:value-type="string" table:style-name="c10">
            <text:p>2026-04-02 08:30</text:p>
          </table:table-cell>
          <table:table-cell office:value-type="float" office:value="0.09105445000000001" table:style-name="c10">
            <text:p>0.091054</text:p>
          </table:table-cell>
          <table:table-cell office:value-type="float" office:value="-0.8438661079394727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45</text:p>
          </table:table-cell>
          <table:table-cell office:value-type="float" office:value="0.09294644999999999" table:style-name="c10">
            <text:p>0.092946</text:p>
          </table:table-cell>
          <table:table-cell office:value-type="string" table:style-name="c10">
            <text:p>2026-04-03 19:45</text:p>
          </table:table-cell>
          <table:table-cell office:value-type="float" office:value="0.09265365" table:style-name="c10">
            <text:p>0.092654</text:p>
          </table:table-cell>
          <table:table-cell office:value-type="float" office:value="-0.5142903751030548" table:style-name="c11">
            <text:p>-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7:30</text:p>
          </table:table-cell>
          <table:table-cell office:value-type="float" office:value="0.09304649999999999" table:style-name="c10">
            <text:p>0.093046</text:p>
          </table:table-cell>
          <table:table-cell office:value-type="string" table:style-name="c10">
            <text:p>2026-04-04 21:15</text:p>
          </table:table-cell>
          <table:table-cell office:value-type="float" office:value="0.0925537" table:style-name="c10">
            <text:p>0.092554</text:p>
          </table:table-cell>
          <table:table-cell office:value-type="float" office:value="-0.7284689335977035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15</text:p>
          </table:table-cell>
          <table:table-cell office:value-type="float" office:value="0.0922461" table:style-name="c10">
            <text:p>0.092246</text:p>
          </table:table-cell>
          <table:table-cell office:value-type="string" table:style-name="c10">
            <text:p>2026-04-08 13:30</text:p>
          </table:table-cell>
          <table:table-cell office:value-type="float" office:value="0.0917541" table:style-name="c10">
            <text:p>0.091754</text:p>
          </table:table-cell>
          <table:table-cell office:value-type="float" office:value="-0.7321897033045199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0.086043" table:style-name="c10">
            <text:p>0.086043</text:p>
          </table:table-cell>
          <table:table-cell office:value-type="string" table:style-name="c10">
            <text:p>2026-04-15 21:15</text:p>
          </table:table-cell>
          <table:table-cell office:value-type="float" office:value="0.08535730000000001" table:style-name="c10">
            <text:p>0.085357</text:p>
          </table:table-cell>
          <table:table-cell office:value-type="float" office:value="-0.9952340605278498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15</text:p>
          </table:table-cell>
          <table:table-cell office:value-type="float" office:value="0.08714354999999999" table:style-name="c10">
            <text:p>0.087144</text:p>
          </table:table-cell>
          <table:table-cell office:value-type="string" table:style-name="c10">
            <text:p>2026-04-16 10:45</text:p>
          </table:table-cell>
          <table:table-cell office:value-type="float" office:value="0.08715640000000001" table:style-name="c10">
            <text:p>0.087156</text:p>
          </table:table-cell>
          <table:table-cell office:value-type="float" office:value="-0.18518369242470634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15</text:p>
          </table:table-cell>
          <table:table-cell office:value-type="float" office:value="0.08794395" table:style-name="c10">
            <text:p>0.087944</text:p>
          </table:table-cell>
          <table:table-cell office:value-type="string" table:style-name="c10">
            <text:p>2026-04-16 14:00</text:p>
          </table:table-cell>
          <table:table-cell office:value-type="float" office:value="0.08785605" table:style-name="c10">
            <text:p>0.087856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0.0886443" table:style-name="c10">
            <text:p>0.088644</text:p>
          </table:table-cell>
          <table:table-cell office:value-type="string" table:style-name="c10">
            <text:p>2026-04-16 21:45</text:p>
          </table:table-cell>
          <table:table-cell office:value-type="float" office:value="0.08925535000000001" table:style-name="c10">
            <text:p>0.089255</text:p>
          </table:table-cell>
          <table:table-cell office:value-type="float" office:value="0.4880500555027423" table:style-name="c12">
            <text:p>+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3:30</text:p>
          </table:table-cell>
          <table:table-cell office:value-type="float" office:value="0.0906453" table:style-name="c10">
            <text:p>0.090645</text:p>
          </table:table-cell>
          <table:table-cell office:value-type="string" table:style-name="c10">
            <text:p>2026-04-17 01:45</text:p>
          </table:table-cell>
          <table:table-cell office:value-type="float" office:value="0.08995500000000001" table:style-name="c10">
            <text:p>0.089955</text:p>
          </table:table-cell>
          <table:table-cell office:value-type="float" office:value="-0.9599174419412715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0.08994495" table:style-name="c10">
            <text:p>0.089945</text:p>
          </table:table-cell>
          <table:table-cell office:value-type="string" table:style-name="c10">
            <text:p>2026-04-17 10:45</text:p>
          </table:table-cell>
          <table:table-cell office:value-type="float" office:value="0.08925535000000001" table:style-name="c10">
            <text:p>0.089255</text:p>
          </table:table-cell>
          <table:table-cell office:value-type="float" office:value="-0.9650585659895183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45</text:p>
          </table:table-cell>
          <table:table-cell office:value-type="float" office:value="0.0902451" table:style-name="c10">
            <text:p>0.090245</text:p>
          </table:table-cell>
          <table:table-cell office:value-type="string" table:style-name="c10">
            <text:p>2026-04-18 16:45</text:p>
          </table:table-cell>
          <table:table-cell office:value-type="float" office:value="0.0895552" table:style-name="c10">
            <text:p>0.089555</text:p>
          </table:table-cell>
          <table:table-cell office:value-type="float" office:value="-0.9628454562075839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1:15</text:p>
          </table:table-cell>
          <table:table-cell office:value-type="float" office:value="0.0898449" table:style-name="c10">
            <text:p>0.089845</text:p>
          </table:table-cell>
          <table:table-cell office:value-type="string" table:style-name="c10">
            <text:p>2026-04-19 16:30</text:p>
          </table:table-cell>
          <table:table-cell office:value-type="float" office:value="0.09015490000000001" table:style-name="c10">
            <text:p>0.090155</text:p>
          </table:table-cell>
          <table:table-cell office:value-type="float" office:value="0.14444932867641036" table:style-name="c12">
            <text:p>+0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08:15</text:p>
          </table:table-cell>
          <table:table-cell office:value-type="float" office:value="0.09014504999999999" table:style-name="c10">
            <text:p>0.090145</text:p>
          </table:table-cell>
          <table:table-cell office:value-type="string" table:style-name="c10">
            <text:p>2026-04-20 21:15</text:p>
          </table:table-cell>
          <table:table-cell office:value-type="float" office:value="0.09385305000000001" table:style-name="c10">
            <text:p>0.093853</text:p>
          </table:table-cell>
          <table:table-cell office:value-type="float" office:value="3.905247989823102" table:style-name="c12">
            <text:p>+3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7:30</text:p>
          </table:table-cell>
          <table:table-cell office:value-type="float" office:value="0.09274635" table:style-name="c10">
            <text:p>0.092746</text:p>
          </table:table-cell>
          <table:table-cell office:value-type="string" table:style-name="c10">
            <text:p>2026-04-21 12:45</text:p>
          </table:table-cell>
          <table:table-cell office:value-type="float" office:value="0.09305345000000001" table:style-name="c10">
            <text:p>0.093053</text:p>
          </table:table-cell>
          <table:table-cell office:value-type="float" office:value="0.1305562466339616" table:style-name="c12">
            <text:p>+0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6:00</text:p>
          </table:table-cell>
          <table:table-cell office:value-type="float" office:value="0.09434714999999999" table:style-name="c10">
            <text:p>0.094347</text:p>
          </table:table-cell>
          <table:table-cell office:value-type="string" table:style-name="c10">
            <text:p>2026-04-21 17:00</text:p>
          </table:table-cell>
          <table:table-cell office:value-type="float" office:value="0.09315340000000001" table:style-name="c10">
            <text:p>0.093153</text:p>
          </table:table-cell>
          <table:table-cell office:value-type="float" office:value="-1.4626447609705107" table:style-name="c11">
            <text:p>-1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8:15</text:p>
          </table:table-cell>
          <table:table-cell office:value-type="float" office:value="0.09414705" table:style-name="c10">
            <text:p>0.094147</text:p>
          </table:table-cell>
          <table:table-cell office:value-type="string" table:style-name="c10">
            <text:p>2026-04-21 18:45</text:p>
          </table:table-cell>
          <table:table-cell office:value-type="float" office:value="0.09325335" table:style-name="c10">
            <text:p>0.093253</text:p>
          </table:table-cell>
          <table:table-cell office:value-type="float" office:value="-1.1472621252073156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00</text:p>
          </table:table-cell>
          <table:table-cell office:value-type="float" office:value="0.09484739999999998" table:style-name="c10">
            <text:p>0.094847</text:p>
          </table:table-cell>
          <table:table-cell office:value-type="string" table:style-name="c10">
            <text:p>2026-04-22 03:45</text:p>
          </table:table-cell>
          <table:table-cell office:value-type="float" office:value="0.09405295000000001" table:style-name="c10">
            <text:p>0.094053</text:p>
          </table:table-cell>
          <table:table-cell office:value-type="float" office:value="-1.0358342422142952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45</text:p>
          </table:table-cell>
          <table:table-cell office:value-type="float" office:value="0.0950475" table:style-name="c10">
            <text:p>0.095047</text:p>
          </table:table-cell>
          <table:table-cell office:value-type="string" table:style-name="c10">
            <text:p>2026-04-22 09:15</text:p>
          </table:table-cell>
          <table:table-cell office:value-type="float" office:value="0.09465265" table:style-name="c10">
            <text:p>0.094653</text:p>
          </table:table-cell>
          <table:table-cell office:value-type="float" office:value="-0.614493434703689" table:style-name="c11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45</text:p>
          </table:table-cell>
          <table:table-cell office:value-type="float" office:value="0.09474735000000001" table:style-name="c10">
            <text:p>0.094747</text:p>
          </table:table-cell>
          <table:table-cell office:value-type="string" table:style-name="c10">
            <text:p>2026-04-22 19:00</text:p>
          </table:table-cell>
          <table:table-cell office:value-type="float" office:value="0.09445275" table:style-name="c10">
            <text:p>0.094453</text:p>
          </table:table-cell>
          <table:table-cell office:value-type="float" office:value="-0.5102106256797745" table:style-name="c11">
            <text:p>-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0932466" table:style-name="c10">
            <text:p>0.093247</text:p>
          </table:table-cell>
          <table:table-cell office:value-type="string" table:style-name="c10">
            <text:p>2026-04-23 10:15</text:p>
          </table:table-cell>
          <table:table-cell office:value-type="float" office:value="0.09265365" table:style-name="c10">
            <text:p>0.092654</text:p>
          </table:table-cell>
          <table:table-cell office:value-type="float" office:value="-0.8345233459986612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3:00</text:p>
          </table:table-cell>
          <table:table-cell office:value-type="float" office:value="0.0944472" table:style-name="c10">
            <text:p>0.094447</text:p>
          </table:table-cell>
          <table:table-cell office:value-type="string" table:style-name="c10">
            <text:p>2026-04-23 17:30</text:p>
          </table:table-cell>
          <table:table-cell office:value-type="float" office:value="0.09525235" table:style-name="c10">
            <text:p>0.095252</text:p>
          </table:table-cell>
          <table:table-cell office:value-type="float" office:value="0.6508827708497478" table:style-name="c12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2:30</text:p>
          </table:table-cell>
          <table:table-cell office:value-type="float" office:value="0.09454725" table:style-name="c10">
            <text:p>0.094547</text:p>
          </table:table-cell>
          <table:table-cell office:value-type="string" table:style-name="c10">
            <text:p>2026-04-24 02:15</text:p>
          </table:table-cell>
          <table:table-cell office:value-type="float" office:value="0.09425285" table:style-name="c10">
            <text:p>0.094253</text:p>
          </table:table-cell>
          <table:table-cell office:value-type="float" office:value="-0.5106562561576267" table:style-name="c11">
            <text:p>-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4:15</text:p>
          </table:table-cell>
          <table:table-cell office:value-type="float" office:value="0.09594794999999999" table:style-name="c10">
            <text:p>0.095948</text:p>
          </table:table-cell>
          <table:table-cell office:value-type="string" table:style-name="c10">
            <text:p>2026-04-24 15:00</text:p>
          </table:table-cell>
          <table:table-cell office:value-type="float" office:value="0.09515240000000001" table:style-name="c10">
            <text:p>0.095152</text:p>
          </table:table-cell>
          <table:table-cell office:value-type="float" office:value="-1.0273900042678918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1:00</text:p>
          </table:table-cell>
          <table:table-cell office:value-type="float" office:value="0.0934467" table:style-name="c10">
            <text:p>0.093447</text:p>
          </table:table-cell>
          <table:table-cell office:value-type="string" table:style-name="c10">
            <text:p>2026-04-29 02:45</text:p>
          </table:table-cell>
          <table:table-cell office:value-type="float" office:value="0.0927536" table:style-name="c10">
            <text:p>0.092754</text:p>
          </table:table-cell>
          <table:table-cell office:value-type="float" office:value="-0.9401235639139749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4:00</text:p>
          </table:table-cell>
          <table:table-cell office:value-type="float" office:value="0.0936468" table:style-name="c10">
            <text:p>0.093647</text:p>
          </table:table-cell>
          <table:table-cell office:value-type="string" table:style-name="c10">
            <text:p>2026-04-29 06:00</text:p>
          </table:table-cell>
          <table:table-cell office:value-type="float" office:value="0.09315340000000001" table:style-name="c10">
            <text:p>0.093153</text:p>
          </table:table-cell>
          <table:table-cell office:value-type="float" office:value="-0.7257200957213605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01:15</text:p>
          </table:table-cell>
          <table:table-cell office:value-type="float" office:value="0.09484739999999998" table:style-name="c10">
            <text:p>0.094847</text:p>
          </table:table-cell>
          <table:table-cell office:value-type="string" table:style-name="c10">
            <text:p>2026-04-30 02:45</text:p>
          </table:table-cell>
          <table:table-cell office:value-type="float" office:value="0.0937531" table:style-name="c10">
            <text:p>0.093753</text:p>
          </table:table-cell>
          <table:table-cell office:value-type="float" office:value="-1.3513416782114818" table:style-name="c11">
            <text:p>-1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07:15</text:p>
          </table:table-cell>
          <table:table-cell office:value-type="float" office:value="0.09394694999999999" table:style-name="c10">
            <text:p>0.093947</text:p>
          </table:table-cell>
          <table:table-cell office:value-type="string" table:style-name="c10">
            <text:p>2026-04-30 14:00</text:p>
          </table:table-cell>
          <table:table-cell office:value-type="float" office:value="0.0947526" table:style-name="c10">
            <text:p>0.094753</text:p>
          </table:table-cell>
          <table:table-cell office:value-type="float" office:value="0.6559441819026679" table:style-name="c12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16:00</text:p>
          </table:table-cell>
          <table:table-cell office:value-type="float" office:value="0.09614805" table:style-name="c10">
            <text:p>0.096148</text:p>
          </table:table-cell>
          <table:table-cell office:value-type="string" table:style-name="c10">
            <text:p>2026-04-30 19:00</text:p>
          </table:table-cell>
          <table:table-cell office:value-type="float" office:value="0.09565215" table:style-name="c10">
            <text:p>0.095652</text:p>
          </table:table-cell>
          <table:table-cell office:value-type="float" office:value="-0.7146360720264089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0:30</text:p>
          </table:table-cell>
          <table:table-cell office:value-type="float" office:value="0.09694844999999999" table:style-name="c10">
            <text:p>0.096948</text:p>
          </table:table-cell>
          <table:table-cell office:value-type="string" table:style-name="c10">
            <text:p>2026-05-02 02:45</text:p>
          </table:table-cell>
          <table:table-cell office:value-type="float" office:value="0.09625185" table:style-name="c10">
            <text:p>0.096252</text:p>
          </table:table-cell>
          <table:table-cell office:value-type="float" office:value="-0.9169898519780229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14:45</text:p>
          </table:table-cell>
          <table:table-cell office:value-type="float" office:value="0.09774884999999998" table:style-name="c10">
            <text:p>0.097749</text:p>
          </table:table-cell>
          <table:table-cell office:value-type="string" table:style-name="c10">
            <text:p>2026-05-02 17:30</text:p>
          </table:table-cell>
          <table:table-cell office:value-type="float" office:value="0.09725135" table:style-name="c10">
            <text:p>0.097251</text:p>
          </table:table-cell>
          <table:table-cell office:value-type="float" office:value="-0.7078399885522724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0.096048" table:style-name="c10">
            <text:p>0.096048</text:p>
          </table:table-cell>
          <table:table-cell office:value-type="string" table:style-name="c10">
            <text:p>2026-05-04 08:00</text:p>
          </table:table-cell>
          <table:table-cell office:value-type="float" office:value="0.09665165" table:style-name="c10">
            <text:p>0.096652</text:p>
          </table:table-cell>
          <table:table-cell office:value-type="float" office:value="0.427331492222649" table:style-name="c12">
            <text:p>+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21:30</text:p>
          </table:table-cell>
          <table:table-cell office:value-type="float" office:value="0.09814905" table:style-name="c10">
            <text:p>0.098149</text:p>
          </table:table-cell>
          <table:table-cell office:value-type="string" table:style-name="c10">
            <text:p>2026-05-04 23:15</text:p>
          </table:table-cell>
          <table:table-cell office:value-type="float" office:value="0.09755120000000002" table:style-name="c10">
            <text:p>0.097551</text:p>
          </table:table-cell>
          <table:table-cell office:value-type="float" office:value="-0.807806951570067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1:15</text:p>
          </table:table-cell>
          <table:table-cell office:value-type="float" office:value="0.09874934999999999" table:style-name="c10">
            <text:p>0.098749</text:p>
          </table:table-cell>
          <table:table-cell office:value-type="string" table:style-name="c10">
            <text:p>2026-05-05 04:00</text:p>
          </table:table-cell>
          <table:table-cell office:value-type="float" office:value="0.09785105000000001" table:style-name="c10">
            <text:p>0.097851</text:p>
          </table:table-cell>
          <table:table-cell office:value-type="float" office:value="-1.1077584297516707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0:15</text:p>
          </table:table-cell>
          <table:table-cell office:value-type="float" office:value="0.09894945" table:style-name="c10">
            <text:p>0.098949</text:p>
          </table:table-cell>
          <table:table-cell office:value-type="string" table:style-name="c10">
            <text:p>2026-05-08 04:00</text:p>
          </table:table-cell>
          <table:table-cell office:value-type="float" office:value="0.09845075" table:style-name="c10">
            <text:p>0.098451</text:p>
          </table:table-cell>
          <table:table-cell office:value-type="float" office:value="-0.7028872310558376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8:45</text:p>
          </table:table-cell>
          <table:table-cell office:value-type="float" office:value="0.10085039999999999" table:style-name="c10">
            <text:p>0.10085</text:p>
          </table:table-cell>
          <table:table-cell office:value-type="string" table:style-name="c10">
            <text:p>2026-05-08 12:15</text:p>
          </table:table-cell>
          <table:table-cell office:value-type="float" office:value="0.10144925000000002" table:style-name="c10">
            <text:p>0.10145</text:p>
          </table:table-cell>
          <table:table-cell office:value-type="float" office:value="0.3927133152174189" table:style-name="c12">
            <text:p>+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15</text:p>
          </table:table-cell>
          <table:table-cell office:value-type="float" office:value="0.1014507" table:style-name="c10">
            <text:p>0.10145</text:p>
          </table:table-cell>
          <table:table-cell office:value-type="string" table:style-name="c10">
            <text:p>2026-05-09 00:15</text:p>
          </table:table-cell>
          <table:table-cell office:value-type="float" office:value="0.10124935" table:style-name="c10">
            <text:p>0.10125</text:p>
          </table:table-cell>
          <table:table-cell office:value-type="float" office:value="-0.3979740412338284" table:style-name="c11">
            <text:p>-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30</text:p>
          </table:table-cell>
          <table:table-cell office:value-type="float" office:value="0.1028514" table:style-name="c10">
            <text:p>0.10285</text:p>
          </table:table-cell>
          <table:table-cell office:value-type="string" table:style-name="c10">
            <text:p>2026-05-09 03:45</text:p>
          </table:table-cell>
          <table:table-cell office:value-type="float" office:value="0.10244875" table:style-name="c10">
            <text:p>0.10245</text:p>
          </table:table-cell>
          <table:table-cell office:value-type="float" office:value="-0.5906045530250426" table:style-name="c11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2:30</text:p>
          </table:table-cell>
          <table:table-cell office:value-type="float" office:value="0.1014507" table:style-name="c10">
            <text:p>0.10145</text:p>
          </table:table-cell>
          <table:table-cell office:value-type="string" table:style-name="c10">
            <text:p>2026-05-10 11:30</text:p>
          </table:table-cell>
          <table:table-cell office:value-type="float" office:value="0.10224885" table:style-name="c10">
            <text:p>0.10225</text:p>
          </table:table-cell>
          <table:table-cell office:value-type="float" office:value="0.5852641222288124" table:style-name="c12">
            <text:p>+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30</text:p>
          </table:table-cell>
          <table:table-cell office:value-type="float" office:value="0.10375184999999999" table:style-name="c10">
            <text:p>0.10375</text:p>
          </table:table-cell>
          <table:table-cell office:value-type="string" table:style-name="c10">
            <text:p>2026-05-10 20:45</text:p>
          </table:table-cell>
          <table:table-cell office:value-type="float" office:value="0.10274860000000001" table:style-name="c10">
            <text:p>0.10275</text:p>
          </table:table-cell>
          <table:table-cell office:value-type="float" office:value="-1.1649377349897572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45</text:p>
          </table:table-cell>
          <table:table-cell office:value-type="float" office:value="0.1042521" table:style-name="c10">
            <text:p>0.10425</text:p>
          </table:table-cell>
          <table:table-cell office:value-type="string" table:style-name="c10">
            <text:p>2026-05-11 02:30</text:p>
          </table:table-cell>
          <table:table-cell office:value-type="float" office:value="0.10374810000000001" table:style-name="c10">
            <text:p>0.10375</text:p>
          </table:table-cell>
          <table:table-cell office:value-type="float" office:value="-0.6823770954254016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19:45</text:p>
          </table:table-cell>
          <table:table-cell office:value-type="float" office:value="0.09244619999999999" table:style-name="c10">
            <text:p>0.092446</text:p>
          </table:table-cell>
          <table:table-cell office:value-type="string" table:style-name="c10">
            <text:p>2026-05-17 22:30</text:p>
          </table:table-cell>
          <table:table-cell office:value-type="float" office:value="0.09185405" table:style-name="c10">
            <text:p>0.091854</text:p>
          </table:table-cell>
          <table:table-cell office:value-type="float" office:value="-0.8391542821121867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0.09126561" table:style-name="c10">
            <text:p>0.091266</text:p>
          </table:table-cell>
          <table:table-cell office:value-type="string" table:style-name="c10">
            <text:p>2026-05-21 23:15</text:p>
          </table:table-cell>
          <table:table-cell office:value-type="float" office:value="0.09123436" table:style-name="c10">
            <text:p>0.091234</text:p>
          </table:table-cell>
          <table:table-cell office:value-type="float" office:value="-0.23407227063950709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20:45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5-22 22:45</text:p>
          </table:table-cell>
          <table:table-cell office:value-type="float" office:value="0.09131432" table:style-name="c10">
            <text:p>0.091314</text:p>
          </table:table-cell>
          <table:table-cell office:value-type="float" office:value="-0.6693134628759867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10:15</text:p>
          </table:table-cell>
          <table:table-cell office:value-type="float" office:value="0.09198596999999999" table:style-name="c10">
            <text:p>0.091986</text:p>
          </table:table-cell>
          <table:table-cell office:value-type="string" table:style-name="c10">
            <text:p>2026-05-24 11:00</text:p>
          </table:table-cell>
          <table:table-cell office:value-type="float" office:value="0.09150422500000001" table:style-name="c10">
            <text:p>0.091504</text:p>
          </table:table-cell>
          <table:table-cell office:value-type="float" office:value="-0.7225688284582588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15</text:p>
          </table:table-cell>
          <table:table-cell office:value-type="float" office:value="0.09219607499999999" table:style-name="c10">
            <text:p>0.092196</text:p>
          </table:table-cell>
          <table:table-cell office:value-type="string" table:style-name="c10">
            <text:p>2026-05-25 11:15</text:p>
          </table:table-cell>
          <table:table-cell office:value-type="float" office:value="0.092023965" table:style-name="c10">
            <text:p>0.092024</text:p>
          </table:table-cell>
          <table:table-cell office:value-type="float" office:value="-0.38620505920126114" table:style-name="c11">
            <text:p>-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7:00</text:p>
          </table:table-cell>
          <table:table-cell office:value-type="float" office:value="0.09350673" table:style-name="c10">
            <text:p>0.093507</text:p>
          </table:table-cell>
          <table:table-cell office:value-type="string" table:style-name="c10">
            <text:p>2026-05-25 20:45</text:p>
          </table:table-cell>
          <table:table-cell office:value-type="float" office:value="0.093003475" table:style-name="c10">
            <text:p>0.093003</text:p>
          </table:table-cell>
          <table:table-cell office:value-type="float" office:value="-0.7370260370830994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0 01:00</text:p>
          </table:table-cell>
          <table:table-cell office:value-type="float" office:value="0.09088542" table:style-name="c10">
            <text:p>0.090885</text:p>
          </table:table-cell>
          <table:table-cell office:value-type="string" table:style-name="c10">
            <text:p>2026-05-30 04:30</text:p>
          </table:table-cell>
          <table:table-cell office:value-type="float" office:value="0.09091452" table:style-name="c10">
            <text:p>0.090915</text:p>
          </table:table-cell>
          <table:table-cell office:value-type="float" office:value="-0.16794566772097008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15</text:p>
          </table:table-cell>
          <table:table-cell office:value-type="float" office:value="0.09119557499999999" table:style-name="c10">
            <text:p>0.091196</text:p>
          </table:table-cell>
          <table:table-cell office:value-type="string" table:style-name="c10">
            <text:p>2026-05-31 07:15</text:p>
          </table:table-cell>
          <table:table-cell office:value-type="float" office:value="0.09071462" table:style-name="c10">
            <text:p>0.090715</text:p>
          </table:table-cell>
          <table:table-cell office:value-type="float" office:value="-0.726234277682869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20:15</text:p>
          </table:table-cell>
          <table:table-cell office:value-type="float" office:value="0.091995975" table:style-name="c10">
            <text:p>0.091996</text:p>
          </table:table-cell>
          <table:table-cell office:value-type="string" table:style-name="c10">
            <text:p>2026-06-01 01:15</text:p>
          </table:table-cell>
          <table:table-cell office:value-type="float" office:value="0.09238378500000001" table:style-name="c10">
            <text:p>0.092384</text:p>
          </table:table-cell>
          <table:table-cell office:value-type="float" office:value="0.22080837100211248" table:style-name="c12">
            <text:p>+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00</text:p>
          </table:table-cell>
          <table:table-cell office:value-type="float" office:value="0.09294644999999999" table:style-name="c10">
            <text:p>0.092946</text:p>
          </table:table-cell>
          <table:table-cell office:value-type="string" table:style-name="c10">
            <text:p>2026-06-01 13:15</text:p>
          </table:table-cell>
          <table:table-cell office:value-type="float" office:value="0.09194400500000001" table:style-name="c10">
            <text:p>0.091944</text:p>
          </table:table-cell>
          <table:table-cell office:value-type="float" office:value="-1.2762629083681643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5:45</text:p>
          </table:table-cell>
          <table:table-cell office:value-type="float" office:value="0.09325660499999999" table:style-name="c10">
            <text:p>0.093257</text:p>
          </table:table-cell>
          <table:table-cell office:value-type="string" table:style-name="c10">
            <text:p>2026-06-01 21:15</text:p>
          </table:table-cell>
          <table:table-cell office:value-type="float" office:value="0.09384305500000001" table:style-name="c10">
            <text:p>0.093843</text:p>
          </table:table-cell>
          <table:table-cell office:value-type="float" office:value="0.4276991780421291" table:style-name="c12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30</text:p>
          </table:table-cell>
          <table:table-cell office:value-type="float" office:value="5.612804999999999e-06" table:style-name="c1">
            <text:p>0.0000056128</text:p>
          </table:table-cell>
          <table:table-cell office:value-type="string" table:style-name="c1">
            <text:p>2026-03-05 23:00</text:p>
          </table:table-cell>
          <table:table-cell office:value-type="float" office:value="5.5372300000000005e-06" table:style-name="c1">
            <text:p>0.0000055372</text:p>
          </table:table-cell>
          <table:table-cell office:value-type="float" office:value="-1.5436831097820014" table:style-name="c13">
            <text:p>-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5.56278e-06" table:style-name="c1">
            <text:p>0.0000055628</text:p>
          </table:table-cell>
          <table:table-cell office:value-type="string" table:style-name="c1">
            <text:p>2026-03-09 20:45</text:p>
          </table:table-cell>
          <table:table-cell office:value-type="float" office:value="5.467265e-06" table:style-name="c1">
            <text:p>0.0000054673</text:p>
          </table:table-cell>
          <table:table-cell office:value-type="float" office:value="-1.9135048075782146" table:style-name="c13">
            <text:p>-1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15</text:p>
          </table:table-cell>
          <table:table-cell office:value-type="float" office:value="5.632815e-06" table:style-name="c1">
            <text:p>0.0000056328</text:p>
          </table:table-cell>
          <table:table-cell office:value-type="string" table:style-name="c1">
            <text:p>2026-03-10 13:45</text:p>
          </table:table-cell>
          <table:table-cell office:value-type="float" office:value="5.7271350000000005e-06" table:style-name="c1">
            <text:p>0.0000057271</text:p>
          </table:table-cell>
          <table:table-cell office:value-type="float" office:value="1.4712263252920854" table:style-name="c14">
            <text:p>+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5.942969999999999e-06" table:style-name="c1">
            <text:p>0.000005943</text:p>
          </table:table-cell>
          <table:table-cell office:value-type="string" table:style-name="c1">
            <text:p>2026-03-10 18:15</text:p>
          </table:table-cell>
          <table:table-cell office:value-type="float" office:value="5.797100000000001e-06" table:style-name="c1">
            <text:p>0.0000057971</text:p>
          </table:table-cell>
          <table:table-cell office:value-type="float" office:value="-2.649490118577047" table:style-name="c13">
            <text:p>-2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5.772884999999999e-06" table:style-name="c1">
            <text:p>0.0000057729</text:p>
          </table:table-cell>
          <table:table-cell office:value-type="string" table:style-name="c1">
            <text:p>2026-03-11 18:45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0.5643042792295772" table:style-name="c14">
            <text:p>+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15</text:p>
          </table:table-cell>
          <table:table-cell office:value-type="float" office:value="5.74287e-06" table:style-name="c1">
            <text:p>0.0000057429</text:p>
          </table:table-cell>
          <table:table-cell office:value-type="string" table:style-name="c1">
            <text:p>2026-03-12 13:30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3.1742295582174007" table:style-name="c14">
            <text:p>+3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3:00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7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8:30</text:p>
          </table:table-cell>
          <table:table-cell office:value-type="float" office:value="5.947025e-06" table:style-name="c1">
            <text:p>0.000005947</text:p>
          </table:table-cell>
          <table:table-cell office:value-type="float" office:value="-0.6336547467472253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1:15</text:p>
          </table:table-cell>
          <table:table-cell office:value-type="float" office:value="6.113054999999999e-06" table:style-name="c1">
            <text:p>0.0000061131</text:p>
          </table:table-cell>
          <table:table-cell office:value-type="string" table:style-name="c1">
            <text:p>2026-03-13 14:15</text:p>
          </table:table-cell>
          <table:table-cell office:value-type="float" office:value="6.1469250000000004e-06" table:style-name="c1">
            <text:p>0.0000061469</text:p>
          </table:table-cell>
          <table:table-cell office:value-type="float" office:value="0.35305255596425056" table:style-name="c14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00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3-16 02:30</text:p>
          </table:table-cell>
          <table:table-cell office:value-type="float" office:value="5.947025e-06" table:style-name="c1">
            <text:p>0.000005947</text:p>
          </table:table-cell>
          <table:table-cell office:value-type="float" office:value="-1.4589566176214208" table:style-name="c13">
            <text:p>-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16 09:00</text:p>
          </table:table-cell>
          <table:table-cell office:value-type="float" office:value="6.21689e-06" table:style-name="c1">
            <text:p>0.0000062169</text:p>
          </table:table-cell>
          <table:table-cell office:value-type="float" office:value="1.9960815133551524" table:style-name="c14">
            <text:p>+2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9:1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17 22:45</text:p>
          </table:table-cell>
          <table:table-cell office:value-type="float" office:value="6.09695e-06" table:style-name="c1">
            <text:p>0.000006097</text:p>
          </table:table-cell>
          <table:table-cell office:value-type="float" office:value="-0.13593864890215634" table:style-name="c13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15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3-18 04:3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0.7859933945222553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0 11:30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1.288414024310136" table:style-name="c13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5:30</text:p>
          </table:table-cell>
          <table:table-cell office:value-type="float" office:value="6.043019999999999e-06" table:style-name="c1">
            <text:p>0.000006043</text:p>
          </table:table-cell>
          <table:table-cell office:value-type="string" table:style-name="c1">
            <text:p>2026-03-21 06:15</text:p>
          </table:table-cell>
          <table:table-cell office:value-type="float" office:value="6.006995000000001e-06" table:style-name="c1">
            <text:p>0.000006007</text:p>
          </table:table-cell>
          <table:table-cell office:value-type="float" office:value="-0.7948506376778353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6:30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21 07:30</text:p>
          </table:table-cell>
          <table:table-cell office:value-type="float" office:value="6.006995000000001e-06" table:style-name="c1">
            <text:p>0.000006007</text:p>
          </table:table-cell>
          <table:table-cell office:value-type="float" office:value="-1.447516094008905" table:style-name="c13">
            <text:p>-1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23 22:3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0.6244070645458955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6.173085e-06" table:style-name="c1">
            <text:p>0.0000061731</text:p>
          </table:table-cell>
          <table:table-cell office:value-type="string" table:style-name="c1">
            <text:p>2026-03-24 11:15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1.107594712530291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3-25 00:30</text:p>
          </table:table-cell>
          <table:table-cell office:value-type="float" office:value="6.1969e-06" table:style-name="c1">
            <text:p>0.0000061969</text:p>
          </table:table-cell>
          <table:table-cell office:value-type="float" office:value="-0.6202301277014266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6:00</text:p>
          </table:table-cell>
          <table:table-cell office:value-type="float" office:value="6.033015e-06" table:style-name="c1">
            <text:p>0.000006033</text:p>
          </table:table-cell>
          <table:table-cell office:value-type="string" table:style-name="c1">
            <text:p>2026-03-30 09:15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0.19637141578465744" table:style-name="c14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5:4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30 17:30</text:p>
          </table:table-cell>
          <table:table-cell office:value-type="float" office:value="6.03698e-06" table:style-name="c1">
            <text:p>0.000006037</text:p>
          </table:table-cell>
          <table:table-cell office:value-type="float" office:value="-1.1182081048145887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1:45</text:p>
          </table:table-cell>
          <table:table-cell office:value-type="float" office:value="5.932965e-06" table:style-name="c1">
            <text:p>0.000005933</text:p>
          </table:table-cell>
          <table:table-cell office:value-type="string" table:style-name="c1">
            <text:p>2026-03-31 15:00</text:p>
          </table:table-cell>
          <table:table-cell office:value-type="float" office:value="5.8970500000000006e-06" table:style-name="c1">
            <text:p>0.0000058971</text:p>
          </table:table-cell>
          <table:table-cell office:value-type="float" office:value="-0.8040364800736111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3-31 21:45</text:p>
          </table:table-cell>
          <table:table-cell office:value-type="float" office:value="5.947025e-06" table:style-name="c1">
            <text:p>0.000005947</text:p>
          </table:table-cell>
          <table:table-cell office:value-type="float" office:value="-1.1304864730134923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6.063029999999999e-06" table:style-name="c1">
            <text:p>0.000006063</text:p>
          </table:table-cell>
          <table:table-cell office:value-type="string" table:style-name="c1">
            <text:p>2026-04-01 13:45</text:p>
          </table:table-cell>
          <table:table-cell office:value-type="float" office:value="6.006995000000001e-06" table:style-name="c1">
            <text:p>0.000006007</text:p>
          </table:table-cell>
          <table:table-cell office:value-type="float" office:value="-1.1222603715468682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7:15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01 17:30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-0.9534230102981267" table:style-name="c13">
            <text:p>-1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2 01:1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1236200577397049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4 20:30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1.6180019574510207" table:style-name="c13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08 00:45</text:p>
          </table:table-cell>
          <table:table-cell office:value-type="float" office:value="6.07696e-06" table:style-name="c1">
            <text:p>0.000006077</text:p>
          </table:table-cell>
          <table:table-cell office:value-type="float" office:value="-1.4344509540351935" table:style-name="c13">
            <text:p>-1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4-11 20:45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0.7964958217734908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6.013004999999999e-06" table:style-name="c1">
            <text:p>0.000006013</text:p>
          </table:table-cell>
          <table:table-cell office:value-type="string" table:style-name="c1">
            <text:p>2026-04-14 01:00</text:p>
          </table:table-cell>
          <table:table-cell office:value-type="float" office:value="5.927035e-06" table:style-name="c1">
            <text:p>0.000005927</text:p>
          </table:table-cell>
          <table:table-cell office:value-type="float" office:value="-1.6267763450221517" table:style-name="c13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1:15</text:p>
          </table:table-cell>
          <table:table-cell office:value-type="float" office:value="5.962979999999999e-06" table:style-name="c1">
            <text:p>0.000005963</text:p>
          </table:table-cell>
          <table:table-cell office:value-type="string" table:style-name="c1">
            <text:p>2026-04-14 12:1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-1.1360625552156778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4 15:1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1.2966537226386743" table:style-name="c13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5.892945e-06" table:style-name="c1">
            <text:p>0.0000058929</text:p>
          </table:table-cell>
          <table:table-cell office:value-type="string" table:style-name="c1">
            <text:p>2026-04-15 13:45</text:p>
          </table:table-cell>
          <table:table-cell office:value-type="float" office:value="5.867065e-06" table:style-name="c1">
            <text:p>0.0000058671</text:p>
          </table:table-cell>
          <table:table-cell office:value-type="float" office:value="-0.6381913107113446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5 21:15</text:p>
          </table:table-cell>
          <table:table-cell office:value-type="float" office:value="5.947025e-06" table:style-name="c1">
            <text:p>0.000005947</text:p>
          </table:table-cell>
          <table:table-cell office:value-type="float" office:value="-1.1304864730134923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6 05:30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0.5311860232383836" table:style-name="c14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6 14:00</text:p>
          </table:table-cell>
          <table:table-cell office:value-type="float" office:value="6.03698e-06" table:style-name="c1">
            <text:p>0.000006037</text:p>
          </table:table-cell>
          <table:table-cell office:value-type="float" office:value="-1.2803094030034101" table:style-name="c13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.133064999999999e-06" table:style-name="c1">
            <text:p>0.0000061331</text:p>
          </table:table-cell>
          <table:table-cell office:value-type="string" table:style-name="c1">
            <text:p>2026-04-16 20:45</text:p>
          </table:table-cell>
          <table:table-cell office:value-type="float" office:value="6.256870000000001e-06" table:style-name="c1">
            <text:p>0.0000062569</text:p>
          </table:table-cell>
          <table:table-cell office:value-type="float" office:value="1.8147128209142105" table:style-name="c14">
            <text:p>+1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6.333165e-06" table:style-name="c1">
            <text:p>0.0000063332</text:p>
          </table:table-cell>
          <table:table-cell office:value-type="string" table:style-name="c1">
            <text:p>2026-04-17 15:45</text:p>
          </table:table-cell>
          <table:table-cell office:value-type="float" office:value="6.35682e-06" table:style-name="c1">
            <text:p>0.0000063568</text:p>
          </table:table-cell>
          <table:table-cell office:value-type="float" office:value="0.1728632811556441" table:style-name="c14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18 08:15</text:p>
          </table:table-cell>
          <table:table-cell office:value-type="float" office:value="6.276860000000001e-06" table:style-name="c1">
            <text:p>0.0000062769</text:p>
          </table:table-cell>
          <table:table-cell office:value-type="float" office:value="-0.6161592717926601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3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22 10:1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2.0074653070985216" table:style-name="c14">
            <text:p>+2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3 08:45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-0.7883774296674972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3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4-23 17:00</text:p>
          </table:table-cell>
          <table:table-cell office:value-type="float" office:value="6.1469250000000004e-06" table:style-name="c1">
            <text:p>0.0000061469</text:p>
          </table:table-cell>
          <table:table-cell office:value-type="float" office:value="-0.783632505349241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4 01:45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0.6233526592223315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6.213104999999999e-06" table:style-name="c1">
            <text:p>0.0000062131</text:p>
          </table:table-cell>
          <table:table-cell office:value-type="string" table:style-name="c1">
            <text:p>2026-04-24 13:45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-0.7812944266996635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6.2031e-06" table:style-name="c1">
            <text:p>0.0000062031</text:p>
          </table:table-cell>
          <table:table-cell office:value-type="string" table:style-name="c1">
            <text:p>2026-04-26 21:4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-0.4604572406538665" table:style-name="c13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0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27 05:00</text:p>
          </table:table-cell>
          <table:table-cell office:value-type="float" office:value="6.266865e-06" table:style-name="c1">
            <text:p>0.0000062669</text:p>
          </table:table-cell>
          <table:table-cell office:value-type="float" office:value="-0.7744137952452324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9 07:00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-0.94081003051526" table:style-name="c13">
            <text:p>-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45</text:p>
          </table:table-cell>
          <table:table-cell office:value-type="float" office:value="6.24312e-06" table:style-name="c1">
            <text:p>0.0000062431</text:p>
          </table:table-cell>
          <table:table-cell office:value-type="string" table:style-name="c1">
            <text:p>2026-04-29 12:15</text:p>
          </table:table-cell>
          <table:table-cell office:value-type="float" office:value="6.286855e-06" table:style-name="c1">
            <text:p>0.0000062869</text:p>
          </table:table-cell>
          <table:table-cell office:value-type="float" office:value="0.49923078292584133" table:style-name="c14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21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30 02:45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0.024052209447256168" table:style-name="c14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1:45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1 07:15</text:p>
          </table:table-cell>
          <table:table-cell office:value-type="float" office:value="6.3368300000000004e-06" table:style-name="c1">
            <text:p>0.0000063368</text:p>
          </table:table-cell>
          <table:table-cell office:value-type="float" office:value="0.4928803774583601" table:style-name="c14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5-01 16:0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0.17211799171390485" table:style-name="c14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3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5-02 17:45</text:p>
          </table:table-cell>
          <table:table-cell office:value-type="float" office:value="6.276860000000001e-06" table:style-name="c1">
            <text:p>0.0000062769</text:p>
          </table:table-cell>
          <table:table-cell office:value-type="float" office:value="-0.616159271792649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2:00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2 22:30</text:p>
          </table:table-cell>
          <table:table-cell office:value-type="float" office:value="6.266865e-06" table:style-name="c1">
            <text:p>0.0000062669</text:p>
          </table:table-cell>
          <table:table-cell office:value-type="float" office:value="-0.6166624658258901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6.403199999999999e-06" table:style-name="c1">
            <text:p>0.0000064032</text:p>
          </table:table-cell>
          <table:table-cell office:value-type="string" table:style-name="c1">
            <text:p>2026-05-05 22:45</text:p>
          </table:table-cell>
          <table:table-cell office:value-type="float" office:value="6.3368300000000004e-06" table:style-name="c1">
            <text:p>0.0000063368</text:p>
          </table:table-cell>
          <table:table-cell office:value-type="float" office:value="-1.2343410040291936" table:style-name="c13">
            <text:p>-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00</text:p>
          </table:table-cell>
          <table:table-cell office:value-type="float" office:value="6.413204999999999e-06" table:style-name="c1">
            <text:p>0.0000064132</text:p>
          </table:table-cell>
          <table:table-cell office:value-type="string" table:style-name="c1">
            <text:p>2026-05-06 02:45</text:p>
          </table:table-cell>
          <table:table-cell office:value-type="float" office:value="6.37681e-06" table:style-name="c1">
            <text:p>0.0000063768</text:p>
          </table:table-cell>
          <table:table-cell office:value-type="float" office:value="-0.7662665264871138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6.433215e-06" table:style-name="c1">
            <text:p>0.0000064332</text:p>
          </table:table-cell>
          <table:table-cell office:value-type="string" table:style-name="c1">
            <text:p>2026-05-06 06:30</text:p>
          </table:table-cell>
          <table:table-cell office:value-type="float" office:value="6.3968e-06" table:style-name="c1">
            <text:p>0.0000063968</text:p>
          </table:table-cell>
          <table:table-cell office:value-type="float" office:value="-0.7648151538538706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6.4832399999999994e-06" table:style-name="c1">
            <text:p>0.0000064832</text:p>
          </table:table-cell>
          <table:table-cell office:value-type="string" table:style-name="c1">
            <text:p>2026-05-06 12:30</text:p>
          </table:table-cell>
          <table:table-cell office:value-type="float" office:value="6.486755e-06" table:style-name="c1">
            <text:p>0.0000064868</text:p>
          </table:table-cell>
          <table:table-cell office:value-type="float" office:value="-0.14579166041979175" table:style-name="c13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6.44322e-06" table:style-name="c1">
            <text:p>0.0000064432</text:p>
          </table:table-cell>
          <table:table-cell office:value-type="string" table:style-name="c1">
            <text:p>2026-05-06 22:30</text:p>
          </table:table-cell>
          <table:table-cell office:value-type="float" office:value="6.386805e-06" table:style-name="c1">
            <text:p>0.0000063868</text:p>
          </table:table-cell>
          <table:table-cell office:value-type="float" office:value="-1.0737212635141935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6.373185e-06" table:style-name="c1">
            <text:p>0.0000063732</text:p>
          </table:table-cell>
          <table:table-cell office:value-type="string" table:style-name="c1">
            <text:p>2026-05-07 09:30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-0.6126811503980978" table:style-name="c13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8 23:15</text:p>
          </table:table-cell>
          <table:table-cell office:value-type="float" office:value="6.446775000000001e-06" table:style-name="c1">
            <text:p>0.0000064468</text:p>
          </table:table-cell>
          <table:table-cell office:value-type="float" office:value="0.16623926004288858" table:style-name="c14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9 20:30</text:p>
          </table:table-cell>
          <table:table-cell office:value-type="float" office:value="6.386805e-06" table:style-name="c1">
            <text:p>0.0000063868</text:p>
          </table:table-cell>
          <table:table-cell office:value-type="float" office:value="-0.7655397098179861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2:30</text:p>
          </table:table-cell>
          <table:table-cell office:value-type="float" office:value="6.393195e-06" table:style-name="c1">
            <text:p>0.0000063932</text:p>
          </table:table-cell>
          <table:table-cell office:value-type="string" table:style-name="c1">
            <text:p>2026-05-10 11:30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0.3244521211225537" table:style-name="c14">
            <text:p>+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4:45</text:p>
          </table:table-cell>
          <table:table-cell office:value-type="float" office:value="6.54327e-06" table:style-name="c1">
            <text:p>0.0000065433</text:p>
          </table:table-cell>
          <table:table-cell office:value-type="string" table:style-name="c1">
            <text:p>2026-05-10 20:00</text:p>
          </table:table-cell>
          <table:table-cell office:value-type="float" office:value="6.596700000000001e-06" table:style-name="c1">
            <text:p>0.0000065967</text:p>
          </table:table-cell>
          <table:table-cell office:value-type="float" office:value="0.615031883141004" table:style-name="c14">
            <text:p>+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6.6033e-06" table:style-name="c1">
            <text:p>0.0000066033</text:p>
          </table:table-cell>
          <table:table-cell office:value-type="string" table:style-name="c1">
            <text:p>2026-05-11 02:00</text:p>
          </table:table-cell>
          <table:table-cell office:value-type="float" office:value="6.55672e-06" table:style-name="c1">
            <text:p>0.0000065567</text:p>
          </table:table-cell>
          <table:table-cell office:value-type="float" office:value="-0.903894768979141" table:style-name="c13">
            <text:p>-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0:4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5-21 06:00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-0.1280489343968294" table:style-name="c13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09:30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0.8118095559240812" table:style-name="c13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22:00</text:p>
          </table:table-cell>
          <table:table-cell office:value-type="float" office:value="5.847075e-06" table:style-name="c1">
            <text:p>0.0000058471</text:p>
          </table:table-cell>
          <table:table-cell office:value-type="float" office:value="-0.1289304478753639" table:style-name="c13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45</text:p>
          </table:table-cell>
          <table:table-cell office:value-type="float" office:value="5.492745e-06" table:style-name="c1">
            <text:p>0.0000054927</text:p>
          </table:table-cell>
          <table:table-cell office:value-type="string" table:style-name="c1">
            <text:p>2026-05-30 04:15</text:p>
          </table:table-cell>
          <table:table-cell office:value-type="float" office:value="5.49725e-06" table:style-name="c1">
            <text:p>0.0000054972</text:p>
          </table:table-cell>
          <table:table-cell office:value-type="float" office:value="-0.11804667338461972" table:style-name="c13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2:15</text:p>
          </table:table-cell>
          <table:table-cell office:value-type="float" office:value="5.512754999999999e-06" table:style-name="c1">
            <text:p>0.0000055128</text:p>
          </table:table-cell>
          <table:table-cell office:value-type="string" table:style-name="c1">
            <text:p>2026-06-01 01:30</text:p>
          </table:table-cell>
          <table:table-cell office:value-type="float" office:value="5.507245e-06" table:style-name="c1">
            <text:p>0.0000055072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8:00</text:p>
          </table:table-cell>
          <table:table-cell office:value-type="float" office:value="5.54277e-06" table:style-name="c1">
            <text:p>0.0000055428</text:p>
          </table:table-cell>
          <table:table-cell office:value-type="string" table:style-name="c1">
            <text:p>2026-06-01 21:15</text:p>
          </table:table-cell>
          <table:table-cell office:value-type="float" office:value="5.51724e-06" table:style-name="c1">
            <text:p>0.0000055172</text:p>
          </table:table-cell>
          <table:table-cell office:value-type="float" office:value="-0.6595792854475313" table:style-name="c13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30</text:p>
          </table:table-cell>
          <table:table-cell office:value-type="float" office:value="89.80488" table:style-name="c10">
            <text:p>89.805</text:p>
          </table:table-cell>
          <table:table-cell office:value-type="string" table:style-name="c10">
            <text:p>2026-03-05 23:15</text:p>
          </table:table-cell>
          <table:table-cell office:value-type="float" office:value="88.945505" table:style-name="c10">
            <text:p>88.946</text:p>
          </table:table-cell>
          <table:table-cell office:value-type="float" office:value="-1.154922833252492" table:style-name="c11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88.74435" table:style-name="c10">
            <text:p>88.744</text:p>
          </table:table-cell>
          <table:table-cell office:value-type="string" table:style-name="c10">
            <text:p>2026-03-06 09:15</text:p>
          </table:table-cell>
          <table:table-cell office:value-type="float" office:value="87.74610500000001" table:style-name="c10">
            <text:p>87.746</text:p>
          </table:table-cell>
          <table:table-cell office:value-type="float" office:value="-1.3225061244969138" table:style-name="c11">
            <text:p>-1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88.14405" table:style-name="c10">
            <text:p>88.144</text:p>
          </table:table-cell>
          <table:table-cell office:value-type="string" table:style-name="c10">
            <text:p>2026-03-10 18:15</text:p>
          </table:table-cell>
          <table:table-cell office:value-type="float" office:value="87.01647000000001" table:style-name="c10">
            <text:p>87.016</text:p>
          </table:table-cell>
          <table:table-cell office:value-type="float" office:value="-1.4765896546959034" table:style-name="c11">
            <text:p>-1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30</text:p>
          </table:table-cell>
          <table:table-cell office:value-type="float" office:value="86.28312" table:style-name="c10">
            <text:p>86.283</text:p>
          </table:table-cell>
          <table:table-cell office:value-type="string" table:style-name="c10">
            <text:p>2026-03-11 15:15</text:p>
          </table:table-cell>
          <table:table-cell office:value-type="float" office:value="85.71712000000001" table:style-name="c10">
            <text:p>85.717</text:p>
          </table:table-cell>
          <table:table-cell office:value-type="float" office:value="-0.85456868374717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7:00</text:p>
          </table:table-cell>
          <table:table-cell office:value-type="float" office:value="86.493225" table:style-name="c10">
            <text:p>86.493</text:p>
          </table:table-cell>
          <table:table-cell office:value-type="string" table:style-name="c10">
            <text:p>2026-03-11 21:15</text:p>
          </table:table-cell>
          <table:table-cell office:value-type="float" office:value="87.166395" table:style-name="c10">
            <text:p>87.166</text:p>
          </table:table-cell>
          <table:table-cell office:value-type="float" office:value="0.5768363665419995" table:style-name="c12">
            <text:p>+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45</text:p>
          </table:table-cell>
          <table:table-cell office:value-type="float" office:value="85.94295" table:style-name="c10">
            <text:p>85.943</text:p>
          </table:table-cell>
          <table:table-cell office:value-type="string" table:style-name="c10">
            <text:p>2026-03-12 14:00</text:p>
          </table:table-cell>
          <table:table-cell office:value-type="float" office:value="86.706625" table:style-name="c10">
            <text:p>86.707</text:p>
          </table:table-cell>
          <table:table-cell office:value-type="float" office:value="0.6869073689290461" table:style-name="c12">
            <text:p>+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45</text:p>
          </table:table-cell>
          <table:table-cell office:value-type="float" office:value="90.02499" table:style-name="c10">
            <text:p>90.025</text:p>
          </table:table-cell>
          <table:table-cell office:value-type="string" table:style-name="c10">
            <text:p>2026-03-13 02:45</text:p>
          </table:table-cell>
          <table:table-cell office:value-type="float" office:value="89.19538" table:style-name="c10">
            <text:p>89.195</text:p>
          </table:table-cell>
          <table:table-cell office:value-type="float" office:value="-1.1195908654030529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1:15</text:p>
          </table:table-cell>
          <table:table-cell office:value-type="float" office:value="90.20508" table:style-name="c10">
            <text:p>90.205</text:p>
          </table:table-cell>
          <table:table-cell office:value-type="string" table:style-name="c10">
            <text:p>2026-03-13 15:00</text:p>
          </table:table-cell>
          <table:table-cell office:value-type="float" office:value="90.65465" table:style-name="c10">
            <text:p>90.655</text:p>
          </table:table-cell>
          <table:table-cell office:value-type="float" office:value="0.2974902906244248" table:style-name="c12">
            <text:p>+0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88.48422" table:style-name="c10">
            <text:p>88.484</text:p>
          </table:table-cell>
          <table:table-cell office:value-type="string" table:style-name="c10">
            <text:p>2026-03-15 19:00</text:p>
          </table:table-cell>
          <table:table-cell office:value-type="float" office:value="87.87604" table:style-name="c10">
            <text:p>87.876</text:p>
          </table:table-cell>
          <table:table-cell office:value-type="float" office:value="-0.8858576184092248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1:45</text:p>
          </table:table-cell>
          <table:table-cell office:value-type="float" office:value="89.78486999999998" table:style-name="c10">
            <text:p>89.785</text:p>
          </table:table-cell>
          <table:table-cell office:value-type="string" table:style-name="c10">
            <text:p>2026-03-16 02:30</text:p>
          </table:table-cell>
          <table:table-cell office:value-type="float" office:value="91.27434" table:style-name="c10">
            <text:p>91.274</text:p>
          </table:table-cell>
          <table:table-cell office:value-type="float" office:value="1.4557158620823518" table:style-name="c12">
            <text:p>+1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93.31663499999999" table:style-name="c10">
            <text:p>93.317</text:p>
          </table:table-cell>
          <table:table-cell office:value-type="string" table:style-name="c10">
            <text:p>2026-03-16 08:30</text:p>
          </table:table-cell>
          <table:table-cell office:value-type="float" office:value="93.25335" table:style-name="c10">
            <text:p>93.253</text:p>
          </table:table-cell>
          <table:table-cell office:value-type="float" office:value="-0.26758192325516683" table:style-name="c11">
            <text:p>-0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2:30</text:p>
          </table:table-cell>
          <table:table-cell office:value-type="float" office:value="94.08702" table:style-name="c10">
            <text:p>94.087</text:p>
          </table:table-cell>
          <table:table-cell office:value-type="string" table:style-name="c10">
            <text:p>2026-03-16 14:00</text:p>
          </table:table-cell>
          <table:table-cell office:value-type="float" office:value="93.63316000000002" table:style-name="c10">
            <text:p>93.633</text:p>
          </table:table-cell>
          <table:table-cell office:value-type="float" office:value="-0.6813189394668573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6:30</text:p>
          </table:table-cell>
          <table:table-cell office:value-type="float" office:value="94.56725999999999" table:style-name="c10">
            <text:p>94.567</text:p>
          </table:table-cell>
          <table:table-cell office:value-type="string" table:style-name="c10">
            <text:p>2026-03-17 20:15</text:p>
          </table:table-cell>
          <table:table-cell office:value-type="float" office:value="94.402775" table:style-name="c10">
            <text:p>94.403</text:p>
          </table:table-cell>
          <table:table-cell office:value-type="float" office:value="-0.37348670906292014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7:30</text:p>
          </table:table-cell>
          <table:table-cell office:value-type="float" office:value="91.23559499999999" table:style-name="c10">
            <text:p>91.236</text:p>
          </table:table-cell>
          <table:table-cell office:value-type="string" table:style-name="c10">
            <text:p>2026-03-24 11:30</text:p>
          </table:table-cell>
          <table:table-cell office:value-type="float" office:value="91.45425" table:style-name="c10">
            <text:p>91.454</text:p>
          </table:table-cell>
          <table:table-cell office:value-type="float" office:value="0.039280671376151766" table:style-name="c12">
            <text:p>+0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90.00497999999999" table:style-name="c10">
            <text:p>90.005</text:p>
          </table:table-cell>
          <table:table-cell office:value-type="string" table:style-name="c10">
            <text:p>2026-03-25 03:15</text:p>
          </table:table-cell>
          <table:table-cell office:value-type="float" office:value="90.85455000000002" table:style-name="c10">
            <text:p>90.855</text:p>
          </table:table-cell>
          <table:table-cell office:value-type="float" office:value="0.7421275517755177" table:style-name="c12">
            <text:p>+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4:00</text:p>
          </table:table-cell>
          <table:table-cell office:value-type="float" office:value="91.735845" table:style-name="c10">
            <text:p>91.736</text:p>
          </table:table-cell>
          <table:table-cell office:value-type="string" table:style-name="c10">
            <text:p>2026-03-25 08:00</text:p>
          </table:table-cell>
          <table:table-cell office:value-type="float" office:value="91.77409" table:style-name="c10">
            <text:p>91.774</text:p>
          </table:table-cell>
          <table:table-cell office:value-type="float" office:value="-0.15829298341341058" table:style-name="c11">
            <text:p>-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1:45</text:p>
          </table:table-cell>
          <table:table-cell office:value-type="float" office:value="93.156555" table:style-name="c10">
            <text:p>93.157</text:p>
          </table:table-cell>
          <table:table-cell office:value-type="string" table:style-name="c10">
            <text:p>2026-03-25 14:00</text:p>
          </table:table-cell>
          <table:table-cell office:value-type="float" office:value="92.69363" table:style-name="c10">
            <text:p>92.694</text:p>
          </table:table-cell>
          <table:table-cell office:value-type="float" office:value="-0.6958389201597193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2:45</text:p>
          </table:table-cell>
          <table:table-cell office:value-type="float" office:value="91.80588" table:style-name="c10">
            <text:p>91.806</text:p>
          </table:table-cell>
          <table:table-cell office:value-type="string" table:style-name="c10">
            <text:p>2026-03-26 02:15</text:p>
          </table:table-cell>
          <table:table-cell office:value-type="float" office:value="91.48423500000001" table:style-name="c10">
            <text:p>91.484</text:p>
          </table:table-cell>
          <table:table-cell office:value-type="float" office:value="-0.5495530196595211" table:style-name="c11">
            <text:p>-0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83.79187499999999" table:style-name="c10">
            <text:p>83.792</text:p>
          </table:table-cell>
          <table:table-cell office:value-type="string" table:style-name="c10">
            <text:p>2026-03-31 05:00</text:p>
          </table:table-cell>
          <table:table-cell office:value-type="float" office:value="83.288335" table:style-name="c10">
            <text:p>83.288</text:p>
          </table:table-cell>
          <table:table-cell office:value-type="float" office:value="-0.7996400386851232" table:style-name="c11">
            <text:p>-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6:00</text:p>
          </table:table-cell>
          <table:table-cell office:value-type="float" office:value="83.66181" table:style-name="c10">
            <text:p>83.662</text:p>
          </table:table-cell>
          <table:table-cell office:value-type="string" table:style-name="c10">
            <text:p>2026-04-01 18:00</text:p>
          </table:table-cell>
          <table:table-cell office:value-type="float" office:value="84.38778500000001" table:style-name="c10">
            <text:p>84.388</text:p>
          </table:table-cell>
          <table:table-cell office:value-type="float" office:value="0.6661149427498625" table:style-name="c12">
            <text:p>+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81.190575" table:style-name="c10">
            <text:p>81.191</text:p>
          </table:table-cell>
          <table:table-cell office:value-type="string" table:style-name="c10">
            <text:p>2026-04-04 17:00</text:p>
          </table:table-cell>
          <table:table-cell office:value-type="float" office:value="80.709625" table:style-name="c10">
            <text:p>80.71</text:p>
          </table:table-cell>
          <table:table-cell office:value-type="float" office:value="-0.7910875620415148" table:style-name="c11">
            <text:p>-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00</text:p>
          </table:table-cell>
          <table:table-cell office:value-type="float" office:value="81.930945" table:style-name="c10">
            <text:p>81.931</text:p>
          </table:table-cell>
          <table:table-cell office:value-type="string" table:style-name="c10">
            <text:p>2026-04-06 04:15</text:p>
          </table:table-cell>
          <table:table-cell office:value-type="float" office:value="82.008975" table:style-name="c10">
            <text:p>82.009</text:p>
          </table:table-cell>
          <table:table-cell office:value-type="float" office:value="-0.10485164186131435" table:style-name="c11">
            <text:p>-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82.48122" table:style-name="c10">
            <text:p>82.481</text:p>
          </table:table-cell>
          <table:table-cell office:value-type="string" table:style-name="c10">
            <text:p>2026-04-06 12:15</text:p>
          </table:table-cell>
          <table:table-cell office:value-type="float" office:value="82.248855" table:style-name="c10">
            <text:p>82.249</text:p>
          </table:table-cell>
          <table:table-cell office:value-type="float" office:value="-0.4810555192381827" table:style-name="c11">
            <text:p>-0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85.28262" table:style-name="c10">
            <text:p>85.283</text:p>
          </table:table-cell>
          <table:table-cell office:value-type="string" table:style-name="c10">
            <text:p>2026-04-08 01:30</text:p>
          </table:table-cell>
          <table:table-cell office:value-type="float" office:value="84.447755" table:style-name="c10">
            <text:p>84.448</text:p>
          </table:table-cell>
          <table:table-cell office:value-type="float" office:value="-1.1768823029182252" table:style-name="c11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83.411685" table:style-name="c10">
            <text:p>83.412</text:p>
          </table:table-cell>
          <table:table-cell office:value-type="string" table:style-name="c10">
            <text:p>2026-04-09 19:30</text:p>
          </table:table-cell>
          <table:table-cell office:value-type="float" office:value="83.53821" table:style-name="c10">
            <text:p>83.538</text:p>
          </table:table-cell>
          <table:table-cell office:value-type="float" office:value="-0.04851584258248609" table:style-name="c11">
            <text:p>-0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84.95245499999999" table:style-name="c10">
            <text:p>84.952</text:p>
          </table:table-cell>
          <table:table-cell office:value-type="string" table:style-name="c10">
            <text:p>2026-04-09 23:00</text:p>
          </table:table-cell>
          <table:table-cell office:value-type="float" office:value="83.948005" table:style-name="c10">
            <text:p>83.948</text:p>
          </table:table-cell>
          <table:table-cell office:value-type="float" office:value="-1.3799036908291762" table:style-name="c11">
            <text:p>-1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85.50272999999999" table:style-name="c10">
            <text:p>85.503</text:p>
          </table:table-cell>
          <table:table-cell office:value-type="string" table:style-name="c10">
            <text:p>2026-04-10 22:30</text:p>
          </table:table-cell>
          <table:table-cell office:value-type="float" office:value="84.93751" table:style-name="c10">
            <text:p>84.938</text:p>
          </table:table-cell>
          <table:table-cell office:value-type="float" office:value="-0.8596334672471673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8:45</text:p>
          </table:table-cell>
          <table:table-cell office:value-type="float" office:value="85.50272999999999" table:style-name="c10">
            <text:p>85.503</text:p>
          </table:table-cell>
          <table:table-cell office:value-type="string" table:style-name="c10">
            <text:p>2026-04-11 20:45</text:p>
          </table:table-cell>
          <table:table-cell office:value-type="float" office:value="85.307325" table:style-name="c10">
            <text:p>85.307</text:p>
          </table:table-cell>
          <table:table-cell office:value-type="float" office:value="-0.42797971792828404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84.132045" table:style-name="c10">
            <text:p>84.132</text:p>
          </table:table-cell>
          <table:table-cell office:value-type="string" table:style-name="c10">
            <text:p>2026-04-14 03:30</text:p>
          </table:table-cell>
          <table:table-cell office:value-type="float" office:value="85.97699" table:style-name="c10">
            <text:p>85.977</text:p>
          </table:table-cell>
          <table:table-cell office:value-type="float" office:value="1.988632270842805" table:style-name="c12">
            <text:p>+2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15</text:p>
          </table:table-cell>
          <table:table-cell office:value-type="float" office:value="86.173065" table:style-name="c10">
            <text:p>86.173</text:p>
          </table:table-cell>
          <table:table-cell office:value-type="string" table:style-name="c10">
            <text:p>2026-04-16 17:15</text:p>
          </table:table-cell>
          <table:table-cell office:value-type="float" office:value="85.747105" table:style-name="c10">
            <text:p>85.747</text:p>
          </table:table-cell>
          <table:table-cell office:value-type="float" office:value="-0.6932194681655957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9:00</text:p>
          </table:table-cell>
          <table:table-cell office:value-type="float" office:value="89.054505" table:style-name="c10">
            <text:p>89.055</text:p>
          </table:table-cell>
          <table:table-cell office:value-type="string" table:style-name="c10">
            <text:p>2026-04-16 23:30</text:p>
          </table:table-cell>
          <table:table-cell office:value-type="float" office:value="88.87554" table:style-name="c10">
            <text:p>88.876</text:p>
          </table:table-cell>
          <table:table-cell office:value-type="float" office:value="-0.40045947642965984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9:00</text:p>
          </table:table-cell>
          <table:table-cell office:value-type="float" office:value="88.98446999999999" table:style-name="c10">
            <text:p>88.984</text:p>
          </table:table-cell>
          <table:table-cell office:value-type="string" table:style-name="c10">
            <text:p>2026-04-17 10:15</text:p>
          </table:table-cell>
          <table:table-cell office:value-type="float" office:value="88.19588" table:style-name="c10">
            <text:p>88.196</text:p>
          </table:table-cell>
          <table:table-cell office:value-type="float" office:value="-1.0843392831580423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45</text:p>
          </table:table-cell>
          <table:table-cell office:value-type="float" office:value="89.854905" table:style-name="c10">
            <text:p>89.855</text:p>
          </table:table-cell>
          <table:table-cell office:value-type="string" table:style-name="c10">
            <text:p>2026-04-17 17:30</text:p>
          </table:table-cell>
          <table:table-cell office:value-type="float" office:value="89.365295" table:style-name="c10">
            <text:p>89.365</text:p>
          </table:table-cell>
          <table:table-cell office:value-type="float" office:value="-0.7437003296647982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87.29362499999999" table:style-name="c10">
            <text:p>87.294</text:p>
          </table:table-cell>
          <table:table-cell office:value-type="string" table:style-name="c10">
            <text:p>2026-04-22 08:30</text:p>
          </table:table-cell>
          <table:table-cell office:value-type="float" office:value="87.65615000000001" table:style-name="c10">
            <text:p>87.656</text:p>
          </table:table-cell>
          <table:table-cell office:value-type="float" office:value="0.21456361349412312" table:style-name="c12">
            <text:p>+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9:15</text:p>
          </table:table-cell>
          <table:table-cell office:value-type="float" office:value="88.4442" table:style-name="c10">
            <text:p>88.444</text:p>
          </table:table-cell>
          <table:table-cell office:value-type="string" table:style-name="c10">
            <text:p>2026-04-22 14:45</text:p>
          </table:table-cell>
          <table:table-cell office:value-type="float" office:value="88.585685" table:style-name="c10">
            <text:p>88.586</text:p>
          </table:table-cell>
          <table:table-cell office:value-type="float" office:value="-0.0402488623505004" table:style-name="c11">
            <text:p>-0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84.68231999999999" table:style-name="c10">
            <text:p>84.682</text:p>
          </table:table-cell>
          <table:table-cell office:value-type="string" table:style-name="c10">
            <text:p>2026-05-02 22:30</text:p>
          </table:table-cell>
          <table:table-cell office:value-type="float" office:value="84.19788" table:style-name="c10">
            <text:p>84.198</text:p>
          </table:table-cell>
          <table:table-cell office:value-type="float" office:value="-0.7708239005733364" table:style-name="c11">
            <text:p>-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83.98196999999999" table:style-name="c10">
            <text:p>83.982</text:p>
          </table:table-cell>
          <table:table-cell office:value-type="string" table:style-name="c10">
            <text:p>2026-05-03 11:00</text:p>
          </table:table-cell>
          <table:table-cell office:value-type="float" office:value="83.77808999999999" table:style-name="c10">
            <text:p>83.778</text:p>
          </table:table-cell>
          <table:table-cell office:value-type="float" office:value="-0.44218110376548214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84.79237499999999" table:style-name="c10">
            <text:p>84.792</text:p>
          </table:table-cell>
          <table:table-cell office:value-type="string" table:style-name="c10">
            <text:p>2026-05-03 23:30</text:p>
          </table:table-cell>
          <table:table-cell office:value-type="float" office:value="84.027965" table:style-name="c10">
            <text:p>84.028</text:p>
          </table:table-cell>
          <table:table-cell office:value-type="float" office:value="-1.0996058337026104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84.81238499999999" table:style-name="c10">
            <text:p>84.812</text:p>
          </table:table-cell>
          <table:table-cell office:value-type="string" table:style-name="c10">
            <text:p>2026-05-04 06:30</text:p>
          </table:table-cell>
          <table:table-cell office:value-type="float" office:value="84.767595" table:style-name="c10">
            <text:p>84.768</text:p>
          </table:table-cell>
          <table:table-cell office:value-type="float" office:value="-0.2526051146952035" table:style-name="c11">
            <text:p>-0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85.032495" table:style-name="c10">
            <text:p>85.032</text:p>
          </table:table-cell>
          <table:table-cell office:value-type="string" table:style-name="c10">
            <text:p>2026-05-04 16:15</text:p>
          </table:table-cell>
          <table:table-cell office:value-type="float" office:value="84.047955" table:style-name="c10">
            <text:p>84.048</text:p>
          </table:table-cell>
          <table:table-cell office:value-type="float" office:value="-1.3554251960324115" table:style-name="c11">
            <text:p>-1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3:15</text:p>
          </table:table-cell>
          <table:table-cell office:value-type="float" office:value="85.94295" table:style-name="c10">
            <text:p>85.943</text:p>
          </table:table-cell>
          <table:table-cell office:value-type="string" table:style-name="c10">
            <text:p>2026-05-05 14:45</text:p>
          </table:table-cell>
          <table:table-cell office:value-type="float" office:value="85.307325" table:style-name="c10">
            <text:p>85.307</text:p>
          </table:table-cell>
          <table:table-cell office:value-type="float" office:value="-0.9380110208865311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9:45</text:p>
          </table:table-cell>
          <table:table-cell office:value-type="float" office:value="86.52324" table:style-name="c10">
            <text:p>86.523</text:p>
          </table:table-cell>
          <table:table-cell office:value-type="string" table:style-name="c10">
            <text:p>2026-05-05 22:45</text:p>
          </table:table-cell>
          <table:table-cell office:value-type="float" office:value="86.346805" table:style-name="c10">
            <text:p>86.347</text:p>
          </table:table-cell>
          <table:table-cell office:value-type="float" office:value="-0.40340868325665635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3:30</text:p>
          </table:table-cell>
          <table:table-cell office:value-type="float" office:value="87.26361" table:style-name="c10">
            <text:p>87.264</text:p>
          </table:table-cell>
          <table:table-cell office:value-type="string" table:style-name="c10">
            <text:p>2026-05-06 05:00</text:p>
          </table:table-cell>
          <table:table-cell office:value-type="float" office:value="86.7566" table:style-name="c10">
            <text:p>86.757</text:p>
          </table:table-cell>
          <table:table-cell office:value-type="float" office:value="-0.7797482173840908" table:style-name="c11">
            <text:p>-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89.06450999999998" table:style-name="c10">
            <text:p>89.065</text:p>
          </table:table-cell>
          <table:table-cell office:value-type="string" table:style-name="c10">
            <text:p>2026-05-06 13:15</text:p>
          </table:table-cell>
          <table:table-cell office:value-type="float" office:value="88.87554" table:style-name="c10">
            <text:p>88.876</text:p>
          </table:table-cell>
          <table:table-cell office:value-type="float" office:value="-0.4116479217816216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6:45</text:p>
          </table:table-cell>
          <table:table-cell office:value-type="float" office:value="89.28461999999999" table:style-name="c10">
            <text:p>89.285</text:p>
          </table:table-cell>
          <table:table-cell office:value-type="string" table:style-name="c10">
            <text:p>2026-05-06 20:45</text:p>
          </table:table-cell>
          <table:table-cell office:value-type="float" office:value="88.9555" table:style-name="c10">
            <text:p>88.956</text:p>
          </table:table-cell>
          <table:table-cell office:value-type="float" office:value="-0.5677820485767926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7:45</text:p>
          </table:table-cell>
          <table:table-cell office:value-type="float" office:value="90.23509499999999" table:style-name="c10">
            <text:p>90.235</text:p>
          </table:table-cell>
          <table:table-cell office:value-type="string" table:style-name="c10">
            <text:p>2026-05-07 09:30</text:p>
          </table:table-cell>
          <table:table-cell office:value-type="float" office:value="89.23536" table:style-name="c10">
            <text:p>89.235</text:p>
          </table:table-cell>
          <table:table-cell office:value-type="float" office:value="-1.3056078509586344" table:style-name="c11">
            <text:p>-1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30</text:p>
          </table:table-cell>
          <table:table-cell office:value-type="float" office:value="90.36515999999999" table:style-name="c10">
            <text:p>90.365</text:p>
          </table:table-cell>
          <table:table-cell office:value-type="string" table:style-name="c10">
            <text:p>2026-05-08 23:00</text:p>
          </table:table-cell>
          <table:table-cell office:value-type="float" office:value="92.25385" table:style-name="c10">
            <text:p>92.254</text:p>
          </table:table-cell>
          <table:table-cell office:value-type="float" office:value="1.8859863180124004" table:style-name="c12">
            <text:p>+1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45</text:p>
          </table:table-cell>
          <table:table-cell office:value-type="float" office:value="93.236595" table:style-name="c10">
            <text:p>93.237</text:p>
          </table:table-cell>
          <table:table-cell office:value-type="string" table:style-name="c10">
            <text:p>2026-05-09 05:00</text:p>
          </table:table-cell>
          <table:table-cell office:value-type="float" office:value="93.19338" table:style-name="c10">
            <text:p>93.193</text:p>
          </table:table-cell>
          <table:table-cell office:value-type="float" office:value="-0.2461571731786183" table:style-name="c11">
            <text:p>-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9:15</text:p>
          </table:table-cell>
          <table:table-cell office:value-type="float" office:value="94.517235" table:style-name="c10">
            <text:p>94.517</text:p>
          </table:table-cell>
          <table:table-cell office:value-type="string" table:style-name="c10">
            <text:p>2026-05-10 10:15</text:p>
          </table:table-cell>
          <table:table-cell office:value-type="float" office:value="93.77309" table:style-name="c10">
            <text:p>93.773</text:p>
          </table:table-cell>
          <table:table-cell office:value-type="float" office:value="-0.985637600285294" table:style-name="c11">
            <text:p>-1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15</text:p>
          </table:table-cell>
          <table:table-cell office:value-type="float" office:value="95.26760999999999" table:style-name="c10">
            <text:p>95.268</text:p>
          </table:table-cell>
          <table:table-cell office:value-type="string" table:style-name="c10">
            <text:p>2026-05-10 20:45</text:p>
          </table:table-cell>
          <table:table-cell office:value-type="float" office:value="94.87254" table:style-name="c10">
            <text:p>94.873</text:p>
          </table:table-cell>
          <table:table-cell office:value-type="float" office:value="-0.6137660086780627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00</text:p>
          </table:table-cell>
          <table:table-cell office:value-type="float" office:value="96.28811999999999" table:style-name="c10">
            <text:p>96.288</text:p>
          </table:table-cell>
          <table:table-cell office:value-type="string" table:style-name="c10">
            <text:p>2026-05-11 02:15</text:p>
          </table:table-cell>
          <table:table-cell office:value-type="float" office:value="95.78208500000001" table:style-name="c10">
            <text:p>95.782</text:p>
          </table:table-cell>
          <table:table-cell office:value-type="float" office:value="-0.7243919477449401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96.26811" table:style-name="c10">
            <text:p>96.268</text:p>
          </table:table-cell>
          <table:table-cell office:value-type="string" table:style-name="c10">
            <text:p>2026-05-11 21:30</text:p>
          </table:table-cell>
          <table:table-cell office:value-type="float" office:value="97.51122000000001" table:style-name="c10">
            <text:p>97.511</text:p>
          </table:table-cell>
          <table:table-cell office:value-type="float" office:value="1.0888185830385755" table:style-name="c12">
            <text:p>+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20:00</text:p>
          </table:table-cell>
          <table:table-cell office:value-type="float" office:value="94.96746" table:style-name="c10">
            <text:p>94.967</text:p>
          </table:table-cell>
          <table:table-cell office:value-type="string" table:style-name="c10">
            <text:p>2026-05-12 23:00</text:p>
          </table:table-cell>
          <table:table-cell office:value-type="float" office:value="94.62266500000001" table:style-name="c10">
            <text:p>94.623</text:p>
          </table:table-cell>
          <table:table-cell office:value-type="float" office:value="-0.5622406952181414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7:00</text:p>
          </table:table-cell>
          <table:table-cell office:value-type="float" office:value="86.533245" table:style-name="c10">
            <text:p>86.533</text:p>
          </table:table-cell>
          <table:table-cell office:value-type="string" table:style-name="c10">
            <text:p>2026-05-20 18:45</text:p>
          </table:table-cell>
          <table:table-cell office:value-type="float" office:value="85.91702" table:style-name="c10">
            <text:p>85.917</text:p>
          </table:table-cell>
          <table:table-cell office:value-type="float" office:value="-0.9106016109531101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87.09352499999999" table:style-name="c10">
            <text:p>87.094</text:p>
          </table:table-cell>
          <table:table-cell office:value-type="string" table:style-name="c10">
            <text:p>2026-05-21 09:45</text:p>
          </table:table-cell>
          <table:table-cell office:value-type="float" office:value="86.45675" table:style-name="c10">
            <text:p>86.457</text:p>
          </table:table-cell>
          <table:table-cell office:value-type="float" office:value="-0.9295777651093795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86.86340999999999" table:style-name="c10">
            <text:p>86.863</text:p>
          </table:table-cell>
          <table:table-cell office:value-type="string" table:style-name="c10">
            <text:p>2026-05-21 21:45</text:p>
          </table:table-cell>
          <table:table-cell office:value-type="float" office:value="87.346305" table:style-name="c10">
            <text:p>87.346</text:p>
          </table:table-cell>
          <table:table-cell office:value-type="float" office:value="0.3549132325164406" table:style-name="c12">
            <text:p>+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06:00</text:p>
          </table:table-cell>
          <table:table-cell office:value-type="float" office:value="86.20307999999999" table:style-name="c10">
            <text:p>86.203</text:p>
          </table:table-cell>
          <table:table-cell office:value-type="string" table:style-name="c10">
            <text:p>2026-05-24 10:15</text:p>
          </table:table-cell>
          <table:table-cell office:value-type="float" office:value="86.266845" table:style-name="c10">
            <text:p>86.267</text:p>
          </table:table-cell>
          <table:table-cell office:value-type="float" office:value="-0.12607719254925653" table:style-name="c11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0.9312653999999999" table:style-name="c1">
            <text:p>0.93127</text:p>
          </table:table-cell>
          <table:table-cell office:value-type="string" table:style-name="c1">
            <text:p>2026-03-09 22:45</text:p>
          </table:table-cell>
          <table:table-cell office:value-type="float" office:value="0.9537229000000002" table:style-name="c1">
            <text:p>0.95372</text:p>
          </table:table-cell>
          <table:table-cell office:value-type="float" office:value="2.206783149347147" table:style-name="c14">
            <text:p>+2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9598797" table:style-name="c1">
            <text:p>0.95988</text:p>
          </table:table-cell>
          <table:table-cell office:value-type="string" table:style-name="c1">
            <text:p>2026-03-10 03:45</text:p>
          </table:table-cell>
          <table:table-cell office:value-type="float" office:value="0.9479258" table:style-name="c1">
            <text:p>0.94793</text:p>
          </table:table-cell>
          <table:table-cell office:value-type="float" office:value="-1.4427645124904798" table:style-name="c13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0041018" table:style-name="c1">
            <text:p>1.0041</text:p>
          </table:table-cell>
          <table:table-cell office:value-type="string" table:style-name="c1">
            <text:p>2026-03-10 17:30</text:p>
          </table:table-cell>
          <table:table-cell office:value-type="float" office:value="0.98520715" table:style-name="c1">
            <text:p>0.98521</text:p>
          </table:table-cell>
          <table:table-cell office:value-type="float" office:value="-2.0778848412431827" table:style-name="c13">
            <text:p>-2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0:45</text:p>
          </table:table-cell>
          <table:table-cell office:value-type="float" office:value="0.9578787" table:style-name="c1">
            <text:p>0.95788</text:p>
          </table:table-cell>
          <table:table-cell office:value-type="string" table:style-name="c1">
            <text:p>2026-03-11 15:15</text:p>
          </table:table-cell>
          <table:table-cell office:value-type="float" office:value="0.96861545" table:style-name="c1">
            <text:p>0.96862</text:p>
          </table:table-cell>
          <table:table-cell office:value-type="float" office:value="0.9187476154809637" table:style-name="c14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98419185" table:style-name="c1">
            <text:p>0.98419</text:p>
          </table:table-cell>
          <table:table-cell office:value-type="string" table:style-name="c1">
            <text:p>2026-03-11 20:30</text:p>
          </table:table-cell>
          <table:table-cell office:value-type="float" office:value="0.98280835" table:style-name="c1">
            <text:p>0.98281</text:p>
          </table:table-cell>
          <table:table-cell office:value-type="float" office:value="-0.34019118240512514" table:style-name="c13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0.97738845" table:style-name="c1">
            <text:p>0.97739</text:p>
          </table:table-cell>
          <table:table-cell office:value-type="string" table:style-name="c1">
            <text:p>2026-03-12 09:30</text:p>
          </table:table-cell>
          <table:table-cell office:value-type="float" office:value="0.9723136" table:style-name="c1">
            <text:p>0.97231</text:p>
          </table:table-cell>
          <table:table-cell office:value-type="float" office:value="-0.718087561439873" table:style-name="c13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2:30</text:p>
          </table:table-cell>
          <table:table-cell office:value-type="float" office:value="0.9857926499999999" table:style-name="c1">
            <text:p>0.98579</text:p>
          </table:table-cell>
          <table:table-cell office:value-type="string" table:style-name="c1">
            <text:p>2026-03-12 13:30</text:p>
          </table:table-cell>
          <table:table-cell office:value-type="float" office:value="0.9790102500000001" table:style-name="c1">
            <text:p>0.97901</text:p>
          </table:table-cell>
          <table:table-cell office:value-type="float" office:value="-0.8865395263141784" table:style-name="c13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15</text:p>
          </table:table-cell>
          <table:table-cell office:value-type="float" office:value="0.9990993" table:style-name="c1">
            <text:p>0.9991</text:p>
          </table:table-cell>
          <table:table-cell office:value-type="string" table:style-name="c1">
            <text:p>2026-03-13 07:45</text:p>
          </table:table-cell>
          <table:table-cell office:value-type="float" office:value="1.0282856" table:style-name="c1">
            <text:p>1.0283</text:p>
          </table:table-cell>
          <table:table-cell office:value-type="float" office:value="2.7155215788460696" table:style-name="c14">
            <text:p>+2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1.04742345" table:style-name="c1">
            <text:p>1.0474</text:p>
          </table:table-cell>
          <table:table-cell office:value-type="string" table:style-name="c1">
            <text:p>2026-03-13 12:30</text:p>
          </table:table-cell>
          <table:table-cell office:value-type="float" office:value="1.03818065" table:style-name="c1">
            <text:p>1.0382</text:p>
          </table:table-cell>
          <table:table-cell office:value-type="float" office:value="-1.0805680471780543" table:style-name="c13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02461205" table:style-name="c1">
            <text:p>1.0246</text:p>
          </table:table-cell>
          <table:table-cell office:value-type="string" table:style-name="c1">
            <text:p>2026-03-15 23:30</text:p>
          </table:table-cell>
          <table:table-cell office:value-type="float" office:value="1.015492" table:style-name="c1">
            <text:p>1.0155</text:p>
          </table:table-cell>
          <table:table-cell office:value-type="float" office:value="-1.0882185611617468" table:style-name="c13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1.0317155999999998" table:style-name="c1">
            <text:p>1.0317</text:p>
          </table:table-cell>
          <table:table-cell office:value-type="string" table:style-name="c1">
            <text:p>2026-03-16 08:45</text:p>
          </table:table-cell>
          <table:table-cell office:value-type="float" office:value="1.0529732500000002" table:style-name="c1">
            <text:p>1.053</text:p>
          </table:table-cell>
          <table:table-cell office:value-type="float" office:value="1.856398844143703" table:style-name="c14">
            <text:p>+1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.0811403" table:style-name="c1">
            <text:p>1.0811</text:p>
          </table:table-cell>
          <table:table-cell office:value-type="string" table:style-name="c1">
            <text:p>2026-03-17 00:30</text:p>
          </table:table-cell>
          <table:table-cell office:value-type="float" office:value="1.0648673" table:style-name="c1">
            <text:p>1.0649</text:p>
          </table:table-cell>
          <table:table-cell office:value-type="float" office:value="-1.7020612156165016" table:style-name="c13">
            <text:p>-1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5:15</text:p>
          </table:table-cell>
          <table:table-cell office:value-type="float" office:value="1.0479237000000001" table:style-name="c1">
            <text:p>1.0479</text:p>
          </table:table-cell>
          <table:table-cell office:value-type="string" table:style-name="c1">
            <text:p>2026-03-18 06:00</text:p>
          </table:table-cell>
          <table:table-cell office:value-type="float" office:value="1.03358295" table:style-name="c1">
            <text:p>1.0336</text:p>
          </table:table-cell>
          <table:table-cell office:value-type="float" office:value="-1.565656193962417" table:style-name="c13">
            <text:p>-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15</text:p>
          </table:table-cell>
          <table:table-cell office:value-type="float" office:value="0.95297625" table:style-name="c1">
            <text:p>0.95298</text:p>
          </table:table-cell>
          <table:table-cell office:value-type="string" table:style-name="c1">
            <text:p>2026-03-24 11:15</text:p>
          </table:table-cell>
          <table:table-cell office:value-type="float" office:value="0.9520237500000001" table:style-name="c1">
            <text:p>0.95202</text:p>
          </table:table-cell>
          <table:table-cell office:value-type="float" office:value="-0.2996502248875599" table:style-name="c13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486741" table:style-name="c1">
            <text:p>0.94867</text:p>
          </table:table-cell>
          <table:table-cell office:value-type="string" table:style-name="c1">
            <text:p>2026-03-25 02:15</text:p>
          </table:table-cell>
          <table:table-cell office:value-type="float" office:value="0.9507244000000001" table:style-name="c1">
            <text:p>0.95072</text:p>
          </table:table-cell>
          <table:table-cell office:value-type="float" office:value="0.015790662399250976" table:style-name="c14">
            <text:p>+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6:45</text:p>
          </table:table-cell>
          <table:table-cell office:value-type="float" office:value="0.96178065" table:style-name="c1">
            <text:p>0.96178</text:p>
          </table:table-cell>
          <table:table-cell office:value-type="string" table:style-name="c1">
            <text:p>2026-03-25 10:45</text:p>
          </table:table-cell>
          <table:table-cell office:value-type="float" office:value="0.9605195" table:style-name="c1">
            <text:p>0.96052</text:p>
          </table:table-cell>
          <table:table-cell office:value-type="float" office:value="-0.3307644503453222" table:style-name="c13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30</text:p>
          </table:table-cell>
          <table:table-cell office:value-type="float" office:value="0.9696845999999999" table:style-name="c1">
            <text:p>0.96968</text:p>
          </table:table-cell>
          <table:table-cell office:value-type="string" table:style-name="c1">
            <text:p>2026-03-25 12:30</text:p>
          </table:table-cell>
          <table:table-cell office:value-type="float" office:value="0.9609193" table:style-name="c1">
            <text:p>0.96092</text:p>
          </table:table-cell>
          <table:table-cell office:value-type="float" office:value="-1.102026131042999" table:style-name="c13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8886440999999999" table:style-name="c1">
            <text:p>0.88864</text:p>
          </table:table-cell>
          <table:table-cell office:value-type="string" table:style-name="c1">
            <text:p>2026-04-01 09:15</text:p>
          </table:table-cell>
          <table:table-cell office:value-type="float" office:value="0.8951522" table:style-name="c1">
            <text:p>0.89515</text:p>
          </table:table-cell>
          <table:table-cell office:value-type="float" office:value="0.5309989400931192" table:style-name="c14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0.8940467999999999" table:style-name="c1">
            <text:p>0.89405</text:p>
          </table:table-cell>
          <table:table-cell office:value-type="string" table:style-name="c1">
            <text:p>2026-04-02 01:30</text:p>
          </table:table-cell>
          <table:table-cell office:value-type="float" office:value="0.8712641500000001" table:style-name="c1">
            <text:p>0.87126</text:p>
          </table:table-cell>
          <table:table-cell office:value-type="float" office:value="-2.743067481014394" table:style-name="c13">
            <text:p>-2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4-06 11:30</text:p>
          </table:table-cell>
          <table:table-cell office:value-type="float" office:value="0.9035480000000001" table:style-name="c1">
            <text:p>0.90355</text:p>
          </table:table-cell>
          <table:table-cell office:value-type="float" office:value="0.14346244077965142" table:style-name="c14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89174565" table:style-name="c1">
            <text:p>0.89175</text:p>
          </table:table-cell>
          <table:table-cell office:value-type="string" table:style-name="c1">
            <text:p>2026-04-08 03:45</text:p>
          </table:table-cell>
          <table:table-cell office:value-type="float" office:value="0.9611192000000001" table:style-name="c1">
            <text:p>0.96112</text:p>
          </table:table-cell>
          <table:table-cell office:value-type="float" office:value="7.5640708445507965" table:style-name="c14">
            <text:p>+7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9348672" table:style-name="c1">
            <text:p>0.93487</text:p>
          </table:table-cell>
          <table:table-cell office:value-type="string" table:style-name="c1">
            <text:p>2026-04-09 23:00</text:p>
          </table:table-cell>
          <table:table-cell office:value-type="float" office:value="0.9379308000000001" table:style-name="c1">
            <text:p>0.93793</text:p>
          </table:table-cell>
          <table:table-cell office:value-type="float" office:value="0.12714921764289677" table:style-name="c14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6:15</text:p>
          </table:table-cell>
          <table:table-cell office:value-type="float" office:value="0.9447721499999999" table:style-name="c1">
            <text:p>0.94477</text:p>
          </table:table-cell>
          <table:table-cell office:value-type="string" table:style-name="c1">
            <text:p>2026-04-10 06:45</text:p>
          </table:table-cell>
          <table:table-cell office:value-type="float" office:value="0.93223365" table:style-name="c1">
            <text:p>0.93223</text:p>
          </table:table-cell>
          <table:table-cell office:value-type="float" office:value="-1.5243924226968297" table:style-name="c13">
            <text:p>-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9:45</text:p>
          </table:table-cell>
          <table:table-cell office:value-type="float" office:value="0.9376686" table:style-name="c1">
            <text:p>0.93767</text:p>
          </table:table-cell>
          <table:table-cell office:value-type="string" table:style-name="c1">
            <text:p>2026-04-10 10:00</text:p>
          </table:table-cell>
          <table:table-cell office:value-type="float" office:value="0.9365315000000001" table:style-name="c1">
            <text:p>0.93653</text:p>
          </table:table-cell>
          <table:table-cell office:value-type="float" office:value="-0.320926441228786" table:style-name="c13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9462729" table:style-name="c1">
            <text:p>0.94627</text:p>
          </table:table-cell>
          <table:table-cell office:value-type="string" table:style-name="c1">
            <text:p>2026-04-10 20:45</text:p>
          </table:table-cell>
          <table:table-cell office:value-type="float" office:value="0.94942505" table:style-name="c1">
            <text:p>0.94943</text:p>
          </table:table-cell>
          <table:table-cell office:value-type="float" office:value="0.13254625859515645" table:style-name="c14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4697325" table:style-name="c1">
            <text:p>0.94697</text:p>
          </table:table-cell>
          <table:table-cell office:value-type="string" table:style-name="c1">
            <text:p>2026-04-11 20:45</text:p>
          </table:table-cell>
          <table:table-cell office:value-type="float" office:value="0.9519238000000001" table:style-name="c1">
            <text:p>0.95192</text:p>
          </table:table-cell>
          <table:table-cell office:value-type="float" office:value="0.3218310890830356" table:style-name="c14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0.9390692999999999" table:style-name="c1">
            <text:p>0.93907</text:p>
          </table:table-cell>
          <table:table-cell office:value-type="string" table:style-name="c1">
            <text:p>2026-04-14 01:00</text:p>
          </table:table-cell>
          <table:table-cell office:value-type="float" office:value="0.9487254" table:style-name="c1">
            <text:p>0.94873</text:p>
          </table:table-cell>
          <table:table-cell office:value-type="float" office:value="0.82630727310542" table:style-name="c14">
            <text:p>+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9610803" table:style-name="c1">
            <text:p>0.96108</text:p>
          </table:table-cell>
          <table:table-cell office:value-type="string" table:style-name="c1">
            <text:p>2026-04-14 14:45</text:p>
          </table:table-cell>
          <table:table-cell office:value-type="float" office:value="0.95022465" table:style-name="c1">
            <text:p>0.95022</text:p>
          </table:table-cell>
          <table:table-cell office:value-type="float" office:value="-1.3271678834068434" table:style-name="c13">
            <text:p>-1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9393694499999999" table:style-name="c1">
            <text:p>0.93937</text:p>
          </table:table-cell>
          <table:table-cell office:value-type="string" table:style-name="c1">
            <text:p>2026-04-15 05:30</text:p>
          </table:table-cell>
          <table:table-cell office:value-type="float" office:value="0.9370312500000001" table:style-name="c1">
            <text:p>0.93703</text:p>
          </table:table-cell>
          <table:table-cell office:value-type="float" office:value="-0.4483140758675619" table:style-name="c13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4577265" table:style-name="c1">
            <text:p>0.94577</text:p>
          </table:table-cell>
          <table:table-cell office:value-type="string" table:style-name="c1">
            <text:p>2026-04-15 15:45</text:p>
          </table:table-cell>
          <table:table-cell office:value-type="float" office:value="0.9446274500000001" table:style-name="c1">
            <text:p>0.94463</text:p>
          </table:table-cell>
          <table:table-cell office:value-type="float" office:value="-0.3207441315362547" table:style-name="c13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9716855999999999" table:style-name="c1">
            <text:p>0.97169</text:p>
          </table:table-cell>
          <table:table-cell office:value-type="string" table:style-name="c1">
            <text:p>2026-04-15 23:00</text:p>
          </table:table-cell>
          <table:table-cell office:value-type="float" office:value="0.9637179" table:style-name="c1">
            <text:p>0.96372</text:p>
          </table:table-cell>
          <table:table-cell office:value-type="float" office:value="-1.0182482978136065" table:style-name="c13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9721858499999999" table:style-name="c1">
            <text:p>0.97219</text:p>
          </table:table-cell>
          <table:table-cell office:value-type="string" table:style-name="c1">
            <text:p>2026-04-16 05:15</text:p>
          </table:table-cell>
          <table:table-cell office:value-type="float" office:value="0.9631182" table:style-name="c1">
            <text:p>0.96312</text:p>
          </table:table-cell>
          <table:table-cell office:value-type="float" office:value="-1.1307429831240334" table:style-name="c13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00</text:p>
          </table:table-cell>
          <table:table-cell office:value-type="float" office:value="0.9828912" table:style-name="c1">
            <text:p>0.98289</text:p>
          </table:table-cell>
          <table:table-cell office:value-type="string" table:style-name="c1">
            <text:p>2026-04-16 08:00</text:p>
          </table:table-cell>
          <table:table-cell office:value-type="float" office:value="0.97061445" table:style-name="c1">
            <text:p>0.97061</text:p>
          </table:table-cell>
          <table:table-cell office:value-type="float" office:value="-1.4464478149310844" table:style-name="c13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0.9904949999999999" table:style-name="c1">
            <text:p>0.99049</text:p>
          </table:table-cell>
          <table:table-cell office:value-type="string" table:style-name="c1">
            <text:p>2026-04-16 14:00</text:p>
          </table:table-cell>
          <table:table-cell office:value-type="float" office:value="0.9681157" table:style-name="c1">
            <text:p>0.96812</text:p>
          </table:table-cell>
          <table:table-cell office:value-type="float" office:value="-2.454789098814225" table:style-name="c13">
            <text:p>-2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9862928999999999" table:style-name="c1">
            <text:p>0.98629</text:p>
          </table:table-cell>
          <table:table-cell office:value-type="string" table:style-name="c1">
            <text:p>2026-04-17 10:30</text:p>
          </table:table-cell>
          <table:table-cell office:value-type="float" office:value="0.9899048" table:style-name="c1">
            <text:p>0.9899</text:p>
          </table:table-cell>
          <table:table-cell office:value-type="float" office:value="0.16557761946780492" table:style-name="c14">
            <text:p>+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00</text:p>
          </table:table-cell>
          <table:table-cell office:value-type="float" office:value="1.00100025" table:style-name="c1">
            <text:p>1.001</text:p>
          </table:table-cell>
          <table:table-cell office:value-type="string" table:style-name="c1">
            <text:p>2026-04-17 15:45</text:p>
          </table:table-cell>
          <table:table-cell office:value-type="float" office:value="1.0200897" table:style-name="c1">
            <text:p>1.0201</text:p>
          </table:table-cell>
          <table:table-cell office:value-type="float" office:value="1.7033253178208696" table:style-name="c14">
            <text:p>+1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742869" table:style-name="c1">
            <text:p>0.97429</text:p>
          </table:table-cell>
          <table:table-cell office:value-type="string" table:style-name="c1">
            <text:p>2026-04-22 08:45</text:p>
          </table:table-cell>
          <table:table-cell office:value-type="float" office:value="0.96641655" table:style-name="c1">
            <text:p>0.96642</text:p>
          </table:table-cell>
          <table:table-cell office:value-type="float" office:value="-1.0060913970463825" table:style-name="c13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176065" table:style-name="c1">
            <text:p>0.92176</text:p>
          </table:table-cell>
          <table:table-cell office:value-type="string" table:style-name="c1">
            <text:p>2026-05-01 19:45</text:p>
          </table:table-cell>
          <table:table-cell office:value-type="float" office:value="0.92283835" table:style-name="c1">
            <text:p>0.92284</text:p>
          </table:table-cell>
          <table:table-cell office:value-type="float" office:value="-0.08321616480915228" table:style-name="c13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9273634499999999" table:style-name="c1">
            <text:p>0.92736</text:p>
          </table:table-cell>
          <table:table-cell office:value-type="string" table:style-name="c1">
            <text:p>2026-05-02 17:45</text:p>
          </table:table-cell>
          <table:table-cell office:value-type="float" office:value="0.9233381" table:style-name="c1">
            <text:p>0.92334</text:p>
          </table:table-cell>
          <table:table-cell office:value-type="float" office:value="-0.6330962107574667" table:style-name="c13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5-03 23:30</text:p>
          </table:table-cell>
          <table:table-cell office:value-type="float" office:value="0.9213391" table:style-name="c1">
            <text:p>0.92134</text:p>
          </table:table-cell>
          <table:table-cell office:value-type="float" office:value="-0.9657516996781745" table:style-name="c13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308652" table:style-name="c1">
            <text:p>0.93087</text:p>
          </table:table-cell>
          <table:table-cell office:value-type="string" table:style-name="c1">
            <text:p>2026-05-04 06:30</text:p>
          </table:table-cell>
          <table:table-cell office:value-type="float" office:value="0.9378308500000001" table:style-name="c1">
            <text:p>0.93783</text:p>
          </table:table-cell>
          <table:table-cell office:value-type="float" office:value="0.5469026160662249" table:style-name="c14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9546771" table:style-name="c1">
            <text:p>0.95468</text:p>
          </table:table-cell>
          <table:table-cell office:value-type="string" table:style-name="c1">
            <text:p>2026-05-05 14:15</text:p>
          </table:table-cell>
          <table:table-cell office:value-type="float" office:value="0.96281835" table:style-name="c1">
            <text:p>0.96282</text:p>
          </table:table-cell>
          <table:table-cell office:value-type="float" office:value="0.6511705495344966" table:style-name="c14">
            <text:p>+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7:15</text:p>
          </table:table-cell>
          <table:table-cell office:value-type="float" office:value="0.99339645" table:style-name="c1">
            <text:p>0.9934</text:p>
          </table:table-cell>
          <table:table-cell office:value-type="string" table:style-name="c1">
            <text:p>2026-05-06 13:15</text:p>
          </table:table-cell>
          <table:table-cell office:value-type="float" office:value="1.0118938" table:style-name="c1">
            <text:p>1.0119</text:p>
          </table:table-cell>
          <table:table-cell office:value-type="float" office:value="1.6584088149097065" table:style-name="c14">
            <text:p>+1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1.0014004499999998" table:style-name="c1">
            <text:p>1.0014</text:p>
          </table:table-cell>
          <table:table-cell office:value-type="string" table:style-name="c1">
            <text:p>2026-05-06 22:30</text:p>
          </table:table-cell>
          <table:table-cell office:value-type="float" office:value="0.9912041500000001" table:style-name="c1">
            <text:p>0.9912</text:p>
          </table:table-cell>
          <table:table-cell office:value-type="float" office:value="-1.2160686662213593" table:style-name="c13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45</text:p>
          </table:table-cell>
          <table:table-cell office:value-type="float" office:value="0.9852924" table:style-name="c1">
            <text:p>0.98529</text:p>
          </table:table-cell>
          <table:table-cell office:value-type="string" table:style-name="c1">
            <text:p>2026-05-07 09:30</text:p>
          </table:table-cell>
          <table:table-cell office:value-type="float" office:value="0.9906044500000001" table:style-name="c1">
            <text:p>0.9906</text:p>
          </table:table-cell>
          <table:table-cell office:value-type="float" office:value="0.338156643088916" table:style-name="c14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0980465" table:style-name="c1">
            <text:p>1.0098</text:p>
          </table:table-cell>
          <table:table-cell office:value-type="string" table:style-name="c1">
            <text:p>2026-05-08 21:00</text:p>
          </table:table-cell>
          <table:table-cell office:value-type="float" office:value="1.0208893" table:style-name="c1">
            <text:p>1.0209</text:p>
          </table:table-cell>
          <table:table-cell office:value-type="float" office:value="0.8956081049240838" table:style-name="c14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30</text:p>
          </table:table-cell>
          <table:table-cell office:value-type="float" office:value="1.0421208" table:style-name="c1">
            <text:p>1.0421</text:p>
          </table:table-cell>
          <table:table-cell office:value-type="string" table:style-name="c1">
            <text:p>2026-05-09 05:00</text:p>
          </table:table-cell>
          <table:table-cell office:value-type="float" office:value="1.073463" table:style-name="c1">
            <text:p>1.0735</text:p>
          </table:table-cell>
          <table:table-cell office:value-type="float" office:value="2.8016279363198615" table:style-name="c14">
            <text:p>+2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1.06503225" table:style-name="c1">
            <text:p>1.065</text:p>
          </table:table-cell>
          <table:table-cell office:value-type="string" table:style-name="c1">
            <text:p>2026-05-09 23:30</text:p>
          </table:table-cell>
          <table:table-cell office:value-type="float" office:value="1.0682656" table:style-name="c1">
            <text:p>1.0683</text:p>
          </table:table-cell>
          <table:table-cell office:value-type="float" office:value="0.10308486579631015" table:style-name="c14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1.0799397" table:style-name="c1">
            <text:p>1.0799</text:p>
          </table:table-cell>
          <table:table-cell office:value-type="string" table:style-name="c1">
            <text:p>2026-05-10 01:00</text:p>
          </table:table-cell>
          <table:table-cell office:value-type="float" office:value="1.0801596500000001" table:style-name="c1">
            <text:p>1.0802</text:p>
          </table:table-cell>
          <table:table-cell office:value-type="float" office:value="-0.17957383549745964" table:style-name="c13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3:15</text:p>
          </table:table-cell>
          <table:table-cell office:value-type="float" office:value="1.0935465" table:style-name="c1">
            <text:p>1.0935</text:p>
          </table:table-cell>
          <table:table-cell office:value-type="string" table:style-name="c1">
            <text:p>2026-05-10 04:30</text:p>
          </table:table-cell>
          <table:table-cell office:value-type="float" office:value="1.0826584" table:style-name="c1">
            <text:p>1.0827</text:p>
          </table:table-cell>
          <table:table-cell office:value-type="float" office:value="-1.1935783381502252" table:style-name="c13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1.09064505" table:style-name="c1">
            <text:p>1.0906</text:p>
          </table:table-cell>
          <table:table-cell office:value-type="string" table:style-name="c1">
            <text:p>2026-05-10 12:45</text:p>
          </table:table-cell>
          <table:table-cell office:value-type="float" office:value="1.1256369000000002" table:style-name="c1">
            <text:p>1.1256</text:p>
          </table:table-cell>
          <table:table-cell office:value-type="float" office:value="3.0020492768843665" table:style-name="c14">
            <text:p>+3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15</text:p>
          </table:table-cell>
          <table:table-cell office:value-type="float" office:value="1.1717856" table:style-name="c1">
            <text:p>1.1718</text:p>
          </table:table-cell>
          <table:table-cell office:value-type="string" table:style-name="c1">
            <text:p>2026-05-10 21:30</text:p>
          </table:table-cell>
          <table:table-cell office:value-type="float" office:value="1.3391301000000002" table:style-name="c1">
            <text:p>1.3391</text:p>
          </table:table-cell>
          <table:table-cell office:value-type="float" office:value="14.052705454828995" table:style-name="c14">
            <text:p>+14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30</text:p>
          </table:table-cell>
          <table:table-cell office:value-type="float" office:value="1.3128560999999999" table:style-name="c1">
            <text:p>1.3129</text:p>
          </table:table-cell>
          <table:table-cell office:value-type="string" table:style-name="c1">
            <text:p>2026-05-11 06:45</text:p>
          </table:table-cell>
          <table:table-cell office:value-type="float" office:value="1.2876558500000002" table:style-name="c1">
            <text:p>1.2877</text:p>
          </table:table-cell>
          <table:table-cell office:value-type="float" office:value="-2.115561183297243" table:style-name="c13">
            <text:p>-2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3:00</text:p>
          </table:table-cell>
          <table:table-cell office:value-type="float" office:value="1.26853395" table:style-name="c1">
            <text:p>1.2685</text:p>
          </table:table-cell>
          <table:table-cell office:value-type="string" table:style-name="c1">
            <text:p>2026-05-12 14:00</text:p>
          </table:table-cell>
          <table:table-cell office:value-type="float" office:value="1.2471761000000001" table:style-name="c1">
            <text:p>1.2472</text:p>
          </table:table-cell>
          <table:table-cell office:value-type="float" office:value="-1.8801983994121807" table:style-name="c13">
            <text:p>-1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00</text:p>
          </table:table-cell>
          <table:table-cell office:value-type="float" office:value="1.1229612" table:style-name="c1">
            <text:p>1.123</text:p>
          </table:table-cell>
          <table:table-cell office:value-type="string" table:style-name="c1">
            <text:p>2026-05-21 03:15</text:p>
          </table:table-cell>
          <table:table-cell office:value-type="float" office:value="1.11074435" table:style-name="c1">
            <text:p>1.1107</text:p>
          </table:table-cell>
          <table:table-cell office:value-type="float" office:value="-1.2856390724496958" table:style-name="c13">
            <text:p>-1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1331663" table:style-name="c1">
            <text:p>1.1332</text:p>
          </table:table-cell>
          <table:table-cell office:value-type="string" table:style-name="c1">
            <text:p>2026-05-21 09:00</text:p>
          </table:table-cell>
          <table:table-cell office:value-type="float" office:value="1.11953995" table:style-name="c1">
            <text:p>1.1195</text:p>
          </table:table-cell>
          <table:table-cell office:value-type="float" office:value="-1.399998425654736" table:style-name="c13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15</text:p>
          </table:table-cell>
          <table:table-cell office:value-type="float" office:value="1.11105525" table:style-name="c1">
            <text:p>1.1111</text:p>
          </table:table-cell>
          <table:table-cell office:value-type="string" table:style-name="c1">
            <text:p>2026-05-21 21:00</text:p>
          </table:table-cell>
          <table:table-cell office:value-type="float" office:value="1.13433255" table:style-name="c1">
            <text:p>1.1343</text:p>
          </table:table-cell>
          <table:table-cell office:value-type="float" office:value="1.890974299662429" table:style-name="c14">
            <text:p>+1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2:15</text:p>
          </table:table-cell>
          <table:table-cell office:value-type="float" office:value="1.3336664999999999" table:style-name="c10">
            <text:p>1.3337</text:p>
          </table:table-cell>
          <table:table-cell office:value-type="string" table:style-name="c10">
            <text:p>2026-03-05 02:45</text:p>
          </table:table-cell>
          <table:table-cell office:value-type="float" office:value="1.3163415" table:style-name="c10">
            <text:p>1.3163</text:p>
          </table:table-cell>
          <table:table-cell office:value-type="float" office:value="-1.4963535980321852" table:style-name="c11">
            <text:p>-1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8:45</text:p>
          </table:table-cell>
          <table:table-cell office:value-type="float" office:value="1.34067" table:style-name="c10">
            <text:p>1.3407</text:p>
          </table:table-cell>
          <table:table-cell office:value-type="string" table:style-name="c10">
            <text:p>2026-03-05 15:45</text:p>
          </table:table-cell>
          <table:table-cell office:value-type="float" office:value="1.3703145" table:style-name="c10">
            <text:p>1.3703</text:p>
          </table:table-cell>
          <table:table-cell office:value-type="float" office:value="2.0068504042381807" table:style-name="c12">
            <text:p>+2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8:0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3-06 20:30</text:p>
          </table:table-cell>
          <table:table-cell office:value-type="float" office:value="1.3183405" table:style-name="c10">
            <text:p>1.3183</text:p>
          </table:table-cell>
          <table:table-cell office:value-type="float" office:value="-0.6010874124162346" table:style-name="c11">
            <text:p>-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3536765" table:style-name="c10">
            <text:p>1.3537</text:p>
          </table:table-cell>
          <table:table-cell office:value-type="string" table:style-name="c10">
            <text:p>2026-03-08 13:15</text:p>
          </table:table-cell>
          <table:table-cell office:value-type="float" office:value="1.3403295" table:style-name="c10">
            <text:p>1.3403</text:p>
          </table:table-cell>
          <table:table-cell office:value-type="float" office:value="-1.1839105333142697" table:style-name="c11">
            <text:p>-1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1:30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3-16 06:15</text:p>
          </table:table-cell>
          <table:table-cell office:value-type="float" office:value="1.3223385" table:style-name="c10">
            <text:p>1.3223</text:p>
          </table:table-cell>
          <table:table-cell office:value-type="float" office:value="0.07857568472973142" table:style-name="c12">
            <text:p>+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1:15</text:p>
          </table:table-cell>
          <table:table-cell office:value-type="float" office:value="1.2696344999999998" table:style-name="c10">
            <text:p>1.2696</text:p>
          </table:table-cell>
          <table:table-cell office:value-type="string" table:style-name="c10">
            <text:p>2026-03-22 01:45</text:p>
          </table:table-cell>
          <table:table-cell office:value-type="float" office:value="1.2483755" table:style-name="c10">
            <text:p>1.2484</text:p>
          </table:table-cell>
          <table:table-cell office:value-type="float" office:value="-1.8709717343455723" table:style-name="c11">
            <text:p>-1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23:15</text:p>
          </table:table-cell>
          <table:table-cell office:value-type="float" office:value="1.2566279999999999" table:style-name="c10">
            <text:p>1.2566</text:p>
          </table:table-cell>
          <table:table-cell office:value-type="string" table:style-name="c10">
            <text:p>2026-03-23 00:15</text:p>
          </table:table-cell>
          <table:table-cell office:value-type="float" office:value="1.2483755" table:style-name="c10">
            <text:p>1.2484</text:p>
          </table:table-cell>
          <table:table-cell office:value-type="float" office:value="-0.8553050405131768" table:style-name="c11">
            <text:p>-0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1:15</text:p>
          </table:table-cell>
          <table:table-cell office:value-type="float" office:value="1.2956474999999998" table:style-name="c10">
            <text:p>1.2956</text:p>
          </table:table-cell>
          <table:table-cell office:value-type="string" table:style-name="c10">
            <text:p>2026-03-23 15:45</text:p>
          </table:table-cell>
          <table:table-cell office:value-type="float" office:value="1.2963515" table:style-name="c10">
            <text:p>1.2964</text:p>
          </table:table-cell>
          <table:table-cell office:value-type="float" office:value="-0.14567285071748204" table:style-name="c11">
            <text:p>-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30</text:p>
          </table:table-cell>
          <table:table-cell office:value-type="float" office:value="1.312656" table:style-name="c10">
            <text:p>1.3127</text:p>
          </table:table-cell>
          <table:table-cell office:value-type="string" table:style-name="c10">
            <text:p>2026-03-24 00:30</text:p>
          </table:table-cell>
          <table:table-cell office:value-type="float" office:value="1.3103445" table:style-name="c10">
            <text:p>1.3103</text:p>
          </table:table-cell>
          <table:table-cell office:value-type="float" office:value="-0.3756413451429852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1:30</text:p>
          </table:table-cell>
          <table:table-cell office:value-type="float" office:value="1.3256625" table:style-name="c10">
            <text:p>1.3257</text:p>
          </table:table-cell>
          <table:table-cell office:value-type="string" table:style-name="c10">
            <text:p>2026-03-24 04:45</text:p>
          </table:table-cell>
          <table:table-cell office:value-type="float" office:value="1.3243375" table:style-name="c10">
            <text:p>1.3243</text:p>
          </table:table-cell>
          <table:table-cell office:value-type="float" office:value="-0.299650224887571" table:style-name="c11">
            <text:p>-0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1:00</text:p>
          </table:table-cell>
          <table:table-cell office:value-type="float" office:value="1.2416205" table:style-name="c10">
            <text:p>1.2416</text:p>
          </table:table-cell>
          <table:table-cell office:value-type="string" table:style-name="c10">
            <text:p>2026-04-02 01:30</text:p>
          </table:table-cell>
          <table:table-cell office:value-type="float" office:value="1.2303845000000002" table:style-name="c10">
            <text:p>1.2304</text:p>
          </table:table-cell>
          <table:table-cell office:value-type="float" office:value="-1.1030374108272012" table:style-name="c11">
            <text:p>-1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05:15</text:p>
          </table:table-cell>
          <table:table-cell office:value-type="float" office:value="1.252626" table:style-name="c10">
            <text:p>1.2526</text:p>
          </table:table-cell>
          <table:table-cell office:value-type="string" table:style-name="c10">
            <text:p>2026-04-03 11:30</text:p>
          </table:table-cell>
          <table:table-cell office:value-type="float" office:value="1.2523735" table:style-name="c10">
            <text:p>1.2524</text:p>
          </table:table-cell>
          <table:table-cell office:value-type="float" office:value="-0.2200173576550446" table:style-name="c11">
            <text:p>-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3:00</text:p>
          </table:table-cell>
          <table:table-cell office:value-type="float" office:value="1.2346169999999999" table:style-name="c10">
            <text:p>1.2346</text:p>
          </table:table-cell>
          <table:table-cell office:value-type="string" table:style-name="c10">
            <text:p>2026-04-04 16:00</text:p>
          </table:table-cell>
          <table:table-cell office:value-type="float" office:value="1.2323835" table:style-name="c10">
            <text:p>1.2324</text:p>
          </table:table-cell>
          <table:table-cell office:value-type="float" office:value="-0.3804446736518141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03:15</text:p>
          </table:table-cell>
          <table:table-cell office:value-type="float" office:value="1.242621" table:style-name="c10">
            <text:p>1.2426</text:p>
          </table:table-cell>
          <table:table-cell office:value-type="string" table:style-name="c10">
            <text:p>2026-04-05 06:15</text:p>
          </table:table-cell>
          <table:table-cell office:value-type="float" office:value="1.237381" table:style-name="c10">
            <text:p>1.2374</text:p>
          </table:table-cell>
          <table:table-cell office:value-type="float" office:value="-0.6207463594289697" table:style-name="c11">
            <text:p>-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07:45</text:p>
          </table:table-cell>
          <table:table-cell office:value-type="float" office:value="1.284642" table:style-name="c10">
            <text:p>1.2846</text:p>
          </table:table-cell>
          <table:table-cell office:value-type="string" table:style-name="c10">
            <text:p>2026-04-10 12:45</text:p>
          </table:table-cell>
          <table:table-cell office:value-type="float" office:value="1.285357" table:style-name="c10">
            <text:p>1.2854</text:p>
          </table:table-cell>
          <table:table-cell office:value-type="float" office:value="-0.14435372991075113" table:style-name="c11">
            <text:p>-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20:45</text:p>
          </table:table-cell>
          <table:table-cell office:value-type="float" office:value="1.30065" table:style-name="c10">
            <text:p>1.3007</text:p>
          </table:table-cell>
          <table:table-cell office:value-type="string" table:style-name="c10">
            <text:p>2026-04-11 01:30</text:p>
          </table:table-cell>
          <table:table-cell office:value-type="float" office:value="1.305347" table:style-name="c10">
            <text:p>1.3053</text:p>
          </table:table-cell>
          <table:table-cell office:value-type="float" office:value="0.16050523561297325" table:style-name="c12">
            <text:p>+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4:45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1 05:15</text:p>
          </table:table-cell>
          <table:table-cell office:value-type="float" office:value="1.3103445" table:style-name="c10">
            <text:p>1.3103</text:p>
          </table:table-cell>
          <table:table-cell office:value-type="float" office:value="-0.904352877048975" table:style-name="c11">
            <text:p>-0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7:30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1 15:15</text:p>
          </table:table-cell>
          <table:table-cell office:value-type="float" office:value="1.3903045" table:style-name="c10">
            <text:p>1.3903</text:p>
          </table:table-cell>
          <table:table-cell office:value-type="float" office:value="5.142673644565154" table:style-name="c12">
            <text:p>+5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15</text:p>
          </table:table-cell>
          <table:table-cell office:value-type="float" office:value="1.4337165" table:style-name="c10">
            <text:p>1.4337</text:p>
          </table:table-cell>
          <table:table-cell office:value-type="string" table:style-name="c10">
            <text:p>2026-04-11 20:15</text:p>
          </table:table-cell>
          <table:table-cell office:value-type="float" office:value="1.45927" table:style-name="c10">
            <text:p>1.4593</text:p>
          </table:table-cell>
          <table:table-cell office:value-type="float" office:value="1.578862994880792" table:style-name="c12">
            <text:p>+1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16:15</text:p>
          </table:table-cell>
          <table:table-cell office:value-type="float" office:value="1.4677335" table:style-name="c10">
            <text:p>1.4677</text:p>
          </table:table-cell>
          <table:table-cell office:value-type="string" table:style-name="c10">
            <text:p>2026-04-12 16:30</text:p>
          </table:table-cell>
          <table:table-cell office:value-type="float" office:value="1.4522735000000002" table:style-name="c10">
            <text:p>1.4523</text:p>
          </table:table-cell>
          <table:table-cell office:value-type="float" office:value="-1.2511191388967946" table:style-name="c11">
            <text:p>-1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18:30</text:p>
          </table:table-cell>
          <table:table-cell office:value-type="float" office:value="1.4607299999999999" table:style-name="c10">
            <text:p>1.4607</text:p>
          </table:table-cell>
          <table:table-cell office:value-type="string" table:style-name="c10">
            <text:p>2026-04-12 21:15</text:p>
          </table:table-cell>
          <table:table-cell office:value-type="float" office:value="1.4562715000000002" table:style-name="c10">
            <text:p>1.4563</text:p>
          </table:table-cell>
          <table:table-cell office:value-type="float" office:value="-0.504513957302144" table:style-name="c11">
            <text:p>-0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3:45</text:p>
          </table:table-cell>
          <table:table-cell office:value-type="float" office:value="1.4287139999999998" table:style-name="c10">
            <text:p>1.4287</text:p>
          </table:table-cell>
          <table:table-cell office:value-type="string" table:style-name="c10">
            <text:p>2026-04-13 16:30</text:p>
          </table:table-cell>
          <table:table-cell office:value-type="float" office:value="1.4182905000000001" table:style-name="c10">
            <text:p>1.4183</text:p>
          </table:table-cell>
          <table:table-cell office:value-type="float" office:value="-0.928013773890346" table:style-name="c11">
            <text:p>-0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45</text:p>
          </table:table-cell>
          <table:table-cell office:value-type="float" office:value="1.4417205" table:style-name="c10">
            <text:p>1.4417</text:p>
          </table:table-cell>
          <table:table-cell office:value-type="string" table:style-name="c10">
            <text:p>2026-04-14 00:15</text:p>
          </table:table-cell>
          <table:table-cell office:value-type="float" office:value="1.431284" table:style-name="c10">
            <text:p>1.4313</text:p>
          </table:table-cell>
          <table:table-cell office:value-type="float" office:value="-0.9223449840659148" table:style-name="c11">
            <text:p>-0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0:15</text:p>
          </table:table-cell>
          <table:table-cell office:value-type="float" office:value="1.356678" table:style-name="c10">
            <text:p>1.3567</text:p>
          </table:table-cell>
          <table:table-cell office:value-type="string" table:style-name="c10">
            <text:p>2026-04-21 03:00</text:p>
          </table:table-cell>
          <table:table-cell office:value-type="float" office:value="1.3573210000000002" table:style-name="c10">
            <text:p>1.3573</text:p>
          </table:table-cell>
          <table:table-cell office:value-type="float" office:value="-0.15259956150242004" table:style-name="c11">
            <text:p>-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7:30</text:p>
          </table:table-cell>
          <table:table-cell office:value-type="float" office:value="1.3846919999999998" table:style-name="c10">
            <text:p>1.3847</text:p>
          </table:table-cell>
          <table:table-cell office:value-type="string" table:style-name="c10">
            <text:p>2026-04-21 10:45</text:p>
          </table:table-cell>
          <table:table-cell office:value-type="float" office:value="1.3723135" table:style-name="c10">
            <text:p>1.3723</text:p>
          </table:table-cell>
          <table:table-cell office:value-type="float" office:value="-1.0920662996897312" table:style-name="c11">
            <text:p>-1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0:30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4-22 07:30</text:p>
          </table:table-cell>
          <table:table-cell office:value-type="float" office:value="1.3743125" table:style-name="c10">
            <text:p>1.3743</text:p>
          </table:table-cell>
          <table:table-cell office:value-type="float" office:value="0.4307552679704285" table:style-name="c12">
            <text:p>+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07:00</text:p>
          </table:table-cell>
          <table:table-cell office:value-type="float" office:value="1.350675" table:style-name="c10">
            <text:p>1.3507</text:p>
          </table:table-cell>
          <table:table-cell office:value-type="string" table:style-name="c10">
            <text:p>2026-04-25 08:45</text:p>
          </table:table-cell>
          <table:table-cell office:value-type="float" office:value="1.3483255" table:style-name="c10">
            <text:p>1.3483</text:p>
          </table:table-cell>
          <table:table-cell office:value-type="float" office:value="-0.3735023358320877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30</text:p>
          </table:table-cell>
          <table:table-cell office:value-type="float" office:value="1.332666" table:style-name="c10">
            <text:p>1.3327</text:p>
          </table:table-cell>
          <table:table-cell office:value-type="string" table:style-name="c10">
            <text:p>2026-04-29 12:30</text:p>
          </table:table-cell>
          <table:table-cell office:value-type="float" office:value="1.3293350000000002" table:style-name="c10">
            <text:p>1.3293</text:p>
          </table:table-cell>
          <table:table-cell office:value-type="float" office:value="-0.44935044977508776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21:45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4-30 02:15</text:p>
          </table:table-cell>
          <table:table-cell office:value-type="float" office:value="1.3203395" table:style-name="c10">
            <text:p>1.3203</text:p>
          </table:table-cell>
          <table:table-cell office:value-type="float" office:value="-0.4503688186518917" table:style-name="c11">
            <text:p>-0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0:15</text:p>
          </table:table-cell>
          <table:table-cell office:value-type="float" office:value="1.3476735" table:style-name="c10">
            <text:p>1.3477</text:p>
          </table:table-cell>
          <table:table-cell office:value-type="string" table:style-name="c10">
            <text:p>2026-05-01 02:45</text:p>
          </table:table-cell>
          <table:table-cell office:value-type="float" office:value="1.3403295" table:style-name="c10">
            <text:p>1.3403</text:p>
          </table:table-cell>
          <table:table-cell office:value-type="float" office:value="-0.7437497784515301" table:style-name="c11">
            <text:p>-0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8:30</text:p>
          </table:table-cell>
          <table:table-cell office:value-type="float" office:value="1.3336664999999999" table:style-name="c10">
            <text:p>1.3337</text:p>
          </table:table-cell>
          <table:table-cell office:value-type="string" table:style-name="c10">
            <text:p>2026-05-02 12:45</text:p>
          </table:table-cell>
          <table:table-cell office:value-type="float" office:value="1.3313340000000002" table:style-name="c10">
            <text:p>1.3313</text:p>
          </table:table-cell>
          <table:table-cell office:value-type="float" office:value="-0.37444418570905524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0:45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5-04 10:15</text:p>
          </table:table-cell>
          <table:table-cell office:value-type="float" office:value="1.3703145" table:style-name="c10">
            <text:p>1.3703</text:p>
          </table:table-cell>
          <table:table-cell office:value-type="float" office:value="0.13859307082724204" table:style-name="c12">
            <text:p>+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1.4537265" table:style-name="c10">
            <text:p>1.4537</text:p>
          </table:table-cell>
          <table:table-cell office:value-type="string" table:style-name="c10">
            <text:p>2026-05-04 16:45</text:p>
          </table:table-cell>
          <table:table-cell office:value-type="float" office:value="1.413293" table:style-name="c10">
            <text:p>1.4133</text:p>
          </table:table-cell>
          <table:table-cell office:value-type="float" office:value="-2.975709165857532" table:style-name="c11">
            <text:p>-3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20:45</text:p>
          </table:table-cell>
          <table:table-cell office:value-type="float" office:value="1.4777385" table:style-name="c10">
            <text:p>1.4777</text:p>
          </table:table-cell>
          <table:table-cell office:value-type="string" table:style-name="c10">
            <text:p>2026-05-05 04:15</text:p>
          </table:table-cell>
          <table:table-cell office:value-type="float" office:value="1.7101445000000002" table:style-name="c10">
            <text:p>1.7101</text:p>
          </table:table-cell>
          <table:table-cell office:value-type="float" office:value="15.495801262841823" table:style-name="c12">
            <text:p>+15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1.7958975" table:style-name="c10">
            <text:p>1.7959</text:p>
          </table:table-cell>
          <table:table-cell office:value-type="string" table:style-name="c10">
            <text:p>2026-05-05 11:45</text:p>
          </table:table-cell>
          <table:table-cell office:value-type="float" office:value="1.8240875" table:style-name="c10">
            <text:p>1.8241</text:p>
          </table:table-cell>
          <table:table-cell office:value-type="float" office:value="1.3666508855600057" table:style-name="c12">
            <text:p>+1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1.8999495" table:style-name="c10">
            <text:p>1.8999</text:p>
          </table:table-cell>
          <table:table-cell office:value-type="string" table:style-name="c10">
            <text:p>2026-05-05 13:45</text:p>
          </table:table-cell>
          <table:table-cell office:value-type="float" office:value="1.8170910000000002" table:style-name="c10">
            <text:p>1.8171</text:p>
          </table:table-cell>
          <table:table-cell office:value-type="float" office:value="-4.552271779276229" table:style-name="c11">
            <text:p>-4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45</text:p>
          </table:table-cell>
          <table:table-cell office:value-type="float" office:value="1.950975" table:style-name="c10">
            <text:p>1.951</text:p>
          </table:table-cell>
          <table:table-cell office:value-type="string" table:style-name="c10">
            <text:p>2026-05-06 00:00</text:p>
          </table:table-cell>
          <table:table-cell office:value-type="float" office:value="1.9520235000000001" table:style-name="c10">
            <text:p>1.952</text:p>
          </table:table-cell>
          <table:table-cell office:value-type="float" office:value="-0.14626507138737477" table:style-name="c11">
            <text:p>-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1:45</text:p>
          </table:table-cell>
          <table:table-cell office:value-type="float" office:value="2.0270129999999997" table:style-name="c10">
            <text:p>2.027</text:p>
          </table:table-cell>
          <table:table-cell office:value-type="string" table:style-name="c10">
            <text:p>2026-05-06 06:00</text:p>
          </table:table-cell>
          <table:table-cell office:value-type="float" office:value="2.0979505000000005" table:style-name="c10">
            <text:p>2.098</text:p>
          </table:table-cell>
          <table:table-cell office:value-type="float" office:value="3.2927118351239404" table:style-name="c12">
            <text:p>+3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45</text:p>
          </table:table-cell>
          <table:table-cell office:value-type="float" office:value="2.235117" table:style-name="c10">
            <text:p>2.2351</text:p>
          </table:table-cell>
          <table:table-cell office:value-type="string" table:style-name="c10">
            <text:p>2026-05-06 14:15</text:p>
          </table:table-cell>
          <table:table-cell office:value-type="float" office:value="2.2638675000000004" table:style-name="c10">
            <text:p>2.2639</text:p>
          </table:table-cell>
          <table:table-cell office:value-type="float" office:value="1.0838371712756034" table:style-name="c12">
            <text:p>+1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7:00</text:p>
          </table:table-cell>
          <table:table-cell office:value-type="float" office:value="2.4282135" table:style-name="c10">
            <text:p>2.4282</text:p>
          </table:table-cell>
          <table:table-cell office:value-type="string" table:style-name="c10">
            <text:p>2026-05-06 20:45</text:p>
          </table:table-cell>
          <table:table-cell office:value-type="float" office:value="2.370814" table:style-name="c10">
            <text:p>2.3708</text:p>
          </table:table-cell>
          <table:table-cell office:value-type="float" office:value="-2.5590318637961573" table:style-name="c11">
            <text:p>-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2:15</text:p>
          </table:table-cell>
          <table:table-cell office:value-type="float" office:value="2.465232" table:style-name="c10">
            <text:p>2.4652</text:p>
          </table:table-cell>
          <table:table-cell office:value-type="string" table:style-name="c10">
            <text:p>2026-05-06 23:15</text:p>
          </table:table-cell>
          <table:table-cell office:value-type="float" office:value="2.4147920000000003" table:style-name="c10">
            <text:p>2.4148</text:p>
          </table:table-cell>
          <table:table-cell office:value-type="float" office:value="-2.241864830896223" table:style-name="c11">
            <text:p>-2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3:30</text:p>
          </table:table-cell>
          <table:table-cell office:value-type="float" office:value="2.4492239999999996" table:style-name="c10">
            <text:p>2.4492</text:p>
          </table:table-cell>
          <table:table-cell office:value-type="string" table:style-name="c10">
            <text:p>2026-05-07 07:30</text:p>
          </table:table-cell>
          <table:table-cell office:value-type="float" office:value="2.7516235000000004" table:style-name="c10">
            <text:p>2.7516</text:p>
          </table:table-cell>
          <table:table-cell office:value-type="float" office:value="12.122166229936514" table:style-name="c12">
            <text:p>+1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17:45</text:p>
          </table:table-cell>
          <table:table-cell office:value-type="float" office:value="2.5392689999999996" table:style-name="c10">
            <text:p>2.5393</text:p>
          </table:table-cell>
          <table:table-cell office:value-type="string" table:style-name="c10">
            <text:p>2026-05-07 20:45</text:p>
          </table:table-cell>
          <table:table-cell office:value-type="float" office:value="2.6076955" table:style-name="c10">
            <text:p>2.6077</text:p>
          </table:table-cell>
          <table:table-cell office:value-type="float" office:value="2.489445454400485" table:style-name="c12">
            <text:p>+2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8:45</text:p>
          </table:table-cell>
          <table:table-cell office:value-type="float" office:value="2.775387" table:style-name="c10">
            <text:p>2.7754</text:p>
          </table:table-cell>
          <table:table-cell office:value-type="string" table:style-name="c10">
            <text:p>2026-05-08 09:00</text:p>
          </table:table-cell>
          <table:table-cell office:value-type="float" office:value="2.7156415000000003" table:style-name="c10">
            <text:p>2.7156</text:p>
          </table:table-cell>
          <table:table-cell office:value-type="float" office:value="-2.3482875490336674" table:style-name="c11">
            <text:p>-2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45</text:p>
          </table:table-cell>
          <table:table-cell office:value-type="float" office:value="2.5602795" table:style-name="c10">
            <text:p>2.5603</text:p>
          </table:table-cell>
          <table:table-cell office:value-type="string" table:style-name="c10">
            <text:p>2026-05-08 23:45</text:p>
          </table:table-cell>
          <table:table-cell office:value-type="float" office:value="2.4987500000000002" table:style-name="c10">
            <text:p>2.4988</text:p>
          </table:table-cell>
          <table:table-cell office:value-type="float" office:value="-2.598329645259434" table:style-name="c11">
            <text:p>-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13:00</text:p>
          </table:table-cell>
          <table:table-cell office:value-type="float" office:value="2.0510249999999997" table:style-name="c10">
            <text:p>2.051</text:p>
          </table:table-cell>
          <table:table-cell office:value-type="string" table:style-name="c10">
            <text:p>2026-05-18 13:30</text:p>
          </table:table-cell>
          <table:table-cell office:value-type="float" office:value="1.991004" table:style-name="c10">
            <text:p>1.991</text:p>
          </table:table-cell>
          <table:table-cell office:value-type="float" office:value="-3.120440608768782" table:style-name="c11">
            <text:p>-3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4:15</text:p>
          </table:table-cell>
          <table:table-cell office:value-type="float" office:value="2.0460225" table:style-name="c10">
            <text:p>2.046</text:p>
          </table:table-cell>
          <table:table-cell office:value-type="string" table:style-name="c10">
            <text:p>2026-05-19 08:15</text:p>
          </table:table-cell>
          <table:table-cell office:value-type="float" office:value="2.0349820000000003" table:style-name="c10">
            <text:p>2.035</text:p>
          </table:table-cell>
          <table:table-cell office:value-type="float" office:value="-0.7384292703525697" table:style-name="c11">
            <text:p>-0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17:00</text:p>
          </table:table-cell>
          <table:table-cell office:value-type="float" office:value="2.0500244999999997" table:style-name="c10">
            <text:p>2.05</text:p>
          </table:table-cell>
          <table:table-cell office:value-type="string" table:style-name="c10">
            <text:p>2026-05-19 18:30</text:p>
          </table:table-cell>
          <table:table-cell office:value-type="float" office:value="2.0039975" table:style-name="c10">
            <text:p>2.004</text:p>
          </table:table-cell>
          <table:table-cell office:value-type="float" office:value="-2.4406045392384335" table:style-name="c11">
            <text:p>-2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0:45</text:p>
          </table:table-cell>
          <table:table-cell office:value-type="float" office:value="2.0860425" table:style-name="c10">
            <text:p>2.086</text:p>
          </table:table-cell>
          <table:table-cell office:value-type="string" table:style-name="c10">
            <text:p>2026-05-21 01:30</text:p>
          </table:table-cell>
          <table:table-cell office:value-type="float" office:value="2.052973" table:style-name="c10">
            <text:p>2.053</text:p>
          </table:table-cell>
          <table:table-cell office:value-type="float" office:value="-1.7820055452849037" table:style-name="c11">
            <text:p>-1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15</text:p>
          </table:table-cell>
          <table:table-cell office:value-type="float" office:value="2.0340165" table:style-name="c10">
            <text:p>2.034</text:p>
          </table:table-cell>
          <table:table-cell office:value-type="string" table:style-name="c10">
            <text:p>2026-05-21 19:30</text:p>
          </table:table-cell>
          <table:table-cell office:value-type="float" office:value="2.0349820000000003" table:style-name="c10">
            <text:p>2.035</text:p>
          </table:table-cell>
          <table:table-cell office:value-type="float" office:value="-0.15252722964633758" table:style-name="c11">
            <text:p>-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00</text:p>
          </table:table-cell>
          <table:table-cell office:value-type="float" office:value="1.976988" table:style-name="c10">
            <text:p>1.977</text:p>
          </table:table-cell>
          <table:table-cell office:value-type="string" table:style-name="c10">
            <text:p>2026-05-25 19:15</text:p>
          </table:table-cell>
          <table:table-cell office:value-type="float" office:value="2.0219885000000004" table:style-name="c10">
            <text:p>2.022</text:p>
          </table:table-cell>
          <table:table-cell office:value-type="float" office:value="2.0717649772532987" table:style-name="c12">
            <text:p>+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0:45</text:p>
          </table:table-cell>
          <table:table-cell office:value-type="float" office:value="1.850925" table:style-name="c10">
            <text:p>1.8509</text:p>
          </table:table-cell>
          <table:table-cell office:value-type="string" table:style-name="c10">
            <text:p>2026-05-31 02:00</text:p>
          </table:table-cell>
          <table:table-cell office:value-type="float" office:value="1.8470760000000002" table:style-name="c10">
            <text:p>1.8471</text:p>
          </table:table-cell>
          <table:table-cell office:value-type="float" office:value="-0.4074343868065933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6:15</text:p>
          </table:table-cell>
          <table:table-cell office:value-type="float" office:value="1.8919454999999998" table:style-name="c10">
            <text:p>1.8919</text:p>
          </table:table-cell>
          <table:table-cell office:value-type="string" table:style-name="c10">
            <text:p>2026-05-31 07:15</text:p>
          </table:table-cell>
          <table:table-cell office:value-type="float" office:value="1.8580705000000002" table:style-name="c10">
            <text:p>1.8581</text:p>
          </table:table-cell>
          <table:table-cell office:value-type="float" office:value="-1.9868058001406341" table:style-name="c11">
            <text:p>-2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9:30</text:p>
          </table:table-cell>
          <table:table-cell office:value-type="float" office:value="1.8939465" table:style-name="c10">
            <text:p>1.8939</text:p>
          </table:table-cell>
          <table:table-cell office:value-type="string" table:style-name="c10">
            <text:p>2026-05-31 10:45</text:p>
          </table:table-cell>
          <table:table-cell office:value-type="float" office:value="1.8700645" table:style-name="c10">
            <text:p>1.8701</text:p>
          </table:table-cell>
          <table:table-cell office:value-type="float" office:value="-1.4583442000869584" table:style-name="c11">
            <text:p>-1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12:30</text:p>
          </table:table-cell>
          <table:table-cell office:value-type="float" office:value="1.9159575" table:style-name="c10">
            <text:p>1.916</text:p>
          </table:table-cell>
          <table:table-cell office:value-type="string" table:style-name="c10">
            <text:p>2026-05-31 13:15</text:p>
          </table:table-cell>
          <table:table-cell office:value-type="float" office:value="1.891054" table:style-name="c10">
            <text:p>1.8911</text:p>
          </table:table-cell>
          <table:table-cell office:value-type="float" office:value="-1.497095679105609" table:style-name="c11">
            <text:p>-1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15:15</text:p>
          </table:table-cell>
          <table:table-cell office:value-type="float" office:value="1.9049519999999998" table:style-name="c10">
            <text:p>1.905</text:p>
          </table:table-cell>
          <table:table-cell office:value-type="string" table:style-name="c10">
            <text:p>2026-05-31 16:30</text:p>
          </table:table-cell>
          <table:table-cell office:value-type="float" office:value="1.883058" table:style-name="c10">
            <text:p>1.8831</text:p>
          </table:table-cell>
          <table:table-cell office:value-type="float" office:value="-1.3469228065589034" table:style-name="c11">
            <text:p>-1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1:00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6-01 02:00</text:p>
          </table:table-cell>
          <table:table-cell office:value-type="float" office:value="1.903048" table:style-name="c10">
            <text:p>1.903</text:p>
          </table:table-cell>
          <table:table-cell office:value-type="float" office:value="-1.9982106495538998" table:style-name="c11">
            <text:p>-2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4:00</text:p>
          </table:table-cell>
          <table:table-cell office:value-type="float" office:value="2.0020005" table:style-name="c10">
            <text:p>2.002</text:p>
          </table:table-cell>
          <table:table-cell office:value-type="string" table:style-name="c10">
            <text:p>2026-06-01 05:45</text:p>
          </table:table-cell>
          <table:table-cell office:value-type="float" office:value="1.9540225000000002" table:style-name="c10">
            <text:p>1.954</text:p>
          </table:table-cell>
          <table:table-cell office:value-type="float" office:value="-2.5916122886832205" table:style-name="c11">
            <text:p>-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6:30</text:p>
          </table:table-cell>
          <table:table-cell office:value-type="float" office:value="2.1800895" table:style-name="c10">
            <text:p>2.1801</text:p>
          </table:table-cell>
          <table:table-cell office:value-type="string" table:style-name="c10">
            <text:p>2026-06-01 20:45</text:p>
          </table:table-cell>
          <table:table-cell office:value-type="float" office:value="2.1629180000000003" table:style-name="c10">
            <text:p>2.1629</text:p>
          </table:table-cell>
          <table:table-cell office:value-type="float" office:value="-0.9859766345372334" table:style-name="c11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30</text:p>
          </table:table-cell>
          <table:table-cell office:value-type="float" office:value="0.28454219999999997" table:style-name="c1">
            <text:p>0.28454</text:p>
          </table:table-cell>
          <table:table-cell office:value-type="string" table:style-name="c1">
            <text:p>2026-03-05 22:00</text:p>
          </table:table-cell>
          <table:table-cell office:value-type="float" office:value="0.2842578" table:style-name="c1">
            <text:p>0.28426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16:15</text:p>
          </table:table-cell>
          <table:table-cell office:value-type="float" office:value="0.2893446" table:style-name="c1">
            <text:p>0.28934</text:p>
          </table:table-cell>
          <table:table-cell office:value-type="string" table:style-name="c1">
            <text:p>2026-03-08 22:15</text:p>
          </table:table-cell>
          <table:table-cell office:value-type="float" office:value="0.28955515000000004" table:style-name="c1">
            <text:p>0.28956</text:p>
          </table:table-cell>
          <table:table-cell office:value-type="float" office:value="-0.12727755930125317" table:style-name="c13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3:15</text:p>
          </table:table-cell>
          <table:table-cell office:value-type="float" office:value="0.29044515" table:style-name="c1">
            <text:p>0.29045</text:p>
          </table:table-cell>
          <table:table-cell office:value-type="string" table:style-name="c1">
            <text:p>2026-03-09 04:15</text:p>
          </table:table-cell>
          <table:table-cell office:value-type="float" office:value="0.28935525" table:style-name="c1">
            <text:p>0.28936</text:p>
          </table:table-cell>
          <table:table-cell office:value-type="float" office:value="-0.5744014471406933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29164575" table:style-name="c1">
            <text:p>0.29165</text:p>
          </table:table-cell>
          <table:table-cell office:value-type="string" table:style-name="c1">
            <text:p>2026-03-11 18:45</text:p>
          </table:table-cell>
          <table:table-cell office:value-type="float" office:value="0.28995495000000004" table:style-name="c1">
            <text:p>0.28995</text:p>
          </table:table-cell>
          <table:table-cell office:value-type="float" office:value="-0.7784855239789779" table:style-name="c13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290145" table:style-name="c1">
            <text:p>0.29014</text:p>
          </table:table-cell>
          <table:table-cell office:value-type="string" table:style-name="c1">
            <text:p>2026-03-13 03:45</text:p>
          </table:table-cell>
          <table:table-cell office:value-type="float" office:value="0.289855" table:style-name="c1">
            <text:p>0.28985</text:p>
          </table:table-cell>
          <table:table-cell office:value-type="float" office:value="-0.2996502248875599" table:style-name="c13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4:30</text:p>
          </table:table-cell>
          <table:table-cell office:value-type="float" office:value="0.2903451" table:style-name="c1">
            <text:p>0.29035</text:p>
          </table:table-cell>
          <table:table-cell office:value-type="string" table:style-name="c1">
            <text:p>2026-03-14 06:45</text:p>
          </table:table-cell>
          <table:table-cell office:value-type="float" office:value="0.2936531" table:style-name="c1">
            <text:p>0.29365</text:p>
          </table:table-cell>
          <table:table-cell office:value-type="float" office:value="0.9371563195314625" table:style-name="c14">
            <text:p>+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3:00</text:p>
          </table:table-cell>
          <table:table-cell office:value-type="float" office:value="0.29724854999999994" table:style-name="c1">
            <text:p>0.29725</text:p>
          </table:table-cell>
          <table:table-cell office:value-type="string" table:style-name="c1">
            <text:p>2026-03-14 17:45</text:p>
          </table:table-cell>
          <table:table-cell office:value-type="float" office:value="0.2972513" table:style-name="c1">
            <text:p>0.29725</text:p>
          </table:table-cell>
          <table:table-cell office:value-type="float" office:value="-0.19897669768277337" table:style-name="c13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30</text:p>
          </table:table-cell>
          <table:table-cell office:value-type="float" office:value="0.2973486" table:style-name="c1">
            <text:p>0.29735</text:p>
          </table:table-cell>
          <table:table-cell office:value-type="string" table:style-name="c1">
            <text:p>2026-03-15 20:30</text:p>
          </table:table-cell>
          <table:table-cell office:value-type="float" office:value="0.29825080000000004" table:style-name="c1">
            <text:p>0.29825</text:p>
          </table:table-cell>
          <table:table-cell office:value-type="float" office:value="0.1029083879325654" table:style-name="c14">
            <text:p>+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2:45</text:p>
          </table:table-cell>
          <table:table-cell office:value-type="float" office:value="0.2965482" table:style-name="c1">
            <text:p>0.29655</text:p>
          </table:table-cell>
          <table:table-cell office:value-type="string" table:style-name="c1">
            <text:p>2026-03-17 05:45</text:p>
          </table:table-cell>
          <table:table-cell office:value-type="float" office:value="0.29605190000000003" table:style-name="c1">
            <text:p>0.29605</text:p>
          </table:table-cell>
          <table:table-cell office:value-type="float" office:value="-0.3669244150191875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15</text:p>
          </table:table-cell>
          <table:table-cell office:value-type="float" office:value="0.2995497" table:style-name="c1">
            <text:p>0.29955</text:p>
          </table:table-cell>
          <table:table-cell office:value-type="string" table:style-name="c1">
            <text:p>2026-03-18 03:15</text:p>
          </table:table-cell>
          <table:table-cell office:value-type="float" office:value="0.3072463" table:style-name="c1">
            <text:p>0.30725</text:p>
          </table:table-cell>
          <table:table-cell office:value-type="float" office:value="2.3643537771194767" table:style-name="c14">
            <text:p>+2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9 22:45</text:p>
          </table:table-cell>
          <table:table-cell office:value-type="float" office:value="0.30425204999999994" table:style-name="c1">
            <text:p>0.30425</text:p>
          </table:table-cell>
          <table:table-cell office:value-type="string" table:style-name="c1">
            <text:p>2026-03-20 04:00</text:p>
          </table:table-cell>
          <table:table-cell office:value-type="float" office:value="0.303848" table:style-name="c1">
            <text:p>0.30385</text:p>
          </table:table-cell>
          <table:table-cell office:value-type="float" office:value="-0.33243560791124116" table:style-name="c13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0:30</text:p>
          </table:table-cell>
          <table:table-cell office:value-type="float" office:value="0.3069534" table:style-name="c1">
            <text:p>0.30695</text:p>
          </table:table-cell>
          <table:table-cell office:value-type="string" table:style-name="c1">
            <text:p>2026-03-20 12:45</text:p>
          </table:table-cell>
          <table:table-cell office:value-type="float" office:value="0.30534725" table:style-name="c1">
            <text:p>0.30535</text:p>
          </table:table-cell>
          <table:table-cell office:value-type="float" office:value="-0.7221093341041263" table:style-name="c13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4:15</text:p>
          </table:table-cell>
          <table:table-cell office:value-type="float" office:value="0.30965475" table:style-name="c1">
            <text:p>0.30965</text:p>
          </table:table-cell>
          <table:table-cell office:value-type="string" table:style-name="c1">
            <text:p>2026-03-21 08:00</text:p>
          </table:table-cell>
          <table:table-cell office:value-type="float" office:value="0.30904539999999997" table:style-name="c1">
            <text:p>0.30905</text:p>
          </table:table-cell>
          <table:table-cell office:value-type="float" office:value="-0.39629030544501287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23:45</text:p>
          </table:table-cell>
          <table:table-cell office:value-type="float" office:value="0.3133566" table:style-name="c1">
            <text:p>0.31336</text:p>
          </table:table-cell>
          <table:table-cell office:value-type="string" table:style-name="c1">
            <text:p>2026-03-22 00:15</text:p>
          </table:table-cell>
          <table:table-cell office:value-type="float" office:value="0.3108445" table:style-name="c1">
            <text:p>0.31084</text:p>
          </table:table-cell>
          <table:table-cell office:value-type="float" office:value="-0.999971966602875" table:style-name="c13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1:15</text:p>
          </table:table-cell>
          <table:table-cell office:value-type="float" office:value="0.3099549" table:style-name="c1">
            <text:p>0.30995</text:p>
          </table:table-cell>
          <table:table-cell office:value-type="string" table:style-name="c1">
            <text:p>2026-03-23 12:00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-0.7823827125010618" table:style-name="c13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4 13:45</text:p>
          </table:table-cell>
          <table:table-cell office:value-type="float" office:value="0.30984500000000004" table:style-name="c1">
            <text:p>0.30985</text:p>
          </table:table-cell>
          <table:table-cell office:value-type="float" office:value="-0.6521747660403143" table:style-name="c13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6:15</text:p>
          </table:table-cell>
          <table:table-cell office:value-type="float" office:value="0.312156" table:style-name="c1">
            <text:p>0.31216</text:p>
          </table:table-cell>
          <table:table-cell office:value-type="string" table:style-name="c1">
            <text:p>2026-03-26 00:00</text:p>
          </table:table-cell>
          <table:table-cell office:value-type="float" office:value="0.31434275" table:style-name="c1">
            <text:p>0.31434</text:p>
          </table:table-cell>
          <table:table-cell office:value-type="float" office:value="0.49923078292584133" table:style-name="c14">
            <text:p>+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04:30</text:p>
          </table:table-cell>
          <table:table-cell office:value-type="float" office:value="0.31545765000000003" table:style-name="c1">
            <text:p>0.31546</text:p>
          </table:table-cell>
          <table:table-cell office:value-type="string" table:style-name="c1">
            <text:p>2026-03-26 06:00</text:p>
          </table:table-cell>
          <table:table-cell office:value-type="float" office:value="0.31434275" table:style-name="c1">
            <text:p>0.31434</text:p>
          </table:table-cell>
          <table:table-cell office:value-type="float" office:value="-0.5526165421095297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2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7 02:00</text:p>
          </table:table-cell>
          <table:table-cell office:value-type="float" office:value="0.31074455" table:style-name="c1">
            <text:p>0.31074</text:p>
          </table:table-cell>
          <table:table-cell office:value-type="float" office:value="-0.36374559600622636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4:45</text:p>
          </table:table-cell>
          <table:table-cell office:value-type="float" office:value="0.31365675" table:style-name="c1">
            <text:p>0.31366</text:p>
          </table:table-cell>
          <table:table-cell office:value-type="string" table:style-name="c1">
            <text:p>2026-03-27 09:15</text:p>
          </table:table-cell>
          <table:table-cell office:value-type="float" office:value="0.31414285000000003" table:style-name="c1">
            <text:p>0.31414</text:p>
          </table:table-cell>
          <table:table-cell office:value-type="float" office:value="-0.04523146948057777" table:style-name="c13">
            <text:p>-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1:45</text:p>
          </table:table-cell>
          <table:table-cell office:value-type="float" office:value="0.31405695" table:style-name="c1">
            <text:p>0.31406</text:p>
          </table:table-cell>
          <table:table-cell office:value-type="string" table:style-name="c1">
            <text:p>2026-03-28 15:45</text:p>
          </table:table-cell>
          <table:table-cell office:value-type="float" office:value="0.3148425" table:style-name="c1">
            <text:p>0.31484</text:p>
          </table:table-cell>
          <table:table-cell office:value-type="float" office:value="0.049729783881580225" table:style-name="c14">
            <text:p>+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09:00</text:p>
          </table:table-cell>
          <table:table-cell office:value-type="float" office:value="0.31965974999999996" table:style-name="c1">
            <text:p>0.31966</text:p>
          </table:table-cell>
          <table:table-cell office:value-type="string" table:style-name="c1">
            <text:p>2026-03-29 13:30</text:p>
          </table:table-cell>
          <table:table-cell office:value-type="float" office:value="0.31834075" table:style-name="c1">
            <text:p>0.31834</text:p>
          </table:table-cell>
          <table:table-cell office:value-type="float" office:value="-0.6117013978925945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20:15</text:p>
          </table:table-cell>
          <table:table-cell office:value-type="float" office:value="0.32306145000000003" table:style-name="c1">
            <text:p>0.32306</text:p>
          </table:table-cell>
          <table:table-cell office:value-type="string" table:style-name="c1">
            <text:p>2026-03-29 23:00</text:p>
          </table:table-cell>
          <table:table-cell office:value-type="float" office:value="0.32233875" table:style-name="c1">
            <text:p>0.32234</text:p>
          </table:table-cell>
          <table:table-cell office:value-type="float" office:value="-0.423156387507706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8:45</text:p>
          </table:table-cell>
          <table:table-cell office:value-type="float" office:value="0.3211605" table:style-name="c1">
            <text:p>0.32116</text:p>
          </table:table-cell>
          <table:table-cell office:value-type="string" table:style-name="c1">
            <text:p>2026-03-30 22:00</text:p>
          </table:table-cell>
          <table:table-cell office:value-type="float" office:value="0.31974005000000005" table:style-name="c1">
            <text:p>0.31974</text:p>
          </table:table-cell>
          <table:table-cell office:value-type="float" office:value="-0.641302513836528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30</text:p>
          </table:table-cell>
          <table:table-cell office:value-type="float" office:value="0.31825905" table:style-name="c1">
            <text:p>0.31826</text:p>
          </table:table-cell>
          <table:table-cell office:value-type="string" table:style-name="c1">
            <text:p>2026-04-06 13:45</text:p>
          </table:table-cell>
          <table:table-cell office:value-type="float" office:value="0.31774105" table:style-name="c1">
            <text:p>0.31774</text:p>
          </table:table-cell>
          <table:table-cell office:value-type="float" office:value="-0.36233513515169236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02:45</text:p>
          </table:table-cell>
          <table:table-cell office:value-type="float" office:value="0.32005995" table:style-name="c1">
            <text:p>0.32006</text:p>
          </table:table-cell>
          <table:table-cell office:value-type="string" table:style-name="c1">
            <text:p>2026-04-12 07:15</text:p>
          </table:table-cell>
          <table:table-cell office:value-type="float" office:value="0.31993995000000003" table:style-name="c1">
            <text:p>0.31994</text:p>
          </table:table-cell>
          <table:table-cell office:value-type="float" office:value="-0.2373180274664044" table:style-name="c13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08:00</text:p>
          </table:table-cell>
          <table:table-cell office:value-type="float" office:value="0.32176079999999996" table:style-name="c1">
            <text:p>0.32176</text:p>
          </table:table-cell>
          <table:table-cell office:value-type="string" table:style-name="c1">
            <text:p>2026-04-13 11:15</text:p>
          </table:table-cell>
          <table:table-cell office:value-type="float" office:value="0.32143920000000004" table:style-name="c1">
            <text:p>0.32144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0.32646315" table:style-name="c1">
            <text:p>0.32646</text:p>
          </table:table-cell>
          <table:table-cell office:value-type="string" table:style-name="c1">
            <text:p>2026-04-15 21:45</text:p>
          </table:table-cell>
          <table:table-cell office:value-type="float" office:value="0.3276361" table:style-name="c1">
            <text:p>0.32764</text:p>
          </table:table-cell>
          <table:table-cell office:value-type="float" office:value="0.15867194692571474" table:style-name="c14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7:00</text:p>
          </table:table-cell>
          <table:table-cell office:value-type="float" office:value="0.3275637" table:style-name="c1">
            <text:p>0.32756</text:p>
          </table:table-cell>
          <table:table-cell office:value-type="string" table:style-name="c1">
            <text:p>2026-04-18 07:30</text:p>
          </table:table-cell>
          <table:table-cell office:value-type="float" office:value="0.32693645000000005" table:style-name="c1">
            <text:p>0.32694</text:p>
          </table:table-cell>
          <table:table-cell office:value-type="float" office:value="-0.3910066846692595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06:15</text:p>
          </table:table-cell>
          <table:table-cell office:value-type="float" office:value="0.32916449999999997" table:style-name="c1">
            <text:p>0.32916</text:p>
          </table:table-cell>
          <table:table-cell office:value-type="string" table:style-name="c1">
            <text:p>2026-04-19 11:00</text:p>
          </table:table-cell>
          <table:table-cell office:value-type="float" office:value="0.3312343" table:style-name="c1">
            <text:p>0.33123</text:p>
          </table:table-cell>
          <table:table-cell office:value-type="float" office:value="0.4276471594901743" table:style-name="c14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15:00</text:p>
          </table:table-cell>
          <table:table-cell office:value-type="float" office:value="0.332166" table:style-name="c1">
            <text:p>0.33217</text:p>
          </table:table-cell>
          <table:table-cell office:value-type="string" table:style-name="c1">
            <text:p>2026-04-19 18:15</text:p>
          </table:table-cell>
          <table:table-cell office:value-type="float" office:value="0.33343320000000004" table:style-name="c1">
            <text:p>0.33343</text:p>
          </table:table-cell>
          <table:table-cell office:value-type="float" office:value="0.1808333884864899" table:style-name="c14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02:15</text:p>
          </table:table-cell>
          <table:table-cell office:value-type="float" office:value="0.33186584999999996" table:style-name="c1">
            <text:p>0.33187</text:p>
          </table:table-cell>
          <table:table-cell office:value-type="string" table:style-name="c1">
            <text:p>2026-04-20 06:15</text:p>
          </table:table-cell>
          <table:table-cell office:value-type="float" office:value="0.33133425000000005" table:style-name="c1">
            <text:p>0.33133</text:p>
          </table:table-cell>
          <table:table-cell office:value-type="float" office:value="-0.3597649971366135" table:style-name="c13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45</text:p>
          </table:table-cell>
          <table:table-cell office:value-type="float" office:value="0.3343671" table:style-name="c1">
            <text:p>0.33437</text:p>
          </table:table-cell>
          <table:table-cell office:value-type="string" table:style-name="c1">
            <text:p>2026-04-21 23:15</text:p>
          </table:table-cell>
          <table:table-cell office:value-type="float" office:value="0.33313335" table:style-name="c1">
            <text:p>0.33313</text:p>
          </table:table-cell>
          <table:table-cell office:value-type="float" office:value="-0.5681430878366811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0.32696339999999996" table:style-name="c1">
            <text:p>0.32696</text:p>
          </table:table-cell>
          <table:table-cell office:value-type="string" table:style-name="c1">
            <text:p>2026-05-01 14:00</text:p>
          </table:table-cell>
          <table:table-cell office:value-type="float" office:value="0.32613685" table:style-name="c1">
            <text:p>0.32614</text:p>
          </table:table-cell>
          <table:table-cell office:value-type="float" office:value="-0.4521905397209647" table:style-name="c13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3 06:30</text:p>
          </table:table-cell>
          <table:table-cell office:value-type="float" office:value="0.33753115" table:style-name="c1">
            <text:p>0.33753</text:p>
          </table:table-cell>
          <table:table-cell office:value-type="float" office:value="-0.12219484112881984" table:style-name="c13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30</text:p>
          </table:table-cell>
          <table:table-cell office:value-type="float" office:value="0.34077029999999997" table:style-name="c1">
            <text:p>0.34077</text:p>
          </table:table-cell>
          <table:table-cell office:value-type="string" table:style-name="c1">
            <text:p>2026-05-05 09:15</text:p>
          </table:table-cell>
          <table:table-cell office:value-type="float" office:value="0.33953015000000003" table:style-name="c1">
            <text:p>0.33953</text:p>
          </table:table-cell>
          <table:table-cell office:value-type="float" office:value="-0.5630980076168468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30</text:p>
          </table:table-cell>
          <table:table-cell office:value-type="float" office:value="0.34097039999999995" table:style-name="c1">
            <text:p>0.34097</text:p>
          </table:table-cell>
          <table:table-cell office:value-type="string" table:style-name="c1">
            <text:p>2026-05-05 20:30</text:p>
          </table:table-cell>
          <table:table-cell office:value-type="float" office:value="0.34382799999999997" table:style-name="c1">
            <text:p>0.34383</text:p>
          </table:table-cell>
          <table:table-cell office:value-type="float" office:value="0.6365032941275661" table:style-name="c14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7:15</text:p>
          </table:table-cell>
          <table:table-cell office:value-type="float" office:value="0.3505752" table:style-name="c1">
            <text:p>0.35058</text:p>
          </table:table-cell>
          <table:table-cell office:value-type="string" table:style-name="c1">
            <text:p>2026-05-08 09:00</text:p>
          </table:table-cell>
          <table:table-cell office:value-type="float" office:value="0.34942520000000005" table:style-name="c1">
            <text:p>0.34943</text:p>
          </table:table-cell>
          <table:table-cell office:value-type="float" office:value="-0.5272765942370916" table:style-name="c13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5:30</text:p>
          </table:table-cell>
          <table:table-cell office:value-type="float" office:value="0.3533766" table:style-name="c1">
            <text:p>0.35338</text:p>
          </table:table-cell>
          <table:table-cell office:value-type="string" table:style-name="c1">
            <text:p>2026-05-09 07:30</text:p>
          </table:table-cell>
          <table:table-cell office:value-type="float" office:value="0.3514242" table:style-name="c1">
            <text:p>0.35142</text:p>
          </table:table-cell>
          <table:table-cell office:value-type="float" office:value="-0.7512939384780815" table:style-name="c13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1:30</text:p>
          </table:table-cell>
          <table:table-cell office:value-type="float" office:value="0.35007495" table:style-name="c1">
            <text:p>0.35007</text:p>
          </table:table-cell>
          <table:table-cell office:value-type="string" table:style-name="c1">
            <text:p>2026-05-10 20:45</text:p>
          </table:table-cell>
          <table:table-cell office:value-type="float" office:value="0.3510244" table:style-name="c1">
            <text:p>0.35102</text:p>
          </table:table-cell>
          <table:table-cell office:value-type="float" office:value="0.0707711946827505" table:style-name="c14">
            <text:p>+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2:45</text:p>
          </table:table-cell>
          <table:table-cell office:value-type="float" office:value="0.35067524999999994" table:style-name="c1">
            <text:p>0.35068</text:p>
          </table:table-cell>
          <table:table-cell office:value-type="string" table:style-name="c1">
            <text:p>2026-05-14 14:45</text:p>
          </table:table-cell>
          <table:table-cell office:value-type="float" office:value="0.35412285000000004" table:style-name="c1">
            <text:p>0.35412</text:p>
          </table:table-cell>
          <table:table-cell office:value-type="float" office:value="0.7812665487085368" table:style-name="c14">
            <text:p>+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7:00</text:p>
          </table:table-cell>
          <table:table-cell office:value-type="float" office:value="0.35467724999999994" table:style-name="c1">
            <text:p>0.35468</text:p>
          </table:table-cell>
          <table:table-cell office:value-type="string" table:style-name="c1">
            <text:p>2026-05-16 21:30</text:p>
          </table:table-cell>
          <table:table-cell office:value-type="float" office:value="0.3542228" table:style-name="c1">
            <text:p>0.35422</text:p>
          </table:table-cell>
          <table:table-cell office:value-type="float" office:value="-0.3277744420314366" table:style-name="c13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11:00</text:p>
          </table:table-cell>
          <table:table-cell office:value-type="float" office:value="0.35727855" table:style-name="c1">
            <text:p>0.35728</text:p>
          </table:table-cell>
          <table:table-cell office:value-type="string" table:style-name="c1">
            <text:p>2026-05-18 15:00</text:p>
          </table:table-cell>
          <table:table-cell office:value-type="float" office:value="0.35632175" table:style-name="c1">
            <text:p>0.35632</text:p>
          </table:table-cell>
          <table:table-cell office:value-type="float" office:value="-0.4671669145124957" table:style-name="c13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2:30</text:p>
          </table:table-cell>
          <table:table-cell office:value-type="float" office:value="0.36368174999999997" table:style-name="c1">
            <text:p>0.36368</text:p>
          </table:table-cell>
          <table:table-cell office:value-type="string" table:style-name="c1">
            <text:p>2026-05-21 14:00</text:p>
          </table:table-cell>
          <table:table-cell office:value-type="float" office:value="0.36201890000000003" table:style-name="c1">
            <text:p>0.36202</text:p>
          </table:table-cell>
          <table:table-cell office:value-type="float" office:value="-0.6562126862565854" table:style-name="c13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10:30</text:p>
          </table:table-cell>
          <table:table-cell office:value-type="float" office:value="0.3619809" table:style-name="c1">
            <text:p>0.36198</text:p>
          </table:table-cell>
          <table:table-cell office:value-type="string" table:style-name="c1">
            <text:p>2026-05-23 10:45</text:p>
          </table:table-cell>
          <table:table-cell office:value-type="float" office:value="0.3590204" table:style-name="c1">
            <text:p>0.35902</text:p>
          </table:table-cell>
          <table:table-cell office:value-type="float" office:value="-1.0161259280807244" table:style-name="c13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9:15</text:p>
          </table:table-cell>
          <table:table-cell office:value-type="float" office:value="0.36348165" table:style-name="c1">
            <text:p>0.36348</text:p>
          </table:table-cell>
          <table:table-cell office:value-type="string" table:style-name="c1">
            <text:p>2026-05-24 20:15</text:p>
          </table:table-cell>
          <table:table-cell office:value-type="float" office:value="0.36651665000000005" table:style-name="c1">
            <text:p>0.36652</text:p>
          </table:table-cell>
          <table:table-cell office:value-type="float" office:value="0.633411127260497" table:style-name="c14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5:45</text:p>
          </table:table-cell>
          <table:table-cell office:value-type="float" office:value="0.36608294999999996" table:style-name="c1">
            <text:p>0.36608</text:p>
          </table:table-cell>
          <table:table-cell office:value-type="string" table:style-name="c1">
            <text:p>2026-05-25 10:30</text:p>
          </table:table-cell>
          <table:table-cell office:value-type="float" office:value="0.36631675" table:style-name="c1">
            <text:p>0.36632</text:p>
          </table:table-cell>
          <table:table-cell office:value-type="float" office:value="-0.13616235971927182" table:style-name="c13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30</text:p>
          </table:table-cell>
          <table:table-cell office:value-type="float" office:value="0.36828405" table:style-name="c1">
            <text:p>0.36828</text:p>
          </table:table-cell>
          <table:table-cell office:value-type="string" table:style-name="c1">
            <text:p>2026-05-25 19:45</text:p>
          </table:table-cell>
          <table:table-cell office:value-type="float" office:value="0.37191395" table:style-name="c1">
            <text:p>0.37191</text:p>
          </table:table-cell>
          <table:table-cell office:value-type="float" office:value="0.7837548256434124" table:style-name="c14">
            <text:p>+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2:00</text:p>
          </table:table-cell>
          <table:table-cell office:value-type="float" office:value="0.37608795" table:style-name="c1">
            <text:p>0.37609</text:p>
          </table:table-cell>
          <table:table-cell office:value-type="string" table:style-name="c1">
            <text:p>2026-05-26 14:15</text:p>
          </table:table-cell>
          <table:table-cell office:value-type="float" office:value="0.373813" table:style-name="c1">
            <text:p>0.37381</text:p>
          </table:table-cell>
          <table:table-cell office:value-type="float" office:value="-0.8035892101834197" table:style-name="c13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12:00</text:p>
          </table:table-cell>
          <table:table-cell office:value-type="float" office:value="0.37428704999999995" table:style-name="c1">
            <text:p>0.37429</text:p>
          </table:table-cell>
          <table:table-cell office:value-type="string" table:style-name="c1">
            <text:p>2026-05-27 13:00</text:p>
          </table:table-cell>
          <table:table-cell office:value-type="float" office:value="0.37331325000000004" table:style-name="c1">
            <text:p>0.37331</text:p>
          </table:table-cell>
          <table:table-cell office:value-type="float" office:value="-0.45955455491980546" table:style-name="c13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5:15</text:p>
          </table:table-cell>
          <table:table-cell office:value-type="float" office:value="0.35167574999999995" table:style-name="c1">
            <text:p>0.35168</text:p>
          </table:table-cell>
          <table:table-cell office:value-type="string" table:style-name="c1">
            <text:p>2026-06-01 07:15</text:p>
          </table:table-cell>
          <table:table-cell office:value-type="float" office:value="0.35072455" table:style-name="c1">
            <text:p>0.35072</text:p>
          </table:table-cell>
          <table:table-cell office:value-type="float" office:value="-0.46983574370706993" table:style-name="c13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1:15</text:p>
          </table:table-cell>
          <table:table-cell office:value-type="float" office:value="4.016007" table:style-name="c10">
            <text:p>4.016</text:p>
          </table:table-cell>
          <table:table-cell office:value-type="string" table:style-name="c10">
            <text:p>2026-03-05 01:45</text:p>
          </table:table-cell>
          <table:table-cell office:value-type="float" office:value="3.9670155" table:style-name="c10">
            <text:p>3.967</text:p>
          </table:table-cell>
          <table:table-cell office:value-type="float" office:value="-1.4173671506175212" table:style-name="c11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9:15</text:p>
          </table:table-cell>
          <table:table-cell office:value-type="float" office:value="4.020009" table:style-name="c10">
            <text:p>4.02</text:p>
          </table:table-cell>
          <table:table-cell office:value-type="string" table:style-name="c10">
            <text:p>2026-03-05 19:45</text:p>
          </table:table-cell>
          <table:table-cell office:value-type="float" office:value="3.9850065000000003" table:style-name="c10">
            <text:p>3.985</text:p>
          </table:table-cell>
          <table:table-cell office:value-type="float" office:value="-1.06886646257508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4.014005999999999" table:style-name="c10">
            <text:p>4.014</text:p>
          </table:table-cell>
          <table:table-cell office:value-type="string" table:style-name="c10">
            <text:p>2026-03-06 09:15</text:p>
          </table:table-cell>
          <table:table-cell office:value-type="float" office:value="3.962018" table:style-name="c10">
            <text:p>3.962</text:p>
          </table:table-cell>
          <table:table-cell office:value-type="float" office:value="-1.4924759450284597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3:45</text:p>
          </table:table-cell>
          <table:table-cell office:value-type="float" office:value="3.9149564999999997" table:style-name="c10">
            <text:p>3.915</text:p>
          </table:table-cell>
          <table:table-cell office:value-type="string" table:style-name="c10">
            <text:p>2026-03-09 17:45</text:p>
          </table:table-cell>
          <table:table-cell office:value-type="float" office:value="3.8950515" table:style-name="c10">
            <text:p>3.8951</text:p>
          </table:table-cell>
          <table:table-cell office:value-type="float" office:value="-0.70731840694781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30</text:p>
          </table:table-cell>
          <table:table-cell office:value-type="float" office:value="3.9769875" table:style-name="c10">
            <text:p>3.977</text:p>
          </table:table-cell>
          <table:table-cell office:value-type="string" table:style-name="c10">
            <text:p>2026-03-09 19:45</text:p>
          </table:table-cell>
          <table:table-cell office:value-type="float" office:value="3.924037" table:style-name="c10">
            <text:p>3.924</text:p>
          </table:table-cell>
          <table:table-cell office:value-type="float" office:value="-1.528660825888939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3.9729855" table:style-name="c10">
            <text:p>3.973</text:p>
          </table:table-cell>
          <table:table-cell office:value-type="string" table:style-name="c10">
            <text:p>2026-03-10 15:45</text:p>
          </table:table-cell>
          <table:table-cell office:value-type="float" office:value="3.9150415" table:style-name="c10">
            <text:p>3.915</text:p>
          </table:table-cell>
          <table:table-cell office:value-type="float" office:value="-1.6554343819905726" table:style-name="c11">
            <text:p>-1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6:00</text:p>
          </table:table-cell>
          <table:table-cell office:value-type="float" office:value="3.943971" table:style-name="c10">
            <text:p>3.944</text:p>
          </table:table-cell>
          <table:table-cell office:value-type="string" table:style-name="c10">
            <text:p>2026-03-10 17:15</text:p>
          </table:table-cell>
          <table:table-cell office:value-type="float" office:value="3.9060460000000004" table:style-name="c10">
            <text:p>3.906</text:p>
          </table:table-cell>
          <table:table-cell office:value-type="float" office:value="-1.159572064652603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3.9259619999999997" table:style-name="c10">
            <text:p>3.926</text:p>
          </table:table-cell>
          <table:table-cell office:value-type="string" table:style-name="c10">
            <text:p>2026-03-11 15:15</text:p>
          </table:table-cell>
          <table:table-cell office:value-type="float" office:value="3.89805" table:style-name="c10">
            <text:p>3.8981</text:p>
          </table:table-cell>
          <table:table-cell office:value-type="float" office:value="-0.909438296906584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7:45</text:p>
          </table:table-cell>
          <table:table-cell office:value-type="float" office:value="3.887943" table:style-name="c10">
            <text:p>3.8879</text:p>
          </table:table-cell>
          <table:table-cell office:value-type="string" table:style-name="c10">
            <text:p>2026-03-12 09:30</text:p>
          </table:table-cell>
          <table:table-cell office:value-type="float" office:value="3.8720630000000003" table:style-name="c10">
            <text:p>3.8721</text:p>
          </table:table-cell>
          <table:table-cell office:value-type="float" office:value="-0.6075257259944289" table:style-name="c11">
            <text:p>-0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9:45</text:p>
          </table:table-cell>
          <table:table-cell office:value-type="float" office:value="3.923961" table:style-name="c10">
            <text:p>3.924</text:p>
          </table:table-cell>
          <table:table-cell office:value-type="string" table:style-name="c10">
            <text:p>2026-03-12 12:15</text:p>
          </table:table-cell>
          <table:table-cell office:value-type="float" office:value="3.9060460000000004" table:style-name="c10">
            <text:p>3.906</text:p>
          </table:table-cell>
          <table:table-cell office:value-type="float" office:value="-0.6555413255636244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4.100048999999999" table:style-name="c10">
            <text:p>4.1</text:p>
          </table:table-cell>
          <table:table-cell office:value-type="string" table:style-name="c10">
            <text:p>2026-03-13 15:00</text:p>
          </table:table-cell>
          <table:table-cell office:value-type="float" office:value="4.101948" table:style-name="c10">
            <text:p>4.1019</text:p>
          </table:table-cell>
          <table:table-cell office:value-type="float" office:value="-0.153676067090891" table:style-name="c11">
            <text:p>-0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3:45</text:p>
          </table:table-cell>
          <table:table-cell office:value-type="float" office:value="3.9489734999999997" table:style-name="c10">
            <text:p>3.949</text:p>
          </table:table-cell>
          <table:table-cell office:value-type="string" table:style-name="c10">
            <text:p>2026-03-14 14:45</text:p>
          </table:table-cell>
          <table:table-cell office:value-type="float" office:value="3.9210385000000003" table:style-name="c10">
            <text:p>3.921</text:p>
          </table:table-cell>
          <table:table-cell office:value-type="float" office:value="-0.9058849334263597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1:00</text:p>
          </table:table-cell>
          <table:table-cell office:value-type="float" office:value="3.987993" table:style-name="c10">
            <text:p>3.988</text:p>
          </table:table-cell>
          <table:table-cell office:value-type="string" table:style-name="c10">
            <text:p>2026-03-15 13:15</text:p>
          </table:table-cell>
          <table:table-cell office:value-type="float" office:value="3.9530225000000003" table:style-name="c10">
            <text:p>3.953</text:p>
          </table:table-cell>
          <table:table-cell office:value-type="float" office:value="-1.0750418061791889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4.068033" table:style-name="c10">
            <text:p>4.068</text:p>
          </table:table-cell>
          <table:table-cell office:value-type="string" table:style-name="c10">
            <text:p>2026-03-15 23:30</text:p>
          </table:table-cell>
          <table:table-cell office:value-type="float" office:value="4.0429775" table:style-name="c10">
            <text:p>4.043</text:p>
          </table:table-cell>
          <table:table-cell office:value-type="float" office:value="-0.8145807082316936" table:style-name="c11">
            <text:p>-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3.6178079999999997" table:style-name="c10">
            <text:p>3.6178</text:p>
          </table:table-cell>
          <table:table-cell office:value-type="string" table:style-name="c10">
            <text:p>2026-03-25 02:00</text:p>
          </table:table-cell>
          <table:table-cell office:value-type="float" office:value="3.600199" table:style-name="c10">
            <text:p>3.6002</text:p>
          </table:table-cell>
          <table:table-cell office:value-type="float" office:value="-0.6856582162734881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7:15</text:p>
          </table:table-cell>
          <table:table-cell office:value-type="float" office:value="3.647823" table:style-name="c10">
            <text:p>3.6478</text:p>
          </table:table-cell>
          <table:table-cell office:value-type="string" table:style-name="c10">
            <text:p>2026-03-25 12:30</text:p>
          </table:table-cell>
          <table:table-cell office:value-type="float" office:value="3.6911535000000004" table:style-name="c10">
            <text:p>3.6912</text:p>
          </table:table-cell>
          <table:table-cell office:value-type="float" office:value="0.9855709598163287" table:style-name="c12">
            <text:p>+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3:15</text:p>
          </table:table-cell>
          <table:table-cell office:value-type="float" office:value="3.7508745" table:style-name="c10">
            <text:p>3.7509</text:p>
          </table:table-cell>
          <table:table-cell office:value-type="string" table:style-name="c10">
            <text:p>2026-03-25 15:15</text:p>
          </table:table-cell>
          <table:table-cell office:value-type="float" office:value="3.7131425" table:style-name="c10">
            <text:p>3.7131</text:p>
          </table:table-cell>
          <table:table-cell office:value-type="float" office:value="-1.2038411804367155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7:15</text:p>
          </table:table-cell>
          <table:table-cell office:value-type="float" office:value="3.7348665" table:style-name="c10">
            <text:p>3.7349</text:p>
          </table:table-cell>
          <table:table-cell office:value-type="string" table:style-name="c10">
            <text:p>2026-03-25 17:45</text:p>
          </table:table-cell>
          <table:table-cell office:value-type="float" office:value="3.7171405" table:style-name="c10">
            <text:p>3.7171</text:p>
          </table:table-cell>
          <table:table-cell office:value-type="float" office:value="-0.6735599213385401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3-30 10:00</text:p>
          </table:table-cell>
          <table:table-cell office:value-type="float" office:value="3.5092445000000003" table:style-name="c10">
            <text:p>3.5092</text:p>
          </table:table-cell>
          <table:table-cell office:value-type="float" office:value="-0.9765408598529368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13:15</text:p>
          </table:table-cell>
          <table:table-cell office:value-type="float" office:value="3.5557769999999995" table:style-name="c10">
            <text:p>3.5558</text:p>
          </table:table-cell>
          <table:table-cell office:value-type="string" table:style-name="c10">
            <text:p>2026-03-30 14:30</text:p>
          </table:table-cell>
          <table:table-cell office:value-type="float" office:value="3.5132425000000005" table:style-name="c10">
            <text:p>3.5132</text:p>
          </table:table-cell>
          <table:table-cell office:value-type="float" office:value="-1.3937170907371121" table:style-name="c11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30</text:p>
          </table:table-cell>
          <table:table-cell office:value-type="float" office:value="3.547773" table:style-name="c10">
            <text:p>3.5478</text:p>
          </table:table-cell>
          <table:table-cell office:value-type="string" table:style-name="c10">
            <text:p>2026-03-31 15:00</text:p>
          </table:table-cell>
          <table:table-cell office:value-type="float" office:value="3.4942520000000004" table:style-name="c10">
            <text:p>3.4943</text:p>
          </table:table-cell>
          <table:table-cell office:value-type="float" office:value="-1.7054645195168638" table:style-name="c11">
            <text:p>-1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30</text:p>
          </table:table-cell>
          <table:table-cell office:value-type="float" office:value="3.6278129999999997" table:style-name="c10">
            <text:p>3.6278</text:p>
          </table:table-cell>
          <table:table-cell office:value-type="string" table:style-name="c10">
            <text:p>2026-04-01 08:30</text:p>
          </table:table-cell>
          <table:table-cell office:value-type="float" office:value="3.6181900000000002" table:style-name="c10">
            <text:p>3.6182</text:p>
          </table:table-cell>
          <table:table-cell office:value-type="float" office:value="-0.4646259829268917" table:style-name="c11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3.6318149999999996" table:style-name="c10">
            <text:p>3.6318</text:p>
          </table:table-cell>
          <table:table-cell office:value-type="string" table:style-name="c10">
            <text:p>2026-04-01 13:00</text:p>
          </table:table-cell>
          <table:table-cell office:value-type="float" office:value="3.6031975000000003" table:style-name="c10">
            <text:p>3.6032</text:p>
          </table:table-cell>
          <table:table-cell office:value-type="float" office:value="-0.9862917522643455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3.1785885" table:style-name="c10">
            <text:p>3.1786</text:p>
          </table:table-cell>
          <table:table-cell office:value-type="string" table:style-name="c10">
            <text:p>2026-04-06 13:00</text:p>
          </table:table-cell>
          <table:table-cell office:value-type="float" office:value="3.1854065" table:style-name="c10">
            <text:p>3.1854</text:p>
          </table:table-cell>
          <table:table-cell office:value-type="float" office:value="0.01416894343195807" table:style-name="c12">
            <text:p>+0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8:15</text:p>
          </table:table-cell>
          <table:table-cell office:value-type="float" office:value="3.2546265" table:style-name="c10">
            <text:p>3.2546</text:p>
          </table:table-cell>
          <table:table-cell office:value-type="string" table:style-name="c10">
            <text:p>2026-04-08 11:30</text:p>
          </table:table-cell>
          <table:table-cell office:value-type="float" office:value="3.2473755000000004" table:style-name="c10">
            <text:p>3.2474</text:p>
          </table:table-cell>
          <table:table-cell office:value-type="float" office:value="-0.4222451831108587" table:style-name="c11">
            <text:p>-0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3.1685834999999996" table:style-name="c10">
            <text:p>3.1686</text:p>
          </table:table-cell>
          <table:table-cell office:value-type="string" table:style-name="c10">
            <text:p>2026-04-11 20:45</text:p>
          </table:table-cell>
          <table:table-cell office:value-type="float" office:value="3.1834075000000004" table:style-name="c10">
            <text:p>3.1834</text:p>
          </table:table-cell>
          <table:table-cell office:value-type="float" office:value="0.26700790455738144" table:style-name="c12">
            <text:p>+0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3.16158" table:style-name="c10">
            <text:p>3.1616</text:p>
          </table:table-cell>
          <table:table-cell office:value-type="string" table:style-name="c10">
            <text:p>2026-04-14 01:00</text:p>
          </table:table-cell>
          <table:table-cell office:value-type="float" office:value="3.1993995" table:style-name="c10">
            <text:p>3.1994</text:p>
          </table:table-cell>
          <table:table-cell office:value-type="float" office:value="0.9939302627009594" table:style-name="c12">
            <text:p>+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3.145572" table:style-name="c10">
            <text:p>3.1456</text:p>
          </table:table-cell>
          <table:table-cell office:value-type="string" table:style-name="c10">
            <text:p>2026-04-15 05:45</text:p>
          </table:table-cell>
          <table:table-cell office:value-type="float" office:value="3.140429" table:style-name="c10">
            <text:p>3.1404</text:p>
          </table:table-cell>
          <table:table-cell office:value-type="float" office:value="-0.363072839248324" table:style-name="c11">
            <text:p>-0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15</text:p>
          </table:table-cell>
          <table:table-cell office:value-type="float" office:value="3.1865924999999997" table:style-name="c10">
            <text:p>3.1866</text:p>
          </table:table-cell>
          <table:table-cell office:value-type="string" table:style-name="c10">
            <text:p>2026-04-15 15:45</text:p>
          </table:table-cell>
          <table:table-cell office:value-type="float" office:value="3.1864060000000003" table:style-name="c10">
            <text:p>3.1864</text:p>
          </table:table-cell>
          <table:table-cell office:value-type="float" office:value="-0.20574094723436742" table:style-name="c11">
            <text:p>-0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3.2466225" table:style-name="c10">
            <text:p>3.2466</text:p>
          </table:table-cell>
          <table:table-cell office:value-type="string" table:style-name="c10">
            <text:p>2026-04-15 20:45</text:p>
          </table:table-cell>
          <table:table-cell office:value-type="float" office:value="3.2163910000000002" table:style-name="c10">
            <text:p>3.2164</text:p>
          </table:table-cell>
          <table:table-cell office:value-type="float" office:value="-1.1292062938946468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3.249624" table:style-name="c10">
            <text:p>3.2496</text:p>
          </table:table-cell>
          <table:table-cell office:value-type="string" table:style-name="c10">
            <text:p>2026-04-16 10:15</text:p>
          </table:table-cell>
          <table:table-cell office:value-type="float" office:value="3.2533725000000002" table:style-name="c10">
            <text:p>3.2534</text:p>
          </table:table-cell>
          <table:table-cell office:value-type="float" office:value="-0.08477878140671358" table:style-name="c11">
            <text:p>-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15</text:p>
          </table:table-cell>
          <table:table-cell office:value-type="float" office:value="3.2896439999999996" table:style-name="c10">
            <text:p>3.2896</text:p>
          </table:table-cell>
          <table:table-cell office:value-type="string" table:style-name="c10">
            <text:p>2026-04-16 14:00</text:p>
          </table:table-cell>
          <table:table-cell office:value-type="float" office:value="3.29835" table:style-name="c10">
            <text:p>3.2984</text:p>
          </table:table-cell>
          <table:table-cell office:value-type="float" office:value="0.06421966480265606" table:style-name="c12">
            <text:p>+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3.3806895" table:style-name="c10">
            <text:p>3.3807</text:p>
          </table:table-cell>
          <table:table-cell office:value-type="string" table:style-name="c10">
            <text:p>2026-04-16 21:45</text:p>
          </table:table-cell>
          <table:table-cell office:value-type="float" office:value="3.4012985000000002" table:style-name="c10">
            <text:p>3.4013</text:p>
          </table:table-cell>
          <table:table-cell office:value-type="float" office:value="0.40849076197326806" table:style-name="c12">
            <text:p>+0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45</text:p>
          </table:table-cell>
          <table:table-cell office:value-type="float" office:value="3.3976979999999997" table:style-name="c10">
            <text:p>3.3977</text:p>
          </table:table-cell>
          <table:table-cell office:value-type="string" table:style-name="c10">
            <text:p>2026-04-17 10:45</text:p>
          </table:table-cell>
          <table:table-cell office:value-type="float" office:value="3.4012985000000002" table:style-name="c10">
            <text:p>3.4013</text:p>
          </table:table-cell>
          <table:table-cell office:value-type="float" office:value="-0.09414302570444066" table:style-name="c11">
            <text:p>-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1:45</text:p>
          </table:table-cell>
          <table:table-cell office:value-type="float" office:value="3.443721" table:style-name="c10">
            <text:p>3.4437</text:p>
          </table:table-cell>
          <table:table-cell office:value-type="string" table:style-name="c10">
            <text:p>2026-04-17 15:15</text:p>
          </table:table-cell>
          <table:table-cell office:value-type="float" office:value="3.4842570000000004" table:style-name="c10">
            <text:p>3.4843</text:p>
          </table:table-cell>
          <table:table-cell office:value-type="float" office:value="0.9748458210464994" table:style-name="c12">
            <text:p>+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7:00</text:p>
          </table:table-cell>
          <table:table-cell office:value-type="float" office:value="3.577788" table:style-name="c10">
            <text:p>3.5778</text:p>
          </table:table-cell>
          <table:table-cell office:value-type="string" table:style-name="c10">
            <text:p>2026-04-17 18:15</text:p>
          </table:table-cell>
          <table:table-cell office:value-type="float" office:value="3.490254" table:style-name="c10">
            <text:p>3.4903</text:p>
          </table:table-cell>
          <table:table-cell office:value-type="float" office:value="-2.6416047498063144" table:style-name="c11">
            <text:p>-2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3.383691" table:style-name="c10">
            <text:p>3.3837</text:p>
          </table:table-cell>
          <table:table-cell office:value-type="string" table:style-name="c10">
            <text:p>2026-04-22 10:30</text:p>
          </table:table-cell>
          <table:table-cell office:value-type="float" office:value="3.382308" table:style-name="c10">
            <text:p>3.3823</text:p>
          </table:table-cell>
          <table:table-cell office:value-type="float" office:value="-0.24069082230024907" table:style-name="c11">
            <text:p>-0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4:00</text:p>
          </table:table-cell>
          <table:table-cell office:value-type="float" office:value="3.4107044999999996" table:style-name="c10">
            <text:p>3.4107</text:p>
          </table:table-cell>
          <table:table-cell office:value-type="string" table:style-name="c10">
            <text:p>2026-04-22 16:45</text:p>
          </table:table-cell>
          <table:table-cell office:value-type="float" office:value="3.4012985000000002" table:style-name="c10">
            <text:p>3.4013</text:p>
          </table:table-cell>
          <table:table-cell office:value-type="float" office:value="-0.4751275198862759" table:style-name="c11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3:45</text:p>
          </table:table-cell>
          <table:table-cell office:value-type="float" office:value="3.3586785" table:style-name="c10">
            <text:p>3.3587</text:p>
          </table:table-cell>
          <table:table-cell office:value-type="string" table:style-name="c10">
            <text:p>2026-04-27 05:15</text:p>
          </table:table-cell>
          <table:table-cell office:value-type="float" office:value="3.294352" table:style-name="c10">
            <text:p>3.2944</text:p>
          </table:table-cell>
          <table:table-cell office:value-type="float" office:value="-2.1113038847868193" table:style-name="c11">
            <text:p>-2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3.2866425" table:style-name="c10">
            <text:p>3.2866</text:p>
          </table:table-cell>
          <table:table-cell office:value-type="string" table:style-name="c10">
            <text:p>2026-04-27 15:15</text:p>
          </table:table-cell>
          <table:table-cell office:value-type="float" office:value="3.2373805" table:style-name="c10">
            <text:p>3.2374</text:p>
          </table:table-cell>
          <table:table-cell office:value-type="float" office:value="-1.6957586235649247" table:style-name="c11">
            <text:p>-1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4:45</text:p>
          </table:table-cell>
          <table:table-cell office:value-type="float" office:value="3.2966474999999997" table:style-name="c10">
            <text:p>3.2966</text:p>
          </table:table-cell>
          <table:table-cell office:value-type="string" table:style-name="c10">
            <text:p>2026-04-29 07:00</text:p>
          </table:table-cell>
          <table:table-cell office:value-type="float" office:value="3.2833575" table:style-name="c10">
            <text:p>3.2834</text:p>
          </table:table-cell>
          <table:table-cell office:value-type="float" office:value="-0.6022309525813618" table:style-name="c11">
            <text:p>-0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3.3186585" table:style-name="c10">
            <text:p>3.3187</text:p>
          </table:table-cell>
          <table:table-cell office:value-type="string" table:style-name="c10">
            <text:p>2026-04-29 11:30</text:p>
          </table:table-cell>
          <table:table-cell office:value-type="float" office:value="3.2913535000000005" table:style-name="c10">
            <text:p>3.2914</text:p>
          </table:table-cell>
          <table:table-cell office:value-type="float" office:value="-1.0210274918766027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3.2686334999999995" table:style-name="c10">
            <text:p>3.2686</text:p>
          </table:table-cell>
          <table:table-cell office:value-type="string" table:style-name="c10">
            <text:p>2026-05-01 16:15</text:p>
          </table:table-cell>
          <table:table-cell office:value-type="float" office:value="3.2433775000000002" table:style-name="c10">
            <text:p>3.2434</text:p>
          </table:table-cell>
          <table:table-cell office:value-type="float" office:value="-0.9710330516559673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3.2306144999999997" table:style-name="c10">
            <text:p>3.2306</text:p>
          </table:table-cell>
          <table:table-cell office:value-type="string" table:style-name="c10">
            <text:p>2026-05-03 09:00</text:p>
          </table:table-cell>
          <table:table-cell office:value-type="float" office:value="3.220389" table:style-name="c10">
            <text:p>3.2204</text:p>
          </table:table-cell>
          <table:table-cell office:value-type="float" office:value="-0.5157860094728073" table:style-name="c11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5:00</text:p>
          </table:table-cell>
          <table:table-cell office:value-type="float" office:value="3.4467224999999995" table:style-name="c10">
            <text:p>3.4467</text:p>
          </table:table-cell>
          <table:table-cell office:value-type="string" table:style-name="c10">
            <text:p>2026-05-04 06:45</text:p>
          </table:table-cell>
          <table:table-cell office:value-type="float" office:value="3.3643170000000002" table:style-name="c10">
            <text:p>3.3643</text:p>
          </table:table-cell>
          <table:table-cell office:value-type="float" office:value="-2.5859572298901234" table:style-name="c11">
            <text:p>-2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3.335667" table:style-name="c10">
            <text:p>3.3357</text:p>
          </table:table-cell>
          <table:table-cell office:value-type="string" table:style-name="c10">
            <text:p>2026-05-04 16:15</text:p>
          </table:table-cell>
          <table:table-cell office:value-type="float" office:value="3.2803590000000002" table:style-name="c10">
            <text:p>3.2804</text:p>
          </table:table-cell>
          <table:table-cell office:value-type="float" office:value="-1.8546646784885823" table:style-name="c11">
            <text:p>-1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3.3526754999999997" table:style-name="c10">
            <text:p>3.3527</text:p>
          </table:table-cell>
          <table:table-cell office:value-type="string" table:style-name="c10">
            <text:p>2026-05-05 09:45</text:p>
          </table:table-cell>
          <table:table-cell office:value-type="float" office:value="3.3353315000000006" table:style-name="c10">
            <text:p>3.3353</text:p>
          </table:table-cell>
          <table:table-cell office:value-type="float" office:value="-0.7161840645925621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3.475737" table:style-name="c10">
            <text:p>3.4757</text:p>
          </table:table-cell>
          <table:table-cell office:value-type="string" table:style-name="c10">
            <text:p>2026-05-06 13:15</text:p>
          </table:table-cell>
          <table:table-cell office:value-type="float" office:value="3.4732625" table:style-name="c10">
            <text:p>3.4733</text:p>
          </table:table-cell>
          <table:table-cell office:value-type="float" office:value="-0.2709512180438356" table:style-name="c11">
            <text:p>-0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45</text:p>
          </table:table-cell>
          <table:table-cell office:value-type="float" office:value="3.4567275" table:style-name="c10">
            <text:p>3.4567</text:p>
          </table:table-cell>
          <table:table-cell office:value-type="string" table:style-name="c10">
            <text:p>2026-05-07 09:30</text:p>
          </table:table-cell>
          <table:table-cell office:value-type="float" office:value="3.4672655" table:style-name="c10">
            <text:p>3.4673</text:p>
          </table:table-cell>
          <table:table-cell office:value-type="float" office:value="0.10434540372359358" table:style-name="c12">
            <text:p>+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0:15</text:p>
          </table:table-cell>
          <table:table-cell office:value-type="float" office:value="3.4447215" table:style-name="c10">
            <text:p>3.4447</text:p>
          </table:table-cell>
          <table:table-cell office:value-type="string" table:style-name="c10">
            <text:p>2026-05-08 01:15</text:p>
          </table:table-cell>
          <table:table-cell office:value-type="float" office:value="3.4122930000000005" table:style-name="c10">
            <text:p>3.4123</text:p>
          </table:table-cell>
          <table:table-cell office:value-type="float" office:value="-1.1394150066122877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5-08 23:15</text:p>
          </table:table-cell>
          <table:table-cell office:value-type="float" office:value="3.6851565" table:style-name="c10">
            <text:p>3.6852</text:p>
          </table:table-cell>
          <table:table-cell office:value-type="float" office:value="3.987323796560016" table:style-name="c12">
            <text:p>+4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0:45</text:p>
          </table:table-cell>
          <table:table-cell office:value-type="float" office:value="3.7858919999999996" table:style-name="c10">
            <text:p>3.7859</text:p>
          </table:table-cell>
          <table:table-cell office:value-type="string" table:style-name="c10">
            <text:p>2026-05-09 03:00</text:p>
          </table:table-cell>
          <table:table-cell office:value-type="float" office:value="3.7411285000000003" table:style-name="c10">
            <text:p>3.7411</text:p>
          </table:table-cell>
          <table:table-cell office:value-type="float" office:value="-1.3799129999349957" table:style-name="c11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15</text:p>
          </table:table-cell>
          <table:table-cell office:value-type="float" office:value="3.679839" table:style-name="c10">
            <text:p>3.6798</text:p>
          </table:table-cell>
          <table:table-cell office:value-type="string" table:style-name="c10">
            <text:p>2026-05-10 01:00</text:p>
          </table:table-cell>
          <table:table-cell office:value-type="float" office:value="3.7461260000000003" table:style-name="c10">
            <text:p>3.7461</text:p>
          </table:table-cell>
          <table:table-cell office:value-type="float" office:value="1.5978550726268193" table:style-name="c12">
            <text:p>+1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15</text:p>
          </table:table-cell>
          <table:table-cell office:value-type="float" office:value="3.7768874999999995" table:style-name="c10">
            <text:p>3.7769</text:p>
          </table:table-cell>
          <table:table-cell office:value-type="string" table:style-name="c10">
            <text:p>2026-05-10 10:15</text:p>
          </table:table-cell>
          <table:table-cell office:value-type="float" office:value="3.9320330000000006" table:style-name="c10">
            <text:p>3.932</text:p>
          </table:table-cell>
          <table:table-cell office:value-type="float" office:value="3.899649275574135" table:style-name="c12">
            <text:p>+3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3:15</text:p>
          </table:table-cell>
          <table:table-cell office:value-type="float" office:value="4.0930455" table:style-name="c10">
            <text:p>4.093</text:p>
          </table:table-cell>
          <table:table-cell office:value-type="string" table:style-name="c10">
            <text:p>2026-05-10 15:45</text:p>
          </table:table-cell>
          <table:table-cell office:value-type="float" office:value="4.025986" table:style-name="c10">
            <text:p>4.026</text:p>
          </table:table-cell>
          <table:table-cell office:value-type="float" office:value="-1.8350014925072378" table:style-name="c11">
            <text:p>-1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6:15</text:p>
          </table:table-cell>
          <table:table-cell office:value-type="float" office:value="3.9259619999999997" table:style-name="c10">
            <text:p>3.926</text:p>
          </table:table-cell>
          <table:table-cell office:value-type="string" table:style-name="c10">
            <text:p>2026-05-11 16:45</text:p>
          </table:table-cell>
          <table:table-cell office:value-type="float" office:value="3.8680650000000005" table:style-name="c10">
            <text:p>3.8681</text:p>
          </table:table-cell>
          <table:table-cell office:value-type="float" office:value="-1.6716733869303724" table:style-name="c11">
            <text:p>-1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5 08:45</text:p>
          </table:table-cell>
          <table:table-cell office:value-type="float" office:value="3.72186" table:style-name="c10">
            <text:p>3.7219</text:p>
          </table:table-cell>
          <table:table-cell office:value-type="string" table:style-name="c10">
            <text:p>2026-05-15 10:00</text:p>
          </table:table-cell>
          <table:table-cell office:value-type="float" office:value="3.6871555000000003" table:style-name="c10">
            <text:p>3.6872</text:p>
          </table:table-cell>
          <table:table-cell office:value-type="float" office:value="-1.13048647301347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7:00</text:p>
          </table:table-cell>
          <table:table-cell office:value-type="float" office:value="3.5797889999999994" table:style-name="c10">
            <text:p>3.5798</text:p>
          </table:table-cell>
          <table:table-cell office:value-type="string" table:style-name="c10">
            <text:p>2026-05-20 12:00</text:p>
          </table:table-cell>
          <table:table-cell office:value-type="float" office:value="3.5952015000000004" table:style-name="c10">
            <text:p>3.5952</text:p>
          </table:table-cell>
          <table:table-cell office:value-type="float" office:value="0.2297814815761745" table:style-name="c12">
            <text:p>+0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6:00</text:p>
          </table:table-cell>
          <table:table-cell office:value-type="float" office:value="3.6408194999999997" table:style-name="c10">
            <text:p>3.6408</text:p>
          </table:table-cell>
          <table:table-cell office:value-type="string" table:style-name="c10">
            <text:p>2026-05-20 16:30</text:p>
          </table:table-cell>
          <table:table-cell office:value-type="float" office:value="3.5952015000000004" table:style-name="c10">
            <text:p>3.5952</text:p>
          </table:table-cell>
          <table:table-cell office:value-type="float" office:value="-1.4503550038253432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15</text:p>
          </table:table-cell>
          <table:table-cell office:value-type="float" office:value="3.6868425" table:style-name="c10">
            <text:p>3.6868</text:p>
          </table:table-cell>
          <table:table-cell office:value-type="string" table:style-name="c10">
            <text:p>2026-05-21 09:00</text:p>
          </table:table-cell>
          <table:table-cell office:value-type="float" office:value="3.648175" table:style-name="c10">
            <text:p>3.6482</text:p>
          </table:table-cell>
          <table:table-cell office:value-type="float" office:value="-1.2466006298072152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45</text:p>
          </table:table-cell>
          <table:table-cell office:value-type="float" office:value="3.6178079999999997" table:style-name="c10">
            <text:p>3.6178</text:p>
          </table:table-cell>
          <table:table-cell office:value-type="string" table:style-name="c10">
            <text:p>2026-05-21 22:00</text:p>
          </table:table-cell>
          <table:table-cell office:value-type="float" office:value="3.6031975000000003" table:style-name="c10">
            <text:p>3.6032</text:p>
          </table:table-cell>
          <table:table-cell office:value-type="float" office:value="-0.6029422181193511" table:style-name="c11">
            <text:p>-0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1:45</text:p>
          </table:table-cell>
          <table:table-cell office:value-type="float" office:value="3.6248115" table:style-name="c10">
            <text:p>3.6248</text:p>
          </table:table-cell>
          <table:table-cell office:value-type="string" table:style-name="c10">
            <text:p>2026-05-22 14:15</text:p>
          </table:table-cell>
          <table:table-cell office:value-type="float" office:value="3.6351815000000003" table:style-name="c10">
            <text:p>3.6352</text:p>
          </table:table-cell>
          <table:table-cell office:value-type="float" office:value="0.08561196027712104" table:style-name="c12">
            <text:p>+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45</text:p>
          </table:table-cell>
          <table:table-cell office:value-type="float" office:value="3.653826" table:style-name="c10">
            <text:p>3.6538</text:p>
          </table:table-cell>
          <table:table-cell office:value-type="string" table:style-name="c10">
            <text:p>2026-05-22 18:00</text:p>
          </table:table-cell>
          <table:table-cell office:value-type="float" office:value="3.6111935" table:style-name="c10">
            <text:p>3.6112</text:p>
          </table:table-cell>
          <table:table-cell office:value-type="float" office:value="-1.3643582317959257" table:style-name="c11">
            <text:p>-1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0073216589999999995" table:style-name="c1">
            <text:p>0.0073217</text:p>
          </table:table-cell>
          <table:table-cell office:value-type="string" table:style-name="c1">
            <text:p>2026-03-05 23:45</text:p>
          </table:table-cell>
          <table:table-cell office:value-type="float" office:value="0.007290353" table:style-name="c1">
            <text:p>0.0072904</text:p>
          </table:table-cell>
          <table:table-cell office:value-type="float" office:value="-0.6266259552240805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071465715" table:style-name="c1">
            <text:p>0.0071466</text:p>
          </table:table-cell>
          <table:table-cell office:value-type="string" table:style-name="c1">
            <text:p>2026-03-10 18:15</text:p>
          </table:table-cell>
          <table:table-cell office:value-type="float" office:value="0.007130433" table:style-name="c1">
            <text:p>0.0071304</text:p>
          </table:table-cell>
          <table:table-cell office:value-type="float" office:value="-0.4252701532056258" table:style-name="c13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0.0071525745" table:style-name="c1">
            <text:p>0.0071526</text:p>
          </table:table-cell>
          <table:table-cell office:value-type="string" table:style-name="c1">
            <text:p>2026-03-11 15:15</text:p>
          </table:table-cell>
          <table:table-cell office:value-type="float" office:value="0.007088454000000001" table:style-name="c1">
            <text:p>0.0070885</text:p>
          </table:table-cell>
          <table:table-cell office:value-type="float" office:value="-1.0945753804591396" table:style-name="c13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0.0073046505" table:style-name="c1">
            <text:p>0.0073047</text:p>
          </table:table-cell>
          <table:table-cell office:value-type="string" table:style-name="c1">
            <text:p>2026-03-13 06:30</text:p>
          </table:table-cell>
          <table:table-cell office:value-type="float" office:value="0.007324336000000001" table:style-name="c1">
            <text:p>0.0073243</text:p>
          </table:table-cell>
          <table:table-cell office:value-type="float" office:value="0.06905398603258561" table:style-name="c14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0.0074067015" table:style-name="c1">
            <text:p>0.0074067</text:p>
          </table:table-cell>
          <table:table-cell office:value-type="string" table:style-name="c1">
            <text:p>2026-03-13 14:45</text:p>
          </table:table-cell>
          <table:table-cell office:value-type="float" office:value="0.0074352805000000004" table:style-name="c1">
            <text:p>0.0074353</text:p>
          </table:table-cell>
          <table:table-cell office:value-type="float" office:value="0.1851819501636598" table:style-name="c14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073586775" table:style-name="c1">
            <text:p>0.0073587</text:p>
          </table:table-cell>
          <table:table-cell office:value-type="string" table:style-name="c1">
            <text:p>2026-03-15 12:15</text:p>
          </table:table-cell>
          <table:table-cell office:value-type="float" office:value="0.007331332500000001" table:style-name="c1">
            <text:p>0.0073313</text:p>
          </table:table-cell>
          <table:table-cell office:value-type="float" office:value="-0.5707592657444249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07453725" table:style-name="c1">
            <text:p>0.0074537</text:p>
          </table:table-cell>
          <table:table-cell office:value-type="string" table:style-name="c1">
            <text:p>2026-03-16 08:45</text:p>
          </table:table-cell>
          <table:table-cell office:value-type="float" office:value="0.0076211875" table:style-name="c1">
            <text:p>0.0076212</text:p>
          </table:table-cell>
          <table:table-cell office:value-type="float" office:value="2.0423043000312058" table:style-name="c14">
            <text:p>+2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0.007831913999999999" table:style-name="c1">
            <text:p>0.0078319</text:p>
          </table:table-cell>
          <table:table-cell office:value-type="string" table:style-name="c1">
            <text:p>2026-03-17 02:00</text:p>
          </table:table-cell>
          <table:table-cell office:value-type="float" office:value="0.007782107000000001" table:style-name="c1">
            <text:p>0.0077821</text:p>
          </table:table-cell>
          <table:table-cell office:value-type="float" office:value="-0.8345780085557419" table:style-name="c13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076588275" table:style-name="c1">
            <text:p>0.0076588</text:p>
          </table:table-cell>
          <table:table-cell office:value-type="string" table:style-name="c1">
            <text:p>2026-03-17 12:00</text:p>
          </table:table-cell>
          <table:table-cell office:value-type="float" office:value="0.0076271845" table:style-name="c1">
            <text:p>0.0076272</text:p>
          </table:table-cell>
          <table:table-cell office:value-type="float" office:value="-0.6122313345678587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2:30</text:p>
          </table:table-cell>
          <table:table-cell office:value-type="float" office:value="0.007110553499999999" table:style-name="c1">
            <text:p>0.0071106</text:p>
          </table:table-cell>
          <table:table-cell office:value-type="string" table:style-name="c1">
            <text:p>2026-03-24 14:00</text:p>
          </table:table-cell>
          <table:table-cell office:value-type="float" office:value="0.0070734615" table:style-name="c1">
            <text:p>0.0070735</text:p>
          </table:table-cell>
          <table:table-cell office:value-type="float" office:value="-0.7205043818107715" table:style-name="c13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07159578" table:style-name="c1">
            <text:p>0.0071596</text:p>
          </table:table-cell>
          <table:table-cell office:value-type="string" table:style-name="c1">
            <text:p>2026-03-25 02:00</text:p>
          </table:table-cell>
          <table:table-cell office:value-type="float" office:value="0.0071944010000000004" table:style-name="c1">
            <text:p>0.0071944</text:p>
          </table:table-cell>
          <table:table-cell office:value-type="float" office:value="0.28551113488812785" table:style-name="c14">
            <text:p>+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2:00</text:p>
          </table:table-cell>
          <table:table-cell office:value-type="float" office:value="0.00676338" table:style-name="c1">
            <text:p>0.0067634</text:p>
          </table:table-cell>
          <table:table-cell office:value-type="string" table:style-name="c1">
            <text:p>2026-03-30 23:15</text:p>
          </table:table-cell>
          <table:table-cell office:value-type="float" office:value="0.0066636665" table:style-name="c1">
            <text:p>0.0066637</text:p>
          </table:table-cell>
          <table:table-cell office:value-type="float" office:value="-1.6712674629179358" table:style-name="c13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0.006747372" table:style-name="c1">
            <text:p>0.0067474</text:p>
          </table:table-cell>
          <table:table-cell office:value-type="string" table:style-name="c1">
            <text:p>2026-03-31 03:45</text:p>
          </table:table-cell>
          <table:table-cell office:value-type="float" office:value="0.006702647000000001" table:style-name="c1">
            <text:p>0.0067026</text:p>
          </table:table-cell>
          <table:table-cell office:value-type="float" office:value="-0.861425623976253" table:style-name="c13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068464215" table:style-name="c1">
            <text:p>0.0068464</text:p>
          </table:table-cell>
          <table:table-cell office:value-type="string" table:style-name="c1">
            <text:p>2026-04-01 09:15</text:p>
          </table:table-cell>
          <table:table-cell office:value-type="float" office:value="0.006868564" table:style-name="c1">
            <text:p>0.0068686</text:p>
          </table:table-cell>
          <table:table-cell office:value-type="float" office:value="0.12287062027949158" table:style-name="c14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069804885" table:style-name="c1">
            <text:p>0.0069805</text:p>
          </table:table-cell>
          <table:table-cell office:value-type="string" table:style-name="c1">
            <text:p>2026-04-01 13:45</text:p>
          </table:table-cell>
          <table:table-cell office:value-type="float" office:value="0.0068895535" table:style-name="c1">
            <text:p>0.0068896</text:p>
          </table:table-cell>
          <table:table-cell office:value-type="float" office:value="-1.4999984234126185" table:style-name="c13">
            <text:p>-1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6:30</text:p>
          </table:table-cell>
          <table:table-cell office:value-type="float" office:value="0.006971484" table:style-name="c1">
            <text:p>0.0069715</text:p>
          </table:table-cell>
          <table:table-cell office:value-type="string" table:style-name="c1">
            <text:p>2026-04-01 18:00</text:p>
          </table:table-cell>
          <table:table-cell office:value-type="float" office:value="0.0069215375" table:style-name="c1">
            <text:p>0.0069215</text:p>
          </table:table-cell>
          <table:table-cell office:value-type="float" office:value="-0.9149078368751895" table:style-name="c13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5:45</text:p>
          </table:table-cell>
          <table:table-cell office:value-type="float" office:value="0.0070145055" table:style-name="c1">
            <text:p>0.0070145</text:p>
          </table:table-cell>
          <table:table-cell office:value-type="string" table:style-name="c1">
            <text:p>2026-04-03 08:00</text:p>
          </table:table-cell>
          <table:table-cell office:value-type="float" office:value="0.0069355305" table:style-name="c1">
            <text:p>0.0069355</text:p>
          </table:table-cell>
          <table:table-cell office:value-type="float" office:value="-1.3235305820132215" table:style-name="c13">
            <text:p>-1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8:15</text:p>
          </table:table-cell>
          <table:table-cell office:value-type="float" office:value="0.0069684824999999995" table:style-name="c1">
            <text:p>0.0069685</text:p>
          </table:table-cell>
          <table:table-cell office:value-type="string" table:style-name="c1">
            <text:p>2026-04-03 23:30</text:p>
          </table:table-cell>
          <table:table-cell office:value-type="float" office:value="0.006991502500000001" table:style-name="c1">
            <text:p>0.0069915</text:p>
          </table:table-cell>
          <table:table-cell office:value-type="float" office:value="0.12978416036062423" table:style-name="c14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1:00</text:p>
          </table:table-cell>
          <table:table-cell office:value-type="float" office:value="0.007039517999999999" table:style-name="c1">
            <text:p>0.0070395</text:p>
          </table:table-cell>
          <table:table-cell office:value-type="string" table:style-name="c1">
            <text:p>2026-04-04 09:30</text:p>
          </table:table-cell>
          <table:table-cell office:value-type="float" office:value="0.007458269" table:style-name="c1">
            <text:p>0.0074583</text:p>
          </table:table-cell>
          <table:table-cell office:value-type="float" office:value="5.736783687022329" table:style-name="c14">
            <text:p>+5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0.0074037" table:style-name="c1">
            <text:p>0.0074037</text:p>
          </table:table-cell>
          <table:table-cell office:value-type="string" table:style-name="c1">
            <text:p>2026-04-06 05:00</text:p>
          </table:table-cell>
          <table:table-cell office:value-type="float" office:value="0.0074712625" table:style-name="c1">
            <text:p>0.0074713</text:p>
          </table:table-cell>
          <table:table-cell office:value-type="float" office:value="0.7108262931034615" table:style-name="c14">
            <text:p>+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0.007099548" table:style-name="c1">
            <text:p>0.0070995</text:p>
          </table:table-cell>
          <table:table-cell office:value-type="string" table:style-name="c1">
            <text:p>2026-04-14 01:00</text:p>
          </table:table-cell>
          <table:table-cell office:value-type="float" office:value="0.007012492" table:style-name="c1">
            <text:p>0.0070125</text:p>
          </table:table-cell>
          <table:table-cell office:value-type="float" office:value="-1.4236676969857642" table:style-name="c13">
            <text:p>-1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07017507" table:style-name="c1">
            <text:p>0.0070175</text:p>
          </table:table-cell>
          <table:table-cell office:value-type="string" table:style-name="c1">
            <text:p>2026-04-14 15:15</text:p>
          </table:table-cell>
          <table:table-cell office:value-type="float" office:value="0.006944526" table:style-name="c1">
            <text:p>0.0069445</text:p>
          </table:table-cell>
          <table:table-cell office:value-type="float" office:value="-1.2378057830793598" table:style-name="c13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0070555259999999995" table:style-name="c1">
            <text:p>0.0070555</text:p>
          </table:table-cell>
          <table:table-cell office:value-type="string" table:style-name="c1">
            <text:p>2026-04-15 21:15</text:p>
          </table:table-cell>
          <table:table-cell office:value-type="float" office:value="0.00701649" table:style-name="c1">
            <text:p>0.0070165</text:p>
          </table:table-cell>
          <table:table-cell office:value-type="float" office:value="-0.7520624757105132" table:style-name="c13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2:30</text:p>
          </table:table-cell>
          <table:table-cell office:value-type="float" office:value="0.0070705335" table:style-name="c1">
            <text:p>0.0070705</text:p>
          </table:table-cell>
          <table:table-cell office:value-type="string" table:style-name="c1">
            <text:p>2026-04-16 01:15</text:p>
          </table:table-cell>
          <table:table-cell office:value-type="float" office:value="0.0070194885000000005" table:style-name="c1">
            <text:p>0.0070195</text:p>
          </table:table-cell>
          <table:table-cell office:value-type="float" office:value="-0.9203967071438113" table:style-name="c13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30</text:p>
          </table:table-cell>
          <table:table-cell office:value-type="float" office:value="0.0070925445" table:style-name="c1">
            <text:p>0.0070925</text:p>
          </table:table-cell>
          <table:table-cell office:value-type="string" table:style-name="c1">
            <text:p>2026-04-16 06:00</text:p>
          </table:table-cell>
          <table:table-cell office:value-type="float" office:value="0.007134431000000001" table:style-name="c1">
            <text:p>0.0071344</text:p>
          </table:table-cell>
          <table:table-cell office:value-type="float" office:value="0.3894902940827505" table:style-name="c14">
            <text:p>+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45</text:p>
          </table:table-cell>
          <table:table-cell office:value-type="float" office:value="0.0071605785" table:style-name="c1">
            <text:p>0.0071606</text:p>
          </table:table-cell>
          <table:table-cell office:value-type="string" table:style-name="c1">
            <text:p>2026-04-16 14:00</text:p>
          </table:table-cell>
          <table:table-cell office:value-type="float" office:value="0.0071354305000000005" table:style-name="c1">
            <text:p>0.0071354</text:p>
          </table:table-cell>
          <table:table-cell office:value-type="float" office:value="-0.5503986244896231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07210603499999999" table:style-name="c1">
            <text:p>0.0072106</text:p>
          </table:table-cell>
          <table:table-cell office:value-type="string" table:style-name="c1">
            <text:p>2026-04-16 17:00</text:p>
          </table:table-cell>
          <table:table-cell office:value-type="float" office:value="0.007172412" table:style-name="c1">
            <text:p>0.0071724</text:p>
          </table:table-cell>
          <table:table-cell office:value-type="float" office:value="-0.7284986837509333" table:style-name="c13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15</text:p>
          </table:table-cell>
          <table:table-cell office:value-type="float" office:value="0.0074487225" table:style-name="c1">
            <text:p>0.0074487</text:p>
          </table:table-cell>
          <table:table-cell office:value-type="string" table:style-name="c1">
            <text:p>2026-04-17 00:00</text:p>
          </table:table-cell>
          <table:table-cell office:value-type="float" office:value="0.0074192885" table:style-name="c1">
            <text:p>0.0074193</text:p>
          </table:table-cell>
          <table:table-cell office:value-type="float" office:value="-0.5942650932626359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0.007315655999999999" table:style-name="c1">
            <text:p>0.0073157</text:p>
          </table:table-cell>
          <table:table-cell office:value-type="string" table:style-name="c1">
            <text:p>2026-04-17 10:30</text:p>
          </table:table-cell>
          <table:table-cell office:value-type="float" office:value="0.007260368" table:style-name="c1">
            <text:p>0.0072604</text:p>
          </table:table-cell>
          <table:table-cell office:value-type="float" office:value="-0.9541382978095148" table:style-name="c13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30</text:p>
          </table:table-cell>
          <table:table-cell office:value-type="float" office:value="0.007429713" table:style-name="c1">
            <text:p>0.0074297</text:p>
          </table:table-cell>
          <table:table-cell office:value-type="string" table:style-name="c1">
            <text:p>2026-04-17 15:45</text:p>
          </table:table-cell>
          <table:table-cell office:value-type="float" office:value="0.0073992985" table:style-name="c1">
            <text:p>0.0073993</text:p>
          </table:table-cell>
          <table:table-cell office:value-type="float" office:value="-0.6084447367145973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0.00734367" table:style-name="c1">
            <text:p>0.0073437</text:p>
          </table:table-cell>
          <table:table-cell office:value-type="string" table:style-name="c1">
            <text:p>2026-04-18 08:30</text:p>
          </table:table-cell>
          <table:table-cell office:value-type="float" office:value="0.00729635" table:style-name="c1">
            <text:p>0.0072964</text:p>
          </table:table-cell>
          <table:table-cell office:value-type="float" office:value="-0.8429763817001557" table:style-name="c13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0.007235615999999999" table:style-name="c1">
            <text:p>0.0072356</text:p>
          </table:table-cell>
          <table:table-cell office:value-type="string" table:style-name="c1">
            <text:p>2026-04-22 10:00</text:p>
          </table:table-cell>
          <table:table-cell office:value-type="float" office:value="0.00729635" table:style-name="c1">
            <text:p>0.0072964</text:p>
          </table:table-cell>
          <table:table-cell office:value-type="float" office:value="0.6377977541925928" table:style-name="c14">
            <text:p>+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0.0073076519999999996" table:style-name="c1">
            <text:p>0.0073077</text:p>
          </table:table-cell>
          <table:table-cell office:value-type="string" table:style-name="c1">
            <text:p>2026-04-23 21:15</text:p>
          </table:table-cell>
          <table:table-cell office:value-type="float" office:value="0.0071954005" table:style-name="c1">
            <text:p>0.0071954</text:p>
          </table:table-cell>
          <table:table-cell office:value-type="float" office:value="-1.7329110034180473" table:style-name="c13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30</text:p>
          </table:table-cell>
          <table:table-cell office:value-type="float" office:value="0.0072866415" table:style-name="c1">
            <text:p>0.0072866</text:p>
          </table:table-cell>
          <table:table-cell office:value-type="string" table:style-name="c1">
            <text:p>2026-04-24 13:30</text:p>
          </table:table-cell>
          <table:table-cell office:value-type="float" office:value="0.007309343500000001" table:style-name="c1">
            <text:p>0.0073093</text:p>
          </table:table-cell>
          <table:table-cell office:value-type="float" office:value="0.11103362699402819" table:style-name="c14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00</text:p>
          </table:table-cell>
          <table:table-cell office:value-type="float" office:value="0.0074067015" table:style-name="c1">
            <text:p>0.0074067</text:p>
          </table:table-cell>
          <table:table-cell office:value-type="string" table:style-name="c1">
            <text:p>2026-04-25 05:00</text:p>
          </table:table-cell>
          <table:table-cell office:value-type="float" office:value="0.007358319" table:style-name="c1">
            <text:p>0.0073583</text:p>
          </table:table-cell>
          <table:table-cell office:value-type="float" office:value="-0.8518202020291965" table:style-name="c13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45</text:p>
          </table:table-cell>
          <table:table-cell office:value-type="float" office:value="0.007389693" table:style-name="c1">
            <text:p>0.0073897</text:p>
          </table:table-cell>
          <table:table-cell office:value-type="string" table:style-name="c1">
            <text:p>2026-04-26 00:15</text:p>
          </table:table-cell>
          <table:table-cell office:value-type="float" office:value="0.0073303330000000005" table:style-name="c1">
            <text:p>0.0073303</text:p>
          </table:table-cell>
          <table:table-cell office:value-type="float" office:value="-1.0015752436129621" table:style-name="c13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30</text:p>
          </table:table-cell>
          <table:table-cell office:value-type="float" office:value="0.007409703" table:style-name="c1">
            <text:p>0.0074097</text:p>
          </table:table-cell>
          <table:table-cell office:value-type="string" table:style-name="c1">
            <text:p>2026-04-26 16:00</text:p>
          </table:table-cell>
          <table:table-cell office:value-type="float" office:value="0.0073992985" table:style-name="c1">
            <text:p>0.0073993</text:p>
          </table:table-cell>
          <table:table-cell office:value-type="float" office:value="-0.3400365399463312" table:style-name="c13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074207084999999996" table:style-name="c1">
            <text:p>0.0074207</text:p>
          </table:table-cell>
          <table:table-cell office:value-type="string" table:style-name="c1">
            <text:p>2026-04-27 04:45</text:p>
          </table:table-cell>
          <table:table-cell office:value-type="float" office:value="0.0074152905" table:style-name="c1">
            <text:p>0.0074153</text:p>
          </table:table-cell>
          <table:table-cell office:value-type="float" office:value="-0.2727659455899589" table:style-name="c13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6:00</text:p>
          </table:table-cell>
          <table:table-cell office:value-type="float" office:value="0.0072386175" table:style-name="c1">
            <text:p>0.0072386</text:p>
          </table:table-cell>
          <table:table-cell office:value-type="string" table:style-name="c1">
            <text:p>2026-05-01 20:45</text:p>
          </table:table-cell>
          <table:table-cell office:value-type="float" office:value="0.0071964" table:style-name="c1">
            <text:p>0.0071964</text:p>
          </table:table-cell>
          <table:table-cell office:value-type="float" office:value="-0.781960140869431" table:style-name="c13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4:45</text:p>
          </table:table-cell>
          <table:table-cell office:value-type="float" office:value="0.007181589" table:style-name="c1">
            <text:p>0.0071816</text:p>
          </table:table-cell>
          <table:table-cell office:value-type="string" table:style-name="c1">
            <text:p>2026-05-03 05:00</text:p>
          </table:table-cell>
          <table:table-cell office:value-type="float" office:value="0.007167414500000001" table:style-name="c1">
            <text:p>0.0071674</text:p>
          </table:table-cell>
          <table:table-cell office:value-type="float" office:value="-0.39687820600007306" table:style-name="c13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0.0073346654999999995" table:style-name="c1">
            <text:p>0.0073347</text:p>
          </table:table-cell>
          <table:table-cell office:value-type="string" table:style-name="c1">
            <text:p>2026-05-04 07:45</text:p>
          </table:table-cell>
          <table:table-cell office:value-type="float" office:value="0.0073673145" table:style-name="c1">
            <text:p>0.0073673</text:p>
          </table:table-cell>
          <table:table-cell office:value-type="float" office:value="0.2443429535334829" table:style-name="c14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7:45</text:p>
          </table:table-cell>
          <table:table-cell office:value-type="float" office:value="0.007219608" table:style-name="c1">
            <text:p>0.0072196</text:p>
          </table:table-cell>
          <table:table-cell office:value-type="string" table:style-name="c1">
            <text:p>2026-05-04 19:45</text:p>
          </table:table-cell>
          <table:table-cell office:value-type="float" office:value="0.007184406" table:style-name="c1">
            <text:p>0.0071844</text:p>
          </table:table-cell>
          <table:table-cell office:value-type="float" office:value="-0.6865141098242433" table:style-name="c13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3:45</text:p>
          </table:table-cell>
          <table:table-cell office:value-type="float" office:value="0.007247622" table:style-name="c1">
            <text:p>0.0072476</text:p>
          </table:table-cell>
          <table:table-cell office:value-type="string" table:style-name="c1">
            <text:p>2026-05-05 04:15</text:p>
          </table:table-cell>
          <table:table-cell office:value-type="float" office:value="0.007193401500000001" table:style-name="c1">
            <text:p>0.0071934</text:p>
          </table:table-cell>
          <table:table-cell office:value-type="float" office:value="-0.9465188664433466" table:style-name="c13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1:00</text:p>
          </table:table-cell>
          <table:table-cell office:value-type="float" office:value="0.007306651499999999" table:style-name="c1">
            <text:p>0.0073067</text:p>
          </table:table-cell>
          <table:table-cell office:value-type="string" table:style-name="c1">
            <text:p>2026-05-05 14:15</text:p>
          </table:table-cell>
          <table:table-cell office:value-type="float" office:value="0.007288354" table:style-name="c1">
            <text:p>0.0072884</text:p>
          </table:table-cell>
          <table:table-cell office:value-type="float" office:value="-0.449821914265347" table:style-name="c13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0.007483739999999999" table:style-name="c1">
            <text:p>0.0074837</text:p>
          </table:table-cell>
          <table:table-cell office:value-type="string" table:style-name="c1">
            <text:p>2026-05-05 23:45</text:p>
          </table:table-cell>
          <table:table-cell office:value-type="float" office:value="0.0074952505" table:style-name="c1">
            <text:p>0.0074953</text:p>
          </table:table-cell>
          <table:table-cell office:value-type="float" office:value="-0.0464006733197464" table:style-name="c13">
            <text:p>-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0.00766383" table:style-name="c1">
            <text:p>0.0076638</text:p>
          </table:table-cell>
          <table:table-cell office:value-type="string" table:style-name="c1">
            <text:p>2026-05-06 05:15</text:p>
          </table:table-cell>
          <table:table-cell office:value-type="float" office:value="0.0075872045" table:style-name="c1">
            <text:p>0.0075872</text:p>
          </table:table-cell>
          <table:table-cell office:value-type="float" office:value="-1.1977343155511022" table:style-name="c13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0.0076908435" table:style-name="c1">
            <text:p>0.0076908</text:p>
          </table:table-cell>
          <table:table-cell office:value-type="string" table:style-name="c1">
            <text:p>2026-05-06 12:15</text:p>
          </table:table-cell>
          <table:table-cell office:value-type="float" office:value="0.007694151000000001" table:style-name="c1">
            <text:p>0.0076942</text:p>
          </table:table-cell>
          <table:table-cell office:value-type="float" office:value="-0.15698028244885975" table:style-name="c13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7:30</text:p>
          </table:table-cell>
          <table:table-cell office:value-type="float" office:value="0.007679838" table:style-name="c1">
            <text:p>0.0076798</text:p>
          </table:table-cell>
          <table:table-cell office:value-type="string" table:style-name="c1">
            <text:p>2026-05-06 19:30</text:p>
          </table:table-cell>
          <table:table-cell office:value-type="float" office:value="0.0076431765" table:style-name="c1">
            <text:p>0.0076432</text:p>
          </table:table-cell>
          <table:table-cell office:value-type="float" office:value="-0.6763190815157749" table:style-name="c13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30</text:p>
          </table:table-cell>
          <table:table-cell office:value-type="float" office:value="0.007651824" table:style-name="c1">
            <text:p>0.0076518</text:p>
          </table:table-cell>
          <table:table-cell office:value-type="string" table:style-name="c1">
            <text:p>2026-05-07 09:30</text:p>
          </table:table-cell>
          <table:table-cell office:value-type="float" office:value="0.0076961500000000006" table:style-name="c1">
            <text:p>0.0076962</text:p>
          </table:table-cell>
          <table:table-cell office:value-type="float" office:value="0.37822872232819993" table:style-name="c14">
            <text:p>+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15</text:p>
          </table:table-cell>
          <table:table-cell office:value-type="float" office:value="0.007791894" table:style-name="c1">
            <text:p>0.0077919</text:p>
          </table:table-cell>
          <table:table-cell office:value-type="string" table:style-name="c1">
            <text:p>2026-05-09 03:45</text:p>
          </table:table-cell>
          <table:table-cell office:value-type="float" office:value="0.0079989985" table:style-name="c1">
            <text:p>0.007999</text:p>
          </table:table-cell>
          <table:table-cell office:value-type="float" office:value="2.4527348806144156" table:style-name="c14">
            <text:p>+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0 20:15</text:p>
          </table:table-cell>
          <table:table-cell office:value-type="float" office:value="0.007949023500000001" table:style-name="c1">
            <text:p>0.007949</text:p>
          </table:table-cell>
          <table:table-cell office:value-type="float" office:value="0.2930535999834838" table:style-name="c14">
            <text:p>+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0.0079489725" table:style-name="c1">
            <text:p>0.007949</text:p>
          </table:table-cell>
          <table:table-cell office:value-type="string" table:style-name="c1">
            <text:p>2026-05-11 00:30</text:p>
          </table:table-cell>
          <table:table-cell office:value-type="float" office:value="0.00783608" table:style-name="c1">
            <text:p>0.0078361</text:p>
          </table:table-cell>
          <table:table-cell office:value-type="float" office:value="-1.6172759928405833" table:style-name="c13">
            <text:p>-1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0.0078489225" table:style-name="c1">
            <text:p>0.0078489</text:p>
          </table:table-cell>
          <table:table-cell office:value-type="string" table:style-name="c1">
            <text:p>2026-05-11 12:15</text:p>
          </table:table-cell>
          <table:table-cell office:value-type="float" office:value="0.0077771095000000005" table:style-name="c1">
            <text:p>0.0077771</text:p>
          </table:table-cell>
          <table:table-cell office:value-type="float" office:value="-1.1130119056532828" table:style-name="c13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0:45</text:p>
          </table:table-cell>
          <table:table-cell office:value-type="float" office:value="0.006661329" table:style-name="c1">
            <text:p>0.0066613</text:p>
          </table:table-cell>
          <table:table-cell office:value-type="string" table:style-name="c1">
            <text:p>2026-05-25 02:00</text:p>
          </table:table-cell>
          <table:table-cell office:value-type="float" office:value="0.006602697" table:style-name="c1">
            <text:p>0.0066027</text:p>
          </table:table-cell>
          <table:table-cell office:value-type="float" office:value="-1.0783252306409086" table:style-name="c13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4:15</text:p>
          </table:table-cell>
          <table:table-cell office:value-type="float" office:value="0.0066763364999999995" table:style-name="c1">
            <text:p>0.0066763</text:p>
          </table:table-cell>
          <table:table-cell office:value-type="string" table:style-name="c1">
            <text:p>2026-05-26 05:45</text:p>
          </table:table-cell>
          <table:table-cell office:value-type="float" office:value="0.006646675" table:style-name="c1">
            <text:p>0.0066467</text:p>
          </table:table-cell>
          <table:table-cell office:value-type="float" office:value="-0.6432899738501585" table:style-name="c13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7:00</text:p>
          </table:table-cell>
          <table:table-cell office:value-type="float" office:value="0.0062831399999999996" table:style-name="c1">
            <text:p>0.0062831</text:p>
          </table:table-cell>
          <table:table-cell office:value-type="string" table:style-name="c1">
            <text:p>2026-05-30 11:30</text:p>
          </table:table-cell>
          <table:table-cell office:value-type="float" office:value="0.006259868500000001" table:style-name="c1">
            <text:p>0.0062599</text:p>
          </table:table-cell>
          <table:table-cell office:value-type="float" office:value="-0.5695397067628338" table:style-name="c13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0:30</text:p>
          </table:table-cell>
          <table:table-cell office:value-type="float" office:value="0.1582791" table:style-name="c10">
            <text:p>0.15828</text:p>
          </table:table-cell>
          <table:table-cell office:value-type="string" table:style-name="c10">
            <text:p>2026-03-05 23:45</text:p>
          </table:table-cell>
          <table:table-cell office:value-type="float" office:value="0.15682155000000003" table:style-name="c10">
            <text:p>0.15682</text:p>
          </table:table-cell>
          <table:table-cell office:value-type="float" office:value="-1.1189324923189248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3:00</text:p>
          </table:table-cell>
          <table:table-cell office:value-type="float" office:value="0.15417704999999998" table:style-name="c10">
            <text:p>0.15418</text:p>
          </table:table-cell>
          <table:table-cell office:value-type="string" table:style-name="c10">
            <text:p>2026-03-10 12:30</text:p>
          </table:table-cell>
          <table:table-cell office:value-type="float" office:value="0.15992" table:style-name="c10">
            <text:p>0.15992</text:p>
          </table:table-cell>
          <table:table-cell office:value-type="float" office:value="3.5175597924594015" table:style-name="c12">
            <text:p>+3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4:45</text:p>
          </table:table-cell>
          <table:table-cell office:value-type="float" office:value="0.16378185" table:style-name="c10">
            <text:p>0.16378</text:p>
          </table:table-cell>
          <table:table-cell office:value-type="string" table:style-name="c10">
            <text:p>2026-03-10 17:30</text:p>
          </table:table-cell>
          <table:table-cell office:value-type="float" office:value="0.1641179" table:style-name="c10">
            <text:p>0.16412</text:p>
          </table:table-cell>
          <table:table-cell office:value-type="float" office:value="0.004871307718179452" table:style-name="c12">
            <text:p>+0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00</text:p>
          </table:table-cell>
          <table:table-cell office:value-type="float" office:value="0.15857925" table:style-name="c10">
            <text:p>0.15858</text:p>
          </table:table-cell>
          <table:table-cell office:value-type="string" table:style-name="c10">
            <text:p>2026-03-12 13:30</text:p>
          </table:table-cell>
          <table:table-cell office:value-type="float" office:value="0.1593203" table:style-name="c10">
            <text:p>0.15932</text:p>
          </table:table-cell>
          <table:table-cell office:value-type="float" office:value="0.26647163503419335" table:style-name="c12">
            <text:p>+0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6:00</text:p>
          </table:table-cell>
          <table:table-cell office:value-type="float" office:value="0.16378185" table:style-name="c10">
            <text:p>0.16378</text:p>
          </table:table-cell>
          <table:table-cell office:value-type="string" table:style-name="c10">
            <text:p>2026-03-13 06:30</text:p>
          </table:table-cell>
          <table:table-cell office:value-type="float" office:value="0.1621189" table:style-name="c10">
            <text:p>0.16212</text:p>
          </table:table-cell>
          <table:table-cell office:value-type="float" office:value="-1.2132148227047224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0.16668329999999998" table:style-name="c10">
            <text:p>0.16668</text:p>
          </table:table-cell>
          <table:table-cell office:value-type="string" table:style-name="c10">
            <text:p>2026-03-13 14:45</text:p>
          </table:table-cell>
          <table:table-cell office:value-type="float" office:value="0.16521735" table:style-name="c10">
            <text:p>0.16522</text:p>
          </table:table-cell>
          <table:table-cell office:value-type="float" office:value="-1.0776241427005284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21:15</text:p>
          </table:table-cell>
          <table:table-cell office:value-type="float" office:value="0.16478235" table:style-name="c10">
            <text:p>0.16478</text:p>
          </table:table-cell>
          <table:table-cell office:value-type="string" table:style-name="c10">
            <text:p>2026-03-13 22:30</text:p>
          </table:table-cell>
          <table:table-cell office:value-type="float" office:value="0.16401795" table:style-name="c10">
            <text:p>0.16402</text:p>
          </table:table-cell>
          <table:table-cell office:value-type="float" office:value="-0.6628573278934402" table:style-name="c11">
            <text:p>-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0:30</text:p>
          </table:table-cell>
          <table:table-cell office:value-type="float" office:value="0.16668329999999998" table:style-name="c10">
            <text:p>0.16668</text:p>
          </table:table-cell>
          <table:table-cell office:value-type="string" table:style-name="c10">
            <text:p>2026-03-14 00:45</text:p>
          </table:table-cell>
          <table:table-cell office:value-type="float" office:value="0.16481755" table:style-name="c10">
            <text:p>0.16482</text:p>
          </table:table-cell>
          <table:table-cell office:value-type="float" office:value="-1.317000732796847" table:style-name="c11">
            <text:p>-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3:15</text:p>
          </table:table-cell>
          <table:table-cell office:value-type="float" office:value="0.1658829" table:style-name="c10">
            <text:p>0.16588</text:p>
          </table:table-cell>
          <table:table-cell office:value-type="string" table:style-name="c10">
            <text:p>2026-03-14 05:00</text:p>
          </table:table-cell>
          <table:table-cell office:value-type="float" office:value="0.1641179" table:style-name="c10">
            <text:p>0.16412</text:p>
          </table:table-cell>
          <table:table-cell office:value-type="float" office:value="-1.261776640087675" table:style-name="c11">
            <text:p>-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15</text:p>
          </table:table-cell>
          <table:table-cell office:value-type="float" office:value="0.1676838" table:style-name="c10">
            <text:p>0.16768</text:p>
          </table:table-cell>
          <table:table-cell office:value-type="string" table:style-name="c10">
            <text:p>2026-03-15 06:00</text:p>
          </table:table-cell>
          <table:table-cell office:value-type="float" office:value="0.16701645" table:style-name="c10">
            <text:p>0.16702</text:p>
          </table:table-cell>
          <table:table-cell office:value-type="float" office:value="-0.5970856359111432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0.1678839" table:style-name="c10">
            <text:p>0.16788</text:p>
          </table:table-cell>
          <table:table-cell office:value-type="string" table:style-name="c10">
            <text:p>2026-03-15 11:45</text:p>
          </table:table-cell>
          <table:table-cell office:value-type="float" office:value="0.16701645" table:style-name="c10">
            <text:p>0.16702</text:p>
          </table:table-cell>
          <table:table-cell office:value-type="float" office:value="-0.7155634837825442" table:style-name="c11">
            <text:p>-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3:00</text:p>
          </table:table-cell>
          <table:table-cell office:value-type="float" office:value="0.16838414999999998" table:style-name="c10">
            <text:p>0.16838</text:p>
          </table:table-cell>
          <table:table-cell office:value-type="string" table:style-name="c10">
            <text:p>2026-03-15 13:30</text:p>
          </table:table-cell>
          <table:table-cell office:value-type="float" office:value="0.16741625000000002" table:style-name="c10">
            <text:p>0.16742</text:p>
          </table:table-cell>
          <table:table-cell office:value-type="float" office:value="-0.7735675143711429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0.1688844" table:style-name="c10">
            <text:p>0.16888</text:p>
          </table:table-cell>
          <table:table-cell office:value-type="string" table:style-name="c10">
            <text:p>2026-03-15 23:30</text:p>
          </table:table-cell>
          <table:table-cell office:value-type="float" office:value="0.16821585000000003" table:style-name="c10">
            <text:p>0.16822</text:p>
          </table:table-cell>
          <table:table-cell office:value-type="float" office:value="-0.5949711661645263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2:45</text:p>
          </table:table-cell>
          <table:table-cell office:value-type="float" office:value="0.17278634999999998" table:style-name="c10">
            <text:p>0.17279</text:p>
          </table:table-cell>
          <table:table-cell office:value-type="string" table:style-name="c10">
            <text:p>2026-03-16 14:45</text:p>
          </table:table-cell>
          <table:table-cell office:value-type="float" office:value="0.17211390000000001" table:style-name="c10">
            <text:p>0.17211</text:p>
          </table:table-cell>
          <table:table-cell office:value-type="float" office:value="-0.5883020771605851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00</text:p>
          </table:table-cell>
          <table:table-cell office:value-type="float" office:value="0.1746873" table:style-name="c10">
            <text:p>0.17469</text:p>
          </table:table-cell>
          <table:table-cell office:value-type="string" table:style-name="c10">
            <text:p>2026-03-16 15:45</text:p>
          </table:table-cell>
          <table:table-cell office:value-type="float" office:value="0.1729135" table:style-name="c10">
            <text:p>0.17291</text:p>
          </table:table-cell>
          <table:table-cell office:value-type="float" office:value="-1.2132845870879039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7:15</text:p>
          </table:table-cell>
          <table:table-cell office:value-type="float" office:value="0.17458724999999997" table:style-name="c10">
            <text:p>0.17459</text:p>
          </table:table-cell>
          <table:table-cell office:value-type="string" table:style-name="c10">
            <text:p>2026-03-16 19:45</text:p>
          </table:table-cell>
          <table:table-cell office:value-type="float" office:value="0.17411290000000001" table:style-name="c10">
            <text:p>0.17411</text:p>
          </table:table-cell>
          <table:table-cell office:value-type="float" office:value="-0.4710548376814283" table:style-name="c11">
            <text:p>-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22:30</text:p>
          </table:table-cell>
          <table:table-cell office:value-type="float" office:value="0.17608799999999997" table:style-name="c10">
            <text:p>0.17609</text:p>
          </table:table-cell>
          <table:table-cell office:value-type="string" table:style-name="c10">
            <text:p>2026-03-17 03:45</text:p>
          </table:table-cell>
          <table:table-cell office:value-type="float" office:value="0.17581205" table:style-name="c10">
            <text:p>0.17581</text:p>
          </table:table-cell>
          <table:table-cell office:value-type="float" office:value="-0.35629815089611716" table:style-name="c11">
            <text:p>-0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3:30</text:p>
          </table:table-cell>
          <table:table-cell office:value-type="float" office:value="0.17738865" table:style-name="c10">
            <text:p>0.17739</text:p>
          </table:table-cell>
          <table:table-cell office:value-type="string" table:style-name="c10">
            <text:p>2026-03-18 04:30</text:p>
          </table:table-cell>
          <table:table-cell office:value-type="float" office:value="0.17541225" table:style-name="c10">
            <text:p>0.17541</text:p>
          </table:table-cell>
          <table:table-cell office:value-type="float" office:value="-1.3118365170206814" table:style-name="c11">
            <text:p>-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00</text:p>
          </table:table-cell>
          <table:table-cell office:value-type="float" office:value="0.16678334999999997" table:style-name="c10">
            <text:p>0.16678</text:p>
          </table:table-cell>
          <table:table-cell office:value-type="string" table:style-name="c10">
            <text:p>2026-03-24 00:30</text:p>
          </table:table-cell>
          <table:table-cell office:value-type="float" office:value="0.1657171" table:style-name="c10">
            <text:p>0.16572</text:p>
          </table:table-cell>
          <table:table-cell office:value-type="float" office:value="-0.8379244588263446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9:30</text:p>
          </table:table-cell>
          <table:table-cell office:value-type="float" office:value="0.16758375" table:style-name="c10">
            <text:p>0.16758</text:p>
          </table:table-cell>
          <table:table-cell office:value-type="string" table:style-name="c10">
            <text:p>2026-03-25 03:00</text:p>
          </table:table-cell>
          <table:table-cell office:value-type="float" office:value="0.17521235000000002" table:style-name="c10">
            <text:p>0.17521</text:p>
          </table:table-cell>
          <table:table-cell office:value-type="float" office:value="4.343112331804266" table:style-name="c12">
            <text:p>+4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7:00</text:p>
          </table:table-cell>
          <table:table-cell office:value-type="float" office:value="0.17938964999999998" table:style-name="c10">
            <text:p>0.17939</text:p>
          </table:table-cell>
          <table:table-cell office:value-type="string" table:style-name="c10">
            <text:p>2026-03-25 09:45</text:p>
          </table:table-cell>
          <table:table-cell office:value-type="float" office:value="0.17881055" table:style-name="c10">
            <text:p>0.17881</text:p>
          </table:table-cell>
          <table:table-cell office:value-type="float" office:value="-0.5220715294611211" table:style-name="c11">
            <text:p>-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14:15</text:p>
          </table:table-cell>
          <table:table-cell office:value-type="float" office:value="0.1754877" table:style-name="c10">
            <text:p>0.17549</text:p>
          </table:table-cell>
          <table:table-cell office:value-type="string" table:style-name="c10">
            <text:p>2026-03-26 15:15</text:p>
          </table:table-cell>
          <table:table-cell office:value-type="float" office:value="0.17261365" table:style-name="c10">
            <text:p>0.17261</text:p>
          </table:table-cell>
          <table:table-cell office:value-type="float" office:value="-1.8343762476515257" table:style-name="c11">
            <text:p>-1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20:15</text:p>
          </table:table-cell>
          <table:table-cell office:value-type="float" office:value="0.17378685" table:style-name="c10">
            <text:p>0.17379</text:p>
          </table:table-cell>
          <table:table-cell office:value-type="string" table:style-name="c10">
            <text:p>2026-03-27 00:45</text:p>
          </table:table-cell>
          <table:table-cell office:value-type="float" office:value="0.17301345" table:style-name="c10">
            <text:p>0.17301</text:p>
          </table:table-cell>
          <table:table-cell office:value-type="float" office:value="-0.6440383070122735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45</text:p>
          </table:table-cell>
          <table:table-cell office:value-type="float" office:value="0.16958475" table:style-name="c10">
            <text:p>0.16958</text:p>
          </table:table-cell>
          <table:table-cell office:value-type="string" table:style-name="c10">
            <text:p>2026-03-31 04:15</text:p>
          </table:table-cell>
          <table:table-cell office:value-type="float" office:value="0.16891550000000002" table:style-name="c10">
            <text:p>0.16892</text:p>
          </table:table-cell>
          <table:table-cell office:value-type="float" office:value="-0.5937515516578062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0.172086" table:style-name="c10">
            <text:p>0.17209</text:p>
          </table:table-cell>
          <table:table-cell office:value-type="string" table:style-name="c10">
            <text:p>2026-04-01 13:45</text:p>
          </table:table-cell>
          <table:table-cell office:value-type="float" office:value="0.17181405" table:style-name="c10">
            <text:p>0.17181</text:p>
          </table:table-cell>
          <table:table-cell office:value-type="float" office:value="-0.35761554452424793" table:style-name="c11">
            <text:p>-0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1554777" table:style-name="c10">
            <text:p>0.15548</text:p>
          </table:table-cell>
          <table:table-cell office:value-type="string" table:style-name="c10">
            <text:p>2026-04-14 04:00</text:p>
          </table:table-cell>
          <table:table-cell office:value-type="float" office:value="0.15522235" table:style-name="c10">
            <text:p>0.15522</text:p>
          </table:table-cell>
          <table:table-cell office:value-type="float" office:value="-0.3638074641250655" table:style-name="c11">
            <text:p>-0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8:45</text:p>
          </table:table-cell>
          <table:table-cell office:value-type="float" office:value="0.1564782" table:style-name="c10">
            <text:p>0.15648</text:p>
          </table:table-cell>
          <table:table-cell office:value-type="string" table:style-name="c10">
            <text:p>2026-04-14 11:30</text:p>
          </table:table-cell>
          <table:table-cell office:value-type="float" office:value="0.15602195" table:style-name="c10">
            <text:p>0.15602</text:p>
          </table:table-cell>
          <table:table-cell office:value-type="float" office:value="-0.490891305018859" table:style-name="c11">
            <text:p>-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0.15707849999999998" table:style-name="c10">
            <text:p>0.15708</text:p>
          </table:table-cell>
          <table:table-cell office:value-type="string" table:style-name="c10">
            <text:p>2026-04-14 15:00</text:p>
          </table:table-cell>
          <table:table-cell office:value-type="float" office:value="0.15642175" table:style-name="c10">
            <text:p>0.15642</text:p>
          </table:table-cell>
          <table:table-cell office:value-type="float" office:value="-0.6171672623879076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2:15</text:p>
          </table:table-cell>
          <table:table-cell office:value-type="float" office:value="0.1572786" table:style-name="c10">
            <text:p>0.15728</text:p>
          </table:table-cell>
          <table:table-cell office:value-type="string" table:style-name="c10">
            <text:p>2026-04-15 03:15</text:p>
          </table:table-cell>
          <table:table-cell office:value-type="float" office:value="0.15542225" table:style-name="c10">
            <text:p>0.15542</text:p>
          </table:table-cell>
          <table:table-cell office:value-type="float" office:value="-1.3778346690204502" table:style-name="c11">
            <text:p>-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2:15</text:p>
          </table:table-cell>
          <table:table-cell office:value-type="float" office:value="0.1586793" table:style-name="c10">
            <text:p>0.15868</text:p>
          </table:table-cell>
          <table:table-cell office:value-type="string" table:style-name="c10">
            <text:p>2026-04-15 23:15</text:p>
          </table:table-cell>
          <table:table-cell office:value-type="float" office:value="0.15722135" table:style-name="c10">
            <text:p>0.15722</text:p>
          </table:table-cell>
          <table:table-cell office:value-type="float" office:value="-1.1168662066507684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16008" table:style-name="c10">
            <text:p>0.16008</text:p>
          </table:table-cell>
          <table:table-cell office:value-type="string" table:style-name="c10">
            <text:p>2026-04-16 05:15</text:p>
          </table:table-cell>
          <table:table-cell office:value-type="float" office:value="0.15942025" table:style-name="c10">
            <text:p>0.15942</text:p>
          </table:table-cell>
          <table:table-cell office:value-type="float" office:value="-0.6112138179347748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8:45</text:p>
          </table:table-cell>
          <table:table-cell office:value-type="float" office:value="0.16178085" table:style-name="c10">
            <text:p>0.16178</text:p>
          </table:table-cell>
          <table:table-cell office:value-type="string" table:style-name="c10">
            <text:p>2026-04-16 09:45</text:p>
          </table:table-cell>
          <table:table-cell office:value-type="float" office:value="0.16081955" table:style-name="c10">
            <text:p>0.16082</text:p>
          </table:table-cell>
          <table:table-cell office:value-type="float" office:value="-0.7929110772072256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30</text:p>
          </table:table-cell>
          <table:table-cell office:value-type="float" office:value="0.16158075" table:style-name="c10">
            <text:p>0.16158</text:p>
          </table:table-cell>
          <table:table-cell office:value-type="string" table:style-name="c10">
            <text:p>2026-04-16 14:00</text:p>
          </table:table-cell>
          <table:table-cell office:value-type="float" office:value="0.16071960000000002" table:style-name="c10">
            <text:p>0.16072</text:p>
          </table:table-cell>
          <table:table-cell office:value-type="float" office:value="-0.7317879638508828" table:style-name="c11">
            <text:p>-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0.16288139999999998" table:style-name="c10">
            <text:p>0.16288</text:p>
          </table:table-cell>
          <table:table-cell office:value-type="string" table:style-name="c10">
            <text:p>2026-04-17 00:30</text:p>
          </table:table-cell>
          <table:table-cell office:value-type="float" office:value="0.167916" table:style-name="c10">
            <text:p>0.16792</text:p>
          </table:table-cell>
          <table:table-cell office:value-type="float" office:value="2.88488183181137" table:style-name="c12">
            <text:p>+2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0.16728359999999998" table:style-name="c10">
            <text:p>0.16728</text:p>
          </table:table-cell>
          <table:table-cell office:value-type="string" table:style-name="c10">
            <text:p>2026-04-17 10:45</text:p>
          </table:table-cell>
          <table:table-cell office:value-type="float" office:value="0.16721635" table:style-name="c10">
            <text:p>0.16722</text:p>
          </table:table-cell>
          <table:table-cell office:value-type="float" office:value="-0.240020829089016" table:style-name="c11">
            <text:p>-0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00</text:p>
          </table:table-cell>
          <table:table-cell office:value-type="float" office:value="0.17078534999999997" table:style-name="c10">
            <text:p>0.17079</text:p>
          </table:table-cell>
          <table:table-cell office:value-type="string" table:style-name="c10">
            <text:p>2026-04-17 18:15</text:p>
          </table:table-cell>
          <table:table-cell office:value-type="float" office:value="0.17211390000000001" table:style-name="c10">
            <text:p>0.17211</text:p>
          </table:table-cell>
          <table:table-cell office:value-type="float" office:value="0.5764512669851563" table:style-name="c12">
            <text:p>+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1:45</text:p>
          </table:table-cell>
          <table:table-cell office:value-type="float" office:value="0.17028509999999997" table:style-name="c10">
            <text:p>0.17029</text:p>
          </table:table-cell>
          <table:table-cell office:value-type="string" table:style-name="c10">
            <text:p>2026-04-19 15:45</text:p>
          </table:table-cell>
          <table:table-cell office:value-type="float" office:value="0.17031480000000002" table:style-name="c10">
            <text:p>0.17031</text:p>
          </table:table-cell>
          <table:table-cell office:value-type="float" office:value="-0.1824935271494299" table:style-name="c11">
            <text:p>-0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9:45</text:p>
          </table:table-cell>
          <table:table-cell office:value-type="float" office:value="0.17138565" table:style-name="c10">
            <text:p>0.17139</text:p>
          </table:table-cell>
          <table:table-cell office:value-type="string" table:style-name="c10">
            <text:p>2026-04-19 20:15</text:p>
          </table:table-cell>
          <table:table-cell office:value-type="float" office:value="0.16981505" table:style-name="c10">
            <text:p>0.16982</text:p>
          </table:table-cell>
          <table:table-cell office:value-type="float" office:value="-1.1144808710355836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8:00</text:p>
          </table:table-cell>
          <table:table-cell office:value-type="float" office:value="0.1726863" table:style-name="c10">
            <text:p>0.17269</text:p>
          </table:table-cell>
          <table:table-cell office:value-type="string" table:style-name="c10">
            <text:p>2026-04-20 21:15</text:p>
          </table:table-cell>
          <table:table-cell office:value-type="float" office:value="0.1729135" table:style-name="c10">
            <text:p>0.17291</text:p>
          </table:table-cell>
          <table:table-cell office:value-type="float" office:value="-0.06859495310281849" table:style-name="c11">
            <text:p>-0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1:15</text:p>
          </table:table-cell>
          <table:table-cell office:value-type="float" office:value="0.17538765" table:style-name="c10">
            <text:p>0.17539</text:p>
          </table:table-cell>
          <table:table-cell office:value-type="string" table:style-name="c10">
            <text:p>2026-04-21 02:15</text:p>
          </table:table-cell>
          <table:table-cell office:value-type="float" office:value="0.17381305" table:style-name="c10">
            <text:p>0.17381</text:p>
          </table:table-cell>
          <table:table-cell office:value-type="float" office:value="-1.095888043970028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5:00</text:p>
          </table:table-cell>
          <table:table-cell office:value-type="float" office:value="0.1758879" table:style-name="c10">
            <text:p>0.17589</text:p>
          </table:table-cell>
          <table:table-cell office:value-type="string" table:style-name="c10">
            <text:p>2026-04-21 11:30</text:p>
          </table:table-cell>
          <table:table-cell office:value-type="float" office:value="0.18080955" table:style-name="c10">
            <text:p>0.18081</text:p>
          </table:table-cell>
          <table:table-cell office:value-type="float" office:value="2.5926807412846475" table:style-name="c12">
            <text:p>+2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0.1812906" table:style-name="c10">
            <text:p>0.18129</text:p>
          </table:table-cell>
          <table:table-cell office:value-type="string" table:style-name="c10">
            <text:p>2026-04-22 08:00</text:p>
          </table:table-cell>
          <table:table-cell office:value-type="float" office:value="0.18020985" table:style-name="c10">
            <text:p>0.18021</text:p>
          </table:table-cell>
          <table:table-cell office:value-type="float" office:value="-0.7948506376778575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17778885" table:style-name="c10">
            <text:p>0.17779</text:p>
          </table:table-cell>
          <table:table-cell office:value-type="string" table:style-name="c10">
            <text:p>2026-04-23 08:45</text:p>
          </table:table-cell>
          <table:table-cell office:value-type="float" office:value="0.17621185000000003" table:style-name="c10">
            <text:p>0.17621</text:p>
          </table:table-cell>
          <table:table-cell office:value-type="float" office:value="-1.0851341285744165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30</text:p>
          </table:table-cell>
          <table:table-cell office:value-type="float" office:value="0.17758875" table:style-name="c10">
            <text:p>0.17759</text:p>
          </table:table-cell>
          <table:table-cell office:value-type="string" table:style-name="c10">
            <text:p>2026-04-23 14:00</text:p>
          </table:table-cell>
          <table:table-cell office:value-type="float" office:value="0.17641175" table:style-name="c10">
            <text:p>0.17641</text:p>
          </table:table-cell>
          <table:table-cell office:value-type="float" office:value="-0.8613423362966222" table:style-name="c11">
            <text:p>-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5:00</text:p>
          </table:table-cell>
          <table:table-cell office:value-type="float" office:value="0.17888939999999998" table:style-name="c10">
            <text:p>0.17889</text:p>
          </table:table-cell>
          <table:table-cell office:value-type="string" table:style-name="c10">
            <text:p>2026-04-23 17:00</text:p>
          </table:table-cell>
          <table:table-cell office:value-type="float" office:value="0.1773113" table:style-name="c10">
            <text:p>0.17731</text:p>
          </table:table-cell>
          <table:table-cell office:value-type="float" office:value="-1.0803017331938003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0.1604802" table:style-name="c10">
            <text:p>0.16048</text:p>
          </table:table-cell>
          <table:table-cell office:value-type="string" table:style-name="c10">
            <text:p>2026-05-05 14:45</text:p>
          </table:table-cell>
          <table:table-cell office:value-type="float" office:value="0.15922035" table:style-name="c10">
            <text:p>0.15922</text:p>
          </table:table-cell>
          <table:table-cell office:value-type="float" office:value="-0.9833808031458058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1:30</text:p>
          </table:table-cell>
          <table:table-cell office:value-type="float" office:value="0.16148069999999998" table:style-name="c10">
            <text:p>0.16148</text:p>
          </table:table-cell>
          <table:table-cell office:value-type="string" table:style-name="c10">
            <text:p>2026-05-06 02:45</text:p>
          </table:table-cell>
          <table:table-cell office:value-type="float" office:value="0.16031979999999998" table:style-name="c10">
            <text:p>0.16032</text:p>
          </table:table-cell>
          <table:table-cell office:value-type="float" office:value="-0.9173723424533153" table:style-name="c11">
            <text:p>-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3:30</text:p>
          </table:table-cell>
          <table:table-cell office:value-type="float" office:value="0.1618809" table:style-name="c10">
            <text:p>0.16188</text:p>
          </table:table-cell>
          <table:table-cell office:value-type="string" table:style-name="c10">
            <text:p>2026-05-06 05:00</text:p>
          </table:table-cell>
          <table:table-cell office:value-type="float" office:value="0.1613193" table:style-name="c10">
            <text:p>0.16132</text:p>
          </table:table-cell>
          <table:table-cell office:value-type="float" office:value="-0.5461282218594099" table:style-name="c11">
            <text:p>-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7:30</text:p>
          </table:table-cell>
          <table:table-cell office:value-type="float" office:value="0.16288139999999998" table:style-name="c10">
            <text:p>0.16288</text:p>
          </table:table-cell>
          <table:table-cell office:value-type="string" table:style-name="c10">
            <text:p>2026-05-06 12:15</text:p>
          </table:table-cell>
          <table:table-cell office:value-type="float" office:value="0.16461765000000003" table:style-name="c10">
            <text:p>0.16462</text:p>
          </table:table-cell>
          <table:table-cell office:value-type="float" office:value="0.863928795829394" table:style-name="c12">
            <text:p>+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1:45</text:p>
          </table:table-cell>
          <table:table-cell office:value-type="float" office:value="0.1624812" table:style-name="c10">
            <text:p>0.16248</text:p>
          </table:table-cell>
          <table:table-cell office:value-type="string" table:style-name="c10">
            <text:p>2026-05-06 23:15</text:p>
          </table:table-cell>
          <table:table-cell office:value-type="float" office:value="0.16081955" table:style-name="c10">
            <text:p>0.16082</text:p>
          </table:table-cell>
          <table:table-cell office:value-type="float" office:value="-1.2205278398054742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0.16168079999999999" table:style-name="c10">
            <text:p>0.16168</text:p>
          </table:table-cell>
          <table:table-cell office:value-type="string" table:style-name="c10">
            <text:p>2026-05-07 06:15</text:p>
          </table:table-cell>
          <table:table-cell office:value-type="float" office:value="0.16031979999999998" table:style-name="c10">
            <text:p>0.16032</text:p>
          </table:table-cell>
          <table:table-cell office:value-type="float" office:value="-1.0399993568809718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00</text:p>
          </table:table-cell>
          <table:table-cell office:value-type="float" office:value="0.1638819" table:style-name="c10">
            <text:p>0.16388</text:p>
          </table:table-cell>
          <table:table-cell office:value-type="string" table:style-name="c10">
            <text:p>2026-05-08 21:15</text:p>
          </table:table-cell>
          <table:table-cell office:value-type="float" office:value="0.16381805" table:style-name="c10">
            <text:p>0.16382</text:p>
          </table:table-cell>
          <table:table-cell office:value-type="float" office:value="-0.2387831004827201" table:style-name="c11">
            <text:p>-0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00</text:p>
          </table:table-cell>
          <table:table-cell office:value-type="float" office:value="0.16488239999999998" table:style-name="c10">
            <text:p>0.16488</text:p>
          </table:table-cell>
          <table:table-cell office:value-type="string" table:style-name="c10">
            <text:p>2026-05-09 05:00</text:p>
          </table:table-cell>
          <table:table-cell office:value-type="float" office:value="0.16611689999999998" table:style-name="c10">
            <text:p>0.16612</text:p>
          </table:table-cell>
          <table:table-cell office:value-type="float" office:value="0.5473187659204459" table:style-name="c12">
            <text:p>+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0.16778384999999998" table:style-name="c10">
            <text:p>0.16778</text:p>
          </table:table-cell>
          <table:table-cell office:value-type="string" table:style-name="c10">
            <text:p>2026-05-10 20:30</text:p>
          </table:table-cell>
          <table:table-cell office:value-type="float" office:value="0.17051470000000002" table:style-name="c10">
            <text:p>0.17051</text:p>
          </table:table-cell>
          <table:table-cell office:value-type="float" office:value="1.4244464617423347" table:style-name="c12">
            <text:p>+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8:15</text:p>
          </table:table-cell>
          <table:table-cell office:value-type="float" office:value="0.16748369999999999" table:style-name="c10">
            <text:p>0.16748</text:p>
          </table:table-cell>
          <table:table-cell office:value-type="string" table:style-name="c10">
            <text:p>2026-05-11 13:00</text:p>
          </table:table-cell>
          <table:table-cell office:value-type="float" office:value="0.16691650000000002" table:style-name="c10">
            <text:p>0.16692</text:p>
          </table:table-cell>
          <table:table-cell office:value-type="float" office:value="-0.5378828408376224" table:style-name="c11">
            <text:p>-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15</text:p>
          </table:table-cell>
          <table:table-cell office:value-type="float" office:value="0.1482741" table:style-name="c10">
            <text:p>0.14827</text:p>
          </table:table-cell>
          <table:table-cell office:value-type="string" table:style-name="c10">
            <text:p>2026-05-21 20:30</text:p>
          </table:table-cell>
          <table:table-cell office:value-type="float" office:value="0.14722635" table:style-name="c10">
            <text:p>0.14723</text:p>
          </table:table-cell>
          <table:table-cell office:value-type="float" office:value="-0.9051179360724526" table:style-name="c11">
            <text:p>-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00</text:p>
          </table:table-cell>
          <table:table-cell office:value-type="float" office:value="0.15057525" table:style-name="c10">
            <text:p>0.15058</text:p>
          </table:table-cell>
          <table:table-cell office:value-type="string" table:style-name="c10">
            <text:p>2026-05-22 13:45</text:p>
          </table:table-cell>
          <table:table-cell office:value-type="float" office:value="0.14882555" table:style-name="c10">
            <text:p>0.14883</text:p>
          </table:table-cell>
          <table:table-cell office:value-type="float" office:value="-1.359587498244219" table:style-name="c11">
            <text:p>-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00</text:p>
          </table:table-cell>
          <table:table-cell office:value-type="float" office:value="0.1506753" table:style-name="c10">
            <text:p>0.15068</text:p>
          </table:table-cell>
          <table:table-cell office:value-type="string" table:style-name="c10">
            <text:p>2026-05-25 10:15</text:p>
          </table:table-cell>
          <table:table-cell office:value-type="float" office:value="0.1517241" table:style-name="c10">
            <text:p>0.15172</text:p>
          </table:table-cell>
          <table:table-cell office:value-type="float" office:value="0.494774872922088" table:style-name="c12">
            <text:p>+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7:00</text:p>
          </table:table-cell>
          <table:table-cell office:value-type="float" office:value="0.14937464999999997" table:style-name="c10">
            <text:p>0.14937</text:p>
          </table:table-cell>
          <table:table-cell office:value-type="string" table:style-name="c10">
            <text:p>2026-05-26 07:45</text:p>
          </table:table-cell>
          <table:table-cell office:value-type="float" office:value="0.14822585" table:style-name="c10">
            <text:p>0.14823</text:p>
          </table:table-cell>
          <table:table-cell office:value-type="float" office:value="-0.9674355549284863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1:00</text:p>
          </table:table-cell>
          <table:table-cell office:value-type="float" office:value="0.1504752" table:style-name="c10">
            <text:p>0.15048</text:p>
          </table:table-cell>
          <table:table-cell office:value-type="string" table:style-name="c10">
            <text:p>2026-05-26 13:30</text:p>
          </table:table-cell>
          <table:table-cell office:value-type="float" office:value="0.14922535" table:style-name="c10">
            <text:p>0.14923</text:p>
          </table:table-cell>
          <table:table-cell office:value-type="float" office:value="-1.0288416128704347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14:00</text:p>
          </table:table-cell>
          <table:table-cell office:value-type="float" office:value="0.15157574999999998" table:style-name="c10">
            <text:p>0.15158</text:p>
          </table:table-cell>
          <table:table-cell office:value-type="string" table:style-name="c10">
            <text:p>2026-05-27 21:45</text:p>
          </table:table-cell>
          <table:table-cell office:value-type="float" office:value="0.16421785" table:style-name="c10">
            <text:p>0.16422</text:p>
          </table:table-cell>
          <table:table-cell office:value-type="float" office:value="8.123877676904145" table:style-name="c12">
            <text:p>+8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00:15</text:p>
          </table:table-cell>
          <table:table-cell office:value-type="float" office:value="0.1676838" table:style-name="c10">
            <text:p>0.16768</text:p>
          </table:table-cell>
          <table:table-cell office:value-type="string" table:style-name="c10">
            <text:p>2026-05-28 03:45</text:p>
          </table:table-cell>
          <table:table-cell office:value-type="float" office:value="0.17211390000000001" table:style-name="c10">
            <text:p>0.17211</text:p>
          </table:table-cell>
          <table:table-cell office:value-type="float" office:value="2.436755556529646" table:style-name="c12">
            <text:p>+2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12:30</text:p>
          </table:table-cell>
          <table:table-cell office:value-type="float" office:value="0.18259124999999998" table:style-name="c10">
            <text:p>0.18259</text:p>
          </table:table-cell>
          <table:table-cell office:value-type="string" table:style-name="c10">
            <text:p>2026-05-28 19:45</text:p>
          </table:table-cell>
          <table:table-cell office:value-type="float" office:value="0.20189900000000002" table:style-name="c10">
            <text:p>0.2019</text:p>
          </table:table-cell>
          <table:table-cell office:value-type="float" office:value="10.353263860672413" table:style-name="c12">
            <text:p>+10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08:30</text:p>
          </table:table-cell>
          <table:table-cell office:value-type="float" office:value="0.21460724999999997" table:style-name="c10">
            <text:p>0.21461</text:p>
          </table:table-cell>
          <table:table-cell office:value-type="string" table:style-name="c10">
            <text:p>2026-05-29 10:00</text:p>
          </table:table-cell>
          <table:table-cell office:value-type="float" office:value="0.21049470000000003" table:style-name="c10">
            <text:p>0.21049</text:p>
          </table:table-cell>
          <table:table-cell office:value-type="float" office:value="-2.112383857162292" table:style-name="c11">
            <text:p>-2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9:45</text:p>
          </table:table-cell>
          <table:table-cell office:value-type="float" office:value="0.23581784999999997" table:style-name="c10">
            <text:p>0.23582</text:p>
          </table:table-cell>
          <table:table-cell office:value-type="string" table:style-name="c10">
            <text:p>2026-05-30 04:45</text:p>
          </table:table-cell>
          <table:table-cell office:value-type="float" office:value="0.27146420000000004" table:style-name="c10">
            <text:p>0.27146</text:p>
          </table:table-cell>
          <table:table-cell office:value-type="float" office:value="14.885935506663328" table:style-name="c12">
            <text:p>+14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45</text:p>
          </table:table-cell>
          <table:table-cell office:value-type="float" office:value="0.24192089999999997" table:style-name="c10">
            <text:p>0.24192</text:p>
          </table:table-cell>
          <table:table-cell office:value-type="string" table:style-name="c10">
            <text:p>2026-05-31 06:45</text:p>
          </table:table-cell>
          <table:table-cell office:value-type="float" office:value="0.23268360000000002" table:style-name="c10">
            <text:p>0.23268</text:p>
          </table:table-cell>
          <table:table-cell office:value-type="float" office:value="-4.010581357956234" table:style-name="c11">
            <text:p>-4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9:15</text:p>
          </table:table-cell>
          <table:table-cell office:value-type="float" office:value="0.2411205" table:style-name="c10">
            <text:p>0.24112</text:p>
          </table:table-cell>
          <table:table-cell office:value-type="string" table:style-name="c10">
            <text:p>2026-05-31 14:45</text:p>
          </table:table-cell>
          <table:table-cell office:value-type="float" office:value="0.2508745" table:style-name="c10">
            <text:p>0.25087</text:p>
          </table:table-cell>
          <table:table-cell office:value-type="float" office:value="3.8372937491835124" table:style-name="c12">
            <text:p>+3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30</text:p>
          </table:table-cell>
          <table:table-cell office:value-type="float" office:value="0.26383185" table:style-name="c10">
            <text:p>0.26383</text:p>
          </table:table-cell>
          <table:table-cell office:value-type="string" table:style-name="c10">
            <text:p>2026-06-01 14:00</text:p>
          </table:table-cell>
          <table:table-cell office:value-type="float" office:value="0.2574712" table:style-name="c10">
            <text:p>0.25747</text:p>
          </table:table-cell>
          <table:table-cell office:value-type="float" office:value="-2.605953348240553" table:style-name="c11">
            <text:p>-2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00</text:p>
          </table:table-cell>
          <table:table-cell office:value-type="float" office:value="1.44862395" table:style-name="c1">
            <text:p>1.4486</text:p>
          </table:table-cell>
          <table:table-cell office:value-type="string" table:style-name="c1">
            <text:p>2026-03-05 13:15</text:p>
          </table:table-cell>
          <table:table-cell office:value-type="float" office:value="1.4328832" table:style-name="c1">
            <text:p>1.4329</text:p>
          </table:table-cell>
          <table:table-cell office:value-type="float" office:value="-1.2843280353607267" table:style-name="c13">
            <text:p>-1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6 08:00</text:p>
          </table:table-cell>
          <table:table-cell office:value-type="float" office:value="1.4084038499999998" table:style-name="c1">
            <text:p>1.4084</text:p>
          </table:table-cell>
          <table:table-cell office:value-type="string" table:style-name="c1">
            <text:p>2026-03-06 09:15</text:p>
          </table:table-cell>
          <table:table-cell office:value-type="float" office:value="1.3998997000000002" table:style-name="c1">
            <text:p>1.3999</text:p>
          </table:table-cell>
          <table:table-cell office:value-type="float" office:value="-0.8025077111440515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1.40800365" table:style-name="c1">
            <text:p>1.408</text:p>
          </table:table-cell>
          <table:table-cell office:value-type="string" table:style-name="c1">
            <text:p>2026-03-10 11:15</text:p>
          </table:table-cell>
          <table:table-cell office:value-type="float" office:value="1.3976008500000001" table:style-name="c1">
            <text:p>1.3976</text:p>
          </table:table-cell>
          <table:table-cell office:value-type="float" office:value="-0.9372563841826609" table:style-name="c13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1.4191092" table:style-name="c1">
            <text:p>1.4191</text:p>
          </table:table-cell>
          <table:table-cell office:value-type="string" table:style-name="c1">
            <text:p>2026-03-10 17:45</text:p>
          </table:table-cell>
          <table:table-cell office:value-type="float" office:value="1.41119405" table:style-name="c1">
            <text:p>1.4112</text:p>
          </table:table-cell>
          <table:table-cell office:value-type="float" office:value="-0.7565398706421034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1.3992993" table:style-name="c1">
            <text:p>1.3993</text:p>
          </table:table-cell>
          <table:table-cell office:value-type="string" table:style-name="c1">
            <text:p>2026-03-11 15:15</text:p>
          </table:table-cell>
          <table:table-cell office:value-type="float" office:value="1.3831081" table:style-name="c1">
            <text:p>1.3831</text:p>
          </table:table-cell>
          <table:table-cell office:value-type="float" office:value="-1.3546803812379382" table:style-name="c13">
            <text:p>-1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6:00</text:p>
          </table:table-cell>
          <table:table-cell office:value-type="float" office:value="1.4241116999999999" table:style-name="c1">
            <text:p>1.4241</text:p>
          </table:table-cell>
          <table:table-cell office:value-type="string" table:style-name="c1">
            <text:p>2026-03-13 07:45</text:p>
          </table:table-cell>
          <table:table-cell office:value-type="float" office:value="1.4128932" table:style-name="c1">
            <text:p>1.4129</text:p>
          </table:table-cell>
          <table:table-cell office:value-type="float" office:value="-0.9860794983146182" table:style-name="c13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1.4309150999999998" table:style-name="c1">
            <text:p>1.4309</text:p>
          </table:table-cell>
          <table:table-cell office:value-type="string" table:style-name="c1">
            <text:p>2026-03-13 11:30</text:p>
          </table:table-cell>
          <table:table-cell office:value-type="float" office:value="1.4240876000000002" table:style-name="c1">
            <text:p>1.4241</text:p>
          </table:table-cell>
          <table:table-cell office:value-type="float" office:value="-0.6760884075092455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1.43861895" table:style-name="c1">
            <text:p>1.4386</text:p>
          </table:table-cell>
          <table:table-cell office:value-type="string" table:style-name="c1">
            <text:p>2026-03-13 14:45</text:p>
          </table:table-cell>
          <table:table-cell office:value-type="float" office:value="1.4340826000000002" table:style-name="c1">
            <text:p>1.4341</text:p>
          </table:table-cell>
          <table:table-cell office:value-type="float" office:value="-0.5145963854709334" table:style-name="c13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1.4160076499999998" table:style-name="c1">
            <text:p>1.416</text:p>
          </table:table-cell>
          <table:table-cell office:value-type="string" table:style-name="c1">
            <text:p>2026-03-15 06:30</text:p>
          </table:table-cell>
          <table:table-cell office:value-type="float" office:value="1.4090951" table:style-name="c1">
            <text:p>1.4091</text:p>
          </table:table-cell>
          <table:table-cell office:value-type="float" office:value="-0.6870959422358824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3:00</text:p>
          </table:table-cell>
          <table:table-cell office:value-type="float" office:value="1.4245119" table:style-name="c1">
            <text:p>1.4245</text:p>
          </table:table-cell>
          <table:table-cell office:value-type="string" table:style-name="c1">
            <text:p>2026-03-15 14:30</text:p>
          </table:table-cell>
          <table:table-cell office:value-type="float" office:value="1.41759085" table:style-name="c1">
            <text:p>1.4176</text:p>
          </table:table-cell>
          <table:table-cell office:value-type="float" office:value="-0.6847829147057172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1.42801365" table:style-name="c1">
            <text:p>1.428</text:p>
          </table:table-cell>
          <table:table-cell office:value-type="string" table:style-name="c1">
            <text:p>2026-03-16 01:15</text:p>
          </table:table-cell>
          <table:table-cell office:value-type="float" office:value="1.4403794500000002" table:style-name="c1">
            <text:p>1.4404</text:p>
          </table:table-cell>
          <table:table-cell office:value-type="float" office:value="0.6643130812825415" table:style-name="c14">
            <text:p>+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4711351999999998" table:style-name="c1">
            <text:p>1.4711</text:p>
          </table:table-cell>
          <table:table-cell office:value-type="string" table:style-name="c1">
            <text:p>2026-03-16 08:45</text:p>
          </table:table-cell>
          <table:table-cell office:value-type="float" office:value="1.4656668" table:style-name="c1">
            <text:p>1.4657</text:p>
          </table:table-cell>
          <table:table-cell office:value-type="float" office:value="-0.5708698923932998" table:style-name="c13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1.4852422499999998" table:style-name="c1">
            <text:p>1.4852</text:p>
          </table:table-cell>
          <table:table-cell office:value-type="string" table:style-name="c1">
            <text:p>2026-03-16 14:45</text:p>
          </table:table-cell>
          <table:table-cell office:value-type="float" office:value="1.4758617" table:style-name="c1">
            <text:p>1.4759</text:p>
          </table:table-cell>
          <table:table-cell office:value-type="float" office:value="-0.8302213014947268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1.51005465" table:style-name="c1">
            <text:p>1.5101</text:p>
          </table:table-cell>
          <table:table-cell office:value-type="string" table:style-name="c1">
            <text:p>2026-03-16 22:00</text:p>
          </table:table-cell>
          <table:table-cell office:value-type="float" office:value="1.527236" table:style-name="c1">
            <text:p>1.5272</text:p>
          </table:table-cell>
          <table:table-cell office:value-type="float" office:value="0.9356221138089094" table:style-name="c14">
            <text:p>+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3:00</text:p>
          </table:table-cell>
          <table:table-cell office:value-type="float" office:value="1.5521756999999998" table:style-name="c1">
            <text:p>1.5522</text:p>
          </table:table-cell>
          <table:table-cell office:value-type="string" table:style-name="c1">
            <text:p>2026-03-17 00:45</text:p>
          </table:table-cell>
          <table:table-cell office:value-type="float" office:value="1.53753085" table:style-name="c1">
            <text:p>1.5375</text:p>
          </table:table-cell>
          <table:table-cell office:value-type="float" office:value="-1.1415185902697633" table:style-name="c13">
            <text:p>-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1:15</text:p>
          </table:table-cell>
          <table:table-cell office:value-type="float" office:value="1.56568245" table:style-name="c1">
            <text:p>1.5657</text:p>
          </table:table-cell>
          <table:table-cell office:value-type="string" table:style-name="c1">
            <text:p>2026-03-17 03:30</text:p>
          </table:table-cell>
          <table:table-cell office:value-type="float" office:value="1.56451735" table:style-name="c1">
            <text:p>1.5645</text:p>
          </table:table-cell>
          <table:table-cell office:value-type="float" office:value="-0.274166078993221" table:style-name="c13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30</text:p>
          </table:table-cell>
          <table:table-cell office:value-type="float" office:value="1.4230111499999998" table:style-name="c1">
            <text:p>1.423</text:p>
          </table:table-cell>
          <table:table-cell office:value-type="string" table:style-name="c1">
            <text:p>2026-03-24 09:00</text:p>
          </table:table-cell>
          <table:table-cell office:value-type="float" office:value="1.41659135" table:style-name="c1">
            <text:p>1.4166</text:p>
          </table:table-cell>
          <table:table-cell office:value-type="float" office:value="-0.6501400996506423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30</text:p>
          </table:table-cell>
          <table:table-cell office:value-type="float" office:value="1.4221107" table:style-name="c1">
            <text:p>1.4221</text:p>
          </table:table-cell>
          <table:table-cell office:value-type="string" table:style-name="c1">
            <text:p>2026-03-25 08:15</text:p>
          </table:table-cell>
          <table:table-cell office:value-type="float" office:value="1.41759085" table:style-name="c1">
            <text:p>1.4176</text:p>
          </table:table-cell>
          <table:table-cell office:value-type="float" office:value="-0.5170915392978759" table:style-name="c13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15</text:p>
          </table:table-cell>
          <table:table-cell office:value-type="float" office:value="1.4317155" table:style-name="c1">
            <text:p>1.4317</text:p>
          </table:table-cell>
          <table:table-cell office:value-type="string" table:style-name="c1">
            <text:p>2026-03-25 12:30</text:p>
          </table:table-cell>
          <table:table-cell office:value-type="float" office:value="1.4174909" table:style-name="c1">
            <text:p>1.4175</text:p>
          </table:table-cell>
          <table:table-cell office:value-type="float" office:value="-1.191449300444114" table:style-name="c13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1.3448721" table:style-name="c1">
            <text:p>1.3449</text:p>
          </table:table-cell>
          <table:table-cell office:value-type="string" table:style-name="c1">
            <text:p>2026-04-06 07:15</text:p>
          </table:table-cell>
          <table:table-cell office:value-type="float" office:value="1.3372310500000002" table:style-name="c1">
            <text:p>1.3372</text:p>
          </table:table-cell>
          <table:table-cell office:value-type="float" office:value="-0.7669260793609856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1.3532762999999999" table:style-name="c1">
            <text:p>1.3533</text:p>
          </table:table-cell>
          <table:table-cell office:value-type="string" table:style-name="c1">
            <text:p>2026-04-06 12:30</text:p>
          </table:table-cell>
          <table:table-cell office:value-type="float" office:value="1.34582675" table:style-name="c1">
            <text:p>1.3458</text:p>
          </table:table-cell>
          <table:table-cell office:value-type="float" office:value="-0.7492821438792596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9:00</text:p>
          </table:table-cell>
          <table:table-cell office:value-type="float" office:value="1.3202598" table:style-name="c1">
            <text:p>1.3203</text:p>
          </table:table-cell>
          <table:table-cell office:value-type="string" table:style-name="c1">
            <text:p>2026-04-07 10:30</text:p>
          </table:table-cell>
          <table:table-cell office:value-type="float" office:value="1.3120436500000001" table:style-name="c1">
            <text:p>1.312</text:p>
          </table:table-cell>
          <table:table-cell office:value-type="float" office:value="-0.8209691195891766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1.3742868" table:style-name="c1">
            <text:p>1.3743</text:p>
          </table:table-cell>
          <table:table-cell office:value-type="string" table:style-name="c1">
            <text:p>2026-04-08 03:15</text:p>
          </table:table-cell>
          <table:table-cell office:value-type="float" office:value="1.3699147" table:style-name="c1">
            <text:p>1.3699</text:p>
          </table:table-cell>
          <table:table-cell office:value-type="float" office:value="-0.5173999695914921" table:style-name="c13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1.364682" table:style-name="c1">
            <text:p>1.3647</text:p>
          </table:table-cell>
          <table:table-cell office:value-type="string" table:style-name="c1">
            <text:p>2026-04-11 20:45</text:p>
          </table:table-cell>
          <table:table-cell office:value-type="float" office:value="1.3601196" table:style-name="c1">
            <text:p>1.3601</text:p>
          </table:table-cell>
          <table:table-cell office:value-type="float" office:value="-0.5335513387294544" table:style-name="c13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1.3722857999999998" table:style-name="c1">
            <text:p>1.3723</text:p>
          </table:table-cell>
          <table:table-cell office:value-type="string" table:style-name="c1">
            <text:p>2026-04-14 00:30</text:p>
          </table:table-cell>
          <table:table-cell office:value-type="float" office:value="1.3637178" table:style-name="c1">
            <text:p>1.3637</text:p>
          </table:table-cell>
          <table:table-cell office:value-type="float" office:value="-0.8230116410298582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1.39339635" table:style-name="c1">
            <text:p>1.3934</text:p>
          </table:table-cell>
          <table:table-cell office:value-type="string" table:style-name="c1">
            <text:p>2026-04-14 14:45</text:p>
          </table:table-cell>
          <table:table-cell office:value-type="float" office:value="1.3771111" table:style-name="c1">
            <text:p>1.3771</text:p>
          </table:table-cell>
          <table:table-cell office:value-type="float" office:value="-1.3663086665111401" table:style-name="c13">
            <text:p>-1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1.3641817499999997" table:style-name="c1">
            <text:p>1.3642</text:p>
          </table:table-cell>
          <table:table-cell office:value-type="string" table:style-name="c1">
            <text:p>2026-04-15 20:45</text:p>
          </table:table-cell>
          <table:table-cell office:value-type="float" office:value="1.38740595" table:style-name="c1">
            <text:p>1.3874</text:p>
          </table:table-cell>
          <table:table-cell office:value-type="float" office:value="1.4991239624742247" table:style-name="c14">
            <text:p>+1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1:45</text:p>
          </table:table-cell>
          <table:table-cell office:value-type="float" office:value="1.4017005" table:style-name="c1">
            <text:p>1.4017</text:p>
          </table:table-cell>
          <table:table-cell office:value-type="string" table:style-name="c1">
            <text:p>2026-04-16 05:15</text:p>
          </table:table-cell>
          <table:table-cell office:value-type="float" office:value="1.4022985000000001" table:style-name="c1">
            <text:p>1.4023</text:p>
          </table:table-cell>
          <table:table-cell office:value-type="float" office:value="-0.15732281621499977" table:style-name="c13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9:15</text:p>
          </table:table-cell>
          <table:table-cell office:value-type="float" office:value="1.4150071499999999" table:style-name="c1">
            <text:p>1.415</text:p>
          </table:table-cell>
          <table:table-cell office:value-type="string" table:style-name="c1">
            <text:p>2026-04-16 11:00</text:p>
          </table:table-cell>
          <table:table-cell office:value-type="float" office:value="1.4080956000000002" table:style-name="c1">
            <text:p>1.4081</text:p>
          </table:table-cell>
          <table:table-cell office:value-type="float" office:value="-0.6873698909860226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15</text:p>
          </table:table-cell>
          <table:table-cell office:value-type="float" office:value="1.4235114" table:style-name="c1">
            <text:p>1.4235</text:p>
          </table:table-cell>
          <table:table-cell office:value-type="string" table:style-name="c1">
            <text:p>2026-04-16 17:15</text:p>
          </table:table-cell>
          <table:table-cell office:value-type="float" office:value="1.41559185" table:style-name="c1">
            <text:p>1.4156</text:p>
          </table:table-cell>
          <table:table-cell office:value-type="float" office:value="-0.7551269423026863" table:style-name="c13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1.45962945" table:style-name="c1">
            <text:p>1.4596</text:p>
          </table:table-cell>
          <table:table-cell office:value-type="string" table:style-name="c1">
            <text:p>2026-04-17 17:30</text:p>
          </table:table-cell>
          <table:table-cell office:value-type="float" office:value="1.4810591000000002" table:style-name="c1">
            <text:p>1.4811</text:p>
          </table:table-cell>
          <table:table-cell office:value-type="float" office:value="1.2653220212226257" table:style-name="c14">
            <text:p>+1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7:00</text:p>
          </table:table-cell>
          <table:table-cell office:value-type="float" office:value="1.4377185" table:style-name="c1">
            <text:p>1.4377</text:p>
          </table:table-cell>
          <table:table-cell office:value-type="string" table:style-name="c1">
            <text:p>2026-04-21 11:15</text:p>
          </table:table-cell>
          <table:table-cell office:value-type="float" office:value="1.43878025" table:style-name="c1">
            <text:p>1.4388</text:p>
          </table:table-cell>
          <table:table-cell office:value-type="float" office:value="-0.12619798101992652" table:style-name="c13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1.44942435" table:style-name="c1">
            <text:p>1.4494</text:p>
          </table:table-cell>
          <table:table-cell office:value-type="string" table:style-name="c1">
            <text:p>2026-04-22 08:30</text:p>
          </table:table-cell>
          <table:table-cell office:value-type="float" office:value="1.451274" table:style-name="c1">
            <text:p>1.4513</text:p>
          </table:table-cell>
          <table:table-cell office:value-type="float" office:value="-0.07254236662990188" table:style-name="c13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2:15</text:p>
          </table:table-cell>
          <table:table-cell office:value-type="float" office:value="1.43161545" table:style-name="c1">
            <text:p>1.4316</text:p>
          </table:table-cell>
          <table:table-cell office:value-type="string" table:style-name="c1">
            <text:p>2026-04-26 22:45</text:p>
          </table:table-cell>
          <table:table-cell office:value-type="float" office:value="1.4262865000000002" table:style-name="c1">
            <text:p>1.4263</text:p>
          </table:table-cell>
          <table:table-cell office:value-type="float" office:value="-0.5713892451705282" table:style-name="c13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1.3898945999999999" table:style-name="c1">
            <text:p>1.3899</text:p>
          </table:table-cell>
          <table:table-cell office:value-type="string" table:style-name="c1">
            <text:p>2026-05-01 17:30</text:p>
          </table:table-cell>
          <table:table-cell office:value-type="float" office:value="1.39060435" table:style-name="c1">
            <text:p>1.3906</text:p>
          </table:table-cell>
          <table:table-cell office:value-type="float" office:value="-0.14893705577745386" table:style-name="c13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1.4023008" table:style-name="c1">
            <text:p>1.4023</text:p>
          </table:table-cell>
          <table:table-cell office:value-type="string" table:style-name="c1">
            <text:p>2026-05-03 23:30</text:p>
          </table:table-cell>
          <table:table-cell office:value-type="float" office:value="1.3889052" table:style-name="c1">
            <text:p>1.3889</text:p>
          </table:table-cell>
          <table:table-cell office:value-type="float" office:value="-1.1532491099484399" table:style-name="c13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1.4057024999999999" table:style-name="c1">
            <text:p>1.4057</text:p>
          </table:table-cell>
          <table:table-cell office:value-type="string" table:style-name="c1">
            <text:p>2026-05-04 06:30</text:p>
          </table:table-cell>
          <table:table-cell office:value-type="float" office:value="1.4044974000000001" table:style-name="c1">
            <text:p>1.4045</text:p>
          </table:table-cell>
          <table:table-cell office:value-type="float" office:value="-0.28545800427898227" table:style-name="c13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1.40740335" table:style-name="c1">
            <text:p>1.4074</text:p>
          </table:table-cell>
          <table:table-cell office:value-type="string" table:style-name="c1">
            <text:p>2026-05-04 15:45</text:p>
          </table:table-cell>
          <table:table-cell office:value-type="float" office:value="1.39820055" table:style-name="c1">
            <text:p>1.3982</text:p>
          </table:table-cell>
          <table:table-cell office:value-type="float" office:value="-0.8524779267755855" table:style-name="c13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1.4187089999999998" table:style-name="c1">
            <text:p>1.4187</text:p>
          </table:table-cell>
          <table:table-cell office:value-type="string" table:style-name="c1">
            <text:p>2026-05-05 14:15</text:p>
          </table:table-cell>
          <table:table-cell office:value-type="float" office:value="1.40759585" table:style-name="c1">
            <text:p>1.4076</text:p>
          </table:table-cell>
          <table:table-cell office:value-type="float" office:value="-0.981662490627011" table:style-name="c13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06 13:00</text:p>
          </table:table-cell>
          <table:table-cell office:value-type="float" office:value="1.4443774500000002" table:style-name="c1">
            <text:p>1.4444</text:p>
          </table:table-cell>
          <table:table-cell office:value-type="float" office:value="-0.14763638504745602" table:style-name="c13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15</text:p>
          </table:table-cell>
          <table:table-cell office:value-type="float" office:value="1.4195094" table:style-name="c1">
            <text:p>1.4195</text:p>
          </table:table-cell>
          <table:table-cell office:value-type="string" table:style-name="c1">
            <text:p>2026-05-07 09:45</text:p>
          </table:table-cell>
          <table:table-cell office:value-type="float" office:value="1.4100946" table:style-name="c1">
            <text:p>1.4101</text:p>
          </table:table-cell>
          <table:table-cell office:value-type="float" office:value="-0.8618174071548967" table:style-name="c13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4293143" table:style-name="c1">
            <text:p>1.4293</text:p>
          </table:table-cell>
          <table:table-cell office:value-type="string" table:style-name="c1">
            <text:p>2026-05-09 04:45</text:p>
          </table:table-cell>
          <table:table-cell office:value-type="float" office:value="1.42738595" table:style-name="c1">
            <text:p>1.4274</text:p>
          </table:table-cell>
          <table:table-cell office:value-type="float" office:value="-0.3345446494203541" table:style-name="c13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45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10 20:15</text:p>
          </table:table-cell>
          <table:table-cell office:value-type="float" office:value="1.4781605500000001" table:style-name="c1">
            <text:p>1.4782</text:p>
          </table:table-cell>
          <table:table-cell office:value-type="float" office:value="2.187848972495554" table:style-name="c14">
            <text:p>+2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.4717355" table:style-name="c1">
            <text:p>1.4717</text:p>
          </table:table-cell>
          <table:table-cell office:value-type="string" table:style-name="c1">
            <text:p>2026-05-14 20:15</text:p>
          </table:table-cell>
          <table:table-cell office:value-type="float" office:value="1.50474725" table:style-name="c1">
            <text:p>1.5047</text:p>
          </table:table-cell>
          <table:table-cell office:value-type="float" office:value="2.0386652525029136" table:style-name="c14">
            <text:p>+2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3839916499999998" table:style-name="c1">
            <text:p>1.384</text:p>
          </table:table-cell>
          <table:table-cell office:value-type="string" table:style-name="c1">
            <text:p>2026-05-21 09:45</text:p>
          </table:table-cell>
          <table:table-cell office:value-type="float" office:value="1.3749122" table:style-name="c1">
            <text:p>1.3749</text:p>
          </table:table-cell>
          <table:table-cell office:value-type="float" office:value="-0.8546221711525193" table:style-name="c13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1.3543768499999997" table:style-name="c1">
            <text:p>1.3544</text:p>
          </table:table-cell>
          <table:table-cell office:value-type="string" table:style-name="c1">
            <text:p>2026-05-25 02:45</text:p>
          </table:table-cell>
          <table:table-cell office:value-type="float" office:value="1.3476258500000002" table:style-name="c1">
            <text:p>1.3476</text:p>
          </table:table-cell>
          <table:table-cell office:value-type="float" office:value="-0.6973616002185379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1.3560777" table:style-name="c1">
            <text:p>1.3561</text:p>
          </table:table-cell>
          <table:table-cell office:value-type="string" table:style-name="c1">
            <text:p>2026-05-30 04:00</text:p>
          </table:table-cell>
          <table:table-cell office:value-type="float" office:value="1.3497248000000002" table:style-name="c1">
            <text:p>1.3497</text:p>
          </table:table-cell>
          <table:table-cell office:value-type="float" office:value="-0.6674396220216261" table:style-name="c13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45</text:p>
          </table:table-cell>
          <table:table-cell office:value-type="float" office:value="1.3421707499999997" table:style-name="c1">
            <text:p>1.3422</text:p>
          </table:table-cell>
          <table:table-cell office:value-type="string" table:style-name="c1">
            <text:p>2026-05-31 10:00</text:p>
          </table:table-cell>
          <table:table-cell office:value-type="float" office:value="1.33843045" table:style-name="c1">
            <text:p>1.3384</text:p>
          </table:table-cell>
          <table:table-cell office:value-type="float" office:value="-0.4780183497181345" table:style-name="c13">
            <text:p>-0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