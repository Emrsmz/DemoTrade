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7" style:family="table-cell" style:display-name="c7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F2F2F2"/>
      <style:paragraph-properties fo:text-align="center"/>
    </style:style>
    <style:style style:name="c9" style:family="table-cell" style:display-name="c9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1" style:family="table-cell" style:display-name="c11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6.09280750808382" table:style-name="c3">
            <text:p>-16.1</text:p>
          </table:table-cell>
          <table:table-cell office:value-type="float" office:value="-5.276645311589984" table:style-name="c1">
            <text:p>-5.3</text:p>
          </table:table-cell>
          <table:table-cell office:value-type="float" office:value="-10.816162196493835" table:style-name="c4">
            <text:p>-10.8</text:p>
          </table:table-cell>
          <table:table-cell office:value-type="float" office:value="87" table:style-name="c1">
            <text:p>87</text:p>
          </table:table-cell>
          <table:table-cell office:value-type="float" office:value="29.88505747126437" table:style-name="c1">
            <text:p>29.9</text:p>
          </table:table-cell>
          <table:table-cell office:value-type="float" office:value="18.239556044786557" table:style-name="c1">
            <text:p>18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16.532946157164453" table:style-name="c3">
            <text:p>-16.5</text:p>
          </table:table-cell>
          <table:table-cell office:value-type="float" office:value="-3.753213367609249" table:style-name="c1">
            <text:p>-3.8</text:p>
          </table:table-cell>
          <table:table-cell office:value-type="float" office:value="-12.779732789555204" table:style-name="c4">
            <text:p>-12.8</text:p>
          </table:table-cell>
          <table:table-cell office:value-type="float" office:value="66" table:style-name="c1">
            <text:p>66</text:p>
          </table:table-cell>
          <table:table-cell office:value-type="float" office:value="15.151515151515152" table:style-name="c1">
            <text:p>15.2</text:p>
          </table:table-cell>
          <table:table-cell office:value-type="float" office:value="18.964608514687725" table:style-name="c1">
            <text:p>19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7.289054300523365" table:style-name="c3">
            <text:p>-17.3</text:p>
          </table:table-cell>
          <table:table-cell office:value-type="float" office:value="-5.198889916743747" table:style-name="c1">
            <text:p>-5.2</text:p>
          </table:table-cell>
          <table:table-cell office:value-type="float" office:value="-12.090164383779618" table:style-name="c4">
            <text:p>-12.1</text:p>
          </table:table-cell>
          <table:table-cell office:value-type="float" office:value="60" table:style-name="c1">
            <text:p>60</text:p>
          </table:table-cell>
          <table:table-cell office:value-type="float" office:value="15.0" table:style-name="c1">
            <text:p>15.0</text:p>
          </table:table-cell>
          <table:table-cell office:value-type="float" office:value="17.61809259693841" table:style-name="c1">
            <text:p>17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19.282200161460924" table:style-name="c3">
            <text:p>-19.3</text:p>
          </table:table-cell>
          <table:table-cell office:value-type="float" office:value="9.49268154042916" table:style-name="c1">
            <text:p>+9.5</text:p>
          </table:table-cell>
          <table:table-cell office:value-type="float" office:value="-28.774881701890084" table:style-name="c4">
            <text:p>-28.8</text:p>
          </table:table-cell>
          <table:table-cell office:value-type="float" office:value="82" table:style-name="c1">
            <text:p>82</text:p>
          </table:table-cell>
          <table:table-cell office:value-type="float" office:value="24.390243902439025" table:style-name="c1">
            <text:p>24.4</text:p>
          </table:table-cell>
          <table:table-cell office:value-type="float" office:value="19.738071177628814" table:style-name="c1">
            <text:p>19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20.64299122795123" table:style-name="c3">
            <text:p>-20.6</text:p>
          </table:table-cell>
          <table:table-cell office:value-type="float" office:value="-0.7117597923241992" table:style-name="c1">
            <text:p>-0.7</text:p>
          </table:table-cell>
          <table:table-cell office:value-type="float" office:value="-19.931231435627033" table:style-name="c4">
            <text:p>-19.9</text:p>
          </table:table-cell>
          <table:table-cell office:value-type="float" office:value="100" table:style-name="c1">
            <text:p>100</text:p>
          </table:table-cell>
          <table:table-cell office:value-type="float" office:value="25.0" table:style-name="c1">
            <text:p>25.0</text:p>
          </table:table-cell>
          <table:table-cell office:value-type="float" office:value="22.022650767171893" table:style-name="c1">
            <text:p>22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1.59321816336317" table:style-name="c3">
            <text:p>-21.6</text:p>
          </table:table-cell>
          <table:table-cell office:value-type="float" office:value="-3.098901098901099" table:style-name="c1">
            <text:p>-3.1</text:p>
          </table:table-cell>
          <table:table-cell office:value-type="float" office:value="-18.49431706446207" table:style-name="c4">
            <text:p>-18.5</text:p>
          </table:table-cell>
          <table:table-cell office:value-type="float" office:value="89" table:style-name="c1">
            <text:p>89</text:p>
          </table:table-cell>
          <table:table-cell office:value-type="float" office:value="25.842696629213485" table:style-name="c1">
            <text:p>25.8</text:p>
          </table:table-cell>
          <table:table-cell office:value-type="float" office:value="23.376342992396484" table:style-name="c1">
            <text:p>23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21.661307226421048" table:style-name="c3">
            <text:p>-21.7</text:p>
          </table:table-cell>
          <table:table-cell office:value-type="float" office:value="-6.673407482305353" table:style-name="c1">
            <text:p>-6.7</text:p>
          </table:table-cell>
          <table:table-cell office:value-type="float" office:value="-14.987899744115694" table:style-name="c4">
            <text:p>-15.0</text:p>
          </table:table-cell>
          <table:table-cell office:value-type="float" office:value="116" table:style-name="c1">
            <text:p>116</text:p>
          </table:table-cell>
          <table:table-cell office:value-type="float" office:value="33.62068965517241" table:style-name="c1">
            <text:p>33.6</text:p>
          </table:table-cell>
          <table:table-cell office:value-type="float" office:value="24.599171358756493" table:style-name="c1">
            <text:p>24.6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21.760205490809085" table:style-name="c3">
            <text:p>-21.8</text:p>
          </table:table-cell>
          <table:table-cell office:value-type="float" office:value="-13.702190865206088" table:style-name="c1">
            <text:p>-13.7</text:p>
          </table:table-cell>
          <table:table-cell office:value-type="float" office:value="-8.058014625602997" table:style-name="c4">
            <text:p>-8.1</text:p>
          </table:table-cell>
          <table:table-cell office:value-type="float" office:value="80" table:style-name="c1">
            <text:p>80</text:p>
          </table:table-cell>
          <table:table-cell office:value-type="float" office:value="23.75" table:style-name="c1">
            <text:p>23.8</text:p>
          </table:table-cell>
          <table:table-cell office:value-type="float" office:value="22.662324328392774" table:style-name="c1">
            <text:p>22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-23.812171994983792" table:style-name="c3">
            <text:p>-23.8</text:p>
          </table:table-cell>
          <table:table-cell office:value-type="float" office:value="-3.915761763738067" table:style-name="c1">
            <text:p>-3.9</text:p>
          </table:table-cell>
          <table:table-cell office:value-type="float" office:value="-19.896410231245724" table:style-name="c4">
            <text:p>-19.9</text:p>
          </table:table-cell>
          <table:table-cell office:value-type="float" office:value="103" table:style-name="c1">
            <text:p>103</text:p>
          </table:table-cell>
          <table:table-cell office:value-type="float" office:value="24.271844660194176" table:style-name="c1">
            <text:p>24.3</text:p>
          </table:table-cell>
          <table:table-cell office:value-type="float" office:value="25.716268114370443" table:style-name="c1">
            <text:p>25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23.97219030407937" table:style-name="c3">
            <text:p>-24.0</text:p>
          </table:table-cell>
          <table:table-cell office:value-type="float" office:value="6.185002736726874" table:style-name="c1">
            <text:p>+6.2</text:p>
          </table:table-cell>
          <table:table-cell office:value-type="float" office:value="-30.15719304080624" table:style-name="c4">
            <text:p>-30.2</text:p>
          </table:table-cell>
          <table:table-cell office:value-type="float" office:value="100" table:style-name="c1">
            <text:p>100</text:p>
          </table:table-cell>
          <table:table-cell office:value-type="float" office:value="30.0" table:style-name="c1">
            <text:p>30.0</text:p>
          </table:table-cell>
          <table:table-cell office:value-type="float" office:value="25.2771160887037" table:style-name="c1">
            <text:p>25.3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25.532065871690314" table:style-name="c3">
            <text:p>-25.5</text:p>
          </table:table-cell>
          <table:table-cell office:value-type="float" office:value="7.331551522147663" table:style-name="c1">
            <text:p>+7.3</text:p>
          </table:table-cell>
          <table:table-cell office:value-type="float" office:value="-32.86361739383798" table:style-name="c4">
            <text:p>-32.9</text:p>
          </table:table-cell>
          <table:table-cell office:value-type="float" office:value="94" table:style-name="c1">
            <text:p>94</text:p>
          </table:table-cell>
          <table:table-cell office:value-type="float" office:value="22.340425531914892" table:style-name="c1">
            <text:p>22.3</text:p>
          </table:table-cell>
          <table:table-cell office:value-type="float" office:value="26.82860932174852" table:style-name="c1">
            <text:p>26.8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25.68933051652001" table:style-name="c3">
            <text:p>-25.7</text:p>
          </table:table-cell>
          <table:table-cell office:value-type="float" office:value="-21.977287909151645" table:style-name="c1">
            <text:p>-22.0</text:p>
          </table:table-cell>
          <table:table-cell office:value-type="float" office:value="-3.712042607368364" table:style-name="c4">
            <text:p>-3.7</text:p>
          </table:table-cell>
          <table:table-cell office:value-type="float" office:value="78" table:style-name="c1">
            <text:p>78</text:p>
          </table:table-cell>
          <table:table-cell office:value-type="float" office:value="25.64102564102564" table:style-name="c1">
            <text:p>25.6</text:p>
          </table:table-cell>
          <table:table-cell office:value-type="float" office:value="25.867992775600772" table:style-name="c1">
            <text:p>25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25.897500771283628" table:style-name="c3">
            <text:p>-25.9</text:p>
          </table:table-cell>
          <table:table-cell office:value-type="float" office:value="-0.18382352941176297" table:style-name="c1">
            <text:p>-0.2</text:p>
          </table:table-cell>
          <table:table-cell office:value-type="float" office:value="-25.713677241871864" table:style-name="c4">
            <text:p>-25.7</text:p>
          </table:table-cell>
          <table:table-cell office:value-type="float" office:value="113" table:style-name="c1">
            <text:p>113</text:p>
          </table:table-cell>
          <table:table-cell office:value-type="float" office:value="29.20353982300885" table:style-name="c1">
            <text:p>29.2</text:p>
          </table:table-cell>
          <table:table-cell office:value-type="float" office:value="28.217749954173815" table:style-name="c1">
            <text:p>28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26.831202458065796" table:style-name="c3">
            <text:p>-26.8</text:p>
          </table:table-cell>
          <table:table-cell office:value-type="float" office:value="-7.5697211155378445" table:style-name="c1">
            <text:p>-7.6</text:p>
          </table:table-cell>
          <table:table-cell office:value-type="float" office:value="-19.26148134252795" table:style-name="c4">
            <text:p>-19.3</text:p>
          </table:table-cell>
          <table:table-cell office:value-type="float" office:value="92" table:style-name="c1">
            <text:p>92</text:p>
          </table:table-cell>
          <table:table-cell office:value-type="float" office:value="28.26086956521739" table:style-name="c1">
            <text:p>28.3</text:p>
          </table:table-cell>
          <table:table-cell office:value-type="float" office:value="28.539685407915137" table:style-name="c1">
            <text:p>28.5</text:p>
          </table:table-cell>
        </table:table-row>
        <table:table-row>
          <table:table-cell office:value-type="string" table:style-name="c2">
            <text:p>TIA/USDT</text:p>
          </table:table-cell>
          <table:table-cell office:value-type="float" office:value="-26.985341281598963" table:style-name="c3">
            <text:p>-27.0</text:p>
          </table:table-cell>
          <table:table-cell office:value-type="float" office:value="19.08752327746741" table:style-name="c1">
            <text:p>+19.1</text:p>
          </table:table-cell>
          <table:table-cell office:value-type="float" office:value="-46.072864559066375" table:style-name="c4">
            <text:p>-46.1</text:p>
          </table:table-cell>
          <table:table-cell office:value-type="float" office:value="109" table:style-name="c1">
            <text:p>109</text:p>
          </table:table-cell>
          <table:table-cell office:value-type="float" office:value="33.02752293577982" table:style-name="c1">
            <text:p>33.0</text:p>
          </table:table-cell>
          <table:table-cell office:value-type="float" office:value="29.24829927850454" table:style-name="c1">
            <text:p>29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7.10816792638931" table:style-name="c3">
            <text:p>-27.1</text:p>
          </table:table-cell>
          <table:table-cell office:value-type="float" office:value="8.912403185338711" table:style-name="c1">
            <text:p>+8.9</text:p>
          </table:table-cell>
          <table:table-cell office:value-type="float" office:value="-36.02057111172802" table:style-name="c4">
            <text:p>-36.0</text:p>
          </table:table-cell>
          <table:table-cell office:value-type="float" office:value="113" table:style-name="c1">
            <text:p>113</text:p>
          </table:table-cell>
          <table:table-cell office:value-type="float" office:value="26.548672566371685" table:style-name="c1">
            <text:p>26.5</text:p>
          </table:table-cell>
          <table:table-cell office:value-type="float" office:value="29.359964872997583" table:style-name="c1">
            <text:p>29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27.219160122980053" table:style-name="c3">
            <text:p>-27.2</text:p>
          </table:table-cell>
          <table:table-cell office:value-type="float" office:value="-23.347107438016526" table:style-name="c1">
            <text:p>-23.3</text:p>
          </table:table-cell>
          <table:table-cell office:value-type="float" office:value="-3.8720526849635277" table:style-name="c4">
            <text:p>-3.9</text:p>
          </table:table-cell>
          <table:table-cell office:value-type="float" office:value="91" table:style-name="c1">
            <text:p>91</text:p>
          </table:table-cell>
          <table:table-cell office:value-type="float" office:value="28.57142857142857" table:style-name="c1">
            <text:p>28.6</text:p>
          </table:table-cell>
          <table:table-cell office:value-type="float" office:value="28.38836912983555" table:style-name="c1">
            <text:p>28.4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27.282101777813978" table:style-name="c3">
            <text:p>-27.3</text:p>
          </table:table-cell>
          <table:table-cell office:value-type="float" office:value="1.8842224744608442" table:style-name="c1">
            <text:p>+1.9</text:p>
          </table:table-cell>
          <table:table-cell office:value-type="float" office:value="-29.166324252274823" table:style-name="c4">
            <text:p>-29.2</text:p>
          </table:table-cell>
          <table:table-cell office:value-type="float" office:value="104" table:style-name="c1">
            <text:p>104</text:p>
          </table:table-cell>
          <table:table-cell office:value-type="float" office:value="20.192307692307693" table:style-name="c1">
            <text:p>20.2</text:p>
          </table:table-cell>
          <table:table-cell office:value-type="float" office:value="27.41867643372367" table:style-name="c1">
            <text:p>27.4</text:p>
          </table:table-cell>
        </table:table-row>
        <table:table-row>
          <table:table-cell office:value-type="string" table:style-name="c2">
            <text:p>SAND/USDT</text:p>
          </table:table-cell>
          <table:table-cell office:value-type="float" office:value="-27.465921757166562" table:style-name="c3">
            <text:p>-27.5</text:p>
          </table:table-cell>
          <table:table-cell office:value-type="float" office:value="-18.42603550295858" table:style-name="c1">
            <text:p>-18.4</text:p>
          </table:table-cell>
          <table:table-cell office:value-type="float" office:value="-9.039886254207982" table:style-name="c4">
            <text:p>-9.0</text:p>
          </table:table-cell>
          <table:table-cell office:value-type="float" office:value="86" table:style-name="c1">
            <text:p>86</text:p>
          </table:table-cell>
          <table:table-cell office:value-type="float" office:value="20.930232558139537" table:style-name="c1">
            <text:p>20.9</text:p>
          </table:table-cell>
          <table:table-cell office:value-type="float" office:value="28.861834550214603" table:style-name="c1">
            <text:p>28.9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float" office:value="-28.33153774918566" table:style-name="c3">
            <text:p>-28.3</text:p>
          </table:table-cell>
          <table:table-cell office:value-type="float" office:value="-7.890318970341363" table:style-name="c1">
            <text:p>-7.9</text:p>
          </table:table-cell>
          <table:table-cell office:value-type="float" office:value="-20.441218778844295" table:style-name="c4">
            <text:p>-20.4</text:p>
          </table:table-cell>
          <table:table-cell office:value-type="float" office:value="87" table:style-name="c1">
            <text:p>87</text:p>
          </table:table-cell>
          <table:table-cell office:value-type="float" office:value="29.88505747126437" table:style-name="c1">
            <text:p>29.9</text:p>
          </table:table-cell>
          <table:table-cell office:value-type="float" office:value="28.438193656308265" table:style-name="c1">
            <text:p>28.4</text:p>
          </table:table-cell>
        </table:table-row>
        <table:table-row>
          <table:table-cell office:value-type="string" table:style-name="c2">
            <text:p>MANA/USDT</text:p>
          </table:table-cell>
          <table:table-cell office:value-type="float" office:value="-28.919899447316865" table:style-name="c3">
            <text:p>-28.9</text:p>
          </table:table-cell>
          <table:table-cell office:value-type="float" office:value="-13.4297520661157" table:style-name="c1">
            <text:p>-13.4</text:p>
          </table:table-cell>
          <table:table-cell office:value-type="float" office:value="-15.490147381201165" table:style-name="c4">
            <text:p>-15.5</text:p>
          </table:table-cell>
          <table:table-cell office:value-type="float" office:value="98" table:style-name="c1">
            <text:p>98</text:p>
          </table:table-cell>
          <table:table-cell office:value-type="float" office:value="21.428571428571427" table:style-name="c1">
            <text:p>21.4</text:p>
          </table:table-cell>
          <table:table-cell office:value-type="float" office:value="30.276416710008704" table:style-name="c1">
            <text:p>3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30.380647384263614" table:style-name="c3">
            <text:p>-30.4</text:p>
          </table:table-cell>
          <table:table-cell office:value-type="float" office:value="-5.633802816901413" table:style-name="c1">
            <text:p>-5.6</text:p>
          </table:table-cell>
          <table:table-cell office:value-type="float" office:value="-24.746844567362203" table:style-name="c4">
            <text:p>-24.7</text:p>
          </table:table-cell>
          <table:table-cell office:value-type="float" office:value="100" table:style-name="c1">
            <text:p>100</text:p>
          </table:table-cell>
          <table:table-cell office:value-type="float" office:value="24.0" table:style-name="c1">
            <text:p>24.0</text:p>
          </table:table-cell>
          <table:table-cell office:value-type="float" office:value="30.51435033491496" table:style-name="c1">
            <text:p>3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30.387181416167326" table:style-name="c3">
            <text:p>-30.4</text:p>
          </table:table-cell>
          <table:table-cell office:value-type="float" office:value="0.0" table:style-name="c1">
            <text:p>+0.0</text:p>
          </table:table-cell>
          <table:table-cell office:value-type="float" office:value="-30.387181416167326" table:style-name="c4">
            <text:p>-30.4</text:p>
          </table:table-cell>
          <table:table-cell office:value-type="float" office:value="114" table:style-name="c1">
            <text:p>114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30.75744417371004" table:style-name="c1">
            <text:p>30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-31.220894171559564" table:style-name="c3">
            <text:p>-31.2</text:p>
          </table:table-cell>
          <table:table-cell office:value-type="float" office:value="68.94775570272257" table:style-name="c1">
            <text:p>+68.9</text:p>
          </table:table-cell>
          <table:table-cell office:value-type="float" office:value="-100.16864987428214" table:style-name="c4">
            <text:p>-100.2</text:p>
          </table:table-cell>
          <table:table-cell office:value-type="float" office:value="102" table:style-name="c1">
            <text:p>102</text:p>
          </table:table-cell>
          <table:table-cell office:value-type="float" office:value="31.372549019607842" table:style-name="c1">
            <text:p>31.4</text:p>
          </table:table-cell>
          <table:table-cell office:value-type="float" office:value="31.537876034268166" table:style-name="c1">
            <text:p>31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float" office:value="-32.53237744811963" table:style-name="c3">
            <text:p>-32.5</text:p>
          </table:table-cell>
          <table:table-cell office:value-type="float" office:value="-4.011461318051574" table:style-name="c1">
            <text:p>-4.0</text:p>
          </table:table-cell>
          <table:table-cell office:value-type="float" office:value="-28.52091613006806" table:style-name="c4">
            <text:p>-28.5</text:p>
          </table:table-cell>
          <table:table-cell office:value-type="float" office:value="116" table:style-name="c1">
            <text:p>116</text:p>
          </table:table-cell>
          <table:table-cell office:value-type="float" office:value="26.72413793103448" table:style-name="c1">
            <text:p>26.7</text:p>
          </table:table-cell>
          <table:table-cell office:value-type="float" office:value="34.608992806060954" table:style-name="c1">
            <text:p>34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-35.90961301153824" table:style-name="c3">
            <text:p>-35.9</text:p>
          </table:table-cell>
          <table:table-cell office:value-type="float" office:value="112.10336931632318" table:style-name="c1">
            <text:p>+112.1</text:p>
          </table:table-cell>
          <table:table-cell office:value-type="float" office:value="-148.01298232786144" table:style-name="c4">
            <text:p>-148.0</text:p>
          </table:table-cell>
          <table:table-cell office:value-type="float" office:value="152" table:style-name="c1">
            <text:p>152</text:p>
          </table:table-cell>
          <table:table-cell office:value-type="float" office:value="34.21052631578947" table:style-name="c1">
            <text:p>34.2</text:p>
          </table:table-cell>
          <table:table-cell office:value-type="float" office:value="39.3732491684444" table:style-name="c1">
            <text:p>39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41.324761228973955" table:style-name="c3">
            <text:p>-41.3</text:p>
          </table:table-cell>
          <table:table-cell office:value-type="float" office:value="-5.714285714285708" table:style-name="c1">
            <text:p>-5.7</text:p>
          </table:table-cell>
          <table:table-cell office:value-type="float" office:value="-35.61047551468825" table:style-name="c4">
            <text:p>-35.6</text:p>
          </table:table-cell>
          <table:table-cell office:value-type="float" office:value="108" table:style-name="c1">
            <text:p>108</text:p>
          </table:table-cell>
          <table:table-cell office:value-type="float" office:value="25.0" table:style-name="c1">
            <text:p>25.0</text:p>
          </table:table-cell>
          <table:table-cell office:value-type="float" office:value="42.99402577549086" table:style-name="c1">
            <text:p>43.0</text:p>
          </table:table-cell>
        </table:table-row>
        <table:table-row>
          <table:table-cell office:value-type="string" table:style-name="c2">
            <text:p>WIF/USDT</text:p>
          </table:table-cell>
          <table:table-cell office:value-type="float" office:value="-41.980299180844796" table:style-name="c3">
            <text:p>-42.0</text:p>
          </table:table-cell>
          <table:table-cell office:value-type="float" office:value="-7.4626865671641855" table:style-name="c1">
            <text:p>-7.5</text:p>
          </table:table-cell>
          <table:table-cell office:value-type="float" office:value="-34.51761261368061" table:style-name="c4">
            <text:p>-34.5</text:p>
          </table:table-cell>
          <table:table-cell office:value-type="float" office:value="160" table:style-name="c1">
            <text:p>160</text:p>
          </table:table-cell>
          <table:table-cell office:value-type="float" office:value="33.125" table:style-name="c1">
            <text:p>33.1</text:p>
          </table:table-cell>
          <table:table-cell office:value-type="float" office:value="43.30690131222978" table:style-name="c1">
            <text:p>43.3</text:p>
          </table:table-cell>
        </table:table-row>
        <table:table-row>
          <table:table-cell office:value-type="string" table:style-name="c5">
            <text:p>AVERAGE</text:p>
          </table:table-cell>
          <table:table-cell office:value-type="float" office:value="-26.55846771629709" table:style-name="c6">
            <text:p>-26.6</text:p>
          </table:table-cell>
          <table:table-cell office:value-type="float" office:value="2.7131234717593693" table:style-name="c5">
            <text:p>+2.7</text:p>
          </table:table-cell>
          <table:table-cell office:value-type="float" office:value="-29.27159118805646" table:style-name="c6">
            <text:p>-29.3</text:p>
          </table:table-cell>
          <table:table-cell office:value-type="float" office:value="2800" table:style-name="c5">
            <text:p>2800</text:p>
          </table:table-cell>
          <table:table-cell office:value-type="float" office:value="26.453830280521203" table:style-name="c5">
            <text:p>26.5</text:p>
          </table:table-cell>
          <table:table-cell office:value-type="float" office:value="27.9554583457137" table:style-name="c5">
            <text:p>28.0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15</text:p>
          </table:table-cell>
          <table:table-cell office:value-type="float" office:value="0.26943464999999994" table:style-name="c8">
            <text:p>0.26943</text:p>
          </table:table-cell>
          <table:table-cell office:value-type="string" table:style-name="c8">
            <text:p>2026-03-03 16:45</text:p>
          </table:table-cell>
          <table:table-cell office:value-type="float" office:value="0.2660669" table:style-name="c8">
            <text:p>0.26607</text:p>
          </table:table-cell>
          <table:table-cell office:value-type="float" office:value="-1.4473334194766485" table:style-name="c9">
            <text:p>-1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0.27193589999999995" table:style-name="c8">
            <text:p>0.27194</text:p>
          </table:table-cell>
          <table:table-cell office:value-type="string" table:style-name="c8">
            <text:p>2026-03-04 09:30</text:p>
          </table:table-cell>
          <table:table-cell office:value-type="float" office:value="0.27196395" table:style-name="c8">
            <text:p>0.27196</text:p>
          </table:table-cell>
          <table:table-cell office:value-type="float" office:value="-0.18960568871190242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0.2731365" table:style-name="c8">
            <text:p>0.27314</text:p>
          </table:table-cell>
          <table:table-cell office:value-type="string" table:style-name="c8">
            <text:p>2026-03-04 10:15</text:p>
          </table:table-cell>
          <table:table-cell office:value-type="float" office:value="0.27296345000000005" table:style-name="c8">
            <text:p>0.27296</text:p>
          </table:table-cell>
          <table:table-cell office:value-type="float" office:value="-0.2631299502446338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4:15</text:p>
          </table:table-cell>
          <table:table-cell office:value-type="float" office:value="0.27353669999999997" table:style-name="c8">
            <text:p>0.27354</text:p>
          </table:table-cell>
          <table:table-cell office:value-type="string" table:style-name="c8">
            <text:p>2026-03-04 14:45</text:p>
          </table:table-cell>
          <table:table-cell office:value-type="float" office:value="0.27256365" table:style-name="c8">
            <text:p>0.27256</text:p>
          </table:table-cell>
          <table:table-cell office:value-type="float" office:value="-0.554918128481463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6:00</text:p>
          </table:table-cell>
          <table:table-cell office:value-type="float" office:value="0.28104044999999994" table:style-name="c8">
            <text:p>0.28104</text:p>
          </table:table-cell>
          <table:table-cell office:value-type="string" table:style-name="c8">
            <text:p>2026-03-04 16:30</text:p>
          </table:table-cell>
          <table:table-cell office:value-type="float" office:value="0.27896045" table:style-name="c8">
            <text:p>0.27896</text:p>
          </table:table-cell>
          <table:table-cell office:value-type="float" office:value="-0.938527510737297" table:style-name="c9">
            <text:p>-0.9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0:45</text:p>
          </table:table-cell>
          <table:table-cell office:value-type="float" office:value="0.27593789999999996" table:style-name="c8">
            <text:p>0.27594</text:p>
          </table:table-cell>
          <table:table-cell office:value-type="string" table:style-name="c8">
            <text:p>2026-03-05 11:15</text:p>
          </table:table-cell>
          <table:table-cell office:value-type="float" office:value="0.2760619" table:style-name="c8">
            <text:p>0.27606</text:p>
          </table:table-cell>
          <table:table-cell office:value-type="float" office:value="-0.1550521831542251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9:30</text:p>
          </table:table-cell>
          <table:table-cell office:value-type="float" office:value="0.26603295" table:style-name="c8">
            <text:p>0.26603</text:p>
          </table:table-cell>
          <table:table-cell office:value-type="string" table:style-name="c8">
            <text:p>2026-03-10 10:00</text:p>
          </table:table-cell>
          <table:table-cell office:value-type="float" office:value="0.2668665" table:style-name="c8">
            <text:p>0.26687</text:p>
          </table:table-cell>
          <table:table-cell office:value-type="float" office:value="0.11279951092524332" table:style-name="c10">
            <text:p>+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4:45</text:p>
          </table:table-cell>
          <table:table-cell office:value-type="float" office:value="0.2669334" table:style-name="c8">
            <text:p>0.26693</text:p>
          </table:table-cell>
          <table:table-cell office:value-type="string" table:style-name="c8">
            <text:p>2026-03-10 15:15</text:p>
          </table:table-cell>
          <table:table-cell office:value-type="float" office:value="0.2704647" table:style-name="c8">
            <text:p>0.27046</text:p>
          </table:table-cell>
          <table:table-cell office:value-type="float" office:value="1.1203697494206244" table:style-name="c10">
            <text:p>+1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1:15</text:p>
          </table:table-cell>
          <table:table-cell office:value-type="float" office:value="0.25992989999999994" table:style-name="c8">
            <text:p>0.25993</text:p>
          </table:table-cell>
          <table:table-cell office:value-type="string" table:style-name="c8">
            <text:p>2026-03-11 11:45</text:p>
          </table:table-cell>
          <table:table-cell office:value-type="float" office:value="0.25897045" table:style-name="c8">
            <text:p>0.25897</text:p>
          </table:table-cell>
          <table:table-cell office:value-type="float" office:value="-0.568280882480221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00</text:p>
          </table:table-cell>
          <table:table-cell office:value-type="float" office:value="0.26143065" table:style-name="c8">
            <text:p>0.26143</text:p>
          </table:table-cell>
          <table:table-cell office:value-type="string" table:style-name="c8">
            <text:p>2026-03-11 13:30</text:p>
          </table:table-cell>
          <table:table-cell office:value-type="float" office:value="0.26396795" table:style-name="c8">
            <text:p>0.26397</text:p>
          </table:table-cell>
          <table:table-cell office:value-type="float" office:value="0.7687040780987253" table:style-name="c10">
            <text:p>+0.8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7:30</text:p>
          </table:table-cell>
          <table:table-cell office:value-type="float" office:value="0.26583284999999995" table:style-name="c8">
            <text:p>0.26583</text:p>
          </table:table-cell>
          <table:table-cell office:value-type="string" table:style-name="c8">
            <text:p>2026-03-11 18:00</text:p>
          </table:table-cell>
          <table:table-cell office:value-type="float" office:value="0.26476755" table:style-name="c8">
            <text:p>0.26477</text:p>
          </table:table-cell>
          <table:table-cell office:value-type="float" office:value="-0.5998394601908319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8:30</text:p>
          </table:table-cell>
          <table:table-cell office:value-type="float" office:value="0.2615307" table:style-name="c8">
            <text:p>0.26153</text:p>
          </table:table-cell>
          <table:table-cell office:value-type="string" table:style-name="c8">
            <text:p>2026-03-12 09:00</text:p>
          </table:table-cell>
          <table:table-cell office:value-type="float" office:value="0.2606696" table:style-name="c8">
            <text:p>0.26067</text:p>
          </table:table-cell>
          <table:table-cell office:value-type="float" office:value="-0.5284957102168142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0:30</text:p>
          </table:table-cell>
          <table:table-cell office:value-type="float" office:value="0.2625312" table:style-name="c8">
            <text:p>0.26253</text:p>
          </table:table-cell>
          <table:table-cell office:value-type="string" table:style-name="c8">
            <text:p>2026-03-12 11:00</text:p>
          </table:table-cell>
          <table:table-cell office:value-type="float" office:value="0.26296845" table:style-name="c8">
            <text:p>0.26297</text:p>
          </table:table-cell>
          <table:table-cell office:value-type="float" office:value="-0.03368130399357128" table:style-name="c9">
            <text:p>-0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0.26953469999999996" table:style-name="c8">
            <text:p>0.26953</text:p>
          </table:table-cell>
          <table:table-cell office:value-type="string" table:style-name="c8">
            <text:p>2026-03-13 01:00</text:p>
          </table:table-cell>
          <table:table-cell office:value-type="float" office:value="0.26916535" table:style-name="c8">
            <text:p>0.26917</text:p>
          </table:table-cell>
          <table:table-cell office:value-type="float" office:value="-0.336658521017863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5:45</text:p>
          </table:table-cell>
          <table:table-cell office:value-type="float" office:value="0.27543765" table:style-name="c8">
            <text:p>0.27544</text:p>
          </table:table-cell>
          <table:table-cell office:value-type="string" table:style-name="c8">
            <text:p>2026-03-13 06:15</text:p>
          </table:table-cell>
          <table:table-cell office:value-type="float" office:value="0.2732633" table:style-name="c8">
            <text:p>0.27326</text:p>
          </table:table-cell>
          <table:table-cell office:value-type="float" office:value="-0.9877383635461423" table:style-name="c9">
            <text:p>-1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2:45</text:p>
          </table:table-cell>
          <table:table-cell office:value-type="float" office:value="0.2767383" table:style-name="c8">
            <text:p>0.27674</text:p>
          </table:table-cell>
          <table:table-cell office:value-type="string" table:style-name="c8">
            <text:p>2026-03-13 13:15</text:p>
          </table:table-cell>
          <table:table-cell office:value-type="float" office:value="0.27796095000000004" table:style-name="c8">
            <text:p>0.27796</text:p>
          </table:table-cell>
          <table:table-cell office:value-type="float" office:value="0.24102412313367072" table:style-name="c10">
            <text:p>+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0.27923955" table:style-name="c8">
            <text:p>0.27924</text:p>
          </table:table-cell>
          <table:table-cell office:value-type="string" table:style-name="c8">
            <text:p>2026-03-13 14:00</text:p>
          </table:table-cell>
          <table:table-cell office:value-type="float" office:value="0.27886050000000007" table:style-name="c8">
            <text:p>0.27886</text:p>
          </table:table-cell>
          <table:table-cell office:value-type="float" office:value="-0.3353723136639952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04:45</text:p>
          </table:table-cell>
          <table:table-cell office:value-type="float" office:value="0.2665332" table:style-name="c8">
            <text:p>0.26653</text:p>
          </table:table-cell>
          <table:table-cell office:value-type="string" table:style-name="c8">
            <text:p>2026-03-14 05:15</text:p>
          </table:table-cell>
          <table:table-cell office:value-type="float" office:value="0.2646676" table:style-name="c8">
            <text:p>0.26467</text:p>
          </table:table-cell>
          <table:table-cell office:value-type="float" office:value="-0.8984511244377935" table:style-name="c9">
            <text:p>-0.9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00</text:p>
          </table:table-cell>
          <table:table-cell office:value-type="float" office:value="0.26683334999999997" table:style-name="c8">
            <text:p>0.26683</text:p>
          </table:table-cell>
          <table:table-cell office:value-type="string" table:style-name="c8">
            <text:p>2026-03-15 22:30</text:p>
          </table:table-cell>
          <table:table-cell office:value-type="float" office:value="0.2660669" table:style-name="c8">
            <text:p>0.26607</text:p>
          </table:table-cell>
          <table:table-cell office:value-type="float" office:value="-0.4865650163669355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0.27003494999999994" table:style-name="c8">
            <text:p>0.27003</text:p>
          </table:table-cell>
          <table:table-cell office:value-type="string" table:style-name="c8">
            <text:p>2026-03-15 23:15</text:p>
          </table:table-cell>
          <table:table-cell office:value-type="float" office:value="0.27106440000000004" table:style-name="c8">
            <text:p>0.27106</text:p>
          </table:table-cell>
          <table:table-cell office:value-type="float" office:value="0.18056635424419376" table:style-name="c10">
            <text:p>+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0:15</text:p>
          </table:table-cell>
          <table:table-cell office:value-type="float" office:value="0.27193589999999995" table:style-name="c8">
            <text:p>0.27194</text:p>
          </table:table-cell>
          <table:table-cell office:value-type="string" table:style-name="c8">
            <text:p>2026-03-16 00:45</text:p>
          </table:table-cell>
          <table:table-cell office:value-type="float" office:value="0.2700649" table:style-name="c8">
            <text:p>0.27006</text:p>
          </table:table-cell>
          <table:table-cell office:value-type="float" office:value="-0.8865544178241924" table:style-name="c9">
            <text:p>-0.9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0.2783391" table:style-name="c8">
            <text:p>0.27834</text:p>
          </table:table-cell>
          <table:table-cell office:value-type="string" table:style-name="c8">
            <text:p>2026-03-16 04:15</text:p>
          </table:table-cell>
          <table:table-cell office:value-type="float" office:value="0.28005990000000003" table:style-name="c8">
            <text:p>0.28006</text:p>
          </table:table-cell>
          <table:table-cell office:value-type="float" office:value="0.4171028288515677" table:style-name="c10">
            <text:p>+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4:30</text:p>
          </table:table-cell>
          <table:table-cell office:value-type="float" office:value="0.28064025000000004" table:style-name="c8">
            <text:p>0.28064</text:p>
          </table:table-cell>
          <table:table-cell office:value-type="string" table:style-name="c8">
            <text:p>2026-03-16 05:00</text:p>
          </table:table-cell>
          <table:table-cell office:value-type="float" office:value="0.2828585" table:style-name="c8">
            <text:p>0.28286</text:p>
          </table:table-cell>
          <table:table-cell office:value-type="float" office:value="0.5889446928941888" table:style-name="c10">
            <text:p>+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7:30</text:p>
          </table:table-cell>
          <table:table-cell office:value-type="float" office:value="0.2877438" table:style-name="c8">
            <text:p>0.28774</text:p>
          </table:table-cell>
          <table:table-cell office:value-type="string" table:style-name="c8">
            <text:p>2026-03-17 08:00</text:p>
          </table:table-cell>
          <table:table-cell office:value-type="float" office:value="0.28635675" table:style-name="c8">
            <text:p>0.28636</text:p>
          </table:table-cell>
          <table:table-cell office:value-type="float" office:value="-0.6809797963500785" table:style-name="c9">
            <text:p>-0.7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5:15</text:p>
          </table:table-cell>
          <table:table-cell office:value-type="float" office:value="0.29444715" table:style-name="c8">
            <text:p>0.29445</text:p>
          </table:table-cell>
          <table:table-cell office:value-type="string" table:style-name="c8">
            <text:p>2026-03-18 05:45</text:p>
          </table:table-cell>
          <table:table-cell office:value-type="float" office:value="0.29095445000000003" table:style-name="c8">
            <text:p>0.29095</text:p>
          </table:table-cell>
          <table:table-cell office:value-type="float" office:value="-1.3837179084769335" table:style-name="c9">
            <text:p>-1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21:45</text:p>
          </table:table-cell>
          <table:table-cell office:value-type="float" office:value="0.264132" table:style-name="c8">
            <text:p>0.26413</text:p>
          </table:table-cell>
          <table:table-cell office:value-type="string" table:style-name="c8">
            <text:p>2026-03-23 22:15</text:p>
          </table:table-cell>
          <table:table-cell office:value-type="float" office:value="0.26196895000000003" table:style-name="c8">
            <text:p>0.26197</text:p>
          </table:table-cell>
          <table:table-cell office:value-type="float" office:value="-1.017190620996311" table:style-name="c9">
            <text:p>-1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8:15</text:p>
          </table:table-cell>
          <table:table-cell office:value-type="float" office:value="0.26783385" table:style-name="c8">
            <text:p>0.26783</text:p>
          </table:table-cell>
          <table:table-cell office:value-type="string" table:style-name="c8">
            <text:p>2026-03-24 08:45</text:p>
          </table:table-cell>
          <table:table-cell office:value-type="float" office:value="0.26756615" table:style-name="c8">
            <text:p>0.26757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0:15</text:p>
          </table:table-cell>
          <table:table-cell office:value-type="float" office:value="0.26843415" table:style-name="c8">
            <text:p>0.26843</text:p>
          </table:table-cell>
          <table:table-cell office:value-type="string" table:style-name="c8">
            <text:p>2026-03-25 00:45</text:p>
          </table:table-cell>
          <table:table-cell office:value-type="float" office:value="0.26786600000000005" table:style-name="c8">
            <text:p>0.26787</text:p>
          </table:table-cell>
          <table:table-cell office:value-type="float" office:value="-0.4111303029066704" table:style-name="c9">
            <text:p>-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6:30</text:p>
          </table:table-cell>
          <table:table-cell office:value-type="float" office:value="0.2703351" table:style-name="c8">
            <text:p>0.27034</text:p>
          </table:table-cell>
          <table:table-cell office:value-type="string" table:style-name="c8">
            <text:p>2026-03-25 07:00</text:p>
          </table:table-cell>
          <table:table-cell office:value-type="float" office:value="0.26936525000000006" table:style-name="c8">
            <text:p>0.26937</text:p>
          </table:table-cell>
          <table:table-cell office:value-type="float" office:value="-0.5579412864810895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3:15</text:p>
          </table:table-cell>
          <table:table-cell office:value-type="float" office:value="0.27643815" table:style-name="c8">
            <text:p>0.27644</text:p>
          </table:table-cell>
          <table:table-cell office:value-type="string" table:style-name="c8">
            <text:p>2026-03-25 13:45</text:p>
          </table:table-cell>
          <table:table-cell office:value-type="float" office:value="0.27296345000000005" table:style-name="c8">
            <text:p>0.27296</text:p>
          </table:table-cell>
          <table:table-cell office:value-type="float" office:value="-1.4543412103394382" table:style-name="c9">
            <text:p>-1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23:00</text:p>
          </table:table-cell>
          <table:table-cell office:value-type="float" office:value="0.27083535" table:style-name="c8">
            <text:p>0.27084</text:p>
          </table:table-cell>
          <table:table-cell office:value-type="string" table:style-name="c8">
            <text:p>2026-03-25 23:30</text:p>
          </table:table-cell>
          <table:table-cell office:value-type="float" office:value="0.2700649" table:style-name="c8">
            <text:p>0.27006</text:p>
          </table:table-cell>
          <table:table-cell office:value-type="float" office:value="-0.483803068949451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5:00</text:p>
          </table:table-cell>
          <table:table-cell office:value-type="float" office:value="0.24772379999999997" table:style-name="c8">
            <text:p>0.24772</text:p>
          </table:table-cell>
          <table:table-cell office:value-type="string" table:style-name="c8">
            <text:p>2026-04-03 15:30</text:p>
          </table:table-cell>
          <table:table-cell office:value-type="float" office:value="0.24727630000000003" table:style-name="c8">
            <text:p>0.24728</text:p>
          </table:table-cell>
          <table:table-cell office:value-type="float" office:value="-0.38018362535209294" table:style-name="c9">
            <text:p>-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5:15</text:p>
          </table:table-cell>
          <table:table-cell office:value-type="float" office:value="0.2465232" table:style-name="c8">
            <text:p>0.24652</text:p>
          </table:table-cell>
          <table:table-cell office:value-type="string" table:style-name="c8">
            <text:p>2026-04-04 15:45</text:p>
          </table:table-cell>
          <table:table-cell office:value-type="float" office:value="0.24507740000000003" table:style-name="c8">
            <text:p>0.24508</text:p>
          </table:table-cell>
          <table:table-cell office:value-type="float" office:value="-0.7852038763897173" table:style-name="c9">
            <text:p>-0.8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9:15</text:p>
          </table:table-cell>
          <table:table-cell office:value-type="float" office:value="0.24982485" table:style-name="c8">
            <text:p>0.24982</text:p>
          </table:table-cell>
          <table:table-cell office:value-type="string" table:style-name="c8">
            <text:p>2026-04-04 19:45</text:p>
          </table:table-cell>
          <table:table-cell office:value-type="float" office:value="0.24757615000000002" table:style-name="c8">
            <text:p>0.24758</text:p>
          </table:table-cell>
          <table:table-cell office:value-type="float" office:value="-1.0982112963742297" table:style-name="c9">
            <text:p>-1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0:15</text:p>
          </table:table-cell>
          <table:table-cell office:value-type="float" office:value="0.25482734999999995" table:style-name="c8">
            <text:p>0.25483</text:p>
          </table:table-cell>
          <table:table-cell office:value-type="string" table:style-name="c8">
            <text:p>2026-04-06 00:45</text:p>
          </table:table-cell>
          <table:table-cell office:value-type="float" office:value="0.25537225" table:style-name="c8">
            <text:p>0.25537</text:p>
          </table:table-cell>
          <table:table-cell office:value-type="float" office:value="0.013503602439079998" table:style-name="c10">
            <text:p>+0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2:15</text:p>
          </table:table-cell>
          <table:table-cell office:value-type="float" office:value="0.2577288" table:style-name="c8">
            <text:p>0.25773</text:p>
          </table:table-cell>
          <table:table-cell office:value-type="string" table:style-name="c8">
            <text:p>2026-04-06 02:45</text:p>
          </table:table-cell>
          <table:table-cell office:value-type="float" office:value="0.2570714" table:style-name="c8">
            <text:p>0.25707</text:p>
          </table:table-cell>
          <table:table-cell office:value-type="float" office:value="-0.4544644326128666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30</text:p>
          </table:table-cell>
          <table:table-cell office:value-type="float" office:value="0.25842914999999994" table:style-name="c8">
            <text:p>0.25843</text:p>
          </table:table-cell>
          <table:table-cell office:value-type="string" table:style-name="c8">
            <text:p>2026-04-06 11:00</text:p>
          </table:table-cell>
          <table:table-cell office:value-type="float" office:value="0.25657165" table:style-name="c8">
            <text:p>0.25657</text:p>
          </table:table-cell>
          <table:table-cell office:value-type="float" office:value="-0.9172288529951" table:style-name="c9">
            <text:p>-0.9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0.26283134999999996" table:style-name="c8">
            <text:p>0.26283</text:p>
          </table:table-cell>
          <table:table-cell office:value-type="string" table:style-name="c8">
            <text:p>2026-04-07 23:30</text:p>
          </table:table-cell>
          <table:table-cell office:value-type="float" office:value="0.26556715000000003" table:style-name="c8">
            <text:p>0.26557</text:p>
          </table:table-cell>
          <table:table-cell office:value-type="float" office:value="0.8389148658065615" table:style-name="c10">
            <text:p>+0.8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0.2583291" table:style-name="c8">
            <text:p>0.25833</text:p>
          </table:table-cell>
          <table:table-cell office:value-type="string" table:style-name="c8">
            <text:p>2026-04-09 23:00</text:p>
          </table:table-cell>
          <table:table-cell office:value-type="float" office:value="0.25597195" table:style-name="c8">
            <text:p>0.25597</text:p>
          </table:table-cell>
          <table:table-cell office:value-type="float" office:value="-1.110536106094906" table:style-name="c9">
            <text:p>-1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30</text:p>
          </table:table-cell>
          <table:table-cell office:value-type="float" office:value="0.2549274" table:style-name="c8">
            <text:p>0.25493</text:p>
          </table:table-cell>
          <table:table-cell office:value-type="string" table:style-name="c8">
            <text:p>2026-04-10 15:00</text:p>
          </table:table-cell>
          <table:table-cell office:value-type="float" office:value="0.25517235000000005" table:style-name="c8">
            <text:p>0.25517</text:p>
          </table:table-cell>
          <table:table-cell office:value-type="float" office:value="-0.10400589644345981" table:style-name="c9">
            <text:p>-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9:15</text:p>
          </table:table-cell>
          <table:table-cell office:value-type="float" office:value="0.25782884999999994" table:style-name="c8">
            <text:p>0.25783</text:p>
          </table:table-cell>
          <table:table-cell office:value-type="string" table:style-name="c8">
            <text:p>2026-04-10 19:45</text:p>
          </table:table-cell>
          <table:table-cell office:value-type="float" office:value="0.25757115" table:style-name="c8">
            <text:p>0.25757</text:p>
          </table:table-cell>
          <table:table-cell office:value-type="float" office:value="-0.29965022488750437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00</text:p>
          </table:table-cell>
          <table:table-cell office:value-type="float" office:value="0.24532259999999997" table:style-name="c8">
            <text:p>0.24532</text:p>
          </table:table-cell>
          <table:table-cell office:value-type="string" table:style-name="c8">
            <text:p>2026-04-15 17:30</text:p>
          </table:table-cell>
          <table:table-cell office:value-type="float" office:value="0.24577705000000002" table:style-name="c8">
            <text:p>0.24578</text:p>
          </table:table-cell>
          <table:table-cell office:value-type="float" office:value="-0.015024430260368593" table:style-name="c9">
            <text:p>-0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0.24982485" table:style-name="c8">
            <text:p>0.24982</text:p>
          </table:table-cell>
          <table:table-cell office:value-type="string" table:style-name="c8">
            <text:p>2026-04-15 20:15</text:p>
          </table:table-cell>
          <table:table-cell office:value-type="float" office:value="0.24797595" table:style-name="c8">
            <text:p>0.24798</text:p>
          </table:table-cell>
          <table:table-cell office:value-type="float" office:value="-0.9384990820768935" table:style-name="c9">
            <text:p>-0.9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45</text:p>
          </table:table-cell>
          <table:table-cell office:value-type="float" office:value="0.2491245" table:style-name="c8">
            <text:p>0.24912</text:p>
          </table:table-cell>
          <table:table-cell office:value-type="string" table:style-name="c8">
            <text:p>2026-04-16 03:15</text:p>
          </table:table-cell>
          <table:table-cell office:value-type="float" office:value="0.24837575" table:style-name="c8">
            <text:p>0.24838</text:p>
          </table:table-cell>
          <table:table-cell office:value-type="float" office:value="-0.4998517304600658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4:00</text:p>
          </table:table-cell>
          <table:table-cell office:value-type="float" office:value="0.24932459999999998" table:style-name="c8">
            <text:p>0.24932</text:p>
          </table:table-cell>
          <table:table-cell office:value-type="string" table:style-name="c8">
            <text:p>2026-04-16 04:30</text:p>
          </table:table-cell>
          <table:table-cell office:value-type="float" office:value="0.2500749" table:style-name="c8">
            <text:p>0.25007</text:p>
          </table:table-cell>
          <table:table-cell office:value-type="float" office:value="0.10043143552620482" table:style-name="c10">
            <text:p>+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0.25282635" table:style-name="c8">
            <text:p>0.25283</text:p>
          </table:table-cell>
          <table:table-cell office:value-type="string" table:style-name="c8">
            <text:p>2026-04-16 13:45</text:p>
          </table:table-cell>
          <table:table-cell office:value-type="float" office:value="0.25337325" table:style-name="c8">
            <text:p>0.25337</text:p>
          </table:table-cell>
          <table:table-cell office:value-type="float" office:value="0.015982065654940314" table:style-name="c10">
            <text:p>+0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9:00</text:p>
          </table:table-cell>
          <table:table-cell office:value-type="float" office:value="0.2591295" table:style-name="c8">
            <text:p>0.25913</text:p>
          </table:table-cell>
          <table:table-cell office:value-type="string" table:style-name="c8">
            <text:p>2026-04-16 19:30</text:p>
          </table:table-cell>
          <table:table-cell office:value-type="float" office:value="0.2584707" table:style-name="c8">
            <text:p>0.25847</text:p>
          </table:table-cell>
          <table:table-cell office:value-type="float" office:value="-0.4536275990576155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15</text:p>
          </table:table-cell>
          <table:table-cell office:value-type="float" office:value="0.25582784999999997" table:style-name="c8">
            <text:p>0.25583</text:p>
          </table:table-cell>
          <table:table-cell office:value-type="string" table:style-name="c8">
            <text:p>2026-04-17 07:45</text:p>
          </table:table-cell>
          <table:table-cell office:value-type="float" office:value="0.25597195" table:style-name="c8">
            <text:p>0.25597</text:p>
          </table:table-cell>
          <table:table-cell office:value-type="float" office:value="-0.14368565738639427" table:style-name="c9">
            <text:p>-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00</text:p>
          </table:table-cell>
          <table:table-cell office:value-type="float" office:value="0.25632809999999995" table:style-name="c8">
            <text:p>0.25633</text:p>
          </table:table-cell>
          <table:table-cell office:value-type="string" table:style-name="c8">
            <text:p>2026-04-17 08:30</text:p>
          </table:table-cell>
          <table:table-cell office:value-type="float" office:value="0.2564717" table:style-name="c8">
            <text:p>0.25647</text:p>
          </table:table-cell>
          <table:table-cell office:value-type="float" office:value="-0.1439900378850112" table:style-name="c9">
            <text:p>-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0.2571285" table:style-name="c8">
            <text:p>0.25713</text:p>
          </table:table-cell>
          <table:table-cell office:value-type="string" table:style-name="c8">
            <text:p>2026-04-17 09:15</text:p>
          </table:table-cell>
          <table:table-cell office:value-type="float" office:value="0.25687150000000003" table:style-name="c8">
            <text:p>0.25687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2:15</text:p>
          </table:table-cell>
          <table:table-cell office:value-type="float" office:value="0.25842914999999994" table:style-name="c8">
            <text:p>0.25843</text:p>
          </table:table-cell>
          <table:table-cell office:value-type="string" table:style-name="c8">
            <text:p>2026-04-17 12:45</text:p>
          </table:table-cell>
          <table:table-cell office:value-type="float" office:value="0.2584707" table:style-name="c8">
            <text:p>0.25847</text:p>
          </table:table-cell>
          <table:table-cell office:value-type="float" office:value="-0.18385423211737528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00</text:p>
          </table:table-cell>
          <table:table-cell office:value-type="float" office:value="0.26063025" table:style-name="c8">
            <text:p>0.26063</text:p>
          </table:table-cell>
          <table:table-cell office:value-type="string" table:style-name="c8">
            <text:p>2026-04-17 13:30</text:p>
          </table:table-cell>
          <table:table-cell office:value-type="float" office:value="0.2630684" table:style-name="c8">
            <text:p>0.26307</text:p>
          </table:table-cell>
          <table:table-cell office:value-type="float" office:value="0.7337123255646727" table:style-name="c10">
            <text:p>+0.7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45</text:p>
          </table:table-cell>
          <table:table-cell office:value-type="float" office:value="0.26463225" table:style-name="c8">
            <text:p>0.26463</text:p>
          </table:table-cell>
          <table:table-cell office:value-type="string" table:style-name="c8">
            <text:p>2026-04-17 14:15</text:p>
          </table:table-cell>
          <table:table-cell office:value-type="float" office:value="0.26536725000000005" table:style-name="c8">
            <text:p>0.26537</text:p>
          </table:table-cell>
          <table:table-cell office:value-type="float" office:value="0.07728871566110573" table:style-name="c10">
            <text:p>+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1 08:45</text:p>
          </table:table-cell>
          <table:table-cell office:value-type="float" office:value="0.2511255" table:style-name="c8">
            <text:p>0.25113</text:p>
          </table:table-cell>
          <table:table-cell office:value-type="string" table:style-name="c8">
            <text:p>2026-04-21 09:15</text:p>
          </table:table-cell>
          <table:table-cell office:value-type="float" office:value="0.249875" table:style-name="c8">
            <text:p>0.24988</text:p>
          </table:table-cell>
          <table:table-cell office:value-type="float" office:value="-0.6968627737923949" table:style-name="c9">
            <text:p>-0.7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2:30</text:p>
          </table:table-cell>
          <table:table-cell office:value-type="float" office:value="0.25382685" table:style-name="c8">
            <text:p>0.25383</text:p>
          </table:table-cell>
          <table:table-cell office:value-type="string" table:style-name="c8">
            <text:p>2026-04-22 03:00</text:p>
          </table:table-cell>
          <table:table-cell office:value-type="float" office:value="0.25417285000000006" table:style-name="c8">
            <text:p>0.25417</text:p>
          </table:table-cell>
          <table:table-cell office:value-type="float" office:value="-0.06385909416201097" table:style-name="c9">
            <text:p>-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0.25702845" table:style-name="c8">
            <text:p>0.25703</text:p>
          </table:table-cell>
          <table:table-cell office:value-type="string" table:style-name="c8">
            <text:p>2026-04-22 06:00</text:p>
          </table:table-cell>
          <table:table-cell office:value-type="float" office:value="0.25567210000000007" table:style-name="c8">
            <text:p>0.25567</text:p>
          </table:table-cell>
          <table:table-cell office:value-type="float" office:value="-0.7265493480974383" table:style-name="c9">
            <text:p>-0.7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13:30</text:p>
          </table:table-cell>
          <table:table-cell office:value-type="float" office:value="0.2553276" table:style-name="c8">
            <text:p>0.25533</text:p>
          </table:table-cell>
          <table:table-cell office:value-type="string" table:style-name="c8">
            <text:p>2026-04-22 14:00</text:p>
          </table:table-cell>
          <table:table-cell office:value-type="float" office:value="0.2548725" table:style-name="c8">
            <text:p>0.25487</text:p>
          </table:table-cell>
          <table:table-cell office:value-type="float" office:value="-0.377785295244204" table:style-name="c9">
            <text:p>-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6:45</text:p>
          </table:table-cell>
          <table:table-cell office:value-type="float" office:value="0.25192590000000004" table:style-name="c8">
            <text:p>0.25193</text:p>
          </table:table-cell>
          <table:table-cell office:value-type="string" table:style-name="c8">
            <text:p>2026-04-26 07:15</text:p>
          </table:table-cell>
          <table:table-cell office:value-type="float" office:value="0.25137425" table:style-name="c8">
            <text:p>0.25137</text:p>
          </table:table-cell>
          <table:table-cell office:value-type="float" office:value="-0.41843539141868114" table:style-name="c9">
            <text:p>-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9:30</text:p>
          </table:table-cell>
          <table:table-cell office:value-type="float" office:value="0.25282635" table:style-name="c8">
            <text:p>0.25283</text:p>
          </table:table-cell>
          <table:table-cell office:value-type="string" table:style-name="c8">
            <text:p>2026-04-26 10:00</text:p>
          </table:table-cell>
          <table:table-cell office:value-type="float" office:value="0.2520739" table:style-name="c8">
            <text:p>0.25207</text:p>
          </table:table-cell>
          <table:table-cell office:value-type="float" office:value="-0.4969204064766086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0.25302645" table:style-name="c8">
            <text:p>0.25303</text:p>
          </table:table-cell>
          <table:table-cell office:value-type="string" table:style-name="c8">
            <text:p>2026-04-29 10:30</text:p>
          </table:table-cell>
          <table:table-cell office:value-type="float" office:value="0.25377305000000006" table:style-name="c8">
            <text:p>0.25377</text:p>
          </table:table-cell>
          <table:table-cell office:value-type="float" office:value="0.0945781253501643" table:style-name="c10">
            <text:p>+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4:00</text:p>
          </table:table-cell>
          <table:table-cell office:value-type="float" office:value="0.25062524999999997" table:style-name="c8">
            <text:p>0.25063</text:p>
          </table:table-cell>
          <table:table-cell office:value-type="string" table:style-name="c8">
            <text:p>2026-05-01 14:30</text:p>
          </table:table-cell>
          <table:table-cell office:value-type="float" office:value="0.249875" table:style-name="c8">
            <text:p>0.24988</text:p>
          </table:table-cell>
          <table:table-cell office:value-type="float" office:value="-0.498652919049436" table:style-name="c9">
            <text:p>-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00</text:p>
          </table:table-cell>
          <table:table-cell office:value-type="float" office:value="0.25232609999999994" table:style-name="c8">
            <text:p>0.25233</text:p>
          </table:table-cell>
          <table:table-cell office:value-type="string" table:style-name="c8">
            <text:p>2026-05-04 02:30</text:p>
          </table:table-cell>
          <table:table-cell office:value-type="float" office:value="0.2520739" table:style-name="c8">
            <text:p>0.25207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0.25262625" table:style-name="c8">
            <text:p>0.25263</text:p>
          </table:table-cell>
          <table:table-cell office:value-type="string" table:style-name="c8">
            <text:p>2026-05-04 15:30</text:p>
          </table:table-cell>
          <table:table-cell office:value-type="float" office:value="0.25057465" table:style-name="c8">
            <text:p>0.25057</text:p>
          </table:table-cell>
          <table:table-cell office:value-type="float" office:value="-1.0103853916012429" table:style-name="c9">
            <text:p>-1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7:00</text:p>
          </table:table-cell>
          <table:table-cell office:value-type="float" office:value="0.25482734999999995" table:style-name="c8">
            <text:p>0.25483</text:p>
          </table:table-cell>
          <table:table-cell office:value-type="string" table:style-name="c8">
            <text:p>2026-05-05 07:30</text:p>
          </table:table-cell>
          <table:table-cell office:value-type="float" office:value="0.2564717" table:style-name="c8">
            <text:p>0.25647</text:p>
          </table:table-cell>
          <table:table-cell office:value-type="float" office:value="0.44409011501320705" table:style-name="c10">
            <text:p>+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7:45</text:p>
          </table:table-cell>
          <table:table-cell office:value-type="float" office:value="0.25802895" table:style-name="c8">
            <text:p>0.25803</text:p>
          </table:table-cell>
          <table:table-cell office:value-type="string" table:style-name="c8">
            <text:p>2026-05-05 08:15</text:p>
          </table:table-cell>
          <table:table-cell office:value-type="float" office:value="0.25757115" table:style-name="c8">
            <text:p>0.25757</text:p>
          </table:table-cell>
          <table:table-cell office:value-type="float" office:value="-0.3769672855894357" table:style-name="c9">
            <text:p>-0.4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00</text:p>
          </table:table-cell>
          <table:table-cell office:value-type="float" office:value="0.26133059999999997" table:style-name="c8">
            <text:p>0.26133</text:p>
          </table:table-cell>
          <table:table-cell office:value-type="string" table:style-name="c8">
            <text:p>2026-05-05 21:30</text:p>
          </table:table-cell>
          <table:table-cell office:value-type="float" office:value="0.2630684" table:style-name="c8">
            <text:p>0.26307</text:p>
          </table:table-cell>
          <table:table-cell office:value-type="float" office:value="0.46375214705052237" table:style-name="c10">
            <text:p>+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45</text:p>
          </table:table-cell>
          <table:table-cell office:value-type="float" office:value="0.2631315" table:style-name="c8">
            <text:p>0.26313</text:p>
          </table:table-cell>
          <table:table-cell office:value-type="string" table:style-name="c8">
            <text:p>2026-05-05 22:15</text:p>
          </table:table-cell>
          <table:table-cell office:value-type="float" office:value="0.2650674" table:style-name="c8">
            <text:p>0.26507</text:p>
          </table:table-cell>
          <table:table-cell office:value-type="float" office:value="0.5343450964251595" table:style-name="c10">
            <text:p>+0.5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2:30</text:p>
          </table:table-cell>
          <table:table-cell office:value-type="float" office:value="0.26443215" table:style-name="c8">
            <text:p>0.26443</text:p>
          </table:table-cell>
          <table:table-cell office:value-type="string" table:style-name="c8">
            <text:p>2026-05-05 23:00</text:p>
          </table:table-cell>
          <table:table-cell office:value-type="float" office:value="0.26236875000000004" table:style-name="c8">
            <text:p>0.26237</text:p>
          </table:table-cell>
          <table:table-cell office:value-type="float" office:value="-0.9786537420846675" table:style-name="c9">
            <text:p>-1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8:15</text:p>
          </table:table-cell>
          <table:table-cell office:value-type="float" office:value="0.26583284999999995" table:style-name="c8">
            <text:p>0.26583</text:p>
          </table:table-cell>
          <table:table-cell office:value-type="string" table:style-name="c8">
            <text:p>2026-05-06 08:45</text:p>
          </table:table-cell>
          <table:table-cell office:value-type="float" office:value="0.26896545" table:style-name="c8">
            <text:p>0.26897</text:p>
          </table:table-cell>
          <table:table-cell office:value-type="float" office:value="0.9761540251515433" table:style-name="c10">
            <text:p>+1.0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00</text:p>
          </table:table-cell>
          <table:table-cell office:value-type="float" office:value="0.272136" table:style-name="c8">
            <text:p>0.27214</text:p>
          </table:table-cell>
          <table:table-cell office:value-type="string" table:style-name="c8">
            <text:p>2026-05-06 09:30</text:p>
          </table:table-cell>
          <table:table-cell office:value-type="float" office:value="0.27056465" table:style-name="c8">
            <text:p>0.27056</text:p>
          </table:table-cell>
          <table:table-cell office:value-type="float" office:value="-0.776159249548003" table:style-name="c9">
            <text:p>-0.8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45</text:p>
          </table:table-cell>
          <table:table-cell office:value-type="float" office:value="0.2731365" table:style-name="c8">
            <text:p>0.27314</text:p>
          </table:table-cell>
          <table:table-cell office:value-type="string" table:style-name="c8">
            <text:p>2026-05-06 10:15</text:p>
          </table:table-cell>
          <table:table-cell office:value-type="float" office:value="0.2716641" table:style-name="c8">
            <text:p>0.27166</text:p>
          </table:table-cell>
          <table:table-cell office:value-type="float" office:value="-0.7378935206023174" table:style-name="c9">
            <text:p>-0.7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7:45</text:p>
          </table:table-cell>
          <table:table-cell office:value-type="float" office:value="0.27173579999999997" table:style-name="c8">
            <text:p>0.27174</text:p>
          </table:table-cell>
          <table:table-cell office:value-type="string" table:style-name="c8">
            <text:p>2026-05-08 18:15</text:p>
          </table:table-cell>
          <table:table-cell office:value-type="float" office:value="0.2716641" table:style-name="c8">
            <text:p>0.27166</text:p>
          </table:table-cell>
          <table:table-cell office:value-type="float" office:value="-0.22623317792500597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1:45</text:p>
          </table:table-cell>
          <table:table-cell office:value-type="float" office:value="0.2773386" table:style-name="c8">
            <text:p>0.27734</text:p>
          </table:table-cell>
          <table:table-cell office:value-type="string" table:style-name="c8">
            <text:p>2026-05-08 22:15</text:p>
          </table:table-cell>
          <table:table-cell office:value-type="float" office:value="0.2770614" table:style-name="c8">
            <text:p>0.27706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2:00</text:p>
          </table:table-cell>
          <table:table-cell office:value-type="float" office:value="0.2777388" table:style-name="c8">
            <text:p>0.27774</text:p>
          </table:table-cell>
          <table:table-cell office:value-type="string" table:style-name="c8">
            <text:p>2026-05-09 02:30</text:p>
          </table:table-cell>
          <table:table-cell office:value-type="float" office:value="0.27656165" table:style-name="c8">
            <text:p>0.27656</text:p>
          </table:table-cell>
          <table:table-cell office:value-type="float" office:value="-0.6228862292017023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8:30</text:p>
          </table:table-cell>
          <table:table-cell office:value-type="float" office:value="0.27303645" table:style-name="c8">
            <text:p>0.27304</text:p>
          </table:table-cell>
          <table:table-cell office:value-type="string" table:style-name="c8">
            <text:p>2026-05-09 19:00</text:p>
          </table:table-cell>
          <table:table-cell office:value-type="float" office:value="0.27186400000000005" table:style-name="c8">
            <text:p>0.27186</text:p>
          </table:table-cell>
          <table:table-cell office:value-type="float" office:value="-0.6284531373008662" table:style-name="c9">
            <text:p>-0.6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8:30</text:p>
          </table:table-cell>
          <table:table-cell office:value-type="float" office:value="0.27293639999999997" table:style-name="c8">
            <text:p>0.27294</text:p>
          </table:table-cell>
          <table:table-cell office:value-type="string" table:style-name="c8">
            <text:p>2026-05-10 09:00</text:p>
          </table:table-cell>
          <table:table-cell office:value-type="float" office:value="0.2730634" table:style-name="c8">
            <text:p>0.27306</text:p>
          </table:table-cell>
          <table:table-cell office:value-type="float" office:value="-0.15346202873637305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5:45</text:p>
          </table:table-cell>
          <table:table-cell office:value-type="float" office:value="0.27743864999999995" table:style-name="c8">
            <text:p>0.27744</text:p>
          </table:table-cell>
          <table:table-cell office:value-type="string" table:style-name="c8">
            <text:p>2026-05-10 16:15</text:p>
          </table:table-cell>
          <table:table-cell office:value-type="float" office:value="0.2814592" table:style-name="c8">
            <text:p>0.28146</text:p>
          </table:table-cell>
          <table:table-cell office:value-type="float" office:value="1.2463703450114494" table:style-name="c10">
            <text:p>+1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30</text:p>
          </table:table-cell>
          <table:table-cell office:value-type="float" office:value="0.28404195" table:style-name="c8">
            <text:p>0.28404</text:p>
          </table:table-cell>
          <table:table-cell office:value-type="string" table:style-name="c8">
            <text:p>2026-05-10 17:00</text:p>
          </table:table-cell>
          <table:table-cell office:value-type="float" office:value="0.28445770000000004" table:style-name="c8">
            <text:p>0.28446</text:p>
          </table:table-cell>
          <table:table-cell office:value-type="float" office:value="-0.05382336739341298" table:style-name="c9">
            <text:p>-0.1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0:15</text:p>
          </table:table-cell>
          <table:table-cell office:value-type="float" office:value="0.27983985" table:style-name="c8">
            <text:p>0.27984</text:p>
          </table:table-cell>
          <table:table-cell office:value-type="string" table:style-name="c8">
            <text:p>2026-05-11 10:45</text:p>
          </table:table-cell>
          <table:table-cell office:value-type="float" office:value="0.27986000000000005" table:style-name="c8">
            <text:p>0.27986</text:p>
          </table:table-cell>
          <table:table-cell office:value-type="float" office:value="-0.19271384686632143" table:style-name="c9">
            <text:p>-0.2</text:p>
          </table:table-cell>
        </table:table-row>
        <table:table-row>
          <table:table-cell office:value-type="string" table:style-name="c7">
            <text:p>AD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6:45</text:p>
          </table:table-cell>
          <table:table-cell office:value-type="float" office:value="0.24732359999999998" table:style-name="c8">
            <text:p>0.24732</text:p>
          </table:table-cell>
          <table:table-cell office:value-type="string" table:style-name="c8">
            <text:p>2026-05-25 17:15</text:p>
          </table:table-cell>
          <table:table-cell office:value-type="float" office:value="0.2468765" table:style-name="c8">
            <text:p>0.24688</text:p>
          </table:table-cell>
          <table:table-cell office:value-type="float" office:value="-0.380313938297816" table:style-name="c9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7:45</text:p>
          </table:table-cell>
          <table:table-cell office:value-type="float" office:value="0.9934964999999999" table:style-name="c1">
            <text:p>0.9935</text:p>
          </table:table-cell>
          <table:table-cell office:value-type="string" table:style-name="c1">
            <text:p>2026-03-03 18:15</text:p>
          </table:table-cell>
          <table:table-cell office:value-type="float" office:value="0.9965015" table:style-name="c1">
            <text:p>0.9965</text:p>
          </table:table-cell>
          <table:table-cell office:value-type="float" office:value="0.10196246302831558" table:style-name="c11">
            <text:p>+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23:15</text:p>
          </table:table-cell>
          <table:table-cell office:value-type="float" office:value="1.014507" table:style-name="c1">
            <text:p>1.0145</text:p>
          </table:table-cell>
          <table:table-cell office:value-type="string" table:style-name="c1">
            <text:p>2026-03-03 23:45</text:p>
          </table:table-cell>
          <table:table-cell office:value-type="float" office:value="1.013493" table:style-name="c1">
            <text:p>1.0135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7:15</text:p>
          </table:table-cell>
          <table:table-cell office:value-type="float" office:value="1.0075034999999999" table:style-name="c1">
            <text:p>1.0075</text:p>
          </table:table-cell>
          <table:table-cell office:value-type="string" table:style-name="c1">
            <text:p>2026-03-05 07:45</text:p>
          </table:table-cell>
          <table:table-cell office:value-type="float" office:value="0.9985005" table:style-name="c1">
            <text:p>0.9985</text:p>
          </table:table-cell>
          <table:table-cell office:value-type="float" office:value="-1.0917086143621302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9974985" table:style-name="c1">
            <text:p>0.9975</text:p>
          </table:table-cell>
          <table:table-cell office:value-type="string" table:style-name="c1">
            <text:p>2026-03-05 19:45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0.9996526806807182" table:style-name="c12">
            <text:p>-1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1.0235115" table:style-name="c1">
            <text:p>1.0235</text:p>
          </table:table-cell>
          <table:table-cell office:value-type="string" table:style-name="c1">
            <text:p>2026-03-06 08:30</text:p>
          </table:table-cell>
          <table:table-cell office:value-type="float" office:value="1.013493" table:style-name="c1">
            <text:p>1.0135</text:p>
          </table:table-cell>
          <table:table-cell office:value-type="float" office:value="-1.176779401794692" table:style-name="c12">
            <text:p>-1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30</text:p>
          </table:table-cell>
          <table:table-cell office:value-type="float" office:value="0.9664829999999999" table:style-name="c1">
            <text:p>0.96648</text:p>
          </table:table-cell>
          <table:table-cell office:value-type="string" table:style-name="c1">
            <text:p>2026-03-09 15:00</text:p>
          </table:table-cell>
          <table:table-cell office:value-type="float" office:value="0.9645175" table:style-name="c1">
            <text:p>0.96452</text:p>
          </table:table-cell>
          <table:table-cell office:value-type="float" office:value="-0.40285969670442734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15</text:p>
          </table:table-cell>
          <table:table-cell office:value-type="float" office:value="0.9904949999999999" table:style-name="c1">
            <text:p>0.99049</text:p>
          </table:table-cell>
          <table:table-cell office:value-type="string" table:style-name="c1">
            <text:p>2026-03-10 15:45</text:p>
          </table:table-cell>
          <table:table-cell office:value-type="float" office:value="0.9865065000000001" table:style-name="c1">
            <text:p>0.98651</text:p>
          </table:table-cell>
          <table:table-cell office:value-type="float" office:value="-0.6017724969333282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5:00</text:p>
          </table:table-cell>
          <table:table-cell office:value-type="float" office:value="0.9594794999999999" table:style-name="c1">
            <text:p>0.95948</text:p>
          </table:table-cell>
          <table:table-cell office:value-type="string" table:style-name="c1">
            <text:p>2026-03-13 15:30</text:p>
          </table:table-cell>
          <table:table-cell office:value-type="float" office:value="0.9575210000000001" table:style-name="c1">
            <text:p>0.95752</text:p>
          </table:table-cell>
          <table:table-cell office:value-type="float" office:value="-0.4036130505133073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3-15 23:15</text:p>
          </table:table-cell>
          <table:table-cell office:value-type="float" office:value="0.9355320000000001" table:style-name="c1">
            <text:p>0.93553</text:p>
          </table:table-cell>
          <table:table-cell office:value-type="float" office:value="-0.08615911187874747" table:style-name="c12">
            <text:p>-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942471" table:style-name="c1">
            <text:p>0.94247</text:p>
          </table:table-cell>
          <table:table-cell office:value-type="string" table:style-name="c1">
            <text:p>2026-03-16 04:00</text:p>
          </table:table-cell>
          <table:table-cell office:value-type="float" office:value="0.951524" table:style-name="c1">
            <text:p>0.95152</text:p>
          </table:table-cell>
          <table:table-cell office:value-type="float" office:value="0.7587399001136363" table:style-name="c11">
            <text:p>+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15</text:p>
          </table:table-cell>
          <table:table-cell office:value-type="float" office:value="0.9604799999999999" table:style-name="c1">
            <text:p>0.96048</text:p>
          </table:table-cell>
          <table:table-cell office:value-type="string" table:style-name="c1">
            <text:p>2026-03-16 04:45</text:p>
          </table:table-cell>
          <table:table-cell office:value-type="float" office:value="0.9605195" table:style-name="c1">
            <text:p>0.96052</text:p>
          </table:table-cell>
          <table:table-cell office:value-type="float" office:value="-0.19579569387180307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0.9974985" table:style-name="c1">
            <text:p>0.9975</text:p>
          </table:table-cell>
          <table:table-cell office:value-type="string" table:style-name="c1">
            <text:p>2026-03-16 14:15</text:p>
          </table:table-cell>
          <table:table-cell office:value-type="float" office:value="1.0074960000000002" table:style-name="c1">
            <text:p>1.0075</text:p>
          </table:table-cell>
          <table:table-cell office:value-type="float" office:value="0.8003536342160222" table:style-name="c11">
            <text:p>+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1.0155074999999998" table:style-name="c1">
            <text:p>1.0155</text:p>
          </table:table-cell>
          <table:table-cell office:value-type="string" table:style-name="c1">
            <text:p>2026-03-16 17:15</text:p>
          </table:table-cell>
          <table:table-cell office:value-type="float" office:value="1.0074960000000002" table:style-name="c1">
            <text:p>1.0075</text:p>
          </table:table-cell>
          <table:table-cell office:value-type="float" office:value="-0.9872388440262281" table:style-name="c12">
            <text:p>-1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30</text:p>
          </table:table-cell>
          <table:table-cell office:value-type="float" office:value="1.0095044999999998" table:style-name="c1">
            <text:p>1.0095</text:p>
          </table:table-cell>
          <table:table-cell office:value-type="string" table:style-name="c1">
            <text:p>2026-03-16 19:00</text:p>
          </table:table-cell>
          <table:table-cell office:value-type="float" office:value="1.0004994999999999" table:style-name="c1">
            <text:p>1.0005</text:p>
          </table:table-cell>
          <table:table-cell office:value-type="float" office:value="-1.0901386274652536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00</text:p>
          </table:table-cell>
          <table:table-cell office:value-type="float" office:value="1.0175085" table:style-name="c1">
            <text:p>1.0175</text:p>
          </table:table-cell>
          <table:table-cell office:value-type="string" table:style-name="c1">
            <text:p>2026-03-16 21:30</text:p>
          </table:table-cell>
          <table:table-cell office:value-type="float" office:value="1.0174910000000001" table:style-name="c1">
            <text:p>1.0175</text:p>
          </table:table-cell>
          <table:table-cell office:value-type="float" office:value="-0.20161644929745925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45</text:p>
          </table:table-cell>
          <table:table-cell office:value-type="float" office:value="1.0215104999999998" table:style-name="c1">
            <text:p>1.0215</text:p>
          </table:table-cell>
          <table:table-cell office:value-type="string" table:style-name="c1">
            <text:p>2026-03-16 23:15</text:p>
          </table:table-cell>
          <table:table-cell office:value-type="float" office:value="1.015492" table:style-name="c1">
            <text:p>1.0155</text:p>
          </table:table-cell>
          <table:table-cell office:value-type="float" office:value="-0.7878987546383165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1.0025009999999999" table:style-name="c1">
            <text:p>1.0025</text:p>
          </table:table-cell>
          <table:table-cell office:value-type="string" table:style-name="c1">
            <text:p>2026-03-17 08:45</text:p>
          </table:table-cell>
          <table:table-cell office:value-type="float" office:value="1.0024985" table:style-name="c1">
            <text:p>1.0025</text:p>
          </table:table-cell>
          <table:table-cell office:value-type="float" office:value="-0.20014887780659407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3:15</text:p>
          </table:table-cell>
          <table:table-cell office:value-type="float" office:value="1.012506" table:style-name="c1">
            <text:p>1.0125</text:p>
          </table:table-cell>
          <table:table-cell office:value-type="string" table:style-name="c1">
            <text:p>2026-03-17 23:45</text:p>
          </table:table-cell>
          <table:table-cell office:value-type="float" office:value="1.005497" table:style-name="c1">
            <text:p>1.0055</text:p>
          </table:table-cell>
          <table:table-cell office:value-type="float" office:value="-0.8907590180206149" table:style-name="c12">
            <text:p>-0.9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3:45</text:p>
          </table:table-cell>
          <table:table-cell office:value-type="float" office:value="1.012506" table:style-name="c1">
            <text:p>1.0125</text:p>
          </table:table-cell>
          <table:table-cell office:value-type="string" table:style-name="c1">
            <text:p>2026-03-20 14:15</text:p>
          </table:table-cell>
          <table:table-cell office:value-type="float" office:value="1.0044975" table:style-name="c1">
            <text:p>1.0045</text:p>
          </table:table-cell>
          <table:table-cell office:value-type="float" office:value="-0.9892771502094666" table:style-name="c12">
            <text:p>-1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4:30</text:p>
          </table:table-cell>
          <table:table-cell office:value-type="float" office:value="1.0085039999999998" table:style-name="c1">
            <text:p>1.0085</text:p>
          </table:table-cell>
          <table:table-cell office:value-type="string" table:style-name="c1">
            <text:p>2026-03-20 15:00</text:p>
          </table:table-cell>
          <table:table-cell office:value-type="float" office:value="0.9885055" table:style-name="c1">
            <text:p>0.98851</text:p>
          </table:table-cell>
          <table:table-cell office:value-type="float" office:value="-2.1789226908866755" table:style-name="c12">
            <text:p>-2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6:00</text:p>
          </table:table-cell>
          <table:table-cell office:value-type="float" office:value="1.006503" table:style-name="c1">
            <text:p>1.0065</text:p>
          </table:table-cell>
          <table:table-cell office:value-type="string" table:style-name="c1">
            <text:p>2026-03-20 16:30</text:p>
          </table:table-cell>
          <table:table-cell office:value-type="float" office:value="1.0064965" table:style-name="c1">
            <text:p>1.0065</text:p>
          </table:table-cell>
          <table:table-cell office:value-type="float" office:value="-0.20054450940534263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9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3-21 09:45</text:p>
          </table:table-cell>
          <table:table-cell office:value-type="float" office:value="1.0184905" table:style-name="c1">
            <text:p>1.0185</text:p>
          </table:table-cell>
          <table:table-cell office:value-type="float" office:value="-0.7864683390238381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1.012506" table:style-name="c1">
            <text:p>1.0125</text:p>
          </table:table-cell>
          <table:table-cell office:value-type="string" table:style-name="c1">
            <text:p>2026-03-23 19:30</text:p>
          </table:table-cell>
          <table:table-cell office:value-type="float" office:value="1.0064965" table:style-name="c1">
            <text:p>1.0065</text:p>
          </table:table-cell>
          <table:table-cell office:value-type="float" office:value="-0.7922408858317853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1.06053" table:style-name="c1">
            <text:p>1.0605</text:p>
          </table:table-cell>
          <table:table-cell office:value-type="string" table:style-name="c1">
            <text:p>2026-03-23 21:15</text:p>
          </table:table-cell>
          <table:table-cell office:value-type="float" office:value="1.0404795" table:style-name="c1">
            <text:p>1.0405</text:p>
          </table:table-cell>
          <table:table-cell office:value-type="float" office:value="-2.0867319661395545" table:style-name="c12">
            <text:p>-2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6:15</text:p>
          </table:table-cell>
          <table:table-cell office:value-type="float" office:value="1.0835415" table:style-name="c1">
            <text:p>1.0835</text:p>
          </table:table-cell>
          <table:table-cell office:value-type="string" table:style-name="c1">
            <text:p>2026-03-24 06:45</text:p>
          </table:table-cell>
          <table:table-cell office:value-type="float" office:value="1.0464765" table:style-name="c1">
            <text:p>1.0465</text:p>
          </table:table-cell>
          <table:table-cell office:value-type="float" office:value="-3.613789275583801" table:style-name="c12">
            <text:p>-3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00</text:p>
          </table:table-cell>
          <table:table-cell office:value-type="float" office:value="1.074537" table:style-name="c1">
            <text:p>1.0745</text:p>
          </table:table-cell>
          <table:table-cell office:value-type="string" table:style-name="c1">
            <text:p>2026-03-24 09:30</text:p>
          </table:table-cell>
          <table:table-cell office:value-type="float" office:value="1.0664665" table:style-name="c1">
            <text:p>1.0665</text:p>
          </table:table-cell>
          <table:table-cell office:value-type="float" office:value="-0.9494662848743229" table:style-name="c12">
            <text:p>-0.9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6:30</text:p>
          </table:table-cell>
          <table:table-cell office:value-type="float" office:value="1.048524" table:style-name="c1">
            <text:p>1.0485</text:p>
          </table:table-cell>
          <table:table-cell office:value-type="string" table:style-name="c1">
            <text:p>2026-03-24 17:00</text:p>
          </table:table-cell>
          <table:table-cell office:value-type="float" office:value="1.047476" table:style-name="c1">
            <text:p>1.0475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3:30</text:p>
          </table:table-cell>
          <table:table-cell office:value-type="float" office:value="1.108554" table:style-name="c1">
            <text:p>1.1086</text:p>
          </table:table-cell>
          <table:table-cell office:value-type="string" table:style-name="c1">
            <text:p>2026-03-25 00:00</text:p>
          </table:table-cell>
          <table:table-cell office:value-type="float" office:value="1.1154420000000003" table:style-name="c1">
            <text:p>1.1154</text:p>
          </table:table-cell>
          <table:table-cell office:value-type="float" office:value="0.4202078962324274" table:style-name="c11">
            <text:p>+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0:15</text:p>
          </table:table-cell>
          <table:table-cell office:value-type="float" office:value="1.102551" table:style-name="c1">
            <text:p>1.1026</text:p>
          </table:table-cell>
          <table:table-cell office:value-type="string" table:style-name="c1">
            <text:p>2026-03-25 00:45</text:p>
          </table:table-cell>
          <table:table-cell office:value-type="float" office:value="1.0974510000000002" table:style-name="c1">
            <text:p>1.0975</text:p>
          </table:table-cell>
          <table:table-cell office:value-type="float" office:value="-0.6615389718026443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15</text:p>
          </table:table-cell>
          <table:table-cell office:value-type="float" office:value="0.8614305" table:style-name="c1">
            <text:p>0.86143</text:p>
          </table:table-cell>
          <table:table-cell office:value-type="string" table:style-name="c1">
            <text:p>2026-04-06 08:45</text:p>
          </table:table-cell>
          <table:table-cell office:value-type="float" office:value="0.8645675" table:style-name="c1">
            <text:p>0.86457</text:p>
          </table:table-cell>
          <table:table-cell office:value-type="float" office:value="0.1635337461931119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8684339999999999" table:style-name="c1">
            <text:p>0.86843</text:p>
          </table:table-cell>
          <table:table-cell office:value-type="string" table:style-name="c1">
            <text:p>2026-04-06 10:00</text:p>
          </table:table-cell>
          <table:table-cell office:value-type="float" office:value="0.871564" table:style-name="c1">
            <text:p>0.87156</text:p>
          </table:table-cell>
          <table:table-cell office:value-type="float" office:value="0.15979839158763998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5:45</text:p>
          </table:table-cell>
          <table:table-cell office:value-type="float" office:value="0.8824409999999999" table:style-name="c1">
            <text:p>0.88244</text:p>
          </table:table-cell>
          <table:table-cell office:value-type="string" table:style-name="c1">
            <text:p>2026-04-08 06:15</text:p>
          </table:table-cell>
          <table:table-cell office:value-type="float" office:value="0.8745625" table:style-name="c1">
            <text:p>0.87456</text:p>
          </table:table-cell>
          <table:table-cell office:value-type="float" office:value="-1.0909228421503325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6:45</text:p>
          </table:table-cell>
          <table:table-cell office:value-type="float" office:value="0.8684339999999999" table:style-name="c1">
            <text:p>0.86843</text:p>
          </table:table-cell>
          <table:table-cell office:value-type="string" table:style-name="c1">
            <text:p>2026-04-10 17:15</text:p>
          </table:table-cell>
          <table:table-cell office:value-type="float" office:value="0.863568" table:style-name="c1">
            <text:p>0.86357</text:p>
          </table:table-cell>
          <table:table-cell office:value-type="float" office:value="-0.7590988413627264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0.8744369999999999" table:style-name="c1">
            <text:p>0.87444</text:p>
          </table:table-cell>
          <table:table-cell office:value-type="string" table:style-name="c1">
            <text:p>2026-04-10 19:45</text:p>
          </table:table-cell>
          <table:table-cell office:value-type="float" office:value="0.869565" table:style-name="c1">
            <text:p>0.86957</text:p>
          </table:table-cell>
          <table:table-cell office:value-type="float" office:value="-0.7559447318674417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2:15</text:p>
          </table:table-cell>
          <table:table-cell office:value-type="float" office:value="0.8544269999999999" table:style-name="c1">
            <text:p>0.85443</text:p>
          </table:table-cell>
          <table:table-cell office:value-type="string" table:style-name="c1">
            <text:p>2026-04-11 12:45</text:p>
          </table:table-cell>
          <table:table-cell office:value-type="float" office:value="0.8525735" table:style-name="c1">
            <text:p>0.85257</text:p>
          </table:table-cell>
          <table:table-cell office:value-type="float" office:value="-0.41639536513944364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0.8674335" table:style-name="c1">
            <text:p>0.86743</text:p>
          </table:table-cell>
          <table:table-cell office:value-type="string" table:style-name="c1">
            <text:p>2026-04-11 17:15</text:p>
          </table:table-cell>
          <table:table-cell office:value-type="float" office:value="0.8675660000000001" table:style-name="c1">
            <text:p>0.86757</text:p>
          </table:table-cell>
          <table:table-cell office:value-type="float" office:value="-0.18465558846874064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15</text:p>
          </table:table-cell>
          <table:table-cell office:value-type="float" office:value="0.8664329999999999" table:style-name="c1">
            <text:p>0.86643</text:p>
          </table:table-cell>
          <table:table-cell office:value-type="string" table:style-name="c1">
            <text:p>2026-04-11 18:45</text:p>
          </table:table-cell>
          <table:table-cell office:value-type="float" office:value="0.8755620000000001" table:style-name="c1">
            <text:p>0.87556</text:p>
          </table:table-cell>
          <table:table-cell office:value-type="float" office:value="0.8516240219382354" table:style-name="c11">
            <text:p>+0.9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00</text:p>
          </table:table-cell>
          <table:table-cell office:value-type="float" office:value="0.8744369999999999" table:style-name="c1">
            <text:p>0.87444</text:p>
          </table:table-cell>
          <table:table-cell office:value-type="string" table:style-name="c1">
            <text:p>2026-04-11 19:30</text:p>
          </table:table-cell>
          <table:table-cell office:value-type="float" office:value="0.8785605000000001" table:style-name="c1">
            <text:p>0.87856</text:p>
          </table:table-cell>
          <table:table-cell office:value-type="float" office:value="0.2707179088373479" table:style-name="c11">
            <text:p>+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8714354999999999" table:style-name="c1">
            <text:p>0.87144</text:p>
          </table:table-cell>
          <table:table-cell office:value-type="string" table:style-name="c1">
            <text:p>2026-04-13 23:00</text:p>
          </table:table-cell>
          <table:table-cell office:value-type="float" office:value="0.8745625" table:style-name="c1">
            <text:p>0.87456</text:p>
          </table:table-cell>
          <table:table-cell office:value-type="float" office:value="0.15821590496372107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8774384999999999" table:style-name="c1">
            <text:p>0.87744</text:p>
          </table:table-cell>
          <table:table-cell office:value-type="string" table:style-name="c1">
            <text:p>2026-04-15 12:30</text:p>
          </table:table-cell>
          <table:table-cell office:value-type="float" office:value="0.8805595" table:style-name="c1">
            <text:p>0.88056</text:p>
          </table:table-cell>
          <table:table-cell office:value-type="float" office:value="0.15508341148697813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45</text:p>
          </table:table-cell>
          <table:table-cell office:value-type="float" office:value="0.8874434999999999" table:style-name="c1">
            <text:p>0.88744</text:p>
          </table:table-cell>
          <table:table-cell office:value-type="string" table:style-name="c1">
            <text:p>2026-04-15 13:15</text:p>
          </table:table-cell>
          <table:table-cell office:value-type="float" office:value="0.8835580000000001" table:style-name="c1">
            <text:p>0.88356</text:p>
          </table:table-cell>
          <table:table-cell office:value-type="float" office:value="-0.6368554665170167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30</text:p>
          </table:table-cell>
          <table:table-cell office:value-type="float" office:value="0.8934464999999999" table:style-name="c1">
            <text:p>0.89345</text:p>
          </table:table-cell>
          <table:table-cell office:value-type="string" table:style-name="c1">
            <text:p>2026-04-15 16:00</text:p>
          </table:table-cell>
          <table:table-cell office:value-type="float" office:value="0.9025485000000001" table:style-name="c1">
            <text:p>0.90255</text:p>
          </table:table-cell>
          <table:table-cell office:value-type="float" office:value="0.8168150581484346" table:style-name="c11">
            <text:p>+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30</text:p>
          </table:table-cell>
          <table:table-cell office:value-type="float" office:value="0.8974485" table:style-name="c1">
            <text:p>0.89745</text:p>
          </table:table-cell>
          <table:table-cell office:value-type="string" table:style-name="c1">
            <text:p>2026-04-16 03:00</text:p>
          </table:table-cell>
          <table:table-cell office:value-type="float" office:value="0.8985505" table:style-name="c1">
            <text:p>0.89855</text:p>
          </table:table-cell>
          <table:table-cell office:value-type="float" office:value="-0.07735290097425906" table:style-name="c12">
            <text:p>-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15</text:p>
          </table:table-cell>
          <table:table-cell office:value-type="float" office:value="0.910455" table:style-name="c1">
            <text:p>0.91046</text:p>
          </table:table-cell>
          <table:table-cell office:value-type="string" table:style-name="c1">
            <text:p>2026-04-16 04:45</text:p>
          </table:table-cell>
          <table:table-cell office:value-type="float" office:value="0.925537" table:style-name="c1">
            <text:p>0.92554</text:p>
          </table:table-cell>
          <table:table-cell office:value-type="float" office:value="1.453322957971559" table:style-name="c11">
            <text:p>+1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9384689999999999" table:style-name="c1">
            <text:p>0.93847</text:p>
          </table:table-cell>
          <table:table-cell office:value-type="string" table:style-name="c1">
            <text:p>2026-04-16 12:45</text:p>
          </table:table-cell>
          <table:table-cell office:value-type="float" office:value="0.9365315000000001" table:style-name="c1">
            <text:p>0.93653</text:p>
          </table:table-cell>
          <table:table-cell office:value-type="float" office:value="-0.4059405764601398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0.942471" table:style-name="c1">
            <text:p>0.94247</text:p>
          </table:table-cell>
          <table:table-cell office:value-type="string" table:style-name="c1">
            <text:p>2026-04-16 15:45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3.087198175116268" table:style-name="c11">
            <text:p>+3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988494" table:style-name="c1">
            <text:p>0.98849</text:p>
          </table:table-cell>
          <table:table-cell office:value-type="string" table:style-name="c1">
            <text:p>2026-04-16 16:30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-1.7124082176522948" table:style-name="c12">
            <text:p>-1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45</text:p>
          </table:table-cell>
          <table:table-cell office:value-type="float" office:value="0.9914955" table:style-name="c1">
            <text:p>0.9915</text:p>
          </table:table-cell>
          <table:table-cell office:value-type="string" table:style-name="c1">
            <text:p>2026-04-16 20:15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0.4002560268805855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2:45</text:p>
          </table:table-cell>
          <table:table-cell office:value-type="float" office:value="1.0035014999999998" table:style-name="c1">
            <text:p>1.0035</text:p>
          </table:table-cell>
          <table:table-cell office:value-type="string" table:style-name="c1">
            <text:p>2026-04-16 23:15</text:p>
          </table:table-cell>
          <table:table-cell office:value-type="float" office:value="0.9975010000000001" table:style-name="c1">
            <text:p>0.9975</text:p>
          </table:table-cell>
          <table:table-cell office:value-type="float" office:value="-0.7966609416129145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45</text:p>
          </table:table-cell>
          <table:table-cell office:value-type="float" office:value="1.0015005" table:style-name="c1">
            <text:p>1.0015</text:p>
          </table:table-cell>
          <table:table-cell office:value-type="string" table:style-name="c1">
            <text:p>2026-04-17 10:15</text:p>
          </table:table-cell>
          <table:table-cell office:value-type="float" office:value="1.0024985" table:style-name="c1">
            <text:p>1.0025</text:p>
          </table:table-cell>
          <table:table-cell office:value-type="float" office:value="-0.1004487268353893" table:style-name="c12">
            <text:p>-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04799999999999" table:style-name="c1">
            <text:p>0.96048</text:p>
          </table:table-cell>
          <table:table-cell office:value-type="string" table:style-name="c1">
            <text:p>2026-04-22 06:00</text:p>
          </table:table-cell>
          <table:table-cell office:value-type="float" office:value="0.951524" table:style-name="c1">
            <text:p>0.95152</text:p>
          </table:table-cell>
          <table:table-cell office:value-type="float" office:value="-1.1304864730134812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8:15</text:p>
          </table:table-cell>
          <table:table-cell office:value-type="float" office:value="0.9664829999999999" table:style-name="c1">
            <text:p>0.96648</text:p>
          </table:table-cell>
          <table:table-cell office:value-type="string" table:style-name="c1">
            <text:p>2026-04-22 08:45</text:p>
          </table:table-cell>
          <table:table-cell office:value-type="float" office:value="0.9685155" table:style-name="c1">
            <text:p>0.96852</text:p>
          </table:table-cell>
          <table:table-cell office:value-type="float" office:value="0.00997819056309801" table:style-name="c11">
            <text:p>+0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2:00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4-22 12:30</text:p>
          </table:table-cell>
          <table:table-cell office:value-type="float" office:value="0.977511" table:style-name="c1">
            <text:p>0.97751</text:p>
          </table:table-cell>
          <table:table-cell office:value-type="float" office:value="-1.1085780121095512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15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4-23 06:45</text:p>
          </table:table-cell>
          <table:table-cell office:value-type="float" office:value="0.9525235" table:style-name="c1">
            <text:p>0.9525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2:45</text:p>
          </table:table-cell>
          <table:table-cell office:value-type="float" office:value="0.9494744999999999" table:style-name="c1">
            <text:p>0.94947</text:p>
          </table:table-cell>
          <table:table-cell office:value-type="string" table:style-name="c1">
            <text:p>2026-04-23 13:15</text:p>
          </table:table-cell>
          <table:table-cell office:value-type="float" office:value="0.945527" table:style-name="c1">
            <text:p>0.94553</text:p>
          </table:table-cell>
          <table:table-cell office:value-type="float" office:value="-0.6148251978331132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9594794999999999" table:style-name="c1">
            <text:p>0.95948</text:p>
          </table:table-cell>
          <table:table-cell office:value-type="string" table:style-name="c1">
            <text:p>2026-04-24 11:45</text:p>
          </table:table-cell>
          <table:table-cell office:value-type="float" office:value="0.9585205" table:style-name="c1">
            <text:p>0.95852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2:00</text:p>
          </table:table-cell>
          <table:table-cell office:value-type="float" office:value="0.9634814999999999" table:style-name="c1">
            <text:p>0.96348</text:p>
          </table:table-cell>
          <table:table-cell office:value-type="string" table:style-name="c1">
            <text:p>2026-04-24 12:30</text:p>
          </table:table-cell>
          <table:table-cell office:value-type="float" office:value="0.963518" table:style-name="c1">
            <text:p>0.96352</text:p>
          </table:table-cell>
          <table:table-cell office:value-type="float" office:value="-0.19611922823633554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0:00</text:p>
          </table:table-cell>
          <table:table-cell office:value-type="float" office:value="0.9714854999999999" table:style-name="c1">
            <text:p>0.97149</text:p>
          </table:table-cell>
          <table:table-cell office:value-type="string" table:style-name="c1">
            <text:p>2026-04-24 20:30</text:p>
          </table:table-cell>
          <table:table-cell office:value-type="float" office:value="0.967516" table:style-name="c1">
            <text:p>0.96752</text:p>
          </table:table-cell>
          <table:table-cell office:value-type="float" office:value="-0.6076842612679156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1:15</text:p>
          </table:table-cell>
          <table:table-cell office:value-type="float" office:value="0.9794894999999999" table:style-name="c1">
            <text:p>0.97949</text:p>
          </table:table-cell>
          <table:table-cell office:value-type="string" table:style-name="c1">
            <text:p>2026-04-24 21:45</text:p>
          </table:table-cell>
          <table:table-cell office:value-type="float" office:value="0.9785105000000001" table:style-name="c1">
            <text:p>0.9785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15</text:p>
          </table:table-cell>
          <table:table-cell office:value-type="float" office:value="0.9954974999999999" table:style-name="c1">
            <text:p>0.9955</text:p>
          </table:table-cell>
          <table:table-cell office:value-type="string" table:style-name="c1">
            <text:p>2026-04-25 04:45</text:p>
          </table:table-cell>
          <table:table-cell office:value-type="float" office:value="0.983508" table:style-name="c1">
            <text:p>0.98351</text:p>
          </table:table-cell>
          <table:table-cell office:value-type="float" office:value="-1.4018651470244503" table:style-name="c12">
            <text:p>-1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2:30</text:p>
          </table:table-cell>
          <table:table-cell office:value-type="float" office:value="0.9674834999999999" table:style-name="c1">
            <text:p>0.96748</text:p>
          </table:table-cell>
          <table:table-cell office:value-type="string" table:style-name="c1">
            <text:p>2026-04-25 23:00</text:p>
          </table:table-cell>
          <table:table-cell office:value-type="float" office:value="0.9645175" table:style-name="c1">
            <text:p>0.96452</text:p>
          </table:table-cell>
          <table:table-cell office:value-type="float" office:value="-0.5058557052910917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4:45</text:p>
          </table:table-cell>
          <table:table-cell office:value-type="float" office:value="0.9684839999999999" table:style-name="c1">
            <text:p>0.96848</text:p>
          </table:table-cell>
          <table:table-cell office:value-type="string" table:style-name="c1">
            <text:p>2026-04-26 05:15</text:p>
          </table:table-cell>
          <table:table-cell office:value-type="float" office:value="0.9725135" table:style-name="c1">
            <text:p>0.97251</text:p>
          </table:table-cell>
          <table:table-cell office:value-type="float" office:value="0.21533092064507375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9:00</text:p>
          </table:table-cell>
          <table:table-cell office:value-type="float" office:value="0.9814904999999999" table:style-name="c1">
            <text:p>0.98149</text:p>
          </table:table-cell>
          <table:table-cell office:value-type="string" table:style-name="c1">
            <text:p>2026-04-26 09:30</text:p>
          </table:table-cell>
          <table:table-cell office:value-type="float" office:value="0.977511" table:style-name="c1">
            <text:p>0.97751</text:p>
          </table:table-cell>
          <table:table-cell office:value-type="float" office:value="-0.6045442608970664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0:00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4-26 10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0.0036976953207146224" table:style-name="c11">
            <text:p>+0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30</text:p>
          </table:table-cell>
          <table:table-cell office:value-type="float" office:value="0.9994995" table:style-name="c1">
            <text:p>0.9995</text:p>
          </table:table-cell>
          <table:table-cell office:value-type="string" table:style-name="c1">
            <text:p>2026-04-26 12:00</text:p>
          </table:table-cell>
          <table:table-cell office:value-type="float" office:value="0.9905045" table:style-name="c1">
            <text:p>0.9905</text:p>
          </table:table-cell>
          <table:table-cell office:value-type="float" office:value="-1.0980514242878714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6:00</text:p>
          </table:table-cell>
          <table:table-cell office:value-type="float" office:value="0.9934964999999999" table:style-name="c1">
            <text:p>0.9935</text:p>
          </table:table-cell>
          <table:table-cell office:value-type="string" table:style-name="c1">
            <text:p>2026-04-26 16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-0.701262912803402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30</text:p>
          </table:table-cell>
          <table:table-cell office:value-type="float" office:value="0.9934964999999999" table:style-name="c1">
            <text:p>0.9935</text:p>
          </table:table-cell>
          <table:table-cell office:value-type="string" table:style-name="c1">
            <text:p>2026-04-26 19:00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0.6008597408244221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0.9874934999999999" table:style-name="c1">
            <text:p>0.98749</text:p>
          </table:table-cell>
          <table:table-cell office:value-type="string" table:style-name="c1">
            <text:p>2026-04-29 04:15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0.003390351936505276" table:style-name="c11">
            <text:p>+0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6:00</text:p>
          </table:table-cell>
          <table:table-cell office:value-type="float" office:value="0.994497" table:style-name="c1">
            <text:p>0.9945</text:p>
          </table:table-cell>
          <table:table-cell office:value-type="string" table:style-name="c1">
            <text:p>2026-04-29 06:30</text:p>
          </table:table-cell>
          <table:table-cell office:value-type="float" office:value="1.0014990000000001" table:style-name="c1">
            <text:p>1.0015</text:p>
          </table:table-cell>
          <table:table-cell office:value-type="float" office:value="0.5027670771254655" table:style-name="c11">
            <text:p>+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6:45</text:p>
          </table:table-cell>
          <table:table-cell office:value-type="float" office:value="1.0075034999999999" table:style-name="c1">
            <text:p>1.0075</text:p>
          </table:table-cell>
          <table:table-cell office:value-type="string" table:style-name="c1">
            <text:p>2026-04-29 07:15</text:p>
          </table:table-cell>
          <table:table-cell office:value-type="float" office:value="1.0024985" table:style-name="c1">
            <text:p>1.0025</text:p>
          </table:table-cell>
          <table:table-cell office:value-type="float" office:value="-0.6956794196248506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45</text:p>
          </table:table-cell>
          <table:table-cell office:value-type="float" office:value="1.0035014999999998" table:style-name="c1">
            <text:p>1.0035</text:p>
          </table:table-cell>
          <table:table-cell office:value-type="string" table:style-name="c1">
            <text:p>2026-04-29 11:15</text:p>
          </table:table-cell>
          <table:table-cell office:value-type="float" office:value="0.9985005" table:style-name="c1">
            <text:p>0.9985</text:p>
          </table:table-cell>
          <table:table-cell office:value-type="float" office:value="-0.6972587982678413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8:00</text:p>
          </table:table-cell>
          <table:table-cell office:value-type="float" office:value="0.9844919999999999" table:style-name="c1">
            <text:p>0.98449</text:p>
          </table:table-cell>
          <table:table-cell office:value-type="string" table:style-name="c1">
            <text:p>2026-04-29 18:30</text:p>
          </table:table-cell>
          <table:table-cell office:value-type="float" office:value="0.951524" table:style-name="c1">
            <text:p>0.95152</text:p>
          </table:table-cell>
          <table:table-cell office:value-type="float" office:value="-3.5419380224521624" table:style-name="c12">
            <text:p>-3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20:45</text:p>
          </table:table-cell>
          <table:table-cell office:value-type="float" office:value="0.9834915" table:style-name="c1">
            <text:p>0.98349</text:p>
          </table:table-cell>
          <table:table-cell office:value-type="string" table:style-name="c1">
            <text:p>2026-04-29 21:15</text:p>
          </table:table-cell>
          <table:table-cell office:value-type="float" office:value="0.9825085" table:style-name="c1">
            <text:p>0.9825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2:15</text:p>
          </table:table-cell>
          <table:table-cell office:value-type="float" office:value="1.0275134999999997" table:style-name="c1">
            <text:p>1.0275</text:p>
          </table:table-cell>
          <table:table-cell office:value-type="string" table:style-name="c1">
            <text:p>2026-04-30 02:45</text:p>
          </table:table-cell>
          <table:table-cell office:value-type="float" office:value="1.0074960000000002" table:style-name="c1">
            <text:p>1.0075</text:p>
          </table:table-cell>
          <table:table-cell office:value-type="float" office:value="-2.1441552353326343" table:style-name="c12">
            <text:p>-2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2:00</text:p>
          </table:table-cell>
          <table:table-cell office:value-type="float" office:value="1.022511" table:style-name="c1">
            <text:p>1.0225</text:p>
          </table:table-cell>
          <table:table-cell office:value-type="string" table:style-name="c1">
            <text:p>2026-05-01 02:30</text:p>
          </table:table-cell>
          <table:table-cell office:value-type="float" office:value="1.015492" table:style-name="c1">
            <text:p>1.0155</text:p>
          </table:table-cell>
          <table:table-cell office:value-type="float" office:value="-0.8849751746435985" table:style-name="c12">
            <text:p>-0.9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1:15</text:p>
          </table:table-cell>
          <table:table-cell office:value-type="float" office:value="1.0095044999999998" table:style-name="c1">
            <text:p>1.0095</text:p>
          </table:table-cell>
          <table:table-cell office:value-type="string" table:style-name="c1">
            <text:p>2026-05-02 01:45</text:p>
          </table:table-cell>
          <table:table-cell office:value-type="float" office:value="1.0044975" table:style-name="c1">
            <text:p>1.0045</text:p>
          </table:table-cell>
          <table:table-cell office:value-type="float" office:value="-0.6948944261763845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2:15</text:p>
          </table:table-cell>
          <table:table-cell office:value-type="float" office:value="1.0135064999999999" table:style-name="c1">
            <text:p>1.0135</text:p>
          </table:table-cell>
          <table:table-cell office:value-type="string" table:style-name="c1">
            <text:p>2026-05-02 02:45</text:p>
          </table:table-cell>
          <table:table-cell office:value-type="float" office:value="1.0024985" table:style-name="c1">
            <text:p>1.0025</text:p>
          </table:table-cell>
          <table:table-cell office:value-type="float" office:value="-1.283859008452315" table:style-name="c12">
            <text:p>-1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1.0005" table:style-name="c1">
            <text:p>1.0005</text:p>
          </table:table-cell>
          <table:table-cell office:value-type="string" table:style-name="c1">
            <text:p>2026-05-06 02:15</text:p>
          </table:table-cell>
          <table:table-cell office:value-type="float" office:value="1.005497" table:style-name="c1">
            <text:p>1.0055</text:p>
          </table:table-cell>
          <table:table-cell office:value-type="float" office:value="0.29855187376313097" table:style-name="c11">
            <text:p>+0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15</text:p>
          </table:table-cell>
          <table:table-cell office:value-type="float" office:value="1.0115055" table:style-name="c1">
            <text:p>1.0115</text:p>
          </table:table-cell>
          <table:table-cell office:value-type="string" table:style-name="c1">
            <text:p>2026-05-06 03:45</text:p>
          </table:table-cell>
          <table:table-cell office:value-type="float" office:value="1.01949" table:style-name="c1">
            <text:p>1.0195</text:p>
          </table:table-cell>
          <table:table-cell office:value-type="float" office:value="0.5878899808256177" table:style-name="c11">
            <text:p>+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15</text:p>
          </table:table-cell>
          <table:table-cell office:value-type="float" office:value="1.0275134999999997" table:style-name="c1">
            <text:p>1.0275</text:p>
          </table:table-cell>
          <table:table-cell office:value-type="string" table:style-name="c1">
            <text:p>2026-05-06 08:45</text:p>
          </table:table-cell>
          <table:table-cell office:value-type="float" office:value="1.0394800000000002" table:style-name="c1">
            <text:p>1.0395</text:p>
          </table:table-cell>
          <table:table-cell office:value-type="float" office:value="0.962379519101253" table:style-name="c11">
            <text:p>+1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15</text:p>
          </table:table-cell>
          <table:table-cell office:value-type="float" office:value="1.0535264999999998" table:style-name="c1">
            <text:p>1.0535</text:p>
          </table:table-cell>
          <table:table-cell office:value-type="string" table:style-name="c1">
            <text:p>2026-05-06 09:45</text:p>
          </table:table-cell>
          <table:table-cell office:value-type="float" office:value="1.057471" table:style-name="c1">
            <text:p>1.0575</text:p>
          </table:table-cell>
          <table:table-cell office:value-type="float" office:value="0.1737607427055865" table:style-name="c11">
            <text:p>+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30</text:p>
          </table:table-cell>
          <table:table-cell office:value-type="float" office:value="1.0155074999999998" table:style-name="c1">
            <text:p>1.0155</text:p>
          </table:table-cell>
          <table:table-cell office:value-type="string" table:style-name="c1">
            <text:p>2026-05-07 05:00</text:p>
          </table:table-cell>
          <table:table-cell office:value-type="float" office:value="1.0174910000000001" table:style-name="c1">
            <text:p>1.0175</text:p>
          </table:table-cell>
          <table:table-cell office:value-type="float" office:value="-0.00496938811379577" table:style-name="c12">
            <text:p>-0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8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5-07 18:45</text:p>
          </table:table-cell>
          <table:table-cell office:value-type="float" office:value="1.021489" table:style-name="c1">
            <text:p>1.0215</text:p>
          </table:table-cell>
          <table:table-cell office:value-type="float" office:value="-0.49437747054206227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2:00</text:p>
          </table:table-cell>
          <table:table-cell office:value-type="float" office:value="1.062531" table:style-name="c1">
            <text:p>1.0625</text:p>
          </table:table-cell>
          <table:table-cell office:value-type="string" table:style-name="c1">
            <text:p>2026-05-08 12:30</text:p>
          </table:table-cell>
          <table:table-cell office:value-type="float" office:value="1.0564715" table:style-name="c1">
            <text:p>1.0565</text:p>
          </table:table-cell>
          <table:table-cell office:value-type="float" office:value="-0.7690492351281941" table:style-name="c12">
            <text:p>-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62531" table:style-name="c1">
            <text:p>1.0625</text:p>
          </table:table-cell>
          <table:table-cell office:value-type="string" table:style-name="c1">
            <text:p>2026-05-08 15:30</text:p>
          </table:table-cell>
          <table:table-cell office:value-type="float" office:value="1.053473" table:style-name="c1">
            <text:p>1.0535</text:p>
          </table:table-cell>
          <table:table-cell office:value-type="float" office:value="-1.050688641272557" table:style-name="c12">
            <text:p>-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0675335" table:style-name="c1">
            <text:p>1.0675</text:p>
          </table:table-cell>
          <table:table-cell office:value-type="string" table:style-name="c1">
            <text:p>2026-05-08 16:15</text:p>
          </table:table-cell>
          <table:table-cell office:value-type="float" office:value="1.0704645" table:style-name="c1">
            <text:p>1.0705</text:p>
          </table:table-cell>
          <table:table-cell office:value-type="float" office:value="0.07410928692168639" table:style-name="c11">
            <text:p>+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1155575" table:style-name="c1">
            <text:p>1.1156</text:p>
          </table:table-cell>
          <table:table-cell office:value-type="string" table:style-name="c1">
            <text:p>2026-05-09 18:00</text:p>
          </table:table-cell>
          <table:table-cell office:value-type="float" office:value="1.111444" table:style-name="c1">
            <text:p>1.1114</text:p>
          </table:table-cell>
          <table:table-cell office:value-type="float" office:value="-0.567902287062716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1.1415705" table:style-name="c1">
            <text:p>1.1416</text:p>
          </table:table-cell>
          <table:table-cell office:value-type="string" table:style-name="c1">
            <text:p>2026-05-10 17:15</text:p>
          </table:table-cell>
          <table:table-cell office:value-type="float" office:value="1.169415" table:style-name="c1">
            <text:p>1.1694</text:p>
          </table:table-cell>
          <table:table-cell office:value-type="float" office:value="2.2343639236472868" table:style-name="c11">
            <text:p>+2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30</text:p>
          </table:table-cell>
          <table:table-cell office:value-type="float" office:value="1.2006" table:style-name="c1">
            <text:p>1.2006</text:p>
          </table:table-cell>
          <table:table-cell office:value-type="string" table:style-name="c1">
            <text:p>2026-05-10 18:00</text:p>
          </table:table-cell>
          <table:table-cell office:value-type="float" office:value="1.1744125" table:style-name="c1">
            <text:p>1.1744</text:p>
          </table:table-cell>
          <table:table-cell office:value-type="float" office:value="-2.3767408452023964" table:style-name="c12">
            <text:p>-2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9:45</text:p>
          </table:table-cell>
          <table:table-cell office:value-type="float" office:value="1.2126059999999999" table:style-name="c1">
            <text:p>1.2126</text:p>
          </table:table-cell>
          <table:table-cell office:value-type="string" table:style-name="c1">
            <text:p>2026-05-10 20:15</text:p>
          </table:table-cell>
          <table:table-cell office:value-type="float" office:value="1.2073960000000001" table:style-name="c1">
            <text:p>1.2074</text:p>
          </table:table-cell>
          <table:table-cell office:value-type="float" office:value="-0.6286942835512788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0:30</text:p>
          </table:table-cell>
          <table:table-cell office:value-type="float" office:value="1.2286139999999999" table:style-name="c1">
            <text:p>1.2286</text:p>
          </table:table-cell>
          <table:table-cell office:value-type="string" table:style-name="c1">
            <text:p>2026-05-10 21:00</text:p>
          </table:table-cell>
          <table:table-cell office:value-type="float" office:value="1.1764115000000002" table:style-name="c1">
            <text:p>1.1764</text:p>
          </table:table-cell>
          <table:table-cell office:value-type="float" office:value="-4.4402999305314665" table:style-name="c12">
            <text:p>-4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30</text:p>
          </table:table-cell>
          <table:table-cell office:value-type="float" office:value="1.1375685" table:style-name="c1">
            <text:p>1.1376</text:p>
          </table:table-cell>
          <table:table-cell office:value-type="string" table:style-name="c1">
            <text:p>2026-05-11 07:00</text:p>
          </table:table-cell>
          <table:table-cell office:value-type="float" office:value="1.125437" table:style-name="c1">
            <text:p>1.1254</text:p>
          </table:table-cell>
          <table:table-cell office:value-type="float" office:value="-1.264209457540355" table:style-name="c12">
            <text:p>-1.3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1.1335665" table:style-name="c1">
            <text:p>1.1336</text:p>
          </table:table-cell>
          <table:table-cell office:value-type="string" table:style-name="c1">
            <text:p>2026-05-11 10:45</text:p>
          </table:table-cell>
          <table:table-cell office:value-type="float" office:value="1.1284355000000001" table:style-name="c1">
            <text:p>1.1284</text:p>
          </table:table-cell>
          <table:table-cell office:value-type="float" office:value="-0.6516373379505835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5-21 03:00</text:p>
          </table:table-cell>
          <table:table-cell office:value-type="float" office:value="0.95952" table:style-name="c1">
            <text:p>0.95952</text:p>
          </table:table-cell>
          <table:table-cell office:value-type="float" office:value="-0.5069274593472395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1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5-21 08:45</text:p>
          </table:table-cell>
          <table:table-cell office:value-type="float" office:value="0.9685155" table:style-name="c1">
            <text:p>0.96852</text:p>
          </table:table-cell>
          <table:table-cell office:value-type="float" office:value="-0.4024340906350843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0.9614805" table:style-name="c1">
            <text:p>0.96148</text:p>
          </table:table-cell>
          <table:table-cell office:value-type="string" table:style-name="c1">
            <text:p>2026-05-21 16:00</text:p>
          </table:table-cell>
          <table:table-cell office:value-type="float" office:value="0.9585205" table:style-name="c1">
            <text:p>0.95852</text:p>
          </table:table-cell>
          <table:table-cell office:value-type="float" office:value="-0.5071431484569899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15</text:p>
          </table:table-cell>
          <table:table-cell office:value-type="float" office:value="0.9654824999999999" table:style-name="c1">
            <text:p>0.96548</text:p>
          </table:table-cell>
          <table:table-cell office:value-type="string" table:style-name="c1">
            <text:p>2026-05-21 17:45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0.6301975968492801" table:style-name="c11">
            <text:p>+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30</text:p>
          </table:table-cell>
          <table:table-cell office:value-type="float" office:value="0.9894944999999999" table:style-name="c1">
            <text:p>0.98949</text:p>
          </table:table-cell>
          <table:table-cell office:value-type="string" table:style-name="c1">
            <text:p>2026-05-22 05:00</text:p>
          </table:table-cell>
          <table:table-cell office:value-type="float" office:value="0.9845075000000001" table:style-name="c1">
            <text:p>0.98451</text:p>
          </table:table-cell>
          <table:table-cell office:value-type="float" office:value="-0.7028872310558265" table:style-name="c12">
            <text:p>-0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1:00</text:p>
          </table:table-cell>
          <table:table-cell office:value-type="float" office:value="0.9684839999999999" table:style-name="c1">
            <text:p>0.96848</text:p>
          </table:table-cell>
          <table:table-cell office:value-type="string" table:style-name="c1">
            <text:p>2026-05-25 11:30</text:p>
          </table:table-cell>
          <table:table-cell office:value-type="float" office:value="0.9645175" table:style-name="c1">
            <text:p>0.96452</text:p>
          </table:table-cell>
          <table:table-cell office:value-type="float" office:value="-0.6086389122071156" table:style-name="c12">
            <text:p>-0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15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5-25 14:45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-0.19718326725638446" table:style-name="c12">
            <text:p>-0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15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5-25 17:45</text:p>
          </table:table-cell>
          <table:table-cell office:value-type="float" office:value="0.9845075000000001" table:style-name="c1">
            <text:p>0.98451</text:p>
          </table:table-cell>
          <table:table-cell office:value-type="float" office:value="-0.40076619829030324" table:style-name="c12">
            <text:p>-0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30</text:p>
          </table:table-cell>
          <table:table-cell office:value-type="float" office:value="0.9654824999999999" table:style-name="c1">
            <text:p>0.96548</text:p>
          </table:table-cell>
          <table:table-cell office:value-type="string" table:style-name="c1">
            <text:p>2026-05-26 05:00</text:p>
          </table:table-cell>
          <table:table-cell office:value-type="float" office:value="0.967516" table:style-name="c1">
            <text:p>0.96752</text:p>
          </table:table-cell>
          <table:table-cell office:value-type="float" office:value="0.01029904902472012" table:style-name="c11">
            <text:p>+0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15</text:p>
          </table:table-cell>
          <table:table-cell office:value-type="float" office:value="0.9684839999999999" table:style-name="c1">
            <text:p>0.96848</text:p>
          </table:table-cell>
          <table:table-cell office:value-type="string" table:style-name="c1">
            <text:p>2026-05-26 05:45</text:p>
          </table:table-cell>
          <table:table-cell office:value-type="float" office:value="0.9785105000000001" table:style-name="c1">
            <text:p>0.97851</text:p>
          </table:table-cell>
          <table:table-cell office:value-type="float" office:value="0.8333082952842075" table:style-name="c11">
            <text:p>+0.8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6:00</text:p>
          </table:table-cell>
          <table:table-cell office:value-type="float" office:value="0.9784889999999999" table:style-name="c1">
            <text:p>0.97849</text:p>
          </table:table-cell>
          <table:table-cell office:value-type="string" table:style-name="c1">
            <text:p>2026-05-26 06:30</text:p>
          </table:table-cell>
          <table:table-cell office:value-type="float" office:value="0.975512" table:style-name="c1">
            <text:p>0.97551</text:p>
          </table:table-cell>
          <table:table-cell office:value-type="float" office:value="-0.5035364207466753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0.996498" table:style-name="c1">
            <text:p>0.9965</text:p>
          </table:table-cell>
          <table:table-cell office:value-type="string" table:style-name="c1">
            <text:p>2026-05-26 11:00</text:p>
          </table:table-cell>
          <table:table-cell office:value-type="float" office:value="0.993503" table:style-name="c1">
            <text:p>0.9935</text:p>
          </table:table-cell>
          <table:table-cell office:value-type="float" office:value="-0.4998517304600769" table:style-name="c12">
            <text:p>-0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1:15</text:p>
          </table:table-cell>
          <table:table-cell office:value-type="float" office:value="0.996498" table:style-name="c1">
            <text:p>0.9965</text:p>
          </table:table-cell>
          <table:table-cell office:value-type="string" table:style-name="c1">
            <text:p>2026-05-26 11:45</text:p>
          </table:table-cell>
          <table:table-cell office:value-type="float" office:value="0.9975010000000001" table:style-name="c1">
            <text:p>0.9975</text:p>
          </table:table-cell>
          <table:table-cell office:value-type="float" office:value="-0.09944871931506505" table:style-name="c12">
            <text:p>-0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1.0095044999999998" table:style-name="c1">
            <text:p>1.0095</text:p>
          </table:table-cell>
          <table:table-cell office:value-type="string" table:style-name="c1">
            <text:p>2026-05-26 15:00</text:p>
          </table:table-cell>
          <table:table-cell office:value-type="float" office:value="0.9925035000000001" table:style-name="c1">
            <text:p>0.9925</text:p>
          </table:table-cell>
          <table:table-cell office:value-type="float" office:value="-1.880627030042914" table:style-name="c12">
            <text:p>-1.9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9594794999999999" table:style-name="c1">
            <text:p>0.95948</text:p>
          </table:table-cell>
          <table:table-cell office:value-type="string" table:style-name="c1">
            <text:p>2026-06-01 04:00</text:p>
          </table:table-cell>
          <table:table-cell office:value-type="float" office:value="0.953523" table:style-name="c1">
            <text:p>0.95352</text:p>
          </table:table-cell>
          <table:table-cell office:value-type="float" office:value="-0.819464353016397" table:style-name="c12">
            <text:p>-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7:00</text:p>
          </table:table-cell>
          <table:table-cell office:value-type="float" office:value="0.1024512" table:style-name="c8">
            <text:p>0.10245</text:p>
          </table:table-cell>
          <table:table-cell office:value-type="string" table:style-name="c8">
            <text:p>2026-03-03 17:30</text:p>
          </table:table-cell>
          <table:table-cell office:value-type="float" office:value="0.101949" table:style-name="c8">
            <text:p>0.10195</text:p>
          </table:table-cell>
          <table:table-cell office:value-type="float" office:value="-0.689104716196598" table:style-name="c9">
            <text:p>-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30</text:p>
          </table:table-cell>
          <table:table-cell office:value-type="float" office:value="0.10555274999999999" table:style-name="c8">
            <text:p>0.10555</text:p>
          </table:table-cell>
          <table:table-cell office:value-type="string" table:style-name="c8">
            <text:p>2026-03-04 10:00</text:p>
          </table:table-cell>
          <table:table-cell office:value-type="float" office:value="0.10484755" table:style-name="c8">
            <text:p>0.10485</text:p>
          </table:table-cell>
          <table:table-cell office:value-type="float" office:value="-0.8666664321393736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45</text:p>
          </table:table-cell>
          <table:table-cell office:value-type="float" office:value="0.1048524" table:style-name="c8">
            <text:p>0.10485</text:p>
          </table:table-cell>
          <table:table-cell office:value-type="string" table:style-name="c8">
            <text:p>2026-03-04 16:15</text:p>
          </table:table-cell>
          <table:table-cell office:value-type="float" office:value="0.10444775" table:style-name="c8">
            <text:p>0.10445</text:p>
          </table:table-cell>
          <table:table-cell office:value-type="float" office:value="-0.585051989510954" table:style-name="c9">
            <text:p>-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8:00</text:p>
          </table:table-cell>
          <table:table-cell office:value-type="float" office:value="0.1048524" table:style-name="c8">
            <text:p>0.10485</text:p>
          </table:table-cell>
          <table:table-cell office:value-type="string" table:style-name="c8">
            <text:p>2026-03-04 18:30</text:p>
          </table:table-cell>
          <table:table-cell office:value-type="float" office:value="0.1049475" table:style-name="c8">
            <text:p>0.10495</text:p>
          </table:table-cell>
          <table:table-cell office:value-type="float" office:value="-0.1093823818052786" table:style-name="c9">
            <text:p>-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09:30</text:p>
          </table:table-cell>
          <table:table-cell office:value-type="float" office:value="0.1042521" table:style-name="c8">
            <text:p>0.10425</text:p>
          </table:table-cell>
          <table:table-cell office:value-type="string" table:style-name="c8">
            <text:p>2026-03-05 10:00</text:p>
          </table:table-cell>
          <table:table-cell office:value-type="float" office:value="0.10404795" table:style-name="c8">
            <text:p>0.10405</text:p>
          </table:table-cell>
          <table:table-cell office:value-type="float" office:value="-0.39533194252201476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3:00</text:p>
          </table:table-cell>
          <table:table-cell office:value-type="float" office:value="0.10465229999999999" table:style-name="c8">
            <text:p>0.10465</text:p>
          </table:table-cell>
          <table:table-cell office:value-type="string" table:style-name="c8">
            <text:p>2026-03-05 13:30</text:p>
          </table:table-cell>
          <table:table-cell office:value-type="float" office:value="0.10384805000000001" table:style-name="c8">
            <text:p>0.10385</text:p>
          </table:table-cell>
          <table:table-cell office:value-type="float" office:value="-0.9668609786406823" table:style-name="c9">
            <text:p>-1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9:15</text:p>
          </table:table-cell>
          <table:table-cell office:value-type="float" office:value="0.10355174999999998" table:style-name="c8">
            <text:p>0.10355</text:p>
          </table:table-cell>
          <table:table-cell office:value-type="string" table:style-name="c8">
            <text:p>2026-03-05 19:45</text:p>
          </table:table-cell>
          <table:table-cell office:value-type="float" office:value="0.10264865000000001" table:style-name="c8">
            <text:p>0.10265</text:p>
          </table:table-cell>
          <table:table-cell office:value-type="float" office:value="-1.0702809477869502" table:style-name="c9">
            <text:p>-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6:30</text:p>
          </table:table-cell>
          <table:table-cell office:value-type="float" office:value="0.09954975" table:style-name="c8">
            <text:p>0.09955</text:p>
          </table:table-cell>
          <table:table-cell office:value-type="string" table:style-name="c8">
            <text:p>2026-03-09 17:00</text:p>
          </table:table-cell>
          <table:table-cell office:value-type="float" office:value="0.0985507" table:style-name="c8">
            <text:p>0.098551</text:p>
          </table:table-cell>
          <table:table-cell office:value-type="float" office:value="-1.2014624339086621" table:style-name="c9">
            <text:p>-1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9:30</text:p>
          </table:table-cell>
          <table:table-cell office:value-type="float" office:value="0.10095045" table:style-name="c8">
            <text:p>0.10095</text:p>
          </table:table-cell>
          <table:table-cell office:value-type="string" table:style-name="c8">
            <text:p>2026-03-09 20:00</text:p>
          </table:table-cell>
          <table:table-cell office:value-type="float" office:value="0.09925035" table:style-name="c8">
            <text:p>0.09925</text:p>
          </table:table-cell>
          <table:table-cell office:value-type="float" office:value="-1.8806270300429584" table:style-name="c9">
            <text:p>-1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2:45</text:p>
          </table:table-cell>
          <table:table-cell office:value-type="float" office:value="0.1004502" table:style-name="c8">
            <text:p>0.10045</text:p>
          </table:table-cell>
          <table:table-cell office:value-type="string" table:style-name="c8">
            <text:p>2026-03-10 03:15</text:p>
          </table:table-cell>
          <table:table-cell office:value-type="float" office:value="0.09975010000000001" table:style-name="c8">
            <text:p>0.09975</text:p>
          </table:table-cell>
          <table:table-cell office:value-type="float" office:value="-0.8954690482448013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8:15</text:p>
          </table:table-cell>
          <table:table-cell office:value-type="float" office:value="0.1004502" table:style-name="c8">
            <text:p>0.10045</text:p>
          </table:table-cell>
          <table:table-cell office:value-type="string" table:style-name="c8">
            <text:p>2026-03-10 08:45</text:p>
          </table:table-cell>
          <table:table-cell office:value-type="float" office:value="0.09995000000000001" table:style-name="c8">
            <text:p>0.09995</text:p>
          </table:table-cell>
          <table:table-cell office:value-type="float" office:value="-0.6968627737923838" table:style-name="c9">
            <text:p>-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9:30</text:p>
          </table:table-cell>
          <table:table-cell office:value-type="float" office:value="0.1012506" table:style-name="c8">
            <text:p>0.10125</text:p>
          </table:table-cell>
          <table:table-cell office:value-type="string" table:style-name="c8">
            <text:p>2026-03-10 10:00</text:p>
          </table:table-cell>
          <table:table-cell office:value-type="float" office:value="0.1005497" table:style-name="c8">
            <text:p>0.10055</text:p>
          </table:table-cell>
          <table:table-cell office:value-type="float" office:value="-0.890759018020626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07:15</text:p>
          </table:table-cell>
          <table:table-cell office:value-type="float" office:value="0.09864929999999998" table:style-name="c8">
            <text:p>0.098649</text:p>
          </table:table-cell>
          <table:table-cell office:value-type="string" table:style-name="c8">
            <text:p>2026-03-11 07:45</text:p>
          </table:table-cell>
          <table:table-cell office:value-type="float" office:value="0.09795100000000001" table:style-name="c8">
            <text:p>0.097951</text:p>
          </table:table-cell>
          <table:table-cell office:value-type="float" office:value="-0.9063460653040312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2:45</text:p>
          </table:table-cell>
          <table:table-cell office:value-type="float" office:value="0.10085039999999999" table:style-name="c8">
            <text:p>0.10085</text:p>
          </table:table-cell>
          <table:table-cell office:value-type="string" table:style-name="c8">
            <text:p>2026-03-11 13:15</text:p>
          </table:table-cell>
          <table:table-cell office:value-type="float" office:value="0.10144925000000002" table:style-name="c8">
            <text:p>0.10145</text:p>
          </table:table-cell>
          <table:table-cell office:value-type="float" office:value="0.39271331521744113" table:style-name="c10">
            <text:p>+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45</text:p>
          </table:table-cell>
          <table:table-cell office:value-type="float" office:value="0.1018509" table:style-name="c8">
            <text:p>0.10185</text:p>
          </table:table-cell>
          <table:table-cell office:value-type="string" table:style-name="c8">
            <text:p>2026-03-11 14:15</text:p>
          </table:table-cell>
          <table:table-cell office:value-type="float" office:value="0.10174910000000001" table:style-name="c8">
            <text:p>0.1017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4:30</text:p>
          </table:table-cell>
          <table:table-cell office:value-type="float" office:value="0.10235115" table:style-name="c8">
            <text:p>0.10235</text:p>
          </table:table-cell>
          <table:table-cell office:value-type="string" table:style-name="c8">
            <text:p>2026-03-11 15:00</text:p>
          </table:table-cell>
          <table:table-cell office:value-type="float" office:value="0.1015492" table:style-name="c8">
            <text:p>0.10155</text:p>
          </table:table-cell>
          <table:table-cell office:value-type="float" office:value="-0.981861806926454" table:style-name="c9">
            <text:p>-1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0:00</text:p>
          </table:table-cell>
          <table:table-cell office:value-type="float" office:value="0.0994497" table:style-name="c8">
            <text:p>0.09945</text:p>
          </table:table-cell>
          <table:table-cell office:value-type="string" table:style-name="c8">
            <text:p>2026-03-12 10:30</text:p>
          </table:table-cell>
          <table:table-cell office:value-type="float" office:value="0.09985005000000001" table:style-name="c8">
            <text:p>0.09985</text:p>
          </table:table-cell>
          <table:table-cell office:value-type="float" office:value="0.20186058887057268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0.1024512" table:style-name="c8">
            <text:p>0.10245</text:p>
          </table:table-cell>
          <table:table-cell office:value-type="string" table:style-name="c8">
            <text:p>2026-03-13 01:00</text:p>
          </table:table-cell>
          <table:table-cell office:value-type="float" office:value="0.101949" table:style-name="c8">
            <text:p>0.10195</text:p>
          </table:table-cell>
          <table:table-cell office:value-type="float" office:value="-0.6891047161966091" table:style-name="c9">
            <text:p>-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15</text:p>
          </table:table-cell>
          <table:table-cell office:value-type="float" office:value="0.10515255" table:style-name="c8">
            <text:p>0.10515</text:p>
          </table:table-cell>
          <table:table-cell office:value-type="string" table:style-name="c8">
            <text:p>2026-03-13 10:45</text:p>
          </table:table-cell>
          <table:table-cell office:value-type="float" office:value="0.10464765000000001" table:style-name="c8">
            <text:p>0.10465</text:p>
          </table:table-cell>
          <table:table-cell office:value-type="float" office:value="-0.6790997007205091" table:style-name="c9">
            <text:p>-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0.10595294999999999" table:style-name="c8">
            <text:p>0.10595</text:p>
          </table:table-cell>
          <table:table-cell office:value-type="string" table:style-name="c8">
            <text:p>2026-03-13 14:00</text:p>
          </table:table-cell>
          <table:table-cell office:value-type="float" office:value="0.10624685000000002" table:style-name="c8">
            <text:p>0.10625</text:p>
          </table:table-cell>
          <table:table-cell office:value-type="float" office:value="0.07693277709588386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0:30</text:p>
          </table:table-cell>
          <table:table-cell office:value-type="float" office:value="0.10235115" table:style-name="c8">
            <text:p>0.10235</text:p>
          </table:table-cell>
          <table:table-cell office:value-type="string" table:style-name="c8">
            <text:p>2026-03-15 11:00</text:p>
          </table:table-cell>
          <table:table-cell office:value-type="float" office:value="0.1023488" table:style-name="c8">
            <text:p>0.10235</text:p>
          </table:table-cell>
          <table:table-cell office:value-type="float" office:value="-0.20219142745343532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8:15</text:p>
          </table:table-cell>
          <table:table-cell office:value-type="float" office:value="0.1022511" table:style-name="c8">
            <text:p>0.10225</text:p>
          </table:table-cell>
          <table:table-cell office:value-type="string" table:style-name="c8">
            <text:p>2026-03-15 18:45</text:p>
          </table:table-cell>
          <table:table-cell office:value-type="float" office:value="0.10204895" table:style-name="c8">
            <text:p>0.10205</text:p>
          </table:table-cell>
          <table:table-cell office:value-type="float" office:value="-0.39720438318022744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0.10375184999999999" table:style-name="c8">
            <text:p>0.10375</text:p>
          </table:table-cell>
          <table:table-cell office:value-type="string" table:style-name="c8">
            <text:p>2026-03-15 23:15</text:p>
          </table:table-cell>
          <table:table-cell office:value-type="float" office:value="0.10424785" table:style-name="c8">
            <text:p>0.10425</text:p>
          </table:table-cell>
          <table:table-cell office:value-type="float" office:value="0.27720811518061605" table:style-name="c10">
            <text:p>+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0.1050525" table:style-name="c8">
            <text:p>0.10505</text:p>
          </table:table-cell>
          <table:table-cell office:value-type="string" table:style-name="c8">
            <text:p>2026-03-16 04:00</text:p>
          </table:table-cell>
          <table:table-cell office:value-type="float" office:value="0.105947" table:style-name="c8">
            <text:p>0.10595</text:p>
          </table:table-cell>
          <table:table-cell office:value-type="float" office:value="0.6498769158277851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4:15</text:p>
          </table:table-cell>
          <table:table-cell office:value-type="float" office:value="0.10675335" table:style-name="c8">
            <text:p>0.10675</text:p>
          </table:table-cell>
          <table:table-cell office:value-type="string" table:style-name="c8">
            <text:p>2026-03-16 04:45</text:p>
          </table:table-cell>
          <table:table-cell office:value-type="float" office:value="0.10674660000000001" table:style-name="c8">
            <text:p>0.10675</text:p>
          </table:table-cell>
          <table:table-cell office:value-type="float" office:value="-0.20621034693523166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1:15</text:p>
          </table:table-cell>
          <table:table-cell office:value-type="float" office:value="0.1102551" table:style-name="c8">
            <text:p>0.11026</text:p>
          </table:table-cell>
          <table:table-cell office:value-type="string" table:style-name="c8">
            <text:p>2026-03-16 21:45</text:p>
          </table:table-cell>
          <table:table-cell office:value-type="float" office:value="0.1107446" table:style-name="c8">
            <text:p>0.11074</text:p>
          </table:table-cell>
          <table:table-cell office:value-type="float" office:value="0.24318289548508343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4:45</text:p>
          </table:table-cell>
          <table:table-cell office:value-type="float" office:value="0.10845419999999999" table:style-name="c8">
            <text:p>0.10845</text:p>
          </table:table-cell>
          <table:table-cell office:value-type="string" table:style-name="c8">
            <text:p>2026-03-17 15:15</text:p>
          </table:table-cell>
          <table:table-cell office:value-type="float" office:value="0.10744625000000001" table:style-name="c8">
            <text:p>0.10745</text:p>
          </table:table-cell>
          <table:table-cell office:value-type="float" office:value="-1.1274206565997202" table:style-name="c9">
            <text:p>-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00</text:p>
          </table:table-cell>
          <table:table-cell office:value-type="float" office:value="0.09274635" table:style-name="c8">
            <text:p>0.092746</text:p>
          </table:table-cell>
          <table:table-cell office:value-type="string" table:style-name="c8">
            <text:p>2026-03-30 08:30</text:p>
          </table:table-cell>
          <table:table-cell office:value-type="float" office:value="0.0927536" table:style-name="c8">
            <text:p>0.092754</text:p>
          </table:table-cell>
          <table:table-cell office:value-type="float" office:value="-0.19209860700718506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45</text:p>
          </table:table-cell>
          <table:table-cell office:value-type="float" office:value="0.09314655" table:style-name="c8">
            <text:p>0.093147</text:p>
          </table:table-cell>
          <table:table-cell office:value-type="string" table:style-name="c8">
            <text:p>2026-03-30 09:15</text:p>
          </table:table-cell>
          <table:table-cell office:value-type="float" office:value="0.09265365" table:style-name="c8">
            <text:p>0.092654</text:p>
          </table:table-cell>
          <table:table-cell office:value-type="float" office:value="-0.7280083334809451" table:style-name="c9">
            <text:p>-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2:30</text:p>
          </table:table-cell>
          <table:table-cell office:value-type="float" office:value="0.09334664999999999" table:style-name="c8">
            <text:p>0.093347</text:p>
          </table:table-cell>
          <table:table-cell office:value-type="string" table:style-name="c8">
            <text:p>2026-03-30 13:00</text:p>
          </table:table-cell>
          <table:table-cell office:value-type="float" office:value="0.09345325" table:style-name="c8">
            <text:p>0.093453</text:p>
          </table:table-cell>
          <table:table-cell office:value-type="float" office:value="-0.08593028967829319" table:style-name="c9">
            <text:p>-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1:15</text:p>
          </table:table-cell>
          <table:table-cell office:value-type="float" office:value="0.0912456" table:style-name="c8">
            <text:p>0.091246</text:p>
          </table:table-cell>
          <table:table-cell office:value-type="string" table:style-name="c8">
            <text:p>2026-03-30 21:45</text:p>
          </table:table-cell>
          <table:table-cell office:value-type="float" office:value="0.0915542" table:style-name="c8">
            <text:p>0.091554</text:p>
          </table:table-cell>
          <table:table-cell office:value-type="float" office:value="0.13763201096819166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2:00</text:p>
          </table:table-cell>
          <table:table-cell office:value-type="float" office:value="0.09244619999999999" table:style-name="c8">
            <text:p>0.092446</text:p>
          </table:table-cell>
          <table:table-cell office:value-type="string" table:style-name="c8">
            <text:p>2026-03-31 12:30</text:p>
          </table:table-cell>
          <table:table-cell office:value-type="float" office:value="0.09215390000000001" table:style-name="c8">
            <text:p>0.092154</text:p>
          </table:table-cell>
          <table:table-cell office:value-type="float" office:value="-0.5154518477773817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3:15</text:p>
          </table:table-cell>
          <table:table-cell office:value-type="float" office:value="0.09244619999999999" table:style-name="c8">
            <text:p>0.092446</text:p>
          </table:table-cell>
          <table:table-cell office:value-type="string" table:style-name="c8">
            <text:p>2026-03-31 13:45</text:p>
          </table:table-cell>
          <table:table-cell office:value-type="float" office:value="0.09245375" table:style-name="c8">
            <text:p>0.092454</text:p>
          </table:table-cell>
          <table:table-cell office:value-type="float" office:value="-0.1917494134426212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0.09474735000000001" table:style-name="c8">
            <text:p>0.094747</text:p>
          </table:table-cell>
          <table:table-cell office:value-type="string" table:style-name="c8">
            <text:p>2026-04-01 06:00</text:p>
          </table:table-cell>
          <table:table-cell office:value-type="float" office:value="0.0947526" table:style-name="c8">
            <text:p>0.094753</text:p>
          </table:table-cell>
          <table:table-cell office:value-type="float" office:value="-0.19437002449144147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45</text:p>
          </table:table-cell>
          <table:table-cell office:value-type="float" office:value="0.09674834999999998" table:style-name="c8">
            <text:p>0.096748</text:p>
          </table:table-cell>
          <table:table-cell office:value-type="string" table:style-name="c8">
            <text:p>2026-04-01 13:15</text:p>
          </table:table-cell>
          <table:table-cell office:value-type="float" office:value="0.09545225" table:style-name="c8">
            <text:p>0.095452</text:p>
          </table:table-cell>
          <table:table-cell office:value-type="float" office:value="-1.536883107308784" table:style-name="c9">
            <text:p>-1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09:15</text:p>
          </table:table-cell>
          <table:table-cell office:value-type="float" office:value="0.09434714999999999" table:style-name="c8">
            <text:p>0.094347</text:p>
          </table:table-cell>
          <table:table-cell office:value-type="string" table:style-name="c8">
            <text:p>2026-04-03 09:45</text:p>
          </table:table-cell>
          <table:table-cell office:value-type="float" office:value="0.09465265" table:style-name="c8">
            <text:p>0.094653</text:p>
          </table:table-cell>
          <table:table-cell office:value-type="float" office:value="0.12325687914263028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9:15</text:p>
          </table:table-cell>
          <table:table-cell office:value-type="float" office:value="0.09374685" table:style-name="c8">
            <text:p>0.093747</text:p>
          </table:table-cell>
          <table:table-cell office:value-type="string" table:style-name="c8">
            <text:p>2026-04-04 19:45</text:p>
          </table:table-cell>
          <table:table-cell office:value-type="float" office:value="0.09285355" table:style-name="c8">
            <text:p>0.092854</text:p>
          </table:table-cell>
          <table:table-cell office:value-type="float" office:value="-1.1508805324659033" table:style-name="c9">
            <text:p>-1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8:15</text:p>
          </table:table-cell>
          <table:table-cell office:value-type="float" office:value="0.09634815" table:style-name="c8">
            <text:p>0.096348</text:p>
          </table:table-cell>
          <table:table-cell office:value-type="string" table:style-name="c8">
            <text:p>2026-04-06 08:45</text:p>
          </table:table-cell>
          <table:table-cell office:value-type="float" office:value="0.09685155000000001" table:style-name="c8">
            <text:p>0.096852</text:p>
          </table:table-cell>
          <table:table-cell office:value-type="float" office:value="0.32153575501969733" table:style-name="c10">
            <text:p>+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00</text:p>
          </table:table-cell>
          <table:table-cell office:value-type="float" office:value="0.09654825" table:style-name="c8">
            <text:p>0.096548</text:p>
          </table:table-cell>
          <table:table-cell office:value-type="string" table:style-name="c8">
            <text:p>2026-04-06 09:30</text:p>
          </table:table-cell>
          <table:table-cell office:value-type="float" office:value="0.09745125" table:style-name="c8">
            <text:p>0.097451</text:p>
          </table:table-cell>
          <table:table-cell office:value-type="float" office:value="0.7335140214866698" table:style-name="c10">
            <text:p>+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45</text:p>
          </table:table-cell>
          <table:table-cell office:value-type="float" office:value="0.09714855" table:style-name="c8">
            <text:p>0.097149</text:p>
          </table:table-cell>
          <table:table-cell office:value-type="string" table:style-name="c8">
            <text:p>2026-04-06 10:15</text:p>
          </table:table-cell>
          <table:table-cell office:value-type="float" office:value="0.09795100000000001" table:style-name="c8">
            <text:p>0.097951</text:p>
          </table:table-cell>
          <table:table-cell office:value-type="float" office:value="0.6244518842535518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06:00</text:p>
          </table:table-cell>
          <table:table-cell office:value-type="float" office:value="0.0942471" table:style-name="c8">
            <text:p>0.094247</text:p>
          </table:table-cell>
          <table:table-cell office:value-type="string" table:style-name="c8">
            <text:p>2026-04-07 06:30</text:p>
          </table:table-cell>
          <table:table-cell office:value-type="float" office:value="0.09385305000000001" table:style-name="c8">
            <text:p>0.093853</text:p>
          </table:table-cell>
          <table:table-cell office:value-type="float" office:value="-0.6171672623879187" table:style-name="c9">
            <text:p>-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18:00</text:p>
          </table:table-cell>
          <table:table-cell office:value-type="float" office:value="0.09484739999999998" table:style-name="c8">
            <text:p>0.094847</text:p>
          </table:table-cell>
          <table:table-cell office:value-type="string" table:style-name="c8">
            <text:p>2026-04-07 18:30</text:p>
          </table:table-cell>
          <table:table-cell office:value-type="float" office:value="0.09515240000000001" table:style-name="c8">
            <text:p>0.095152</text:p>
          </table:table-cell>
          <table:table-cell office:value-type="float" office:value="0.12102635644206661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19:30</text:p>
          </table:table-cell>
          <table:table-cell office:value-type="float" office:value="0.0956478" table:style-name="c8">
            <text:p>0.095648</text:p>
          </table:table-cell>
          <table:table-cell office:value-type="string" table:style-name="c8">
            <text:p>2026-04-07 20:00</text:p>
          </table:table-cell>
          <table:table-cell office:value-type="float" office:value="0.09695150000000001" table:style-name="c8">
            <text:p>0.096952</text:p>
          </table:table-cell>
          <table:table-cell office:value-type="float" office:value="1.1603967383463365" table:style-name="c10">
            <text:p>+1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0:15</text:p>
          </table:table-cell>
          <table:table-cell office:value-type="float" office:value="0.0974487" table:style-name="c8">
            <text:p>0.097449</text:p>
          </table:table-cell>
          <table:table-cell office:value-type="string" table:style-name="c8">
            <text:p>2026-04-07 20:45</text:p>
          </table:table-cell>
          <table:table-cell office:value-type="float" office:value="0.09705145000000001" table:style-name="c8">
            <text:p>0.097051</text:p>
          </table:table-cell>
          <table:table-cell office:value-type="float" office:value="-0.6067354911353351" table:style-name="c9">
            <text:p>-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45</text:p>
          </table:table-cell>
          <table:table-cell office:value-type="float" office:value="0.10075034999999999" table:style-name="c8">
            <text:p>0.10075</text:p>
          </table:table-cell>
          <table:table-cell office:value-type="string" table:style-name="c8">
            <text:p>2026-04-07 23:15</text:p>
          </table:table-cell>
          <table:table-cell office:value-type="float" office:value="0.10204895" table:style-name="c8">
            <text:p>0.10205</text:p>
          </table:table-cell>
          <table:table-cell office:value-type="float" office:value="1.0864519566929687" table:style-name="c10">
            <text:p>+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04:15</text:p>
          </table:table-cell>
          <table:table-cell office:value-type="float" office:value="0.1028514" table:style-name="c8">
            <text:p>0.10285</text:p>
          </table:table-cell>
          <table:table-cell office:value-type="string" table:style-name="c8">
            <text:p>2026-04-08 04:45</text:p>
          </table:table-cell>
          <table:table-cell office:value-type="float" office:value="0.10364815000000001" table:style-name="c8">
            <text:p>0.10365</text:p>
          </table:table-cell>
          <table:table-cell office:value-type="float" office:value="0.5732127595249104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21:15</text:p>
          </table:table-cell>
          <table:table-cell office:value-type="float" office:value="0.1038519" table:style-name="c8">
            <text:p>0.10385</text:p>
          </table:table-cell>
          <table:table-cell office:value-type="string" table:style-name="c8">
            <text:p>2026-04-08 21:45</text:p>
          </table:table-cell>
          <table:table-cell office:value-type="float" office:value="0.10474760000000001" table:style-name="c8">
            <text:p>0.10475</text:p>
          </table:table-cell>
          <table:table-cell office:value-type="float" office:value="0.6608541082060437" table:style-name="c10">
            <text:p>+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6:00</text:p>
          </table:table-cell>
          <table:table-cell office:value-type="float" office:value="0.10395195" table:style-name="c8">
            <text:p>0.10395</text:p>
          </table:table-cell>
          <table:table-cell office:value-type="string" table:style-name="c8">
            <text:p>2026-04-09 16:30</text:p>
          </table:table-cell>
          <table:table-cell office:value-type="float" office:value="0.10364815000000001" table:style-name="c8">
            <text:p>0.10365</text:p>
          </table:table-cell>
          <table:table-cell office:value-type="float" office:value="-0.4915662013555311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1:45</text:p>
          </table:table-cell>
          <table:table-cell office:value-type="float" office:value="0.1070535" table:style-name="c8">
            <text:p>0.10705</text:p>
          </table:table-cell>
          <table:table-cell office:value-type="string" table:style-name="c8">
            <text:p>2026-04-09 22:15</text:p>
          </table:table-cell>
          <table:table-cell office:value-type="float" office:value="0.10804595" table:style-name="c8">
            <text:p>0.10805</text:p>
          </table:table-cell>
          <table:table-cell office:value-type="float" office:value="0.7253066419594001" table:style-name="c10">
            <text:p>+0.7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0.10895445" table:style-name="c8">
            <text:p>0.10895</text:p>
          </table:table-cell>
          <table:table-cell office:value-type="string" table:style-name="c8">
            <text:p>2026-04-09 23:00</text:p>
          </table:table-cell>
          <table:table-cell office:value-type="float" office:value="0.10784605" table:style-name="c8">
            <text:p>0.10785</text:p>
          </table:table-cell>
          <table:table-cell office:value-type="float" office:value="-1.215172261389974" table:style-name="c9">
            <text:p>-1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05:00</text:p>
          </table:table-cell>
          <table:table-cell office:value-type="float" office:value="0.112056" table:style-name="c8">
            <text:p>0.11206</text:p>
          </table:table-cell>
          <table:table-cell office:value-type="string" table:style-name="c8">
            <text:p>2026-04-10 05:30</text:p>
          </table:table-cell>
          <table:table-cell office:value-type="float" office:value="0.11104445000000002" table:style-name="c8">
            <text:p>0.11104</text:p>
          </table:table-cell>
          <table:table-cell office:value-type="float" office:value="-1.1008137498661252" table:style-name="c9">
            <text:p>-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21:45</text:p>
          </table:table-cell>
          <table:table-cell office:value-type="float" office:value="0.1136568" table:style-name="c8">
            <text:p>0.11366</text:p>
          </table:table-cell>
          <table:table-cell office:value-type="string" table:style-name="c8">
            <text:p>2026-04-10 22:15</text:p>
          </table:table-cell>
          <table:table-cell office:value-type="float" office:value="0.11484255" table:style-name="c8">
            <text:p>0.11484</text:p>
          </table:table-cell>
          <table:table-cell office:value-type="float" office:value="0.8412868764121395" table:style-name="c10">
            <text:p>+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22:30</text:p>
          </table:table-cell>
          <table:table-cell office:value-type="float" office:value="0.11495745" table:style-name="c8">
            <text:p>0.11496</text:p>
          </table:table-cell>
          <table:table-cell office:value-type="string" table:style-name="c8">
            <text:p>2026-04-10 23:00</text:p>
          </table:table-cell>
          <table:table-cell office:value-type="float" office:value="0.11544225000000001" table:style-name="c8">
            <text:p>0.11544</text:p>
          </table:table-cell>
          <table:table-cell office:value-type="float" office:value="0.22097823346813872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02:30</text:p>
          </table:table-cell>
          <table:table-cell office:value-type="float" office:value="0.1174587" table:style-name="c8">
            <text:p>0.11746</text:p>
          </table:table-cell>
          <table:table-cell office:value-type="string" table:style-name="c8">
            <text:p>2026-04-11 03:00</text:p>
          </table:table-cell>
          <table:table-cell office:value-type="float" office:value="0.1189405" table:style-name="c8">
            <text:p>0.11894</text:p>
          </table:table-cell>
          <table:table-cell office:value-type="float" office:value="1.0591279662553799" table:style-name="c10">
            <text:p>+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04:00</text:p>
          </table:table-cell>
          <table:table-cell office:value-type="float" office:value="0.1206603" table:style-name="c8">
            <text:p>0.12066</text:p>
          </table:table-cell>
          <table:table-cell office:value-type="string" table:style-name="c8">
            <text:p>2026-04-11 04:30</text:p>
          </table:table-cell>
          <table:table-cell office:value-type="float" office:value="0.11824085000000001" table:style-name="c8">
            <text:p>0.11824</text:p>
          </table:table-cell>
          <table:table-cell office:value-type="float" office:value="-2.2010665141309893" table:style-name="c9">
            <text:p>-2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30</text:p>
          </table:table-cell>
          <table:table-cell office:value-type="float" office:value="0.11665829999999999" table:style-name="c8">
            <text:p>0.11666</text:p>
          </table:table-cell>
          <table:table-cell office:value-type="string" table:style-name="c8">
            <text:p>2026-04-11 19:00</text:p>
          </table:table-cell>
          <table:table-cell office:value-type="float" office:value="0.1167416" table:style-name="c8">
            <text:p>0.11674</text:p>
          </table:table-cell>
          <table:table-cell office:value-type="float" office:value="-0.12863761806918284" table:style-name="c9">
            <text:p>-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2 13:15</text:p>
          </table:table-cell>
          <table:table-cell office:value-type="float" office:value="0.11195595" table:style-name="c8">
            <text:p>0.11196</text:p>
          </table:table-cell>
          <table:table-cell office:value-type="string" table:style-name="c8">
            <text:p>2026-04-12 13:45</text:p>
          </table:table-cell>
          <table:table-cell office:value-type="float" office:value="0.11184405" table:style-name="c8">
            <text:p>0.11184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2 18:15</text:p>
          </table:table-cell>
          <table:table-cell office:value-type="float" office:value="0.11295645" table:style-name="c8">
            <text:p>0.11296</text:p>
          </table:table-cell>
          <table:table-cell office:value-type="string" table:style-name="c8">
            <text:p>2026-04-12 18:45</text:p>
          </table:table-cell>
          <table:table-cell office:value-type="float" office:value="0.111944" table:style-name="c8">
            <text:p>0.11194</text:p>
          </table:table-cell>
          <table:table-cell office:value-type="float" office:value="-1.0944271495784252" table:style-name="c9">
            <text:p>-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2 21:00</text:p>
          </table:table-cell>
          <table:table-cell office:value-type="float" office:value="0.11245619999999999" table:style-name="c8">
            <text:p>0.11246</text:p>
          </table:table-cell>
          <table:table-cell office:value-type="string" table:style-name="c8">
            <text:p>2026-04-12 21:30</text:p>
          </table:table-cell>
          <table:table-cell office:value-type="float" office:value="0.11164415" table:style-name="c8">
            <text:p>0.11164</text:p>
          </table:table-cell>
          <table:table-cell office:value-type="float" office:value="-0.9205598765119172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6:45</text:p>
          </table:table-cell>
          <table:table-cell office:value-type="float" office:value="0.11135564999999999" table:style-name="c8">
            <text:p>0.11136</text:p>
          </table:table-cell>
          <table:table-cell office:value-type="string" table:style-name="c8">
            <text:p>2026-04-14 17:15</text:p>
          </table:table-cell>
          <table:table-cell office:value-type="float" office:value="0.11164415" table:style-name="c8">
            <text:p>0.11164</text:p>
          </table:table-cell>
          <table:table-cell office:value-type="float" office:value="0.05866190368430946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7:30</text:p>
          </table:table-cell>
          <table:table-cell office:value-type="float" office:value="0.11145569999999999" table:style-name="c8">
            <text:p>0.11146</text:p>
          </table:table-cell>
          <table:table-cell office:value-type="string" table:style-name="c8">
            <text:p>2026-04-14 18:00</text:p>
          </table:table-cell>
          <table:table-cell office:value-type="float" office:value="0.11154420000000001" table:style-name="c8">
            <text:p>0.11154</text:p>
          </table:table-cell>
          <table:table-cell office:value-type="float" office:value="-0.12065498292145316" table:style-name="c9">
            <text:p>-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1:15</text:p>
          </table:table-cell>
          <table:table-cell office:value-type="float" office:value="0.11335664999999999" table:style-name="c8">
            <text:p>0.11336</text:p>
          </table:table-cell>
          <table:table-cell office:value-type="string" table:style-name="c8">
            <text:p>2026-04-15 11:45</text:p>
          </table:table-cell>
          <table:table-cell office:value-type="float" office:value="0.11304345000000002" table:style-name="c8">
            <text:p>0.11304</text:p>
          </table:table-cell>
          <table:table-cell office:value-type="float" office:value="-0.47564378141906616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5:30</text:p>
          </table:table-cell>
          <table:table-cell office:value-type="float" office:value="0.11785889999999999" table:style-name="c8">
            <text:p>0.11786</text:p>
          </table:table-cell>
          <table:table-cell office:value-type="string" table:style-name="c8">
            <text:p>2026-04-16 06:00</text:p>
          </table:table-cell>
          <table:table-cell office:value-type="float" office:value="0.11824085000000001" table:style-name="c8">
            <text:p>0.11824</text:p>
          </table:table-cell>
          <table:table-cell office:value-type="float" office:value="0.12352613239221544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7:30</text:p>
          </table:table-cell>
          <table:table-cell office:value-type="float" office:value="0.1192596" table:style-name="c8">
            <text:p>0.11926</text:p>
          </table:table-cell>
          <table:table-cell office:value-type="string" table:style-name="c8">
            <text:p>2026-04-16 08:00</text:p>
          </table:table-cell>
          <table:table-cell office:value-type="float" office:value="0.1195402" table:style-name="c8">
            <text:p>0.11954</text:p>
          </table:table-cell>
          <table:table-cell office:value-type="float" office:value="0.03491470724368284" table:style-name="c10">
            <text:p>+0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8:15</text:p>
          </table:table-cell>
          <table:table-cell office:value-type="float" office:value="0.1194597" table:style-name="c8">
            <text:p>0.11946</text:p>
          </table:table-cell>
          <table:table-cell office:value-type="string" table:style-name="c8">
            <text:p>2026-04-16 08:45</text:p>
          </table:table-cell>
          <table:table-cell office:value-type="float" office:value="0.11864065" table:style-name="c8">
            <text:p>0.11864</text:p>
          </table:table-cell>
          <table:table-cell office:value-type="float" office:value="-0.8841581381419772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15</text:p>
          </table:table-cell>
          <table:table-cell office:value-type="float" office:value="0.1202601" table:style-name="c8">
            <text:p>0.12026</text:p>
          </table:table-cell>
          <table:table-cell office:value-type="string" table:style-name="c8">
            <text:p>2026-04-16 12:45</text:p>
          </table:table-cell>
          <table:table-cell office:value-type="float" office:value="0.12123935000000001" table:style-name="c8">
            <text:p>0.12124</text:p>
          </table:table-cell>
          <table:table-cell office:value-type="float" office:value="0.6127489827049803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0.12416205" table:style-name="c8">
            <text:p>0.12416</text:p>
          </table:table-cell>
          <table:table-cell office:value-type="string" table:style-name="c8">
            <text:p>2026-04-16 13:45</text:p>
          </table:table-cell>
          <table:table-cell office:value-type="float" office:value="0.12463765000000002" table:style-name="c8">
            <text:p>0.12464</text:p>
          </table:table-cell>
          <table:table-cell office:value-type="float" office:value="0.18238208667626932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0.1244622" table:style-name="c8">
            <text:p>0.12446</text:p>
          </table:table-cell>
          <table:table-cell office:value-type="string" table:style-name="c8">
            <text:p>2026-04-16 16:15</text:p>
          </table:table-cell>
          <table:table-cell office:value-type="float" office:value="0.12343825" table:style-name="c8">
            <text:p>0.12344</text:p>
          </table:table-cell>
          <table:table-cell office:value-type="float" office:value="-1.020955006218749" table:style-name="c9">
            <text:p>-1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8:15</text:p>
          </table:table-cell>
          <table:table-cell office:value-type="float" office:value="0.12466229999999999" table:style-name="c8">
            <text:p>0.12466</text:p>
          </table:table-cell>
          <table:table-cell office:value-type="string" table:style-name="c8">
            <text:p>2026-04-16 18:45</text:p>
          </table:table-cell>
          <table:table-cell office:value-type="float" office:value="0.12563715" table:style-name="c8">
            <text:p>0.12564</text:p>
          </table:table-cell>
          <table:table-cell office:value-type="float" office:value="0.5805294280227358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2:00</text:p>
          </table:table-cell>
          <table:table-cell office:value-type="float" office:value="0.13396694999999997" table:style-name="c8">
            <text:p>0.13397</text:p>
          </table:table-cell>
          <table:table-cell office:value-type="string" table:style-name="c8">
            <text:p>2026-04-17 12:30</text:p>
          </table:table-cell>
          <table:table-cell office:value-type="float" office:value="0.13423285000000001" table:style-name="c8">
            <text:p>0.13423</text:p>
          </table:table-cell>
          <table:table-cell office:value-type="float" office:value="-0.0018149753726270923" table:style-name="c9">
            <text:p>-0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6:15</text:p>
          </table:table-cell>
          <table:table-cell office:value-type="float" office:value="0.13186589999999998" table:style-name="c8">
            <text:p>0.13187</text:p>
          </table:table-cell>
          <table:table-cell office:value-type="string" table:style-name="c8">
            <text:p>2026-04-18 06:45</text:p>
          </table:table-cell>
          <table:table-cell office:value-type="float" office:value="0.1331334" table:style-name="c8">
            <text:p>0.13313</text:p>
          </table:table-cell>
          <table:table-cell office:value-type="float" office:value="0.7593823220408247" table:style-name="c10">
            <text:p>+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7:00</text:p>
          </table:table-cell>
          <table:table-cell office:value-type="float" office:value="0.1330665" table:style-name="c8">
            <text:p>0.13307</text:p>
          </table:table-cell>
          <table:table-cell office:value-type="string" table:style-name="c8">
            <text:p>2026-04-18 07:30</text:p>
          </table:table-cell>
          <table:table-cell office:value-type="float" office:value="0.1335332" table:style-name="c8">
            <text:p>0.13353</text:p>
          </table:table-cell>
          <table:table-cell office:value-type="float" office:value="0.15012578913549124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22:30</text:p>
          </table:table-cell>
          <table:table-cell office:value-type="float" office:value="0.12856425" table:style-name="c8">
            <text:p>0.12856</text:p>
          </table:table-cell>
          <table:table-cell office:value-type="string" table:style-name="c8">
            <text:p>2026-04-18 23:00</text:p>
          </table:table-cell>
          <table:table-cell office:value-type="float" office:value="0.1285357" table:style-name="c8">
            <text:p>0.12854</text:p>
          </table:table-cell>
          <table:table-cell office:value-type="float" office:value="-0.2220624040508934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6:00</text:p>
          </table:table-cell>
          <table:table-cell office:value-type="float" office:value="0.12916455" table:style-name="c8">
            <text:p>0.12916</text:p>
          </table:table-cell>
          <table:table-cell office:value-type="string" table:style-name="c8">
            <text:p>2026-04-22 06:30</text:p>
          </table:table-cell>
          <table:table-cell office:value-type="float" office:value="0.1287356" table:style-name="c8">
            <text:p>0.12874</text:p>
          </table:table-cell>
          <table:table-cell office:value-type="float" office:value="-0.5313319052325238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18:00</text:p>
          </table:table-cell>
          <table:table-cell office:value-type="float" office:value="0.13186589999999998" table:style-name="c8">
            <text:p>0.13187</text:p>
          </table:table-cell>
          <table:table-cell office:value-type="string" table:style-name="c8">
            <text:p>2026-04-22 18:30</text:p>
          </table:table-cell>
          <table:table-cell office:value-type="float" office:value="0.1315342" table:style-name="c8">
            <text:p>0.13153</text:p>
          </table:table-cell>
          <table:table-cell office:value-type="float" office:value="-0.45094058873446086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3 07:15</text:p>
          </table:table-cell>
          <table:table-cell office:value-type="float" office:value="0.1270635" table:style-name="c8">
            <text:p>0.12706</text:p>
          </table:table-cell>
          <table:table-cell office:value-type="string" table:style-name="c8">
            <text:p>2026-04-23 07:45</text:p>
          </table:table-cell>
          <table:table-cell office:value-type="float" office:value="0.1271364" table:style-name="c8">
            <text:p>0.12714</text:p>
          </table:table-cell>
          <table:table-cell office:value-type="float" office:value="-0.1426418000448515" table:style-name="c9">
            <text:p>-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00:15</text:p>
          </table:table-cell>
          <table:table-cell office:value-type="float" office:value="0.1288644" table:style-name="c8">
            <text:p>0.12886</text:p>
          </table:table-cell>
          <table:table-cell office:value-type="string" table:style-name="c8">
            <text:p>2026-04-24 00:45</text:p>
          </table:table-cell>
          <table:table-cell office:value-type="float" office:value="0.13013490000000003" table:style-name="c8">
            <text:p>0.13013</text:p>
          </table:table-cell>
          <table:table-cell office:value-type="float" office:value="0.784049229189776" table:style-name="c10">
            <text:p>+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01:00</text:p>
          </table:table-cell>
          <table:table-cell office:value-type="float" office:value="0.1308654" table:style-name="c8">
            <text:p>0.13087</text:p>
          </table:table-cell>
          <table:table-cell office:value-type="string" table:style-name="c8">
            <text:p>2026-04-24 01:30</text:p>
          </table:table-cell>
          <table:table-cell office:value-type="float" office:value="0.13003495" table:style-name="c8">
            <text:p>0.13003</text:p>
          </table:table-cell>
          <table:table-cell office:value-type="float" office:value="-0.8332147879042018" table:style-name="c9">
            <text:p>-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2:15</text:p>
          </table:table-cell>
          <table:table-cell office:value-type="float" office:value="0.1308654" table:style-name="c8">
            <text:p>0.13087</text:p>
          </table:table-cell>
          <table:table-cell office:value-type="string" table:style-name="c8">
            <text:p>2026-04-24 12:45</text:p>
          </table:table-cell>
          <table:table-cell office:value-type="float" office:value="0.1313343" table:style-name="c8">
            <text:p>0.13133</text:p>
          </table:table-cell>
          <table:table-cell office:value-type="float" office:value="0.15769082912673316" table:style-name="c10">
            <text:p>+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2:15</text:p>
          </table:table-cell>
          <table:table-cell office:value-type="float" office:value="0.132066" table:style-name="c8">
            <text:p>0.13207</text:p>
          </table:table-cell>
          <table:table-cell office:value-type="string" table:style-name="c8">
            <text:p>2026-04-25 02:45</text:p>
          </table:table-cell>
          <table:table-cell office:value-type="float" office:value="0.13243375000000002" table:style-name="c8">
            <text:p>0.13243</text:p>
          </table:table-cell>
          <table:table-cell office:value-type="float" office:value="0.0780026151697033" table:style-name="c10">
            <text:p>+0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23:15</text:p>
          </table:table-cell>
          <table:table-cell office:value-type="float" office:value="0.12916455" table:style-name="c8">
            <text:p>0.12916</text:p>
          </table:table-cell>
          <table:table-cell office:value-type="string" table:style-name="c8">
            <text:p>2026-04-25 23:45</text:p>
          </table:table-cell>
          <table:table-cell office:value-type="float" office:value="0.12903545" table:style-name="c8">
            <text:p>0.12904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0:00</text:p>
          </table:table-cell>
          <table:table-cell office:value-type="float" office:value="0.1292646" table:style-name="c8">
            <text:p>0.12926</text:p>
          </table:table-cell>
          <table:table-cell office:value-type="string" table:style-name="c8">
            <text:p>2026-04-26 00:30</text:p>
          </table:table-cell>
          <table:table-cell office:value-type="float" office:value="0.1285357" table:style-name="c8">
            <text:p>0.12854</text:p>
          </table:table-cell>
          <table:table-cell office:value-type="float" office:value="-0.762654945205421" table:style-name="c9">
            <text:p>-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5:30</text:p>
          </table:table-cell>
          <table:table-cell office:value-type="float" office:value="0.1314657" table:style-name="c8">
            <text:p>0.13147</text:p>
          </table:table-cell>
          <table:table-cell office:value-type="string" table:style-name="c8">
            <text:p>2026-04-26 06:00</text:p>
          </table:table-cell>
          <table:table-cell office:value-type="float" office:value="0.1305347" table:style-name="c8">
            <text:p>0.13053</text:p>
          </table:table-cell>
          <table:table-cell office:value-type="float" office:value="-0.9066538764864074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9:15</text:p>
          </table:table-cell>
          <table:table-cell office:value-type="float" office:value="0.13216604999999998" table:style-name="c8">
            <text:p>0.13217</text:p>
          </table:table-cell>
          <table:table-cell office:value-type="string" table:style-name="c8">
            <text:p>2026-04-26 09:45</text:p>
          </table:table-cell>
          <table:table-cell office:value-type="float" office:value="0.13173410000000002" table:style-name="c8">
            <text:p>0.13173</text:p>
          </table:table-cell>
          <table:table-cell office:value-type="float" office:value="-0.5260703984873216" table:style-name="c9">
            <text:p>-0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15</text:p>
          </table:table-cell>
          <table:table-cell office:value-type="float" office:value="0.13096544999999998" table:style-name="c8">
            <text:p>0.13097</text:p>
          </table:table-cell>
          <table:table-cell office:value-type="string" table:style-name="c8">
            <text:p>2026-04-27 01:45</text:p>
          </table:table-cell>
          <table:table-cell office:value-type="float" office:value="0.13083455" table:style-name="c8">
            <text:p>0.13083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0.1310655" table:style-name="c8">
            <text:p>0.13107</text:p>
          </table:table-cell>
          <table:table-cell office:value-type="string" table:style-name="c8">
            <text:p>2026-04-29 10:30</text:p>
          </table:table-cell>
          <table:table-cell office:value-type="float" office:value="0.13183405" table:style-name="c8">
            <text:p>0.13183</text:p>
          </table:table-cell>
          <table:table-cell office:value-type="float" office:value="0.3853140102086705" table:style-name="c10">
            <text:p>+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11:15</text:p>
          </table:table-cell>
          <table:table-cell office:value-type="float" office:value="0.12816404999999997" table:style-name="c8">
            <text:p>0.12816</text:p>
          </table:table-cell>
          <table:table-cell office:value-type="string" table:style-name="c8">
            <text:p>2026-04-30 11:45</text:p>
          </table:table-cell>
          <table:table-cell office:value-type="float" office:value="0.12723635" table:style-name="c8">
            <text:p>0.12724</text:p>
          </table:table-cell>
          <table:table-cell office:value-type="float" office:value="-0.9222909728976103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00</text:p>
          </table:table-cell>
          <table:table-cell office:value-type="float" office:value="0.12416205" table:style-name="c8">
            <text:p>0.12416</text:p>
          </table:table-cell>
          <table:table-cell office:value-type="string" table:style-name="c8">
            <text:p>2026-05-06 09:30</text:p>
          </table:table-cell>
          <table:table-cell office:value-type="float" office:value="0.12413790000000001" table:style-name="c8">
            <text:p>0.12414</text:p>
          </table:table-cell>
          <table:table-cell office:value-type="float" office:value="-0.21931150629358465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6:45</text:p>
          </table:table-cell>
          <table:table-cell office:value-type="float" office:value="0.12486239999999998" table:style-name="c8">
            <text:p>0.12486</text:p>
          </table:table-cell>
          <table:table-cell office:value-type="string" table:style-name="c8">
            <text:p>2026-05-06 17:15</text:p>
          </table:table-cell>
          <table:table-cell office:value-type="float" office:value="0.12463765000000002" table:style-name="c8">
            <text:p>0.12464</text:p>
          </table:table-cell>
          <table:table-cell office:value-type="float" office:value="-0.37953832566887113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0:15</text:p>
          </table:table-cell>
          <table:table-cell office:value-type="float" office:value="0.1258629" table:style-name="c8">
            <text:p>0.12586</text:p>
          </table:table-cell>
          <table:table-cell office:value-type="string" table:style-name="c8">
            <text:p>2026-05-06 20:45</text:p>
          </table:table-cell>
          <table:table-cell office:value-type="float" office:value="0.12443775" table:style-name="c8">
            <text:p>0.12444</text:p>
          </table:table-cell>
          <table:table-cell office:value-type="float" office:value="-1.3299400079372137" table:style-name="c9">
            <text:p>-1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1:45</text:p>
          </table:table-cell>
          <table:table-cell office:value-type="float" office:value="0.1282641" table:style-name="c8">
            <text:p>0.12826</text:p>
          </table:table-cell>
          <table:table-cell office:value-type="string" table:style-name="c8">
            <text:p>2026-05-06 22:15</text:p>
          </table:table-cell>
          <table:table-cell office:value-type="float" office:value="0.1275362" table:style-name="c8">
            <text:p>0.12754</text:p>
          </table:table-cell>
          <table:table-cell office:value-type="float" office:value="-0.7662665264871471" table:style-name="c9">
            <text:p>-0.8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2:45</text:p>
          </table:table-cell>
          <table:table-cell office:value-type="float" office:value="0.12866429999999998" table:style-name="c8">
            <text:p>0.12866</text:p>
          </table:table-cell>
          <table:table-cell office:value-type="string" table:style-name="c8">
            <text:p>2026-05-06 23:15</text:p>
          </table:table-cell>
          <table:table-cell office:value-type="float" office:value="0.1273363" table:style-name="c8">
            <text:p>0.12734</text:p>
          </table:table-cell>
          <table:table-cell office:value-type="float" office:value="-1.229980082820159" table:style-name="c9">
            <text:p>-1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0:15</text:p>
          </table:table-cell>
          <table:table-cell office:value-type="float" office:value="0.1292646" table:style-name="c8">
            <text:p>0.12926</text:p>
          </table:table-cell>
          <table:table-cell office:value-type="string" table:style-name="c8">
            <text:p>2026-05-07 00:45</text:p>
          </table:table-cell>
          <table:table-cell office:value-type="float" office:value="0.12623685" table:style-name="c8">
            <text:p>0.12624</text:p>
          </table:table-cell>
          <table:table-cell office:value-type="float" office:value="-2.5375063730905256" table:style-name="c9">
            <text:p>-2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09:30</text:p>
          </table:table-cell>
          <table:table-cell office:value-type="float" office:value="0.1346673" table:style-name="c8">
            <text:p>0.13467</text:p>
          </table:table-cell>
          <table:table-cell office:value-type="string" table:style-name="c8">
            <text:p>2026-05-08 10:00</text:p>
          </table:table-cell>
          <table:table-cell office:value-type="float" office:value="0.13193400000000002" table:style-name="c8">
            <text:p>0.13193</text:p>
          </table:table-cell>
          <table:table-cell office:value-type="float" office:value="-2.2255113646742486" table:style-name="c9">
            <text:p>-2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1:45</text:p>
          </table:table-cell>
          <table:table-cell office:value-type="float" office:value="0.13416704999999998" table:style-name="c8">
            <text:p>0.13417</text:p>
          </table:table-cell>
          <table:table-cell office:value-type="string" table:style-name="c8">
            <text:p>2026-05-08 12:15</text:p>
          </table:table-cell>
          <table:table-cell office:value-type="float" office:value="0.13393300000000002" table:style-name="c8">
            <text:p>0.13393</text:p>
          </table:table-cell>
          <table:table-cell office:value-type="float" office:value="-0.3739979875833632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5:00</text:p>
          </table:table-cell>
          <table:table-cell office:value-type="float" office:value="0.1352676" table:style-name="c8">
            <text:p>0.13527</text:p>
          </table:table-cell>
          <table:table-cell office:value-type="string" table:style-name="c8">
            <text:p>2026-05-08 15:30</text:p>
          </table:table-cell>
          <table:table-cell office:value-type="float" office:value="0.13523235" table:style-name="c8">
            <text:p>0.13523</text:p>
          </table:table-cell>
          <table:table-cell office:value-type="float" office:value="-0.22590736262783073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7:45</text:p>
          </table:table-cell>
          <table:table-cell office:value-type="float" office:value="0.14197094999999998" table:style-name="c8">
            <text:p>0.14197</text:p>
          </table:table-cell>
          <table:table-cell office:value-type="string" table:style-name="c8">
            <text:p>2026-05-08 18:15</text:p>
          </table:table-cell>
          <table:table-cell office:value-type="float" office:value="0.141929" table:style-name="c8">
            <text:p>0.14193</text:p>
          </table:table-cell>
          <table:table-cell office:value-type="float" office:value="-0.22938923138852152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9:00</text:p>
          </table:table-cell>
          <table:table-cell office:value-type="float" office:value="0.14457224999999999" table:style-name="c8">
            <text:p>0.14457</text:p>
          </table:table-cell>
          <table:table-cell office:value-type="string" table:style-name="c8">
            <text:p>2026-05-08 19:30</text:p>
          </table:table-cell>
          <table:table-cell office:value-type="float" office:value="0.1465267" table:style-name="c8">
            <text:p>0.14653</text:p>
          </table:table-cell>
          <table:table-cell office:value-type="float" office:value="1.1492821939895093" table:style-name="c10">
            <text:p>+1.1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2:30</text:p>
          </table:table-cell>
          <table:table-cell office:value-type="float" office:value="0.1450725" table:style-name="c8">
            <text:p>0.14507</text:p>
          </table:table-cell>
          <table:table-cell office:value-type="string" table:style-name="c8">
            <text:p>2026-05-09 03:00</text:p>
          </table:table-cell>
          <table:table-cell office:value-type="float" office:value="0.14542725" table:style-name="c8">
            <text:p>0.14543</text:p>
          </table:table-cell>
          <table:table-cell office:value-type="float" office:value="0.04414408468180753" table:style-name="c10">
            <text:p>+0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3:15</text:p>
          </table:table-cell>
          <table:table-cell office:value-type="float" office:value="0.14557274999999997" table:style-name="c8">
            <text:p>0.14557</text:p>
          </table:table-cell>
          <table:table-cell office:value-type="string" table:style-name="c8">
            <text:p>2026-05-09 03:45</text:p>
          </table:table-cell>
          <table:table-cell office:value-type="float" office:value="0.14372810000000003" table:style-name="c8">
            <text:p>0.14373</text:p>
          </table:table-cell>
          <table:table-cell office:value-type="float" office:value="-1.464534036692966" table:style-name="c9">
            <text:p>-1.5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6:45</text:p>
          </table:table-cell>
          <table:table-cell office:value-type="float" office:value="0.14557274999999997" table:style-name="c8">
            <text:p>0.14557</text:p>
          </table:table-cell>
          <table:table-cell office:value-type="string" table:style-name="c8">
            <text:p>2026-05-09 07:15</text:p>
          </table:table-cell>
          <table:table-cell office:value-type="float" office:value="0.1467266" table:style-name="c8">
            <text:p>0.14673</text:p>
          </table:table-cell>
          <table:table-cell office:value-type="float" office:value="0.5911432782577997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8:15</text:p>
          </table:table-cell>
          <table:table-cell office:value-type="float" office:value="0.14857425" table:style-name="c8">
            <text:p>0.14857</text:p>
          </table:table-cell>
          <table:table-cell office:value-type="string" table:style-name="c8">
            <text:p>2026-05-09 08:45</text:p>
          </table:table-cell>
          <table:table-cell office:value-type="float" office:value="0.14842575" table:style-name="c8">
            <text:p>0.14843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7:45</text:p>
          </table:table-cell>
          <table:table-cell office:value-type="float" office:value="0.14117055" table:style-name="c8">
            <text:p>0.14117</text:p>
          </table:table-cell>
          <table:table-cell office:value-type="string" table:style-name="c8">
            <text:p>2026-05-10 08:15</text:p>
          </table:table-cell>
          <table:table-cell office:value-type="float" office:value="0.14122935" table:style-name="c8">
            <text:p>0.14123</text:p>
          </table:table-cell>
          <table:table-cell office:value-type="float" office:value="-0.15833151507167464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8:30</text:p>
          </table:table-cell>
          <table:table-cell office:value-type="float" office:value="0.14257124999999998" table:style-name="c8">
            <text:p>0.14257</text:p>
          </table:table-cell>
          <table:table-cell office:value-type="string" table:style-name="c8">
            <text:p>2026-05-10 09:00</text:p>
          </table:table-cell>
          <table:table-cell office:value-type="float" office:value="0.14222885000000002" table:style-name="c8">
            <text:p>0.14223</text:p>
          </table:table-cell>
          <table:table-cell office:value-type="float" office:value="-0.43958054036136174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0:45</text:p>
          </table:table-cell>
          <table:table-cell office:value-type="float" office:value="0.14337165" table:style-name="c8">
            <text:p>0.14337</text:p>
          </table:table-cell>
          <table:table-cell office:value-type="string" table:style-name="c8">
            <text:p>2026-05-10 11:15</text:p>
          </table:table-cell>
          <table:table-cell office:value-type="float" office:value="0.14402795000000002" table:style-name="c8">
            <text:p>0.14403</text:p>
          </table:table-cell>
          <table:table-cell office:value-type="float" office:value="0.2569462846734316" table:style-name="c10">
            <text:p>+0.3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2:30</text:p>
          </table:table-cell>
          <table:table-cell office:value-type="float" office:value="0.1436718" table:style-name="c8">
            <text:p>0.14367</text:p>
          </table:table-cell>
          <table:table-cell office:value-type="string" table:style-name="c8">
            <text:p>2026-05-10 13:00</text:p>
          </table:table-cell>
          <table:table-cell office:value-type="float" office:value="0.14332830000000002" table:style-name="c8">
            <text:p>0.14333</text:p>
          </table:table-cell>
          <table:table-cell office:value-type="float" office:value="-0.4385086507581626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45</text:p>
          </table:table-cell>
          <table:table-cell office:value-type="float" office:value="0.1438719" table:style-name="c8">
            <text:p>0.14387</text:p>
          </table:table-cell>
          <table:table-cell office:value-type="string" table:style-name="c8">
            <text:p>2026-05-10 17:15</text:p>
          </table:table-cell>
          <table:table-cell office:value-type="float" office:value="0.14352820000000002" table:style-name="c8">
            <text:p>0.14353</text:p>
          </table:table-cell>
          <table:table-cell office:value-type="float" office:value="-0.43831552360118486" table:style-name="c9">
            <text:p>-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00</text:p>
          </table:table-cell>
          <table:table-cell office:value-type="float" office:value="0.1448724" table:style-name="c8">
            <text:p>0.14487</text:p>
          </table:table-cell>
          <table:table-cell office:value-type="string" table:style-name="c8">
            <text:p>2026-05-10 23:30</text:p>
          </table:table-cell>
          <table:table-cell office:value-type="float" office:value="0.143928" table:style-name="c8">
            <text:p>0.14393</text:p>
          </table:table-cell>
          <table:table-cell office:value-type="float" office:value="-0.8504808866284908" table:style-name="c9">
            <text:p>-0.9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9:15</text:p>
          </table:table-cell>
          <table:table-cell office:value-type="float" office:value="0.1428714" table:style-name="c8">
            <text:p>0.14287</text:p>
          </table:table-cell>
          <table:table-cell office:value-type="string" table:style-name="c8">
            <text:p>2026-05-11 09:45</text:p>
          </table:table-cell>
          <table:table-cell office:value-type="float" office:value="0.1423288" table:style-name="c8">
            <text:p>0.14233</text:p>
          </table:table-cell>
          <table:table-cell office:value-type="float" office:value="-0.5789229133332574" table:style-name="c9">
            <text:p>-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0:30</text:p>
          </table:table-cell>
          <table:table-cell office:value-type="float" office:value="0.1432716" table:style-name="c8">
            <text:p>0.14327</text:p>
          </table:table-cell>
          <table:table-cell office:value-type="string" table:style-name="c8">
            <text:p>2026-05-11 11:00</text:p>
          </table:table-cell>
          <table:table-cell office:value-type="float" office:value="0.1421289" table:style-name="c8">
            <text:p>0.14213</text:p>
          </table:table-cell>
          <table:table-cell office:value-type="float" office:value="-0.9958817177305179" table:style-name="c9">
            <text:p>-1.0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7:00</text:p>
          </table:table-cell>
          <table:table-cell office:value-type="float" office:value="0.10995495" table:style-name="c8">
            <text:p>0.10995</text:p>
          </table:table-cell>
          <table:table-cell office:value-type="string" table:style-name="c8">
            <text:p>2026-05-25 17:30</text:p>
          </table:table-cell>
          <table:table-cell office:value-type="float" office:value="0.11064465000000001" table:style-name="c8">
            <text:p>0.11064</text:p>
          </table:table-cell>
          <table:table-cell office:value-type="float" office:value="0.426103003684708" table:style-name="c10">
            <text:p>+0.4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15</text:p>
          </table:table-cell>
          <table:table-cell office:value-type="float" office:value="0.10845419999999999" table:style-name="c8">
            <text:p>0.10845</text:p>
          </table:table-cell>
          <table:table-cell office:value-type="string" table:style-name="c8">
            <text:p>2026-05-26 05:45</text:p>
          </table:table-cell>
          <table:table-cell office:value-type="float" office:value="0.1093453" table:style-name="c8">
            <text:p>0.10935</text:p>
          </table:table-cell>
          <table:table-cell office:value-type="float" office:value="0.6200946992371392" table:style-name="c10">
            <text:p>+0.6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9:30</text:p>
          </table:table-cell>
          <table:table-cell office:value-type="float" office:value="0.11095545" table:style-name="c8">
            <text:p>0.11096</text:p>
          </table:table-cell>
          <table:table-cell office:value-type="string" table:style-name="c8">
            <text:p>2026-05-26 10:00</text:p>
          </table:table-cell>
          <table:table-cell office:value-type="float" office:value="0.1109445" table:style-name="c8">
            <text:p>0.11094</text:p>
          </table:table-cell>
          <table:table-cell office:value-type="float" office:value="-0.20974909794876373" table:style-name="c9">
            <text:p>-0.2</text:p>
          </table:table-cell>
        </table:table-row>
        <table:table-row>
          <table:table-cell office:value-type="string" table:style-name="c7">
            <text:p>ARB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0.11255625" table:style-name="c8">
            <text:p>0.11256</text:p>
          </table:table-cell>
          <table:table-cell office:value-type="string" table:style-name="c8">
            <text:p>2026-05-26 11:00</text:p>
          </table:table-cell>
          <table:table-cell office:value-type="float" office:value="0.11244375000000001" table:style-name="c8">
            <text:p>0.11244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30</text:p>
          </table:table-cell>
          <table:table-cell office:value-type="float" office:value="1.822911" table:style-name="c1">
            <text:p>1.8229</text:p>
          </table:table-cell>
          <table:table-cell office:value-type="string" table:style-name="c1">
            <text:p>2026-03-03 17:00</text:p>
          </table:table-cell>
          <table:table-cell office:value-type="float" office:value="1.8090950000000001" table:style-name="c1">
            <text:p>1.8091</text:p>
          </table:table-cell>
          <table:table-cell office:value-type="float" office:value="-0.9562935823525964" table:style-name="c12">
            <text:p>-1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1:45</text:p>
          </table:table-cell>
          <table:table-cell office:value-type="float" office:value="1.8279134999999997" table:style-name="c1">
            <text:p>1.8279</text:p>
          </table:table-cell>
          <table:table-cell office:value-type="string" table:style-name="c1">
            <text:p>2026-03-04 02:15</text:p>
          </table:table-cell>
          <table:table-cell office:value-type="float" office:value="1.8240875" table:style-name="c1">
            <text:p>1.8241</text:p>
          </table:table-cell>
          <table:table-cell office:value-type="float" office:value="-0.40879127554447336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8:00</text:p>
          </table:table-cell>
          <table:table-cell office:value-type="float" office:value="1.8519255" table:style-name="c1">
            <text:p>1.8519</text:p>
          </table:table-cell>
          <table:table-cell office:value-type="string" table:style-name="c1">
            <text:p>2026-03-04 08:30</text:p>
          </table:table-cell>
          <table:table-cell office:value-type="float" office:value="1.8530730000000002" table:style-name="c1">
            <text:p>1.8531</text:p>
          </table:table-cell>
          <table:table-cell office:value-type="float" office:value="-0.138061327359007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8:45</text:p>
          </table:table-cell>
          <table:table-cell office:value-type="float" office:value="1.870935" table:style-name="c1">
            <text:p>1.8709</text:p>
          </table:table-cell>
          <table:table-cell office:value-type="string" table:style-name="c1">
            <text:p>2026-03-04 09:15</text:p>
          </table:table-cell>
          <table:table-cell office:value-type="float" office:value="1.903048" table:style-name="c1">
            <text:p>1.903</text:p>
          </table:table-cell>
          <table:table-cell office:value-type="float" office:value="1.5130834073872057" table:style-name="c11">
            <text:p>+1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30</text:p>
          </table:table-cell>
          <table:table-cell office:value-type="float" office:value="1.9199595" table:style-name="c1">
            <text:p>1.92</text:p>
          </table:table-cell>
          <table:table-cell office:value-type="string" table:style-name="c1">
            <text:p>2026-03-04 10:00</text:p>
          </table:table-cell>
          <table:table-cell office:value-type="float" office:value="1.9020485" table:style-name="c1">
            <text:p>1.902</text:p>
          </table:table-cell>
          <table:table-cell office:value-type="float" office:value="-1.1309194257222654" table:style-name="c12">
            <text:p>-1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1.8959475" table:style-name="c1">
            <text:p>1.8959</text:p>
          </table:table-cell>
          <table:table-cell office:value-type="string" table:style-name="c1">
            <text:p>2026-03-04 16:00</text:p>
          </table:table-cell>
          <table:table-cell office:value-type="float" office:value="1.897051" table:style-name="c1">
            <text:p>1.8971</text:p>
          </table:table-cell>
          <table:table-cell office:value-type="float" office:value="-0.14181325954436552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45</text:p>
          </table:table-cell>
          <table:table-cell office:value-type="float" office:value="1.9059525" table:style-name="c1">
            <text:p>1.906</text:p>
          </table:table-cell>
          <table:table-cell office:value-type="string" table:style-name="c1">
            <text:p>2026-03-04 20:15</text:p>
          </table:table-cell>
          <table:table-cell office:value-type="float" office:value="1.8920535" table:style-name="c1">
            <text:p>1.8921</text:p>
          </table:table-cell>
          <table:table-cell office:value-type="float" office:value="-0.9276839242583268" table:style-name="c12">
            <text:p>-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1.8789389999999997" table:style-name="c1">
            <text:p>1.8789</text:p>
          </table:table-cell>
          <table:table-cell office:value-type="string" table:style-name="c1">
            <text:p>2026-03-05 09:45</text:p>
          </table:table-cell>
          <table:table-cell office:value-type="float" office:value="1.8710640000000003" table:style-name="c1">
            <text:p>1.8711</text:p>
          </table:table-cell>
          <table:table-cell office:value-type="float" office:value="-0.6181816938175988" table:style-name="c12">
            <text:p>-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1.7858924999999999" table:style-name="c1">
            <text:p>1.7859</text:p>
          </table:table-cell>
          <table:table-cell office:value-type="string" table:style-name="c1">
            <text:p>2026-03-10 10:00</text:p>
          </table:table-cell>
          <table:table-cell office:value-type="float" office:value="1.7851070000000002" table:style-name="c1">
            <text:p>1.7851</text:p>
          </table:table-cell>
          <table:table-cell office:value-type="float" office:value="-0.2437956871983893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30</text:p>
          </table:table-cell>
          <table:table-cell office:value-type="float" office:value="1.816908" table:style-name="c1">
            <text:p>1.8169</text:p>
          </table:table-cell>
          <table:table-cell office:value-type="string" table:style-name="c1">
            <text:p>2026-03-10 15:00</text:p>
          </table:table-cell>
          <table:table-cell office:value-type="float" office:value="1.8250870000000001" table:style-name="c1">
            <text:p>1.8251</text:p>
          </table:table-cell>
          <table:table-cell office:value-type="float" office:value="0.24936051175954432" table:style-name="c11">
            <text:p>+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3:45</text:p>
          </table:table-cell>
          <table:table-cell office:value-type="float" office:value="1.812906" table:style-name="c1">
            <text:p>1.8129</text:p>
          </table:table-cell>
          <table:table-cell office:value-type="string" table:style-name="c1">
            <text:p>2026-03-11 04:15</text:p>
          </table:table-cell>
          <table:table-cell office:value-type="float" office:value="1.8090950000000001" table:style-name="c1">
            <text:p>1.8091</text:p>
          </table:table-cell>
          <table:table-cell office:value-type="float" office:value="-0.4096947610631618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00</text:p>
          </table:table-cell>
          <table:table-cell office:value-type="float" office:value="1.846923" table:style-name="c1">
            <text:p>1.8469</text:p>
          </table:table-cell>
          <table:table-cell office:value-type="string" table:style-name="c1">
            <text:p>2026-03-11 19:30</text:p>
          </table:table-cell>
          <table:table-cell office:value-type="float" office:value="1.8390800000000003" table:style-name="c1">
            <text:p>1.8391</text:p>
          </table:table-cell>
          <table:table-cell office:value-type="float" office:value="-0.6237033660850932" table:style-name="c12">
            <text:p>-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23:15</text:p>
          </table:table-cell>
          <table:table-cell office:value-type="float" office:value="1.8499245" table:style-name="c1">
            <text:p>1.8499</text:p>
          </table:table-cell>
          <table:table-cell office:value-type="string" table:style-name="c1">
            <text:p>2026-03-11 23:45</text:p>
          </table:table-cell>
          <table:table-cell office:value-type="float" office:value="1.8390800000000003" table:style-name="c1">
            <text:p>1.8391</text:p>
          </table:table-cell>
          <table:table-cell office:value-type="float" office:value="-0.7849412730086991" table:style-name="c12">
            <text:p>-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1.858929" table:style-name="c1">
            <text:p>1.8589</text:p>
          </table:table-cell>
          <table:table-cell office:value-type="string" table:style-name="c1">
            <text:p>2026-03-13 10:45</text:p>
          </table:table-cell>
          <table:table-cell office:value-type="float" office:value="1.8640675" table:style-name="c1">
            <text:p>1.8641</text:p>
          </table:table-cell>
          <table:table-cell office:value-type="float" office:value="0.07597003798960333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.8759374999999998" table:style-name="c1">
            <text:p>1.8759</text:p>
          </table:table-cell>
          <table:table-cell office:value-type="string" table:style-name="c1">
            <text:p>2026-03-13 14:00</text:p>
          </table:table-cell>
          <table:table-cell office:value-type="float" office:value="1.8720635" table:style-name="c1">
            <text:p>1.8721</text:p>
          </table:table-cell>
          <table:table-cell office:value-type="float" office:value="-0.4059972646476617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5:00</text:p>
          </table:table-cell>
          <table:table-cell office:value-type="float" office:value="1.8829409999999998" table:style-name="c1">
            <text:p>1.8829</text:p>
          </table:table-cell>
          <table:table-cell office:value-type="string" table:style-name="c1">
            <text:p>2026-03-13 15:30</text:p>
          </table:table-cell>
          <table:table-cell office:value-type="float" office:value="1.891054" table:style-name="c1">
            <text:p>1.8911</text:p>
          </table:table-cell>
          <table:table-cell office:value-type="float" office:value="0.23010721281231383" table:style-name="c11">
            <text:p>+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00</text:p>
          </table:table-cell>
          <table:table-cell office:value-type="float" office:value="1.884942" table:style-name="c1">
            <text:p>1.8849</text:p>
          </table:table-cell>
          <table:table-cell office:value-type="string" table:style-name="c1">
            <text:p>2026-03-14 04:30</text:p>
          </table:table-cell>
          <table:table-cell office:value-type="float" office:value="1.8760615" table:style-name="c1">
            <text:p>1.8761</text:p>
          </table:table-cell>
          <table:table-cell office:value-type="float" office:value="-0.6700867686379675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30</text:p>
          </table:table-cell>
          <table:table-cell office:value-type="float" office:value="1.872936" table:style-name="c1">
            <text:p>1.8729</text:p>
          </table:table-cell>
          <table:table-cell office:value-type="string" table:style-name="c1">
            <text:p>2026-03-15 12:00</text:p>
          </table:table-cell>
          <table:table-cell office:value-type="float" office:value="1.8620685000000001" table:style-name="c1">
            <text:p>1.8621</text:p>
          </table:table-cell>
          <table:table-cell office:value-type="float" office:value="-0.7789788295755828" table:style-name="c12">
            <text:p>-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8919454999999998" table:style-name="c1">
            <text:p>1.8919</text:p>
          </table:table-cell>
          <table:table-cell office:value-type="string" table:style-name="c1">
            <text:p>2026-03-16 04:15</text:p>
          </table:table-cell>
          <table:table-cell office:value-type="float" office:value="1.8880555" table:style-name="c1">
            <text:p>1.8881</text:p>
          </table:table-cell>
          <table:table-cell office:value-type="float" office:value="-0.40509744834086314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1.9249619999999998" table:style-name="c1">
            <text:p>1.925</text:p>
          </table:table-cell>
          <table:table-cell office:value-type="string" table:style-name="c1">
            <text:p>2026-03-16 17:00</text:p>
          </table:table-cell>
          <table:table-cell office:value-type="float" office:value="1.9310340000000001" table:style-name="c1">
            <text:p>1.931</text:p>
          </table:table-cell>
          <table:table-cell office:value-type="float" office:value="0.11490424403184374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7:15</text:p>
          </table:table-cell>
          <table:table-cell office:value-type="float" office:value="1.9439715" table:style-name="c1">
            <text:p>1.944</text:p>
          </table:table-cell>
          <table:table-cell office:value-type="string" table:style-name="c1">
            <text:p>2026-03-16 17:45</text:p>
          </table:table-cell>
          <table:table-cell office:value-type="float" office:value="1.9520235000000001" table:style-name="c1">
            <text:p>1.952</text:p>
          </table:table-cell>
          <table:table-cell office:value-type="float" office:value="0.21347561029059214" table:style-name="c11">
            <text:p>+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00</text:p>
          </table:table-cell>
          <table:table-cell office:value-type="float" office:value="1.9559775" table:style-name="c1">
            <text:p>1.956</text:p>
          </table:table-cell>
          <table:table-cell office:value-type="string" table:style-name="c1">
            <text:p>2026-03-16 18:30</text:p>
          </table:table-cell>
          <table:table-cell office:value-type="float" office:value="1.9700145000000002" table:style-name="c1">
            <text:p>1.97</text:p>
          </table:table-cell>
          <table:table-cell office:value-type="float" office:value="0.5163117170059461" table:style-name="c11">
            <text:p>+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1:15</text:p>
          </table:table-cell>
          <table:table-cell office:value-type="float" office:value="1.9709849999999998" table:style-name="c1">
            <text:p>1.971</text:p>
          </table:table-cell>
          <table:table-cell office:value-type="string" table:style-name="c1">
            <text:p>2026-03-18 01:45</text:p>
          </table:table-cell>
          <table:table-cell office:value-type="float" office:value="1.9700145000000002" table:style-name="c1">
            <text:p>1.97</text:p>
          </table:table-cell>
          <table:table-cell office:value-type="float" office:value="-0.24904091028088438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00</text:p>
          </table:table-cell>
          <table:table-cell office:value-type="float" office:value="1.992996" table:style-name="c1">
            <text:p>1.993</text:p>
          </table:table-cell>
          <table:table-cell office:value-type="string" table:style-name="c1">
            <text:p>2026-03-18 03:30</text:p>
          </table:table-cell>
          <table:table-cell office:value-type="float" office:value="2.0029980000000003" table:style-name="c1">
            <text:p>2.003</text:p>
          </table:table-cell>
          <table:table-cell office:value-type="float" office:value="0.30095429183001343" table:style-name="c11">
            <text:p>+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9:15</text:p>
          </table:table-cell>
          <table:table-cell office:value-type="float" office:value="2.0150069999999998" table:style-name="c1">
            <text:p>2.015</text:p>
          </table:table-cell>
          <table:table-cell office:value-type="string" table:style-name="c1">
            <text:p>2026-03-18 09:45</text:p>
          </table:table-cell>
          <table:table-cell office:value-type="float" office:value="2.0199895" table:style-name="c1">
            <text:p>2.02</text:p>
          </table:table-cell>
          <table:table-cell office:value-type="float" office:value="0.046875320507600016" table:style-name="c11">
            <text:p>+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10:45</text:p>
          </table:table-cell>
          <table:table-cell office:value-type="float" office:value="2.0220105" table:style-name="c1">
            <text:p>2.022</text:p>
          </table:table-cell>
          <table:table-cell office:value-type="string" table:style-name="c1">
            <text:p>2026-03-18 11:15</text:p>
          </table:table-cell>
          <table:table-cell office:value-type="float" office:value="2.01899" table:style-name="c1">
            <text:p>2.019</text:p>
          </table:table-cell>
          <table:table-cell office:value-type="float" office:value="-0.348982411812393" table:style-name="c12">
            <text:p>-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00</text:p>
          </table:table-cell>
          <table:table-cell office:value-type="float" office:value="1.706853" table:style-name="c1">
            <text:p>1.7069</text:p>
          </table:table-cell>
          <table:table-cell office:value-type="string" table:style-name="c1">
            <text:p>2026-03-31 07:30</text:p>
          </table:table-cell>
          <table:table-cell office:value-type="float" office:value="1.7021485" table:style-name="c1">
            <text:p>1.7021</text:p>
          </table:table-cell>
          <table:table-cell office:value-type="float" office:value="-0.47497323152609905" table:style-name="c12">
            <text:p>-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5:15</text:p>
          </table:table-cell>
          <table:table-cell office:value-type="float" office:value="1.6918455" table:style-name="c1">
            <text:p>1.6918</text:p>
          </table:table-cell>
          <table:table-cell office:value-type="string" table:style-name="c1">
            <text:p>2026-03-31 15:45</text:p>
          </table:table-cell>
          <table:table-cell office:value-type="float" office:value="1.687156" table:style-name="c1">
            <text:p>1.6872</text:p>
          </table:table-cell>
          <table:table-cell office:value-type="float" office:value="-0.4765284326494035" table:style-name="c12">
            <text:p>-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1.722861" table:style-name="c1">
            <text:p>1.7229</text:p>
          </table:table-cell>
          <table:table-cell office:value-type="string" table:style-name="c1">
            <text:p>2026-04-01 06:00</text:p>
          </table:table-cell>
          <table:table-cell office:value-type="float" office:value="1.7241375" table:style-name="c1">
            <text:p>1.7241</text:p>
          </table:table-cell>
          <table:table-cell office:value-type="float" office:value="-0.1259562357323052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1.7378685" table:style-name="c1">
            <text:p>1.7379</text:p>
          </table:table-cell>
          <table:table-cell office:value-type="string" table:style-name="c1">
            <text:p>2026-04-01 06:45</text:p>
          </table:table-cell>
          <table:table-cell office:value-type="float" office:value="1.7351320000000001" table:style-name="c1">
            <text:p>1.7351</text:p>
          </table:table-cell>
          <table:table-cell office:value-type="float" office:value="-0.35704823857500845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6:30</text:p>
          </table:table-cell>
          <table:table-cell office:value-type="float" office:value="1.7178585" table:style-name="c1">
            <text:p>1.7179</text:p>
          </table:table-cell>
          <table:table-cell office:value-type="string" table:style-name="c1">
            <text:p>2026-04-03 17:00</text:p>
          </table:table-cell>
          <table:table-cell office:value-type="float" office:value="1.711144" table:style-name="c1">
            <text:p>1.7111</text:p>
          </table:table-cell>
          <table:table-cell office:value-type="float" office:value="-0.5899832178261399" table:style-name="c12">
            <text:p>-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7:30</text:p>
          </table:table-cell>
          <table:table-cell office:value-type="float" office:value="1.7298645" table:style-name="c1">
            <text:p>1.7299</text:p>
          </table:table-cell>
          <table:table-cell office:value-type="string" table:style-name="c1">
            <text:p>2026-04-06 08:00</text:p>
          </table:table-cell>
          <table:table-cell office:value-type="float" office:value="1.7321335000000002" table:style-name="c1">
            <text:p>1.7321</text:p>
          </table:table-cell>
          <table:table-cell office:value-type="float" office:value="-0.06899585872187641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1.7488739999999998" table:style-name="c1">
            <text:p>1.7489</text:p>
          </table:table-cell>
          <table:table-cell office:value-type="string" table:style-name="c1">
            <text:p>2026-04-06 10:15</text:p>
          </table:table-cell>
          <table:table-cell office:value-type="float" office:value="1.73913" table:style-name="c1">
            <text:p>1.7391</text:p>
          </table:table-cell>
          <table:table-cell office:value-type="float" office:value="-0.7559447318674639" table:style-name="c12">
            <text:p>-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1.7398695" table:style-name="c1">
            <text:p>1.7399</text:p>
          </table:table-cell>
          <table:table-cell office:value-type="string" table:style-name="c1">
            <text:p>2026-04-07 21:45</text:p>
          </table:table-cell>
          <table:table-cell office:value-type="float" office:value="1.745127" table:style-name="c1">
            <text:p>1.7451</text:p>
          </table:table-cell>
          <table:table-cell office:value-type="float" office:value="0.1016737822578273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1.756878" table:style-name="c1">
            <text:p>1.7569</text:p>
          </table:table-cell>
          <table:table-cell office:value-type="string" table:style-name="c1">
            <text:p>2026-04-07 23:15</text:p>
          </table:table-cell>
          <table:table-cell office:value-type="float" office:value="1.7741125" table:style-name="c1">
            <text:p>1.7741</text:p>
          </table:table-cell>
          <table:table-cell office:value-type="float" office:value="0.7791121018363434" table:style-name="c11">
            <text:p>+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1.7898944999999997" table:style-name="c1">
            <text:p>1.7899</text:p>
          </table:table-cell>
          <table:table-cell office:value-type="string" table:style-name="c1">
            <text:p>2026-04-08 00:00</text:p>
          </table:table-cell>
          <table:table-cell office:value-type="float" office:value="1.8050970000000002" table:style-name="c1">
            <text:p>1.8051</text:p>
          </table:table-cell>
          <table:table-cell office:value-type="float" office:value="0.6477538814159356" table:style-name="c11">
            <text:p>+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0:15</text:p>
          </table:table-cell>
          <table:table-cell office:value-type="float" office:value="1.8019005" table:style-name="c1">
            <text:p>1.8019</text:p>
          </table:table-cell>
          <table:table-cell office:value-type="string" table:style-name="c1">
            <text:p>2026-04-08 00:45</text:p>
          </table:table-cell>
          <table:table-cell office:value-type="float" office:value="1.7881055000000001" table:style-name="c1">
            <text:p>1.7881</text:p>
          </table:table-cell>
          <table:table-cell office:value-type="float" office:value="-0.9639501678644136" table:style-name="c12">
            <text:p>-1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5:45</text:p>
          </table:table-cell>
          <table:table-cell office:value-type="float" office:value="1.788894" table:style-name="c1">
            <text:p>1.7889</text:p>
          </table:table-cell>
          <table:table-cell office:value-type="string" table:style-name="c1">
            <text:p>2026-04-08 16:15</text:p>
          </table:table-cell>
          <table:table-cell office:value-type="float" office:value="1.777111" table:style-name="c1">
            <text:p>1.7771</text:p>
          </table:table-cell>
          <table:table-cell office:value-type="float" office:value="-0.8572584451063014" table:style-name="c12">
            <text:p>-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1.8219104999999998" table:style-name="c1">
            <text:p>1.8219</text:p>
          </table:table-cell>
          <table:table-cell office:value-type="string" table:style-name="c1">
            <text:p>2026-04-09 16:15</text:p>
          </table:table-cell>
          <table:table-cell office:value-type="float" office:value="1.81909" table:style-name="c1">
            <text:p>1.8191</text:p>
          </table:table-cell>
          <table:table-cell office:value-type="float" office:value="-0.3544005542533424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1.8419204999999998" table:style-name="c1">
            <text:p>1.8419</text:p>
          </table:table-cell>
          <table:table-cell office:value-type="string" table:style-name="c1">
            <text:p>2026-04-10 15:00</text:p>
          </table:table-cell>
          <table:table-cell office:value-type="float" office:value="1.8420785000000002" table:style-name="c1">
            <text:p>1.8421</text:p>
          </table:table-cell>
          <table:table-cell office:value-type="float" office:value="-0.19133914419757758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6:00</text:p>
          </table:table-cell>
          <table:table-cell office:value-type="float" office:value="1.7968979999999999" table:style-name="c1">
            <text:p>1.7969</text:p>
          </table:table-cell>
          <table:table-cell office:value-type="string" table:style-name="c1">
            <text:p>2026-04-16 06:30</text:p>
          </table:table-cell>
          <table:table-cell office:value-type="float" office:value="1.797101" table:style-name="c1">
            <text:p>1.7971</text:p>
          </table:table-cell>
          <table:table-cell office:value-type="float" office:value="-0.18862533649653956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30</text:p>
          </table:table-cell>
          <table:table-cell office:value-type="float" office:value="1.806903" table:style-name="c1">
            <text:p>1.8069</text:p>
          </table:table-cell>
          <table:table-cell office:value-type="string" table:style-name="c1">
            <text:p>2026-04-16 08:00</text:p>
          </table:table-cell>
          <table:table-cell office:value-type="float" office:value="1.7981005" table:style-name="c1">
            <text:p>1.7981</text:p>
          </table:table-cell>
          <table:table-cell office:value-type="float" office:value="-0.6860856891321543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1.8179085" table:style-name="c1">
            <text:p>1.8179</text:p>
          </table:table-cell>
          <table:table-cell office:value-type="string" table:style-name="c1">
            <text:p>2026-04-16 14:00</text:p>
          </table:table-cell>
          <table:table-cell office:value-type="float" office:value="1.8040975000000001" table:style-name="c1">
            <text:p>1.8041</text:p>
          </table:table-cell>
          <table:table-cell office:value-type="float" office:value="-0.9581005260990705" table:style-name="c12">
            <text:p>-1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1.864932" table:style-name="c1">
            <text:p>1.8649</text:p>
          </table:table-cell>
          <table:table-cell office:value-type="string" table:style-name="c1">
            <text:p>2026-04-17 14:30</text:p>
          </table:table-cell>
          <table:table-cell office:value-type="float" office:value="1.851074" table:style-name="c1">
            <text:p>1.8511</text:p>
          </table:table-cell>
          <table:table-cell office:value-type="float" office:value="-0.941497970220917" table:style-name="c12">
            <text:p>-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0:30</text:p>
          </table:table-cell>
          <table:table-cell office:value-type="float" office:value="1.8059024999999997" table:style-name="c1">
            <text:p>1.8059</text:p>
          </table:table-cell>
          <table:table-cell office:value-type="string" table:style-name="c1">
            <text:p>2026-04-21 11:00</text:p>
          </table:table-cell>
          <table:table-cell office:value-type="float" office:value="1.8120935" table:style-name="c1">
            <text:p>1.8121</text:p>
          </table:table-cell>
          <table:table-cell office:value-type="float" office:value="0.14223498187195815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5:30</text:p>
          </table:table-cell>
          <table:table-cell office:value-type="float" office:value="1.8219104999999998" table:style-name="c1">
            <text:p>1.8219</text:p>
          </table:table-cell>
          <table:table-cell office:value-type="string" table:style-name="c1">
            <text:p>2026-04-21 16:00</text:p>
          </table:table-cell>
          <table:table-cell office:value-type="float" office:value="1.835082" table:style-name="c1">
            <text:p>1.8351</text:p>
          </table:table-cell>
          <table:table-cell office:value-type="float" office:value="0.5216047155993886" table:style-name="c11">
            <text:p>+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6:15</text:p>
          </table:table-cell>
          <table:table-cell office:value-type="float" office:value="1.8259124999999998" table:style-name="c1">
            <text:p>1.8259</text:p>
          </table:table-cell>
          <table:table-cell office:value-type="string" table:style-name="c1">
            <text:p>2026-04-21 16:45</text:p>
          </table:table-cell>
          <table:table-cell office:value-type="float" office:value="1.8210890000000002" table:style-name="c1">
            <text:p>1.8211</text:p>
          </table:table-cell>
          <table:table-cell office:value-type="float" office:value="-0.4635412108192183" table:style-name="c12">
            <text:p>-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0:30</text:p>
          </table:table-cell>
          <table:table-cell office:value-type="float" office:value="1.862931" table:style-name="c1">
            <text:p>1.8629</text:p>
          </table:table-cell>
          <table:table-cell office:value-type="string" table:style-name="c1">
            <text:p>2026-04-22 01:00</text:p>
          </table:table-cell>
          <table:table-cell office:value-type="float" office:value="1.8530730000000002" table:style-name="c1">
            <text:p>1.8531</text:p>
          </table:table-cell>
          <table:table-cell office:value-type="float" office:value="-0.728008333480934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15</text:p>
          </table:table-cell>
          <table:table-cell office:value-type="float" office:value="1.8769379999999998" table:style-name="c1">
            <text:p>1.8769</text:p>
          </table:table-cell>
          <table:table-cell office:value-type="string" table:style-name="c1">
            <text:p>2026-04-22 02:45</text:p>
          </table:table-cell>
          <table:table-cell office:value-type="float" office:value="1.883058" table:style-name="c1">
            <text:p>1.8831</text:p>
          </table:table-cell>
          <table:table-cell office:value-type="float" office:value="0.12551118140289308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1.8599294999999998" table:style-name="c1">
            <text:p>1.8599</text:p>
          </table:table-cell>
          <table:table-cell office:value-type="string" table:style-name="c1">
            <text:p>2026-04-23 07:45</text:p>
          </table:table-cell>
          <table:table-cell office:value-type="float" office:value="1.8600695" table:style-name="c1">
            <text:p>1.8601</text:p>
          </table:table-cell>
          <table:table-cell office:value-type="float" office:value="-0.19238787978252958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2:45</text:p>
          </table:table-cell>
          <table:table-cell office:value-type="float" office:value="1.8759374999999998" table:style-name="c1">
            <text:p>1.8759</text:p>
          </table:table-cell>
          <table:table-cell office:value-type="string" table:style-name="c1">
            <text:p>2026-04-23 13:15</text:p>
          </table:table-cell>
          <table:table-cell office:value-type="float" office:value="1.8710640000000003" table:style-name="c1">
            <text:p>1.8711</text:p>
          </table:table-cell>
          <table:table-cell office:value-type="float" office:value="-0.4591707845277071" table:style-name="c12">
            <text:p>-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30</text:p>
          </table:table-cell>
          <table:table-cell office:value-type="float" office:value="1.8869429999999998" table:style-name="c1">
            <text:p>1.8869</text:p>
          </table:table-cell>
          <table:table-cell office:value-type="string" table:style-name="c1">
            <text:p>2026-04-23 21:00</text:p>
          </table:table-cell>
          <table:table-cell office:value-type="float" office:value="1.893053" table:style-name="c1">
            <text:p>1.8931</text:p>
          </table:table-cell>
          <table:table-cell office:value-type="float" office:value="0.12325687914263028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1.9139564999999998" table:style-name="c1">
            <text:p>1.914</text:p>
          </table:table-cell>
          <table:table-cell office:value-type="string" table:style-name="c1">
            <text:p>2026-04-24 00:45</text:p>
          </table:table-cell>
          <table:table-cell office:value-type="float" office:value="1.9200395000000001" table:style-name="c1">
            <text:p>1.92</text:p>
          </table:table-cell>
          <table:table-cell office:value-type="float" office:value="0.117287986404091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1.9259625" table:style-name="c1">
            <text:p>1.926</text:p>
          </table:table-cell>
          <table:table-cell office:value-type="string" table:style-name="c1">
            <text:p>2026-04-24 01:30</text:p>
          </table:table-cell>
          <table:table-cell office:value-type="float" office:value="1.925037" table:style-name="c1">
            <text:p>1.925</text:p>
          </table:table-cell>
          <table:table-cell office:value-type="float" office:value="-0.2478578353939942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15</text:p>
          </table:table-cell>
          <table:table-cell office:value-type="float" office:value="1.9379685" table:style-name="c1">
            <text:p>1.938</text:p>
          </table:table-cell>
          <table:table-cell office:value-type="string" table:style-name="c1">
            <text:p>2026-04-24 08:45</text:p>
          </table:table-cell>
          <table:table-cell office:value-type="float" office:value="1.9410290000000001" table:style-name="c1">
            <text:p>1.941</text:p>
          </table:table-cell>
          <table:table-cell office:value-type="float" office:value="-0.04229258478658515" table:style-name="c12">
            <text:p>-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9:00</text:p>
          </table:table-cell>
          <table:table-cell office:value-type="float" office:value="1.944972" table:style-name="c1">
            <text:p>1.945</text:p>
          </table:table-cell>
          <table:table-cell office:value-type="string" table:style-name="c1">
            <text:p>2026-04-24 09:30</text:p>
          </table:table-cell>
          <table:table-cell office:value-type="float" office:value="1.935032" table:style-name="c1">
            <text:p>1.935</text:p>
          </table:table-cell>
          <table:table-cell office:value-type="float" office:value="-0.7099397301349342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1.9629809999999999" table:style-name="c1">
            <text:p>1.963</text:p>
          </table:table-cell>
          <table:table-cell office:value-type="string" table:style-name="c1">
            <text:p>2026-04-24 11:45</text:p>
          </table:table-cell>
          <table:table-cell office:value-type="float" office:value="1.9660165000000003" table:style-name="c1">
            <text:p>1.966</text:p>
          </table:table-cell>
          <table:table-cell office:value-type="float" office:value="-0.04557186154628967" table:style-name="c12">
            <text:p>-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1.9939965" table:style-name="c1">
            <text:p>1.994</text:p>
          </table:table-cell>
          <table:table-cell office:value-type="string" table:style-name="c1">
            <text:p>2026-04-24 16:30</text:p>
          </table:table-cell>
          <table:table-cell office:value-type="float" office:value="1.983008" table:style-name="c1">
            <text:p>1.983</text:p>
          </table:table-cell>
          <table:table-cell office:value-type="float" office:value="-0.7498775946697789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0:30</text:p>
          </table:table-cell>
          <table:table-cell office:value-type="float" office:value="1.998999" table:style-name="c1">
            <text:p>1.999</text:p>
          </table:table-cell>
          <table:table-cell office:value-type="string" table:style-name="c1">
            <text:p>2026-04-25 01:00</text:p>
          </table:table-cell>
          <table:table-cell office:value-type="float" office:value="2.006996" table:style-name="c1">
            <text:p>2.007</text:p>
          </table:table-cell>
          <table:table-cell office:value-type="float" office:value="0.19935052473760706" table:style-name="c11">
            <text:p>+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0:30</text:p>
          </table:table-cell>
          <table:table-cell office:value-type="float" office:value="2.0480235" table:style-name="c1">
            <text:p>2.048</text:p>
          </table:table-cell>
          <table:table-cell office:value-type="string" table:style-name="c1">
            <text:p>2026-04-25 11:00</text:p>
          </table:table-cell>
          <table:table-cell office:value-type="float" office:value="2.0539725000000004" table:style-name="c1">
            <text:p>2.054</text:p>
          </table:table-cell>
          <table:table-cell office:value-type="float" office:value="0.08999452264588648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9129559999999999" table:style-name="c1">
            <text:p>1.913</text:p>
          </table:table-cell>
          <table:table-cell office:value-type="string" table:style-name="c1">
            <text:p>2026-05-04 02:30</text:p>
          </table:table-cell>
          <table:table-cell office:value-type="float" office:value="1.9120435000000002" table:style-name="c1">
            <text:p>1.912</text:p>
          </table:table-cell>
          <table:table-cell office:value-type="float" office:value="-0.247505690486316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1.9179585" table:style-name="c1">
            <text:p>1.918</text:p>
          </table:table-cell>
          <table:table-cell office:value-type="string" table:style-name="c1">
            <text:p>2026-05-04 03:15</text:p>
          </table:table-cell>
          <table:table-cell office:value-type="float" office:value="1.91904" table:style-name="c1">
            <text:p>1.919</text:p>
          </table:table-cell>
          <table:table-cell office:value-type="float" office:value="-0.14362463838500927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5:00</text:p>
          </table:table-cell>
          <table:table-cell office:value-type="float" office:value="1.9209599999999998" table:style-name="c1">
            <text:p>1.921</text:p>
          </table:table-cell>
          <table:table-cell office:value-type="string" table:style-name="c1">
            <text:p>2026-05-04 05:30</text:p>
          </table:table-cell>
          <table:table-cell office:value-type="float" office:value="1.913043" table:style-name="c1">
            <text:p>1.913</text:p>
          </table:table-cell>
          <table:table-cell office:value-type="float" office:value="-0.6112138179347637" table:style-name="c12">
            <text:p>-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1:15</text:p>
          </table:table-cell>
          <table:table-cell office:value-type="float" office:value="1.9079534999999999" table:style-name="c1">
            <text:p>1.908</text:p>
          </table:table-cell>
          <table:table-cell office:value-type="string" table:style-name="c1">
            <text:p>2026-05-05 01:45</text:p>
          </table:table-cell>
          <table:table-cell office:value-type="float" office:value="1.905047" table:style-name="c1">
            <text:p>1.905</text:p>
          </table:table-cell>
          <table:table-cell office:value-type="float" office:value="-0.3519314780470184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1.9209599999999998" table:style-name="c1">
            <text:p>1.921</text:p>
          </table:table-cell>
          <table:table-cell office:value-type="string" table:style-name="c1">
            <text:p>2026-05-06 04:30</text:p>
          </table:table-cell>
          <table:table-cell office:value-type="float" office:value="1.9200395000000001" table:style-name="c1">
            <text:p>1.92</text:p>
          </table:table-cell>
          <table:table-cell office:value-type="float" office:value="-0.24772295937967037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1.9589789999999998" table:style-name="c1">
            <text:p>1.959</text:p>
          </table:table-cell>
          <table:table-cell office:value-type="string" table:style-name="c1">
            <text:p>2026-05-06 09:15</text:p>
          </table:table-cell>
          <table:table-cell office:value-type="float" office:value="1.9520235000000001" table:style-name="c1">
            <text:p>1.952</text:p>
          </table:table-cell>
          <table:table-cell office:value-type="float" office:value="-0.5542476451508516" table:style-name="c12">
            <text:p>-0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2:45</text:p>
          </table:table-cell>
          <table:table-cell office:value-type="float" office:value="1.9699845" table:style-name="c1">
            <text:p>1.97</text:p>
          </table:table-cell>
          <table:table-cell office:value-type="string" table:style-name="c1">
            <text:p>2026-05-06 13:15</text:p>
          </table:table-cell>
          <table:table-cell office:value-type="float" office:value="1.9700145000000002" table:style-name="c1">
            <text:p>1.97</text:p>
          </table:table-cell>
          <table:table-cell office:value-type="float" office:value="-0.19838018956495063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1.9089539999999998" table:style-name="c1">
            <text:p>1.909</text:p>
          </table:table-cell>
          <table:table-cell office:value-type="string" table:style-name="c1">
            <text:p>2026-05-07 06:15</text:p>
          </table:table-cell>
          <table:table-cell office:value-type="float" office:value="1.9000495000000002" table:style-name="c1">
            <text:p>1.9</text:p>
          </table:table-cell>
          <table:table-cell office:value-type="float" office:value="-0.6654271894712793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2:00</text:p>
          </table:table-cell>
          <table:table-cell office:value-type="float" office:value="1.9499745" table:style-name="c1">
            <text:p>1.95</text:p>
          </table:table-cell>
          <table:table-cell office:value-type="string" table:style-name="c1">
            <text:p>2026-05-08 22:30</text:p>
          </table:table-cell>
          <table:table-cell office:value-type="float" office:value="1.9410290000000001" table:style-name="c1">
            <text:p>1.941</text:p>
          </table:table-cell>
          <table:table-cell office:value-type="float" office:value="-0.6577325483486995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30</text:p>
          </table:table-cell>
          <table:table-cell office:value-type="float" office:value="1.972986" table:style-name="c1">
            <text:p>1.973</text:p>
          </table:table-cell>
          <table:table-cell office:value-type="string" table:style-name="c1">
            <text:p>2026-05-09 01:00</text:p>
          </table:table-cell>
          <table:table-cell office:value-type="float" office:value="1.9840075000000001" table:style-name="c1">
            <text:p>1.984</text:p>
          </table:table-cell>
          <table:table-cell office:value-type="float" office:value="0.3576036022303386" table:style-name="c11">
            <text:p>+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5:30</text:p>
          </table:table-cell>
          <table:table-cell office:value-type="float" office:value="1.9329659999999997" table:style-name="c1">
            <text:p>1.933</text:p>
          </table:table-cell>
          <table:table-cell office:value-type="string" table:style-name="c1">
            <text:p>2026-05-10 06:00</text:p>
          </table:table-cell>
          <table:table-cell office:value-type="float" office:value="1.9300345" table:style-name="c1">
            <text:p>1.93</text:p>
          </table:table-cell>
          <table:table-cell office:value-type="float" office:value="-0.35125496079597696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15</text:p>
          </table:table-cell>
          <table:table-cell office:value-type="float" office:value="1.9749869999999998" table:style-name="c1">
            <text:p>1.975</text:p>
          </table:table-cell>
          <table:table-cell office:value-type="string" table:style-name="c1">
            <text:p>2026-05-10 15:45</text:p>
          </table:table-cell>
          <table:table-cell office:value-type="float" office:value="2.0019985" table:style-name="c1">
            <text:p>2.002</text:p>
          </table:table-cell>
          <table:table-cell office:value-type="float" office:value="1.1650458964286958" table:style-name="c11">
            <text:p>+1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45</text:p>
          </table:table-cell>
          <table:table-cell office:value-type="float" office:value="2.0490239999999997" table:style-name="c1">
            <text:p>2.049</text:p>
          </table:table-cell>
          <table:table-cell office:value-type="string" table:style-name="c1">
            <text:p>2026-05-11 10:15</text:p>
          </table:table-cell>
          <table:table-cell office:value-type="float" office:value="2.0869560000000003" table:style-name="c1">
            <text:p>2.087</text:p>
          </table:table-cell>
          <table:table-cell office:value-type="float" office:value="1.6476222316576417" table:style-name="c11">
            <text:p>+1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30</text:p>
          </table:table-cell>
          <table:table-cell office:value-type="float" office:value="2.0420205" table:style-name="c1">
            <text:p>2.042</text:p>
          </table:table-cell>
          <table:table-cell office:value-type="string" table:style-name="c1">
            <text:p>2026-05-12 00:00</text:p>
          </table:table-cell>
          <table:table-cell office:value-type="float" office:value="2.0419785000000004" table:style-name="c1">
            <text:p>2.042</text:p>
          </table:table-cell>
          <table:table-cell office:value-type="float" office:value="-0.20195267488742896" table:style-name="c12">
            <text:p>-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6:45</text:p>
          </table:table-cell>
          <table:table-cell office:value-type="float" office:value="2.057028" table:style-name="c1">
            <text:p>2.057</text:p>
          </table:table-cell>
          <table:table-cell office:value-type="string" table:style-name="c1">
            <text:p>2026-05-12 07:15</text:p>
          </table:table-cell>
          <table:table-cell office:value-type="float" office:value="2.060969" table:style-name="c1">
            <text:p>2.061</text:p>
          </table:table-cell>
          <table:table-cell office:value-type="float" office:value="-0.008695896750054999" table:style-name="c12">
            <text:p>-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7:30</text:p>
          </table:table-cell>
          <table:table-cell office:value-type="float" office:value="2.0630309999999996" table:style-name="c1">
            <text:p>2.063</text:p>
          </table:table-cell>
          <table:table-cell office:value-type="string" table:style-name="c1">
            <text:p>2026-05-12 08:00</text:p>
          </table:table-cell>
          <table:table-cell office:value-type="float" office:value="2.0479755" table:style-name="c1">
            <text:p>2.048</text:p>
          </table:table-cell>
          <table:table-cell office:value-type="float" office:value="-0.9282169305502075" table:style-name="c12">
            <text:p>-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0:15</text:p>
          </table:table-cell>
          <table:table-cell office:value-type="float" office:value="2.0800395000000003" table:style-name="c1">
            <text:p>2.08</text:p>
          </table:table-cell>
          <table:table-cell office:value-type="string" table:style-name="c1">
            <text:p>2026-05-12 10:45</text:p>
          </table:table-cell>
          <table:table-cell office:value-type="float" office:value="2.0469760000000004" table:style-name="c1">
            <text:p>2.047</text:p>
          </table:table-cell>
          <table:table-cell office:value-type="float" office:value="-1.7862836270176596" table:style-name="c12">
            <text:p>-1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15</text:p>
          </table:table-cell>
          <table:table-cell office:value-type="float" office:value="2.0620304999999997" table:style-name="c1">
            <text:p>2.062</text:p>
          </table:table-cell>
          <table:table-cell office:value-type="string" table:style-name="c1">
            <text:p>2026-05-12 17:45</text:p>
          </table:table-cell>
          <table:table-cell office:value-type="float" office:value="2.074962" table:style-name="c1">
            <text:p>2.075</text:p>
          </table:table-cell>
          <table:table-cell office:value-type="float" office:value="0.42597095251504236" table:style-name="c11">
            <text:p>+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8:15</text:p>
          </table:table-cell>
          <table:table-cell office:value-type="float" office:value="2.097048" table:style-name="c1">
            <text:p>2.097</text:p>
          </table:table-cell>
          <table:table-cell office:value-type="string" table:style-name="c1">
            <text:p>2026-05-12 18:45</text:p>
          </table:table-cell>
          <table:table-cell office:value-type="float" office:value="2.128935" table:style-name="c1">
            <text:p>2.1289</text:p>
          </table:table-cell>
          <table:table-cell office:value-type="float" office:value="1.31762644131177" table:style-name="c11">
            <text:p>+1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9:00</text:p>
          </table:table-cell>
          <table:table-cell office:value-type="float" office:value="2.109054" table:style-name="c1">
            <text:p>2.1091</text:p>
          </table:table-cell>
          <table:table-cell office:value-type="string" table:style-name="c1">
            <text:p>2026-05-12 19:30</text:p>
          </table:table-cell>
          <table:table-cell office:value-type="float" office:value="2.1319335" table:style-name="c1">
            <text:p>2.1319</text:p>
          </table:table-cell>
          <table:table-cell office:value-type="float" office:value="0.8827543028059104" table:style-name="c11">
            <text:p>+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2:00</text:p>
          </table:table-cell>
          <table:table-cell office:value-type="float" office:value="2.157078" table:style-name="c1">
            <text:p>2.1571</text:p>
          </table:table-cell>
          <table:table-cell office:value-type="string" table:style-name="c1">
            <text:p>2026-05-13 02:30</text:p>
          </table:table-cell>
          <table:table-cell office:value-type="float" office:value="2.17891" table:style-name="c1">
            <text:p>2.1789</text:p>
          </table:table-cell>
          <table:table-cell office:value-type="float" office:value="0.8101866928317047" table:style-name="c11">
            <text:p>+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2:45</text:p>
          </table:table-cell>
          <table:table-cell office:value-type="float" office:value="2.173086" table:style-name="c1">
            <text:p>2.1731</text:p>
          </table:table-cell>
          <table:table-cell office:value-type="string" table:style-name="c1">
            <text:p>2026-05-13 03:15</text:p>
          </table:table-cell>
          <table:table-cell office:value-type="float" office:value="2.1599195" table:style-name="c1">
            <text:p>2.1599</text:p>
          </table:table-cell>
          <table:table-cell office:value-type="float" office:value="-0.8045783314834187" table:style-name="c12">
            <text:p>-0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5:15</text:p>
          </table:table-cell>
          <table:table-cell office:value-type="float" office:value="2.2011000000000003" table:style-name="c1">
            <text:p>2.2011</text:p>
          </table:table-cell>
          <table:table-cell office:value-type="string" table:style-name="c1">
            <text:p>2026-05-13 05:45</text:p>
          </table:table-cell>
          <table:table-cell office:value-type="float" office:value="2.1759115" table:style-name="c1">
            <text:p>2.1759</text:p>
          </table:table-cell>
          <table:table-cell office:value-type="float" office:value="-1.3419720634455512" table:style-name="c12">
            <text:p>-1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20:15</text:p>
          </table:table-cell>
          <table:table-cell office:value-type="float" office:value="2.0840415" table:style-name="c1">
            <text:p>2.084</text:p>
          </table:table-cell>
          <table:table-cell office:value-type="string" table:style-name="c1">
            <text:p>2026-05-13 20:45</text:p>
          </table:table-cell>
          <table:table-cell office:value-type="float" office:value="2.076961" table:style-name="c1">
            <text:p>2.077</text:p>
          </table:table-cell>
          <table:table-cell office:value-type="float" office:value="-0.5389693554087249" table:style-name="c12">
            <text:p>-0.5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03:45</text:p>
          </table:table-cell>
          <table:table-cell office:value-type="float" office:value="2.053026" table:style-name="c1">
            <text:p>2.053</text:p>
          </table:table-cell>
          <table:table-cell office:value-type="string" table:style-name="c1">
            <text:p>2026-05-17 04:15</text:p>
          </table:table-cell>
          <table:table-cell office:value-type="float" office:value="2.0559715" table:style-name="c1">
            <text:p>2.056</text:p>
          </table:table-cell>
          <table:table-cell office:value-type="float" office:value="-0.05671564941213125" table:style-name="c12">
            <text:p>-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10:15</text:p>
          </table:table-cell>
          <table:table-cell office:value-type="float" office:value="2.125062" table:style-name="c1">
            <text:p>2.1251</text:p>
          </table:table-cell>
          <table:table-cell office:value-type="string" table:style-name="c1">
            <text:p>2026-05-17 10:45</text:p>
          </table:table-cell>
          <table:table-cell office:value-type="float" office:value="2.090954" table:style-name="c1">
            <text:p>2.091</text:p>
          </table:table-cell>
          <table:table-cell office:value-type="float" office:value="-1.8017270576575983" table:style-name="c12">
            <text:p>-1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03:00</text:p>
          </table:table-cell>
          <table:table-cell office:value-type="float" office:value="2.053026" table:style-name="c1">
            <text:p>2.053</text:p>
          </table:table-cell>
          <table:table-cell office:value-type="string" table:style-name="c1">
            <text:p>2026-05-18 03:30</text:p>
          </table:table-cell>
          <table:table-cell office:value-type="float" office:value="2.0519735" table:style-name="c1">
            <text:p>2.052</text:p>
          </table:table-cell>
          <table:table-cell office:value-type="float" office:value="-0.2510633097924653" table:style-name="c12">
            <text:p>-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06:15</text:p>
          </table:table-cell>
          <table:table-cell office:value-type="float" office:value="2.0700344999999998" table:style-name="c1">
            <text:p>2.07</text:p>
          </table:table-cell>
          <table:table-cell office:value-type="string" table:style-name="c1">
            <text:p>2026-05-18 06:45</text:p>
          </table:table-cell>
          <table:table-cell office:value-type="float" office:value="2.0599695000000002" table:style-name="c1">
            <text:p>2.06</text:p>
          </table:table-cell>
          <table:table-cell office:value-type="float" office:value="-0.685151818991403" table:style-name="c12">
            <text:p>-0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15</text:p>
          </table:table-cell>
          <table:table-cell office:value-type="float" office:value="2.0870429999999995" table:style-name="c1">
            <text:p>2.087</text:p>
          </table:table-cell>
          <table:table-cell office:value-type="string" table:style-name="c1">
            <text:p>2026-05-19 00:45</text:p>
          </table:table-cell>
          <table:table-cell office:value-type="float" office:value="2.0679655" table:style-name="c1">
            <text:p>2.068</text:p>
          </table:table-cell>
          <table:table-cell office:value-type="float" office:value="-1.1121650600634303" table:style-name="c12">
            <text:p>-1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7:45</text:p>
          </table:table-cell>
          <table:table-cell office:value-type="float" office:value="2.0780385" table:style-name="c1">
            <text:p>2.078</text:p>
          </table:table-cell>
          <table:table-cell office:value-type="string" table:style-name="c1">
            <text:p>2026-05-19 08:15</text:p>
          </table:table-cell>
          <table:table-cell office:value-type="float" office:value="2.062968" table:style-name="c1">
            <text:p>2.063</text:p>
          </table:table-cell>
          <table:table-cell office:value-type="float" office:value="-0.9236774502493494" table:style-name="c12">
            <text:p>-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1:00</text:p>
          </table:table-cell>
          <table:table-cell office:value-type="float" office:value="2.08104" table:style-name="c1">
            <text:p>2.081</text:p>
          </table:table-cell>
          <table:table-cell office:value-type="string" table:style-name="c1">
            <text:p>2026-05-19 11:30</text:p>
          </table:table-cell>
          <table:table-cell office:value-type="float" office:value="2.0599695000000002" table:style-name="c1">
            <text:p>2.06</text:p>
          </table:table-cell>
          <table:table-cell office:value-type="float" office:value="-1.2103745737948257" table:style-name="c12">
            <text:p>-1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7:00</text:p>
          </table:table-cell>
          <table:table-cell office:value-type="float" office:value="2.08104" table:style-name="c1">
            <text:p>2.081</text:p>
          </table:table-cell>
          <table:table-cell office:value-type="string" table:style-name="c1">
            <text:p>2026-05-19 17:30</text:p>
          </table:table-cell>
          <table:table-cell office:value-type="float" office:value="2.0799595" table:style-name="c1">
            <text:p>2.08</text:p>
          </table:table-cell>
          <table:table-cell office:value-type="float" office:value="-0.2517173644187354" table:style-name="c12">
            <text:p>-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15</text:p>
          </table:table-cell>
          <table:table-cell office:value-type="float" office:value="2.0310149999999996" table:style-name="c1">
            <text:p>2.031</text:p>
          </table:table-cell>
          <table:table-cell office:value-type="string" table:style-name="c1">
            <text:p>2026-05-21 18:45</text:p>
          </table:table-cell>
          <table:table-cell office:value-type="float" office:value="2.040979" table:style-name="c1">
            <text:p>2.041</text:p>
          </table:table-cell>
          <table:table-cell office:value-type="float" office:value="0.28971144865992393" table:style-name="c11">
            <text:p>+0.3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3:15</text:p>
          </table:table-cell>
          <table:table-cell office:value-type="float" office:value="2.089044" table:style-name="c1">
            <text:p>2.089</text:p>
          </table:table-cell>
          <table:table-cell office:value-type="string" table:style-name="c1">
            <text:p>2026-05-22 03:45</text:p>
          </table:table-cell>
          <table:table-cell office:value-type="float" office:value="2.1309340000000003" table:style-name="c1">
            <text:p>2.1309</text:p>
          </table:table-cell>
          <table:table-cell office:value-type="float" office:value="1.8013150002585077" table:style-name="c11">
            <text:p>+1.8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00</text:p>
          </table:table-cell>
          <table:table-cell office:value-type="float" office:value="2.1510749999999996" table:style-name="c1">
            <text:p>2.1511</text:p>
          </table:table-cell>
          <table:table-cell office:value-type="string" table:style-name="c1">
            <text:p>2026-05-22 04:30</text:p>
          </table:table-cell>
          <table:table-cell office:value-type="float" office:value="2.1199395" table:style-name="c1">
            <text:p>2.1199</text:p>
          </table:table-cell>
          <table:table-cell office:value-type="float" office:value="-1.6444456404588026" table:style-name="c12">
            <text:p>-1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1:30</text:p>
          </table:table-cell>
          <table:table-cell office:value-type="float" office:value="2.1780885" table:style-name="c1">
            <text:p>2.1781</text:p>
          </table:table-cell>
          <table:table-cell office:value-type="string" table:style-name="c1">
            <text:p>2026-05-22 12:00</text:p>
          </table:table-cell>
          <table:table-cell office:value-type="float" office:value="2.184907" table:style-name="c1">
            <text:p>2.1849</text:p>
          </table:table-cell>
          <table:table-cell office:value-type="float" office:value="0.11252393587315446" table:style-name="c11">
            <text:p>+0.1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01:45</text:p>
          </table:table-cell>
          <table:table-cell office:value-type="float" office:value="2.117058" table:style-name="c1">
            <text:p>2.1171</text:p>
          </table:table-cell>
          <table:table-cell office:value-type="string" table:style-name="c1">
            <text:p>2026-05-23 02:15</text:p>
          </table:table-cell>
          <table:table-cell office:value-type="float" office:value="2.112943" table:style-name="c1">
            <text:p>2.1129</text:p>
          </table:table-cell>
          <table:table-cell office:value-type="float" office:value="-0.3938849600247152" table:style-name="c12">
            <text:p>-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1:00</text:p>
          </table:table-cell>
          <table:table-cell office:value-type="float" office:value="2.147073" table:style-name="c1">
            <text:p>2.1471</text:p>
          </table:table-cell>
          <table:table-cell office:value-type="string" table:style-name="c1">
            <text:p>2026-05-23 21:30</text:p>
          </table:table-cell>
          <table:table-cell office:value-type="float" office:value="2.1179405000000004" table:style-name="c1">
            <text:p>2.1179</text:p>
          </table:table-cell>
          <table:table-cell office:value-type="float" office:value="-1.5540348679108473" table:style-name="c12">
            <text:p>-1.6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7:00</text:p>
          </table:table-cell>
          <table:table-cell office:value-type="float" office:value="2.1820904999999997" table:style-name="c1">
            <text:p>2.1821</text:p>
          </table:table-cell>
          <table:table-cell office:value-type="string" table:style-name="c1">
            <text:p>2026-05-25 07:30</text:p>
          </table:table-cell>
          <table:table-cell office:value-type="float" office:value="2.132933" table:style-name="c1">
            <text:p>2.1329</text:p>
          </table:table-cell>
          <table:table-cell office:value-type="float" office:value="-2.448167620316366" table:style-name="c12">
            <text:p>-2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2.2541265" table:style-name="c1">
            <text:p>2.2541</text:p>
          </table:table-cell>
          <table:table-cell office:value-type="string" table:style-name="c1">
            <text:p>2026-05-26 14:15</text:p>
          </table:table-cell>
          <table:table-cell office:value-type="float" office:value="2.2768610000000002" table:style-name="c1">
            <text:p>2.2769</text:p>
          </table:table-cell>
          <table:table-cell office:value-type="float" office:value="0.8066563638287505" table:style-name="c11">
            <text:p>+0.8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9.084539999999999" table:style-name="c8">
            <text:p>9.0845</text:p>
          </table:table-cell>
          <table:table-cell office:value-type="string" table:style-name="c8">
            <text:p>2026-03-03 16:15</text:p>
          </table:table-cell>
          <table:table-cell office:value-type="float" office:value="9.285355" table:style-name="c8">
            <text:p>9.2854</text:p>
          </table:table-cell>
          <table:table-cell office:value-type="float" office:value="2.0061948690302422" table:style-name="c10">
            <text:p>+2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30</text:p>
          </table:table-cell>
          <table:table-cell office:value-type="float" office:value="9.294645" table:style-name="c8">
            <text:p>9.2946</text:p>
          </table:table-cell>
          <table:table-cell office:value-type="string" table:style-name="c8">
            <text:p>2026-03-03 17:00</text:p>
          </table:table-cell>
          <table:table-cell office:value-type="float" office:value="9.1954" table:style-name="c8">
            <text:p>9.1954</text:p>
          </table:table-cell>
          <table:table-cell office:value-type="float" office:value="-1.2655309008574367" table:style-name="c9">
            <text:p>-1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9.38469" table:style-name="c8">
            <text:p>9.3847</text:p>
          </table:table-cell>
          <table:table-cell office:value-type="string" table:style-name="c8">
            <text:p>2026-03-04 09:30</text:p>
          </table:table-cell>
          <table:table-cell office:value-type="float" office:value="9.41529" table:style-name="c8">
            <text:p>9.4153</text:p>
          </table:table-cell>
          <table:table-cell office:value-type="float" office:value="0.12551118140289308" table:style-name="c10">
            <text:p>+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9.594795" table:style-name="c8">
            <text:p>9.5948</text:p>
          </table:table-cell>
          <table:table-cell office:value-type="string" table:style-name="c8">
            <text:p>2026-03-04 16:00</text:p>
          </table:table-cell>
          <table:table-cell office:value-type="float" office:value="9.705145000000002" table:style-name="c8">
            <text:p>9.7051</text:p>
          </table:table-cell>
          <table:table-cell office:value-type="float" office:value="0.947903682621698" table:style-name="c10">
            <text:p>+0.9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45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3-04 20:15</text:p>
          </table:table-cell>
          <table:table-cell office:value-type="float" office:value="9.635180000000002" table:style-name="c8">
            <text:p>9.6352</text:p>
          </table:table-cell>
          <table:table-cell office:value-type="float" office:value="-1.1202292353822862" table:style-name="c9">
            <text:p>-1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3:45</text:p>
          </table:table-cell>
          <table:table-cell office:value-type="float" office:value="9.28464" table:style-name="c8">
            <text:p>9.2846</text:p>
          </table:table-cell>
          <table:table-cell office:value-type="string" table:style-name="c8">
            <text:p>2026-03-09 14:15</text:p>
          </table:table-cell>
          <table:table-cell office:value-type="float" office:value="9.235380000000001" table:style-name="c8">
            <text:p>9.2354</text:p>
          </table:table-cell>
          <table:table-cell office:value-type="float" office:value="-0.7293931118492303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4:30</text:p>
          </table:table-cell>
          <table:table-cell office:value-type="float" office:value="9.28464" table:style-name="c8">
            <text:p>9.2846</text:p>
          </table:table-cell>
          <table:table-cell office:value-type="string" table:style-name="c8">
            <text:p>2026-03-09 15:00</text:p>
          </table:table-cell>
          <table:table-cell office:value-type="float" office:value="9.255370000000001" table:style-name="c8">
            <text:p>9.2554</text:p>
          </table:table-cell>
          <table:table-cell office:value-type="float" office:value="-0.5145216683683951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2:45</text:p>
          </table:table-cell>
          <table:table-cell office:value-type="float" office:value="9.48474" table:style-name="c8">
            <text:p>9.4847</text:p>
          </table:table-cell>
          <table:table-cell office:value-type="string" table:style-name="c8">
            <text:p>2026-03-10 03:15</text:p>
          </table:table-cell>
          <table:table-cell office:value-type="float" office:value="9.445275" table:style-name="c8">
            <text:p>9.4453</text:p>
          </table:table-cell>
          <table:table-cell office:value-type="float" office:value="-0.6151576608847464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9:30</text:p>
          </table:table-cell>
          <table:table-cell office:value-type="float" office:value="9.56478" table:style-name="c8">
            <text:p>9.5648</text:p>
          </table:table-cell>
          <table:table-cell office:value-type="string" table:style-name="c8">
            <text:p>2026-03-10 10:00</text:p>
          </table:table-cell>
          <table:table-cell office:value-type="float" office:value="9.565215" table:style-name="c8">
            <text:p>9.5652</text:p>
          </table:table-cell>
          <table:table-cell office:value-type="float" office:value="-0.1953611560851387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9.64482" table:style-name="c8">
            <text:p>9.6448</text:p>
          </table:table-cell>
          <table:table-cell office:value-type="string" table:style-name="c8">
            <text:p>2026-03-10 15:30</text:p>
          </table:table-cell>
          <table:table-cell office:value-type="float" office:value="9.645175" table:style-name="c8">
            <text:p>9.6452</text:p>
          </table:table-cell>
          <table:table-cell office:value-type="float" office:value="-0.19622662553576697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6:30</text:p>
          </table:table-cell>
          <table:table-cell office:value-type="float" office:value="9.90495" table:style-name="c8">
            <text:p>9.9049</text:p>
          </table:table-cell>
          <table:table-cell office:value-type="string" table:style-name="c8">
            <text:p>2026-03-10 17:00</text:p>
          </table:table-cell>
          <table:table-cell office:value-type="float" office:value="9.825085000000001" table:style-name="c8">
            <text:p>9.8251</text:p>
          </table:table-cell>
          <table:table-cell office:value-type="float" office:value="-1.0046021929943971" table:style-name="c9">
            <text:p>-1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4:00</text:p>
          </table:table-cell>
          <table:table-cell office:value-type="float" office:value="9.714855" table:style-name="c8">
            <text:p>9.7149</text:p>
          </table:table-cell>
          <table:table-cell office:value-type="string" table:style-name="c8">
            <text:p>2026-03-11 14:30</text:p>
          </table:table-cell>
          <table:table-cell office:value-type="float" office:value="9.725135000000002" table:style-name="c8">
            <text:p>9.7251</text:p>
          </table:table-cell>
          <table:table-cell office:value-type="float" office:value="-0.09429420063397087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7:30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3-11 18:00</text:p>
          </table:table-cell>
          <table:table-cell office:value-type="float" office:value="9.67516" table:style-name="c8">
            <text:p>9.6752</text:p>
          </table:table-cell>
          <table:table-cell office:value-type="float" office:value="-0.7099397301349231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7:45</text:p>
          </table:table-cell>
          <table:table-cell office:value-type="float" office:value="9.574785" table:style-name="c8">
            <text:p>9.5748</text:p>
          </table:table-cell>
          <table:table-cell office:value-type="string" table:style-name="c8">
            <text:p>2026-03-12 08:15</text:p>
          </table:table-cell>
          <table:table-cell office:value-type="float" office:value="9.57521" table:style-name="c8">
            <text:p>9.5752</text:p>
          </table:table-cell>
          <table:table-cell office:value-type="float" office:value="-0.19547013107866773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0:45</text:p>
          </table:table-cell>
          <table:table-cell office:value-type="float" office:value="9.634815" table:style-name="c8">
            <text:p>9.6348</text:p>
          </table:table-cell>
          <table:table-cell office:value-type="string" table:style-name="c8">
            <text:p>2026-03-12 11:15</text:p>
          </table:table-cell>
          <table:table-cell office:value-type="float" office:value="9.565215" table:style-name="c8">
            <text:p>9.5652</text:p>
          </table:table-cell>
          <table:table-cell office:value-type="float" office:value="-0.9208362047947727" table:style-name="c9">
            <text:p>-0.9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23:15</text:p>
          </table:table-cell>
          <table:table-cell office:value-type="float" office:value="9.734865" table:style-name="c8">
            <text:p>9.7349</text:p>
          </table:table-cell>
          <table:table-cell office:value-type="string" table:style-name="c8">
            <text:p>2026-03-12 23:45</text:p>
          </table:table-cell>
          <table:table-cell office:value-type="float" office:value="9.685155" table:style-name="c8">
            <text:p>9.6852</text:p>
          </table:table-cell>
          <table:table-cell office:value-type="float" office:value="-0.7095180554121505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9.874934999999999" table:style-name="c8">
            <text:p>9.8749</text:p>
          </table:table-cell>
          <table:table-cell office:value-type="string" table:style-name="c8">
            <text:p>2026-03-13 01:00</text:p>
          </table:table-cell>
          <table:table-cell office:value-type="float" office:value="9.815090000000001" table:style-name="c8">
            <text:p>9.8151</text:p>
          </table:table-cell>
          <table:table-cell office:value-type="float" office:value="-0.8047178529276167" table:style-name="c9">
            <text:p>-0.8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2:15</text:p>
          </table:table-cell>
          <table:table-cell office:value-type="float" office:value="10.004999999999999" table:style-name="c8">
            <text:p>10.005</text:p>
          </table:table-cell>
          <table:table-cell office:value-type="string" table:style-name="c8">
            <text:p>2026-03-13 02:45</text:p>
          </table:table-cell>
          <table:table-cell office:value-type="float" office:value="9.895050000000001" table:style-name="c8">
            <text:p>9.8951</text:p>
          </table:table-cell>
          <table:table-cell office:value-type="float" office:value="-1.2966537226386632" table:style-name="c9">
            <text:p>-1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00</text:p>
          </table:table-cell>
          <table:table-cell office:value-type="float" office:value="9.954975" table:style-name="c8">
            <text:p>9.955</text:p>
          </table:table-cell>
          <table:table-cell office:value-type="string" table:style-name="c8">
            <text:p>2026-03-13 10:30</text:p>
          </table:table-cell>
          <table:table-cell office:value-type="float" office:value="9.995000000000001" table:style-name="c8">
            <text:p>9.995</text:p>
          </table:table-cell>
          <table:table-cell office:value-type="float" office:value="0.20135655790196605" table:style-name="c10">
            <text:p>+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2:30</text:p>
          </table:table-cell>
          <table:table-cell office:value-type="float" office:value="10.06503" table:style-name="c8">
            <text:p>10.065</text:p>
          </table:table-cell>
          <table:table-cell office:value-type="string" table:style-name="c8">
            <text:p>2026-03-13 13:00</text:p>
          </table:table-cell>
          <table:table-cell office:value-type="float" office:value="10.084955" table:style-name="c8">
            <text:p>10.085</text:p>
          </table:table-cell>
          <table:table-cell office:value-type="float" office:value="-0.0023330784408970295" table:style-name="c9">
            <text:p>-0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10.185089999999999" table:style-name="c8">
            <text:p>10.185</text:p>
          </table:table-cell>
          <table:table-cell office:value-type="string" table:style-name="c8">
            <text:p>2026-03-13 14:00</text:p>
          </table:table-cell>
          <table:table-cell office:value-type="float" office:value="10.21489" table:style-name="c8">
            <text:p>10.215</text:p>
          </table:table-cell>
          <table:table-cell office:value-type="float" office:value="0.09209967599699276" table:style-name="c10">
            <text:p>+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9:15</text:p>
          </table:table-cell>
          <table:table-cell office:value-type="float" office:value="9.82491" table:style-name="c8">
            <text:p>9.8249</text:p>
          </table:table-cell>
          <table:table-cell office:value-type="string" table:style-name="c8">
            <text:p>2026-03-15 09:45</text:p>
          </table:table-cell>
          <table:table-cell office:value-type="float" office:value="9.83508" table:style-name="c8">
            <text:p>9.8351</text:p>
          </table:table-cell>
          <table:table-cell office:value-type="float" office:value="-0.09659452269791258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9.94497" table:style-name="c8">
            <text:p>9.945</text:p>
          </table:table-cell>
          <table:table-cell office:value-type="string" table:style-name="c8">
            <text:p>2026-03-15 23:15</text:p>
          </table:table-cell>
          <table:table-cell office:value-type="float" office:value="10.004995000000001" table:style-name="c8">
            <text:p>10.005</text:p>
          </table:table-cell>
          <table:table-cell office:value-type="float" office:value="0.4024649143738124" table:style-name="c10">
            <text:p>+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2:00</text:p>
          </table:table-cell>
          <table:table-cell office:value-type="float" office:value="10.004999999999999" table:style-name="c8">
            <text:p>10.005</text:p>
          </table:table-cell>
          <table:table-cell office:value-type="string" table:style-name="c8">
            <text:p>2026-03-16 02:30</text:p>
          </table:table-cell>
          <table:table-cell office:value-type="float" office:value="9.905045000000001" table:style-name="c8">
            <text:p>9.905</text:p>
          </table:table-cell>
          <table:table-cell office:value-type="float" office:value="-1.1969533728635517" table:style-name="c9">
            <text:p>-1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10.105049999999999" table:style-name="c8">
            <text:p>10.105</text:p>
          </table:table-cell>
          <table:table-cell office:value-type="string" table:style-name="c8">
            <text:p>2026-03-16 04:00</text:p>
          </table:table-cell>
          <table:table-cell office:value-type="float" office:value="10.264865" table:style-name="c8">
            <text:p>10.265</text:p>
          </table:table-cell>
          <table:table-cell office:value-type="float" office:value="1.3784744742975086" table:style-name="c10">
            <text:p>+1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15</text:p>
          </table:table-cell>
          <table:table-cell office:value-type="float" office:value="10.52526" table:style-name="c8">
            <text:p>10.525</text:p>
          </table:table-cell>
          <table:table-cell office:value-type="string" table:style-name="c8">
            <text:p>2026-03-17 00:45</text:p>
          </table:table-cell>
          <table:table-cell office:value-type="float" office:value="10.484755000000002" table:style-name="c8">
            <text:p>10.485</text:p>
          </table:table-cell>
          <table:table-cell office:value-type="float" office:value="-0.5839668116986996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21:30</text:p>
          </table:table-cell>
          <table:table-cell office:value-type="float" office:value="10.295144999999998" table:style-name="c8">
            <text:p>10.295</text:p>
          </table:table-cell>
          <table:table-cell office:value-type="string" table:style-name="c8">
            <text:p>2026-03-17 22:00</text:p>
          </table:table-cell>
          <table:table-cell office:value-type="float" office:value="10.294850000000002" table:style-name="c8">
            <text:p>10.295</text:p>
          </table:table-cell>
          <table:table-cell office:value-type="float" office:value="-0.20275970032471724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2:45</text:p>
          </table:table-cell>
          <table:table-cell office:value-type="float" office:value="10.285139999999998" table:style-name="c8">
            <text:p>10.285</text:p>
          </table:table-cell>
          <table:table-cell office:value-type="string" table:style-name="c8">
            <text:p>2026-03-18 03:15</text:p>
          </table:table-cell>
          <table:table-cell office:value-type="float" office:value="10.27486" table:style-name="c8">
            <text:p>10.275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9.524759999999999" table:style-name="c8">
            <text:p>9.5248</text:p>
          </table:table-cell>
          <table:table-cell office:value-type="string" table:style-name="c8">
            <text:p>2026-03-24 21:00</text:p>
          </table:table-cell>
          <table:table-cell office:value-type="float" office:value="9.55522" table:style-name="c8">
            <text:p>9.5552</text:p>
          </table:table-cell>
          <table:table-cell office:value-type="float" office:value="0.11925880778100861" table:style-name="c10">
            <text:p>+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8:45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3-25 09:15</text:p>
          </table:table-cell>
          <table:table-cell office:value-type="float" office:value="9.685155" table:style-name="c8">
            <text:p>9.6852</text:p>
          </table:table-cell>
          <table:table-cell office:value-type="float" office:value="-0.6073673538230961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1:45</text:p>
          </table:table-cell>
          <table:table-cell office:value-type="float" office:value="9.76488" table:style-name="c8">
            <text:p>9.7649</text:p>
          </table:table-cell>
          <table:table-cell office:value-type="string" table:style-name="c8">
            <text:p>2026-03-25 12:15</text:p>
          </table:table-cell>
          <table:table-cell office:value-type="float" office:value="9.765115" table:style-name="c8">
            <text:p>9.7651</text:p>
          </table:table-cell>
          <table:table-cell office:value-type="float" office:value="-0.1974982271671588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45</text:p>
          </table:table-cell>
          <table:table-cell office:value-type="float" office:value="8.98449" table:style-name="c8">
            <text:p>8.9845</text:p>
          </table:table-cell>
          <table:table-cell office:value-type="string" table:style-name="c8">
            <text:p>2026-03-31 02:15</text:p>
          </table:table-cell>
          <table:table-cell office:value-type="float" office:value="9.025485" table:style-name="c8">
            <text:p>9.0255</text:p>
          </table:table-cell>
          <table:table-cell office:value-type="float" office:value="0.2554742170674196" table:style-name="c10">
            <text:p>+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4:00</text:p>
          </table:table-cell>
          <table:table-cell office:value-type="float" office:value="8.874434999999998" table:style-name="c8">
            <text:p>8.8744</text:p>
          </table:table-cell>
          <table:table-cell office:value-type="string" table:style-name="c8">
            <text:p>2026-03-31 14:30</text:p>
          </table:table-cell>
          <table:table-cell office:value-type="float" office:value="8.925535" table:style-name="c8">
            <text:p>8.9255</text:p>
          </table:table-cell>
          <table:table-cell office:value-type="float" office:value="0.37476025837139826" table:style-name="c10">
            <text:p>+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6:45</text:p>
          </table:table-cell>
          <table:table-cell office:value-type="float" office:value="8.864429999999999" table:style-name="c8">
            <text:p>8.8644</text:p>
          </table:table-cell>
          <table:table-cell office:value-type="string" table:style-name="c8">
            <text:p>2026-03-31 17:15</text:p>
          </table:table-cell>
          <table:table-cell office:value-type="float" office:value="8.945525" table:style-name="c8">
            <text:p>8.9455</text:p>
          </table:table-cell>
          <table:table-cell office:value-type="float" office:value="0.713107278471381" table:style-name="c10">
            <text:p>+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9.084539999999999" table:style-name="c8">
            <text:p>9.0845</text:p>
          </table:table-cell>
          <table:table-cell office:value-type="string" table:style-name="c8">
            <text:p>2026-04-01 06:00</text:p>
          </table:table-cell>
          <table:table-cell office:value-type="float" office:value="9.085455" table:style-name="c8">
            <text:p>9.0855</text:p>
          </table:table-cell>
          <table:table-cell office:value-type="float" office:value="-0.18984807755811905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15</text:p>
          </table:table-cell>
          <table:table-cell office:value-type="float" office:value="9.254624999999999" table:style-name="c8">
            <text:p>9.2546</text:p>
          </table:table-cell>
          <table:table-cell office:value-type="string" table:style-name="c8">
            <text:p>2026-04-01 06:45</text:p>
          </table:table-cell>
          <table:table-cell office:value-type="float" office:value="9.3953" table:style-name="c8">
            <text:p>9.3953</text:p>
          </table:table-cell>
          <table:table-cell office:value-type="float" office:value="1.3171122038980743" table:style-name="c10">
            <text:p>+1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7:15</text:p>
          </table:table-cell>
          <table:table-cell office:value-type="float" office:value="9.454724999999998" table:style-name="c8">
            <text:p>9.4547</text:p>
          </table:table-cell>
          <table:table-cell office:value-type="string" table:style-name="c8">
            <text:p>2026-04-01 07:45</text:p>
          </table:table-cell>
          <table:table-cell office:value-type="float" office:value="9.37531" table:style-name="c8">
            <text:p>9.3753</text:p>
          </table:table-cell>
          <table:table-cell office:value-type="float" office:value="-1.0381713343327936" table:style-name="c9">
            <text:p>-1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5:00</text:p>
          </table:table-cell>
          <table:table-cell office:value-type="float" office:value="9.034514999999999" table:style-name="c8">
            <text:p>9.0345</text:p>
          </table:table-cell>
          <table:table-cell office:value-type="string" table:style-name="c8">
            <text:p>2026-04-03 15:30</text:p>
          </table:table-cell>
          <table:table-cell office:value-type="float" office:value="9.01549" table:style-name="c8">
            <text:p>9.0155</text:p>
          </table:table-cell>
          <table:table-cell office:value-type="float" office:value="-0.41006035752886305" table:style-name="c9">
            <text:p>-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0:15</text:p>
          </table:table-cell>
          <table:table-cell office:value-type="float" office:value="9.194595" table:style-name="c8">
            <text:p>9.1946</text:p>
          </table:table-cell>
          <table:table-cell office:value-type="string" table:style-name="c8">
            <text:p>2026-04-06 00:45</text:p>
          </table:table-cell>
          <table:table-cell office:value-type="float" office:value="9.31534" table:style-name="c8">
            <text:p>9.3153</text:p>
          </table:table-cell>
          <table:table-cell office:value-type="float" office:value="1.1106920461423364" table:style-name="c10">
            <text:p>+1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1:00</text:p>
          </table:table-cell>
          <table:table-cell office:value-type="float" office:value="9.42471" table:style-name="c8">
            <text:p>9.4247</text:p>
          </table:table-cell>
          <table:table-cell office:value-type="string" table:style-name="c8">
            <text:p>2026-04-06 01:30</text:p>
          </table:table-cell>
          <table:table-cell office:value-type="float" office:value="9.485255" table:style-name="c8">
            <text:p>9.4853</text:p>
          </table:table-cell>
          <table:table-cell office:value-type="float" office:value="0.4412228626132997" table:style-name="c10">
            <text:p>+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6:00</text:p>
          </table:table-cell>
          <table:table-cell office:value-type="float" office:value="9.344669999999999" table:style-name="c8">
            <text:p>9.3447</text:p>
          </table:table-cell>
          <table:table-cell office:value-type="string" table:style-name="c8">
            <text:p>2026-04-09 16:30</text:p>
          </table:table-cell>
          <table:table-cell office:value-type="float" office:value="9.31534" table:style-name="c8">
            <text:p>9.3153</text:p>
          </table:table-cell>
          <table:table-cell office:value-type="float" office:value="-0.513141337896339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00</text:p>
          </table:table-cell>
          <table:table-cell office:value-type="float" office:value="9.42471" table:style-name="c8">
            <text:p>9.4247</text:p>
          </table:table-cell>
          <table:table-cell office:value-type="string" table:style-name="c8">
            <text:p>2026-04-09 22:30</text:p>
          </table:table-cell>
          <table:table-cell office:value-type="float" office:value="9.55522" table:style-name="c8">
            <text:p>9.5552</text:p>
          </table:table-cell>
          <table:table-cell office:value-type="float" office:value="1.1820959501141148" table:style-name="c10">
            <text:p>+1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45</text:p>
          </table:table-cell>
          <table:table-cell office:value-type="float" office:value="9.554775" table:style-name="c8">
            <text:p>9.5548</text:p>
          </table:table-cell>
          <table:table-cell office:value-type="string" table:style-name="c8">
            <text:p>2026-04-09 23:15</text:p>
          </table:table-cell>
          <table:table-cell office:value-type="float" office:value="9.47526" table:style-name="c8">
            <text:p>9.4753</text:p>
          </table:table-cell>
          <table:table-cell office:value-type="float" office:value="-1.0304381289983122" table:style-name="c9">
            <text:p>-1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05:15</text:p>
          </table:table-cell>
          <table:table-cell office:value-type="float" office:value="9.4047" table:style-name="c8">
            <text:p>9.4047</text:p>
          </table:table-cell>
          <table:table-cell office:value-type="string" table:style-name="c8">
            <text:p>2026-04-10 05:45</text:p>
          </table:table-cell>
          <table:table-cell office:value-type="float" office:value="9.35532" table:style-name="c8">
            <text:p>9.3553</text:p>
          </table:table-cell>
          <table:table-cell office:value-type="float" office:value="-0.7239070324412178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6:45</text:p>
          </table:table-cell>
          <table:table-cell office:value-type="float" office:value="9.454724999999998" table:style-name="c8">
            <text:p>9.4547</text:p>
          </table:table-cell>
          <table:table-cell office:value-type="string" table:style-name="c8">
            <text:p>2026-04-11 17:15</text:p>
          </table:table-cell>
          <table:table-cell office:value-type="float" office:value="9.385305" table:style-name="c8">
            <text:p>9.3853</text:p>
          </table:table-cell>
          <table:table-cell office:value-type="float" office:value="-0.9326683186977602" table:style-name="c9">
            <text:p>-0.9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9.48474" table:style-name="c8">
            <text:p>9.4847</text:p>
          </table:table-cell>
          <table:table-cell office:value-type="string" table:style-name="c8">
            <text:p>2026-04-11 19:15</text:p>
          </table:table-cell>
          <table:table-cell office:value-type="float" office:value="9.505245" table:style-name="c8">
            <text:p>9.5052</text:p>
          </table:table-cell>
          <table:table-cell office:value-type="float" office:value="0.01585721110963778" table:style-name="c10">
            <text:p>+0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0:00</text:p>
          </table:table-cell>
          <table:table-cell office:value-type="float" office:value="9.414705" table:style-name="c8">
            <text:p>9.4147</text:p>
          </table:table-cell>
          <table:table-cell office:value-type="string" table:style-name="c8">
            <text:p>2026-04-13 20:30</text:p>
          </table:table-cell>
          <table:table-cell office:value-type="float" office:value="9.31534" table:style-name="c8">
            <text:p>9.3153</text:p>
          </table:table-cell>
          <table:table-cell office:value-type="float" office:value="-1.2532136127472726" table:style-name="c9">
            <text:p>-1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30</text:p>
          </table:table-cell>
          <table:table-cell office:value-type="float" office:value="9.514755" table:style-name="c8">
            <text:p>9.5148</text:p>
          </table:table-cell>
          <table:table-cell office:value-type="string" table:style-name="c8">
            <text:p>2026-04-13 23:00</text:p>
          </table:table-cell>
          <table:table-cell office:value-type="float" office:value="9.5952" table:style-name="c8">
            <text:p>9.5952</text:p>
          </table:table-cell>
          <table:table-cell office:value-type="float" office:value="0.643886208315414" table:style-name="c10">
            <text:p>+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30</text:p>
          </table:table-cell>
          <table:table-cell office:value-type="float" office:value="9.704849999999999" table:style-name="c8">
            <text:p>9.7048</text:p>
          </table:table-cell>
          <table:table-cell office:value-type="string" table:style-name="c8">
            <text:p>2026-04-14 00:00</text:p>
          </table:table-cell>
          <table:table-cell office:value-type="float" office:value="9.65517" table:style-name="c8">
            <text:p>9.6552</text:p>
          </table:table-cell>
          <table:table-cell office:value-type="float" office:value="-0.7107856878777019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9.534764999999998" table:style-name="c8">
            <text:p>9.5348</text:p>
          </table:table-cell>
          <table:table-cell office:value-type="string" table:style-name="c8">
            <text:p>2026-04-15 20:15</text:p>
          </table:table-cell>
          <table:table-cell office:value-type="float" office:value="9.47526" table:style-name="c8">
            <text:p>9.4753</text:p>
          </table:table-cell>
          <table:table-cell office:value-type="float" office:value="-0.8227370547674417" table:style-name="c9">
            <text:p>-0.8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30</text:p>
          </table:table-cell>
          <table:table-cell office:value-type="float" office:value="9.514755" table:style-name="c8">
            <text:p>9.5148</text:p>
          </table:table-cell>
          <table:table-cell office:value-type="string" table:style-name="c8">
            <text:p>2026-04-16 13:00</text:p>
          </table:table-cell>
          <table:table-cell office:value-type="float" office:value="9.505245" table:style-name="c8">
            <text:p>9.5052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9.574785" table:style-name="c8">
            <text:p>9.5748</text:p>
          </table:table-cell>
          <table:table-cell office:value-type="string" table:style-name="c8">
            <text:p>2026-04-16 16:15</text:p>
          </table:table-cell>
          <table:table-cell office:value-type="float" office:value="9.585205" table:style-name="c8">
            <text:p>9.5852</text:p>
          </table:table-cell>
          <table:table-cell office:value-type="float" office:value="-0.09129003726977558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15</text:p>
          </table:table-cell>
          <table:table-cell office:value-type="float" office:value="9.6048" table:style-name="c8">
            <text:p>9.6048</text:p>
          </table:table-cell>
          <table:table-cell office:value-type="string" table:style-name="c8">
            <text:p>2026-04-17 07:45</text:p>
          </table:table-cell>
          <table:table-cell office:value-type="float" office:value="9.5952" table:style-name="c8">
            <text:p>9.5952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00</text:p>
          </table:table-cell>
          <table:table-cell office:value-type="float" office:value="9.634815" table:style-name="c8">
            <text:p>9.6348</text:p>
          </table:table-cell>
          <table:table-cell office:value-type="string" table:style-name="c8">
            <text:p>2026-04-17 08:30</text:p>
          </table:table-cell>
          <table:table-cell office:value-type="float" office:value="9.625185000000002" table:style-name="c8">
            <text:p>9.6252</text:p>
          </table:table-cell>
          <table:table-cell office:value-type="float" office:value="-0.29965022488751547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30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4-17 10:00</text:p>
          </table:table-cell>
          <table:table-cell office:value-type="float" office:value="9.67516" table:style-name="c8">
            <text:p>9.6752</text:p>
          </table:table-cell>
          <table:table-cell office:value-type="float" office:value="-0.7099397301349342" table:style-name="c9">
            <text:p>-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00</text:p>
          </table:table-cell>
          <table:table-cell office:value-type="float" office:value="9.734865" table:style-name="c8">
            <text:p>9.7349</text:p>
          </table:table-cell>
          <table:table-cell office:value-type="string" table:style-name="c8">
            <text:p>2026-04-17 13:30</text:p>
          </table:table-cell>
          <table:table-cell office:value-type="float" office:value="9.875060000000001" table:style-name="c8">
            <text:p>9.8751</text:p>
          </table:table-cell>
          <table:table-cell office:value-type="float" office:value="1.2373541395797716" table:style-name="c10">
            <text:p>+1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45</text:p>
          </table:table-cell>
          <table:table-cell office:value-type="float" office:value="9.894945" table:style-name="c8">
            <text:p>9.8949</text:p>
          </table:table-cell>
          <table:table-cell office:value-type="string" table:style-name="c8">
            <text:p>2026-04-17 14:15</text:p>
          </table:table-cell>
          <table:table-cell office:value-type="float" office:value="9.885055000000001" table:style-name="c8">
            <text:p>9.8851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1 11:45</text:p>
          </table:table-cell>
          <table:table-cell office:value-type="float" office:value="9.474735" table:style-name="c8">
            <text:p>9.4747</text:p>
          </table:table-cell>
          <table:table-cell office:value-type="string" table:style-name="c8">
            <text:p>2026-04-21 12:15</text:p>
          </table:table-cell>
          <table:table-cell office:value-type="float" office:value="9.345325" table:style-name="c8">
            <text:p>9.3453</text:p>
          </table:table-cell>
          <table:table-cell office:value-type="float" office:value="-1.5630126296408364" table:style-name="c9">
            <text:p>-1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2:45</text:p>
          </table:table-cell>
          <table:table-cell office:value-type="float" office:value="9.594795" table:style-name="c8">
            <text:p>9.5948</text:p>
          </table:table-cell>
          <table:table-cell office:value-type="string" table:style-name="c8">
            <text:p>2026-04-22 03:15</text:p>
          </table:table-cell>
          <table:table-cell office:value-type="float" office:value="9.5952" table:style-name="c8">
            <text:p>9.5952</text:p>
          </table:table-cell>
          <table:table-cell office:value-type="float" office:value="-0.19568739926177914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9.64482" table:style-name="c8">
            <text:p>9.6448</text:p>
          </table:table-cell>
          <table:table-cell office:value-type="string" table:style-name="c8">
            <text:p>2026-04-22 06:00</text:p>
          </table:table-cell>
          <table:table-cell office:value-type="float" office:value="9.605195" table:style-name="c8">
            <text:p>9.6052</text:p>
          </table:table-cell>
          <table:table-cell office:value-type="float" office:value="-0.6099210229428831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11:45</text:p>
          </table:table-cell>
          <table:table-cell office:value-type="float" office:value="9.494745" table:style-name="c8">
            <text:p>9.4947</text:p>
          </table:table-cell>
          <table:table-cell office:value-type="string" table:style-name="c8">
            <text:p>2026-04-26 12:15</text:p>
          </table:table-cell>
          <table:table-cell office:value-type="float" office:value="9.465265" table:style-name="c8">
            <text:p>9.4653</text:p>
          </table:table-cell>
          <table:table-cell office:value-type="float" office:value="-0.5097668735179139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18:45</text:p>
          </table:table-cell>
          <table:table-cell office:value-type="float" office:value="9.524759999999999" table:style-name="c8">
            <text:p>9.5248</text:p>
          </table:table-cell>
          <table:table-cell office:value-type="string" table:style-name="c8">
            <text:p>2026-04-26 19:15</text:p>
          </table:table-cell>
          <table:table-cell office:value-type="float" office:value="9.49525" table:style-name="c8">
            <text:p>9.4953</text:p>
          </table:table-cell>
          <table:table-cell office:value-type="float" office:value="-0.5091047412217997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9.4047" table:style-name="c8">
            <text:p>9.4047</text:p>
          </table:table-cell>
          <table:table-cell office:value-type="string" table:style-name="c8">
            <text:p>2026-04-29 10:30</text:p>
          </table:table-cell>
          <table:table-cell office:value-type="float" office:value="9.41529" table:style-name="c8">
            <text:p>9.4153</text:p>
          </table:table-cell>
          <table:table-cell office:value-type="float" office:value="-0.08752182111070317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00</text:p>
          </table:table-cell>
          <table:table-cell office:value-type="float" office:value="9.2046" table:style-name="c8">
            <text:p>9.2046</text:p>
          </table:table-cell>
          <table:table-cell office:value-type="string" table:style-name="c8">
            <text:p>2026-05-04 02:30</text:p>
          </table:table-cell>
          <table:table-cell office:value-type="float" office:value="9.225385000000001" table:style-name="c8">
            <text:p>9.2254</text:p>
          </table:table-cell>
          <table:table-cell office:value-type="float" office:value="0.025459611335643118" table:style-name="c10">
            <text:p>+0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3:15</text:p>
          </table:table-cell>
          <table:table-cell office:value-type="float" office:value="9.32466" table:style-name="c8">
            <text:p>9.3247</text:p>
          </table:table-cell>
          <table:table-cell office:value-type="string" table:style-name="c8">
            <text:p>2026-05-04 03:45</text:p>
          </table:table-cell>
          <table:table-cell office:value-type="float" office:value="9.255370000000001" table:style-name="c8">
            <text:p>9.2554</text:p>
          </table:table-cell>
          <table:table-cell office:value-type="float" office:value="-0.9414979702208948" table:style-name="c9">
            <text:p>-0.9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0:45</text:p>
          </table:table-cell>
          <table:table-cell office:value-type="float" office:value="9.414705" table:style-name="c8">
            <text:p>9.4147</text:p>
          </table:table-cell>
          <table:table-cell office:value-type="string" table:style-name="c8">
            <text:p>2026-05-05 11:15</text:p>
          </table:table-cell>
          <table:table-cell office:value-type="float" office:value="9.37531" table:style-name="c8">
            <text:p>9.3753</text:p>
          </table:table-cell>
          <table:table-cell office:value-type="float" office:value="-0.617504687507453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3:15</text:p>
          </table:table-cell>
          <table:table-cell office:value-type="float" office:value="9.464730000000001" table:style-name="c8">
            <text:p>9.4647</text:p>
          </table:table-cell>
          <table:table-cell office:value-type="string" table:style-name="c8">
            <text:p>2026-05-05 13:45</text:p>
          </table:table-cell>
          <table:table-cell office:value-type="float" office:value="9.445275" table:style-name="c8">
            <text:p>9.4453</text:p>
          </table:table-cell>
          <table:table-cell office:value-type="float" office:value="-0.40504171513611187" table:style-name="c9">
            <text:p>-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4:00</text:p>
          </table:table-cell>
          <table:table-cell office:value-type="float" office:value="9.48474" table:style-name="c8">
            <text:p>9.4847</text:p>
          </table:table-cell>
          <table:table-cell office:value-type="string" table:style-name="c8">
            <text:p>2026-05-05 14:30</text:p>
          </table:table-cell>
          <table:table-cell office:value-type="float" office:value="9.45527" table:style-name="c8">
            <text:p>9.4553</text:p>
          </table:table-cell>
          <table:table-cell office:value-type="float" office:value="-0.5099885155523509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4:00</text:p>
          </table:table-cell>
          <table:table-cell office:value-type="float" office:value="9.574785" table:style-name="c8">
            <text:p>9.5748</text:p>
          </table:table-cell>
          <table:table-cell office:value-type="string" table:style-name="c8">
            <text:p>2026-05-06 04:30</text:p>
          </table:table-cell>
          <table:table-cell office:value-type="float" office:value="9.51524" table:style-name="c8">
            <text:p>9.5152</text:p>
          </table:table-cell>
          <table:table-cell office:value-type="float" office:value="-0.8205506939320317" table:style-name="c9">
            <text:p>-0.8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8:30</text:p>
          </table:table-cell>
          <table:table-cell office:value-type="float" office:value="9.624809999999998" table:style-name="c8">
            <text:p>9.6248</text:p>
          </table:table-cell>
          <table:table-cell office:value-type="string" table:style-name="c8">
            <text:p>2026-05-06 09:00</text:p>
          </table:table-cell>
          <table:table-cell office:value-type="float" office:value="9.715140000000002" table:style-name="c8">
            <text:p>9.7151</text:p>
          </table:table-cell>
          <table:table-cell office:value-type="float" office:value="0.7367359474109492" table:style-name="c10">
            <text:p>+0.7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15</text:p>
          </table:table-cell>
          <table:table-cell office:value-type="float" office:value="9.68484" table:style-name="c8">
            <text:p>9.6848</text:p>
          </table:table-cell>
          <table:table-cell office:value-type="string" table:style-name="c8">
            <text:p>2026-05-06 09:45</text:p>
          </table:table-cell>
          <table:table-cell office:value-type="float" office:value="9.725135000000002" table:style-name="c8">
            <text:p>9.7251</text:p>
          </table:table-cell>
          <table:table-cell office:value-type="float" office:value="0.21533092064507375" table:style-name="c10">
            <text:p>+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0:00</text:p>
          </table:table-cell>
          <table:table-cell office:value-type="float" office:value="9.734865" table:style-name="c8">
            <text:p>9.7349</text:p>
          </table:table-cell>
          <table:table-cell office:value-type="string" table:style-name="c8">
            <text:p>2026-05-06 10:30</text:p>
          </table:table-cell>
          <table:table-cell office:value-type="float" office:value="9.745125" table:style-name="c8">
            <text:p>9.7451</text:p>
          </table:table-cell>
          <table:table-cell office:value-type="float" office:value="-0.09471630962525346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5:15</text:p>
          </table:table-cell>
          <table:table-cell office:value-type="float" office:value="9.6048" table:style-name="c8">
            <text:p>9.6048</text:p>
          </table:table-cell>
          <table:table-cell office:value-type="string" table:style-name="c8">
            <text:p>2026-05-07 05:45</text:p>
          </table:table-cell>
          <table:table-cell office:value-type="float" office:value="9.57521" table:style-name="c8">
            <text:p>9.5752</text:p>
          </table:table-cell>
          <table:table-cell office:value-type="float" office:value="-0.5073592869190291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6:45</text:p>
          </table:table-cell>
          <table:table-cell office:value-type="float" office:value="9.634815" table:style-name="c8">
            <text:p>9.6348</text:p>
          </table:table-cell>
          <table:table-cell office:value-type="string" table:style-name="c8">
            <text:p>2026-05-07 07:15</text:p>
          </table:table-cell>
          <table:table-cell office:value-type="float" office:value="9.665165" table:style-name="c8">
            <text:p>9.6652</text:p>
          </table:table-cell>
          <table:table-cell office:value-type="float" office:value="0.11447376171729307" table:style-name="c10">
            <text:p>+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8:30</text:p>
          </table:table-cell>
          <table:table-cell office:value-type="float" office:value="9.88494" table:style-name="c8">
            <text:p>9.8849</text:p>
          </table:table-cell>
          <table:table-cell office:value-type="string" table:style-name="c8">
            <text:p>2026-05-08 19:00</text:p>
          </table:table-cell>
          <table:table-cell office:value-type="float" office:value="9.895050000000001" table:style-name="c8">
            <text:p>9.8951</text:p>
          </table:table-cell>
          <table:table-cell office:value-type="float" office:value="-0.09782765449257713" table:style-name="c9">
            <text:p>-0.1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1:15</text:p>
          </table:table-cell>
          <table:table-cell office:value-type="float" office:value="10.06503" table:style-name="c8">
            <text:p>10.065</text:p>
          </table:table-cell>
          <table:table-cell office:value-type="string" table:style-name="c8">
            <text:p>2026-05-09 01:45</text:p>
          </table:table-cell>
          <table:table-cell office:value-type="float" office:value="10.064965" table:style-name="c8">
            <text:p>10.065</text:p>
          </table:table-cell>
          <table:table-cell office:value-type="float" office:value="-0.20054450940530932" table:style-name="c9">
            <text:p>-0.2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7:45</text:p>
          </table:table-cell>
          <table:table-cell office:value-type="float" office:value="9.954975" table:style-name="c8">
            <text:p>9.955</text:p>
          </table:table-cell>
          <table:table-cell office:value-type="string" table:style-name="c8">
            <text:p>2026-05-09 18:15</text:p>
          </table:table-cell>
          <table:table-cell office:value-type="float" office:value="9.925035" table:style-name="c8">
            <text:p>9.925</text:p>
          </table:table-cell>
          <table:table-cell office:value-type="float" office:value="-0.5000529380033703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9:15</text:p>
          </table:table-cell>
          <table:table-cell office:value-type="float" office:value="10.14507" table:style-name="c8">
            <text:p>10.145</text:p>
          </table:table-cell>
          <table:table-cell office:value-type="string" table:style-name="c8">
            <text:p>2026-05-11 09:45</text:p>
          </table:table-cell>
          <table:table-cell office:value-type="float" office:value="10.104945" table:style-name="c8">
            <text:p>10.105</text:p>
          </table:table-cell>
          <table:table-cell office:value-type="float" office:value="-0.5946216739263543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10:00</text:p>
          </table:table-cell>
          <table:table-cell office:value-type="float" office:value="10.155075" table:style-name="c8">
            <text:p>10.155</text:p>
          </table:table-cell>
          <table:table-cell office:value-type="string" table:style-name="c8">
            <text:p>2026-05-13 10:30</text:p>
          </table:table-cell>
          <table:table-cell office:value-type="float" office:value="10.07496" table:style-name="c8">
            <text:p>10.075</text:p>
          </table:table-cell>
          <table:table-cell office:value-type="float" office:value="-0.9872388440262614" table:style-name="c9">
            <text:p>-1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4:45</text:p>
          </table:table-cell>
          <table:table-cell office:value-type="float" office:value="9.2896425" table:style-name="c8">
            <text:p>9.2896</text:p>
          </table:table-cell>
          <table:table-cell office:value-type="string" table:style-name="c8">
            <text:p>2026-05-20 15:15</text:p>
          </table:table-cell>
          <table:table-cell office:value-type="float" office:value="9.266364500000002" table:style-name="c8">
            <text:p>9.2664</text:p>
          </table:table-cell>
          <table:table-cell office:value-type="float" office:value="-0.4499792390880164" table:style-name="c9">
            <text:p>-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9.347671499999999" table:style-name="c8">
            <text:p>9.3477</text:p>
          </table:table-cell>
          <table:table-cell office:value-type="string" table:style-name="c8">
            <text:p>2026-05-20 16:00</text:p>
          </table:table-cell>
          <table:table-cell office:value-type="float" office:value="9.3363295" table:style-name="c8">
            <text:p>9.3363</text:p>
          </table:table-cell>
          <table:table-cell office:value-type="float" office:value="-0.3209924810740339" table:style-name="c9">
            <text:p>-0.3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7:30</text:p>
          </table:table-cell>
          <table:table-cell office:value-type="float" office:value="9.3676815" table:style-name="c8">
            <text:p>9.3677</text:p>
          </table:table-cell>
          <table:table-cell office:value-type="string" table:style-name="c8">
            <text:p>2026-05-20 18:00</text:p>
          </table:table-cell>
          <table:table-cell office:value-type="float" office:value="9.3363295" table:style-name="c8">
            <text:p>9.3363</text:p>
          </table:table-cell>
          <table:table-cell office:value-type="float" office:value="-0.5339135694408581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00</text:p>
          </table:table-cell>
          <table:table-cell office:value-type="float" office:value="9.476735999999999" table:style-name="c8">
            <text:p>9.4767</text:p>
          </table:table-cell>
          <table:table-cell office:value-type="string" table:style-name="c8">
            <text:p>2026-05-21 08:30</text:p>
          </table:table-cell>
          <table:table-cell office:value-type="float" office:value="9.494250500000001" table:style-name="c8">
            <text:p>9.4943</text:p>
          </table:table-cell>
          <table:table-cell office:value-type="float" office:value="-0.015453704202550433" table:style-name="c9">
            <text:p>-0.0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5:30</text:p>
          </table:table-cell>
          <table:table-cell office:value-type="float" office:value="9.403699499999998" table:style-name="c8">
            <text:p>9.4037</text:p>
          </table:table-cell>
          <table:table-cell office:value-type="string" table:style-name="c8">
            <text:p>2026-05-21 16:00</text:p>
          </table:table-cell>
          <table:table-cell office:value-type="float" office:value="9.3723115" table:style-name="c8">
            <text:p>9.3723</text:p>
          </table:table-cell>
          <table:table-cell office:value-type="float" office:value="-0.533016295219757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30</text:p>
          </table:table-cell>
          <table:table-cell office:value-type="float" office:value="9.4957455" table:style-name="c8">
            <text:p>9.4957</text:p>
          </table:table-cell>
          <table:table-cell office:value-type="string" table:style-name="c8">
            <text:p>2026-05-25 15:00</text:p>
          </table:table-cell>
          <table:table-cell office:value-type="float" office:value="9.467264" table:style-name="c8">
            <text:p>9.4673</text:p>
          </table:table-cell>
          <table:table-cell office:value-type="float" office:value="-0.49924000949689296" table:style-name="c9">
            <text:p>-0.5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45</text:p>
          </table:table-cell>
          <table:table-cell office:value-type="float" office:value="9.319657499999998" table:style-name="c8">
            <text:p>9.3197</text:p>
          </table:table-cell>
          <table:table-cell office:value-type="string" table:style-name="c8">
            <text:p>2026-05-26 06:15</text:p>
          </table:table-cell>
          <table:table-cell office:value-type="float" office:value="9.2963495" table:style-name="c8">
            <text:p>9.2963</text:p>
          </table:table-cell>
          <table:table-cell office:value-type="float" office:value="-0.44949508767352375" table:style-name="c9">
            <text:p>-0.4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45</text:p>
          </table:table-cell>
          <table:table-cell office:value-type="float" office:value="9.448722" table:style-name="c8">
            <text:p>9.4487</text:p>
          </table:table-cell>
          <table:table-cell office:value-type="string" table:style-name="c8">
            <text:p>2026-05-26 11:15</text:p>
          </table:table-cell>
          <table:table-cell office:value-type="float" office:value="9.4122915" table:style-name="c8">
            <text:p>9.4123</text:p>
          </table:table-cell>
          <table:table-cell office:value-type="float" office:value="-0.5846893443208212" table:style-name="c9">
            <text:p>-0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4:30</text:p>
          </table:table-cell>
          <table:table-cell office:value-type="float" office:value="9.482738999999999" table:style-name="c8">
            <text:p>9.4827</text:p>
          </table:table-cell>
          <table:table-cell office:value-type="string" table:style-name="c8">
            <text:p>2026-05-26 15:00</text:p>
          </table:table-cell>
          <table:table-cell office:value-type="float" office:value="9.351322" table:style-name="c8">
            <text:p>9.3513</text:p>
          </table:table-cell>
          <table:table-cell office:value-type="float" office:value="-1.5829845435796353" table:style-name="c9">
            <text:p>-1.6</text:p>
          </table:table-cell>
        </table:table-row>
        <table:table-row>
          <table:table-cell office:value-type="string" table:style-name="c7">
            <text:p>AVAX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0:15</text:p>
          </table:table-cell>
          <table:table-cell office:value-type="float" office:value="9.0195075" table:style-name="c8">
            <text:p>9.0195</text:p>
          </table:table-cell>
          <table:table-cell office:value-type="string" table:style-name="c8">
            <text:p>2026-06-01 00:45</text:p>
          </table:table-cell>
          <table:table-cell office:value-type="float" office:value="9.051472" table:style-name="c8">
            <text:p>9.0515</text:p>
          </table:table-cell>
          <table:table-cell office:value-type="float" office:value="0.15378453282512972" table:style-name="c10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15</text:p>
          </table:table-cell>
          <table:table-cell office:value-type="float" office:value="635.527605" table:style-name="c1">
            <text:p>635.53</text:p>
          </table:table-cell>
          <table:table-cell office:value-type="string" table:style-name="c1">
            <text:p>2026-03-03 16:45</text:p>
          </table:table-cell>
          <table:table-cell office:value-type="float" office:value="630.4146350000001" table:style-name="c1">
            <text:p>630.41</text:p>
          </table:table-cell>
          <table:table-cell office:value-type="float" office:value="-1.0028154253606258" table:style-name="c12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8:15</text:p>
          </table:table-cell>
          <table:table-cell office:value-type="float" office:value="641.46057" table:style-name="c1">
            <text:p>641.46</text:p>
          </table:table-cell>
          <table:table-cell office:value-type="string" table:style-name="c1">
            <text:p>2026-03-04 08:45</text:p>
          </table:table-cell>
          <table:table-cell office:value-type="float" office:value="643.807935" table:style-name="c1">
            <text:p>643.81</text:p>
          </table:table-cell>
          <table:table-cell office:value-type="float" office:value="0.1653091378531757" table:style-name="c11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651.575625" table:style-name="c1">
            <text:p>651.58</text:p>
          </table:table-cell>
          <table:table-cell office:value-type="string" table:style-name="c1">
            <text:p>2026-03-04 09:30</text:p>
          </table:table-cell>
          <table:table-cell office:value-type="float" office:value="650.8644050000001" table:style-name="c1">
            <text:p>650.86</text:p>
          </table:table-cell>
          <table:table-cell office:value-type="float" office:value="-0.3088356697804495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45</text:p>
          </table:table-cell>
          <table:table-cell office:value-type="float" office:value="657.26847" table:style-name="c1">
            <text:p>657.27</text:p>
          </table:table-cell>
          <table:table-cell office:value-type="string" table:style-name="c1">
            <text:p>2026-03-04 16:15</text:p>
          </table:table-cell>
          <table:table-cell office:value-type="float" office:value="656.91138" table:style-name="c1">
            <text:p>656.91</text:p>
          </table:table-cell>
          <table:table-cell office:value-type="float" office:value="-0.2541207930786493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644.432055" table:style-name="c1">
            <text:p>644.43</text:p>
          </table:table-cell>
          <table:table-cell office:value-type="string" table:style-name="c1">
            <text:p>2026-03-10 03:30</text:p>
          </table:table-cell>
          <table:table-cell office:value-type="float" office:value="644.4975900000001" table:style-name="c1">
            <text:p>644.5</text:p>
          </table:table-cell>
          <table:table-cell office:value-type="float" office:value="-0.18975090902484393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648.213945" table:style-name="c1">
            <text:p>648.21</text:p>
          </table:table-cell>
          <table:table-cell office:value-type="string" table:style-name="c1">
            <text:p>2026-03-10 09:15</text:p>
          </table:table-cell>
          <table:table-cell office:value-type="float" office:value="645.1872450000001" table:style-name="c1">
            <text:p>645.19</text:p>
          </table:table-cell>
          <table:table-cell office:value-type="float" office:value="-0.6658957796341292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651.2154449999999" table:style-name="c1">
            <text:p>651.22</text:p>
          </table:table-cell>
          <table:table-cell office:value-type="string" table:style-name="c1">
            <text:p>2026-03-10 15:30</text:p>
          </table:table-cell>
          <table:table-cell office:value-type="float" office:value="648.3756500000001" table:style-name="c1">
            <text:p>648.38</text:p>
          </table:table-cell>
          <table:table-cell office:value-type="float" office:value="-0.6351043968789605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649.08438" table:style-name="c1">
            <text:p>649.08</text:p>
          </table:table-cell>
          <table:table-cell office:value-type="string" table:style-name="c1">
            <text:p>2026-03-11 14:15</text:p>
          </table:table-cell>
          <table:table-cell office:value-type="float" office:value="646.1467650000001" table:style-name="c1">
            <text:p>646.15</text:p>
          </table:table-cell>
          <table:table-cell office:value-type="float" office:value="-0.6515735878954376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650.70519" table:style-name="c1">
            <text:p>650.71</text:p>
          </table:table-cell>
          <table:table-cell office:value-type="string" table:style-name="c1">
            <text:p>2026-03-12 10:15</text:p>
          </table:table-cell>
          <table:table-cell office:value-type="float" office:value="649.6450150000001" table:style-name="c1">
            <text:p>649.65</text:p>
          </table:table-cell>
          <table:table-cell office:value-type="float" office:value="-0.36250139406217574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3:00</text:p>
          </table:table-cell>
          <table:table-cell office:value-type="float" office:value="655.8877799999999" table:style-name="c1">
            <text:p>655.89</text:p>
          </table:table-cell>
          <table:table-cell office:value-type="string" table:style-name="c1">
            <text:p>2026-03-12 13:30</text:p>
          </table:table-cell>
          <table:table-cell office:value-type="float" office:value="652.703485" table:style-name="c1">
            <text:p>652.7</text:p>
          </table:table-cell>
          <table:table-cell office:value-type="float" office:value="-0.6844233729304983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3 09:15</text:p>
          </table:table-cell>
          <table:table-cell office:value-type="float" office:value="665.5070800000001" table:style-name="c1">
            <text:p>665.51</text:p>
          </table:table-cell>
          <table:table-cell office:value-type="float" office:value="-0.529711866911086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671.545605" table:style-name="c1">
            <text:p>671.55</text:p>
          </table:table-cell>
          <table:table-cell office:value-type="string" table:style-name="c1">
            <text:p>2026-03-13 13:30</text:p>
          </table:table-cell>
          <table:table-cell office:value-type="float" office:value="674.2327150000001" table:style-name="c1">
            <text:p>674.23</text:p>
          </table:table-cell>
          <table:table-cell office:value-type="float" office:value="0.19943825002251003" table:style-name="c11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676.227945" table:style-name="c1">
            <text:p>676.23</text:p>
          </table:table-cell>
          <table:table-cell office:value-type="string" table:style-name="c1">
            <text:p>2026-03-13 14:15</text:p>
          </table:table-cell>
          <table:table-cell office:value-type="float" office:value="675.572045" table:style-name="c1">
            <text:p>675.57</text:p>
          </table:table-cell>
          <table:table-cell office:value-type="float" office:value="-0.29670003033590575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662.280975" table:style-name="c1">
            <text:p>662.28</text:p>
          </table:table-cell>
          <table:table-cell office:value-type="string" table:style-name="c1">
            <text:p>2026-03-15 18:30</text:p>
          </table:table-cell>
          <table:table-cell office:value-type="float" office:value="661.0093300000001" table:style-name="c1">
            <text:p>661.01</text:p>
          </table:table-cell>
          <table:table-cell office:value-type="float" office:value="-0.3915260665112607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668.29398" table:style-name="c1">
            <text:p>668.29</text:p>
          </table:table-cell>
          <table:table-cell office:value-type="string" table:style-name="c1">
            <text:p>2026-03-15 22:15</text:p>
          </table:table-cell>
          <table:table-cell office:value-type="float" office:value="665.716975" table:style-name="c1">
            <text:p>665.72</text:p>
          </table:table-cell>
          <table:table-cell office:value-type="float" office:value="-0.5847386554379885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674.026845" table:style-name="c1">
            <text:p>674.03</text:p>
          </table:table-cell>
          <table:table-cell office:value-type="string" table:style-name="c1">
            <text:p>2026-03-15 23:15</text:p>
          </table:table-cell>
          <table:table-cell office:value-type="float" office:value="676.7714450000001" table:style-name="c1">
            <text:p>676.77</text:p>
          </table:table-cell>
          <table:table-cell office:value-type="float" office:value="0.20648048245690553" table:style-name="c11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82.030845" table:style-name="c1">
            <text:p>682.03</text:p>
          </table:table-cell>
          <table:table-cell office:value-type="string" table:style-name="c1">
            <text:p>2026-03-16 04:15</text:p>
          </table:table-cell>
          <table:table-cell office:value-type="float" office:value="682.5485550000001" table:style-name="c1">
            <text:p>682.55</text:p>
          </table:table-cell>
          <table:table-cell office:value-type="float" office:value="-0.12414461422853851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45</text:p>
          </table:table-cell>
          <table:table-cell office:value-type="float" office:value="635.59764" table:style-name="c1">
            <text:p>635.6</text:p>
          </table:table-cell>
          <table:table-cell office:value-type="string" table:style-name="c1">
            <text:p>2026-03-24 08:15</text:p>
          </table:table-cell>
          <table:table-cell office:value-type="float" office:value="636.7814500000001" table:style-name="c1">
            <text:p>636.78</text:p>
          </table:table-cell>
          <table:table-cell office:value-type="float" office:value="-0.014020838489892107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616.938315" table:style-name="c1">
            <text:p>616.94</text:p>
          </table:table-cell>
          <table:table-cell office:value-type="string" table:style-name="c1">
            <text:p>2026-03-31 02:30</text:p>
          </table:table-cell>
          <table:table-cell office:value-type="float" office:value="616.8214350000001" table:style-name="c1">
            <text:p>616.82</text:p>
          </table:table-cell>
          <table:table-cell office:value-type="float" office:value="-0.21880729657144382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45</text:p>
          </table:table-cell>
          <table:table-cell office:value-type="float" office:value="622.000845" table:style-name="c1">
            <text:p>622</text:p>
          </table:table-cell>
          <table:table-cell office:value-type="string" table:style-name="c1">
            <text:p>2026-04-01 07:15</text:p>
          </table:table-cell>
          <table:table-cell office:value-type="float" office:value="620.199745" table:style-name="c1">
            <text:p>620.2</text:p>
          </table:table-cell>
          <table:table-cell office:value-type="float" office:value="-0.488886681537392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5 16:00</text:p>
          </table:table-cell>
          <table:table-cell office:value-type="float" office:value="592.833435" table:style-name="c1">
            <text:p>592.83</text:p>
          </table:table-cell>
          <table:table-cell office:value-type="float" office:value="-0.4825343103355028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600.1099049999999" table:style-name="c1">
            <text:p>600.11</text:p>
          </table:table-cell>
          <table:table-cell office:value-type="string" table:style-name="c1">
            <text:p>2026-04-05 23:45</text:p>
          </table:table-cell>
          <table:table-cell office:value-type="float" office:value="601.65902" table:style-name="c1">
            <text:p>601.66</text:p>
          </table:table-cell>
          <table:table-cell office:value-type="float" office:value="0.057722529845638526" table:style-name="c11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604.9023" table:style-name="c1">
            <text:p>604.9</text:p>
          </table:table-cell>
          <table:table-cell office:value-type="string" table:style-name="c1">
            <text:p>2026-04-06 00:45</text:p>
          </table:table-cell>
          <table:table-cell office:value-type="float" office:value="604.79745" table:style-name="c1">
            <text:p>604.8</text:p>
          </table:table-cell>
          <table:table-cell office:value-type="float" office:value="-0.21719872821610586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607.7237099999999" table:style-name="c1">
            <text:p>607.72</text:p>
          </table:table-cell>
          <table:table-cell office:value-type="string" table:style-name="c1">
            <text:p>2026-04-06 10:00</text:p>
          </table:table-cell>
          <table:table-cell office:value-type="float" office:value="606.686505" table:style-name="c1">
            <text:p>606.69</text:p>
          </table:table-cell>
          <table:table-cell office:value-type="float" office:value="-0.37022931415572335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6:30</text:p>
          </table:table-cell>
          <table:table-cell office:value-type="float" office:value="600.62016" table:style-name="c1">
            <text:p>600.62</text:p>
          </table:table-cell>
          <table:table-cell office:value-type="string" table:style-name="c1">
            <text:p>2026-04-07 17:00</text:p>
          </table:table-cell>
          <table:table-cell office:value-type="float" office:value="600.929385" table:style-name="c1">
            <text:p>600.93</text:p>
          </table:table-cell>
          <table:table-cell office:value-type="float" office:value="-0.14851863124524245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608.7142049999999" table:style-name="c1">
            <text:p>608.71</text:p>
          </table:table-cell>
          <table:table-cell office:value-type="string" table:style-name="c1">
            <text:p>2026-04-07 20:30</text:p>
          </table:table-cell>
          <table:table-cell office:value-type="float" office:value="607.7859550000001" table:style-name="c1">
            <text:p>607.79</text:p>
          </table:table-cell>
          <table:table-cell office:value-type="float" office:value="-0.3520887316971310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612.155925" table:style-name="c1">
            <text:p>612.16</text:p>
          </table:table-cell>
          <table:table-cell office:value-type="string" table:style-name="c1">
            <text:p>2026-04-07 21:45</text:p>
          </table:table-cell>
          <table:table-cell office:value-type="float" office:value="611.803945" table:style-name="c1">
            <text:p>611.8</text:p>
          </table:table-cell>
          <table:table-cell office:value-type="float" office:value="-0.2572834831346293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613.88679" table:style-name="c1">
            <text:p>613.89</text:p>
          </table:table-cell>
          <table:table-cell office:value-type="string" table:style-name="c1">
            <text:p>2026-04-07 22:45</text:p>
          </table:table-cell>
          <table:table-cell office:value-type="float" office:value="615.17226" table:style-name="c1">
            <text:p>615.17</text:p>
          </table:table-cell>
          <table:table-cell office:value-type="float" office:value="0.009079956299440362" table:style-name="c11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19.76973" table:style-name="c1">
            <text:p>619.77</text:p>
          </table:table-cell>
          <table:table-cell office:value-type="string" table:style-name="c1">
            <text:p>2026-04-07 23:30</text:p>
          </table:table-cell>
          <table:table-cell office:value-type="float" office:value="624.3976450000001" table:style-name="c1">
            <text:p>624.4</text:p>
          </table:table-cell>
          <table:table-cell office:value-type="float" office:value="0.5453225519169935" table:style-name="c11">
            <text:p>+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45</text:p>
          </table:table-cell>
          <table:table-cell office:value-type="float" office:value="621.69069" table:style-name="c1">
            <text:p>621.69</text:p>
          </table:table-cell>
          <table:table-cell office:value-type="string" table:style-name="c1">
            <text:p>2026-04-08 00:15</text:p>
          </table:table-cell>
          <table:table-cell office:value-type="float" office:value="619.340175" table:style-name="c1">
            <text:p>619.34</text:p>
          </table:table-cell>
          <table:table-cell office:value-type="float" office:value="-0.5772285265885024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10.775235" table:style-name="c1">
            <text:p>610.78</text:p>
          </table:table-cell>
          <table:table-cell office:value-type="string" table:style-name="c1">
            <text:p>2026-04-11 19:15</text:p>
          </table:table-cell>
          <table:table-cell office:value-type="float" office:value="612.45362" table:style-name="c1">
            <text:p>612.45</text:p>
          </table:table-cell>
          <table:table-cell office:value-type="float" office:value="0.07434653332334396" table:style-name="c11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3 22:45</text:p>
          </table:table-cell>
          <table:table-cell office:value-type="float" office:value="614.19275" table:style-name="c1">
            <text:p>614.19</text:p>
          </table:table-cell>
          <table:table-cell office:value-type="float" office:value="0.0945381924039479" table:style-name="c11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617.378535" table:style-name="c1">
            <text:p>617.38</text:p>
          </table:table-cell>
          <table:table-cell office:value-type="string" table:style-name="c1">
            <text:p>2026-04-14 00:00</text:p>
          </table:table-cell>
          <table:table-cell office:value-type="float" office:value="614.4026450000001" table:style-name="c1">
            <text:p>614.4</text:p>
          </table:table-cell>
          <table:table-cell office:value-type="float" office:value="-0.6809567629938673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8:45</text:p>
          </table:table-cell>
          <table:table-cell office:value-type="float" office:value="618.5091" table:style-name="c1">
            <text:p>618.51</text:p>
          </table:table-cell>
          <table:table-cell office:value-type="string" table:style-name="c1">
            <text:p>2026-04-14 09:15</text:p>
          </table:table-cell>
          <table:table-cell office:value-type="float" office:value="617.6310300000001" table:style-name="c1">
            <text:p>617.63</text:p>
          </table:table-cell>
          <table:table-cell office:value-type="float" office:value="-0.3415817857764458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22.55112" table:style-name="c1">
            <text:p>622.55</text:p>
          </table:table-cell>
          <table:table-cell office:value-type="string" table:style-name="c1">
            <text:p>2026-04-14 14:30</text:p>
          </table:table-cell>
          <table:table-cell office:value-type="float" office:value="620.36966" table:style-name="c1">
            <text:p>620.37</text:p>
          </table:table-cell>
          <table:table-cell office:value-type="float" office:value="-0.5496061030843435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26.93331" table:style-name="c1">
            <text:p>626.93</text:p>
          </table:table-cell>
          <table:table-cell office:value-type="string" table:style-name="c1">
            <text:p>2026-04-15 20:15</text:p>
          </table:table-cell>
          <table:table-cell office:value-type="float" office:value="622.898395" table:style-name="c1">
            <text:p>622.9</text:p>
          </table:table-cell>
          <table:table-cell office:value-type="float" office:value="-0.8422090208613953" table:style-name="c12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626.262975" table:style-name="c1">
            <text:p>626.26</text:p>
          </table:table-cell>
          <table:table-cell office:value-type="string" table:style-name="c1">
            <text:p>2026-04-16 03:15</text:p>
          </table:table-cell>
          <table:table-cell office:value-type="float" office:value="624.0178350000001" table:style-name="c1">
            <text:p>624.02</text:p>
          </table:table-cell>
          <table:table-cell office:value-type="float" office:value="-0.5576813242336276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25.3525199999999" table:style-name="c1">
            <text:p>625.35</text:p>
          </table:table-cell>
          <table:table-cell office:value-type="string" table:style-name="c1">
            <text:p>2026-04-16 16:15</text:p>
          </table:table-cell>
          <table:table-cell office:value-type="float" office:value="625.22723" table:style-name="c1">
            <text:p>625.23</text:p>
          </table:table-cell>
          <table:table-cell office:value-type="float" office:value="-0.21989504939868842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636.167925" table:style-name="c1">
            <text:p>636.17</text:p>
          </table:table-cell>
          <table:table-cell office:value-type="string" table:style-name="c1">
            <text:p>2026-04-16 19:30</text:p>
          </table:table-cell>
          <table:table-cell office:value-type="float" office:value="634.32268" table:style-name="c1">
            <text:p>634.32</text:p>
          </table:table-cell>
          <table:table-cell office:value-type="float" office:value="-0.4893764547025725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640.1098949999999" table:style-name="c1">
            <text:p>640.11</text:p>
          </table:table-cell>
          <table:table-cell office:value-type="string" table:style-name="c1">
            <text:p>2026-04-17 13:45</text:p>
          </table:table-cell>
          <table:table-cell office:value-type="float" office:value="641.17925" table:style-name="c1">
            <text:p>641.18</text:p>
          </table:table-cell>
          <table:table-cell office:value-type="float" office:value="-0.03317591594953484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643.3715249999999" table:style-name="c1">
            <text:p>643.37</text:p>
          </table:table-cell>
          <table:table-cell office:value-type="string" table:style-name="c1">
            <text:p>2026-04-17 14:30</text:p>
          </table:table-cell>
          <table:table-cell office:value-type="float" office:value="642.97835" table:style-name="c1">
            <text:p>642.98</text:p>
          </table:table-cell>
          <table:table-cell office:value-type="float" office:value="-0.2608894948606610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638.028855" table:style-name="c1">
            <text:p>638.03</text:p>
          </table:table-cell>
          <table:table-cell office:value-type="string" table:style-name="c1">
            <text:p>2026-04-22 03:00</text:p>
          </table:table-cell>
          <table:table-cell office:value-type="float" office:value="639.7599600000001" table:style-name="c1">
            <text:p>639.76</text:p>
          </table:table-cell>
          <table:table-cell office:value-type="float" office:value="0.0708784307192456" table:style-name="c11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15</text:p>
          </table:table-cell>
          <table:table-cell office:value-type="float" office:value="640.9603199999999" table:style-name="c1">
            <text:p>640.96</text:p>
          </table:table-cell>
          <table:table-cell office:value-type="string" table:style-name="c1">
            <text:p>2026-04-22 03:45</text:p>
          </table:table-cell>
          <table:table-cell office:value-type="float" office:value="639.56006" table:style-name="c1">
            <text:p>639.56</text:p>
          </table:table-cell>
          <table:table-cell office:value-type="float" office:value="-0.41792611435600424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643.151415" table:style-name="c1">
            <text:p>643.15</text:p>
          </table:table-cell>
          <table:table-cell office:value-type="string" table:style-name="c1">
            <text:p>2026-04-22 06:00</text:p>
          </table:table-cell>
          <table:table-cell office:value-type="float" office:value="642.508585" table:style-name="c1">
            <text:p>642.5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3:45</text:p>
          </table:table-cell>
          <table:table-cell office:value-type="float" office:value="651.035355" table:style-name="c1">
            <text:p>651.04</text:p>
          </table:table-cell>
          <table:table-cell office:value-type="string" table:style-name="c1">
            <text:p>2026-04-22 14:15</text:p>
          </table:table-cell>
          <table:table-cell office:value-type="float" office:value="651.97385" table:style-name="c1">
            <text:p>651.97</text:p>
          </table:table-cell>
          <table:table-cell office:value-type="float" office:value="-0.05603393476995011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638.509095" table:style-name="c1">
            <text:p>638.51</text:p>
          </table:table-cell>
          <table:table-cell office:value-type="string" table:style-name="c1">
            <text:p>2026-04-23 21:15</text:p>
          </table:table-cell>
          <table:table-cell office:value-type="float" office:value="637.1212800000001" table:style-name="c1">
            <text:p>637.12</text:p>
          </table:table-cell>
          <table:table-cell office:value-type="float" office:value="-0.416817937216673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4 02:45</text:p>
          </table:table-cell>
          <table:table-cell office:value-type="float" office:value="625.9168850000001" table:style-name="c1">
            <text:p>625.92</text:p>
          </table:table-cell>
          <table:table-cell office:value-type="float" office:value="0.1336766096816211" table:style-name="c11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635.85777" table:style-name="c1">
            <text:p>635.86</text:p>
          </table:table-cell>
          <table:table-cell office:value-type="string" table:style-name="c1">
            <text:p>2026-05-04 04:45</text:p>
          </table:table-cell>
          <table:table-cell office:value-type="float" office:value="635.672005" table:style-name="c1">
            <text:p>635.67</text:p>
          </table:table-cell>
          <table:table-cell office:value-type="float" office:value="-0.22905646619604259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627.743715" table:style-name="c1">
            <text:p>627.74</text:p>
          </table:table-cell>
          <table:table-cell office:value-type="string" table:style-name="c1">
            <text:p>2026-05-04 15:45</text:p>
          </table:table-cell>
          <table:table-cell office:value-type="float" office:value="625.5670600000001" table:style-name="c1">
            <text:p>625.57</text:p>
          </table:table-cell>
          <table:table-cell office:value-type="float" office:value="-0.5459494808227383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633.3565199999999" table:style-name="c1">
            <text:p>633.36</text:p>
          </table:table-cell>
          <table:table-cell office:value-type="string" table:style-name="c1">
            <text:p>2026-05-05 13:45</text:p>
          </table:table-cell>
          <table:table-cell office:value-type="float" office:value="631.174255" table:style-name="c1">
            <text:p>631.17</text:p>
          </table:table-cell>
          <table:table-cell office:value-type="float" office:value="-0.5437667770034071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633.67668" table:style-name="c1">
            <text:p>633.68</text:p>
          </table:table-cell>
          <table:table-cell office:value-type="string" table:style-name="c1">
            <text:p>2026-05-06 02:15</text:p>
          </table:table-cell>
          <table:table-cell office:value-type="float" office:value="634.092795" table:style-name="c1">
            <text:p>634.09</text:p>
          </table:table-cell>
          <table:table-cell office:value-type="float" office:value="-0.13436449913305504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644.50209" table:style-name="c1">
            <text:p>644.5</text:p>
          </table:table-cell>
          <table:table-cell office:value-type="string" table:style-name="c1">
            <text:p>2026-05-06 09:15</text:p>
          </table:table-cell>
          <table:table-cell office:value-type="float" office:value="643.767955" table:style-name="c1">
            <text:p>643.77</text:p>
          </table:table-cell>
          <table:table-cell office:value-type="float" office:value="-0.3135796102763599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1:30</text:p>
          </table:table-cell>
          <table:table-cell office:value-type="float" office:value="649.82475" table:style-name="c1">
            <text:p>649.82</text:p>
          </table:table-cell>
          <table:table-cell office:value-type="string" table:style-name="c1">
            <text:p>2026-05-06 12:00</text:p>
          </table:table-cell>
          <table:table-cell office:value-type="float" office:value="652.23372" table:style-name="c1">
            <text:p>652.23</text:p>
          </table:table-cell>
          <table:table-cell office:value-type="float" office:value="0.170069667817363" table:style-name="c11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2:15</text:p>
          </table:table-cell>
          <table:table-cell office:value-type="float" office:value="653.336505" table:style-name="c1">
            <text:p>653.34</text:p>
          </table:table-cell>
          <table:table-cell office:value-type="string" table:style-name="c1">
            <text:p>2026-05-06 12:45</text:p>
          </table:table-cell>
          <table:table-cell office:value-type="float" office:value="658.4706" table:style-name="c1">
            <text:p>658.47</text:p>
          </table:table-cell>
          <table:table-cell office:value-type="float" office:value="0.5843561841994305" table:style-name="c11">
            <text:p>+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3:00</text:p>
          </table:table-cell>
          <table:table-cell office:value-type="float" office:value="657.40854" table:style-name="c1">
            <text:p>657.41</text:p>
          </table:table-cell>
          <table:table-cell office:value-type="string" table:style-name="c1">
            <text:p>2026-05-06 13:30</text:p>
          </table:table-cell>
          <table:table-cell office:value-type="float" office:value="649.8749" table:style-name="c1">
            <text:p>649.87</text:p>
          </table:table-cell>
          <table:table-cell office:value-type="float" office:value="-1.3435693921925562" table:style-name="c12">
            <text:p>-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655.817745" table:style-name="c1">
            <text:p>655.82</text:p>
          </table:table-cell>
          <table:table-cell office:value-type="string" table:style-name="c1">
            <text:p>2026-05-09 02:15</text:p>
          </table:table-cell>
          <table:table-cell office:value-type="float" office:value="653.9028850000001" table:style-name="c1">
            <text:p>653.9</text:p>
          </table:table-cell>
          <table:table-cell office:value-type="float" office:value="-0.4912968414898411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0 23:00</text:p>
          </table:table-cell>
          <table:table-cell office:value-type="float" office:value="665.457105" table:style-name="c1">
            <text:p>665.46</text:p>
          </table:table-cell>
          <table:table-cell office:value-type="float" office:value="-0.18120920786148798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1 23:30</text:p>
          </table:table-cell>
          <table:table-cell office:value-type="float" office:value="668.4056300000001" table:style-name="c1">
            <text:p>668.41</text:p>
          </table:table-cell>
          <table:table-cell office:value-type="float" office:value="-0.4975421842364214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8:45</text:p>
          </table:table-cell>
          <table:table-cell office:value-type="float" office:value="660.5100899999999" table:style-name="c1">
            <text:p>660.51</text:p>
          </table:table-cell>
          <table:table-cell office:value-type="string" table:style-name="c1">
            <text:p>2026-05-12 19:15</text:p>
          </table:table-cell>
          <table:table-cell office:value-type="float" office:value="662.14876" table:style-name="c1">
            <text:p>662.15</text:p>
          </table:table-cell>
          <table:table-cell office:value-type="float" office:value="0.04769565727000824" table:style-name="c11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674.87727" table:style-name="c1">
            <text:p>674.88</text:p>
          </table:table-cell>
          <table:table-cell office:value-type="string" table:style-name="c1">
            <text:p>2026-05-13 01:45</text:p>
          </table:table-cell>
          <table:table-cell office:value-type="float" office:value="678.6605000000001" table:style-name="c1">
            <text:p>678.66</text:p>
          </table:table-cell>
          <table:table-cell office:value-type="float" office:value="0.3595598441921144" table:style-name="c11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15</text:p>
          </table:table-cell>
          <table:table-cell office:value-type="float" office:value="684.28197" table:style-name="c1">
            <text:p>684.28</text:p>
          </table:table-cell>
          <table:table-cell office:value-type="string" table:style-name="c1">
            <text:p>2026-05-14 17:45</text:p>
          </table:table-cell>
          <table:table-cell office:value-type="float" office:value="682.8584000000001" table:style-name="c1">
            <text:p>682.86</text:p>
          </table:table-cell>
          <table:table-cell office:value-type="float" office:value="-0.4075226388911002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15</text:p>
          </table:table-cell>
          <table:table-cell office:value-type="float" office:value="654.34701" table:style-name="c1">
            <text:p>654.35</text:p>
          </table:table-cell>
          <table:table-cell office:value-type="string" table:style-name="c1">
            <text:p>2026-05-21 01:45</text:p>
          </table:table-cell>
          <table:table-cell office:value-type="float" office:value="652.21373" table:style-name="c1">
            <text:p>652.21</text:p>
          </table:table-cell>
          <table:table-cell office:value-type="float" office:value="-0.5252649120028763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655.58763" table:style-name="c1">
            <text:p>655.59</text:p>
          </table:table-cell>
          <table:table-cell office:value-type="string" table:style-name="c1">
            <text:p>2026-05-21 09:00</text:p>
          </table:table-cell>
          <table:table-cell office:value-type="float" office:value="654.602535" table:style-name="c1">
            <text:p>654.6</text:p>
          </table:table-cell>
          <table:table-cell office:value-type="float" office:value="-0.34986100446480206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659.80974" table:style-name="c1">
            <text:p>659.81</text:p>
          </table:table-cell>
          <table:table-cell office:value-type="string" table:style-name="c1">
            <text:p>2026-05-21 18:00</text:p>
          </table:table-cell>
          <table:table-cell office:value-type="float" office:value="657.461105" table:style-name="c1">
            <text:p>657.46</text:p>
          </table:table-cell>
          <table:table-cell office:value-type="float" office:value="-0.555144843556743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659.8797749999999" table:style-name="c1">
            <text:p>659.88</text:p>
          </table:table-cell>
          <table:table-cell office:value-type="string" table:style-name="c1">
            <text:p>2026-05-22 08:45</text:p>
          </table:table-cell>
          <table:table-cell office:value-type="float" office:value="659.300185" table:style-name="c1">
            <text:p>659.3</text:p>
          </table:table-cell>
          <table:table-cell office:value-type="float" office:value="-0.2875570886855638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30</text:p>
          </table:table-cell>
          <table:table-cell office:value-type="float" office:value="659.0793749999999" table:style-name="c1">
            <text:p>659.08</text:p>
          </table:table-cell>
          <table:table-cell office:value-type="string" table:style-name="c1">
            <text:p>2026-05-22 13:00</text:p>
          </table:table-cell>
          <table:table-cell office:value-type="float" office:value="660.2896900000001" table:style-name="c1">
            <text:p>660.29</text:p>
          </table:table-cell>
          <table:table-cell office:value-type="float" office:value="-0.016629877138829574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45</text:p>
          </table:table-cell>
          <table:table-cell office:value-type="float" office:value="663.281475" table:style-name="c1">
            <text:p>663.28</text:p>
          </table:table-cell>
          <table:table-cell office:value-type="string" table:style-name="c1">
            <text:p>2026-05-22 14:15</text:p>
          </table:table-cell>
          <table:table-cell office:value-type="float" office:value="661.678995" table:style-name="c1">
            <text:p>661.68</text:p>
          </table:table-cell>
          <table:table-cell office:value-type="float" office:value="-0.4410158313263634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657.78873" table:style-name="c1">
            <text:p>657.79</text:p>
          </table:table-cell>
          <table:table-cell office:value-type="string" table:style-name="c1">
            <text:p>2026-05-25 00:15</text:p>
          </table:table-cell>
          <table:table-cell office:value-type="float" office:value="658.3706500000001" table:style-name="c1">
            <text:p>658.37</text:p>
          </table:table-cell>
          <table:table-cell office:value-type="float" office:value="-0.11161074914584068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15</text:p>
          </table:table-cell>
          <table:table-cell office:value-type="float" office:value="666.1429049999999" table:style-name="c1">
            <text:p>666.14</text:p>
          </table:table-cell>
          <table:table-cell office:value-type="string" table:style-name="c1">
            <text:p>2026-05-25 12:45</text:p>
          </table:table-cell>
          <table:table-cell office:value-type="float" office:value="669.575045" table:style-name="c1">
            <text:p>669.58</text:p>
          </table:table-cell>
          <table:table-cell office:value-type="float" office:value="0.3142958469317003" table:style-name="c11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662.25096" table:style-name="c1">
            <text:p>662.25</text:p>
          </table:table-cell>
          <table:table-cell office:value-type="string" table:style-name="c1">
            <text:p>2026-05-26 11:00</text:p>
          </table:table-cell>
          <table:table-cell office:value-type="float" office:value="662.44861" table:style-name="c1">
            <text:p>662.45</text:p>
          </table:table-cell>
          <table:table-cell office:value-type="float" office:value="-0.1701144791681375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667.9938299999999" table:style-name="c1">
            <text:p>667.99</text:p>
          </table:table-cell>
          <table:table-cell office:value-type="string" table:style-name="c1">
            <text:p>2026-05-26 15:00</text:p>
          </table:table-cell>
          <table:table-cell office:value-type="float" office:value="662.5585550000001" table:style-name="c1">
            <text:p>662.56</text:p>
          </table:table-cell>
          <table:table-cell office:value-type="float" office:value="-1.0119449084499577" table:style-name="c12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659.179425" table:style-name="c1">
            <text:p>659.18</text:p>
          </table:table-cell>
          <table:table-cell office:value-type="string" table:style-name="c1">
            <text:p>2026-05-27 01:45</text:p>
          </table:table-cell>
          <table:table-cell office:value-type="float" office:value="657.3711500000001" table:style-name="c1">
            <text:p>657.37</text:p>
          </table:table-cell>
          <table:table-cell office:value-type="float" office:value="-0.4736737541299995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653.5766249999999" table:style-name="c1">
            <text:p>653.58</text:p>
          </table:table-cell>
          <table:table-cell office:value-type="string" table:style-name="c1">
            <text:p>2026-05-30 02:30</text:p>
          </table:table-cell>
          <table:table-cell office:value-type="float" office:value="654.302685" table:style-name="c1">
            <text:p>654.3</text:p>
          </table:table-cell>
          <table:table-cell office:value-type="float" office:value="-0.0890318051559702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45</text:p>
          </table:table-cell>
          <table:table-cell office:value-type="float" office:value="657.898785" table:style-name="c1">
            <text:p>657.9</text:p>
          </table:table-cell>
          <table:table-cell office:value-type="string" table:style-name="c1">
            <text:p>2026-05-30 03:15</text:p>
          </table:table-cell>
          <table:table-cell office:value-type="float" office:value="660.20973" table:style-name="c1">
            <text:p>660.21</text:p>
          </table:table-cell>
          <table:table-cell office:value-type="float" office:value="0.15065930692210738" table:style-name="c11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4:30</text:p>
          </table:table-cell>
          <table:table-cell office:value-type="float" office:value="682.8512549999999" table:style-name="c1">
            <text:p>682.85</text:p>
          </table:table-cell>
          <table:table-cell office:value-type="string" table:style-name="c1">
            <text:p>2026-05-30 15:00</text:p>
          </table:table-cell>
          <table:table-cell office:value-type="float" office:value="686.326665" table:style-name="c1">
            <text:p>686.33</text:p>
          </table:table-cell>
          <table:table-cell office:value-type="float" office:value="0.3080382413099825" table:style-name="c11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5:30</text:p>
          </table:table-cell>
          <table:table-cell office:value-type="float" office:value="690.475065" table:style-name="c1">
            <text:p>690.48</text:p>
          </table:table-cell>
          <table:table-cell office:value-type="string" table:style-name="c1">
            <text:p>2026-05-30 16:00</text:p>
          </table:table-cell>
          <table:table-cell office:value-type="float" office:value="694.182735" table:style-name="c1">
            <text:p>694.18</text:p>
          </table:table-cell>
          <table:table-cell office:value-type="float" office:value="0.33600036124912247" table:style-name="c11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6:15</text:p>
          </table:table-cell>
          <table:table-cell office:value-type="float" office:value="703.25145" table:style-name="c1">
            <text:p>703.25</text:p>
          </table:table-cell>
          <table:table-cell office:value-type="string" table:style-name="c1">
            <text:p>2026-05-30 16:45</text:p>
          </table:table-cell>
          <table:table-cell office:value-type="float" office:value="707.26619" table:style-name="c1">
            <text:p>707.27</text:p>
          </table:table-cell>
          <table:table-cell office:value-type="float" office:value="0.36984138265054867" table:style-name="c11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7:00</text:p>
          </table:table-cell>
          <table:table-cell office:value-type="float" office:value="708.91428" table:style-name="c1">
            <text:p>708.91</text:p>
          </table:table-cell>
          <table:table-cell office:value-type="string" table:style-name="c1">
            <text:p>2026-05-30 17:30</text:p>
          </table:table-cell>
          <table:table-cell office:value-type="float" office:value="705.017315" table:style-name="c1">
            <text:p>705.02</text:p>
          </table:table-cell>
          <table:table-cell office:value-type="float" office:value="-0.748510047319817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20:00</text:p>
          </table:table-cell>
          <table:table-cell office:value-type="float" office:value="721.490565" table:style-name="c1">
            <text:p>721.49</text:p>
          </table:table-cell>
          <table:table-cell office:value-type="string" table:style-name="c1">
            <text:p>2026-05-30 20:30</text:p>
          </table:table-cell>
          <table:table-cell office:value-type="float" office:value="719.8998700000001" table:style-name="c1">
            <text:p>719.9</text:p>
          </table:table-cell>
          <table:table-cell office:value-type="float" office:value="-0.4199327041968903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2:15</text:p>
          </table:table-cell>
          <table:table-cell office:value-type="float" office:value="733.2964649999999" table:style-name="c1">
            <text:p>733.3</text:p>
          </table:table-cell>
          <table:table-cell office:value-type="string" table:style-name="c1">
            <text:p>2026-05-31 02:45</text:p>
          </table:table-cell>
          <table:table-cell office:value-type="float" office:value="737.17123" table:style-name="c1">
            <text:p>737.17</text:p>
          </table:table-cell>
          <table:table-cell office:value-type="float" office:value="0.32744733212779487" table:style-name="c11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740.2499399999999" table:style-name="c1">
            <text:p>740.25</text:p>
          </table:table-cell>
          <table:table-cell office:value-type="string" table:style-name="c1">
            <text:p>2026-05-31 03:30</text:p>
          </table:table-cell>
          <table:table-cell office:value-type="float" office:value="740.8194050000001" table:style-name="c1">
            <text:p>740.82</text:p>
          </table:table-cell>
          <table:table-cell office:value-type="float" office:value="-0.12312503403848485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3:30</text:p>
          </table:table-cell>
          <table:table-cell office:value-type="float" office:value="732.06585" table:style-name="c1">
            <text:p>732.07</text:p>
          </table:table-cell>
          <table:table-cell office:value-type="string" table:style-name="c1">
            <text:p>2026-05-31 14:00</text:p>
          </table:table-cell>
          <table:table-cell office:value-type="float" office:value="727.0962700000001" table:style-name="c1">
            <text:p>727.1</text:p>
          </table:table-cell>
          <table:table-cell office:value-type="float" office:value="-0.8773862957451084" table:style-name="c12">
            <text:p>-0.9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67562.974605" table:style-name="c8">
            <text:p>67563</text:p>
          </table:table-cell>
          <table:table-cell office:value-type="string" table:style-name="c8">
            <text:p>2026-03-03 16:15</text:p>
          </table:table-cell>
          <table:table-cell office:value-type="float" office:value="68439.77299499999" table:style-name="c8">
            <text:p>68440</text:p>
          </table:table-cell>
          <table:table-cell office:value-type="float" office:value="1.0952556309269168" table:style-name="c10">
            <text:p>+1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8:00</text:p>
          </table:table-cell>
          <table:table-cell office:value-type="float" office:value="69527.88657" table:style-name="c8">
            <text:p>69528</text:p>
          </table:table-cell>
          <table:table-cell office:value-type="string" table:style-name="c8">
            <text:p>2026-03-04 08:30</text:p>
          </table:table-cell>
          <table:table-cell office:value-type="float" office:value="69281.76179" table:style-name="c8">
            <text:p>69282</text:p>
          </table:table-cell>
          <table:table-cell office:value-type="float" office:value="-0.5531867007505964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71046.90569999999" table:style-name="c8">
            <text:p>71047</text:p>
          </table:table-cell>
          <table:table-cell office:value-type="string" table:style-name="c8">
            <text:p>2026-03-04 09:30</text:p>
          </table:table-cell>
          <table:table-cell office:value-type="float" office:value="71274.345" table:style-name="c8">
            <text:p>71274</text:p>
          </table:table-cell>
          <table:table-cell office:value-type="float" office:value="0.11958562235458992" table:style-name="c10">
            <text:p>+0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73008.63607499999" table:style-name="c8">
            <text:p>73009</text:p>
          </table:table-cell>
          <table:table-cell office:value-type="string" table:style-name="c8">
            <text:p>2026-03-04 16:00</text:p>
          </table:table-cell>
          <table:table-cell office:value-type="float" office:value="73360.171565" table:style-name="c8">
            <text:p>73360</text:p>
          </table:table-cell>
          <table:table-cell office:value-type="float" office:value="0.28063598781806753" table:style-name="c10">
            <text:p>+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6 08:00</text:p>
          </table:table-cell>
          <table:table-cell office:value-type="float" office:value="71091.96822" table:style-name="c8">
            <text:p>71092</text:p>
          </table:table-cell>
          <table:table-cell office:value-type="string" table:style-name="c8">
            <text:p>2026-03-06 08:30</text:p>
          </table:table-cell>
          <table:table-cell office:value-type="float" office:value="70898.66293500001" table:style-name="c8">
            <text:p>70899</text:p>
          </table:table-cell>
          <table:table-cell office:value-type="float" office:value="-0.47126520842728503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9:30</text:p>
          </table:table-cell>
          <table:table-cell office:value-type="float" office:value="69398.14173" table:style-name="c8">
            <text:p>69398</text:p>
          </table:table-cell>
          <table:table-cell office:value-type="string" table:style-name="c8">
            <text:p>2026-03-09 20:00</text:p>
          </table:table-cell>
          <table:table-cell office:value-type="float" office:value="68957.434035" table:style-name="c8">
            <text:p>68957</text:p>
          </table:table-cell>
          <table:table-cell office:value-type="float" office:value="-0.833673051199102" table:style-name="c9">
            <text:p>-0.8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1:00</text:p>
          </table:table-cell>
          <table:table-cell office:value-type="float" office:value="69191.93867999999" table:style-name="c8">
            <text:p>69192</text:p>
          </table:table-cell>
          <table:table-cell office:value-type="string" table:style-name="c8">
            <text:p>2026-03-10 01:30</text:p>
          </table:table-cell>
          <table:table-cell office:value-type="float" office:value="68941.19215999999" table:style-name="c8">
            <text:p>68941</text:p>
          </table:table-cell>
          <table:table-cell office:value-type="float" office:value="-0.5615682556964652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2:45</text:p>
          </table:table-cell>
          <table:table-cell office:value-type="float" office:value="70355.32008" table:style-name="c8">
            <text:p>70355</text:p>
          </table:table-cell>
          <table:table-cell office:value-type="string" table:style-name="c8">
            <text:p>2026-03-10 03:15</text:p>
          </table:table-cell>
          <table:table-cell office:value-type="float" office:value="70137.05393000001" table:style-name="c8">
            <text:p>70137</text:p>
          </table:table-cell>
          <table:table-cell office:value-type="float" office:value="-0.5095138795452203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8:15</text:p>
          </table:table-cell>
          <table:table-cell office:value-type="float" office:value="70934.80967999999" table:style-name="c8">
            <text:p>70935</text:p>
          </table:table-cell>
          <table:table-cell office:value-type="string" table:style-name="c8">
            <text:p>2026-03-10 08:45</text:p>
          </table:table-cell>
          <table:table-cell office:value-type="float" office:value="70883.22065999999" table:style-name="c8">
            <text:p>70883</text:p>
          </table:table-cell>
          <table:table-cell office:value-type="float" office:value="-0.272481985884343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71503.543905" table:style-name="c8">
            <text:p>71504</text:p>
          </table:table-cell>
          <table:table-cell office:value-type="string" table:style-name="c8">
            <text:p>2026-03-10 15:30</text:p>
          </table:table-cell>
          <table:table-cell office:value-type="float" office:value="71312.335995" table:style-name="c8">
            <text:p>71312</text:p>
          </table:table-cell>
          <table:table-cell office:value-type="float" office:value="-0.46677584274346096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45</text:p>
          </table:table-cell>
          <table:table-cell office:value-type="float" office:value="70477.231005" table:style-name="c8">
            <text:p>70477</text:p>
          </table:table-cell>
          <table:table-cell office:value-type="string" table:style-name="c8">
            <text:p>2026-03-11 14:15</text:p>
          </table:table-cell>
          <table:table-cell office:value-type="float" office:value="70192.895995" table:style-name="c8">
            <text:p>70193</text:p>
          </table:table-cell>
          <table:table-cell office:value-type="float" office:value="-0.6025358871773578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4:30</text:p>
          </table:table-cell>
          <table:table-cell office:value-type="float" office:value="70699.502085" table:style-name="c8">
            <text:p>70700</text:p>
          </table:table-cell>
          <table:table-cell office:value-type="string" table:style-name="c8">
            <text:p>2026-03-11 15:00</text:p>
          </table:table-cell>
          <table:table-cell office:value-type="float" office:value="70543.41065" table:style-name="c8">
            <text:p>70543</text:p>
          </table:table-cell>
          <table:table-cell office:value-type="float" office:value="-0.42024017726765006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71518.27126499999" table:style-name="c8">
            <text:p>71518</text:p>
          </table:table-cell>
          <table:table-cell office:value-type="string" table:style-name="c8">
            <text:p>2026-03-13 01:00</text:p>
          </table:table-cell>
          <table:table-cell office:value-type="float" office:value="71439.8622" table:style-name="c8">
            <text:p>71440</text:p>
          </table:table-cell>
          <table:table-cell office:value-type="float" office:value="-0.30931585121528604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00</text:p>
          </table:table-cell>
          <table:table-cell office:value-type="float" office:value="72821.12236499999" table:style-name="c8">
            <text:p>72821</text:p>
          </table:table-cell>
          <table:table-cell office:value-type="string" table:style-name="c8">
            <text:p>2026-03-13 13:30</text:p>
          </table:table-cell>
          <table:table-cell office:value-type="float" office:value="72986.658415" table:style-name="c8">
            <text:p>72987</text:p>
          </table:table-cell>
          <table:table-cell office:value-type="float" office:value="0.02696431912982966" table:style-name="c10">
            <text:p>+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45</text:p>
          </table:table-cell>
          <table:table-cell office:value-type="float" office:value="73307.41539" table:style-name="c8">
            <text:p>73307</text:p>
          </table:table-cell>
          <table:table-cell office:value-type="string" table:style-name="c8">
            <text:p>2026-03-13 14:15</text:p>
          </table:table-cell>
          <table:table-cell office:value-type="float" office:value="73464.599325" table:style-name="c8">
            <text:p>73465</text:p>
          </table:table-cell>
          <table:table-cell office:value-type="float" office:value="0.014088889772456703" table:style-name="c10">
            <text:p>+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4:30</text:p>
          </table:table-cell>
          <table:table-cell office:value-type="float" office:value="73775.38926" table:style-name="c8">
            <text:p>73775</text:p>
          </table:table-cell>
          <table:table-cell office:value-type="string" table:style-name="c8">
            <text:p>2026-03-13 15:00</text:p>
          </table:table-cell>
          <table:table-cell office:value-type="float" office:value="72346.52864" table:style-name="c8">
            <text:p>72347</text:p>
          </table:table-cell>
          <table:table-cell office:value-type="float" office:value="-2.1327997676922728" table:style-name="c9">
            <text:p>-2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2:30</text:p>
          </table:table-cell>
          <table:table-cell office:value-type="float" office:value="71303.92414499998" table:style-name="c8">
            <text:p>71304</text:p>
          </table:table-cell>
          <table:table-cell office:value-type="string" table:style-name="c8">
            <text:p>2026-03-15 03:00</text:p>
          </table:table-cell>
          <table:table-cell office:value-type="float" office:value="71414.81473" table:style-name="c8">
            <text:p>71415</text:p>
          </table:table-cell>
          <table:table-cell office:value-type="float" office:value="-0.044692672987323157" table:style-name="c9">
            <text:p>-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8:00</text:p>
          </table:table-cell>
          <table:table-cell office:value-type="float" office:value="71855.86998" table:style-name="c8">
            <text:p>71856</text:p>
          </table:table-cell>
          <table:table-cell office:value-type="string" table:style-name="c8">
            <text:p>2026-03-15 18:30</text:p>
          </table:table-cell>
          <table:table-cell office:value-type="float" office:value="71690.51681000002" table:style-name="c8">
            <text:p>71691</text:p>
          </table:table-cell>
          <table:table-cell office:value-type="float" office:value="-0.4295578262278221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00</text:p>
          </table:table-cell>
          <table:table-cell office:value-type="float" office:value="72145.64479499999" table:style-name="c8">
            <text:p>72146</text:p>
          </table:table-cell>
          <table:table-cell office:value-type="string" table:style-name="c8">
            <text:p>2026-03-15 22:30</text:p>
          </table:table-cell>
          <table:table-cell office:value-type="float" office:value="71895.52425500001" table:style-name="c8">
            <text:p>71896</text:p>
          </table:table-cell>
          <table:table-cell office:value-type="float" office:value="-0.5458953123293919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72427.59569999999" table:style-name="c8">
            <text:p>72428</text:p>
          </table:table-cell>
          <table:table-cell office:value-type="string" table:style-name="c8">
            <text:p>2026-03-15 23:15</text:p>
          </table:table-cell>
          <table:table-cell office:value-type="float" office:value="72955.504" table:style-name="c8">
            <text:p>72956</text:p>
          </table:table-cell>
          <table:table-cell office:value-type="float" office:value="0.527520268775139" table:style-name="c10">
            <text:p>+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73806.885" table:style-name="c8">
            <text:p>73807</text:p>
          </table:table-cell>
          <table:table-cell office:value-type="string" table:style-name="c8">
            <text:p>2026-03-16 04:15</text:p>
          </table:table-cell>
          <table:table-cell office:value-type="float" office:value="73659.102025" table:style-name="c8">
            <text:p>73659</text:p>
          </table:table-cell>
          <table:table-cell office:value-type="float" office:value="-0.39972899540193785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3:45</text:p>
          </table:table-cell>
          <table:table-cell office:value-type="float" office:value="74116.689825" table:style-name="c8">
            <text:p>74117</text:p>
          </table:table-cell>
          <table:table-cell office:value-type="string" table:style-name="c8">
            <text:p>2026-03-16 14:15</text:p>
          </table:table-cell>
          <table:table-cell office:value-type="float" office:value="74261.47069" table:style-name="c8">
            <text:p>74261</text:p>
          </table:table-cell>
          <table:table-cell office:value-type="float" office:value="-0.004948703076146366" table:style-name="c9">
            <text:p>-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1:15</text:p>
          </table:table-cell>
          <table:table-cell office:value-type="float" office:value="74405.11396499998" table:style-name="c8">
            <text:p>74405</text:p>
          </table:table-cell>
          <table:table-cell office:value-type="string" table:style-name="c8">
            <text:p>2026-03-16 21:45</text:p>
          </table:table-cell>
          <table:table-cell office:value-type="float" office:value="74398.782" table:style-name="c8">
            <text:p>74399</text:p>
          </table:table-cell>
          <table:table-cell office:value-type="float" office:value="-0.20839310896145768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15</text:p>
          </table:table-cell>
          <table:table-cell office:value-type="float" office:value="75447.034665" table:style-name="c8">
            <text:p>75447</text:p>
          </table:table-cell>
          <table:table-cell office:value-type="string" table:style-name="c8">
            <text:p>2026-03-17 00:45</text:p>
          </table:table-cell>
          <table:table-cell office:value-type="float" office:value="74959.46152000001" table:style-name="c8">
            <text:p>74959</text:p>
          </table:table-cell>
          <table:table-cell office:value-type="float" office:value="-0.8448537592083194" table:style-name="c9">
            <text:p>-0.8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1:15</text:p>
          </table:table-cell>
          <table:table-cell office:value-type="float" office:value="75878.80044" table:style-name="c8">
            <text:p>75879</text:p>
          </table:table-cell>
          <table:table-cell office:value-type="string" table:style-name="c8">
            <text:p>2026-03-17 01:45</text:p>
          </table:table-cell>
          <table:table-cell office:value-type="float" office:value="75640.330915" table:style-name="c8">
            <text:p>75640</text:p>
          </table:table-cell>
          <table:table-cell office:value-type="float" office:value="-0.5135486384068688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1:00</text:p>
          </table:table-cell>
          <table:table-cell office:value-type="float" office:value="70128.236595" table:style-name="c8">
            <text:p>70128</text:p>
          </table:table-cell>
          <table:table-cell office:value-type="string" table:style-name="c8">
            <text:p>2026-03-24 21:30</text:p>
          </table:table-cell>
          <table:table-cell office:value-type="float" office:value="70024.88004500001" table:style-name="c8">
            <text:p>70025</text:p>
          </table:table-cell>
          <table:table-cell office:value-type="float" office:value="-0.346987600180570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5:15</text:p>
          </table:table-cell>
          <table:table-cell office:value-type="float" office:value="71280.952665" table:style-name="c8">
            <text:p>71281</text:p>
          </table:table-cell>
          <table:table-cell office:value-type="string" table:style-name="c8">
            <text:p>2026-03-25 05:45</text:p>
          </table:table-cell>
          <table:table-cell office:value-type="float" office:value="71185.319535" table:style-name="c8">
            <text:p>71185</text:p>
          </table:table-cell>
          <table:table-cell office:value-type="float" office:value="-0.33379545987366477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8:45</text:p>
          </table:table-cell>
          <table:table-cell office:value-type="float" office:value="71514.05916" table:style-name="c8">
            <text:p>71514</text:p>
          </table:table-cell>
          <table:table-cell office:value-type="string" table:style-name="c8">
            <text:p>2026-03-25 09:15</text:p>
          </table:table-cell>
          <table:table-cell office:value-type="float" office:value="71298.362985" table:style-name="c8">
            <text:p>71298</text:p>
          </table:table-cell>
          <table:table-cell office:value-type="float" office:value="-0.5009107395310353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15</text:p>
          </table:table-cell>
          <table:table-cell office:value-type="float" office:value="67927.86696" table:style-name="c8">
            <text:p>67928</text:p>
          </table:table-cell>
          <table:table-cell office:value-type="string" table:style-name="c8">
            <text:p>2026-03-30 08:45</text:p>
          </table:table-cell>
          <table:table-cell office:value-type="float" office:value="67727.1195" table:style-name="c8">
            <text:p>67727</text:p>
          </table:table-cell>
          <table:table-cell office:value-type="float" office:value="-0.4948395804603045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00</text:p>
          </table:table-cell>
          <table:table-cell office:value-type="float" office:value="67242.34437" table:style-name="c8">
            <text:p>67242</text:p>
          </table:table-cell>
          <table:table-cell office:value-type="string" table:style-name="c8">
            <text:p>2026-03-31 01:30</text:p>
          </table:table-cell>
          <table:table-cell office:value-type="float" office:value="67741.59226" table:style-name="c8">
            <text:p>67742</text:p>
          </table:table-cell>
          <table:table-cell office:value-type="float" office:value="0.5410763864363011" table:style-name="c10">
            <text:p>+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45</text:p>
          </table:table-cell>
          <table:table-cell office:value-type="float" office:value="67967.276655" table:style-name="c8">
            <text:p>67967</text:p>
          </table:table-cell>
          <table:table-cell office:value-type="string" table:style-name="c8">
            <text:p>2026-03-31 02:15</text:p>
          </table:table-cell>
          <table:table-cell office:value-type="float" office:value="67882.64170000001" table:style-name="c8">
            <text:p>67883</text:p>
          </table:table-cell>
          <table:table-cell office:value-type="float" office:value="-0.3241741711628165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4:00</text:p>
          </table:table-cell>
          <table:table-cell office:value-type="float" office:value="67335.93114" table:style-name="c8">
            <text:p>67336</text:p>
          </table:table-cell>
          <table:table-cell office:value-type="string" table:style-name="c8">
            <text:p>2026-03-31 14:30</text:p>
          </table:table-cell>
          <table:table-cell office:value-type="float" office:value="67704.13100000001" table:style-name="c8">
            <text:p>67704</text:p>
          </table:table-cell>
          <table:table-cell office:value-type="float" office:value="0.34581730465248484" table:style-name="c10">
            <text:p>+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6:45</text:p>
          </table:table-cell>
          <table:table-cell office:value-type="float" office:value="67809.92801999999" table:style-name="c8">
            <text:p>67810</text:p>
          </table:table-cell>
          <table:table-cell office:value-type="string" table:style-name="c8">
            <text:p>2026-03-31 17:15</text:p>
          </table:table-cell>
          <table:table-cell office:value-type="float" office:value="68419.773" table:style-name="c8">
            <text:p>68420</text:p>
          </table:table-cell>
          <table:table-cell office:value-type="float" office:value="0.697646889749648" table:style-name="c10">
            <text:p>+0.7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7:30</text:p>
          </table:table-cell>
          <table:table-cell office:value-type="float" office:value="68068.01699999999" table:style-name="c8">
            <text:p>68068</text:p>
          </table:table-cell>
          <table:table-cell office:value-type="string" table:style-name="c8">
            <text:p>2026-03-31 18:00</text:p>
          </table:table-cell>
          <table:table-cell office:value-type="float" office:value="67492.99662" table:style-name="c8">
            <text:p>67493</text:p>
          </table:table-cell>
          <table:table-cell office:value-type="float" office:value="-1.0429845197978405" table:style-name="c9">
            <text:p>-1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15:30</text:p>
          </table:table-cell>
          <table:table-cell office:value-type="float" office:value="67533.75" table:style-name="c8">
            <text:p>67534</text:p>
          </table:table-cell>
          <table:table-cell office:value-type="string" table:style-name="c8">
            <text:p>2026-04-05 16:00</text:p>
          </table:table-cell>
          <table:table-cell office:value-type="float" office:value="67272.996675" table:style-name="c8">
            <text:p>67273</text:p>
          </table:table-cell>
          <table:table-cell office:value-type="float" office:value="-0.5852363379100445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22:45</text:p>
          </table:table-cell>
          <table:table-cell office:value-type="float" office:value="67998.29215499999" table:style-name="c8">
            <text:p>67998</text:p>
          </table:table-cell>
          <table:table-cell office:value-type="string" table:style-name="c8">
            <text:p>2026-04-05 23:15</text:p>
          </table:table-cell>
          <table:table-cell office:value-type="float" office:value="68565.69000500001" table:style-name="c8">
            <text:p>68566</text:p>
          </table:table-cell>
          <table:table-cell office:value-type="float" office:value="0.6328615352560574" table:style-name="c10">
            <text:p>+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23:30</text:p>
          </table:table-cell>
          <table:table-cell office:value-type="float" office:value="68838.732165" table:style-name="c8">
            <text:p>68839</text:p>
          </table:table-cell>
          <table:table-cell office:value-type="string" table:style-name="c8">
            <text:p>2026-04-06 00:00</text:p>
          </table:table-cell>
          <table:table-cell office:value-type="float" office:value="68999.66291" table:style-name="c8">
            <text:p>69000</text:p>
          </table:table-cell>
          <table:table-cell office:value-type="float" office:value="0.033412031453150526" table:style-name="c10">
            <text:p>+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0:15</text:p>
          </table:table-cell>
          <table:table-cell office:value-type="float" office:value="69269.17727999999" table:style-name="c8">
            <text:p>69269</text:p>
          </table:table-cell>
          <table:table-cell office:value-type="string" table:style-name="c8">
            <text:p>2026-04-06 00:45</text:p>
          </table:table-cell>
          <table:table-cell office:value-type="float" office:value="69278.073635" table:style-name="c8">
            <text:p>69278</text:p>
          </table:table-cell>
          <table:table-cell office:value-type="float" office:value="-0.1870825081010108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15</text:p>
          </table:table-cell>
          <table:table-cell office:value-type="float" office:value="69668.40679499999" table:style-name="c8">
            <text:p>69668</text:p>
          </table:table-cell>
          <table:table-cell office:value-type="string" table:style-name="c8">
            <text:p>2026-04-06 09:45</text:p>
          </table:table-cell>
          <table:table-cell office:value-type="float" office:value="69818.39334000001" table:style-name="c8">
            <text:p>69818</text:p>
          </table:table-cell>
          <table:table-cell office:value-type="float" office:value="0.014955956641915513" table:style-name="c10">
            <text:p>+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17:45</text:p>
          </table:table-cell>
          <table:table-cell office:value-type="float" office:value="68728.517085" table:style-name="c8">
            <text:p>68729</text:p>
          </table:table-cell>
          <table:table-cell office:value-type="string" table:style-name="c8">
            <text:p>2026-04-07 18:15</text:p>
          </table:table-cell>
          <table:table-cell office:value-type="float" office:value="68613.21622999999" table:style-name="c8">
            <text:p>68613</text:p>
          </table:table-cell>
          <table:table-cell office:value-type="float" office:value="-0.36732739909338674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0:00</text:p>
          </table:table-cell>
          <table:table-cell office:value-type="float" office:value="69045.79564499999" table:style-name="c8">
            <text:p>69046</text:p>
          </table:table-cell>
          <table:table-cell office:value-type="string" table:style-name="c8">
            <text:p>2026-04-07 20:30</text:p>
          </table:table-cell>
          <table:table-cell office:value-type="float" office:value="69329.447935" table:style-name="c8">
            <text:p>69329</text:p>
          </table:table-cell>
          <table:table-cell office:value-type="float" office:value="0.21009638924835983" table:style-name="c10">
            <text:p>+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1:15</text:p>
          </table:table-cell>
          <table:table-cell office:value-type="float" office:value="70016.17059" table:style-name="c8">
            <text:p>70016</text:p>
          </table:table-cell>
          <table:table-cell office:value-type="string" table:style-name="c8">
            <text:p>2026-04-07 21:45</text:p>
          </table:table-cell>
          <table:table-cell office:value-type="float" office:value="69877.16394" table:style-name="c8">
            <text:p>69877</text:p>
          </table:table-cell>
          <table:table-cell office:value-type="float" office:value="-0.39803819370244353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45</text:p>
          </table:table-cell>
          <table:table-cell office:value-type="float" office:value="70797.17089499999" table:style-name="c8">
            <text:p>70797</text:p>
          </table:table-cell>
          <table:table-cell office:value-type="string" table:style-name="c8">
            <text:p>2026-04-07 23:15</text:p>
          </table:table-cell>
          <table:table-cell office:value-type="float" office:value="71451.60632500002" table:style-name="c8">
            <text:p>71452</text:p>
          </table:table-cell>
          <table:table-cell office:value-type="float" office:value="0.7226329279670152" table:style-name="c10">
            <text:p>+0.7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30</text:p>
          </table:table-cell>
          <table:table-cell office:value-type="float" office:value="72789.646635" table:style-name="c8">
            <text:p>72790</text:p>
          </table:table-cell>
          <table:table-cell office:value-type="string" table:style-name="c8">
            <text:p>2026-04-08 00:00</text:p>
          </table:table-cell>
          <table:table-cell office:value-type="float" office:value="71888.25789000001" table:style-name="c8">
            <text:p>71888</text:p>
          </table:table-cell>
          <table:table-cell office:value-type="float" office:value="-1.4357720099434812" table:style-name="c9">
            <text:p>-1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13:00</text:p>
          </table:table-cell>
          <table:table-cell office:value-type="float" office:value="72107.98597499999" table:style-name="c8">
            <text:p>72108</text:p>
          </table:table-cell>
          <table:table-cell office:value-type="string" table:style-name="c8">
            <text:p>2026-04-08 13:30</text:p>
          </table:table-cell>
          <table:table-cell office:value-type="float" office:value="72451.61607" table:style-name="c8">
            <text:p>72452</text:p>
          </table:table-cell>
          <table:table-cell office:value-type="float" office:value="0.27569666769644563" table:style-name="c10">
            <text:p>+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5:45</text:p>
          </table:table-cell>
          <table:table-cell office:value-type="float" office:value="72111.77787" table:style-name="c8">
            <text:p>72112</text:p>
          </table:table-cell>
          <table:table-cell office:value-type="string" table:style-name="c8">
            <text:p>2026-04-09 16:15</text:p>
          </table:table-cell>
          <table:table-cell office:value-type="float" office:value="72140.53169" table:style-name="c8">
            <text:p>72141</text:p>
          </table:table-cell>
          <table:table-cell office:value-type="float" office:value="-0.16010575007101568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2:45</text:p>
          </table:table-cell>
          <table:table-cell office:value-type="float" office:value="72351.507675" table:style-name="c8">
            <text:p>72352</text:p>
          </table:table-cell>
          <table:table-cell office:value-type="string" table:style-name="c8">
            <text:p>2026-04-10 13:15</text:p>
          </table:table-cell>
          <table:table-cell office:value-type="float" office:value="72177.89300000001" table:style-name="c8">
            <text:p>72178</text:p>
          </table:table-cell>
          <table:table-cell office:value-type="float" office:value="-0.439380316074367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15</text:p>
          </table:table-cell>
          <table:table-cell office:value-type="float" office:value="72745.664655" table:style-name="c8">
            <text:p>72746</text:p>
          </table:table-cell>
          <table:table-cell office:value-type="string" table:style-name="c8">
            <text:p>2026-04-10 14:45</text:p>
          </table:table-cell>
          <table:table-cell office:value-type="float" office:value="72828.597485" table:style-name="c8">
            <text:p>72829</text:p>
          </table:table-cell>
          <table:table-cell office:value-type="float" office:value="-0.08612408267852922" table:style-name="c9">
            <text:p>-0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6:15</text:p>
          </table:table-cell>
          <table:table-cell office:value-type="float" office:value="72908.97626999998" table:style-name="c8">
            <text:p>72909</text:p>
          </table:table-cell>
          <table:table-cell office:value-type="string" table:style-name="c8">
            <text:p>2026-04-11 16:45</text:p>
          </table:table-cell>
          <table:table-cell office:value-type="float" office:value="73070.98623" table:style-name="c8">
            <text:p>73071</text:p>
          </table:table-cell>
          <table:table-cell office:value-type="float" office:value="0.021864329115262038" table:style-name="c10">
            <text:p>+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73500.161715" table:style-name="c8">
            <text:p>73500</text:p>
          </table:table-cell>
          <table:table-cell office:value-type="string" table:style-name="c8">
            <text:p>2026-04-11 19:15</text:p>
          </table:table-cell>
          <table:table-cell office:value-type="float" office:value="73533.21500000001" table:style-name="c8">
            <text:p>73533</text:p>
          </table:table-cell>
          <table:table-cell office:value-type="float" office:value="-0.15501953890496578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9:30</text:p>
          </table:table-cell>
          <table:table-cell office:value-type="float" office:value="73655.22920999999" table:style-name="c8">
            <text:p>73655</text:p>
          </table:table-cell>
          <table:table-cell office:value-type="string" table:style-name="c8">
            <text:p>2026-04-11 20:00</text:p>
          </table:table-cell>
          <table:table-cell office:value-type="float" office:value="73650.31642" table:style-name="c8">
            <text:p>73650</text:p>
          </table:table-cell>
          <table:table-cell office:value-type="float" office:value="-0.20655664798734374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19:45</text:p>
          </table:table-cell>
          <table:table-cell office:value-type="float" office:value="73052.257875" table:style-name="c8">
            <text:p>73052</text:p>
          </table:table-cell>
          <table:table-cell office:value-type="string" table:style-name="c8">
            <text:p>2026-04-13 20:15</text:p>
          </table:table-cell>
          <table:table-cell office:value-type="float" office:value="73023.47" table:style-name="c8">
            <text:p>73023</text:p>
          </table:table-cell>
          <table:table-cell office:value-type="float" office:value="-0.2392284600279293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15</text:p>
          </table:table-cell>
          <table:table-cell office:value-type="float" office:value="73790.13663" table:style-name="c8">
            <text:p>73790</text:p>
          </table:table-cell>
          <table:table-cell office:value-type="string" table:style-name="c8">
            <text:p>2026-04-13 22:45</text:p>
          </table:table-cell>
          <table:table-cell office:value-type="float" office:value="74222.87000000001" table:style-name="c8">
            <text:p>74223</text:p>
          </table:table-cell>
          <table:table-cell office:value-type="float" office:value="0.38536566790201565" table:style-name="c10">
            <text:p>+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3:45</text:p>
          </table:table-cell>
          <table:table-cell office:value-type="float" office:value="75226.09425" table:style-name="c8">
            <text:p>75226</text:p>
          </table:table-cell>
          <table:table-cell office:value-type="string" table:style-name="c8">
            <text:p>2026-04-14 14:30</text:p>
          </table:table-cell>
          <table:table-cell office:value-type="float" office:value="75817.15246000001" table:style-name="c8">
            <text:p>75817</text:p>
          </table:table-cell>
          <table:table-cell office:value-type="float" office:value="0.5842383904338888" table:style-name="c10">
            <text:p>+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0:30</text:p>
          </table:table-cell>
          <table:table-cell office:value-type="float" office:value="74622.24247499999" table:style-name="c8">
            <text:p>74622</text:p>
          </table:table-cell>
          <table:table-cell office:value-type="string" table:style-name="c8">
            <text:p>2026-04-15 01:00</text:p>
          </table:table-cell>
          <table:table-cell office:value-type="float" office:value="74531.085815" table:style-name="c8">
            <text:p>74531</text:p>
          </table:table-cell>
          <table:table-cell office:value-type="float" office:value="-0.321813299331819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20:00</text:p>
          </table:table-cell>
          <table:table-cell office:value-type="float" office:value="75040.1013" table:style-name="c8">
            <text:p>75040</text:p>
          </table:table-cell>
          <table:table-cell office:value-type="string" table:style-name="c8">
            <text:p>2026-04-15 20:30</text:p>
          </table:table-cell>
          <table:table-cell office:value-type="float" office:value="74728.75693" table:style-name="c8">
            <text:p>74729</text:p>
          </table:table-cell>
          <table:table-cell office:value-type="float" office:value="-0.6139745910805017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45</text:p>
          </table:table-cell>
          <table:table-cell office:value-type="float" office:value="75235.52896499999" table:style-name="c8">
            <text:p>75236</text:p>
          </table:table-cell>
          <table:table-cell office:value-type="string" table:style-name="c8">
            <text:p>2026-04-16 03:15</text:p>
          </table:table-cell>
          <table:table-cell office:value-type="float" office:value="74917.59246500001" table:style-name="c8">
            <text:p>74918</text:p>
          </table:table-cell>
          <table:table-cell office:value-type="float" office:value="-0.6216434891487044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30</text:p>
          </table:table-cell>
          <table:table-cell office:value-type="float" office:value="75012.98775" table:style-name="c8">
            <text:p>75013</text:p>
          </table:table-cell>
          <table:table-cell office:value-type="string" table:style-name="c8">
            <text:p>2026-04-16 14:00</text:p>
          </table:table-cell>
          <table:table-cell office:value-type="float" office:value="73751.135985" table:style-name="c8">
            <text:p>73751</text:p>
          </table:table-cell>
          <table:table-cell office:value-type="float" office:value="-1.8787150440278566" table:style-name="c9">
            <text:p>-1.9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74734.5486" table:style-name="c8">
            <text:p>74735</text:p>
          </table:table-cell>
          <table:table-cell office:value-type="string" table:style-name="c8">
            <text:p>2026-04-16 16:30</text:p>
          </table:table-cell>
          <table:table-cell office:value-type="float" office:value="74533.084815" table:style-name="c8">
            <text:p>74533</text:p>
          </table:table-cell>
          <table:table-cell office:value-type="float" office:value="-0.46893361652710075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75376.999665" table:style-name="c8">
            <text:p>75377</text:p>
          </table:table-cell>
          <table:table-cell office:value-type="string" table:style-name="c8">
            <text:p>2026-04-17 09:15</text:p>
          </table:table-cell>
          <table:table-cell office:value-type="float" office:value="75864.87858500001" table:style-name="c8">
            <text:p>75865</text:p>
          </table:table-cell>
          <table:table-cell office:value-type="float" office:value="0.44605785478712967" table:style-name="c10">
            <text:p>+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30</text:p>
          </table:table-cell>
          <table:table-cell office:value-type="float" office:value="76323.10248" table:style-name="c8">
            <text:p>76323</text:p>
          </table:table-cell>
          <table:table-cell office:value-type="string" table:style-name="c8">
            <text:p>2026-04-17 10:00</text:p>
          </table:table-cell>
          <table:table-cell office:value-type="float" office:value="75742.10000500001" table:style-name="c8">
            <text:p>75742</text:p>
          </table:table-cell>
          <table:table-cell office:value-type="float" office:value="-0.9596189215472561" table:style-name="c9">
            <text:p>-1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15</text:p>
          </table:table-cell>
          <table:table-cell office:value-type="float" office:value="76948.444995" table:style-name="c8">
            <text:p>76948</text:p>
          </table:table-cell>
          <table:table-cell office:value-type="string" table:style-name="c8">
            <text:p>2026-04-17 13:45</text:p>
          </table:table-cell>
          <table:table-cell office:value-type="float" office:value="76854.003775" table:style-name="c8">
            <text:p>76854</text:p>
          </table:table-cell>
          <table:table-cell office:value-type="float" office:value="-0.3223877669813135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4:00</text:p>
          </table:table-cell>
          <table:table-cell office:value-type="float" office:value="77378.780055" table:style-name="c8">
            <text:p>77379</text:p>
          </table:table-cell>
          <table:table-cell office:value-type="string" table:style-name="c8">
            <text:p>2026-04-17 14:30</text:p>
          </table:table-cell>
          <table:table-cell office:value-type="float" office:value="77415.54286500001" table:style-name="c8">
            <text:p>77416</text:p>
          </table:table-cell>
          <table:table-cell office:value-type="float" office:value="-0.15248477696758744" table:style-name="c9">
            <text:p>-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2:30</text:p>
          </table:table-cell>
          <table:table-cell office:value-type="float" office:value="77278.18978500001" table:style-name="c8">
            <text:p>77278</text:p>
          </table:table-cell>
          <table:table-cell office:value-type="string" table:style-name="c8">
            <text:p>2026-04-22 03:00</text:p>
          </table:table-cell>
          <table:table-cell office:value-type="float" office:value="77565.89765" table:style-name="c8">
            <text:p>77566</text:p>
          </table:table-cell>
          <table:table-cell office:value-type="float" office:value="0.17165727609136372" table:style-name="c10">
            <text:p>+0.2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3:15</text:p>
          </table:table-cell>
          <table:table-cell office:value-type="float" office:value="77645.58339" table:style-name="c8">
            <text:p>77646</text:p>
          </table:table-cell>
          <table:table-cell office:value-type="string" table:style-name="c8">
            <text:p>2026-04-22 03:45</text:p>
          </table:table-cell>
          <table:table-cell office:value-type="float" office:value="77544.538335" table:style-name="c8">
            <text:p>77545</text:p>
          </table:table-cell>
          <table:table-cell office:value-type="float" office:value="-0.329776113401758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78297.659265" table:style-name="c8">
            <text:p>78298</text:p>
          </table:table-cell>
          <table:table-cell office:value-type="string" table:style-name="c8">
            <text:p>2026-04-22 06:00</text:p>
          </table:table-cell>
          <table:table-cell office:value-type="float" office:value="77955.92254" table:style-name="c8">
            <text:p>77956</text:p>
          </table:table-cell>
          <table:table-cell office:value-type="float" office:value="-0.6354859376746069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14:00</text:p>
          </table:table-cell>
          <table:table-cell office:value-type="float" office:value="78880.36047" table:style-name="c8">
            <text:p>78880</text:p>
          </table:table-cell>
          <table:table-cell office:value-type="string" table:style-name="c8">
            <text:p>2026-04-22 14:30</text:p>
          </table:table-cell>
          <table:table-cell office:value-type="float" office:value="78968.79585000001" table:style-name="c8">
            <text:p>78969</text:p>
          </table:table-cell>
          <table:table-cell office:value-type="float" office:value="-0.08801080838181097" table:style-name="c9">
            <text:p>-0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3 15:00</text:p>
          </table:table-cell>
          <table:table-cell office:value-type="float" office:value="78219.87039" table:style-name="c8">
            <text:p>78220</text:p>
          </table:table-cell>
          <table:table-cell office:value-type="string" table:style-name="c8">
            <text:p>2026-04-23 15:30</text:p>
          </table:table-cell>
          <table:table-cell office:value-type="float" office:value="78347.68656" table:style-name="c8">
            <text:p>78348</text:p>
          </table:table-cell>
          <table:table-cell office:value-type="float" office:value="-0.03682038245502728" table:style-name="c9">
            <text:p>-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14:30</text:p>
          </table:table-cell>
          <table:table-cell office:value-type="float" office:value="78105.002985" table:style-name="c8">
            <text:p>78105</text:p>
          </table:table-cell>
          <table:table-cell office:value-type="string" table:style-name="c8">
            <text:p>2026-04-26 15:00</text:p>
          </table:table-cell>
          <table:table-cell office:value-type="float" office:value="78056.60217499999" table:style-name="c8">
            <text:p>78057</text:p>
          </table:table-cell>
          <table:table-cell office:value-type="float" office:value="-0.2617450226422679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22:15</text:p>
          </table:table-cell>
          <table:table-cell office:value-type="float" office:value="78608.80476" table:style-name="c8">
            <text:p>78609</text:p>
          </table:table-cell>
          <table:table-cell office:value-type="string" table:style-name="c8">
            <text:p>2026-04-26 22:45</text:p>
          </table:table-cell>
          <table:table-cell office:value-type="float" office:value="78242.37924000001" table:style-name="c8">
            <text:p>78242</text:p>
          </table:table-cell>
          <table:table-cell office:value-type="float" office:value="-0.6651062024120469" table:style-name="c9">
            <text:p>-0.7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00</text:p>
          </table:table-cell>
          <table:table-cell office:value-type="float" office:value="79348.65449999999" table:style-name="c8">
            <text:p>79349</text:p>
          </table:table-cell>
          <table:table-cell office:value-type="string" table:style-name="c8">
            <text:p>2026-04-27 01:30</text:p>
          </table:table-cell>
          <table:table-cell office:value-type="float" office:value="78868.915815" table:style-name="c8">
            <text:p>78869</text:p>
          </table:table-cell>
          <table:table-cell office:value-type="float" office:value="-0.803287279073106" table:style-name="c9">
            <text:p>-0.8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14:45</text:p>
          </table:table-cell>
          <table:table-cell office:value-type="float" office:value="78217.46919" table:style-name="c8">
            <text:p>78217</text:p>
          </table:table-cell>
          <table:table-cell office:value-type="string" table:style-name="c8">
            <text:p>2026-04-27 15:15</text:p>
          </table:table-cell>
          <table:table-cell office:value-type="float" office:value="77336.93219" table:style-name="c8">
            <text:p>77337</text:p>
          </table:table-cell>
          <table:table-cell office:value-type="float" office:value="-1.3234045260827165" table:style-name="c9">
            <text:p>-1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03:45</text:p>
          </table:table-cell>
          <table:table-cell office:value-type="float" office:value="77196.97919999999" table:style-name="c8">
            <text:p>77197</text:p>
          </table:table-cell>
          <table:table-cell office:value-type="string" table:style-name="c8">
            <text:p>2026-05-01 04:15</text:p>
          </table:table-cell>
          <table:table-cell office:value-type="float" office:value="77077.72186" table:style-name="c8">
            <text:p>77078</text:p>
          </table:table-cell>
          <table:table-cell office:value-type="float" office:value="-0.35407565014943243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2:30</text:p>
          </table:table-cell>
          <table:table-cell office:value-type="float" office:value="77801.92151999999" table:style-name="c8">
            <text:p>77802</text:p>
          </table:table-cell>
          <table:table-cell office:value-type="string" table:style-name="c8">
            <text:p>2026-05-01 13:00</text:p>
          </table:table-cell>
          <table:table-cell office:value-type="float" office:value="77857.061995" table:style-name="c8">
            <text:p>77857</text:p>
          </table:table-cell>
          <table:table-cell office:value-type="float" office:value="-0.12916877882273026" table:style-name="c9">
            <text:p>-0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3:15</text:p>
          </table:table-cell>
          <table:table-cell office:value-type="float" office:value="78383.54218499998" table:style-name="c8">
            <text:p>78384</text:p>
          </table:table-cell>
          <table:table-cell office:value-type="string" table:style-name="c8">
            <text:p>2026-05-01 13:45</text:p>
          </table:table-cell>
          <table:table-cell office:value-type="float" office:value="78219.940465" table:style-name="c8">
            <text:p>78220</text:p>
          </table:table-cell>
          <table:table-cell office:value-type="float" office:value="-0.40820224765339974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4:00</text:p>
          </table:table-cell>
          <table:table-cell office:value-type="float" office:value="78776.62862999999" table:style-name="c8">
            <text:p>78777</text:p>
          </table:table-cell>
          <table:table-cell office:value-type="string" table:style-name="c8">
            <text:p>2026-05-01 14:30</text:p>
          </table:table-cell>
          <table:table-cell office:value-type="float" office:value="78236.732065" table:style-name="c8">
            <text:p>78237</text:p>
          </table:table-cell>
          <table:table-cell office:value-type="float" office:value="-0.8838811770789046" table:style-name="c9">
            <text:p>-0.9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21:45</text:p>
          </table:table-cell>
          <table:table-cell office:value-type="float" office:value="78846.073335" table:style-name="c8">
            <text:p>78846</text:p>
          </table:table-cell>
          <table:table-cell office:value-type="string" table:style-name="c8">
            <text:p>2026-05-02 22:15</text:p>
          </table:table-cell>
          <table:table-cell office:value-type="float" office:value="78731.74443500002" table:style-name="c8">
            <text:p>78732</text:p>
          </table:table-cell>
          <table:table-cell office:value-type="float" office:value="-0.34461279507361775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07:30</text:p>
          </table:table-cell>
          <table:table-cell office:value-type="float" office:value="78451.96637999998" table:style-name="c8">
            <text:p>78452</text:p>
          </table:table-cell>
          <table:table-cell office:value-type="string" table:style-name="c8">
            <text:p>2026-05-03 08:00</text:p>
          </table:table-cell>
          <table:table-cell office:value-type="float" office:value="78324.05838000002" table:style-name="c8">
            <text:p>78324</text:p>
          </table:table-cell>
          <table:table-cell office:value-type="float" office:value="-0.36261397365574544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0:45</text:p>
          </table:table-cell>
          <table:table-cell office:value-type="float" office:value="79047.293895" table:style-name="c8">
            <text:p>79047</text:p>
          </table:table-cell>
          <table:table-cell office:value-type="string" table:style-name="c8">
            <text:p>2026-05-03 21:15</text:p>
          </table:table-cell>
          <table:table-cell office:value-type="float" office:value="78971.04472500001" table:style-name="c8">
            <text:p>78971</text:p>
          </table:table-cell>
          <table:table-cell office:value-type="float" office:value="-0.2961673662304487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15</text:p>
          </table:table-cell>
          <table:table-cell office:value-type="float" office:value="79298.979675" table:style-name="c8">
            <text:p>79299</text:p>
          </table:table-cell>
          <table:table-cell office:value-type="string" table:style-name="c8">
            <text:p>2026-05-03 22:45</text:p>
          </table:table-cell>
          <table:table-cell office:value-type="float" office:value="79228.36600000001" table:style-name="c8">
            <text:p>79228</text:p>
          </table:table-cell>
          <table:table-cell office:value-type="float" office:value="-0.2887693884240261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00</text:p>
          </table:table-cell>
          <table:table-cell office:value-type="float" office:value="79809.31471499999" table:style-name="c8">
            <text:p>79809</text:p>
          </table:table-cell>
          <table:table-cell office:value-type="string" table:style-name="c8">
            <text:p>2026-05-04 02:30</text:p>
          </table:table-cell>
          <table:table-cell office:value-type="float" office:value="79665.3474" table:style-name="c8">
            <text:p>79665</text:p>
          </table:table-cell>
          <table:table-cell office:value-type="float" office:value="-0.3799285152809251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80256.25807499999" table:style-name="c8">
            <text:p>80256</text:p>
          </table:table-cell>
          <table:table-cell office:value-type="string" table:style-name="c8">
            <text:p>2026-05-04 15:30</text:p>
          </table:table-cell>
          <table:table-cell office:value-type="float" office:value="79660.519815" table:style-name="c8">
            <text:p>79661</text:p>
          </table:table-cell>
          <table:table-cell office:value-type="float" office:value="-0.9407112382496585" table:style-name="c9">
            <text:p>-0.9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3:45</text:p>
          </table:table-cell>
          <table:table-cell office:value-type="float" office:value="80950.99526999998" table:style-name="c8">
            <text:p>80951</text:p>
          </table:table-cell>
          <table:table-cell office:value-type="string" table:style-name="c8">
            <text:p>2026-05-05 04:15</text:p>
          </table:table-cell>
          <table:table-cell office:value-type="float" office:value="80767.83588000001" table:style-name="c8">
            <text:p>80768</text:p>
          </table:table-cell>
          <table:table-cell office:value-type="float" office:value="-0.42570729708102384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3:15</text:p>
          </table:table-cell>
          <table:table-cell office:value-type="float" office:value="81662.800995" table:style-name="c8">
            <text:p>81663</text:p>
          </table:table-cell>
          <table:table-cell office:value-type="string" table:style-name="c8">
            <text:p>2026-05-05 13:45</text:p>
          </table:table-cell>
          <table:table-cell office:value-type="float" office:value="81373.40294500001" table:style-name="c8">
            <text:p>81373</text:p>
          </table:table-cell>
          <table:table-cell office:value-type="float" office:value="-0.5535733246704644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1:30</text:p>
          </table:table-cell>
          <table:table-cell office:value-type="float" office:value="82725.34199999999" table:style-name="c8">
            <text:p>82725</text:p>
          </table:table-cell>
          <table:table-cell office:value-type="string" table:style-name="c8">
            <text:p>2026-05-06 12:00</text:p>
          </table:table-cell>
          <table:table-cell office:value-type="float" office:value="82481.61856" table:style-name="c8">
            <text:p>82482</text:p>
          </table:table-cell>
          <table:table-cell office:value-type="float" office:value="-0.4939286869329762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7:00</text:p>
          </table:table-cell>
          <table:table-cell office:value-type="float" office:value="81479.33931" table:style-name="c8">
            <text:p>81479</text:p>
          </table:table-cell>
          <table:table-cell office:value-type="string" table:style-name="c8">
            <text:p>2026-05-07 07:30</text:p>
          </table:table-cell>
          <table:table-cell office:value-type="float" office:value="81520.57932" table:style-name="c8">
            <text:p>81521</text:p>
          </table:table-cell>
          <table:table-cell office:value-type="float" office:value="-0.14938710732247396" table:style-name="c9">
            <text:p>-0.1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2:30</text:p>
          </table:table-cell>
          <table:table-cell office:value-type="float" office:value="81544.461855" table:style-name="c8">
            <text:p>81544</text:p>
          </table:table-cell>
          <table:table-cell office:value-type="string" table:style-name="c8">
            <text:p>2026-05-10 23:00</text:p>
          </table:table-cell>
          <table:table-cell office:value-type="float" office:value="82003.467755" table:style-name="c8">
            <text:p>82003</text:p>
          </table:table-cell>
          <table:table-cell office:value-type="float" office:value="0.36186512393994175" table:style-name="c10">
            <text:p>+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15</text:p>
          </table:table-cell>
          <table:table-cell office:value-type="float" office:value="82441.2" table:style-name="c8">
            <text:p>82441</text:p>
          </table:table-cell>
          <table:table-cell office:value-type="string" table:style-name="c8">
            <text:p>2026-05-10 23:45</text:p>
          </table:table-cell>
          <table:table-cell office:value-type="float" office:value="82346.66607" table:style-name="c8">
            <text:p>82347</text:p>
          </table:table-cell>
          <table:table-cell office:value-type="float" office:value="-0.3143390870995577" table:style-name="c9">
            <text:p>-0.3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77592.246735" table:style-name="c8">
            <text:p>77592</text:p>
          </table:table-cell>
          <table:table-cell office:value-type="string" table:style-name="c8">
            <text:p>2026-05-20 16:00</text:p>
          </table:table-cell>
          <table:table-cell office:value-type="float" office:value="77416.72227500001" table:style-name="c8">
            <text:p>77417</text:p>
          </table:table-cell>
          <table:table-cell office:value-type="float" office:value="-0.4256617145727337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30</text:p>
          </table:table-cell>
          <table:table-cell office:value-type="float" office:value="78094.377675" table:style-name="c8">
            <text:p>78094</text:p>
          </table:table-cell>
          <table:table-cell office:value-type="string" table:style-name="c8">
            <text:p>2026-05-21 09:00</text:p>
          </table:table-cell>
          <table:table-cell office:value-type="float" office:value="77885.66768500001" table:style-name="c8">
            <text:p>77886</text:p>
          </table:table-cell>
          <table:table-cell office:value-type="float" office:value="-0.4666193016081399" table:style-name="c9">
            <text:p>-0.5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30</text:p>
          </table:table-cell>
          <table:table-cell office:value-type="float" office:value="78019.53026999999" table:style-name="c8">
            <text:p>78020</text:p>
          </table:table-cell>
          <table:table-cell office:value-type="string" table:style-name="c8">
            <text:p>2026-05-21 18:00</text:p>
          </table:table-cell>
          <table:table-cell office:value-type="float" office:value="77830.44531000001" table:style-name="c8">
            <text:p>77830</text:p>
          </table:table-cell>
          <table:table-cell office:value-type="float" office:value="-0.44177146283999047" table:style-name="c9">
            <text:p>-0.4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4 22:15</text:p>
          </table:table-cell>
          <table:table-cell office:value-type="float" office:value="77023.19235" table:style-name="c8">
            <text:p>77023</text:p>
          </table:table-cell>
          <table:table-cell office:value-type="string" table:style-name="c8">
            <text:p>2026-05-24 22:45</text:p>
          </table:table-cell>
          <table:table-cell office:value-type="float" office:value="76744.238685" table:style-name="c8">
            <text:p>76744</text:p>
          </table:table-cell>
          <table:table-cell office:value-type="float" office:value="-0.561344427489574" table:style-name="c9">
            <text:p>-0.6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77268.35487" table:style-name="c8">
            <text:p>77268</text:p>
          </table:table-cell>
          <table:table-cell office:value-type="string" table:style-name="c8">
            <text:p>2026-05-26 11:00</text:p>
          </table:table-cell>
          <table:table-cell office:value-type="float" office:value="77391.285" table:style-name="c8">
            <text:p>77391</text:p>
          </table:table-cell>
          <table:table-cell office:value-type="float" office:value="-0.04112297818227306" table:style-name="c9">
            <text:p>-0.0</text:p>
          </table:table-cell>
        </table:table-row>
        <table:table-row>
          <table:table-cell office:value-type="string" table:style-name="c7">
            <text:p>B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4:30</text:p>
          </table:table-cell>
          <table:table-cell office:value-type="float" office:value="77997.3792" table:style-name="c8">
            <text:p>77997</text:p>
          </table:table-cell>
          <table:table-cell office:value-type="string" table:style-name="c8">
            <text:p>2026-05-26 15:00</text:p>
          </table:table-cell>
          <table:table-cell office:value-type="float" office:value="76869.555995" table:style-name="c8">
            <text:p>76870</text:p>
          </table:table-cell>
          <table:table-cell office:value-type="float" office:value="-1.6429852651177357" table:style-name="c9">
            <text:p>-1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0.036928455" table:style-name="c1">
            <text:p>0.036928</text:p>
          </table:table-cell>
          <table:table-cell office:value-type="string" table:style-name="c1">
            <text:p>2026-03-04 09:30</text:p>
          </table:table-cell>
          <table:table-cell office:value-type="float" office:value="0.036881550000000006" table:style-name="c1">
            <text:p>0.036882</text:p>
          </table:table-cell>
          <table:table-cell office:value-type="float" office:value="-0.3266619696112194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0.03694846499999999" table:style-name="c1">
            <text:p>0.036948</text:p>
          </table:table-cell>
          <table:table-cell office:value-type="string" table:style-name="c1">
            <text:p>2026-03-04 10:15</text:p>
          </table:table-cell>
          <table:table-cell office:value-type="float" office:value="0.03704147000000001" table:style-name="c1">
            <text:p>0.037041</text:p>
          </table:table-cell>
          <table:table-cell office:value-type="float" office:value="0.051312284475191206" table:style-name="c11">
            <text:p>+0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3:45</text:p>
          </table:table-cell>
          <table:table-cell office:value-type="float" office:value="0.03817908" table:style-name="c1">
            <text:p>0.038179</text:p>
          </table:table-cell>
          <table:table-cell office:value-type="string" table:style-name="c1">
            <text:p>2026-03-05 04:15</text:p>
          </table:table-cell>
          <table:table-cell office:value-type="float" office:value="0.038270855" table:style-name="c1">
            <text:p>0.038271</text:p>
          </table:table-cell>
          <table:table-cell office:value-type="float" office:value="0.039999813654501004" table:style-name="c11">
            <text:p>+0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6:00</text:p>
          </table:table-cell>
          <table:table-cell office:value-type="float" office:value="0.03859929" table:style-name="c1">
            <text:p>0.038599</text:p>
          </table:table-cell>
          <table:table-cell office:value-type="string" table:style-name="c1">
            <text:p>2026-03-05 06:30</text:p>
          </table:table-cell>
          <table:table-cell office:value-type="float" office:value="0.03870064" table:style-name="c1">
            <text:p>0.038701</text:p>
          </table:table-cell>
          <table:table-cell office:value-type="float" office:value="0.062144719864010156" table:style-name="c11">
            <text:p>+0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15</text:p>
          </table:table-cell>
          <table:table-cell office:value-type="float" office:value="0.03897948" table:style-name="c1">
            <text:p>0.038979</text:p>
          </table:table-cell>
          <table:table-cell office:value-type="string" table:style-name="c1">
            <text:p>2026-03-05 11:45</text:p>
          </table:table-cell>
          <table:table-cell office:value-type="float" office:value="0.03816091" table:style-name="c1">
            <text:p>0.038161</text:p>
          </table:table-cell>
          <table:table-cell office:value-type="float" office:value="-2.2957044554981265" table:style-name="c12">
            <text:p>-2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15</text:p>
          </table:table-cell>
          <table:table-cell office:value-type="float" office:value="0.038109044999999994" table:style-name="c1">
            <text:p>0.038109</text:p>
          </table:table-cell>
          <table:table-cell office:value-type="string" table:style-name="c1">
            <text:p>2026-03-09 03:45</text:p>
          </table:table-cell>
          <table:table-cell office:value-type="float" office:value="0.038060960000000005" table:style-name="c1">
            <text:p>0.038061</text:p>
          </table:table-cell>
          <table:table-cell office:value-type="float" office:value="-0.3258251657578759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0.038429205" table:style-name="c1">
            <text:p>0.038429</text:p>
          </table:table-cell>
          <table:table-cell office:value-type="string" table:style-name="c1">
            <text:p>2026-03-09 14:00</text:p>
          </table:table-cell>
          <table:table-cell office:value-type="float" office:value="0.03842078" table:style-name="c1">
            <text:p>0.038421</text:p>
          </table:table-cell>
          <table:table-cell office:value-type="float" office:value="-0.22177960543290354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6:30</text:p>
          </table:table-cell>
          <table:table-cell office:value-type="float" office:value="0.03921959999999999" table:style-name="c1">
            <text:p>0.03922</text:p>
          </table:table-cell>
          <table:table-cell office:value-type="string" table:style-name="c1">
            <text:p>2026-03-09 17:00</text:p>
          </table:table-cell>
          <table:table-cell office:value-type="float" office:value="0.038450765" table:style-name="c1">
            <text:p>0.038451</text:p>
          </table:table-cell>
          <table:table-cell office:value-type="float" office:value="-2.156314901822032" table:style-name="c12">
            <text:p>-2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23:15</text:p>
          </table:table-cell>
          <table:table-cell office:value-type="float" office:value="0.038729355" table:style-name="c1">
            <text:p>0.038729</text:p>
          </table:table-cell>
          <table:table-cell office:value-type="string" table:style-name="c1">
            <text:p>2026-03-09 23:45</text:p>
          </table:table-cell>
          <table:table-cell office:value-type="float" office:value="0.038510735000000004" table:style-name="c1">
            <text:p>0.038511</text:p>
          </table:table-cell>
          <table:table-cell office:value-type="float" office:value="-0.7632529879854633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0:30</text:p>
          </table:table-cell>
          <table:table-cell office:value-type="float" office:value="0.03921959999999999" table:style-name="c1">
            <text:p>0.03922</text:p>
          </table:table-cell>
          <table:table-cell office:value-type="string" table:style-name="c1">
            <text:p>2026-03-10 01:00</text:p>
          </table:table-cell>
          <table:table-cell office:value-type="float" office:value="0.03915041500000001" table:style-name="c1">
            <text:p>0.03915</text:p>
          </table:table-cell>
          <table:table-cell office:value-type="float" office:value="-0.37595151298072116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03984991499999999" table:style-name="c1">
            <text:p>0.03985</text:p>
          </table:table-cell>
          <table:table-cell office:value-type="string" table:style-name="c1">
            <text:p>2026-03-10 03:15</text:p>
          </table:table-cell>
          <table:table-cell office:value-type="float" office:value="0.03992003" table:style-name="c1">
            <text:p>0.03992</text:p>
          </table:table-cell>
          <table:table-cell office:value-type="float" office:value="-0.02430404172754086" table:style-name="c12">
            <text:p>-0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30</text:p>
          </table:table-cell>
          <table:table-cell office:value-type="float" office:value="0.04012005" table:style-name="c1">
            <text:p>0.04012</text:p>
          </table:table-cell>
          <table:table-cell office:value-type="string" table:style-name="c1">
            <text:p>2026-03-10 04:00</text:p>
          </table:table-cell>
          <table:table-cell office:value-type="float" office:value="0.039989995" table:style-name="c1">
            <text:p>0.03999</text:p>
          </table:table-cell>
          <table:table-cell office:value-type="float" office:value="-0.523416595953885" table:style-name="c12">
            <text:p>-0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1:15</text:p>
          </table:table-cell>
          <table:table-cell office:value-type="float" office:value="0.03859929" table:style-name="c1">
            <text:p>0.038599</text:p>
          </table:table-cell>
          <table:table-cell office:value-type="string" table:style-name="c1">
            <text:p>2026-03-11 01:45</text:p>
          </table:table-cell>
          <table:table-cell office:value-type="float" office:value="0.039010485000000004" table:style-name="c1">
            <text:p>0.03901</text:p>
          </table:table-cell>
          <table:table-cell office:value-type="float" office:value="0.8632620975282279" table:style-name="c11">
            <text:p>+0.9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2:00</text:p>
          </table:table-cell>
          <table:table-cell office:value-type="float" office:value="0.03867933" table:style-name="c1">
            <text:p>0.038679</text:p>
          </table:table-cell>
          <table:table-cell office:value-type="string" table:style-name="c1">
            <text:p>2026-03-11 02:30</text:p>
          </table:table-cell>
          <table:table-cell office:value-type="float" office:value="0.03800099" table:style-name="c1">
            <text:p>0.038001</text:p>
          </table:table-cell>
          <table:table-cell office:value-type="float" office:value="-1.9501474793125806" table:style-name="c12">
            <text:p>-2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15</text:p>
          </table:table-cell>
          <table:table-cell office:value-type="float" office:value="0.039079529999999994" table:style-name="c1">
            <text:p>0.03908</text:p>
          </table:table-cell>
          <table:table-cell office:value-type="string" table:style-name="c1">
            <text:p>2026-03-16 03:45</text:p>
          </table:table-cell>
          <table:table-cell office:value-type="float" office:value="0.03904047" table:style-name="c1">
            <text:p>0.0390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00</text:p>
          </table:table-cell>
          <table:table-cell office:value-type="float" office:value="0.03951975" table:style-name="c1">
            <text:p>0.03952</text:p>
          </table:table-cell>
          <table:table-cell office:value-type="string" table:style-name="c1">
            <text:p>2026-03-16 07:30</text:p>
          </table:table-cell>
          <table:table-cell office:value-type="float" office:value="0.03936031" table:style-name="c1">
            <text:p>0.03936</text:p>
          </table:table-cell>
          <table:table-cell office:value-type="float" office:value="-0.6025373634448328" table:style-name="c12">
            <text:p>-0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9:15</text:p>
          </table:table-cell>
          <table:table-cell office:value-type="float" office:value="0.039959970000000004" table:style-name="c1">
            <text:p>0.03996</text:p>
          </table:table-cell>
          <table:table-cell office:value-type="string" table:style-name="c1">
            <text:p>2026-03-16 09:45</text:p>
          </table:table-cell>
          <table:table-cell office:value-type="float" office:value="0.03970014" table:style-name="c1">
            <text:p>0.0397</text:p>
          </table:table-cell>
          <table:table-cell office:value-type="float" office:value="-0.8488259121816277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39549765" table:style-name="c1">
            <text:p>0.03955</text:p>
          </table:table-cell>
          <table:table-cell office:value-type="string" table:style-name="c1">
            <text:p>2026-03-17 10:15</text:p>
          </table:table-cell>
          <table:table-cell office:value-type="float" office:value="0.03942028" table:style-name="c1">
            <text:p>0.03942</text:p>
          </table:table-cell>
          <table:table-cell office:value-type="float" office:value="-0.5266431790934556" table:style-name="c12">
            <text:p>-0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3:15</text:p>
          </table:table-cell>
          <table:table-cell office:value-type="float" office:value="0.03605802" table:style-name="c1">
            <text:p>0.036058</text:p>
          </table:table-cell>
          <table:table-cell office:value-type="string" table:style-name="c1">
            <text:p>2026-03-24 23:45</text:p>
          </table:table-cell>
          <table:table-cell office:value-type="float" office:value="0.035952015000000004" table:style-name="c1">
            <text:p>0.035952</text:p>
          </table:table-cell>
          <table:table-cell office:value-type="float" office:value="-0.4932968531965898" table:style-name="c12">
            <text:p>-0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8:00</text:p>
          </table:table-cell>
          <table:table-cell office:value-type="float" office:value="0.036198089999999995" table:style-name="c1">
            <text:p>0.036198</text:p>
          </table:table-cell>
          <table:table-cell office:value-type="string" table:style-name="c1">
            <text:p>2026-03-27 08:30</text:p>
          </table:table-cell>
          <table:table-cell office:value-type="float" office:value="0.03620189000000001" table:style-name="c1">
            <text:p>0.036202</text:p>
          </table:table-cell>
          <table:table-cell office:value-type="float" office:value="-0.1894231936270363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03:15</text:p>
          </table:table-cell>
          <table:table-cell office:value-type="float" office:value="0.03589794" table:style-name="c1">
            <text:p>0.035898</text:p>
          </table:table-cell>
          <table:table-cell office:value-type="string" table:style-name="c1">
            <text:p>2026-03-28 03:45</text:p>
          </table:table-cell>
          <table:table-cell office:value-type="float" office:value="0.036111935000000005" table:style-name="c1">
            <text:p>0.036112</text:p>
          </table:table-cell>
          <table:table-cell office:value-type="float" office:value="0.3950289123414885" table:style-name="c11">
            <text:p>+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06:45</text:p>
          </table:table-cell>
          <table:table-cell office:value-type="float" office:value="0.036428205" table:style-name="c1">
            <text:p>0.036428</text:p>
          </table:table-cell>
          <table:table-cell office:value-type="string" table:style-name="c1">
            <text:p>2026-03-28 07:15</text:p>
          </table:table-cell>
          <table:table-cell office:value-type="float" office:value="0.036291845" table:style-name="c1">
            <text:p>0.036292</text:p>
          </table:table-cell>
          <table:table-cell office:value-type="float" office:value="-0.5734770575574366" table:style-name="c12">
            <text:p>-0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2:15</text:p>
          </table:table-cell>
          <table:table-cell office:value-type="float" office:value="0.037688835" table:style-name="c1">
            <text:p>0.037689</text:p>
          </table:table-cell>
          <table:table-cell office:value-type="string" table:style-name="c1">
            <text:p>2026-03-28 12:45</text:p>
          </table:table-cell>
          <table:table-cell office:value-type="float" office:value="0.03792103" table:style-name="c1">
            <text:p>0.037921</text:p>
          </table:table-cell>
          <table:table-cell office:value-type="float" office:value="0.4149527599619507" table:style-name="c11">
            <text:p>+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3:30</text:p>
          </table:table-cell>
          <table:table-cell office:value-type="float" office:value="0.038419199999999994" table:style-name="c1">
            <text:p>0.038419</text:p>
          </table:table-cell>
          <table:table-cell office:value-type="string" table:style-name="c1">
            <text:p>2026-03-28 14:00</text:p>
          </table:table-cell>
          <table:table-cell office:value-type="float" office:value="0.038930525" table:style-name="c1">
            <text:p>0.038931</text:p>
          </table:table-cell>
          <table:table-cell office:value-type="float" office:value="1.128349576578902" table:style-name="c11">
            <text:p>+1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20:30</text:p>
          </table:table-cell>
          <table:table-cell office:value-type="float" office:value="0.041650815" table:style-name="c1">
            <text:p>0.041651</text:p>
          </table:table-cell>
          <table:table-cell office:value-type="string" table:style-name="c1">
            <text:p>2026-03-28 21:00</text:p>
          </table:table-cell>
          <table:table-cell office:value-type="float" office:value="0.04171913" table:style-name="c1">
            <text:p>0.041719</text:p>
          </table:table-cell>
          <table:table-cell office:value-type="float" office:value="-0.036209473620152366" table:style-name="c12">
            <text:p>-0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16:00</text:p>
          </table:table-cell>
          <table:table-cell office:value-type="float" office:value="0.03983991" table:style-name="c1">
            <text:p>0.03984</text:p>
          </table:table-cell>
          <table:table-cell office:value-type="string" table:style-name="c1">
            <text:p>2026-03-29 16:30</text:p>
          </table:table-cell>
          <table:table-cell office:value-type="float" office:value="0.039390295000000006" table:style-name="c1">
            <text:p>0.03939</text:p>
          </table:table-cell>
          <table:table-cell office:value-type="float" office:value="-1.3261982763138502" table:style-name="c12">
            <text:p>-1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1:15</text:p>
          </table:table-cell>
          <table:table-cell office:value-type="float" office:value="0.041150565" table:style-name="c1">
            <text:p>0.041151</text:p>
          </table:table-cell>
          <table:table-cell office:value-type="string" table:style-name="c1">
            <text:p>2026-03-30 01:45</text:p>
          </table:table-cell>
          <table:table-cell office:value-type="float" office:value="0.040949515" table:style-name="c1">
            <text:p>0.04095</text:p>
          </table:table-cell>
          <table:table-cell office:value-type="float" office:value="-0.6874950088413101" table:style-name="c12">
            <text:p>-0.7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4:15</text:p>
          </table:table-cell>
          <table:table-cell office:value-type="float" office:value="0.04200099" table:style-name="c1">
            <text:p>0.042001</text:p>
          </table:table-cell>
          <table:table-cell office:value-type="string" table:style-name="c1">
            <text:p>2026-03-30 04:45</text:p>
          </table:table-cell>
          <table:table-cell office:value-type="float" office:value="0.04199899000000001" table:style-name="c1">
            <text:p>0.041999</text:p>
          </table:table-cell>
          <table:table-cell office:value-type="float" office:value="-0.20465227369639294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7:15</text:p>
          </table:table-cell>
          <table:table-cell office:value-type="float" office:value="0.0434217" table:style-name="c1">
            <text:p>0.043422</text:p>
          </table:table-cell>
          <table:table-cell office:value-type="string" table:style-name="c1">
            <text:p>2026-03-30 07:45</text:p>
          </table:table-cell>
          <table:table-cell office:value-type="float" office:value="0.04394801500000001" table:style-name="c1">
            <text:p>0.043948</text:p>
          </table:table-cell>
          <table:table-cell office:value-type="float" office:value="1.009778332066702" table:style-name="c11">
            <text:p>+1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43851915" table:style-name="c1">
            <text:p>0.043852</text:p>
          </table:table-cell>
          <table:table-cell office:value-type="string" table:style-name="c1">
            <text:p>2026-03-30 08:30</text:p>
          </table:table-cell>
          <table:table-cell office:value-type="float" office:value="0.043808085000000004" table:style-name="c1">
            <text:p>0.04380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1:30</text:p>
          </table:table-cell>
          <table:table-cell office:value-type="float" office:value="0.044212095" table:style-name="c1">
            <text:p>0.044212</text:p>
          </table:table-cell>
          <table:table-cell office:value-type="string" table:style-name="c1">
            <text:p>2026-03-30 12:00</text:p>
          </table:table-cell>
          <table:table-cell office:value-type="float" office:value="0.043768105" table:style-name="c1">
            <text:p>0.043768</text:p>
          </table:table-cell>
          <table:table-cell office:value-type="float" office:value="-1.2021200123970455" table:style-name="c12">
            <text:p>-1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00</text:p>
          </table:table-cell>
          <table:table-cell office:value-type="float" office:value="0.042031004999999996" table:style-name="c1">
            <text:p>0.042031</text:p>
          </table:table-cell>
          <table:table-cell office:value-type="string" table:style-name="c1">
            <text:p>2026-04-01 06:30</text:p>
          </table:table-cell>
          <table:table-cell office:value-type="float" office:value="0.04247875" table:style-name="c1">
            <text:p>0.042479</text:p>
          </table:table-cell>
          <table:table-cell office:value-type="float" office:value="0.8632436429964363" table:style-name="c11">
            <text:p>+0.9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5:45</text:p>
          </table:table-cell>
          <table:table-cell office:value-type="float" office:value="0.039419699999999995" table:style-name="c1">
            <text:p>0.03942</text:p>
          </table:table-cell>
          <table:table-cell office:value-type="string" table:style-name="c1">
            <text:p>2026-04-08 06:15</text:p>
          </table:table-cell>
          <table:table-cell office:value-type="float" office:value="0.039190395" table:style-name="c1">
            <text:p>0.03919</text:p>
          </table:table-cell>
          <table:table-cell office:value-type="float" office:value="-0.7804387136507773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7:15</text:p>
          </table:table-cell>
          <table:table-cell office:value-type="float" office:value="0.03933966" table:style-name="c1">
            <text:p>0.03934</text:p>
          </table:table-cell>
          <table:table-cell office:value-type="string" table:style-name="c1">
            <text:p>2026-04-08 07:45</text:p>
          </table:table-cell>
          <table:table-cell office:value-type="float" office:value="0.039250365" table:style-name="c1">
            <text:p>0.03925</text:p>
          </table:table-cell>
          <table:table-cell office:value-type="float" office:value="-0.4264309341641348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039429704999999995" table:style-name="c1">
            <text:p>0.03943</text:p>
          </table:table-cell>
          <table:table-cell office:value-type="string" table:style-name="c1">
            <text:p>2026-04-09 16:15</text:p>
          </table:table-cell>
          <table:table-cell office:value-type="float" office:value="0.039350315000000004" table:style-name="c1">
            <text:p>0.03935</text:p>
          </table:table-cell>
          <table:table-cell office:value-type="float" office:value="-0.4008431706120752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15</text:p>
          </table:table-cell>
          <table:table-cell office:value-type="float" office:value="0.03825912" table:style-name="c1">
            <text:p>0.038259</text:p>
          </table:table-cell>
          <table:table-cell office:value-type="string" table:style-name="c1">
            <text:p>2026-04-15 11:45</text:p>
          </table:table-cell>
          <table:table-cell office:value-type="float" office:value="0.038230875000000004" table:style-name="c1">
            <text:p>0.038231</text:p>
          </table:table-cell>
          <table:table-cell office:value-type="float" office:value="-0.2735779576869324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00</text:p>
          </table:table-cell>
          <table:table-cell office:value-type="float" office:value="0.03915957" table:style-name="c1">
            <text:p>0.03916</text:p>
          </table:table-cell>
          <table:table-cell office:value-type="string" table:style-name="c1">
            <text:p>2026-04-15 13:30</text:p>
          </table:table-cell>
          <table:table-cell office:value-type="float" office:value="0.03914042" table:style-name="c1">
            <text:p>0.03914</text:p>
          </table:table-cell>
          <table:table-cell office:value-type="float" office:value="-0.24870472168105895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30</text:p>
          </table:table-cell>
          <table:table-cell office:value-type="float" office:value="0.042831404999999996" table:style-name="c1">
            <text:p>0.042831</text:p>
          </table:table-cell>
          <table:table-cell office:value-type="string" table:style-name="c1">
            <text:p>2026-04-15 17:00</text:p>
          </table:table-cell>
          <table:table-cell office:value-type="float" office:value="0.04303847" table:style-name="c1">
            <text:p>0.043038</text:p>
          </table:table-cell>
          <table:table-cell office:value-type="float" office:value="0.2825755972049038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7:15</text:p>
          </table:table-cell>
          <table:table-cell office:value-type="float" office:value="0.04376187" table:style-name="c1">
            <text:p>0.043762</text:p>
          </table:table-cell>
          <table:table-cell office:value-type="string" table:style-name="c1">
            <text:p>2026-04-15 17:45</text:p>
          </table:table-cell>
          <table:table-cell office:value-type="float" office:value="0.043428275" table:style-name="c1">
            <text:p>0.043428</text:p>
          </table:table-cell>
          <table:table-cell office:value-type="float" office:value="-0.9606722055638839" table:style-name="c12">
            <text:p>-1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0:30</text:p>
          </table:table-cell>
          <table:table-cell office:value-type="float" office:value="0.042821399999999996" table:style-name="c1">
            <text:p>0.042821</text:p>
          </table:table-cell>
          <table:table-cell office:value-type="string" table:style-name="c1">
            <text:p>2026-04-16 01:00</text:p>
          </table:table-cell>
          <table:table-cell office:value-type="float" office:value="0.04303847" table:style-name="c1">
            <text:p>0.043038</text:p>
          </table:table-cell>
          <table:table-cell office:value-type="float" office:value="0.30600610552200536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15</text:p>
          </table:table-cell>
          <table:table-cell office:value-type="float" office:value="0.04326162" table:style-name="c1">
            <text:p>0.043262</text:p>
          </table:table-cell>
          <table:table-cell office:value-type="string" table:style-name="c1">
            <text:p>2026-04-16 05:45</text:p>
          </table:table-cell>
          <table:table-cell office:value-type="float" office:value="0.043478249999999996" table:style-name="c1">
            <text:p>0.043478</text:p>
          </table:table-cell>
          <table:table-cell office:value-type="float" office:value="0.2998430901339333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0:00</text:p>
          </table:table-cell>
          <table:table-cell office:value-type="float" office:value="0.04128063" table:style-name="c1">
            <text:p>0.041281</text:p>
          </table:table-cell>
          <table:table-cell office:value-type="string" table:style-name="c1">
            <text:p>2026-04-17 10:30</text:p>
          </table:table-cell>
          <table:table-cell office:value-type="float" office:value="0.041459260000000005" table:style-name="c1">
            <text:p>0.041459</text:p>
          </table:table-cell>
          <table:table-cell office:value-type="float" office:value="0.2319560996525638" table:style-name="c11">
            <text:p>+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30</text:p>
          </table:table-cell>
          <table:table-cell office:value-type="float" office:value="0.04200099" table:style-name="c1">
            <text:p>0.042001</text:p>
          </table:table-cell>
          <table:table-cell office:value-type="string" table:style-name="c1">
            <text:p>2026-04-17 14:00</text:p>
          </table:table-cell>
          <table:table-cell office:value-type="float" office:value="0.04187905" table:style-name="c1">
            <text:p>0.041879</text:p>
          </table:table-cell>
          <table:table-cell office:value-type="float" office:value="-0.48964612726983825" table:style-name="c12">
            <text:p>-0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5:15</text:p>
          </table:table-cell>
          <table:table-cell office:value-type="float" office:value="0.042531255" table:style-name="c1">
            <text:p>0.042531</text:p>
          </table:table-cell>
          <table:table-cell office:value-type="string" table:style-name="c1">
            <text:p>2026-04-18 05:45</text:p>
          </table:table-cell>
          <table:table-cell office:value-type="float" office:value="0.042078950000000004" table:style-name="c1">
            <text:p>0.042079</text:p>
          </table:table-cell>
          <table:table-cell office:value-type="float" office:value="-1.2612391076867957" table:style-name="c12">
            <text:p>-1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01:00</text:p>
          </table:table-cell>
          <table:table-cell office:value-type="float" office:value="0.04212104999999999" table:style-name="c1">
            <text:p>0.042121</text:p>
          </table:table-cell>
          <table:table-cell office:value-type="string" table:style-name="c1">
            <text:p>2026-04-20 01:30</text:p>
          </table:table-cell>
          <table:table-cell office:value-type="float" office:value="0.04169914" table:style-name="c1">
            <text:p>0.041699</text:p>
          </table:table-cell>
          <table:table-cell office:value-type="float" office:value="-1.1995583701260748" table:style-name="c12">
            <text:p>-1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0:45</text:p>
          </table:table-cell>
          <table:table-cell office:value-type="float" office:value="0.044492235" table:style-name="c1">
            <text:p>0.044492</text:p>
          </table:table-cell>
          <table:table-cell office:value-type="string" table:style-name="c1">
            <text:p>2026-04-20 11:15</text:p>
          </table:table-cell>
          <table:table-cell office:value-type="float" office:value="0.044487745" table:style-name="c1">
            <text:p>0.044488</text:p>
          </table:table-cell>
          <table:table-cell office:value-type="float" office:value="-0.2099714753709181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0.04516257" table:style-name="c1">
            <text:p>0.045163</text:p>
          </table:table-cell>
          <table:table-cell office:value-type="string" table:style-name="c1">
            <text:p>2026-04-20 17:45</text:p>
          </table:table-cell>
          <table:table-cell office:value-type="float" office:value="0.045637170000000005" table:style-name="c1">
            <text:p>0.045637</text:p>
          </table:table-cell>
          <table:table-cell office:value-type="float" office:value="0.8488695332661722" table:style-name="c11">
            <text:p>+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8:15</text:p>
          </table:table-cell>
          <table:table-cell office:value-type="float" office:value="0.046073025" table:style-name="c1">
            <text:p>0.046073</text:p>
          </table:table-cell>
          <table:table-cell office:value-type="string" table:style-name="c1">
            <text:p>2026-04-20 18:45</text:p>
          </table:table-cell>
          <table:table-cell office:value-type="float" office:value="0.04667665" table:style-name="c1">
            <text:p>0.046677</text:p>
          </table:table-cell>
          <table:table-cell office:value-type="float" office:value="1.1076294136319609" table:style-name="c11">
            <text:p>+1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9:00</text:p>
          </table:table-cell>
          <table:table-cell office:value-type="float" office:value="0.04696347" table:style-name="c1">
            <text:p>0.046963</text:p>
          </table:table-cell>
          <table:table-cell office:value-type="string" table:style-name="c1">
            <text:p>2026-04-20 19:30</text:p>
          </table:table-cell>
          <table:table-cell office:value-type="float" office:value="0.046886545" table:style-name="c1">
            <text:p>0.046887</text:p>
          </table:table-cell>
          <table:table-cell office:value-type="float" office:value="-0.3633700905299575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21:00</text:p>
          </table:table-cell>
          <table:table-cell office:value-type="float" office:value="0.04738368" table:style-name="c1">
            <text:p>0.047384</text:p>
          </table:table-cell>
          <table:table-cell office:value-type="string" table:style-name="c1">
            <text:p>2026-04-20 21:30</text:p>
          </table:table-cell>
          <table:table-cell office:value-type="float" office:value="0.047766105" table:style-name="c1">
            <text:p>0.047766</text:p>
          </table:table-cell>
          <table:table-cell office:value-type="float" office:value="0.6055683224793995" table:style-name="c11">
            <text:p>+0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2:15</text:p>
          </table:table-cell>
          <table:table-cell office:value-type="float" office:value="0.048154064999999996" table:style-name="c1">
            <text:p>0.048154</text:p>
          </table:table-cell>
          <table:table-cell office:value-type="string" table:style-name="c1">
            <text:p>2026-04-21 12:45</text:p>
          </table:table-cell>
          <table:table-cell office:value-type="float" office:value="0.046816580000000003" table:style-name="c1">
            <text:p>0.046817</text:p>
          </table:table-cell>
          <table:table-cell office:value-type="float" office:value="-2.97185989058244" table:style-name="c12">
            <text:p>-3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7:30</text:p>
          </table:table-cell>
          <table:table-cell office:value-type="float" office:value="0.04692344999999999" table:style-name="c1">
            <text:p>0.046923</text:p>
          </table:table-cell>
          <table:table-cell office:value-type="string" table:style-name="c1">
            <text:p>2026-04-22 18:00</text:p>
          </table:table-cell>
          <table:table-cell office:value-type="float" office:value="0.047046465" table:style-name="c1">
            <text:p>0.047046</text:p>
          </table:table-cell>
          <table:table-cell office:value-type="float" office:value="0.06173697045934734" table:style-name="c11">
            <text:p>+0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15</text:p>
          </table:table-cell>
          <table:table-cell office:value-type="float" office:value="0.04704351" table:style-name="c1">
            <text:p>0.047044</text:p>
          </table:table-cell>
          <table:table-cell office:value-type="string" table:style-name="c1">
            <text:p>2026-04-22 18:45</text:p>
          </table:table-cell>
          <table:table-cell office:value-type="float" office:value="0.046966505" table:style-name="c1">
            <text:p>0.046967</text:p>
          </table:table-cell>
          <table:table-cell office:value-type="float" office:value="-0.3632616773174391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21:30</text:p>
          </table:table-cell>
          <table:table-cell office:value-type="float" office:value="0.04770384" table:style-name="c1">
            <text:p>0.047704</text:p>
          </table:table-cell>
          <table:table-cell office:value-type="string" table:style-name="c1">
            <text:p>2026-04-22 22:00</text:p>
          </table:table-cell>
          <table:table-cell office:value-type="float" office:value="0.04755621" table:style-name="c1">
            <text:p>0.047556</text:p>
          </table:table-cell>
          <table:table-cell office:value-type="float" office:value="-0.5087533074695894" table:style-name="c12">
            <text:p>-0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2:45</text:p>
          </table:table-cell>
          <table:table-cell office:value-type="float" office:value="0.049104539999999995" table:style-name="c1">
            <text:p>0.049105</text:p>
          </table:table-cell>
          <table:table-cell office:value-type="string" table:style-name="c1">
            <text:p>2026-04-23 23:15</text:p>
          </table:table-cell>
          <table:table-cell office:value-type="float" office:value="0.05007495" table:style-name="c1">
            <text:p>0.050075</text:p>
          </table:table-cell>
          <table:table-cell office:value-type="float" office:value="1.7723619342529195" table:style-name="c11">
            <text:p>+1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3:30</text:p>
          </table:table-cell>
          <table:table-cell office:value-type="float" office:value="0.04953475499999999" table:style-name="c1">
            <text:p>0.049535</text:p>
          </table:table-cell>
          <table:table-cell office:value-type="string" table:style-name="c1">
            <text:p>2026-04-24 00:00</text:p>
          </table:table-cell>
          <table:table-cell office:value-type="float" office:value="0.05024486500000001" table:style-name="c1">
            <text:p>0.050245</text:p>
          </table:table-cell>
          <table:table-cell office:value-type="float" office:value="1.2307934396062148" table:style-name="c11">
            <text:p>+1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0.05126562" table:style-name="c1">
            <text:p>0.051266</text:p>
          </table:table-cell>
          <table:table-cell office:value-type="string" table:style-name="c1">
            <text:p>2026-04-24 00:45</text:p>
          </table:table-cell>
          <table:table-cell office:value-type="float" office:value="0.051504235" table:style-name="c1">
            <text:p>0.051504</text:p>
          </table:table-cell>
          <table:table-cell office:value-type="float" office:value="0.26461795299657087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3:15</text:p>
          </table:table-cell>
          <table:table-cell office:value-type="float" office:value="0.048474224999999996" table:style-name="c1">
            <text:p>0.048474</text:p>
          </table:table-cell>
          <table:table-cell office:value-type="string" table:style-name="c1">
            <text:p>2026-04-24 13:45</text:p>
          </table:table-cell>
          <table:table-cell office:value-type="float" office:value="0.048035970000000004" table:style-name="c1">
            <text:p>0.048036</text:p>
          </table:table-cell>
          <table:table-cell office:value-type="float" office:value="-1.1021917401051629" table:style-name="c12">
            <text:p>-1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3:45</text:p>
          </table:table-cell>
          <table:table-cell office:value-type="float" office:value="0.04988493" table:style-name="c1">
            <text:p>0.049885</text:p>
          </table:table-cell>
          <table:table-cell office:value-type="string" table:style-name="c1">
            <text:p>2026-04-25 14:15</text:p>
          </table:table-cell>
          <table:table-cell office:value-type="float" office:value="0.049475250000000005" table:style-name="c1">
            <text:p>0.049475</text:p>
          </table:table-cell>
          <table:table-cell office:value-type="float" office:value="-1.0195083460075027" table:style-name="c12">
            <text:p>-1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4:30</text:p>
          </table:table-cell>
          <table:table-cell office:value-type="float" office:value="0.049744859999999995" table:style-name="c1">
            <text:p>0.049745</text:p>
          </table:table-cell>
          <table:table-cell office:value-type="string" table:style-name="c1">
            <text:p>2026-04-25 15:00</text:p>
          </table:table-cell>
          <table:table-cell office:value-type="float" office:value="0.04949524" table:style-name="c1">
            <text:p>0.049495</text:p>
          </table:table-cell>
          <table:table-cell office:value-type="float" office:value="-0.7006974886651585" table:style-name="c12">
            <text:p>-0.7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15</text:p>
          </table:table-cell>
          <table:table-cell office:value-type="float" office:value="0.05012505" table:style-name="c1">
            <text:p>0.050125</text:p>
          </table:table-cell>
          <table:table-cell office:value-type="string" table:style-name="c1">
            <text:p>2026-04-26 06:45</text:p>
          </table:table-cell>
          <table:table-cell office:value-type="float" office:value="0.050384795" table:style-name="c1">
            <text:p>0.050385</text:p>
          </table:table-cell>
          <table:table-cell office:value-type="float" office:value="0.31725812701435263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4:45</text:p>
          </table:table-cell>
          <table:table-cell office:value-type="float" office:value="0.050905439999999996" table:style-name="c1">
            <text:p>0.050905</text:p>
          </table:table-cell>
          <table:table-cell office:value-type="string" table:style-name="c1">
            <text:p>2026-04-26 15:15</text:p>
          </table:table-cell>
          <table:table-cell office:value-type="float" office:value="0.05089454" table:style-name="c1">
            <text:p>0.050895</text:p>
          </table:table-cell>
          <table:table-cell office:value-type="float" office:value="-0.22126944676245097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9:30</text:p>
          </table:table-cell>
          <table:table-cell office:value-type="float" office:value="0.050745359999999996" table:style-name="c1">
            <text:p>0.050745</text:p>
          </table:table-cell>
          <table:table-cell office:value-type="string" table:style-name="c1">
            <text:p>2026-04-27 10:00</text:p>
          </table:table-cell>
          <table:table-cell office:value-type="float" office:value="0.050944515" table:style-name="c1">
            <text:p>0.050945</text:p>
          </table:table-cell>
          <table:table-cell office:value-type="float" office:value="0.19177500073899179" table:style-name="c11">
            <text:p>+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1:00</text:p>
          </table:table-cell>
          <table:table-cell office:value-type="float" office:value="0.042791385" table:style-name="c1">
            <text:p>0.042791</text:p>
          </table:table-cell>
          <table:table-cell office:value-type="string" table:style-name="c1">
            <text:p>2026-05-05 11:30</text:p>
          </table:table-cell>
          <table:table-cell office:value-type="float" office:value="0.0427786" table:style-name="c1">
            <text:p>0.042779</text:p>
          </table:table-cell>
          <table:table-cell office:value-type="float" office:value="-0.22971778408200638" table:style-name="c12">
            <text:p>-0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30</text:p>
          </table:table-cell>
          <table:table-cell office:value-type="float" office:value="0.042551265" table:style-name="c1">
            <text:p>0.042551</text:p>
          </table:table-cell>
          <table:table-cell office:value-type="string" table:style-name="c1">
            <text:p>2026-05-06 10:00</text:p>
          </table:table-cell>
          <table:table-cell office:value-type="float" office:value="0.04249874000000001" table:style-name="c1">
            <text:p>0.042499</text:p>
          </table:table-cell>
          <table:table-cell office:value-type="float" office:value="-0.32309258316994827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0:30</text:p>
          </table:table-cell>
          <table:table-cell office:value-type="float" office:value="0.04306152" table:style-name="c1">
            <text:p>0.043062</text:p>
          </table:table-cell>
          <table:table-cell office:value-type="string" table:style-name="c1">
            <text:p>2026-05-06 11:00</text:p>
          </table:table-cell>
          <table:table-cell office:value-type="float" office:value="0.04325836" table:style-name="c1">
            <text:p>0.043258</text:p>
          </table:table-cell>
          <table:table-cell office:value-type="float" office:value="0.25629968092164557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0.043511745" table:style-name="c1">
            <text:p>0.043512</text:p>
          </table:table-cell>
          <table:table-cell office:value-type="string" table:style-name="c1">
            <text:p>2026-05-06 20:45</text:p>
          </table:table-cell>
          <table:table-cell office:value-type="float" office:value="0.043018480000000005" table:style-name="c1">
            <text:p>0.043018</text:p>
          </table:table-cell>
          <table:table-cell office:value-type="float" office:value="-1.3312703076375998" table:style-name="c12">
            <text:p>-1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2:45</text:p>
          </table:table-cell>
          <table:table-cell office:value-type="float" office:value="0.04341169499999999" table:style-name="c1">
            <text:p>0.043412</text:p>
          </table:table-cell>
          <table:table-cell office:value-type="string" table:style-name="c1">
            <text:p>2026-05-06 23:15</text:p>
          </table:table-cell>
          <table:table-cell office:value-type="float" office:value="0.04315841000000001" table:style-name="c1">
            <text:p>0.043158</text:p>
          </table:table-cell>
          <table:table-cell office:value-type="float" office:value="-0.7821824547278755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7:15</text:p>
          </table:table-cell>
          <table:table-cell office:value-type="float" office:value="0.043631805" table:style-name="c1">
            <text:p>0.043632</text:p>
          </table:table-cell>
          <table:table-cell office:value-type="string" table:style-name="c1">
            <text:p>2026-05-07 17:45</text:p>
          </table:table-cell>
          <table:table-cell office:value-type="float" office:value="0.04369814" table:style-name="c1">
            <text:p>0.043698</text:p>
          </table:table-cell>
          <table:table-cell office:value-type="float" office:value="-0.04817032405602939" table:style-name="c12">
            <text:p>-0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15</text:p>
          </table:table-cell>
          <table:table-cell office:value-type="float" office:value="0.046273125" table:style-name="c1">
            <text:p>0.046273</text:p>
          </table:table-cell>
          <table:table-cell office:value-type="string" table:style-name="c1">
            <text:p>2026-05-09 06:45</text:p>
          </table:table-cell>
          <table:table-cell office:value-type="float" office:value="0.04649674" table:style-name="c1">
            <text:p>0.046497</text:p>
          </table:table-cell>
          <table:table-cell office:value-type="float" office:value="0.28238424947526486" table:style-name="c11">
            <text:p>+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8:15</text:p>
          </table:table-cell>
          <table:table-cell office:value-type="float" office:value="0.04710353999999999" table:style-name="c1">
            <text:p>0.047104</text:p>
          </table:table-cell>
          <table:table-cell office:value-type="string" table:style-name="c1">
            <text:p>2026-05-09 08:45</text:p>
          </table:table-cell>
          <table:table-cell office:value-type="float" office:value="0.046346815000000006" table:style-name="c1">
            <text:p>0.046347</text:p>
          </table:table-cell>
          <table:table-cell office:value-type="float" office:value="-1.8032026535266477" table:style-name="c12">
            <text:p>-1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4:15</text:p>
          </table:table-cell>
          <table:table-cell office:value-type="float" office:value="0.045842909999999994" table:style-name="c1">
            <text:p>0.045843</text:p>
          </table:table-cell>
          <table:table-cell office:value-type="string" table:style-name="c1">
            <text:p>2026-05-10 14:45</text:p>
          </table:table-cell>
          <table:table-cell office:value-type="float" office:value="0.045797090000000006" table:style-name="c1">
            <text:p>0.04579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0.044732354999999994" table:style-name="c1">
            <text:p>0.044732</text:p>
          </table:table-cell>
          <table:table-cell office:value-type="string" table:style-name="c1">
            <text:p>2026-05-13 10:15</text:p>
          </table:table-cell>
          <table:table-cell office:value-type="float" office:value="0.04444776500000001" table:style-name="c1">
            <text:p>0.044448</text:p>
          </table:table-cell>
          <table:table-cell office:value-type="float" office:value="-0.8348343882967679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0:15</text:p>
          </table:table-cell>
          <table:table-cell office:value-type="float" office:value="0.044712345" table:style-name="c1">
            <text:p>0.044712</text:p>
          </table:table-cell>
          <table:table-cell office:value-type="string" table:style-name="c1">
            <text:p>2026-05-15 00:45</text:p>
          </table:table-cell>
          <table:table-cell office:value-type="float" office:value="0.04411793" table:style-name="c1">
            <text:p>0.044118</text:p>
          </table:table-cell>
          <table:table-cell office:value-type="float" office:value="-1.5266628088283052" table:style-name="c12">
            <text:p>-1.5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1:30</text:p>
          </table:table-cell>
          <table:table-cell office:value-type="float" office:value="0.04470233999999999" table:style-name="c1">
            <text:p>0.044702</text:p>
          </table:table-cell>
          <table:table-cell office:value-type="string" table:style-name="c1">
            <text:p>2026-05-15 02:00</text:p>
          </table:table-cell>
          <table:table-cell office:value-type="float" office:value="0.0443778" table:style-name="c1">
            <text:p>0.044378</text:p>
          </table:table-cell>
          <table:table-cell office:value-type="float" office:value="-0.9244509844450799" table:style-name="c12">
            <text:p>-0.9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3:45</text:p>
          </table:table-cell>
          <table:table-cell office:value-type="float" office:value="0.04490244" table:style-name="c1">
            <text:p>0.044902</text:p>
          </table:table-cell>
          <table:table-cell office:value-type="string" table:style-name="c1">
            <text:p>2026-05-15 04:15</text:p>
          </table:table-cell>
          <table:table-cell office:value-type="float" office:value="0.04495751" table:style-name="c1">
            <text:p>0.044958</text:p>
          </table:table-cell>
          <table:table-cell office:value-type="float" office:value="-0.0775014954421338" table:style-name="c12">
            <text:p>-0.1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10:30</text:p>
          </table:table-cell>
          <table:table-cell office:value-type="float" office:value="0.04484241" table:style-name="c1">
            <text:p>0.044842</text:p>
          </table:table-cell>
          <table:table-cell office:value-type="string" table:style-name="c1">
            <text:p>2026-05-15 11:00</text:p>
          </table:table-cell>
          <table:table-cell office:value-type="float" office:value="0.045907035" table:style-name="c1">
            <text:p>0.045907</text:p>
          </table:table-cell>
          <table:table-cell office:value-type="float" office:value="2.1695016771734466" table:style-name="c11">
            <text:p>+2.2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11:15</text:p>
          </table:table-cell>
          <table:table-cell office:value-type="float" office:value="0.046043009999999995" table:style-name="c1">
            <text:p>0.046043</text:p>
          </table:table-cell>
          <table:table-cell office:value-type="string" table:style-name="c1">
            <text:p>2026-05-15 11:45</text:p>
          </table:table-cell>
          <table:table-cell office:value-type="float" office:value="0.04495751" table:style-name="c1">
            <text:p>0.044958</text:p>
          </table:table-cell>
          <table:table-cell office:value-type="float" office:value="-2.5527654740426176" table:style-name="c12">
            <text:p>-2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23:15</text:p>
          </table:table-cell>
          <table:table-cell office:value-type="float" office:value="0.045952965" table:style-name="c1">
            <text:p>0.045953</text:p>
          </table:table-cell>
          <table:table-cell office:value-type="string" table:style-name="c1">
            <text:p>2026-05-15 23:45</text:p>
          </table:table-cell>
          <table:table-cell office:value-type="float" office:value="0.04539729000000001" table:style-name="c1">
            <text:p>0.045397</text:p>
          </table:table-cell>
          <table:table-cell office:value-type="float" office:value="-1.4067083216719234" table:style-name="c12">
            <text:p>-1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00:45</text:p>
          </table:table-cell>
          <table:table-cell office:value-type="float" office:value="0.04630314" table:style-name="c1">
            <text:p>0.046303</text:p>
          </table:table-cell>
          <table:table-cell office:value-type="string" table:style-name="c1">
            <text:p>2026-05-16 01:15</text:p>
          </table:table-cell>
          <table:table-cell office:value-type="float" office:value="0.0463768" table:style-name="c1">
            <text:p>0.046377</text:p>
          </table:table-cell>
          <table:table-cell office:value-type="float" office:value="-0.04113592123556886" table:style-name="c12">
            <text:p>-0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1:15</text:p>
          </table:table-cell>
          <table:table-cell office:value-type="float" office:value="0.04484241" table:style-name="c1">
            <text:p>0.044842</text:p>
          </table:table-cell>
          <table:table-cell office:value-type="string" table:style-name="c1">
            <text:p>2026-05-16 11:45</text:p>
          </table:table-cell>
          <table:table-cell office:value-type="float" office:value="0.04475761" table:style-name="c1">
            <text:p>0.044758</text:p>
          </table:table-cell>
          <table:table-cell office:value-type="float" office:value="-0.3886286718086662" table:style-name="c12">
            <text:p>-0.4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4:15</text:p>
          </table:table-cell>
          <table:table-cell office:value-type="float" office:value="0.045912945" table:style-name="c1">
            <text:p>0.045913</text:p>
          </table:table-cell>
          <table:table-cell office:value-type="string" table:style-name="c1">
            <text:p>2026-05-16 14:45</text:p>
          </table:table-cell>
          <table:table-cell office:value-type="float" office:value="0.04633682" table:style-name="c1">
            <text:p>0.046337</text:p>
          </table:table-cell>
          <table:table-cell office:value-type="float" office:value="0.7214690689521408" table:style-name="c11">
            <text:p>+0.7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45</text:p>
          </table:table-cell>
          <table:table-cell office:value-type="float" office:value="0.047843909999999996" table:style-name="c1">
            <text:p>0.047844</text:p>
          </table:table-cell>
          <table:table-cell office:value-type="string" table:style-name="c1">
            <text:p>2026-05-16 18:15</text:p>
          </table:table-cell>
          <table:table-cell office:value-type="float" office:value="0.04711643" table:style-name="c1">
            <text:p>0.047116</text:p>
          </table:table-cell>
          <table:table-cell office:value-type="float" office:value="-1.7173883647260246" table:style-name="c12">
            <text:p>-1.7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08:15</text:p>
          </table:table-cell>
          <table:table-cell office:value-type="float" office:value="0.04953475499999999" table:style-name="c1">
            <text:p>0.049535</text:p>
          </table:table-cell>
          <table:table-cell office:value-type="string" table:style-name="c1">
            <text:p>2026-05-17 08:45</text:p>
          </table:table-cell>
          <table:table-cell office:value-type="float" office:value="0.04883557" table:style-name="c1">
            <text:p>0.048836</text:p>
          </table:table-cell>
          <table:table-cell office:value-type="float" office:value="-1.6085823063624494" table:style-name="c12">
            <text:p>-1.6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19:15</text:p>
          </table:table-cell>
          <table:table-cell office:value-type="float" office:value="0.04838418" table:style-name="c1">
            <text:p>0.048384</text:p>
          </table:table-cell>
          <table:table-cell office:value-type="string" table:style-name="c1">
            <text:p>2026-05-17 19:45</text:p>
          </table:table-cell>
          <table:table-cell office:value-type="float" office:value="0.048105935" table:style-name="c1">
            <text:p>0.048106</text:p>
          </table:table-cell>
          <table:table-cell office:value-type="float" office:value="-0.7738247585574398" table:style-name="c12">
            <text:p>-0.8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20:00</text:p>
          </table:table-cell>
          <table:table-cell office:value-type="float" office:value="0.04834416" table:style-name="c1">
            <text:p>0.048344</text:p>
          </table:table-cell>
          <table:table-cell office:value-type="string" table:style-name="c1">
            <text:p>2026-05-17 20:30</text:p>
          </table:table-cell>
          <table:table-cell office:value-type="float" office:value="0.04793602" table:style-name="c1">
            <text:p>0.047936</text:p>
          </table:table-cell>
          <table:table-cell office:value-type="float" office:value="-1.042450844072984" table:style-name="c12">
            <text:p>-1.0</text:p>
          </table:table-cell>
        </table:table-row>
        <table:table-row>
          <table:table-cell office:value-type="string" table:style-name="c2">
            <text:p>CHZ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20:00</text:p>
          </table:table-cell>
          <table:table-cell office:value-type="float" office:value="0.049434705" table:style-name="c1">
            <text:p>0.049435</text:p>
          </table:table-cell>
          <table:table-cell office:value-type="string" table:style-name="c1">
            <text:p>2026-05-18 20:30</text:p>
          </table:table-cell>
          <table:table-cell office:value-type="float" office:value="0.048935519999999996" table:style-name="c1">
            <text:p>0.048936</text:p>
          </table:table-cell>
          <table:table-cell office:value-type="float" office:value="-1.2076679824022607" table:style-name="c12">
            <text:p>-1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15</text:p>
          </table:table-cell>
          <table:table-cell office:value-type="float" office:value="0.091355655" table:style-name="c8">
            <text:p>0.091356</text:p>
          </table:table-cell>
          <table:table-cell office:value-type="string" table:style-name="c8">
            <text:p>2026-03-03 16:45</text:p>
          </table:table-cell>
          <table:table-cell office:value-type="float" office:value="0.090384785" table:style-name="c8">
            <text:p>0.090385</text:p>
          </table:table-cell>
          <table:table-cell office:value-type="float" office:value="-1.2605122093591214" table:style-name="c9">
            <text:p>-1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15</text:p>
          </table:table-cell>
          <table:table-cell office:value-type="float" office:value="0.092536245" table:style-name="c8">
            <text:p>0.092536</text:p>
          </table:table-cell>
          <table:table-cell office:value-type="string" table:style-name="c8">
            <text:p>2026-03-04 09:45</text:p>
          </table:table-cell>
          <table:table-cell office:value-type="float" office:value="0.093143405" table:style-name="c8">
            <text:p>0.093143</text:p>
          </table:table-cell>
          <table:table-cell office:value-type="float" office:value="0.4549204837574816" table:style-name="c10">
            <text:p>+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0:00</text:p>
          </table:table-cell>
          <table:table-cell office:value-type="float" office:value="0.09260628" table:style-name="c8">
            <text:p>0.092606</text:p>
          </table:table-cell>
          <table:table-cell office:value-type="string" table:style-name="c8">
            <text:p>2026-03-04 10:30</text:p>
          </table:table-cell>
          <table:table-cell office:value-type="float" office:value="0.09273361000000001" table:style-name="c8">
            <text:p>0.092734</text:p>
          </table:table-cell>
          <table:table-cell office:value-type="float" office:value="-0.06267877987323756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4:00</text:p>
          </table:table-cell>
          <table:table-cell office:value-type="float" office:value="0.094117035" table:style-name="c8">
            <text:p>0.094117</text:p>
          </table:table-cell>
          <table:table-cell office:value-type="string" table:style-name="c8">
            <text:p>2026-03-04 14:30</text:p>
          </table:table-cell>
          <table:table-cell office:value-type="float" office:value="0.09465265" table:style-name="c8">
            <text:p>0.094653</text:p>
          </table:table-cell>
          <table:table-cell office:value-type="float" office:value="0.36805701821140957" table:style-name="c10">
            <text:p>+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4:45</text:p>
          </table:table-cell>
          <table:table-cell office:value-type="float" office:value="0.09490743" table:style-name="c8">
            <text:p>0.094907</text:p>
          </table:table-cell>
          <table:table-cell office:value-type="string" table:style-name="c8">
            <text:p>2026-03-04 15:15</text:p>
          </table:table-cell>
          <table:table-cell office:value-type="float" office:value="0.09593201" table:style-name="c8">
            <text:p>0.095932</text:p>
          </table:table-cell>
          <table:table-cell office:value-type="float" office:value="0.877499171571694" table:style-name="c10">
            <text:p>+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0.097218585" table:style-name="c8">
            <text:p>0.097219</text:p>
          </table:table-cell>
          <table:table-cell office:value-type="string" table:style-name="c8">
            <text:p>2026-03-04 16:00</text:p>
          </table:table-cell>
          <table:table-cell office:value-type="float" office:value="0.099000475" table:style-name="c8">
            <text:p>0.099</text:p>
          </table:table-cell>
          <table:table-cell office:value-type="float" office:value="1.6293058065749655" table:style-name="c10">
            <text:p>+1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6:15</text:p>
          </table:table-cell>
          <table:table-cell office:value-type="float" office:value="0.09870933" table:style-name="c8">
            <text:p>0.098709</text:p>
          </table:table-cell>
          <table:table-cell office:value-type="string" table:style-name="c8">
            <text:p>2026-03-04 16:45</text:p>
          </table:table-cell>
          <table:table-cell office:value-type="float" office:value="0.09842076500000001" table:style-name="c8">
            <text:p>0.098421</text:p>
          </table:table-cell>
          <table:table-cell office:value-type="float" office:value="-0.49165373651607336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0:45</text:p>
          </table:table-cell>
          <table:table-cell office:value-type="float" office:value="0.09740868" table:style-name="c8">
            <text:p>0.097409</text:p>
          </table:table-cell>
          <table:table-cell office:value-type="string" table:style-name="c8">
            <text:p>2026-03-05 11:15</text:p>
          </table:table-cell>
          <table:table-cell office:value-type="float" office:value="0.09747124" table:style-name="c8">
            <text:p>0.097471</text:p>
          </table:table-cell>
          <table:table-cell office:value-type="float" office:value="-0.13580412829738986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21:00</text:p>
          </table:table-cell>
          <table:table-cell office:value-type="float" office:value="0.09438716999999999" table:style-name="c8">
            <text:p>0.094387</text:p>
          </table:table-cell>
          <table:table-cell office:value-type="string" table:style-name="c8">
            <text:p>2026-03-05 21:30</text:p>
          </table:table-cell>
          <table:table-cell office:value-type="float" office:value="0.094502725" table:style-name="c8">
            <text:p>0.094503</text:p>
          </table:table-cell>
          <table:table-cell office:value-type="float" office:value="-0.0777181340165134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4:00</text:p>
          </table:table-cell>
          <table:table-cell office:value-type="float" office:value="0.09196596" table:style-name="c8">
            <text:p>0.091966</text:p>
          </table:table-cell>
          <table:table-cell office:value-type="string" table:style-name="c8">
            <text:p>2026-03-09 14:30</text:p>
          </table:table-cell>
          <table:table-cell office:value-type="float" office:value="0.0915542" table:style-name="c8">
            <text:p>0.091554</text:p>
          </table:table-cell>
          <table:table-cell office:value-type="float" office:value="-0.6467358637913367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3:30</text:p>
          </table:table-cell>
          <table:table-cell office:value-type="float" office:value="0.09667831499999999" table:style-name="c8">
            <text:p>0.096678</text:p>
          </table:table-cell>
          <table:table-cell office:value-type="string" table:style-name="c8">
            <text:p>2026-03-10 14:00</text:p>
          </table:table-cell>
          <table:table-cell office:value-type="float" office:value="0.09605195000000001" table:style-name="c8">
            <text:p>0.096052</text:p>
          </table:table-cell>
          <table:table-cell office:value-type="float" office:value="-0.8464905993137872" table:style-name="c9">
            <text:p>-0.8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4:45</text:p>
          </table:table-cell>
          <table:table-cell office:value-type="float" office:value="0.097938945" table:style-name="c8">
            <text:p>0.097939</text:p>
          </table:table-cell>
          <table:table-cell office:value-type="string" table:style-name="c8">
            <text:p>2026-03-10 15:15</text:p>
          </table:table-cell>
          <table:table-cell office:value-type="float" office:value="0.09837079" table:style-name="c8">
            <text:p>0.098371</text:p>
          </table:table-cell>
          <table:table-cell office:value-type="float" office:value="0.2401514441369601" table:style-name="c10">
            <text:p>+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2:30</text:p>
          </table:table-cell>
          <table:table-cell office:value-type="float" office:value="0.09286641" table:style-name="c8">
            <text:p>0.092866</text:p>
          </table:table-cell>
          <table:table-cell office:value-type="string" table:style-name="c8">
            <text:p>2026-03-11 13:00</text:p>
          </table:table-cell>
          <table:table-cell office:value-type="float" office:value="0.092443755" table:style-name="c8">
            <text:p>0.092444</text:p>
          </table:table-cell>
          <table:table-cell office:value-type="float" office:value="-0.6541117140686281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45</text:p>
          </table:table-cell>
          <table:table-cell office:value-type="float" office:value="0.093696825" table:style-name="c8">
            <text:p>0.093697</text:p>
          </table:table-cell>
          <table:table-cell office:value-type="string" table:style-name="c8">
            <text:p>2026-03-11 14:15</text:p>
          </table:table-cell>
          <table:table-cell office:value-type="float" office:value="0.09297349" table:style-name="c8">
            <text:p>0.092973</text:p>
          </table:table-cell>
          <table:table-cell office:value-type="float" office:value="-0.9703519905930436" table:style-name="c9">
            <text:p>-1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7:30</text:p>
          </table:table-cell>
          <table:table-cell office:value-type="float" office:value="0.093916935" table:style-name="c8">
            <text:p>0.093917</text:p>
          </table:table-cell>
          <table:table-cell office:value-type="string" table:style-name="c8">
            <text:p>2026-03-11 18:00</text:p>
          </table:table-cell>
          <table:table-cell office:value-type="float" office:value="0.093643155" table:style-name="c8">
            <text:p>0.093643</text:p>
          </table:table-cell>
          <table:table-cell office:value-type="float" office:value="-0.4908301861053843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1:00</text:p>
          </table:table-cell>
          <table:table-cell office:value-type="float" office:value="0.09436715999999999" table:style-name="c8">
            <text:p>0.094367</text:p>
          </table:table-cell>
          <table:table-cell office:value-type="string" table:style-name="c8">
            <text:p>2026-03-12 11:30</text:p>
          </table:table-cell>
          <table:table-cell office:value-type="float" office:value="0.094362795" table:style-name="c8">
            <text:p>0.094363</text:p>
          </table:table-cell>
          <table:table-cell office:value-type="float" office:value="-0.20451630334640258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1:00</text:p>
          </table:table-cell>
          <table:table-cell office:value-type="float" office:value="0.09686841" table:style-name="c8">
            <text:p>0.096868</text:p>
          </table:table-cell>
          <table:table-cell office:value-type="string" table:style-name="c8">
            <text:p>2026-03-13 01:30</text:p>
          </table:table-cell>
          <table:table-cell office:value-type="float" office:value="0.09675160000000001" table:style-name="c8">
            <text:p>0.096752</text:p>
          </table:table-cell>
          <table:table-cell office:value-type="float" office:value="-0.32024521554548935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9:45</text:p>
          </table:table-cell>
          <table:table-cell office:value-type="float" office:value="0.09854925" table:style-name="c8">
            <text:p>0.098549</text:p>
          </table:table-cell>
          <table:table-cell office:value-type="string" table:style-name="c8">
            <text:p>2026-03-13 10:15</text:p>
          </table:table-cell>
          <table:table-cell office:value-type="float" office:value="0.09864065500000001" table:style-name="c8">
            <text:p>0.098641</text:p>
          </table:table-cell>
          <table:table-cell office:value-type="float" office:value="-0.10733482938226624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45</text:p>
          </table:table-cell>
          <table:table-cell office:value-type="float" office:value="0.09902949" table:style-name="c8">
            <text:p>0.099029</text:p>
          </table:table-cell>
          <table:table-cell office:value-type="string" table:style-name="c8">
            <text:p>2026-03-13 11:15</text:p>
          </table:table-cell>
          <table:table-cell office:value-type="float" office:value="0.09953021000000001" table:style-name="c8">
            <text:p>0.09953</text:p>
          </table:table-cell>
          <table:table-cell office:value-type="float" office:value="0.30471641347440404" table:style-name="c10">
            <text:p>+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2:00</text:p>
          </table:table-cell>
          <table:table-cell office:value-type="float" office:value="0.100080015" table:style-name="c8">
            <text:p>0.10008</text:p>
          </table:table-cell>
          <table:table-cell office:value-type="string" table:style-name="c8">
            <text:p>2026-03-13 12:30</text:p>
          </table:table-cell>
          <table:table-cell office:value-type="float" office:value="0.10008993000000001" table:style-name="c8">
            <text:p>0.10009</text:p>
          </table:table-cell>
          <table:table-cell office:value-type="float" office:value="-0.19001273138297137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11:15</text:p>
          </table:table-cell>
          <table:table-cell office:value-type="float" office:value="0.09478737" table:style-name="c8">
            <text:p>0.094787</text:p>
          </table:table-cell>
          <table:table-cell office:value-type="string" table:style-name="c8">
            <text:p>2026-03-14 11:45</text:p>
          </table:table-cell>
          <table:table-cell office:value-type="float" office:value="0.09523236" table:style-name="c8">
            <text:p>0.095232</text:p>
          </table:table-cell>
          <table:table-cell office:value-type="float" office:value="0.26862282639557034" table:style-name="c10">
            <text:p>+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12:00</text:p>
          </table:table-cell>
          <table:table-cell office:value-type="float" office:value="0.09531763499999998" table:style-name="c8">
            <text:p>0.095318</text:p>
          </table:table-cell>
          <table:table-cell office:value-type="string" table:style-name="c8">
            <text:p>2026-03-14 12:30</text:p>
          </table:table-cell>
          <table:table-cell office:value-type="float" office:value="0.094922515" table:style-name="c8">
            <text:p>0.094923</text:p>
          </table:table-cell>
          <table:table-cell office:value-type="float" office:value="-0.6136011531181818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2:15</text:p>
          </table:table-cell>
          <table:table-cell office:value-type="float" office:value="0.09634815" table:style-name="c8">
            <text:p>0.096348</text:p>
          </table:table-cell>
          <table:table-cell office:value-type="string" table:style-name="c8">
            <text:p>2026-03-15 02:45</text:p>
          </table:table-cell>
          <table:table-cell office:value-type="float" office:value="0.097081435" table:style-name="c8">
            <text:p>0.097081</text:p>
          </table:table-cell>
          <table:table-cell office:value-type="float" office:value="0.5596570473174634" table:style-name="c10">
            <text:p>+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9:00</text:p>
          </table:table-cell>
          <table:table-cell office:value-type="float" office:value="0.09650823" table:style-name="c8">
            <text:p>0.096508</text:p>
          </table:table-cell>
          <table:table-cell office:value-type="string" table:style-name="c8">
            <text:p>2026-03-15 09:30</text:p>
          </table:table-cell>
          <table:table-cell office:value-type="float" office:value="0.09629183" table:style-name="c8">
            <text:p>0.096292</text:p>
          </table:table-cell>
          <table:table-cell office:value-type="float" office:value="-0.42368134631628473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0.09692843999999999" table:style-name="c8">
            <text:p>0.096928</text:p>
          </table:table-cell>
          <table:table-cell office:value-type="string" table:style-name="c8">
            <text:p>2026-03-15 23:15</text:p>
          </table:table-cell>
          <table:table-cell office:value-type="float" office:value="0.09765115" table:style-name="c8">
            <text:p>0.097651</text:p>
          </table:table-cell>
          <table:table-cell office:value-type="float" office:value="0.5442214391875089" table:style-name="c10">
            <text:p>+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0.09940968" table:style-name="c8">
            <text:p>0.09941</text:p>
          </table:table-cell>
          <table:table-cell office:value-type="string" table:style-name="c8">
            <text:p>2026-03-16 04:00</text:p>
          </table:table-cell>
          <table:table-cell office:value-type="float" office:value="0.09993001" table:style-name="c8">
            <text:p>0.09993</text:p>
          </table:table-cell>
          <table:table-cell office:value-type="float" office:value="0.32247353578644944" table:style-name="c10">
            <text:p>+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4:15</text:p>
          </table:table-cell>
          <table:table-cell office:value-type="float" office:value="0.10132063499999999" table:style-name="c8">
            <text:p>0.10132</text:p>
          </table:table-cell>
          <table:table-cell office:value-type="string" table:style-name="c8">
            <text:p>2026-03-16 14:45</text:p>
          </table:table-cell>
          <table:table-cell office:value-type="float" office:value="0.10085954500000001" table:style-name="c8">
            <text:p>0.10086</text:p>
          </table:table-cell>
          <table:table-cell office:value-type="float" office:value="-0.6540703485079624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5:00</text:p>
          </table:table-cell>
          <table:table-cell office:value-type="float" office:value="0.10319157" table:style-name="c8">
            <text:p>0.10319</text:p>
          </table:table-cell>
          <table:table-cell office:value-type="string" table:style-name="c8">
            <text:p>2026-03-16 15:30</text:p>
          </table:table-cell>
          <table:table-cell office:value-type="float" office:value="0.10159917500000001" table:style-name="c8">
            <text:p>0.1016</text:p>
          </table:table-cell>
          <table:table-cell office:value-type="float" office:value="-1.739959718439188" table:style-name="c9">
            <text:p>-1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2:15</text:p>
          </table:table-cell>
          <table:table-cell office:value-type="float" office:value="0.102981465" table:style-name="c8">
            <text:p>0.10298</text:p>
          </table:table-cell>
          <table:table-cell office:value-type="string" table:style-name="c8">
            <text:p>2026-03-16 22:45</text:p>
          </table:table-cell>
          <table:table-cell office:value-type="float" office:value="0.103158395" table:style-name="c8">
            <text:p>0.10316</text:p>
          </table:table-cell>
          <table:table-cell office:value-type="float" office:value="-0.028435827364658994" table:style-name="c9">
            <text:p>-0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3:00</text:p>
          </table:table-cell>
          <table:table-cell office:value-type="float" office:value="0.103301625" table:style-name="c8">
            <text:p>0.1033</text:p>
          </table:table-cell>
          <table:table-cell office:value-type="string" table:style-name="c8">
            <text:p>2026-03-16 23:30</text:p>
          </table:table-cell>
          <table:table-cell office:value-type="float" office:value="0.10280857" table:style-name="c8">
            <text:p>0.10281</text:p>
          </table:table-cell>
          <table:table-cell office:value-type="float" office:value="-0.6762423451034616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15</text:p>
          </table:table-cell>
          <table:table-cell office:value-type="float" office:value="0.10389192" table:style-name="c8">
            <text:p>0.10389</text:p>
          </table:table-cell>
          <table:table-cell office:value-type="string" table:style-name="c8">
            <text:p>2026-03-17 00:45</text:p>
          </table:table-cell>
          <table:table-cell office:value-type="float" office:value="0.10295849500000001" table:style-name="c8">
            <text:p>0.10296</text:p>
          </table:table-cell>
          <table:table-cell office:value-type="float" office:value="-1.0965617263642646" table:style-name="c9">
            <text:p>-1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2:45</text:p>
          </table:table-cell>
          <table:table-cell office:value-type="float" office:value="0.10427210999999999" table:style-name="c8">
            <text:p>0.10427</text:p>
          </table:table-cell>
          <table:table-cell office:value-type="string" table:style-name="c8">
            <text:p>2026-03-17 03:15</text:p>
          </table:table-cell>
          <table:table-cell office:value-type="float" office:value="0.102678635" table:style-name="c8">
            <text:p>0.10268</text:p>
          </table:table-cell>
          <table:table-cell office:value-type="float" office:value="-1.7250342314593659" table:style-name="c9">
            <text:p>-1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9:45</text:p>
          </table:table-cell>
          <table:table-cell office:value-type="float" office:value="0.09532764" table:style-name="c8">
            <text:p>0.095328</text:p>
          </table:table-cell>
          <table:table-cell office:value-type="string" table:style-name="c8">
            <text:p>2026-03-24 10:15</text:p>
          </table:table-cell>
          <table:table-cell office:value-type="float" office:value="0.094502725" table:style-name="c8">
            <text:p>0.094503</text:p>
          </table:table-cell>
          <table:table-cell office:value-type="float" office:value="-1.0635173043988089" table:style-name="c9">
            <text:p>-1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0.094437195" table:style-name="c8">
            <text:p>0.094437</text:p>
          </table:table-cell>
          <table:table-cell office:value-type="string" table:style-name="c8">
            <text:p>2026-03-24 21:00</text:p>
          </table:table-cell>
          <table:table-cell office:value-type="float" office:value="0.094542705" table:style-name="c8">
            <text:p>0.094543</text:p>
          </table:table-cell>
          <table:table-cell office:value-type="float" office:value="-0.08839829189652981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3:30</text:p>
          </table:table-cell>
          <table:table-cell office:value-type="float" office:value="0.09531763499999998" table:style-name="c8">
            <text:p>0.095318</text:p>
          </table:table-cell>
          <table:table-cell office:value-type="string" table:style-name="c8">
            <text:p>2026-03-25 00:00</text:p>
          </table:table-cell>
          <table:table-cell office:value-type="float" office:value="0.09506244500000001" table:style-name="c8">
            <text:p>0.095062</text:p>
          </table:table-cell>
          <table:table-cell office:value-type="float" office:value="-0.4670907199438745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5:15</text:p>
          </table:table-cell>
          <table:table-cell office:value-type="float" office:value="0.096658305" table:style-name="c8">
            <text:p>0.096658</text:p>
          </table:table-cell>
          <table:table-cell office:value-type="string" table:style-name="c8">
            <text:p>2026-03-25 05:45</text:p>
          </table:table-cell>
          <table:table-cell office:value-type="float" office:value="0.096321815" table:style-name="c8">
            <text:p>0.096322</text:p>
          </table:table-cell>
          <table:table-cell office:value-type="float" office:value="-0.5473273177974636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6:30</text:p>
          </table:table-cell>
          <table:table-cell office:value-type="float" office:value="0.09745870499999999" table:style-name="c8">
            <text:p>0.097459</text:p>
          </table:table-cell>
          <table:table-cell office:value-type="string" table:style-name="c8">
            <text:p>2026-03-25 07:00</text:p>
          </table:table-cell>
          <table:table-cell office:value-type="float" office:value="0.096921515" table:style-name="c8">
            <text:p>0.096922</text:p>
          </table:table-cell>
          <table:table-cell office:value-type="float" office:value="-0.7499957120146283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1:30</text:p>
          </table:table-cell>
          <table:table-cell office:value-type="float" office:value="0.09306651" table:style-name="c8">
            <text:p>0.093067</text:p>
          </table:table-cell>
          <table:table-cell office:value-type="string" table:style-name="c8">
            <text:p>2026-03-30 12:00</text:p>
          </table:table-cell>
          <table:table-cell office:value-type="float" office:value="0.09284355500000001" table:style-name="c8">
            <text:p>0.092844</text:p>
          </table:table-cell>
          <table:table-cell office:value-type="float" office:value="-0.43898634046231066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30</text:p>
          </table:table-cell>
          <table:table-cell office:value-type="float" office:value="0.09200598" table:style-name="c8">
            <text:p>0.092006</text:p>
          </table:table-cell>
          <table:table-cell office:value-type="string" table:style-name="c8">
            <text:p>2026-03-31 02:00</text:p>
          </table:table-cell>
          <table:table-cell office:value-type="float" office:value="0.09217389000000001" table:style-name="c8">
            <text:p>0.092174</text:p>
          </table:table-cell>
          <table:table-cell office:value-type="float" office:value="-0.017765808385483695" table:style-name="c9">
            <text:p>-0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0.09308651999999999" table:style-name="c8">
            <text:p>0.093087</text:p>
          </table:table-cell>
          <table:table-cell office:value-type="string" table:style-name="c8">
            <text:p>2026-04-01 06:00</text:p>
          </table:table-cell>
          <table:table-cell office:value-type="float" office:value="0.09316339500000001" table:style-name="c8">
            <text:p>0.093163</text:p>
          </table:table-cell>
          <table:table-cell office:value-type="float" office:value="-0.11748062620128286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15</text:p>
          </table:table-cell>
          <table:table-cell office:value-type="float" office:value="0.094016985" table:style-name="c8">
            <text:p>0.094017</text:p>
          </table:table-cell>
          <table:table-cell office:value-type="string" table:style-name="c8">
            <text:p>2026-04-01 06:45</text:p>
          </table:table-cell>
          <table:table-cell office:value-type="float" office:value="0.09428283500000001" table:style-name="c8">
            <text:p>0.094283</text:p>
          </table:table-cell>
          <table:table-cell office:value-type="float" office:value="0.08230280181289462" table:style-name="c10">
            <text:p>+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5:15</text:p>
          </table:table-cell>
          <table:table-cell office:value-type="float" office:value="0.09188592" table:style-name="c8">
            <text:p>0.091886</text:p>
          </table:table-cell>
          <table:table-cell office:value-type="string" table:style-name="c8">
            <text:p>2026-04-03 15:45</text:p>
          </table:table-cell>
          <table:table-cell office:value-type="float" office:value="0.09149423" table:style-name="c8">
            <text:p>0.091494</text:p>
          </table:table-cell>
          <table:table-cell office:value-type="float" office:value="-0.625326454553643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7:30</text:p>
          </table:table-cell>
          <table:table-cell office:value-type="float" office:value="0.09244619999999999" table:style-name="c8">
            <text:p>0.092446</text:p>
          </table:table-cell>
          <table:table-cell office:value-type="string" table:style-name="c8">
            <text:p>2026-04-04 18:00</text:p>
          </table:table-cell>
          <table:table-cell office:value-type="float" office:value="0.092203875" table:style-name="c8">
            <text:p>0.092204</text:p>
          </table:table-cell>
          <table:table-cell office:value-type="float" office:value="-0.4615014420549346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9:15</text:p>
          </table:table-cell>
          <table:table-cell office:value-type="float" office:value="0.09309652499999999" table:style-name="c8">
            <text:p>0.093097</text:p>
          </table:table-cell>
          <table:table-cell office:value-type="string" table:style-name="c8">
            <text:p>2026-04-04 19:45</text:p>
          </table:table-cell>
          <table:table-cell office:value-type="float" office:value="0.092203875" table:style-name="c8">
            <text:p>0.092204</text:p>
          </table:table-cell>
          <table:table-cell office:value-type="float" office:value="-1.1568267946896693" table:style-name="c9">
            <text:p>-1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1:00</text:p>
          </table:table-cell>
          <table:table-cell office:value-type="float" office:value="0.09282639" table:style-name="c8">
            <text:p>0.092826</text:p>
          </table:table-cell>
          <table:table-cell office:value-type="string" table:style-name="c8">
            <text:p>2026-04-06 01:30</text:p>
          </table:table-cell>
          <table:table-cell office:value-type="float" office:value="0.092143905" table:style-name="c8">
            <text:p>0.092144</text:p>
          </table:table-cell>
          <table:table-cell office:value-type="float" office:value="-0.9336576226814386" table:style-name="c9">
            <text:p>-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2:15</text:p>
          </table:table-cell>
          <table:table-cell office:value-type="float" office:value="0.09316656" table:style-name="c8">
            <text:p>0.093167</text:p>
          </table:table-cell>
          <table:table-cell office:value-type="string" table:style-name="c8">
            <text:p>2026-04-06 02:45</text:p>
          </table:table-cell>
          <table:table-cell office:value-type="float" office:value="0.092863545" table:style-name="c8">
            <text:p>0.092864</text:p>
          </table:table-cell>
          <table:table-cell office:value-type="float" office:value="-0.5244899312102813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45</text:p>
          </table:table-cell>
          <table:table-cell office:value-type="float" office:value="0.09306651" table:style-name="c8">
            <text:p>0.093067</text:p>
          </table:table-cell>
          <table:table-cell office:value-type="string" table:style-name="c8">
            <text:p>2026-04-06 10:15</text:p>
          </table:table-cell>
          <table:table-cell office:value-type="float" office:value="0.093103425" table:style-name="c8">
            <text:p>0.093103</text:p>
          </table:table-cell>
          <table:table-cell office:value-type="float" office:value="-0.1603141093127869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15</text:p>
          </table:table-cell>
          <table:table-cell office:value-type="float" office:value="0.093436695" table:style-name="c8">
            <text:p>0.093437</text:p>
          </table:table-cell>
          <table:table-cell office:value-type="string" table:style-name="c8">
            <text:p>2026-04-07 22:45</text:p>
          </table:table-cell>
          <table:table-cell office:value-type="float" office:value="0.09372311500000001" table:style-name="c8">
            <text:p>0.093723</text:p>
          </table:table-cell>
          <table:table-cell office:value-type="float" office:value="0.10602632414919988" table:style-name="c10">
            <text:p>+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0.09505750499999999" table:style-name="c8">
            <text:p>0.095058</text:p>
          </table:table-cell>
          <table:table-cell office:value-type="string" table:style-name="c8">
            <text:p>2026-04-07 23:30</text:p>
          </table:table-cell>
          <table:table-cell office:value-type="float" office:value="0.09597199" table:style-name="c8">
            <text:p>0.095972</text:p>
          </table:table-cell>
          <table:table-cell office:value-type="float" office:value="0.7602103505557123" table:style-name="c10">
            <text:p>+0.8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30</text:p>
          </table:table-cell>
          <table:table-cell office:value-type="float" office:value="0.09388692" table:style-name="c8">
            <text:p>0.093887</text:p>
          </table:table-cell>
          <table:table-cell office:value-type="string" table:style-name="c8">
            <text:p>2026-04-10 15:00</text:p>
          </table:table-cell>
          <table:table-cell office:value-type="float" office:value="0.09394300500000001" table:style-name="c8">
            <text:p>0.093943</text:p>
          </table:table-cell>
          <table:table-cell office:value-type="float" office:value="-0.140282658111468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5:15</text:p>
          </table:table-cell>
          <table:table-cell office:value-type="float" office:value="0.094257105" table:style-name="c8">
            <text:p>0.094257</text:p>
          </table:table-cell>
          <table:table-cell office:value-type="string" table:style-name="c8">
            <text:p>2026-04-10 15:45</text:p>
          </table:table-cell>
          <table:table-cell office:value-type="float" office:value="0.09351322000000001" table:style-name="c8">
            <text:p>0.093513</text:p>
          </table:table-cell>
          <table:table-cell office:value-type="float" office:value="-0.9875307827245217" table:style-name="c9">
            <text:p>-1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9:15</text:p>
          </table:table-cell>
          <table:table-cell office:value-type="float" office:value="0.0952476" table:style-name="c8">
            <text:p>0.095248</text:p>
          </table:table-cell>
          <table:table-cell office:value-type="string" table:style-name="c8">
            <text:p>2026-04-10 19:45</text:p>
          </table:table-cell>
          <table:table-cell office:value-type="float" office:value="0.094922515" table:style-name="c8">
            <text:p>0.094923</text:p>
          </table:table-cell>
          <table:table-cell office:value-type="float" office:value="-0.5405229186719596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6:45</text:p>
          </table:table-cell>
          <table:table-cell office:value-type="float" office:value="0.09350673" table:style-name="c8">
            <text:p>0.093507</text:p>
          </table:table-cell>
          <table:table-cell office:value-type="string" table:style-name="c8">
            <text:p>2026-04-11 17:15</text:p>
          </table:table-cell>
          <table:table-cell office:value-type="float" office:value="0.093103425" table:style-name="c8">
            <text:p>0.093103</text:p>
          </table:table-cell>
          <table:table-cell office:value-type="float" office:value="-0.630349009718334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0.09394694999999999" table:style-name="c8">
            <text:p>0.093947</text:p>
          </table:table-cell>
          <table:table-cell office:value-type="string" table:style-name="c8">
            <text:p>2026-04-11 19:15</text:p>
          </table:table-cell>
          <table:table-cell office:value-type="float" office:value="0.09421287" table:style-name="c8">
            <text:p>0.094213</text:p>
          </table:table-cell>
          <table:table-cell office:value-type="float" office:value="0.082587537828549" table:style-name="c10">
            <text:p>+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9:30</text:p>
          </table:table-cell>
          <table:table-cell office:value-type="float" office:value="0.09445720499999999" table:style-name="c8">
            <text:p>0.094457</text:p>
          </table:table-cell>
          <table:table-cell office:value-type="string" table:style-name="c8">
            <text:p>2026-04-11 20:00</text:p>
          </table:table-cell>
          <table:table-cell office:value-type="float" office:value="0.09465265" table:style-name="c8">
            <text:p>0.094653</text:p>
          </table:table-cell>
          <table:table-cell office:value-type="float" office:value="0.006600187513505773" table:style-name="c10">
            <text:p>+0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30</text:p>
          </table:table-cell>
          <table:table-cell office:value-type="float" office:value="0.094016985" table:style-name="c8">
            <text:p>0.094017</text:p>
          </table:table-cell>
          <table:table-cell office:value-type="string" table:style-name="c8">
            <text:p>2026-04-13 23:00</text:p>
          </table:table-cell>
          <table:table-cell office:value-type="float" office:value="0.09401297000000002" table:style-name="c8">
            <text:p>0.094013</text:p>
          </table:table-cell>
          <table:table-cell office:value-type="float" office:value="-0.20416196821243515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09:00</text:p>
          </table:table-cell>
          <table:table-cell office:value-type="float" office:value="0.09441718499999999" table:style-name="c8">
            <text:p>0.094417</text:p>
          </table:table-cell>
          <table:table-cell office:value-type="string" table:style-name="c8">
            <text:p>2026-04-14 09:30</text:p>
          </table:table-cell>
          <table:table-cell office:value-type="float" office:value="0.094362795" table:style-name="c8">
            <text:p>0.094363</text:p>
          </table:table-cell>
          <table:table-cell office:value-type="float" office:value="-0.2573908840906247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1:15</text:p>
          </table:table-cell>
          <table:table-cell office:value-type="float" office:value="0.095297625" table:style-name="c8">
            <text:p>0.095298</text:p>
          </table:table-cell>
          <table:table-cell office:value-type="string" table:style-name="c8">
            <text:p>2026-04-14 11:45</text:p>
          </table:table-cell>
          <table:table-cell office:value-type="float" office:value="0.094502725" table:style-name="c8">
            <text:p>0.094503</text:p>
          </table:table-cell>
          <table:table-cell office:value-type="float" office:value="-1.0323562074868176" table:style-name="c9">
            <text:p>-1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3:45</text:p>
          </table:table-cell>
          <table:table-cell office:value-type="float" office:value="0.09549772499999999" table:style-name="c8">
            <text:p>0.095498</text:p>
          </table:table-cell>
          <table:table-cell office:value-type="string" table:style-name="c8">
            <text:p>2026-04-14 14:15</text:p>
          </table:table-cell>
          <table:table-cell office:value-type="float" office:value="0.097221365" table:style-name="c8">
            <text:p>0.097221</text:p>
          </table:table-cell>
          <table:table-cell office:value-type="float" office:value="1.6013936367227588" table:style-name="c10">
            <text:p>+1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4:30</text:p>
          </table:table-cell>
          <table:table-cell office:value-type="float" office:value="0.09670833" table:style-name="c8">
            <text:p>0.096708</text:p>
          </table:table-cell>
          <table:table-cell office:value-type="string" table:style-name="c8">
            <text:p>2026-04-14 15:00</text:p>
          </table:table-cell>
          <table:table-cell office:value-type="float" office:value="0.09603196" table:style-name="c8">
            <text:p>0.096032</text:p>
          </table:table-cell>
          <table:table-cell office:value-type="float" office:value="-0.8978935817007705" table:style-name="c9">
            <text:p>-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4:30</text:p>
          </table:table-cell>
          <table:table-cell office:value-type="float" office:value="0.09409702499999999" table:style-name="c8">
            <text:p>0.094097</text:p>
          </table:table-cell>
          <table:table-cell office:value-type="string" table:style-name="c8">
            <text:p>2026-04-15 15:00</text:p>
          </table:table-cell>
          <table:table-cell office:value-type="float" office:value="0.09391302000000001" table:style-name="c8">
            <text:p>0.093913</text:p>
          </table:table-cell>
          <table:table-cell office:value-type="float" office:value="-0.3950572581651435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6:15</text:p>
          </table:table-cell>
          <table:table-cell office:value-type="float" office:value="0.094317135" table:style-name="c8">
            <text:p>0.094317</text:p>
          </table:table-cell>
          <table:table-cell office:value-type="string" table:style-name="c8">
            <text:p>2026-04-15 16:45</text:p>
          </table:table-cell>
          <table:table-cell office:value-type="float" office:value="0.09428283500000001" table:style-name="c8">
            <text:p>0.094283</text:p>
          </table:table-cell>
          <table:table-cell office:value-type="float" office:value="-0.23619397171571466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0.09640818" table:style-name="c8">
            <text:p>0.096408</text:p>
          </table:table-cell>
          <table:table-cell office:value-type="string" table:style-name="c8">
            <text:p>2026-04-15 20:15</text:p>
          </table:table-cell>
          <table:table-cell office:value-type="float" office:value="0.095682135" table:style-name="c8">
            <text:p>0.095682</text:p>
          </table:table-cell>
          <table:table-cell office:value-type="float" office:value="-0.9514893734794971" table:style-name="c9">
            <text:p>-1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45</text:p>
          </table:table-cell>
          <table:table-cell office:value-type="float" office:value="0.09646821" table:style-name="c8">
            <text:p>0.096468</text:p>
          </table:table-cell>
          <table:table-cell office:value-type="string" table:style-name="c8">
            <text:p>2026-04-16 03:15</text:p>
          </table:table-cell>
          <table:table-cell office:value-type="float" office:value="0.09633181" table:style-name="c8">
            <text:p>0.096332</text:p>
          </table:table-cell>
          <table:table-cell office:value-type="float" office:value="-0.34101108353725706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3:30</text:p>
          </table:table-cell>
          <table:table-cell office:value-type="float" office:value="0.09645820499999999" table:style-name="c8">
            <text:p>0.096458</text:p>
          </table:table-cell>
          <table:table-cell office:value-type="string" table:style-name="c8">
            <text:p>2026-04-16 04:00</text:p>
          </table:table-cell>
          <table:table-cell office:value-type="float" office:value="0.096981485" table:style-name="c8">
            <text:p>0.096981</text:p>
          </table:table-cell>
          <table:table-cell office:value-type="float" office:value="0.34150958074017357" table:style-name="c10">
            <text:p>+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4:15</text:p>
          </table:table-cell>
          <table:table-cell office:value-type="float" office:value="0.097598775" table:style-name="c8">
            <text:p>0.097599</text:p>
          </table:table-cell>
          <table:table-cell office:value-type="string" table:style-name="c8">
            <text:p>2026-04-16 04:45</text:p>
          </table:table-cell>
          <table:table-cell office:value-type="float" office:value="0.097401275" table:style-name="c8">
            <text:p>0.097401</text:p>
          </table:table-cell>
          <table:table-cell office:value-type="float" office:value="-0.40185458139715413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0.09735865499999999" table:style-name="c8">
            <text:p>0.097359</text:p>
          </table:table-cell>
          <table:table-cell office:value-type="string" table:style-name="c8">
            <text:p>2026-04-16 16:30</text:p>
          </table:table-cell>
          <table:table-cell office:value-type="float" office:value="0.09802096500000002" table:style-name="c8">
            <text:p>0.098021</text:p>
          </table:table-cell>
          <table:table-cell office:value-type="float" office:value="0.479018625478167" table:style-name="c10">
            <text:p>+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15</text:p>
          </table:table-cell>
          <table:table-cell office:value-type="float" office:value="0.098179065" table:style-name="c8">
            <text:p>0.098179</text:p>
          </table:table-cell>
          <table:table-cell office:value-type="string" table:style-name="c8">
            <text:p>2026-04-17 07:45</text:p>
          </table:table-cell>
          <table:table-cell office:value-type="float" office:value="0.09803096" table:style-name="c8">
            <text:p>0.098031</text:p>
          </table:table-cell>
          <table:table-cell office:value-type="float" office:value="-0.350450362345589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00</text:p>
          </table:table-cell>
          <table:table-cell office:value-type="float" office:value="0.09812904" table:style-name="c8">
            <text:p>0.098129</text:p>
          </table:table-cell>
          <table:table-cell office:value-type="string" table:style-name="c8">
            <text:p>2026-04-17 08:30</text:p>
          </table:table-cell>
          <table:table-cell office:value-type="float" office:value="0.09807094000000001" table:style-name="c8">
            <text:p>0.098071</text:p>
          </table:table-cell>
          <table:table-cell office:value-type="float" office:value="-0.2589893970836754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0.09837916499999999" table:style-name="c8">
            <text:p>0.098379</text:p>
          </table:table-cell>
          <table:table-cell office:value-type="string" table:style-name="c8">
            <text:p>2026-04-17 09:15</text:p>
          </table:table-cell>
          <table:table-cell office:value-type="float" office:value="0.098460745" table:style-name="c8">
            <text:p>0.098461</text:p>
          </table:table-cell>
          <table:table-cell office:value-type="float" office:value="-0.117141702976431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30</text:p>
          </table:table-cell>
          <table:table-cell office:value-type="float" office:value="0.09953974499999999" table:style-name="c8">
            <text:p>0.09954</text:p>
          </table:table-cell>
          <table:table-cell office:value-type="string" table:style-name="c8">
            <text:p>2026-04-17 10:00</text:p>
          </table:table-cell>
          <table:table-cell office:value-type="float" office:value="0.09887053999999999" table:style-name="c8">
            <text:p>0.098871</text:p>
          </table:table-cell>
          <table:table-cell office:value-type="float" office:value="-0.870855364819334" table:style-name="c9">
            <text:p>-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00</text:p>
          </table:table-cell>
          <table:table-cell office:value-type="float" office:value="0.10017005999999999" table:style-name="c8">
            <text:p>0.10017</text:p>
          </table:table-cell>
          <table:table-cell office:value-type="string" table:style-name="c8">
            <text:p>2026-04-17 13:30</text:p>
          </table:table-cell>
          <table:table-cell office:value-type="float" office:value="0.10095949500000001" table:style-name="c8">
            <text:p>0.10096</text:p>
          </table:table-cell>
          <table:table-cell office:value-type="float" office:value="0.5866193646035578" table:style-name="c10">
            <text:p>+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7:00</text:p>
          </table:table-cell>
          <table:table-cell office:value-type="float" office:value="0.102020985" table:style-name="c8">
            <text:p>0.10202</text:p>
          </table:table-cell>
          <table:table-cell office:value-type="string" table:style-name="c8">
            <text:p>2026-04-17 17:30</text:p>
          </table:table-cell>
          <table:table-cell office:value-type="float" office:value="0.100459745" table:style-name="c8">
            <text:p>0.10046</text:p>
          </table:table-cell>
          <table:table-cell office:value-type="float" office:value="-1.7271535167544094" table:style-name="c9">
            <text:p>-1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1 01:15</text:p>
          </table:table-cell>
          <table:table-cell office:value-type="float" office:value="0.09584789999999999" table:style-name="c8">
            <text:p>0.095848</text:p>
          </table:table-cell>
          <table:table-cell office:value-type="string" table:style-name="c8">
            <text:p>2026-04-21 01:45</text:p>
          </table:table-cell>
          <table:table-cell office:value-type="float" office:value="0.09569213000000001" table:style-name="c8">
            <text:p>0.095692</text:p>
          </table:table-cell>
          <table:table-cell office:value-type="float" office:value="-0.3620930326798777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3:00</text:p>
          </table:table-cell>
          <table:table-cell office:value-type="float" office:value="0.096598275" table:style-name="c8">
            <text:p>0.096598</text:p>
          </table:table-cell>
          <table:table-cell office:value-type="string" table:style-name="c8">
            <text:p>2026-04-22 03:30</text:p>
          </table:table-cell>
          <table:table-cell office:value-type="float" office:value="0.09631182" table:style-name="c8">
            <text:p>0.096312</text:p>
          </table:table-cell>
          <table:table-cell office:value-type="float" office:value="-0.49584977390123575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0.09726860999999999" table:style-name="c8">
            <text:p>0.097269</text:p>
          </table:table-cell>
          <table:table-cell office:value-type="string" table:style-name="c8">
            <text:p>2026-04-22 06:00</text:p>
          </table:table-cell>
          <table:table-cell office:value-type="float" office:value="0.097101425" table:style-name="c8">
            <text:p>0.097101</text:p>
          </table:table-cell>
          <table:table-cell office:value-type="float" office:value="-0.37143611754603123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7:15</text:p>
          </table:table-cell>
          <table:table-cell office:value-type="float" office:value="0.097818885" table:style-name="c8">
            <text:p>0.097819</text:p>
          </table:table-cell>
          <table:table-cell office:value-type="string" table:style-name="c8">
            <text:p>2026-04-22 07:45</text:p>
          </table:table-cell>
          <table:table-cell office:value-type="float" office:value="0.09739128000000001" table:style-name="c8">
            <text:p>0.097391</text:p>
          </table:table-cell>
          <table:table-cell office:value-type="float" office:value="-0.6361656736528776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3 04:45</text:p>
          </table:table-cell>
          <table:table-cell office:value-type="float" office:value="0.09592794" table:style-name="c8">
            <text:p>0.095928</text:p>
          </table:table-cell>
          <table:table-cell office:value-type="string" table:style-name="c8">
            <text:p>2026-04-23 05:15</text:p>
          </table:table-cell>
          <table:table-cell office:value-type="float" office:value="0.096041955" table:style-name="c8">
            <text:p>0.096042</text:p>
          </table:table-cell>
          <table:table-cell office:value-type="float" office:value="-0.08128275041140443" table:style-name="c9">
            <text:p>-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3 15:45</text:p>
          </table:table-cell>
          <table:table-cell office:value-type="float" office:value="0.09760877999999999" table:style-name="c8">
            <text:p>0.097609</text:p>
          </table:table-cell>
          <table:table-cell office:value-type="string" table:style-name="c8">
            <text:p>2026-04-23 16:15</text:p>
          </table:table-cell>
          <table:table-cell office:value-type="float" office:value="0.0971514" table:style-name="c8">
            <text:p>0.097151</text:p>
          </table:table-cell>
          <table:table-cell office:value-type="float" office:value="-0.6675481945374151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02:00</text:p>
          </table:table-cell>
          <table:table-cell office:value-type="float" office:value="0.097978965" table:style-name="c8">
            <text:p>0.097979</text:p>
          </table:table-cell>
          <table:table-cell office:value-type="string" table:style-name="c8">
            <text:p>2026-04-24 02:30</text:p>
          </table:table-cell>
          <table:table-cell office:value-type="float" office:value="0.097681135" table:style-name="c8">
            <text:p>0.097681</text:p>
          </table:table-cell>
          <table:table-cell office:value-type="float" office:value="-0.5032657661417472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1:00</text:p>
          </table:table-cell>
          <table:table-cell office:value-type="float" office:value="0.097898925" table:style-name="c8">
            <text:p>0.097899</text:p>
          </table:table-cell>
          <table:table-cell office:value-type="string" table:style-name="c8">
            <text:p>2026-04-24 11:30</text:p>
          </table:table-cell>
          <table:table-cell office:value-type="float" office:value="0.09847074" table:style-name="c8">
            <text:p>0.098471</text:p>
          </table:table-cell>
          <table:table-cell office:value-type="float" office:value="0.383019518079486" table:style-name="c10">
            <text:p>+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00</text:p>
          </table:table-cell>
          <table:table-cell office:value-type="float" office:value="0.09999997499999999" table:style-name="c8">
            <text:p>0.1</text:p>
          </table:table-cell>
          <table:table-cell office:value-type="string" table:style-name="c8">
            <text:p>2026-04-27 01:30</text:p>
          </table:table-cell>
          <table:table-cell office:value-type="float" office:value="0.099580185" table:style-name="c8">
            <text:p>0.09958</text:p>
          </table:table-cell>
          <table:table-cell office:value-type="float" office:value="-0.6188509445277157" table:style-name="c9">
            <text:p>-0.6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14:45</text:p>
          </table:table-cell>
          <table:table-cell office:value-type="float" office:value="0.099139545" table:style-name="c8">
            <text:p>0.09914</text:p>
          </table:table-cell>
          <table:table-cell office:value-type="string" table:style-name="c8">
            <text:p>2026-04-27 15:15</text:p>
          </table:table-cell>
          <table:table-cell office:value-type="float" office:value="0.098100925" table:style-name="c8">
            <text:p>0.098101</text:p>
          </table:table-cell>
          <table:table-cell office:value-type="float" office:value="-1.245440201561332" table:style-name="c9">
            <text:p>-1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01:15</text:p>
          </table:table-cell>
          <table:table-cell office:value-type="float" office:value="0.0994497" table:style-name="c8">
            <text:p>0.09945</text:p>
          </table:table-cell>
          <table:table-cell office:value-type="string" table:style-name="c8">
            <text:p>2026-04-28 01:45</text:p>
          </table:table-cell>
          <table:table-cell office:value-type="float" office:value="0.09913041000000002" table:style-name="c8">
            <text:p>0.09913</text:p>
          </table:table-cell>
          <table:table-cell office:value-type="float" office:value="-0.5203149829411169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04:15</text:p>
          </table:table-cell>
          <table:table-cell office:value-type="float" office:value="0.100120035" table:style-name="c8">
            <text:p>0.10012</text:p>
          </table:table-cell>
          <table:table-cell office:value-type="string" table:style-name="c8">
            <text:p>2026-04-28 04:45</text:p>
          </table:table-cell>
          <table:table-cell office:value-type="float" office:value="0.09945025" table:style-name="c8">
            <text:p>0.09945</text:p>
          </table:table-cell>
          <table:table-cell office:value-type="float" office:value="-0.8675446924783836" table:style-name="c9">
            <text:p>-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3:45</text:p>
          </table:table-cell>
          <table:table-cell office:value-type="float" office:value="0.10143068999999999" table:style-name="c8">
            <text:p>0.10143</text:p>
          </table:table-cell>
          <table:table-cell office:value-type="string" table:style-name="c8">
            <text:p>2026-04-29 04:15</text:p>
          </table:table-cell>
          <table:table-cell office:value-type="float" office:value="0.101299325" table:style-name="c8">
            <text:p>0.1013</text:p>
          </table:table-cell>
          <table:table-cell office:value-type="float" office:value="-0.3291531889164867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4:45</text:p>
          </table:table-cell>
          <table:table-cell office:value-type="float" office:value="0.102361155" table:style-name="c8">
            <text:p>0.10236</text:p>
          </table:table-cell>
          <table:table-cell office:value-type="string" table:style-name="c8">
            <text:p>2026-04-29 05:15</text:p>
          </table:table-cell>
          <table:table-cell office:value-type="float" office:value="0.10181906500000001" table:style-name="c8">
            <text:p>0.10182</text:p>
          </table:table-cell>
          <table:table-cell office:value-type="float" office:value="-0.7284270199324983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6:00</text:p>
          </table:table-cell>
          <table:table-cell office:value-type="float" office:value="0.102361155" table:style-name="c8">
            <text:p>0.10236</text:p>
          </table:table-cell>
          <table:table-cell office:value-type="string" table:style-name="c8">
            <text:p>2026-04-29 06:30</text:p>
          </table:table-cell>
          <table:table-cell office:value-type="float" office:value="0.10230882000000001" table:style-name="c8">
            <text:p>0.10231</text:p>
          </table:table-cell>
          <table:table-cell office:value-type="float" office:value="-0.25092558908700324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7:45</text:p>
          </table:table-cell>
          <table:table-cell office:value-type="float" office:value="0.10453224" table:style-name="c8">
            <text:p>0.10453</text:p>
          </table:table-cell>
          <table:table-cell office:value-type="string" table:style-name="c8">
            <text:p>2026-04-29 08:15</text:p>
          </table:table-cell>
          <table:table-cell office:value-type="float" office:value="0.10526734" table:style-name="c8">
            <text:p>0.10527</text:p>
          </table:table-cell>
          <table:table-cell office:value-type="float" office:value="0.5019222656474254" table:style-name="c10">
            <text:p>+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0.10951472999999999" table:style-name="c8">
            <text:p>0.10951</text:p>
          </table:table-cell>
          <table:table-cell office:value-type="string" table:style-name="c8">
            <text:p>2026-04-29 10:30</text:p>
          </table:table-cell>
          <table:table-cell office:value-type="float" office:value="0.10990502" table:style-name="c8">
            <text:p>0.10991</text:p>
          </table:table-cell>
          <table:table-cell office:value-type="float" office:value="0.15576887695383235" table:style-name="c10">
            <text:p>+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00:30</text:p>
          </table:table-cell>
          <table:table-cell office:value-type="float" office:value="0.10570282499999999" table:style-name="c8">
            <text:p>0.1057</text:p>
          </table:table-cell>
          <table:table-cell office:value-type="string" table:style-name="c8">
            <text:p>2026-04-30 01:00</text:p>
          </table:table-cell>
          <table:table-cell office:value-type="float" office:value="0.10788603" table:style-name="c8">
            <text:p>0.10789</text:p>
          </table:table-cell>
          <table:table-cell office:value-type="float" office:value="1.8613890650793996" table:style-name="c10">
            <text:p>+1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03:30</text:p>
          </table:table-cell>
          <table:table-cell office:value-type="float" office:value="0.10959477" table:style-name="c8">
            <text:p>0.10959</text:p>
          </table:table-cell>
          <table:table-cell office:value-type="string" table:style-name="c8">
            <text:p>2026-05-01 04:00</text:p>
          </table:table-cell>
          <table:table-cell office:value-type="float" office:value="0.109055445" table:style-name="c8">
            <text:p>0.10906</text:p>
          </table:table-cell>
          <table:table-cell office:value-type="float" office:value="-0.6910246123560504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3:15</text:p>
          </table:table-cell>
          <table:table-cell office:value-type="float" office:value="0.11030512499999999" table:style-name="c8">
            <text:p>0.11031</text:p>
          </table:table-cell>
          <table:table-cell office:value-type="string" table:style-name="c8">
            <text:p>2026-05-01 13:45</text:p>
          </table:table-cell>
          <table:table-cell office:value-type="float" office:value="0.1093453" table:style-name="c8">
            <text:p>0.10935</text:p>
          </table:table-cell>
          <table:table-cell office:value-type="float" office:value="-1.0683150530856667" table:style-name="c9">
            <text:p>-1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14:45</text:p>
          </table:table-cell>
          <table:table-cell office:value-type="float" office:value="0.10893444" table:style-name="c8">
            <text:p>0.10893</text:p>
          </table:table-cell>
          <table:table-cell office:value-type="string" table:style-name="c8">
            <text:p>2026-05-02 15:15</text:p>
          </table:table-cell>
          <table:table-cell office:value-type="float" office:value="0.10887553500000001" table:style-name="c8">
            <text:p>0.10888</text:p>
          </table:table-cell>
          <table:table-cell office:value-type="float" office:value="-0.2538657145205847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12:15</text:p>
          </table:table-cell>
          <table:table-cell office:value-type="float" office:value="0.109324635" table:style-name="c8">
            <text:p>0.10932</text:p>
          </table:table-cell>
          <table:table-cell office:value-type="string" table:style-name="c8">
            <text:p>2026-05-03 12:45</text:p>
          </table:table-cell>
          <table:table-cell office:value-type="float" office:value="0.10900547000000001" table:style-name="c8">
            <text:p>0.10901</text:p>
          </table:table-cell>
          <table:table-cell office:value-type="float" office:value="-0.49125884072698245" table:style-name="c9">
            <text:p>-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30</text:p>
          </table:table-cell>
          <table:table-cell office:value-type="float" office:value="0.10921457999999999" table:style-name="c8">
            <text:p>0.10921</text:p>
          </table:table-cell>
          <table:table-cell office:value-type="string" table:style-name="c8">
            <text:p>2026-05-03 23:00</text:p>
          </table:table-cell>
          <table:table-cell office:value-type="float" office:value="0.10921536500000001" table:style-name="c8">
            <text:p>0.10922</text:p>
          </table:table-cell>
          <table:table-cell office:value-type="float" office:value="-0.19918266831679965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1:45</text:p>
          </table:table-cell>
          <table:table-cell office:value-type="float" office:value="0.11153574" table:style-name="c8">
            <text:p>0.11154</text:p>
          </table:table-cell>
          <table:table-cell office:value-type="string" table:style-name="c8">
            <text:p>2026-05-04 02:15</text:p>
          </table:table-cell>
          <table:table-cell office:value-type="float" office:value="0.11204395000000002" table:style-name="c8">
            <text:p>0.11204</text:p>
          </table:table-cell>
          <table:table-cell office:value-type="float" office:value="0.2548368298359138" table:style-name="c10">
            <text:p>+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3:15</text:p>
          </table:table-cell>
          <table:table-cell office:value-type="float" office:value="0.11093544" table:style-name="c8">
            <text:p>0.11094</text:p>
          </table:table-cell>
          <table:table-cell office:value-type="string" table:style-name="c8">
            <text:p>2026-05-04 13:45</text:p>
          </table:table-cell>
          <table:table-cell office:value-type="float" office:value="0.11086454000000001" table:style-name="c8">
            <text:p>0.11086</text:p>
          </table:table-cell>
          <table:table-cell office:value-type="float" office:value="-0.2636832877392359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4:45</text:p>
          </table:table-cell>
          <table:table-cell office:value-type="float" office:value="0.11162578499999999" table:style-name="c8">
            <text:p>0.11163</text:p>
          </table:table-cell>
          <table:table-cell office:value-type="string" table:style-name="c8">
            <text:p>2026-05-04 15:15</text:p>
          </table:table-cell>
          <table:table-cell office:value-type="float" office:value="0.11087453500000001" table:style-name="c8">
            <text:p>0.11087</text:p>
          </table:table-cell>
          <table:table-cell office:value-type="float" office:value="-0.8715622429575687" table:style-name="c9">
            <text:p>-0.9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3:30</text:p>
          </table:table-cell>
          <table:table-cell office:value-type="float" office:value="0.11257625999999998" table:style-name="c8">
            <text:p>0.11258</text:p>
          </table:table-cell>
          <table:table-cell office:value-type="string" table:style-name="c8">
            <text:p>2026-05-05 14:00</text:p>
          </table:table-cell>
          <table:table-cell office:value-type="float" office:value="0.112353795" table:style-name="c8">
            <text:p>0.11235</text:p>
          </table:table-cell>
          <table:table-cell office:value-type="float" office:value="-0.3971176837860635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2:00</text:p>
          </table:table-cell>
          <table:table-cell office:value-type="float" office:value="0.115487715" table:style-name="c8">
            <text:p>0.11549</text:p>
          </table:table-cell>
          <table:table-cell office:value-type="string" table:style-name="c8">
            <text:p>2026-05-05 22:30</text:p>
          </table:table-cell>
          <table:table-cell office:value-type="float" office:value="0.11613190500000001" table:style-name="c8">
            <text:p>0.11613</text:p>
          </table:table-cell>
          <table:table-cell office:value-type="float" office:value="0.35678454795387005" table:style-name="c10">
            <text:p>+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45</text:p>
          </table:table-cell>
          <table:table-cell office:value-type="float" office:value="0.11575785" table:style-name="c8">
            <text:p>0.11576</text:p>
          </table:table-cell>
          <table:table-cell office:value-type="string" table:style-name="c8">
            <text:p>2026-05-06 04:15</text:p>
          </table:table-cell>
          <table:table-cell office:value-type="float" office:value="0.11576209000000001" table:style-name="c8">
            <text:p>0.11576</text:p>
          </table:table-cell>
          <table:table-cell office:value-type="float" office:value="-0.1962445034267457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7:45</text:p>
          </table:table-cell>
          <table:table-cell office:value-type="float" office:value="0.109584765" table:style-name="c8">
            <text:p>0.10958</text:p>
          </table:table-cell>
          <table:table-cell office:value-type="string" table:style-name="c8">
            <text:p>2026-05-09 18:15</text:p>
          </table:table-cell>
          <table:table-cell office:value-type="float" office:value="0.10950522000000001" table:style-name="c8">
            <text:p>0.10951</text:p>
          </table:table-cell>
          <table:table-cell office:value-type="float" office:value="-0.27234254212251674" table:style-name="c9">
            <text:p>-0.3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2:45</text:p>
          </table:table-cell>
          <table:table-cell office:value-type="float" office:value="0.11103548999999999" table:style-name="c8">
            <text:p>0.11104</text:p>
          </table:table-cell>
          <table:table-cell office:value-type="string" table:style-name="c8">
            <text:p>2026-05-10 23:15</text:p>
          </table:table-cell>
          <table:table-cell office:value-type="float" office:value="0.11182406" table:style-name="c8">
            <text:p>0.11182</text:p>
          </table:table-cell>
          <table:table-cell office:value-type="float" office:value="0.508876670026881" table:style-name="c10">
            <text:p>+0.5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30</text:p>
          </table:table-cell>
          <table:table-cell office:value-type="float" office:value="0.11196595499999999" table:style-name="c8">
            <text:p>0.11197</text:p>
          </table:table-cell>
          <table:table-cell office:value-type="string" table:style-name="c8">
            <text:p>2026-05-11 00:00</text:p>
          </table:table-cell>
          <table:table-cell office:value-type="float" office:value="0.11240377000000001" table:style-name="c8">
            <text:p>0.1124</text:p>
          </table:table-cell>
          <table:table-cell office:value-type="float" office:value="0.19034345196273783" table:style-name="c10">
            <text:p>+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1:15</text:p>
          </table:table-cell>
          <table:table-cell office:value-type="float" office:value="0.11139566999999999" table:style-name="c8">
            <text:p>0.1114</text:p>
          </table:table-cell>
          <table:table-cell office:value-type="string" table:style-name="c8">
            <text:p>2026-05-13 01:45</text:p>
          </table:table-cell>
          <table:table-cell office:value-type="float" office:value="0.111354295" table:style-name="c8">
            <text:p>0.11135</text:p>
          </table:table-cell>
          <table:table-cell office:value-type="float" office:value="-0.2369681296454096" table:style-name="c9">
            <text:p>-0.2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4:45</text:p>
          </table:table-cell>
          <table:table-cell office:value-type="float" office:value="0.11243618999999999" table:style-name="c8">
            <text:p>0.11244</text:p>
          </table:table-cell>
          <table:table-cell office:value-type="string" table:style-name="c8">
            <text:p>2026-05-13 05:15</text:p>
          </table:table-cell>
          <table:table-cell office:value-type="float" office:value="0.11223385500000001" table:style-name="c8">
            <text:p>0.11223</text:p>
          </table:table-cell>
          <table:table-cell office:value-type="float" office:value="-0.37949567318582567" table:style-name="c9">
            <text:p>-0.4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9:45</text:p>
          </table:table-cell>
          <table:table-cell office:value-type="float" office:value="0.11429711999999999" table:style-name="c8">
            <text:p>0.1143</text:p>
          </table:table-cell>
          <table:table-cell office:value-type="string" table:style-name="c8">
            <text:p>2026-05-13 10:15</text:p>
          </table:table-cell>
          <table:table-cell office:value-type="float" office:value="0.11358318" table:style-name="c8">
            <text:p>0.11358</text:p>
          </table:table-cell>
          <table:table-cell office:value-type="float" office:value="-0.8232865157232205" table:style-name="c9">
            <text:p>-0.8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17:30</text:p>
          </table:table-cell>
          <table:table-cell office:value-type="float" office:value="0.11281638" table:style-name="c8">
            <text:p>0.11282</text:p>
          </table:table-cell>
          <table:table-cell office:value-type="string" table:style-name="c8">
            <text:p>2026-05-13 18:00</text:p>
          </table:table-cell>
          <table:table-cell office:value-type="float" office:value="0.11310342" table:style-name="c8">
            <text:p>0.1131</text:p>
          </table:table-cell>
          <table:table-cell office:value-type="float" office:value="0.05402253061126405" table:style-name="c10">
            <text:p>+0.1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30</text:p>
          </table:table-cell>
          <table:table-cell office:value-type="float" office:value="0.106283115" table:style-name="c8">
            <text:p>0.10628</text:p>
          </table:table-cell>
          <table:table-cell office:value-type="string" table:style-name="c8">
            <text:p>2026-05-21 09:00</text:p>
          </table:table-cell>
          <table:table-cell office:value-type="float" office:value="0.10578708" table:style-name="c8">
            <text:p>0.10579</text:p>
          </table:table-cell>
          <table:table-cell office:value-type="float" office:value="-0.6656780551830832" table:style-name="c9">
            <text:p>-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15</text:p>
          </table:table-cell>
          <table:table-cell office:value-type="float" office:value="0.10518256499999999" table:style-name="c8">
            <text:p>0.10518</text:p>
          </table:table-cell>
          <table:table-cell office:value-type="string" table:style-name="c8">
            <text:p>2026-05-21 17:45</text:p>
          </table:table-cell>
          <table:table-cell office:value-type="float" office:value="0.10612691" table:style-name="c8">
            <text:p>0.10613</text:p>
          </table:table-cell>
          <table:table-cell office:value-type="float" office:value="0.6961204139773525" table:style-name="c10">
            <text:p>+0.7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2:30</text:p>
          </table:table-cell>
          <table:table-cell office:value-type="float" office:value="0.10129062" table:style-name="c8">
            <text:p>0.10129</text:p>
          </table:table-cell>
          <table:table-cell office:value-type="string" table:style-name="c8">
            <text:p>2026-05-30 03:00</text:p>
          </table:table-cell>
          <table:table-cell office:value-type="float" office:value="0.10152921000000001" table:style-name="c8">
            <text:p>0.10153</text:p>
          </table:table-cell>
          <table:table-cell office:value-type="float" office:value="0.035179080955383135" table:style-name="c10">
            <text:p>+0.0</text:p>
          </table:table-cell>
        </table:table-row>
        <table:table-row>
          <table:table-cell office:value-type="string" table:style-name="c7">
            <text:p>DOGE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1 03:15</text:p>
          </table:table-cell>
          <table:table-cell office:value-type="float" office:value="0.101380665" table:style-name="c8">
            <text:p>0.10138</text:p>
          </table:table-cell>
          <table:table-cell office:value-type="string" table:style-name="c8">
            <text:p>2026-05-31 03:45</text:p>
          </table:table-cell>
          <table:table-cell office:value-type="float" office:value="0.10119937500000001" table:style-name="c8">
            <text:p>0.1012</text:p>
          </table:table-cell>
          <table:table-cell office:value-type="float" office:value="-0.37836361659788764" table:style-name="c9">
            <text:p>-0.4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15</text:p>
          </table:table-cell>
          <table:table-cell office:value-type="float" office:value="1.5377684999999999" table:style-name="c1">
            <text:p>1.5378</text:p>
          </table:table-cell>
          <table:table-cell office:value-type="string" table:style-name="c1">
            <text:p>2026-03-03 16:45</text:p>
          </table:table-cell>
          <table:table-cell office:value-type="float" office:value="1.5092450000000002" table:style-name="c1">
            <text:p>1.5092</text:p>
          </table:table-cell>
          <table:table-cell office:value-type="float" office:value="-2.0510551981653746" table:style-name="c12">
            <text:p>-2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0:30</text:p>
          </table:table-cell>
          <table:table-cell office:value-type="float" office:value="1.5397694999999998" table:style-name="c1">
            <text:p>1.5398</text:p>
          </table:table-cell>
          <table:table-cell office:value-type="string" table:style-name="c1">
            <text:p>2026-03-04 01:00</text:p>
          </table:table-cell>
          <table:table-cell office:value-type="float" office:value="1.527236" table:style-name="c1">
            <text:p>1.5272</text:p>
          </table:table-cell>
          <table:table-cell office:value-type="float" office:value="-1.0122583129487772" table:style-name="c12">
            <text:p>-1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1:30</text:p>
          </table:table-cell>
          <table:table-cell office:value-type="float" office:value="1.5457724999999998" table:style-name="c1">
            <text:p>1.5458</text:p>
          </table:table-cell>
          <table:table-cell office:value-type="string" table:style-name="c1">
            <text:p>2026-03-04 02:00</text:p>
          </table:table-cell>
          <table:table-cell office:value-type="float" office:value="1.5362315" table:style-name="c1">
            <text:p>1.5362</text:p>
          </table:table-cell>
          <table:table-cell office:value-type="float" office:value="-0.8158979907133546" table:style-name="c12">
            <text:p>-0.8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1.5707849999999999" table:style-name="c1">
            <text:p>1.5708</text:p>
          </table:table-cell>
          <table:table-cell office:value-type="string" table:style-name="c1">
            <text:p>2026-03-04 10:15</text:p>
          </table:table-cell>
          <table:table-cell office:value-type="float" office:value="1.5562215" table:style-name="c1">
            <text:p>1.5562</text:p>
          </table:table-cell>
          <table:table-cell office:value-type="float" office:value="-1.125194522388484" table:style-name="c12">
            <text:p>-1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45</text:p>
          </table:table-cell>
          <table:table-cell office:value-type="float" office:value="1.54077" table:style-name="c1">
            <text:p>1.5408</text:p>
          </table:table-cell>
          <table:table-cell office:value-type="string" table:style-name="c1">
            <text:p>2026-03-04 16:15</text:p>
          </table:table-cell>
          <table:table-cell office:value-type="float" office:value="1.5412290000000002" table:style-name="c1">
            <text:p>1.5412</text:p>
          </table:table-cell>
          <table:table-cell office:value-type="float" office:value="-0.17016925115361792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15</text:p>
          </table:table-cell>
          <table:table-cell office:value-type="float" office:value="1.556778" table:style-name="c1">
            <text:p>1.5568</text:p>
          </table:table-cell>
          <table:table-cell office:value-type="string" table:style-name="c1">
            <text:p>2026-03-04 19:45</text:p>
          </table:table-cell>
          <table:table-cell office:value-type="float" office:value="1.5632180000000002" table:style-name="c1">
            <text:p>1.5632</text:p>
          </table:table-cell>
          <table:table-cell office:value-type="float" office:value="0.21294797447035663" table:style-name="c11">
            <text:p>+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1.5397694999999998" table:style-name="c1">
            <text:p>1.5398</text:p>
          </table:table-cell>
          <table:table-cell office:value-type="string" table:style-name="c1">
            <text:p>2026-03-10 10:00</text:p>
          </table:table-cell>
          <table:table-cell office:value-type="float" office:value="1.5302345" table:style-name="c1">
            <text:p>1.5302</text:p>
          </table:table-cell>
          <table:table-cell office:value-type="float" office:value="-0.8179106525684432" table:style-name="c12">
            <text:p>-0.8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5:00</text:p>
          </table:table-cell>
          <table:table-cell office:value-type="float" office:value="1.4957475" table:style-name="c1">
            <text:p>1.4957</text:p>
          </table:table-cell>
          <table:table-cell office:value-type="string" table:style-name="c1">
            <text:p>2026-03-11 05:30</text:p>
          </table:table-cell>
          <table:table-cell office:value-type="float" office:value="1.4842575000000002" table:style-name="c1">
            <text:p>1.4843</text:p>
          </table:table-cell>
          <table:table-cell office:value-type="float" office:value="-0.966542196627429" table:style-name="c12">
            <text:p>-1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45</text:p>
          </table:table-cell>
          <table:table-cell office:value-type="float" office:value="1.534767" table:style-name="c1">
            <text:p>1.5348</text:p>
          </table:table-cell>
          <table:table-cell office:value-type="string" table:style-name="c1">
            <text:p>2026-03-11 13:15</text:p>
          </table:table-cell>
          <table:table-cell office:value-type="float" office:value="1.5462265" table:style-name="c1">
            <text:p>1.5462</text:p>
          </table:table-cell>
          <table:table-cell office:value-type="float" office:value="0.5452679935455951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5377684999999999" table:style-name="c1">
            <text:p>1.5378</text:p>
          </table:table-cell>
          <table:table-cell office:value-type="string" table:style-name="c1">
            <text:p>2026-03-11 14:15</text:p>
          </table:table-cell>
          <table:table-cell office:value-type="float" office:value="1.537231" table:style-name="c1">
            <text:p>1.5372</text:p>
          </table:table-cell>
          <table:table-cell office:value-type="float" office:value="-0.2347833740254046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8:15</text:p>
          </table:table-cell>
          <table:table-cell office:value-type="float" office:value="1.5107549999999998" table:style-name="c1">
            <text:p>1.5108</text:p>
          </table:table-cell>
          <table:table-cell office:value-type="string" table:style-name="c1">
            <text:p>2026-03-12 08:45</text:p>
          </table:table-cell>
          <table:table-cell office:value-type="float" office:value="1.5102445" table:style-name="c1">
            <text:p>1.5102</text:p>
          </table:table-cell>
          <table:table-cell office:value-type="float" office:value="-0.23362350318215652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1.5377684999999999" table:style-name="c1">
            <text:p>1.5378</text:p>
          </table:table-cell>
          <table:table-cell office:value-type="string" table:style-name="c1">
            <text:p>2026-03-13 01:00</text:p>
          </table:table-cell>
          <table:table-cell office:value-type="float" office:value="1.5322335" table:style-name="c1">
            <text:p>1.5322</text:p>
          </table:table-cell>
          <table:table-cell office:value-type="float" office:value="-0.5591176283361143" table:style-name="c12">
            <text:p>-0.6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1.522761" table:style-name="c1">
            <text:p>1.5228</text:p>
          </table:table-cell>
          <table:table-cell office:value-type="string" table:style-name="c1">
            <text:p>2026-03-13 11:00</text:p>
          </table:table-cell>
          <table:table-cell office:value-type="float" office:value="1.5222385" table:style-name="c1">
            <text:p>1.5222</text:p>
          </table:table-cell>
          <table:table-cell office:value-type="float" office:value="-0.23414408180272295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.5377684999999999" table:style-name="c1">
            <text:p>1.5378</text:p>
          </table:table-cell>
          <table:table-cell office:value-type="string" table:style-name="c1">
            <text:p>2026-03-13 14:00</text:p>
          </table:table-cell>
          <table:table-cell office:value-type="float" office:value="1.5362315" table:style-name="c1">
            <text:p>1.5362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1.5257625" table:style-name="c1">
            <text:p>1.5258</text:p>
          </table:table-cell>
          <table:table-cell office:value-type="string" table:style-name="c1">
            <text:p>2026-03-16 05:30</text:p>
          </table:table-cell>
          <table:table-cell office:value-type="float" office:value="1.5302345" table:style-name="c1">
            <text:p>1.5302</text:p>
          </table:table-cell>
          <table:table-cell office:value-type="float" office:value="0.09261344635878022" table:style-name="c11">
            <text:p>+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45</text:p>
          </table:table-cell>
          <table:table-cell office:value-type="float" office:value="1.5487739999999999" table:style-name="c1">
            <text:p>1.5488</text:p>
          </table:table-cell>
          <table:table-cell office:value-type="string" table:style-name="c1">
            <text:p>2026-03-16 06:15</text:p>
          </table:table-cell>
          <table:table-cell office:value-type="float" office:value="1.5412290000000002" table:style-name="c1">
            <text:p>1.5412</text:p>
          </table:table-cell>
          <table:table-cell office:value-type="float" office:value="-0.6860856891321654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6:30</text:p>
          </table:table-cell>
          <table:table-cell office:value-type="float" office:value="1.556778" table:style-name="c1">
            <text:p>1.5568</text:p>
          </table:table-cell>
          <table:table-cell office:value-type="string" table:style-name="c1">
            <text:p>2026-03-16 07:00</text:p>
          </table:table-cell>
          <table:table-cell office:value-type="float" office:value="1.5772110000000001" table:style-name="c1">
            <text:p>1.5772</text:p>
          </table:table-cell>
          <table:table-cell office:value-type="float" office:value="1.1099948233466828" table:style-name="c11">
            <text:p>+1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1:15</text:p>
          </table:table-cell>
          <table:table-cell office:value-type="float" office:value="1.6058024999999998" table:style-name="c1">
            <text:p>1.6058</text:p>
          </table:table-cell>
          <table:table-cell office:value-type="string" table:style-name="c1">
            <text:p>2026-03-16 11:45</text:p>
          </table:table-cell>
          <table:table-cell office:value-type="float" office:value="1.597201" table:style-name="c1">
            <text:p>1.5972</text:p>
          </table:table-cell>
          <table:table-cell office:value-type="float" office:value="-0.7344804108225911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7:15</text:p>
          </table:table-cell>
          <table:table-cell office:value-type="float" office:value="1.5937964999999998" table:style-name="c1">
            <text:p>1.5938</text:p>
          </table:table-cell>
          <table:table-cell office:value-type="string" table:style-name="c1">
            <text:p>2026-03-16 17:45</text:p>
          </table:table-cell>
          <table:table-cell office:value-type="float" office:value="1.5982005000000001" table:style-name="c1">
            <text:p>1.5982</text:p>
          </table:table-cell>
          <table:table-cell office:value-type="float" office:value="0.07586898330498304" table:style-name="c11">
            <text:p>+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0:45</text:p>
          </table:table-cell>
          <table:table-cell office:value-type="float" office:value="1.6328159999999998" table:style-name="c1">
            <text:p>1.6328</text:p>
          </table:table-cell>
          <table:table-cell office:value-type="string" table:style-name="c1">
            <text:p>2026-03-16 21:15</text:p>
          </table:table-cell>
          <table:table-cell office:value-type="float" office:value="1.6291849999999999" table:style-name="c1">
            <text:p>1.6292</text:p>
          </table:table-cell>
          <table:table-cell office:value-type="float" office:value="-0.4218320260825581" table:style-name="c12">
            <text:p>-0.4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45</text:p>
          </table:table-cell>
          <table:table-cell office:value-type="float" office:value="1.6478234999999999" table:style-name="c1">
            <text:p>1.6478</text:p>
          </table:table-cell>
          <table:table-cell office:value-type="string" table:style-name="c1">
            <text:p>2026-03-18 03:15</text:p>
          </table:table-cell>
          <table:table-cell office:value-type="float" office:value="1.6341825" table:style-name="c1">
            <text:p>1.6342</text:p>
          </table:table-cell>
          <table:table-cell office:value-type="float" office:value="-1.0260644308992983" table:style-name="c12">
            <text:p>-1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10:00</text:p>
          </table:table-cell>
          <table:table-cell office:value-type="float" office:value="1.6348169999999997" table:style-name="c1">
            <text:p>1.6348</text:p>
          </table:table-cell>
          <table:table-cell office:value-type="string" table:style-name="c1">
            <text:p>2026-03-18 10:30</text:p>
          </table:table-cell>
          <table:table-cell office:value-type="float" office:value="1.6341825" table:style-name="c1">
            <text:p>1.6342</text:p>
          </table:table-cell>
          <table:table-cell office:value-type="float" office:value="-0.23863409895417131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1.296648" table:style-name="c1">
            <text:p>1.2966</text:p>
          </table:table-cell>
          <table:table-cell office:value-type="string" table:style-name="c1">
            <text:p>2026-04-01 06:45</text:p>
          </table:table-cell>
          <table:table-cell office:value-type="float" office:value="1.3003495" table:style-name="c1">
            <text:p>1.3003</text:p>
          </table:table-cell>
          <table:table-cell office:value-type="float" office:value="0.08499618628186045" table:style-name="c11">
            <text:p>+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1.2696344999999998" table:style-name="c1">
            <text:p>1.2696</text:p>
          </table:table-cell>
          <table:table-cell office:value-type="string" table:style-name="c1">
            <text:p>2026-04-02 01:15</text:p>
          </table:table-cell>
          <table:table-cell office:value-type="float" office:value="1.2563715" table:style-name="c1">
            <text:p>1.2564</text:p>
          </table:table-cell>
          <table:table-cell office:value-type="float" office:value="-1.242443130562354" table:style-name="c12">
            <text:p>-1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1:45</text:p>
          </table:table-cell>
          <table:table-cell office:value-type="float" office:value="1.2506249999999999" table:style-name="c1">
            <text:p>1.2506</text:p>
          </table:table-cell>
          <table:table-cell office:value-type="string" table:style-name="c1">
            <text:p>2026-04-04 12:15</text:p>
          </table:table-cell>
          <table:table-cell office:value-type="float" office:value="1.2553720000000002" table:style-name="c1">
            <text:p>1.2554</text:p>
          </table:table-cell>
          <table:table-cell office:value-type="float" office:value="0.1789114540329928" table:style-name="c11">
            <text:p>+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1.2576284999999998" table:style-name="c1">
            <text:p>1.2576</text:p>
          </table:table-cell>
          <table:table-cell office:value-type="string" table:style-name="c1">
            <text:p>2026-04-04 13:00</text:p>
          </table:table-cell>
          <table:table-cell office:value-type="float" office:value="1.253373" table:style-name="c1">
            <text:p>1.2534</text:p>
          </table:table-cell>
          <table:table-cell office:value-type="float" office:value="-0.5375985537064087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1.264632" table:style-name="c1">
            <text:p>1.2646</text:p>
          </table:table-cell>
          <table:table-cell office:value-type="string" table:style-name="c1">
            <text:p>2026-04-04 18:00</text:p>
          </table:table-cell>
          <table:table-cell office:value-type="float" office:value="1.2613690000000002" table:style-name="c1">
            <text:p>1.2614</text:p>
          </table:table-cell>
          <table:table-cell office:value-type="float" office:value="-0.4574039428861365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6:15</text:p>
          </table:table-cell>
          <table:table-cell office:value-type="float" office:value="1.270635" table:style-name="c1">
            <text:p>1.2706</text:p>
          </table:table-cell>
          <table:table-cell office:value-type="string" table:style-name="c1">
            <text:p>2026-04-06 06:45</text:p>
          </table:table-cell>
          <table:table-cell office:value-type="float" office:value="1.267366" table:style-name="c1">
            <text:p>1.2674</text:p>
          </table:table-cell>
          <table:table-cell office:value-type="float" office:value="-0.45665864973024606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1.282641" table:style-name="c1">
            <text:p>1.2826</text:p>
          </table:table-cell>
          <table:table-cell office:value-type="string" table:style-name="c1">
            <text:p>2026-04-06 10:00</text:p>
          </table:table-cell>
          <table:table-cell office:value-type="float" office:value="1.2913540000000001" table:style-name="c1">
            <text:p>1.2914</text:p>
          </table:table-cell>
          <table:table-cell office:value-type="float" office:value="0.47804361111178917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30</text:p>
          </table:table-cell>
          <table:table-cell office:value-type="float" office:value="1.3096545" table:style-name="c1">
            <text:p>1.3097</text:p>
          </table:table-cell>
          <table:table-cell office:value-type="string" table:style-name="c1">
            <text:p>2026-04-06 13:00</text:p>
          </table:table-cell>
          <table:table-cell office:value-type="float" office:value="1.295352" table:style-name="c1">
            <text:p>1.2954</text:p>
          </table:table-cell>
          <table:table-cell office:value-type="float" office:value="-1.289798847558643" table:style-name="c12">
            <text:p>-1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1.336668" table:style-name="c1">
            <text:p>1.3367</text:p>
          </table:table-cell>
          <table:table-cell office:value-type="string" table:style-name="c1">
            <text:p>2026-04-09 23:00</text:p>
          </table:table-cell>
          <table:table-cell office:value-type="float" office:value="1.321339" table:style-name="c1">
            <text:p>1.3213</text:p>
          </table:table-cell>
          <table:table-cell office:value-type="float" office:value="-1.3444143692375232" table:style-name="c12">
            <text:p>-1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00</text:p>
          </table:table-cell>
          <table:table-cell office:value-type="float" office:value="1.3176584999999998" table:style-name="c1">
            <text:p>1.3177</text:p>
          </table:table-cell>
          <table:table-cell office:value-type="string" table:style-name="c1">
            <text:p>2026-04-10 15:30</text:p>
          </table:table-cell>
          <table:table-cell office:value-type="float" office:value="1.3183405" table:style-name="c1">
            <text:p>1.3183</text:p>
          </table:table-cell>
          <table:table-cell office:value-type="float" office:value="-0.1482449860491175" table:style-name="c12">
            <text:p>-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1.32066" table:style-name="c1">
            <text:p>1.3207</text:p>
          </table:table-cell>
          <table:table-cell office:value-type="string" table:style-name="c1">
            <text:p>2026-04-10 19:45</text:p>
          </table:table-cell>
          <table:table-cell office:value-type="float" office:value="1.3143425" table:style-name="c1">
            <text:p>1.3143</text:p>
          </table:table-cell>
          <table:table-cell office:value-type="float" office:value="-0.677303064944812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00</text:p>
          </table:table-cell>
          <table:table-cell office:value-type="float" office:value="1.302651" table:style-name="c1">
            <text:p>1.3027</text:p>
          </table:table-cell>
          <table:table-cell office:value-type="string" table:style-name="c1">
            <text:p>2026-04-11 19:30</text:p>
          </table:table-cell>
          <table:table-cell office:value-type="float" office:value="1.3103445" table:style-name="c1">
            <text:p>1.3103</text:p>
          </table:table-cell>
          <table:table-cell office:value-type="float" office:value="0.3895226998251955" table:style-name="c11">
            <text:p>+0.4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45</text:p>
          </table:table-cell>
          <table:table-cell office:value-type="float" office:value="1.216608" table:style-name="c1">
            <text:p>1.2166</text:p>
          </table:table-cell>
          <table:table-cell office:value-type="string" table:style-name="c1">
            <text:p>2026-04-16 05:15</text:p>
          </table:table-cell>
          <table:table-cell office:value-type="float" office:value="1.2123935000000001" table:style-name="c1">
            <text:p>1.2124</text:p>
          </table:table-cell>
          <table:table-cell office:value-type="float" office:value="-0.5456214825564021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45</text:p>
          </table:table-cell>
          <table:table-cell office:value-type="float" office:value="1.232616" table:style-name="c1">
            <text:p>1.2326</text:p>
          </table:table-cell>
          <table:table-cell office:value-type="string" table:style-name="c1">
            <text:p>2026-04-16 06:15</text:p>
          </table:table-cell>
          <table:table-cell office:value-type="float" office:value="1.231384" table:style-name="c1">
            <text:p>1.231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00</text:p>
          </table:table-cell>
          <table:table-cell office:value-type="float" office:value="1.252626" table:style-name="c1">
            <text:p>1.2526</text:p>
          </table:table-cell>
          <table:table-cell office:value-type="string" table:style-name="c1">
            <text:p>2026-04-16 07:30</text:p>
          </table:table-cell>
          <table:table-cell office:value-type="float" office:value="1.2703645" table:style-name="c1">
            <text:p>1.2704</text:p>
          </table:table-cell>
          <table:table-cell office:value-type="float" office:value="1.213374252530297" table:style-name="c11">
            <text:p>+1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45</text:p>
          </table:table-cell>
          <table:table-cell office:value-type="float" office:value="1.2736364999999998" table:style-name="c1">
            <text:p>1.2736</text:p>
          </table:table-cell>
          <table:table-cell office:value-type="string" table:style-name="c1">
            <text:p>2026-04-16 08:15</text:p>
          </table:table-cell>
          <table:table-cell office:value-type="float" office:value="1.2713640000000002" table:style-name="c1">
            <text:p>1.2714</text:p>
          </table:table-cell>
          <table:table-cell office:value-type="float" office:value="-0.37796943130945504" table:style-name="c12">
            <text:p>-0.4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1.2976484999999998" table:style-name="c1">
            <text:p>1.2976</text:p>
          </table:table-cell>
          <table:table-cell office:value-type="string" table:style-name="c1">
            <text:p>2026-04-16 13:45</text:p>
          </table:table-cell>
          <table:table-cell office:value-type="float" office:value="1.301349" table:style-name="c1">
            <text:p>1.3013</text:p>
          </table:table-cell>
          <table:table-cell office:value-type="float" office:value="0.08469962004351572" table:style-name="c11">
            <text:p>+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1.3166579999999999" table:style-name="c1">
            <text:p>1.3167</text:p>
          </table:table-cell>
          <table:table-cell office:value-type="string" table:style-name="c1">
            <text:p>2026-04-16 16:15</text:p>
          </table:table-cell>
          <table:table-cell office:value-type="float" office:value="1.3203395" table:style-name="c1">
            <text:p>1.3203</text:p>
          </table:table-cell>
          <table:table-cell office:value-type="float" office:value="0.07915049614251046" table:style-name="c11">
            <text:p>+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8:30</text:p>
          </table:table-cell>
          <table:table-cell office:value-type="float" office:value="1.3196595" table:style-name="c1">
            <text:p>1.3197</text:p>
          </table:table-cell>
          <table:table-cell office:value-type="string" table:style-name="c1">
            <text:p>2026-04-16 19:00</text:p>
          </table:table-cell>
          <table:table-cell office:value-type="float" office:value="1.3283355000000001" table:style-name="c1">
            <text:p>1.3283</text:p>
          </table:table-cell>
          <table:table-cell office:value-type="float" office:value="0.4562280903142035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6:45</text:p>
          </table:table-cell>
          <table:table-cell office:value-type="float" office:value="1.3196595" table:style-name="c1">
            <text:p>1.3197</text:p>
          </table:table-cell>
          <table:table-cell office:value-type="string" table:style-name="c1">
            <text:p>2026-04-17 07:15</text:p>
          </table:table-cell>
          <table:table-cell office:value-type="float" office:value="1.3183405" table:style-name="c1">
            <text:p>1.3183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16:30</text:p>
          </table:table-cell>
          <table:table-cell office:value-type="float" office:value="1.302651" table:style-name="c1">
            <text:p>1.3027</text:p>
          </table:table-cell>
          <table:table-cell office:value-type="string" table:style-name="c1">
            <text:p>2026-04-18 17:00</text:p>
          </table:table-cell>
          <table:table-cell office:value-type="float" office:value="1.289355" table:style-name="c1">
            <text:p>1.2894</text:p>
          </table:table-cell>
          <table:table-cell office:value-type="float" office:value="-1.218547457837904" table:style-name="c12">
            <text:p>-1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30</text:p>
          </table:table-cell>
          <table:table-cell office:value-type="float" office:value="1.2916454999999998" table:style-name="c1">
            <text:p>1.2916</text:p>
          </table:table-cell>
          <table:table-cell office:value-type="string" table:style-name="c1">
            <text:p>2026-04-22 04:00</text:p>
          </table:table-cell>
          <table:table-cell office:value-type="float" office:value="1.2913540000000001" table:style-name="c1">
            <text:p>1.2914</text:p>
          </table:table-cell>
          <table:table-cell office:value-type="float" office:value="-0.22242299810587562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4:45</text:p>
          </table:table-cell>
          <table:table-cell office:value-type="float" office:value="1.3036515" table:style-name="c1">
            <text:p>1.3037</text:p>
          </table:table-cell>
          <table:table-cell office:value-type="string" table:style-name="c1">
            <text:p>2026-04-22 05:15</text:p>
          </table:table-cell>
          <table:table-cell office:value-type="float" office:value="1.3083455" table:style-name="c1">
            <text:p>1.3083</text:p>
          </table:table-cell>
          <table:table-cell office:value-type="float" office:value="0.1594457832863938" table:style-name="c11">
            <text:p>+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1.3236614999999998" table:style-name="c1">
            <text:p>1.3237</text:p>
          </table:table-cell>
          <table:table-cell office:value-type="string" table:style-name="c1">
            <text:p>2026-04-22 06:00</text:p>
          </table:table-cell>
          <table:table-cell office:value-type="float" office:value="1.311344" table:style-name="c1">
            <text:p>1.3113</text:p>
          </table:table-cell>
          <table:table-cell office:value-type="float" office:value="-1.1286024905914238" table:style-name="c12">
            <text:p>-1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1.266633" table:style-name="c1">
            <text:p>1.2666</text:p>
          </table:table-cell>
          <table:table-cell office:value-type="string" table:style-name="c1">
            <text:p>2026-04-27 01:45</text:p>
          </table:table-cell>
          <table:table-cell office:value-type="float" office:value="1.2663665" table:style-name="c1">
            <text:p>1.2664</text:p>
          </table:table-cell>
          <table:table-cell office:value-type="float" office:value="-0.22089797388036292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1.2536264999999998" table:style-name="c1">
            <text:p>1.2536</text:p>
          </table:table-cell>
          <table:table-cell office:value-type="string" table:style-name="c1">
            <text:p>2026-04-29 10:30</text:p>
          </table:table-cell>
          <table:table-cell office:value-type="float" office:value="1.2563715" table:style-name="c1">
            <text:p>1.2564</text:p>
          </table:table-cell>
          <table:table-cell office:value-type="float" office:value="0.018627028983542182" table:style-name="c11">
            <text:p>+0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9:15</text:p>
          </table:table-cell>
          <table:table-cell office:value-type="float" office:value="1.22061" table:style-name="c1">
            <text:p>1.2206</text:p>
          </table:table-cell>
          <table:table-cell office:value-type="string" table:style-name="c1">
            <text:p>2026-05-02 19:45</text:p>
          </table:table-cell>
          <table:table-cell office:value-type="float" office:value="1.2223885" table:style-name="c1">
            <text:p>1.2224</text:p>
          </table:table-cell>
          <table:table-cell office:value-type="float" office:value="-0.05448543035856401" table:style-name="c12">
            <text:p>-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0:00</text:p>
          </table:table-cell>
          <table:table-cell office:value-type="float" office:value="1.2236115" table:style-name="c1">
            <text:p>1.2236</text:p>
          </table:table-cell>
          <table:table-cell office:value-type="string" table:style-name="c1">
            <text:p>2026-05-02 20:30</text:p>
          </table:table-cell>
          <table:table-cell office:value-type="float" office:value="1.2223885" table:style-name="c1">
            <text:p>1.222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0:45</text:p>
          </table:table-cell>
          <table:table-cell office:value-type="float" office:value="1.2296145" table:style-name="c1">
            <text:p>1.2296</text:p>
          </table:table-cell>
          <table:table-cell office:value-type="string" table:style-name="c1">
            <text:p>2026-05-02 21:15</text:p>
          </table:table-cell>
          <table:table-cell office:value-type="float" office:value="1.2233880000000001" table:style-name="c1">
            <text:p>1.2234</text:p>
          </table:table-cell>
          <table:table-cell office:value-type="float" office:value="-0.705265968480373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7:45</text:p>
          </table:table-cell>
          <table:table-cell office:value-type="float" office:value="1.2156075" table:style-name="c1">
            <text:p>1.2156</text:p>
          </table:table-cell>
          <table:table-cell office:value-type="string" table:style-name="c1">
            <text:p>2026-05-03 08:15</text:p>
          </table:table-cell>
          <table:table-cell office:value-type="float" office:value="1.2173910000000001" table:style-name="c1">
            <text:p>1.2174</text:p>
          </table:table-cell>
          <table:table-cell office:value-type="float" office:value="-0.053476521739115324" table:style-name="c12">
            <text:p>-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45</text:p>
          </table:table-cell>
          <table:table-cell office:value-type="float" office:value="1.2576284999999998" table:style-name="c1">
            <text:p>1.2576</text:p>
          </table:table-cell>
          <table:table-cell office:value-type="string" table:style-name="c1">
            <text:p>2026-05-05 08:15</text:p>
          </table:table-cell>
          <table:table-cell office:value-type="float" office:value="1.2583705" table:style-name="c1">
            <text:p>1.2584</text:p>
          </table:table-cell>
          <table:table-cell office:value-type="float" office:value="-0.14101800567496436" table:style-name="c12">
            <text:p>-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2:45</text:p>
          </table:table-cell>
          <table:table-cell office:value-type="float" office:value="1.2736364999999998" table:style-name="c1">
            <text:p>1.2736</text:p>
          </table:table-cell>
          <table:table-cell office:value-type="string" table:style-name="c1">
            <text:p>2026-05-05 13:15</text:p>
          </table:table-cell>
          <table:table-cell office:value-type="float" office:value="1.27936" table:style-name="c1">
            <text:p>1.2794</text:p>
          </table:table-cell>
          <table:table-cell office:value-type="float" office:value="0.2485842200659505" table:style-name="c11">
            <text:p>+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15</text:p>
          </table:table-cell>
          <table:table-cell office:value-type="float" office:value="1.2876435" table:style-name="c1">
            <text:p>1.2876</text:p>
          </table:table-cell>
          <table:table-cell office:value-type="string" table:style-name="c1">
            <text:p>2026-05-05 14:45</text:p>
          </table:table-cell>
          <table:table-cell office:value-type="float" office:value="1.2713640000000002" table:style-name="c1">
            <text:p>1.2714</text:p>
          </table:table-cell>
          <table:table-cell office:value-type="float" office:value="-1.4616589635252253" table:style-name="c12">
            <text:p>-1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15</text:p>
          </table:table-cell>
          <table:table-cell office:value-type="float" office:value="1.2896444999999999" table:style-name="c1">
            <text:p>1.2896</text:p>
          </table:table-cell>
          <table:table-cell office:value-type="string" table:style-name="c1">
            <text:p>2026-05-05 21:45</text:p>
          </table:table-cell>
          <table:table-cell office:value-type="float" office:value="1.283358" table:style-name="c1">
            <text:p>1.2834</text:p>
          </table:table-cell>
          <table:table-cell office:value-type="float" office:value="-0.6863854839066152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1.296648" table:style-name="c1">
            <text:p>1.2966</text:p>
          </table:table-cell>
          <table:table-cell office:value-type="string" table:style-name="c1">
            <text:p>2026-05-06 02:30</text:p>
          </table:table-cell>
          <table:table-cell office:value-type="float" office:value="1.2823585" table:style-name="c1">
            <text:p>1.2824</text:p>
          </table:table-cell>
          <table:table-cell office:value-type="float" office:value="-1.2997308939280305" table:style-name="c12">
            <text:p>-1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1.3196595" table:style-name="c1">
            <text:p>1.3197</text:p>
          </table:table-cell>
          <table:table-cell office:value-type="string" table:style-name="c1">
            <text:p>2026-05-06 09:00</text:p>
          </table:table-cell>
          <table:table-cell office:value-type="float" office:value="1.3283355000000001" table:style-name="c1">
            <text:p>1.3283</text:p>
          </table:table-cell>
          <table:table-cell office:value-type="float" office:value="0.45622809031422573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1.3176584999999998" table:style-name="c1">
            <text:p>1.3177</text:p>
          </table:table-cell>
          <table:table-cell office:value-type="string" table:style-name="c1">
            <text:p>2026-05-06 20:45</text:p>
          </table:table-cell>
          <table:table-cell office:value-type="float" office:value="1.3033480000000002" table:style-name="c1">
            <text:p>1.3033</text:p>
          </table:table-cell>
          <table:table-cell office:value-type="float" office:value="-1.2837842773373964" table:style-name="c12">
            <text:p>-1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1.318659" table:style-name="c1">
            <text:p>1.3187</text:p>
          </table:table-cell>
          <table:table-cell office:value-type="string" table:style-name="c1">
            <text:p>2026-05-07 05:45</text:p>
          </table:table-cell>
          <table:table-cell office:value-type="float" office:value="1.3193400000000002" table:style-name="c1">
            <text:p>1.3193</text:p>
          </table:table-cell>
          <table:table-cell office:value-type="float" office:value="-0.1483598610406256" table:style-name="c12">
            <text:p>-0.1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1.3596795" table:style-name="c1">
            <text:p>1.3597</text:p>
          </table:table-cell>
          <table:table-cell office:value-type="string" table:style-name="c1">
            <text:p>2026-05-08 16:30</text:p>
          </table:table-cell>
          <table:table-cell office:value-type="float" office:value="1.3503245000000001" table:style-name="c1">
            <text:p>1.3503</text:p>
          </table:table-cell>
          <table:table-cell office:value-type="float" office:value="-0.8865544178241924" table:style-name="c12">
            <text:p>-0.9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5-08 18:15</text:p>
          </table:table-cell>
          <table:table-cell office:value-type="float" office:value="1.3673160000000002" table:style-name="c1">
            <text:p>1.3673</text:p>
          </table:table-cell>
          <table:table-cell office:value-type="float" office:value="-0.007273832585152906" table:style-name="c12">
            <text:p>-0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45</text:p>
          </table:table-cell>
          <table:table-cell office:value-type="float" office:value="1.348674" table:style-name="c1">
            <text:p>1.3487</text:p>
          </table:table-cell>
          <table:table-cell office:value-type="string" table:style-name="c1">
            <text:p>2026-05-10 08:15</text:p>
          </table:table-cell>
          <table:table-cell office:value-type="float" office:value="1.349325" table:style-name="c1">
            <text:p>1.3493</text:p>
          </table:table-cell>
          <table:table-cell office:value-type="float" office:value="-0.15172685726867474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45</text:p>
          </table:table-cell>
          <table:table-cell office:value-type="float" office:value="1.356678" table:style-name="c1">
            <text:p>1.3567</text:p>
          </table:table-cell>
          <table:table-cell office:value-type="string" table:style-name="c1">
            <text:p>2026-05-10 09:15</text:p>
          </table:table-cell>
          <table:table-cell office:value-type="float" office:value="1.3573210000000002" table:style-name="c1">
            <text:p>1.3573</text:p>
          </table:table-cell>
          <table:table-cell office:value-type="float" office:value="-0.15259956150242004" table:style-name="c12">
            <text:p>-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00</text:p>
          </table:table-cell>
          <table:table-cell office:value-type="float" office:value="1.3736865" table:style-name="c1">
            <text:p>1.3737</text:p>
          </table:table-cell>
          <table:table-cell office:value-type="string" table:style-name="c1">
            <text:p>2026-05-10 16:30</text:p>
          </table:table-cell>
          <table:table-cell office:value-type="float" office:value="1.383308" table:style-name="c1">
            <text:p>1.3833</text:p>
          </table:table-cell>
          <table:table-cell office:value-type="float" office:value="0.49911441278629454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1.392696" table:style-name="c1">
            <text:p>1.3927</text:p>
          </table:table-cell>
          <table:table-cell office:value-type="string" table:style-name="c1">
            <text:p>2026-05-10 17:45</text:p>
          </table:table-cell>
          <table:table-cell office:value-type="float" office:value="1.395302" table:style-name="c1">
            <text:p>1.3953</text:p>
          </table:table-cell>
          <table:table-cell office:value-type="float" office:value="-0.01315496691308704" table:style-name="c12">
            <text:p>-0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5:30</text:p>
          </table:table-cell>
          <table:table-cell office:value-type="float" office:value="1.3716855" table:style-name="c1">
            <text:p>1.3717</text:p>
          </table:table-cell>
          <table:table-cell office:value-type="string" table:style-name="c1">
            <text:p>2026-05-11 16:00</text:p>
          </table:table-cell>
          <table:table-cell office:value-type="float" office:value="1.3673160000000002" table:style-name="c1">
            <text:p>1.3673</text:p>
          </table:table-cell>
          <table:table-cell office:value-type="float" office:value="-0.5178129158615152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1.4217104999999999" table:style-name="c1">
            <text:p>1.4217</text:p>
          </table:table-cell>
          <table:table-cell office:value-type="string" table:style-name="c1">
            <text:p>2026-05-13 10:15</text:p>
          </table:table-cell>
          <table:table-cell office:value-type="float" office:value="1.4202895000000002" table:style-name="c1">
            <text:p>1.4203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00</text:p>
          </table:table-cell>
          <table:table-cell office:value-type="float" office:value="1.3906949999999998" table:style-name="c1">
            <text:p>1.3907</text:p>
          </table:table-cell>
          <table:table-cell office:value-type="string" table:style-name="c1">
            <text:p>2026-05-14 17:30</text:p>
          </table:table-cell>
          <table:table-cell office:value-type="float" office:value="1.3863065" table:style-name="c1">
            <text:p>1.3863</text:p>
          </table:table-cell>
          <table:table-cell office:value-type="float" office:value="-0.5148308359129494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30</text:p>
          </table:table-cell>
          <table:table-cell office:value-type="float" office:value="1.2656325" table:style-name="c1">
            <text:p>1.2656</text:p>
          </table:table-cell>
          <table:table-cell office:value-type="string" table:style-name="c1">
            <text:p>2026-05-21 03:00</text:p>
          </table:table-cell>
          <table:table-cell office:value-type="float" office:value="1.2643674999999999" table:style-name="c1">
            <text:p>1.264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5:00</text:p>
          </table:table-cell>
          <table:table-cell office:value-type="float" office:value="1.286643" table:style-name="c1">
            <text:p>1.2866</text:p>
          </table:table-cell>
          <table:table-cell office:value-type="string" table:style-name="c1">
            <text:p>2026-05-21 05:30</text:p>
          </table:table-cell>
          <table:table-cell office:value-type="float" office:value="1.2743625" table:style-name="c1">
            <text:p>1.2744</text:p>
          </table:table-cell>
          <table:table-cell office:value-type="float" office:value="-1.1524525946591146" table:style-name="c12">
            <text:p>-1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1.2786389999999999" table:style-name="c1">
            <text:p>1.2786</text:p>
          </table:table-cell>
          <table:table-cell office:value-type="string" table:style-name="c1">
            <text:p>2026-05-21 18:15</text:p>
          </table:table-cell>
          <table:table-cell office:value-type="float" office:value="1.2843575" table:style-name="c1">
            <text:p>1.2844</text:p>
          </table:table-cell>
          <table:table-cell office:value-type="float" office:value="0.24643932787129508" table:style-name="c11">
            <text:p>+0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20:00</text:p>
          </table:table-cell>
          <table:table-cell office:value-type="float" office:value="1.3016504999999998" table:style-name="c1">
            <text:p>1.3017</text:p>
          </table:table-cell>
          <table:table-cell office:value-type="string" table:style-name="c1">
            <text:p>2026-05-21 20:30</text:p>
          </table:table-cell>
          <table:table-cell office:value-type="float" office:value="1.2973510000000001" table:style-name="c1">
            <text:p>1.2974</text:p>
          </table:table-cell>
          <table:table-cell office:value-type="float" office:value="-0.5295511083044047" table:style-name="c12">
            <text:p>-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3:15</text:p>
          </table:table-cell>
          <table:table-cell office:value-type="float" office:value="1.3076534999999998" table:style-name="c1">
            <text:p>1.3077</text:p>
          </table:table-cell>
          <table:table-cell office:value-type="string" table:style-name="c1">
            <text:p>2026-05-22 03:45</text:p>
          </table:table-cell>
          <table:table-cell office:value-type="float" office:value="1.3163415" table:style-name="c1">
            <text:p>1.3163</text:p>
          </table:table-cell>
          <table:table-cell office:value-type="float" office:value="0.4631680595433174" table:style-name="c11">
            <text:p>+0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1.3316655" table:style-name="c1">
            <text:p>1.3317</text:p>
          </table:table-cell>
          <table:table-cell office:value-type="string" table:style-name="c1">
            <text:p>2026-05-22 04:45</text:p>
          </table:table-cell>
          <table:table-cell office:value-type="float" office:value="1.321339" table:style-name="c1">
            <text:p>1.3213</text:p>
          </table:table-cell>
          <table:table-cell office:value-type="float" office:value="-0.9738073608575037" table:style-name="c12">
            <text:p>-1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5:45</text:p>
          </table:table-cell>
          <table:table-cell office:value-type="float" office:value="1.3236614999999998" table:style-name="c1">
            <text:p>1.3237</text:p>
          </table:table-cell>
          <table:table-cell office:value-type="string" table:style-name="c1">
            <text:p>2026-05-22 06:15</text:p>
          </table:table-cell>
          <table:table-cell office:value-type="float" office:value="1.317341" table:style-name="c1">
            <text:p>1.3173</text:p>
          </table:table-cell>
          <table:table-cell office:value-type="float" office:value="-0.676446709298395" table:style-name="c12">
            <text:p>-0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00</text:p>
          </table:table-cell>
          <table:table-cell office:value-type="float" office:value="1.3476735" table:style-name="c1">
            <text:p>1.3477</text:p>
          </table:table-cell>
          <table:table-cell office:value-type="string" table:style-name="c1">
            <text:p>2026-05-22 13:30</text:p>
          </table:table-cell>
          <table:table-cell office:value-type="float" office:value="1.3343325000000001" table:style-name="c1">
            <text:p>1.3343</text:p>
          </table:table-cell>
          <table:table-cell office:value-type="float" office:value="-1.1878493320154893" table:style-name="c12">
            <text:p>-1.2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8:15</text:p>
          </table:table-cell>
          <table:table-cell office:value-type="float" office:value="1.2916454999999998" table:style-name="c1">
            <text:p>1.2916</text:p>
          </table:table-cell>
          <table:table-cell office:value-type="string" table:style-name="c1">
            <text:p>2026-05-25 18:45</text:p>
          </table:table-cell>
          <table:table-cell office:value-type="float" office:value="1.2813590000000001" table:style-name="c1">
            <text:p>1.2814</text:p>
          </table:table-cell>
          <table:table-cell office:value-type="float" office:value="-0.9946952659223962" table:style-name="c12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15</text:p>
          </table:table-cell>
          <table:table-cell office:value-type="float" office:value="8.754375" table:style-name="c8">
            <text:p>8.7544</text:p>
          </table:table-cell>
          <table:table-cell office:value-type="string" table:style-name="c8">
            <text:p>2026-03-04 09:45</text:p>
          </table:table-cell>
          <table:table-cell office:value-type="float" office:value="8.77561" table:style-name="c8">
            <text:p>8.7756</text:p>
          </table:table-cell>
          <table:table-cell office:value-type="float" office:value="0.04217954576999361" table:style-name="c10">
            <text:p>+0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0:00</text:p>
          </table:table-cell>
          <table:table-cell office:value-type="float" office:value="8.72436" table:style-name="c8">
            <text:p>8.7244</text:p>
          </table:table-cell>
          <table:table-cell office:value-type="string" table:style-name="c8">
            <text:p>2026-03-04 10:30</text:p>
          </table:table-cell>
          <table:table-cell office:value-type="float" office:value="8.645675" table:style-name="c8">
            <text:p>8.6457</text:p>
          </table:table-cell>
          <table:table-cell office:value-type="float" office:value="-1.0999970694125394" table:style-name="c9">
            <text:p>-1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9:45</text:p>
          </table:table-cell>
          <table:table-cell office:value-type="float" office:value="8.254125" table:style-name="c8">
            <text:p>8.2541</text:p>
          </table:table-cell>
          <table:table-cell office:value-type="string" table:style-name="c8">
            <text:p>2026-03-09 20:15</text:p>
          </table:table-cell>
          <table:table-cell office:value-type="float" office:value="8.225885000000002" table:style-name="c8">
            <text:p>8.2259</text:p>
          </table:table-cell>
          <table:table-cell office:value-type="float" office:value="-0.5413480425241701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9:15</text:p>
          </table:table-cell>
          <table:table-cell office:value-type="float" office:value="8.334165" table:style-name="c8">
            <text:p>8.3342</text:p>
          </table:table-cell>
          <table:table-cell office:value-type="string" table:style-name="c8">
            <text:p>2026-03-10 09:45</text:p>
          </table:table-cell>
          <table:table-cell office:value-type="float" office:value="8.395800000000001" table:style-name="c8">
            <text:p>8.3958</text:p>
          </table:table-cell>
          <table:table-cell office:value-type="float" office:value="0.5381678404495327" table:style-name="c10">
            <text:p>+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0:00</text:p>
          </table:table-cell>
          <table:table-cell office:value-type="float" office:value="8.394195" table:style-name="c8">
            <text:p>8.3942</text:p>
          </table:table-cell>
          <table:table-cell office:value-type="string" table:style-name="c8">
            <text:p>2026-03-10 10:30</text:p>
          </table:table-cell>
          <table:table-cell office:value-type="float" office:value="8.35582" table:style-name="c8">
            <text:p>8.3558</text:p>
          </table:table-cell>
          <table:table-cell office:value-type="float" office:value="-0.656147303940402" table:style-name="c9">
            <text:p>-0.7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8.52426" table:style-name="c8">
            <text:p>8.5243</text:p>
          </table:table-cell>
          <table:table-cell office:value-type="string" table:style-name="c8">
            <text:p>2026-03-10 15:30</text:p>
          </table:table-cell>
          <table:table-cell office:value-type="float" office:value="8.475760000000001" table:style-name="c8">
            <text:p>8.4758</text:p>
          </table:table-cell>
          <table:table-cell office:value-type="float" office:value="-0.7677269843951007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07:00</text:p>
          </table:table-cell>
          <table:table-cell office:value-type="float" office:value="8.234115" table:style-name="c8">
            <text:p>8.2341</text:p>
          </table:table-cell>
          <table:table-cell office:value-type="string" table:style-name="c8">
            <text:p>2026-03-11 07:30</text:p>
          </table:table-cell>
          <table:table-cell office:value-type="float" office:value="8.17591" table:style-name="c8">
            <text:p>8.1759</text:p>
          </table:table-cell>
          <table:table-cell office:value-type="float" office:value="-0.9053631639830195" table:style-name="c9">
            <text:p>-0.9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9:45</text:p>
          </table:table-cell>
          <table:table-cell office:value-type="float" office:value="8.26413" table:style-name="c8">
            <text:p>8.2641</text:p>
          </table:table-cell>
          <table:table-cell office:value-type="string" table:style-name="c8">
            <text:p>2026-03-12 10:15</text:p>
          </table:table-cell>
          <table:table-cell office:value-type="float" office:value="8.205895000000002" table:style-name="c8">
            <text:p>8.2059</text:p>
          </table:table-cell>
          <table:table-cell office:value-type="float" office:value="-0.9031632380540722" table:style-name="c9">
            <text:p>-0.9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9:30</text:p>
          </table:table-cell>
          <table:table-cell office:value-type="float" office:value="8.434215" table:style-name="c8">
            <text:p>8.4342</text:p>
          </table:table-cell>
          <table:table-cell office:value-type="string" table:style-name="c8">
            <text:p>2026-03-13 10:00</text:p>
          </table:table-cell>
          <table:table-cell office:value-type="float" office:value="8.475760000000001" table:style-name="c8">
            <text:p>8.4758</text:p>
          </table:table-cell>
          <table:table-cell office:value-type="float" office:value="0.2916923004689931" table:style-name="c10">
            <text:p>+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15</text:p>
          </table:table-cell>
          <table:table-cell office:value-type="float" office:value="8.52426" table:style-name="c8">
            <text:p>8.5243</text:p>
          </table:table-cell>
          <table:table-cell office:value-type="string" table:style-name="c8">
            <text:p>2026-03-13 10:45</text:p>
          </table:table-cell>
          <table:table-cell office:value-type="float" office:value="8.525735" table:style-name="c8">
            <text:p>8.5257</text:p>
          </table:table-cell>
          <table:table-cell office:value-type="float" office:value="-0.1826310350106719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1:00</text:p>
          </table:table-cell>
          <table:table-cell office:value-type="float" office:value="8.56428" table:style-name="c8">
            <text:p>8.5643</text:p>
          </table:table-cell>
          <table:table-cell office:value-type="string" table:style-name="c8">
            <text:p>2026-03-13 11:30</text:p>
          </table:table-cell>
          <table:table-cell office:value-type="float" office:value="8.545725000000001" table:style-name="c8">
            <text:p>8.5457</text:p>
          </table:table-cell>
          <table:table-cell office:value-type="float" office:value="-0.4161225961201498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00</text:p>
          </table:table-cell>
          <table:table-cell office:value-type="float" office:value="8.694344999999998" table:style-name="c8">
            <text:p>8.6943</text:p>
          </table:table-cell>
          <table:table-cell office:value-type="string" table:style-name="c8">
            <text:p>2026-03-13 13:30</text:p>
          </table:table-cell>
          <table:table-cell office:value-type="float" office:value="8.745625" table:style-name="c8">
            <text:p>8.7456</text:p>
          </table:table-cell>
          <table:table-cell office:value-type="float" office:value="0.3887296354699865" table:style-name="c10">
            <text:p>+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45</text:p>
          </table:table-cell>
          <table:table-cell office:value-type="float" office:value="8.82441" table:style-name="c8">
            <text:p>8.8244</text:p>
          </table:table-cell>
          <table:table-cell office:value-type="string" table:style-name="c8">
            <text:p>2026-03-13 14:15</text:p>
          </table:table-cell>
          <table:table-cell office:value-type="float" office:value="8.75562" table:style-name="c8">
            <text:p>8.7556</text:p>
          </table:table-cell>
          <table:table-cell office:value-type="float" office:value="-0.9778838968271142" table:style-name="c9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00</text:p>
          </table:table-cell>
          <table:table-cell office:value-type="float" office:value="8.394195" table:style-name="c8">
            <text:p>8.3942</text:p>
          </table:table-cell>
          <table:table-cell office:value-type="string" table:style-name="c8">
            <text:p>2026-03-15 22:30</text:p>
          </table:table-cell>
          <table:table-cell office:value-type="float" office:value="8.365815" table:style-name="c8">
            <text:p>8.3658</text:p>
          </table:table-cell>
          <table:table-cell office:value-type="float" office:value="-0.5373149442561065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8.46423" table:style-name="c8">
            <text:p>8.4642</text:p>
          </table:table-cell>
          <table:table-cell office:value-type="string" table:style-name="c8">
            <text:p>2026-03-15 23:15</text:p>
          </table:table-cell>
          <table:table-cell office:value-type="float" office:value="8.485755000000001" table:style-name="c8">
            <text:p>8.4858</text:p>
          </table:table-cell>
          <table:table-cell office:value-type="float" office:value="0.053897114740508734" table:style-name="c10">
            <text:p>+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8.594294999999999" table:style-name="c8">
            <text:p>8.5943</text:p>
          </table:table-cell>
          <table:table-cell office:value-type="string" table:style-name="c8">
            <text:p>2026-03-16 04:00</text:p>
          </table:table-cell>
          <table:table-cell office:value-type="float" office:value="8.65567" table:style-name="c8">
            <text:p>8.6557</text:p>
          </table:table-cell>
          <table:table-cell office:value-type="float" office:value="0.5128089700202398" table:style-name="c10">
            <text:p>+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4:45</text:p>
          </table:table-cell>
          <table:table-cell office:value-type="float" office:value="8.734365" table:style-name="c8">
            <text:p>8.7344</text:p>
          </table:table-cell>
          <table:table-cell office:value-type="string" table:style-name="c8">
            <text:p>2026-03-16 05:15</text:p>
          </table:table-cell>
          <table:table-cell office:value-type="float" office:value="8.805595" table:style-name="c8">
            <text:p>8.8056</text:p>
          </table:table-cell>
          <table:table-cell office:value-type="float" office:value="0.613984137312773" table:style-name="c10">
            <text:p>+0.6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5:45</text:p>
          </table:table-cell>
          <table:table-cell office:value-type="float" office:value="8.974485" table:style-name="c8">
            <text:p>8.9745</text:p>
          </table:table-cell>
          <table:table-cell office:value-type="string" table:style-name="c8">
            <text:p>2026-03-16 06:15</text:p>
          </table:table-cell>
          <table:table-cell office:value-type="float" office:value="8.885555000000002" table:style-name="c8">
            <text:p>8.8856</text:p>
          </table:table-cell>
          <table:table-cell office:value-type="float" office:value="-1.1888395205406965" table:style-name="c9">
            <text:p>-1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8:15</text:p>
          </table:table-cell>
          <table:table-cell office:value-type="float" office:value="9.164579999999999" table:style-name="c8">
            <text:p>9.1646</text:p>
          </table:table-cell>
          <table:table-cell office:value-type="string" table:style-name="c8">
            <text:p>2026-03-16 08:45</text:p>
          </table:table-cell>
          <table:table-cell office:value-type="float" office:value="9.025485" table:style-name="c8">
            <text:p>9.0255</text:p>
          </table:table-cell>
          <table:table-cell office:value-type="float" office:value="-1.714611520822551" table:style-name="c9">
            <text:p>-1.7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4:00</text:p>
          </table:table-cell>
          <table:table-cell office:value-type="float" office:value="8.944469999999999" table:style-name="c8">
            <text:p>8.9445</text:p>
          </table:table-cell>
          <table:table-cell office:value-type="string" table:style-name="c8">
            <text:p>2026-03-16 14:30</text:p>
          </table:table-cell>
          <table:table-cell office:value-type="float" office:value="8.85557" table:style-name="c8">
            <text:p>8.8556</text:p>
          </table:table-cell>
          <table:table-cell office:value-type="float" office:value="-1.1918233772375442" table:style-name="c9">
            <text:p>-1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1:15</text:p>
          </table:table-cell>
          <table:table-cell office:value-type="float" office:value="9.034514999999999" table:style-name="c8">
            <text:p>9.0345</text:p>
          </table:table-cell>
          <table:table-cell office:value-type="string" table:style-name="c8">
            <text:p>2026-03-16 21:45</text:p>
          </table:table-cell>
          <table:table-cell office:value-type="float" office:value="9.065465000000001" table:style-name="c8">
            <text:p>9.0655</text:p>
          </table:table-cell>
          <table:table-cell office:value-type="float" office:value="0.14199030567774162" table:style-name="c10">
            <text:p>+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4:15</text:p>
          </table:table-cell>
          <table:table-cell office:value-type="float" office:value="8.84442" table:style-name="c8">
            <text:p>8.8444</text:p>
          </table:table-cell>
          <table:table-cell office:value-type="string" table:style-name="c8">
            <text:p>2026-03-17 14:45</text:p>
          </table:table-cell>
          <table:table-cell office:value-type="float" office:value="8.865565" table:style-name="c8">
            <text:p>8.8656</text:p>
          </table:table-cell>
          <table:table-cell office:value-type="float" office:value="0.03869937842164717" table:style-name="c10">
            <text:p>+0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20:45</text:p>
          </table:table-cell>
          <table:table-cell office:value-type="float" office:value="8.58429" table:style-name="c8">
            <text:p>8.5843</text:p>
          </table:table-cell>
          <table:table-cell office:value-type="string" table:style-name="c8">
            <text:p>2026-03-23 21:15</text:p>
          </table:table-cell>
          <table:table-cell office:value-type="float" office:value="8.585705" table:style-name="c8">
            <text:p>8.5857</text:p>
          </table:table-cell>
          <table:table-cell office:value-type="float" office:value="-0.1834493510237678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21:30</text:p>
          </table:table-cell>
          <table:table-cell office:value-type="float" office:value="8.66433" table:style-name="c8">
            <text:p>8.6643</text:p>
          </table:table-cell>
          <table:table-cell office:value-type="string" table:style-name="c8">
            <text:p>2026-03-23 22:00</text:p>
          </table:table-cell>
          <table:table-cell office:value-type="float" office:value="8.67566" table:style-name="c8">
            <text:p>8.6757</text:p>
          </table:table-cell>
          <table:table-cell office:value-type="float" office:value="-0.06939537552238528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45</text:p>
          </table:table-cell>
          <table:table-cell office:value-type="float" office:value="8.704349999999998" table:style-name="c8">
            <text:p>8.7043</text:p>
          </table:table-cell>
          <table:table-cell office:value-type="string" table:style-name="c8">
            <text:p>2026-03-24 21:15</text:p>
          </table:table-cell>
          <table:table-cell office:value-type="float" office:value="8.605695" table:style-name="c8">
            <text:p>8.6057</text:p>
          </table:table-cell>
          <table:table-cell office:value-type="float" office:value="-1.3310331535955955" table:style-name="c9">
            <text:p>-1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3:15</text:p>
          </table:table-cell>
          <table:table-cell office:value-type="float" office:value="8.794394999999998" table:style-name="c8">
            <text:p>8.7944</text:p>
          </table:table-cell>
          <table:table-cell office:value-type="string" table:style-name="c8">
            <text:p>2026-03-25 13:45</text:p>
          </table:table-cell>
          <table:table-cell office:value-type="float" office:value="8.71564" table:style-name="c8">
            <text:p>8.7156</text:p>
          </table:table-cell>
          <table:table-cell office:value-type="float" office:value="-1.093623431287749" table:style-name="c9">
            <text:p>-1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00</text:p>
          </table:table-cell>
          <table:table-cell office:value-type="float" office:value="8.32416" table:style-name="c8">
            <text:p>8.3242</text:p>
          </table:table-cell>
          <table:table-cell office:value-type="string" table:style-name="c8">
            <text:p>2026-03-30 08:30</text:p>
          </table:table-cell>
          <table:table-cell office:value-type="float" office:value="8.365815" table:style-name="c8">
            <text:p>8.3658</text:p>
          </table:table-cell>
          <table:table-cell office:value-type="float" office:value="0.29951053097250213" table:style-name="c10">
            <text:p>+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8.254125" table:style-name="c8">
            <text:p>8.2541</text:p>
          </table:table-cell>
          <table:table-cell office:value-type="string" table:style-name="c8">
            <text:p>2026-04-01 06:00</text:p>
          </table:table-cell>
          <table:table-cell office:value-type="float" office:value="8.25587" table:style-name="c8">
            <text:p>8.2559</text:p>
          </table:table-cell>
          <table:table-cell office:value-type="float" office:value="-0.17880131606925476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15</text:p>
          </table:table-cell>
          <table:table-cell office:value-type="float" office:value="8.34417" table:style-name="c8">
            <text:p>8.3442</text:p>
          </table:table-cell>
          <table:table-cell office:value-type="string" table:style-name="c8">
            <text:p>2026-04-01 06:45</text:p>
          </table:table-cell>
          <table:table-cell office:value-type="float" office:value="8.365815" table:style-name="c8">
            <text:p>8.3658</text:p>
          </table:table-cell>
          <table:table-cell office:value-type="float" office:value="0.05898412682148191" table:style-name="c10">
            <text:p>+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20:15</text:p>
          </table:table-cell>
          <table:table-cell office:value-type="float" office:value="8.174085" table:style-name="c8">
            <text:p>8.1741</text:p>
          </table:table-cell>
          <table:table-cell office:value-type="string" table:style-name="c8">
            <text:p>2026-04-03 20:45</text:p>
          </table:table-cell>
          <table:table-cell office:value-type="float" office:value="8.145925" table:style-name="c8">
            <text:p>8.1459</text:p>
          </table:table-cell>
          <table:table-cell office:value-type="float" office:value="-0.5437147286210142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21:15</text:p>
          </table:table-cell>
          <table:table-cell office:value-type="float" office:value="8.18409" table:style-name="c8">
            <text:p>8.1841</text:p>
          </table:table-cell>
          <table:table-cell office:value-type="string" table:style-name="c8">
            <text:p>2026-04-03 21:45</text:p>
          </table:table-cell>
          <table:table-cell office:value-type="float" office:value="8.135930000000002" table:style-name="c8">
            <text:p>8.1359</text:p>
          </table:table-cell>
          <table:table-cell office:value-type="float" office:value="-0.7871824976264596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2:15</text:p>
          </table:table-cell>
          <table:table-cell office:value-type="float" office:value="8.14407" table:style-name="c8">
            <text:p>8.1441</text:p>
          </table:table-cell>
          <table:table-cell office:value-type="string" table:style-name="c8">
            <text:p>2026-04-04 02:45</text:p>
          </table:table-cell>
          <table:table-cell office:value-type="float" office:value="8.11594" table:style-name="c8">
            <text:p>8.1159</text:p>
          </table:table-cell>
          <table:table-cell office:value-type="float" office:value="-0.5446142292489964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4:00</text:p>
          </table:table-cell>
          <table:table-cell office:value-type="float" office:value="8.194094999999999" table:style-name="c8">
            <text:p>8.1941</text:p>
          </table:table-cell>
          <table:table-cell office:value-type="string" table:style-name="c8">
            <text:p>2026-04-04 04:30</text:p>
          </table:table-cell>
          <table:table-cell office:value-type="float" office:value="8.17591" table:style-name="c8">
            <text:p>8.1759</text:p>
          </table:table-cell>
          <table:table-cell office:value-type="float" office:value="-0.421384473697195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7:15</text:p>
          </table:table-cell>
          <table:table-cell office:value-type="float" office:value="8.26413" table:style-name="c8">
            <text:p>8.2641</text:p>
          </table:table-cell>
          <table:table-cell office:value-type="string" table:style-name="c8">
            <text:p>2026-04-04 07:45</text:p>
          </table:table-cell>
          <table:table-cell office:value-type="float" office:value="8.215890000000002" table:style-name="c8">
            <text:p>8.2159</text:p>
          </table:table-cell>
          <table:table-cell office:value-type="float" office:value="-0.7824606354207675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0:45</text:p>
          </table:table-cell>
          <table:table-cell office:value-type="float" office:value="8.374184999999999" table:style-name="c8">
            <text:p>8.3742</text:p>
          </table:table-cell>
          <table:table-cell office:value-type="string" table:style-name="c8">
            <text:p>2026-04-04 11:15</text:p>
          </table:table-cell>
          <table:table-cell office:value-type="float" office:value="8.405795000000001" table:style-name="c8">
            <text:p>8.4058</text:p>
          </table:table-cell>
          <table:table-cell office:value-type="float" office:value="0.17681500701265396" table:style-name="c10">
            <text:p>+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1:30</text:p>
          </table:table-cell>
          <table:table-cell office:value-type="float" office:value="8.44422" table:style-name="c8">
            <text:p>8.4442</text:p>
          </table:table-cell>
          <table:table-cell office:value-type="string" table:style-name="c8">
            <text:p>2026-04-04 12:00</text:p>
          </table:table-cell>
          <table:table-cell office:value-type="float" office:value="8.395800000000001" table:style-name="c8">
            <text:p>8.3958</text:p>
          </table:table-cell>
          <table:table-cell office:value-type="float" office:value="-0.7721637309307194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6:30</text:p>
          </table:table-cell>
          <table:table-cell office:value-type="float" office:value="8.52426" table:style-name="c8">
            <text:p>8.5243</text:p>
          </table:table-cell>
          <table:table-cell office:value-type="string" table:style-name="c8">
            <text:p>2026-04-04 17:00</text:p>
          </table:table-cell>
          <table:table-cell office:value-type="float" office:value="8.455770000000001" table:style-name="c8">
            <text:p>8.4558</text:p>
          </table:table-cell>
          <table:table-cell office:value-type="float" office:value="-1.00176536414891" table:style-name="c9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7:15</text:p>
          </table:table-cell>
          <table:table-cell office:value-type="float" office:value="8.66433" table:style-name="c8">
            <text:p>8.6643</text:p>
          </table:table-cell>
          <table:table-cell office:value-type="string" table:style-name="c8">
            <text:p>2026-04-04 17:45</text:p>
          </table:table-cell>
          <table:table-cell office:value-type="float" office:value="8.71564" table:style-name="c8">
            <text:p>8.7156</text:p>
          </table:table-cell>
          <table:table-cell office:value-type="float" office:value="0.3911143232079306" table:style-name="c10">
            <text:p>+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8:15</text:p>
          </table:table-cell>
          <table:table-cell office:value-type="float" office:value="8.834415" table:style-name="c8">
            <text:p>8.8344</text:p>
          </table:table-cell>
          <table:table-cell office:value-type="string" table:style-name="c8">
            <text:p>2026-04-04 18:45</text:p>
          </table:table-cell>
          <table:table-cell office:value-type="float" office:value="8.825585" table:style-name="c8">
            <text:p>8.8256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19:30</text:p>
          </table:table-cell>
          <table:table-cell office:value-type="float" office:value="8.58429" table:style-name="c8">
            <text:p>8.5843</text:p>
          </table:table-cell>
          <table:table-cell office:value-type="string" table:style-name="c8">
            <text:p>2026-04-05 20:00</text:p>
          </table:table-cell>
          <table:table-cell office:value-type="float" office:value="8.5957" table:style-name="c8">
            <text:p>8.5957</text:p>
          </table:table-cell>
          <table:table-cell office:value-type="float" office:value="-0.06724847716000903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22:00</text:p>
          </table:table-cell>
          <table:table-cell office:value-type="float" office:value="8.684339999999999" table:style-name="c8">
            <text:p>8.6843</text:p>
          </table:table-cell>
          <table:table-cell office:value-type="string" table:style-name="c8">
            <text:p>2026-04-05 22:30</text:p>
          </table:table-cell>
          <table:table-cell office:value-type="float" office:value="8.665665" table:style-name="c8">
            <text:p>8.6657</text:p>
          </table:table-cell>
          <table:table-cell office:value-type="float" office:value="-0.41451237900632654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22:45</text:p>
          </table:table-cell>
          <table:table-cell office:value-type="float" office:value="8.704349999999998" table:style-name="c8">
            <text:p>8.7043</text:p>
          </table:table-cell>
          <table:table-cell office:value-type="string" table:style-name="c8">
            <text:p>2026-04-05 23:15</text:p>
          </table:table-cell>
          <table:table-cell office:value-type="float" office:value="8.75562" table:style-name="c8">
            <text:p>8.7556</text:p>
          </table:table-cell>
          <table:table-cell office:value-type="float" office:value="0.38793839425119714" table:style-name="c10">
            <text:p>+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5 23:30</text:p>
          </table:table-cell>
          <table:table-cell office:value-type="float" office:value="8.804400000000001" table:style-name="c8">
            <text:p>8.8044</text:p>
          </table:table-cell>
          <table:table-cell office:value-type="string" table:style-name="c8">
            <text:p>2026-04-06 00:00</text:p>
          </table:table-cell>
          <table:table-cell office:value-type="float" office:value="8.73563" table:style-name="c8">
            <text:p>8.7356</text:p>
          </table:table-cell>
          <table:table-cell office:value-type="float" office:value="-0.9794253369906025" table:style-name="c9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1:30</text:p>
          </table:table-cell>
          <table:table-cell office:value-type="float" office:value="8.784389999999998" table:style-name="c8">
            <text:p>8.7844</text:p>
          </table:table-cell>
          <table:table-cell office:value-type="string" table:style-name="c8">
            <text:p>2026-04-06 02:00</text:p>
          </table:table-cell>
          <table:table-cell office:value-type="float" office:value="8.71564" table:style-name="c8">
            <text:p>8.7156</text:p>
          </table:table-cell>
          <table:table-cell office:value-type="float" office:value="-0.9809737996605228" table:style-name="c9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30</text:p>
          </table:table-cell>
          <table:table-cell office:value-type="float" office:value="8.74437" table:style-name="c8">
            <text:p>8.7444</text:p>
          </table:table-cell>
          <table:table-cell office:value-type="string" table:style-name="c8">
            <text:p>2026-04-06 11:00</text:p>
          </table:table-cell>
          <table:table-cell office:value-type="float" office:value="8.69565" table:style-name="c8">
            <text:p>8.6957</text:p>
          </table:table-cell>
          <table:table-cell office:value-type="float" office:value="-0.755944731867475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45</text:p>
          </table:table-cell>
          <table:table-cell office:value-type="float" office:value="8.614304999999998" table:style-name="c8">
            <text:p>8.6143</text:p>
          </table:table-cell>
          <table:table-cell office:value-type="string" table:style-name="c8">
            <text:p>2026-04-10 15:15</text:p>
          </table:table-cell>
          <table:table-cell office:value-type="float" office:value="8.615689999999999" table:style-name="c8">
            <text:p>8.6157</text:p>
          </table:table-cell>
          <table:table-cell office:value-type="float" office:value="-0.18385423211738638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00</text:p>
          </table:table-cell>
          <table:table-cell office:value-type="float" office:value="8.514254999999999" table:style-name="c8">
            <text:p>8.5143</text:p>
          </table:table-cell>
          <table:table-cell office:value-type="string" table:style-name="c8">
            <text:p>2026-04-13 23:30</text:p>
          </table:table-cell>
          <table:table-cell office:value-type="float" office:value="8.57571" table:style-name="c8">
            <text:p>8.5757</text:p>
          </table:table-cell>
          <table:table-cell office:value-type="float" office:value="0.5204466592790835" table:style-name="c10">
            <text:p>+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09:15</text:p>
          </table:table-cell>
          <table:table-cell office:value-type="float" office:value="8.52426" table:style-name="c8">
            <text:p>8.5243</text:p>
          </table:table-cell>
          <table:table-cell office:value-type="string" table:style-name="c8">
            <text:p>2026-04-14 09:45</text:p>
          </table:table-cell>
          <table:table-cell office:value-type="float" office:value="8.475760000000001" table:style-name="c8">
            <text:p>8.4758</text:p>
          </table:table-cell>
          <table:table-cell office:value-type="float" office:value="-0.7677269843951229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5:00</text:p>
          </table:table-cell>
          <table:table-cell office:value-type="float" office:value="8.454225" table:style-name="c8">
            <text:p>8.4542</text:p>
          </table:table-cell>
          <table:table-cell office:value-type="string" table:style-name="c8">
            <text:p>2026-04-15 15:30</text:p>
          </table:table-cell>
          <table:table-cell office:value-type="float" office:value="8.405795000000001" table:style-name="c8">
            <text:p>8.4058</text:p>
          </table:table-cell>
          <table:table-cell office:value-type="float" office:value="-0.7716045433496022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6:30</text:p>
          </table:table-cell>
          <table:table-cell office:value-type="float" office:value="8.46423" table:style-name="c8">
            <text:p>8.4642</text:p>
          </table:table-cell>
          <table:table-cell office:value-type="string" table:style-name="c8">
            <text:p>2026-04-15 17:00</text:p>
          </table:table-cell>
          <table:table-cell office:value-type="float" office:value="8.43578" table:style-name="c8">
            <text:p>8.4358</text:p>
          </table:table-cell>
          <table:table-cell office:value-type="float" office:value="-0.5353484513062834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8.534265" table:style-name="c8">
            <text:p>8.5343</text:p>
          </table:table-cell>
          <table:table-cell office:value-type="string" table:style-name="c8">
            <text:p>2026-04-15 20:15</text:p>
          </table:table-cell>
          <table:table-cell office:value-type="float" office:value="8.475760000000001" table:style-name="c8">
            <text:p>8.4758</text:p>
          </table:table-cell>
          <table:table-cell office:value-type="float" office:value="-0.884060247015972" table:style-name="c9">
            <text:p>-0.9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3:00</text:p>
          </table:table-cell>
          <table:table-cell office:value-type="float" office:value="8.494245" table:style-name="c8">
            <text:p>8.4942</text:p>
          </table:table-cell>
          <table:table-cell office:value-type="string" table:style-name="c8">
            <text:p>2026-04-16 03:30</text:p>
          </table:table-cell>
          <table:table-cell office:value-type="float" office:value="8.505745000000001" table:style-name="c8">
            <text:p>8.5057</text:p>
          </table:table-cell>
          <table:table-cell office:value-type="float" office:value="-0.06478485439257442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30</text:p>
          </table:table-cell>
          <table:table-cell office:value-type="float" office:value="8.554275" table:style-name="c8">
            <text:p>8.5543</text:p>
          </table:table-cell>
          <table:table-cell office:value-type="string" table:style-name="c8">
            <text:p>2026-04-16 13:00</text:p>
          </table:table-cell>
          <table:table-cell office:value-type="float" office:value="8.565715" table:style-name="c8">
            <text:p>8.5657</text:p>
          </table:table-cell>
          <table:table-cell office:value-type="float" office:value="-0.06643303243115684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8.62431" table:style-name="c8">
            <text:p>8.6243</text:p>
          </table:table-cell>
          <table:table-cell office:value-type="string" table:style-name="c8">
            <text:p>2026-04-16 16:30</text:p>
          </table:table-cell>
          <table:table-cell office:value-type="float" office:value="8.57571" table:style-name="c8">
            <text:p>8.5757</text:p>
          </table:table-cell>
          <table:table-cell office:value-type="float" office:value="-0.7622968595748403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45</text:p>
          </table:table-cell>
          <table:table-cell office:value-type="float" office:value="8.674335" table:style-name="c8">
            <text:p>8.6743</text:p>
          </table:table-cell>
          <table:table-cell office:value-type="string" table:style-name="c8">
            <text:p>2026-04-17 08:15</text:p>
          </table:table-cell>
          <table:table-cell office:value-type="float" office:value="8.67566" table:style-name="c8">
            <text:p>8.6757</text:p>
          </table:table-cell>
          <table:table-cell office:value-type="float" office:value="-0.18465558846871843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8.684339999999999" table:style-name="c8">
            <text:p>8.6843</text:p>
          </table:table-cell>
          <table:table-cell office:value-type="string" table:style-name="c8">
            <text:p>2026-04-17 09:15</text:p>
          </table:table-cell>
          <table:table-cell office:value-type="float" office:value="8.65567" table:style-name="c8">
            <text:p>8.6557</text:p>
          </table:table-cell>
          <table:table-cell office:value-type="float" office:value="-0.5293745331251154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7:00</text:p>
          </table:table-cell>
          <table:table-cell office:value-type="float" office:value="8.894445" table:style-name="c8">
            <text:p>8.8944</text:p>
          </table:table-cell>
          <table:table-cell office:value-type="string" table:style-name="c8">
            <text:p>2026-04-17 17:30</text:p>
          </table:table-cell>
          <table:table-cell office:value-type="float" office:value="8.825585" table:style-name="c8">
            <text:p>8.8256</text:p>
          </table:table-cell>
          <table:table-cell office:value-type="float" office:value="-0.9725434742133832" table:style-name="c9">
            <text:p>-1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1 15:30</text:p>
          </table:table-cell>
          <table:table-cell office:value-type="float" office:value="8.474235" table:style-name="c8">
            <text:p>8.4742</text:p>
          </table:table-cell>
          <table:table-cell office:value-type="string" table:style-name="c8">
            <text:p>2026-04-21 16:00</text:p>
          </table:table-cell>
          <table:table-cell office:value-type="float" office:value="8.475760000000001" table:style-name="c8">
            <text:p>8.4758</text:p>
          </table:table-cell>
          <table:table-cell office:value-type="float" office:value="-0.1819402487657995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2:45</text:p>
          </table:table-cell>
          <table:table-cell office:value-type="float" office:value="8.56428" table:style-name="c8">
            <text:p>8.5643</text:p>
          </table:table-cell>
          <table:table-cell office:value-type="string" table:style-name="c8">
            <text:p>2026-04-22 03:15</text:p>
          </table:table-cell>
          <table:table-cell office:value-type="float" office:value="8.57571" table:style-name="c8">
            <text:p>8.5757</text:p>
          </table:table-cell>
          <table:table-cell office:value-type="float" office:value="-0.06670548242233565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8.634315" table:style-name="c8">
            <text:p>8.6343</text:p>
          </table:table-cell>
          <table:table-cell office:value-type="string" table:style-name="c8">
            <text:p>2026-04-22 06:00</text:p>
          </table:table-cell>
          <table:table-cell office:value-type="float" office:value="8.605695" table:style-name="c8">
            <text:p>8.6057</text:p>
          </table:table-cell>
          <table:table-cell office:value-type="float" office:value="-0.5307054966722902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11:00</text:p>
          </table:table-cell>
          <table:table-cell office:value-type="float" office:value="8.72436" table:style-name="c8">
            <text:p>8.7244</text:p>
          </table:table-cell>
          <table:table-cell office:value-type="string" table:style-name="c8">
            <text:p>2026-04-22 11:30</text:p>
          </table:table-cell>
          <table:table-cell office:value-type="float" office:value="8.705645" table:style-name="c8">
            <text:p>8.7056</text:p>
          </table:table-cell>
          <table:table-cell office:value-type="float" office:value="-0.41398548839112204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3 06:30</text:p>
          </table:table-cell>
          <table:table-cell office:value-type="float" office:value="8.474235" table:style-name="c8">
            <text:p>8.4742</text:p>
          </table:table-cell>
          <table:table-cell office:value-type="string" table:style-name="c8">
            <text:p>2026-04-23 07:00</text:p>
          </table:table-cell>
          <table:table-cell office:value-type="float" office:value="8.465765000000001" table:style-name="c8">
            <text:p>8.4658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00:30</text:p>
          </table:table-cell>
          <table:table-cell office:value-type="float" office:value="8.54427" table:style-name="c8">
            <text:p>8.5443</text:p>
          </table:table-cell>
          <table:table-cell office:value-type="string" table:style-name="c8">
            <text:p>2026-04-24 01:00</text:p>
          </table:table-cell>
          <table:table-cell office:value-type="float" office:value="8.53573" table:style-name="c8">
            <text:p>8.5357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3:45</text:p>
          </table:table-cell>
          <table:table-cell office:value-type="float" office:value="8.474235" table:style-name="c8">
            <text:p>8.4742</text:p>
          </table:table-cell>
          <table:table-cell office:value-type="string" table:style-name="c8">
            <text:p>2026-04-29 04:15</text:p>
          </table:table-cell>
          <table:table-cell office:value-type="float" office:value="8.445775" table:style-name="c8">
            <text:p>8.4458</text:p>
          </table:table-cell>
          <table:table-cell office:value-type="float" office:value="-0.5350701771310473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4:45</text:p>
          </table:table-cell>
          <table:table-cell office:value-type="float" office:value="8.504249999999999" table:style-name="c8">
            <text:p>8.5042</text:p>
          </table:table-cell>
          <table:table-cell office:value-type="string" table:style-name="c8">
            <text:p>2026-04-29 05:15</text:p>
          </table:table-cell>
          <table:table-cell office:value-type="float" office:value="8.495750000000001" table:style-name="c8">
            <text:p>8.4958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8.58429" table:style-name="c8">
            <text:p>8.5843</text:p>
          </table:table-cell>
          <table:table-cell office:value-type="string" table:style-name="c8">
            <text:p>2026-04-29 10:30</text:p>
          </table:table-cell>
          <table:table-cell office:value-type="float" office:value="8.585705" table:style-name="c8">
            <text:p>8.5857</text:p>
          </table:table-cell>
          <table:table-cell office:value-type="float" office:value="-0.1834493510237789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15</text:p>
          </table:table-cell>
          <table:table-cell office:value-type="float" office:value="8.604299999999999" table:style-name="c8">
            <text:p>8.6043</text:p>
          </table:table-cell>
          <table:table-cell office:value-type="string" table:style-name="c8">
            <text:p>2026-05-04 02:45</text:p>
          </table:table-cell>
          <table:table-cell office:value-type="float" office:value="8.645675" table:style-name="c8">
            <text:p>8.6457</text:p>
          </table:table-cell>
          <table:table-cell office:value-type="float" office:value="0.28000297147940945" table:style-name="c10">
            <text:p>+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3:15</text:p>
          </table:table-cell>
          <table:table-cell office:value-type="float" office:value="8.674335" table:style-name="c8">
            <text:p>8.6743</text:p>
          </table:table-cell>
          <table:table-cell office:value-type="string" table:style-name="c8">
            <text:p>2026-05-04 03:45</text:p>
          </table:table-cell>
          <table:table-cell office:value-type="float" office:value="8.65567" table:style-name="c8">
            <text:p>8.6557</text:p>
          </table:table-cell>
          <table:table-cell office:value-type="float" office:value="-0.4146448613063458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2:45</text:p>
          </table:table-cell>
          <table:table-cell office:value-type="float" office:value="8.654325" table:style-name="c8">
            <text:p>8.6543</text:p>
          </table:table-cell>
          <table:table-cell office:value-type="string" table:style-name="c8">
            <text:p>2026-05-04 13:15</text:p>
          </table:table-cell>
          <table:table-cell office:value-type="float" office:value="8.67566" table:style-name="c8">
            <text:p>8.6757</text:p>
          </table:table-cell>
          <table:table-cell office:value-type="float" office:value="0.04613133502613387" table:style-name="c10">
            <text:p>+0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4:15</text:p>
          </table:table-cell>
          <table:table-cell office:value-type="float" office:value="8.854424999999999" table:style-name="c8">
            <text:p>8.8544</text:p>
          </table:table-cell>
          <table:table-cell office:value-type="string" table:style-name="c8">
            <text:p>2026-05-04 14:45</text:p>
          </table:table-cell>
          <table:table-cell office:value-type="float" office:value="8.75562" table:style-name="c8">
            <text:p>8.7556</text:p>
          </table:table-cell>
          <table:table-cell office:value-type="float" office:value="-1.3135520870073303" table:style-name="c9">
            <text:p>-1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2:30</text:p>
          </table:table-cell>
          <table:table-cell office:value-type="float" office:value="8.82441" table:style-name="c8">
            <text:p>8.8244</text:p>
          </table:table-cell>
          <table:table-cell office:value-type="string" table:style-name="c8">
            <text:p>2026-05-05 03:00</text:p>
          </table:table-cell>
          <table:table-cell office:value-type="float" office:value="8.805595" table:style-name="c8">
            <text:p>8.8056</text:p>
          </table:table-cell>
          <table:table-cell office:value-type="float" office:value="-0.41268917021081153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8:15</text:p>
          </table:table-cell>
          <table:table-cell office:value-type="float" office:value="8.894445" table:style-name="c8">
            <text:p>8.8944</text:p>
          </table:table-cell>
          <table:table-cell office:value-type="string" table:style-name="c8">
            <text:p>2026-05-05 08:45</text:p>
          </table:table-cell>
          <table:table-cell office:value-type="float" office:value="8.85557" table:style-name="c8">
            <text:p>8.8556</text:p>
          </table:table-cell>
          <table:table-cell office:value-type="float" office:value="-0.6360968495504715" table:style-name="c9">
            <text:p>-0.6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0:30</text:p>
          </table:table-cell>
          <table:table-cell office:value-type="float" office:value="8.894445" table:style-name="c8">
            <text:p>8.8944</text:p>
          </table:table-cell>
          <table:table-cell office:value-type="string" table:style-name="c8">
            <text:p>2026-05-05 11:00</text:p>
          </table:table-cell>
          <table:table-cell office:value-type="float" office:value="8.965515000000002" table:style-name="c8">
            <text:p>8.9655</text:p>
          </table:table-cell>
          <table:table-cell office:value-type="float" office:value="0.5975407742136118" table:style-name="c10">
            <text:p>+0.6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00</text:p>
          </table:table-cell>
          <table:table-cell office:value-type="float" office:value="8.994495" table:style-name="c8">
            <text:p>8.9945</text:p>
          </table:table-cell>
          <table:table-cell office:value-type="string" table:style-name="c8">
            <text:p>2026-05-05 21:30</text:p>
          </table:table-cell>
          <table:table-cell office:value-type="float" office:value="8.985505" table:style-name="c8">
            <text:p>8.985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2:00</text:p>
          </table:table-cell>
          <table:table-cell office:value-type="float" office:value="9.02451" table:style-name="c8">
            <text:p>9.0245</text:p>
          </table:table-cell>
          <table:table-cell office:value-type="string" table:style-name="c8">
            <text:p>2026-05-05 22:30</text:p>
          </table:table-cell>
          <table:table-cell office:value-type="float" office:value="9.005495" table:style-name="c8">
            <text:p>9.0055</text:p>
          </table:table-cell>
          <table:table-cell office:value-type="float" office:value="-0.41018276344088056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45</text:p>
          </table:table-cell>
          <table:table-cell office:value-type="float" office:value="9.314655" table:style-name="c8">
            <text:p>9.3147</text:p>
          </table:table-cell>
          <table:table-cell office:value-type="string" table:style-name="c8">
            <text:p>2026-05-06 04:15</text:p>
          </table:table-cell>
          <table:table-cell office:value-type="float" office:value="9.325335" table:style-name="c8">
            <text:p>9.3253</text:p>
          </table:table-cell>
          <table:table-cell office:value-type="float" office:value="-0.08547117059086728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15</text:p>
          </table:table-cell>
          <table:table-cell office:value-type="float" office:value="9.394695" table:style-name="c8">
            <text:p>9.3947</text:p>
          </table:table-cell>
          <table:table-cell office:value-type="string" table:style-name="c8">
            <text:p>2026-05-06 09:45</text:p>
          </table:table-cell>
          <table:table-cell office:value-type="float" office:value="9.35532" table:style-name="c8">
            <text:p>9.3553</text:p>
          </table:table-cell>
          <table:table-cell office:value-type="float" office:value="-0.6181816938176321" table:style-name="c9">
            <text:p>-0.6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5:45</text:p>
          </table:table-cell>
          <table:table-cell office:value-type="float" office:value="9.414705" table:style-name="c8">
            <text:p>9.4147</text:p>
          </table:table-cell>
          <table:table-cell office:value-type="string" table:style-name="c8">
            <text:p>2026-05-06 16:15</text:p>
          </table:table-cell>
          <table:table-cell office:value-type="float" office:value="9.465265" table:style-name="c8">
            <text:p>9.4653</text:p>
          </table:table-cell>
          <table:table-cell office:value-type="float" office:value="0.3360587003522708" table:style-name="c10">
            <text:p>+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6:45</text:p>
          </table:table-cell>
          <table:table-cell office:value-type="float" office:value="9.314655" table:style-name="c8">
            <text:p>9.3147</text:p>
          </table:table-cell>
          <table:table-cell office:value-type="string" table:style-name="c8">
            <text:p>2026-05-07 07:15</text:p>
          </table:table-cell>
          <table:table-cell office:value-type="float" office:value="9.33533" table:style-name="c8">
            <text:p>9.3353</text:p>
          </table:table-cell>
          <table:table-cell office:value-type="float" office:value="0.021618356557495666" table:style-name="c10">
            <text:p>+0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6:30</text:p>
          </table:table-cell>
          <table:table-cell office:value-type="float" office:value="9.32466" table:style-name="c8">
            <text:p>9.3247</text:p>
          </table:table-cell>
          <table:table-cell office:value-type="string" table:style-name="c8">
            <text:p>2026-05-07 17:00</text:p>
          </table:table-cell>
          <table:table-cell office:value-type="float" office:value="9.215390000000001" table:style-name="c8">
            <text:p>9.2154</text:p>
          </table:table-cell>
          <table:table-cell office:value-type="float" office:value="-1.3693964671097736" table:style-name="c9">
            <text:p>-1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08:15</text:p>
          </table:table-cell>
          <table:table-cell office:value-type="float" office:value="9.38469" table:style-name="c8">
            <text:p>9.3847</text:p>
          </table:table-cell>
          <table:table-cell office:value-type="string" table:style-name="c8">
            <text:p>2026-05-08 08:45</text:p>
          </table:table-cell>
          <table:table-cell office:value-type="float" office:value="9.41529" table:style-name="c8">
            <text:p>9.4153</text:p>
          </table:table-cell>
          <table:table-cell office:value-type="float" office:value="0.12551118140289308" table:style-name="c10">
            <text:p>+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09:30</text:p>
          </table:table-cell>
          <table:table-cell office:value-type="float" office:value="9.444719999999998" table:style-name="c8">
            <text:p>9.4447</text:p>
          </table:table-cell>
          <table:table-cell office:value-type="string" table:style-name="c8">
            <text:p>2026-05-08 10:00</text:p>
          </table:table-cell>
          <table:table-cell office:value-type="float" office:value="9.49525" table:style-name="c8">
            <text:p>9.4953</text:p>
          </table:table-cell>
          <table:table-cell office:value-type="float" office:value="0.3340384389373341" table:style-name="c10">
            <text:p>+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0:15</text:p>
          </table:table-cell>
          <table:table-cell office:value-type="float" office:value="9.50475" table:style-name="c8">
            <text:p>9.5047</text:p>
          </table:table-cell>
          <table:table-cell office:value-type="string" table:style-name="c8">
            <text:p>2026-05-08 10:45</text:p>
          </table:table-cell>
          <table:table-cell office:value-type="float" office:value="9.45527" table:style-name="c8">
            <text:p>9.4553</text:p>
          </table:table-cell>
          <table:table-cell office:value-type="float" office:value="-0.7194411713090765" table:style-name="c9">
            <text:p>-0.7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4:45</text:p>
          </table:table-cell>
          <table:table-cell office:value-type="float" office:value="9.474735" table:style-name="c8">
            <text:p>9.4747</text:p>
          </table:table-cell>
          <table:table-cell office:value-type="string" table:style-name="c8">
            <text:p>2026-05-08 15:15</text:p>
          </table:table-cell>
          <table:table-cell office:value-type="float" office:value="9.445275" table:style-name="c8">
            <text:p>9.4453</text:p>
          </table:table-cell>
          <table:table-cell office:value-type="float" office:value="-0.5102106256797634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5:45</text:p>
          </table:table-cell>
          <table:table-cell office:value-type="float" office:value="9.534764999999998" table:style-name="c8">
            <text:p>9.5348</text:p>
          </table:table-cell>
          <table:table-cell office:value-type="string" table:style-name="c8">
            <text:p>2026-05-08 16:15</text:p>
          </table:table-cell>
          <table:table-cell office:value-type="float" office:value="9.745125" table:style-name="c8">
            <text:p>9.7451</text:p>
          </table:table-cell>
          <table:table-cell office:value-type="float" office:value="2.0019318265841024" table:style-name="c10">
            <text:p>+2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0:15</text:p>
          </table:table-cell>
          <table:table-cell office:value-type="float" office:value="9.64482" table:style-name="c8">
            <text:p>9.6448</text:p>
          </table:table-cell>
          <table:table-cell office:value-type="string" table:style-name="c8">
            <text:p>2026-05-10 00:45</text:p>
          </table:table-cell>
          <table:table-cell office:value-type="float" office:value="9.635180000000002" table:style-name="c8">
            <text:p>9.6352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7:30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5-10 08:00</text:p>
          </table:table-cell>
          <table:table-cell office:value-type="float" office:value="9.665165" table:style-name="c8">
            <text:p>9.6652</text:p>
          </table:table-cell>
          <table:table-cell office:value-type="float" office:value="-0.8125121064467833" table:style-name="c9">
            <text:p>-0.8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45</text:p>
          </table:table-cell>
          <table:table-cell office:value-type="float" office:value="9.784889999999999" table:style-name="c8">
            <text:p>9.7849</text:p>
          </table:table-cell>
          <table:table-cell office:value-type="string" table:style-name="c8">
            <text:p>2026-05-10 17:15</text:p>
          </table:table-cell>
          <table:table-cell office:value-type="float" office:value="9.77511" table:style-name="c8">
            <text:p>9.775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2:30</text:p>
          </table:table-cell>
          <table:table-cell office:value-type="float" office:value="9.914954999999999" table:style-name="c8">
            <text:p>9.915</text:p>
          </table:table-cell>
          <table:table-cell office:value-type="string" table:style-name="c8">
            <text:p>2026-05-10 23:00</text:p>
          </table:table-cell>
          <table:table-cell office:value-type="float" office:value="9.945025" table:style-name="c8">
            <text:p>9.945</text:p>
          </table:table-cell>
          <table:table-cell office:value-type="float" office:value="0.10277298308465355" table:style-name="c10">
            <text:p>+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15</text:p>
          </table:table-cell>
          <table:table-cell office:value-type="float" office:value="9.994995" table:style-name="c8">
            <text:p>9.995</text:p>
          </table:table-cell>
          <table:table-cell office:value-type="string" table:style-name="c8">
            <text:p>2026-05-10 23:45</text:p>
          </table:table-cell>
          <table:table-cell office:value-type="float" office:value="10.014990000000001" table:style-name="c8">
            <text:p>10.015</text:p>
          </table:table-cell>
          <table:table-cell office:value-type="float" office:value="-0.0002497751124375114" table:style-name="c9">
            <text:p>-0.0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06:30</text:p>
          </table:table-cell>
          <table:table-cell office:value-type="float" office:value="9.014505" table:style-name="c8">
            <text:p>9.0145</text:p>
          </table:table-cell>
          <table:table-cell office:value-type="string" table:style-name="c8">
            <text:p>2026-05-20 07:00</text:p>
          </table:table-cell>
          <table:table-cell office:value-type="float" office:value="9.025485" table:style-name="c8">
            <text:p>9.0255</text:p>
          </table:table-cell>
          <table:table-cell office:value-type="float" office:value="-0.0783397925343432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08:15</text:p>
          </table:table-cell>
          <table:table-cell office:value-type="float" office:value="9.054525" table:style-name="c8">
            <text:p>9.0545</text:p>
          </table:table-cell>
          <table:table-cell office:value-type="string" table:style-name="c8">
            <text:p>2026-05-20 08:45</text:p>
          </table:table-cell>
          <table:table-cell office:value-type="float" office:value="9.065465000000001" table:style-name="c8">
            <text:p>9.0655</text:p>
          </table:table-cell>
          <table:table-cell office:value-type="float" office:value="-0.07931796019114978" table:style-name="c9">
            <text:p>-0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9.074535" table:style-name="c8">
            <text:p>9.0745</text:p>
          </table:table-cell>
          <table:table-cell office:value-type="string" table:style-name="c8">
            <text:p>2026-05-20 16:00</text:p>
          </table:table-cell>
          <table:table-cell office:value-type="float" office:value="9.075460000000001" table:style-name="c8">
            <text:p>9.0755</text:p>
          </table:table-cell>
          <table:table-cell office:value-type="float" office:value="-0.18972701675620263" table:style-name="c9">
            <text:p>-0.2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7:15</text:p>
          </table:table-cell>
          <table:table-cell office:value-type="float" office:value="9.10455" table:style-name="c8">
            <text:p>9.1045</text:p>
          </table:table-cell>
          <table:table-cell office:value-type="string" table:style-name="c8">
            <text:p>2026-05-20 17:45</text:p>
          </table:table-cell>
          <table:table-cell office:value-type="float" office:value="9.065465000000001" table:style-name="c8">
            <text:p>9.0655</text:p>
          </table:table-cell>
          <table:table-cell office:value-type="float" office:value="-0.6283326966736058" table:style-name="c9">
            <text:p>-0.6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4:15</text:p>
          </table:table-cell>
          <table:table-cell office:value-type="float" office:value="9.174584999999999" table:style-name="c8">
            <text:p>9.1746</text:p>
          </table:table-cell>
          <table:table-cell office:value-type="string" table:style-name="c8">
            <text:p>2026-05-22 04:45</text:p>
          </table:table-cell>
          <table:table-cell office:value-type="float" office:value="9.075460000000001" table:style-name="c8">
            <text:p>9.0755</text:p>
          </table:table-cell>
          <table:table-cell office:value-type="float" office:value="-1.2781705607392446" table:style-name="c9">
            <text:p>-1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8:30</text:p>
          </table:table-cell>
          <table:table-cell office:value-type="float" office:value="9.28464" table:style-name="c8">
            <text:p>9.2846</text:p>
          </table:table-cell>
          <table:table-cell office:value-type="string" table:style-name="c8">
            <text:p>2026-05-22 09:00</text:p>
          </table:table-cell>
          <table:table-cell office:value-type="float" office:value="9.205395000000001" table:style-name="c8">
            <text:p>9.2054</text:p>
          </table:table-cell>
          <table:table-cell office:value-type="float" office:value="-1.0517002770704886" table:style-name="c9">
            <text:p>-1.1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07:00</text:p>
          </table:table-cell>
          <table:table-cell office:value-type="float" office:value="9.014505" table:style-name="c8">
            <text:p>9.0145</text:p>
          </table:table-cell>
          <table:table-cell office:value-type="string" table:style-name="c8">
            <text:p>2026-05-25 07:30</text:p>
          </table:table-cell>
          <table:table-cell office:value-type="float" office:value="8.985505" table:style-name="c8">
            <text:p>8.9855</text:p>
          </table:table-cell>
          <table:table-cell office:value-type="float" office:value="-0.5209606572407544" table:style-name="c9">
            <text:p>-0.5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1:00</text:p>
          </table:table-cell>
          <table:table-cell office:value-type="float" office:value="9.06453" table:style-name="c8">
            <text:p>9.0645</text:p>
          </table:table-cell>
          <table:table-cell office:value-type="string" table:style-name="c8">
            <text:p>2026-05-25 11:30</text:p>
          </table:table-cell>
          <table:table-cell office:value-type="float" office:value="9.055470000000001" table:style-name="c8">
            <text:p>9.0555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30</text:p>
          </table:table-cell>
          <table:table-cell office:value-type="float" office:value="9.114555" table:style-name="c8">
            <text:p>9.1146</text:p>
          </table:table-cell>
          <table:table-cell office:value-type="string" table:style-name="c8">
            <text:p>2026-05-25 15:00</text:p>
          </table:table-cell>
          <table:table-cell office:value-type="float" office:value="9.09545" table:style-name="c8">
            <text:p>9.0954</text:p>
          </table:table-cell>
          <table:table-cell office:value-type="float" office:value="-0.4090907844650715" table:style-name="c9">
            <text:p>-0.4</text:p>
          </table:table-cell>
        </table:table-row>
        <table:table-row>
          <table:table-cell office:value-type="string" table:style-name="c7">
            <text:p>ETC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7:00</text:p>
          </table:table-cell>
          <table:table-cell office:value-type="float" office:value="9.134565" table:style-name="c8">
            <text:p>9.1346</text:p>
          </table:table-cell>
          <table:table-cell office:value-type="string" table:style-name="c8">
            <text:p>2026-05-25 17:30</text:p>
          </table:table-cell>
          <table:table-cell office:value-type="float" office:value="9.085455" table:style-name="c8">
            <text:p>9.0855</text:p>
          </table:table-cell>
          <table:table-cell office:value-type="float" office:value="-0.7364535097730607" table:style-name="c9">
            <text:p>-0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15</text:p>
          </table:table-cell>
          <table:table-cell office:value-type="float" office:value="1996.167585" table:style-name="c1">
            <text:p>1996.2</text:p>
          </table:table-cell>
          <table:table-cell office:value-type="string" table:style-name="c1">
            <text:p>2026-03-03 16:45</text:p>
          </table:table-cell>
          <table:table-cell office:value-type="float" office:value="1969.584715" table:style-name="c1">
            <text:p>1969.6</text:p>
          </table:table-cell>
          <table:table-cell office:value-type="float" office:value="-1.5289332456164928" table:style-name="c12">
            <text:p>-1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8:30</text:p>
          </table:table-cell>
          <table:table-cell office:value-type="float" office:value="2006.68284" table:style-name="c1">
            <text:p>2006.7</text:p>
          </table:table-cell>
          <table:table-cell office:value-type="string" table:style-name="c1">
            <text:p>2026-03-04 09:00</text:p>
          </table:table-cell>
          <table:table-cell office:value-type="float" office:value="2062.6781450000003" table:style-name="c1">
            <text:p>2062.7</text:p>
          </table:table-cell>
          <table:table-cell office:value-type="float" office:value="2.584963121932393" table:style-name="c11">
            <text:p>+2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15</text:p>
          </table:table-cell>
          <table:table-cell office:value-type="float" office:value="2069.864415" table:style-name="c1">
            <text:p>2069.9</text:p>
          </table:table-cell>
          <table:table-cell office:value-type="string" table:style-name="c1">
            <text:p>2026-03-04 09:45</text:p>
          </table:table-cell>
          <table:table-cell office:value-type="float" office:value="2082.9779900000003" table:style-name="c1">
            <text:p>2083</text:p>
          </table:table-cell>
          <table:table-cell office:value-type="float" office:value="0.43238107448648755" table:style-name="c11">
            <text:p>+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0:00</text:p>
          </table:table-cell>
          <table:table-cell office:value-type="float" office:value="2076.27762" table:style-name="c1">
            <text:p>2076.3</text:p>
          </table:table-cell>
          <table:table-cell office:value-type="string" table:style-name="c1">
            <text:p>2026-03-04 10:30</text:p>
          </table:table-cell>
          <table:table-cell office:value-type="float" office:value="2078.9500049999997" table:style-name="c1">
            <text:p>2079</text:p>
          </table:table-cell>
          <table:table-cell office:value-type="float" office:value="-0.07144690313597435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2140.08951" table:style-name="c1">
            <text:p>2140.1</text:p>
          </table:table-cell>
          <table:table-cell office:value-type="string" table:style-name="c1">
            <text:p>2026-03-04 16:00</text:p>
          </table:table-cell>
          <table:table-cell office:value-type="float" office:value="2149.154885" table:style-name="c1">
            <text:p>2149.2</text:p>
          </table:table-cell>
          <table:table-cell office:value-type="float" office:value="0.2228511640564479" table:style-name="c11">
            <text:p>+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15</text:p>
          </table:table-cell>
          <table:table-cell office:value-type="float" office:value="2182.85088" table:style-name="c1">
            <text:p>2182.9</text:p>
          </table:table-cell>
          <table:table-cell office:value-type="string" table:style-name="c1">
            <text:p>2026-03-04 19:45</text:p>
          </table:table-cell>
          <table:table-cell office:value-type="float" office:value="2180.24933" table:style-name="c1">
            <text:p>2180.2</text:p>
          </table:table-cell>
          <table:table-cell office:value-type="float" office:value="-0.3188430540280285" table:style-name="c12">
            <text:p>-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15</text:p>
          </table:table-cell>
          <table:table-cell office:value-type="float" office:value="2094.2766149999998" table:style-name="c1">
            <text:p>2094.3</text:p>
          </table:table-cell>
          <table:table-cell office:value-type="string" table:style-name="c1">
            <text:p>2026-03-05 21:45</text:p>
          </table:table-cell>
          <table:table-cell office:value-type="float" office:value="2080.61917" table:style-name="c1">
            <text:p>2080.6</text:p>
          </table:table-cell>
          <table:table-cell office:value-type="float" office:value="-0.8507282463653842" table:style-name="c12">
            <text:p>-0.9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019.2391149999999" table:style-name="c1">
            <text:p>2019.2</text:p>
          </table:table-cell>
          <table:table-cell office:value-type="string" table:style-name="c1">
            <text:p>2026-03-09 14:00</text:p>
          </table:table-cell>
          <table:table-cell office:value-type="float" office:value="2017.1409250000002" table:style-name="c1">
            <text:p>2017.1</text:p>
          </table:table-cell>
          <table:table-cell office:value-type="float" office:value="-0.30360221647522945" table:style-name="c12">
            <text:p>-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2032.65582" table:style-name="c1">
            <text:p>2032.7</text:p>
          </table:table-cell>
          <table:table-cell office:value-type="string" table:style-name="c1">
            <text:p>2026-03-09 20:15</text:p>
          </table:table-cell>
          <table:table-cell office:value-type="float" office:value="2031.1139350000003" table:style-name="c1">
            <text:p>2031.1</text:p>
          </table:table-cell>
          <table:table-cell office:value-type="float" office:value="-0.2756040496843526" table:style-name="c12">
            <text:p>-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2076.227595" table:style-name="c1">
            <text:p>2076.2</text:p>
          </table:table-cell>
          <table:table-cell office:value-type="string" table:style-name="c1">
            <text:p>2026-03-10 15:30</text:p>
          </table:table-cell>
          <table:table-cell office:value-type="float" office:value="2068.0754450000004" table:style-name="c1">
            <text:p>2068.1</text:p>
          </table:table-cell>
          <table:table-cell office:value-type="float" office:value="-0.5917575146454301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2064.15156" table:style-name="c1">
            <text:p>2064.2</text:p>
          </table:table-cell>
          <table:table-cell office:value-type="string" table:style-name="c1">
            <text:p>2026-03-11 14:15</text:p>
          </table:table-cell>
          <table:table-cell office:value-type="float" office:value="2049.2548600000005" table:style-name="c1">
            <text:p>2049.3</text:p>
          </table:table-cell>
          <table:table-cell office:value-type="float" office:value="-0.92014369648028" table:style-name="c12">
            <text:p>-0.9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6:45</text:p>
          </table:table-cell>
          <table:table-cell office:value-type="float" office:value="2069.444205" table:style-name="c1">
            <text:p>2069.4</text:p>
          </table:table-cell>
          <table:table-cell office:value-type="string" table:style-name="c1">
            <text:p>2026-03-11 17:15</text:p>
          </table:table-cell>
          <table:table-cell office:value-type="float" office:value="2070.28434" table:style-name="c1">
            <text:p>2070.3</text:p>
          </table:table-cell>
          <table:table-cell office:value-type="float" office:value="-0.15938402145321273" table:style-name="c12">
            <text:p>-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8:00</text:p>
          </table:table-cell>
          <table:table-cell office:value-type="float" office:value="2041.710345" table:style-name="c1">
            <text:p>2041.7</text:p>
          </table:table-cell>
          <table:table-cell office:value-type="string" table:style-name="c1">
            <text:p>2026-03-12 08:30</text:p>
          </table:table-cell>
          <table:table-cell office:value-type="float" office:value="2043.59769" table:style-name="c1">
            <text:p>2043.6</text:p>
          </table:table-cell>
          <table:table-cell office:value-type="float" office:value="-0.10764537622548476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4:15</text:p>
          </table:table-cell>
          <table:table-cell office:value-type="float" office:value="2081.250105" table:style-name="c1">
            <text:p>2081.3</text:p>
          </table:table-cell>
          <table:table-cell office:value-type="string" table:style-name="c1">
            <text:p>2026-03-12 14:45</text:p>
          </table:table-cell>
          <table:table-cell office:value-type="float" office:value="2044.6071850000003" table:style-name="c1">
            <text:p>2044.6</text:p>
          </table:table-cell>
          <table:table-cell office:value-type="float" office:value="-1.9570012111934432" table:style-name="c12">
            <text:p>-2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2147.71332" table:style-name="c1">
            <text:p>2147.7</text:p>
          </table:table-cell>
          <table:table-cell office:value-type="string" table:style-name="c1">
            <text:p>2026-03-13 13:30</text:p>
          </table:table-cell>
          <table:table-cell office:value-type="float" office:value="2181.9085" table:style-name="c1">
            <text:p>2181.9</text:p>
          </table:table-cell>
          <table:table-cell office:value-type="float" office:value="1.3890841310468804" table:style-name="c11">
            <text:p>+1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2189.684295" table:style-name="c1">
            <text:p>2189.7</text:p>
          </table:table-cell>
          <table:table-cell office:value-type="string" table:style-name="c1">
            <text:p>2026-03-13 14:15</text:p>
          </table:table-cell>
          <table:table-cell office:value-type="float" office:value="2192.193355" table:style-name="c1">
            <text:p>2192.2</text:p>
          </table:table-cell>
          <table:table-cell office:value-type="float" office:value="-0.08554358822056018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45</text:p>
          </table:table-cell>
          <table:table-cell office:value-type="float" office:value="2104.93194" table:style-name="c1">
            <text:p>2104.9</text:p>
          </table:table-cell>
          <table:table-cell office:value-type="string" table:style-name="c1">
            <text:p>2026-03-15 03:15</text:p>
          </table:table-cell>
          <table:table-cell office:value-type="float" office:value="2101.7486000000004" table:style-name="c1">
            <text:p>2101.7</text:p>
          </table:table-cell>
          <table:table-cell office:value-type="float" office:value="-0.3508301295195082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5:45</text:p>
          </table:table-cell>
          <table:table-cell office:value-type="float" office:value="2113.7163299999997" table:style-name="c1">
            <text:p>2113.7</text:p>
          </table:table-cell>
          <table:table-cell office:value-type="string" table:style-name="c1">
            <text:p>2026-03-15 06:15</text:p>
          </table:table-cell>
          <table:table-cell office:value-type="float" office:value="2108.04545" table:style-name="c1">
            <text:p>2108</text:p>
          </table:table-cell>
          <table:table-cell office:value-type="float" office:value="-0.4676532377714926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30</text:p>
          </table:table-cell>
          <table:table-cell office:value-type="float" office:value="2118.7988699999996" table:style-name="c1">
            <text:p>2118.8</text:p>
          </table:table-cell>
          <table:table-cell office:value-type="string" table:style-name="c1">
            <text:p>2026-03-15 10:00</text:p>
          </table:table-cell>
          <table:table-cell office:value-type="float" office:value="2116.1414" table:style-name="c1">
            <text:p>2116.1</text:p>
          </table:table-cell>
          <table:table-cell office:value-type="float" office:value="-0.32507269831608676" table:style-name="c12">
            <text:p>-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2111.8253849999996" table:style-name="c1">
            <text:p>2111.8</text:p>
          </table:table-cell>
          <table:table-cell office:value-type="string" table:style-name="c1">
            <text:p>2026-03-15 18:30</text:p>
          </table:table-cell>
          <table:table-cell office:value-type="float" office:value="2107.255845" table:style-name="c1">
            <text:p>2107.3</text:p>
          </table:table-cell>
          <table:table-cell office:value-type="float" office:value="-0.4158461441240102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2131.975455" table:style-name="c1">
            <text:p>2132</text:p>
          </table:table-cell>
          <table:table-cell office:value-type="string" table:style-name="c1">
            <text:p>2026-03-15 21:15</text:p>
          </table:table-cell>
          <table:table-cell office:value-type="float" office:value="2122.728105" table:style-name="c1">
            <text:p>2122.7</text:p>
          </table:table-cell>
          <table:table-cell office:value-type="float" office:value="-0.6327785552247112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2173.2760949999997" table:style-name="c1">
            <text:p>2173.3</text:p>
          </table:table-cell>
          <table:table-cell office:value-type="string" table:style-name="c1">
            <text:p>2026-03-15 23:15</text:p>
          </table:table-cell>
          <table:table-cell office:value-type="float" office:value="2195.2418300000004" table:style-name="c1">
            <text:p>2195.2</text:p>
          </table:table-cell>
          <table:table-cell office:value-type="float" office:value="0.8087995180304342" table:style-name="c11">
            <text:p>+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2239.5192" table:style-name="c1">
            <text:p>2239.5</text:p>
          </table:table-cell>
          <table:table-cell office:value-type="string" table:style-name="c1">
            <text:p>2026-03-16 04:15</text:p>
          </table:table-cell>
          <table:table-cell office:value-type="float" office:value="2243.7775500000002" table:style-name="c1">
            <text:p>2243.8</text:p>
          </table:table-cell>
          <table:table-cell office:value-type="float" office:value="-0.010134377166748365" table:style-name="c12">
            <text:p>-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30</text:p>
          </table:table-cell>
          <table:table-cell office:value-type="float" office:value="2250.274575" table:style-name="c1">
            <text:p>2250.3</text:p>
          </table:table-cell>
          <table:table-cell office:value-type="string" table:style-name="c1">
            <text:p>2026-03-16 05:00</text:p>
          </table:table-cell>
          <table:table-cell office:value-type="float" office:value="2262.1683500000004" table:style-name="c1">
            <text:p>2262.2</text:p>
          </table:table-cell>
          <table:table-cell office:value-type="float" office:value="0.3275911548860755" table:style-name="c11">
            <text:p>+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2:30</text:p>
          </table:table-cell>
          <table:table-cell office:value-type="float" office:value="2301.15" table:style-name="c1">
            <text:p>2301.2</text:p>
          </table:table-cell>
          <table:table-cell office:value-type="string" table:style-name="c1">
            <text:p>2026-03-16 13:00</text:p>
          </table:table-cell>
          <table:table-cell office:value-type="float" office:value="2278.1403600000003" table:style-name="c1">
            <text:p>2278.1</text:p>
          </table:table-cell>
          <table:table-cell office:value-type="float" office:value="-1.1978203324268244" table:style-name="c12">
            <text:p>-1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2292.4556549999998" table:style-name="c1">
            <text:p>2292.5</text:p>
          </table:table-cell>
          <table:table-cell office:value-type="string" table:style-name="c1">
            <text:p>2026-03-16 14:15</text:p>
          </table:table-cell>
          <table:table-cell office:value-type="float" office:value="2296.53116" table:style-name="c1">
            <text:p>2296.5</text:p>
          </table:table-cell>
          <table:table-cell office:value-type="float" office:value="-0.022476368854329465" table:style-name="c12">
            <text:p>-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7:30</text:p>
          </table:table-cell>
          <table:table-cell office:value-type="float" office:value="2301.780315" table:style-name="c1">
            <text:p>2301.8</text:p>
          </table:table-cell>
          <table:table-cell office:value-type="string" table:style-name="c1">
            <text:p>2026-03-16 18:00</text:p>
          </table:table-cell>
          <table:table-cell office:value-type="float" office:value="2313.592625" table:style-name="c1">
            <text:p>2313.6</text:p>
          </table:table-cell>
          <table:table-cell office:value-type="float" office:value="0.31225561778363" table:style-name="c11">
            <text:p>+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2352.285555" table:style-name="c1">
            <text:p>2352.3</text:p>
          </table:table-cell>
          <table:table-cell office:value-type="string" table:style-name="c1">
            <text:p>2026-03-16 21:45</text:p>
          </table:table-cell>
          <table:table-cell office:value-type="float" office:value="2357.84049" table:style-name="c1">
            <text:p>2357.8</text:p>
          </table:table-cell>
          <table:table-cell office:value-type="float" office:value="0.03577847335334283" table:style-name="c11">
            <text:p>+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00</text:p>
          </table:table-cell>
          <table:table-cell office:value-type="float" office:value="2362.22052" table:style-name="c1">
            <text:p>2362.2</text:p>
          </table:table-cell>
          <table:table-cell office:value-type="string" table:style-name="c1">
            <text:p>2026-03-16 22:30</text:p>
          </table:table-cell>
          <table:table-cell office:value-type="float" office:value="2358.4202" table:style-name="c1">
            <text:p>2358.4</text:p>
          </table:table-cell>
          <table:table-cell office:value-type="float" office:value="-0.3604575401707222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30</text:p>
          </table:table-cell>
          <table:table-cell office:value-type="float" office:value="2336.58771" table:style-name="c1">
            <text:p>2336.6</text:p>
          </table:table-cell>
          <table:table-cell office:value-type="string" table:style-name="c1">
            <text:p>2026-03-17 08:00</text:p>
          </table:table-cell>
          <table:table-cell office:value-type="float" office:value="2326.5461450000003" table:style-name="c1">
            <text:p>2326.5</text:p>
          </table:table-cell>
          <table:table-cell office:value-type="float" office:value="-0.6287943174987598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2142.840885" table:style-name="c1">
            <text:p>2142.8</text:p>
          </table:table-cell>
          <table:table-cell office:value-type="string" table:style-name="c1">
            <text:p>2026-03-24 21:00</text:p>
          </table:table-cell>
          <table:table-cell office:value-type="float" office:value="2147.40576" table:style-name="c1">
            <text:p>2147.4</text:p>
          </table:table-cell>
          <table:table-cell office:value-type="float" office:value="0.01270327104851976" table:style-name="c11">
            <text:p>+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15</text:p>
          </table:table-cell>
          <table:table-cell office:value-type="float" office:value="2175.597255" table:style-name="c1">
            <text:p>2175.6</text:p>
          </table:table-cell>
          <table:table-cell office:value-type="string" table:style-name="c1">
            <text:p>2026-03-25 05:45</text:p>
          </table:table-cell>
          <table:table-cell office:value-type="float" office:value="2172.03344" table:style-name="c1">
            <text:p>2172</text:p>
          </table:table-cell>
          <table:table-cell office:value-type="float" office:value="-0.3633811280277399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2184.841875" table:style-name="c1">
            <text:p>2184.8</text:p>
          </table:table-cell>
          <table:table-cell office:value-type="string" table:style-name="c1">
            <text:p>2026-03-25 09:15</text:p>
          </table:table-cell>
          <table:table-cell office:value-type="float" office:value="2178.7500800000003" table:style-name="c1">
            <text:p>2178.8</text:p>
          </table:table-cell>
          <table:table-cell office:value-type="float" office:value="-0.4781635014167618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060.60979" table:style-name="c1">
            <text:p>2060.6</text:p>
          </table:table-cell>
          <table:table-cell office:value-type="string" table:style-name="c1">
            <text:p>2026-03-30 08:30</text:p>
          </table:table-cell>
          <table:table-cell office:value-type="float" office:value="2058.9700000000003" table:style-name="c1">
            <text:p>2059</text:p>
          </table:table-cell>
          <table:table-cell office:value-type="float" office:value="-0.27931882387105533" table:style-name="c12">
            <text:p>-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2062.240605" table:style-name="c1">
            <text:p>2062.2</text:p>
          </table:table-cell>
          <table:table-cell office:value-type="string" table:style-name="c1">
            <text:p>2026-03-31 02:00</text:p>
          </table:table-cell>
          <table:table-cell office:value-type="float" office:value="2071.953505" table:style-name="c1">
            <text:p>2072</text:p>
          </table:table-cell>
          <table:table-cell office:value-type="float" office:value="0.2701462152378209" table:style-name="c11">
            <text:p>+0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45</text:p>
          </table:table-cell>
          <table:table-cell office:value-type="float" office:value="2057.2681199999997" table:style-name="c1">
            <text:p>2057.3</text:p>
          </table:table-cell>
          <table:table-cell office:value-type="string" table:style-name="c1">
            <text:p>2026-03-31 13:15</text:p>
          </table:table-cell>
          <table:table-cell office:value-type="float" office:value="2059.099935" table:style-name="c1">
            <text:p>2059.1</text:p>
          </table:table-cell>
          <table:table-cell office:value-type="float" office:value="-0.11103685260356322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2128.56375" table:style-name="c1">
            <text:p>2128.6</text:p>
          </table:table-cell>
          <table:table-cell office:value-type="string" table:style-name="c1">
            <text:p>2026-04-01 06:00</text:p>
          </table:table-cell>
          <table:table-cell office:value-type="float" office:value="2121.608665" table:style-name="c1">
            <text:p>2121.6</text:p>
          </table:table-cell>
          <table:table-cell office:value-type="float" office:value="-0.5259969649175189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2139.279105" table:style-name="c1">
            <text:p>2139.3</text:p>
          </table:table-cell>
          <table:table-cell office:value-type="string" table:style-name="c1">
            <text:p>2026-04-01 06:45</text:p>
          </table:table-cell>
          <table:table-cell office:value-type="float" office:value="2153.8325449999998" table:style-name="c1">
            <text:p>2153.8</text:p>
          </table:table-cell>
          <table:table-cell office:value-type="float" office:value="0.4790365464044877" table:style-name="c11">
            <text:p>+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00</text:p>
          </table:table-cell>
          <table:table-cell office:value-type="float" office:value="2152.31562" table:style-name="c1">
            <text:p>2152.3</text:p>
          </table:table-cell>
          <table:table-cell office:value-type="string" table:style-name="c1">
            <text:p>2026-04-01 07:30</text:p>
          </table:table-cell>
          <table:table-cell office:value-type="float" office:value="2138.2703300000003" table:style-name="c1">
            <text:p>2138.3</text:p>
          </table:table-cell>
          <table:table-cell office:value-type="float" office:value="-0.8511619866267361" table:style-name="c12">
            <text:p>-0.9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00</text:p>
          </table:table-cell>
          <table:table-cell office:value-type="float" office:value="2086.82289" table:style-name="c1">
            <text:p>2086.8</text:p>
          </table:table-cell>
          <table:table-cell office:value-type="string" table:style-name="c1">
            <text:p>2026-04-05 23:30</text:p>
          </table:table-cell>
          <table:table-cell office:value-type="float" office:value="2107.1459" table:style-name="c1">
            <text:p>2107.1</text:p>
          </table:table-cell>
          <table:table-cell office:value-type="float" office:value="0.7720264821275968" table:style-name="c11">
            <text:p>+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45</text:p>
          </table:table-cell>
          <table:table-cell office:value-type="float" office:value="2112.11553" table:style-name="c1">
            <text:p>2112.1</text:p>
          </table:table-cell>
          <table:table-cell office:value-type="string" table:style-name="c1">
            <text:p>2026-04-06 00:15</text:p>
          </table:table-cell>
          <table:table-cell office:value-type="float" office:value="2118.750095" table:style-name="c1">
            <text:p>2118.8</text:p>
          </table:table-cell>
          <table:table-cell office:value-type="float" office:value="0.113591492795595" table:style-name="c11">
            <text:p>+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30</text:p>
          </table:table-cell>
          <table:table-cell office:value-type="float" office:value="2124.191565" table:style-name="c1">
            <text:p>2124.2</text:p>
          </table:table-cell>
          <table:table-cell office:value-type="string" table:style-name="c1">
            <text:p>2026-04-06 01:00</text:p>
          </table:table-cell>
          <table:table-cell office:value-type="float" office:value="2120.9390000000003" table:style-name="c1">
            <text:p>2120.9</text:p>
          </table:table-cell>
          <table:table-cell office:value-type="float" office:value="-0.3527140482266211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15</text:p>
          </table:table-cell>
          <table:table-cell office:value-type="float" office:value="2149.6342799999998" table:style-name="c1">
            <text:p>2149.6</text:p>
          </table:table-cell>
          <table:table-cell office:value-type="string" table:style-name="c1">
            <text:p>2026-04-06 09:45</text:p>
          </table:table-cell>
          <table:table-cell office:value-type="float" office:value="2151.04394" table:style-name="c1">
            <text:p>2151</text:p>
          </table:table-cell>
          <table:table-cell office:value-type="float" office:value="-0.13445435174487264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5:15</text:p>
          </table:table-cell>
          <table:table-cell office:value-type="float" office:value="2168.2835999999998" table:style-name="c1">
            <text:p>2168.3</text:p>
          </table:table-cell>
          <table:table-cell office:value-type="string" table:style-name="c1">
            <text:p>2026-04-06 15:45</text:p>
          </table:table-cell>
          <table:table-cell office:value-type="float" office:value="2163.53769" table:style-name="c1">
            <text:p>2163.5</text:p>
          </table:table-cell>
          <table:table-cell office:value-type="float" office:value="-0.41834111747695024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20:45</text:p>
          </table:table-cell>
          <table:table-cell office:value-type="float" office:value="2151.4651949999998" table:style-name="c1">
            <text:p>2151.5</text:p>
          </table:table-cell>
          <table:table-cell office:value-type="string" table:style-name="c1">
            <text:p>2026-04-06 21:15</text:p>
          </table:table-cell>
          <table:table-cell office:value-type="float" office:value="2145.1668799999998" table:style-name="c1">
            <text:p>2145.2</text:p>
          </table:table-cell>
          <table:table-cell office:value-type="float" office:value="-0.4920601838097616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2114.4466949999996" table:style-name="c1">
            <text:p>2114.4</text:p>
          </table:table-cell>
          <table:table-cell office:value-type="string" table:style-name="c1">
            <text:p>2026-04-07 20:30</text:p>
          </table:table-cell>
          <table:table-cell office:value-type="float" office:value="2114.7121150000003" table:style-name="c1">
            <text:p>2114.7</text:p>
          </table:table-cell>
          <table:table-cell office:value-type="float" office:value="-0.1873723999405219" table:style-name="c12">
            <text:p>-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143.37115" table:style-name="c1">
            <text:p>2143.4</text:p>
          </table:table-cell>
          <table:table-cell office:value-type="string" table:style-name="c1">
            <text:p>2026-04-07 21:45</text:p>
          </table:table-cell>
          <table:table-cell office:value-type="float" office:value="2142.418255" table:style-name="c1">
            <text:p>2142.4</text:p>
          </table:table-cell>
          <table:table-cell office:value-type="float" office:value="-0.24426889816748787" table:style-name="c12">
            <text:p>-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2160.17955" table:style-name="c1">
            <text:p>2160.2</text:p>
          </table:table-cell>
          <table:table-cell office:value-type="string" table:style-name="c1">
            <text:p>2026-04-07 22:45</text:p>
          </table:table-cell>
          <table:table-cell office:value-type="float" office:value="2176.9209950000004" table:style-name="c1">
            <text:p>2176.9</text:p>
          </table:table-cell>
          <table:table-cell office:value-type="float" office:value="0.5735532461176973" table:style-name="c11">
            <text:p>+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2220.88989" table:style-name="c1">
            <text:p>2220.9</text:p>
          </table:table-cell>
          <table:table-cell office:value-type="string" table:style-name="c1">
            <text:p>2026-04-07 23:30</text:p>
          </table:table-cell>
          <table:table-cell office:value-type="float" office:value="2269.2248200000004" table:style-name="c1">
            <text:p>2269.2</text:p>
          </table:table-cell>
          <table:table-cell office:value-type="float" office:value="1.9721261185452255" table:style-name="c11">
            <text:p>+2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45</text:p>
          </table:table-cell>
          <table:table-cell office:value-type="float" office:value="2249.434155" table:style-name="c1">
            <text:p>2249.4</text:p>
          </table:table-cell>
          <table:table-cell office:value-type="string" table:style-name="c1">
            <text:p>2026-04-08 00:15</text:p>
          </table:table-cell>
          <table:table-cell office:value-type="float" office:value="2242.508185" table:style-name="c1">
            <text:p>2242.5</text:p>
          </table:table-cell>
          <table:table-cell office:value-type="float" office:value="-0.5071828324672456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30</text:p>
          </table:table-cell>
          <table:table-cell office:value-type="float" office:value="2261.7703199999996" table:style-name="c1">
            <text:p>2261.8</text:p>
          </table:table-cell>
          <table:table-cell office:value-type="string" table:style-name="c1">
            <text:p>2026-04-08 14:00</text:p>
          </table:table-cell>
          <table:table-cell office:value-type="float" office:value="2234.9319750000004" table:style-name="c1">
            <text:p>2234.9</text:p>
          </table:table-cell>
          <table:table-cell office:value-type="float" office:value="-1.3841358577039053" table:style-name="c12">
            <text:p>-1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2214.116505" table:style-name="c1">
            <text:p>2214.1</text:p>
          </table:table-cell>
          <table:table-cell office:value-type="string" table:style-name="c1">
            <text:p>2026-04-09 16:15</text:p>
          </table:table-cell>
          <table:table-cell office:value-type="float" office:value="2214.45222" table:style-name="c1">
            <text:p>2214.5</text:p>
          </table:table-cell>
          <table:table-cell office:value-type="float" office:value="-0.1847678285465837" table:style-name="c12">
            <text:p>-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1:30</text:p>
          </table:table-cell>
          <table:table-cell office:value-type="float" office:value="2218.26858" table:style-name="c1">
            <text:p>2218.3</text:p>
          </table:table-cell>
          <table:table-cell office:value-type="string" table:style-name="c1">
            <text:p>2026-04-10 12:00</text:p>
          </table:table-cell>
          <table:table-cell office:value-type="float" office:value="2214.55217" table:style-name="c1">
            <text:p>2214.6</text:p>
          </table:table-cell>
          <table:table-cell office:value-type="float" office:value="-0.3671016152530182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2:45</text:p>
          </table:table-cell>
          <table:table-cell office:value-type="float" office:value="2225.8123499999997" table:style-name="c1">
            <text:p>2225.8</text:p>
          </table:table-cell>
          <table:table-cell office:value-type="string" table:style-name="c1">
            <text:p>2026-04-10 13:15</text:p>
          </table:table-cell>
          <table:table-cell office:value-type="float" office:value="2217.6906000000004" table:style-name="c1">
            <text:p>2217.7</text:p>
          </table:table-cell>
          <table:table-cell office:value-type="float" office:value="-0.5640598368231386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2246.372625" table:style-name="c1">
            <text:p>2246.4</text:p>
          </table:table-cell>
          <table:table-cell office:value-type="string" table:style-name="c1">
            <text:p>2026-04-10 15:00</text:p>
          </table:table-cell>
          <table:table-cell office:value-type="float" office:value="2241.63862" table:style-name="c1">
            <text:p>2241.6</text:p>
          </table:table-cell>
          <table:table-cell office:value-type="float" office:value="-0.410218700977083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9:45</text:p>
          </table:table-cell>
          <table:table-cell office:value-type="float" office:value="2243.751315" table:style-name="c1">
            <text:p>2243.8</text:p>
          </table:table-cell>
          <table:table-cell office:value-type="string" table:style-name="c1">
            <text:p>2026-04-11 10:15</text:p>
          </table:table-cell>
          <table:table-cell office:value-type="float" office:value="2238.850015" table:style-name="c1">
            <text:p>2238.9</text:p>
          </table:table-cell>
          <table:table-cell office:value-type="float" office:value="-0.4179055458285008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2264.7518099999998" table:style-name="c1">
            <text:p>2264.8</text:p>
          </table:table-cell>
          <table:table-cell office:value-type="string" table:style-name="c1">
            <text:p>2026-04-11 17:15</text:p>
          </table:table-cell>
          <table:table-cell office:value-type="float" office:value="2255.43172" table:style-name="c1">
            <text:p>2255.4</text:p>
          </table:table-cell>
          <table:table-cell office:value-type="float" office:value="-0.6106054512118653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2296.8078299999997" table:style-name="c1">
            <text:p>2296.8</text:p>
          </table:table-cell>
          <table:table-cell office:value-type="string" table:style-name="c1">
            <text:p>2026-04-11 19:15</text:p>
          </table:table-cell>
          <table:table-cell office:value-type="float" office:value="2313.2428000000004" table:style-name="c1">
            <text:p>2313.2</text:p>
          </table:table-cell>
          <table:table-cell office:value-type="float" office:value="0.5142266361396253" table:style-name="c11">
            <text:p>+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30</text:p>
          </table:table-cell>
          <table:table-cell office:value-type="float" office:value="2322.1605" table:style-name="c1">
            <text:p>2322.2</text:p>
          </table:table-cell>
          <table:table-cell office:value-type="string" table:style-name="c1">
            <text:p>2026-04-11 20:00</text:p>
          </table:table-cell>
          <table:table-cell office:value-type="float" office:value="2314.80202" table:style-name="c1">
            <text:p>2314.8</text:p>
          </table:table-cell>
          <table:table-cell office:value-type="float" office:value="-0.5161473222018764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2263.4611649999997" table:style-name="c1">
            <text:p>2263.5</text:p>
          </table:table-cell>
          <table:table-cell office:value-type="string" table:style-name="c1">
            <text:p>2026-04-13 20:30</text:p>
          </table:table-cell>
          <table:table-cell office:value-type="float" office:value="2252.9229750000004" table:style-name="c1">
            <text:p>2252.9</text:p>
          </table:table-cell>
          <table:table-cell office:value-type="float" office:value="-0.6645478729485621" table:style-name="c12">
            <text:p>-0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2296.56771" table:style-name="c1">
            <text:p>2296.6</text:p>
          </table:table-cell>
          <table:table-cell office:value-type="string" table:style-name="c1">
            <text:p>2026-04-13 22:45</text:p>
          </table:table-cell>
          <table:table-cell office:value-type="float" office:value="2342.9979150000004" table:style-name="c1">
            <text:p>2343</text:p>
          </table:table-cell>
          <table:table-cell office:value-type="float" office:value="1.8177801588926457" table:style-name="c11">
            <text:p>+1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2353.9163699999995" table:style-name="c1">
            <text:p>2353.9</text:p>
          </table:table-cell>
          <table:table-cell office:value-type="string" table:style-name="c1">
            <text:p>2026-04-13 23:30</text:p>
          </table:table-cell>
          <table:table-cell office:value-type="float" office:value="2386.7960049999997" table:style-name="c1">
            <text:p>2386.8</text:p>
          </table:table-cell>
          <table:table-cell office:value-type="float" office:value="1.194113356967108" table:style-name="c11">
            <text:p>+1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45</text:p>
          </table:table-cell>
          <table:table-cell office:value-type="float" office:value="2374.20651" table:style-name="c1">
            <text:p>2374.2</text:p>
          </table:table-cell>
          <table:table-cell office:value-type="string" table:style-name="c1">
            <text:p>2026-04-14 00:15</text:p>
          </table:table-cell>
          <table:table-cell office:value-type="float" office:value="2366.3862150000004" table:style-name="c1">
            <text:p>2366.4</text:p>
          </table:table-cell>
          <table:table-cell office:value-type="float" office:value="-0.5286271851636326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7:15</text:p>
          </table:table-cell>
          <table:table-cell office:value-type="float" office:value="2383.761285" table:style-name="c1">
            <text:p>2383.8</text:p>
          </table:table-cell>
          <table:table-cell office:value-type="string" table:style-name="c1">
            <text:p>2026-04-14 07:45</text:p>
          </table:table-cell>
          <table:table-cell office:value-type="float" office:value="2370.1343400000005" table:style-name="c1">
            <text:p>2370.1</text:p>
          </table:table-cell>
          <table:table-cell office:value-type="float" office:value="-0.7704145402990581" table:style-name="c12">
            <text:p>-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8:45</text:p>
          </table:table-cell>
          <table:table-cell office:value-type="float" office:value="2389.0739399999998" table:style-name="c1">
            <text:p>2389.1</text:p>
          </table:table-cell>
          <table:table-cell office:value-type="string" table:style-name="c1">
            <text:p>2026-04-14 09:15</text:p>
          </table:table-cell>
          <table:table-cell office:value-type="float" office:value="2391.333735" table:style-name="c1">
            <text:p>2391.3</text:p>
          </table:table-cell>
          <table:table-cell office:value-type="float" office:value="-0.10550034028099509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2391.2050050000003" table:style-name="c1">
            <text:p>2391.2</text:p>
          </table:table-cell>
          <table:table-cell office:value-type="string" table:style-name="c1">
            <text:p>2026-04-14 14:15</text:p>
          </table:table-cell>
          <table:table-cell office:value-type="float" office:value="2381.94843" table:style-name="c1">
            <text:p>2381.9</text:p>
          </table:table-cell>
          <table:table-cell office:value-type="float" office:value="-0.586235386855527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2341.17" table:style-name="c1">
            <text:p>2341.2</text:p>
          </table:table-cell>
          <table:table-cell office:value-type="string" table:style-name="c1">
            <text:p>2026-04-15 15:00</text:p>
          </table:table-cell>
          <table:table-cell office:value-type="float" office:value="2337.240795" table:style-name="c1">
            <text:p>2337.2</text:p>
          </table:table-cell>
          <table:table-cell office:value-type="float" office:value="-0.36739533435011795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2376.617715" table:style-name="c1">
            <text:p>2376.6</text:p>
          </table:table-cell>
          <table:table-cell office:value-type="string" table:style-name="c1">
            <text:p>2026-04-15 20:15</text:p>
          </table:table-cell>
          <table:table-cell office:value-type="float" office:value="2361.968425" table:style-name="c1">
            <text:p>2362</text:p>
          </table:table-cell>
          <table:table-cell office:value-type="float" office:value="-0.8150601907625177" table:style-name="c12">
            <text:p>-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2339.8693499999995" table:style-name="c1">
            <text:p>2339.9</text:p>
          </table:table-cell>
          <table:table-cell office:value-type="string" table:style-name="c1">
            <text:p>2026-04-16 16:15</text:p>
          </table:table-cell>
          <table:table-cell office:value-type="float" office:value="2334.841995" table:style-name="c1">
            <text:p>2334.8</text:p>
          </table:table-cell>
          <table:table-cell office:value-type="float" office:value="-0.41432672931094316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30</text:p>
          </table:table-cell>
          <table:table-cell office:value-type="float" office:value="2372.8658399999995" table:style-name="c1">
            <text:p>2372.9</text:p>
          </table:table-cell>
          <table:table-cell office:value-type="string" table:style-name="c1">
            <text:p>2026-04-17 10:00</text:p>
          </table:table-cell>
          <table:table-cell office:value-type="float" office:value="2357.92045" table:style-name="c1">
            <text:p>2357.9</text:p>
          </table:table-cell>
          <table:table-cell office:value-type="float" office:value="-0.8284864929215541" table:style-name="c12">
            <text:p>-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2373.155985" table:style-name="c1">
            <text:p>2373.2</text:p>
          </table:table-cell>
          <table:table-cell office:value-type="string" table:style-name="c1">
            <text:p>2026-04-17 13:30</text:p>
          </table:table-cell>
          <table:table-cell office:value-type="float" office:value="2403.567615" table:style-name="c1">
            <text:p>2403.6</text:p>
          </table:table-cell>
          <table:table-cell office:value-type="float" office:value="1.0790229761325598" table:style-name="c11">
            <text:p>+1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2419.559175" table:style-name="c1">
            <text:p>2419.6</text:p>
          </table:table-cell>
          <table:table-cell office:value-type="string" table:style-name="c1">
            <text:p>2026-04-17 14:15</text:p>
          </table:table-cell>
          <table:table-cell office:value-type="float" office:value="2428.9948950000003" table:style-name="c1">
            <text:p>2429</text:p>
          </table:table-cell>
          <table:table-cell office:value-type="float" office:value="0.18929725927845364" table:style-name="c11">
            <text:p>+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2371.535175" table:style-name="c1">
            <text:p>2371.5</text:p>
          </table:table-cell>
          <table:table-cell office:value-type="string" table:style-name="c1">
            <text:p>2026-04-22 03:30</text:p>
          </table:table-cell>
          <table:table-cell office:value-type="float" office:value="2363.93744" table:style-name="c1">
            <text:p>2363.9</text:p>
          </table:table-cell>
          <table:table-cell office:value-type="float" office:value="-0.5196315902233906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2389.0239149999998" table:style-name="c1">
            <text:p>2389</text:p>
          </table:table-cell>
          <table:table-cell office:value-type="string" table:style-name="c1">
            <text:p>2026-04-22 06:00</text:p>
          </table:table-cell>
          <table:table-cell office:value-type="float" office:value="2395.611595" table:style-name="c1">
            <text:p>2395.6</text:p>
          </table:table-cell>
          <table:table-cell office:value-type="float" office:value="0.07529654309028633" table:style-name="c11">
            <text:p>+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3:30</text:p>
          </table:table-cell>
          <table:table-cell office:value-type="float" office:value="2410.6847399999997" table:style-name="c1">
            <text:p>2410.7</text:p>
          </table:table-cell>
          <table:table-cell office:value-type="string" table:style-name="c1">
            <text:p>2026-04-22 14:00</text:p>
          </table:table-cell>
          <table:table-cell office:value-type="float" office:value="2416.1913000000004" table:style-name="c1">
            <text:p>2416.2</text:p>
          </table:table-cell>
          <table:table-cell office:value-type="float" office:value="0.028066448510433162" table:style-name="c11">
            <text:p>+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2424.27153" table:style-name="c1">
            <text:p>2424.3</text:p>
          </table:table-cell>
          <table:table-cell office:value-type="string" table:style-name="c1">
            <text:p>2026-04-22 14:45</text:p>
          </table:table-cell>
          <table:table-cell office:value-type="float" office:value="2394.7420300000003" table:style-name="c1">
            <text:p>2394.7</text:p>
          </table:table-cell>
          <table:table-cell office:value-type="float" office:value="-1.4155423141883006" table:style-name="c12">
            <text:p>-1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4:30</text:p>
          </table:table-cell>
          <table:table-cell office:value-type="float" office:value="2351.1649949999996" table:style-name="c1">
            <text:p>2351.2</text:p>
          </table:table-cell>
          <table:table-cell office:value-type="string" table:style-name="c1">
            <text:p>2026-04-26 15:00</text:p>
          </table:table-cell>
          <table:table-cell office:value-type="float" office:value="2345.0269" table:style-name="c1">
            <text:p>2345</text:p>
          </table:table-cell>
          <table:table-cell office:value-type="float" office:value="-0.46044423918022437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15</text:p>
          </table:table-cell>
          <table:table-cell office:value-type="float" office:value="2364.56169" table:style-name="c1">
            <text:p>2364.6</text:p>
          </table:table-cell>
          <table:table-cell office:value-type="string" table:style-name="c1">
            <text:p>2026-04-26 18:45</text:p>
          </table:table-cell>
          <table:table-cell office:value-type="float" office:value="2359.289765" table:style-name="c1">
            <text:p>2359.3</text:p>
          </table:table-cell>
          <table:table-cell office:value-type="float" office:value="-0.4224100086910654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2391.75528" table:style-name="c1">
            <text:p>2391.8</text:p>
          </table:table-cell>
          <table:table-cell office:value-type="string" table:style-name="c1">
            <text:p>2026-04-27 01:30</text:p>
          </table:table-cell>
          <table:table-cell office:value-type="float" office:value="2381.68856" table:style-name="c1">
            <text:p>2381.7</text:p>
          </table:table-cell>
          <table:table-cell office:value-type="float" office:value="-0.6199511946489711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2345.172" table:style-name="c1">
            <text:p>2345.2</text:p>
          </table:table-cell>
          <table:table-cell office:value-type="string" table:style-name="c1">
            <text:p>2026-04-29 10:45</text:p>
          </table:table-cell>
          <table:table-cell office:value-type="float" office:value="2330.843995" table:style-name="c1">
            <text:p>2330.8</text:p>
          </table:table-cell>
          <table:table-cell office:value-type="float" office:value="-0.8096362290699655" table:style-name="c12">
            <text:p>-0.8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30</text:p>
          </table:table-cell>
          <table:table-cell office:value-type="float" office:value="2305.9524" table:style-name="c1">
            <text:p>2306</text:p>
          </table:table-cell>
          <table:table-cell office:value-type="string" table:style-name="c1">
            <text:p>2026-05-01 13:00</text:p>
          </table:table-cell>
          <table:table-cell office:value-type="float" office:value="2300.219315" table:style-name="c1">
            <text:p>2300.2</text:p>
          </table:table-cell>
          <table:table-cell office:value-type="float" office:value="-0.4480241400770191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2319.37911" table:style-name="c1">
            <text:p>2319.4</text:p>
          </table:table-cell>
          <table:table-cell office:value-type="string" table:style-name="c1">
            <text:p>2026-05-01 14:30</text:p>
          </table:table-cell>
          <table:table-cell office:value-type="float" office:value="2308.10537" table:style-name="c1">
            <text:p>2308.1</text:p>
          </table:table-cell>
          <table:table-cell office:value-type="float" office:value="-0.6849955044490152" table:style-name="c12">
            <text:p>-0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1:45</text:p>
          </table:table-cell>
          <table:table-cell office:value-type="float" office:value="2329.48416" table:style-name="c1">
            <text:p>2329.5</text:p>
          </table:table-cell>
          <table:table-cell office:value-type="string" table:style-name="c1">
            <text:p>2026-05-02 22:15</text:p>
          </table:table-cell>
          <table:table-cell office:value-type="float" office:value="2324.227305" table:style-name="c1">
            <text:p>2324.2</text:p>
          </table:table-cell>
          <table:table-cell office:value-type="float" office:value="-0.425114948310934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12:15</text:p>
          </table:table-cell>
          <table:table-cell office:value-type="float" office:value="2330.62473" table:style-name="c1">
            <text:p>2330.6</text:p>
          </table:table-cell>
          <table:table-cell office:value-type="string" table:style-name="c1">
            <text:p>2026-05-03 12:45</text:p>
          </table:table-cell>
          <table:table-cell office:value-type="float" office:value="2324.3572400000003" table:style-name="c1">
            <text:p>2324.4</text:p>
          </table:table-cell>
          <table:table-cell office:value-type="float" office:value="-0.4682813145452047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2349.07395" table:style-name="c1">
            <text:p>2349.1</text:p>
          </table:table-cell>
          <table:table-cell office:value-type="string" table:style-name="c1">
            <text:p>2026-05-03 22:45</text:p>
          </table:table-cell>
          <table:table-cell office:value-type="float" office:value="2345.216805" table:style-name="c1">
            <text:p>2345.2</text:p>
          </table:table-cell>
          <table:table-cell office:value-type="float" office:value="-0.36377030162011437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2352.385605" table:style-name="c1">
            <text:p>2352.4</text:p>
          </table:table-cell>
          <table:table-cell office:value-type="string" table:style-name="c1">
            <text:p>2026-05-04 02:30</text:p>
          </table:table-cell>
          <table:table-cell office:value-type="float" office:value="2362.53814" table:style-name="c1">
            <text:p>2362.5</text:p>
          </table:table-cell>
          <table:table-cell office:value-type="float" office:value="0.23082190464858154" table:style-name="c11">
            <text:p>+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2381.840325" table:style-name="c1">
            <text:p>2381.8</text:p>
          </table:table-cell>
          <table:table-cell office:value-type="string" table:style-name="c1">
            <text:p>2026-05-04 03:15</text:p>
          </table:table-cell>
          <table:table-cell office:value-type="float" office:value="2384.06737" table:style-name="c1">
            <text:p>2384.1</text:p>
          </table:table-cell>
          <table:table-cell office:value-type="float" office:value="-0.10658588848228012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3:30</text:p>
          </table:table-cell>
          <table:table-cell office:value-type="float" office:value="2381.2600350000002" table:style-name="c1">
            <text:p>2381.3</text:p>
          </table:table-cell>
          <table:table-cell office:value-type="string" table:style-name="c1">
            <text:p>2026-05-04 04:00</text:p>
          </table:table-cell>
          <table:table-cell office:value-type="float" office:value="2383.917445" table:style-name="c1">
            <text:p>2383.9</text:p>
          </table:table-cell>
          <table:table-cell office:value-type="float" office:value="-0.08852628195037404" table:style-name="c12">
            <text:p>-0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2372.5857" table:style-name="c1">
            <text:p>2372.6</text:p>
          </table:table-cell>
          <table:table-cell office:value-type="string" table:style-name="c1">
            <text:p>2026-05-04 15:30</text:p>
          </table:table-cell>
          <table:table-cell office:value-type="float" office:value="2347.275775" table:style-name="c1">
            <text:p>2347.3</text:p>
          </table:table-cell>
          <table:table-cell office:value-type="float" office:value="-1.264533006088031" table:style-name="c12">
            <text:p>-1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3:45</text:p>
          </table:table-cell>
          <table:table-cell office:value-type="float" office:value="2386.77279" table:style-name="c1">
            <text:p>2386.8</text:p>
          </table:table-cell>
          <table:table-cell office:value-type="string" table:style-name="c1">
            <text:p>2026-05-05 04:15</text:p>
          </table:table-cell>
          <table:table-cell office:value-type="float" office:value="2378.88996" table:style-name="c1">
            <text:p>2378.9</text:p>
          </table:table-cell>
          <table:table-cell office:value-type="float" office:value="-0.5295112749312048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45</text:p>
          </table:table-cell>
          <table:table-cell office:value-type="float" office:value="2418.96888" table:style-name="c1">
            <text:p>2419</text:p>
          </table:table-cell>
          <table:table-cell office:value-type="string" table:style-name="c1">
            <text:p>2026-05-06 10:15</text:p>
          </table:table-cell>
          <table:table-cell office:value-type="float" office:value="2409.93443" table:style-name="c1">
            <text:p>2409.9</text:p>
          </table:table-cell>
          <table:table-cell office:value-type="float" office:value="-0.5726369214625993" table:style-name="c12">
            <text:p>-0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2333.035935" table:style-name="c1">
            <text:p>2333</text:p>
          </table:table-cell>
          <table:table-cell office:value-type="string" table:style-name="c1">
            <text:p>2026-05-09 18:00</text:p>
          </table:table-cell>
          <table:table-cell office:value-type="float" office:value="2328.29527" table:style-name="c1">
            <text:p>2328.3</text:p>
          </table:table-cell>
          <table:table-cell office:value-type="float" office:value="-0.40269106462476056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00</text:p>
          </table:table-cell>
          <table:table-cell office:value-type="float" office:value="2348.73378" table:style-name="c1">
            <text:p>2348.7</text:p>
          </table:table-cell>
          <table:table-cell office:value-type="string" table:style-name="c1">
            <text:p>2026-05-10 16:30</text:p>
          </table:table-cell>
          <table:table-cell office:value-type="float" office:value="2344.177325" table:style-name="c1">
            <text:p>2344.2</text:p>
          </table:table-cell>
          <table:table-cell office:value-type="float" office:value="-0.3935084321337823" table:style-name="c12">
            <text:p>-0.4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2367.693255" table:style-name="c1">
            <text:p>2367.7</text:p>
          </table:table-cell>
          <table:table-cell office:value-type="string" table:style-name="c1">
            <text:p>2026-05-10 23:15</text:p>
          </table:table-cell>
          <table:table-cell office:value-type="float" office:value="2377.91045" table:style-name="c1">
            <text:p>2377.9</text:p>
          </table:table-cell>
          <table:table-cell office:value-type="float" office:value="0.23076266314951965" table:style-name="c11">
            <text:p>+0.2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2136.937935" table:style-name="c1">
            <text:p>2136.9</text:p>
          </table:table-cell>
          <table:table-cell office:value-type="string" table:style-name="c1">
            <text:p>2026-05-21 16:00</text:p>
          </table:table-cell>
          <table:table-cell office:value-type="float" office:value="2131.57368" table:style-name="c1">
            <text:p>2131.6</text:p>
          </table:table-cell>
          <table:table-cell office:value-type="float" office:value="-0.45042350686334" table:style-name="c12">
            <text:p>-0.5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0:00</text:p>
          </table:table-cell>
          <table:table-cell office:value-type="float" office:value="2100.90993" table:style-name="c1">
            <text:p>2100.9</text:p>
          </table:table-cell>
          <table:table-cell office:value-type="string" table:style-name="c1">
            <text:p>2026-05-25 00:30</text:p>
          </table:table-cell>
          <table:table-cell office:value-type="float" office:value="2105.1868799999997" table:style-name="c1">
            <text:p>2105.2</text:p>
          </table:table-cell>
          <table:table-cell office:value-type="float" office:value="0.003269127624139223" table:style-name="c11">
            <text:p>+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45</text:p>
          </table:table-cell>
          <table:table-cell office:value-type="float" office:value="2125.612275" table:style-name="c1">
            <text:p>2125.6</text:p>
          </table:table-cell>
          <table:table-cell office:value-type="string" table:style-name="c1">
            <text:p>2026-05-25 15:15</text:p>
          </table:table-cell>
          <table:table-cell office:value-type="float" office:value="2129.2148600000005" table:style-name="c1">
            <text:p>2129.2</text:p>
          </table:table-cell>
          <table:table-cell office:value-type="float" office:value="-0.030754221399087456" table:style-name="c12">
            <text:p>-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2122.350645" table:style-name="c1">
            <text:p>2122.4</text:p>
          </table:table-cell>
          <table:table-cell office:value-type="string" table:style-name="c1">
            <text:p>2026-05-26 11:00</text:p>
          </table:table-cell>
          <table:table-cell office:value-type="float" office:value="2126.5062150000003" table:style-name="c1">
            <text:p>2126.5</text:p>
          </table:table-cell>
          <table:table-cell office:value-type="float" office:value="-0.004491054482869128" table:style-name="c12">
            <text:p>-0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2139.0990150000002" table:style-name="c1">
            <text:p>2139.1</text:p>
          </table:table-cell>
          <table:table-cell office:value-type="string" table:style-name="c1">
            <text:p>2026-05-26 15:00</text:p>
          </table:table-cell>
          <table:table-cell office:value-type="float" office:value="2108.24535" table:style-name="c1">
            <text:p>2108.2</text:p>
          </table:table-cell>
          <table:table-cell office:value-type="float" office:value="-1.6393840214381172" table:style-name="c12">
            <text:p>-1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1:30</text:p>
          </table:table-cell>
          <table:table-cell office:value-type="float" office:value="2031.0750299999997" table:style-name="c1">
            <text:p>2031.1</text:p>
          </table:table-cell>
          <table:table-cell office:value-type="string" table:style-name="c1">
            <text:p>2026-05-31 02:00</text:p>
          </table:table-cell>
          <table:table-cell office:value-type="float" office:value="2028.095445" table:style-name="c1">
            <text:p>2028.1</text:p>
          </table:table-cell>
          <table:table-cell office:value-type="float" office:value="-0.3463066450358876" table:style-name="c12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0.9954974999999999" table:style-name="c8">
            <text:p>0.9955</text:p>
          </table:table-cell>
          <table:table-cell office:value-type="string" table:style-name="c8">
            <text:p>2026-03-03 16:15</text:p>
          </table:table-cell>
          <table:table-cell office:value-type="float" office:value="1.0014990000000001" table:style-name="c8">
            <text:p>1.0015</text:p>
          </table:table-cell>
          <table:table-cell office:value-type="float" office:value="0.4017592710177764" table:style-name="c10">
            <text:p>+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1:45</text:p>
          </table:table-cell>
          <table:table-cell office:value-type="float" office:value="1.0085039999999998" table:style-name="c8">
            <text:p>1.0085</text:p>
          </table:table-cell>
          <table:table-cell office:value-type="string" table:style-name="c8">
            <text:p>2026-03-04 02:15</text:p>
          </table:table-cell>
          <table:table-cell office:value-type="float" office:value="0.9985005" table:style-name="c8">
            <text:p>0.9985</text:p>
          </table:table-cell>
          <table:table-cell office:value-type="float" office:value="-1.1898319193081819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3:00</text:p>
          </table:table-cell>
          <table:table-cell office:value-type="float" office:value="1.010505" table:style-name="c8">
            <text:p>1.0105</text:p>
          </table:table-cell>
          <table:table-cell office:value-type="string" table:style-name="c8">
            <text:p>2026-03-04 03:30</text:p>
          </table:table-cell>
          <table:table-cell office:value-type="float" office:value="1.003498" table:style-name="c8">
            <text:p>1.0035</text:p>
          </table:table-cell>
          <table:table-cell office:value-type="float" office:value="-0.8919295304822716" table:style-name="c9">
            <text:p>-0.9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7:45</text:p>
          </table:table-cell>
          <table:table-cell office:value-type="float" office:value="1.0035014999999998" table:style-name="c8">
            <text:p>1.0035</text:p>
          </table:table-cell>
          <table:table-cell office:value-type="string" table:style-name="c8">
            <text:p>2026-03-04 08:15</text:p>
          </table:table-cell>
          <table:table-cell office:value-type="float" office:value="1.0084955" table:style-name="c8">
            <text:p>1.0085</text:p>
          </table:table-cell>
          <table:table-cell office:value-type="float" office:value="0.29676263518292334" table:style-name="c10">
            <text:p>+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1.028514" table:style-name="c8">
            <text:p>1.0285</text:p>
          </table:table-cell>
          <table:table-cell office:value-type="string" table:style-name="c8">
            <text:p>2026-03-04 09:30</text:p>
          </table:table-cell>
          <table:table-cell office:value-type="float" office:value="1.0264865" table:style-name="c8">
            <text:p>1.0265</text:p>
          </table:table-cell>
          <table:table-cell office:value-type="float" office:value="-0.39663500093337634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1.0295144999999999" table:style-name="c8">
            <text:p>1.0295</text:p>
          </table:table-cell>
          <table:table-cell office:value-type="string" table:style-name="c8">
            <text:p>2026-03-04 10:15</text:p>
          </table:table-cell>
          <table:table-cell office:value-type="float" office:value="1.0244875" table:style-name="c8">
            <text:p>1.0245</text:p>
          </table:table-cell>
          <table:table-cell office:value-type="float" office:value="-0.6872123231387084" table:style-name="c9">
            <text:p>-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1.0295144999999999" table:style-name="c8">
            <text:p>1.0295</text:p>
          </table:table-cell>
          <table:table-cell office:value-type="string" table:style-name="c8">
            <text:p>2026-03-04 16:00</text:p>
          </table:table-cell>
          <table:table-cell office:value-type="float" office:value="1.0324834999999999" table:style-name="c8">
            <text:p>1.0325</text:p>
          </table:table-cell>
          <table:table-cell office:value-type="float" office:value="0.08791187336361084" table:style-name="c10">
            <text:p>+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15</text:p>
          </table:table-cell>
          <table:table-cell office:value-type="float" office:value="1.0295144999999999" table:style-name="c8">
            <text:p>1.0295</text:p>
          </table:table-cell>
          <table:table-cell office:value-type="string" table:style-name="c8">
            <text:p>2026-03-04 19:45</text:p>
          </table:table-cell>
          <table:table-cell office:value-type="float" office:value="1.0324834999999999" table:style-name="c8">
            <text:p>1.0325</text:p>
          </table:table-cell>
          <table:table-cell office:value-type="float" office:value="0.08791187336361084" table:style-name="c10">
            <text:p>+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9:15</text:p>
          </table:table-cell>
          <table:table-cell office:value-type="float" office:value="1.0245119999999999" table:style-name="c8">
            <text:p>1.0245</text:p>
          </table:table-cell>
          <table:table-cell office:value-type="string" table:style-name="c8">
            <text:p>2026-03-05 19:45</text:p>
          </table:table-cell>
          <table:table-cell office:value-type="float" office:value="1.0144925" table:style-name="c8">
            <text:p>1.0145</text:p>
          </table:table-cell>
          <table:table-cell office:value-type="float" office:value="-1.175922830332865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2:30</text:p>
          </table:table-cell>
          <table:table-cell office:value-type="float" office:value="0.8814405" table:style-name="c8">
            <text:p>0.88144</text:p>
          </table:table-cell>
          <table:table-cell office:value-type="string" table:style-name="c8">
            <text:p>2026-03-15 03:00</text:p>
          </table:table-cell>
          <table:table-cell office:value-type="float" office:value="0.8845575000000001" table:style-name="c8">
            <text:p>0.88456</text:p>
          </table:table-cell>
          <table:table-cell office:value-type="float" office:value="0.15301878657723034" table:style-name="c10">
            <text:p>+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3:00</text:p>
          </table:table-cell>
          <table:table-cell office:value-type="float" office:value="0.90045" table:style-name="c8">
            <text:p>0.90045</text:p>
          </table:table-cell>
          <table:table-cell office:value-type="string" table:style-name="c8">
            <text:p>2026-03-15 23:30</text:p>
          </table:table-cell>
          <table:table-cell office:value-type="float" office:value="0.8915540000000001" table:style-name="c8">
            <text:p>0.89155</text:p>
          </table:table-cell>
          <table:table-cell office:value-type="float" office:value="-1.1858755562218715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0.9044519999999999" table:style-name="c8">
            <text:p>0.90445</text:p>
          </table:table-cell>
          <table:table-cell office:value-type="string" table:style-name="c8">
            <text:p>2026-03-16 04:00</text:p>
          </table:table-cell>
          <table:table-cell office:value-type="float" office:value="0.9115440000000001" table:style-name="c8">
            <text:p>0.91154</text:p>
          </table:table-cell>
          <table:table-cell office:value-type="float" office:value="0.5826537554231903" table:style-name="c10">
            <text:p>+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5:45</text:p>
          </table:table-cell>
          <table:table-cell office:value-type="float" office:value="0.9394694999999998" table:style-name="c8">
            <text:p>0.93947</text:p>
          </table:table-cell>
          <table:table-cell office:value-type="string" table:style-name="c8">
            <text:p>2026-03-16 06:15</text:p>
          </table:table-cell>
          <table:table-cell office:value-type="float" office:value="0.9315340000000001" table:style-name="c8">
            <text:p>0.93153</text:p>
          </table:table-cell>
          <table:table-cell office:value-type="float" office:value="-1.0428903190576877" table:style-name="c9">
            <text:p>-1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6:30</text:p>
          </table:table-cell>
          <table:table-cell office:value-type="float" office:value="0.9434714999999999" table:style-name="c8">
            <text:p>0.94347</text:p>
          </table:table-cell>
          <table:table-cell office:value-type="string" table:style-name="c8">
            <text:p>2026-03-16 07:00</text:p>
          </table:table-cell>
          <table:table-cell office:value-type="float" office:value="0.943528" table:style-name="c8">
            <text:p>0.94353</text:p>
          </table:table-cell>
          <table:table-cell office:value-type="float" office:value="-0.1939234488800068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6:30</text:p>
          </table:table-cell>
          <table:table-cell office:value-type="float" office:value="0.9534765" table:style-name="c8">
            <text:p>0.95348</text:p>
          </table:table-cell>
          <table:table-cell office:value-type="string" table:style-name="c8">
            <text:p>2026-03-16 17:00</text:p>
          </table:table-cell>
          <table:table-cell office:value-type="float" office:value="0.951524" table:style-name="c8">
            <text:p>0.95152</text:p>
          </table:table-cell>
          <table:table-cell office:value-type="float" office:value="-0.4042675908635385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8:30</text:p>
          </table:table-cell>
          <table:table-cell office:value-type="float" office:value="0.9684839999999999" table:style-name="c8">
            <text:p>0.96848</text:p>
          </table:table-cell>
          <table:table-cell office:value-type="string" table:style-name="c8">
            <text:p>2026-03-16 19:00</text:p>
          </table:table-cell>
          <table:table-cell office:value-type="float" office:value="0.967516" table:style-name="c8">
            <text:p>0.96752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9:15</text:p>
          </table:table-cell>
          <table:table-cell office:value-type="float" office:value="0.9874934999999999" table:style-name="c8">
            <text:p>0.98749</text:p>
          </table:table-cell>
          <table:table-cell office:value-type="string" table:style-name="c8">
            <text:p>2026-03-16 19:45</text:p>
          </table:table-cell>
          <table:table-cell office:value-type="float" office:value="0.9745125" table:style-name="c8">
            <text:p>0.97451</text:p>
          </table:table-cell>
          <table:table-cell office:value-type="float" office:value="-1.5118125321837539" table:style-name="c9">
            <text:p>-1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7:15</text:p>
          </table:table-cell>
          <table:table-cell office:value-type="float" office:value="0.9704849999999999" table:style-name="c8">
            <text:p>0.97048</text:p>
          </table:table-cell>
          <table:table-cell office:value-type="string" table:style-name="c8">
            <text:p>2026-03-17 07:45</text:p>
          </table:table-cell>
          <table:table-cell office:value-type="float" office:value="0.9705145000000001" table:style-name="c8">
            <text:p>0.97051</text:p>
          </table:table-cell>
          <table:table-cell office:value-type="float" office:value="-0.19686635914000217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8:30</text:p>
          </table:table-cell>
          <table:table-cell office:value-type="float" office:value="0.9734864999999999" table:style-name="c8">
            <text:p>0.97349</text:p>
          </table:table-cell>
          <table:table-cell office:value-type="string" table:style-name="c8">
            <text:p>2026-03-17 09:00</text:p>
          </table:table-cell>
          <table:table-cell office:value-type="float" office:value="0.9655170000000001" table:style-name="c8">
            <text:p>0.96552</text:p>
          </table:table-cell>
          <table:table-cell office:value-type="float" office:value="-1.0169189283056324" table:style-name="c9">
            <text:p>-1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9:30</text:p>
          </table:table-cell>
          <table:table-cell office:value-type="float" office:value="0.9714854999999999" table:style-name="c8">
            <text:p>0.97149</text:p>
          </table:table-cell>
          <table:table-cell office:value-type="string" table:style-name="c8">
            <text:p>2026-03-17 10:00</text:p>
          </table:table-cell>
          <table:table-cell office:value-type="float" office:value="0.9685155" table:style-name="c8">
            <text:p>0.96852</text:p>
          </table:table-cell>
          <table:table-cell office:value-type="float" office:value="-0.5050062491411267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1:30</text:p>
          </table:table-cell>
          <table:table-cell office:value-type="float" office:value="0.9814904999999999" table:style-name="c8">
            <text:p>0.98149</text:p>
          </table:table-cell>
          <table:table-cell office:value-type="string" table:style-name="c8">
            <text:p>2026-03-17 12:00</text:p>
          </table:table-cell>
          <table:table-cell office:value-type="float" office:value="0.977511" table:style-name="c8">
            <text:p>0.97751</text:p>
          </table:table-cell>
          <table:table-cell office:value-type="float" office:value="-0.6045442608970664" table:style-name="c9">
            <text:p>-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1 15:00</text:p>
          </table:table-cell>
          <table:table-cell office:value-type="float" office:value="0.9254625" table:style-name="c8">
            <text:p>0.92546</text:p>
          </table:table-cell>
          <table:table-cell office:value-type="string" table:style-name="c8">
            <text:p>2026-03-21 15:30</text:p>
          </table:table-cell>
          <table:table-cell office:value-type="float" office:value="0.943528" table:style-name="c8">
            <text:p>0.94353</text:p>
          </table:table-cell>
          <table:table-cell office:value-type="float" office:value="1.74824885157423" table:style-name="c10">
            <text:p>+1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1 16:00</text:p>
          </table:table-cell>
          <table:table-cell office:value-type="float" office:value="0.9734864999999999" table:style-name="c8">
            <text:p>0.97349</text:p>
          </table:table-cell>
          <table:table-cell office:value-type="string" table:style-name="c8">
            <text:p>2026-03-21 16:30</text:p>
          </table:table-cell>
          <table:table-cell office:value-type="float" office:value="0.955522" table:style-name="c8">
            <text:p>0.95552</text:p>
          </table:table-cell>
          <table:table-cell office:value-type="float" office:value="-2.0415885046171645" table:style-name="c9">
            <text:p>-2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19:00</text:p>
          </table:table-cell>
          <table:table-cell office:value-type="float" office:value="0.930465" table:style-name="c8">
            <text:p>0.93046</text:p>
          </table:table-cell>
          <table:table-cell office:value-type="string" table:style-name="c8">
            <text:p>2026-03-23 19:30</text:p>
          </table:table-cell>
          <table:table-cell office:value-type="float" office:value="0.9245375000000001" table:style-name="c8">
            <text:p>0.92454</text:p>
          </table:table-cell>
          <table:table-cell office:value-type="float" office:value="-0.8356736107752449" table:style-name="c9">
            <text:p>-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20:45</text:p>
          </table:table-cell>
          <table:table-cell office:value-type="float" office:value="0.9394694999999998" table:style-name="c8">
            <text:p>0.93947</text:p>
          </table:table-cell>
          <table:table-cell office:value-type="string" table:style-name="c8">
            <text:p>2026-03-23 21:15</text:p>
          </table:table-cell>
          <table:table-cell office:value-type="float" office:value="0.9345325000000001" table:style-name="c8">
            <text:p>0.93453</text:p>
          </table:table-cell>
          <table:table-cell office:value-type="float" office:value="-0.7243588501276266" table:style-name="c9">
            <text:p>-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0.932466" table:style-name="c8">
            <text:p>0.93247</text:p>
          </table:table-cell>
          <table:table-cell office:value-type="string" table:style-name="c8">
            <text:p>2026-03-24 21:00</text:p>
          </table:table-cell>
          <table:table-cell office:value-type="float" office:value="0.9315340000000001" table:style-name="c8">
            <text:p>0.93153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2:00</text:p>
          </table:table-cell>
          <table:table-cell office:value-type="float" office:value="0.934467" table:style-name="c8">
            <text:p>0.93447</text:p>
          </table:table-cell>
          <table:table-cell office:value-type="string" table:style-name="c8">
            <text:p>2026-03-24 22:30</text:p>
          </table:table-cell>
          <table:table-cell office:value-type="float" office:value="0.9235380000000001" table:style-name="c8">
            <text:p>0.92354</text:p>
          </table:table-cell>
          <table:table-cell office:value-type="float" office:value="-1.3671057899315775" table:style-name="c9">
            <text:p>-1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0:45</text:p>
          </table:table-cell>
          <table:table-cell office:value-type="float" office:value="0.9314655" table:style-name="c8">
            <text:p>0.93147</text:p>
          </table:table-cell>
          <table:table-cell office:value-type="string" table:style-name="c8">
            <text:p>2026-03-25 11:15</text:p>
          </table:table-cell>
          <table:table-cell office:value-type="float" office:value="0.9295350000000001" table:style-name="c8">
            <text:p>0.92954</text:p>
          </table:table-cell>
          <table:table-cell office:value-type="float" office:value="-0.4067397520358895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2:00</text:p>
          </table:table-cell>
          <table:table-cell office:value-type="float" office:value="0.8294144999999999" table:style-name="c8">
            <text:p>0.82941</text:p>
          </table:table-cell>
          <table:table-cell office:value-type="string" table:style-name="c8">
            <text:p>2026-03-31 02:30</text:p>
          </table:table-cell>
          <table:table-cell office:value-type="float" office:value="0.831584" table:style-name="c8">
            <text:p>0.83158</text:p>
          </table:table-cell>
          <table:table-cell office:value-type="float" office:value="0.06114718081249304" table:style-name="c10">
            <text:p>+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7:00</text:p>
          </table:table-cell>
          <table:table-cell office:value-type="float" office:value="0.8394194999999999" table:style-name="c8">
            <text:p>0.83942</text:p>
          </table:table-cell>
          <table:table-cell office:value-type="string" table:style-name="c8">
            <text:p>2026-03-31 07:30</text:p>
          </table:table-cell>
          <table:table-cell office:value-type="float" office:value="0.8405795" table:style-name="c8">
            <text:p>0.84058</text:p>
          </table:table-cell>
          <table:table-cell office:value-type="float" office:value="-0.061985505518979966" table:style-name="c9">
            <text:p>-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4:00</text:p>
          </table:table-cell>
          <table:table-cell office:value-type="float" office:value="0.8314154999999999" table:style-name="c8">
            <text:p>0.83142</text:p>
          </table:table-cell>
          <table:table-cell office:value-type="string" table:style-name="c8">
            <text:p>2026-03-31 14:30</text:p>
          </table:table-cell>
          <table:table-cell office:value-type="float" office:value="0.8345825" table:style-name="c8">
            <text:p>0.83458</text:p>
          </table:table-cell>
          <table:table-cell office:value-type="float" office:value="0.18025518919242423" table:style-name="c10">
            <text:p>+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15</text:p>
          </table:table-cell>
          <table:table-cell office:value-type="float" office:value="0.8464229999999999" table:style-name="c8">
            <text:p>0.84642</text:p>
          </table:table-cell>
          <table:table-cell office:value-type="string" table:style-name="c8">
            <text:p>2026-04-01 06:45</text:p>
          </table:table-cell>
          <table:table-cell office:value-type="float" office:value="0.847576" table:style-name="c8">
            <text:p>0.84758</text:p>
          </table:table-cell>
          <table:table-cell office:value-type="float" office:value="-0.06395199846884747" table:style-name="c9">
            <text:p>-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7:15</text:p>
          </table:table-cell>
          <table:table-cell office:value-type="float" office:value="0.8494244999999999" table:style-name="c8">
            <text:p>0.84942</text:p>
          </table:table-cell>
          <table:table-cell office:value-type="string" table:style-name="c8">
            <text:p>2026-04-01 07:45</text:p>
          </table:table-cell>
          <table:table-cell office:value-type="float" office:value="0.847576" table:style-name="c8">
            <text:p>0.84758</text:p>
          </table:table-cell>
          <table:table-cell office:value-type="float" office:value="-0.41708291013502485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45</text:p>
          </table:table-cell>
          <table:table-cell office:value-type="float" office:value="0.8554274999999999" table:style-name="c8">
            <text:p>0.85543</text:p>
          </table:table-cell>
          <table:table-cell office:value-type="string" table:style-name="c8">
            <text:p>2026-04-01 13:15</text:p>
          </table:table-cell>
          <table:table-cell office:value-type="float" office:value="0.8465765000000001" table:style-name="c8">
            <text:p>0.84658</text:p>
          </table:table-cell>
          <table:table-cell office:value-type="float" office:value="-1.2325189947131499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2:00</text:p>
          </table:table-cell>
          <table:table-cell office:value-type="float" office:value="0.8504249999999999" table:style-name="c8">
            <text:p>0.85042</text:p>
          </table:table-cell>
          <table:table-cell office:value-type="string" table:style-name="c8">
            <text:p>2026-04-03 12:30</text:p>
          </table:table-cell>
          <table:table-cell office:value-type="float" office:value="0.847576" table:style-name="c8">
            <text:p>0.84758</text:p>
          </table:table-cell>
          <table:table-cell office:value-type="float" office:value="-0.5342392831819143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2:30</text:p>
          </table:table-cell>
          <table:table-cell office:value-type="float" office:value="0.8414204999999999" table:style-name="c8">
            <text:p>0.84142</text:p>
          </table:table-cell>
          <table:table-cell office:value-type="string" table:style-name="c8">
            <text:p>2026-04-04 13:00</text:p>
          </table:table-cell>
          <table:table-cell office:value-type="float" office:value="0.841579" table:style-name="c8">
            <text:p>0.84158</text:p>
          </table:table-cell>
          <table:table-cell office:value-type="float" office:value="-0.1811004629670876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2:30</text:p>
          </table:table-cell>
          <table:table-cell office:value-type="float" office:value="0.8514255" table:style-name="c8">
            <text:p>0.85143</text:p>
          </table:table-cell>
          <table:table-cell office:value-type="string" table:style-name="c8">
            <text:p>2026-04-06 03:00</text:p>
          </table:table-cell>
          <table:table-cell office:value-type="float" office:value="0.8565715" table:style-name="c8">
            <text:p>0.85657</text:p>
          </table:table-cell>
          <table:table-cell office:value-type="float" office:value="0.40328996154097574" table:style-name="c10">
            <text:p>+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8:45</text:p>
          </table:table-cell>
          <table:table-cell office:value-type="float" office:value="0.8584289999999999" table:style-name="c8">
            <text:p>0.85843</text:p>
          </table:table-cell>
          <table:table-cell office:value-type="string" table:style-name="c8">
            <text:p>2026-04-06 09:15</text:p>
          </table:table-cell>
          <table:table-cell office:value-type="float" office:value="0.8625685000000001" table:style-name="c8">
            <text:p>0.86257</text:p>
          </table:table-cell>
          <table:table-cell office:value-type="float" office:value="0.2813541444312895" table:style-name="c10">
            <text:p>+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30</text:p>
          </table:table-cell>
          <table:table-cell office:value-type="float" office:value="0.872436" table:style-name="c8">
            <text:p>0.87244</text:p>
          </table:table-cell>
          <table:table-cell office:value-type="string" table:style-name="c8">
            <text:p>2026-04-06 10:00</text:p>
          </table:table-cell>
          <table:table-cell office:value-type="float" office:value="0.8745625" table:style-name="c8">
            <text:p>0.87456</text:p>
          </table:table-cell>
          <table:table-cell office:value-type="float" office:value="0.0433555656231599" table:style-name="c10">
            <text:p>+0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15</text:p>
          </table:table-cell>
          <table:table-cell office:value-type="float" office:value="0.8834415" table:style-name="c8">
            <text:p>0.88344</text:p>
          </table:table-cell>
          <table:table-cell office:value-type="string" table:style-name="c8">
            <text:p>2026-04-06 10:45</text:p>
          </table:table-cell>
          <table:table-cell office:value-type="float" office:value="0.8805595" table:style-name="c8">
            <text:p>0.88056</text:p>
          </table:table-cell>
          <table:table-cell office:value-type="float" office:value="-0.5254720816828207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2:00</text:p>
          </table:table-cell>
          <table:table-cell office:value-type="float" office:value="0.894447" table:style-name="c8">
            <text:p>0.89445</text:p>
          </table:table-cell>
          <table:table-cell office:value-type="string" table:style-name="c8">
            <text:p>2026-04-06 12:30</text:p>
          </table:table-cell>
          <table:table-cell office:value-type="float" office:value="0.901549" table:style-name="c8">
            <text:p>0.90155</text:p>
          </table:table-cell>
          <table:table-cell office:value-type="float" office:value="0.5925229274624577" table:style-name="c10">
            <text:p>+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05:15</text:p>
          </table:table-cell>
          <table:table-cell office:value-type="float" office:value="0.8634314999999999" table:style-name="c8">
            <text:p>0.86343</text:p>
          </table:table-cell>
          <table:table-cell office:value-type="string" table:style-name="c8">
            <text:p>2026-04-07 05:45</text:p>
          </table:table-cell>
          <table:table-cell office:value-type="float" office:value="0.8585705" table:style-name="c8">
            <text:p>0.85857</text:p>
          </table:table-cell>
          <table:table-cell office:value-type="float" office:value="-0.7617607684570094" table:style-name="c9">
            <text:p>-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18:00</text:p>
          </table:table-cell>
          <table:table-cell office:value-type="float" office:value="0.8604299999999999" table:style-name="c8">
            <text:p>0.86043</text:p>
          </table:table-cell>
          <table:table-cell office:value-type="string" table:style-name="c8">
            <text:p>2026-04-07 18:30</text:p>
          </table:table-cell>
          <table:table-cell office:value-type="float" office:value="0.8605695" table:style-name="c8">
            <text:p>0.86057</text:p>
          </table:table-cell>
          <table:table-cell office:value-type="float" office:value="-0.18371958561416157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18:45</text:p>
          </table:table-cell>
          <table:table-cell office:value-type="float" office:value="0.8614305" table:style-name="c8">
            <text:p>0.86143</text:p>
          </table:table-cell>
          <table:table-cell office:value-type="string" table:style-name="c8">
            <text:p>2026-04-07 19:15</text:p>
          </table:table-cell>
          <table:table-cell office:value-type="float" office:value="0.8605695" table:style-name="c8">
            <text:p>0.86057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1:15</text:p>
          </table:table-cell>
          <table:table-cell office:value-type="float" office:value="0.8824409999999999" table:style-name="c8">
            <text:p>0.88244</text:p>
          </table:table-cell>
          <table:table-cell office:value-type="string" table:style-name="c8">
            <text:p>2026-04-07 21:45</text:p>
          </table:table-cell>
          <table:table-cell office:value-type="float" office:value="0.885557" table:style-name="c8">
            <text:p>0.88556</text:p>
          </table:table-cell>
          <table:table-cell office:value-type="float" office:value="0.15250555640549113" table:style-name="c10">
            <text:p>+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00</text:p>
          </table:table-cell>
          <table:table-cell office:value-type="float" office:value="0.896448" table:style-name="c8">
            <text:p>0.89645</text:p>
          </table:table-cell>
          <table:table-cell office:value-type="string" table:style-name="c8">
            <text:p>2026-04-07 22:30</text:p>
          </table:table-cell>
          <table:table-cell office:value-type="float" office:value="0.9025485000000001" table:style-name="c8">
            <text:p>0.90255</text:p>
          </table:table-cell>
          <table:table-cell office:value-type="float" office:value="0.4792587577305163" table:style-name="c10">
            <text:p>+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45</text:p>
          </table:table-cell>
          <table:table-cell office:value-type="float" office:value="0.910455" table:style-name="c8">
            <text:p>0.91046</text:p>
          </table:table-cell>
          <table:table-cell office:value-type="string" table:style-name="c8">
            <text:p>2026-04-07 23:15</text:p>
          </table:table-cell>
          <table:table-cell office:value-type="float" office:value="0.9185405000000001" table:style-name="c8">
            <text:p>0.91854</text:p>
          </table:table-cell>
          <table:table-cell office:value-type="float" office:value="0.6863971904707222" table:style-name="c10">
            <text:p>+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21:30</text:p>
          </table:table-cell>
          <table:table-cell office:value-type="float" office:value="0.8984489999999999" table:style-name="c8">
            <text:p>0.89845</text:p>
          </table:table-cell>
          <table:table-cell office:value-type="string" table:style-name="c8">
            <text:p>2026-04-08 22:00</text:p>
          </table:table-cell>
          <table:table-cell office:value-type="float" office:value="0.8985505" table:style-name="c8">
            <text:p>0.89855</text:p>
          </table:table-cell>
          <table:table-cell office:value-type="float" office:value="-0.18862533649656177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0.918459" table:style-name="c8">
            <text:p>0.91846</text:p>
          </table:table-cell>
          <table:table-cell office:value-type="string" table:style-name="c8">
            <text:p>2026-04-09 23:00</text:p>
          </table:table-cell>
          <table:table-cell office:value-type="float" office:value="0.9115440000000001" table:style-name="c8">
            <text:p>0.91154</text:p>
          </table:table-cell>
          <table:table-cell office:value-type="float" office:value="-0.9512864979274838" table:style-name="c9">
            <text:p>-1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5:30</text:p>
          </table:table-cell>
          <table:table-cell office:value-type="float" office:value="0.8954475" table:style-name="c8">
            <text:p>0.89545</text:p>
          </table:table-cell>
          <table:table-cell office:value-type="string" table:style-name="c8">
            <text:p>2026-04-11 16:00</text:p>
          </table:table-cell>
          <table:table-cell office:value-type="float" office:value="0.8975510000000001" table:style-name="c8">
            <text:p>0.89755</text:p>
          </table:table-cell>
          <table:table-cell office:value-type="float" office:value="0.03454089167707064" table:style-name="c10">
            <text:p>+0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6:15</text:p>
          </table:table-cell>
          <table:table-cell office:value-type="float" office:value="0.9044519999999999" table:style-name="c8">
            <text:p>0.90445</text:p>
          </table:table-cell>
          <table:table-cell office:value-type="string" table:style-name="c8">
            <text:p>2026-04-11 16:45</text:p>
          </table:table-cell>
          <table:table-cell office:value-type="float" office:value="0.9075460000000001" table:style-name="c8">
            <text:p>0.90755</text:p>
          </table:table-cell>
          <table:table-cell office:value-type="float" office:value="0.14150176526783742" table:style-name="c10">
            <text:p>+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7:00</text:p>
          </table:table-cell>
          <table:table-cell office:value-type="float" office:value="0.908454" table:style-name="c8">
            <text:p>0.90845</text:p>
          </table:table-cell>
          <table:table-cell office:value-type="string" table:style-name="c8">
            <text:p>2026-04-11 17:30</text:p>
          </table:table-cell>
          <table:table-cell office:value-type="float" office:value="0.9075460000000001" table:style-name="c8">
            <text:p>0.9075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0.9174585" table:style-name="c8">
            <text:p>0.91746</text:p>
          </table:table-cell>
          <table:table-cell office:value-type="string" table:style-name="c8">
            <text:p>2026-04-11 19:15</text:p>
          </table:table-cell>
          <table:table-cell office:value-type="float" office:value="0.9155420000000001" table:style-name="c8">
            <text:p>0.91554</text:p>
          </table:table-cell>
          <table:table-cell office:value-type="float" office:value="-0.4083747066488397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30</text:p>
          </table:table-cell>
          <table:table-cell office:value-type="float" office:value="0.9214605" table:style-name="c8">
            <text:p>0.92146</text:p>
          </table:table-cell>
          <table:table-cell office:value-type="string" table:style-name="c8">
            <text:p>2026-04-13 23:00</text:p>
          </table:table-cell>
          <table:table-cell office:value-type="float" office:value="0.9215390000000001" table:style-name="c8">
            <text:p>0.92154</text:p>
          </table:table-cell>
          <table:table-cell office:value-type="float" office:value="-0.19139794500142582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30</text:p>
          </table:table-cell>
          <table:table-cell office:value-type="float" office:value="0.928464" table:style-name="c8">
            <text:p>0.92846</text:p>
          </table:table-cell>
          <table:table-cell office:value-type="string" table:style-name="c8">
            <text:p>2026-04-14 00:00</text:p>
          </table:table-cell>
          <table:table-cell office:value-type="float" office:value="0.9185405000000001" table:style-name="c8">
            <text:p>0.91854</text:p>
          </table:table-cell>
          <table:table-cell office:value-type="float" office:value="-1.266571720551346" table:style-name="c9">
            <text:p>-1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1:45</text:p>
          </table:table-cell>
          <table:table-cell office:value-type="float" office:value="0.896448" table:style-name="c8">
            <text:p>0.89645</text:p>
          </table:table-cell>
          <table:table-cell office:value-type="string" table:style-name="c8">
            <text:p>2026-04-15 02:15</text:p>
          </table:table-cell>
          <table:table-cell office:value-type="float" office:value="0.8975510000000001" table:style-name="c8">
            <text:p>0.89755</text:p>
          </table:table-cell>
          <table:table-cell office:value-type="float" office:value="-0.0771048012823905" table:style-name="c9">
            <text:p>-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00</text:p>
          </table:table-cell>
          <table:table-cell office:value-type="float" office:value="0.908454" table:style-name="c8">
            <text:p>0.90845</text:p>
          </table:table-cell>
          <table:table-cell office:value-type="string" table:style-name="c8">
            <text:p>2026-04-15 12:30</text:p>
          </table:table-cell>
          <table:table-cell office:value-type="float" office:value="0.9055470000000001" table:style-name="c8">
            <text:p>0.90555</text:p>
          </table:table-cell>
          <table:table-cell office:value-type="float" office:value="-0.5192545195463749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5:15</text:p>
          </table:table-cell>
          <table:table-cell office:value-type="float" office:value="0.9124559999999999" table:style-name="c8">
            <text:p>0.91246</text:p>
          </table:table-cell>
          <table:table-cell office:value-type="string" table:style-name="c8">
            <text:p>2026-04-15 15:45</text:p>
          </table:table-cell>
          <table:table-cell office:value-type="float" office:value="0.9035480000000001" table:style-name="c8">
            <text:p>0.90355</text:p>
          </table:table-cell>
          <table:table-cell office:value-type="float" office:value="-1.1742146965990519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00</text:p>
          </table:table-cell>
          <table:table-cell office:value-type="float" office:value="0.914457" table:style-name="c8">
            <text:p>0.91446</text:p>
          </table:table-cell>
          <table:table-cell office:value-type="string" table:style-name="c8">
            <text:p>2026-04-15 17:30</text:p>
          </table:table-cell>
          <table:table-cell office:value-type="float" office:value="0.9165415000000001" table:style-name="c8">
            <text:p>0.91654</text:p>
          </table:table-cell>
          <table:table-cell office:value-type="float" office:value="0.027593811573445315" table:style-name="c10">
            <text:p>+0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0.9194595" table:style-name="c8">
            <text:p>0.91946</text:p>
          </table:table-cell>
          <table:table-cell office:value-type="string" table:style-name="c8">
            <text:p>2026-04-15 20:15</text:p>
          </table:table-cell>
          <table:table-cell office:value-type="float" office:value="0.9155420000000001" table:style-name="c8">
            <text:p>0.91554</text:p>
          </table:table-cell>
          <table:table-cell office:value-type="float" office:value="-0.6251138258944522" table:style-name="c9">
            <text:p>-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15</text:p>
          </table:table-cell>
          <table:table-cell office:value-type="float" office:value="0.9214605" table:style-name="c8">
            <text:p>0.92146</text:p>
          </table:table-cell>
          <table:table-cell office:value-type="string" table:style-name="c8">
            <text:p>2026-04-16 02:45</text:p>
          </table:table-cell>
          <table:table-cell office:value-type="float" office:value="0.9325335000000001" table:style-name="c8">
            <text:p>0.93253</text:p>
          </table:table-cell>
          <table:table-cell office:value-type="float" office:value="0.999377133745849" table:style-name="c10">
            <text:p>+1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3:00</text:p>
          </table:table-cell>
          <table:table-cell office:value-type="float" office:value="0.9314655" table:style-name="c8">
            <text:p>0.93147</text:p>
          </table:table-cell>
          <table:table-cell office:value-type="string" table:style-name="c8">
            <text:p>2026-04-16 03:30</text:p>
          </table:table-cell>
          <table:table-cell office:value-type="float" office:value="0.93953" table:style-name="c8">
            <text:p>0.93953</text:p>
          </table:table-cell>
          <table:table-cell office:value-type="float" office:value="0.6641555194475846" table:style-name="c10">
            <text:p>+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3:45</text:p>
          </table:table-cell>
          <table:table-cell office:value-type="float" office:value="0.9434714999999999" table:style-name="c8">
            <text:p>0.94347</text:p>
          </table:table-cell>
          <table:table-cell office:value-type="string" table:style-name="c8">
            <text:p>2026-04-16 04:15</text:p>
          </table:table-cell>
          <table:table-cell office:value-type="float" office:value="0.947526" table:style-name="c8">
            <text:p>0.94753</text:p>
          </table:table-cell>
          <table:table-cell office:value-type="float" office:value="0.22898365515018337" table:style-name="c10">
            <text:p>+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4:30</text:p>
          </table:table-cell>
          <table:table-cell office:value-type="float" office:value="0.9524759999999999" table:style-name="c8">
            <text:p>0.95248</text:p>
          </table:table-cell>
          <table:table-cell office:value-type="string" table:style-name="c8">
            <text:p>2026-04-16 05:00</text:p>
          </table:table-cell>
          <table:table-cell office:value-type="float" office:value="0.9655170000000001" table:style-name="c8">
            <text:p>0.96552</text:p>
          </table:table-cell>
          <table:table-cell office:value-type="float" office:value="1.16653138945233" table:style-name="c10">
            <text:p>+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15</text:p>
          </table:table-cell>
          <table:table-cell office:value-type="float" office:value="0.9974985" table:style-name="c8">
            <text:p>0.9975</text:p>
          </table:table-cell>
          <table:table-cell office:value-type="string" table:style-name="c8">
            <text:p>2026-04-16 12:45</text:p>
          </table:table-cell>
          <table:table-cell office:value-type="float" office:value="0.987506" table:style-name="c8">
            <text:p>0.98751</text:p>
          </table:table-cell>
          <table:table-cell office:value-type="float" office:value="-1.199653382335908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30</text:p>
          </table:table-cell>
          <table:table-cell office:value-type="float" office:value="1.0025009999999999" table:style-name="c8">
            <text:p>1.0025</text:p>
          </table:table-cell>
          <table:table-cell office:value-type="string" table:style-name="c8">
            <text:p>2026-04-16 14:00</text:p>
          </table:table-cell>
          <table:table-cell office:value-type="float" office:value="0.9895050000000001" table:style-name="c8">
            <text:p>0.98951</text:p>
          </table:table-cell>
          <table:table-cell office:value-type="float" office:value="-1.4936663898589386" table:style-name="c9">
            <text:p>-1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1.0155074999999998" table:style-name="c8">
            <text:p>1.0155</text:p>
          </table:table-cell>
          <table:table-cell office:value-type="string" table:style-name="c8">
            <text:p>2026-04-16 16:30</text:p>
          </table:table-cell>
          <table:table-cell office:value-type="float" office:value="1.0014990000000001" table:style-name="c8">
            <text:p>1.0015</text:p>
          </table:table-cell>
          <table:table-cell office:value-type="float" office:value="-1.5766005175736897" table:style-name="c9">
            <text:p>-1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30</text:p>
          </table:table-cell>
          <table:table-cell office:value-type="float" office:value="0.9984989999999999" table:style-name="c8">
            <text:p>0.9985</text:p>
          </table:table-cell>
          <table:table-cell office:value-type="string" table:style-name="c8">
            <text:p>2026-04-17 08:00</text:p>
          </table:table-cell>
          <table:table-cell office:value-type="float" office:value="1.0064965" table:style-name="c8">
            <text:p>1.0065</text:p>
          </table:table-cell>
          <table:table-cell office:value-type="float" office:value="0.5994511257898072" table:style-name="c10">
            <text:p>+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15</text:p>
          </table:table-cell>
          <table:table-cell office:value-type="float" office:value="1.0005" table:style-name="c8">
            <text:p>1.0005</text:p>
          </table:table-cell>
          <table:table-cell office:value-type="string" table:style-name="c8">
            <text:p>2026-04-17 08:45</text:p>
          </table:table-cell>
          <table:table-cell office:value-type="float" office:value="0.9905045" table:style-name="c8">
            <text:p>0.9905</text:p>
          </table:table-cell>
          <table:table-cell office:value-type="float" office:value="-1.1969533728635628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6:15</text:p>
          </table:table-cell>
          <table:table-cell office:value-type="float" office:value="0.9854924999999999" table:style-name="c8">
            <text:p>0.98549</text:p>
          </table:table-cell>
          <table:table-cell office:value-type="string" table:style-name="c8">
            <text:p>2026-04-18 06:45</text:p>
          </table:table-cell>
          <table:table-cell office:value-type="float" office:value="0.9925035000000001" table:style-name="c8">
            <text:p>0.9925</text:p>
          </table:table-cell>
          <table:table-cell office:value-type="float" office:value="0.5100988088189595" table:style-name="c10">
            <text:p>+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0.9624809999999999" table:style-name="c8">
            <text:p>0.96248</text:p>
          </table:table-cell>
          <table:table-cell office:value-type="string" table:style-name="c8">
            <text:p>2026-04-22 06:00</text:p>
          </table:table-cell>
          <table:table-cell office:value-type="float" office:value="0.953523" table:style-name="c8">
            <text:p>0.95352</text:p>
          </table:table-cell>
          <table:table-cell office:value-type="float" office:value="-1.1287591627263227" table:style-name="c9">
            <text:p>-1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1:15</text:p>
          </table:table-cell>
          <table:table-cell office:value-type="float" office:value="0.9394694999999998" table:style-name="c8">
            <text:p>0.93947</text:p>
          </table:table-cell>
          <table:table-cell office:value-type="string" table:style-name="c8">
            <text:p>2026-04-24 11:45</text:p>
          </table:table-cell>
          <table:table-cell office:value-type="float" office:value="0.941529" table:style-name="c8">
            <text:p>0.94153</text:p>
          </table:table-cell>
          <table:table-cell office:value-type="float" office:value="0.01888124404252345" table:style-name="c10">
            <text:p>+0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6:00</text:p>
          </table:table-cell>
          <table:table-cell office:value-type="float" office:value="0.9464729999999999" table:style-name="c8">
            <text:p>0.94647</text:p>
          </table:table-cell>
          <table:table-cell office:value-type="string" table:style-name="c8">
            <text:p>2026-04-24 16:30</text:p>
          </table:table-cell>
          <table:table-cell office:value-type="float" office:value="0.945527" table:style-name="c8">
            <text:p>0.94553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4:15</text:p>
          </table:table-cell>
          <table:table-cell office:value-type="float" office:value="0.9564779999999999" table:style-name="c8">
            <text:p>0.95648</text:p>
          </table:table-cell>
          <table:table-cell office:value-type="string" table:style-name="c8">
            <text:p>2026-04-25 04:45</text:p>
          </table:table-cell>
          <table:table-cell office:value-type="float" office:value="0.951524" table:style-name="c8">
            <text:p>0.95152</text:p>
          </table:table-cell>
          <table:table-cell office:value-type="float" office:value="-0.7168065000972224" table:style-name="c9">
            <text:p>-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22:45</text:p>
          </table:table-cell>
          <table:table-cell office:value-type="float" office:value="0.9384689999999999" table:style-name="c8">
            <text:p>0.93847</text:p>
          </table:table-cell>
          <table:table-cell office:value-type="string" table:style-name="c8">
            <text:p>2026-04-25 23:15</text:p>
          </table:table-cell>
          <table:table-cell office:value-type="float" office:value="0.9385305" table:style-name="c8">
            <text:p>0.93853</text:p>
          </table:table-cell>
          <table:table-cell office:value-type="float" office:value="-0.19335987331493554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5:15</text:p>
          </table:table-cell>
          <table:table-cell office:value-type="float" office:value="0.9494744999999999" table:style-name="c8">
            <text:p>0.94947</text:p>
          </table:table-cell>
          <table:table-cell office:value-type="string" table:style-name="c8">
            <text:p>2026-04-26 05:45</text:p>
          </table:table-cell>
          <table:table-cell office:value-type="float" office:value="0.9485255" table:style-name="c8">
            <text:p>0.94853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6:15</text:p>
          </table:table-cell>
          <table:table-cell office:value-type="float" office:value="0.9504749999999998" table:style-name="c8">
            <text:p>0.95047</text:p>
          </table:table-cell>
          <table:table-cell office:value-type="string" table:style-name="c8">
            <text:p>2026-04-26 06:45</text:p>
          </table:table-cell>
          <table:table-cell office:value-type="float" office:value="0.953523" table:style-name="c8">
            <text:p>0.95352</text:p>
          </table:table-cell>
          <table:table-cell office:value-type="float" office:value="0.12014072153396782" table:style-name="c10">
            <text:p>+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5:00</text:p>
          </table:table-cell>
          <table:table-cell office:value-type="float" office:value="0.9474734999999999" table:style-name="c8">
            <text:p>0.94747</text:p>
          </table:table-cell>
          <table:table-cell office:value-type="string" table:style-name="c8">
            <text:p>2026-04-29 05:30</text:p>
          </table:table-cell>
          <table:table-cell office:value-type="float" office:value="0.9445275" table:style-name="c8">
            <text:p>0.94453</text:p>
          </table:table-cell>
          <table:table-cell office:value-type="float" office:value="-0.5102106256797523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0.9554774999999999" table:style-name="c8">
            <text:p>0.95548</text:p>
          </table:table-cell>
          <table:table-cell office:value-type="string" table:style-name="c8">
            <text:p>2026-04-29 10:30</text:p>
          </table:table-cell>
          <table:table-cell office:value-type="float" office:value="0.9625185" table:style-name="c8">
            <text:p>0.96252</text:p>
          </table:table-cell>
          <table:table-cell office:value-type="float" office:value="0.5355359512390745" table:style-name="c10">
            <text:p>+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1:15</text:p>
          </table:table-cell>
          <table:table-cell office:value-type="float" office:value="0.9824909999999999" table:style-name="c8">
            <text:p>0.98249</text:p>
          </table:table-cell>
          <table:table-cell office:value-type="string" table:style-name="c8">
            <text:p>2026-04-29 11:45</text:p>
          </table:table-cell>
          <table:table-cell office:value-type="float" office:value="0.9785105000000001" table:style-name="c8">
            <text:p>0.97851</text:p>
          </table:table-cell>
          <table:table-cell office:value-type="float" office:value="-0.6042337781720031" table:style-name="c9">
            <text:p>-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03:30</text:p>
          </table:table-cell>
          <table:table-cell office:value-type="float" office:value="0.9334665" table:style-name="c8">
            <text:p>0.93347</text:p>
          </table:table-cell>
          <table:table-cell office:value-type="string" table:style-name="c8">
            <text:p>2026-05-01 04:00</text:p>
          </table:table-cell>
          <table:table-cell office:value-type="float" office:value="0.9315340000000001" table:style-name="c8">
            <text:p>0.93153</text:p>
          </table:table-cell>
          <table:table-cell office:value-type="float" office:value="-0.4065101924921821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2:30</text:p>
          </table:table-cell>
          <table:table-cell office:value-type="float" office:value="0.9254625" table:style-name="c8">
            <text:p>0.92546</text:p>
          </table:table-cell>
          <table:table-cell office:value-type="string" table:style-name="c8">
            <text:p>2026-05-01 13:00</text:p>
          </table:table-cell>
          <table:table-cell office:value-type="float" office:value="0.9235380000000001" table:style-name="c8">
            <text:p>0.92354</text:p>
          </table:table-cell>
          <table:table-cell office:value-type="float" office:value="-0.4074343868065933" table:style-name="c9">
            <text:p>-0.4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3:15</text:p>
          </table:table-cell>
          <table:table-cell office:value-type="float" office:value="0.9294645" table:style-name="c8">
            <text:p>0.92946</text:p>
          </table:table-cell>
          <table:table-cell office:value-type="string" table:style-name="c8">
            <text:p>2026-05-01 13:45</text:p>
          </table:table-cell>
          <table:table-cell office:value-type="float" office:value="0.9305345000000002" table:style-name="c8">
            <text:p>0.93053</text:p>
          </table:table-cell>
          <table:table-cell office:value-type="float" office:value="-0.0850100746720095" table:style-name="c9">
            <text:p>-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15</text:p>
          </table:table-cell>
          <table:table-cell office:value-type="float" office:value="0.934467" table:style-name="c8">
            <text:p>0.93447</text:p>
          </table:table-cell>
          <table:table-cell office:value-type="string" table:style-name="c8">
            <text:p>2026-05-03 22:45</text:p>
          </table:table-cell>
          <table:table-cell office:value-type="float" office:value="0.9345325000000001" table:style-name="c8">
            <text:p>0.93453</text:p>
          </table:table-cell>
          <table:table-cell office:value-type="float" office:value="-0.19290466838314257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00</text:p>
          </table:table-cell>
          <table:table-cell office:value-type="float" office:value="0.9484739999999999" table:style-name="c8">
            <text:p>0.94847</text:p>
          </table:table-cell>
          <table:table-cell office:value-type="string" table:style-name="c8">
            <text:p>2026-05-04 02:30</text:p>
          </table:table-cell>
          <table:table-cell office:value-type="float" office:value="0.9585205" table:style-name="c8">
            <text:p>0.95852</text:p>
          </table:table-cell>
          <table:table-cell office:value-type="float" office:value="0.8572103737688241" table:style-name="c10">
            <text:p>+0.9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45</text:p>
          </table:table-cell>
          <table:table-cell office:value-type="float" office:value="0.9704849999999999" table:style-name="c8">
            <text:p>0.97048</text:p>
          </table:table-cell>
          <table:table-cell office:value-type="string" table:style-name="c8">
            <text:p>2026-05-04 03:15</text:p>
          </table:table-cell>
          <table:table-cell office:value-type="float" office:value="0.971514" table:style-name="c8">
            <text:p>0.97151</text:p>
          </table:table-cell>
          <table:table-cell office:value-type="float" office:value="-0.09408249339247776" table:style-name="c9">
            <text:p>-0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15</text:p>
          </table:table-cell>
          <table:table-cell office:value-type="float" office:value="0.9454724999999999" table:style-name="c8">
            <text:p>0.94547</text:p>
          </table:table-cell>
          <table:table-cell office:value-type="string" table:style-name="c8">
            <text:p>2026-05-04 15:45</text:p>
          </table:table-cell>
          <table:table-cell office:value-type="float" office:value="0.9365315000000001" table:style-name="c8">
            <text:p>0.93653</text:p>
          </table:table-cell>
          <table:table-cell office:value-type="float" office:value="-1.1436743499678492" table:style-name="c9">
            <text:p>-1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4:30</text:p>
          </table:table-cell>
          <table:table-cell office:value-type="float" office:value="0.9454724999999999" table:style-name="c8">
            <text:p>0.94547</text:p>
          </table:table-cell>
          <table:table-cell office:value-type="string" table:style-name="c8">
            <text:p>2026-05-05 05:00</text:p>
          </table:table-cell>
          <table:table-cell office:value-type="float" office:value="0.9445275" table:style-name="c8">
            <text:p>0.94453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0:45</text:p>
          </table:table-cell>
          <table:table-cell office:value-type="float" office:value="0.9734864999999999" table:style-name="c8">
            <text:p>0.97349</text:p>
          </table:table-cell>
          <table:table-cell office:value-type="string" table:style-name="c8">
            <text:p>2026-05-05 21:15</text:p>
          </table:table-cell>
          <table:table-cell office:value-type="float" office:value="0.9965015" table:style-name="c8">
            <text:p>0.9965</text:p>
          </table:table-cell>
          <table:table-cell office:value-type="float" office:value="2.1595567582601616" table:style-name="c10">
            <text:p>+2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1:30</text:p>
          </table:table-cell>
          <table:table-cell office:value-type="float" office:value="0.9914955" table:style-name="c8">
            <text:p>0.9915</text:p>
          </table:table-cell>
          <table:table-cell office:value-type="string" table:style-name="c8">
            <text:p>2026-05-06 02:00</text:p>
          </table:table-cell>
          <table:table-cell office:value-type="float" office:value="1.0344825" table:style-name="c8">
            <text:p>1.0345</text:p>
          </table:table-cell>
          <table:table-cell office:value-type="float" office:value="4.127005062806632" table:style-name="c10">
            <text:p>+4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2:45</text:p>
          </table:table-cell>
          <table:table-cell office:value-type="float" office:value="1.0245119999999999" table:style-name="c8">
            <text:p>1.0245</text:p>
          </table:table-cell>
          <table:table-cell office:value-type="string" table:style-name="c8">
            <text:p>2026-05-06 03:15</text:p>
          </table:table-cell>
          <table:table-cell office:value-type="float" office:value="1.0504745" table:style-name="c8">
            <text:p>1.0505</text:p>
          </table:table-cell>
          <table:table-cell office:value-type="float" office:value="2.329167591448411" table:style-name="c10">
            <text:p>+2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30</text:p>
          </table:table-cell>
          <table:table-cell office:value-type="float" office:value="1.074537" table:style-name="c8">
            <text:p>1.0745</text:p>
          </table:table-cell>
          <table:table-cell office:value-type="string" table:style-name="c8">
            <text:p>2026-05-06 04:00</text:p>
          </table:table-cell>
          <table:table-cell office:value-type="float" office:value="1.1174410000000001" table:style-name="c8">
            <text:p>1.1174</text:p>
          </table:table-cell>
          <table:table-cell office:value-type="float" office:value="3.784907866457843" table:style-name="c10">
            <text:p>+3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4:45</text:p>
          </table:table-cell>
          <table:table-cell office:value-type="float" office:value="1.094547" table:style-name="c8">
            <text:p>1.0945</text:p>
          </table:table-cell>
          <table:table-cell office:value-type="string" table:style-name="c8">
            <text:p>2026-05-07 05:15</text:p>
          </table:table-cell>
          <table:table-cell office:value-type="float" office:value="1.0874560000000002" table:style-name="c8">
            <text:p>1.0875</text:p>
          </table:table-cell>
          <table:table-cell office:value-type="float" office:value="-0.8464528744768218" table:style-name="c9">
            <text:p>-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7:00</text:p>
          </table:table-cell>
          <table:table-cell office:value-type="float" office:value="1.108554" table:style-name="c8">
            <text:p>1.1086</text:p>
          </table:table-cell>
          <table:table-cell office:value-type="string" table:style-name="c8">
            <text:p>2026-05-07 07:30</text:p>
          </table:table-cell>
          <table:table-cell office:value-type="float" office:value="1.0904545" table:style-name="c8">
            <text:p>1.0905</text:p>
          </table:table-cell>
          <table:table-cell office:value-type="float" office:value="-1.8293487322674329" table:style-name="c9">
            <text:p>-1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2:15</text:p>
          </table:table-cell>
          <table:table-cell office:value-type="float" office:value="1.118559" table:style-name="c8">
            <text:p>1.1186</text:p>
          </table:table-cell>
          <table:table-cell office:value-type="string" table:style-name="c8">
            <text:p>2026-05-07 12:45</text:p>
          </table:table-cell>
          <table:table-cell office:value-type="float" office:value="1.1074460000000002" table:style-name="c8">
            <text:p>1.1074</text:p>
          </table:table-cell>
          <table:table-cell office:value-type="float" office:value="-1.1914243731443563" table:style-name="c9">
            <text:p>-1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20:00</text:p>
          </table:table-cell>
          <table:table-cell office:value-type="float" office:value="1.08054" table:style-name="c8">
            <text:p>1.0805</text:p>
          </table:table-cell>
          <table:table-cell office:value-type="string" table:style-name="c8">
            <text:p>2026-05-07 20:30</text:p>
          </table:table-cell>
          <table:table-cell office:value-type="float" office:value="1.0844575" table:style-name="c8">
            <text:p>1.0845</text:p>
          </table:table-cell>
          <table:table-cell office:value-type="float" office:value="0.16192546851574452" table:style-name="c10">
            <text:p>+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5:45</text:p>
          </table:table-cell>
          <table:table-cell office:value-type="float" office:value="1.1935965" table:style-name="c8">
            <text:p>1.1936</text:p>
          </table:table-cell>
          <table:table-cell office:value-type="string" table:style-name="c8">
            <text:p>2026-05-08 16:15</text:p>
          </table:table-cell>
          <table:table-cell office:value-type="float" office:value="1.215392" table:style-name="c8">
            <text:p>1.2154</text:p>
          </table:table-cell>
          <table:table-cell office:value-type="float" office:value="1.6224856048086878" table:style-name="c10">
            <text:p>+1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1:45</text:p>
          </table:table-cell>
          <table:table-cell office:value-type="float" office:value="1.2596294999999997" table:style-name="c8">
            <text:p>1.2596</text:p>
          </table:table-cell>
          <table:table-cell office:value-type="string" table:style-name="c8">
            <text:p>2026-05-08 22:15</text:p>
          </table:table-cell>
          <table:table-cell office:value-type="float" office:value="1.2713640000000002" table:style-name="c8">
            <text:p>1.2714</text:p>
          </table:table-cell>
          <table:table-cell office:value-type="float" office:value="0.7298212183821207" table:style-name="c10">
            <text:p>+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3:00</text:p>
          </table:table-cell>
          <table:table-cell office:value-type="float" office:value="1.2816404999999997" table:style-name="c8">
            <text:p>1.2816</text:p>
          </table:table-cell>
          <table:table-cell office:value-type="string" table:style-name="c8">
            <text:p>2026-05-08 23:30</text:p>
          </table:table-cell>
          <table:table-cell office:value-type="float" office:value="1.3163415" table:style-name="c8">
            <text:p>1.3163</text:p>
          </table:table-cell>
          <table:table-cell office:value-type="float" office:value="2.5022331411577836" table:style-name="c10">
            <text:p>+2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3:45</text:p>
          </table:table-cell>
          <table:table-cell office:value-type="float" office:value="1.30065" table:style-name="c8">
            <text:p>1.3007</text:p>
          </table:table-cell>
          <table:table-cell office:value-type="string" table:style-name="c8">
            <text:p>2026-05-09 00:15</text:p>
          </table:table-cell>
          <table:table-cell office:value-type="float" office:value="1.273363" table:style-name="c8">
            <text:p>1.2734</text:p>
          </table:table-cell>
          <table:table-cell office:value-type="float" office:value="-2.293657220389811" table:style-name="c9">
            <text:p>-2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6:30</text:p>
          </table:table-cell>
          <table:table-cell office:value-type="float" office:value="1.2876435" table:style-name="c8">
            <text:p>1.2876</text:p>
          </table:table-cell>
          <table:table-cell office:value-type="string" table:style-name="c8">
            <text:p>2026-05-09 07:00</text:p>
          </table:table-cell>
          <table:table-cell office:value-type="float" office:value="1.2703645" table:style-name="c8">
            <text:p>1.2704</text:p>
          </table:table-cell>
          <table:table-cell office:value-type="float" office:value="-1.5391262127677496" table:style-name="c9">
            <text:p>-1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9:00</text:p>
          </table:table-cell>
          <table:table-cell office:value-type="float" office:value="1.2216105" table:style-name="c8">
            <text:p>1.2216</text:p>
          </table:table-cell>
          <table:table-cell office:value-type="string" table:style-name="c8">
            <text:p>2026-05-09 19:30</text:p>
          </table:table-cell>
          <table:table-cell office:value-type="float" office:value="1.2173910000000001" table:style-name="c8">
            <text:p>1.2174</text:p>
          </table:table-cell>
          <table:table-cell office:value-type="float" office:value="-0.5446142292489853" table:style-name="c9">
            <text:p>-0.5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15</text:p>
          </table:table-cell>
          <table:table-cell office:value-type="float" office:value="1.1845919999999999" table:style-name="c8">
            <text:p>1.1846</text:p>
          </table:table-cell>
          <table:table-cell office:value-type="string" table:style-name="c8">
            <text:p>2026-05-10 16:45</text:p>
          </table:table-cell>
          <table:table-cell office:value-type="float" office:value="1.1784105" table:style-name="c8">
            <text:p>1.1784</text:p>
          </table:table-cell>
          <table:table-cell office:value-type="float" office:value="-0.7206821073837966" table:style-name="c9">
            <text:p>-0.7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0.9694845" table:style-name="c8">
            <text:p>0.96948</text:p>
          </table:table-cell>
          <table:table-cell office:value-type="string" table:style-name="c8">
            <text:p>2026-05-20 16:00</text:p>
          </table:table-cell>
          <table:table-cell office:value-type="float" office:value="0.969515" table:style-name="c8">
            <text:p>0.96952</text:p>
          </table:table-cell>
          <table:table-cell office:value-type="float" office:value="-0.19676028703914383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15</text:p>
          </table:table-cell>
          <table:table-cell office:value-type="float" office:value="0.9984989999999999" table:style-name="c8">
            <text:p>0.9985</text:p>
          </table:table-cell>
          <table:table-cell office:value-type="string" table:style-name="c8">
            <text:p>2026-05-21 08:45</text:p>
          </table:table-cell>
          <table:table-cell office:value-type="float" office:value="0.9945025000000001" table:style-name="c8">
            <text:p>0.9945</text:p>
          </table:table-cell>
          <table:table-cell office:value-type="float" office:value="-0.5993506751133304" table:style-name="c9">
            <text:p>-0.6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4:15</text:p>
          </table:table-cell>
          <table:table-cell office:value-type="float" office:value="0.9854924999999999" table:style-name="c8">
            <text:p>0.98549</text:p>
          </table:table-cell>
          <table:table-cell office:value-type="string" table:style-name="c8">
            <text:p>2026-05-21 14:45</text:p>
          </table:table-cell>
          <table:table-cell office:value-type="float" office:value="0.97951" table:style-name="c8">
            <text:p>0.97951</text:p>
          </table:table-cell>
          <table:table-cell office:value-type="float" office:value="-0.8057433709540929" table:style-name="c9">
            <text:p>-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5:15</text:p>
          </table:table-cell>
          <table:table-cell office:value-type="float" office:value="0.988494" table:style-name="c8">
            <text:p>0.98849</text:p>
          </table:table-cell>
          <table:table-cell office:value-type="string" table:style-name="c8">
            <text:p>2026-05-21 15:45</text:p>
          </table:table-cell>
          <table:table-cell office:value-type="float" office:value="0.9885055" table:style-name="c8">
            <text:p>0.98851</text:p>
          </table:table-cell>
          <table:table-cell office:value-type="float" office:value="-0.1987389396900796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7:30</text:p>
          </table:table-cell>
          <table:table-cell office:value-type="float" office:value="1.022511" table:style-name="c8">
            <text:p>1.0225</text:p>
          </table:table-cell>
          <table:table-cell office:value-type="string" table:style-name="c8">
            <text:p>2026-05-22 08:00</text:p>
          </table:table-cell>
          <table:table-cell office:value-type="float" office:value="1.0144925" table:style-name="c8">
            <text:p>1.0145</text:p>
          </table:table-cell>
          <table:table-cell office:value-type="float" office:value="-0.982529332936255" table:style-name="c9">
            <text:p>-1.0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30</text:p>
          </table:table-cell>
          <table:table-cell office:value-type="float" office:value="0.9854924999999999" table:style-name="c8">
            <text:p>0.98549</text:p>
          </table:table-cell>
          <table:table-cell office:value-type="string" table:style-name="c8">
            <text:p>2026-05-25 15:00</text:p>
          </table:table-cell>
          <table:table-cell office:value-type="float" office:value="0.9845075000000001" table:style-name="c8">
            <text:p>0.9845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00</text:p>
          </table:table-cell>
          <table:table-cell office:value-type="float" office:value="0.986493" table:style-name="c8">
            <text:p>0.98649</text:p>
          </table:table-cell>
          <table:table-cell office:value-type="string" table:style-name="c8">
            <text:p>2026-05-26 05:30</text:p>
          </table:table-cell>
          <table:table-cell office:value-type="float" office:value="0.991504" table:style-name="c8">
            <text:p>0.9915</text:p>
          </table:table-cell>
          <table:table-cell office:value-type="float" office:value="0.3070456155289447" table:style-name="c10">
            <text:p>+0.3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45</text:p>
          </table:table-cell>
          <table:table-cell office:value-type="float" office:value="0.996498" table:style-name="c8">
            <text:p>0.9965</text:p>
          </table:table-cell>
          <table:table-cell office:value-type="string" table:style-name="c8">
            <text:p>2026-05-26 06:15</text:p>
          </table:table-cell>
          <table:table-cell office:value-type="float" office:value="0.9905045" table:style-name="c8">
            <text:p>0.9905</text:p>
          </table:table-cell>
          <table:table-cell office:value-type="float" office:value="-0.8001539888188414" table:style-name="c9">
            <text:p>-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8:15</text:p>
          </table:table-cell>
          <table:table-cell office:value-type="float" office:value="0.994497" table:style-name="c8">
            <text:p>0.9945</text:p>
          </table:table-cell>
          <table:table-cell office:value-type="string" table:style-name="c8">
            <text:p>2026-05-26 08:45</text:p>
          </table:table-cell>
          <table:table-cell office:value-type="float" office:value="0.9945025000000001" table:style-name="c8">
            <text:p>0.9945</text:p>
          </table:table-cell>
          <table:table-cell office:value-type="float" office:value="-0.19934806213592893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3:45</text:p>
          </table:table-cell>
          <table:table-cell office:value-type="float" office:value="1.0275134999999997" table:style-name="c8">
            <text:p>1.0275</text:p>
          </table:table-cell>
          <table:table-cell office:value-type="string" table:style-name="c8">
            <text:p>2026-05-26 14:15</text:p>
          </table:table-cell>
          <table:table-cell office:value-type="float" office:value="1.037481" table:style-name="c8">
            <text:p>1.0375</text:p>
          </table:table-cell>
          <table:table-cell office:value-type="float" office:value="0.7682210969491399" table:style-name="c10">
            <text:p>+0.8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4:30</text:p>
          </table:table-cell>
          <table:table-cell office:value-type="float" office:value="1.0495245" table:style-name="c8">
            <text:p>1.0495</text:p>
          </table:table-cell>
          <table:table-cell office:value-type="string" table:style-name="c8">
            <text:p>2026-05-26 15:00</text:p>
          </table:table-cell>
          <table:table-cell office:value-type="float" office:value="1.029485" table:style-name="c8">
            <text:p>1.0295</text:p>
          </table:table-cell>
          <table:table-cell office:value-type="float" office:value="-2.10547162214888" table:style-name="c9">
            <text:p>-2.1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01:15</text:p>
          </table:table-cell>
          <table:table-cell office:value-type="float" office:value="1.0355174999999999" table:style-name="c8">
            <text:p>1.0355</text:p>
          </table:table-cell>
          <table:table-cell office:value-type="string" table:style-name="c8">
            <text:p>2026-05-27 01:45</text:p>
          </table:table-cell>
          <table:table-cell office:value-type="float" office:value="1.035482" table:style-name="c8">
            <text:p>1.0355</text:p>
          </table:table-cell>
          <table:table-cell office:value-type="float" office:value="-0.2033213845251236" table:style-name="c9">
            <text:p>-0.2</text:p>
          </table:table-cell>
        </table:table-row>
        <table:table-row>
          <table:table-cell office:value-type="string" table:style-name="c7">
            <text:p>FI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1 03:30</text:p>
          </table:table-cell>
          <table:table-cell office:value-type="float" office:value="0.9784889999999999" table:style-name="c8">
            <text:p>0.97849</text:p>
          </table:table-cell>
          <table:table-cell office:value-type="string" table:style-name="c8">
            <text:p>2026-05-31 04:00</text:p>
          </table:table-cell>
          <table:table-cell office:value-type="float" office:value="0.977511" table:style-name="c8">
            <text:p>0.9775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00</text:p>
          </table:table-cell>
          <table:table-cell office:value-type="float" office:value="3.0165075" table:style-name="c1">
            <text:p>3.0165</text:p>
          </table:table-cell>
          <table:table-cell office:value-type="string" table:style-name="c1">
            <text:p>2026-03-03 16:30</text:p>
          </table:table-cell>
          <table:table-cell office:value-type="float" office:value="3.0714635" table:style-name="c1">
            <text:p>3.0715</text:p>
          </table:table-cell>
          <table:table-cell office:value-type="float" office:value="1.6183001190449575" table:style-name="c11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3.1085535" table:style-name="c1">
            <text:p>3.1086</text:p>
          </table:table-cell>
          <table:table-cell office:value-type="string" table:style-name="c1">
            <text:p>2026-03-04 09:30</text:p>
          </table:table-cell>
          <table:table-cell office:value-type="float" office:value="3.1114435" table:style-name="c1">
            <text:p>3.1114</text:p>
          </table:table-cell>
          <table:table-cell office:value-type="float" office:value="-0.10711655940617293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3.129564" table:style-name="c1">
            <text:p>3.1296</text:p>
          </table:table-cell>
          <table:table-cell office:value-type="string" table:style-name="c1">
            <text:p>2026-03-04 10:15</text:p>
          </table:table-cell>
          <table:table-cell office:value-type="float" office:value="3.1114435" table:style-name="c1">
            <text:p>3.1114</text:p>
          </table:table-cell>
          <table:table-cell office:value-type="float" office:value="-0.7777529252157689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3:15</text:p>
          </table:table-cell>
          <table:table-cell office:value-type="float" office:value="3.0875429999999997" table:style-name="c1">
            <text:p>3.0875</text:p>
          </table:table-cell>
          <table:table-cell office:value-type="string" table:style-name="c1">
            <text:p>2026-03-04 13:45</text:p>
          </table:table-cell>
          <table:table-cell office:value-type="float" office:value="3.0824580000000004" table:style-name="c1">
            <text:p>3.0825</text:p>
          </table:table-cell>
          <table:table-cell office:value-type="float" office:value="-0.3642648391293579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3.145572" table:style-name="c1">
            <text:p>3.1456</text:p>
          </table:table-cell>
          <table:table-cell office:value-type="string" table:style-name="c1">
            <text:p>2026-03-04 16:00</text:p>
          </table:table-cell>
          <table:table-cell office:value-type="float" office:value="3.144427" table:style-name="c1">
            <text:p>3.1444</text:p>
          </table:table-cell>
          <table:table-cell office:value-type="float" office:value="-0.23622761052679575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30</text:p>
          </table:table-cell>
          <table:table-cell office:value-type="float" office:value="3.1485734999999995" table:style-name="c1">
            <text:p>3.1486</text:p>
          </table:table-cell>
          <table:table-cell office:value-type="string" table:style-name="c1">
            <text:p>2026-03-04 20:00</text:p>
          </table:table-cell>
          <table:table-cell office:value-type="float" office:value="3.1414285" table:style-name="c1">
            <text:p>3.1414</text:p>
          </table:table-cell>
          <table:table-cell office:value-type="float" office:value="-0.426374533467288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.923461" table:style-name="c1">
            <text:p>2.9235</text:p>
          </table:table-cell>
          <table:table-cell office:value-type="string" table:style-name="c1">
            <text:p>2026-03-09 14:00</text:p>
          </table:table-cell>
          <table:table-cell office:value-type="float" office:value="2.908545" table:style-name="c1">
            <text:p>2.9085</text:p>
          </table:table-cell>
          <table:table-cell office:value-type="float" office:value="-0.7090972465512713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21:15</text:p>
          </table:table-cell>
          <table:table-cell office:value-type="float" office:value="2.955477" table:style-name="c1">
            <text:p>2.9555</text:p>
          </table:table-cell>
          <table:table-cell office:value-type="string" table:style-name="c1">
            <text:p>2026-03-09 21:45</text:p>
          </table:table-cell>
          <table:table-cell office:value-type="float" office:value="2.93853" table:style-name="c1">
            <text:p>2.9385</text:p>
          </table:table-cell>
          <table:table-cell office:value-type="float" office:value="-0.7721637309307527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2.9824904999999995" table:style-name="c1">
            <text:p>2.9825</text:p>
          </table:table-cell>
          <table:table-cell office:value-type="string" table:style-name="c1">
            <text:p>2026-03-10 09:15</text:p>
          </table:table-cell>
          <table:table-cell office:value-type="float" office:value="2.972513" table:style-name="c1">
            <text:p>2.9725</text:p>
          </table:table-cell>
          <table:table-cell office:value-type="float" office:value="-0.5337671146647072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0 15:30</text:p>
          </table:table-cell>
          <table:table-cell office:value-type="float" office:value="2.9865060000000003" table:style-name="c1">
            <text:p>2.9865</text:p>
          </table:table-cell>
          <table:table-cell office:value-type="float" office:value="-1.519125577508762" table:style-name="c12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5:00</text:p>
          </table:table-cell>
          <table:table-cell office:value-type="float" office:value="2.9454719999999996" table:style-name="c1">
            <text:p>2.9455</text:p>
          </table:table-cell>
          <table:table-cell office:value-type="string" table:style-name="c1">
            <text:p>2026-03-11 05:30</text:p>
          </table:table-cell>
          <table:table-cell office:value-type="float" office:value="2.9165410000000005" table:style-name="c1">
            <text:p>2.9165</text:p>
          </table:table-cell>
          <table:table-cell office:value-type="float" office:value="-1.18015603132533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45</text:p>
          </table:table-cell>
          <table:table-cell office:value-type="float" office:value="3.0105044999999997" table:style-name="c1">
            <text:p>3.0105</text:p>
          </table:table-cell>
          <table:table-cell office:value-type="string" table:style-name="c1">
            <text:p>2026-03-11 20:15</text:p>
          </table:table-cell>
          <table:table-cell office:value-type="float" office:value="3.002498" table:style-name="c1">
            <text:p>3.0025</text:p>
          </table:table-cell>
          <table:table-cell office:value-type="float" office:value="-0.465320463796004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1005495" table:style-name="c1">
            <text:p>3.1005</text:p>
          </table:table-cell>
          <table:table-cell office:value-type="string" table:style-name="c1">
            <text:p>2026-03-13 01:00</text:p>
          </table:table-cell>
          <table:table-cell office:value-type="float" office:value="3.0874555000000004" table:style-name="c1">
            <text:p>3.0875</text:p>
          </table:table-cell>
          <table:table-cell office:value-type="float" office:value="-0.6213680363593377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4:15</text:p>
          </table:table-cell>
          <table:table-cell office:value-type="float" office:value="3.1235609999999996" table:style-name="c1">
            <text:p>3.1236</text:p>
          </table:table-cell>
          <table:table-cell office:value-type="string" table:style-name="c1">
            <text:p>2026-03-13 04:45</text:p>
          </table:table-cell>
          <table:table-cell office:value-type="float" office:value="3.1034475" table:style-name="c1">
            <text:p>3.1034</text:p>
          </table:table-cell>
          <table:table-cell office:value-type="float" office:value="-0.8425413030992313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3.1405695" table:style-name="c1">
            <text:p>3.1406</text:p>
          </table:table-cell>
          <table:table-cell office:value-type="string" table:style-name="c1">
            <text:p>2026-03-13 11:00</text:p>
          </table:table-cell>
          <table:table-cell office:value-type="float" office:value="3.1334325" table:style-name="c1">
            <text:p>3.1334</text:p>
          </table:table-cell>
          <table:table-cell office:value-type="float" office:value="-0.4266975008035745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15</text:p>
          </table:table-cell>
          <table:table-cell office:value-type="float" office:value="3.1445714999999996" table:style-name="c1">
            <text:p>3.1446</text:p>
          </table:table-cell>
          <table:table-cell office:value-type="string" table:style-name="c1">
            <text:p>2026-03-13 13:45</text:p>
          </table:table-cell>
          <table:table-cell office:value-type="float" office:value="3.1634175" table:style-name="c1">
            <text:p>3.1634</text:p>
          </table:table-cell>
          <table:table-cell office:value-type="float" office:value="0.39822050214157745" table:style-name="c11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3.10155" table:style-name="c1">
            <text:p>3.1016</text:p>
          </table:table-cell>
          <table:table-cell office:value-type="string" table:style-name="c1">
            <text:p>2026-03-15 21:15</text:p>
          </table:table-cell>
          <table:table-cell office:value-type="float" office:value="3.0824580000000004" table:style-name="c1">
            <text:p>3.0825</text:p>
          </table:table-cell>
          <table:table-cell office:value-type="float" office:value="-0.8142326753397433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3.1105544999999997" table:style-name="c1">
            <text:p>3.1106</text:p>
          </table:table-cell>
          <table:table-cell office:value-type="string" table:style-name="c1">
            <text:p>2026-03-15 23:15</text:p>
          </table:table-cell>
          <table:table-cell office:value-type="float" office:value="3.1154415" table:style-name="c1">
            <text:p>3.1154</text:p>
          </table:table-cell>
          <table:table-cell office:value-type="float" office:value="-0.04310381182838219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3.1345665" table:style-name="c1">
            <text:p>3.1346</text:p>
          </table:table-cell>
          <table:table-cell office:value-type="string" table:style-name="c1">
            <text:p>2026-03-16 04:00</text:p>
          </table:table-cell>
          <table:table-cell office:value-type="float" office:value="3.142428" table:style-name="c1">
            <text:p>3.1424</text:p>
          </table:table-cell>
          <table:table-cell office:value-type="float" office:value="0.05039888061078024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3.1675829999999996" table:style-name="c1">
            <text:p>3.1676</text:p>
          </table:table-cell>
          <table:table-cell office:value-type="string" table:style-name="c1">
            <text:p>2026-03-16 05:30</text:p>
          </table:table-cell>
          <table:table-cell office:value-type="float" office:value="3.1794095" table:style-name="c1">
            <text:p>3.1794</text:p>
          </table:table-cell>
          <table:table-cell office:value-type="float" office:value="0.1727140349440104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6:00</text:p>
          </table:table-cell>
          <table:table-cell office:value-type="float" office:value="3.2026005" table:style-name="c1">
            <text:p>3.2026</text:p>
          </table:table-cell>
          <table:table-cell office:value-type="string" table:style-name="c1">
            <text:p>2026-03-16 06:30</text:p>
          </table:table-cell>
          <table:table-cell office:value-type="float" office:value="3.1914035000000003" table:style-name="c1">
            <text:p>3.1914</text:p>
          </table:table-cell>
          <table:table-cell office:value-type="float" office:value="-0.5488232327603759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3.323661" table:style-name="c1">
            <text:p>3.3237</text:p>
          </table:table-cell>
          <table:table-cell office:value-type="string" table:style-name="c1">
            <text:p>2026-03-16 22:45</text:p>
          </table:table-cell>
          <table:table-cell office:value-type="float" office:value="3.3213385" table:style-name="c1">
            <text:p>3.3213</text:p>
          </table:table-cell>
          <table:table-cell office:value-type="float" office:value="-0.2696380786578634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3.3296639999999997" table:style-name="c1">
            <text:p>3.3297</text:p>
          </table:table-cell>
          <table:table-cell office:value-type="string" table:style-name="c1">
            <text:p>2026-03-17 00:45</text:p>
          </table:table-cell>
          <table:table-cell office:value-type="float" office:value="3.3013485" table:style-name="c1">
            <text:p>3.3013</text:p>
          </table:table-cell>
          <table:table-cell office:value-type="float" office:value="-1.048601169712604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30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3-17 23:00</text:p>
          </table:table-cell>
          <table:table-cell office:value-type="float" office:value="3.244377" table:style-name="c1">
            <text:p>3.2444</text:p>
          </table:table-cell>
          <table:table-cell office:value-type="float" office:value="-0.3610420658820779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3.0665324999999997" table:style-name="c1">
            <text:p>3.0665</text:p>
          </table:table-cell>
          <table:table-cell office:value-type="string" table:style-name="c1">
            <text:p>2026-03-23 20:45</text:p>
          </table:table-cell>
          <table:table-cell office:value-type="float" office:value="3.0914535" table:style-name="c1">
            <text:p>3.0915</text:p>
          </table:table-cell>
          <table:table-cell office:value-type="float" office:value="0.6111523179193723" table:style-name="c11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1:00</text:p>
          </table:table-cell>
          <table:table-cell office:value-type="float" office:value="3.0845415" table:style-name="c1">
            <text:p>3.0845</text:p>
          </table:table-cell>
          <table:table-cell office:value-type="string" table:style-name="c1">
            <text:p>2026-03-23 21:30</text:p>
          </table:table-cell>
          <table:table-cell office:value-type="float" office:value="3.084457" table:style-name="c1">
            <text:p>3.0845</text:p>
          </table:table-cell>
          <table:table-cell office:value-type="float" office:value="-0.2026339909189212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3.0565275" table:style-name="c1">
            <text:p>3.0565</text:p>
          </table:table-cell>
          <table:table-cell office:value-type="string" table:style-name="c1">
            <text:p>2026-03-24 21:00</text:p>
          </table:table-cell>
          <table:table-cell office:value-type="float" office:value="3.0514735" table:style-name="c1">
            <text:p>3.0515</text:p>
          </table:table-cell>
          <table:table-cell office:value-type="float" office:value="-0.36492050297273204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0:00</text:p>
          </table:table-cell>
          <table:table-cell office:value-type="float" office:value="3.063531" table:style-name="c1">
            <text:p>3.0635</text:p>
          </table:table-cell>
          <table:table-cell office:value-type="string" table:style-name="c1">
            <text:p>2026-03-25 00:30</text:p>
          </table:table-cell>
          <table:table-cell office:value-type="float" office:value="3.0624680000000004" table:style-name="c1">
            <text:p>3.0625</text:p>
          </table:table-cell>
          <table:table-cell office:value-type="float" office:value="-0.2345291603708221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30</text:p>
          </table:table-cell>
          <table:table-cell office:value-type="float" office:value="3.089544" table:style-name="c1">
            <text:p>3.0895</text:p>
          </table:table-cell>
          <table:table-cell office:value-type="string" table:style-name="c1">
            <text:p>2026-03-25 11:00</text:p>
          </table:table-cell>
          <table:table-cell office:value-type="float" office:value="3.09845" table:style-name="c1">
            <text:p>3.0985</text:p>
          </table:table-cell>
          <table:table-cell office:value-type="float" office:value="0.08778636750277347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3-25 23:15</text:p>
          </table:table-cell>
          <table:table-cell office:value-type="float" office:value="3.076461" table:style-name="c1">
            <text:p>3.0765</text:p>
          </table:table-cell>
          <table:table-cell office:value-type="float" office:value="-0.5258746814275073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.939469" table:style-name="c1">
            <text:p>2.9395</text:p>
          </table:table-cell>
          <table:table-cell office:value-type="string" table:style-name="c1">
            <text:p>2026-03-30 08:30</text:p>
          </table:table-cell>
          <table:table-cell office:value-type="float" office:value="2.9325330000000003" table:style-name="c1">
            <text:p>2.9325</text:p>
          </table:table-cell>
          <table:table-cell office:value-type="float" office:value="-0.4353892987815078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2.9004494999999997" table:style-name="c1">
            <text:p>2.9004</text:p>
          </table:table-cell>
          <table:table-cell office:value-type="string" table:style-name="c1">
            <text:p>2026-03-31 02:00</text:p>
          </table:table-cell>
          <table:table-cell office:value-type="float" office:value="2.8995495" table:style-name="c1">
            <text:p>2.8995</text:p>
          </table:table-cell>
          <table:table-cell office:value-type="float" office:value="-0.230867644842625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2.8824404999999995" table:style-name="c1">
            <text:p>2.8824</text:p>
          </table:table-cell>
          <table:table-cell office:value-type="string" table:style-name="c1">
            <text:p>2026-03-31 14:30</text:p>
          </table:table-cell>
          <table:table-cell office:value-type="float" office:value="2.8935525" table:style-name="c1">
            <text:p>2.8936</text:p>
          </table:table-cell>
          <table:table-cell office:value-type="float" office:value="0.1848360287922901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2.96148" table:style-name="c1">
            <text:p>2.9615</text:p>
          </table:table-cell>
          <table:table-cell office:value-type="string" table:style-name="c1">
            <text:p>2026-04-01 13:15</text:p>
          </table:table-cell>
          <table:table-cell office:value-type="float" office:value="2.9375305000000003" table:style-name="c1">
            <text:p>2.9375</text:p>
          </table:table-cell>
          <table:table-cell office:value-type="float" office:value="-1.0069837874812304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6 02:45</text:p>
          </table:table-cell>
          <table:table-cell office:value-type="float" office:value="2.864567" table:style-name="c1">
            <text:p>2.8646</text:p>
          </table:table-cell>
          <table:table-cell office:value-type="float" office:value="-0.7498428428369897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2.9164575" table:style-name="c1">
            <text:p>2.9165</text:p>
          </table:table-cell>
          <table:table-cell office:value-type="string" table:style-name="c1">
            <text:p>2026-04-06 10:00</text:p>
          </table:table-cell>
          <table:table-cell office:value-type="float" office:value="2.9245370000000004" table:style-name="c1">
            <text:p>2.9245</text:p>
          </table:table-cell>
          <table:table-cell office:value-type="float" office:value="0.07657751011289626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15</text:p>
          </table:table-cell>
          <table:table-cell office:value-type="float" office:value="2.9564775" table:style-name="c1">
            <text:p>2.9565</text:p>
          </table:table-cell>
          <table:table-cell office:value-type="string" table:style-name="c1">
            <text:p>2026-04-06 12:45</text:p>
          </table:table-cell>
          <table:table-cell office:value-type="float" office:value="2.95852" table:style-name="c1">
            <text:p>2.9585</text:p>
          </table:table-cell>
          <table:table-cell office:value-type="float" office:value="-0.13095250953202298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15</text:p>
          </table:table-cell>
          <table:table-cell office:value-type="float" office:value="2.8554269999999997" table:style-name="c1">
            <text:p>2.8554</text:p>
          </table:table-cell>
          <table:table-cell office:value-type="string" table:style-name="c1">
            <text:p>2026-04-07 07:45</text:p>
          </table:table-cell>
          <table:table-cell office:value-type="float" office:value="2.874562" table:style-name="c1">
            <text:p>2.8746</text:p>
          </table:table-cell>
          <table:table-cell office:value-type="float" office:value="0.4688878602745028" table:style-name="c11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8:00</text:p>
          </table:table-cell>
          <table:table-cell office:value-type="float" office:value="2.8704345" table:style-name="c1">
            <text:p>2.8704</text:p>
          </table:table-cell>
          <table:table-cell office:value-type="string" table:style-name="c1">
            <text:p>2026-04-07 08:30</text:p>
          </table:table-cell>
          <table:table-cell office:value-type="float" office:value="2.8455765" table:style-name="c1">
            <text:p>2.8456</text:p>
          </table:table-cell>
          <table:table-cell office:value-type="float" office:value="-1.064170160423461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.905452" table:style-name="c1">
            <text:p>2.9055</text:p>
          </table:table-cell>
          <table:table-cell office:value-type="string" table:style-name="c1">
            <text:p>2026-04-07 21:45</text:p>
          </table:table-cell>
          <table:table-cell office:value-type="float" office:value="2.9175405000000003" table:style-name="c1">
            <text:p>2.9175</text:p>
          </table:table-cell>
          <table:table-cell office:value-type="float" office:value="0.21533092064507375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00</text:p>
          </table:table-cell>
          <table:table-cell office:value-type="float" office:value="2.9264624999999995" table:style-name="c1">
            <text:p>2.9265</text:p>
          </table:table-cell>
          <table:table-cell office:value-type="string" table:style-name="c1">
            <text:p>2026-04-07 22:30</text:p>
          </table:table-cell>
          <table:table-cell office:value-type="float" office:value="2.9255365" table:style-name="c1">
            <text:p>2.9255</text:p>
          </table:table-cell>
          <table:table-cell office:value-type="float" office:value="-0.23147904555413934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2.959479" table:style-name="c1">
            <text:p>2.9595</text:p>
          </table:table-cell>
          <table:table-cell office:value-type="string" table:style-name="c1">
            <text:p>2026-04-07 23:15</text:p>
          </table:table-cell>
          <table:table-cell office:value-type="float" office:value="3.010494" table:style-name="c1">
            <text:p>3.0105</text:p>
          </table:table-cell>
          <table:table-cell office:value-type="float" office:value="1.520437296361976" table:style-name="c11">
            <text:p>+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3.0425204999999997" table:style-name="c1">
            <text:p>3.0425</text:p>
          </table:table-cell>
          <table:table-cell office:value-type="string" table:style-name="c1">
            <text:p>2026-04-08 00:00</text:p>
          </table:table-cell>
          <table:table-cell office:value-type="float" office:value="3.014492" table:style-name="c1">
            <text:p>3.0145</text:p>
          </table:table-cell>
          <table:table-cell office:value-type="float" office:value="-1.119284800480369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09 06:45</text:p>
          </table:table-cell>
          <table:table-cell office:value-type="float" office:value="2.9075455" table:style-name="c1">
            <text:p>2.907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9:45</text:p>
          </table:table-cell>
          <table:table-cell office:value-type="float" office:value="2.979489" table:style-name="c1">
            <text:p>2.9795</text:p>
          </table:table-cell>
          <table:table-cell office:value-type="string" table:style-name="c1">
            <text:p>2026-04-09 20:15</text:p>
          </table:table-cell>
          <table:table-cell office:value-type="float" office:value="2.9845070000000002" table:style-name="c1">
            <text:p>2.9845</text:p>
          </table:table-cell>
          <table:table-cell office:value-type="float" office:value="-0.03181852636474636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0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0 10:30</text:p>
          </table:table-cell>
          <table:table-cell office:value-type="float" office:value="3.0094945" table:style-name="c1">
            <text:p>3.0095</text:p>
          </table:table-cell>
          <table:table-cell office:value-type="float" office:value="-0.1670258819874925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3.0225104999999997" table:style-name="c1">
            <text:p>3.0225</text:p>
          </table:table-cell>
          <table:table-cell office:value-type="string" table:style-name="c1">
            <text:p>2026-04-10 15:00</text:p>
          </table:table-cell>
          <table:table-cell office:value-type="float" office:value="3.0554715" table:style-name="c1">
            <text:p>3.0555</text:p>
          </table:table-cell>
          <table:table-cell office:value-type="float" office:value="0.8884373593243122" table:style-name="c11">
            <text:p>+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15</text:p>
          </table:table-cell>
          <table:table-cell office:value-type="float" office:value="3.0605295" table:style-name="c1">
            <text:p>3.0605</text:p>
          </table:table-cell>
          <table:table-cell office:value-type="string" table:style-name="c1">
            <text:p>2026-04-10 15:45</text:p>
          </table:table-cell>
          <table:table-cell office:value-type="float" office:value="3.034482" table:style-name="c1">
            <text:p>3.0345</text:p>
          </table:table-cell>
          <table:table-cell office:value-type="float" office:value="-1.0492769149259895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6:15</text:p>
          </table:table-cell>
          <table:table-cell office:value-type="float" office:value="3.049524" table:style-name="c1">
            <text:p>3.0495</text:p>
          </table:table-cell>
          <table:table-cell office:value-type="string" table:style-name="c1">
            <text:p>2026-04-10 16:45</text:p>
          </table:table-cell>
          <table:table-cell office:value-type="float" office:value="3.0474755" table:style-name="c1">
            <text:p>3.0475</text:p>
          </table:table-cell>
          <table:table-cell office:value-type="float" office:value="-0.2669401363786461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4-10 19:45</text:p>
          </table:table-cell>
          <table:table-cell office:value-type="float" office:value="3.064467" table:style-name="c1">
            <text:p>3.0645</text:p>
          </table:table-cell>
          <table:table-cell office:value-type="float" office:value="-0.9136880354960186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0325155" table:style-name="c1">
            <text:p>3.0325</text:p>
          </table:table-cell>
          <table:table-cell office:value-type="string" table:style-name="c1">
            <text:p>2026-04-11 17:15</text:p>
          </table:table-cell>
          <table:table-cell office:value-type="float" office:value="3.020489" table:style-name="c1">
            <text:p>3.0205</text:p>
          </table:table-cell>
          <table:table-cell office:value-type="float" office:value="-0.5956921740713383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45</text:p>
          </table:table-cell>
          <table:table-cell office:value-type="float" office:value="3.0335159999999997" table:style-name="c1">
            <text:p>3.0335</text:p>
          </table:table-cell>
          <table:table-cell office:value-type="string" table:style-name="c1">
            <text:p>2026-04-11 18:15</text:p>
          </table:table-cell>
          <table:table-cell office:value-type="float" office:value="3.022488" table:style-name="c1">
            <text:p>3.0225</text:p>
          </table:table-cell>
          <table:table-cell office:value-type="float" office:value="-0.5627118337928505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3.06153" table:style-name="c1">
            <text:p>3.0615</text:p>
          </table:table-cell>
          <table:table-cell office:value-type="string" table:style-name="c1">
            <text:p>2026-04-11 19:15</text:p>
          </table:table-cell>
          <table:table-cell office:value-type="float" office:value="3.064467" table:style-name="c1">
            <text:p>3.0645</text:p>
          </table:table-cell>
          <table:table-cell office:value-type="float" office:value="-0.10415934297556273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8:45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4-15 09:15</text:p>
          </table:table-cell>
          <table:table-cell office:value-type="float" office:value="3.0154915" table:style-name="c1">
            <text:p>3.0155</text:p>
          </table:table-cell>
          <table:table-cell office:value-type="float" office:value="-0.530438071589201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3.0535259999999997" table:style-name="c1">
            <text:p>3.0535</text:p>
          </table:table-cell>
          <table:table-cell office:value-type="string" table:style-name="c1">
            <text:p>2026-04-15 12:30</text:p>
          </table:table-cell>
          <table:table-cell office:value-type="float" office:value="3.066466" table:style-name="c1">
            <text:p>3.0665</text:p>
          </table:table-cell>
          <table:table-cell office:value-type="float" office:value="0.2230252654144893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3.1095539999999997" table:style-name="c1">
            <text:p>3.1096</text:p>
          </table:table-cell>
          <table:table-cell office:value-type="string" table:style-name="c1">
            <text:p>2026-04-15 15:30</text:p>
          </table:table-cell>
          <table:table-cell office:value-type="float" office:value="3.07846" table:style-name="c1">
            <text:p>3.0785</text:p>
          </table:table-cell>
          <table:table-cell office:value-type="float" office:value="-1.1978515742128937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15</text:p>
          </table:table-cell>
          <table:table-cell office:value-type="float" office:value="3.1225604999999996" table:style-name="c1">
            <text:p>3.1226</text:p>
          </table:table-cell>
          <table:table-cell office:value-type="string" table:style-name="c1">
            <text:p>2026-04-15 16:45</text:p>
          </table:table-cell>
          <table:table-cell office:value-type="float" office:value="3.1374305" table:style-name="c1">
            <text:p>3.1374</text:p>
          </table:table-cell>
          <table:table-cell office:value-type="float" office:value="0.27535980265236404" table:style-name="c11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1:3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15 22:00</text:p>
          </table:table-cell>
          <table:table-cell office:value-type="float" office:value="3.4112935" table:style-name="c1">
            <text:p>3.4113</text:p>
          </table:table-cell>
          <table:table-cell office:value-type="float" office:value="1.5753115768533776" table:style-name="c11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15</text:p>
          </table:table-cell>
          <table:table-cell office:value-type="float" office:value="3.3846914999999997" table:style-name="c1">
            <text:p>3.3847</text:p>
          </table:table-cell>
          <table:table-cell office:value-type="string" table:style-name="c1">
            <text:p>2026-04-15 22:45</text:p>
          </table:table-cell>
          <table:table-cell office:value-type="float" office:value="3.2853565000000002" table:style-name="c1">
            <text:p>3.2854</text:p>
          </table:table-cell>
          <table:table-cell office:value-type="float" office:value="-3.1288649982871175" table:style-name="c12">
            <text:p>-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15</text:p>
          </table:table-cell>
          <table:table-cell office:value-type="float" office:value="3.311655" table:style-name="c1">
            <text:p>3.3117</text:p>
          </table:table-cell>
          <table:table-cell office:value-type="string" table:style-name="c1">
            <text:p>2026-04-16 03:45</text:p>
          </table:table-cell>
          <table:table-cell office:value-type="float" office:value="3.314342" table:style-name="c1">
            <text:p>3.3143</text:p>
          </table:table-cell>
          <table:table-cell office:value-type="float" office:value="-0.11892451532543591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8:00</text:p>
          </table:table-cell>
          <table:table-cell office:value-type="float" office:value="3.3706845" table:style-name="c1">
            <text:p>3.3707</text:p>
          </table:table-cell>
          <table:table-cell office:value-type="string" table:style-name="c1">
            <text:p>2026-04-16 08:30</text:p>
          </table:table-cell>
          <table:table-cell office:value-type="float" office:value="3.3473255" table:style-name="c1">
            <text:p>3.3473</text:p>
          </table:table-cell>
          <table:table-cell office:value-type="float" office:value="-0.8915193241758379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16 12:45</text:p>
          </table:table-cell>
          <table:table-cell office:value-type="float" office:value="3.366316" table:style-name="c1">
            <text:p>3.3663</text:p>
          </table:table-cell>
          <table:table-cell office:value-type="float" office:value="0.08667005740050637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3.4177079999999997" table:style-name="c1">
            <text:p>3.4177</text:p>
          </table:table-cell>
          <table:table-cell office:value-type="string" table:style-name="c1">
            <text:p>2026-04-16 13:45</text:p>
          </table:table-cell>
          <table:table-cell office:value-type="float" office:value="3.4312835" table:style-name="c1">
            <text:p>3.4313</text:p>
          </table:table-cell>
          <table:table-cell office:value-type="float" office:value="0.19651662118298496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3.3966974999999997" table:style-name="c1">
            <text:p>3.3967</text:p>
          </table:table-cell>
          <table:table-cell office:value-type="string" table:style-name="c1">
            <text:p>2026-04-16 16:15</text:p>
          </table:table-cell>
          <table:table-cell office:value-type="float" office:value="3.3753115" table:style-name="c1">
            <text:p>3.3753</text:p>
          </table:table-cell>
          <table:table-cell office:value-type="float" office:value="-0.8282529630177615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3.405702" table:style-name="c1">
            <text:p>3.4057</text:p>
          </table:table-cell>
          <table:table-cell office:value-type="string" table:style-name="c1">
            <text:p>2026-04-17 08:45</text:p>
          </table:table-cell>
          <table:table-cell office:value-type="float" office:value="3.3992995" table:style-name="c1">
            <text:p>3.3993</text:p>
          </table:table-cell>
          <table:table-cell office:value-type="float" office:value="-0.38751774819110185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3.38169" table:style-name="c1">
            <text:p>3.3817</text:p>
          </table:table-cell>
          <table:table-cell office:value-type="string" table:style-name="c1">
            <text:p>2026-04-18 07:15</text:p>
          </table:table-cell>
          <table:table-cell office:value-type="float" office:value="3.382308" table:style-name="c1">
            <text:p>3.3823</text:p>
          </table:table-cell>
          <table:table-cell office:value-type="float" office:value="-0.18166164527203543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3.3306645" table:style-name="c1">
            <text:p>3.3307</text:p>
          </table:table-cell>
          <table:table-cell office:value-type="string" table:style-name="c1">
            <text:p>2026-04-20 17:45</text:p>
          </table:table-cell>
          <table:table-cell office:value-type="float" office:value="3.3073455000000003" table:style-name="c1">
            <text:p>3.3073</text:p>
          </table:table-cell>
          <table:table-cell office:value-type="float" office:value="-0.8986309985440033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22 06:00</text:p>
          </table:table-cell>
          <table:table-cell office:value-type="float" office:value="3.3353315000000006" table:style-name="c1">
            <text:p>3.3353</text:p>
          </table:table-cell>
          <table:table-cell office:value-type="float" office:value="-0.8345552311325721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3.3536759999999997" table:style-name="c1">
            <text:p>3.3537</text:p>
          </table:table-cell>
          <table:table-cell office:value-type="string" table:style-name="c1">
            <text:p>2026-04-22 14:45</text:p>
          </table:table-cell>
          <table:table-cell office:value-type="float" office:value="3.3413285000000004" table:style-name="c1">
            <text:p>3.3413</text:p>
          </table:table-cell>
          <table:table-cell office:value-type="float" office:value="-0.567342094808776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3006494999999996" table:style-name="c1">
            <text:p>3.3006</text:p>
          </table:table-cell>
          <table:table-cell office:value-type="string" table:style-name="c1">
            <text:p>2026-04-23 07:00</text:p>
          </table:table-cell>
          <table:table-cell office:value-type="float" office:value="3.2923530000000003" table:style-name="c1">
            <text:p>3.2924</text:p>
          </table:table-cell>
          <table:table-cell office:value-type="float" office:value="-0.4507571508880037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23 16:30</text:p>
          </table:table-cell>
          <table:table-cell office:value-type="float" office:value="3.3333325" table:style-name="c1">
            <text:p>3.3333</text:p>
          </table:table-cell>
          <table:table-cell office:value-type="float" office:value="-0.7460697014925244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15</text:p>
          </table:table-cell>
          <table:table-cell office:value-type="float" office:value="3.3246615" table:style-name="c1">
            <text:p>3.3247</text:p>
          </table:table-cell>
          <table:table-cell office:value-type="string" table:style-name="c1">
            <text:p>2026-04-23 20:45</text:p>
          </table:table-cell>
          <table:table-cell office:value-type="float" office:value="3.350324" table:style-name="c1">
            <text:p>3.3503</text:p>
          </table:table-cell>
          <table:table-cell office:value-type="float" office:value="0.5704400981573654" table:style-name="c11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15</text:p>
          </table:table-cell>
          <table:table-cell office:value-type="float" office:value="3.431715" table:style-name="c1">
            <text:p>3.4317</text:p>
          </table:table-cell>
          <table:table-cell office:value-type="string" table:style-name="c1">
            <text:p>2026-04-24 08:45</text:p>
          </table:table-cell>
          <table:table-cell office:value-type="float" office:value="3.442278" table:style-name="c1">
            <text:p>3.4423</text:p>
          </table:table-cell>
          <table:table-cell office:value-type="float" office:value="0.10728997827615938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9:45</text:p>
          </table:table-cell>
          <table:table-cell office:value-type="float" office:value="3.4537259999999996" table:style-name="c1">
            <text:p>3.4537</text:p>
          </table:table-cell>
          <table:table-cell office:value-type="string" table:style-name="c1">
            <text:p>2026-04-24 10:15</text:p>
          </table:table-cell>
          <table:table-cell office:value-type="float" office:value="3.4552715" table:style-name="c1">
            <text:p>3.4553</text:p>
          </table:table-cell>
          <table:table-cell office:value-type="float" office:value="-0.15524068002208402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5:15</text:p>
          </table:table-cell>
          <table:table-cell office:value-type="float" office:value="3.6228105" table:style-name="c1">
            <text:p>3.6228</text:p>
          </table:table-cell>
          <table:table-cell office:value-type="string" table:style-name="c1">
            <text:p>2026-04-25 15:45</text:p>
          </table:table-cell>
          <table:table-cell office:value-type="float" office:value="3.648175" table:style-name="c1">
            <text:p>3.6482</text:p>
          </table:table-cell>
          <table:table-cell office:value-type="float" office:value="0.4988336589783149" table:style-name="c11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6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4-25 16:45</text:p>
          </table:table-cell>
          <table:table-cell office:value-type="float" office:value="3.594202" table:style-name="c1">
            <text:p>3.5942</text:p>
          </table:table-cell>
          <table:table-cell office:value-type="float" office:value="-1.6129369398176774" table:style-name="c12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3.6328154999999995" table:style-name="c1">
            <text:p>3.6328</text:p>
          </table:table-cell>
          <table:table-cell office:value-type="string" table:style-name="c1">
            <text:p>2026-04-26 05:45</text:p>
          </table:table-cell>
          <table:table-cell office:value-type="float" office:value="3.6391795" table:style-name="c1">
            <text:p>3.6392</text:p>
          </table:table-cell>
          <table:table-cell office:value-type="float" office:value="-0.025069256076981628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15</text:p>
          </table:table-cell>
          <table:table-cell office:value-type="float" office:value="3.6758369999999996" table:style-name="c1">
            <text:p>3.6758</text:p>
          </table:table-cell>
          <table:table-cell office:value-type="string" table:style-name="c1">
            <text:p>2026-04-26 06:45</text:p>
          </table:table-cell>
          <table:table-cell office:value-type="float" office:value="3.7331325" table:style-name="c1">
            <text:p>3.7331</text:p>
          </table:table-cell>
          <table:table-cell office:value-type="float" office:value="1.3556903674591725" table:style-name="c11">
            <text:p>+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7:00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4-26 07:30</text:p>
          </table:table-cell>
          <table:table-cell office:value-type="float" office:value="4.029984000000001" table:style-name="c1">
            <text:p>4.03</text:p>
          </table:table-cell>
          <table:table-cell office:value-type="float" office:value="5.815164594170419" table:style-name="c11">
            <text:p>+5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9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4-26 20:00</text:p>
          </table:table-cell>
          <table:table-cell office:value-type="float" office:value="3.7831075000000003" table:style-name="c1">
            <text:p>3.7831</text:p>
          </table:table-cell>
          <table:table-cell office:value-type="float" office:value="0.8460245587388115" table:style-name="c11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0:45</text:p>
          </table:table-cell>
          <table:table-cell office:value-type="float" office:value="3.8449215" table:style-name="c1">
            <text:p>3.8449</text:p>
          </table:table-cell>
          <table:table-cell office:value-type="string" table:style-name="c1">
            <text:p>2026-04-26 21:15</text:p>
          </table:table-cell>
          <table:table-cell office:value-type="float" office:value="3.7451265" table:style-name="c1">
            <text:p>3.7451</text:p>
          </table:table-cell>
          <table:table-cell office:value-type="float" office:value="-2.7902132169278393" table:style-name="c12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2:30</text:p>
          </table:table-cell>
          <table:table-cell office:value-type="float" office:value="3.8089034999999996" table:style-name="c1">
            <text:p>3.8089</text:p>
          </table:table-cell>
          <table:table-cell office:value-type="string" table:style-name="c1">
            <text:p>2026-04-27 03:00</text:p>
          </table:table-cell>
          <table:table-cell office:value-type="float" office:value="3.8440770000000004" table:style-name="c1">
            <text:p>3.8441</text:p>
          </table:table-cell>
          <table:table-cell office:value-type="float" office:value="0.7217087562601865" table:style-name="c11">
            <text:p>+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30</text:p>
          </table:table-cell>
          <table:table-cell office:value-type="float" office:value="3.8949464999999996" table:style-name="c1">
            <text:p>3.8949</text:p>
          </table:table-cell>
          <table:table-cell office:value-type="string" table:style-name="c1">
            <text:p>2026-04-27 04:00</text:p>
          </table:table-cell>
          <table:table-cell office:value-type="float" office:value="3.8230875" table:style-name="c1">
            <text:p>3.8231</text:p>
          </table:table-cell>
          <table:table-cell office:value-type="float" office:value="-2.0411410506536942" table:style-name="c12">
            <text:p>-2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5-01 13:45</text:p>
          </table:table-cell>
          <table:table-cell office:value-type="float" office:value="3.6611685" table:style-name="c1">
            <text:p>3.6612</text:p>
          </table:table-cell>
          <table:table-cell office:value-type="float" office:value="0.11030187122722523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9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5-01 19:45</text:p>
          </table:table-cell>
          <table:table-cell office:value-type="float" office:value="3.632183" table:style-name="c1">
            <text:p>3.6322</text:p>
          </table:table-cell>
          <table:table-cell office:value-type="float" office:value="-0.573251623831339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2:00</text:p>
          </table:table-cell>
          <table:table-cell office:value-type="float" office:value="3.6908445" table:style-name="c1">
            <text:p>3.6908</text:p>
          </table:table-cell>
          <table:table-cell office:value-type="string" table:style-name="c1">
            <text:p>2026-05-02 02:30</text:p>
          </table:table-cell>
          <table:table-cell office:value-type="float" office:value="3.6831575" table:style-name="c1">
            <text:p>3.6832</text:p>
          </table:table-cell>
          <table:table-cell office:value-type="float" office:value="-0.407755781705254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3:45</text:p>
          </table:table-cell>
          <table:table-cell office:value-type="float" office:value="3.711855" table:style-name="c1">
            <text:p>3.7119</text:p>
          </table:table-cell>
          <table:table-cell office:value-type="string" table:style-name="c1">
            <text:p>2026-05-02 04:15</text:p>
          </table:table-cell>
          <table:table-cell office:value-type="float" office:value="3.7211385" table:style-name="c1">
            <text:p>3.7211</text:p>
          </table:table-cell>
          <table:table-cell office:value-type="float" office:value="0.04970410046998275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4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5-02 05:00</text:p>
          </table:table-cell>
          <table:table-cell office:value-type="float" office:value="3.744127" table:style-name="c1">
            <text:p>3.7441</text:p>
          </table:table-cell>
          <table:table-cell office:value-type="float" office:value="-0.19307582641068244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9:30</text:p>
          </table:table-cell>
          <table:table-cell office:value-type="float" office:value="3.8349165" table:style-name="c1">
            <text:p>3.8349</text:p>
          </table:table-cell>
          <table:table-cell office:value-type="string" table:style-name="c1">
            <text:p>2026-05-02 10:00</text:p>
          </table:table-cell>
          <table:table-cell office:value-type="float" office:value="3.860069" table:style-name="c1">
            <text:p>3.8601</text:p>
          </table:table-cell>
          <table:table-cell office:value-type="float" office:value="0.45467018822966665" table:style-name="c11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5-04 04:45</text:p>
          </table:table-cell>
          <table:table-cell office:value-type="float" office:value="3.7831075000000003" table:style-name="c1">
            <text:p>3.7831</text:p>
          </table:table-cell>
          <table:table-cell office:value-type="float" office:value="-0.6670639908395226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7:15</text:p>
          </table:table-cell>
          <table:table-cell office:value-type="float" office:value="3.811905" table:style-name="c1">
            <text:p>3.8119</text:p>
          </table:table-cell>
          <table:table-cell office:value-type="string" table:style-name="c1">
            <text:p>2026-05-04 07:45</text:p>
          </table:table-cell>
          <table:table-cell office:value-type="float" office:value="3.8080950000000002" table:style-name="c1">
            <text:p>3.808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3.8569275" table:style-name="c1">
            <text:p>3.8569</text:p>
          </table:table-cell>
          <table:table-cell office:value-type="string" table:style-name="c1">
            <text:p>2026-05-05 21:00</text:p>
          </table:table-cell>
          <table:table-cell office:value-type="float" office:value="3.848075" table:style-name="c1">
            <text:p>3.8481</text:p>
          </table:table-cell>
          <table:table-cell office:value-type="float" office:value="-0.42896325961531145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6 03:15</text:p>
          </table:table-cell>
          <table:table-cell office:value-type="float" office:value="3.8400790000000002" table:style-name="c1">
            <text:p>3.8401</text:p>
          </table:table-cell>
          <table:table-cell office:value-type="float" office:value="-0.944208989919304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7 05:30</text:p>
          </table:table-cell>
          <table:table-cell office:value-type="float" office:value="3.8840570000000003" table:style-name="c1">
            <text:p>3.8841</text:p>
          </table:table-cell>
          <table:table-cell office:value-type="float" office:value="0.06083657698530143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9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7 20:15</text:p>
          </table:table-cell>
          <table:table-cell office:value-type="float" office:value="3.8790595" table:style-name="c1">
            <text:p>3.8791</text:p>
          </table:table-cell>
          <table:table-cell office:value-type="float" office:value="0.06130268353021773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8 04:00</text:p>
          </table:table-cell>
          <table:table-cell office:value-type="float" office:value="3.8680650000000005" table:style-name="c1">
            <text:p>3.8681</text:p>
          </table:table-cell>
          <table:table-cell office:value-type="float" office:value="-0.4282958375005918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5:15</text:p>
          </table:table-cell>
          <table:table-cell office:value-type="float" office:value="3.9109544999999994" table:style-name="c1">
            <text:p>3.911</text:p>
          </table:table-cell>
          <table:table-cell office:value-type="string" table:style-name="c1">
            <text:p>2026-05-08 05:45</text:p>
          </table:table-cell>
          <table:table-cell office:value-type="float" office:value="3.9070455" table:style-name="c1">
            <text:p>3.907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4.036016999999999" table:style-name="c1">
            <text:p>4.036</text:p>
          </table:table-cell>
          <table:table-cell office:value-type="string" table:style-name="c1">
            <text:p>2026-05-08 08:30</text:p>
          </table:table-cell>
          <table:table-cell office:value-type="float" office:value="4.061968" table:style-name="c1">
            <text:p>4.062</text:p>
          </table:table-cell>
          <table:table-cell office:value-type="float" office:value="0.4418000709115244" table:style-name="c11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45</text:p>
          </table:table-cell>
          <table:table-cell office:value-type="float" office:value="4.08204" table:style-name="c1">
            <text:p>4.082</text:p>
          </table:table-cell>
          <table:table-cell office:value-type="string" table:style-name="c1">
            <text:p>2026-05-08 09:15</text:p>
          </table:table-cell>
          <table:table-cell office:value-type="float" office:value="4.005996000000001" table:style-name="c1">
            <text:p>4.006</text:p>
          </table:table-cell>
          <table:table-cell office:value-type="float" office:value="-2.059068162095412" table:style-name="c12">
            <text:p>-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15</text:p>
          </table:table-cell>
          <table:table-cell office:value-type="float" office:value="4.050024" table:style-name="c1">
            <text:p>4.05</text:p>
          </table:table-cell>
          <table:table-cell office:value-type="string" table:style-name="c1">
            <text:p>2026-05-08 10:45</text:p>
          </table:table-cell>
          <table:table-cell office:value-type="float" office:value="4.059969000000001" table:style-name="c1">
            <text:p>4.06</text:p>
          </table:table-cell>
          <table:table-cell office:value-type="float" office:value="0.04516323777341569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4.1650815" table:style-name="c1">
            <text:p>4.1651</text:p>
          </table:table-cell>
          <table:table-cell office:value-type="string" table:style-name="c1">
            <text:p>2026-05-08 16:15</text:p>
          </table:table-cell>
          <table:table-cell office:value-type="float" office:value="4.165916" table:style-name="c1">
            <text:p>4.1659</text:p>
          </table:table-cell>
          <table:table-cell office:value-type="float" office:value="-0.17990442885692515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00</text:p>
          </table:table-cell>
          <table:table-cell office:value-type="float" office:value="4.2231105" table:style-name="c1">
            <text:p>4.2231</text:p>
          </table:table-cell>
          <table:table-cell office:value-type="string" table:style-name="c1">
            <text:p>2026-05-08 18:30</text:p>
          </table:table-cell>
          <table:table-cell office:value-type="float" office:value="4.231883" table:style-name="c1">
            <text:p>4.2319</text:p>
          </table:table-cell>
          <table:table-cell office:value-type="float" office:value="0.007410790766670949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4.312155" table:style-name="c1">
            <text:p>4.3122</text:p>
          </table:table-cell>
          <table:table-cell office:value-type="string" table:style-name="c1">
            <text:p>2026-05-09 01:45</text:p>
          </table:table-cell>
          <table:table-cell office:value-type="float" office:value="4.3188395" table:style-name="c1">
            <text:p>4.3188</text:p>
          </table:table-cell>
          <table:table-cell office:value-type="float" office:value="-0.04519457580952624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2:00</text:p>
          </table:table-cell>
          <table:table-cell office:value-type="float" office:value="4.328162999999999" table:style-name="c1">
            <text:p>4.3282</text:p>
          </table:table-cell>
          <table:table-cell office:value-type="string" table:style-name="c1">
            <text:p>2026-05-09 02:30</text:p>
          </table:table-cell>
          <table:table-cell office:value-type="float" office:value="4.3108435" table:style-name="c1">
            <text:p>4.3108</text:p>
          </table:table-cell>
          <table:table-cell office:value-type="float" office:value="-0.5992583032686016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15</text:p>
          </table:table-cell>
          <table:table-cell office:value-type="float" office:value="4.144071" table:style-name="c1">
            <text:p>4.1441</text:p>
          </table:table-cell>
          <table:table-cell office:value-type="string" table:style-name="c1">
            <text:p>2026-05-10 09:45</text:p>
          </table:table-cell>
          <table:table-cell office:value-type="float" office:value="4.1299339999999995" table:style-name="c1">
            <text:p>4.1299</text:p>
          </table:table-cell>
          <table:table-cell office:value-type="float" office:value="-0.5403560427898246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45</text:p>
          </table:table-cell>
          <table:table-cell office:value-type="float" office:value="4.210104" table:style-name="c1">
            <text:p>4.2101</text:p>
          </table:table-cell>
          <table:table-cell office:value-type="string" table:style-name="c1">
            <text:p>2026-05-10 14:15</text:p>
          </table:table-cell>
          <table:table-cell office:value-type="float" office:value="4.1849065" table:style-name="c1">
            <text:p>4.1849</text:p>
          </table:table-cell>
          <table:table-cell office:value-type="float" office:value="-0.7972042518070821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5:30</text:p>
          </table:table-cell>
          <table:table-cell office:value-type="float" office:value="4.2691335" table:style-name="c1">
            <text:p>4.2691</text:p>
          </table:table-cell>
          <table:table-cell office:value-type="string" table:style-name="c1">
            <text:p>2026-05-11 06:00</text:p>
          </table:table-cell>
          <table:table-cell office:value-type="float" office:value="4.279859" table:style-name="c1">
            <text:p>4.2799</text:p>
          </table:table-cell>
          <table:table-cell office:value-type="float" office:value="0.05083143591084749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15</text:p>
          </table:table-cell>
          <table:table-cell office:value-type="float" office:value="4.278137999999999" table:style-name="c1">
            <text:p>4.2781</text:p>
          </table:table-cell>
          <table:table-cell office:value-type="string" table:style-name="c1">
            <text:p>2026-05-11 06:45</text:p>
          </table:table-cell>
          <table:table-cell office:value-type="float" office:value="4.2588695" table:style-name="c1">
            <text:p>4.2589</text:p>
          </table:table-cell>
          <table:table-cell office:value-type="float" office:value="-0.6493942021154497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8:30</text:p>
          </table:table-cell>
          <table:table-cell office:value-type="float" office:value="4.320158999999999" table:style-name="c1">
            <text:p>4.3202</text:p>
          </table:table-cell>
          <table:table-cell office:value-type="string" table:style-name="c1">
            <text:p>2026-05-11 09:00</text:p>
          </table:table-cell>
          <table:table-cell office:value-type="float" office:value="4.320838500000001" table:style-name="c1">
            <text:p>4.3208</text:p>
          </table:table-cell>
          <table:table-cell office:value-type="float" office:value="-0.1842028536796602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00</text:p>
          </table:table-cell>
          <table:table-cell office:value-type="float" office:value="4.3911945" table:style-name="c1">
            <text:p>4.3912</text:p>
          </table:table-cell>
          <table:table-cell office:value-type="string" table:style-name="c1">
            <text:p>2026-05-11 11:30</text:p>
          </table:table-cell>
          <table:table-cell office:value-type="float" office:value="4.4667655" table:style-name="c1">
            <text:p>4.4668</text:p>
          </table:table-cell>
          <table:table-cell office:value-type="float" office:value="1.517626599448052" table:style-name="c11">
            <text:p>+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45</text:p>
          </table:table-cell>
          <table:table-cell office:value-type="float" office:value="4.4722349999999995" table:style-name="c1">
            <text:p>4.4722</text:p>
          </table:table-cell>
          <table:table-cell office:value-type="string" table:style-name="c1">
            <text:p>2026-05-11 12:15</text:p>
          </table:table-cell>
          <table:table-cell office:value-type="float" office:value="4.4207885000000005" table:style-name="c1">
            <text:p>4.4208</text:p>
          </table:table-cell>
          <table:table-cell office:value-type="float" office:value="-1.3479536788987945" table:style-name="c12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7:15</text:p>
          </table:table-cell>
          <table:table-cell office:value-type="float" office:value="4.4212095" table:style-name="c1">
            <text:p>4.4212</text:p>
          </table:table-cell>
          <table:table-cell office:value-type="string" table:style-name="c1">
            <text:p>2026-05-11 17:45</text:p>
          </table:table-cell>
          <table:table-cell office:value-type="float" office:value="4.5007485" table:style-name="c1">
            <text:p>4.5007</text:p>
          </table:table-cell>
          <table:table-cell office:value-type="float" office:value="1.5955363288824298" table:style-name="c11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8:00</text:p>
          </table:table-cell>
          <table:table-cell office:value-type="float" office:value="4.5452715" table:style-name="c1">
            <text:p>4.5453</text:p>
          </table:table-cell>
          <table:table-cell office:value-type="string" table:style-name="c1">
            <text:p>2026-05-11 18:30</text:p>
          </table:table-cell>
          <table:table-cell office:value-type="float" office:value="4.5637170000000005" table:style-name="c1">
            <text:p>4.5637</text:p>
          </table:table-cell>
          <table:table-cell office:value-type="float" office:value="0.20510611339719098" table:style-name="c11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1:15</text:p>
          </table:table-cell>
          <table:table-cell office:value-type="float" office:value="4.703350499999999" table:style-name="c1">
            <text:p>4.7034</text:p>
          </table:table-cell>
          <table:table-cell office:value-type="string" table:style-name="c1">
            <text:p>2026-05-11 21:45</text:p>
          </table:table-cell>
          <table:table-cell office:value-type="float" office:value="4.6326825000000005" table:style-name="c1">
            <text:p>4.6327</text:p>
          </table:table-cell>
          <table:table-cell office:value-type="float" office:value="-1.6993998707410474" table:style-name="c12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2:30</text:p>
          </table:table-cell>
          <table:table-cell office:value-type="float" office:value="4.7373675" table:style-name="c1">
            <text:p>4.7374</text:p>
          </table:table-cell>
          <table:table-cell office:value-type="string" table:style-name="c1">
            <text:p>2026-05-11 23:00</text:p>
          </table:table-cell>
          <table:table-cell office:value-type="float" office:value="4.619689" table:style-name="c1">
            <text:p>4.6197</text:p>
          </table:table-cell>
          <table:table-cell office:value-type="float" office:value="-2.678982753839554" table:style-name="c12">
            <text:p>-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5:45</text:p>
          </table:table-cell>
          <table:table-cell office:value-type="float" office:value="4.743370499999999" table:style-name="c1">
            <text:p>4.7434</text:p>
          </table:table-cell>
          <table:table-cell office:value-type="string" table:style-name="c1">
            <text:p>2026-05-12 06:15</text:p>
          </table:table-cell>
          <table:table-cell office:value-type="float" office:value="4.663667" table:style-name="c1">
            <text:p>4.6637</text:p>
          </table:table-cell>
          <table:table-cell office:value-type="float" office:value="-1.876854661321492" table:style-name="c12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9:45</text:p>
          </table:table-cell>
          <table:table-cell office:value-type="float" office:value="4.810403999999999" table:style-name="c1">
            <text:p>4.8104</text:p>
          </table:table-cell>
          <table:table-cell office:value-type="string" table:style-name="c1">
            <text:p>2026-05-12 10:15</text:p>
          </table:table-cell>
          <table:table-cell office:value-type="float" office:value="4.847575" table:style-name="c1">
            <text:p>4.8476</text:p>
          </table:table-cell>
          <table:table-cell office:value-type="float" office:value="0.5712762914508174" table:style-name="c11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4:15</text:p>
          </table:table-cell>
          <table:table-cell office:value-type="float" office:value="4.9114545" table:style-name="c1">
            <text:p>4.9115</text:p>
          </table:table-cell>
          <table:table-cell office:value-type="string" table:style-name="c1">
            <text:p>2026-05-12 14:45</text:p>
          </table:table-cell>
          <table:table-cell office:value-type="float" office:value="4.6826574999999995" table:style-name="c1">
            <text:p>4.6827</text:p>
          </table:table-cell>
          <table:table-cell office:value-type="float" office:value="-4.849024506742339" table:style-name="c12">
            <text:p>-4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2 18:15</text:p>
          </table:table-cell>
          <table:table-cell office:value-type="float" office:value="4.827585" table:style-name="c1">
            <text:p>4.8276</text:p>
          </table:table-cell>
          <table:table-cell office:value-type="float" office:value="-0.731253470667248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30</text:p>
          </table:table-cell>
          <table:table-cell office:value-type="float" office:value="4.969483499999999" table:style-name="c1">
            <text:p>4.9695</text:p>
          </table:table-cell>
          <table:table-cell office:value-type="string" table:style-name="c1">
            <text:p>2026-05-13 02:00</text:p>
          </table:table-cell>
          <table:table-cell office:value-type="float" office:value="4.979509" table:style-name="c1">
            <text:p>4.9795</text:p>
          </table:table-cell>
          <table:table-cell office:value-type="float" office:value="0.001438006766707467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2:15</text:p>
          </table:table-cell>
          <table:table-cell office:value-type="float" office:value="5.0655315" table:style-name="c1">
            <text:p>5.0655</text:p>
          </table:table-cell>
          <table:table-cell office:value-type="string" table:style-name="c1">
            <text:p>2026-05-13 02:45</text:p>
          </table:table-cell>
          <table:table-cell office:value-type="float" office:value="5.079459" table:style-name="c1">
            <text:p>5.0795</text:p>
          </table:table-cell>
          <table:table-cell office:value-type="float" office:value="0.07449685110043625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6:00</text:p>
          </table:table-cell>
          <table:table-cell office:value-type="float" office:value="5.2596285" table:style-name="c1">
            <text:p>5.2596</text:p>
          </table:table-cell>
          <table:table-cell office:value-type="string" table:style-name="c1">
            <text:p>2026-05-13 06:30</text:p>
          </table:table-cell>
          <table:table-cell office:value-type="float" office:value="5.273362" table:style-name="c1">
            <text:p>5.2734</text:p>
          </table:table-cell>
          <table:table-cell office:value-type="float" office:value="0.06068963543715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4 05:30</text:p>
          </table:table-cell>
          <table:table-cell office:value-type="float" office:value="5.21739" table:style-name="c1">
            <text:p>5.2174</text:p>
          </table:table-cell>
          <table:table-cell office:value-type="float" office:value="-1.1705609901088043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0:15</text:p>
          </table:table-cell>
          <table:table-cell office:value-type="float" office:value="5.2576275" table:style-name="c1">
            <text:p>5.2576</text:p>
          </table:table-cell>
          <table:table-cell office:value-type="string" table:style-name="c1">
            <text:p>2026-05-14 10:45</text:p>
          </table:table-cell>
          <table:table-cell office:value-type="float" office:value="5.268364500000001" table:style-name="c1">
            <text:p>5.2684</text:p>
          </table:table-cell>
          <table:table-cell office:value-type="float" office:value="0.003909355778830559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00</text:p>
          </table:table-cell>
          <table:table-cell office:value-type="float" office:value="5.148573" table:style-name="c1">
            <text:p>5.1486</text:p>
          </table:table-cell>
          <table:table-cell office:value-type="string" table:style-name="c1">
            <text:p>2026-05-19 00:30</text:p>
          </table:table-cell>
          <table:table-cell office:value-type="float" office:value="5.3163405" table:style-name="c1">
            <text:p>5.3163</text:p>
          </table:table-cell>
          <table:table-cell office:value-type="float" office:value="3.0521104651813236" table:style-name="c11">
            <text:p>+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45</text:p>
          </table:table-cell>
          <table:table-cell office:value-type="float" office:value="5.3536755" table:style-name="c1">
            <text:p>5.3537</text:p>
          </table:table-cell>
          <table:table-cell office:value-type="string" table:style-name="c1">
            <text:p>2026-05-19 01:15</text:p>
          </table:table-cell>
          <table:table-cell office:value-type="float" office:value="5.3023475" table:style-name="c1">
            <text:p>5.3023</text:p>
          </table:table-cell>
          <table:table-cell office:value-type="float" office:value="-1.1567266759537342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6:15</text:p>
          </table:table-cell>
          <table:table-cell office:value-type="float" office:value="4.94247" table:style-name="c1">
            <text:p>4.9425</text:p>
          </table:table-cell>
          <table:table-cell office:value-type="string" table:style-name="c1">
            <text:p>2026-05-19 16:45</text:p>
          </table:table-cell>
          <table:table-cell office:value-type="float" office:value="5.0764605" table:style-name="c1">
            <text:p>5.0765</text:p>
          </table:table-cell>
          <table:table-cell office:value-type="float" office:value="2.5056835036024516" table:style-name="c11">
            <text:p>+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7:00</text:p>
          </table:table-cell>
          <table:table-cell office:value-type="float" office:value="5.080539" table:style-name="c1">
            <text:p>5.0805</text:p>
          </table:table-cell>
          <table:table-cell office:value-type="string" table:style-name="c1">
            <text:p>2026-05-19 17:30</text:p>
          </table:table-cell>
          <table:table-cell office:value-type="float" office:value="5.0384795" table:style-name="c1">
            <text:p>5.0385</text:p>
          </table:table-cell>
          <table:table-cell office:value-type="float" office:value="-1.0261001937097558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5.171584499999999" table:style-name="c1">
            <text:p>5.1716</text:p>
          </table:table-cell>
          <table:table-cell office:value-type="string" table:style-name="c1">
            <text:p>2026-05-20 16:00</text:p>
          </table:table-cell>
          <table:table-cell office:value-type="float" office:value="5.128434500000001" table:style-name="c1">
            <text:p>5.1284</text:p>
          </table:table-cell>
          <table:table-cell office:value-type="float" office:value="-1.0325992075639223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45</text:p>
          </table:table-cell>
          <table:table-cell office:value-type="float" office:value="4.917457499999999" table:style-name="c1">
            <text:p>4.9175</text:p>
          </table:table-cell>
          <table:table-cell office:value-type="string" table:style-name="c1">
            <text:p>2026-05-21 04:15</text:p>
          </table:table-cell>
          <table:table-cell office:value-type="float" office:value="4.9625175" table:style-name="c1">
            <text:p>4.9625</text:p>
          </table:table-cell>
          <table:table-cell office:value-type="float" office:value="0.7145954493251949" table:style-name="c11">
            <text:p>+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1 18:15</text:p>
          </table:table-cell>
          <table:table-cell office:value-type="float" office:value="5.3043465" table:style-name="c1">
            <text:p>5.3043</text:p>
          </table:table-cell>
          <table:table-cell office:value-type="float" office:value="1.323201121509343" table:style-name="c11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30</text:p>
          </table:table-cell>
          <table:table-cell office:value-type="float" office:value="5.2466219999999995" table:style-name="c1">
            <text:p>5.2466</text:p>
          </table:table-cell>
          <table:table-cell office:value-type="string" table:style-name="c1">
            <text:p>2026-05-21 19:00</text:p>
          </table:table-cell>
          <table:table-cell office:value-type="float" office:value="5.184406500000001" table:style-name="c1">
            <text:p>5.1844</text:p>
          </table:table-cell>
          <table:table-cell office:value-type="float" office:value="-1.3833496789648514" table:style-name="c12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22:45</text:p>
          </table:table-cell>
          <table:table-cell office:value-type="float" office:value="5.324661" table:style-name="c1">
            <text:p>5.3247</text:p>
          </table:table-cell>
          <table:table-cell office:value-type="string" table:style-name="c1">
            <text:p>2026-05-21 23:15</text:p>
          </table:table-cell>
          <table:table-cell office:value-type="float" office:value="5.2403785" table:style-name="c1">
            <text:p>5.2404</text:p>
          </table:table-cell>
          <table:table-cell office:value-type="float" office:value="-1.7796065631502045" table:style-name="c12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9:30</text:p>
          </table:table-cell>
          <table:table-cell office:value-type="float" office:value="5.316657" table:style-name="c1">
            <text:p>5.3167</text:p>
          </table:table-cell>
          <table:table-cell office:value-type="string" table:style-name="c1">
            <text:p>2026-05-22 10:00</text:p>
          </table:table-cell>
          <table:table-cell office:value-type="float" office:value="5.289354" table:style-name="c1">
            <text:p>5.2894</text:p>
          </table:table-cell>
          <table:table-cell office:value-type="float" office:value="-0.7124104234295991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15</text:p>
          </table:table-cell>
          <table:table-cell office:value-type="float" office:value="5.512754999999999" table:style-name="c1">
            <text:p>5.5128</text:p>
          </table:table-cell>
          <table:table-cell office:value-type="string" table:style-name="c1">
            <text:p>2026-05-22 12:45</text:p>
          </table:table-cell>
          <table:table-cell office:value-type="float" office:value="5.4512730000000005" table:style-name="c1">
            <text:p>5.4513</text:p>
          </table:table-cell>
          <table:table-cell office:value-type="float" office:value="-1.312938716249823" table:style-name="c12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45</text:p>
          </table:table-cell>
          <table:table-cell office:value-type="float" office:value="5.508753" table:style-name="c1">
            <text:p>5.5088</text:p>
          </table:table-cell>
          <table:table-cell office:value-type="string" table:style-name="c1">
            <text:p>2026-05-22 14:15</text:p>
          </table:table-cell>
          <table:table-cell office:value-type="float" office:value="5.415291000000001" table:style-name="c1">
            <text:p>5.4153</text:p>
          </table:table-cell>
          <table:table-cell office:value-type="float" office:value="-1.893117493360108" table:style-name="c12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3 21:15</text:p>
          </table:table-cell>
          <table:table-cell office:value-type="float" office:value="5.4412780000000005" table:style-name="c1">
            <text:p>5.4413</text:p>
          </table:table-cell>
          <table:table-cell office:value-type="float" office:value="-1.080972448384887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6:45</text:p>
          </table:table-cell>
          <table:table-cell office:value-type="float" office:value="5.216607" table:style-name="c1">
            <text:p>5.2166</text:p>
          </table:table-cell>
          <table:table-cell office:value-type="string" table:style-name="c1">
            <text:p>2026-05-24 07:15</text:p>
          </table:table-cell>
          <table:table-cell office:value-type="float" office:value="5.227385000000001" table:style-name="c1">
            <text:p>5.2274</text:p>
          </table:table-cell>
          <table:table-cell office:value-type="float" office:value="0.006296379715808875" table:style-name="c11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16:15</text:p>
          </table:table-cell>
          <table:table-cell office:value-type="float" office:value="5.1955965" table:style-name="c1">
            <text:p>5.1956</text:p>
          </table:table-cell>
          <table:table-cell office:value-type="string" table:style-name="c1">
            <text:p>2026-05-24 16:45</text:p>
          </table:table-cell>
          <table:table-cell office:value-type="float" office:value="5.1864055" table:style-name="c1">
            <text:p>5.1864</text:p>
          </table:table-cell>
          <table:table-cell office:value-type="float" office:value="-0.37644618080905357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30</text:p>
          </table:table-cell>
          <table:table-cell office:value-type="float" office:value="5.3276625" table:style-name="c1">
            <text:p>5.3277</text:p>
          </table:table-cell>
          <table:table-cell office:value-type="string" table:style-name="c1">
            <text:p>2026-05-25 11:00</text:p>
          </table:table-cell>
          <table:table-cell office:value-type="float" office:value="5.425286" table:style-name="c1">
            <text:p>5.4253</text:p>
          </table:table-cell>
          <table:table-cell office:value-type="float" office:value="1.628826024283625" table:style-name="c11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1:15</text:p>
          </table:table-cell>
          <table:table-cell office:value-type="float" office:value="5.470733999999999" table:style-name="c1">
            <text:p>5.4707</text:p>
          </table:table-cell>
          <table:table-cell office:value-type="string" table:style-name="c1">
            <text:p>2026-05-25 11:45</text:p>
          </table:table-cell>
          <table:table-cell office:value-type="float" office:value="5.43728" table:style-name="c1">
            <text:p>5.4373</text:p>
          </table:table-cell>
          <table:table-cell office:value-type="float" office:value="-0.8101860320753884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45</text:p>
          </table:table-cell>
          <table:table-cell office:value-type="float" office:value="5.719858499999999" table:style-name="c1">
            <text:p>5.7199</text:p>
          </table:table-cell>
          <table:table-cell office:value-type="string" table:style-name="c1">
            <text:p>2026-05-25 13:15</text:p>
          </table:table-cell>
          <table:table-cell office:value-type="float" office:value="5.547225" table:style-name="c1">
            <text:p>5.5472</text:p>
          </table:table-cell>
          <table:table-cell office:value-type="float" office:value="-3.2120095763732426" table:style-name="c12">
            <text:p>-3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23:30</text:p>
          </table:table-cell>
          <table:table-cell office:value-type="float" office:value="5.711854499999999" table:style-name="c1">
            <text:p>5.7119</text:p>
          </table:table-cell>
          <table:table-cell office:value-type="string" table:style-name="c1">
            <text:p>2026-05-26 00:00</text:p>
          </table:table-cell>
          <table:table-cell office:value-type="float" office:value="5.6701635" table:style-name="c1">
            <text:p>5.6702</text:p>
          </table:table-cell>
          <table:table-cell office:value-type="float" office:value="-0.9283439701851526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5.960979" table:style-name="c1">
            <text:p>5.961</text:p>
          </table:table-cell>
          <table:table-cell office:value-type="string" table:style-name="c1">
            <text:p>2026-05-26 14:15</text:p>
          </table:table-cell>
          <table:table-cell office:value-type="float" office:value="6.0339815" table:style-name="c1">
            <text:p>6.034</text:p>
          </table:table-cell>
          <table:table-cell office:value-type="float" office:value="1.0223248728354895" table:style-name="c11">
            <text:p>+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29 07:00</text:p>
          </table:table-cell>
          <table:table-cell office:value-type="float" office:value="6.1759105000000005" table:style-name="c1">
            <text:p>6.1759</text:p>
          </table:table-cell>
          <table:table-cell office:value-type="float" office:value="1.2571435339283177" table:style-name="c11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7:15</text:p>
          </table:table-cell>
          <table:table-cell office:value-type="float" office:value="6.201099" table:style-name="c1">
            <text:p>6.2011</text:p>
          </table:table-cell>
          <table:table-cell office:value-type="string" table:style-name="c1">
            <text:p>2026-05-29 07:45</text:p>
          </table:table-cell>
          <table:table-cell office:value-type="float" office:value="6.1579195" table:style-name="c1">
            <text:p>6.1579</text:p>
          </table:table-cell>
          <table:table-cell office:value-type="float" office:value="-0.8948281761104071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15</text:p>
          </table:table-cell>
          <table:table-cell office:value-type="float" office:value="6.353174999999999" table:style-name="c1">
            <text:p>6.3532</text:p>
          </table:table-cell>
          <table:table-cell office:value-type="string" table:style-name="c1">
            <text:p>2026-05-29 15:45</text:p>
          </table:table-cell>
          <table:table-cell office:value-type="float" office:value="6.6546710000000004" table:style-name="c1">
            <text:p>6.6547</text:p>
          </table:table-cell>
          <table:table-cell office:value-type="float" office:value="4.536209260267521" table:style-name="c11">
            <text:p>+4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0 05:30</text:p>
          </table:table-cell>
          <table:table-cell office:value-type="float" office:value="6.8475745" table:style-name="c1">
            <text:p>6.8476</text:p>
          </table:table-cell>
          <table:table-cell office:value-type="float" office:value="1.252163698383546" table:style-name="c11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6:00</text:p>
          </table:table-cell>
          <table:table-cell office:value-type="float" office:value="6.995495999999999" table:style-name="c1">
            <text:p>6.9955</text:p>
          </table:table-cell>
          <table:table-cell office:value-type="string" table:style-name="c1">
            <text:p>2026-05-30 06:30</text:p>
          </table:table-cell>
          <table:table-cell office:value-type="float" office:value="7.01649" table:style-name="c1">
            <text:p>7.0165</text:p>
          </table:table-cell>
          <table:table-cell office:value-type="float" office:value="0.09960746871986448" table:style-name="c11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00</text:p>
          </table:table-cell>
          <table:table-cell office:value-type="float" office:value="6.5912939999999995" table:style-name="c1">
            <text:p>6.5913</text:p>
          </table:table-cell>
          <table:table-cell office:value-type="string" table:style-name="c1">
            <text:p>2026-05-31 05:30</text:p>
          </table:table-cell>
          <table:table-cell office:value-type="float" office:value="6.589703500000001" table:style-name="c1">
            <text:p>6.5897</text:p>
          </table:table-cell>
          <table:table-cell office:value-type="float" office:value="-0.2239820784279755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6:00</text:p>
          </table:table-cell>
          <table:table-cell office:value-type="float" office:value="6.655326" table:style-name="c1">
            <text:p>6.6553</text:p>
          </table:table-cell>
          <table:table-cell office:value-type="string" table:style-name="c1">
            <text:p>2026-05-31 06:30</text:p>
          </table:table-cell>
          <table:table-cell office:value-type="float" office:value="6.498749" table:style-name="c1">
            <text:p>6.4987</text:p>
          </table:table-cell>
          <table:table-cell office:value-type="float" office:value="-2.5478541434484137" table:style-name="c12">
            <text:p>-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00</text:p>
          </table:table-cell>
          <table:table-cell office:value-type="float" office:value="6.545271" table:style-name="c1">
            <text:p>6.5453</text:p>
          </table:table-cell>
          <table:table-cell office:value-type="string" table:style-name="c1">
            <text:p>2026-06-01 00:30</text:p>
          </table:table-cell>
          <table:table-cell office:value-type="float" office:value="6.502747" table:style-name="c1">
            <text:p>6.5027</text:p>
          </table:table-cell>
          <table:table-cell office:value-type="float" office:value="-0.848291709434168" table:style-name="c12">
            <text:p>-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15</text:p>
          </table:table-cell>
          <table:table-cell office:value-type="float" office:value="8.864429999999999" table:style-name="c8">
            <text:p>8.8644</text:p>
          </table:table-cell>
          <table:table-cell office:value-type="string" table:style-name="c8">
            <text:p>2026-03-03 16:45</text:p>
          </table:table-cell>
          <table:table-cell office:value-type="float" office:value="8.75562" table:style-name="c8">
            <text:p>8.7556</text:p>
          </table:table-cell>
          <table:table-cell office:value-type="float" office:value="-1.424936339730798" table:style-name="c9">
            <text:p>-1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9.194595" table:style-name="c8">
            <text:p>9.1946</text:p>
          </table:table-cell>
          <table:table-cell office:value-type="string" table:style-name="c8">
            <text:p>2026-03-04 09:30</text:p>
          </table:table-cell>
          <table:table-cell office:value-type="float" office:value="9.215390000000001" table:style-name="c8">
            <text:p>9.2154</text:p>
          </table:table-cell>
          <table:table-cell office:value-type="float" office:value="0.025813376119354636" table:style-name="c10">
            <text:p>+0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9.254624999999999" table:style-name="c8">
            <text:p>9.2546</text:p>
          </table:table-cell>
          <table:table-cell office:value-type="string" table:style-name="c8">
            <text:p>2026-03-04 10:15</text:p>
          </table:table-cell>
          <table:table-cell office:value-type="float" office:value="9.235380000000001" table:style-name="c8">
            <text:p>9.2354</text:p>
          </table:table-cell>
          <table:table-cell office:value-type="float" office:value="-0.40743438680657107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9.434714999999999" table:style-name="c8">
            <text:p>9.4347</text:p>
          </table:table-cell>
          <table:table-cell office:value-type="string" table:style-name="c8">
            <text:p>2026-03-04 16:00</text:p>
          </table:table-cell>
          <table:table-cell office:value-type="float" office:value="9.49525" table:style-name="c8">
            <text:p>9.4953</text:p>
          </table:table-cell>
          <table:table-cell office:value-type="float" office:value="0.44043720716526735" table:style-name="c10">
            <text:p>+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21:00</text:p>
          </table:table-cell>
          <table:table-cell office:value-type="float" office:value="9.28464" table:style-name="c8">
            <text:p>9.2846</text:p>
          </table:table-cell>
          <table:table-cell office:value-type="string" table:style-name="c8">
            <text:p>2026-03-05 21:30</text:p>
          </table:table-cell>
          <table:table-cell office:value-type="float" office:value="9.295350000000001" table:style-name="c8">
            <text:p>9.2954</text:p>
          </table:table-cell>
          <table:table-cell office:value-type="float" office:value="-0.08477878140669137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3:45</text:p>
          </table:table-cell>
          <table:table-cell office:value-type="float" office:value="8.944469999999999" table:style-name="c8">
            <text:p>8.9445</text:p>
          </table:table-cell>
          <table:table-cell office:value-type="string" table:style-name="c8">
            <text:p>2026-03-09 14:15</text:p>
          </table:table-cell>
          <table:table-cell office:value-type="float" office:value="8.865565" table:style-name="c8">
            <text:p>8.8656</text:p>
          </table:table-cell>
          <table:table-cell office:value-type="float" office:value="-1.0803017331937892" table:style-name="c9">
            <text:p>-1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4:30</text:p>
          </table:table-cell>
          <table:table-cell office:value-type="float" office:value="8.92446" table:style-name="c8">
            <text:p>8.9245</text:p>
          </table:table-cell>
          <table:table-cell office:value-type="string" table:style-name="c8">
            <text:p>2026-03-09 15:00</text:p>
          </table:table-cell>
          <table:table-cell office:value-type="float" office:value="8.925535" table:style-name="c8">
            <text:p>8.9255</text:p>
          </table:table-cell>
          <table:table-cell office:value-type="float" office:value="-0.18787853231455598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20:00</text:p>
          </table:table-cell>
          <table:table-cell office:value-type="float" office:value="9.014505" table:style-name="c8">
            <text:p>9.0145</text:p>
          </table:table-cell>
          <table:table-cell office:value-type="string" table:style-name="c8">
            <text:p>2026-03-09 20:30</text:p>
          </table:table-cell>
          <table:table-cell office:value-type="float" office:value="9.01549" table:style-name="c8">
            <text:p>9.0155</text:p>
          </table:table-cell>
          <table:table-cell office:value-type="float" office:value="-0.1889950087109571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05:00</text:p>
          </table:table-cell>
          <table:table-cell office:value-type="float" office:value="9.02451" table:style-name="c8">
            <text:p>9.0245</text:p>
          </table:table-cell>
          <table:table-cell office:value-type="string" table:style-name="c8">
            <text:p>2026-03-11 05:30</text:p>
          </table:table-cell>
          <table:table-cell office:value-type="float" office:value="8.955520000000002" table:style-name="c8">
            <text:p>8.9555</text:p>
          </table:table-cell>
          <table:table-cell office:value-type="float" office:value="-0.9628454562075728" table:style-name="c9">
            <text:p>-1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45</text:p>
          </table:table-cell>
          <table:table-cell office:value-type="float" office:value="9.074535" table:style-name="c8">
            <text:p>9.0745</text:p>
          </table:table-cell>
          <table:table-cell office:value-type="string" table:style-name="c8">
            <text:p>2026-03-11 14:15</text:p>
          </table:table-cell>
          <table:table-cell office:value-type="float" office:value="9.055470000000001" table:style-name="c8">
            <text:p>9.0555</text:p>
          </table:table-cell>
          <table:table-cell office:value-type="float" office:value="-0.4095734330188505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7:30</text:p>
          </table:table-cell>
          <table:table-cell office:value-type="float" office:value="9.14457" table:style-name="c8">
            <text:p>9.1446</text:p>
          </table:table-cell>
          <table:table-cell office:value-type="string" table:style-name="c8">
            <text:p>2026-03-11 18:00</text:p>
          </table:table-cell>
          <table:table-cell office:value-type="float" office:value="9.075460000000001" table:style-name="c8">
            <text:p>9.0755</text:p>
          </table:table-cell>
          <table:table-cell office:value-type="float" office:value="-0.9541382978095148" table:style-name="c9">
            <text:p>-1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7:45</text:p>
          </table:table-cell>
          <table:table-cell office:value-type="float" office:value="8.944469999999999" table:style-name="c8">
            <text:p>8.9445</text:p>
          </table:table-cell>
          <table:table-cell office:value-type="string" table:style-name="c8">
            <text:p>2026-03-12 08:15</text:p>
          </table:table-cell>
          <table:table-cell office:value-type="float" office:value="8.93553" table:style-name="c8">
            <text:p>8.935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0:45</text:p>
          </table:table-cell>
          <table:table-cell office:value-type="float" office:value="9.094545" table:style-name="c8">
            <text:p>9.0945</text:p>
          </table:table-cell>
          <table:table-cell office:value-type="string" table:style-name="c8">
            <text:p>2026-03-12 11:15</text:p>
          </table:table-cell>
          <table:table-cell office:value-type="float" office:value="9.045475000000001" table:style-name="c8">
            <text:p>9.0455</text:p>
          </table:table-cell>
          <table:table-cell office:value-type="float" office:value="-0.7383756364391703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00</text:p>
          </table:table-cell>
          <table:table-cell office:value-type="float" office:value="9.28464" table:style-name="c8">
            <text:p>9.2846</text:p>
          </table:table-cell>
          <table:table-cell office:value-type="string" table:style-name="c8">
            <text:p>2026-03-13 10:30</text:p>
          </table:table-cell>
          <table:table-cell office:value-type="float" office:value="9.295350000000001" table:style-name="c8">
            <text:p>9.2954</text:p>
          </table:table-cell>
          <table:table-cell office:value-type="float" office:value="-0.08477878140669137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9.514755" table:style-name="c8">
            <text:p>9.5148</text:p>
          </table:table-cell>
          <table:table-cell office:value-type="string" table:style-name="c8">
            <text:p>2026-03-13 14:00</text:p>
          </table:table-cell>
          <table:table-cell office:value-type="float" office:value="9.51524" table:style-name="c8">
            <text:p>9.5152</text:p>
          </table:table-cell>
          <table:table-cell office:value-type="float" office:value="-0.19481284342055538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9:15</text:p>
          </table:table-cell>
          <table:table-cell office:value-type="float" office:value="9.294645" table:style-name="c8">
            <text:p>9.2946</text:p>
          </table:table-cell>
          <table:table-cell office:value-type="string" table:style-name="c8">
            <text:p>2026-03-15 09:45</text:p>
          </table:table-cell>
          <table:table-cell office:value-type="float" office:value="9.255370000000001" table:style-name="c8">
            <text:p>9.2554</text:p>
          </table:table-cell>
          <table:table-cell office:value-type="float" office:value="-0.6216104502108188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1:45</text:p>
          </table:table-cell>
          <table:table-cell office:value-type="float" office:value="9.314655" table:style-name="c8">
            <text:p>9.3147</text:p>
          </table:table-cell>
          <table:table-cell office:value-type="string" table:style-name="c8">
            <text:p>2026-03-15 22:15</text:p>
          </table:table-cell>
          <table:table-cell office:value-type="float" office:value="9.265365000000001" table:style-name="c8">
            <text:p>9.2654</text:p>
          </table:table-cell>
          <table:table-cell office:value-type="float" office:value="-0.7280083334809451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9.434714999999999" table:style-name="c8">
            <text:p>9.4347</text:p>
          </table:table-cell>
          <table:table-cell office:value-type="string" table:style-name="c8">
            <text:p>2026-03-15 23:15</text:p>
          </table:table-cell>
          <table:table-cell office:value-type="float" office:value="9.505245" table:style-name="c8">
            <text:p>9.5052</text:p>
          </table:table-cell>
          <table:table-cell office:value-type="float" office:value="0.5461639831727982" table:style-name="c10">
            <text:p>+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3:30</text:p>
          </table:table-cell>
          <table:table-cell office:value-type="float" office:value="9.42471" table:style-name="c8">
            <text:p>9.4247</text:p>
          </table:table-cell>
          <table:table-cell office:value-type="string" table:style-name="c8">
            <text:p>2026-03-16 00:00</text:p>
          </table:table-cell>
          <table:table-cell office:value-type="float" office:value="9.49525" table:style-name="c8">
            <text:p>9.4953</text:p>
          </table:table-cell>
          <table:table-cell office:value-type="float" office:value="0.5470618751133971" table:style-name="c10">
            <text:p>+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9.734865" table:style-name="c8">
            <text:p>9.7349</text:p>
          </table:table-cell>
          <table:table-cell office:value-type="string" table:style-name="c8">
            <text:p>2026-03-16 04:15</text:p>
          </table:table-cell>
          <table:table-cell office:value-type="float" office:value="9.745125" table:style-name="c8">
            <text:p>9.7451</text:p>
          </table:table-cell>
          <table:table-cell office:value-type="float" office:value="-0.09471630962524236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1:00</text:p>
          </table:table-cell>
          <table:table-cell office:value-type="float" office:value="9.734865" table:style-name="c8">
            <text:p>9.7349</text:p>
          </table:table-cell>
          <table:table-cell office:value-type="string" table:style-name="c8">
            <text:p>2026-03-16 11:30</text:p>
          </table:table-cell>
          <table:table-cell office:value-type="float" office:value="9.645175" table:style-name="c8">
            <text:p>9.6452</text:p>
          </table:table-cell>
          <table:table-cell office:value-type="float" office:value="-1.1193858859367745" table:style-name="c9">
            <text:p>-1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3:45</text:p>
          </table:table-cell>
          <table:table-cell office:value-type="float" office:value="9.754875" table:style-name="c8">
            <text:p>9.7549</text:p>
          </table:table-cell>
          <table:table-cell office:value-type="string" table:style-name="c8">
            <text:p>2026-03-16 14:15</text:p>
          </table:table-cell>
          <table:table-cell office:value-type="float" office:value="9.765115" table:style-name="c8">
            <text:p>9.7651</text:p>
          </table:table-cell>
          <table:table-cell office:value-type="float" office:value="-0.09513668688734267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45</text:p>
          </table:table-cell>
          <table:table-cell office:value-type="float" office:value="9.2046" table:style-name="c8">
            <text:p>9.2046</text:p>
          </table:table-cell>
          <table:table-cell office:value-type="string" table:style-name="c8">
            <text:p>2026-03-24 21:15</text:p>
          </table:table-cell>
          <table:table-cell office:value-type="float" office:value="9.165415000000001" table:style-name="c8">
            <text:p>9.1654</text:p>
          </table:table-cell>
          <table:table-cell office:value-type="float" office:value="-0.6247600611107185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5:15</text:p>
          </table:table-cell>
          <table:table-cell office:value-type="float" office:value="9.30465" table:style-name="c8">
            <text:p>9.3047</text:p>
          </table:table-cell>
          <table:table-cell office:value-type="string" table:style-name="c8">
            <text:p>2026-03-25 05:45</text:p>
          </table:table-cell>
          <table:table-cell office:value-type="float" office:value="9.31534" table:style-name="c8">
            <text:p>9.3153</text:p>
          </table:table-cell>
          <table:table-cell office:value-type="float" office:value="-0.08524087053247698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8:45</text:p>
          </table:table-cell>
          <table:table-cell office:value-type="float" office:value="9.394695" table:style-name="c8">
            <text:p>9.3947</text:p>
          </table:table-cell>
          <table:table-cell office:value-type="string" table:style-name="c8">
            <text:p>2026-03-25 09:15</text:p>
          </table:table-cell>
          <table:table-cell office:value-type="float" office:value="9.35532" table:style-name="c8">
            <text:p>9.3553</text:p>
          </table:table-cell>
          <table:table-cell office:value-type="float" office:value="-0.6181816938176099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2:15</text:p>
          </table:table-cell>
          <table:table-cell office:value-type="float" office:value="9.444719999999998" table:style-name="c8">
            <text:p>9.4447</text:p>
          </table:table-cell>
          <table:table-cell office:value-type="string" table:style-name="c8">
            <text:p>2026-03-25 12:45</text:p>
          </table:table-cell>
          <table:table-cell office:value-type="float" office:value="9.385305" table:style-name="c8">
            <text:p>9.3853</text:p>
          </table:table-cell>
          <table:table-cell office:value-type="float" office:value="-0.8277241114082345" table:style-name="c9">
            <text:p>-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22:45</text:p>
          </table:table-cell>
          <table:table-cell office:value-type="float" office:value="9.38469" table:style-name="c8">
            <text:p>9.3847</text:p>
          </table:table-cell>
          <table:table-cell office:value-type="string" table:style-name="c8">
            <text:p>2026-03-25 23:15</text:p>
          </table:table-cell>
          <table:table-cell office:value-type="float" office:value="9.37531" table:style-name="c8">
            <text:p>9.3753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00</text:p>
          </table:table-cell>
          <table:table-cell office:value-type="float" office:value="8.754375" table:style-name="c8">
            <text:p>8.7544</text:p>
          </table:table-cell>
          <table:table-cell office:value-type="string" table:style-name="c8">
            <text:p>2026-03-30 08:30</text:p>
          </table:table-cell>
          <table:table-cell office:value-type="float" office:value="8.765615" table:style-name="c8">
            <text:p>8.7656</text:p>
          </table:table-cell>
          <table:table-cell office:value-type="float" office:value="-0.07176371111585755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1:30</text:p>
          </table:table-cell>
          <table:table-cell office:value-type="float" office:value="8.834415" table:style-name="c8">
            <text:p>8.8344</text:p>
          </table:table-cell>
          <table:table-cell office:value-type="string" table:style-name="c8">
            <text:p>2026-03-30 12:00</text:p>
          </table:table-cell>
          <table:table-cell office:value-type="float" office:value="8.85557" table:style-name="c8">
            <text:p>8.8556</text:p>
          </table:table-cell>
          <table:table-cell office:value-type="float" office:value="0.03908256030535906" table:style-name="c10">
            <text:p>+0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30</text:p>
          </table:table-cell>
          <table:table-cell office:value-type="float" office:value="8.76438" table:style-name="c8">
            <text:p>8.7644</text:p>
          </table:table-cell>
          <table:table-cell office:value-type="string" table:style-name="c8">
            <text:p>2026-03-31 02:00</text:p>
          </table:table-cell>
          <table:table-cell office:value-type="float" office:value="8.785605" table:style-name="c8">
            <text:p>8.7856</text:p>
          </table:table-cell>
          <table:table-cell office:value-type="float" office:value="0.04178932913680988" table:style-name="c10">
            <text:p>+0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3:15</text:p>
          </table:table-cell>
          <table:table-cell office:value-type="float" office:value="8.684339999999999" table:style-name="c8">
            <text:p>8.6843</text:p>
          </table:table-cell>
          <table:table-cell office:value-type="string" table:style-name="c8">
            <text:p>2026-03-31 13:45</text:p>
          </table:table-cell>
          <table:table-cell office:value-type="float" office:value="8.685655" table:style-name="c8">
            <text:p>8.6857</text:p>
          </table:table-cell>
          <table:table-cell office:value-type="float" office:value="-0.1847880707687488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6:45</text:p>
          </table:table-cell>
          <table:table-cell office:value-type="float" office:value="8.784389999999998" table:style-name="c8">
            <text:p>8.7844</text:p>
          </table:table-cell>
          <table:table-cell office:value-type="string" table:style-name="c8">
            <text:p>2026-03-31 17:15</text:p>
          </table:table-cell>
          <table:table-cell office:value-type="float" office:value="8.875560000000002" table:style-name="c8">
            <text:p>8.8756</text:p>
          </table:table-cell>
          <table:table-cell office:value-type="float" office:value="0.8358890664007745" table:style-name="c10">
            <text:p>+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8.92446" table:style-name="c8">
            <text:p>8.9245</text:p>
          </table:table-cell>
          <table:table-cell office:value-type="string" table:style-name="c8">
            <text:p>2026-04-01 06:00</text:p>
          </table:table-cell>
          <table:table-cell office:value-type="float" office:value="8.91554" table:style-name="c8">
            <text:p>8.9155</text:p>
          </table:table-cell>
          <table:table-cell office:value-type="float" office:value="-0.299650224887571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45</text:p>
          </table:table-cell>
          <table:table-cell office:value-type="float" office:value="9.094545" table:style-name="c8">
            <text:p>9.0945</text:p>
          </table:table-cell>
          <table:table-cell office:value-type="string" table:style-name="c8">
            <text:p>2026-04-01 07:15</text:p>
          </table:table-cell>
          <table:table-cell office:value-type="float" office:value="9.135430000000001" table:style-name="c8">
            <text:p>9.1354</text:p>
          </table:table-cell>
          <table:table-cell office:value-type="float" office:value="0.2487565395520086" table:style-name="c10">
            <text:p>+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7:30</text:p>
          </table:table-cell>
          <table:table-cell office:value-type="float" office:value="9.074535" table:style-name="c8">
            <text:p>9.0745</text:p>
          </table:table-cell>
          <table:table-cell office:value-type="string" table:style-name="c8">
            <text:p>2026-04-01 08:00</text:p>
          </table:table-cell>
          <table:table-cell office:value-type="float" office:value="9.055470000000001" table:style-name="c8">
            <text:p>9.0555</text:p>
          </table:table-cell>
          <table:table-cell office:value-type="float" office:value="-0.4095734330188505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9:15</text:p>
          </table:table-cell>
          <table:table-cell office:value-type="float" office:value="8.774384999999999" table:style-name="c8">
            <text:p>8.7744</text:p>
          </table:table-cell>
          <table:table-cell office:value-type="string" table:style-name="c8">
            <text:p>2026-04-04 19:45</text:p>
          </table:table-cell>
          <table:table-cell office:value-type="float" office:value="8.71564" table:style-name="c8">
            <text:p>8.7156</text:p>
          </table:table-cell>
          <table:table-cell office:value-type="float" office:value="-0.868067270355688" table:style-name="c9">
            <text:p>-0.9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0:15</text:p>
          </table:table-cell>
          <table:table-cell office:value-type="float" office:value="8.894445" table:style-name="c8">
            <text:p>8.8944</text:p>
          </table:table-cell>
          <table:table-cell office:value-type="string" table:style-name="c8">
            <text:p>2026-04-06 00:45</text:p>
          </table:table-cell>
          <table:table-cell office:value-type="float" office:value="8.945525" table:style-name="c8">
            <text:p>8.9455</text:p>
          </table:table-cell>
          <table:table-cell office:value-type="float" office:value="0.3732430244382856" table:style-name="c10">
            <text:p>+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6:15</text:p>
          </table:table-cell>
          <table:table-cell office:value-type="float" office:value="9.0045" table:style-name="c8">
            <text:p>9.0045</text:p>
          </table:table-cell>
          <table:table-cell office:value-type="string" table:style-name="c8">
            <text:p>2026-04-06 06:45</text:p>
          </table:table-cell>
          <table:table-cell office:value-type="float" office:value="8.905545" table:style-name="c8">
            <text:p>8.9055</text:p>
          </table:table-cell>
          <table:table-cell office:value-type="float" office:value="-1.2966537226386743" table:style-name="c9">
            <text:p>-1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15</text:p>
          </table:table-cell>
          <table:table-cell office:value-type="float" office:value="9.044519999999999" table:style-name="c8">
            <text:p>9.0445</text:p>
          </table:table-cell>
          <table:table-cell office:value-type="string" table:style-name="c8">
            <text:p>2026-04-06 09:45</text:p>
          </table:table-cell>
          <table:table-cell office:value-type="float" office:value="9.085455" table:style-name="c8">
            <text:p>9.0855</text:p>
          </table:table-cell>
          <table:table-cell office:value-type="float" office:value="0.25178976280666454" table:style-name="c10">
            <text:p>+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08:45</text:p>
          </table:table-cell>
          <table:table-cell office:value-type="float" office:value="8.834415" table:style-name="c8">
            <text:p>8.8344</text:p>
          </table:table-cell>
          <table:table-cell office:value-type="string" table:style-name="c8">
            <text:p>2026-04-07 09:15</text:p>
          </table:table-cell>
          <table:table-cell office:value-type="float" office:value="8.865565" table:style-name="c8">
            <text:p>8.8656</text:p>
          </table:table-cell>
          <table:table-cell office:value-type="float" office:value="0.1519934887029839" table:style-name="c10">
            <text:p>+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9.2046" table:style-name="c8">
            <text:p>9.2046</text:p>
          </table:table-cell>
          <table:table-cell office:value-type="string" table:style-name="c8">
            <text:p>2026-04-07 23:30</text:p>
          </table:table-cell>
          <table:table-cell office:value-type="float" office:value="9.405295" table:style-name="c8">
            <text:p>9.4053</text:p>
          </table:table-cell>
          <table:table-cell office:value-type="float" office:value="1.9761186286747945" table:style-name="c10">
            <text:p>+2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45</text:p>
          </table:table-cell>
          <table:table-cell office:value-type="float" office:value="9.32466" table:style-name="c8">
            <text:p>9.3247</text:p>
          </table:table-cell>
          <table:table-cell office:value-type="string" table:style-name="c8">
            <text:p>2026-04-08 00:15</text:p>
          </table:table-cell>
          <table:table-cell office:value-type="float" office:value="9.285355" table:style-name="c8">
            <text:p>9.2854</text:p>
          </table:table-cell>
          <table:table-cell office:value-type="float" office:value="-0.6205740975542273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9.10455" table:style-name="c8">
            <text:p>9.1045</text:p>
          </table:table-cell>
          <table:table-cell office:value-type="string" table:style-name="c8">
            <text:p>2026-04-09 23:00</text:p>
          </table:table-cell>
          <table:table-cell office:value-type="float" office:value="9.01549" table:style-name="c8">
            <text:p>9.0155</text:p>
          </table:table-cell>
          <table:table-cell office:value-type="float" office:value="-1.1761368163171082" table:style-name="c9">
            <text:p>-1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30</text:p>
          </table:table-cell>
          <table:table-cell office:value-type="float" office:value="9.124559999999999" table:style-name="c8">
            <text:p>9.1246</text:p>
          </table:table-cell>
          <table:table-cell office:value-type="string" table:style-name="c8">
            <text:p>2026-04-10 15:00</text:p>
          </table:table-cell>
          <table:table-cell office:value-type="float" office:value="9.125435000000001" table:style-name="c8">
            <text:p>9.1254</text:p>
          </table:table-cell>
          <table:table-cell office:value-type="float" office:value="-0.19032966592359424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7:00</text:p>
          </table:table-cell>
          <table:table-cell office:value-type="float" office:value="9.10455" table:style-name="c8">
            <text:p>9.1045</text:p>
          </table:table-cell>
          <table:table-cell office:value-type="string" table:style-name="c8">
            <text:p>2026-04-11 17:30</text:p>
          </table:table-cell>
          <table:table-cell office:value-type="float" office:value="9.085455" table:style-name="c8">
            <text:p>9.0855</text:p>
          </table:table-cell>
          <table:table-cell office:value-type="float" office:value="-0.40921104881624926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9.194595" table:style-name="c8">
            <text:p>9.1946</text:p>
          </table:table-cell>
          <table:table-cell office:value-type="string" table:style-name="c8">
            <text:p>2026-04-11 19:15</text:p>
          </table:table-cell>
          <table:table-cell office:value-type="float" office:value="9.225385000000001" table:style-name="c8">
            <text:p>9.2254</text:p>
          </table:table-cell>
          <table:table-cell office:value-type="float" office:value="0.13430124312165947" table:style-name="c10">
            <text:p>+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9:30</text:p>
          </table:table-cell>
          <table:table-cell office:value-type="float" office:value="9.254624999999999" table:style-name="c8">
            <text:p>9.2546</text:p>
          </table:table-cell>
          <table:table-cell office:value-type="string" table:style-name="c8">
            <text:p>2026-04-11 20:00</text:p>
          </table:table-cell>
          <table:table-cell office:value-type="float" office:value="9.265365000000001" table:style-name="c8">
            <text:p>9.2654</text:p>
          </table:table-cell>
          <table:table-cell office:value-type="float" office:value="-0.08408190104947089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15</text:p>
          </table:table-cell>
          <table:table-cell office:value-type="float" office:value="9.124559999999999" table:style-name="c8">
            <text:p>9.1246</text:p>
          </table:table-cell>
          <table:table-cell office:value-type="string" table:style-name="c8">
            <text:p>2026-04-13 22:45</text:p>
          </table:table-cell>
          <table:table-cell office:value-type="float" office:value="9.295350000000001" table:style-name="c8">
            <text:p>9.2954</text:p>
          </table:table-cell>
          <table:table-cell office:value-type="float" office:value="1.6681198364633776" table:style-name="c10">
            <text:p>+1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00</text:p>
          </table:table-cell>
          <table:table-cell office:value-type="float" office:value="9.334665" table:style-name="c8">
            <text:p>9.3347</text:p>
          </table:table-cell>
          <table:table-cell office:value-type="string" table:style-name="c8">
            <text:p>2026-04-13 23:30</text:p>
          </table:table-cell>
          <table:table-cell office:value-type="float" office:value="9.41529" table:style-name="c8">
            <text:p>9.4153</text:p>
          </table:table-cell>
          <table:table-cell office:value-type="float" office:value="0.6620894835540625" table:style-name="c10">
            <text:p>+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45</text:p>
          </table:table-cell>
          <table:table-cell office:value-type="float" office:value="9.38469" table:style-name="c8">
            <text:p>9.3847</text:p>
          </table:table-cell>
          <table:table-cell office:value-type="string" table:style-name="c8">
            <text:p>2026-04-14 00:15</text:p>
          </table:table-cell>
          <table:table-cell office:value-type="float" office:value="9.33533" table:style-name="c8">
            <text:p>9.3353</text:p>
          </table:table-cell>
          <table:table-cell office:value-type="float" office:value="-0.7248116311780017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0:30</text:p>
          </table:table-cell>
          <table:table-cell office:value-type="float" office:value="9.06453" table:style-name="c8">
            <text:p>9.0645</text:p>
          </table:table-cell>
          <table:table-cell office:value-type="string" table:style-name="c8">
            <text:p>2026-04-15 01:00</text:p>
          </table:table-cell>
          <table:table-cell office:value-type="float" office:value="9.045475000000001" table:style-name="c8">
            <text:p>9.0455</text:p>
          </table:table-cell>
          <table:table-cell office:value-type="float" office:value="-0.4096947610631618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30</text:p>
          </table:table-cell>
          <table:table-cell office:value-type="float" office:value="9.24462" table:style-name="c8">
            <text:p>9.2446</text:p>
          </table:table-cell>
          <table:table-cell office:value-type="string" table:style-name="c8">
            <text:p>2026-04-15 18:00</text:p>
          </table:table-cell>
          <table:table-cell office:value-type="float" office:value="9.245375000000001" table:style-name="c8">
            <text:p>9.2454</text:p>
          </table:table-cell>
          <table:table-cell office:value-type="float" office:value="-0.1917494134426212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9.354674999999999" table:style-name="c8">
            <text:p>9.3547</text:p>
          </table:table-cell>
          <table:table-cell office:value-type="string" table:style-name="c8">
            <text:p>2026-04-15 20:15</text:p>
          </table:table-cell>
          <table:table-cell office:value-type="float" office:value="9.285355" table:style-name="c8">
            <text:p>9.2854</text:p>
          </table:table-cell>
          <table:table-cell office:value-type="float" office:value="-0.9394385656903981" table:style-name="c9">
            <text:p>-0.9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45</text:p>
          </table:table-cell>
          <table:table-cell office:value-type="float" office:value="9.334665" table:style-name="c8">
            <text:p>9.3347</text:p>
          </table:table-cell>
          <table:table-cell office:value-type="string" table:style-name="c8">
            <text:p>2026-04-16 03:15</text:p>
          </table:table-cell>
          <table:table-cell office:value-type="float" office:value="9.285355" table:style-name="c8">
            <text:p>9.2854</text:p>
          </table:table-cell>
          <table:table-cell office:value-type="float" office:value="-0.72709009530606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5:30</text:p>
          </table:table-cell>
          <table:table-cell office:value-type="float" office:value="9.364679999999998" table:style-name="c8">
            <text:p>9.3647</text:p>
          </table:table-cell>
          <table:table-cell office:value-type="string" table:style-name="c8">
            <text:p>2026-04-16 06:00</text:p>
          </table:table-cell>
          <table:table-cell office:value-type="float" office:value="9.305345" table:style-name="c8">
            <text:p>9.3053</text:p>
          </table:table-cell>
          <table:table-cell office:value-type="float" office:value="-0.832237563429794" table:style-name="c9">
            <text:p>-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9.414705" table:style-name="c8">
            <text:p>9.4147</text:p>
          </table:table-cell>
          <table:table-cell office:value-type="string" table:style-name="c8">
            <text:p>2026-04-16 13:45</text:p>
          </table:table-cell>
          <table:table-cell office:value-type="float" office:value="9.37531" table:style-name="c8">
            <text:p>9.3753</text:p>
          </table:table-cell>
          <table:table-cell office:value-type="float" office:value="-0.617504687507453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9.42471" table:style-name="c8">
            <text:p>9.4247</text:p>
          </table:table-cell>
          <table:table-cell office:value-type="string" table:style-name="c8">
            <text:p>2026-04-16 16:15</text:p>
          </table:table-cell>
          <table:table-cell office:value-type="float" office:value="9.425285" table:style-name="c8">
            <text:p>9.4253</text:p>
          </table:table-cell>
          <table:table-cell office:value-type="float" office:value="-0.19381121238742915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7:15</text:p>
          </table:table-cell>
          <table:table-cell office:value-type="float" office:value="9.454724999999998" table:style-name="c8">
            <text:p>9.4547</text:p>
          </table:table-cell>
          <table:table-cell office:value-type="string" table:style-name="c8">
            <text:p>2026-04-17 07:45</text:p>
          </table:table-cell>
          <table:table-cell office:value-type="float" office:value="9.45527" table:style-name="c8">
            <text:p>9.4553</text:p>
          </table:table-cell>
          <table:table-cell office:value-type="float" office:value="-0.19414720925249318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00</text:p>
          </table:table-cell>
          <table:table-cell office:value-type="float" office:value="9.474735" table:style-name="c8">
            <text:p>9.4747</text:p>
          </table:table-cell>
          <table:table-cell office:value-type="string" table:style-name="c8">
            <text:p>2026-04-17 08:30</text:p>
          </table:table-cell>
          <table:table-cell office:value-type="float" office:value="9.485255" table:style-name="c8">
            <text:p>9.4853</text:p>
          </table:table-cell>
          <table:table-cell office:value-type="float" office:value="-0.08908982409535637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9.534764999999998" table:style-name="c8">
            <text:p>9.5348</text:p>
          </table:table-cell>
          <table:table-cell office:value-type="string" table:style-name="c8">
            <text:p>2026-04-17 09:15</text:p>
          </table:table-cell>
          <table:table-cell office:value-type="float" office:value="9.51524" table:style-name="c8">
            <text:p>9.5152</text:p>
          </table:table-cell>
          <table:table-cell office:value-type="float" office:value="-0.40426759086352737" table:style-name="c9">
            <text:p>-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30</text:p>
          </table:table-cell>
          <table:table-cell office:value-type="float" office:value="9.58479" table:style-name="c8">
            <text:p>9.5848</text:p>
          </table:table-cell>
          <table:table-cell office:value-type="string" table:style-name="c8">
            <text:p>2026-04-17 10:00</text:p>
          </table:table-cell>
          <table:table-cell office:value-type="float" office:value="9.55522" table:style-name="c8">
            <text:p>9.5552</text:p>
          </table:table-cell>
          <table:table-cell office:value-type="float" office:value="-0.5077929175287155" table:style-name="c9">
            <text:p>-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30</text:p>
          </table:table-cell>
          <table:table-cell office:value-type="float" office:value="9.72486" table:style-name="c8">
            <text:p>9.7249</text:p>
          </table:table-cell>
          <table:table-cell office:value-type="string" table:style-name="c8">
            <text:p>2026-04-17 14:00</text:p>
          </table:table-cell>
          <table:table-cell office:value-type="float" office:value="9.785105" table:style-name="c8">
            <text:p>9.7851</text:p>
          </table:table-cell>
          <table:table-cell office:value-type="float" office:value="0.4183564092953729" table:style-name="c10">
            <text:p>+0.4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5:30</text:p>
          </table:table-cell>
          <table:table-cell office:value-type="float" office:value="9.414705" table:style-name="c8">
            <text:p>9.4147</text:p>
          </table:table-cell>
          <table:table-cell office:value-type="string" table:style-name="c8">
            <text:p>2026-04-26 06:00</text:p>
          </table:table-cell>
          <table:table-cell office:value-type="float" office:value="9.385305" table:style-name="c8">
            <text:p>9.3853</text:p>
          </table:table-cell>
          <table:table-cell office:value-type="float" office:value="-0.5115531999674849" table:style-name="c9">
            <text:p>-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11:45</text:p>
          </table:table-cell>
          <table:table-cell office:value-type="float" office:value="9.48474" table:style-name="c8">
            <text:p>9.4847</text:p>
          </table:table-cell>
          <table:table-cell office:value-type="string" table:style-name="c8">
            <text:p>2026-04-26 12:15</text:p>
          </table:table-cell>
          <table:table-cell office:value-type="float" office:value="9.45527" table:style-name="c8">
            <text:p>9.4553</text:p>
          </table:table-cell>
          <table:table-cell office:value-type="float" office:value="-0.5099885155523398" table:style-name="c9">
            <text:p>-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22:15</text:p>
          </table:table-cell>
          <table:table-cell office:value-type="float" office:value="9.494745" table:style-name="c8">
            <text:p>9.4947</text:p>
          </table:table-cell>
          <table:table-cell office:value-type="string" table:style-name="c8">
            <text:p>2026-04-26 22:45</text:p>
          </table:table-cell>
          <table:table-cell office:value-type="float" office:value="9.445275" table:style-name="c8">
            <text:p>9.4453</text:p>
          </table:table-cell>
          <table:table-cell office:value-type="float" office:value="-0.7198835221483124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9.394695" table:style-name="c8">
            <text:p>9.3947</text:p>
          </table:table-cell>
          <table:table-cell office:value-type="string" table:style-name="c8">
            <text:p>2026-04-29 10:30</text:p>
          </table:table-cell>
          <table:table-cell office:value-type="float" office:value="9.405295" table:style-name="c8">
            <text:p>9.4053</text:p>
          </table:table-cell>
          <table:table-cell office:value-type="float" office:value="-0.08729591226750433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4:00</text:p>
          </table:table-cell>
          <table:table-cell office:value-type="float" office:value="9.264629999999999" table:style-name="c8">
            <text:p>9.2646</text:p>
          </table:table-cell>
          <table:table-cell office:value-type="string" table:style-name="c8">
            <text:p>2026-05-01 14:30</text:p>
          </table:table-cell>
          <table:table-cell office:value-type="float" office:value="9.225385000000001" table:style-name="c8">
            <text:p>9.2254</text:p>
          </table:table-cell>
          <table:table-cell office:value-type="float" office:value="-0.6226535178954662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21:45</text:p>
          </table:table-cell>
          <table:table-cell office:value-type="float" office:value="9.214605" table:style-name="c8">
            <text:p>9.2146</text:p>
          </table:table-cell>
          <table:table-cell office:value-type="string" table:style-name="c8">
            <text:p>2026-05-02 22:15</text:p>
          </table:table-cell>
          <table:table-cell office:value-type="float" office:value="9.205395000000001" table:style-name="c8">
            <text:p>9.2054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11:45</text:p>
          </table:table-cell>
          <table:table-cell office:value-type="float" office:value="9.18459" table:style-name="c8">
            <text:p>9.1846</text:p>
          </table:table-cell>
          <table:table-cell office:value-type="string" table:style-name="c8">
            <text:p>2026-05-03 12:15</text:p>
          </table:table-cell>
          <table:table-cell office:value-type="float" office:value="9.1954" table:style-name="c8">
            <text:p>9.1954</text:p>
          </table:table-cell>
          <table:table-cell office:value-type="float" office:value="-0.08243813387424082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15</text:p>
          </table:table-cell>
          <table:table-cell office:value-type="float" office:value="9.194595" table:style-name="c8">
            <text:p>9.1946</text:p>
          </table:table-cell>
          <table:table-cell office:value-type="string" table:style-name="c8">
            <text:p>2026-05-03 22:45</text:p>
          </table:table-cell>
          <table:table-cell office:value-type="float" office:value="9.205395000000001" table:style-name="c8">
            <text:p>9.2054</text:p>
          </table:table-cell>
          <table:table-cell office:value-type="float" office:value="-0.0826744908829391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15</text:p>
          </table:table-cell>
          <table:table-cell office:value-type="float" office:value="9.274634999999998" table:style-name="c8">
            <text:p>9.2746</text:p>
          </table:table-cell>
          <table:table-cell office:value-type="string" table:style-name="c8">
            <text:p>2026-05-04 02:45</text:p>
          </table:table-cell>
          <table:table-cell office:value-type="float" office:value="9.325335" table:style-name="c8">
            <text:p>9.3253</text:p>
          </table:table-cell>
          <table:table-cell office:value-type="float" office:value="0.34565948239475563" table:style-name="c10">
            <text:p>+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9:00</text:p>
          </table:table-cell>
          <table:table-cell office:value-type="float" office:value="9.4047" table:style-name="c8">
            <text:p>9.4047</text:p>
          </table:table-cell>
          <table:table-cell office:value-type="string" table:style-name="c8">
            <text:p>2026-05-04 09:30</text:p>
          </table:table-cell>
          <table:table-cell office:value-type="float" office:value="9.49525" table:style-name="c8">
            <text:p>9.4953</text:p>
          </table:table-cell>
          <table:table-cell office:value-type="float" office:value="0.760991793996646" table:style-name="c10">
            <text:p>+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9:45</text:p>
          </table:table-cell>
          <table:table-cell office:value-type="float" office:value="9.64482" table:style-name="c8">
            <text:p>9.6448</text:p>
          </table:table-cell>
          <table:table-cell office:value-type="string" table:style-name="c8">
            <text:p>2026-05-04 10:15</text:p>
          </table:table-cell>
          <table:table-cell office:value-type="float" office:value="9.345325" table:style-name="c8">
            <text:p>9.3453</text:p>
          </table:table-cell>
          <table:table-cell office:value-type="float" office:value="-3.2989346060890434" table:style-name="c9">
            <text:p>-3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0:45</text:p>
          </table:table-cell>
          <table:table-cell office:value-type="float" office:value="9.48474" table:style-name="c8">
            <text:p>9.4847</text:p>
          </table:table-cell>
          <table:table-cell office:value-type="string" table:style-name="c8">
            <text:p>2026-05-04 11:15</text:p>
          </table:table-cell>
          <table:table-cell office:value-type="float" office:value="9.43528" table:style-name="c8">
            <text:p>9.4353</text:p>
          </table:table-cell>
          <table:table-cell office:value-type="float" office:value="-0.7203268062171531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9.524759999999999" table:style-name="c8">
            <text:p>9.5248</text:p>
          </table:table-cell>
          <table:table-cell office:value-type="string" table:style-name="c8">
            <text:p>2026-05-04 15:30</text:p>
          </table:table-cell>
          <table:table-cell office:value-type="float" office:value="9.445275" table:style-name="c8">
            <text:p>9.4453</text:p>
          </table:table-cell>
          <table:table-cell office:value-type="float" office:value="-1.0327410320574937" table:style-name="c9">
            <text:p>-1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2:45</text:p>
          </table:table-cell>
          <table:table-cell office:value-type="float" office:value="9.50475" table:style-name="c8">
            <text:p>9.5047</text:p>
          </table:table-cell>
          <table:table-cell office:value-type="string" table:style-name="c8">
            <text:p>2026-05-05 03:15</text:p>
          </table:table-cell>
          <table:table-cell office:value-type="float" office:value="9.49525" table:style-name="c8">
            <text:p>9.4953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7:45</text:p>
          </table:table-cell>
          <table:table-cell office:value-type="float" office:value="9.624809999999998" table:style-name="c8">
            <text:p>9.6248</text:p>
          </table:table-cell>
          <table:table-cell office:value-type="string" table:style-name="c8">
            <text:p>2026-05-05 08:15</text:p>
          </table:table-cell>
          <table:table-cell office:value-type="float" office:value="9.61519" table:style-name="c8">
            <text:p>9.6152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0:00</text:p>
          </table:table-cell>
          <table:table-cell office:value-type="float" office:value="9.624809999999998" table:style-name="c8">
            <text:p>9.6248</text:p>
          </table:table-cell>
          <table:table-cell office:value-type="string" table:style-name="c8">
            <text:p>2026-05-05 10:30</text:p>
          </table:table-cell>
          <table:table-cell office:value-type="float" office:value="9.65517" table:style-name="c8">
            <text:p>9.6552</text:p>
          </table:table-cell>
          <table:table-cell office:value-type="float" office:value="0.11490424403186594" table:style-name="c10">
            <text:p>+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0:45</text:p>
          </table:table-cell>
          <table:table-cell office:value-type="float" office:value="9.68484" table:style-name="c8">
            <text:p>9.6848</text:p>
          </table:table-cell>
          <table:table-cell office:value-type="string" table:style-name="c8">
            <text:p>2026-05-05 11:15</text:p>
          </table:table-cell>
          <table:table-cell office:value-type="float" office:value="9.67516" table:style-name="c8">
            <text:p>9.6752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00</text:p>
          </table:table-cell>
          <table:table-cell office:value-type="float" office:value="9.794894999999999" table:style-name="c8">
            <text:p>9.7949</text:p>
          </table:table-cell>
          <table:table-cell office:value-type="string" table:style-name="c8">
            <text:p>2026-05-05 21:30</text:p>
          </table:table-cell>
          <table:table-cell office:value-type="float" office:value="9.785105" table:style-name="c8">
            <text:p>9.7851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2:30</text:p>
          </table:table-cell>
          <table:table-cell office:value-type="float" office:value="9.84492" table:style-name="c8">
            <text:p>9.8449</text:p>
          </table:table-cell>
          <table:table-cell office:value-type="string" table:style-name="c8">
            <text:p>2026-05-05 23:00</text:p>
          </table:table-cell>
          <table:table-cell office:value-type="float" office:value="9.785105" table:style-name="c8">
            <text:p>9.7851</text:p>
          </table:table-cell>
          <table:table-cell office:value-type="float" office:value="-0.8062576932570398" table:style-name="c9">
            <text:p>-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5:15</text:p>
          </table:table-cell>
          <table:table-cell office:value-type="float" office:value="10.025009999999998" table:style-name="c8">
            <text:p>10.025</text:p>
          </table:table-cell>
          <table:table-cell office:value-type="string" table:style-name="c8">
            <text:p>2026-05-07 05:45</text:p>
          </table:table-cell>
          <table:table-cell office:value-type="float" office:value="9.995000000000001" table:style-name="c8">
            <text:p>9.995</text:p>
          </table:table-cell>
          <table:table-cell office:value-type="float" office:value="-0.4986529190494138" table:style-name="c9">
            <text:p>-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04:30</text:p>
          </table:table-cell>
          <table:table-cell office:value-type="float" office:value="9.894945" table:style-name="c8">
            <text:p>9.8949</text:p>
          </table:table-cell>
          <table:table-cell office:value-type="string" table:style-name="c8">
            <text:p>2026-05-08 05:00</text:p>
          </table:table-cell>
          <table:table-cell office:value-type="float" office:value="9.845075" table:style-name="c8">
            <text:p>9.8451</text:p>
          </table:table-cell>
          <table:table-cell office:value-type="float" office:value="-0.7028872310558709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7:45</text:p>
          </table:table-cell>
          <table:table-cell office:value-type="float" office:value="10.26513" table:style-name="c8">
            <text:p>10.265</text:p>
          </table:table-cell>
          <table:table-cell office:value-type="string" table:style-name="c8">
            <text:p>2026-05-08 18:15</text:p>
          </table:table-cell>
          <table:table-cell office:value-type="float" office:value="10.41479" table:style-name="c8">
            <text:p>10.415</text:p>
          </table:table-cell>
          <table:table-cell office:value-type="float" office:value="1.2551310581551567" table:style-name="c10">
            <text:p>+1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8:30</text:p>
          </table:table-cell>
          <table:table-cell office:value-type="float" office:value="10.42521" table:style-name="c8">
            <text:p>10.425</text:p>
          </table:table-cell>
          <table:table-cell office:value-type="string" table:style-name="c8">
            <text:p>2026-05-08 19:00</text:p>
          </table:table-cell>
          <table:table-cell office:value-type="float" office:value="10.374810000000002" table:style-name="c8">
            <text:p>10.375</text:p>
          </table:table-cell>
          <table:table-cell office:value-type="float" office:value="-0.6823770954253905" table:style-name="c9">
            <text:p>-0.7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1:45</text:p>
          </table:table-cell>
          <table:table-cell office:value-type="float" office:value="10.515255" table:style-name="c8">
            <text:p>10.515</text:p>
          </table:table-cell>
          <table:table-cell office:value-type="string" table:style-name="c8">
            <text:p>2026-05-09 02:15</text:p>
          </table:table-cell>
          <table:table-cell office:value-type="float" office:value="10.544725000000001" table:style-name="c8">
            <text:p>10.545</text:p>
          </table:table-cell>
          <table:table-cell office:value-type="float" office:value="0.07979925094543372" table:style-name="c10">
            <text:p>+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8:15</text:p>
          </table:table-cell>
          <table:table-cell office:value-type="float" office:value="10.42521" table:style-name="c8">
            <text:p>10.425</text:p>
          </table:table-cell>
          <table:table-cell office:value-type="string" table:style-name="c8">
            <text:p>2026-05-09 18:45</text:p>
          </table:table-cell>
          <table:table-cell office:value-type="float" office:value="10.41479" table:style-name="c8">
            <text:p>10.41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7:45</text:p>
          </table:table-cell>
          <table:table-cell office:value-type="float" office:value="10.46523" table:style-name="c8">
            <text:p>10.465</text:p>
          </table:table-cell>
          <table:table-cell office:value-type="string" table:style-name="c8">
            <text:p>2026-05-10 08:15</text:p>
          </table:table-cell>
          <table:table-cell office:value-type="float" office:value="10.454770000000002" table:style-name="c8">
            <text:p>10.455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8:30</text:p>
          </table:table-cell>
          <table:table-cell office:value-type="float" office:value="10.48524" table:style-name="c8">
            <text:p>10.485</text:p>
          </table:table-cell>
          <table:table-cell office:value-type="string" table:style-name="c8">
            <text:p>2026-05-10 09:00</text:p>
          </table:table-cell>
          <table:table-cell office:value-type="float" office:value="10.49475" table:style-name="c8">
            <text:p>10.495</text:p>
          </table:table-cell>
          <table:table-cell office:value-type="float" office:value="-0.1093823818052786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3:30</text:p>
          </table:table-cell>
          <table:table-cell office:value-type="float" office:value="10.56528" table:style-name="c8">
            <text:p>10.565</text:p>
          </table:table-cell>
          <table:table-cell office:value-type="string" table:style-name="c8">
            <text:p>2026-05-10 14:00</text:p>
          </table:table-cell>
          <table:table-cell office:value-type="float" office:value="10.584705" table:style-name="c8">
            <text:p>10.585</text:p>
          </table:table-cell>
          <table:table-cell office:value-type="float" office:value="-0.016410594844629145" table:style-name="c9">
            <text:p>-0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00</text:p>
          </table:table-cell>
          <table:table-cell office:value-type="float" office:value="10.635315" table:style-name="c8">
            <text:p>10.635</text:p>
          </table:table-cell>
          <table:table-cell office:value-type="string" table:style-name="c8">
            <text:p>2026-05-10 16:30</text:p>
          </table:table-cell>
          <table:table-cell office:value-type="float" office:value="10.654670000000001" table:style-name="c8">
            <text:p>10.655</text:p>
          </table:table-cell>
          <table:table-cell office:value-type="float" office:value="-0.018275766444142416" table:style-name="c9">
            <text:p>-0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15</text:p>
          </table:table-cell>
          <table:table-cell office:value-type="float" office:value="10.74537" table:style-name="c8">
            <text:p>10.745</text:p>
          </table:table-cell>
          <table:table-cell office:value-type="string" table:style-name="c8">
            <text:p>2026-05-10 23:45</text:p>
          </table:table-cell>
          <table:table-cell office:value-type="float" office:value="10.754620000000001" table:style-name="c8">
            <text:p>10.755</text:p>
          </table:table-cell>
          <table:table-cell office:value-type="float" office:value="-0.11398849346273554" table:style-name="c9">
            <text:p>-0.1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1:30</text:p>
          </table:table-cell>
          <table:table-cell office:value-type="float" office:value="10.715355" table:style-name="c8">
            <text:p>10.715</text:p>
          </table:table-cell>
          <table:table-cell office:value-type="string" table:style-name="c8">
            <text:p>2026-05-11 02:00</text:p>
          </table:table-cell>
          <table:table-cell office:value-type="float" office:value="10.674660000000001" table:style-name="c8">
            <text:p>10.675</text:p>
          </table:table-cell>
          <table:table-cell office:value-type="float" office:value="-0.5789229133332685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6:15</text:p>
          </table:table-cell>
          <table:table-cell office:value-type="float" office:value="10.64532" table:style-name="c8">
            <text:p>10.645</text:p>
          </table:table-cell>
          <table:table-cell office:value-type="string" table:style-name="c8">
            <text:p>2026-05-11 16:45</text:p>
          </table:table-cell>
          <table:table-cell office:value-type="float" office:value="10.554720000000001" table:style-name="c8">
            <text:p>10.555</text:p>
          </table:table-cell>
          <table:table-cell office:value-type="float" office:value="-1.0492769149259784" table:style-name="c9">
            <text:p>-1.0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9:15</text:p>
          </table:table-cell>
          <table:table-cell office:value-type="float" office:value="10.72536" table:style-name="c8">
            <text:p>10.725</text:p>
          </table:table-cell>
          <table:table-cell office:value-type="string" table:style-name="c8">
            <text:p>2026-05-13 09:45</text:p>
          </table:table-cell>
          <table:table-cell office:value-type="float" office:value="10.724635000000001" table:style-name="c8">
            <text:p>10.725</text:p>
          </table:table-cell>
          <table:table-cell office:value-type="float" office:value="-0.20664616726151497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30</text:p>
          </table:table-cell>
          <table:table-cell office:value-type="float" office:value="9.741868499999999" table:style-name="c8">
            <text:p>9.7419</text:p>
          </table:table-cell>
          <table:table-cell office:value-type="string" table:style-name="c8">
            <text:p>2026-05-21 09:00</text:p>
          </table:table-cell>
          <table:table-cell office:value-type="float" office:value="9.673161000000002" table:style-name="c8">
            <text:p>9.6732</text:p>
          </table:table-cell>
          <table:table-cell office:value-type="float" office:value="-0.9037706558961855" table:style-name="c9">
            <text:p>-0.9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5:30</text:p>
          </table:table-cell>
          <table:table-cell office:value-type="float" office:value="9.6838395" table:style-name="c8">
            <text:p>9.6838</text:p>
          </table:table-cell>
          <table:table-cell office:value-type="string" table:style-name="c8">
            <text:p>2026-05-21 16:00</text:p>
          </table:table-cell>
          <table:table-cell office:value-type="float" office:value="9.6441755" table:style-name="c8">
            <text:p>9.6442</text:p>
          </table:table-cell>
          <table:table-cell office:value-type="float" office:value="-0.6086708358239434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30</text:p>
          </table:table-cell>
          <table:table-cell office:value-type="float" office:value="9.8079015" table:style-name="c8">
            <text:p>9.8079</text:p>
          </table:table-cell>
          <table:table-cell office:value-type="string" table:style-name="c8">
            <text:p>2026-05-21 18:00</text:p>
          </table:table-cell>
          <table:table-cell office:value-type="float" office:value="9.804095499999999" table:style-name="c8">
            <text:p>9.8041</text:p>
          </table:table-cell>
          <table:table-cell office:value-type="float" office:value="-0.23862787472429536" table:style-name="c9">
            <text:p>-0.2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13:15</text:p>
          </table:table-cell>
          <table:table-cell office:value-type="float" office:value="10.0140045" table:style-name="c8">
            <text:p>10.014</text:p>
          </table:table-cell>
          <table:table-cell office:value-type="string" table:style-name="c8">
            <text:p>2026-05-22 13:45</text:p>
          </table:table-cell>
          <table:table-cell office:value-type="float" office:value="9.957019" table:style-name="c8">
            <text:p>9.957</text:p>
          </table:table-cell>
          <table:table-cell office:value-type="float" office:value="-0.7678205155689732" table:style-name="c9">
            <text:p>-0.8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30</text:p>
          </table:table-cell>
          <table:table-cell office:value-type="float" office:value="9.64482" table:style-name="c8">
            <text:p>9.6448</text:p>
          </table:table-cell>
          <table:table-cell office:value-type="string" table:style-name="c8">
            <text:p>2026-05-25 15:00</text:p>
          </table:table-cell>
          <table:table-cell office:value-type="float" office:value="9.6101925" table:style-name="c8">
            <text:p>9.6102</text:p>
          </table:table-cell>
          <table:table-cell office:value-type="float" office:value="-0.5582092232669811" table:style-name="c9">
            <text:p>-0.6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6:00</text:p>
          </table:table-cell>
          <table:table-cell office:value-type="float" office:value="9.530762999999999" table:style-name="c8">
            <text:p>9.5308</text:p>
          </table:table-cell>
          <table:table-cell office:value-type="string" table:style-name="c8">
            <text:p>2026-05-26 06:30</text:p>
          </table:table-cell>
          <table:table-cell office:value-type="float" office:value="9.500247500000002" table:style-name="c8">
            <text:p>9.5002</text:p>
          </table:table-cell>
          <table:table-cell office:value-type="float" office:value="-0.5194389447360837" table:style-name="c9">
            <text:p>-0.5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8:30</text:p>
          </table:table-cell>
          <table:table-cell office:value-type="float" office:value="9.542769" table:style-name="c8">
            <text:p>9.5428</text:p>
          </table:table-cell>
          <table:table-cell office:value-type="string" table:style-name="c8">
            <text:p>2026-05-26 09:00</text:p>
          </table:table-cell>
          <table:table-cell office:value-type="float" office:value="9.53523" table:style-name="c8">
            <text:p>9.5352</text:p>
          </table:table-cell>
          <table:table-cell office:value-type="float" office:value="-0.2787443012609913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9.606800999999999" table:style-name="c8">
            <text:p>9.6068</text:p>
          </table:table-cell>
          <table:table-cell office:value-type="string" table:style-name="c8">
            <text:p>2026-05-26 11:00</text:p>
          </table:table-cell>
          <table:table-cell office:value-type="float" office:value="9.597199000000002" table:style-name="c8">
            <text:p>9.5972</text:p>
          </table:table-cell>
          <table:table-cell office:value-type="float" office:value="-0.29965022488751547" table:style-name="c9">
            <text:p>-0.3</text:p>
          </table:table-cell>
        </table:table-row>
        <table:table-row>
          <table:table-cell office:value-type="string" table:style-name="c7">
            <text:p>LINK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3:15</text:p>
          </table:table-cell>
          <table:table-cell office:value-type="float" office:value="9.186591" table:style-name="c8">
            <text:p>9.1866</text:p>
          </table:table-cell>
          <table:table-cell office:value-type="string" table:style-name="c8">
            <text:p>2026-06-01 03:45</text:p>
          </table:table-cell>
          <table:table-cell office:value-type="float" office:value="9.1844055" table:style-name="c8">
            <text:p>9.1844</text:p>
          </table:table-cell>
          <table:table-cell office:value-type="float" office:value="-0.22364255243865205" table:style-name="c9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15</text:p>
          </table:table-cell>
          <table:table-cell office:value-type="float" office:value="54.557265" table:style-name="c1">
            <text:p>54.557</text:p>
          </table:table-cell>
          <table:table-cell office:value-type="string" table:style-name="c1">
            <text:p>2026-03-03 16:45</text:p>
          </table:table-cell>
          <table:table-cell office:value-type="float" office:value="54.372800000000005" table:style-name="c1">
            <text:p>54.373</text:p>
          </table:table-cell>
          <table:table-cell office:value-type="float" office:value="-0.5373367363631476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56.39818499999999" table:style-name="c1">
            <text:p>56.398</text:p>
          </table:table-cell>
          <table:table-cell office:value-type="string" table:style-name="c1">
            <text:p>2026-03-04 10:15</text:p>
          </table:table-cell>
          <table:table-cell office:value-type="float" office:value="56.281845000000004" table:style-name="c1">
            <text:p>56.282</text:p>
          </table:table-cell>
          <table:table-cell office:value-type="float" office:value="-0.40577087392970057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54.617295" table:style-name="c1">
            <text:p>54.617</text:p>
          </table:table-cell>
          <table:table-cell office:value-type="string" table:style-name="c1">
            <text:p>2026-03-11 14:00</text:p>
          </table:table-cell>
          <table:table-cell office:value-type="float" office:value="54.572700000000005" table:style-name="c1">
            <text:p>54.573</text:p>
          </table:table-cell>
          <table:table-cell office:value-type="float" office:value="-0.2813867426059713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54.64731" table:style-name="c1">
            <text:p>54.647</text:p>
          </table:table-cell>
          <table:table-cell office:value-type="string" table:style-name="c1">
            <text:p>2026-03-12 10:15</text:p>
          </table:table-cell>
          <table:table-cell office:value-type="float" office:value="54.382795" table:style-name="c1">
            <text:p>54.383</text:p>
          </table:table-cell>
          <table:table-cell office:value-type="float" office:value="-0.6829726974758588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55.237604999999995" table:style-name="c1">
            <text:p>55.238</text:p>
          </table:table-cell>
          <table:table-cell office:value-type="string" table:style-name="c1">
            <text:p>2026-03-13 01:00</text:p>
          </table:table-cell>
          <table:table-cell office:value-type="float" office:value="55.03247" table:style-name="c1">
            <text:p>55.032</text:p>
          </table:table-cell>
          <table:table-cell office:value-type="float" office:value="-0.5705260167054527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55.927949999999996" table:style-name="c1">
            <text:p>55.928</text:p>
          </table:table-cell>
          <table:table-cell office:value-type="string" table:style-name="c1">
            <text:p>2026-03-13 10:45</text:p>
          </table:table-cell>
          <table:table-cell office:value-type="float" office:value="55.922025000000005" table:style-name="c1">
            <text:p>55.922</text:p>
          </table:table-cell>
          <table:table-cell office:value-type="float" office:value="-0.21047281006186802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56.278124999999996" table:style-name="c1">
            <text:p>56.278</text:p>
          </table:table-cell>
          <table:table-cell office:value-type="string" table:style-name="c1">
            <text:p>2026-03-13 13:30</text:p>
          </table:table-cell>
          <table:table-cell office:value-type="float" office:value="56.401785000000004" table:style-name="c1">
            <text:p>56.402</text:p>
          </table:table-cell>
          <table:table-cell office:value-type="float" office:value="0.019390894392823377" table:style-name="c11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56.57827499999999" table:style-name="c1">
            <text:p>56.578</text:p>
          </table:table-cell>
          <table:table-cell office:value-type="string" table:style-name="c1">
            <text:p>2026-03-13 14:15</text:p>
          </table:table-cell>
          <table:table-cell office:value-type="float" office:value="56.53172000000001" table:style-name="c1">
            <text:p>56.532</text:p>
          </table:table-cell>
          <table:table-cell office:value-type="float" office:value="-0.2820197474737163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3-15 22:30</text:p>
          </table:table-cell>
          <table:table-cell office:value-type="float" office:value="55.55221" table:style-name="c1">
            <text:p>55.552</text:p>
          </table:table-cell>
          <table:table-cell office:value-type="float" office:value="-0.5679985555221423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56.028" table:style-name="c1">
            <text:p>56.028</text:p>
          </table:table-cell>
          <table:table-cell office:value-type="string" table:style-name="c1">
            <text:p>2026-03-15 23:15</text:p>
          </table:table-cell>
          <table:table-cell office:value-type="float" office:value="56.23187" table:style-name="c1">
            <text:p>56.232</text:p>
          </table:table-cell>
          <table:table-cell office:value-type="float" office:value="0.16324425621117022" table:style-name="c11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56.798385" table:style-name="c1">
            <text:p>56.798</text:p>
          </table:table-cell>
          <table:table-cell office:value-type="string" table:style-name="c1">
            <text:p>2026-03-16 04:15</text:p>
          </table:table-cell>
          <table:table-cell office:value-type="float" office:value="56.87155" table:style-name="c1">
            <text:p>56.872</text:p>
          </table:table-cell>
          <table:table-cell office:value-type="float" office:value="-0.0713422194134616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57.92894999999999" table:style-name="c1">
            <text:p>57.929</text:p>
          </table:table-cell>
          <table:table-cell office:value-type="string" table:style-name="c1">
            <text:p>2026-03-16 14:15</text:p>
          </table:table-cell>
          <table:table-cell office:value-type="float" office:value="57.990990000000004" table:style-name="c1">
            <text:p>57.991</text:p>
          </table:table-cell>
          <table:table-cell office:value-type="float" office:value="-0.0930173756126806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58.259114999999994" table:style-name="c1">
            <text:p>58.259</text:p>
          </table:table-cell>
          <table:table-cell office:value-type="string" table:style-name="c1">
            <text:p>2026-03-16 15:30</text:p>
          </table:table-cell>
          <table:table-cell office:value-type="float" office:value="58.13092" table:style-name="c1">
            <text:p>58.131</text:p>
          </table:table-cell>
          <table:table-cell office:value-type="float" office:value="-0.41950295516846037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58.34916" table:style-name="c1">
            <text:p>58.349</text:p>
          </table:table-cell>
          <table:table-cell office:value-type="string" table:style-name="c1">
            <text:p>2026-03-16 17:15</text:p>
          </table:table-cell>
          <table:table-cell office:value-type="float" office:value="58.340815" table:style-name="c1">
            <text:p>58.341</text:p>
          </table:table-cell>
          <table:table-cell office:value-type="float" office:value="-0.21417324462770226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9:15</text:p>
          </table:table-cell>
          <table:table-cell office:value-type="float" office:value="56.108039999999995" table:style-name="c1">
            <text:p>56.108</text:p>
          </table:table-cell>
          <table:table-cell office:value-type="string" table:style-name="c1">
            <text:p>2026-03-21 19:45</text:p>
          </table:table-cell>
          <table:table-cell office:value-type="float" office:value="55.842065" table:style-name="c1">
            <text:p>55.842</text:p>
          </table:table-cell>
          <table:table-cell office:value-type="float" office:value="-0.6729931894519869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5:45</text:p>
          </table:table-cell>
          <table:table-cell office:value-type="float" office:value="55.837905" table:style-name="c1">
            <text:p>55.838</text:p>
          </table:table-cell>
          <table:table-cell office:value-type="string" table:style-name="c1">
            <text:p>2026-03-24 16:15</text:p>
          </table:table-cell>
          <table:table-cell office:value-type="float" office:value="55.85206000000001" table:style-name="c1">
            <text:p>55.852</text:p>
          </table:table-cell>
          <table:table-cell office:value-type="float" office:value="-0.17460051185658187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56.71834499999999" table:style-name="c1">
            <text:p>56.718</text:p>
          </table:table-cell>
          <table:table-cell office:value-type="string" table:style-name="c1">
            <text:p>2026-03-25 09:15</text:p>
          </table:table-cell>
          <table:table-cell office:value-type="float" office:value="56.35181000000001" table:style-name="c1">
            <text:p>56.352</text:p>
          </table:table-cell>
          <table:table-cell office:value-type="float" office:value="-0.8448452933349726" table:style-name="c12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54.687329999999996" table:style-name="c1">
            <text:p>54.687</text:p>
          </table:table-cell>
          <table:table-cell office:value-type="string" table:style-name="c1">
            <text:p>2026-04-01 06:45</text:p>
          </table:table-cell>
          <table:table-cell office:value-type="float" office:value="54.652660000000004" table:style-name="c1">
            <text:p>54.653</text:p>
          </table:table-cell>
          <table:table-cell office:value-type="float" office:value="-0.26317003836170416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53.446709999999996" table:style-name="c1">
            <text:p>53.447</text:p>
          </table:table-cell>
          <table:table-cell office:value-type="string" table:style-name="c1">
            <text:p>2026-04-03 21:45</text:p>
          </table:table-cell>
          <table:table-cell office:value-type="float" office:value="53.383295" table:style-name="c1">
            <text:p>53.383</text:p>
          </table:table-cell>
          <table:table-cell office:value-type="float" office:value="-0.31831371230334193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53.916945" table:style-name="c1">
            <text:p>53.917</text:p>
          </table:table-cell>
          <table:table-cell office:value-type="string" table:style-name="c1">
            <text:p>2026-04-05 23:45</text:p>
          </table:table-cell>
          <table:table-cell office:value-type="float" office:value="53.973000000000006" table:style-name="c1">
            <text:p>53.973</text:p>
          </table:table-cell>
          <table:table-cell office:value-type="float" office:value="-0.0961423667457106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54.24711" table:style-name="c1">
            <text:p>54.247</text:p>
          </table:table-cell>
          <table:table-cell office:value-type="string" table:style-name="c1">
            <text:p>2026-04-06 00:45</text:p>
          </table:table-cell>
          <table:table-cell office:value-type="float" office:value="54.23287" table:style-name="c1">
            <text:p>54.233</text:p>
          </table:table-cell>
          <table:table-cell office:value-type="float" office:value="-0.22609777208407733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54.657315" table:style-name="c1">
            <text:p>54.657</text:p>
          </table:table-cell>
          <table:table-cell office:value-type="string" table:style-name="c1">
            <text:p>2026-04-07 23:15</text:p>
          </table:table-cell>
          <table:table-cell office:value-type="float" office:value="55.022475" table:style-name="c1">
            <text:p>55.022</text:p>
          </table:table-cell>
          <table:table-cell office:value-type="float" office:value="0.4668543862335728" table:style-name="c11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15</text:p>
          </table:table-cell>
          <table:table-cell office:value-type="float" office:value="55.32764999999999" table:style-name="c1">
            <text:p>55.328</text:p>
          </table:table-cell>
          <table:table-cell office:value-type="string" table:style-name="c1">
            <text:p>2026-04-08 13:45</text:p>
          </table:table-cell>
          <table:table-cell office:value-type="float" office:value="55.14241500000001" table:style-name="c1">
            <text:p>55.142</text:p>
          </table:table-cell>
          <table:table-cell office:value-type="float" office:value="-0.5340271773425775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09 16:30</text:p>
          </table:table-cell>
          <table:table-cell office:value-type="float" office:value="54.622675" table:style-name="c1">
            <text:p>54.623</text:p>
          </table:table-cell>
          <table:table-cell office:value-type="float" office:value="-0.4089907656754876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2:45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0 13:15</text:p>
          </table:table-cell>
          <table:table-cell office:value-type="float" office:value="55.00248500000001" table:style-name="c1">
            <text:p>55.002</text:p>
          </table:table-cell>
          <table:table-cell office:value-type="float" office:value="-0.09995906546906852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55.26762" table:style-name="c1">
            <text:p>55.268</text:p>
          </table:table-cell>
          <table:table-cell office:value-type="string" table:style-name="c1">
            <text:p>2026-04-10 15:00</text:p>
          </table:table-cell>
          <table:table-cell office:value-type="float" office:value="55.28234500000001" table:style-name="c1">
            <text:p>55.282</text:p>
          </table:table-cell>
          <table:table-cell office:value-type="float" office:value="-0.17331017267432358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15</text:p>
          </table:table-cell>
          <table:table-cell office:value-type="float" office:value="55.427699999999994" table:style-name="c1">
            <text:p>55.428</text:p>
          </table:table-cell>
          <table:table-cell office:value-type="string" table:style-name="c1">
            <text:p>2026-04-10 15:45</text:p>
          </table:table-cell>
          <table:table-cell office:value-type="float" office:value="55.122425" table:style-name="c1">
            <text:p>55.122</text:p>
          </table:table-cell>
          <table:table-cell office:value-type="float" office:value="-0.7495615505875075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1 17:30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-0.2270352578262802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55.517745" table:style-name="c1">
            <text:p>55.518</text:p>
          </table:table-cell>
          <table:table-cell office:value-type="string" table:style-name="c1">
            <text:p>2026-04-11 19:15</text:p>
          </table:table-cell>
          <table:table-cell office:value-type="float" office:value="55.41228" table:style-name="c1">
            <text:p>55.412</text:p>
          </table:table-cell>
          <table:table-cell office:value-type="float" office:value="-0.3894865465447039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4 14:15</text:p>
          </table:table-cell>
          <table:table-cell office:value-type="float" office:value="55.022475" table:style-name="c1">
            <text:p>55.022</text:p>
          </table:table-cell>
          <table:table-cell office:value-type="float" office:value="-0.4081971489758751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15</text:p>
          </table:table-cell>
          <table:table-cell office:value-type="float" office:value="54.74735999999999" table:style-name="c1">
            <text:p>54.747</text:p>
          </table:table-cell>
          <table:table-cell office:value-type="string" table:style-name="c1">
            <text:p>2026-04-15 13:45</text:p>
          </table:table-cell>
          <table:table-cell office:value-type="float" office:value="54.852560000000004" table:style-name="c1">
            <text:p>54.853</text:p>
          </table:table-cell>
          <table:table-cell office:value-type="float" office:value="-0.008128734317036646" table:style-name="c12">
            <text:p>-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55.607789999999994" table:style-name="c1">
            <text:p>55.608</text:p>
          </table:table-cell>
          <table:table-cell office:value-type="string" table:style-name="c1">
            <text:p>2026-04-15 20:15</text:p>
          </table:table-cell>
          <table:table-cell office:value-type="float" office:value="55.28234500000001" table:style-name="c1">
            <text:p>55.282</text:p>
          </table:table-cell>
          <table:table-cell office:value-type="float" office:value="-0.7839808193330078" table:style-name="c12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6 16:30</text:p>
          </table:table-cell>
          <table:table-cell office:value-type="float" office:value="55.642165000000006" table:style-name="c1">
            <text:p>55.642</text:p>
          </table:table-cell>
          <table:table-cell office:value-type="float" office:value="-0.6565514232949599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56.04801" table:style-name="c1">
            <text:p>56.048</text:p>
          </table:table-cell>
          <table:table-cell office:value-type="string" table:style-name="c1">
            <text:p>2026-04-17 08:15</text:p>
          </table:table-cell>
          <table:table-cell office:value-type="float" office:value="55.962005000000005" table:style-name="c1">
            <text:p>55.962</text:p>
          </table:table-cell>
          <table:table-cell office:value-type="float" office:value="-0.35304205804094213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30</text:p>
          </table:table-cell>
          <table:table-cell office:value-type="float" office:value="56.38818" table:style-name="c1">
            <text:p>56.388</text:p>
          </table:table-cell>
          <table:table-cell office:value-type="string" table:style-name="c1">
            <text:p>2026-04-17 10:00</text:p>
          </table:table-cell>
          <table:table-cell office:value-type="float" office:value="56.13192" table:style-name="c1">
            <text:p>56.132</text:p>
          </table:table-cell>
          <table:table-cell office:value-type="float" office:value="-0.6534484852676603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56.668319999999994" table:style-name="c1">
            <text:p>56.668</text:p>
          </table:table-cell>
          <table:table-cell office:value-type="string" table:style-name="c1">
            <text:p>2026-04-17 13:30</text:p>
          </table:table-cell>
          <table:table-cell office:value-type="float" office:value="57.141415" table:style-name="c1">
            <text:p>57.141</text:p>
          </table:table-cell>
          <table:table-cell office:value-type="float" office:value="0.6332803079657445" table:style-name="c11">
            <text:p>+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17 14:15</text:p>
          </table:table-cell>
          <table:table-cell office:value-type="float" office:value="57.121425" table:style-name="c1">
            <text:p>57.121</text:p>
          </table:table-cell>
          <table:table-cell office:value-type="float" office:value="-0.543288712730372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56.058015" table:style-name="c1">
            <text:p>56.058</text:p>
          </table:table-cell>
          <table:table-cell office:value-type="string" table:style-name="c1">
            <text:p>2026-04-22 03:00</text:p>
          </table:table-cell>
          <table:table-cell office:value-type="float" office:value="55.91203" table:style-name="c1">
            <text:p>55.912</text:p>
          </table:table-cell>
          <table:table-cell office:value-type="float" office:value="-0.4597971368946907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56.268119999999996" table:style-name="c1">
            <text:p>56.268</text:p>
          </table:table-cell>
          <table:table-cell office:value-type="string" table:style-name="c1">
            <text:p>2026-04-22 06:00</text:p>
          </table:table-cell>
          <table:table-cell office:value-type="float" office:value="56.261855000000004" table:style-name="c1">
            <text:p>56.262</text:p>
          </table:table-cell>
          <table:table-cell office:value-type="float" office:value="-0.21101193383570305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4 11:45</text:p>
          </table:table-cell>
          <table:table-cell office:value-type="float" office:value="56.341815000000004" table:style-name="c1">
            <text:p>56.342</text:p>
          </table:table-cell>
          <table:table-cell office:value-type="float" office:value="-0.4762047667240976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56.158065" table:style-name="c1">
            <text:p>56.158</text:p>
          </table:table-cell>
          <table:table-cell office:value-type="string" table:style-name="c1">
            <text:p>2026-04-26 05:45</text:p>
          </table:table-cell>
          <table:table-cell office:value-type="float" office:value="56.03197000000001" table:style-name="c1">
            <text:p>56.032</text:p>
          </table:table-cell>
          <table:table-cell office:value-type="float" office:value="-0.42398702311056136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10:30</text:p>
          </table:table-cell>
          <table:table-cell office:value-type="float" office:value="57.311330000000005" table:style-name="c1">
            <text:p>57.311</text:p>
          </table:table-cell>
          <table:table-cell office:value-type="float" office:value="-0.2126364792293889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5-04 02:30</text:p>
          </table:table-cell>
          <table:table-cell office:value-type="float" office:value="55.902035000000005" table:style-name="c1">
            <text:p>55.902</text:p>
          </table:table-cell>
          <table:table-cell office:value-type="float" office:value="0.058147549291942546" table:style-name="c11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56.148059999999994" table:style-name="c1">
            <text:p>56.148</text:p>
          </table:table-cell>
          <table:table-cell office:value-type="string" table:style-name="c1">
            <text:p>2026-05-04 03:15</text:p>
          </table:table-cell>
          <table:table-cell office:value-type="float" office:value="56.081945000000005" table:style-name="c1">
            <text:p>56.082</text:p>
          </table:table-cell>
          <table:table-cell office:value-type="float" office:value="-0.31741578970847506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56.20809" table:style-name="c1">
            <text:p>56.208</text:p>
          </table:table-cell>
          <table:table-cell office:value-type="string" table:style-name="c1">
            <text:p>2026-05-05 20:45</text:p>
          </table:table-cell>
          <table:table-cell office:value-type="float" office:value="56.321825000000004" table:style-name="c1">
            <text:p>56.322</text:p>
          </table:table-cell>
          <table:table-cell office:value-type="float" office:value="0.002041826763732324" table:style-name="c11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57.178574999999995" table:style-name="c1">
            <text:p>57.179</text:p>
          </table:table-cell>
          <table:table-cell office:value-type="string" table:style-name="c1">
            <text:p>2026-05-06 08:30</text:p>
          </table:table-cell>
          <table:table-cell office:value-type="float" office:value="57.481245" table:style-name="c1">
            <text:p>57.481</text:p>
          </table:table-cell>
          <table:table-cell office:value-type="float" office:value="0.32838347448322924" table:style-name="c11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57.58878" table:style-name="c1">
            <text:p>57.589</text:p>
          </table:table-cell>
          <table:table-cell office:value-type="string" table:style-name="c1">
            <text:p>2026-05-06 09:15</text:p>
          </table:table-cell>
          <table:table-cell office:value-type="float" office:value="57.56120500000001" table:style-name="c1">
            <text:p>57.561</text:p>
          </table:table-cell>
          <table:table-cell office:value-type="float" office:value="-0.247686873719144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30</text:p>
          </table:table-cell>
          <table:table-cell office:value-type="float" office:value="56.76837" table:style-name="c1">
            <text:p>56.768</text:p>
          </table:table-cell>
          <table:table-cell office:value-type="string" table:style-name="c1">
            <text:p>2026-05-07 06:00</text:p>
          </table:table-cell>
          <table:table-cell office:value-type="float" office:value="56.67165000000001" table:style-name="c1">
            <text:p>56.672</text:p>
          </table:table-cell>
          <table:table-cell office:value-type="float" office:value="-0.36993598433422425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8:15</text:p>
          </table:table-cell>
          <table:table-cell office:value-type="float" office:value="56.72835" table:style-name="c1">
            <text:p>56.728</text:p>
          </table:table-cell>
          <table:table-cell office:value-type="string" table:style-name="c1">
            <text:p>2026-05-07 18:45</text:p>
          </table:table-cell>
          <table:table-cell office:value-type="float" office:value="56.59169" table:style-name="c1">
            <text:p>56.592</text:p>
          </table:table-cell>
          <table:table-cell office:value-type="float" office:value="-0.4403209124009488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57.348659999999995" table:style-name="c1">
            <text:p>57.349</text:p>
          </table:table-cell>
          <table:table-cell office:value-type="string" table:style-name="c1">
            <text:p>2026-05-08 15:15</text:p>
          </table:table-cell>
          <table:table-cell office:value-type="float" office:value="57.13142" table:style-name="c1">
            <text:p>57.131</text:p>
          </table:table-cell>
          <table:table-cell office:value-type="float" office:value="-0.5779484796680445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57.858914999999996" table:style-name="c1">
            <text:p>57.859</text:p>
          </table:table-cell>
          <table:table-cell office:value-type="string" table:style-name="c1">
            <text:p>2026-05-08 16:30</text:p>
          </table:table-cell>
          <table:table-cell office:value-type="float" office:value="57.441265" table:style-name="c1">
            <text:p>57.441</text:p>
          </table:table-cell>
          <table:table-cell office:value-type="float" office:value="-0.9202991254415815" table:style-name="c12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30</text:p>
          </table:table-cell>
          <table:table-cell office:value-type="float" office:value="58.82939999999999" table:style-name="c1">
            <text:p>58.829</text:p>
          </table:table-cell>
          <table:table-cell office:value-type="string" table:style-name="c1">
            <text:p>2026-05-09 02:00</text:p>
          </table:table-cell>
          <table:table-cell office:value-type="float" office:value="58.95051" table:style-name="c1">
            <text:p>58.951</text:p>
          </table:table-cell>
          <table:table-cell office:value-type="float" office:value="0.005554927485240668" table:style-name="c11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58.749359999999996" table:style-name="c1">
            <text:p>58.749</text:p>
          </table:table-cell>
          <table:table-cell office:value-type="string" table:style-name="c1">
            <text:p>2026-05-10 08:45</text:p>
          </table:table-cell>
          <table:table-cell office:value-type="float" office:value="58.51073" table:style-name="c1">
            <text:p>58.511</text:p>
          </table:table-cell>
          <table:table-cell office:value-type="float" office:value="-0.6052711880946471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59.489729999999994" table:style-name="c1">
            <text:p>59.49</text:p>
          </table:table-cell>
          <table:table-cell office:value-type="string" table:style-name="c1">
            <text:p>2026-05-10 16:45</text:p>
          </table:table-cell>
          <table:table-cell office:value-type="float" office:value="59.420275000000004" table:style-name="c1">
            <text:p>59.42</text:p>
          </table:table-cell>
          <table:table-cell office:value-type="float" office:value="-0.31641785855305304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59.68982999999999" table:style-name="c1">
            <text:p>59.69</text:p>
          </table:table-cell>
          <table:table-cell office:value-type="string" table:style-name="c1">
            <text:p>2026-05-10 23:00</text:p>
          </table:table-cell>
          <table:table-cell office:value-type="float" office:value="59.930020000000006" table:style-name="c1">
            <text:p>59.93</text:p>
          </table:table-cell>
          <table:table-cell office:value-type="float" office:value="0.20169246590249212" table:style-name="c11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58.90944" table:style-name="c1">
            <text:p>58.909</text:p>
          </table:table-cell>
          <table:table-cell office:value-type="string" table:style-name="c1">
            <text:p>2026-05-13 10:15</text:p>
          </table:table-cell>
          <table:table-cell office:value-type="float" office:value="58.71063" table:style-name="c1">
            <text:p>58.711</text:p>
          </table:table-cell>
          <table:table-cell office:value-type="float" office:value="-0.5367094804669681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15</text:p>
          </table:table-cell>
          <table:table-cell office:value-type="float" office:value="58.81939499999999" table:style-name="c1">
            <text:p>58.819</text:p>
          </table:table-cell>
          <table:table-cell office:value-type="string" table:style-name="c1">
            <text:p>2026-05-14 18:45</text:p>
          </table:table-cell>
          <table:table-cell office:value-type="float" office:value="58.83057" table:style-name="c1">
            <text:p>58.831</text:p>
          </table:table-cell>
          <table:table-cell office:value-type="float" office:value="-0.18093914333868755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9:00</text:p>
          </table:table-cell>
          <table:table-cell office:value-type="float" office:value="59.2296" table:style-name="c1">
            <text:p>59.23</text:p>
          </table:table-cell>
          <table:table-cell office:value-type="string" table:style-name="c1">
            <text:p>2026-05-14 19:30</text:p>
          </table:table-cell>
          <table:table-cell office:value-type="float" office:value="58.9705" table:style-name="c1">
            <text:p>58.971</text:p>
          </table:table-cell>
          <table:table-cell office:value-type="float" office:value="-0.6364757308845448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7:15</text:p>
          </table:table-cell>
          <table:table-cell office:value-type="float" office:value="58.18907999999999" table:style-name="c1">
            <text:p>58.189</text:p>
          </table:table-cell>
          <table:table-cell office:value-type="string" table:style-name="c1">
            <text:p>2026-05-15 07:45</text:p>
          </table:table-cell>
          <table:table-cell office:value-type="float" office:value="58.27085" table:style-name="c1">
            <text:p>58.271</text:p>
          </table:table-cell>
          <table:table-cell office:value-type="float" office:value="-0.05965626050453698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54.417195" table:style-name="c1">
            <text:p>54.417</text:p>
          </table:table-cell>
          <table:table-cell office:value-type="string" table:style-name="c1">
            <text:p>2026-05-22 18:15</text:p>
          </table:table-cell>
          <table:table-cell office:value-type="float" office:value="54.042965" table:style-name="c1">
            <text:p>54.043</text:p>
          </table:table-cell>
          <table:table-cell office:value-type="float" office:value="-0.886230697916357" table:style-name="c12">
            <text:p>-0.9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0.09534764999999999" table:style-name="c8">
            <text:p>0.095348</text:p>
          </table:table-cell>
          <table:table-cell office:value-type="string" table:style-name="c8">
            <text:p>2026-03-03 16:15</text:p>
          </table:table-cell>
          <table:table-cell office:value-type="float" office:value="0.09675160000000001" table:style-name="c8">
            <text:p>0.096752</text:p>
          </table:table-cell>
          <table:table-cell office:value-type="float" office:value="1.2696102647522078" table:style-name="c10">
            <text:p>+1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0.09894945" table:style-name="c8">
            <text:p>0.098949</text:p>
          </table:table-cell>
          <table:table-cell office:value-type="string" table:style-name="c8">
            <text:p>2026-03-04 10:15</text:p>
          </table:table-cell>
          <table:table-cell office:value-type="float" office:value="0.0981509" table:style-name="c8">
            <text:p>0.098151</text:p>
          </table:table-cell>
          <table:table-cell office:value-type="float" office:value="-1.005314985682082" table:style-name="c9">
            <text:p>-1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0.10005" table:style-name="c8">
            <text:p>0.10005</text:p>
          </table:table-cell>
          <table:table-cell office:value-type="string" table:style-name="c8">
            <text:p>2026-03-04 16:00</text:p>
          </table:table-cell>
          <table:table-cell office:value-type="float" office:value="0.10084955000000001" table:style-name="c8">
            <text:p>0.10085</text:p>
          </table:table-cell>
          <table:table-cell office:value-type="float" office:value="0.5976529230884653" table:style-name="c10">
            <text:p>+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15</text:p>
          </table:table-cell>
          <table:table-cell office:value-type="float" office:value="0.10095045" table:style-name="c8">
            <text:p>0.10095</text:p>
          </table:table-cell>
          <table:table-cell office:value-type="string" table:style-name="c8">
            <text:p>2026-03-04 19:45</text:p>
          </table:table-cell>
          <table:table-cell office:value-type="float" office:value="0.10104945" table:style-name="c8">
            <text:p>0.10105</text:p>
          </table:table-cell>
          <table:table-cell office:value-type="float" office:value="-0.10202812424312535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9:15</text:p>
          </table:table-cell>
          <table:table-cell office:value-type="float" office:value="0.0976488" table:style-name="c8">
            <text:p>0.097649</text:p>
          </table:table-cell>
          <table:table-cell office:value-type="string" table:style-name="c8">
            <text:p>2026-03-05 19:45</text:p>
          </table:table-cell>
          <table:table-cell office:value-type="float" office:value="0.09705145000000001" table:style-name="c8">
            <text:p>0.097051</text:p>
          </table:table-cell>
          <table:table-cell office:value-type="float" office:value="-0.8104102134895319" table:style-name="c9">
            <text:p>-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0.0942471" table:style-name="c8">
            <text:p>0.094247</text:p>
          </table:table-cell>
          <table:table-cell office:value-type="string" table:style-name="c8">
            <text:p>2026-03-10 15:30</text:p>
          </table:table-cell>
          <table:table-cell office:value-type="float" office:value="0.09315340000000001" table:style-name="c8">
            <text:p>0.093153</text:p>
          </table:table-cell>
          <table:table-cell office:value-type="float" office:value="-1.358040349888734" table:style-name="c9">
            <text:p>-1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2:15</text:p>
          </table:table-cell>
          <table:table-cell office:value-type="float" office:value="0.09244619999999999" table:style-name="c8">
            <text:p>0.092446</text:p>
          </table:table-cell>
          <table:table-cell office:value-type="string" table:style-name="c8">
            <text:p>2026-03-11 12:45</text:p>
          </table:table-cell>
          <table:table-cell office:value-type="float" office:value="0.09285355" table:style-name="c8">
            <text:p>0.092854</text:p>
          </table:table-cell>
          <table:table-cell office:value-type="float" office:value="0.23985383233708912" table:style-name="c10">
            <text:p>+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30</text:p>
          </table:table-cell>
          <table:table-cell office:value-type="float" office:value="0.0934467" table:style-name="c8">
            <text:p>0.093447</text:p>
          </table:table-cell>
          <table:table-cell office:value-type="string" table:style-name="c8">
            <text:p>2026-03-11 14:00</text:p>
          </table:table-cell>
          <table:table-cell office:value-type="float" office:value="0.09285355" table:style-name="c8">
            <text:p>0.092854</text:p>
          </table:table-cell>
          <table:table-cell office:value-type="float" office:value="-0.8333780074095465" table:style-name="c9">
            <text:p>-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0.09334664999999999" table:style-name="c8">
            <text:p>0.093347</text:p>
          </table:table-cell>
          <table:table-cell office:value-type="string" table:style-name="c8">
            <text:p>2026-03-13 01:00</text:p>
          </table:table-cell>
          <table:table-cell office:value-type="float" office:value="0.09285355" table:style-name="c8">
            <text:p>0.092854</text:p>
          </table:table-cell>
          <table:table-cell office:value-type="float" office:value="-0.7270900953060266" table:style-name="c9">
            <text:p>-0.7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45</text:p>
          </table:table-cell>
          <table:table-cell office:value-type="float" office:value="0.0954477" table:style-name="c8">
            <text:p>0.095448</text:p>
          </table:table-cell>
          <table:table-cell office:value-type="string" table:style-name="c8">
            <text:p>2026-03-13 14:15</text:p>
          </table:table-cell>
          <table:table-cell office:value-type="float" office:value="0.09515240000000001" table:style-name="c8">
            <text:p>0.095152</text:p>
          </table:table-cell>
          <table:table-cell office:value-type="float" office:value="-0.5086656332210948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04:00</text:p>
          </table:table-cell>
          <table:table-cell office:value-type="float" office:value="0.09274635" table:style-name="c8">
            <text:p>0.092746</text:p>
          </table:table-cell>
          <table:table-cell office:value-type="string" table:style-name="c8">
            <text:p>2026-03-14 04:30</text:p>
          </table:table-cell>
          <table:table-cell office:value-type="float" office:value="0.09245375" table:style-name="c8">
            <text:p>0.092454</text:p>
          </table:table-cell>
          <table:table-cell office:value-type="float" office:value="-0.5147534606483206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0.0944472" table:style-name="c8">
            <text:p>0.094447</text:p>
          </table:table-cell>
          <table:table-cell office:value-type="string" table:style-name="c8">
            <text:p>2026-03-16 04:15</text:p>
          </table:table-cell>
          <table:table-cell office:value-type="float" office:value="0.09485255000000001" table:style-name="c8">
            <text:p>0.094853</text:p>
          </table:table-cell>
          <table:table-cell office:value-type="float" office:value="0.2284236616331592" table:style-name="c10">
            <text:p>+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4:00</text:p>
          </table:table-cell>
          <table:table-cell office:value-type="float" office:value="0.09514755" table:style-name="c8">
            <text:p>0.095148</text:p>
          </table:table-cell>
          <table:table-cell office:value-type="string" table:style-name="c8">
            <text:p>2026-03-16 14:30</text:p>
          </table:table-cell>
          <table:table-cell office:value-type="float" office:value="0.09445275" table:style-name="c8">
            <text:p>0.094453</text:p>
          </table:table-cell>
          <table:table-cell office:value-type="float" office:value="-0.9286745136895203" table:style-name="c9">
            <text:p>-0.9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5:15</text:p>
          </table:table-cell>
          <table:table-cell office:value-type="float" office:value="0.0950475" table:style-name="c8">
            <text:p>0.095047</text:p>
          </table:table-cell>
          <table:table-cell office:value-type="string" table:style-name="c8">
            <text:p>2026-03-16 15:45</text:p>
          </table:table-cell>
          <table:table-cell office:value-type="float" office:value="0.0947526" table:style-name="c8">
            <text:p>0.094753</text:p>
          </table:table-cell>
          <table:table-cell office:value-type="float" office:value="-0.5095456980983015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2:15</text:p>
          </table:table-cell>
          <table:table-cell office:value-type="float" office:value="0.09814905" table:style-name="c8">
            <text:p>0.098149</text:p>
          </table:table-cell>
          <table:table-cell office:value-type="string" table:style-name="c8">
            <text:p>2026-03-16 22:45</text:p>
          </table:table-cell>
          <table:table-cell office:value-type="float" office:value="0.09795100000000001" table:style-name="c8">
            <text:p>0.097951</text:p>
          </table:table-cell>
          <table:table-cell office:value-type="float" office:value="-0.40128157022405464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15</text:p>
          </table:table-cell>
          <table:table-cell office:value-type="float" office:value="0.09824909999999999" table:style-name="c8">
            <text:p>0.098249</text:p>
          </table:table-cell>
          <table:table-cell office:value-type="string" table:style-name="c8">
            <text:p>2026-03-17 00:45</text:p>
          </table:table-cell>
          <table:table-cell office:value-type="float" office:value="0.09785105000000001" table:style-name="c8">
            <text:p>0.097851</text:p>
          </table:table-cell>
          <table:table-cell office:value-type="float" office:value="-0.604233778171992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9:30</text:p>
          </table:table-cell>
          <table:table-cell office:value-type="float" office:value="0.0964482" table:style-name="c8">
            <text:p>0.096448</text:p>
          </table:table-cell>
          <table:table-cell office:value-type="string" table:style-name="c8">
            <text:p>2026-03-17 10:00</text:p>
          </table:table-cell>
          <table:table-cell office:value-type="float" office:value="0.09645175" table:style-name="c8">
            <text:p>0.096452</text:p>
          </table:table-cell>
          <table:table-cell office:value-type="float" office:value="-0.19622662553577808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0:15</text:p>
          </table:table-cell>
          <table:table-cell office:value-type="float" office:value="0.09684839999999999" table:style-name="c8">
            <text:p>0.096848</text:p>
          </table:table-cell>
          <table:table-cell office:value-type="string" table:style-name="c8">
            <text:p>2026-03-17 10:45</text:p>
          </table:table-cell>
          <table:table-cell office:value-type="float" office:value="0.0961519" table:style-name="c8">
            <text:p>0.096152</text:p>
          </table:table-cell>
          <table:table-cell office:value-type="float" office:value="-0.9176275995266714" table:style-name="c9">
            <text:p>-0.9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9:00</text:p>
          </table:table-cell>
          <table:table-cell office:value-type="float" office:value="0.09914954999999999" table:style-name="c8">
            <text:p>0.09915</text:p>
          </table:table-cell>
          <table:table-cell office:value-type="string" table:style-name="c8">
            <text:p>2026-03-18 09:30</text:p>
          </table:table-cell>
          <table:table-cell office:value-type="float" office:value="0.0993503" table:style-name="c8">
            <text:p>0.09935</text:p>
          </table:table-cell>
          <table:table-cell office:value-type="float" office:value="0.0021671810915835366" table:style-name="c10">
            <text:p>+0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8:45</text:p>
          </table:table-cell>
          <table:table-cell office:value-type="float" office:value="0.08854424999999999" table:style-name="c8">
            <text:p>0.088544</text:p>
          </table:table-cell>
          <table:table-cell office:value-type="string" table:style-name="c8">
            <text:p>2026-03-24 09:15</text:p>
          </table:table-cell>
          <table:table-cell office:value-type="float" office:value="0.08765615" table:style-name="c8">
            <text:p>0.087656</text:p>
          </table:table-cell>
          <table:table-cell office:value-type="float" office:value="-1.2008963245495718" table:style-name="c9">
            <text:p>-1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6 00:15</text:p>
          </table:table-cell>
          <table:table-cell office:value-type="float" office:value="0.08944469999999999" table:style-name="c8">
            <text:p>0.089445</text:p>
          </table:table-cell>
          <table:table-cell office:value-type="string" table:style-name="c8">
            <text:p>2026-03-26 00:45</text:p>
          </table:table-cell>
          <table:table-cell office:value-type="float" office:value="0.08905545000000001" table:style-name="c8">
            <text:p>0.089055</text:p>
          </table:table-cell>
          <table:table-cell office:value-type="float" office:value="-0.6342151570187693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00</text:p>
          </table:table-cell>
          <table:table-cell office:value-type="float" office:value="0.0838419" table:style-name="c8">
            <text:p>0.083842</text:p>
          </table:table-cell>
          <table:table-cell office:value-type="string" table:style-name="c8">
            <text:p>2026-03-30 08:30</text:p>
          </table:table-cell>
          <table:table-cell office:value-type="float" office:value="0.08385805" table:style-name="c8">
            <text:p>0.083858</text:p>
          </table:table-cell>
          <table:table-cell office:value-type="float" office:value="-0.18067606047810214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0:45</text:p>
          </table:table-cell>
          <table:table-cell office:value-type="float" office:value="0.0822411" table:style-name="c8">
            <text:p>0.082241</text:p>
          </table:table-cell>
          <table:table-cell office:value-type="string" table:style-name="c8">
            <text:p>2026-03-30 21:15</text:p>
          </table:table-cell>
          <table:table-cell office:value-type="float" office:value="0.08255870000000001" table:style-name="c8">
            <text:p>0.082559</text:p>
          </table:table-cell>
          <table:table-cell office:value-type="float" office:value="0.18550962803272064" table:style-name="c10">
            <text:p>+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1:30</text:p>
          </table:table-cell>
          <table:table-cell office:value-type="float" office:value="0.08294145" table:style-name="c8">
            <text:p>0.082941</text:p>
          </table:table-cell>
          <table:table-cell office:value-type="string" table:style-name="c8">
            <text:p>2026-03-30 22:00</text:p>
          </table:table-cell>
          <table:table-cell office:value-type="float" office:value="0.0827586" table:style-name="c8">
            <text:p>0.082759</text:p>
          </table:table-cell>
          <table:table-cell office:value-type="float" office:value="-0.4199160267875812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2:45</text:p>
          </table:table-cell>
          <table:table-cell office:value-type="float" office:value="0.08234114999999999" table:style-name="c8">
            <text:p>0.082341</text:p>
          </table:table-cell>
          <table:table-cell office:value-type="string" table:style-name="c8">
            <text:p>2026-03-31 13:15</text:p>
          </table:table-cell>
          <table:table-cell office:value-type="float" office:value="0.08245875000000001" table:style-name="c8">
            <text:p>0.082459</text:p>
          </table:table-cell>
          <table:table-cell office:value-type="float" office:value="-0.057365049249347155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20:15</text:p>
          </table:table-cell>
          <table:table-cell office:value-type="float" office:value="0.08414205" table:style-name="c8">
            <text:p>0.084142</text:p>
          </table:table-cell>
          <table:table-cell office:value-type="string" table:style-name="c8">
            <text:p>2026-03-31 20:45</text:p>
          </table:table-cell>
          <table:table-cell office:value-type="float" office:value="0.08425785000000001" table:style-name="c8">
            <text:p>0.084258</text:p>
          </table:table-cell>
          <table:table-cell office:value-type="float" office:value="-0.0625507010466042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21:00</text:p>
          </table:table-cell>
          <table:table-cell office:value-type="float" office:value="0.0848424" table:style-name="c8">
            <text:p>0.084842</text:p>
          </table:table-cell>
          <table:table-cell office:value-type="string" table:style-name="c8">
            <text:p>2026-03-31 21:30</text:p>
          </table:table-cell>
          <table:table-cell office:value-type="float" office:value="0.08415790000000001" table:style-name="c8">
            <text:p>0.084158</text:p>
          </table:table-cell>
          <table:table-cell office:value-type="float" office:value="-1.0050772280133402" table:style-name="c9">
            <text:p>-1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1:00</text:p>
          </table:table-cell>
          <table:table-cell office:value-type="float" office:value="0.086043" table:style-name="c8">
            <text:p>0.086043</text:p>
          </table:table-cell>
          <table:table-cell office:value-type="string" table:style-name="c8">
            <text:p>2026-04-01 01:30</text:p>
          </table:table-cell>
          <table:table-cell office:value-type="float" office:value="0.08605695000000001" table:style-name="c8">
            <text:p>0.086057</text:p>
          </table:table-cell>
          <table:table-cell office:value-type="float" office:value="-0.18371958561415047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2:15</text:p>
          </table:table-cell>
          <table:table-cell office:value-type="float" office:value="0.08654324999999999" table:style-name="c8">
            <text:p>0.086543</text:p>
          </table:table-cell>
          <table:table-cell office:value-type="string" table:style-name="c8">
            <text:p>2026-04-01 02:45</text:p>
          </table:table-cell>
          <table:table-cell office:value-type="float" office:value="0.08605695000000001" table:style-name="c8">
            <text:p>0.086057</text:p>
          </table:table-cell>
          <table:table-cell office:value-type="float" office:value="-0.7606923047724257" table:style-name="c9">
            <text:p>-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6:30</text:p>
          </table:table-cell>
          <table:table-cell office:value-type="float" office:value="0.08714354999999999" table:style-name="c8">
            <text:p>0.087144</text:p>
          </table:table-cell>
          <table:table-cell office:value-type="string" table:style-name="c8">
            <text:p>2026-04-01 07:00</text:p>
          </table:table-cell>
          <table:table-cell office:value-type="float" office:value="0.08705645000000001" table:style-name="c8">
            <text:p>0.087056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7:45</text:p>
          </table:table-cell>
          <table:table-cell office:value-type="float" office:value="0.0870435" table:style-name="c8">
            <text:p>0.087043</text:p>
          </table:table-cell>
          <table:table-cell office:value-type="string" table:style-name="c8">
            <text:p>2026-04-01 08:15</text:p>
          </table:table-cell>
          <table:table-cell office:value-type="float" office:value="0.08715640000000001" table:style-name="c8">
            <text:p>0.087156</text:p>
          </table:table-cell>
          <table:table-cell office:value-type="float" office:value="-0.0704540185079705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30</text:p>
          </table:table-cell>
          <table:table-cell office:value-type="float" office:value="0.08904449999999998" table:style-name="c8">
            <text:p>0.089044</text:p>
          </table:table-cell>
          <table:table-cell office:value-type="string" table:style-name="c8">
            <text:p>2026-04-01 13:00</text:p>
          </table:table-cell>
          <table:table-cell office:value-type="float" office:value="0.08915540000000001" table:style-name="c8">
            <text:p>0.089155</text:p>
          </table:table-cell>
          <table:table-cell office:value-type="float" office:value="-0.07560449505580324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3:30</text:p>
          </table:table-cell>
          <table:table-cell office:value-type="float" office:value="0.09014504999999999" table:style-name="c8">
            <text:p>0.090145</text:p>
          </table:table-cell>
          <table:table-cell office:value-type="string" table:style-name="c8">
            <text:p>2026-04-01 14:00</text:p>
          </table:table-cell>
          <table:table-cell office:value-type="float" office:value="0.08995500000000001" table:style-name="c8">
            <text:p>0.089955</text:p>
          </table:table-cell>
          <table:table-cell office:value-type="float" office:value="-0.41030544106414046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21:30</text:p>
          </table:table-cell>
          <table:table-cell office:value-type="float" office:value="0.0884442" table:style-name="c8">
            <text:p>0.088444</text:p>
          </table:table-cell>
          <table:table-cell office:value-type="string" table:style-name="c8">
            <text:p>2026-04-01 22:00</text:p>
          </table:table-cell>
          <table:table-cell office:value-type="float" office:value="0.08825585000000001" table:style-name="c8">
            <text:p>0.088256</text:p>
          </table:table-cell>
          <table:table-cell office:value-type="float" office:value="-0.4124334259906104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2 08:15</text:p>
          </table:table-cell>
          <table:table-cell office:value-type="float" office:value="0.08624309999999999" table:style-name="c8">
            <text:p>0.086243</text:p>
          </table:table-cell>
          <table:table-cell office:value-type="string" table:style-name="c8">
            <text:p>2026-04-02 08:45</text:p>
          </table:table-cell>
          <table:table-cell office:value-type="float" office:value="0.08585705" table:style-name="c8">
            <text:p>0.085857</text:p>
          </table:table-cell>
          <table:table-cell office:value-type="float" office:value="-0.646635200903023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05:00</text:p>
          </table:table-cell>
          <table:table-cell office:value-type="float" office:value="0.08714354999999999" table:style-name="c8">
            <text:p>0.087144</text:p>
          </table:table-cell>
          <table:table-cell office:value-type="string" table:style-name="c8">
            <text:p>2026-04-03 05:30</text:p>
          </table:table-cell>
          <table:table-cell office:value-type="float" office:value="0.08735630000000001" table:style-name="c8">
            <text:p>0.087356</text:p>
          </table:table-cell>
          <table:table-cell office:value-type="float" office:value="0.04374937250091193" table:style-name="c10">
            <text:p>+0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05:45</text:p>
          </table:table-cell>
          <table:table-cell office:value-type="float" office:value="0.0876438" table:style-name="c8">
            <text:p>0.087644</text:p>
          </table:table-cell>
          <table:table-cell office:value-type="string" table:style-name="c8">
            <text:p>2026-04-03 06:15</text:p>
          </table:table-cell>
          <table:table-cell office:value-type="float" office:value="0.0875562" table:style-name="c8">
            <text:p>0.087556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3:15</text:p>
          </table:table-cell>
          <table:table-cell office:value-type="float" office:value="0.08834415" table:style-name="c8">
            <text:p>0.088344</text:p>
          </table:table-cell>
          <table:table-cell office:value-type="string" table:style-name="c8">
            <text:p>2026-04-04 03:45</text:p>
          </table:table-cell>
          <table:table-cell office:value-type="float" office:value="0.08815590000000001" table:style-name="c8">
            <text:p>0.088156</text:p>
          </table:table-cell>
          <table:table-cell office:value-type="float" office:value="-0.4125611532851625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5:30</text:p>
          </table:table-cell>
          <table:table-cell office:value-type="float" office:value="0.08904449999999998" table:style-name="c8">
            <text:p>0.089044</text:p>
          </table:table-cell>
          <table:table-cell office:value-type="string" table:style-name="c8">
            <text:p>2026-04-04 06:00</text:p>
          </table:table-cell>
          <table:table-cell office:value-type="float" office:value="0.08815590000000001" table:style-name="c8">
            <text:p>0.088156</text:p>
          </table:table-cell>
          <table:table-cell office:value-type="float" office:value="-1.1958331442143755" table:style-name="c9">
            <text:p>-1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15</text:p>
          </table:table-cell>
          <table:table-cell office:value-type="float" office:value="0.08814404999999999" table:style-name="c8">
            <text:p>0.088144</text:p>
          </table:table-cell>
          <table:table-cell office:value-type="string" table:style-name="c8">
            <text:p>2026-04-06 10:45</text:p>
          </table:table-cell>
          <table:table-cell office:value-type="float" office:value="0.08835580000000001" table:style-name="c8">
            <text:p>0.088356</text:p>
          </table:table-cell>
          <table:table-cell office:value-type="float" office:value="0.03985153371102168" table:style-name="c10">
            <text:p>+0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16:15</text:p>
          </table:table-cell>
          <table:table-cell office:value-type="float" office:value="0.08874435" table:style-name="c8">
            <text:p>0.088744</text:p>
          </table:table-cell>
          <table:table-cell office:value-type="string" table:style-name="c8">
            <text:p>2026-04-08 16:45</text:p>
          </table:table-cell>
          <table:table-cell office:value-type="float" office:value="0.0887556" table:style-name="c8">
            <text:p>0.088756</text:p>
          </table:table-cell>
          <table:table-cell office:value-type="float" office:value="-0.18724847767772612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07:15</text:p>
          </table:table-cell>
          <table:table-cell office:value-type="float" office:value="0.09094544999999998" table:style-name="c8">
            <text:p>0.090945</text:p>
          </table:table-cell>
          <table:table-cell office:value-type="string" table:style-name="c8">
            <text:p>2026-04-09 07:45</text:p>
          </table:table-cell>
          <table:table-cell office:value-type="float" office:value="0.09085455" table:style-name="c8">
            <text:p>0.090855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08:45</text:p>
          </table:table-cell>
          <table:table-cell office:value-type="float" office:value="0.09184590000000001" table:style-name="c8">
            <text:p>0.091846</text:p>
          </table:table-cell>
          <table:table-cell office:value-type="string" table:style-name="c8">
            <text:p>2026-04-09 09:15</text:p>
          </table:table-cell>
          <table:table-cell office:value-type="float" office:value="0.09215390000000001" table:style-name="c8">
            <text:p>0.092154</text:p>
          </table:table-cell>
          <table:table-cell office:value-type="float" office:value="0.13477395713907825" table:style-name="c10">
            <text:p>+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6:15</text:p>
          </table:table-cell>
          <table:table-cell office:value-type="float" office:value="0.0874437" table:style-name="c8">
            <text:p>0.087444</text:p>
          </table:table-cell>
          <table:table-cell office:value-type="string" table:style-name="c8">
            <text:p>2026-04-14 16:45</text:p>
          </table:table-cell>
          <table:table-cell office:value-type="float" office:value="0.08725635000000001" table:style-name="c8">
            <text:p>0.087256</text:p>
          </table:table-cell>
          <table:table-cell office:value-type="float" office:value="-0.41372385163251924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5:00</text:p>
          </table:table-cell>
          <table:table-cell office:value-type="float" office:value="0.08834415" table:style-name="c8">
            <text:p>0.088344</text:p>
          </table:table-cell>
          <table:table-cell office:value-type="string" table:style-name="c8">
            <text:p>2026-04-15 15:30</text:p>
          </table:table-cell>
          <table:table-cell office:value-type="float" office:value="0.087956" table:style-name="c8">
            <text:p>0.087956</text:p>
          </table:table-cell>
          <table:table-cell office:value-type="float" office:value="-0.6383830100804677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6:30</text:p>
          </table:table-cell>
          <table:table-cell office:value-type="float" office:value="0.08854424999999999" table:style-name="c8">
            <text:p>0.088544</text:p>
          </table:table-cell>
          <table:table-cell office:value-type="string" table:style-name="c8">
            <text:p>2026-04-15 17:00</text:p>
          </table:table-cell>
          <table:table-cell office:value-type="float" office:value="0.0889555" table:style-name="c8">
            <text:p>0.088956</text:p>
          </table:table-cell>
          <table:table-cell office:value-type="float" office:value="0.2636285874012323" table:style-name="c10">
            <text:p>+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15</text:p>
          </table:table-cell>
          <table:table-cell office:value-type="float" office:value="0.08894445000000001" table:style-name="c8">
            <text:p>0.088944</text:p>
          </table:table-cell>
          <table:table-cell office:value-type="string" table:style-name="c8">
            <text:p>2026-04-15 17:45</text:p>
          </table:table-cell>
          <table:table-cell office:value-type="float" office:value="0.0885557" table:style-name="c8">
            <text:p>0.088556</text:p>
          </table:table-cell>
          <table:table-cell office:value-type="float" office:value="-0.6360968495505048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22:15</text:p>
          </table:table-cell>
          <table:table-cell office:value-type="float" office:value="0.09034515" table:style-name="c8">
            <text:p>0.090345</text:p>
          </table:table-cell>
          <table:table-cell office:value-type="string" table:style-name="c8">
            <text:p>2026-04-15 22:45</text:p>
          </table:table-cell>
          <table:table-cell office:value-type="float" office:value="0.09005495000000001" table:style-name="c8">
            <text:p>0.090055</text:p>
          </table:table-cell>
          <table:table-cell office:value-type="float" office:value="-0.5204704901701773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1:00</text:p>
          </table:table-cell>
          <table:table-cell office:value-type="float" office:value="0.09154575" table:style-name="c8">
            <text:p>0.091546</text:p>
          </table:table-cell>
          <table:table-cell office:value-type="string" table:style-name="c8">
            <text:p>2026-04-16 01:30</text:p>
          </table:table-cell>
          <table:table-cell office:value-type="float" office:value="0.09085455" table:style-name="c8">
            <text:p>0.090855</text:p>
          </table:table-cell>
          <table:table-cell office:value-type="float" office:value="-0.9534230102981156" table:style-name="c9">
            <text:p>-1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15</text:p>
          </table:table-cell>
          <table:table-cell office:value-type="float" office:value="0.0922461" table:style-name="c8">
            <text:p>0.092246</text:p>
          </table:table-cell>
          <table:table-cell office:value-type="string" table:style-name="c8">
            <text:p>2026-04-16 02:45</text:p>
          </table:table-cell>
          <table:table-cell office:value-type="float" office:value="0.0923538" table:style-name="c8">
            <text:p>0.092354</text:p>
          </table:table-cell>
          <table:table-cell office:value-type="float" office:value="-0.0833804856790632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0:00</text:p>
          </table:table-cell>
          <table:table-cell office:value-type="float" office:value="0.0926463" table:style-name="c8">
            <text:p>0.092646</text:p>
          </table:table-cell>
          <table:table-cell office:value-type="string" table:style-name="c8">
            <text:p>2026-04-16 10:30</text:p>
          </table:table-cell>
          <table:table-cell office:value-type="float" office:value="0.09285355" table:style-name="c8">
            <text:p>0.092854</text:p>
          </table:table-cell>
          <table:table-cell office:value-type="float" office:value="0.02335306812037974" table:style-name="c10">
            <text:p>+0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30</text:p>
          </table:table-cell>
          <table:table-cell office:value-type="float" office:value="0.09414705" table:style-name="c8">
            <text:p>0.094147</text:p>
          </table:table-cell>
          <table:table-cell office:value-type="string" table:style-name="c8">
            <text:p>2026-04-16 13:00</text:p>
          </table:table-cell>
          <table:table-cell office:value-type="float" office:value="0.09405295000000001" table:style-name="c8">
            <text:p>0.094053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0.0950475" table:style-name="c8">
            <text:p>0.095047</text:p>
          </table:table-cell>
          <table:table-cell office:value-type="string" table:style-name="c8">
            <text:p>2026-04-16 13:45</text:p>
          </table:table-cell>
          <table:table-cell office:value-type="float" office:value="0.09505245000000001" table:style-name="c8">
            <text:p>0.095052</text:p>
          </table:table-cell>
          <table:table-cell office:value-type="float" office:value="-0.1947024882821724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0.09474735000000001" table:style-name="c8">
            <text:p>0.094747</text:p>
          </table:table-cell>
          <table:table-cell office:value-type="string" table:style-name="c8">
            <text:p>2026-04-16 16:30</text:p>
          </table:table-cell>
          <table:table-cell office:value-type="float" office:value="0.0937531" table:style-name="c8">
            <text:p>0.093753</text:p>
          </table:table-cell>
          <table:table-cell office:value-type="float" office:value="-1.2471720284525034" table:style-name="c9">
            <text:p>-1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7:45</text:p>
          </table:table-cell>
          <table:table-cell office:value-type="float" office:value="0.09494744999999999" table:style-name="c8">
            <text:p>0.094947</text:p>
          </table:table-cell>
          <table:table-cell office:value-type="string" table:style-name="c8">
            <text:p>2026-04-16 18:15</text:p>
          </table:table-cell>
          <table:table-cell office:value-type="float" office:value="0.09425285" table:style-name="c8">
            <text:p>0.094253</text:p>
          </table:table-cell>
          <table:table-cell office:value-type="float" office:value="-0.9300001707786665" table:style-name="c9">
            <text:p>-0.9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9:30</text:p>
          </table:table-cell>
          <table:table-cell office:value-type="float" office:value="0.09594794999999999" table:style-name="c8">
            <text:p>0.095948</text:p>
          </table:table-cell>
          <table:table-cell office:value-type="string" table:style-name="c8">
            <text:p>2026-04-16 20:00</text:p>
          </table:table-cell>
          <table:table-cell office:value-type="float" office:value="0.0957521" table:style-name="c8">
            <text:p>0.095752</text:p>
          </table:table-cell>
          <table:table-cell office:value-type="float" office:value="-0.4036130505133073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00</text:p>
          </table:table-cell>
          <table:table-cell office:value-type="float" office:value="0.09414705" table:style-name="c8">
            <text:p>0.094147</text:p>
          </table:table-cell>
          <table:table-cell office:value-type="string" table:style-name="c8">
            <text:p>2026-04-17 08:30</text:p>
          </table:table-cell>
          <table:table-cell office:value-type="float" office:value="0.09345325" table:style-name="c8">
            <text:p>0.093453</text:p>
          </table:table-cell>
          <table:table-cell office:value-type="float" office:value="-0.9353591501273795" table:style-name="c9">
            <text:p>-0.9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30</text:p>
          </table:table-cell>
          <table:table-cell office:value-type="float" office:value="0.0964482" table:style-name="c8">
            <text:p>0.096448</text:p>
          </table:table-cell>
          <table:table-cell office:value-type="string" table:style-name="c8">
            <text:p>2026-04-17 14:00</text:p>
          </table:table-cell>
          <table:table-cell office:value-type="float" office:value="0.09675160000000001" table:style-name="c8">
            <text:p>0.096752</text:p>
          </table:table-cell>
          <table:table-cell office:value-type="float" office:value="0.11404417251954513" table:style-name="c10">
            <text:p>+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7:15</text:p>
          </table:table-cell>
          <table:table-cell office:value-type="float" office:value="0.09684839999999999" table:style-name="c8">
            <text:p>0.096848</text:p>
          </table:table-cell>
          <table:table-cell office:value-type="string" table:style-name="c8">
            <text:p>2026-04-18 07:45</text:p>
          </table:table-cell>
          <table:table-cell office:value-type="float" office:value="0.09755120000000002" table:style-name="c8">
            <text:p>0.097551</text:p>
          </table:table-cell>
          <table:table-cell office:value-type="float" office:value="0.5243196079646406" table:style-name="c10">
            <text:p>+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8:00</text:p>
          </table:table-cell>
          <table:table-cell office:value-type="float" office:value="0.0976488" table:style-name="c8">
            <text:p>0.097649</text:p>
          </table:table-cell>
          <table:table-cell office:value-type="string" table:style-name="c8">
            <text:p>2026-04-18 08:30</text:p>
          </table:table-cell>
          <table:table-cell office:value-type="float" office:value="0.0963518" table:style-name="c8">
            <text:p>0.096352</text:p>
          </table:table-cell>
          <table:table-cell office:value-type="float" office:value="-1.5254741975323505" table:style-name="c9">
            <text:p>-1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17:45</text:p>
          </table:table-cell>
          <table:table-cell office:value-type="float" office:value="0.09334664999999999" table:style-name="c8">
            <text:p>0.093347</text:p>
          </table:table-cell>
          <table:table-cell office:value-type="string" table:style-name="c8">
            <text:p>2026-04-18 18:15</text:p>
          </table:table-cell>
          <table:table-cell office:value-type="float" office:value="0.09305345000000001" table:style-name="c8">
            <text:p>0.093053</text:p>
          </table:table-cell>
          <table:table-cell office:value-type="float" office:value="-0.513370160096771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3:00</text:p>
          </table:table-cell>
          <table:table-cell office:value-type="float" office:value="0.09334664999999999" table:style-name="c8">
            <text:p>0.093347</text:p>
          </table:table-cell>
          <table:table-cell office:value-type="string" table:style-name="c8">
            <text:p>2026-04-22 03:30</text:p>
          </table:table-cell>
          <table:table-cell office:value-type="float" office:value="0.09305345000000001" table:style-name="c8">
            <text:p>0.093053</text:p>
          </table:table-cell>
          <table:table-cell office:value-type="float" office:value="-0.5133701600967822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45</text:p>
          </table:table-cell>
          <table:table-cell office:value-type="float" office:value="0.09394694999999999" table:style-name="c8">
            <text:p>0.093947</text:p>
          </table:table-cell>
          <table:table-cell office:value-type="string" table:style-name="c8">
            <text:p>2026-04-22 06:15</text:p>
          </table:table-cell>
          <table:table-cell office:value-type="float" office:value="0.09315340000000001" table:style-name="c8">
            <text:p>0.093153</text:p>
          </table:table-cell>
          <table:table-cell office:value-type="float" office:value="-1.0428903190576988" table:style-name="c9">
            <text:p>-1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08:00</text:p>
          </table:table-cell>
          <table:table-cell office:value-type="float" office:value="0.09204599999999999" table:style-name="c8">
            <text:p>0.092046</text:p>
          </table:table-cell>
          <table:table-cell office:value-type="string" table:style-name="c8">
            <text:p>2026-04-24 08:30</text:p>
          </table:table-cell>
          <table:table-cell office:value-type="float" office:value="0.09205395000000001" table:style-name="c8">
            <text:p>0.092054</text:p>
          </table:table-cell>
          <table:table-cell office:value-type="float" office:value="-0.19128027947981074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9:30</text:p>
          </table:table-cell>
          <table:table-cell office:value-type="float" office:value="0.09454725" table:style-name="c8">
            <text:p>0.094547</text:p>
          </table:table-cell>
          <table:table-cell office:value-type="string" table:style-name="c8">
            <text:p>2026-04-24 20:00</text:p>
          </table:table-cell>
          <table:table-cell office:value-type="float" office:value="0.0957521" table:style-name="c8">
            <text:p>0.095752</text:p>
          </table:table-cell>
          <table:table-cell office:value-type="float" office:value="1.071888978367963" table:style-name="c10">
            <text:p>+1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1:30</text:p>
          </table:table-cell>
          <table:table-cell office:value-type="float" office:value="0.09684839999999999" table:style-name="c8">
            <text:p>0.096848</text:p>
          </table:table-cell>
          <table:table-cell office:value-type="string" table:style-name="c8">
            <text:p>2026-04-25 02:00</text:p>
          </table:table-cell>
          <table:table-cell office:value-type="float" office:value="0.0973513" table:style-name="c8">
            <text:p>0.097351</text:p>
          </table:table-cell>
          <table:table-cell office:value-type="float" office:value="0.31832714975159604" table:style-name="c10">
            <text:p>+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5:45</text:p>
          </table:table-cell>
          <table:table-cell office:value-type="float" office:value="0.09874934999999999" table:style-name="c8">
            <text:p>0.098749</text:p>
          </table:table-cell>
          <table:table-cell office:value-type="string" table:style-name="c8">
            <text:p>2026-04-25 06:15</text:p>
          </table:table-cell>
          <table:table-cell office:value-type="float" office:value="0.09995000000000001" table:style-name="c8">
            <text:p>0.09995</text:p>
          </table:table-cell>
          <table:table-cell office:value-type="float" office:value="1.0135256080166855" table:style-name="c10">
            <text:p>+1.0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22:15</text:p>
          </table:table-cell>
          <table:table-cell office:value-type="float" office:value="0.09674834999999998" table:style-name="c8">
            <text:p>0.096748</text:p>
          </table:table-cell>
          <table:table-cell office:value-type="string" table:style-name="c8">
            <text:p>2026-04-25 22:45</text:p>
          </table:table-cell>
          <table:table-cell office:value-type="float" office:value="0.09685155000000001" table:style-name="c8">
            <text:p>0.096852</text:p>
          </table:table-cell>
          <table:table-cell office:value-type="float" office:value="-0.09344474448399476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3:15</text:p>
          </table:table-cell>
          <table:table-cell office:value-type="float" office:value="0.09004499999999999" table:style-name="c8">
            <text:p>0.090045</text:p>
          </table:table-cell>
          <table:table-cell office:value-type="string" table:style-name="c8">
            <text:p>2026-05-05 13:45</text:p>
          </table:table-cell>
          <table:table-cell office:value-type="float" office:value="0.08925535000000001" table:style-name="c8">
            <text:p>0.089255</text:p>
          </table:table-cell>
          <table:table-cell office:value-type="float" office:value="-1.0750973898050908" table:style-name="c9">
            <text:p>-1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0:30</text:p>
          </table:table-cell>
          <table:table-cell office:value-type="float" office:value="0.09044519999999999" table:style-name="c8">
            <text:p>0.090445</text:p>
          </table:table-cell>
          <table:table-cell office:value-type="string" table:style-name="c8">
            <text:p>2026-05-05 21:00</text:p>
          </table:table-cell>
          <table:table-cell office:value-type="float" office:value="0.0905547" table:style-name="c8">
            <text:p>0.090555</text:p>
          </table:table-cell>
          <table:table-cell office:value-type="float" office:value="-0.07907422980986123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1:45</text:p>
          </table:table-cell>
          <table:table-cell office:value-type="float" office:value="0.09114554999999999" table:style-name="c8">
            <text:p>0.091146</text:p>
          </table:table-cell>
          <table:table-cell office:value-type="string" table:style-name="c8">
            <text:p>2026-05-06 02:15</text:p>
          </table:table-cell>
          <table:table-cell office:value-type="float" office:value="0.09095450000000001" table:style-name="c8">
            <text:p>0.090955</text:p>
          </table:table-cell>
          <table:table-cell office:value-type="float" office:value="-0.4090907844650493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30</text:p>
          </table:table-cell>
          <table:table-cell office:value-type="float" office:value="0.0922461" table:style-name="c8">
            <text:p>0.092246</text:p>
          </table:table-cell>
          <table:table-cell office:value-type="string" table:style-name="c8">
            <text:p>2026-05-06 04:00</text:p>
          </table:table-cell>
          <table:table-cell office:value-type="float" office:value="0.09215390000000001" table:style-name="c8">
            <text:p>0.092154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8:45</text:p>
          </table:table-cell>
          <table:table-cell office:value-type="float" office:value="0.0934467" table:style-name="c8">
            <text:p>0.093447</text:p>
          </table:table-cell>
          <table:table-cell office:value-type="string" table:style-name="c8">
            <text:p>2026-05-06 09:15</text:p>
          </table:table-cell>
          <table:table-cell office:value-type="float" office:value="0.0935532" table:style-name="c8">
            <text:p>0.093553</text:p>
          </table:table-cell>
          <table:table-cell office:value-type="float" office:value="-0.08615911187872527" table:style-name="c9">
            <text:p>-0.1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6:45</text:p>
          </table:table-cell>
          <table:table-cell office:value-type="float" office:value="0.09274635" table:style-name="c8">
            <text:p>0.092746</text:p>
          </table:table-cell>
          <table:table-cell office:value-type="string" table:style-name="c8">
            <text:p>2026-05-06 17:15</text:p>
          </table:table-cell>
          <table:table-cell office:value-type="float" office:value="0.09265365" table:style-name="c8">
            <text:p>0.092654</text:p>
          </table:table-cell>
          <table:table-cell office:value-type="float" office:value="-0.299650224887571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1:45</text:p>
          </table:table-cell>
          <table:table-cell office:value-type="float" office:value="0.09274635" table:style-name="c8">
            <text:p>0.092746</text:p>
          </table:table-cell>
          <table:table-cell office:value-type="string" table:style-name="c8">
            <text:p>2026-05-06 22:15</text:p>
          </table:table-cell>
          <table:table-cell office:value-type="float" office:value="0.09225385" table:style-name="c8">
            <text:p>0.092254</text:p>
          </table:table-cell>
          <table:table-cell office:value-type="float" office:value="-0.7298566964090925" table:style-name="c9">
            <text:p>-0.7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8:45</text:p>
          </table:table-cell>
          <table:table-cell office:value-type="float" office:value="0.09234614999999999" table:style-name="c8">
            <text:p>0.092346</text:p>
          </table:table-cell>
          <table:table-cell office:value-type="string" table:style-name="c8">
            <text:p>2026-05-07 19:15</text:p>
          </table:table-cell>
          <table:table-cell office:value-type="float" office:value="0.09195400000000001" table:style-name="c8">
            <text:p>0.091954</text:p>
          </table:table-cell>
          <table:table-cell office:value-type="float" office:value="-0.623703366085071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4:15</text:p>
          </table:table-cell>
          <table:table-cell office:value-type="float" office:value="0.09494744999999999" table:style-name="c8">
            <text:p>0.094947</text:p>
          </table:table-cell>
          <table:table-cell office:value-type="string" table:style-name="c8">
            <text:p>2026-05-08 14:45</text:p>
          </table:table-cell>
          <table:table-cell office:value-type="float" office:value="0.09585205000000001" table:style-name="c8">
            <text:p>0.095852</text:p>
          </table:table-cell>
          <table:table-cell office:value-type="float" office:value="0.7509330182643437" table:style-name="c10">
            <text:p>+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6:30</text:p>
          </table:table-cell>
          <table:table-cell office:value-type="float" office:value="0.0956478" table:style-name="c8">
            <text:p>0.095648</text:p>
          </table:table-cell>
          <table:table-cell office:value-type="string" table:style-name="c8">
            <text:p>2026-05-08 17:00</text:p>
          </table:table-cell>
          <table:table-cell office:value-type="float" office:value="0.09545225" table:style-name="c8">
            <text:p>0.095452</text:p>
          </table:table-cell>
          <table:table-cell office:value-type="float" office:value="-0.40393929368998105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8:30</text:p>
          </table:table-cell>
          <table:table-cell office:value-type="float" office:value="0.0966483" table:style-name="c8">
            <text:p>0.096648</text:p>
          </table:table-cell>
          <table:table-cell office:value-type="string" table:style-name="c8">
            <text:p>2026-05-08 19:00</text:p>
          </table:table-cell>
          <table:table-cell office:value-type="float" office:value="0.09645175" table:style-name="c8">
            <text:p>0.096452</text:p>
          </table:table-cell>
          <table:table-cell office:value-type="float" office:value="-0.40285969670444954" table:style-name="c9">
            <text:p>-0.4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1:30</text:p>
          </table:table-cell>
          <table:table-cell office:value-type="float" office:value="0.0976488" table:style-name="c8">
            <text:p>0.097649</text:p>
          </table:table-cell>
          <table:table-cell office:value-type="string" table:style-name="c8">
            <text:p>2026-05-08 22:00</text:p>
          </table:table-cell>
          <table:table-cell office:value-type="float" office:value="0.09755120000000002" table:style-name="c8">
            <text:p>0.09755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1:30</text:p>
          </table:table-cell>
          <table:table-cell office:value-type="float" office:value="0.09894945" table:style-name="c8">
            <text:p>0.098949</text:p>
          </table:table-cell>
          <table:table-cell office:value-type="string" table:style-name="c8">
            <text:p>2026-05-09 02:00</text:p>
          </table:table-cell>
          <table:table-cell office:value-type="float" office:value="0.09895050000000001" table:style-name="c8">
            <text:p>0.098951</text:p>
          </table:table-cell>
          <table:table-cell office:value-type="float" office:value="-0.19884097334545991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8:00</text:p>
          </table:table-cell>
          <table:table-cell office:value-type="float" office:value="0.09694844999999999" table:style-name="c8">
            <text:p>0.096948</text:p>
          </table:table-cell>
          <table:table-cell office:value-type="string" table:style-name="c8">
            <text:p>2026-05-09 18:30</text:p>
          </table:table-cell>
          <table:table-cell office:value-type="float" office:value="0.09695150000000001" table:style-name="c8">
            <text:p>0.096952</text:p>
          </table:table-cell>
          <table:table-cell office:value-type="float" office:value="-0.19676028703913273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8:45</text:p>
          </table:table-cell>
          <table:table-cell office:value-type="float" office:value="0.09714855" table:style-name="c8">
            <text:p>0.097149</text:p>
          </table:table-cell>
          <table:table-cell office:value-type="string" table:style-name="c8">
            <text:p>2026-05-09 19:15</text:p>
          </table:table-cell>
          <table:table-cell office:value-type="float" office:value="0.0965517" table:style-name="c8">
            <text:p>0.096552</text:p>
          </table:table-cell>
          <table:table-cell office:value-type="float" office:value="-0.8130402855215046" table:style-name="c9">
            <text:p>-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6:00</text:p>
          </table:table-cell>
          <table:table-cell office:value-type="float" office:value="0.09754875" table:style-name="c8">
            <text:p>0.097549</text:p>
          </table:table-cell>
          <table:table-cell office:value-type="string" table:style-name="c8">
            <text:p>2026-05-10 06:30</text:p>
          </table:table-cell>
          <table:table-cell office:value-type="float" office:value="0.09695150000000001" table:style-name="c8">
            <text:p>0.096952</text:p>
          </table:table-cell>
          <table:table-cell office:value-type="float" office:value="-0.8109340698881251" table:style-name="c9">
            <text:p>-0.8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1:15</text:p>
          </table:table-cell>
          <table:table-cell office:value-type="float" office:value="0.09884939999999999" table:style-name="c8">
            <text:p>0.098849</text:p>
          </table:table-cell>
          <table:table-cell office:value-type="string" table:style-name="c8">
            <text:p>2026-05-10 11:45</text:p>
          </table:table-cell>
          <table:table-cell office:value-type="float" office:value="0.0985507" table:style-name="c8">
            <text:p>0.098551</text:p>
          </table:table-cell>
          <table:table-cell office:value-type="float" office:value="-0.5014727952825093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15</text:p>
          </table:table-cell>
          <table:table-cell office:value-type="float" office:value="0.1010505" table:style-name="c8">
            <text:p>0.10105</text:p>
          </table:table-cell>
          <table:table-cell office:value-type="string" table:style-name="c8">
            <text:p>2026-05-10 16:45</text:p>
          </table:table-cell>
          <table:table-cell office:value-type="float" office:value="0.1015492" table:style-name="c8">
            <text:p>0.10155</text:p>
          </table:table-cell>
          <table:table-cell office:value-type="float" office:value="0.2926290807071741" table:style-name="c10">
            <text:p>+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5:45</text:p>
          </table:table-cell>
          <table:table-cell office:value-type="float" office:value="0.09974984999999999" table:style-name="c8">
            <text:p>0.09975</text:p>
          </table:table-cell>
          <table:table-cell office:value-type="string" table:style-name="c8">
            <text:p>2026-05-11 06:15</text:p>
          </table:table-cell>
          <table:table-cell office:value-type="float" office:value="0.1005497" table:style-name="c8">
            <text:p>0.10055</text:p>
          </table:table-cell>
          <table:table-cell office:value-type="float" office:value="0.6003529325608215" table:style-name="c10">
            <text:p>+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6:30</text:p>
          </table:table-cell>
          <table:table-cell office:value-type="float" office:value="0.10035015" table:style-name="c8">
            <text:p>0.10035</text:p>
          </table:table-cell>
          <table:table-cell office:value-type="string" table:style-name="c8">
            <text:p>2026-05-11 07:00</text:p>
          </table:table-cell>
          <table:table-cell office:value-type="float" office:value="0.10004995" table:style-name="c8">
            <text:p>0.10005</text:p>
          </table:table-cell>
          <table:table-cell office:value-type="float" office:value="-0.49845451157771725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05:00</text:p>
          </table:table-cell>
          <table:table-cell office:value-type="float" office:value="0.09984989999999999" table:style-name="c8">
            <text:p>0.09985</text:p>
          </table:table-cell>
          <table:table-cell office:value-type="string" table:style-name="c8">
            <text:p>2026-05-12 05:30</text:p>
          </table:table-cell>
          <table:table-cell office:value-type="float" office:value="0.10064965000000001" table:style-name="c8">
            <text:p>0.10065</text:p>
          </table:table-cell>
          <table:table-cell office:value-type="float" office:value="0.5994511257898294" table:style-name="c10">
            <text:p>+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05:45</text:p>
          </table:table-cell>
          <table:table-cell office:value-type="float" office:value="0.1010505" table:style-name="c8">
            <text:p>0.10105</text:p>
          </table:table-cell>
          <table:table-cell office:value-type="string" table:style-name="c8">
            <text:p>2026-05-12 06:15</text:p>
          </table:table-cell>
          <table:table-cell office:value-type="float" office:value="0.10094950000000001" table:style-name="c8">
            <text:p>0.10095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8:00</text:p>
          </table:table-cell>
          <table:table-cell office:value-type="float" office:value="0.10015004999999999" table:style-name="c8">
            <text:p>0.10015</text:p>
          </table:table-cell>
          <table:table-cell office:value-type="string" table:style-name="c8">
            <text:p>2026-05-13 08:30</text:p>
          </table:table-cell>
          <table:table-cell office:value-type="float" office:value="0.09975010000000001" table:style-name="c8">
            <text:p>0.09975</text:p>
          </table:table-cell>
          <table:table-cell office:value-type="float" office:value="-0.5984524719657935" table:style-name="c9">
            <text:p>-0.6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9:30</text:p>
          </table:table-cell>
          <table:table-cell office:value-type="float" office:value="0.10065029999999998" table:style-name="c8">
            <text:p>0.10065</text:p>
          </table:table-cell>
          <table:table-cell office:value-type="string" table:style-name="c8">
            <text:p>2026-05-13 10:00</text:p>
          </table:table-cell>
          <table:table-cell office:value-type="float" office:value="0.10064965000000001" table:style-name="c8">
            <text:p>0.10065</text:p>
          </table:table-cell>
          <table:table-cell office:value-type="float" office:value="-0.20054450940530932" table:style-name="c9">
            <text:p>-0.2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07:00</text:p>
          </table:table-cell>
          <table:table-cell office:value-type="float" office:value="0.09034515" table:style-name="c8">
            <text:p>0.090345</text:p>
          </table:table-cell>
          <table:table-cell office:value-type="string" table:style-name="c8">
            <text:p>2026-05-20 07:30</text:p>
          </table:table-cell>
          <table:table-cell office:value-type="float" office:value="0.09005495000000001" table:style-name="c8">
            <text:p>0.090055</text:p>
          </table:table-cell>
          <table:table-cell office:value-type="float" office:value="-0.5204704901701884" table:style-name="c9">
            <text:p>-0.5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2:30</text:p>
          </table:table-cell>
          <table:table-cell office:value-type="float" office:value="0.08974485" table:style-name="c8">
            <text:p>0.089745</text:p>
          </table:table-cell>
          <table:table-cell office:value-type="string" table:style-name="c8">
            <text:p>2026-05-21 03:00</text:p>
          </table:table-cell>
          <table:table-cell office:value-type="float" office:value="0.08925535000000001" table:style-name="c8">
            <text:p>0.089255</text:p>
          </table:table-cell>
          <table:table-cell office:value-type="float" office:value="-0.7442448727141393" table:style-name="c9">
            <text:p>-0.7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13:00</text:p>
          </table:table-cell>
          <table:table-cell office:value-type="float" office:value="0.0902451" table:style-name="c8">
            <text:p>0.090245</text:p>
          </table:table-cell>
          <table:table-cell office:value-type="string" table:style-name="c8">
            <text:p>2026-05-22 13:30</text:p>
          </table:table-cell>
          <table:table-cell office:value-type="float" office:value="0.0897551" table:style-name="c8">
            <text:p>0.089755</text:p>
          </table:table-cell>
          <table:table-cell office:value-type="float" office:value="-0.7417803791008981" table:style-name="c9">
            <text:p>-0.7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2:15</text:p>
          </table:table-cell>
          <table:table-cell office:value-type="float" office:value="0.08664329999999999" table:style-name="c8">
            <text:p>0.086643</text:p>
          </table:table-cell>
          <table:table-cell office:value-type="string" table:style-name="c8">
            <text:p>2026-05-30 02:45</text:p>
          </table:table-cell>
          <table:table-cell office:value-type="float" office:value="0.08705645000000001" table:style-name="c8">
            <text:p>0.087056</text:p>
          </table:table-cell>
          <table:table-cell office:value-type="float" office:value="0.27598689852534886" table:style-name="c10">
            <text:p>+0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3:15</text:p>
          </table:table-cell>
          <table:table-cell office:value-type="float" office:value="0.0874437" table:style-name="c8">
            <text:p>0.087444</text:p>
          </table:table-cell>
          <table:table-cell office:value-type="string" table:style-name="c8">
            <text:p>2026-05-30 03:45</text:p>
          </table:table-cell>
          <table:table-cell office:value-type="float" office:value="0.08645675" table:style-name="c8">
            <text:p>0.086457</text:p>
          </table:table-cell>
          <table:table-cell office:value-type="float" office:value="-1.3263128655923606" table:style-name="c9">
            <text:p>-1.3</text:p>
          </table:table-cell>
        </table:table-row>
        <table:table-row>
          <table:table-cell office:value-type="string" table:style-name="c7">
            <text:p>MAN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1 02:15</text:p>
          </table:table-cell>
          <table:table-cell office:value-type="float" office:value="0.0854427" table:style-name="c8">
            <text:p>0.085443</text:p>
          </table:table-cell>
          <table:table-cell office:value-type="string" table:style-name="c8">
            <text:p>2026-05-31 02:45</text:p>
          </table:table-cell>
          <table:table-cell office:value-type="float" office:value="0.0847576" table:style-name="c8">
            <text:p>0.084758</text:p>
          </table:table-cell>
          <table:table-cell office:value-type="float" office:value="-1.0001210663988847" table:style-name="c9">
            <text:p>-1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328664" table:style-name="c1">
            <text:p>1.3287</text:p>
          </table:table-cell>
          <table:table-cell office:value-type="string" table:style-name="c1">
            <text:p>2026-03-10 15:30</text:p>
          </table:table-cell>
          <table:table-cell office:value-type="float" office:value="1.3073460000000001" table:style-name="c1">
            <text:p>1.3073</text:p>
          </table:table-cell>
          <table:table-cell office:value-type="float" office:value="-1.8011615166814154" table:style-name="c12">
            <text:p>-1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1:15</text:p>
          </table:table-cell>
          <table:table-cell office:value-type="float" office:value="1.298649" table:style-name="c1">
            <text:p>1.2986</text:p>
          </table:table-cell>
          <table:table-cell office:value-type="string" table:style-name="c1">
            <text:p>2026-03-11 01:45</text:p>
          </table:table-cell>
          <table:table-cell office:value-type="float" office:value="1.2823585" table:style-name="c1">
            <text:p>1.2824</text:p>
          </table:table-cell>
          <table:table-cell office:value-type="float" office:value="-1.451811431841854" table:style-name="c12">
            <text:p>-1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7:45</text:p>
          </table:table-cell>
          <table:table-cell office:value-type="float" office:value="1.338669" table:style-name="c1">
            <text:p>1.3387</text:p>
          </table:table-cell>
          <table:table-cell office:value-type="string" table:style-name="c1">
            <text:p>2026-03-12 18:15</text:p>
          </table:table-cell>
          <table:table-cell office:value-type="float" office:value="1.3453270000000002" table:style-name="c1">
            <text:p>1.3453</text:p>
          </table:table-cell>
          <table:table-cell office:value-type="float" office:value="0.2964654688350832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1:45</text:p>
          </table:table-cell>
          <table:table-cell office:value-type="float" office:value="1.3516754999999998" table:style-name="c1">
            <text:p>1.3517</text:p>
          </table:table-cell>
          <table:table-cell office:value-type="string" table:style-name="c1">
            <text:p>2026-03-12 22:15</text:p>
          </table:table-cell>
          <table:table-cell office:value-type="float" office:value="1.3573210000000002" table:style-name="c1">
            <text:p>1.3573</text:p>
          </table:table-cell>
          <table:table-cell office:value-type="float" office:value="0.21693189829961046" table:style-name="c11">
            <text:p>+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1.382691" table:style-name="c1">
            <text:p>1.3827</text:p>
          </table:table-cell>
          <table:table-cell office:value-type="string" table:style-name="c1">
            <text:p>2026-03-13 01:00</text:p>
          </table:table-cell>
          <table:table-cell office:value-type="float" office:value="1.383308" table:style-name="c1">
            <text:p>1.3833</text:p>
          </table:table-cell>
          <table:table-cell office:value-type="float" office:value="-0.15536607181214634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1.352676" table:style-name="c1">
            <text:p>1.3527</text:p>
          </table:table-cell>
          <table:table-cell office:value-type="string" table:style-name="c1">
            <text:p>2026-03-13 11:00</text:p>
          </table:table-cell>
          <table:table-cell office:value-type="float" office:value="1.3473260000000002" table:style-name="c1">
            <text:p>1.3473</text:p>
          </table:table-cell>
          <table:table-cell office:value-type="float" office:value="-0.5946216739263432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30</text:p>
          </table:table-cell>
          <table:table-cell office:value-type="float" office:value="1.3516754999999998" table:style-name="c1">
            <text:p>1.3517</text:p>
          </table:table-cell>
          <table:table-cell office:value-type="string" table:style-name="c1">
            <text:p>2026-03-15 10:00</text:p>
          </table:table-cell>
          <table:table-cell office:value-type="float" office:value="1.3483255" table:style-name="c1">
            <text:p>1.3483</text:p>
          </table:table-cell>
          <table:table-cell office:value-type="float" office:value="-0.44724511722671334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2:30</text:p>
          </table:table-cell>
          <table:table-cell office:value-type="float" office:value="1.3556774999999999" table:style-name="c1">
            <text:p>1.3557</text:p>
          </table:table-cell>
          <table:table-cell office:value-type="string" table:style-name="c1">
            <text:p>2026-03-15 13:00</text:p>
          </table:table-cell>
          <table:table-cell office:value-type="float" office:value="1.3553220000000001" table:style-name="c1">
            <text:p>1.3553</text:p>
          </table:table-cell>
          <table:table-cell office:value-type="float" office:value="-0.2260706309575755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.3816905" table:style-name="c1">
            <text:p>1.3817</text:p>
          </table:table-cell>
          <table:table-cell office:value-type="string" table:style-name="c1">
            <text:p>2026-03-16 04:00</text:p>
          </table:table-cell>
          <table:table-cell office:value-type="float" office:value="1.389305" table:style-name="c1">
            <text:p>1.3893</text:p>
          </table:table-cell>
          <table:table-cell office:value-type="float" office:value="0.35009861506611895" table:style-name="c11">
            <text:p>+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30</text:p>
          </table:table-cell>
          <table:table-cell office:value-type="float" office:value="1.4127059999999998" table:style-name="c1">
            <text:p>1.4127</text:p>
          </table:table-cell>
          <table:table-cell office:value-type="string" table:style-name="c1">
            <text:p>2026-03-16 14:00</text:p>
          </table:table-cell>
          <table:table-cell office:value-type="float" office:value="1.431284" table:style-name="c1">
            <text:p>1.4313</text:p>
          </table:table-cell>
          <table:table-cell office:value-type="float" office:value="1.1125360325503042" table:style-name="c11">
            <text:p>+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15</text:p>
          </table:table-cell>
          <table:table-cell office:value-type="float" office:value="1.4287139999999998" table:style-name="c1">
            <text:p>1.4287</text:p>
          </table:table-cell>
          <table:table-cell office:value-type="string" table:style-name="c1">
            <text:p>2026-03-16 14:45</text:p>
          </table:table-cell>
          <table:table-cell office:value-type="float" office:value="1.411294" table:style-name="c1">
            <text:p>1.4113</text:p>
          </table:table-cell>
          <table:table-cell office:value-type="float" office:value="-1.4167409786703167" table:style-name="c12">
            <text:p>-1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1.4397195" table:style-name="c1">
            <text:p>1.4397</text:p>
          </table:table-cell>
          <table:table-cell office:value-type="string" table:style-name="c1">
            <text:p>2026-03-16 17:00</text:p>
          </table:table-cell>
          <table:table-cell office:value-type="float" office:value="1.4392800000000001" table:style-name="c1">
            <text:p>1.4393</text:p>
          </table:table-cell>
          <table:table-cell office:value-type="float" office:value="-0.23036575666300907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0:30</text:p>
          </table:table-cell>
          <table:table-cell office:value-type="float" office:value="1.458729" table:style-name="c1">
            <text:p>1.4587</text:p>
          </table:table-cell>
          <table:table-cell office:value-type="string" table:style-name="c1">
            <text:p>2026-03-16 21:00</text:p>
          </table:table-cell>
          <table:table-cell office:value-type="float" office:value="1.463268" table:style-name="c1">
            <text:p>1.4633</text:p>
          </table:table-cell>
          <table:table-cell office:value-type="float" office:value="0.11063928035981441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1.4817405" table:style-name="c1">
            <text:p>1.4817</text:p>
          </table:table-cell>
          <table:table-cell office:value-type="string" table:style-name="c1">
            <text:p>2026-03-16 21:45</text:p>
          </table:table-cell>
          <table:table-cell office:value-type="float" office:value="1.47926" table:style-name="c1">
            <text:p>1.4793</text:p>
          </table:table-cell>
          <table:table-cell office:value-type="float" office:value="-0.36696983986062026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15</text:p>
          </table:table-cell>
          <table:table-cell office:value-type="float" office:value="1.4627309999999998" table:style-name="c1">
            <text:p>1.4627</text:p>
          </table:table-cell>
          <table:table-cell office:value-type="string" table:style-name="c1">
            <text:p>2026-03-17 07:45</text:p>
          </table:table-cell>
          <table:table-cell office:value-type="float" office:value="1.463268" table:style-name="c1">
            <text:p>1.4633</text:p>
          </table:table-cell>
          <table:table-cell office:value-type="float" office:value="-0.1632612375070841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00</text:p>
          </table:table-cell>
          <table:table-cell office:value-type="float" office:value="1.4627309999999998" table:style-name="c1">
            <text:p>1.4627</text:p>
          </table:table-cell>
          <table:table-cell office:value-type="string" table:style-name="c1">
            <text:p>2026-03-17 08:30</text:p>
          </table:table-cell>
          <table:table-cell office:value-type="float" office:value="1.4662665000000001" table:style-name="c1">
            <text:p>1.4663</text:p>
          </table:table-cell>
          <table:table-cell office:value-type="float" office:value="0.041322243563612915" table:style-name="c11">
            <text:p>+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1:00</text:p>
          </table:table-cell>
          <table:table-cell office:value-type="float" office:value="1.322661" table:style-name="c1">
            <text:p>1.3227</text:p>
          </table:table-cell>
          <table:table-cell office:value-type="string" table:style-name="c1">
            <text:p>2026-03-23 21:30</text:p>
          </table:table-cell>
          <table:table-cell office:value-type="float" office:value="1.3203395" table:style-name="c1">
            <text:p>1.3203</text:p>
          </table:table-cell>
          <table:table-cell office:value-type="float" office:value="-0.3750665257764574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30</text:p>
          </table:table-cell>
          <table:table-cell office:value-type="float" office:value="1.214607" table:style-name="c1">
            <text:p>1.2146</text:p>
          </table:table-cell>
          <table:table-cell office:value-type="string" table:style-name="c1">
            <text:p>2026-03-30 09:00</text:p>
          </table:table-cell>
          <table:table-cell office:value-type="float" office:value="1.2203895000000002" table:style-name="c1">
            <text:p>1.2204</text:p>
          </table:table-cell>
          <table:table-cell office:value-type="float" office:value="0.27522823345329517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9:15</text:p>
          </table:table-cell>
          <table:table-cell office:value-type="float" office:value="1.2126059999999999" table:style-name="c1">
            <text:p>1.2126</text:p>
          </table:table-cell>
          <table:table-cell office:value-type="string" table:style-name="c1">
            <text:p>2026-03-30 09:45</text:p>
          </table:table-cell>
          <table:table-cell office:value-type="float" office:value="1.205397" table:style-name="c1">
            <text:p>1.2054</text:p>
          </table:table-cell>
          <table:table-cell office:value-type="float" office:value="-0.7932163128831493" table:style-name="c12">
            <text:p>-0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30</text:p>
          </table:table-cell>
          <table:table-cell office:value-type="float" office:value="1.1965979999999998" table:style-name="c1">
            <text:p>1.1966</text:p>
          </table:table-cell>
          <table:table-cell office:value-type="string" table:style-name="c1">
            <text:p>2026-03-31 15:00</text:p>
          </table:table-cell>
          <table:table-cell office:value-type="float" office:value="1.1764115000000002" table:style-name="c1">
            <text:p>1.1764</text:p>
          </table:table-cell>
          <table:table-cell office:value-type="float" office:value="-1.883518657769756" table:style-name="c12">
            <text:p>-1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1.2026009999999998" table:style-name="c1">
            <text:p>1.2026</text:p>
          </table:table-cell>
          <table:table-cell office:value-type="string" table:style-name="c1">
            <text:p>2026-03-31 17:45</text:p>
          </table:table-cell>
          <table:table-cell office:value-type="float" office:value="1.1864065000000001" table:style-name="c1">
            <text:p>1.1864</text:p>
          </table:table-cell>
          <table:table-cell office:value-type="float" office:value="-1.5438309625137259" table:style-name="c12">
            <text:p>-1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1.2086039999999998" table:style-name="c1">
            <text:p>1.2086</text:p>
          </table:table-cell>
          <table:table-cell office:value-type="string" table:style-name="c1">
            <text:p>2026-04-01 06:00</text:p>
          </table:table-cell>
          <table:table-cell office:value-type="float" office:value="1.2063965" table:style-name="c1">
            <text:p>1.2064</text:p>
          </table:table-cell>
          <table:table-cell office:value-type="float" office:value="-0.38218362701922803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1.2276135" table:style-name="c1">
            <text:p>1.2276</text:p>
          </table:table-cell>
          <table:table-cell office:value-type="string" table:style-name="c1">
            <text:p>2026-04-01 13:15</text:p>
          </table:table-cell>
          <table:table-cell office:value-type="float" office:value="1.209395" table:style-name="c1">
            <text:p>1.2094</text:p>
          </table:table-cell>
          <table:table-cell office:value-type="float" office:value="-1.6809916643145462" table:style-name="c12">
            <text:p>-1.7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1.2056025" table:style-name="c1">
            <text:p>1.2056</text:p>
          </table:table-cell>
          <table:table-cell office:value-type="string" table:style-name="c1">
            <text:p>2026-04-02 01:15</text:p>
          </table:table-cell>
          <table:table-cell office:value-type="float" office:value="1.191404" table:style-name="c1">
            <text:p>1.1914</text:p>
          </table:table-cell>
          <table:table-cell office:value-type="float" office:value="-1.3752556581460351" table:style-name="c12">
            <text:p>-1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1:15</text:p>
          </table:table-cell>
          <table:table-cell office:value-type="float" office:value="1.236618" table:style-name="c1">
            <text:p>1.2366</text:p>
          </table:table-cell>
          <table:table-cell office:value-type="string" table:style-name="c1">
            <text:p>2026-04-04 11:45</text:p>
          </table:table-cell>
          <table:table-cell office:value-type="float" office:value="1.2343825000000002" table:style-name="c1">
            <text:p>1.2344</text:p>
          </table:table-cell>
          <table:table-cell office:value-type="float" office:value="-0.3803139382978382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1.244622" table:style-name="c1">
            <text:p>1.2446</text:p>
          </table:table-cell>
          <table:table-cell office:value-type="string" table:style-name="c1">
            <text:p>2026-04-04 13:00</text:p>
          </table:table-cell>
          <table:table-cell office:value-type="float" office:value="1.247376" table:style-name="c1">
            <text:p>1.2474</text:p>
          </table:table-cell>
          <table:table-cell office:value-type="float" office:value="0.02092967792632905" table:style-name="c11">
            <text:p>+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3:30</text:p>
          </table:table-cell>
          <table:table-cell office:value-type="float" office:value="1.254627" table:style-name="c1">
            <text:p>1.2546</text:p>
          </table:table-cell>
          <table:table-cell office:value-type="string" table:style-name="c1">
            <text:p>2026-04-04 14:00</text:p>
          </table:table-cell>
          <table:table-cell office:value-type="float" office:value="1.243378" table:style-name="c1">
            <text:p>1.2434</text:p>
          </table:table-cell>
          <table:table-cell office:value-type="float" office:value="-1.094708835534386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5:15</text:p>
          </table:table-cell>
          <table:table-cell office:value-type="float" office:value="1.2626309999999998" table:style-name="c1">
            <text:p>1.2626</text:p>
          </table:table-cell>
          <table:table-cell office:value-type="string" table:style-name="c1">
            <text:p>2026-04-04 15:45</text:p>
          </table:table-cell>
          <table:table-cell office:value-type="float" office:value="1.2653670000000001" table:style-name="c1">
            <text:p>1.2654</text:p>
          </table:table-cell>
          <table:table-cell office:value-type="float" office:value="0.016357222894125556" table:style-name="c11">
            <text:p>+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6:15</text:p>
          </table:table-cell>
          <table:table-cell office:value-type="float" office:value="1.2696344999999998" table:style-name="c1">
            <text:p>1.2696</text:p>
          </table:table-cell>
          <table:table-cell office:value-type="string" table:style-name="c1">
            <text:p>2026-04-04 16:45</text:p>
          </table:table-cell>
          <table:table-cell office:value-type="float" office:value="1.2703645" table:style-name="c1">
            <text:p>1.2704</text:p>
          </table:table-cell>
          <table:table-cell office:value-type="float" office:value="-0.1425180739417442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1.276638" table:style-name="c1">
            <text:p>1.2766</text:p>
          </table:table-cell>
          <table:table-cell office:value-type="string" table:style-name="c1">
            <text:p>2026-04-04 18:00</text:p>
          </table:table-cell>
          <table:table-cell office:value-type="float" office:value="1.2783605" table:style-name="c1">
            <text:p>1.2784</text:p>
          </table:table-cell>
          <table:table-cell office:value-type="float" office:value="-0.06524501381753867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2:45</text:p>
          </table:table-cell>
          <table:table-cell office:value-type="float" office:value="1.238619" table:style-name="c1">
            <text:p>1.2386</text:p>
          </table:table-cell>
          <table:table-cell office:value-type="string" table:style-name="c1">
            <text:p>2026-04-05 23:15</text:p>
          </table:table-cell>
          <table:table-cell office:value-type="float" office:value="1.2423785000000003" table:style-name="c1">
            <text:p>1.2424</text:p>
          </table:table-cell>
          <table:table-cell office:value-type="float" office:value="0.10301677743522752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30</text:p>
          </table:table-cell>
          <table:table-cell office:value-type="float" office:value="1.2436215" table:style-name="c1">
            <text:p>1.2436</text:p>
          </table:table-cell>
          <table:table-cell office:value-type="string" table:style-name="c1">
            <text:p>2026-04-06 00:00</text:p>
          </table:table-cell>
          <table:table-cell office:value-type="float" office:value="1.247376" table:style-name="c1">
            <text:p>1.2474</text:p>
          </table:table-cell>
          <table:table-cell office:value-type="float" office:value="0.1013970388900498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1.254627" table:style-name="c1">
            <text:p>1.2546</text:p>
          </table:table-cell>
          <table:table-cell office:value-type="string" table:style-name="c1">
            <text:p>2026-04-06 00:45</text:p>
          </table:table-cell>
          <table:table-cell office:value-type="float" office:value="1.2603695" table:style-name="c1">
            <text:p>1.2604</text:p>
          </table:table-cell>
          <table:table-cell office:value-type="float" office:value="0.256890802565235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00</text:p>
          </table:table-cell>
          <table:table-cell office:value-type="float" office:value="1.3076534999999998" table:style-name="c1">
            <text:p>1.3077</text:p>
          </table:table-cell>
          <table:table-cell office:value-type="string" table:style-name="c1">
            <text:p>2026-04-07 22:30</text:p>
          </table:table-cell>
          <table:table-cell office:value-type="float" office:value="1.2973510000000001" table:style-name="c1">
            <text:p>1.2974</text:p>
          </table:table-cell>
          <table:table-cell office:value-type="float" office:value="-0.9861866808752895" table:style-name="c12">
            <text:p>-1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1.318659" table:style-name="c1">
            <text:p>1.3187</text:p>
          </table:table-cell>
          <table:table-cell office:value-type="string" table:style-name="c1">
            <text:p>2026-04-07 23:15</text:p>
          </table:table-cell>
          <table:table-cell office:value-type="float" office:value="1.3313340000000002" table:style-name="c1">
            <text:p>1.3313</text:p>
          </table:table-cell>
          <table:table-cell office:value-type="float" office:value="0.7593823220408247" table:style-name="c11">
            <text:p>+0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5:30</text:p>
          </table:table-cell>
          <table:table-cell office:value-type="float" office:value="1.3236614999999998" table:style-name="c1">
            <text:p>1.3237</text:p>
          </table:table-cell>
          <table:table-cell office:value-type="string" table:style-name="c1">
            <text:p>2026-04-08 06:00</text:p>
          </table:table-cell>
          <table:table-cell office:value-type="float" office:value="1.321339" table:style-name="c1">
            <text:p>1.3213</text:p>
          </table:table-cell>
          <table:table-cell office:value-type="float" office:value="-0.37500952176970914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8:00</text:p>
          </table:table-cell>
          <table:table-cell office:value-type="float" office:value="1.3516754999999998" table:style-name="c1">
            <text:p>1.3517</text:p>
          </table:table-cell>
          <table:table-cell office:value-type="string" table:style-name="c1">
            <text:p>2026-04-08 08:30</text:p>
          </table:table-cell>
          <table:table-cell office:value-type="float" office:value="1.3563215" table:style-name="c1">
            <text:p>1.3563</text:p>
          </table:table-cell>
          <table:table-cell office:value-type="float" office:value="0.14313445212996712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8:45</text:p>
          </table:table-cell>
          <table:table-cell office:value-type="float" office:value="1.362681" table:style-name="c1">
            <text:p>1.3627</text:p>
          </table:table-cell>
          <table:table-cell office:value-type="string" table:style-name="c1">
            <text:p>2026-04-08 09:15</text:p>
          </table:table-cell>
          <table:table-cell office:value-type="float" office:value="1.3653170000000001" table:style-name="c1">
            <text:p>1.3653</text:p>
          </table:table-cell>
          <table:table-cell office:value-type="float" office:value="-0.00684449867576209" table:style-name="c12">
            <text:p>-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30</text:p>
          </table:table-cell>
          <table:table-cell office:value-type="float" office:value="1.3896944999999998" table:style-name="c1">
            <text:p>1.3897</text:p>
          </table:table-cell>
          <table:table-cell office:value-type="string" table:style-name="c1">
            <text:p>2026-04-08 14:00</text:p>
          </table:table-cell>
          <table:table-cell office:value-type="float" office:value="1.377311" table:style-name="c1">
            <text:p>1.3773</text:p>
          </table:table-cell>
          <table:table-cell office:value-type="float" office:value="-1.089213830018032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30</text:p>
          </table:table-cell>
          <table:table-cell office:value-type="float" office:value="1.362681" table:style-name="c1">
            <text:p>1.3627</text:p>
          </table:table-cell>
          <table:table-cell office:value-type="string" table:style-name="c1">
            <text:p>2026-04-09 16:00</text:p>
          </table:table-cell>
          <table:table-cell office:value-type="float" office:value="1.3803095" table:style-name="c1">
            <text:p>1.3803</text:p>
          </table:table-cell>
          <table:table-cell office:value-type="float" office:value="1.0911769746184241" table:style-name="c11">
            <text:p>+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15</text:p>
          </table:table-cell>
          <table:table-cell office:value-type="float" office:value="1.3856925" table:style-name="c1">
            <text:p>1.3857</text:p>
          </table:table-cell>
          <table:table-cell office:value-type="string" table:style-name="c1">
            <text:p>2026-04-09 16:45</text:p>
          </table:table-cell>
          <table:table-cell office:value-type="float" office:value="1.3643175" table:style-name="c1">
            <text:p>1.3643</text:p>
          </table:table-cell>
          <table:table-cell office:value-type="float" office:value="-1.7393664671274345" table:style-name="c12">
            <text:p>-1.7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30</text:p>
          </table:table-cell>
          <table:table-cell office:value-type="float" office:value="1.3656825" table:style-name="c1">
            <text:p>1.3657</text:p>
          </table:table-cell>
          <table:table-cell office:value-type="string" table:style-name="c1">
            <text:p>2026-04-11 16:00</text:p>
          </table:table-cell>
          <table:table-cell office:value-type="float" office:value="1.3673160000000002" table:style-name="c1">
            <text:p>1.3673</text:p>
          </table:table-cell>
          <table:table-cell office:value-type="float" office:value="-0.08052857703014782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15</text:p>
          </table:table-cell>
          <table:table-cell office:value-type="float" office:value="1.3866929999999997" table:style-name="c1">
            <text:p>1.3867</text:p>
          </table:table-cell>
          <table:table-cell office:value-type="string" table:style-name="c1">
            <text:p>2026-04-11 16:45</text:p>
          </table:table-cell>
          <table:table-cell office:value-type="float" office:value="1.3823085000000002" table:style-name="c1">
            <text:p>1.3823</text:p>
          </table:table-cell>
          <table:table-cell office:value-type="float" office:value="-0.5154518477773928" table:style-name="c12">
            <text:p>-0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30</text:p>
          </table:table-cell>
          <table:table-cell office:value-type="float" office:value="1.3996994999999999" table:style-name="c1">
            <text:p>1.3997</text:p>
          </table:table-cell>
          <table:table-cell office:value-type="string" table:style-name="c1">
            <text:p>2026-04-11 18:00</text:p>
          </table:table-cell>
          <table:table-cell office:value-type="float" office:value="1.4062965" table:style-name="c1">
            <text:p>1.4063</text:p>
          </table:table-cell>
          <table:table-cell office:value-type="float" office:value="0.2704732906241958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1:15</text:p>
          </table:table-cell>
          <table:table-cell office:value-type="float" office:value="1.4197095" table:style-name="c1">
            <text:p>1.4197</text:p>
          </table:table-cell>
          <table:table-cell office:value-type="string" table:style-name="c1">
            <text:p>2026-04-14 01:45</text:p>
          </table:table-cell>
          <table:table-cell office:value-type="float" office:value="1.4122935" table:style-name="c1">
            <text:p>1.4123</text:p>
          </table:table-cell>
          <table:table-cell office:value-type="float" office:value="-0.7212161858816679" table:style-name="c12">
            <text:p>-0.7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00</text:p>
          </table:table-cell>
          <table:table-cell office:value-type="float" office:value="1.4297145" table:style-name="c1">
            <text:p>1.4297</text:p>
          </table:table-cell>
          <table:table-cell office:value-type="string" table:style-name="c1">
            <text:p>2026-04-16 04:30</text:p>
          </table:table-cell>
          <table:table-cell office:value-type="float" office:value="1.427286" table:style-name="c1">
            <text:p>1.4273</text:p>
          </table:table-cell>
          <table:table-cell office:value-type="float" office:value="-0.3694195389359112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1.4137065" table:style-name="c1">
            <text:p>1.4137</text:p>
          </table:table-cell>
          <table:table-cell office:value-type="string" table:style-name="c1">
            <text:p>2026-04-16 16:15</text:p>
          </table:table-cell>
          <table:table-cell office:value-type="float" office:value="1.4082955000000001" table:style-name="c1">
            <text:p>1.4083</text:p>
          </table:table-cell>
          <table:table-cell office:value-type="float" office:value="-0.5818875915545196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6:45</text:p>
          </table:table-cell>
          <table:table-cell office:value-type="float" office:value="1.4197095" table:style-name="c1">
            <text:p>1.4197</text:p>
          </table:table-cell>
          <table:table-cell office:value-type="string" table:style-name="c1">
            <text:p>2026-04-17 07:15</text:p>
          </table:table-cell>
          <table:table-cell office:value-type="float" office:value="1.415292" table:style-name="c1">
            <text:p>1.4153</text:p>
          </table:table-cell>
          <table:table-cell office:value-type="float" office:value="-0.5104332053846306" table:style-name="c12">
            <text:p>-0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1.4197095" table:style-name="c1">
            <text:p>1.4197</text:p>
          </table:table-cell>
          <table:table-cell office:value-type="string" table:style-name="c1">
            <text:p>2026-04-17 08:00</text:p>
          </table:table-cell>
          <table:table-cell office:value-type="float" office:value="1.425287" table:style-name="c1">
            <text:p>1.4253</text:p>
          </table:table-cell>
          <table:table-cell office:value-type="float" office:value="0.19217672960558652" table:style-name="c11">
            <text:p>+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1.4127059999999998" table:style-name="c1">
            <text:p>1.4127</text:p>
          </table:table-cell>
          <table:table-cell office:value-type="string" table:style-name="c1">
            <text:p>2026-04-17 13:45</text:p>
          </table:table-cell>
          <table:table-cell office:value-type="float" office:value="1.421289" table:style-name="c1">
            <text:p>1.4213</text:p>
          </table:table-cell>
          <table:table-cell office:value-type="float" office:value="0.40644290383138326" table:style-name="c11">
            <text:p>+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1.4277134999999999" table:style-name="c1">
            <text:p>1.4277</text:p>
          </table:table-cell>
          <table:table-cell office:value-type="string" table:style-name="c1">
            <text:p>2026-04-17 14:30</text:p>
          </table:table-cell>
          <table:table-cell office:value-type="float" office:value="1.423288" table:style-name="c1">
            <text:p>1.4233</text:p>
          </table:table-cell>
          <table:table-cell office:value-type="float" office:value="-0.5092515208408144" table:style-name="c12">
            <text:p>-0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5:15</text:p>
          </table:table-cell>
          <table:table-cell office:value-type="float" office:value="1.368684" table:style-name="c1">
            <text:p>1.3687</text:p>
          </table:table-cell>
          <table:table-cell office:value-type="string" table:style-name="c1">
            <text:p>2026-04-21 05:45</text:p>
          </table:table-cell>
          <table:table-cell office:value-type="float" office:value="1.3633180000000003" table:style-name="c1">
            <text:p>1.3633</text:p>
          </table:table-cell>
          <table:table-cell office:value-type="float" office:value="-0.5911717154580609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8:00</text:p>
          </table:table-cell>
          <table:table-cell office:value-type="float" office:value="1.3796895" table:style-name="c1">
            <text:p>1.3797</text:p>
          </table:table-cell>
          <table:table-cell office:value-type="string" table:style-name="c1">
            <text:p>2026-04-21 08:30</text:p>
          </table:table-cell>
          <table:table-cell office:value-type="float" office:value="1.3803095" table:style-name="c1">
            <text:p>1.3803</text:p>
          </table:table-cell>
          <table:table-cell office:value-type="float" office:value="-0.1550521831542473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1.4006999999999998" table:style-name="c1">
            <text:p>1.4007</text:p>
          </table:table-cell>
          <table:table-cell office:value-type="string" table:style-name="c1">
            <text:p>2026-04-22 03:00</text:p>
          </table:table-cell>
          <table:table-cell office:value-type="float" office:value="1.4022985000000001" table:style-name="c1">
            <text:p>1.4023</text:p>
          </table:table-cell>
          <table:table-cell office:value-type="float" office:value="-0.08600661822657507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1.4127059999999998" table:style-name="c1">
            <text:p>1.4127</text:p>
          </table:table-cell>
          <table:table-cell office:value-type="string" table:style-name="c1">
            <text:p>2026-04-22 06:00</text:p>
          </table:table-cell>
          <table:table-cell office:value-type="float" office:value="1.407296" table:style-name="c1">
            <text:p>1.4073</text:p>
          </table:table-cell>
          <table:table-cell office:value-type="float" office:value="-0.5820874763751038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5:45</text:p>
          </table:table-cell>
          <table:table-cell office:value-type="float" office:value="1.4287139999999998" table:style-name="c1">
            <text:p>1.4287</text:p>
          </table:table-cell>
          <table:table-cell office:value-type="string" table:style-name="c1">
            <text:p>2026-04-22 16:15</text:p>
          </table:table-cell>
          <table:table-cell office:value-type="float" office:value="1.4182905000000001" table:style-name="c1">
            <text:p>1.4183</text:p>
          </table:table-cell>
          <table:table-cell office:value-type="float" office:value="-0.9280137738903349" table:style-name="c12">
            <text:p>-0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2:15</text:p>
          </table:table-cell>
          <table:table-cell office:value-type="float" office:value="1.3946969999999999" table:style-name="c1">
            <text:p>1.3947</text:p>
          </table:table-cell>
          <table:table-cell office:value-type="string" table:style-name="c1">
            <text:p>2026-04-23 12:45</text:p>
          </table:table-cell>
          <table:table-cell office:value-type="float" office:value="1.389305" table:style-name="c1">
            <text:p>1.3893</text:p>
          </table:table-cell>
          <table:table-cell office:value-type="float" office:value="-0.5857344423197186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4:30</text:p>
          </table:table-cell>
          <table:table-cell office:value-type="float" office:value="1.398699" table:style-name="c1">
            <text:p>1.3987</text:p>
          </table:table-cell>
          <table:table-cell office:value-type="string" table:style-name="c1">
            <text:p>2026-04-23 15:00</text:p>
          </table:table-cell>
          <table:table-cell office:value-type="float" office:value="1.3983005000000002" table:style-name="c1">
            <text:p>1.3983</text:p>
          </table:table-cell>
          <table:table-cell office:value-type="float" office:value="-0.22833380873938935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1:15</text:p>
          </table:table-cell>
          <table:table-cell office:value-type="float" office:value="1.4006999999999998" table:style-name="c1">
            <text:p>1.4007</text:p>
          </table:table-cell>
          <table:table-cell office:value-type="string" table:style-name="c1">
            <text:p>2026-04-23 21:45</text:p>
          </table:table-cell>
          <table:table-cell office:value-type="float" office:value="1.4022985000000001" table:style-name="c1">
            <text:p>1.4023</text:p>
          </table:table-cell>
          <table:table-cell office:value-type="float" office:value="-0.08600661822656397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1.2946469999999999" table:style-name="c1">
            <text:p>1.2946</text:p>
          </table:table-cell>
          <table:table-cell office:value-type="string" table:style-name="c1">
            <text:p>2026-05-05 20:45</text:p>
          </table:table-cell>
          <table:table-cell office:value-type="float" office:value="1.295352" table:style-name="c1">
            <text:p>1.2954</text:p>
          </table:table-cell>
          <table:table-cell office:value-type="float" office:value="-0.1455538573834958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1.306653" table:style-name="c1">
            <text:p>1.3067</text:p>
          </table:table-cell>
          <table:table-cell office:value-type="string" table:style-name="c1">
            <text:p>2026-05-05 21:30</text:p>
          </table:table-cell>
          <table:table-cell office:value-type="float" office:value="1.3083455" table:style-name="c1">
            <text:p>1.3083</text:p>
          </table:table-cell>
          <table:table-cell office:value-type="float" office:value="-0.07062951330615297" table:style-name="c12">
            <text:p>-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1.3116554999999999" table:style-name="c1">
            <text:p>1.3117</text:p>
          </table:table-cell>
          <table:table-cell office:value-type="string" table:style-name="c1">
            <text:p>2026-05-06 02:30</text:p>
          </table:table-cell>
          <table:table-cell office:value-type="float" office:value="1.3003495" table:style-name="c1">
            <text:p>1.3003</text:p>
          </table:table-cell>
          <table:table-cell office:value-type="float" office:value="-1.0601410698540925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5:45</text:p>
          </table:table-cell>
          <table:table-cell office:value-type="float" office:value="1.3176584999999998" table:style-name="c1">
            <text:p>1.3177</text:p>
          </table:table-cell>
          <table:table-cell office:value-type="string" table:style-name="c1">
            <text:p>2026-05-06 06:15</text:p>
          </table:table-cell>
          <table:table-cell office:value-type="float" office:value="1.3143425" table:style-name="c1">
            <text:p>1.3143</text:p>
          </table:table-cell>
          <table:table-cell office:value-type="float" office:value="-0.45105546372599115" table:style-name="c12">
            <text:p>-0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7:45</text:p>
          </table:table-cell>
          <table:table-cell office:value-type="float" office:value="1.3556774999999999" table:style-name="c1">
            <text:p>1.3557</text:p>
          </table:table-cell>
          <table:table-cell office:value-type="string" table:style-name="c1">
            <text:p>2026-05-06 08:15</text:p>
          </table:table-cell>
          <table:table-cell office:value-type="float" office:value="1.3803095" table:style-name="c1">
            <text:p>1.3803</text:p>
          </table:table-cell>
          <table:table-cell office:value-type="float" office:value="1.613419217291745" table:style-name="c11">
            <text:p>+1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1.404702" table:style-name="c1">
            <text:p>1.4047</text:p>
          </table:table-cell>
          <table:table-cell office:value-type="string" table:style-name="c1">
            <text:p>2026-05-06 09:00</text:p>
          </table:table-cell>
          <table:table-cell office:value-type="float" office:value="1.4262865000000002" table:style-name="c1">
            <text:p>1.4263</text:p>
          </table:table-cell>
          <table:table-cell office:value-type="float" office:value="1.3336176133087685" table:style-name="c11">
            <text:p>+1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15</text:p>
          </table:table-cell>
          <table:table-cell office:value-type="float" office:value="1.52076" table:style-name="c1">
            <text:p>1.5208</text:p>
          </table:table-cell>
          <table:table-cell office:value-type="string" table:style-name="c1">
            <text:p>2026-05-06 16:45</text:p>
          </table:table-cell>
          <table:table-cell office:value-type="float" office:value="1.505247" table:style-name="c1">
            <text:p>1.5052</text:p>
          </table:table-cell>
          <table:table-cell office:value-type="float" office:value="-1.2179429201846337" table:style-name="c12">
            <text:p>-1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1.5357674999999997" table:style-name="c1">
            <text:p>1.5358</text:p>
          </table:table-cell>
          <table:table-cell office:value-type="string" table:style-name="c1">
            <text:p>2026-05-08 08:30</text:p>
          </table:table-cell>
          <table:table-cell office:value-type="float" office:value="1.521239" table:style-name="c1">
            <text:p>1.5212</text:p>
          </table:table-cell>
          <table:table-cell office:value-type="float" office:value="-1.144018007999259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1.5677834999999998" table:style-name="c1">
            <text:p>1.5678</text:p>
          </table:table-cell>
          <table:table-cell office:value-type="string" table:style-name="c1">
            <text:p>2026-05-08 10:00</text:p>
          </table:table-cell>
          <table:table-cell office:value-type="float" office:value="1.5582205" table:style-name="c1">
            <text:p>1.5582</text:p>
          </table:table-cell>
          <table:table-cell office:value-type="float" office:value="-0.8086500961070109" table:style-name="c12">
            <text:p>-0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5757875" table:style-name="c1">
            <text:p>1.5758</text:p>
          </table:table-cell>
          <table:table-cell office:value-type="string" table:style-name="c1">
            <text:p>2026-05-08 15:30</text:p>
          </table:table-cell>
          <table:table-cell office:value-type="float" office:value="1.565217" table:style-name="c1">
            <text:p>1.5652</text:p>
          </table:table-cell>
          <table:table-cell office:value-type="float" office:value="-0.8693665093167491" table:style-name="c12">
            <text:p>-0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3:00</text:p>
          </table:table-cell>
          <table:table-cell office:value-type="float" office:value="1.5937964999999998" table:style-name="c1">
            <text:p>1.5938</text:p>
          </table:table-cell>
          <table:table-cell office:value-type="string" table:style-name="c1">
            <text:p>2026-05-08 23:30</text:p>
          </table:table-cell>
          <table:table-cell office:value-type="float" office:value="1.5902045" table:style-name="c1">
            <text:p>1.5902</text:p>
          </table:table-cell>
          <table:table-cell office:value-type="float" office:value="-0.4248232942850483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1.6078035" table:style-name="c1">
            <text:p>1.6078</text:p>
          </table:table-cell>
          <table:table-cell office:value-type="string" table:style-name="c1">
            <text:p>2026-05-09 02:15</text:p>
          </table:table-cell>
          <table:table-cell office:value-type="float" office:value="1.6141925000000001" table:style-name="c1">
            <text:p>1.6142</text:p>
          </table:table-cell>
          <table:table-cell office:value-type="float" office:value="0.19668007890889516" table:style-name="c11">
            <text:p>+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8:30</text:p>
          </table:table-cell>
          <table:table-cell office:value-type="float" office:value="1.574787" table:style-name="c1">
            <text:p>1.5748</text:p>
          </table:table-cell>
          <table:table-cell office:value-type="string" table:style-name="c1">
            <text:p>2026-05-09 19:00</text:p>
          </table:table-cell>
          <table:table-cell office:value-type="float" office:value="1.5582205" table:style-name="c1">
            <text:p>1.5582</text:p>
          </table:table-cell>
          <table:table-cell office:value-type="float" office:value="-1.2497806229985309" table:style-name="c12">
            <text:p>-1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8:45</text:p>
          </table:table-cell>
          <table:table-cell office:value-type="float" office:value="1.604802" table:style-name="c1">
            <text:p>1.6048</text:p>
          </table:table-cell>
          <table:table-cell office:value-type="string" table:style-name="c1">
            <text:p>2026-05-10 19:15</text:p>
          </table:table-cell>
          <table:table-cell office:value-type="float" office:value="1.6091950000000002" table:style-name="c1">
            <text:p>1.6092</text:p>
          </table:table-cell>
          <table:table-cell office:value-type="float" office:value="0.07329372688968938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0:00</text:p>
          </table:table-cell>
          <table:table-cell office:value-type="float" office:value="1.6238115" table:style-name="c1">
            <text:p>1.6238</text:p>
          </table:table-cell>
          <table:table-cell office:value-type="string" table:style-name="c1">
            <text:p>2026-05-10 20:30</text:p>
          </table:table-cell>
          <table:table-cell office:value-type="float" office:value="1.6001995" table:style-name="c1">
            <text:p>1.6002</text:p>
          </table:table-cell>
          <table:table-cell office:value-type="float" office:value="-1.6511029020609858" table:style-name="c12">
            <text:p>-1.7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7:45</text:p>
          </table:table-cell>
          <table:table-cell office:value-type="float" office:value="1.552776" table:style-name="c1">
            <text:p>1.5528</text:p>
          </table:table-cell>
          <table:table-cell office:value-type="string" table:style-name="c1">
            <text:p>2026-05-11 08:15</text:p>
          </table:table-cell>
          <table:table-cell office:value-type="float" office:value="1.5482255" table:style-name="c1">
            <text:p>1.5482</text:p>
          </table:table-cell>
          <table:table-cell office:value-type="float" office:value="-0.4923699731641751" table:style-name="c12">
            <text:p>-0.5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5:15</text:p>
          </table:table-cell>
          <table:table-cell office:value-type="float" office:value="1.576788" table:style-name="c1">
            <text:p>1.5768</text:p>
          </table:table-cell>
          <table:table-cell office:value-type="string" table:style-name="c1">
            <text:p>2026-05-12 15:45</text:p>
          </table:table-cell>
          <table:table-cell office:value-type="float" office:value="1.5522235" table:style-name="c1">
            <text:p>1.5522</text:p>
          </table:table-cell>
          <table:table-cell office:value-type="float" office:value="-1.754668019828931" table:style-name="c12">
            <text:p>-1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9:00</text:p>
          </table:table-cell>
          <table:table-cell office:value-type="float" office:value="1.6238115" table:style-name="c1">
            <text:p>1.6238</text:p>
          </table:table-cell>
          <table:table-cell office:value-type="string" table:style-name="c1">
            <text:p>2026-05-12 19:30</text:p>
          </table:table-cell>
          <table:table-cell office:value-type="float" office:value="1.5952020000000002" table:style-name="c1">
            <text:p>1.5952</text:p>
          </table:table-cell>
          <table:table-cell office:value-type="float" office:value="-1.9582512377822159" table:style-name="c12">
            <text:p>-2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1.6638315" table:style-name="c1">
            <text:p>1.6638</text:p>
          </table:table-cell>
          <table:table-cell office:value-type="string" table:style-name="c1">
            <text:p>2026-05-13 01:45</text:p>
          </table:table-cell>
          <table:table-cell office:value-type="float" office:value="1.6741625000000002" table:style-name="c1">
            <text:p>1.6742</text:p>
          </table:table-cell>
          <table:table-cell office:value-type="float" office:value="0.41977502905194974" table:style-name="c11">
            <text:p>+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8:15</text:p>
          </table:table-cell>
          <table:table-cell office:value-type="float" office:value="1.5937964999999998" table:style-name="c1">
            <text:p>1.5938</text:p>
          </table:table-cell>
          <table:table-cell office:value-type="string" table:style-name="c1">
            <text:p>2026-05-13 18:45</text:p>
          </table:table-cell>
          <table:table-cell office:value-type="float" office:value="1.6021985" table:style-name="c1">
            <text:p>1.6022</text:p>
          </table:table-cell>
          <table:table-cell office:value-type="float" office:value="0.32621512209998205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2:15</text:p>
          </table:table-cell>
          <table:table-cell office:value-type="float" office:value="1.610805" table:style-name="c1">
            <text:p>1.6108</text:p>
          </table:table-cell>
          <table:table-cell office:value-type="string" table:style-name="c1">
            <text:p>2026-05-14 02:45</text:p>
          </table:table-cell>
          <table:table-cell office:value-type="float" office:value="1.5852070000000003" table:style-name="c1">
            <text:p>1.5852</text:p>
          </table:table-cell>
          <table:table-cell office:value-type="float" office:value="-1.7858666190507022" table:style-name="c12">
            <text:p>-1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6:15</text:p>
          </table:table-cell>
          <table:table-cell office:value-type="float" office:value="1.6278134999999998" table:style-name="c1">
            <text:p>1.6278</text:p>
          </table:table-cell>
          <table:table-cell office:value-type="string" table:style-name="c1">
            <text:p>2026-05-14 16:45</text:p>
          </table:table-cell>
          <table:table-cell office:value-type="float" office:value="1.6171910000000003" table:style-name="c1">
            <text:p>1.6172</text:p>
          </table:table-cell>
          <table:table-cell office:value-type="float" office:value="-0.8511579986896334" table:style-name="c12">
            <text:p>-0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21:15</text:p>
          </table:table-cell>
          <table:table-cell office:value-type="float" office:value="1.538769" table:style-name="c1">
            <text:p>1.5388</text:p>
          </table:table-cell>
          <table:table-cell office:value-type="string" table:style-name="c1">
            <text:p>2026-05-17 21:45</text:p>
          </table:table-cell>
          <table:table-cell office:value-type="float" office:value="1.53923" table:style-name="c1">
            <text:p>1.5392</text:p>
          </table:table-cell>
          <table:table-cell office:value-type="float" office:value="-0.1700008753750537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7:15</text:p>
          </table:table-cell>
          <table:table-cell office:value-type="float" office:value="1.6438214999999998" table:style-name="c1">
            <text:p>1.6438</text:p>
          </table:table-cell>
          <table:table-cell office:value-type="string" table:style-name="c1">
            <text:p>2026-05-19 07:45</text:p>
          </table:table-cell>
          <table:table-cell office:value-type="float" office:value="1.665167" table:style-name="c1">
            <text:p>1.6652</text:p>
          </table:table-cell>
          <table:table-cell office:value-type="float" office:value="1.0960333081785345" table:style-name="c11">
            <text:p>+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8:00</text:p>
          </table:table-cell>
          <table:table-cell office:value-type="float" office:value="1.6568279999999997" table:style-name="c1">
            <text:p>1.6568</text:p>
          </table:table-cell>
          <table:table-cell office:value-type="string" table:style-name="c1">
            <text:p>2026-05-19 08:30</text:p>
          </table:table-cell>
          <table:table-cell office:value-type="float" office:value="1.641179" table:style-name="c1">
            <text:p>1.6412</text:p>
          </table:table-cell>
          <table:table-cell office:value-type="float" office:value="-1.142527578058794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5:30</text:p>
          </table:table-cell>
          <table:table-cell office:value-type="float" office:value="1.622811" table:style-name="c1">
            <text:p>1.6228</text:p>
          </table:table-cell>
          <table:table-cell office:value-type="string" table:style-name="c1">
            <text:p>2026-05-20 06:00</text:p>
          </table:table-cell>
          <table:table-cell office:value-type="float" office:value="1.6621685000000002" table:style-name="c1">
            <text:p>1.6622</text:p>
          </table:table-cell>
          <table:table-cell office:value-type="float" office:value="2.220518912461178" table:style-name="c11">
            <text:p>+2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3:30</text:p>
          </table:table-cell>
          <table:table-cell office:value-type="float" office:value="1.6538264999999999" table:style-name="c1">
            <text:p>1.6538</text:p>
          </table:table-cell>
          <table:table-cell office:value-type="string" table:style-name="c1">
            <text:p>2026-05-20 14:00</text:p>
          </table:table-cell>
          <table:table-cell office:value-type="float" office:value="1.653173" table:style-name="c1">
            <text:p>1.6532</text:p>
          </table:table-cell>
          <table:table-cell office:value-type="float" office:value="-0.23933543373503285" table:style-name="c12">
            <text:p>-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1.7048519999999998" table:style-name="c1">
            <text:p>1.7049</text:p>
          </table:table-cell>
          <table:table-cell office:value-type="string" table:style-name="c1">
            <text:p>2026-05-20 16:00</text:p>
          </table:table-cell>
          <table:table-cell office:value-type="float" office:value="1.687156" table:style-name="c1">
            <text:p>1.6872</text:p>
          </table:table-cell>
          <table:table-cell office:value-type="float" office:value="-1.2358037439026859" table:style-name="c12">
            <text:p>-1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1.7308649999999999" table:style-name="c1">
            <text:p>1.7309</text:p>
          </table:table-cell>
          <table:table-cell office:value-type="string" table:style-name="c1">
            <text:p>2026-05-21 03:15</text:p>
          </table:table-cell>
          <table:table-cell office:value-type="float" office:value="1.7381305000000002" table:style-name="c1">
            <text:p>1.7381</text:p>
          </table:table-cell>
          <table:table-cell office:value-type="float" office:value="0.21902211498301405" table:style-name="c11">
            <text:p>+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4:45</text:p>
          </table:table-cell>
          <table:table-cell office:value-type="float" office:value="1.7658824999999998" table:style-name="c1">
            <text:p>1.7659</text:p>
          </table:table-cell>
          <table:table-cell office:value-type="string" table:style-name="c1">
            <text:p>2026-05-21 05:15</text:p>
          </table:table-cell>
          <table:table-cell office:value-type="float" office:value="1.7691150000000002" table:style-name="c1">
            <text:p>1.7691</text:p>
          </table:table-cell>
          <table:table-cell office:value-type="float" office:value="-0.01721297339997152" table:style-name="c12">
            <text:p>-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7648819999999998" table:style-name="c1">
            <text:p>1.7649</text:p>
          </table:table-cell>
          <table:table-cell office:value-type="string" table:style-name="c1">
            <text:p>2026-05-21 09:00</text:p>
          </table:table-cell>
          <table:table-cell office:value-type="float" office:value="1.7681155" table:style-name="c1">
            <text:p>1.7681</text:p>
          </table:table-cell>
          <table:table-cell office:value-type="float" office:value="-0.017052861579414103" table:style-name="c12">
            <text:p>-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45</text:p>
          </table:table-cell>
          <table:table-cell office:value-type="float" office:value="1.8079034999999999" table:style-name="c1">
            <text:p>1.8079</text:p>
          </table:table-cell>
          <table:table-cell office:value-type="string" table:style-name="c1">
            <text:p>2026-05-21 16:15</text:p>
          </table:table-cell>
          <table:table-cell office:value-type="float" office:value="1.8050970000000002" table:style-name="c1">
            <text:p>1.8051</text:p>
          </table:table-cell>
          <table:table-cell office:value-type="float" office:value="-0.35482474053508684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00</text:p>
          </table:table-cell>
          <table:table-cell office:value-type="float" office:value="1.8579284999999999" table:style-name="c1">
            <text:p>1.8579</text:p>
          </table:table-cell>
          <table:table-cell office:value-type="string" table:style-name="c1">
            <text:p>2026-05-21 18:30</text:p>
          </table:table-cell>
          <table:table-cell office:value-type="float" office:value="1.851074" table:style-name="c1">
            <text:p>1.8511</text:p>
          </table:table-cell>
          <table:table-cell office:value-type="float" office:value="-0.5680948931027219" table:style-name="c12">
            <text:p>-0.6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20:00</text:p>
          </table:table-cell>
          <table:table-cell office:value-type="float" office:value="1.9249619999999998" table:style-name="c1">
            <text:p>1.925</text:p>
          </table:table-cell>
          <table:table-cell office:value-type="string" table:style-name="c1">
            <text:p>2026-05-21 20:30</text:p>
          </table:table-cell>
          <table:table-cell office:value-type="float" office:value="1.9340325000000003" table:style-name="c1">
            <text:p>1.934</text:p>
          </table:table-cell>
          <table:table-cell office:value-type="float" office:value="0.27036216987661454" table:style-name="c11">
            <text:p>+0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1:15</text:p>
          </table:table-cell>
          <table:table-cell office:value-type="float" office:value="2.0100045" table:style-name="c1">
            <text:p>2.01</text:p>
          </table:table-cell>
          <table:table-cell office:value-type="string" table:style-name="c1">
            <text:p>2026-05-22 01:45</text:p>
          </table:table-cell>
          <table:table-cell office:value-type="float" office:value="2.0179905000000002" table:style-name="c1">
            <text:p>2.018</text:p>
          </table:table-cell>
          <table:table-cell office:value-type="float" office:value="0.1966183155560186" table:style-name="c11">
            <text:p>+0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2.2641315" table:style-name="c1">
            <text:p>2.2641</text:p>
          </table:table-cell>
          <table:table-cell office:value-type="string" table:style-name="c1">
            <text:p>2026-05-22 08:45</text:p>
          </table:table-cell>
          <table:table-cell office:value-type="float" office:value="2.2468760000000003" table:style-name="c1">
            <text:p>2.2469</text:p>
          </table:table-cell>
          <table:table-cell office:value-type="float" office:value="-0.9605009746121218" table:style-name="c12">
            <text:p>-1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15</text:p>
          </table:table-cell>
          <table:table-cell office:value-type="float" office:value="2.3141565" table:style-name="c1">
            <text:p>2.3142</text:p>
          </table:table-cell>
          <table:table-cell office:value-type="string" table:style-name="c1">
            <text:p>2026-05-22 13:45</text:p>
          </table:table-cell>
          <table:table-cell office:value-type="float" office:value="2.3218385" table:style-name="c1">
            <text:p>2.3218</text:p>
          </table:table-cell>
          <table:table-cell office:value-type="float" office:value="0.1313932242050342" table:style-name="c11">
            <text:p>+0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15:15</text:p>
          </table:table-cell>
          <table:table-cell office:value-type="float" office:value="2.2121055" table:style-name="c1">
            <text:p>2.2121</text:p>
          </table:table-cell>
          <table:table-cell office:value-type="string" table:style-name="c1">
            <text:p>2026-05-23 15:45</text:p>
          </table:table-cell>
          <table:table-cell office:value-type="float" office:value="2.2318835000000004" table:style-name="c1">
            <text:p>2.2319</text:p>
          </table:table-cell>
          <table:table-cell office:value-type="float" office:value="0.6923930564568748" table:style-name="c11">
            <text:p>+0.7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15:15</text:p>
          </table:table-cell>
          <table:table-cell office:value-type="float" office:value="2.4682334999999997" table:style-name="c1">
            <text:p>2.4682</text:p>
          </table:table-cell>
          <table:table-cell office:value-type="string" table:style-name="c1">
            <text:p>2026-05-24 15:45</text:p>
          </table:table-cell>
          <table:table-cell office:value-type="float" office:value="2.4257865" table:style-name="c1">
            <text:p>2.4258</text:p>
          </table:table-cell>
          <table:table-cell office:value-type="float" office:value="-1.9161942017843603" table:style-name="c12">
            <text:p>-1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5:15</text:p>
          </table:table-cell>
          <table:table-cell office:value-type="float" office:value="2.3881935" table:style-name="c1">
            <text:p>2.3882</text:p>
          </table:table-cell>
          <table:table-cell office:value-type="string" table:style-name="c1">
            <text:p>2026-05-25 05:45</text:p>
          </table:table-cell>
          <table:table-cell office:value-type="float" office:value="2.3658165" table:style-name="c1">
            <text:p>2.3658</text:p>
          </table:table-cell>
          <table:table-cell office:value-type="float" office:value="-1.1350113457515132" table:style-name="c12">
            <text:p>-1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15</text:p>
          </table:table-cell>
          <table:table-cell office:value-type="float" office:value="2.5072529999999995" table:style-name="c1">
            <text:p>2.5073</text:p>
          </table:table-cell>
          <table:table-cell office:value-type="string" table:style-name="c1">
            <text:p>2026-05-25 12:45</text:p>
          </table:table-cell>
          <table:table-cell office:value-type="float" office:value="2.5417285000000005" table:style-name="c1">
            <text:p>2.5417</text:p>
          </table:table-cell>
          <table:table-cell office:value-type="float" office:value="1.1723820742661761" table:style-name="c11">
            <text:p>+1.2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15</text:p>
          </table:table-cell>
          <table:table-cell office:value-type="float" office:value="2.6583285" table:style-name="c1">
            <text:p>2.6583</text:p>
          </table:table-cell>
          <table:table-cell office:value-type="string" table:style-name="c1">
            <text:p>2026-05-25 14:45</text:p>
          </table:table-cell>
          <table:table-cell office:value-type="float" office:value="2.6516735000000002" table:style-name="c1">
            <text:p>2.6517</text:p>
          </table:table-cell>
          <table:table-cell office:value-type="float" office:value="-0.44974484253920144" table:style-name="c12">
            <text:p>-0.4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8:30</text:p>
          </table:table-cell>
          <table:table-cell office:value-type="float" office:value="2.5512749999999995" table:style-name="c1">
            <text:p>2.5513</text:p>
          </table:table-cell>
          <table:table-cell office:value-type="string" table:style-name="c1">
            <text:p>2026-05-27 09:00</text:p>
          </table:table-cell>
          <table:table-cell office:value-type="float" office:value="2.5227380000000004" table:style-name="c1">
            <text:p>2.5227</text:p>
          </table:table-cell>
          <table:table-cell office:value-type="float" office:value="-1.3162028108298585" table:style-name="c12">
            <text:p>-1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00</text:p>
          </table:table-cell>
          <table:table-cell office:value-type="float" office:value="0.12476235" table:style-name="c8">
            <text:p>0.12476</text:p>
          </table:table-cell>
          <table:table-cell office:value-type="string" table:style-name="c8">
            <text:p>2026-03-03 16:30</text:p>
          </table:table-cell>
          <table:table-cell office:value-type="float" office:value="0.1271364" table:style-name="c8">
            <text:p>0.12714</text:p>
          </table:table-cell>
          <table:table-cell office:value-type="float" office:value="1.6991539005156708" table:style-name="c10">
            <text:p>+1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0.13116555" table:style-name="c8">
            <text:p>0.13117</text:p>
          </table:table-cell>
          <table:table-cell office:value-type="string" table:style-name="c8">
            <text:p>2026-03-04 10:15</text:p>
          </table:table-cell>
          <table:table-cell office:value-type="float" office:value="0.13013490000000003" table:style-name="c8">
            <text:p>0.13013</text:p>
          </table:table-cell>
          <table:table-cell office:value-type="float" office:value="-0.9840919853574159" table:style-name="c9">
            <text:p>-1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45</text:p>
          </table:table-cell>
          <table:table-cell office:value-type="float" office:value="0.13056525" table:style-name="c8">
            <text:p>0.13057</text:p>
          </table:table-cell>
          <table:table-cell office:value-type="string" table:style-name="c8">
            <text:p>2026-03-04 16:15</text:p>
          </table:table-cell>
          <table:table-cell office:value-type="float" office:value="0.13023485" table:style-name="c8">
            <text:p>0.13023</text:p>
          </table:table-cell>
          <table:table-cell office:value-type="float" office:value="-0.4524476958072565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05:15</text:p>
          </table:table-cell>
          <table:table-cell office:value-type="float" office:value="0.12896444999999998" table:style-name="c8">
            <text:p>0.12896</text:p>
          </table:table-cell>
          <table:table-cell office:value-type="string" table:style-name="c8">
            <text:p>2026-03-05 05:45</text:p>
          </table:table-cell>
          <table:table-cell office:value-type="float" office:value="0.1273363" table:style-name="c8">
            <text:p>0.12734</text:p>
          </table:table-cell>
          <table:table-cell office:value-type="float" office:value="-1.4598560019447038" table:style-name="c9">
            <text:p>-1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09:15</text:p>
          </table:table-cell>
          <table:table-cell office:value-type="float" office:value="0.1296648" table:style-name="c8">
            <text:p>0.12966</text:p>
          </table:table-cell>
          <table:table-cell office:value-type="string" table:style-name="c8">
            <text:p>2026-03-05 09:45</text:p>
          </table:table-cell>
          <table:table-cell office:value-type="float" office:value="0.12883555" table:style-name="c8">
            <text:p>0.12884</text:p>
          </table:table-cell>
          <table:table-cell office:value-type="float" office:value="-0.8381552005247594" table:style-name="c9">
            <text:p>-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0:15</text:p>
          </table:table-cell>
          <table:table-cell office:value-type="float" office:value="0.1292646" table:style-name="c8">
            <text:p>0.12926</text:p>
          </table:table-cell>
          <table:table-cell office:value-type="string" table:style-name="c8">
            <text:p>2026-03-05 10:45</text:p>
          </table:table-cell>
          <table:table-cell office:value-type="float" office:value="0.1297351" table:style-name="c8">
            <text:p>0.12974</text:p>
          </table:table-cell>
          <table:table-cell office:value-type="float" office:value="0.16335449543027902" table:style-name="c10">
            <text:p>+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1:00</text:p>
          </table:table-cell>
          <table:table-cell office:value-type="float" office:value="0.12996494999999997" table:style-name="c8">
            <text:p>0.12996</text:p>
          </table:table-cell>
          <table:table-cell office:value-type="string" table:style-name="c8">
            <text:p>2026-03-05 11:30</text:p>
          </table:table-cell>
          <table:table-cell office:value-type="float" office:value="0.12843575000000002" table:style-name="c8">
            <text:p>0.12844</text:p>
          </table:table-cell>
          <table:table-cell office:value-type="float" office:value="-1.3741728552582488" table:style-name="c9">
            <text:p>-1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4:00</text:p>
          </table:table-cell>
          <table:table-cell office:value-type="float" office:value="0.1196598" table:style-name="c8">
            <text:p>0.11966</text:p>
          </table:table-cell>
          <table:table-cell office:value-type="string" table:style-name="c8">
            <text:p>2026-03-09 14:30</text:p>
          </table:table-cell>
          <table:table-cell office:value-type="float" office:value="0.1203398" table:style-name="c8">
            <text:p>0.12034</text:p>
          </table:table-cell>
          <table:table-cell office:value-type="float" office:value="0.36724174685232036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4:45</text:p>
          </table:table-cell>
          <table:table-cell office:value-type="float" office:value="0.12036015" table:style-name="c8">
            <text:p>0.12036</text:p>
          </table:table-cell>
          <table:table-cell office:value-type="string" table:style-name="c8">
            <text:p>2026-03-09 15:15</text:p>
          </table:table-cell>
          <table:table-cell office:value-type="float" office:value="0.11924035000000001" table:style-name="c8">
            <text:p>0.11924</text:p>
          </table:table-cell>
          <table:table-cell office:value-type="float" office:value="-1.1284145621702657" table:style-name="c9">
            <text:p>-1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19:45</text:p>
          </table:table-cell>
          <table:table-cell office:value-type="float" office:value="0.12056025" table:style-name="c8">
            <text:p>0.12056</text:p>
          </table:table-cell>
          <table:table-cell office:value-type="string" table:style-name="c8">
            <text:p>2026-03-09 20:15</text:p>
          </table:table-cell>
          <table:table-cell office:value-type="float" office:value="0.11974010000000002" table:style-name="c8">
            <text:p>0.11974</text:p>
          </table:table-cell>
          <table:table-cell office:value-type="float" office:value="-0.8788223812574825" table:style-name="c9">
            <text:p>-0.9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4:00</text:p>
          </table:table-cell>
          <table:table-cell office:value-type="float" office:value="0.12116054999999999" table:style-name="c8">
            <text:p>0.12116</text:p>
          </table:table-cell>
          <table:table-cell office:value-type="string" table:style-name="c8">
            <text:p>2026-03-11 14:30</text:p>
          </table:table-cell>
          <table:table-cell office:value-type="float" office:value="0.12183905" table:style-name="c8">
            <text:p>0.12184</text:p>
          </table:table-cell>
          <table:table-cell office:value-type="float" office:value="0.35898131780518483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0:30</text:p>
          </table:table-cell>
          <table:table-cell office:value-type="float" office:value="0.11995995" table:style-name="c8">
            <text:p>0.11996</text:p>
          </table:table-cell>
          <table:table-cell office:value-type="string" table:style-name="c8">
            <text:p>2026-03-12 11:00</text:p>
          </table:table-cell>
          <table:table-cell office:value-type="float" office:value="0.11964015" table:style-name="c8">
            <text:p>0.11964</text:p>
          </table:table-cell>
          <table:table-cell office:value-type="float" office:value="-0.46595606271092604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30</text:p>
          </table:table-cell>
          <table:table-cell office:value-type="float" office:value="0.12556275" table:style-name="c8">
            <text:p>0.12556</text:p>
          </table:table-cell>
          <table:table-cell office:value-type="string" table:style-name="c8">
            <text:p>2026-03-13 11:00</text:p>
          </table:table-cell>
          <table:table-cell office:value-type="float" office:value="0.1257371" table:style-name="c8">
            <text:p>0.12574</text:p>
          </table:table-cell>
          <table:table-cell office:value-type="float" office:value="-0.0613226955446744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0.1264632" table:style-name="c8">
            <text:p>0.12646</text:p>
          </table:table-cell>
          <table:table-cell office:value-type="string" table:style-name="c8">
            <text:p>2026-03-13 14:00</text:p>
          </table:table-cell>
          <table:table-cell office:value-type="float" office:value="0.1265367" table:style-name="c8">
            <text:p>0.12654</text:p>
          </table:table-cell>
          <table:table-cell office:value-type="float" office:value="-0.14189650688896105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5:15</text:p>
          </table:table-cell>
          <table:table-cell office:value-type="float" office:value="0.1268634" table:style-name="c8">
            <text:p>0.12686</text:p>
          </table:table-cell>
          <table:table-cell office:value-type="string" table:style-name="c8">
            <text:p>2026-03-13 15:45</text:p>
          </table:table-cell>
          <table:table-cell office:value-type="float" office:value="0.12593700000000002" table:style-name="c8">
            <text:p>0.12594</text:p>
          </table:table-cell>
          <table:table-cell office:value-type="float" office:value="-0.928674513689498" table:style-name="c9">
            <text:p>-0.9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04:15</text:p>
          </table:table-cell>
          <table:table-cell office:value-type="float" office:value="0.1258629" table:style-name="c8">
            <text:p>0.12586</text:p>
          </table:table-cell>
          <table:table-cell office:value-type="string" table:style-name="c8">
            <text:p>2026-03-14 04:45</text:p>
          </table:table-cell>
          <table:table-cell office:value-type="float" office:value="0.12523735" table:style-name="c8">
            <text:p>0.12524</text:p>
          </table:table-cell>
          <table:table-cell office:value-type="float" office:value="-0.6959155260604977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4:15</text:p>
          </table:table-cell>
          <table:table-cell office:value-type="float" office:value="0.1268634" table:style-name="c8">
            <text:p>0.12686</text:p>
          </table:table-cell>
          <table:table-cell office:value-type="string" table:style-name="c8">
            <text:p>2026-03-15 04:45</text:p>
          </table:table-cell>
          <table:table-cell office:value-type="float" office:value="0.1267366" table:style-name="c8">
            <text:p>0.12674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1:00</text:p>
          </table:table-cell>
          <table:table-cell office:value-type="float" office:value="0.12756375" table:style-name="c8">
            <text:p>0.12756</text:p>
          </table:table-cell>
          <table:table-cell office:value-type="string" table:style-name="c8">
            <text:p>2026-03-15 11:30</text:p>
          </table:table-cell>
          <table:table-cell office:value-type="float" office:value="0.12703645" table:style-name="c8">
            <text:p>0.12704</text:p>
          </table:table-cell>
          <table:table-cell office:value-type="float" office:value="-0.6124356359467176" table:style-name="c9">
            <text:p>-0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30</text:p>
          </table:table-cell>
          <table:table-cell office:value-type="float" office:value="0.1288644" table:style-name="c8">
            <text:p>0.12886</text:p>
          </table:table-cell>
          <table:table-cell office:value-type="string" table:style-name="c8">
            <text:p>2026-03-16 04:00</text:p>
          </table:table-cell>
          <table:table-cell office:value-type="float" office:value="0.1291354" table:style-name="c8">
            <text:p>0.12914</text:p>
          </table:table-cell>
          <table:table-cell office:value-type="float" office:value="0.00997819056314242" table:style-name="c10">
            <text:p>+0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7:30</text:p>
          </table:table-cell>
          <table:table-cell office:value-type="float" office:value="0.13196594999999997" table:style-name="c8">
            <text:p>0.13197</text:p>
          </table:table-cell>
          <table:table-cell office:value-type="string" table:style-name="c8">
            <text:p>2026-03-16 08:00</text:p>
          </table:table-cell>
          <table:table-cell office:value-type="float" office:value="0.13123435" table:style-name="c8">
            <text:p>0.13123</text:p>
          </table:table-cell>
          <table:table-cell office:value-type="float" office:value="-0.7531772140085935" table:style-name="c9">
            <text:p>-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5:00</text:p>
          </table:table-cell>
          <table:table-cell office:value-type="float" office:value="0.1312656" table:style-name="c8">
            <text:p>0.13127</text:p>
          </table:table-cell>
          <table:table-cell office:value-type="string" table:style-name="c8">
            <text:p>2026-03-16 15:30</text:p>
          </table:table-cell>
          <table:table-cell office:value-type="float" office:value="0.13063465000000002" table:style-name="c8">
            <text:p>0.13063</text:p>
          </table:table-cell>
          <table:table-cell office:value-type="float" office:value="-0.6796058261646531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6:45</text:p>
          </table:table-cell>
          <table:table-cell office:value-type="float" office:value="0.13236615" table:style-name="c8">
            <text:p>0.13237</text:p>
          </table:table-cell>
          <table:table-cell office:value-type="string" table:style-name="c8">
            <text:p>2026-03-16 17:15</text:p>
          </table:table-cell>
          <table:table-cell office:value-type="float" office:value="0.13243375000000002" table:style-name="c8">
            <text:p>0.13243</text:p>
          </table:table-cell>
          <table:table-cell office:value-type="float" office:value="-0.14893163112318364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7:30</text:p>
          </table:table-cell>
          <table:table-cell office:value-type="float" office:value="0.13596794999999998" table:style-name="c8">
            <text:p>0.13597</text:p>
          </table:table-cell>
          <table:table-cell office:value-type="string" table:style-name="c8">
            <text:p>2026-03-17 08:00</text:p>
          </table:table-cell>
          <table:table-cell office:value-type="float" office:value="0.1353323" table:style-name="c8">
            <text:p>0.13533</text:p>
          </table:table-cell>
          <table:table-cell office:value-type="float" office:value="-0.6664653454729552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8:15</text:p>
          </table:table-cell>
          <table:table-cell office:value-type="float" office:value="0.13556775000000001" table:style-name="c8">
            <text:p>0.13557</text:p>
          </table:table-cell>
          <table:table-cell office:value-type="string" table:style-name="c8">
            <text:p>2026-03-17 08:45</text:p>
          </table:table-cell>
          <table:table-cell office:value-type="float" office:value="0.13543225" table:style-name="c8">
            <text:p>0.13543</text:p>
          </table:table-cell>
          <table:table-cell office:value-type="float" office:value="-0.2996502248875821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08:00</text:p>
          </table:table-cell>
          <table:table-cell office:value-type="float" office:value="0.1086543" table:style-name="c8">
            <text:p>0.10865</text:p>
          </table:table-cell>
          <table:table-cell office:value-type="string" table:style-name="c8">
            <text:p>2026-03-30 08:30</text:p>
          </table:table-cell>
          <table:table-cell office:value-type="float" office:value="0.1083458" table:style-name="c8">
            <text:p>0.10835</text:p>
          </table:table-cell>
          <table:table-cell office:value-type="float" office:value="-0.48326044546785907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2:30</text:p>
          </table:table-cell>
          <table:table-cell office:value-type="float" office:value="0.10885439999999999" table:style-name="c8">
            <text:p>0.10885</text:p>
          </table:table-cell>
          <table:table-cell office:value-type="string" table:style-name="c8">
            <text:p>2026-03-30 13:00</text:p>
          </table:table-cell>
          <table:table-cell office:value-type="float" office:value="0.10914540000000002" table:style-name="c8">
            <text:p>0.10915</text:p>
          </table:table-cell>
          <table:table-cell office:value-type="float" office:value="0.06689517869742367" table:style-name="c10">
            <text:p>+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7:00</text:p>
          </table:table-cell>
          <table:table-cell office:value-type="float" office:value="0.1090545" table:style-name="c8">
            <text:p>0.10905</text:p>
          </table:table-cell>
          <table:table-cell office:value-type="string" table:style-name="c8">
            <text:p>2026-03-31 07:30</text:p>
          </table:table-cell>
          <table:table-cell office:value-type="float" office:value="0.107946" table:style-name="c8">
            <text:p>0.10795</text:p>
          </table:table-cell>
          <table:table-cell office:value-type="float" office:value="-1.2143323329161015" table:style-name="c9">
            <text:p>-1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45</text:p>
          </table:table-cell>
          <table:table-cell office:value-type="float" office:value="0.112056" table:style-name="c8">
            <text:p>0.11206</text:p>
          </table:table-cell>
          <table:table-cell office:value-type="string" table:style-name="c8">
            <text:p>2026-04-01 06:15</text:p>
          </table:table-cell>
          <table:table-cell office:value-type="float" office:value="0.111944" table:style-name="c8">
            <text:p>0.11194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7:45</text:p>
          </table:table-cell>
          <table:table-cell office:value-type="float" office:value="0.1128564" table:style-name="c8">
            <text:p>0.11286</text:p>
          </table:table-cell>
          <table:table-cell office:value-type="string" table:style-name="c8">
            <text:p>2026-04-01 08:15</text:p>
          </table:table-cell>
          <table:table-cell office:value-type="float" office:value="0.11254370000000001" table:style-name="c8">
            <text:p>0.11254</text:p>
          </table:table-cell>
          <table:table-cell office:value-type="float" office:value="-0.476423894701572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45</text:p>
          </table:table-cell>
          <table:table-cell office:value-type="float" office:value="0.11315655" table:style-name="c8">
            <text:p>0.11316</text:p>
          </table:table-cell>
          <table:table-cell office:value-type="string" table:style-name="c8">
            <text:p>2026-04-01 13:15</text:p>
          </table:table-cell>
          <table:table-cell office:value-type="float" office:value="0.111944" table:style-name="c8">
            <text:p>0.11194</text:p>
          </table:table-cell>
          <table:table-cell office:value-type="float" office:value="-1.2693264826472594" table:style-name="c9">
            <text:p>-1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20:15</text:p>
          </table:table-cell>
          <table:table-cell office:value-type="float" office:value="0.11075535" table:style-name="c8">
            <text:p>0.11076</text:p>
          </table:table-cell>
          <table:table-cell office:value-type="string" table:style-name="c8">
            <text:p>2026-04-03 20:45</text:p>
          </table:table-cell>
          <table:table-cell office:value-type="float" office:value="0.11024485" table:style-name="c8">
            <text:p>0.11024</text:p>
          </table:table-cell>
          <table:table-cell office:value-type="float" office:value="-0.6599044246169639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00</text:p>
          </table:table-cell>
          <table:table-cell office:value-type="float" office:value="0.11335664999999999" table:style-name="c8">
            <text:p>0.11336</text:p>
          </table:table-cell>
          <table:table-cell office:value-type="string" table:style-name="c8">
            <text:p>2026-04-06 10:30</text:p>
          </table:table-cell>
          <table:table-cell office:value-type="float" office:value="0.11404295" table:style-name="c8">
            <text:p>0.11404</text:p>
          </table:table-cell>
          <table:table-cell office:value-type="float" office:value="0.40432400123857626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1:00</text:p>
          </table:table-cell>
          <table:table-cell office:value-type="float" office:value="0.11425709999999999" table:style-name="c8">
            <text:p>0.11426</text:p>
          </table:table-cell>
          <table:table-cell office:value-type="string" table:style-name="c8">
            <text:p>2026-04-06 11:30</text:p>
          </table:table-cell>
          <table:table-cell office:value-type="float" office:value="0.11424285" table:style-name="c8">
            <text:p>0.11424</text:p>
          </table:table-cell>
          <table:table-cell office:value-type="float" office:value="-0.2123469413716661" table:style-name="c9">
            <text:p>-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08:15</text:p>
          </table:table-cell>
          <table:table-cell office:value-type="float" office:value="0.1102551" table:style-name="c8">
            <text:p>0.11026</text:p>
          </table:table-cell>
          <table:table-cell office:value-type="string" table:style-name="c8">
            <text:p>2026-04-07 08:45</text:p>
          </table:table-cell>
          <table:table-cell office:value-type="float" office:value="0.10984505" table:style-name="c8">
            <text:p>0.10985</text:p>
          </table:table-cell>
          <table:table-cell office:value-type="float" office:value="-0.5710667850738815" table:style-name="c9">
            <text:p>-0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45</text:p>
          </table:table-cell>
          <table:table-cell office:value-type="float" office:value="0.11635815" table:style-name="c8">
            <text:p>0.11636</text:p>
          </table:table-cell>
          <table:table-cell office:value-type="string" table:style-name="c8">
            <text:p>2026-04-07 23:15</text:p>
          </table:table-cell>
          <table:table-cell office:value-type="float" office:value="0.1175412" table:style-name="c8">
            <text:p>0.11754</text:p>
          </table:table-cell>
          <table:table-cell office:value-type="float" office:value="0.8147990847224618" table:style-name="c10">
            <text:p>+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30</text:p>
          </table:table-cell>
          <table:table-cell office:value-type="float" office:value="0.11915954999999999" table:style-name="c8">
            <text:p>0.11916</text:p>
          </table:table-cell>
          <table:table-cell office:value-type="string" table:style-name="c8">
            <text:p>2026-04-08 00:00</text:p>
          </table:table-cell>
          <table:table-cell office:value-type="float" office:value="0.11874060000000002" table:style-name="c8">
            <text:p>0.11874</text:p>
          </table:table-cell>
          <table:table-cell office:value-type="float" office:value="-0.5507846071926004" table:style-name="c9">
            <text:p>-0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04:15</text:p>
          </table:table-cell>
          <table:table-cell office:value-type="float" office:value="0.12016004999999999" table:style-name="c8">
            <text:p>0.12016</text:p>
          </table:table-cell>
          <table:table-cell office:value-type="string" table:style-name="c8">
            <text:p>2026-04-08 04:45</text:p>
          </table:table-cell>
          <table:table-cell office:value-type="float" office:value="0.1205397" table:style-name="c8">
            <text:p>0.12054</text:p>
          </table:table-cell>
          <table:table-cell office:value-type="float" office:value="0.11542200564997884" table:style-name="c10">
            <text:p>+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17:15</text:p>
          </table:table-cell>
          <table:table-cell office:value-type="float" office:value="0.1176588" table:style-name="c8">
            <text:p>0.11766</text:p>
          </table:table-cell>
          <table:table-cell office:value-type="string" table:style-name="c8">
            <text:p>2026-04-08 17:45</text:p>
          </table:table-cell>
          <table:table-cell office:value-type="float" office:value="0.11664165" table:style-name="c8">
            <text:p>0.11664</text:p>
          </table:table-cell>
          <table:table-cell office:value-type="float" office:value="-1.062663105819528" table:style-name="c9">
            <text:p>-1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00</text:p>
          </table:table-cell>
          <table:table-cell office:value-type="float" office:value="0.1164582" table:style-name="c8">
            <text:p>0.11646</text:p>
          </table:table-cell>
          <table:table-cell office:value-type="string" table:style-name="c8">
            <text:p>2026-04-13 23:30</text:p>
          </table:table-cell>
          <table:table-cell office:value-type="float" office:value="0.11584205000000002" table:style-name="c8">
            <text:p>0.11584</text:p>
          </table:table-cell>
          <table:table-cell office:value-type="float" office:value="-0.7279163321689319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45</text:p>
          </table:table-cell>
          <table:table-cell office:value-type="float" office:value="0.116058" table:style-name="c8">
            <text:p>0.11606</text:p>
          </table:table-cell>
          <table:table-cell office:value-type="string" table:style-name="c8">
            <text:p>2026-04-14 00:15</text:p>
          </table:table-cell>
          <table:table-cell office:value-type="float" office:value="0.11584205000000002" table:style-name="c8">
            <text:p>0.11584</text:p>
          </table:table-cell>
          <table:table-cell office:value-type="float" office:value="-0.3855988022798851" table:style-name="c9">
            <text:p>-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4:45</text:p>
          </table:table-cell>
          <table:table-cell office:value-type="float" office:value="0.11535764999999999" table:style-name="c8">
            <text:p>0.11536</text:p>
          </table:table-cell>
          <table:table-cell office:value-type="string" table:style-name="c8">
            <text:p>2026-04-14 15:15</text:p>
          </table:table-cell>
          <table:table-cell office:value-type="float" office:value="0.1131434" table:style-name="c8">
            <text:p>0.11314</text:p>
          </table:table-cell>
          <table:table-cell office:value-type="float" office:value="-2.11552823466844" table:style-name="c9">
            <text:p>-2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0:15</text:p>
          </table:table-cell>
          <table:table-cell office:value-type="float" office:value="0.11395695" table:style-name="c8">
            <text:p>0.11396</text:p>
          </table:table-cell>
          <table:table-cell office:value-type="string" table:style-name="c8">
            <text:p>2026-04-15 10:45</text:p>
          </table:table-cell>
          <table:table-cell office:value-type="float" office:value="0.11394300000000002" table:style-name="c8">
            <text:p>0.11394</text:p>
          </table:table-cell>
          <table:table-cell office:value-type="float" office:value="-0.21211699418068886" table:style-name="c9">
            <text:p>-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1:45</text:p>
          </table:table-cell>
          <table:table-cell office:value-type="float" office:value="0.11515754999999998" table:style-name="c8">
            <text:p>0.11516</text:p>
          </table:table-cell>
          <table:table-cell office:value-type="string" table:style-name="c8">
            <text:p>2026-04-15 12:15</text:p>
          </table:table-cell>
          <table:table-cell office:value-type="float" office:value="0.1151424" table:style-name="c8">
            <text:p>0.11514</text:p>
          </table:table-cell>
          <table:table-cell office:value-type="float" office:value="-0.21302959085180984" table:style-name="c9">
            <text:p>-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30</text:p>
          </table:table-cell>
          <table:table-cell office:value-type="float" office:value="0.11555775" table:style-name="c8">
            <text:p>0.11556</text:p>
          </table:table-cell>
          <table:table-cell office:value-type="string" table:style-name="c8">
            <text:p>2026-04-15 13:00</text:p>
          </table:table-cell>
          <table:table-cell office:value-type="float" office:value="0.11604195" table:style-name="c8">
            <text:p>0.11604</text:p>
          </table:table-cell>
          <table:table-cell office:value-type="float" office:value="0.21827367004809695" table:style-name="c10">
            <text:p>+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5:00</text:p>
          </table:table-cell>
          <table:table-cell office:value-type="float" office:value="0.1176588" table:style-name="c8">
            <text:p>0.11766</text:p>
          </table:table-cell>
          <table:table-cell office:value-type="string" table:style-name="c8">
            <text:p>2026-04-15 15:30</text:p>
          </table:table-cell>
          <table:table-cell office:value-type="float" office:value="0.11644175000000001" table:style-name="c8">
            <text:p>0.11644</text:p>
          </table:table-cell>
          <table:table-cell office:value-type="float" office:value="-1.2322215238043999" table:style-name="c9">
            <text:p>-1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6:15</text:p>
          </table:table-cell>
          <table:table-cell office:value-type="float" office:value="0.11815904999999999" table:style-name="c8">
            <text:p>0.11816</text:p>
          </table:table-cell>
          <table:table-cell office:value-type="string" table:style-name="c8">
            <text:p>2026-04-15 16:45</text:p>
          </table:table-cell>
          <table:table-cell office:value-type="float" office:value="0.11924035000000001" table:style-name="c8">
            <text:p>0.11924</text:p>
          </table:table-cell>
          <table:table-cell office:value-type="float" office:value="0.7133931259180049" table:style-name="c10">
            <text:p>+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15</text:p>
          </table:table-cell>
          <table:table-cell office:value-type="float" office:value="0.1206603" table:style-name="c8">
            <text:p>0.12066</text:p>
          </table:table-cell>
          <table:table-cell office:value-type="string" table:style-name="c8">
            <text:p>2026-04-16 02:45</text:p>
          </table:table-cell>
          <table:table-cell office:value-type="float" office:value="0.12123935000000001" table:style-name="c8">
            <text:p>0.12124</text:p>
          </table:table-cell>
          <table:table-cell office:value-type="float" office:value="0.2790416892300307" table:style-name="c10">
            <text:p>+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5:30</text:p>
          </table:table-cell>
          <table:table-cell office:value-type="float" office:value="0.1222611" table:style-name="c8">
            <text:p>0.12226</text:p>
          </table:table-cell>
          <table:table-cell office:value-type="string" table:style-name="c8">
            <text:p>2026-04-16 06:00</text:p>
          </table:table-cell>
          <table:table-cell office:value-type="float" office:value="0.12263865000000002" table:style-name="c8">
            <text:p>0.12264</text:p>
          </table:table-cell>
          <table:table-cell office:value-type="float" office:value="0.10828901314481332" table:style-name="c10">
            <text:p>+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7:30</text:p>
          </table:table-cell>
          <table:table-cell office:value-type="float" office:value="0.1232616" table:style-name="c8">
            <text:p>0.12326</text:p>
          </table:table-cell>
          <table:table-cell office:value-type="string" table:style-name="c8">
            <text:p>2026-04-16 08:00</text:p>
          </table:table-cell>
          <table:table-cell office:value-type="float" office:value="0.12263865000000002" table:style-name="c8">
            <text:p>0.12264</text:p>
          </table:table-cell>
          <table:table-cell office:value-type="float" office:value="-0.7042782678060133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00</text:p>
          </table:table-cell>
          <table:table-cell office:value-type="float" office:value="0.1232616" table:style-name="c8">
            <text:p>0.12326</text:p>
          </table:table-cell>
          <table:table-cell office:value-type="string" table:style-name="c8">
            <text:p>2026-04-16 12:30</text:p>
          </table:table-cell>
          <table:table-cell office:value-type="float" office:value="0.12523735" table:style-name="c8">
            <text:p>0.12524</text:p>
          </table:table-cell>
          <table:table-cell office:value-type="float" office:value="1.3997875553700467" table:style-name="c10">
            <text:p>+1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30</text:p>
          </table:table-cell>
          <table:table-cell office:value-type="float" office:value="0.1276638" table:style-name="c8">
            <text:p>0.12766</text:p>
          </table:table-cell>
          <table:table-cell office:value-type="string" table:style-name="c8">
            <text:p>2026-04-16 16:00</text:p>
          </table:table-cell>
          <table:table-cell office:value-type="float" office:value="0.1305347" table:style-name="c8">
            <text:p>0.13053</text:p>
          </table:table-cell>
          <table:table-cell office:value-type="float" office:value="2.0444018858125856" table:style-name="c10">
            <text:p>+2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9:15</text:p>
          </table:table-cell>
          <table:table-cell office:value-type="float" office:value="0.13116555" table:style-name="c8">
            <text:p>0.13117</text:p>
          </table:table-cell>
          <table:table-cell office:value-type="string" table:style-name="c8">
            <text:p>2026-04-16 19:45</text:p>
          </table:table-cell>
          <table:table-cell office:value-type="float" office:value="0.13193400000000002" table:style-name="c8">
            <text:p>0.13193</text:p>
          </table:table-cell>
          <table:table-cell office:value-type="float" office:value="0.3847915355823517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0.1282641" table:style-name="c8">
            <text:p>0.12826</text:p>
          </table:table-cell>
          <table:table-cell office:value-type="string" table:style-name="c8">
            <text:p>2026-04-22 06:00</text:p>
          </table:table-cell>
          <table:table-cell office:value-type="float" office:value="0.1275362" table:style-name="c8">
            <text:p>0.12754</text:p>
          </table:table-cell>
          <table:table-cell office:value-type="float" office:value="-0.766266526487136" table:style-name="c9">
            <text:p>-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16:00</text:p>
          </table:table-cell>
          <table:table-cell office:value-type="float" office:value="0.12416205" table:style-name="c8">
            <text:p>0.12416</text:p>
          </table:table-cell>
          <table:table-cell office:value-type="string" table:style-name="c8">
            <text:p>2026-04-24 16:30</text:p>
          </table:table-cell>
          <table:table-cell office:value-type="float" office:value="0.12363815000000002" table:style-name="c8">
            <text:p>0.12364</text:p>
          </table:table-cell>
          <table:table-cell office:value-type="float" office:value="-0.6210050992634164" table:style-name="c9">
            <text:p>-0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20:00</text:p>
          </table:table-cell>
          <table:table-cell office:value-type="float" office:value="0.1252626" table:style-name="c8">
            <text:p>0.12526</text:p>
          </table:table-cell>
          <table:table-cell office:value-type="string" table:style-name="c8">
            <text:p>2026-04-24 20:30</text:p>
          </table:table-cell>
          <table:table-cell office:value-type="float" office:value="0.12453770000000002" table:style-name="c8">
            <text:p>0.12454</text:p>
          </table:table-cell>
          <table:table-cell office:value-type="float" office:value="-0.7774474282826516" table:style-name="c9">
            <text:p>-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1:45</text:p>
          </table:table-cell>
          <table:table-cell office:value-type="float" office:value="0.1270635" table:style-name="c8">
            <text:p>0.12706</text:p>
          </table:table-cell>
          <table:table-cell office:value-type="string" table:style-name="c8">
            <text:p>2026-04-25 02:15</text:p>
          </table:table-cell>
          <table:table-cell office:value-type="float" office:value="0.12663665000000002" table:style-name="c8">
            <text:p>0.12664</text:p>
          </table:table-cell>
          <table:table-cell office:value-type="float" office:value="-0.5351628621515836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4:15</text:p>
          </table:table-cell>
          <table:table-cell office:value-type="float" office:value="0.12856425" table:style-name="c8">
            <text:p>0.12856</text:p>
          </table:table-cell>
          <table:table-cell office:value-type="string" table:style-name="c8">
            <text:p>2026-04-25 04:45</text:p>
          </table:table-cell>
          <table:table-cell office:value-type="float" office:value="0.12823585" table:style-name="c8">
            <text:p>0.12824</text:p>
          </table:table-cell>
          <table:table-cell office:value-type="float" office:value="-0.45482586656085955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9:00</text:p>
          </table:table-cell>
          <table:table-cell office:value-type="float" office:value="0.13246619999999998" table:style-name="c8">
            <text:p>0.13247</text:p>
          </table:table-cell>
          <table:table-cell office:value-type="string" table:style-name="c8">
            <text:p>2026-04-25 09:30</text:p>
          </table:table-cell>
          <table:table-cell office:value-type="float" office:value="0.13063465000000002" table:style-name="c8">
            <text:p>0.13063</text:p>
          </table:table-cell>
          <table:table-cell office:value-type="float" office:value="-1.5797906676193407" table:style-name="c9">
            <text:p>-1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23:15</text:p>
          </table:table-cell>
          <table:table-cell office:value-type="float" office:value="0.1252626" table:style-name="c8">
            <text:p>0.12526</text:p>
          </table:table-cell>
          <table:table-cell office:value-type="string" table:style-name="c8">
            <text:p>2026-04-25 23:45</text:p>
          </table:table-cell>
          <table:table-cell office:value-type="float" office:value="0.1251374" table:style-name="c8">
            <text:p>0.12514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05:15</text:p>
          </table:table-cell>
          <table:table-cell office:value-type="float" office:value="0.1256628" table:style-name="c8">
            <text:p>0.12566</text:p>
          </table:table-cell>
          <table:table-cell office:value-type="string" table:style-name="c8">
            <text:p>2026-04-26 05:45</text:p>
          </table:table-cell>
          <table:table-cell office:value-type="float" office:value="0.1253373" table:style-name="c8">
            <text:p>0.12534</text:p>
          </table:table-cell>
          <table:table-cell office:value-type="float" office:value="-0.4584087436377171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6 15:45</text:p>
          </table:table-cell>
          <table:table-cell office:value-type="float" office:value="0.1264632" table:style-name="c8">
            <text:p>0.12646</text:p>
          </table:table-cell>
          <table:table-cell office:value-type="string" table:style-name="c8">
            <text:p>2026-04-26 16:15</text:p>
          </table:table-cell>
          <table:table-cell office:value-type="float" office:value="0.12633680000000003" table:style-name="c8">
            <text:p>0.12634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15</text:p>
          </table:table-cell>
          <table:table-cell office:value-type="float" office:value="0.1268634" table:style-name="c8">
            <text:p>0.12686</text:p>
          </table:table-cell>
          <table:table-cell office:value-type="string" table:style-name="c8">
            <text:p>2026-04-27 01:45</text:p>
          </table:table-cell>
          <table:table-cell office:value-type="float" office:value="0.1269365" table:style-name="c8">
            <text:p>0.12694</text:p>
          </table:table-cell>
          <table:table-cell office:value-type="float" office:value="-0.14239415268704203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3:30</text:p>
          </table:table-cell>
          <table:table-cell office:value-type="float" office:value="0.12896444999999998" table:style-name="c8">
            <text:p>0.12896</text:p>
          </table:table-cell>
          <table:table-cell office:value-type="string" table:style-name="c8">
            <text:p>2026-04-27 04:00</text:p>
          </table:table-cell>
          <table:table-cell office:value-type="float" office:value="0.1283358" table:style-name="c8">
            <text:p>0.12834</text:p>
          </table:table-cell>
          <table:table-cell office:value-type="float" office:value="-0.6863854839066041" table:style-name="c9">
            <text:p>-0.7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00</text:p>
          </table:table-cell>
          <table:table-cell office:value-type="float" office:value="0.1252626" table:style-name="c8">
            <text:p>0.12526</text:p>
          </table:table-cell>
          <table:table-cell office:value-type="string" table:style-name="c8">
            <text:p>2026-04-29 10:30</text:p>
          </table:table-cell>
          <table:table-cell office:value-type="float" office:value="0.12563715" table:style-name="c8">
            <text:p>0.12564</text:p>
          </table:table-cell>
          <table:table-cell office:value-type="float" office:value="0.09851411127503873" table:style-name="c10">
            <text:p>+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16:00</text:p>
          </table:table-cell>
          <table:table-cell office:value-type="float" office:value="0.1234617" table:style-name="c8">
            <text:p>0.12346</text:p>
          </table:table-cell>
          <table:table-cell office:value-type="string" table:style-name="c8">
            <text:p>2026-05-02 16:30</text:p>
          </table:table-cell>
          <table:table-cell office:value-type="float" office:value="0.1233383" table:style-name="c8">
            <text:p>0.12334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19:00</text:p>
          </table:table-cell>
          <table:table-cell office:value-type="float" office:value="0.1252626" table:style-name="c8">
            <text:p>0.12526</text:p>
          </table:table-cell>
          <table:table-cell office:value-type="string" table:style-name="c8">
            <text:p>2026-05-02 19:30</text:p>
          </table:table-cell>
          <table:table-cell office:value-type="float" office:value="0.12543725" table:style-name="c8">
            <text:p>0.12544</text:p>
          </table:table-cell>
          <table:table-cell office:value-type="float" office:value="-0.06075162318999183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20:15</text:p>
          </table:table-cell>
          <table:table-cell office:value-type="float" office:value="0.12636314999999998" table:style-name="c8">
            <text:p>0.12636</text:p>
          </table:table-cell>
          <table:table-cell office:value-type="string" table:style-name="c8">
            <text:p>2026-05-02 20:45</text:p>
          </table:table-cell>
          <table:table-cell office:value-type="float" office:value="0.12613690000000002" table:style-name="c8">
            <text:p>0.12614</text:p>
          </table:table-cell>
          <table:table-cell office:value-type="float" office:value="-0.37858953587335265" table:style-name="c9">
            <text:p>-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4:15</text:p>
          </table:table-cell>
          <table:table-cell office:value-type="float" office:value="0.1270635" table:style-name="c8">
            <text:p>0.12706</text:p>
          </table:table-cell>
          <table:table-cell office:value-type="string" table:style-name="c8">
            <text:p>2026-05-04 04:45</text:p>
          </table:table-cell>
          <table:table-cell office:value-type="float" office:value="0.1273363" table:style-name="c8">
            <text:p>0.12734</text:p>
          </table:table-cell>
          <table:table-cell office:value-type="float" office:value="0.014366624797834682" table:style-name="c10">
            <text:p>+0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0.12486239999999998" table:style-name="c8">
            <text:p>0.12486</text:p>
          </table:table-cell>
          <table:table-cell office:value-type="string" table:style-name="c8">
            <text:p>2026-05-04 15:30</text:p>
          </table:table-cell>
          <table:table-cell office:value-type="float" office:value="0.12313840000000001" table:style-name="c8">
            <text:p>0.12314</text:p>
          </table:table-cell>
          <table:table-cell office:value-type="float" office:value="-1.577859837388973" table:style-name="c9">
            <text:p>-1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2:15</text:p>
          </table:table-cell>
          <table:table-cell office:value-type="float" office:value="0.1274637" table:style-name="c8">
            <text:p>0.12746</text:p>
          </table:table-cell>
          <table:table-cell office:value-type="string" table:style-name="c8">
            <text:p>2026-05-05 02:45</text:p>
          </table:table-cell>
          <table:table-cell office:value-type="float" office:value="0.12793600000000002" table:style-name="c8">
            <text:p>0.12794</text:p>
          </table:table-cell>
          <table:table-cell office:value-type="float" office:value="0.16989616337828028" table:style-name="c10">
            <text:p>+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4:15</text:p>
          </table:table-cell>
          <table:table-cell office:value-type="float" office:value="0.12756375" table:style-name="c8">
            <text:p>0.12756</text:p>
          </table:table-cell>
          <table:table-cell office:value-type="string" table:style-name="c8">
            <text:p>2026-05-05 04:45</text:p>
          </table:table-cell>
          <table:table-cell office:value-type="float" office:value="0.12763615" table:style-name="c8">
            <text:p>0.12764</text:p>
          </table:table-cell>
          <table:table-cell office:value-type="float" office:value="-0.14325751935797548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9:00</text:p>
          </table:table-cell>
          <table:table-cell office:value-type="float" office:value="0.12836414999999998" table:style-name="c8">
            <text:p>0.12836</text:p>
          </table:table-cell>
          <table:table-cell office:value-type="string" table:style-name="c8">
            <text:p>2026-05-05 09:30</text:p>
          </table:table-cell>
          <table:table-cell office:value-type="float" office:value="0.12903545" table:style-name="c8">
            <text:p>0.12904</text:p>
          </table:table-cell>
          <table:table-cell office:value-type="float" office:value="0.32201992180058703" table:style-name="c10">
            <text:p>+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0:15</text:p>
          </table:table-cell>
          <table:table-cell office:value-type="float" office:value="0.12936465" table:style-name="c8">
            <text:p>0.12936</text:p>
          </table:table-cell>
          <table:table-cell office:value-type="string" table:style-name="c8">
            <text:p>2026-05-05 20:45</text:p>
          </table:table-cell>
          <table:table-cell office:value-type="float" office:value="0.1297351" table:style-name="c8">
            <text:p>0.12974</text:p>
          </table:table-cell>
          <table:table-cell office:value-type="float" office:value="0.0858886373518386" table:style-name="c10">
            <text:p>+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8:30</text:p>
          </table:table-cell>
          <table:table-cell office:value-type="float" office:value="0.134067" table:style-name="c8">
            <text:p>0.13407</text:p>
          </table:table-cell>
          <table:table-cell office:value-type="string" table:style-name="c8">
            <text:p>2026-05-06 09:00</text:p>
          </table:table-cell>
          <table:table-cell office:value-type="float" office:value="0.13483255" table:style-name="c8">
            <text:p>0.13483</text:p>
          </table:table-cell>
          <table:table-cell office:value-type="float" office:value="0.36997899001993684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3:00</text:p>
          </table:table-cell>
          <table:table-cell office:value-type="float" office:value="0.1372686" table:style-name="c8">
            <text:p>0.13727</text:p>
          </table:table-cell>
          <table:table-cell office:value-type="string" table:style-name="c8">
            <text:p>2026-05-06 13:30</text:p>
          </table:table-cell>
          <table:table-cell office:value-type="float" office:value="0.13513239999999999" table:style-name="c8">
            <text:p>0.13513</text:p>
          </table:table-cell>
          <table:table-cell office:value-type="float" office:value="-1.7530080933294334" table:style-name="c9">
            <text:p>-1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6:00</text:p>
          </table:table-cell>
          <table:table-cell office:value-type="float" office:value="0.13626809999999998" table:style-name="c8">
            <text:p>0.13627</text:p>
          </table:table-cell>
          <table:table-cell office:value-type="string" table:style-name="c8">
            <text:p>2026-05-06 16:30</text:p>
          </table:table-cell>
          <table:table-cell office:value-type="float" office:value="0.13593200000000003" table:style-name="c8">
            <text:p>0.13593</text:p>
          </table:table-cell>
          <table:table-cell office:value-type="float" office:value="-0.44605308799341437" table:style-name="c9">
            <text:p>-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1:30</text:p>
          </table:table-cell>
          <table:table-cell office:value-type="float" office:value="0.1450725" table:style-name="c8">
            <text:p>0.14507</text:p>
          </table:table-cell>
          <table:table-cell office:value-type="string" table:style-name="c8">
            <text:p>2026-05-06 22:00</text:p>
          </table:table-cell>
          <table:table-cell office:value-type="float" office:value="0.14762615" table:style-name="c8">
            <text:p>0.14763</text:p>
          </table:table-cell>
          <table:table-cell office:value-type="float" office:value="1.5568390467869841" table:style-name="c10">
            <text:p>+1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6:00</text:p>
          </table:table-cell>
          <table:table-cell office:value-type="float" office:value="0.1496748" table:style-name="c8">
            <text:p>0.14967</text:p>
          </table:table-cell>
          <table:table-cell office:value-type="string" table:style-name="c8">
            <text:p>2026-05-07 06:30</text:p>
          </table:table-cell>
          <table:table-cell office:value-type="float" office:value="0.14542725" table:style-name="c8">
            <text:p>0.14543</text:p>
          </table:table-cell>
          <table:table-cell office:value-type="float" office:value="-3.0320795970664394" table:style-name="c9">
            <text:p>-3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1:45</text:p>
          </table:table-cell>
          <table:table-cell office:value-type="float" office:value="0.14717355000000001" table:style-name="c8">
            <text:p>0.14717</text:p>
          </table:table-cell>
          <table:table-cell office:value-type="string" table:style-name="c8">
            <text:p>2026-05-07 12:15</text:p>
          </table:table-cell>
          <table:table-cell office:value-type="float" office:value="0.1481259" table:style-name="c8">
            <text:p>0.14813</text:p>
          </table:table-cell>
          <table:table-cell office:value-type="float" office:value="0.4458996374688162" table:style-name="c10">
            <text:p>+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2:30</text:p>
          </table:table-cell>
          <table:table-cell office:value-type="float" office:value="0.1484742" table:style-name="c8">
            <text:p>0.14847</text:p>
          </table:table-cell>
          <table:table-cell office:value-type="string" table:style-name="c8">
            <text:p>2026-05-07 13:00</text:p>
          </table:table-cell>
          <table:table-cell office:value-type="float" office:value="0.14762615" table:style-name="c8">
            <text:p>0.14763</text:p>
          </table:table-cell>
          <table:table-cell office:value-type="float" office:value="-0.769934893638069" table:style-name="c9">
            <text:p>-0.8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7:45</text:p>
          </table:table-cell>
          <table:table-cell office:value-type="float" office:value="0.15897945" table:style-name="c8">
            <text:p>0.15898</text:p>
          </table:table-cell>
          <table:table-cell office:value-type="string" table:style-name="c8">
            <text:p>2026-05-08 18:15</text:p>
          </table:table-cell>
          <table:table-cell office:value-type="float" office:value="0.16341825000000001" table:style-name="c8">
            <text:p>0.16342</text:p>
          </table:table-cell>
          <table:table-cell office:value-type="float" office:value="2.5865776477714597" table:style-name="c10">
            <text:p>+2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3:00</text:p>
          </table:table-cell>
          <table:table-cell office:value-type="float" office:value="0.17478734999999998" table:style-name="c8">
            <text:p>0.17479</text:p>
          </table:table-cell>
          <table:table-cell office:value-type="string" table:style-name="c8">
            <text:p>2026-05-08 23:30</text:p>
          </table:table-cell>
          <table:table-cell office:value-type="float" office:value="0.17321335000000002" table:style-name="c8">
            <text:p>0.17321</text:p>
          </table:table-cell>
          <table:table-cell office:value-type="float" office:value="-1.0986226901717688" table:style-name="c9">
            <text:p>-1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45</text:p>
          </table:table-cell>
          <table:table-cell office:value-type="float" office:value="0.16398195" table:style-name="c8">
            <text:p>0.16398</text:p>
          </table:table-cell>
          <table:table-cell office:value-type="string" table:style-name="c8">
            <text:p>2026-05-11 00:15</text:p>
          </table:table-cell>
          <table:table-cell office:value-type="float" office:value="0.16251870000000002" table:style-name="c8">
            <text:p>0.16252</text:p>
          </table:table-cell>
          <table:table-cell office:value-type="float" office:value="-1.090440064470477" table:style-name="c9">
            <text:p>-1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0:15</text:p>
          </table:table-cell>
          <table:table-cell office:value-type="float" office:value="0.16038015" table:style-name="c8">
            <text:p>0.16038</text:p>
          </table:table-cell>
          <table:table-cell office:value-type="string" table:style-name="c8">
            <text:p>2026-05-11 10:45</text:p>
          </table:table-cell>
          <table:table-cell office:value-type="float" office:value="0.15982005" table:style-name="c8">
            <text:p>0.15982</text:p>
          </table:table-cell>
          <table:table-cell office:value-type="float" office:value="-0.5484346285684616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2:45</text:p>
          </table:table-cell>
          <table:table-cell office:value-type="float" office:value="0.13096544999999998" table:style-name="c8">
            <text:p>0.13097</text:p>
          </table:table-cell>
          <table:table-cell office:value-type="string" table:style-name="c8">
            <text:p>2026-05-21 03:15</text:p>
          </table:table-cell>
          <table:table-cell office:value-type="float" office:value="0.13083455" table:style-name="c8">
            <text:p>0.13083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30</text:p>
          </table:table-cell>
          <table:table-cell office:value-type="float" office:value="0.13066529999999998" table:style-name="c8">
            <text:p>0.13067</text:p>
          </table:table-cell>
          <table:table-cell office:value-type="string" table:style-name="c8">
            <text:p>2026-05-21 09:00</text:p>
          </table:table-cell>
          <table:table-cell office:value-type="float" office:value="0.13013490000000003" table:style-name="c8">
            <text:p>0.13013</text:p>
          </table:table-cell>
          <table:table-cell office:value-type="float" office:value="-0.6050111736627506" table:style-name="c9">
            <text:p>-0.6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8:30</text:p>
          </table:table-cell>
          <table:table-cell office:value-type="float" office:value="0.1348674" table:style-name="c8">
            <text:p>0.13487</text:p>
          </table:table-cell>
          <table:table-cell office:value-type="string" table:style-name="c8">
            <text:p>2026-05-22 09:00</text:p>
          </table:table-cell>
          <table:table-cell office:value-type="float" office:value="0.13383305" table:style-name="c8">
            <text:p>0.13383</text:p>
          </table:table-cell>
          <table:table-cell office:value-type="float" office:value="-0.9653053791724431" table:style-name="c9">
            <text:p>-1.0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13:30</text:p>
          </table:table-cell>
          <table:table-cell office:value-type="float" office:value="0.13626809999999998" table:style-name="c8">
            <text:p>0.13627</text:p>
          </table:table-cell>
          <table:table-cell office:value-type="string" table:style-name="c8">
            <text:p>2026-05-22 14:00</text:p>
          </table:table-cell>
          <table:table-cell office:value-type="float" office:value="0.13593200000000003" table:style-name="c8">
            <text:p>0.13593</text:p>
          </table:table-cell>
          <table:table-cell office:value-type="float" office:value="-0.44605308799341437" table:style-name="c9">
            <text:p>-0.4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00</text:p>
          </table:table-cell>
          <table:table-cell office:value-type="float" office:value="0.13066529999999998" table:style-name="c8">
            <text:p>0.13067</text:p>
          </table:table-cell>
          <table:table-cell office:value-type="string" table:style-name="c8">
            <text:p>2026-05-25 14:30</text:p>
          </table:table-cell>
          <table:table-cell office:value-type="float" office:value="0.13123435" table:style-name="c8">
            <text:p>0.13123</text:p>
          </table:table-cell>
          <table:table-cell office:value-type="float" office:value="0.23473143546912656" table:style-name="c10">
            <text:p>+0.2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7:00</text:p>
          </table:table-cell>
          <table:table-cell office:value-type="float" office:value="0.13216604999999998" table:style-name="c8">
            <text:p>0.13217</text:p>
          </table:table-cell>
          <table:table-cell office:value-type="string" table:style-name="c8">
            <text:p>2026-05-25 17:30</text:p>
          </table:table-cell>
          <table:table-cell office:value-type="float" office:value="0.13183405" table:style-name="c8">
            <text:p>0.13183</text:p>
          </table:table-cell>
          <table:table-cell office:value-type="float" office:value="-0.45059700728740104" table:style-name="c9">
            <text:p>-0.5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30</text:p>
          </table:table-cell>
          <table:table-cell office:value-type="float" office:value="0.12996494999999997" table:style-name="c8">
            <text:p>0.12996</text:p>
          </table:table-cell>
          <table:table-cell office:value-type="string" table:style-name="c8">
            <text:p>2026-05-26 06:00</text:p>
          </table:table-cell>
          <table:table-cell office:value-type="float" office:value="0.13013490000000003" table:style-name="c8">
            <text:p>0.13013</text:p>
          </table:table-cell>
          <table:table-cell office:value-type="float" office:value="-0.06939537552237418" table:style-name="c9">
            <text:p>-0.1</text:p>
          </table:table-cell>
        </table:table-row>
        <table:table-row>
          <table:table-cell office:value-type="string" table:style-name="c7">
            <text:p>OP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0.13336665" table:style-name="c8">
            <text:p>0.13337</text:p>
          </table:table-cell>
          <table:table-cell office:value-type="string" table:style-name="c8">
            <text:p>2026-05-26 11:00</text:p>
          </table:table-cell>
          <table:table-cell office:value-type="float" office:value="0.13363315000000003" table:style-name="c8">
            <text:p>0.13363</text:p>
          </table:table-cell>
          <table:table-cell office:value-type="float" office:value="-0.00047438160137858176" table:style-name="c9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3.56178e-06" table:style-name="c1">
            <text:p>0.0000035618</text:p>
          </table:table-cell>
          <table:table-cell office:value-type="string" table:style-name="c1">
            <text:p>2026-03-04 09:30</text:p>
          </table:table-cell>
          <table:table-cell office:value-type="float" office:value="3.588205e-06" table:style-name="c1">
            <text:p>0.0000035882</text:p>
          </table:table-cell>
          <table:table-cell office:value-type="float" office:value="0.540521261981386" table:style-name="c11">
            <text:p>+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3.58179e-06" table:style-name="c1">
            <text:p>0.0000035818</text:p>
          </table:table-cell>
          <table:table-cell office:value-type="string" table:style-name="c1">
            <text:p>2026-03-04 10:15</text:p>
          </table:table-cell>
          <table:table-cell office:value-type="float" office:value="3.55822e-06" table:style-name="c1">
            <text:p>0.0000035582</text:p>
          </table:table-cell>
          <table:table-cell office:value-type="float" office:value="-0.8566354191619219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3:45</text:p>
          </table:table-cell>
          <table:table-cell office:value-type="float" office:value="3.62181e-06" table:style-name="c1">
            <text:p>0.0000036218</text:p>
          </table:table-cell>
          <table:table-cell office:value-type="string" table:style-name="c1">
            <text:p>2026-03-04 14:15</text:p>
          </table:table-cell>
          <table:table-cell office:value-type="float" office:value="3.628185e-06" table:style-name="c1">
            <text:p>0.0000036282</text:p>
          </table:table-cell>
          <table:table-cell office:value-type="float" office:value="-0.02423489401708334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3.6718349999999996e-06" table:style-name="c1">
            <text:p>0.0000036718</text:p>
          </table:table-cell>
          <table:table-cell office:value-type="string" table:style-name="c1">
            <text:p>2026-03-04 16:00</text:p>
          </table:table-cell>
          <table:table-cell office:value-type="float" office:value="3.7381300000000002e-06" table:style-name="c1">
            <text:p>0.0000037381</text:p>
          </table:table-cell>
          <table:table-cell office:value-type="float" office:value="1.6019913239565753" table:style-name="c11">
            <text:p>+1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30</text:p>
          </table:table-cell>
          <table:table-cell office:value-type="float" office:value="3.6017999999999995e-06" table:style-name="c1">
            <text:p>0.0000036018</text:p>
          </table:table-cell>
          <table:table-cell office:value-type="string" table:style-name="c1">
            <text:p>2026-03-05 11:00</text:p>
          </table:table-cell>
          <table:table-cell office:value-type="float" office:value="3.61819e-06" table:style-name="c1">
            <text:p>0.0000036182</text:p>
          </table:table-cell>
          <table:table-cell office:value-type="float" office:value="0.25424060719640984" table:style-name="c11">
            <text:p>+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15</text:p>
          </table:table-cell>
          <table:table-cell office:value-type="float" office:value="3.611805e-06" table:style-name="c1">
            <text:p>0.0000036118</text:p>
          </table:table-cell>
          <table:table-cell office:value-type="string" table:style-name="c1">
            <text:p>2026-03-05 11:45</text:p>
          </table:table-cell>
          <table:table-cell office:value-type="float" office:value="3.5482250000000002e-06" table:style-name="c1">
            <text:p>0.0000035482</text:p>
          </table:table-cell>
          <table:table-cell office:value-type="float" office:value="-1.9567197502356803" table:style-name="c12">
            <text:p>-2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3.3716849999999996e-06" table:style-name="c1">
            <text:p>0.0000033717</text:p>
          </table:table-cell>
          <table:table-cell office:value-type="string" table:style-name="c1">
            <text:p>2026-03-09 20:00</text:p>
          </table:table-cell>
          <table:table-cell office:value-type="float" office:value="3.3183400000000003e-06" table:style-name="c1">
            <text:p>0.0000033183</text:p>
          </table:table-cell>
          <table:table-cell office:value-type="float" office:value="-1.778883901076156" table:style-name="c12">
            <text:p>-1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45</text:p>
          </table:table-cell>
          <table:table-cell office:value-type="float" office:value="3.4017e-06" table:style-name="c1">
            <text:p>0.0000034017</text:p>
          </table:table-cell>
          <table:table-cell office:value-type="string" table:style-name="c1">
            <text:p>2026-03-10 10:15</text:p>
          </table:table-cell>
          <table:table-cell office:value-type="float" office:value="3.3583200000000002e-06" table:style-name="c1">
            <text:p>0.0000033583</text:p>
          </table:table-cell>
          <table:table-cell office:value-type="float" office:value="-1.4725955163594429" table:style-name="c12">
            <text:p>-1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15</text:p>
          </table:table-cell>
          <table:table-cell office:value-type="float" office:value="3.451725e-06" table:style-name="c1">
            <text:p>0.0000034517</text:p>
          </table:table-cell>
          <table:table-cell office:value-type="string" table:style-name="c1">
            <text:p>2026-03-10 13:45</text:p>
          </table:table-cell>
          <table:table-cell office:value-type="float" office:value="3.3583200000000002e-06" table:style-name="c1">
            <text:p>0.0000033583</text:p>
          </table:table-cell>
          <table:table-cell office:value-type="float" office:value="-2.900528914673073" table:style-name="c12">
            <text:p>-2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15</text:p>
          </table:table-cell>
          <table:table-cell office:value-type="float" office:value="3.4717349999999996e-06" table:style-name="c1">
            <text:p>0.0000034717</text:p>
          </table:table-cell>
          <table:table-cell office:value-type="string" table:style-name="c1">
            <text:p>2026-03-10 15:45</text:p>
          </table:table-cell>
          <table:table-cell office:value-type="float" office:value="3.448275e-06" table:style-name="c1">
            <text:p>0.0000034483</text:p>
          </table:table-cell>
          <table:table-cell office:value-type="float" office:value="-0.8742920103348761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3.3716849999999996e-06" table:style-name="c1">
            <text:p>0.0000033717</text:p>
          </table:table-cell>
          <table:table-cell office:value-type="string" table:style-name="c1">
            <text:p>2026-03-11 18:00</text:p>
          </table:table-cell>
          <table:table-cell office:value-type="float" office:value="3.3583200000000002e-06" table:style-name="c1">
            <text:p>0.0000033583</text:p>
          </table:table-cell>
          <table:table-cell office:value-type="float" office:value="-0.5954969601252746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2:00</text:p>
          </table:table-cell>
          <table:table-cell office:value-type="float" office:value="3.331665e-06" table:style-name="c1">
            <text:p>0.0000033317</text:p>
          </table:table-cell>
          <table:table-cell office:value-type="string" table:style-name="c1">
            <text:p>2026-03-12 12:30</text:p>
          </table:table-cell>
          <table:table-cell office:value-type="float" office:value="3.3383300000000003e-06" table:style-name="c1">
            <text:p>0.0000033383</text:p>
          </table:table-cell>
          <table:table-cell office:value-type="float" office:value="-0.00024977511242640915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2:00</text:p>
          </table:table-cell>
          <table:table-cell office:value-type="float" office:value="3.36168e-06" table:style-name="c1">
            <text:p>0.0000033617</text:p>
          </table:table-cell>
          <table:table-cell office:value-type="string" table:style-name="c1">
            <text:p>2026-03-12 22:30</text:p>
          </table:table-cell>
          <table:table-cell office:value-type="float" office:value="3.3483250000000003e-06" table:style-name="c1">
            <text:p>0.0000033483</text:p>
          </table:table-cell>
          <table:table-cell office:value-type="float" office:value="-0.5963774563610857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3:15</text:p>
          </table:table-cell>
          <table:table-cell office:value-type="float" office:value="3.391695e-06" table:style-name="c1">
            <text:p>0.0000033917</text:p>
          </table:table-cell>
          <table:table-cell office:value-type="string" table:style-name="c1">
            <text:p>2026-03-12 23:45</text:p>
          </table:table-cell>
          <table:table-cell office:value-type="float" office:value="3.3583200000000002e-06" table:style-name="c1">
            <text:p>0.0000033583</text:p>
          </table:table-cell>
          <table:table-cell office:value-type="float" office:value="-1.1819542051982768" table:style-name="c12">
            <text:p>-1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411705e-06" table:style-name="c1">
            <text:p>0.0000034117</text:p>
          </table:table-cell>
          <table:table-cell office:value-type="string" table:style-name="c1">
            <text:p>2026-03-13 01:00</text:p>
          </table:table-cell>
          <table:table-cell office:value-type="float" office:value="3.41829e-06" table:style-name="c1">
            <text:p>0.0000034183</text:p>
          </table:table-cell>
          <table:table-cell office:value-type="float" office:value="-0.007273832585175111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3.4917449999999997e-06" table:style-name="c1">
            <text:p>0.0000034917</text:p>
          </table:table-cell>
          <table:table-cell office:value-type="string" table:style-name="c1">
            <text:p>2026-03-13 10:15</text:p>
          </table:table-cell>
          <table:table-cell office:value-type="float" office:value="3.508245e-06" table:style-name="c1">
            <text:p>0.0000035082</text:p>
          </table:table-cell>
          <table:table-cell office:value-type="float" office:value="0.2716984844254089" table:style-name="c11">
            <text:p>+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15</text:p>
          </table:table-cell>
          <table:table-cell office:value-type="float" office:value="3.571785e-06" table:style-name="c1">
            <text:p>0.0000035718</text:p>
          </table:table-cell>
          <table:table-cell office:value-type="string" table:style-name="c1">
            <text:p>2026-03-13 11:45</text:p>
          </table:table-cell>
          <table:table-cell office:value-type="float" office:value="3.5982e-06" table:style-name="c1">
            <text:p>0.0000035982</text:p>
          </table:table-cell>
          <table:table-cell office:value-type="float" office:value="0.5381678404495327" table:style-name="c11">
            <text:p>+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3.611805e-06" table:style-name="c1">
            <text:p>0.0000036118</text:p>
          </table:table-cell>
          <table:table-cell office:value-type="string" table:style-name="c1">
            <text:p>2026-03-13 12:30</text:p>
          </table:table-cell>
          <table:table-cell office:value-type="float" office:value="3.588205e-06" table:style-name="c1">
            <text:p>0.0000035882</text:p>
          </table:table-cell>
          <table:table-cell office:value-type="float" office:value="-0.8520067333369297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3.611805e-06" table:style-name="c1">
            <text:p>0.0000036118</text:p>
          </table:table-cell>
          <table:table-cell office:value-type="string" table:style-name="c1">
            <text:p>2026-03-13 13:30</text:p>
          </table:table-cell>
          <table:table-cell office:value-type="float" office:value="3.55822e-06" table:style-name="c1">
            <text:p>0.0000035582</text:p>
          </table:table-cell>
          <table:table-cell office:value-type="float" office:value="-1.680541496011012" table:style-name="c12">
            <text:p>-1.7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2:30</text:p>
          </table:table-cell>
          <table:table-cell office:value-type="float" office:value="3.4017e-06" table:style-name="c1">
            <text:p>0.0000034017</text:p>
          </table:table-cell>
          <table:table-cell office:value-type="string" table:style-name="c1">
            <text:p>2026-03-14 03:00</text:p>
          </table:table-cell>
          <table:table-cell office:value-type="float" office:value="3.41829e-06" table:style-name="c1">
            <text:p>0.0000034183</text:p>
          </table:table-cell>
          <table:table-cell office:value-type="float" office:value="0.28682242084840937" table:style-name="c11">
            <text:p>+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3.4417199999999997e-06" table:style-name="c1">
            <text:p>0.0000034417</text:p>
          </table:table-cell>
          <table:table-cell office:value-type="string" table:style-name="c1">
            <text:p>2026-03-15 23:30</text:p>
          </table:table-cell>
          <table:table-cell office:value-type="float" office:value="3.41829e-06" table:style-name="c1">
            <text:p>0.0000034183</text:p>
          </table:table-cell>
          <table:table-cell office:value-type="float" office:value="-0.8793034212544626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3.5917949999999997e-06" table:style-name="c1">
            <text:p>0.0000035918</text:p>
          </table:table-cell>
          <table:table-cell office:value-type="string" table:style-name="c1">
            <text:p>2026-03-16 04:15</text:p>
          </table:table-cell>
          <table:table-cell office:value-type="float" office:value="3.6481750000000004e-06" table:style-name="c1">
            <text:p>0.0000036482</text:p>
          </table:table-cell>
          <table:table-cell office:value-type="float" office:value="1.3666508855600057" table:style-name="c11">
            <text:p>+1.4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3.6718349999999996e-06" table:style-name="c1">
            <text:p>0.0000036718</text:p>
          </table:table-cell>
          <table:table-cell office:value-type="string" table:style-name="c1">
            <text:p>2026-03-16 05:30</text:p>
          </table:table-cell>
          <table:table-cell office:value-type="float" office:value="3.7281350000000003e-06" table:style-name="c1">
            <text:p>0.0000037281</text:p>
          </table:table-cell>
          <table:table-cell office:value-type="float" office:value="1.3303282455502607" table:style-name="c11">
            <text:p>+1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00</text:p>
          </table:table-cell>
          <table:table-cell office:value-type="float" office:value="3.7318649999999995e-06" table:style-name="c1">
            <text:p>0.0000037319</text:p>
          </table:table-cell>
          <table:table-cell office:value-type="string" table:style-name="c1">
            <text:p>2026-03-17 19:30</text:p>
          </table:table-cell>
          <table:table-cell office:value-type="float" office:value="3.7181400000000003e-06" table:style-name="c1">
            <text:p>0.0000037181</text:p>
          </table:table-cell>
          <table:table-cell office:value-type="float" office:value="-0.5669433878235042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5:15</text:p>
          </table:table-cell>
          <table:table-cell office:value-type="float" office:value="3.5517749999999995e-06" table:style-name="c1">
            <text:p>0.0000035518</text:p>
          </table:table-cell>
          <table:table-cell office:value-type="string" table:style-name="c1">
            <text:p>2026-03-23 15:45</text:p>
          </table:table-cell>
          <table:table-cell office:value-type="float" office:value="3.4782600000000004e-06" table:style-name="c1">
            <text:p>0.0000034783</text:p>
          </table:table-cell>
          <table:table-cell office:value-type="float" office:value="-2.2655726148193223" table:style-name="c12">
            <text:p>-2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8:45</text:p>
          </table:table-cell>
          <table:table-cell office:value-type="float" office:value="3.4217099999999996e-06" table:style-name="c1">
            <text:p>0.0000034217</text:p>
          </table:table-cell>
          <table:table-cell office:value-type="string" table:style-name="c1">
            <text:p>2026-03-24 19:15</text:p>
          </table:table-cell>
          <table:table-cell office:value-type="float" office:value="3.4382800000000005e-06" table:style-name="c1">
            <text:p>0.0000034383</text:p>
          </table:table-cell>
          <table:table-cell office:value-type="float" office:value="0.2833927562534866" table:style-name="c11">
            <text:p>+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9:30</text:p>
          </table:table-cell>
          <table:table-cell office:value-type="float" office:value="3.4417199999999997e-06" table:style-name="c1">
            <text:p>0.0000034417</text:p>
          </table:table-cell>
          <table:table-cell office:value-type="string" table:style-name="c1">
            <text:p>2026-03-24 20:00</text:p>
          </table:table-cell>
          <table:table-cell office:value-type="float" office:value="3.4282850000000005e-06" table:style-name="c1">
            <text:p>0.0000034283</text:p>
          </table:table-cell>
          <table:table-cell office:value-type="float" office:value="-0.5894768230710001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3.4917449999999997e-06" table:style-name="c1">
            <text:p>0.0000034917</text:p>
          </table:table-cell>
          <table:table-cell office:value-type="string" table:style-name="c1">
            <text:p>2026-03-24 21:15</text:p>
          </table:table-cell>
          <table:table-cell office:value-type="float" office:value="3.468265e-06" table:style-name="c1">
            <text:p>0.0000034683</text:p>
          </table:table-cell>
          <table:table-cell office:value-type="float" office:value="-0.8709989342005175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15</text:p>
          </table:table-cell>
          <table:table-cell office:value-type="float" office:value="3.571785e-06" table:style-name="c1">
            <text:p>0.0000035718</text:p>
          </table:table-cell>
          <table:table-cell office:value-type="string" table:style-name="c1">
            <text:p>2026-03-25 05:45</text:p>
          </table:table-cell>
          <table:table-cell office:value-type="float" office:value="3.55822e-06" table:style-name="c1">
            <text:p>0.0000035582</text:p>
          </table:table-cell>
          <table:table-cell office:value-type="float" office:value="-0.5789229133332685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30</text:p>
          </table:table-cell>
          <table:table-cell office:value-type="float" office:value="3.6017999999999995e-06" table:style-name="c1">
            <text:p>0.0000036018</text:p>
          </table:table-cell>
          <table:table-cell office:value-type="string" table:style-name="c1">
            <text:p>2026-03-25 07:00</text:p>
          </table:table-cell>
          <table:table-cell office:value-type="float" office:value="3.5982e-06" table:style-name="c1">
            <text:p>0.0000035982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531765e-06" table:style-name="c1">
            <text:p>0.0000035318</text:p>
          </table:table-cell>
          <table:table-cell office:value-type="string" table:style-name="c1">
            <text:p>2026-03-25 23:15</text:p>
          </table:table-cell>
          <table:table-cell office:value-type="float" office:value="3.5282350000000003e-06" table:style-name="c1">
            <text:p>0.000003528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00:00</text:p>
          </table:table-cell>
          <table:table-cell office:value-type="float" office:value="3.5517749999999995e-06" table:style-name="c1">
            <text:p>0.0000035518</text:p>
          </table:table-cell>
          <table:table-cell office:value-type="string" table:style-name="c1">
            <text:p>2026-03-26 00:30</text:p>
          </table:table-cell>
          <table:table-cell office:value-type="float" office:value="3.5282350000000003e-06" table:style-name="c1">
            <text:p>0.0000035282</text:p>
          </table:table-cell>
          <table:table-cell office:value-type="float" office:value="-0.8613423362966222" table:style-name="c12">
            <text:p>-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3.4017e-06" table:style-name="c1">
            <text:p>0.0000034017</text:p>
          </table:table-cell>
          <table:table-cell office:value-type="string" table:style-name="c1">
            <text:p>2026-03-30 08:30</text:p>
          </table:table-cell>
          <table:table-cell office:value-type="float" office:value="3.3983e-06" table:style-name="c1">
            <text:p>0.0000033983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2:30</text:p>
          </table:table-cell>
          <table:table-cell office:value-type="float" office:value="3.351675e-06" table:style-name="c1">
            <text:p>0.0000033517</text:p>
          </table:table-cell>
          <table:table-cell office:value-type="string" table:style-name="c1">
            <text:p>2026-03-30 23:00</text:p>
          </table:table-cell>
          <table:table-cell office:value-type="float" office:value="3.3383300000000003e-06" table:style-name="c1">
            <text:p>0.0000033383</text:p>
          </table:table-cell>
          <table:table-cell office:value-type="float" office:value="-0.5972632092908658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3:45</text:p>
          </table:table-cell>
          <table:table-cell office:value-type="float" office:value="3.351675e-06" table:style-name="c1">
            <text:p>0.0000033517</text:p>
          </table:table-cell>
          <table:table-cell office:value-type="string" table:style-name="c1">
            <text:p>2026-03-31 14:15</text:p>
          </table:table-cell>
          <table:table-cell office:value-type="float" office:value="3.3583200000000002e-06" table:style-name="c1">
            <text:p>0.0000033583</text:p>
          </table:table-cell>
          <table:table-cell office:value-type="float" office:value="-0.002037240484231706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30</text:p>
          </table:table-cell>
          <table:table-cell office:value-type="float" office:value="3.3816899999999995e-06" table:style-name="c1">
            <text:p>0.0000033817</text:p>
          </table:table-cell>
          <table:table-cell office:value-type="string" table:style-name="c1">
            <text:p>2026-03-31 15:00</text:p>
          </table:table-cell>
          <table:table-cell office:value-type="float" office:value="3.3383300000000003e-06" table:style-name="c1">
            <text:p>0.0000033383</text:p>
          </table:table-cell>
          <table:table-cell office:value-type="float" office:value="-1.4795360210427044" table:style-name="c12">
            <text:p>-1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3.511755e-06" table:style-name="c1">
            <text:p>0.0000035118</text:p>
          </table:table-cell>
          <table:table-cell office:value-type="string" table:style-name="c1">
            <text:p>2026-04-01 06:45</text:p>
          </table:table-cell>
          <table:table-cell office:value-type="float" office:value="3.5182400000000003e-06" table:style-name="c1">
            <text:p>0.0000035182</text:p>
          </table:table-cell>
          <table:table-cell office:value-type="float" office:value="-0.015603644331674271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00</text:p>
          </table:table-cell>
          <table:table-cell office:value-type="float" office:value="3.52176e-06" table:style-name="c1">
            <text:p>0.0000035218</text:p>
          </table:table-cell>
          <table:table-cell office:value-type="string" table:style-name="c1">
            <text:p>2026-04-01 07:30</text:p>
          </table:table-cell>
          <table:table-cell office:value-type="float" office:value="3.4882550000000004e-06" table:style-name="c1">
            <text:p>0.0000034883</text:p>
          </table:table-cell>
          <table:table-cell office:value-type="float" office:value="-1.149369115016341" table:style-name="c12">
            <text:p>-1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7:00</text:p>
          </table:table-cell>
          <table:table-cell office:value-type="float" office:value="3.46173e-06" table:style-name="c1">
            <text:p>0.0000034617</text:p>
          </table:table-cell>
          <table:table-cell office:value-type="string" table:style-name="c1">
            <text:p>2026-04-03 07:30</text:p>
          </table:table-cell>
          <table:table-cell office:value-type="float" office:value="3.468265e-06" table:style-name="c1">
            <text:p>0.0000034683</text:p>
          </table:table-cell>
          <table:table-cell office:value-type="float" office:value="-0.011498924959485457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3.5517749999999995e-06" table:style-name="c1">
            <text:p>0.0000035518</text:p>
          </table:table-cell>
          <table:table-cell office:value-type="string" table:style-name="c1">
            <text:p>2026-04-06 01:30</text:p>
          </table:table-cell>
          <table:table-cell office:value-type="float" office:value="3.568215e-06" table:style-name="c1">
            <text:p>0.0000035682</text:p>
          </table:table-cell>
          <table:table-cell office:value-type="float" office:value="0.2620418865215468" table:style-name="c11">
            <text:p>+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3.5417699999999997e-06" table:style-name="c1">
            <text:p>0.0000035418</text:p>
          </table:table-cell>
          <table:table-cell office:value-type="string" table:style-name="c1">
            <text:p>2026-04-06 11:00</text:p>
          </table:table-cell>
          <table:table-cell office:value-type="float" office:value="3.5382300000000003e-06" table:style-name="c1">
            <text:p>0.000003538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00</text:p>
          </table:table-cell>
          <table:table-cell office:value-type="float" office:value="3.6017999999999995e-06" table:style-name="c1">
            <text:p>0.0000036018</text:p>
          </table:table-cell>
          <table:table-cell office:value-type="string" table:style-name="c1">
            <text:p>2026-04-07 22:30</text:p>
          </table:table-cell>
          <table:table-cell office:value-type="float" office:value="3.6481750000000004e-06" table:style-name="c1">
            <text:p>0.0000036482</text:p>
          </table:table-cell>
          <table:table-cell office:value-type="float" office:value="1.0850768553223533" table:style-name="c11">
            <text:p>+1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3.70185e-06" table:style-name="c1">
            <text:p>0.0000037018</text:p>
          </table:table-cell>
          <table:table-cell office:value-type="string" table:style-name="c1">
            <text:p>2026-04-07 23:15</text:p>
          </table:table-cell>
          <table:table-cell office:value-type="float" office:value="3.7081450000000003e-06" table:style-name="c1">
            <text:p>0.0000037081</text:p>
          </table:table-cell>
          <table:table-cell office:value-type="float" office:value="-0.030189820089943087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00</text:p>
          </table:table-cell>
          <table:table-cell office:value-type="float" office:value="3.571785e-06" table:style-name="c1">
            <text:p>0.0000035718</text:p>
          </table:table-cell>
          <table:table-cell office:value-type="string" table:style-name="c1">
            <text:p>2026-04-10 15:30</text:p>
          </table:table-cell>
          <table:table-cell office:value-type="float" office:value="3.568215e-06" table:style-name="c1">
            <text:p>0.0000035682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3.68184e-06" table:style-name="c1">
            <text:p>0.0000036818</text:p>
          </table:table-cell>
          <table:table-cell office:value-type="string" table:style-name="c1">
            <text:p>2026-04-10 19:45</text:p>
          </table:table-cell>
          <table:table-cell office:value-type="float" office:value="3.6681650000000004e-06" table:style-name="c1">
            <text:p>0.0000036682</text:p>
          </table:table-cell>
          <table:table-cell office:value-type="float" office:value="-0.5705750884068883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45</text:p>
          </table:table-cell>
          <table:table-cell office:value-type="float" office:value="3.6017999999999995e-06" table:style-name="c1">
            <text:p>0.0000036018</text:p>
          </table:table-cell>
          <table:table-cell office:value-type="string" table:style-name="c1">
            <text:p>2026-04-11 16:15</text:p>
          </table:table-cell>
          <table:table-cell office:value-type="float" office:value="3.6081950000000005e-06" table:style-name="c1">
            <text:p>0.0000036082</text:p>
          </table:table-cell>
          <table:table-cell office:value-type="float" office:value="-0.022704808845541713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6418199999999997e-06" table:style-name="c1">
            <text:p>0.0000036418</text:p>
          </table:table-cell>
          <table:table-cell office:value-type="string" table:style-name="c1">
            <text:p>2026-04-11 17:15</text:p>
          </table:table-cell>
          <table:table-cell office:value-type="float" office:value="3.61819e-06" table:style-name="c1">
            <text:p>0.0000036182</text:p>
          </table:table-cell>
          <table:table-cell office:value-type="float" office:value="-0.8474543445310401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3.6718349999999996e-06" table:style-name="c1">
            <text:p>0.0000036718</text:p>
          </table:table-cell>
          <table:table-cell office:value-type="string" table:style-name="c1">
            <text:p>2026-04-11 19:15</text:p>
          </table:table-cell>
          <table:table-cell office:value-type="float" office:value="3.6981500000000003e-06" table:style-name="c1">
            <text:p>0.0000036982</text:p>
          </table:table-cell>
          <table:table-cell office:value-type="float" office:value="0.5153390103313615" table:style-name="c11">
            <text:p>+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30</text:p>
          </table:table-cell>
          <table:table-cell office:value-type="float" office:value="3.7218599999999996e-06" table:style-name="c1">
            <text:p>0.0000037219</text:p>
          </table:table-cell>
          <table:table-cell office:value-type="string" table:style-name="c1">
            <text:p>2026-04-11 20:00</text:p>
          </table:table-cell>
          <table:table-cell office:value-type="float" office:value="3.768115e-06" table:style-name="c1">
            <text:p>0.0000037681</text:p>
          </table:table-cell>
          <table:table-cell office:value-type="float" office:value="1.0404082398317138" table:style-name="c11">
            <text:p>+1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20:15</text:p>
          </table:table-cell>
          <table:table-cell office:value-type="float" office:value="3.831915e-06" table:style-name="c1">
            <text:p>0.0000038319</text:p>
          </table:table-cell>
          <table:table-cell office:value-type="string" table:style-name="c1">
            <text:p>2026-04-11 20:45</text:p>
          </table:table-cell>
          <table:table-cell office:value-type="float" office:value="3.7281350000000003e-06" table:style-name="c1">
            <text:p>0.0000037281</text:p>
          </table:table-cell>
          <table:table-cell office:value-type="float" office:value="-2.9027925166659196" table:style-name="c12">
            <text:p>-2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3.70185e-06" table:style-name="c1">
            <text:p>0.0000037018</text:p>
          </table:table-cell>
          <table:table-cell office:value-type="string" table:style-name="c1">
            <text:p>2026-04-13 23:00</text:p>
          </table:table-cell>
          <table:table-cell office:value-type="float" office:value="3.688155e-06" table:style-name="c1">
            <text:p>0.0000036882</text:p>
          </table:table-cell>
          <table:table-cell office:value-type="float" office:value="-0.5691106296851656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3.7318649999999995e-06" table:style-name="c1">
            <text:p>0.0000037319</text:p>
          </table:table-cell>
          <table:table-cell office:value-type="string" table:style-name="c1">
            <text:p>2026-04-14 14:15</text:p>
          </table:table-cell>
          <table:table-cell office:value-type="float" office:value="3.7481250000000002e-06" table:style-name="c1">
            <text:p>0.0000037481</text:p>
          </table:table-cell>
          <table:table-cell office:value-type="float" office:value="0.23493610098439532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2:00</text:p>
          </table:table-cell>
          <table:table-cell office:value-type="float" office:value="3.62181e-06" table:style-name="c1">
            <text:p>0.0000036218</text:p>
          </table:table-cell>
          <table:table-cell office:value-type="string" table:style-name="c1">
            <text:p>2026-04-15 02:30</text:p>
          </table:table-cell>
          <table:table-cell office:value-type="float" office:value="3.588205e-06" table:style-name="c1">
            <text:p>0.0000035882</text:p>
          </table:table-cell>
          <table:table-cell office:value-type="float" office:value="-1.1258962174989784" table:style-name="c12">
            <text:p>-1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3.66183e-06" table:style-name="c1">
            <text:p>0.0000036618</text:p>
          </table:table-cell>
          <table:table-cell office:value-type="string" table:style-name="c1">
            <text:p>2026-04-15 15:00</text:p>
          </table:table-cell>
          <table:table-cell office:value-type="float" office:value="3.67816e-06" table:style-name="c1">
            <text:p>0.0000036782</text:p>
          </table:table-cell>
          <table:table-cell office:value-type="float" office:value="0.2451604296212606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3.7918949999999997e-06" table:style-name="c1">
            <text:p>0.0000037919</text:p>
          </table:table-cell>
          <table:table-cell office:value-type="string" table:style-name="c1">
            <text:p>2026-04-15 20:15</text:p>
          </table:table-cell>
          <table:table-cell office:value-type="float" office:value="3.7281350000000003e-06" table:style-name="c1">
            <text:p>0.0000037281</text:p>
          </table:table-cell>
          <table:table-cell office:value-type="float" office:value="-1.8780198783194035" table:style-name="c12">
            <text:p>-1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3.8019e-06" table:style-name="c1">
            <text:p>0.0000038019</text:p>
          </table:table-cell>
          <table:table-cell office:value-type="string" table:style-name="c1">
            <text:p>2026-04-16 02:45</text:p>
          </table:table-cell>
          <table:table-cell office:value-type="float" office:value="3.908045e-06" table:style-name="c1">
            <text:p>0.000003908</text:p>
          </table:table-cell>
          <table:table-cell office:value-type="float" office:value="2.5864125317604403" table:style-name="c11">
            <text:p>+2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3.871935e-06" table:style-name="c1">
            <text:p>0.0000038719</text:p>
          </table:table-cell>
          <table:table-cell office:value-type="string" table:style-name="c1">
            <text:p>2026-04-16 03:30</text:p>
          </table:table-cell>
          <table:table-cell office:value-type="float" office:value="3.89805e-06" table:style-name="c1">
            <text:p>0.000003898</text:p>
          </table:table-cell>
          <table:table-cell office:value-type="float" office:value="0.47322070360169555" table:style-name="c11">
            <text:p>+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00</text:p>
          </table:table-cell>
          <table:table-cell office:value-type="float" office:value="3.971985e-06" table:style-name="c1">
            <text:p>0.000003972</text:p>
          </table:table-cell>
          <table:table-cell office:value-type="string" table:style-name="c1">
            <text:p>2026-04-16 04:30</text:p>
          </table:table-cell>
          <table:table-cell office:value-type="float" office:value="3.988005e-06" table:style-name="c1">
            <text:p>0.000003988</text:p>
          </table:table-cell>
          <table:table-cell office:value-type="float" office:value="0.2026185397225877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3.851925e-06" table:style-name="c1">
            <text:p>0.0000038519</text:p>
          </table:table-cell>
          <table:table-cell office:value-type="string" table:style-name="c1">
            <text:p>2026-04-16 13:15</text:p>
          </table:table-cell>
          <table:table-cell office:value-type="float" office:value="3.89805e-06" table:style-name="c1">
            <text:p>0.000003898</text:p>
          </table:table-cell>
          <table:table-cell office:value-type="float" office:value="0.9951595124515489" table:style-name="c11">
            <text:p>+1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3.88194e-06" table:style-name="c1">
            <text:p>0.0000038819</text:p>
          </table:table-cell>
          <table:table-cell office:value-type="string" table:style-name="c1">
            <text:p>2026-04-16 14:00</text:p>
          </table:table-cell>
          <table:table-cell office:value-type="float" office:value="3.7881050000000006e-06" table:style-name="c1">
            <text:p>0.0000037881</text:p>
          </table:table-cell>
          <table:table-cell office:value-type="float" office:value="-2.6122872042071643" table:style-name="c12">
            <text:p>-2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30</text:p>
          </table:table-cell>
          <table:table-cell office:value-type="float" office:value="3.90195e-06" table:style-name="c1">
            <text:p>0.0000039019</text:p>
          </table:table-cell>
          <table:table-cell office:value-type="string" table:style-name="c1">
            <text:p>2026-04-16 17:00</text:p>
          </table:table-cell>
          <table:table-cell office:value-type="float" office:value="3.87806e-06" table:style-name="c1">
            <text:p>0.0000038781</text:p>
          </table:table-cell>
          <table:table-cell office:value-type="float" office:value="-0.8109340698881362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4.032015e-06" table:style-name="c1">
            <text:p>0.000004032</text:p>
          </table:table-cell>
          <table:table-cell office:value-type="string" table:style-name="c1">
            <text:p>2026-04-17 13:45</text:p>
          </table:table-cell>
          <table:table-cell office:value-type="float" office:value="4.0379800000000004e-06" table:style-name="c1">
            <text:p>0.000004038</text:p>
          </table:table-cell>
          <table:table-cell office:value-type="float" office:value="-0.052254816016295" table:style-name="c12">
            <text:p>-0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4.092045e-06" table:style-name="c1">
            <text:p>0.000004092</text:p>
          </table:table-cell>
          <table:table-cell office:value-type="string" table:style-name="c1">
            <text:p>2026-04-17 17:30</text:p>
          </table:table-cell>
          <table:table-cell office:value-type="float" office:value="4.047975000000001e-06" table:style-name="c1">
            <text:p>0.000004048</text:p>
          </table:table-cell>
          <table:table-cell office:value-type="float" office:value="-1.2747147703654038" table:style-name="c12">
            <text:p>-1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0:00</text:p>
          </table:table-cell>
          <table:table-cell office:value-type="float" office:value="3.811905e-06" table:style-name="c1">
            <text:p>0.0000038119</text:p>
          </table:table-cell>
          <table:table-cell office:value-type="string" table:style-name="c1">
            <text:p>2026-04-21 10:30</text:p>
          </table:table-cell>
          <table:table-cell office:value-type="float" office:value="3.808095e-06" table:style-name="c1">
            <text:p>0.000003808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4:45</text:p>
          </table:table-cell>
          <table:table-cell office:value-type="float" office:value="3.811905e-06" table:style-name="c1">
            <text:p>0.0000038119</text:p>
          </table:table-cell>
          <table:table-cell office:value-type="string" table:style-name="c1">
            <text:p>2026-04-21 15:15</text:p>
          </table:table-cell>
          <table:table-cell office:value-type="float" office:value="3.7881050000000006e-06" table:style-name="c1">
            <text:p>0.0000037881</text:p>
          </table:table-cell>
          <table:table-cell office:value-type="float" office:value="-0.8230116410298582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15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4-22 03:45</text:p>
          </table:table-cell>
          <table:table-cell office:value-type="float" office:value="3.87806e-06" table:style-name="c1">
            <text:p>0.0000038781</text:p>
          </table:table-cell>
          <table:table-cell office:value-type="float" office:value="-1.8179296630872366" table:style-name="c12">
            <text:p>-1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911954999999999e-06" table:style-name="c1">
            <text:p>0.000003912</text:p>
          </table:table-cell>
          <table:table-cell office:value-type="string" table:style-name="c1">
            <text:p>2026-04-22 06:00</text:p>
          </table:table-cell>
          <table:table-cell office:value-type="float" office:value="3.888055e-06" table:style-name="c1">
            <text:p>0.0000038881</text:p>
          </table:table-cell>
          <table:table-cell office:value-type="float" office:value="-0.8096264385709762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1:00</text:p>
          </table:table-cell>
          <table:table-cell office:value-type="float" office:value="3.951975e-06" table:style-name="c1">
            <text:p>0.000003952</text:p>
          </table:table-cell>
          <table:table-cell office:value-type="string" table:style-name="c1">
            <text:p>2026-04-22 11:30</text:p>
          </table:table-cell>
          <table:table-cell office:value-type="float" office:value="3.958020000000001e-06" table:style-name="c1">
            <text:p>0.000003958</text:p>
          </table:table-cell>
          <table:table-cell office:value-type="float" office:value="-0.04724427608979731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82191e-06" table:style-name="c1">
            <text:p>0.0000038219</text:p>
          </table:table-cell>
          <table:table-cell office:value-type="string" table:style-name="c1">
            <text:p>2026-04-23 07:00</text:p>
          </table:table-cell>
          <table:table-cell office:value-type="float" office:value="3.808095e-06" table:style-name="c1">
            <text:p>0.0000038081</text:p>
          </table:table-cell>
          <table:table-cell office:value-type="float" office:value="-0.560645904927104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1:00</text:p>
          </table:table-cell>
          <table:table-cell office:value-type="float" office:value="3.911954999999999e-06" table:style-name="c1">
            <text:p>0.000003912</text:p>
          </table:table-cell>
          <table:table-cell office:value-type="string" table:style-name="c1">
            <text:p>2026-04-24 21:30</text:p>
          </table:table-cell>
          <table:table-cell office:value-type="float" office:value="3.888055e-06" table:style-name="c1">
            <text:p>0.0000038881</text:p>
          </table:table-cell>
          <table:table-cell office:value-type="float" office:value="-0.809626438570954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1:45</text:p>
          </table:table-cell>
          <table:table-cell office:value-type="float" office:value="3.841919999999999e-06" table:style-name="c1">
            <text:p>0.0000038419</text:p>
          </table:table-cell>
          <table:table-cell office:value-type="string" table:style-name="c1">
            <text:p>2026-04-25 22:15</text:p>
          </table:table-cell>
          <table:table-cell office:value-type="float" office:value="3.83808e-06" table:style-name="c1">
            <text:p>0.000003838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30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4-26 12:00</text:p>
          </table:table-cell>
          <table:table-cell office:value-type="float" office:value="3.938030000000001e-06" table:style-name="c1">
            <text:p>0.000003938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4-27 01:30</text:p>
          </table:table-cell>
          <table:table-cell office:value-type="float" office:value="3.938030000000001e-06" table:style-name="c1">
            <text:p>0.00000393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00</text:p>
          </table:table-cell>
          <table:table-cell office:value-type="float" office:value="4.002e-06" table:style-name="c1">
            <text:p>0.000004002</text:p>
          </table:table-cell>
          <table:table-cell office:value-type="string" table:style-name="c1">
            <text:p>2026-04-27 03:30</text:p>
          </table:table-cell>
          <table:table-cell office:value-type="float" office:value="4.01799e-06" table:style-name="c1">
            <text:p>0.000004018</text:p>
          </table:table-cell>
          <table:table-cell office:value-type="float" office:value="0.19885152398799733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4:45</text:p>
          </table:table-cell>
          <table:table-cell office:value-type="float" office:value="3.90195e-06" table:style-name="c1">
            <text:p>0.0000039019</text:p>
          </table:table-cell>
          <table:table-cell office:value-type="string" table:style-name="c1">
            <text:p>2026-04-27 15:15</text:p>
          </table:table-cell>
          <table:table-cell office:value-type="float" office:value="3.828085e-06" table:style-name="c1">
            <text:p>0.0000038281</text:p>
          </table:table-cell>
          <table:table-cell office:value-type="float" office:value="-2.0891436823895826" table:style-name="c12">
            <text:p>-2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4-29 05:15</text:p>
          </table:table-cell>
          <table:table-cell office:value-type="float" office:value="3.928035e-06" table:style-name="c1">
            <text:p>0.000003928</text:p>
          </table:table-cell>
          <table:table-cell office:value-type="float" office:value="-0.5526967979208486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3.951975e-06" table:style-name="c1">
            <text:p>0.000003952</text:p>
          </table:table-cell>
          <table:table-cell office:value-type="string" table:style-name="c1">
            <text:p>2026-04-29 08:15</text:p>
          </table:table-cell>
          <table:table-cell office:value-type="float" office:value="3.938030000000001e-06" table:style-name="c1">
            <text:p>0.000003938</text:p>
          </table:table-cell>
          <table:table-cell office:value-type="float" office:value="-0.5520561736853002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9:30</text:p>
          </table:table-cell>
          <table:table-cell office:value-type="float" office:value="3.991995e-06" table:style-name="c1">
            <text:p>0.000003992</text:p>
          </table:table-cell>
          <table:table-cell office:value-type="string" table:style-name="c1">
            <text:p>2026-04-29 10:00</text:p>
          </table:table-cell>
          <table:table-cell office:value-type="float" office:value="4.0379800000000004e-06" table:style-name="c1">
            <text:p>0.000004038</text:p>
          </table:table-cell>
          <table:table-cell office:value-type="float" office:value="0.9497275918431969" table:style-name="c11">
            <text:p>+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4.112054999999999e-06" table:style-name="c1">
            <text:p>0.0000041121</text:p>
          </table:table-cell>
          <table:table-cell office:value-type="string" table:style-name="c1">
            <text:p>2026-04-29 10:45</text:p>
          </table:table-cell>
          <table:table-cell office:value-type="float" office:value="4.09795e-06" table:style-name="c1">
            <text:p>0.000004098</text:p>
          </table:table-cell>
          <table:table-cell office:value-type="float" office:value="-0.5422301513476668" table:style-name="c12">
            <text:p>-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1:00</text:p>
          </table:table-cell>
          <table:table-cell office:value-type="float" office:value="3.931964999999999e-06" table:style-name="c1">
            <text:p>0.000003932</text:p>
          </table:table-cell>
          <table:table-cell office:value-type="string" table:style-name="c1">
            <text:p>2026-04-30 01:30</text:p>
          </table:table-cell>
          <table:table-cell office:value-type="float" office:value="3.908045e-06" table:style-name="c1">
            <text:p>0.000003908</text:p>
          </table:table-cell>
          <table:table-cell office:value-type="float" office:value="-0.8070311397736063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10:00</text:p>
          </table:table-cell>
          <table:table-cell office:value-type="float" office:value="3.931964999999999e-06" table:style-name="c1">
            <text:p>0.000003932</text:p>
          </table:table-cell>
          <table:table-cell office:value-type="string" table:style-name="c1">
            <text:p>2026-04-30 10:30</text:p>
          </table:table-cell>
          <table:table-cell office:value-type="float" office:value="3.908045e-06" table:style-name="c1">
            <text:p>0.000003908</text:p>
          </table:table-cell>
          <table:table-cell office:value-type="float" office:value="-0.807031139773573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0:30</text:p>
          </table:table-cell>
          <table:table-cell office:value-type="float" office:value="3.891945e-06" table:style-name="c1">
            <text:p>0.0000038919</text:p>
          </table:table-cell>
          <table:table-cell office:value-type="string" table:style-name="c1">
            <text:p>2026-05-01 01:00</text:p>
          </table:table-cell>
          <table:table-cell office:value-type="float" office:value="3.87806e-06" table:style-name="c1">
            <text:p>0.0000038781</text:p>
          </table:table-cell>
          <table:table-cell office:value-type="float" office:value="-0.5559493245664959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3.96198e-06" table:style-name="c1">
            <text:p>0.000003962</text:p>
          </table:table-cell>
          <table:table-cell office:value-type="string" table:style-name="c1">
            <text:p>2026-05-01 04:00</text:p>
          </table:table-cell>
          <table:table-cell office:value-type="float" office:value="3.948025e-06" table:style-name="c1">
            <text:p>0.000003948</text:p>
          </table:table-cell>
          <table:table-cell office:value-type="float" office:value="-0.5514187849257168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00</text:p>
          </table:table-cell>
          <table:table-cell office:value-type="float" office:value="3.951975e-06" table:style-name="c1">
            <text:p>0.000003952</text:p>
          </table:table-cell>
          <table:table-cell office:value-type="string" table:style-name="c1">
            <text:p>2026-05-01 13:30</text:p>
          </table:table-cell>
          <table:table-cell office:value-type="float" office:value="3.948025e-06" table:style-name="c1">
            <text:p>0.000003948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3.991995e-06" table:style-name="c1">
            <text:p>0.000003992</text:p>
          </table:table-cell>
          <table:table-cell office:value-type="string" table:style-name="c1">
            <text:p>2026-05-01 14:30</text:p>
          </table:table-cell>
          <table:table-cell office:value-type="float" office:value="3.988005e-06" table:style-name="c1">
            <text:p>0.000003988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45</text:p>
          </table:table-cell>
          <table:table-cell office:value-type="float" office:value="3.9819899999999995e-06" table:style-name="c1">
            <text:p>0.000003982</text:p>
          </table:table-cell>
          <table:table-cell office:value-type="string" table:style-name="c1">
            <text:p>2026-05-01 15:15</text:p>
          </table:table-cell>
          <table:table-cell office:value-type="float" office:value="3.9780100000000006e-06" table:style-name="c1">
            <text:p>0.000003978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7:15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5-02 07:45</text:p>
          </table:table-cell>
          <table:table-cell office:value-type="float" office:value="3.928035e-06" table:style-name="c1">
            <text:p>0.000003928</text:p>
          </table:table-cell>
          <table:table-cell office:value-type="float" office:value="-0.5526967979208375" table:style-name="c12">
            <text:p>-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9:15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5-02 09:45</text:p>
          </table:table-cell>
          <table:table-cell office:value-type="float" office:value="3.948025e-06" table:style-name="c1">
            <text:p>0.000003948</text:p>
          </table:table-cell>
          <table:table-cell office:value-type="float" office:value="-0.04660365185427118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00</text:p>
          </table:table-cell>
          <table:table-cell office:value-type="float" office:value="3.94197e-06" table:style-name="c1">
            <text:p>0.000003942</text:p>
          </table:table-cell>
          <table:table-cell office:value-type="string" table:style-name="c1">
            <text:p>2026-05-02 14:30</text:p>
          </table:table-cell>
          <table:table-cell office:value-type="float" office:value="3.948025e-06" table:style-name="c1">
            <text:p>0.000003948</text:p>
          </table:table-cell>
          <table:table-cell office:value-type="float" office:value="-0.04660365185427118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7:00</text:p>
          </table:table-cell>
          <table:table-cell office:value-type="float" office:value="4.002e-06" table:style-name="c1">
            <text:p>0.000004002</text:p>
          </table:table-cell>
          <table:table-cell office:value-type="string" table:style-name="c1">
            <text:p>2026-05-02 17:30</text:p>
          </table:table-cell>
          <table:table-cell office:value-type="float" office:value="3.9780100000000006e-06" table:style-name="c1">
            <text:p>0.000003978</text:p>
          </table:table-cell>
          <table:table-cell office:value-type="float" office:value="-0.7981519737631171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15</text:p>
          </table:table-cell>
          <table:table-cell office:value-type="float" office:value="4.012004999999999e-06" table:style-name="c1">
            <text:p>0.000004012</text:p>
          </table:table-cell>
          <table:table-cell office:value-type="string" table:style-name="c1">
            <text:p>2026-05-02 22:45</text:p>
          </table:table-cell>
          <table:table-cell office:value-type="float" office:value="3.998e-06" table:style-name="c1">
            <text:p>0.000003998</text:p>
          </table:table-cell>
          <table:table-cell office:value-type="float" office:value="-0.5482795260723483" table:style-name="c12">
            <text:p>-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9:45</text:p>
          </table:table-cell>
          <table:table-cell office:value-type="float" office:value="3.951975e-06" table:style-name="c1">
            <text:p>0.000003952</text:p>
          </table:table-cell>
          <table:table-cell office:value-type="string" table:style-name="c1">
            <text:p>2026-05-03 10:15</text:p>
          </table:table-cell>
          <table:table-cell office:value-type="float" office:value="3.948025e-06" table:style-name="c1">
            <text:p>0.000003948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3.9819899999999995e-06" table:style-name="c1">
            <text:p>0.000003982</text:p>
          </table:table-cell>
          <table:table-cell office:value-type="string" table:style-name="c1">
            <text:p>2026-05-03 22:45</text:p>
          </table:table-cell>
          <table:table-cell office:value-type="float" office:value="3.988005e-06" table:style-name="c1">
            <text:p>0.000003988</text:p>
          </table:table-cell>
          <table:table-cell office:value-type="float" office:value="-0.04914683349277471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1:45</text:p>
          </table:table-cell>
          <table:table-cell office:value-type="float" office:value="3.991995e-06" table:style-name="c1">
            <text:p>0.000003992</text:p>
          </table:table-cell>
          <table:table-cell office:value-type="string" table:style-name="c1">
            <text:p>2026-05-04 02:15</text:p>
          </table:table-cell>
          <table:table-cell office:value-type="float" office:value="4.0379800000000004e-06" table:style-name="c1">
            <text:p>0.000004038</text:p>
          </table:table-cell>
          <table:table-cell office:value-type="float" office:value="0.9497275918432191" table:style-name="c11">
            <text:p>+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00</text:p>
          </table:table-cell>
          <table:table-cell office:value-type="float" office:value="4.1220600000000005e-06" table:style-name="c1">
            <text:p>0.0000041221</text:p>
          </table:table-cell>
          <table:table-cell office:value-type="string" table:style-name="c1">
            <text:p>2026-05-05 14:30</text:p>
          </table:table-cell>
          <table:table-cell office:value-type="float" office:value="4.13793e-06" table:style-name="c1">
            <text:p>0.0000041379</text:p>
          </table:table-cell>
          <table:table-cell office:value-type="float" office:value="0.18433205557413235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4.1820899999999995e-06" table:style-name="c1">
            <text:p>0.0000041821</text:p>
          </table:table-cell>
          <table:table-cell office:value-type="string" table:style-name="c1">
            <text:p>2026-05-05 21:00</text:p>
          </table:table-cell>
          <table:table-cell office:value-type="float" office:value="4.1979e-06" table:style-name="c1">
            <text:p>0.0000041979</text:p>
          </table:table-cell>
          <table:table-cell office:value-type="float" office:value="0.17738494150056905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4.1820899999999995e-06" table:style-name="c1">
            <text:p>0.0000041821</text:p>
          </table:table-cell>
          <table:table-cell office:value-type="string" table:style-name="c1">
            <text:p>2026-05-06 02:15</text:p>
          </table:table-cell>
          <table:table-cell office:value-type="float" office:value="4.1979e-06" table:style-name="c1">
            <text:p>0.0000041979</text:p>
          </table:table-cell>
          <table:table-cell office:value-type="float" office:value="0.17738494150056905" table:style-name="c11">
            <text:p>+0.2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4.16208e-06" table:style-name="c1">
            <text:p>0.0000041621</text:p>
          </table:table-cell>
          <table:table-cell office:value-type="string" table:style-name="c1">
            <text:p>2026-05-07 05:45</text:p>
          </table:table-cell>
          <table:table-cell office:value-type="float" office:value="4.15792e-06" table:style-name="c1">
            <text:p>0.000004157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4.1820899999999995e-06" table:style-name="c1">
            <text:p>0.0000041821</text:p>
          </table:table-cell>
          <table:table-cell office:value-type="string" table:style-name="c1">
            <text:p>2026-05-07 07:30</text:p>
          </table:table-cell>
          <table:table-cell office:value-type="float" office:value="4.217890000000001e-06" table:style-name="c1">
            <text:p>0.0000042179</text:p>
          </table:table-cell>
          <table:table-cell office:value-type="float" office:value="0.6544201078886758" table:style-name="c11">
            <text:p>+0.7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45</text:p>
          </table:table-cell>
          <table:table-cell office:value-type="float" office:value="4.24212e-06" table:style-name="c1">
            <text:p>0.0000042421</text:p>
          </table:table-cell>
          <table:table-cell office:value-type="string" table:style-name="c1">
            <text:p>2026-05-07 08:15</text:p>
          </table:table-cell>
          <table:table-cell office:value-type="float" office:value="4.23788e-06" table:style-name="c1">
            <text:p>0.0000042379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2:15</text:p>
          </table:table-cell>
          <table:table-cell office:value-type="float" office:value="4.24212e-06" table:style-name="c1">
            <text:p>0.0000042421</text:p>
          </table:table-cell>
          <table:table-cell office:value-type="string" table:style-name="c1">
            <text:p>2026-05-07 12:45</text:p>
          </table:table-cell>
          <table:table-cell office:value-type="float" office:value="4.267865e-06" table:style-name="c1">
            <text:p>0.0000042679</text:p>
          </table:table-cell>
          <table:table-cell office:value-type="float" office:value="0.40577677823823155" table:style-name="c11">
            <text:p>+0.4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3:00</text:p>
          </table:table-cell>
          <table:table-cell office:value-type="float" office:value="4.2521249999999995e-06" table:style-name="c1">
            <text:p>0.0000042521</text:p>
          </table:table-cell>
          <table:table-cell office:value-type="string" table:style-name="c1">
            <text:p>2026-05-07 13:30</text:p>
          </table:table-cell>
          <table:table-cell office:value-type="float" office:value="4.2278850000000004e-06" table:style-name="c1">
            <text:p>0.0000042279</text:p>
          </table:table-cell>
          <table:table-cell office:value-type="float" office:value="-0.7688283414762798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15</text:p>
          </table:table-cell>
          <table:table-cell office:value-type="float" office:value="4.202099999999999e-06" table:style-name="c1">
            <text:p>0.0000042021</text:p>
          </table:table-cell>
          <table:table-cell office:value-type="string" table:style-name="c1">
            <text:p>2026-05-08 14:45</text:p>
          </table:table-cell>
          <table:table-cell office:value-type="float" office:value="4.247875e-06" table:style-name="c1">
            <text:p>0.0000042479</text:p>
          </table:table-cell>
          <table:table-cell office:value-type="float" office:value="0.8872587010066768" table:style-name="c11">
            <text:p>+0.9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4.24212e-06" table:style-name="c1">
            <text:p>0.0000042421</text:p>
          </table:table-cell>
          <table:table-cell office:value-type="string" table:style-name="c1">
            <text:p>2026-05-08 15:30</text:p>
          </table:table-cell>
          <table:table-cell office:value-type="float" office:value="4.2078950000000005e-06" table:style-name="c1">
            <text:p>0.0000042079</text:p>
          </table:table-cell>
          <table:table-cell office:value-type="float" office:value="-1.0050772280133402" table:style-name="c12">
            <text:p>-1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4.2821399999999995e-06" table:style-name="c1">
            <text:p>0.0000042821</text:p>
          </table:table-cell>
          <table:table-cell office:value-type="string" table:style-name="c1">
            <text:p>2026-05-08 16:30</text:p>
          </table:table-cell>
          <table:table-cell office:value-type="float" office:value="4.247875e-06" table:style-name="c1">
            <text:p>0.0000042479</text:p>
          </table:table-cell>
          <table:table-cell office:value-type="float" office:value="-0.9984844522831882" table:style-name="c12">
            <text:p>-1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4.32216e-06" table:style-name="c1">
            <text:p>0.0000043222</text:p>
          </table:table-cell>
          <table:table-cell office:value-type="string" table:style-name="c1">
            <text:p>2026-05-08 18:15</text:p>
          </table:table-cell>
          <table:table-cell office:value-type="float" office:value="4.317840000000001e-06" table:style-name="c1">
            <text:p>0.000004317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9:15</text:p>
          </table:table-cell>
          <table:table-cell office:value-type="float" office:value="4.2821399999999995e-06" table:style-name="c1">
            <text:p>0.0000042821</text:p>
          </table:table-cell>
          <table:table-cell office:value-type="string" table:style-name="c1">
            <text:p>2026-05-09 19:45</text:p>
          </table:table-cell>
          <table:table-cell office:value-type="float" office:value="4.267865e-06" table:style-name="c1">
            <text:p>0.0000042679</text:p>
          </table:table-cell>
          <table:table-cell office:value-type="float" office:value="-0.5325949673527619" table:style-name="c12">
            <text:p>-0.5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30</text:p>
          </table:table-cell>
          <table:table-cell office:value-type="float" office:value="4.272134999999999e-06" table:style-name="c1">
            <text:p>0.0000042721</text:p>
          </table:table-cell>
          <table:table-cell office:value-type="string" table:style-name="c1">
            <text:p>2026-05-10 09:00</text:p>
          </table:table-cell>
          <table:table-cell office:value-type="float" office:value="4.27786e-06" table:style-name="c1">
            <text:p>0.0000042779</text:p>
          </table:table-cell>
          <table:table-cell office:value-type="float" office:value="-0.06615994438374795" table:style-name="c12">
            <text:p>-0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30</text:p>
          </table:table-cell>
          <table:table-cell office:value-type="float" office:value="4.3521749999999995e-06" table:style-name="c1">
            <text:p>0.0000043522</text:p>
          </table:table-cell>
          <table:table-cell office:value-type="string" table:style-name="c1">
            <text:p>2026-05-10 17:00</text:p>
          </table:table-cell>
          <table:table-cell office:value-type="float" office:value="4.35782e-06" table:style-name="c1">
            <text:p>0.0000043578</text:p>
          </table:table-cell>
          <table:table-cell office:value-type="float" office:value="-0.07045401850798161" table:style-name="c12">
            <text:p>-0.1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4.36218e-06" table:style-name="c1">
            <text:p>0.0000043622</text:p>
          </table:table-cell>
          <table:table-cell office:value-type="string" table:style-name="c1">
            <text:p>2026-05-10 17:45</text:p>
          </table:table-cell>
          <table:table-cell office:value-type="float" office:value="4.4577699999999995e-06" table:style-name="c1">
            <text:p>0.0000044578</text:p>
          </table:table-cell>
          <table:table-cell office:value-type="float" office:value="1.9870550451838165" table:style-name="c11">
            <text:p>+2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5:45</text:p>
          </table:table-cell>
          <table:table-cell office:value-type="float" office:value="4.332165e-06" table:style-name="c1">
            <text:p>0.0000043322</text:p>
          </table:table-cell>
          <table:table-cell office:value-type="string" table:style-name="c1">
            <text:p>2026-05-11 16:15</text:p>
          </table:table-cell>
          <table:table-cell office:value-type="float" office:value="4.367815e-06" table:style-name="c1">
            <text:p>0.0000043678</text:p>
          </table:table-cell>
          <table:table-cell office:value-type="float" office:value="0.6213691725730719" table:style-name="c11">
            <text:p>+0.6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00</text:p>
          </table:table-cell>
          <table:table-cell office:value-type="float" office:value="3.7318649999999995e-06" table:style-name="c1">
            <text:p>0.0000037319</text:p>
          </table:table-cell>
          <table:table-cell office:value-type="string" table:style-name="c1">
            <text:p>2026-05-20 15:30</text:p>
          </table:table-cell>
          <table:table-cell office:value-type="float" office:value="3.7281350000000003e-06" table:style-name="c1">
            <text:p>0.0000037281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30</text:p>
          </table:table-cell>
          <table:table-cell office:value-type="float" office:value="3.7818899999999995e-06" table:style-name="c1">
            <text:p>0.0000037819</text:p>
          </table:table-cell>
          <table:table-cell office:value-type="string" table:style-name="c1">
            <text:p>2026-05-21 04:00</text:p>
          </table:table-cell>
          <table:table-cell office:value-type="float" office:value="3.77811e-06" table:style-name="c1">
            <text:p>0.000003778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3.8019e-06" table:style-name="c1">
            <text:p>0.0000038019</text:p>
          </table:table-cell>
          <table:table-cell office:value-type="string" table:style-name="c1">
            <text:p>2026-05-21 09:00</text:p>
          </table:table-cell>
          <table:table-cell office:value-type="float" office:value="3.77811e-06" table:style-name="c1">
            <text:p>0.0000037781</text:p>
          </table:table-cell>
          <table:table-cell office:value-type="float" office:value="-0.8243889079144529" table:style-name="c12">
            <text:p>-0.8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00</text:p>
          </table:table-cell>
          <table:table-cell office:value-type="float" office:value="3.811905e-06" table:style-name="c1">
            <text:p>0.0000038119</text:p>
          </table:table-cell>
          <table:table-cell office:value-type="string" table:style-name="c1">
            <text:p>2026-05-21 18:30</text:p>
          </table:table-cell>
          <table:table-cell office:value-type="float" office:value="3.81809e-06" table:style-name="c1">
            <text:p>0.0000038181</text:p>
          </table:table-cell>
          <table:table-cell office:value-type="float" office:value="-0.03796951681638294" table:style-name="c12">
            <text:p>-0.0</text:p>
          </table:table-cell>
        </table:table-row>
        <table:table-row>
          <table:table-cell office:value-type="string" table:style-name="c2">
            <text:p>PEP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4:30</text:p>
          </table:table-cell>
          <table:table-cell office:value-type="float" office:value="3.451725e-06" table:style-name="c1">
            <text:p>0.0000034517</text:p>
          </table:table-cell>
          <table:table-cell office:value-type="string" table:style-name="c1">
            <text:p>2026-05-31 05:00</text:p>
          </table:table-cell>
          <table:table-cell office:value-type="float" office:value="3.468265e-06" table:style-name="c1">
            <text:p>0.0000034683</text:p>
          </table:table-cell>
          <table:table-cell office:value-type="float" office:value="0.27832281728701336" table:style-name="c11">
            <text:p>+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0.0834417" table:style-name="c8">
            <text:p>0.083442</text:p>
          </table:table-cell>
          <table:table-cell office:value-type="string" table:style-name="c8">
            <text:p>2026-03-03 16:15</text:p>
          </table:table-cell>
          <table:table-cell office:value-type="float" office:value="0.08485755" table:style-name="c8">
            <text:p>0.084858</text:p>
          </table:table-cell>
          <table:table-cell office:value-type="float" office:value="1.493521533657649" table:style-name="c10">
            <text:p>+1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8:30</text:p>
          </table:table-cell>
          <table:table-cell office:value-type="float" office:value="0.08534264999999999" table:style-name="c8">
            <text:p>0.085343</text:p>
          </table:table-cell>
          <table:table-cell office:value-type="string" table:style-name="c8">
            <text:p>2026-03-03 19:00</text:p>
          </table:table-cell>
          <table:table-cell office:value-type="float" office:value="0.0849575" table:style-name="c8">
            <text:p>0.084958</text:p>
          </table:table-cell>
          <table:table-cell office:value-type="float" office:value="-0.6502962381646049" table:style-name="c9">
            <text:p>-0.7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0.08724359999999999" table:style-name="c8">
            <text:p>0.087244</text:p>
          </table:table-cell>
          <table:table-cell office:value-type="string" table:style-name="c8">
            <text:p>2026-03-04 10:15</text:p>
          </table:table-cell>
          <table:table-cell office:value-type="float" office:value="0.08615690000000001" table:style-name="c8">
            <text:p>0.086157</text:p>
          </table:table-cell>
          <table:table-cell office:value-type="float" office:value="-1.4430028599232259" table:style-name="c9">
            <text:p>-1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15</text:p>
          </table:table-cell>
          <table:table-cell office:value-type="float" office:value="0.08874435" table:style-name="c8">
            <text:p>0.088744</text:p>
          </table:table-cell>
          <table:table-cell office:value-type="string" table:style-name="c8">
            <text:p>2026-03-04 19:45</text:p>
          </table:table-cell>
          <table:table-cell office:value-type="float" office:value="0.0887556" table:style-name="c8">
            <text:p>0.088756</text:p>
          </table:table-cell>
          <table:table-cell office:value-type="float" office:value="-0.18724847767771502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9 21:15</text:p>
          </table:table-cell>
          <table:table-cell office:value-type="float" office:value="0.08234114999999999" table:style-name="c8">
            <text:p>0.082341</text:p>
          </table:table-cell>
          <table:table-cell office:value-type="string" table:style-name="c8">
            <text:p>2026-03-09 21:45</text:p>
          </table:table-cell>
          <table:table-cell office:value-type="float" office:value="0.08155920000000001" table:style-name="c8">
            <text:p>0.081559</text:p>
          </table:table-cell>
          <table:table-cell office:value-type="float" office:value="-1.1476483396211545" table:style-name="c9">
            <text:p>-1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3:30</text:p>
          </table:table-cell>
          <table:table-cell office:value-type="float" office:value="0.0822411" table:style-name="c8">
            <text:p>0.082241</text:p>
          </table:table-cell>
          <table:table-cell office:value-type="string" table:style-name="c8">
            <text:p>2026-03-10 04:00</text:p>
          </table:table-cell>
          <table:table-cell office:value-type="float" office:value="0.08155920000000001" table:style-name="c8">
            <text:p>0.081559</text:p>
          </table:table-cell>
          <table:table-cell office:value-type="float" office:value="-1.027390004267914" table:style-name="c9">
            <text:p>-1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4:45</text:p>
          </table:table-cell>
          <table:table-cell office:value-type="float" office:value="0.08244119999999999" table:style-name="c8">
            <text:p>0.082441</text:p>
          </table:table-cell>
          <table:table-cell office:value-type="string" table:style-name="c8">
            <text:p>2026-03-10 05:15</text:p>
          </table:table-cell>
          <table:table-cell office:value-type="float" office:value="0.08185905" table:style-name="c8">
            <text:p>0.081859</text:p>
          </table:table-cell>
          <table:table-cell office:value-type="float" office:value="-0.9046280754646752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6:30</text:p>
          </table:table-cell>
          <table:table-cell office:value-type="float" office:value="0.0838419" table:style-name="c8">
            <text:p>0.083842</text:p>
          </table:table-cell>
          <table:table-cell office:value-type="string" table:style-name="c8">
            <text:p>2026-03-10 17:00</text:p>
          </table:table-cell>
          <table:table-cell office:value-type="float" office:value="0.08335830000000001" table:style-name="c8">
            <text:p>0.083358</text:p>
          </table:table-cell>
          <table:table-cell office:value-type="float" office:value="-0.775546882525302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07:15</text:p>
          </table:table-cell>
          <table:table-cell office:value-type="float" office:value="0.0812406" table:style-name="c8">
            <text:p>0.081241</text:p>
          </table:table-cell>
          <table:table-cell office:value-type="string" table:style-name="c8">
            <text:p>2026-03-11 07:45</text:p>
          </table:table-cell>
          <table:table-cell office:value-type="float" office:value="0.0807596" table:style-name="c8">
            <text:p>0.08076</text:p>
          </table:table-cell>
          <table:table-cell office:value-type="float" office:value="-0.7907849528437816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00</text:p>
          </table:table-cell>
          <table:table-cell office:value-type="float" office:value="0.08274134999999999" table:style-name="c8">
            <text:p>0.082741</text:p>
          </table:table-cell>
          <table:table-cell office:value-type="string" table:style-name="c8">
            <text:p>2026-03-11 13:30</text:p>
          </table:table-cell>
          <table:table-cell office:value-type="float" office:value="0.08365815" table:style-name="c8">
            <text:p>0.083658</text:p>
          </table:table-cell>
          <table:table-cell office:value-type="float" office:value="0.9059162778344954" table:style-name="c10">
            <text:p>+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9:45</text:p>
          </table:table-cell>
          <table:table-cell office:value-type="float" office:value="0.08234114999999999" table:style-name="c8">
            <text:p>0.082341</text:p>
          </table:table-cell>
          <table:table-cell office:value-type="string" table:style-name="c8">
            <text:p>2026-03-12 10:15</text:p>
          </table:table-cell>
          <table:table-cell office:value-type="float" office:value="0.0817591" table:style-name="c8">
            <text:p>0.081759</text:p>
          </table:table-cell>
          <table:table-cell office:value-type="float" office:value="-0.9053631639829973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0.08394195" table:style-name="c8">
            <text:p>0.083942</text:p>
          </table:table-cell>
          <table:table-cell office:value-type="string" table:style-name="c8">
            <text:p>2026-03-13 01:00</text:p>
          </table:table-cell>
          <table:table-cell office:value-type="float" office:value="0.08365815" table:style-name="c8">
            <text:p>0.083658</text:p>
          </table:table-cell>
          <table:table-cell office:value-type="float" office:value="-0.5373149442561176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45</text:p>
          </table:table-cell>
          <table:table-cell office:value-type="float" office:value="0.08504250000000001" table:style-name="c8">
            <text:p>0.085043</text:p>
          </table:table-cell>
          <table:table-cell office:value-type="string" table:style-name="c8">
            <text:p>2026-03-13 11:15</text:p>
          </table:table-cell>
          <table:table-cell office:value-type="float" office:value="0.08515740000000001" table:style-name="c8">
            <text:p>0.085157</text:p>
          </table:table-cell>
          <table:table-cell office:value-type="float" office:value="-0.06506116659317218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15</text:p>
          </table:table-cell>
          <table:table-cell office:value-type="float" office:value="0.0854427" table:style-name="c8">
            <text:p>0.085443</text:p>
          </table:table-cell>
          <table:table-cell office:value-type="string" table:style-name="c8">
            <text:p>2026-03-13 13:45</text:p>
          </table:table-cell>
          <table:table-cell office:value-type="float" office:value="0.08695649999999999" table:style-name="c8">
            <text:p>0.086956</text:p>
          </table:table-cell>
          <table:table-cell office:value-type="float" office:value="1.568272019142647" table:style-name="c10">
            <text:p>+1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45</text:p>
          </table:table-cell>
          <table:table-cell office:value-type="float" office:value="0.08534264999999999" table:style-name="c8">
            <text:p>0.085343</text:p>
          </table:table-cell>
          <table:table-cell office:value-type="string" table:style-name="c8">
            <text:p>2026-03-15 23:15</text:p>
          </table:table-cell>
          <table:table-cell office:value-type="float" office:value="0.08525735000000001" table:style-name="c8">
            <text:p>0.085257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0.08654324999999999" table:style-name="c8">
            <text:p>0.086543</text:p>
          </table:table-cell>
          <table:table-cell office:value-type="string" table:style-name="c8">
            <text:p>2026-03-16 04:15</text:p>
          </table:table-cell>
          <table:table-cell office:value-type="float" office:value="0.08695649999999999" table:style-name="c8">
            <text:p>0.086956</text:p>
          </table:table-cell>
          <table:table-cell office:value-type="float" office:value="0.27665237496856676" table:style-name="c10">
            <text:p>+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5:00</text:p>
          </table:table-cell>
          <table:table-cell office:value-type="float" office:value="0.08724359999999999" table:style-name="c8">
            <text:p>0.087244</text:p>
          </table:table-cell>
          <table:table-cell office:value-type="string" table:style-name="c8">
            <text:p>2026-03-16 05:30</text:p>
          </table:table-cell>
          <table:table-cell office:value-type="float" office:value="0.08735630000000001" table:style-name="c8">
            <text:p>0.087356</text:p>
          </table:table-cell>
          <table:table-cell office:value-type="float" office:value="-0.07097969788039116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1:15</text:p>
          </table:table-cell>
          <table:table-cell office:value-type="float" office:value="0.08954474999999999" table:style-name="c8">
            <text:p>0.089545</text:p>
          </table:table-cell>
          <table:table-cell office:value-type="string" table:style-name="c8">
            <text:p>2026-03-16 21:45</text:p>
          </table:table-cell>
          <table:table-cell office:value-type="float" office:value="0.09005495000000001" table:style-name="c8">
            <text:p>0.090055</text:p>
          </table:table-cell>
          <table:table-cell office:value-type="float" office:value="0.36873200824172336" table:style-name="c10">
            <text:p>+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15</text:p>
          </table:table-cell>
          <table:table-cell office:value-type="float" office:value="0.09054525" table:style-name="c8">
            <text:p>0.090545</text:p>
          </table:table-cell>
          <table:table-cell office:value-type="string" table:style-name="c8">
            <text:p>2026-03-17 00:45</text:p>
          </table:table-cell>
          <table:table-cell office:value-type="float" office:value="0.09005495000000001" table:style-name="c8">
            <text:p>0.090055</text:p>
          </table:table-cell>
          <table:table-cell office:value-type="float" office:value="-0.7403147542803024" table:style-name="c9">
            <text:p>-0.7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9:00</text:p>
          </table:table-cell>
          <table:table-cell office:value-type="float" office:value="0.08994495" table:style-name="c8">
            <text:p>0.089945</text:p>
          </table:table-cell>
          <table:table-cell office:value-type="string" table:style-name="c8">
            <text:p>2026-03-18 09:30</text:p>
          </table:table-cell>
          <table:table-cell office:value-type="float" office:value="0.09005495000000001" table:style-name="c8">
            <text:p>0.090055</text:p>
          </table:table-cell>
          <table:table-cell office:value-type="float" office:value="-0.07784744452021819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9:45</text:p>
          </table:table-cell>
          <table:table-cell office:value-type="float" office:value="0.09104549999999999" table:style-name="c8">
            <text:p>0.091045</text:p>
          </table:table-cell>
          <table:table-cell office:value-type="string" table:style-name="c8">
            <text:p>2026-03-18 10:15</text:p>
          </table:table-cell>
          <table:table-cell office:value-type="float" office:value="0.0895552" table:style-name="c8">
            <text:p>0.089555</text:p>
          </table:table-cell>
          <table:table-cell office:value-type="float" office:value="-1.8335017598892778" table:style-name="c9">
            <text:p>-1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19:45</text:p>
          </table:table-cell>
          <table:table-cell office:value-type="float" office:value="0.08114055" table:style-name="c8">
            <text:p>0.081141</text:p>
          </table:table-cell>
          <table:table-cell office:value-type="string" table:style-name="c8">
            <text:p>2026-03-23 20:15</text:p>
          </table:table-cell>
          <table:table-cell office:value-type="float" office:value="0.08085955" table:style-name="c8">
            <text:p>0.08086</text:p>
          </table:table-cell>
          <table:table-cell office:value-type="float" office:value="-0.5455203846289058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19:30</text:p>
          </table:table-cell>
          <table:table-cell office:value-type="float" office:value="0.08034014999999999" table:style-name="c8">
            <text:p>0.08034</text:p>
          </table:table-cell>
          <table:table-cell office:value-type="string" table:style-name="c8">
            <text:p>2026-03-24 20:00</text:p>
          </table:table-cell>
          <table:table-cell office:value-type="float" office:value="0.08055970000000001" table:style-name="c8">
            <text:p>0.08056</text:p>
          </table:table-cell>
          <table:table-cell office:value-type="float" office:value="0.07282928859360105" table:style-name="c10">
            <text:p>+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0.0818409" table:style-name="c8">
            <text:p>0.081841</text:p>
          </table:table-cell>
          <table:table-cell office:value-type="string" table:style-name="c8">
            <text:p>2026-03-24 21:00</text:p>
          </table:table-cell>
          <table:table-cell office:value-type="float" office:value="0.08185905" table:style-name="c8">
            <text:p>0.081859</text:p>
          </table:table-cell>
          <table:table-cell office:value-type="float" office:value="-0.17776715670281273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1:30</text:p>
          </table:table-cell>
          <table:table-cell office:value-type="float" office:value="0.0742371" table:style-name="c8">
            <text:p>0.074237</text:p>
          </table:table-cell>
          <table:table-cell office:value-type="string" table:style-name="c8">
            <text:p>2026-03-30 22:00</text:p>
          </table:table-cell>
          <table:table-cell office:value-type="float" office:value="0.07406295" table:style-name="c8">
            <text:p>0.074063</text:p>
          </table:table-cell>
          <table:table-cell office:value-type="float" office:value="-0.43401727310200533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0:30</text:p>
          </table:table-cell>
          <table:table-cell office:value-type="float" office:value="0.076038" table:style-name="c8">
            <text:p>0.076038</text:p>
          </table:table-cell>
          <table:table-cell office:value-type="string" table:style-name="c8">
            <text:p>2026-04-01 01:00</text:p>
          </table:table-cell>
          <table:table-cell office:value-type="float" office:value="0.0763618" table:style-name="c8">
            <text:p>0.076362</text:p>
          </table:table-cell>
          <table:table-cell office:value-type="float" office:value="0.2250884581393553" table:style-name="c10">
            <text:p>+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1:45</text:p>
          </table:table-cell>
          <table:table-cell office:value-type="float" office:value="0.0770385" table:style-name="c8">
            <text:p>0.077038</text:p>
          </table:table-cell>
          <table:table-cell office:value-type="string" table:style-name="c8">
            <text:p>2026-04-01 02:15</text:p>
          </table:table-cell>
          <table:table-cell office:value-type="float" office:value="0.0767616" table:style-name="c8">
            <text:p>0.076762</text:p>
          </table:table-cell>
          <table:table-cell office:value-type="float" office:value="-0.5586121723553772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4:45</text:p>
          </table:table-cell>
          <table:table-cell office:value-type="float" office:value="0.07733865" table:style-name="c8">
            <text:p>0.077339</text:p>
          </table:table-cell>
          <table:table-cell office:value-type="string" table:style-name="c8">
            <text:p>2026-04-01 05:15</text:p>
          </table:table-cell>
          <table:table-cell office:value-type="float" office:value="0.0767616" table:style-name="c8">
            <text:p>0.076762</text:p>
          </table:table-cell>
          <table:table-cell office:value-type="float" office:value="-0.9445425261495943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05:30</text:p>
          </table:table-cell>
          <table:table-cell office:value-type="float" office:value="0.07783889999999999" table:style-name="c8">
            <text:p>0.077839</text:p>
          </table:table-cell>
          <table:table-cell office:value-type="string" table:style-name="c8">
            <text:p>2026-04-01 06:00</text:p>
          </table:table-cell>
          <table:table-cell office:value-type="float" office:value="0.07786105" table:style-name="c8">
            <text:p>0.077861</text:p>
          </table:table-cell>
          <table:table-cell office:value-type="float" office:value="-0.1715006750480641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45</text:p>
          </table:table-cell>
          <table:table-cell office:value-type="float" office:value="0.07913955" table:style-name="c8">
            <text:p>0.07914</text:p>
          </table:table-cell>
          <table:table-cell office:value-type="string" table:style-name="c8">
            <text:p>2026-04-01 13:15</text:p>
          </table:table-cell>
          <table:table-cell office:value-type="float" office:value="0.0781609" table:style-name="c8">
            <text:p>0.078161</text:p>
          </table:table-cell>
          <table:table-cell office:value-type="float" office:value="-1.4340410567156292" table:style-name="c9">
            <text:p>-1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0:00</text:p>
          </table:table-cell>
          <table:table-cell office:value-type="float" office:value="0.0774387" table:style-name="c8">
            <text:p>0.077439</text:p>
          </table:table-cell>
          <table:table-cell office:value-type="string" table:style-name="c8">
            <text:p>2026-04-03 10:30</text:p>
          </table:table-cell>
          <table:table-cell office:value-type="float" office:value="0.0773613" table:style-name="c8">
            <text:p>0.077361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3 18:00</text:p>
          </table:table-cell>
          <table:table-cell office:value-type="float" office:value="0.07693844999999999" table:style-name="c8">
            <text:p>0.076938</text:p>
          </table:table-cell>
          <table:table-cell office:value-type="string" table:style-name="c8">
            <text:p>2026-04-03 18:30</text:p>
          </table:table-cell>
          <table:table-cell office:value-type="float" office:value="0.0769615" table:style-name="c8">
            <text:p>0.076962</text:p>
          </table:table-cell>
          <table:table-cell office:value-type="float" office:value="-0.1700008753750426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1:30</text:p>
          </table:table-cell>
          <table:table-cell office:value-type="float" office:value="0.07713855" table:style-name="c8">
            <text:p>0.077139</text:p>
          </table:table-cell>
          <table:table-cell office:value-type="string" table:style-name="c8">
            <text:p>2026-04-04 02:00</text:p>
          </table:table-cell>
          <table:table-cell office:value-type="float" office:value="0.0771614" table:style-name="c8">
            <text:p>0.077161</text:p>
          </table:table-cell>
          <table:table-cell office:value-type="float" office:value="-0.170337190159775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7:15</text:p>
          </table:table-cell>
          <table:table-cell office:value-type="float" office:value="0.07773885" table:style-name="c8">
            <text:p>0.077739</text:p>
          </table:table-cell>
          <table:table-cell office:value-type="string" table:style-name="c8">
            <text:p>2026-04-04 07:45</text:p>
          </table:table-cell>
          <table:table-cell office:value-type="float" office:value="0.07766115000000001" table:style-name="c8">
            <text:p>0.07766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8:30</text:p>
          </table:table-cell>
          <table:table-cell office:value-type="float" office:value="0.07833915" table:style-name="c8">
            <text:p>0.078339</text:p>
          </table:table-cell>
          <table:table-cell office:value-type="string" table:style-name="c8">
            <text:p>2026-04-04 09:00</text:p>
          </table:table-cell>
          <table:table-cell office:value-type="float" office:value="0.0777611" table:style-name="c8">
            <text:p>0.077761</text:p>
          </table:table-cell>
          <table:table-cell office:value-type="float" office:value="-0.9363063537197069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4:15</text:p>
          </table:table-cell>
          <table:table-cell office:value-type="float" office:value="0.07773885" table:style-name="c8">
            <text:p>0.077739</text:p>
          </table:table-cell>
          <table:table-cell office:value-type="string" table:style-name="c8">
            <text:p>2026-04-06 04:45</text:p>
          </table:table-cell>
          <table:table-cell office:value-type="float" office:value="0.07806095" table:style-name="c8">
            <text:p>0.078061</text:p>
          </table:table-cell>
          <table:table-cell office:value-type="float" office:value="0.21360768901264038" table:style-name="c10">
            <text:p>+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15</text:p>
          </table:table-cell>
          <table:table-cell office:value-type="float" office:value="0.0786393" table:style-name="c8">
            <text:p>0.078639</text:p>
          </table:table-cell>
          <table:table-cell office:value-type="string" table:style-name="c8">
            <text:p>2026-04-06 10:45</text:p>
          </table:table-cell>
          <table:table-cell office:value-type="float" office:value="0.0789605" table:style-name="c8">
            <text:p>0.078961</text:p>
          </table:table-cell>
          <table:table-cell office:value-type="float" office:value="0.20773068999850874" table:style-name="c10">
            <text:p>+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1:15</text:p>
          </table:table-cell>
          <table:table-cell office:value-type="float" office:value="0.07933965" table:style-name="c8">
            <text:p>0.07934</text:p>
          </table:table-cell>
          <table:table-cell office:value-type="string" table:style-name="c8">
            <text:p>2026-04-06 11:45</text:p>
          </table:table-cell>
          <table:table-cell office:value-type="float" office:value="0.0791604" table:style-name="c8">
            <text:p>0.07916</text:p>
          </table:table-cell>
          <table:table-cell office:value-type="float" office:value="-0.42537576054342274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0.0802401" table:style-name="c8">
            <text:p>0.08024</text:p>
          </table:table-cell>
          <table:table-cell office:value-type="string" table:style-name="c8">
            <text:p>2026-04-07 23:30</text:p>
          </table:table-cell>
          <table:table-cell office:value-type="float" office:value="0.08115939999999999" table:style-name="c8">
            <text:p>0.081159</text:p>
          </table:table-cell>
          <table:table-cell office:value-type="float" office:value="0.9434962810365599" table:style-name="c10">
            <text:p>+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00:15</text:p>
          </table:table-cell>
          <table:table-cell office:value-type="float" office:value="0.0810405" table:style-name="c8">
            <text:p>0.081041</text:p>
          </table:table-cell>
          <table:table-cell office:value-type="string" table:style-name="c8">
            <text:p>2026-04-08 00:45</text:p>
          </table:table-cell>
          <table:table-cell office:value-type="float" office:value="0.08025985000000001" table:style-name="c8">
            <text:p>0.08026</text:p>
          </table:table-cell>
          <table:table-cell office:value-type="float" office:value="-1.1612581859070437" table:style-name="c9">
            <text:p>-1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45</text:p>
          </table:table-cell>
          <table:table-cell office:value-type="float" office:value="0.07983989999999999" table:style-name="c8">
            <text:p>0.07984</text:p>
          </table:table-cell>
          <table:table-cell office:value-type="string" table:style-name="c8">
            <text:p>2026-04-09 23:15</text:p>
          </table:table-cell>
          <table:table-cell office:value-type="float" office:value="0.07886055" table:style-name="c8">
            <text:p>0.078861</text:p>
          </table:table-cell>
          <table:table-cell office:value-type="float" office:value="-1.4240902599451988" table:style-name="c9">
            <text:p>-1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00</text:p>
          </table:table-cell>
          <table:table-cell office:value-type="float" office:value="0.07913955" table:style-name="c8">
            <text:p>0.07914</text:p>
          </table:table-cell>
          <table:table-cell office:value-type="string" table:style-name="c8">
            <text:p>2026-04-13 23:30</text:p>
          </table:table-cell>
          <table:table-cell office:value-type="float" office:value="0.08005995" table:style-name="c8">
            <text:p>0.08006</text:p>
          </table:table-cell>
          <table:table-cell office:value-type="float" office:value="0.9607840326991912" table:style-name="c10">
            <text:p>+1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45</text:p>
          </table:table-cell>
          <table:table-cell office:value-type="float" office:value="0.07953974999999999" table:style-name="c8">
            <text:p>0.07954</text:p>
          </table:table-cell>
          <table:table-cell office:value-type="string" table:style-name="c8">
            <text:p>2026-04-14 00:15</text:p>
          </table:table-cell>
          <table:table-cell office:value-type="float" office:value="0.07996" table:style-name="c8">
            <text:p>0.07996</text:p>
          </table:table-cell>
          <table:table-cell office:value-type="float" office:value="0.32739600011315595" table:style-name="c10">
            <text:p>+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1:45</text:p>
          </table:table-cell>
          <table:table-cell office:value-type="float" office:value="0.07713855" table:style-name="c8">
            <text:p>0.077139</text:p>
          </table:table-cell>
          <table:table-cell office:value-type="string" table:style-name="c8">
            <text:p>2026-04-15 02:15</text:p>
          </table:table-cell>
          <table:table-cell office:value-type="float" office:value="0.07686155" table:style-name="c8">
            <text:p>0.076862</text:p>
          </table:table-cell>
          <table:table-cell office:value-type="float" office:value="-0.5582762943430963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00</text:p>
          </table:table-cell>
          <table:table-cell office:value-type="float" office:value="0.07793894999999999" table:style-name="c8">
            <text:p>0.077939</text:p>
          </table:table-cell>
          <table:table-cell office:value-type="string" table:style-name="c8">
            <text:p>2026-04-15 12:30</text:p>
          </table:table-cell>
          <table:table-cell office:value-type="float" office:value="0.07756120000000001" table:style-name="c8">
            <text:p>0.077561</text:p>
          </table:table-cell>
          <table:table-cell office:value-type="float" office:value="-0.683605358809658" table:style-name="c9">
            <text:p>-0.7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6:15</text:p>
          </table:table-cell>
          <table:table-cell office:value-type="float" office:value="0.07883939999999999" table:style-name="c8">
            <text:p>0.078839</text:p>
          </table:table-cell>
          <table:table-cell office:value-type="string" table:style-name="c8">
            <text:p>2026-04-15 16:45</text:p>
          </table:table-cell>
          <table:table-cell office:value-type="float" office:value="0.07866065000000001" table:style-name="c8">
            <text:p>0.078661</text:p>
          </table:table-cell>
          <table:table-cell office:value-type="float" office:value="-0.4261735114041598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8:15</text:p>
          </table:table-cell>
          <table:table-cell office:value-type="float" office:value="0.07943969999999999" table:style-name="c8">
            <text:p>0.07944</text:p>
          </table:table-cell>
          <table:table-cell office:value-type="string" table:style-name="c8">
            <text:p>2026-04-15 18:45</text:p>
          </table:table-cell>
          <table:table-cell office:value-type="float" office:value="0.0791604" table:style-name="c8">
            <text:p>0.07916</text:p>
          </table:table-cell>
          <table:table-cell office:value-type="float" office:value="-0.5507846071926115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30</text:p>
          </table:table-cell>
          <table:table-cell office:value-type="float" office:value="0.07983989999999999" table:style-name="c8">
            <text:p>0.07984</text:p>
          </table:table-cell>
          <table:table-cell office:value-type="string" table:style-name="c8">
            <text:p>2026-04-16 03:00</text:p>
          </table:table-cell>
          <table:table-cell office:value-type="float" office:value="0.07956020000000001" table:style-name="c8">
            <text:p>0.07956</text:p>
          </table:table-cell>
          <table:table-cell office:value-type="float" office:value="-0.5495257882336846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15</text:p>
          </table:table-cell>
          <table:table-cell office:value-type="float" office:value="0.0810405" table:style-name="c8">
            <text:p>0.081041</text:p>
          </table:table-cell>
          <table:table-cell office:value-type="string" table:style-name="c8">
            <text:p>2026-04-16 12:45</text:p>
          </table:table-cell>
          <table:table-cell office:value-type="float" office:value="0.08085955" table:style-name="c8">
            <text:p>0.08086</text:p>
          </table:table-cell>
          <table:table-cell office:value-type="float" office:value="-0.4227370764617766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0.08244119999999999" table:style-name="c8">
            <text:p>0.082441</text:p>
          </table:table-cell>
          <table:table-cell office:value-type="string" table:style-name="c8">
            <text:p>2026-04-16 13:45</text:p>
          </table:table-cell>
          <table:table-cell office:value-type="float" office:value="0.08185905" table:style-name="c8">
            <text:p>0.081859</text:p>
          </table:table-cell>
          <table:table-cell office:value-type="float" office:value="-0.9046280754646863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0.0816408" table:style-name="c8">
            <text:p>0.081641</text:p>
          </table:table-cell>
          <table:table-cell office:value-type="string" table:style-name="c8">
            <text:p>2026-04-16 16:15</text:p>
          </table:table-cell>
          <table:table-cell office:value-type="float" office:value="0.0817591" table:style-name="c8">
            <text:p>0.081759</text:p>
          </table:table-cell>
          <table:table-cell office:value-type="float" office:value="-0.05528662249756344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20:15</text:p>
          </table:table-cell>
          <table:table-cell office:value-type="float" office:value="0.0844422" table:style-name="c8">
            <text:p>0.084442</text:p>
          </table:table-cell>
          <table:table-cell office:value-type="string" table:style-name="c8">
            <text:p>2026-04-16 20:45</text:p>
          </table:table-cell>
          <table:table-cell office:value-type="float" office:value="0.08335830000000001" table:style-name="c8">
            <text:p>0.083358</text:p>
          </table:table-cell>
          <table:table-cell office:value-type="float" office:value="-1.480933989995492" table:style-name="c9">
            <text:p>-1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15</text:p>
          </table:table-cell>
          <table:table-cell office:value-type="float" office:value="0.0828414" table:style-name="c8">
            <text:p>0.082841</text:p>
          </table:table-cell>
          <table:table-cell office:value-type="string" table:style-name="c8">
            <text:p>2026-04-17 08:45</text:p>
          </table:table-cell>
          <table:table-cell office:value-type="float" office:value="0.08255870000000001" table:style-name="c8">
            <text:p>0.082559</text:p>
          </table:table-cell>
          <table:table-cell office:value-type="float" office:value="-0.5404723257936062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6:00</text:p>
          </table:table-cell>
          <table:table-cell office:value-type="float" office:value="0.08414205" table:style-name="c8">
            <text:p>0.084142</text:p>
          </table:table-cell>
          <table:table-cell office:value-type="string" table:style-name="c8">
            <text:p>2026-04-18 06:30</text:p>
          </table:table-cell>
          <table:table-cell office:value-type="float" office:value="0.08385805" table:style-name="c8">
            <text:p>0.083858</text:p>
          </table:table-cell>
          <table:table-cell office:value-type="float" office:value="-0.5367497487284933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8:15</text:p>
          </table:table-cell>
          <table:table-cell office:value-type="float" office:value="0.08594295" table:style-name="c8">
            <text:p>0.085943</text:p>
          </table:table-cell>
          <table:table-cell office:value-type="string" table:style-name="c8">
            <text:p>2026-04-18 08:45</text:p>
          </table:table-cell>
          <table:table-cell office:value-type="float" office:value="0.08425785000000001" table:style-name="c8">
            <text:p>0.084258</text:p>
          </table:table-cell>
          <table:table-cell office:value-type="float" office:value="-2.1566998132482085" table:style-name="c9">
            <text:p>-2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4 20:00</text:p>
          </table:table-cell>
          <table:table-cell office:value-type="float" office:value="0.07953974999999999" table:style-name="c8">
            <text:p>0.07954</text:p>
          </table:table-cell>
          <table:table-cell office:value-type="string" table:style-name="c8">
            <text:p>2026-04-24 20:30</text:p>
          </table:table-cell>
          <table:table-cell office:value-type="float" office:value="0.0789605" table:style-name="c8">
            <text:p>0.078961</text:p>
          </table:table-cell>
          <table:table-cell office:value-type="float" office:value="-0.9266964498882535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1:30</text:p>
          </table:table-cell>
          <table:table-cell office:value-type="float" office:value="0.0796398" table:style-name="c8">
            <text:p>0.07964</text:p>
          </table:table-cell>
          <table:table-cell office:value-type="string" table:style-name="c8">
            <text:p>2026-04-25 02:00</text:p>
          </table:table-cell>
          <table:table-cell office:value-type="float" office:value="0.08055970000000001" table:style-name="c8">
            <text:p>0.08056</text:p>
          </table:table-cell>
          <table:table-cell office:value-type="float" office:value="0.9528667320862327" table:style-name="c10">
            <text:p>+1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5:45</text:p>
          </table:table-cell>
          <table:table-cell office:value-type="float" office:value="0.08294145" table:style-name="c8">
            <text:p>0.082941</text:p>
          </table:table-cell>
          <table:table-cell office:value-type="string" table:style-name="c8">
            <text:p>2026-04-25 06:15</text:p>
          </table:table-cell>
          <table:table-cell office:value-type="float" office:value="0.0847576" table:style-name="c8">
            <text:p>0.084758</text:p>
          </table:table-cell>
          <table:table-cell office:value-type="float" office:value="1.9854000112127235" table:style-name="c10">
            <text:p>+2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5 08:45</text:p>
          </table:table-cell>
          <table:table-cell office:value-type="float" office:value="0.0844422" table:style-name="c8">
            <text:p>0.084442</text:p>
          </table:table-cell>
          <table:table-cell office:value-type="string" table:style-name="c8">
            <text:p>2026-04-25 09:15</text:p>
          </table:table-cell>
          <table:table-cell office:value-type="float" office:value="0.08585705" table:style-name="c8">
            <text:p>0.085857</text:p>
          </table:table-cell>
          <table:table-cell office:value-type="float" office:value="1.4722754227744161" table:style-name="c10">
            <text:p>+1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0:45</text:p>
          </table:table-cell>
          <table:table-cell office:value-type="float" office:value="0.0752376" table:style-name="c8">
            <text:p>0.075238</text:p>
          </table:table-cell>
          <table:table-cell office:value-type="string" table:style-name="c8">
            <text:p>2026-05-05 11:15</text:p>
          </table:table-cell>
          <table:table-cell office:value-type="float" office:value="0.07476260000000001" table:style-name="c8">
            <text:p>0.074763</text:p>
          </table:table-cell>
          <table:table-cell office:value-type="float" office:value="-0.8299712343296295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00</text:p>
          </table:table-cell>
          <table:table-cell office:value-type="float" office:value="0.07783889999999999" table:style-name="c8">
            <text:p>0.077839</text:p>
          </table:table-cell>
          <table:table-cell office:value-type="string" table:style-name="c8">
            <text:p>2026-05-06 09:30</text:p>
          </table:table-cell>
          <table:table-cell office:value-type="float" office:value="0.07766115000000001" table:style-name="c8">
            <text:p>0.077661</text:p>
          </table:table-cell>
          <table:table-cell office:value-type="float" office:value="-0.42779977472698905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0:15</text:p>
          </table:table-cell>
          <table:table-cell office:value-type="float" office:value="0.07773885" table:style-name="c8">
            <text:p>0.077739</text:p>
          </table:table-cell>
          <table:table-cell office:value-type="string" table:style-name="c8">
            <text:p>2026-05-06 20:45</text:p>
          </table:table-cell>
          <table:table-cell office:value-type="float" office:value="0.07686155" table:style-name="c8">
            <text:p>0.076862</text:p>
          </table:table-cell>
          <table:table-cell office:value-type="float" office:value="-1.3261660526879382" table:style-name="c9">
            <text:p>-1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21:45</text:p>
          </table:table-cell>
          <table:table-cell office:value-type="float" office:value="0.0782391" table:style-name="c8">
            <text:p>0.078239</text:p>
          </table:table-cell>
          <table:table-cell office:value-type="string" table:style-name="c8">
            <text:p>2026-05-06 22:15</text:p>
          </table:table-cell>
          <table:table-cell office:value-type="float" office:value="0.07766115000000001" table:style-name="c8">
            <text:p>0.077661</text:p>
          </table:table-cell>
          <table:table-cell office:value-type="float" office:value="-0.9371204919918386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9:45</text:p>
          </table:table-cell>
          <table:table-cell office:value-type="float" office:value="0.0776388" table:style-name="c8">
            <text:p>0.077639</text:p>
          </table:table-cell>
          <table:table-cell office:value-type="string" table:style-name="c8">
            <text:p>2026-05-07 20:15</text:p>
          </table:table-cell>
          <table:table-cell office:value-type="float" office:value="0.0777611" table:style-name="c8">
            <text:p>0.077761</text:p>
          </table:table-cell>
          <table:table-cell office:value-type="float" office:value="-0.04269056051871001" table:style-name="c9">
            <text:p>-0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21:30</text:p>
          </table:table-cell>
          <table:table-cell office:value-type="float" office:value="0.08244119999999999" table:style-name="c8">
            <text:p>0.082441</text:p>
          </table:table-cell>
          <table:table-cell office:value-type="string" table:style-name="c8">
            <text:p>2026-05-08 22:00</text:p>
          </table:table-cell>
          <table:table-cell office:value-type="float" office:value="0.08225885000000001" table:style-name="c8">
            <text:p>0.082259</text:p>
          </table:table-cell>
          <table:table-cell office:value-type="float" office:value="-0.42064579500296073" table:style-name="c9">
            <text:p>-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0:30</text:p>
          </table:table-cell>
          <table:table-cell office:value-type="float" office:value="0.08234114999999999" table:style-name="c8">
            <text:p>0.082341</text:p>
          </table:table-cell>
          <table:table-cell office:value-type="string" table:style-name="c8">
            <text:p>2026-05-09 01:00</text:p>
          </table:table-cell>
          <table:table-cell office:value-type="float" office:value="0.08285855" table:style-name="c8">
            <text:p>0.082859</text:p>
          </table:table-cell>
          <table:table-cell office:value-type="float" office:value="0.4272053020270228" table:style-name="c10">
            <text:p>+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1:15</text:p>
          </table:table-cell>
          <table:table-cell office:value-type="float" office:value="0.08354175" table:style-name="c8">
            <text:p>0.083542</text:p>
          </table:table-cell>
          <table:table-cell office:value-type="string" table:style-name="c8">
            <text:p>2026-05-09 01:45</text:p>
          </table:table-cell>
          <table:table-cell office:value-type="float" office:value="0.08365815" table:style-name="c8">
            <text:p>0.083658</text:p>
          </table:table-cell>
          <table:table-cell office:value-type="float" office:value="-0.060846991893259705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5:30</text:p>
          </table:table-cell>
          <table:table-cell office:value-type="float" office:value="0.0802401" table:style-name="c8">
            <text:p>0.08024</text:p>
          </table:table-cell>
          <table:table-cell office:value-type="string" table:style-name="c8">
            <text:p>2026-05-10 06:00</text:p>
          </table:table-cell>
          <table:table-cell office:value-type="float" office:value="0.08025985000000001" table:style-name="c8">
            <text:p>0.08026</text:p>
          </table:table-cell>
          <table:table-cell office:value-type="float" office:value="-0.17533557429513236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15</text:p>
          </table:table-cell>
          <table:table-cell office:value-type="float" office:value="0.08294145" table:style-name="c8">
            <text:p>0.082941</text:p>
          </table:table-cell>
          <table:table-cell office:value-type="string" table:style-name="c8">
            <text:p>2026-05-10 16:45</text:p>
          </table:table-cell>
          <table:table-cell office:value-type="float" office:value="0.08345825000000001" table:style-name="c8">
            <text:p>0.083458</text:p>
          </table:table-cell>
          <table:table-cell office:value-type="float" office:value="0.42194458651254596" table:style-name="c10">
            <text:p>+0.4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45</text:p>
          </table:table-cell>
          <table:table-cell office:value-type="float" office:value="0.08374184999999999" table:style-name="c8">
            <text:p>0.083742</text:p>
          </table:table-cell>
          <table:table-cell office:value-type="string" table:style-name="c8">
            <text:p>2026-05-11 00:15</text:p>
          </table:table-cell>
          <table:table-cell office:value-type="float" office:value="0.08285855" table:style-name="c8">
            <text:p>0.082859</text:p>
          </table:table-cell>
          <table:table-cell office:value-type="float" office:value="-1.2525806886878987" table:style-name="c9">
            <text:p>-1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6:30</text:p>
          </table:table-cell>
          <table:table-cell office:value-type="float" office:value="0.0826413" table:style-name="c8">
            <text:p>0.082641</text:p>
          </table:table-cell>
          <table:table-cell office:value-type="string" table:style-name="c8">
            <text:p>2026-05-11 07:00</text:p>
          </table:table-cell>
          <table:table-cell office:value-type="float" office:value="0.08215889999999999" table:style-name="c8">
            <text:p>0.082159</text:p>
          </table:table-cell>
          <table:table-cell office:value-type="float" office:value="-0.7824606354207897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7:45</text:p>
          </table:table-cell>
          <table:table-cell office:value-type="float" office:value="0.072726345" table:style-name="c8">
            <text:p>0.072726</text:p>
          </table:table-cell>
          <table:table-cell office:value-type="string" table:style-name="c8">
            <text:p>2026-05-20 18:15</text:p>
          </table:table-cell>
          <table:table-cell office:value-type="float" office:value="0.07232382" table:style-name="c8">
            <text:p>0.072324</text:p>
          </table:table-cell>
          <table:table-cell office:value-type="float" office:value="-0.7522725309239697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2:30</text:p>
          </table:table-cell>
          <table:table-cell office:value-type="float" office:value="0.072726345" table:style-name="c8">
            <text:p>0.072726</text:p>
          </table:table-cell>
          <table:table-cell office:value-type="string" table:style-name="c8">
            <text:p>2026-05-21 03:00</text:p>
          </table:table-cell>
          <table:table-cell office:value-type="float" office:value="0.07243376500000001" table:style-name="c8">
            <text:p>0.072434</text:p>
          </table:table-cell>
          <table:table-cell office:value-type="float" office:value="-0.6013984289118146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5:45</text:p>
          </table:table-cell>
          <table:table-cell office:value-type="float" office:value="0.07229613" table:style-name="c8">
            <text:p>0.072296</text:p>
          </table:table-cell>
          <table:table-cell office:value-type="string" table:style-name="c8">
            <text:p>2026-05-21 16:15</text:p>
          </table:table-cell>
          <table:table-cell office:value-type="float" office:value="0.07211392500000001" table:style-name="c8">
            <text:p>0.072114</text:p>
          </table:table-cell>
          <table:table-cell office:value-type="float" office:value="-0.4514221384671613" table:style-name="c9">
            <text:p>-0.5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45</text:p>
          </table:table-cell>
          <table:table-cell office:value-type="float" office:value="0.07339667999999999" table:style-name="c8">
            <text:p>0.073397</text:p>
          </table:table-cell>
          <table:table-cell office:value-type="string" table:style-name="c8">
            <text:p>2026-05-21 18:15</text:p>
          </table:table-cell>
          <table:table-cell office:value-type="float" office:value="0.07344326000000001" table:style-name="c8">
            <text:p>0.073443</text:p>
          </table:table-cell>
          <table:table-cell office:value-type="float" office:value="-0.13656350224557912" table:style-name="c9">
            <text:p>-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8:30</text:p>
          </table:table-cell>
          <table:table-cell office:value-type="float" office:value="0.07385691" table:style-name="c8">
            <text:p>0.073857</text:p>
          </table:table-cell>
          <table:table-cell office:value-type="string" table:style-name="c8">
            <text:p>2026-05-21 19:00</text:p>
          </table:table-cell>
          <table:table-cell office:value-type="float" office:value="0.07332332" table:style-name="c8">
            <text:p>0.073323</text:p>
          </table:table-cell>
          <table:table-cell office:value-type="float" office:value="-0.9209203535322619" table:style-name="c9">
            <text:p>-0.9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4:15</text:p>
          </table:table-cell>
          <table:table-cell office:value-type="float" office:value="0.07377687" table:style-name="c8">
            <text:p>0.073777</text:p>
          </table:table-cell>
          <table:table-cell office:value-type="string" table:style-name="c8">
            <text:p>2026-05-22 04:45</text:p>
          </table:table-cell>
          <table:table-cell office:value-type="float" office:value="0.073473245" table:style-name="c8">
            <text:p>0.073473</text:p>
          </table:table-cell>
          <table:table-cell office:value-type="float" office:value="-0.6106222949753493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30</text:p>
          </table:table-cell>
          <table:table-cell office:value-type="float" office:value="0.07251624" table:style-name="c8">
            <text:p>0.072516</text:p>
          </table:table-cell>
          <table:table-cell office:value-type="string" table:style-name="c8">
            <text:p>2026-05-25 15:00</text:p>
          </table:table-cell>
          <table:table-cell office:value-type="float" office:value="0.07223386500000001" table:style-name="c8">
            <text:p>0.072234</text:p>
          </table:table-cell>
          <table:table-cell office:value-type="float" office:value="-0.5885171323485316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7:00</text:p>
          </table:table-cell>
          <table:table-cell office:value-type="float" office:value="0.072666315" table:style-name="c8">
            <text:p>0.072666</text:p>
          </table:table-cell>
          <table:table-cell office:value-type="string" table:style-name="c8">
            <text:p>2026-05-25 17:30</text:p>
          </table:table-cell>
          <table:table-cell office:value-type="float" office:value="0.07260368" table:style-name="c8">
            <text:p>0.072604</text:p>
          </table:table-cell>
          <table:table-cell office:value-type="float" office:value="-0.2859230667194179" table:style-name="c9">
            <text:p>-0.3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45</text:p>
          </table:table-cell>
          <table:table-cell office:value-type="float" office:value="0.0714357" table:style-name="c8">
            <text:p>0.071436</text:p>
          </table:table-cell>
          <table:table-cell office:value-type="string" table:style-name="c8">
            <text:p>2026-05-26 06:15</text:p>
          </table:table-cell>
          <table:table-cell office:value-type="float" office:value="0.071174395" table:style-name="c8">
            <text:p>0.071174</text:p>
          </table:table-cell>
          <table:table-cell office:value-type="float" office:value="-0.5649592789109703" table:style-name="c9">
            <text:p>-0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0.07235615999999999" table:style-name="c8">
            <text:p>0.072356</text:p>
          </table:table-cell>
          <table:table-cell office:value-type="string" table:style-name="c8">
            <text:p>2026-05-26 11:00</text:p>
          </table:table-cell>
          <table:table-cell office:value-type="float" office:value="0.07248374" table:style-name="c8">
            <text:p>0.072484</text:p>
          </table:table-cell>
          <table:table-cell office:value-type="float" office:value="-0.023930231040425465" table:style-name="c9">
            <text:p>-0.0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4:30</text:p>
          </table:table-cell>
          <table:table-cell office:value-type="float" office:value="0.07333665" table:style-name="c8">
            <text:p>0.073337</text:p>
          </table:table-cell>
          <table:table-cell office:value-type="string" table:style-name="c8">
            <text:p>2026-05-26 15:00</text:p>
          </table:table-cell>
          <table:table-cell office:value-type="float" office:value="0.07228384" table:style-name="c8">
            <text:p>0.072284</text:p>
          </table:table-cell>
          <table:table-cell office:value-type="float" office:value="-1.63261533784268" table:style-name="c9">
            <text:p>-1.6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2:15</text:p>
          </table:table-cell>
          <table:table-cell office:value-type="float" office:value="0.07101549" table:style-name="c8">
            <text:p>0.071015</text:p>
          </table:table-cell>
          <table:table-cell office:value-type="string" table:style-name="c8">
            <text:p>2026-05-30 02:45</text:p>
          </table:table-cell>
          <table:table-cell office:value-type="float" office:value="0.071254355" table:style-name="c8">
            <text:p>0.071254</text:p>
          </table:table-cell>
          <table:table-cell office:value-type="float" office:value="0.13578381893162295" table:style-name="c10">
            <text:p>+0.1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1 02:15</text:p>
          </table:table-cell>
          <table:table-cell office:value-type="float" office:value="0.07052524499999999" table:style-name="c8">
            <text:p>0.070525</text:p>
          </table:table-cell>
          <table:table-cell office:value-type="string" table:style-name="c8">
            <text:p>2026-05-31 02:45</text:p>
          </table:table-cell>
          <table:table-cell office:value-type="float" office:value="0.070134915" table:style-name="c8">
            <text:p>0.070135</text:p>
          </table:table-cell>
          <table:table-cell office:value-type="float" office:value="-0.7522550188730159" table:style-name="c9">
            <text:p>-0.8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0:15</text:p>
          </table:table-cell>
          <table:table-cell office:value-type="float" office:value="0.07093545" table:style-name="c8">
            <text:p>0.070935</text:p>
          </table:table-cell>
          <table:table-cell office:value-type="string" table:style-name="c8">
            <text:p>2026-06-01 00:45</text:p>
          </table:table-cell>
          <table:table-cell office:value-type="float" office:value="0.070934515" table:style-name="c8">
            <text:p>0.070935</text:p>
          </table:table-cell>
          <table:table-cell office:value-type="float" office:value="-0.20121546488391928" table:style-name="c9">
            <text:p>-0.2</text:p>
          </table:table-cell>
        </table:table-row>
        <table:table-row>
          <table:table-cell office:value-type="string" table:style-name="c7">
            <text:p>SAND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3:30</text:p>
          </table:table-cell>
          <table:table-cell office:value-type="float" office:value="0.07128562499999999" table:style-name="c8">
            <text:p>0.071286</text:p>
          </table:table-cell>
          <table:table-cell office:value-type="string" table:style-name="c8">
            <text:p>2026-06-01 04:00</text:p>
          </table:table-cell>
          <table:table-cell office:value-type="float" office:value="0.07100448000000001" table:style-name="c8">
            <text:p>0.071004</text:p>
          </table:table-cell>
          <table:table-cell office:value-type="float" office:value="-0.5935038873825849" table:style-name="c9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15</text:p>
          </table:table-cell>
          <table:table-cell office:value-type="float" office:value="5.64282e-06" table:style-name="c1">
            <text:p>0.0000056428</text:p>
          </table:table-cell>
          <table:table-cell office:value-type="string" table:style-name="c1">
            <text:p>2026-03-04 09:45</text:p>
          </table:table-cell>
          <table:table-cell office:value-type="float" office:value="5.647175000000001e-06" table:style-name="c1">
            <text:p>0.0000056472</text:p>
          </table:table-cell>
          <table:table-cell office:value-type="float" office:value="-0.12287655507351447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15</text:p>
          </table:table-cell>
          <table:table-cell office:value-type="float" office:value="5.632815e-06" table:style-name="c1">
            <text:p>0.0000056328</text:p>
          </table:table-cell>
          <table:table-cell office:value-type="string" table:style-name="c1">
            <text:p>2026-03-04 15:45</text:p>
          </table:table-cell>
          <table:table-cell office:value-type="float" office:value="5.717140000000001e-06" table:style-name="c1">
            <text:p>0.0000057171</text:p>
          </table:table-cell>
          <table:table-cell office:value-type="float" office:value="1.2941386702741253" table:style-name="c11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6:00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04 16:30</text:p>
          </table:table-cell>
          <table:table-cell office:value-type="float" office:value="5.7471250000000005e-06" table:style-name="c1">
            <text:p>0.0000057471</text:p>
          </table:table-cell>
          <table:table-cell office:value-type="float" office:value="-1.3292579678319094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7:15</text:p>
          </table:table-cell>
          <table:table-cell office:value-type="float" office:value="5.82291e-06" table:style-name="c1">
            <text:p>0.0000058229</text:p>
          </table:table-cell>
          <table:table-cell office:value-type="string" table:style-name="c1">
            <text:p>2026-03-04 17:4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8:00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04 18:30</text:p>
          </table:table-cell>
          <table:table-cell office:value-type="float" office:value="5.77711e-06" table:style-name="c1">
            <text:p>0.0000057771</text:p>
          </table:table-cell>
          <table:table-cell office:value-type="float" office:value="-0.8144540963597402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45</text:p>
          </table:table-cell>
          <table:table-cell office:value-type="float" office:value="5.702849999999999e-06" table:style-name="c1">
            <text:p>0.0000057028</text:p>
          </table:table-cell>
          <table:table-cell office:value-type="string" table:style-name="c1">
            <text:p>2026-03-05 11:15</text:p>
          </table:table-cell>
          <table:table-cell office:value-type="float" office:value="5.69715e-06" table:style-name="c1">
            <text:p>0.0000056972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5 21:00</text:p>
          </table:table-cell>
          <table:table-cell office:value-type="float" office:value="5.61719e-06" table:style-name="c1">
            <text:p>0.0000056172</text:p>
          </table:table-cell>
          <table:table-cell office:value-type="float" office:value="-0.12193124133118571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00</text:p>
          </table:table-cell>
          <table:table-cell office:value-type="float" office:value="5.452725e-06" table:style-name="c1">
            <text:p>0.0000054527</text:p>
          </table:table-cell>
          <table:table-cell office:value-type="string" table:style-name="c1">
            <text:p>2026-03-09 14:30</text:p>
          </table:table-cell>
          <table:table-cell office:value-type="float" office:value="5.427285e-06" table:style-name="c1">
            <text:p>0.0000054273</text:p>
          </table:table-cell>
          <table:table-cell office:value-type="float" office:value="-0.6655230680989832" table:style-name="c12">
            <text:p>-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5.56278e-06" table:style-name="c1">
            <text:p>0.0000055628</text:p>
          </table:table-cell>
          <table:table-cell office:value-type="string" table:style-name="c1">
            <text:p>2026-03-09 20:00</text:p>
          </table:table-cell>
          <table:table-cell office:value-type="float" office:value="5.487255e-06" table:style-name="c1">
            <text:p>0.0000054873</text:p>
          </table:table-cell>
          <table:table-cell office:value-type="float" office:value="-1.5548704558691728" table:style-name="c12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5.632815e-06" table:style-name="c1">
            <text:p>0.0000056328</text:p>
          </table:table-cell>
          <table:table-cell office:value-type="string" table:style-name="c1">
            <text:p>2026-03-10 08:45</text:p>
          </table:table-cell>
          <table:table-cell office:value-type="float" office:value="5.61719e-06" table:style-name="c1">
            <text:p>0.0000056172</text:p>
          </table:table-cell>
          <table:table-cell office:value-type="float" office:value="-0.4767378799055199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5.712855e-06" table:style-name="c1">
            <text:p>0.0000057129</text:p>
          </table:table-cell>
          <table:table-cell office:value-type="string" table:style-name="c1">
            <text:p>2026-03-10 10:00</text:p>
          </table:table-cell>
          <table:table-cell office:value-type="float" office:value="5.7071450000000006e-06" table:style-name="c1">
            <text:p>0.000005707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1:00</text:p>
          </table:table-cell>
          <table:table-cell office:value-type="float" office:value="5.72286e-06" table:style-name="c1">
            <text:p>0.0000057229</text:p>
          </table:table-cell>
          <table:table-cell office:value-type="string" table:style-name="c1">
            <text:p>2026-03-10 11:30</text:p>
          </table:table-cell>
          <table:table-cell office:value-type="float" office:value="5.7271350000000005e-06" table:style-name="c1">
            <text:p>0.0000057271</text:p>
          </table:table-cell>
          <table:table-cell office:value-type="float" office:value="-0.12534891409189397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00</text:p>
          </table:table-cell>
          <table:table-cell office:value-type="float" office:value="5.792895e-06" table:style-name="c1">
            <text:p>0.0000057929</text:p>
          </table:table-cell>
          <table:table-cell office:value-type="string" table:style-name="c1">
            <text:p>2026-03-10 13:3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0.04473785723719814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10 15:30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1.7144982554177624" table:style-name="c11">
            <text:p>+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1 13:00</text:p>
          </table:table-cell>
          <table:table-cell office:value-type="float" office:value="5.7471250000000005e-06" table:style-name="c1">
            <text:p>0.0000057471</text:p>
          </table:table-cell>
          <table:table-cell office:value-type="float" office:value="-0.645232026534370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11 13:45</text:p>
          </table:table-cell>
          <table:table-cell office:value-type="float" office:value="5.797100000000001e-06" table:style-name="c1">
            <text:p>0.0000057971</text:p>
          </table:table-cell>
          <table:table-cell office:value-type="float" office:value="-0.47125151537826815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5.8029e-06" table:style-name="c1">
            <text:p>0.0000058029</text:p>
          </table:table-cell>
          <table:table-cell office:value-type="string" table:style-name="c1">
            <text:p>2026-03-11 14:3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0.21604123946648013" table:style-name="c11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6:0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3-11 16:3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0.8118095559240701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15</text:p>
          </table:table-cell>
          <table:table-cell office:value-type="float" office:value="5.74287e-06" table:style-name="c1">
            <text:p>0.0000057429</text:p>
          </table:table-cell>
          <table:table-cell office:value-type="string" table:style-name="c1">
            <text:p>2026-03-12 07:4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1.0899016883544332" table:style-name="c11">
            <text:p>+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8:00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12 08:3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0.21515364658462044" table:style-name="c11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1:1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0.034354296972138876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30</text:p>
          </table:table-cell>
          <table:table-cell office:value-type="float" office:value="5.98299e-06" table:style-name="c1">
            <text:p>0.000005983</text:p>
          </table:table-cell>
          <table:table-cell office:value-type="string" table:style-name="c1">
            <text:p>2026-03-13 02:00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0.03379576098239134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7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8:15</text:p>
          </table:table-cell>
          <table:table-cell office:value-type="float" office:value="5.97701e-06" table:style-name="c1">
            <text:p>0.000005977</text:p>
          </table:table-cell>
          <table:table-cell office:value-type="float" office:value="-0.1326479639576994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15</text:p>
          </table:table-cell>
          <table:table-cell office:value-type="float" office:value="6.113054999999999e-06" table:style-name="c1">
            <text:p>0.0000061131</text:p>
          </table:table-cell>
          <table:table-cell office:value-type="string" table:style-name="c1">
            <text:p>2026-03-13 11:4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1.005755336816061" table:style-name="c11">
            <text:p>+1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6.193095e-06" table:style-name="c1">
            <text:p>0.0000061931</text:p>
          </table:table-cell>
          <table:table-cell office:value-type="string" table:style-name="c1">
            <text:p>2026-03-13 12:30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-0.6217838267457587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00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3-16 01:30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0.6308806228115027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45</text:p>
          </table:table-cell>
          <table:table-cell office:value-type="float" office:value="5.992995e-06" table:style-name="c1">
            <text:p>0.000005993</text:p>
          </table:table-cell>
          <table:table-cell office:value-type="string" table:style-name="c1">
            <text:p>2026-03-16 02:15</text:p>
          </table:table-cell>
          <table:table-cell office:value-type="float" office:value="5.97701e-06" table:style-name="c1">
            <text:p>0.000005977</text:p>
          </table:table-cell>
          <table:table-cell office:value-type="float" office:value="-0.466094882275047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16 04:15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0.35627312889607854" table:style-name="c11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4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16 05:15</text:p>
          </table:table-cell>
          <table:table-cell office:value-type="float" office:value="6.1969e-06" table:style-name="c1">
            <text:p>0.0000061969</text:p>
          </table:table-cell>
          <table:table-cell office:value-type="float" office:value="0.6746202940875135" table:style-name="c11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1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3-16 07:45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0.4916223923752572" table:style-name="c11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1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17 19:4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1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3-17 22:45</text:p>
          </table:table-cell>
          <table:table-cell office:value-type="float" office:value="6.09695e-06" table:style-name="c1">
            <text:p>0.000006097</text:p>
          </table:table-cell>
          <table:table-cell office:value-type="float" office:value="-0.7875801585340847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15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3-18 02:4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0.4617646147657916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00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18 03:30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0.8369987139166701" table:style-name="c11">
            <text:p>+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0 11:45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1.6180019574510096" table:style-name="c12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5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3-21 06:00</text:p>
          </table:table-cell>
          <table:table-cell office:value-type="float" office:value="6.01699e-06" table:style-name="c1">
            <text:p>0.000006017</text:p>
          </table:table-cell>
          <table:table-cell office:value-type="float" office:value="-0.629783833414399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6:30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21 07:00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1.119554417117108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23 20:45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0.46202864471671656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2:0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3-23 22:3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1.2676147858109665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6.173085e-06" table:style-name="c1">
            <text:p>0.0000061731</text:p>
          </table:table-cell>
          <table:table-cell office:value-type="string" table:style-name="c1">
            <text:p>2026-03-24 10:15</text:p>
          </table:table-cell>
          <table:table-cell office:value-type="float" office:value="6.1469250000000004e-06" table:style-name="c1">
            <text:p>0.0000061469</text:p>
          </table:table-cell>
          <table:table-cell office:value-type="float" office:value="-0.622828019944632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3-24 21:15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-1.1010999819222156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6:00</text:p>
          </table:table-cell>
          <table:table-cell office:value-type="float" office:value="6.033015e-06" table:style-name="c1">
            <text:p>0.000006033</text:p>
          </table:table-cell>
          <table:table-cell office:value-type="string" table:style-name="c1">
            <text:p>2026-03-30 06:30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3-30 08:30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0.02616791163243537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5:4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30 16:15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0.35519607905409867" table:style-name="c11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3-30 17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1:45</text:p>
          </table:table-cell>
          <table:table-cell office:value-type="float" office:value="5.932965e-06" table:style-name="c1">
            <text:p>0.000005933</text:p>
          </table:table-cell>
          <table:table-cell office:value-type="string" table:style-name="c1">
            <text:p>2026-03-31 12:1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0.635907728344931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30</text:p>
          </table:table-cell>
          <table:table-cell office:value-type="float" office:value="5.92296e-06" table:style-name="c1">
            <text:p>0.000005923</text:p>
          </table:table-cell>
          <table:table-cell office:value-type="string" table:style-name="c1">
            <text:p>2026-03-31 13:00</text:p>
          </table:table-cell>
          <table:table-cell office:value-type="float" office:value="5.887055000000001e-06" table:style-name="c1">
            <text:p>0.0000058871</text:p>
          </table:table-cell>
          <table:table-cell office:value-type="float" office:value="-0.8048884838830372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15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31 14:4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3-31 17:45</text:p>
          </table:table-cell>
          <table:table-cell office:value-type="float" office:value="5.927035e-06" table:style-name="c1">
            <text:p>0.000005927</text:p>
          </table:table-cell>
          <table:table-cell office:value-type="float" office:value="-1.4628209722638563" table:style-name="c12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6.063029999999999e-06" table:style-name="c1">
            <text:p>0.000006063</text:p>
          </table:table-cell>
          <table:table-cell office:value-type="string" table:style-name="c1">
            <text:p>2026-04-01 13:15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7932163128831493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7:15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01 17:45</text:p>
          </table:table-cell>
          <table:table-cell office:value-type="float" office:value="6.07696e-06" table:style-name="c1">
            <text:p>0.000006077</text:p>
          </table:table-cell>
          <table:table-cell office:value-type="float" office:value="-0.6265366175928211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2 0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16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4 19:4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1.288414024310125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7 23:30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0.0245785548689037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4-11 19:15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13403502592559402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4-11 20:0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-0.1345834206241236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6.013004999999999e-06" table:style-name="c1">
            <text:p>0.000006013</text:p>
          </table:table-cell>
          <table:table-cell office:value-type="string" table:style-name="c1">
            <text:p>2026-04-14 00:30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1.2949948149885038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1:15</text:p>
          </table:table-cell>
          <table:table-cell office:value-type="float" office:value="5.962979999999999e-06" table:style-name="c1">
            <text:p>0.000005963</text:p>
          </table:table-cell>
          <table:table-cell office:value-type="string" table:style-name="c1">
            <text:p>2026-04-14 11:4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0.6342151570187915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4 14:30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0.465817474512719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5.892945e-06" table:style-name="c1">
            <text:p>0.0000058929</text:p>
          </table:table-cell>
          <table:table-cell office:value-type="string" table:style-name="c1">
            <text:p>2026-04-15 12:4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0.03889086093624705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5 20:15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0.7981519737631171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6 02:4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1.1958550217391561" table:style-name="c11">
            <text:p>+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16 03:30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-0.13485625831709536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0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04:30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0.19067936417038744" table:style-name="c11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13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0.027236167817745738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4-16 16:1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0.6762096424055564" table:style-name="c11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4-16 19:30</text:p>
          </table:table-cell>
          <table:table-cell office:value-type="float" office:value="6.35682e-06" table:style-name="c1">
            <text:p>0.0000063568</text:p>
          </table:table-cell>
          <table:table-cell office:value-type="float" office:value="0.01486191951343141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7 13:30</text:p>
          </table:table-cell>
          <table:table-cell office:value-type="float" office:value="6.416790000000001e-06" table:style-name="c1">
            <text:p>0.0000064168</text:p>
          </table:table-cell>
          <table:table-cell office:value-type="float" office:value="1.1178902932420076" table:style-name="c11">
            <text:p>+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4-17 14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14435372991071782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18 07:15</text:p>
          </table:table-cell>
          <table:table-cell office:value-type="float" office:value="6.286855e-06" table:style-name="c1">
            <text:p>0.0000062869</text:p>
          </table:table-cell>
          <table:table-cell office:value-type="float" office:value="-0.4579047483400988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3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21 21:0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15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2 02:45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0.6778041846724037" table:style-name="c11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2 03:30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-0.6223050785286621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2 06:00</text:p>
          </table:table-cell>
          <table:table-cell office:value-type="float" office:value="6.1969e-06" table:style-name="c1">
            <text:p>0.0000061969</text:p>
          </table:table-cell>
          <table:table-cell office:value-type="float" office:value="-0.6202301277014044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9:00</text:p>
          </table:table-cell>
          <table:table-cell office:value-type="float" office:value="6.233114999999999e-06" table:style-name="c1">
            <text:p>0.0000062331</text:p>
          </table:table-cell>
          <table:table-cell office:value-type="string" table:style-name="c1">
            <text:p>2026-04-22 09:30</text:p>
          </table:table-cell>
          <table:table-cell office:value-type="float" office:value="6.236880000000001e-06" table:style-name="c1">
            <text:p>0.0000062369</text:p>
          </table:table-cell>
          <table:table-cell office:value-type="float" office:value="-0.1396175607220162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3 07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3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3 16:00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-0.1383227980669699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4 01:15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6.213104999999999e-06" table:style-name="c1">
            <text:p>0.0000062131</text:p>
          </table:table-cell>
          <table:table-cell office:value-type="string" table:style-name="c1">
            <text:p>2026-04-24 11:45</text:p>
          </table:table-cell>
          <table:table-cell office:value-type="float" office:value="6.21689e-06" table:style-name="c1">
            <text:p>0.0000062169</text:p>
          </table:table-cell>
          <table:table-cell office:value-type="float" office:value="-0.13910215761683276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6.2031e-06" table:style-name="c1">
            <text:p>0.0000062031</text:p>
          </table:table-cell>
          <table:table-cell office:value-type="string" table:style-name="c1">
            <text:p>2026-04-26 19:1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1388432091212421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0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27 03:30</text:p>
          </table:table-cell>
          <table:table-cell office:value-type="float" office:value="6.31684e-06" table:style-name="c1">
            <text:p>0.0000063168</text:p>
          </table:table-cell>
          <table:table-cell office:value-type="float" office:value="0.016858822017562503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9 05:1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45994017629448214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6.24312e-06" table:style-name="c1">
            <text:p>0.0000062431</text:p>
          </table:table-cell>
          <table:table-cell office:value-type="string" table:style-name="c1">
            <text:p>2026-04-29 08:15</text:p>
          </table:table-cell>
          <table:table-cell office:value-type="float" office:value="6.226885e-06" table:style-name="c1">
            <text:p>0.0000062269</text:p>
          </table:table-cell>
          <table:table-cell office:value-type="float" office:value="-0.4594264264502268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9:30</text:p>
          </table:table-cell>
          <table:table-cell office:value-type="float" office:value="6.36318e-06" table:style-name="c1">
            <text:p>0.0000063632</text:p>
          </table:table-cell>
          <table:table-cell office:value-type="string" table:style-name="c1">
            <text:p>2026-04-29 10:00</text:p>
          </table:table-cell>
          <table:table-cell office:value-type="float" office:value="6.45677e-06" table:style-name="c1">
            <text:p>0.0000064568</text:p>
          </table:table-cell>
          <table:table-cell office:value-type="float" office:value="1.2679653376141964" table:style-name="c11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6.54327e-06" table:style-name="c1">
            <text:p>0.0000065433</text:p>
          </table:table-cell>
          <table:table-cell office:value-type="string" table:style-name="c1">
            <text:p>2026-04-29 10:45</text:p>
          </table:table-cell>
          <table:table-cell office:value-type="float" office:value="6.446775000000001e-06" table:style-name="c1">
            <text:p>0.0000064468</text:p>
          </table:table-cell>
          <table:table-cell office:value-type="float" office:value="-1.6716733869303946" table:style-name="c12">
            <text:p>-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21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9 22:1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0.6233526592223426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1:00</text:p>
          </table:table-cell>
          <table:table-cell office:value-type="float" office:value="6.26313e-06" table:style-name="c1">
            <text:p>0.0000062631</text:p>
          </table:table-cell>
          <table:table-cell office:value-type="string" table:style-name="c1">
            <text:p>2026-04-30 01:30</text:p>
          </table:table-cell>
          <table:table-cell office:value-type="float" office:value="6.256870000000001e-06" table:style-name="c1">
            <text:p>0.00000625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1:45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1 02:15</text:p>
          </table:table-cell>
          <table:table-cell office:value-type="float" office:value="6.306845e-06" table:style-name="c1">
            <text:p>0.0000063068</text:p>
          </table:table-cell>
          <table:table-cell office:value-type="float" office:value="0.017362016050803675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04:00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-0.14239415268705313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13:15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0.17211799171390485" table:style-name="c11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30</text:p>
          </table:table-cell>
          <table:table-cell office:value-type="float" office:value="6.36318e-06" table:style-name="c1">
            <text:p>0.0000063632</text:p>
          </table:table-cell>
          <table:table-cell office:value-type="string" table:style-name="c1">
            <text:p>2026-05-01 14:00</text:p>
          </table:table-cell>
          <table:table-cell office:value-type="float" office:value="6.37681e-06" table:style-name="c1">
            <text:p>0.0000063768</text:p>
          </table:table-cell>
          <table:table-cell office:value-type="float" office:value="0.013872887612809137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3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5-02 15:00</text:p>
          </table:table-cell>
          <table:table-cell office:value-type="float" office:value="6.2968500000000005e-06" table:style-name="c1">
            <text:p>0.0000062969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2 22:30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-0.6166624658259012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6.403199999999999e-06" table:style-name="c1">
            <text:p>0.0000064032</text:p>
          </table:table-cell>
          <table:table-cell office:value-type="string" table:style-name="c1">
            <text:p>2026-05-05 22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7669956144583767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06 02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9218052936870169" table:style-name="c12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6.433215e-06" table:style-name="c1">
            <text:p>0.0000064332</text:p>
          </table:table-cell>
          <table:table-cell office:value-type="string" table:style-name="c1">
            <text:p>2026-05-06 04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6.4832399999999994e-06" table:style-name="c1">
            <text:p>0.0000064832</text:p>
          </table:table-cell>
          <table:table-cell office:value-type="string" table:style-name="c1">
            <text:p>2026-05-06 09:30</text:p>
          </table:table-cell>
          <table:table-cell office:value-type="float" office:value="6.47676e-06" table:style-name="c1">
            <text:p>0.000006476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0:15</text:p>
          </table:table-cell>
          <table:table-cell office:value-type="float" office:value="6.52326e-06" table:style-name="c1">
            <text:p>0.0000065233</text:p>
          </table:table-cell>
          <table:table-cell office:value-type="string" table:style-name="c1">
            <text:p>2026-05-06 10:45</text:p>
          </table:table-cell>
          <table:table-cell office:value-type="float" office:value="6.49675e-06" table:style-name="c1">
            <text:p>0.0000064968</text:p>
          </table:table-cell>
          <table:table-cell office:value-type="float" office:value="-0.6054795186762552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6.44322e-06" table:style-name="c1">
            <text:p>0.0000064432</text:p>
          </table:table-cell>
          <table:table-cell office:value-type="string" table:style-name="c1">
            <text:p>2026-05-06 22:15</text:p>
          </table:table-cell>
          <table:table-cell office:value-type="float" office:value="6.406795e-06" table:style-name="c1">
            <text:p>0.0000064068</text:p>
          </table:table-cell>
          <table:table-cell office:value-type="float" office:value="-0.7640928480635689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6.373185e-06" table:style-name="c1">
            <text:p>0.0000063732</text:p>
          </table:table-cell>
          <table:table-cell office:value-type="string" table:style-name="c1">
            <text:p>2026-05-07 07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8 18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14435372991071782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30</text:p>
          </table:table-cell>
          <table:table-cell office:value-type="float" office:value="6.46323e-06" table:style-name="c1">
            <text:p>0.0000064632</text:p>
          </table:table-cell>
          <table:table-cell office:value-type="string" table:style-name="c1">
            <text:p>2026-05-08 21:00</text:p>
          </table:table-cell>
          <table:table-cell office:value-type="float" office:value="6.446775000000001e-06" table:style-name="c1">
            <text:p>0.0000064468</text:p>
          </table:table-cell>
          <table:table-cell office:value-type="float" office:value="-0.45398513166016174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18:00</text:p>
          </table:table-cell>
          <table:table-cell office:value-type="float" office:value="6.416790000000001e-06" table:style-name="c1">
            <text:p>0.0000064168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0 03:0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6117013978925834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10 06:30</text:p>
          </table:table-cell>
          <table:table-cell office:value-type="float" office:value="6.3968e-06" table:style-name="c1">
            <text:p>0.0000063968</text:p>
          </table:table-cell>
          <table:table-cell office:value-type="float" office:value="-0.4551889920874075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4:45</text:p>
          </table:table-cell>
          <table:table-cell office:value-type="float" office:value="6.54327e-06" table:style-name="c1">
            <text:p>0.0000065433</text:p>
          </table:table-cell>
          <table:table-cell office:value-type="string" table:style-name="c1">
            <text:p>2026-05-10 15:15</text:p>
          </table:table-cell>
          <table:table-cell office:value-type="float" office:value="6.586705e-06" table:style-name="c1">
            <text:p>0.0000065867</text:p>
          </table:table-cell>
          <table:table-cell office:value-type="float" office:value="0.46258486513623964" table:style-name="c11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6.6033e-06" table:style-name="c1">
            <text:p>0.0000066033</text:p>
          </table:table-cell>
          <table:table-cell office:value-type="string" table:style-name="c1">
            <text:p>2026-05-10 23:45</text:p>
          </table:table-cell>
          <table:table-cell office:value-type="float" office:value="6.626685e-06" table:style-name="c1">
            <text:p>0.0000066267</text:p>
          </table:table-cell>
          <table:table-cell office:value-type="float" office:value="0.15353318318114262" table:style-name="c11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0:4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5-21 01:15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0.04355235609390107" table:style-name="c11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30</text:p>
          </table:table-cell>
          <table:table-cell office:value-type="float" office:value="5.8529249999999995e-06" table:style-name="c1">
            <text:p>0.0000058529</text:p>
          </table:table-cell>
          <table:table-cell office:value-type="string" table:style-name="c1">
            <text:p>2026-05-21 04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0.4700781732210446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09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0.47037000189971145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18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45</text:p>
          </table:table-cell>
          <table:table-cell office:value-type="float" office:value="5.492745e-06" table:style-name="c1">
            <text:p>0.0000054927</text:p>
          </table:table-cell>
          <table:table-cell office:value-type="string" table:style-name="c1">
            <text:p>2026-05-30 02:15</text:p>
          </table:table-cell>
          <table:table-cell office:value-type="float" office:value="5.527235000000001e-06" table:style-name="c1">
            <text:p>0.0000055272</text:p>
          </table:table-cell>
          <table:table-cell office:value-type="float" office:value="0.426763981124223" table:style-name="c11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2:15</text:p>
          </table:table-cell>
          <table:table-cell office:value-type="float" office:value="5.512754999999999e-06" table:style-name="c1">
            <text:p>0.0000055128</text:p>
          </table:table-cell>
          <table:table-cell office:value-type="string" table:style-name="c1">
            <text:p>2026-05-31 22:45</text:p>
          </table:table-cell>
          <table:table-cell office:value-type="float" office:value="5.51724e-06" table:style-name="c1">
            <text:p>0.0000055172</text:p>
          </table:table-cell>
          <table:table-cell office:value-type="float" office:value="-0.1187058514299899" table:style-name="c12">
            <text:p>-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84.58227000000001" table:style-name="c8">
            <text:p>84.582</text:p>
          </table:table-cell>
          <table:table-cell office:value-type="string" table:style-name="c8">
            <text:p>2026-03-03 16:15</text:p>
          </table:table-cell>
          <table:table-cell office:value-type="float" office:value="86.25685" table:style-name="c8">
            <text:p>86.257</text:p>
          </table:table-cell>
          <table:table-cell office:value-type="float" office:value="1.775966236009019" table:style-name="c10">
            <text:p>+1.8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30</text:p>
          </table:table-cell>
          <table:table-cell office:value-type="float" office:value="86.93344499999999" table:style-name="c8">
            <text:p>86.933</text:p>
          </table:table-cell>
          <table:table-cell office:value-type="string" table:style-name="c8">
            <text:p>2026-03-03 17:00</text:p>
          </table:table-cell>
          <table:table-cell office:value-type="float" office:value="85.35730000000001" table:style-name="c8">
            <text:p>85.357</text:p>
          </table:table-cell>
          <table:table-cell office:value-type="float" office:value="-2.0093236184301366" table:style-name="c9">
            <text:p>-2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00</text:p>
          </table:table-cell>
          <table:table-cell office:value-type="float" office:value="89.75485499999999" table:style-name="c8">
            <text:p>89.755</text:p>
          </table:table-cell>
          <table:table-cell office:value-type="string" table:style-name="c8">
            <text:p>2026-03-04 09:30</text:p>
          </table:table-cell>
          <table:table-cell office:value-type="float" office:value="90.03496" table:style-name="c8">
            <text:p>90.035</text:p>
          </table:table-cell>
          <table:table-cell office:value-type="float" office:value="0.11155398218849477" table:style-name="c10">
            <text:p>+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45</text:p>
          </table:table-cell>
          <table:table-cell office:value-type="float" office:value="90.85540499999999" table:style-name="c8">
            <text:p>90.855</text:p>
          </table:table-cell>
          <table:table-cell office:value-type="string" table:style-name="c8">
            <text:p>2026-03-04 10:15</text:p>
          </table:table-cell>
          <table:table-cell office:value-type="float" office:value="90.54470500000001" table:style-name="c8">
            <text:p>90.545</text:p>
          </table:table-cell>
          <table:table-cell office:value-type="float" office:value="-0.54118834789737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30</text:p>
          </table:table-cell>
          <table:table-cell office:value-type="float" office:value="92.67631499999999" table:style-name="c8">
            <text:p>92.676</text:p>
          </table:table-cell>
          <table:table-cell office:value-type="string" table:style-name="c8">
            <text:p>2026-03-04 16:00</text:p>
          </table:table-cell>
          <table:table-cell office:value-type="float" office:value="92.89353" table:style-name="c8">
            <text:p>92.894</text:p>
          </table:table-cell>
          <table:table-cell office:value-type="float" office:value="0.03401174672299501" table:style-name="c10">
            <text:p>+0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30</text:p>
          </table:table-cell>
          <table:table-cell office:value-type="float" office:value="92.696325" table:style-name="c8">
            <text:p>92.696</text:p>
          </table:table-cell>
          <table:table-cell office:value-type="string" table:style-name="c8">
            <text:p>2026-03-04 20:00</text:p>
          </table:table-cell>
          <table:table-cell office:value-type="float" office:value="93.143405" table:style-name="c8">
            <text:p>93.143</text:p>
          </table:table-cell>
          <table:table-cell office:value-type="float" office:value="0.28144193786001637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21:30</text:p>
          </table:table-cell>
          <table:table-cell office:value-type="float" office:value="89.80488" table:style-name="c8">
            <text:p>89.805</text:p>
          </table:table-cell>
          <table:table-cell office:value-type="string" table:style-name="c8">
            <text:p>2026-03-05 22:00</text:p>
          </table:table-cell>
          <table:table-cell office:value-type="float" office:value="89.07544000000001" table:style-name="c8">
            <text:p>89.075</text:p>
          </table:table-cell>
          <table:table-cell office:value-type="float" office:value="-1.0105261591129344" table:style-name="c9">
            <text:p>-1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6 08:00</text:p>
          </table:table-cell>
          <table:table-cell office:value-type="float" office:value="88.74435" table:style-name="c8">
            <text:p>88.744</text:p>
          </table:table-cell>
          <table:table-cell office:value-type="string" table:style-name="c8">
            <text:p>2026-03-06 08:30</text:p>
          </table:table-cell>
          <table:table-cell office:value-type="float" office:value="88.37579000000001" table:style-name="c8">
            <text:p>88.376</text:p>
          </table:table-cell>
          <table:table-cell office:value-type="float" office:value="-0.6143751170750389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88.14405" table:style-name="c8">
            <text:p>88.144</text:p>
          </table:table-cell>
          <table:table-cell office:value-type="string" table:style-name="c8">
            <text:p>2026-03-10 15:30</text:p>
          </table:table-cell>
          <table:table-cell office:value-type="float" office:value="87.72611500000001" table:style-name="c8">
            <text:p>87.726</text:p>
          </table:table-cell>
          <table:table-cell office:value-type="float" office:value="-0.6731021593459618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3:30</text:p>
          </table:table-cell>
          <table:table-cell office:value-type="float" office:value="86.28312" table:style-name="c8">
            <text:p>86.283</text:p>
          </table:table-cell>
          <table:table-cell office:value-type="string" table:style-name="c8">
            <text:p>2026-03-11 14:00</text:p>
          </table:table-cell>
          <table:table-cell office:value-type="float" office:value="85.927015" table:style-name="c8">
            <text:p>85.927</text:p>
          </table:table-cell>
          <table:table-cell office:value-type="float" office:value="-0.6117918579961024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4:30</text:p>
          </table:table-cell>
          <table:table-cell office:value-type="float" office:value="86.67331499999999" table:style-name="c8">
            <text:p>86.673</text:p>
          </table:table-cell>
          <table:table-cell office:value-type="string" table:style-name="c8">
            <text:p>2026-03-11 15:00</text:p>
          </table:table-cell>
          <table:table-cell office:value-type="float" office:value="86.49673000000001" table:style-name="c8">
            <text:p>86.497</text:p>
          </table:table-cell>
          <table:table-cell office:value-type="float" office:value="-0.40322902530031124" table:style-name="c9">
            <text:p>-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7:00</text:p>
          </table:table-cell>
          <table:table-cell office:value-type="float" office:value="86.493225" table:style-name="c8">
            <text:p>86.493</text:p>
          </table:table-cell>
          <table:table-cell office:value-type="string" table:style-name="c8">
            <text:p>2026-03-11 17:30</text:p>
          </table:table-cell>
          <table:table-cell office:value-type="float" office:value="87.626165" table:style-name="c8">
            <text:p>87.626</text:p>
          </table:table-cell>
          <table:table-cell office:value-type="float" office:value="1.1073414087230393" table:style-name="c10">
            <text:p>+1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8:45</text:p>
          </table:table-cell>
          <table:table-cell office:value-type="float" office:value="85.94295" table:style-name="c8">
            <text:p>85.943</text:p>
          </table:table-cell>
          <table:table-cell office:value-type="string" table:style-name="c8">
            <text:p>2026-03-12 09:15</text:p>
          </table:table-cell>
          <table:table-cell office:value-type="float" office:value="85.60717500000001" table:style-name="c8">
            <text:p>85.607</text:p>
          </table:table-cell>
          <table:table-cell office:value-type="float" office:value="-0.5898142230688852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12:30</text:p>
          </table:table-cell>
          <table:table-cell office:value-type="float" office:value="87.22359" table:style-name="c8">
            <text:p>87.224</text:p>
          </table:table-cell>
          <table:table-cell office:value-type="string" table:style-name="c8">
            <text:p>2026-03-12 13:00</text:p>
          </table:table-cell>
          <table:table-cell office:value-type="float" office:value="87.20637500000001" table:style-name="c8">
            <text:p>87.206</text:p>
          </table:table-cell>
          <table:table-cell office:value-type="float" office:value="-0.21959717964484815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45</text:p>
          </table:table-cell>
          <table:table-cell office:value-type="float" office:value="90.02499" table:style-name="c8">
            <text:p>90.025</text:p>
          </table:table-cell>
          <table:table-cell office:value-type="string" table:style-name="c8">
            <text:p>2026-03-13 01:15</text:p>
          </table:table-cell>
          <table:table-cell office:value-type="float" office:value="89.955" table:style-name="c8">
            <text:p>89.955</text:p>
          </table:table-cell>
          <table:table-cell office:value-type="float" office:value="-0.2774896670357907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1:15</text:p>
          </table:table-cell>
          <table:table-cell office:value-type="float" office:value="90.20508" table:style-name="c8">
            <text:p>90.205</text:p>
          </table:table-cell>
          <table:table-cell office:value-type="string" table:style-name="c8">
            <text:p>2026-03-13 11:45</text:p>
          </table:table-cell>
          <table:table-cell office:value-type="float" office:value="90.07494000000001" table:style-name="c8">
            <text:p>90.075</text:p>
          </table:table-cell>
          <table:table-cell office:value-type="float" office:value="-0.3438828556661999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30</text:p>
          </table:table-cell>
          <table:table-cell office:value-type="float" office:value="91.46571" table:style-name="c8">
            <text:p>91.466</text:p>
          </table:table-cell>
          <table:table-cell office:value-type="string" table:style-name="c8">
            <text:p>2026-03-13 14:00</text:p>
          </table:table-cell>
          <table:table-cell office:value-type="float" office:value="91.83406" table:style-name="c8">
            <text:p>91.834</text:p>
          </table:table-cell>
          <table:table-cell office:value-type="float" office:value="0.20201419095746687" table:style-name="c10">
            <text:p>+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4:15</text:p>
          </table:table-cell>
          <table:table-cell office:value-type="float" office:value="92.496225" table:style-name="c8">
            <text:p>92.496</text:p>
          </table:table-cell>
          <table:table-cell office:value-type="string" table:style-name="c8">
            <text:p>2026-03-13 14:45</text:p>
          </table:table-cell>
          <table:table-cell office:value-type="float" office:value="91.67414000000001" table:style-name="c8">
            <text:p>91.674</text:p>
          </table:table-cell>
          <table:table-cell office:value-type="float" office:value="-1.086900147395209" table:style-name="c9">
            <text:p>-1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8:00</text:p>
          </table:table-cell>
          <table:table-cell office:value-type="float" office:value="88.48422" table:style-name="c8">
            <text:p>88.484</text:p>
          </table:table-cell>
          <table:table-cell office:value-type="string" table:style-name="c8">
            <text:p>2026-03-15 18:30</text:p>
          </table:table-cell>
          <table:table-cell office:value-type="float" office:value="88.505725" table:style-name="c8">
            <text:p>88.506</text:p>
          </table:table-cell>
          <table:table-cell office:value-type="float" office:value="-0.1756448147195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1:45</text:p>
          </table:table-cell>
          <table:table-cell office:value-type="float" office:value="89.78486999999998" table:style-name="c8">
            <text:p>89.785</text:p>
          </table:table-cell>
          <table:table-cell office:value-type="string" table:style-name="c8">
            <text:p>2026-03-15 22:15</text:p>
          </table:table-cell>
          <table:table-cell office:value-type="float" office:value="90.07494000000001" table:style-name="c8">
            <text:p>90.075</text:p>
          </table:table-cell>
          <table:table-cell office:value-type="float" office:value="0.12252642894066135" table:style-name="c10">
            <text:p>+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2:30</text:p>
          </table:table-cell>
          <table:table-cell office:value-type="float" office:value="90.48522" table:style-name="c8">
            <text:p>90.485</text:p>
          </table:table-cell>
          <table:table-cell office:value-type="string" table:style-name="c8">
            <text:p>2026-03-15 23:00</text:p>
          </table:table-cell>
          <table:table-cell office:value-type="float" office:value="92.60367500000001" table:style-name="c8">
            <text:p>92.604</text:p>
          </table:table-cell>
          <table:table-cell office:value-type="float" office:value="2.136636517737389" table:style-name="c10">
            <text:p>+2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23:15</text:p>
          </table:table-cell>
          <table:table-cell office:value-type="float" office:value="92.74634999999999" table:style-name="c8">
            <text:p>92.746</text:p>
          </table:table-cell>
          <table:table-cell office:value-type="string" table:style-name="c8">
            <text:p>2026-03-15 23:45</text:p>
          </table:table-cell>
          <table:table-cell office:value-type="float" office:value="92.21387000000001" table:style-name="c8">
            <text:p>92.214</text:p>
          </table:table-cell>
          <table:table-cell office:value-type="float" office:value="-0.7728773435612069" table:style-name="c9">
            <text:p>-0.8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93.31663499999999" table:style-name="c8">
            <text:p>93.317</text:p>
          </table:table-cell>
          <table:table-cell office:value-type="string" table:style-name="c8">
            <text:p>2026-03-16 04:15</text:p>
          </table:table-cell>
          <table:table-cell office:value-type="float" office:value="93.303325" table:style-name="c8">
            <text:p>93.303</text:p>
          </table:table-cell>
          <table:table-cell office:value-type="float" office:value="-0.21413475386782288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2:30</text:p>
          </table:table-cell>
          <table:table-cell office:value-type="float" office:value="94.08702" table:style-name="c8">
            <text:p>94.087</text:p>
          </table:table-cell>
          <table:table-cell office:value-type="string" table:style-name="c8">
            <text:p>2026-03-16 13:00</text:p>
          </table:table-cell>
          <table:table-cell office:value-type="float" office:value="93.73311000000001" table:style-name="c8">
            <text:p>93.733</text:p>
          </table:table-cell>
          <table:table-cell office:value-type="float" office:value="-0.5752998520837327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6:30</text:p>
          </table:table-cell>
          <table:table-cell office:value-type="float" office:value="94.56725999999999" table:style-name="c8">
            <text:p>94.567</text:p>
          </table:table-cell>
          <table:table-cell office:value-type="string" table:style-name="c8">
            <text:p>2026-03-17 17:00</text:p>
          </table:table-cell>
          <table:table-cell office:value-type="float" office:value="94.34280500000001" table:style-name="c8">
            <text:p>94.343</text:p>
          </table:table-cell>
          <table:table-cell office:value-type="float" office:value="-0.43677512407040986" table:style-name="c9">
            <text:p>-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7:30</text:p>
          </table:table-cell>
          <table:table-cell office:value-type="float" office:value="91.23559499999999" table:style-name="c8">
            <text:p>91.236</text:p>
          </table:table-cell>
          <table:table-cell office:value-type="string" table:style-name="c8">
            <text:p>2026-03-24 08:00</text:p>
          </table:table-cell>
          <table:table-cell office:value-type="float" office:value="91.664145" table:style-name="c8">
            <text:p>91.664</text:p>
          </table:table-cell>
          <table:table-cell office:value-type="float" office:value="0.2688790204579794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45</text:p>
          </table:table-cell>
          <table:table-cell office:value-type="float" office:value="90.00497999999999" table:style-name="c8">
            <text:p>90.005</text:p>
          </table:table-cell>
          <table:table-cell office:value-type="string" table:style-name="c8">
            <text:p>2026-03-24 21:15</text:p>
          </table:table-cell>
          <table:table-cell office:value-type="float" office:value="89.945005" table:style-name="c8">
            <text:p>89.945</text:p>
          </table:table-cell>
          <table:table-cell office:value-type="float" office:value="-0.2664019979727761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1:30</text:p>
          </table:table-cell>
          <table:table-cell office:value-type="float" office:value="90.055005" table:style-name="c8">
            <text:p>90.055</text:p>
          </table:table-cell>
          <table:table-cell office:value-type="string" table:style-name="c8">
            <text:p>2026-03-24 22:00</text:p>
          </table:table-cell>
          <table:table-cell office:value-type="float" office:value="90.34480500000001" table:style-name="c8">
            <text:p>90.345</text:p>
          </table:table-cell>
          <table:table-cell office:value-type="float" office:value="0.12126003968908616" table:style-name="c10">
            <text:p>+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4:00</text:p>
          </table:table-cell>
          <table:table-cell office:value-type="float" office:value="91.735845" table:style-name="c8">
            <text:p>91.736</text:p>
          </table:table-cell>
          <table:table-cell office:value-type="string" table:style-name="c8">
            <text:p>2026-03-25 04:30</text:p>
          </table:table-cell>
          <table:table-cell office:value-type="float" office:value="91.724115" table:style-name="c8">
            <text:p>91.724</text:p>
          </table:table-cell>
          <table:table-cell office:value-type="float" office:value="-0.21266115321116885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5:15</text:p>
          </table:table-cell>
          <table:table-cell office:value-type="float" office:value="92.636295" table:style-name="c8">
            <text:p>92.636</text:p>
          </table:table-cell>
          <table:table-cell office:value-type="string" table:style-name="c8">
            <text:p>2026-03-25 05:45</text:p>
          </table:table-cell>
          <table:table-cell office:value-type="float" office:value="92.48373500000001" table:style-name="c8">
            <text:p>92.484</text:p>
          </table:table-cell>
          <table:table-cell office:value-type="float" office:value="-0.3642578605556168" table:style-name="c9">
            <text:p>-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6:30</text:p>
          </table:table-cell>
          <table:table-cell office:value-type="float" office:value="92.876415" table:style-name="c8">
            <text:p>92.876</text:p>
          </table:table-cell>
          <table:table-cell office:value-type="string" table:style-name="c8">
            <text:p>2026-03-25 07:00</text:p>
          </table:table-cell>
          <table:table-cell office:value-type="float" office:value="92.3538" table:style-name="c8">
            <text:p>92.354</text:p>
          </table:table-cell>
          <table:table-cell office:value-type="float" office:value="-0.7614745317204519" table:style-name="c9">
            <text:p>-0.8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1:45</text:p>
          </table:table-cell>
          <table:table-cell office:value-type="float" office:value="93.156555" table:style-name="c8">
            <text:p>93.157</text:p>
          </table:table-cell>
          <table:table-cell office:value-type="string" table:style-name="c8">
            <text:p>2026-03-25 12:15</text:p>
          </table:table-cell>
          <table:table-cell office:value-type="float" office:value="93.143405" table:style-name="c8">
            <text:p>93.143</text:p>
          </table:table-cell>
          <table:table-cell office:value-type="float" office:value="-0.21398780428816266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22:45</text:p>
          </table:table-cell>
          <table:table-cell office:value-type="float" office:value="91.80588" table:style-name="c8">
            <text:p>91.806</text:p>
          </table:table-cell>
          <table:table-cell office:value-type="string" table:style-name="c8">
            <text:p>2026-03-25 23:15</text:p>
          </table:table-cell>
          <table:table-cell office:value-type="float" office:value="91.61417" table:style-name="c8">
            <text:p>91.614</text:p>
          </table:table-cell>
          <table:table-cell office:value-type="float" office:value="-0.40830361391884784" table:style-name="c9">
            <text:p>-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30</text:p>
          </table:table-cell>
          <table:table-cell office:value-type="float" office:value="83.79187499999999" table:style-name="c8">
            <text:p>83.792</text:p>
          </table:table-cell>
          <table:table-cell office:value-type="string" table:style-name="c8">
            <text:p>2026-03-31 02:00</text:p>
          </table:table-cell>
          <table:table-cell office:value-type="float" office:value="83.808075" table:style-name="c8">
            <text:p>83.808</text:p>
          </table:table-cell>
          <table:table-cell office:value-type="float" office:value="-0.18060503112621307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6:00</text:p>
          </table:table-cell>
          <table:table-cell office:value-type="float" office:value="83.66181" table:style-name="c8">
            <text:p>83.662</text:p>
          </table:table-cell>
          <table:table-cell office:value-type="string" table:style-name="c8">
            <text:p>2026-04-01 16:30</text:p>
          </table:table-cell>
          <table:table-cell office:value-type="float" office:value="84.33781" table:style-name="c8">
            <text:p>84.338</text:p>
          </table:table-cell>
          <table:table-cell office:value-type="float" office:value="0.6064998089450935" table:style-name="c10">
            <text:p>+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6:45</text:p>
          </table:table-cell>
          <table:table-cell office:value-type="float" office:value="85.28262" table:style-name="c8">
            <text:p>85.283</text:p>
          </table:table-cell>
          <table:table-cell office:value-type="string" table:style-name="c8">
            <text:p>2026-04-01 17:15</text:p>
          </table:table-cell>
          <table:table-cell office:value-type="float" office:value="85.707125" table:style-name="c8">
            <text:p>85.707</text:p>
          </table:table-cell>
          <table:table-cell office:value-type="float" office:value="0.2968675881733107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5:15</text:p>
          </table:table-cell>
          <table:table-cell office:value-type="float" office:value="81.190575" table:style-name="c8">
            <text:p>81.191</text:p>
          </table:table-cell>
          <table:table-cell office:value-type="string" table:style-name="c8">
            <text:p>2026-04-04 15:45</text:p>
          </table:table-cell>
          <table:table-cell office:value-type="float" office:value="80.84955500000001" table:style-name="c8">
            <text:p>80.85</text:p>
          </table:table-cell>
          <table:table-cell office:value-type="float" office:value="-0.619084494037625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0:00</text:p>
          </table:table-cell>
          <table:table-cell office:value-type="float" office:value="81.930945" table:style-name="c8">
            <text:p>81.931</text:p>
          </table:table-cell>
          <table:table-cell office:value-type="string" table:style-name="c8">
            <text:p>2026-04-06 00:30</text:p>
          </table:table-cell>
          <table:table-cell office:value-type="float" office:value="82.43876" table:style-name="c8">
            <text:p>82.439</text:p>
          </table:table-cell>
          <table:table-cell office:value-type="float" office:value="0.4186695500216775" table:style-name="c10">
            <text:p>+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15</text:p>
          </table:table-cell>
          <table:table-cell office:value-type="float" office:value="82.48122" table:style-name="c8">
            <text:p>82.481</text:p>
          </table:table-cell>
          <table:table-cell office:value-type="string" table:style-name="c8">
            <text:p>2026-04-06 09:45</text:p>
          </table:table-cell>
          <table:table-cell office:value-type="float" office:value="82.488735" table:style-name="c8">
            <text:p>82.489</text:p>
          </table:table-cell>
          <table:table-cell office:value-type="float" office:value="-0.190807048277164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85.28262" table:style-name="c8">
            <text:p>85.283</text:p>
          </table:table-cell>
          <table:table-cell office:value-type="string" table:style-name="c8">
            <text:p>2026-04-07 23:30</text:p>
          </table:table-cell>
          <table:table-cell office:value-type="float" office:value="86.89653" table:style-name="c8">
            <text:p>86.897</text:p>
          </table:table-cell>
          <table:table-cell office:value-type="float" office:value="1.6887424853152977" table:style-name="c10">
            <text:p>+1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45</text:p>
          </table:table-cell>
          <table:table-cell office:value-type="float" office:value="85.78286999999999" table:style-name="c8">
            <text:p>85.783</text:p>
          </table:table-cell>
          <table:table-cell office:value-type="string" table:style-name="c8">
            <text:p>2026-04-08 00:15</text:p>
          </table:table-cell>
          <table:table-cell office:value-type="float" office:value="85.33731" table:style-name="c8">
            <text:p>85.337</text:p>
          </table:table-cell>
          <table:table-cell office:value-type="float" office:value="-0.7182661091777343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5:45</text:p>
          </table:table-cell>
          <table:table-cell office:value-type="float" office:value="83.411685" table:style-name="c8">
            <text:p>83.412</text:p>
          </table:table-cell>
          <table:table-cell office:value-type="string" table:style-name="c8">
            <text:p>2026-04-09 16:15</text:p>
          </table:table-cell>
          <table:table-cell office:value-type="float" office:value="83.70812500000001" table:style-name="c8">
            <text:p>83.708</text:p>
          </table:table-cell>
          <table:table-cell office:value-type="float" office:value="0.1547834192835218" table:style-name="c10">
            <text:p>+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84.95245499999999" table:style-name="c8">
            <text:p>84.952</text:p>
          </table:table-cell>
          <table:table-cell office:value-type="string" table:style-name="c8">
            <text:p>2026-04-09 23:00</text:p>
          </table:table-cell>
          <table:table-cell office:value-type="float" office:value="83.948005" table:style-name="c8">
            <text:p>83.948</text:p>
          </table:table-cell>
          <table:table-cell office:value-type="float" office:value="-1.379903690829165" table:style-name="c9">
            <text:p>-1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9:15</text:p>
          </table:table-cell>
          <table:table-cell office:value-type="float" office:value="85.50272999999999" table:style-name="c8">
            <text:p>85.503</text:p>
          </table:table-cell>
          <table:table-cell office:value-type="string" table:style-name="c8">
            <text:p>2026-04-10 19:45</text:p>
          </table:table-cell>
          <table:table-cell office:value-type="float" office:value="85.11742" table:style-name="c8">
            <text:p>85.117</text:p>
          </table:table-cell>
          <table:table-cell office:value-type="float" office:value="-0.6496397513623187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85.50272999999999" table:style-name="c8">
            <text:p>85.503</text:p>
          </table:table-cell>
          <table:table-cell office:value-type="string" table:style-name="c8">
            <text:p>2026-04-11 19:15</text:p>
          </table:table-cell>
          <table:table-cell office:value-type="float" office:value="85.587185" table:style-name="c8">
            <text:p>85.587</text:p>
          </table:table-cell>
          <table:table-cell office:value-type="float" office:value="-0.10132282655183067" table:style-name="c9">
            <text:p>-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0:00</text:p>
          </table:table-cell>
          <table:table-cell office:value-type="float" office:value="84.132045" table:style-name="c8">
            <text:p>84.132</text:p>
          </table:table-cell>
          <table:table-cell office:value-type="string" table:style-name="c8">
            <text:p>2026-04-13 20:30</text:p>
          </table:table-cell>
          <table:table-cell office:value-type="float" office:value="84.007975" table:style-name="c8">
            <text:p>84.008</text:p>
          </table:table-cell>
          <table:table-cell office:value-type="float" office:value="-0.34707576884051017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2:30</text:p>
          </table:table-cell>
          <table:table-cell office:value-type="float" office:value="85.72284" table:style-name="c8">
            <text:p>85.723</text:p>
          </table:table-cell>
          <table:table-cell office:value-type="string" table:style-name="c8">
            <text:p>2026-04-13 23:00</text:p>
          </table:table-cell>
          <table:table-cell office:value-type="float" office:value="86.17689" table:style-name="c8">
            <text:p>86.177</text:p>
          </table:table-cell>
          <table:table-cell office:value-type="float" office:value="0.32871332411523735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30</text:p>
          </table:table-cell>
          <table:table-cell office:value-type="float" office:value="86.633295" table:style-name="c8">
            <text:p>86.633</text:p>
          </table:table-cell>
          <table:table-cell office:value-type="string" table:style-name="c8">
            <text:p>2026-04-14 00:00</text:p>
          </table:table-cell>
          <table:table-cell office:value-type="float" office:value="86.466745" table:style-name="c8">
            <text:p>86.467</text:p>
          </table:table-cell>
          <table:table-cell office:value-type="float" office:value="-0.3917628011897767" table:style-name="c9">
            <text:p>-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15</text:p>
          </table:table-cell>
          <table:table-cell office:value-type="float" office:value="86.173065" table:style-name="c8">
            <text:p>86.173</text:p>
          </table:table-cell>
          <table:table-cell office:value-type="string" table:style-name="c8">
            <text:p>2026-04-16 15:45</text:p>
          </table:table-cell>
          <table:table-cell office:value-type="float" office:value="86.67664" table:style-name="c8">
            <text:p>86.677</text:p>
          </table:table-cell>
          <table:table-cell office:value-type="float" office:value="0.3833081678596528" table:style-name="c10">
            <text:p>+0.4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6:00</text:p>
          </table:table-cell>
          <table:table-cell office:value-type="float" office:value="86.66331" table:style-name="c8">
            <text:p>86.663</text:p>
          </table:table-cell>
          <table:table-cell office:value-type="string" table:style-name="c8">
            <text:p>2026-04-16 16:30</text:p>
          </table:table-cell>
          <table:table-cell office:value-type="float" office:value="86.586685" table:style-name="c8">
            <text:p>86.587</text:p>
          </table:table-cell>
          <table:table-cell office:value-type="float" office:value="-0.2881401406373607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9:00</text:p>
          </table:table-cell>
          <table:table-cell office:value-type="float" office:value="89.054505" table:style-name="c8">
            <text:p>89.055</text:p>
          </table:table-cell>
          <table:table-cell office:value-type="string" table:style-name="c8">
            <text:p>2026-04-16 19:30</text:p>
          </table:table-cell>
          <table:table-cell office:value-type="float" office:value="89.145405" table:style-name="c8">
            <text:p>89.145</text:p>
          </table:table-cell>
          <table:table-cell office:value-type="float" office:value="-0.09803172180342656" table:style-name="c9">
            <text:p>-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00</text:p>
          </table:table-cell>
          <table:table-cell office:value-type="float" office:value="88.98446999999999" table:style-name="c8">
            <text:p>88.984</text:p>
          </table:table-cell>
          <table:table-cell office:value-type="string" table:style-name="c8">
            <text:p>2026-04-17 09:30</text:p>
          </table:table-cell>
          <table:table-cell office:value-type="float" office:value="89.39528" table:style-name="c8">
            <text:p>89.395</text:p>
          </table:table-cell>
          <table:table-cell office:value-type="float" office:value="0.2608419595913958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3:45</text:p>
          </table:table-cell>
          <table:table-cell office:value-type="float" office:value="89.854905" table:style-name="c8">
            <text:p>89.855</text:p>
          </table:table-cell>
          <table:table-cell office:value-type="string" table:style-name="c8">
            <text:p>2026-04-17 14:15</text:p>
          </table:table-cell>
          <table:table-cell office:value-type="float" office:value="89.73511" table:style-name="c8">
            <text:p>89.735</text:p>
          </table:table-cell>
          <table:table-cell office:value-type="float" office:value="-0.33295398274584276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2:30</text:p>
          </table:table-cell>
          <table:table-cell office:value-type="float" office:value="87.29362499999999" table:style-name="c8">
            <text:p>87.294</text:p>
          </table:table-cell>
          <table:table-cell office:value-type="string" table:style-name="c8">
            <text:p>2026-04-22 03:00</text:p>
          </table:table-cell>
          <table:table-cell office:value-type="float" office:value="87.37629000000001" table:style-name="c8">
            <text:p>87.376</text:p>
          </table:table-cell>
          <table:table-cell office:value-type="float" office:value="-0.10539166372112163" table:style-name="c9">
            <text:p>-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3:15</text:p>
          </table:table-cell>
          <table:table-cell office:value-type="float" office:value="87.64379999999998" table:style-name="c8">
            <text:p>87.644</text:p>
          </table:table-cell>
          <table:table-cell office:value-type="string" table:style-name="c8">
            <text:p>2026-04-22 03:45</text:p>
          </table:table-cell>
          <table:table-cell office:value-type="float" office:value="87.25635" table:style-name="c8">
            <text:p>87.256</text:p>
          </table:table-cell>
          <table:table-cell office:value-type="float" office:value="-0.6410897789118963" table:style-name="c9">
            <text:p>-0.6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5:30</text:p>
          </table:table-cell>
          <table:table-cell office:value-type="float" office:value="88.08402" table:style-name="c8">
            <text:p>88.084</text:p>
          </table:table-cell>
          <table:table-cell office:value-type="string" table:style-name="c8">
            <text:p>2026-04-22 06:00</text:p>
          </table:table-cell>
          <table:table-cell office:value-type="float" office:value="87.97599" table:style-name="c8">
            <text:p>87.976</text:p>
          </table:table-cell>
          <table:table-cell office:value-type="float" office:value="-0.32229910034760056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09:15</text:p>
          </table:table-cell>
          <table:table-cell office:value-type="float" office:value="88.4442" table:style-name="c8">
            <text:p>88.444</text:p>
          </table:table-cell>
          <table:table-cell office:value-type="string" table:style-name="c8">
            <text:p>2026-04-22 09:45</text:p>
          </table:table-cell>
          <table:table-cell office:value-type="float" office:value="88.41577" table:style-name="c8">
            <text:p>88.416</text:p>
          </table:table-cell>
          <table:table-cell office:value-type="float" office:value="-0.2319803042257207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2 13:45</text:p>
          </table:table-cell>
          <table:table-cell office:value-type="float" office:value="89.02449" table:style-name="c8">
            <text:p>89.024</text:p>
          </table:table-cell>
          <table:table-cell office:value-type="string" table:style-name="c8">
            <text:p>2026-04-22 14:15</text:p>
          </table:table-cell>
          <table:table-cell office:value-type="float" office:value="89.25535" table:style-name="c8">
            <text:p>89.255</text:p>
          </table:table-cell>
          <table:table-cell office:value-type="float" office:value="0.0589035167177121" table:style-name="c10">
            <text:p>+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21:45</text:p>
          </table:table-cell>
          <table:table-cell office:value-type="float" office:value="84.68231999999999" table:style-name="c8">
            <text:p>84.682</text:p>
          </table:table-cell>
          <table:table-cell office:value-type="string" table:style-name="c8">
            <text:p>2026-05-02 22:15</text:p>
          </table:table-cell>
          <table:table-cell office:value-type="float" office:value="84.38778500000001" table:style-name="c8">
            <text:p>84.388</text:p>
          </table:table-cell>
          <table:table-cell office:value-type="float" office:value="-0.547016404622569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07:45</text:p>
          </table:table-cell>
          <table:table-cell office:value-type="float" office:value="83.98196999999999" table:style-name="c8">
            <text:p>83.982</text:p>
          </table:table-cell>
          <table:table-cell office:value-type="string" table:style-name="c8">
            <text:p>2026-05-03 08:15</text:p>
          </table:table-cell>
          <table:table-cell office:value-type="float" office:value="83.93801" table:style-name="c8">
            <text:p>83.938</text:p>
          </table:table-cell>
          <table:table-cell office:value-type="float" office:value="-0.25213993192824136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15</text:p>
          </table:table-cell>
          <table:table-cell office:value-type="float" office:value="84.79237499999999" table:style-name="c8">
            <text:p>84.792</text:p>
          </table:table-cell>
          <table:table-cell office:value-type="string" table:style-name="c8">
            <text:p>2026-05-03 22:45</text:p>
          </table:table-cell>
          <table:table-cell office:value-type="float" office:value="84.69763" table:style-name="c8">
            <text:p>84.698</text:p>
          </table:table-cell>
          <table:table-cell office:value-type="float" office:value="-0.311414277958344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00</text:p>
          </table:table-cell>
          <table:table-cell office:value-type="float" office:value="84.81238499999999" table:style-name="c8">
            <text:p>84.812</text:p>
          </table:table-cell>
          <table:table-cell office:value-type="string" table:style-name="c8">
            <text:p>2026-05-04 02:30</text:p>
          </table:table-cell>
          <table:table-cell office:value-type="float" office:value="85.007475" table:style-name="c8">
            <text:p>85.007</text:p>
          </table:table-cell>
          <table:table-cell office:value-type="float" office:value="0.029665546458801373" table:style-name="c10">
            <text:p>+0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2:45</text:p>
          </table:table-cell>
          <table:table-cell office:value-type="float" office:value="85.552755" table:style-name="c8">
            <text:p>85.553</text:p>
          </table:table-cell>
          <table:table-cell office:value-type="string" table:style-name="c8">
            <text:p>2026-05-04 03:15</text:p>
          </table:table-cell>
          <table:table-cell office:value-type="float" office:value="85.527215" table:style-name="c8">
            <text:p>85.527</text:p>
          </table:table-cell>
          <table:table-cell office:value-type="float" office:value="-0.22969324925306012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85.032495" table:style-name="c8">
            <text:p>85.032</text:p>
          </table:table-cell>
          <table:table-cell office:value-type="string" table:style-name="c8">
            <text:p>2026-05-04 15:30</text:p>
          </table:table-cell>
          <table:table-cell office:value-type="float" office:value="84.43776000000001" table:style-name="c8">
            <text:p>84.438</text:p>
          </table:table-cell>
          <table:table-cell office:value-type="float" office:value="-0.8979227085362917" table:style-name="c9">
            <text:p>-0.9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3:15</text:p>
          </table:table-cell>
          <table:table-cell office:value-type="float" office:value="85.94295" table:style-name="c8">
            <text:p>85.943</text:p>
          </table:table-cell>
          <table:table-cell office:value-type="string" table:style-name="c8">
            <text:p>2026-05-05 13:45</text:p>
          </table:table-cell>
          <table:table-cell office:value-type="float" office:value="85.507225" table:style-name="c8">
            <text:p>85.507</text:p>
          </table:table-cell>
          <table:table-cell office:value-type="float" office:value="-0.7058798223414486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9:45</text:p>
          </table:table-cell>
          <table:table-cell office:value-type="float" office:value="86.52324" table:style-name="c8">
            <text:p>86.523</text:p>
          </table:table-cell>
          <table:table-cell office:value-type="string" table:style-name="c8">
            <text:p>2026-05-05 20:15</text:p>
          </table:table-cell>
          <table:table-cell office:value-type="float" office:value="86.68663500000001" table:style-name="c8">
            <text:p>86.687</text:p>
          </table:table-cell>
          <table:table-cell office:value-type="float" office:value="-0.011432284973356133" table:style-name="c9">
            <text:p>-0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30</text:p>
          </table:table-cell>
          <table:table-cell office:value-type="float" office:value="87.26361" table:style-name="c8">
            <text:p>87.264</text:p>
          </table:table-cell>
          <table:table-cell office:value-type="string" table:style-name="c8">
            <text:p>2026-05-06 04:00</text:p>
          </table:table-cell>
          <table:table-cell office:value-type="float" office:value="87.29633000000001" table:style-name="c8">
            <text:p>87.296</text:p>
          </table:table-cell>
          <table:table-cell office:value-type="float" office:value="-0.16247936988853517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4:15</text:p>
          </table:table-cell>
          <table:table-cell office:value-type="float" office:value="87.353655" table:style-name="c8">
            <text:p>87.354</text:p>
          </table:table-cell>
          <table:table-cell office:value-type="string" table:style-name="c8">
            <text:p>2026-05-06 04:45</text:p>
          </table:table-cell>
          <table:table-cell office:value-type="float" office:value="86.906525" table:style-name="c8">
            <text:p>86.907</text:p>
          </table:table-cell>
          <table:table-cell office:value-type="float" office:value="-0.7107385987169201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00</text:p>
          </table:table-cell>
          <table:table-cell office:value-type="float" office:value="89.06450999999998" table:style-name="c8">
            <text:p>89.065</text:p>
          </table:table-cell>
          <table:table-cell office:value-type="string" table:style-name="c8">
            <text:p>2026-05-06 09:30</text:p>
          </table:table-cell>
          <table:table-cell office:value-type="float" office:value="88.77559" table:style-name="c8">
            <text:p>88.776</text:p>
          </table:table-cell>
          <table:table-cell office:value-type="float" office:value="-0.5236456186757166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45</text:p>
          </table:table-cell>
          <table:table-cell office:value-type="float" office:value="89.294625" table:style-name="c8">
            <text:p>89.295</text:p>
          </table:table-cell>
          <table:table-cell office:value-type="string" table:style-name="c8">
            <text:p>2026-05-06 10:15</text:p>
          </table:table-cell>
          <table:table-cell office:value-type="float" office:value="89.47524" table:style-name="c8">
            <text:p>89.475</text:p>
          </table:table-cell>
          <table:table-cell office:value-type="float" office:value="0.00196427863379256" table:style-name="c10">
            <text:p>+0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6:45</text:p>
          </table:table-cell>
          <table:table-cell office:value-type="float" office:value="89.28461999999999" table:style-name="c8">
            <text:p>89.285</text:p>
          </table:table-cell>
          <table:table-cell office:value-type="string" table:style-name="c8">
            <text:p>2026-05-06 17:15</text:p>
          </table:table-cell>
          <table:table-cell office:value-type="float" office:value="89.18538500000001" table:style-name="c8">
            <text:p>89.185</text:p>
          </table:table-cell>
          <table:table-cell office:value-type="float" office:value="-0.3108223842079205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07:45</text:p>
          </table:table-cell>
          <table:table-cell office:value-type="float" office:value="90.23509499999999" table:style-name="c8">
            <text:p>90.235</text:p>
          </table:table-cell>
          <table:table-cell office:value-type="string" table:style-name="c8">
            <text:p>2026-05-07 08:15</text:p>
          </table:table-cell>
          <table:table-cell office:value-type="float" office:value="90.10492500000001" table:style-name="c8">
            <text:p>90.105</text:p>
          </table:table-cell>
          <table:table-cell office:value-type="float" office:value="-0.34386814251702313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7:30</text:p>
          </table:table-cell>
          <table:table-cell office:value-type="float" office:value="90.36515999999999" table:style-name="c8">
            <text:p>90.365</text:p>
          </table:table-cell>
          <table:table-cell office:value-type="string" table:style-name="c8">
            <text:p>2026-05-08 18:00</text:p>
          </table:table-cell>
          <table:table-cell office:value-type="float" office:value="91.61417" table:style-name="c8">
            <text:p>91.614</text:p>
          </table:table-cell>
          <table:table-cell office:value-type="float" office:value="1.1795179405093892" table:style-name="c10">
            <text:p>+1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1:45</text:p>
          </table:table-cell>
          <table:table-cell office:value-type="float" office:value="93.236595" table:style-name="c8">
            <text:p>93.237</text:p>
          </table:table-cell>
          <table:table-cell office:value-type="string" table:style-name="c8">
            <text:p>2026-05-09 02:15</text:p>
          </table:table-cell>
          <table:table-cell office:value-type="float" office:value="93.53321" table:style-name="c8">
            <text:p>93.533</text:p>
          </table:table-cell>
          <table:table-cell office:value-type="float" office:value="0.1175955784421534" table:style-name="c10">
            <text:p>+0.1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9:15</text:p>
          </table:table-cell>
          <table:table-cell office:value-type="float" office:value="94.517235" table:style-name="c8">
            <text:p>94.517</text:p>
          </table:table-cell>
          <table:table-cell office:value-type="string" table:style-name="c8">
            <text:p>2026-05-10 09:45</text:p>
          </table:table-cell>
          <table:table-cell office:value-type="float" office:value="94.26284500000001" table:style-name="c8">
            <text:p>94.263</text:p>
          </table:table-cell>
          <table:table-cell office:value-type="float" office:value="-0.4685086557546958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7:15</text:p>
          </table:table-cell>
          <table:table-cell office:value-type="float" office:value="95.26760999999999" table:style-name="c8">
            <text:p>95.268</text:p>
          </table:table-cell>
          <table:table-cell office:value-type="string" table:style-name="c8">
            <text:p>2026-05-10 17:45</text:p>
          </table:table-cell>
          <table:table-cell office:value-type="float" office:value="95.90202500000001" table:style-name="c8">
            <text:p>95.902</text:p>
          </table:table-cell>
          <table:table-cell office:value-type="float" office:value="0.4646981823360763" table:style-name="c10">
            <text:p>+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00</text:p>
          </table:table-cell>
          <table:table-cell office:value-type="float" office:value="96.28811999999999" table:style-name="c8">
            <text:p>96.288</text:p>
          </table:table-cell>
          <table:table-cell office:value-type="string" table:style-name="c8">
            <text:p>2026-05-10 23:30</text:p>
          </table:table-cell>
          <table:table-cell office:value-type="float" office:value="96.29183" table:style-name="c8">
            <text:p>96.292</text:p>
          </table:table-cell>
          <table:table-cell office:value-type="float" office:value="-0.19605468272720916" table:style-name="c9">
            <text:p>-0.2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5:30</text:p>
          </table:table-cell>
          <table:table-cell office:value-type="float" office:value="96.26811" table:style-name="c8">
            <text:p>96.268</text:p>
          </table:table-cell>
          <table:table-cell office:value-type="string" table:style-name="c8">
            <text:p>2026-05-11 16:00</text:p>
          </table:table-cell>
          <table:table-cell office:value-type="float" office:value="96.741605" table:style-name="c8">
            <text:p>96.742</text:p>
          </table:table-cell>
          <table:table-cell office:value-type="float" office:value="0.29096710385714264" table:style-name="c10">
            <text:p>+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6:15</text:p>
          </table:table-cell>
          <table:table-cell office:value-type="float" office:value="97.998975" table:style-name="c8">
            <text:p>97.999</text:p>
          </table:table-cell>
          <table:table-cell office:value-type="string" table:style-name="c8">
            <text:p>2026-05-11 16:45</text:p>
          </table:table-cell>
          <table:table-cell office:value-type="float" office:value="97.25135" table:style-name="c8">
            <text:p>97.251</text:p>
          </table:table-cell>
          <table:table-cell office:value-type="float" office:value="-0.9612656139005527" table:style-name="c9">
            <text:p>-1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20:00</text:p>
          </table:table-cell>
          <table:table-cell office:value-type="float" office:value="98.23909499999999" table:style-name="c8">
            <text:p>98.239</text:p>
          </table:table-cell>
          <table:table-cell office:value-type="string" table:style-name="c8">
            <text:p>2026-05-11 20:30</text:p>
          </table:table-cell>
          <table:table-cell office:value-type="float" office:value="97.76109500000001" table:style-name="c8">
            <text:p>97.761</text:p>
          </table:table-cell>
          <table:table-cell office:value-type="float" office:value="-0.6854953508122041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20:00</text:p>
          </table:table-cell>
          <table:table-cell office:value-type="float" office:value="94.96746" table:style-name="c8">
            <text:p>94.967</text:p>
          </table:table-cell>
          <table:table-cell office:value-type="string" table:style-name="c8">
            <text:p>2026-05-12 20:30</text:p>
          </table:table-cell>
          <table:table-cell office:value-type="float" office:value="94.90252500000001" table:style-name="c8">
            <text:p>94.903</text:p>
          </table:table-cell>
          <table:table-cell office:value-type="float" office:value="-0.2681393684478728" table:style-name="c9">
            <text:p>-0.3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7:00</text:p>
          </table:table-cell>
          <table:table-cell office:value-type="float" office:value="86.533245" table:style-name="c8">
            <text:p>86.533</text:p>
          </table:table-cell>
          <table:table-cell office:value-type="string" table:style-name="c8">
            <text:p>2026-05-20 17:30</text:p>
          </table:table-cell>
          <table:table-cell office:value-type="float" office:value="86.74660500000002" table:style-name="c8">
            <text:p>86.747</text:p>
          </table:table-cell>
          <table:table-cell office:value-type="float" office:value="0.04617131439486055" table:style-name="c10">
            <text:p>+0.0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08:30</text:p>
          </table:table-cell>
          <table:table-cell office:value-type="float" office:value="87.09352499999999" table:style-name="c8">
            <text:p>87.094</text:p>
          </table:table-cell>
          <table:table-cell office:value-type="string" table:style-name="c8">
            <text:p>2026-05-21 09:00</text:p>
          </table:table-cell>
          <table:table-cell office:value-type="float" office:value="86.81657" table:style-name="c8">
            <text:p>86.817</text:p>
          </table:table-cell>
          <table:table-cell office:value-type="float" office:value="-0.5172615569641659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5:30</text:p>
          </table:table-cell>
          <table:table-cell office:value-type="float" office:value="86.86340999999999" table:style-name="c8">
            <text:p>86.863</text:p>
          </table:table-cell>
          <table:table-cell office:value-type="string" table:style-name="c8">
            <text:p>2026-05-21 16:00</text:p>
          </table:table-cell>
          <table:table-cell office:value-type="float" office:value="86.41677" table:style-name="c8">
            <text:p>86.417</text:p>
          </table:table-cell>
          <table:table-cell office:value-type="float" office:value="-0.7130587243005748" table:style-name="c9">
            <text:p>-0.7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30</text:p>
          </table:table-cell>
          <table:table-cell office:value-type="float" office:value="87.853905" table:style-name="c8">
            <text:p>87.854</text:p>
          </table:table-cell>
          <table:table-cell office:value-type="string" table:style-name="c8">
            <text:p>2026-05-21 18:00</text:p>
          </table:table-cell>
          <table:table-cell office:value-type="float" office:value="87.54620500000001" table:style-name="c8">
            <text:p>87.546</text:p>
          </table:table-cell>
          <table:table-cell office:value-type="float" office:value="-0.54944041906273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4 06:00</text:p>
          </table:table-cell>
          <table:table-cell office:value-type="float" office:value="86.20307999999999" table:style-name="c8">
            <text:p>86.203</text:p>
          </table:table-cell>
          <table:table-cell office:value-type="string" table:style-name="c8">
            <text:p>2026-05-24 06:30</text:p>
          </table:table-cell>
          <table:table-cell office:value-type="float" office:value="85.91702" table:style-name="c8">
            <text:p>85.917</text:p>
          </table:table-cell>
          <table:table-cell office:value-type="float" office:value="-0.5310809346719347" table:style-name="c9">
            <text:p>-0.5</text:p>
          </table:table-cell>
        </table:table-row>
        <table:table-row>
          <table:table-cell office:value-type="string" table:style-name="c7">
            <text:p>SOL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4 07:00</text:p>
          </table:table-cell>
          <table:table-cell office:value-type="float" office:value="86.50322999999999" table:style-name="c8">
            <text:p>86.503</text:p>
          </table:table-cell>
          <table:table-cell office:value-type="string" table:style-name="c8">
            <text:p>2026-05-24 07:30</text:p>
          </table:table-cell>
          <table:table-cell office:value-type="float" office:value="86.17689" table:style-name="c8">
            <text:p>86.177</text:p>
          </table:table-cell>
          <table:table-cell office:value-type="float" office:value="-0.5764034511890448" table:style-name="c9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0.94077015" table:style-name="c1">
            <text:p>0.94077</text:p>
          </table:table-cell>
          <table:table-cell office:value-type="string" table:style-name="c1">
            <text:p>2026-03-04 09:30</text:p>
          </table:table-cell>
          <table:table-cell office:value-type="float" office:value="0.9477259000000001" table:style-name="c1">
            <text:p>0.94773</text:p>
          </table:table-cell>
          <table:table-cell office:value-type="float" office:value="0.5379896381597638" table:style-name="c11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0.9530763" table:style-name="c1">
            <text:p>0.95308</text:p>
          </table:table-cell>
          <table:table-cell office:value-type="string" table:style-name="c1">
            <text:p>2026-03-04 10:15</text:p>
          </table:table-cell>
          <table:table-cell office:value-type="float" office:value="0.9477259000000001" table:style-name="c1">
            <text:p>0.94773</text:p>
          </table:table-cell>
          <table:table-cell office:value-type="float" office:value="-0.7601599236178425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4:3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3-04 15:00</text:p>
          </table:table-cell>
          <table:table-cell office:value-type="float" office:value="0.9400297500000001" table:style-name="c1">
            <text:p>0.94003</text:p>
          </table:table-cell>
          <table:table-cell office:value-type="float" office:value="-0.9316651204508752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0.96678315" table:style-name="c1">
            <text:p>0.96678</text:p>
          </table:table-cell>
          <table:table-cell office:value-type="string" table:style-name="c1">
            <text:p>2026-03-04 16:00</text:p>
          </table:table-cell>
          <table:table-cell office:value-type="float" office:value="0.9774110500000001" table:style-name="c1">
            <text:p>0.97741</text:p>
          </table:table-cell>
          <table:table-cell office:value-type="float" office:value="0.8972079531019972" table:style-name="c11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00</text:p>
          </table:table-cell>
          <table:table-cell office:value-type="float" office:value="0.9800898" table:style-name="c1">
            <text:p>0.98009</text:p>
          </table:table-cell>
          <table:table-cell office:value-type="string" table:style-name="c1">
            <text:p>2026-03-04 19:30</text:p>
          </table:table-cell>
          <table:table-cell office:value-type="float" office:value="0.9815090000000001" table:style-name="c1">
            <text:p>0.98151</text:p>
          </table:table-cell>
          <table:table-cell office:value-type="float" office:value="-0.05538640347038104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0.9312653999999999" table:style-name="c1">
            <text:p>0.93127</text:p>
          </table:table-cell>
          <table:table-cell office:value-type="string" table:style-name="c1">
            <text:p>2026-03-09 14:15</text:p>
          </table:table-cell>
          <table:table-cell office:value-type="float" office:value="0.9230382500000001" table:style-name="c1">
            <text:p>0.92304</text:p>
          </table:table-cell>
          <table:table-cell office:value-type="float" office:value="-1.0815717476188702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30</text:p>
          </table:table-cell>
          <table:table-cell office:value-type="float" office:value="0.9300647999999999" table:style-name="c1">
            <text:p>0.93006</text:p>
          </table:table-cell>
          <table:table-cell office:value-type="string" table:style-name="c1">
            <text:p>2026-03-09 15:00</text:p>
          </table:table-cell>
          <table:table-cell office:value-type="float" office:value="0.9293351" table:style-name="c1">
            <text:p>0.92934</text:p>
          </table:table-cell>
          <table:table-cell office:value-type="float" office:value="-0.2782000635762061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7:30</text:p>
          </table:table-cell>
          <table:table-cell office:value-type="float" office:value="0.9392693999999999" table:style-name="c1">
            <text:p>0.93927</text:p>
          </table:table-cell>
          <table:table-cell office:value-type="string" table:style-name="c1">
            <text:p>2026-03-09 18:00</text:p>
          </table:table-cell>
          <table:table-cell office:value-type="float" office:value="0.9339328" table:style-name="c1">
            <text:p>0.93393</text:p>
          </table:table-cell>
          <table:table-cell office:value-type="float" office:value="-0.7669292395983462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9839917499999999" table:style-name="c1">
            <text:p>0.98399</text:p>
          </table:table-cell>
          <table:table-cell office:value-type="string" table:style-name="c1">
            <text:p>2026-03-09 20:00</text:p>
          </table:table-cell>
          <table:table-cell office:value-type="float" office:value="0.9717139" table:style-name="c1">
            <text:p>0.97171</text:p>
          </table:table-cell>
          <table:table-cell office:value-type="float" office:value="-1.4451651740067795" table:style-name="c12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9598797" table:style-name="c1">
            <text:p>0.95988</text:p>
          </table:table-cell>
          <table:table-cell office:value-type="string" table:style-name="c1">
            <text:p>2026-03-10 03:15</text:p>
          </table:table-cell>
          <table:table-cell office:value-type="float" office:value="0.9528233500000001" table:style-name="c1">
            <text:p>0.95282</text:p>
          </table:table-cell>
          <table:table-cell office:value-type="float" office:value="-0.9335590571037056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0 15:30</text:p>
          </table:table-cell>
          <table:table-cell office:value-type="float" office:value="0.9940027500000002" table:style-name="c1">
            <text:p>0.994</text:p>
          </table:table-cell>
          <table:table-cell office:value-type="float" office:value="-1.2036689404649858" table:style-name="c12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0:45</text:p>
          </table:table-cell>
          <table:table-cell office:value-type="float" office:value="0.9578787" table:style-name="c1">
            <text:p>0.95788</text:p>
          </table:table-cell>
          <table:table-cell office:value-type="string" table:style-name="c1">
            <text:p>2026-03-11 11:15</text:p>
          </table:table-cell>
          <table:table-cell office:value-type="float" office:value="0.95562195" table:style-name="c1">
            <text:p>0.95562</text:p>
          </table:table-cell>
          <table:table-cell office:value-type="float" office:value="-0.43502776270627486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0.9759877499999999" table:style-name="c1">
            <text:p>0.97599</text:p>
          </table:table-cell>
          <table:table-cell office:value-type="string" table:style-name="c1">
            <text:p>2026-03-11 14:00</text:p>
          </table:table-cell>
          <table:table-cell office:value-type="float" office:value="0.9712141500000001" table:style-name="c1">
            <text:p>0.97121</text:p>
          </table:table-cell>
          <table:table-cell office:value-type="float" office:value="-0.6880267796240069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98419185" table:style-name="c1">
            <text:p>0.98419</text:p>
          </table:table-cell>
          <table:table-cell office:value-type="string" table:style-name="c1">
            <text:p>2026-03-11 17:45</text:p>
          </table:table-cell>
          <table:table-cell office:value-type="float" office:value="0.98180885" table:style-name="c1">
            <text:p>0.98181</text:p>
          </table:table-cell>
          <table:table-cell office:value-type="float" office:value="-0.44154357619908824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00</text:p>
          </table:table-cell>
          <table:table-cell office:value-type="float" office:value="0.9918956999999999" table:style-name="c1">
            <text:p>0.9919</text:p>
          </table:table-cell>
          <table:table-cell office:value-type="string" table:style-name="c1">
            <text:p>2026-03-11 19:30</text:p>
          </table:table-cell>
          <table:table-cell office:value-type="float" office:value="0.9939028" table:style-name="c1">
            <text:p>0.9939</text:p>
          </table:table-cell>
          <table:table-cell office:value-type="float" office:value="0.0020454068709208073" table:style-name="c11">
            <text:p>+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0.97738845" table:style-name="c1">
            <text:p>0.97739</text:p>
          </table:table-cell>
          <table:table-cell office:value-type="string" table:style-name="c1">
            <text:p>2026-03-12 08:15</text:p>
          </table:table-cell>
          <table:table-cell office:value-type="float" office:value="0.9773111000000001" table:style-name="c1">
            <text:p>0.97731</text:p>
          </table:table-cell>
          <table:table-cell office:value-type="float" office:value="-0.20779812661996244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2:30</text:p>
          </table:table-cell>
          <table:table-cell office:value-type="float" office:value="0.9857926499999999" table:style-name="c1">
            <text:p>0.98579</text:p>
          </table:table-cell>
          <table:table-cell office:value-type="string" table:style-name="c1">
            <text:p>2026-03-12 13:00</text:p>
          </table:table-cell>
          <table:table-cell office:value-type="float" office:value="0.987506" table:style-name="c1">
            <text:p>0.98751</text:p>
          </table:table-cell>
          <table:table-cell office:value-type="float" office:value="-0.02644313629240891" table:style-name="c12">
            <text:p>-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9990993" table:style-name="c1">
            <text:p>0.9991</text:p>
          </table:table-cell>
          <table:table-cell office:value-type="string" table:style-name="c1">
            <text:p>2026-03-13 00:45</text:p>
          </table:table-cell>
          <table:table-cell office:value-type="float" office:value="1.0086954000000001" table:style-name="c1">
            <text:p>1.0087</text:p>
          </table:table-cell>
          <table:table-cell office:value-type="float" office:value="0.7586551101977479" table:style-name="c11">
            <text:p>+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5:30</text:p>
          </table:table-cell>
          <table:table-cell office:value-type="float" office:value="1.0397195999999997" table:style-name="c1">
            <text:p>1.0397</text:p>
          </table:table-cell>
          <table:table-cell office:value-type="string" table:style-name="c1">
            <text:p>2026-03-13 06:00</text:p>
          </table:table-cell>
          <table:table-cell office:value-type="float" office:value="1.03598175" table:style-name="c1">
            <text:p>1.036</text:p>
          </table:table-cell>
          <table:table-cell office:value-type="float" office:value="-0.5586869304233466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1.04742345" table:style-name="c1">
            <text:p>1.0474</text:p>
          </table:table-cell>
          <table:table-cell office:value-type="string" table:style-name="c1">
            <text:p>2026-03-13 10:30</text:p>
          </table:table-cell>
          <table:table-cell office:value-type="float" office:value="1.0442776" table:style-name="c1">
            <text:p>1.0443</text:p>
          </table:table-cell>
          <table:table-cell office:value-type="float" office:value="-0.4996413744985162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02461205" table:style-name="c1">
            <text:p>1.0246</text:p>
          </table:table-cell>
          <table:table-cell office:value-type="string" table:style-name="c1">
            <text:p>2026-03-15 23:15</text:p>
          </table:table-cell>
          <table:table-cell office:value-type="float" office:value="1.0246874" table:style-name="c1">
            <text:p>1.0247</text:p>
          </table:table-cell>
          <table:table-cell office:value-type="float" office:value="-0.19256069773921913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.0317155999999998" table:style-name="c1">
            <text:p>1.0317</text:p>
          </table:table-cell>
          <table:table-cell office:value-type="string" table:style-name="c1">
            <text:p>2026-03-16 04:00</text:p>
          </table:table-cell>
          <table:table-cell office:value-type="float" office:value="1.0406794" table:style-name="c1">
            <text:p>1.0407</text:p>
          </table:table-cell>
          <table:table-cell office:value-type="float" office:value="0.6671879226600952" table:style-name="c11">
            <text:p>+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.0811403" table:style-name="c1">
            <text:p>1.0811</text:p>
          </table:table-cell>
          <table:table-cell office:value-type="string" table:style-name="c1">
            <text:p>2026-03-17 00:45</text:p>
          </table:table-cell>
          <table:table-cell office:value-type="float" office:value="1.0557718500000002" table:style-name="c1">
            <text:p>1.0558</text:p>
          </table:table-cell>
          <table:table-cell office:value-type="float" office:value="-2.5416625324344744" table:style-name="c12">
            <text:p>-2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5:15</text:p>
          </table:table-cell>
          <table:table-cell office:value-type="float" office:value="1.0479237000000001" table:style-name="c1">
            <text:p>1.0479</text:p>
          </table:table-cell>
          <table:table-cell office:value-type="string" table:style-name="c1">
            <text:p>2026-03-18 05:45</text:p>
          </table:table-cell>
          <table:table-cell office:value-type="float" office:value="1.0382806" table:style-name="c1">
            <text:p>1.0383</text:p>
          </table:table-cell>
          <table:table-cell office:value-type="float" office:value="-1.118270625943485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4 07:45</text:p>
          </table:table-cell>
          <table:table-cell office:value-type="float" office:value="0.95102425" table:style-name="c1">
            <text:p>0.95102</text:p>
          </table:table-cell>
          <table:table-cell office:value-type="float" office:value="-0.40432250811601733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486741" table:style-name="c1">
            <text:p>0.94867</text:p>
          </table:table-cell>
          <table:table-cell office:value-type="string" table:style-name="c1">
            <text:p>2026-03-24 21:00</text:p>
          </table:table-cell>
          <table:table-cell office:value-type="float" office:value="0.9473261000000001" table:style-name="c1">
            <text:p>0.94733</text:p>
          </table:table-cell>
          <table:table-cell office:value-type="float" office:value="-0.3417090098591147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45</text:p>
          </table:table-cell>
          <table:table-cell office:value-type="float" office:value="0.96178065" table:style-name="c1">
            <text:p>0.96178</text:p>
          </table:table-cell>
          <table:table-cell office:value-type="string" table:style-name="c1">
            <text:p>2026-03-25 07:15</text:p>
          </table:table-cell>
          <table:table-cell office:value-type="float" office:value="0.9598198500000001" table:style-name="c1">
            <text:p>0.95982</text:p>
          </table:table-cell>
          <table:table-cell office:value-type="float" office:value="-0.403364309746701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30</text:p>
          </table:table-cell>
          <table:table-cell office:value-type="float" office:value="0.9696845999999999" table:style-name="c1">
            <text:p>0.96968</text:p>
          </table:table-cell>
          <table:table-cell office:value-type="string" table:style-name="c1">
            <text:p>2026-03-25 12:00</text:p>
          </table:table-cell>
          <table:table-cell office:value-type="float" office:value="0.9671162000000001" table:style-name="c1">
            <text:p>0.96712</text:p>
          </table:table-cell>
          <table:table-cell office:value-type="float" office:value="-0.46424015435531096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8886440999999999" table:style-name="c1">
            <text:p>0.88864</text:p>
          </table:table-cell>
          <table:table-cell office:value-type="string" table:style-name="c1">
            <text:p>2026-04-01 06:15</text:p>
          </table:table-cell>
          <table:table-cell office:value-type="float" office:value="0.8983506000000001" table:style-name="c1">
            <text:p>0.89835</text:p>
          </table:table-cell>
          <table:table-cell office:value-type="float" office:value="0.8901985790036759" table:style-name="c11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30</text:p>
          </table:table-cell>
          <table:table-cell office:value-type="float" office:value="0.8996495999999999" table:style-name="c1">
            <text:p>0.89965</text:p>
          </table:table-cell>
          <table:table-cell office:value-type="string" table:style-name="c1">
            <text:p>2026-04-01 07:00</text:p>
          </table:table-cell>
          <table:table-cell office:value-type="float" office:value="0.90104925" table:style-name="c1">
            <text:p>0.90105</text:p>
          </table:table-cell>
          <table:table-cell office:value-type="float" office:value="-0.04463376082753934" table:style-name="c12">
            <text:p>-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0.8940467999999999" table:style-name="c1">
            <text:p>0.89405</text:p>
          </table:table-cell>
          <table:table-cell office:value-type="string" table:style-name="c1">
            <text:p>2026-04-02 01:15</text:p>
          </table:table-cell>
          <table:table-cell office:value-type="float" office:value="0.8867564" table:style-name="c1">
            <text:p>0.88676</text:p>
          </table:table-cell>
          <table:table-cell office:value-type="float" office:value="-1.0137082358104732" table:style-name="c12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6 10:00</text:p>
          </table:table-cell>
          <table:table-cell office:value-type="float" office:value="0.9001497" table:style-name="c1">
            <text:p>0.90015</text:p>
          </table:table-cell>
          <table:table-cell office:value-type="float" office:value="-0.23318332503747818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0.9158576999999999" table:style-name="c1">
            <text:p>0.91586</text:p>
          </table:table-cell>
          <table:table-cell office:value-type="string" table:style-name="c1">
            <text:p>2026-04-06 11:00</text:p>
          </table:table-cell>
          <table:table-cell office:value-type="float" office:value="0.9094450500000001" table:style-name="c1">
            <text:p>0.90945</text:p>
          </table:table-cell>
          <table:table-cell office:value-type="float" office:value="-0.8986800738749912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7 20:30</text:p>
          </table:table-cell>
          <table:table-cell office:value-type="float" office:value="0.89365295" table:style-name="c1">
            <text:p>0.89365</text:p>
          </table:table-cell>
          <table:table-cell office:value-type="float" office:value="0.013556304193929058" table:style-name="c11">
            <text:p>+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0.9094544999999999" table:style-name="c1">
            <text:p>0.90945</text:p>
          </table:table-cell>
          <table:table-cell office:value-type="string" table:style-name="c1">
            <text:p>2026-04-07 21:45</text:p>
          </table:table-cell>
          <table:table-cell office:value-type="float" office:value="0.9083456000000001" table:style-name="c1">
            <text:p>0.90835</text:p>
          </table:table-cell>
          <table:table-cell office:value-type="float" office:value="-0.3215864954651204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9302649" table:style-name="c1">
            <text:p>0.93026</text:p>
          </table:table-cell>
          <table:table-cell office:value-type="string" table:style-name="c1">
            <text:p>2026-04-07 23:15</text:p>
          </table:table-cell>
          <table:table-cell office:value-type="float" office:value="0.95822065" table:style-name="c1">
            <text:p>0.95822</text:p>
          </table:table-cell>
          <table:table-cell office:value-type="float" office:value="2.7992313716931783" table:style-name="c11">
            <text:p>+2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0.9764879999999999" table:style-name="c1">
            <text:p>0.97649</text:p>
          </table:table-cell>
          <table:table-cell office:value-type="string" table:style-name="c1">
            <text:p>2026-04-08 00:00</text:p>
          </table:table-cell>
          <table:table-cell office:value-type="float" office:value="0.9593201" table:style-name="c1">
            <text:p>0.95932</text:p>
          </table:table-cell>
          <table:table-cell office:value-type="float" office:value="-1.9545125879580572" table:style-name="c12">
            <text:p>-2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09 16:15</text:p>
          </table:table-cell>
          <table:table-cell office:value-type="float" office:value="0.93543205" table:style-name="c1">
            <text:p>0.93543</text:p>
          </table:table-cell>
          <table:table-cell office:value-type="float" office:value="-0.1396004339386247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30</text:p>
          </table:table-cell>
          <table:table-cell office:value-type="float" office:value="0.9340668" table:style-name="c1">
            <text:p>0.93407</text:p>
          </table:table-cell>
          <table:table-cell office:value-type="string" table:style-name="c1">
            <text:p>2026-04-09 17:00</text:p>
          </table:table-cell>
          <table:table-cell office:value-type="float" office:value="0.9319338" table:style-name="c1">
            <text:p>0.93193</text:p>
          </table:table-cell>
          <table:table-cell office:value-type="float" office:value="-0.4277997747270223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09 23:00</text:p>
          </table:table-cell>
          <table:table-cell office:value-type="float" office:value="0.9379308000000001" table:style-name="c1">
            <text:p>0.93793</text:p>
          </table:table-cell>
          <table:table-cell office:value-type="float" office:value="-2.083926500297717" table:style-name="c12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6:15</text:p>
          </table:table-cell>
          <table:table-cell office:value-type="float" office:value="0.9447721499999999" table:style-name="c1">
            <text:p>0.94477</text:p>
          </table:table-cell>
          <table:table-cell office:value-type="string" table:style-name="c1">
            <text:p>2026-04-10 06:45</text:p>
          </table:table-cell>
          <table:table-cell office:value-type="float" office:value="0.93223365" table:style-name="c1">
            <text:p>0.93223</text:p>
          </table:table-cell>
          <table:table-cell office:value-type="float" office:value="-1.5243924226968297" table:style-name="c12">
            <text:p>-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9:45</text:p>
          </table:table-cell>
          <table:table-cell office:value-type="float" office:value="0.9376686" table:style-name="c1">
            <text:p>0.93767</text:p>
          </table:table-cell>
          <table:table-cell office:value-type="string" table:style-name="c1">
            <text:p>2026-04-10 10:15</text:p>
          </table:table-cell>
          <table:table-cell office:value-type="float" office:value="0.9343326000000001" table:style-name="c1">
            <text:p>0.93433</text:p>
          </table:table-cell>
          <table:table-cell office:value-type="float" office:value="-0.5549648209825953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9462729" table:style-name="c1">
            <text:p>0.94627</text:p>
          </table:table-cell>
          <table:table-cell office:value-type="string" table:style-name="c1">
            <text:p>2026-04-10 15:00</text:p>
          </table:table-cell>
          <table:table-cell office:value-type="float" office:value="0.9476259500000002" table:style-name="c1">
            <text:p>0.94763</text:p>
          </table:table-cell>
          <table:table-cell office:value-type="float" office:value="-0.057198539031366735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8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10 19:00</text:p>
          </table:table-cell>
          <table:table-cell office:value-type="float" office:value="0.9585205" table:style-name="c1">
            <text:p>0.95852</text:p>
          </table:table-cell>
          <table:table-cell office:value-type="float" office:value="0.06555252154143432" table:style-name="c11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4-11 17:30</text:p>
          </table:table-cell>
          <table:table-cell office:value-type="float" office:value="0.9436279500000001" table:style-name="c1">
            <text:p>0.94363</text:p>
          </table:table-cell>
          <table:table-cell office:value-type="float" office:value="-0.5524561831128816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0.9552773999999999" table:style-name="c1">
            <text:p>0.95528</text:p>
          </table:table-cell>
          <table:table-cell office:value-type="string" table:style-name="c1">
            <text:p>2026-04-11 19:15</text:p>
          </table:table-cell>
          <table:table-cell office:value-type="float" office:value="0.9563216" table:style-name="c1">
            <text:p>0.95632</text:p>
          </table:table-cell>
          <table:table-cell office:value-type="float" office:value="-0.09080994467156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45</text:p>
          </table:table-cell>
          <table:table-cell office:value-type="float" office:value="0.9620808" table:style-name="c1">
            <text:p>0.96208</text:p>
          </table:table-cell>
          <table:table-cell office:value-type="string" table:style-name="c1">
            <text:p>2026-04-11 20:15</text:p>
          </table:table-cell>
          <table:table-cell office:value-type="float" office:value="0.9608193500000001" table:style-name="c1">
            <text:p>0.96082</text:p>
          </table:table-cell>
          <table:table-cell office:value-type="float" office:value="-0.33075474332819876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0.9390692999999999" table:style-name="c1">
            <text:p>0.93907</text:p>
          </table:table-cell>
          <table:table-cell office:value-type="string" table:style-name="c1">
            <text:p>2026-04-13 22:45</text:p>
          </table:table-cell>
          <table:table-cell office:value-type="float" office:value="0.9563216" table:style-name="c1">
            <text:p>0.95632</text:p>
          </table:table-cell>
          <table:table-cell office:value-type="float" office:value="1.6335975546852621" table:style-name="c11">
            <text:p>+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0.9588791999999999" table:style-name="c1">
            <text:p>0.95888</text:p>
          </table:table-cell>
          <table:table-cell office:value-type="string" table:style-name="c1">
            <text:p>2026-04-14 00:00</text:p>
          </table:table-cell>
          <table:table-cell office:value-type="float" office:value="0.9593201" table:style-name="c1">
            <text:p>0.95932</text:p>
          </table:table-cell>
          <table:table-cell office:value-type="float" office:value="-0.15401114967349416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9610803" table:style-name="c1">
            <text:p>0.96108</text:p>
          </table:table-cell>
          <table:table-cell office:value-type="string" table:style-name="c1">
            <text:p>2026-04-14 14:30</text:p>
          </table:table-cell>
          <table:table-cell office:value-type="float" office:value="0.9580207500000001" table:style-name="c1">
            <text:p>0.95802</text:p>
          </table:table-cell>
          <table:table-cell office:value-type="float" office:value="-0.5176085160886079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9393694499999999" table:style-name="c1">
            <text:p>0.93937</text:p>
          </table:table-cell>
          <table:table-cell office:value-type="string" table:style-name="c1">
            <text:p>2026-04-15 00:45</text:p>
          </table:table-cell>
          <table:table-cell office:value-type="float" office:value="0.93743105" table:style-name="c1">
            <text:p>0.93743</text:p>
          </table:table-cell>
          <table:table-cell office:value-type="float" office:value="-0.40583868987329463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4577265" table:style-name="c1">
            <text:p>0.94577</text:p>
          </table:table-cell>
          <table:table-cell office:value-type="string" table:style-name="c1">
            <text:p>2026-04-15 12:30</text:p>
          </table:table-cell>
          <table:table-cell office:value-type="float" office:value="0.9467264000000001" table:style-name="c1">
            <text:p>0.94673</text:p>
          </table:table-cell>
          <table:table-cell office:value-type="float" office:value="-0.0992581117248425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45</text:p>
          </table:table-cell>
          <table:table-cell office:value-type="float" office:value="0.9513754499999999" table:style-name="c1">
            <text:p>0.95138</text:p>
          </table:table-cell>
          <table:table-cell office:value-type="string" table:style-name="c1">
            <text:p>2026-04-15 13:15</text:p>
          </table:table-cell>
          <table:table-cell office:value-type="float" office:value="0.94962495" table:style-name="c1">
            <text:p>0.94962</text:p>
          </table:table-cell>
          <table:table-cell office:value-type="float" office:value="-0.3835289501163741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716855999999999" table:style-name="c1">
            <text:p>0.97169</text:p>
          </table:table-cell>
          <table:table-cell office:value-type="string" table:style-name="c1">
            <text:p>2026-04-15 20:15</text:p>
          </table:table-cell>
          <table:table-cell office:value-type="float" office:value="0.96501725" table:style-name="c1">
            <text:p>0.96502</text:p>
          </table:table-cell>
          <table:table-cell office:value-type="float" office:value="-0.8847943699844873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6 03:15</text:p>
          </table:table-cell>
          <table:table-cell office:value-type="float" office:value="0.9691152000000001" table:style-name="c1">
            <text:p>0.96912</text:p>
          </table:table-cell>
          <table:table-cell office:value-type="float" office:value="-0.5151187177636629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45</text:p>
          </table:table-cell>
          <table:table-cell office:value-type="float" office:value="0.9732864" table:style-name="c1">
            <text:p>0.97329</text:p>
          </table:table-cell>
          <table:table-cell office:value-type="string" table:style-name="c1">
            <text:p>2026-04-16 04:15</text:p>
          </table:table-cell>
          <table:table-cell office:value-type="float" office:value="0.9784105500000001" table:style-name="c1">
            <text:p>0.97841</text:p>
          </table:table-cell>
          <table:table-cell office:value-type="float" office:value="0.32552672168748575" table:style-name="c11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00</text:p>
          </table:table-cell>
          <table:table-cell office:value-type="float" office:value="0.9828912" table:style-name="c1">
            <text:p>0.98289</text:p>
          </table:table-cell>
          <table:table-cell office:value-type="string" table:style-name="c1">
            <text:p>2026-04-16 07:30</text:p>
          </table:table-cell>
          <table:table-cell office:value-type="float" office:value="0.9769113000000001" table:style-name="c1">
            <text:p>0.97691</text:p>
          </table:table-cell>
          <table:table-cell office:value-type="float" office:value="-0.8070827868536967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0.9904949999999999" table:style-name="c1">
            <text:p>0.99049</text:p>
          </table:table-cell>
          <table:table-cell office:value-type="string" table:style-name="c1">
            <text:p>2026-04-16 14:00</text:p>
          </table:table-cell>
          <table:table-cell office:value-type="float" office:value="0.9681157" table:style-name="c1">
            <text:p>0.96812</text:p>
          </table:table-cell>
          <table:table-cell office:value-type="float" office:value="-2.454789098814225" table:style-name="c12">
            <text:p>-2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9862928999999999" table:style-name="c1">
            <text:p>0.98629</text:p>
          </table:table-cell>
          <table:table-cell office:value-type="string" table:style-name="c1">
            <text:p>2026-04-17 07:45</text:p>
          </table:table-cell>
          <table:table-cell office:value-type="float" office:value="0.9941027000000001" table:style-name="c1">
            <text:p>0.9941</text:p>
          </table:table-cell>
          <table:table-cell office:value-type="float" office:value="0.5903508686618375" table:style-name="c11">
            <text:p>+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0.99319635" table:style-name="c1">
            <text:p>0.9932</text:p>
          </table:table-cell>
          <table:table-cell office:value-type="string" table:style-name="c1">
            <text:p>2026-04-17 08:30</text:p>
          </table:table-cell>
          <table:table-cell office:value-type="float" office:value="0.99280335" table:style-name="c1">
            <text:p>0.9928</text:p>
          </table:table-cell>
          <table:table-cell office:value-type="float" office:value="-0.23939011622929884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00</text:p>
          </table:table-cell>
          <table:table-cell office:value-type="float" office:value="0.99999975" table:style-name="c1">
            <text:p>1</text:p>
          </table:table-cell>
          <table:table-cell office:value-type="string" table:style-name="c1">
            <text:p>2026-04-17 09:30</text:p>
          </table:table-cell>
          <table:table-cell office:value-type="float" office:value="1.00379785" table:style-name="c1">
            <text:p>1.0038</text:p>
          </table:table-cell>
          <table:table-cell office:value-type="float" office:value="0.1791508545727183" table:style-name="c11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1.00100025" table:style-name="c1">
            <text:p>1.001</text:p>
          </table:table-cell>
          <table:table-cell office:value-type="string" table:style-name="c1">
            <text:p>2026-04-17 12:30</text:p>
          </table:table-cell>
          <table:table-cell office:value-type="float" office:value="0.9996999000000001" table:style-name="c1">
            <text:p>0.9997</text:p>
          </table:table-cell>
          <table:table-cell office:value-type="float" office:value="-0.32954538224139185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0107051" table:style-name="c1">
            <text:p>1.0107</text:p>
          </table:table-cell>
          <table:table-cell office:value-type="string" table:style-name="c1">
            <text:p>2026-04-17 13:30</text:p>
          </table:table-cell>
          <table:table-cell office:value-type="float" office:value="1.0278858" table:style-name="c1">
            <text:p>1.0279</text:p>
          </table:table-cell>
          <table:table-cell office:value-type="float" office:value="1.4965746473229347" table:style-name="c11">
            <text:p>+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1.03921935" table:style-name="c1">
            <text:p>1.0392</text:p>
          </table:table-cell>
          <table:table-cell office:value-type="string" table:style-name="c1">
            <text:p>2026-04-17 14:15</text:p>
          </table:table-cell>
          <table:table-cell office:value-type="float" office:value="1.03658145" table:style-name="c1">
            <text:p>1.0366</text:p>
          </table:table-cell>
          <table:table-cell office:value-type="float" office:value="-0.45322734979386103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742869" table:style-name="c1">
            <text:p>0.97429</text:p>
          </table:table-cell>
          <table:table-cell office:value-type="string" table:style-name="c1">
            <text:p>2026-04-22 06:00</text:p>
          </table:table-cell>
          <table:table-cell office:value-type="float" office:value="0.9682156500000001" table:style-name="c1">
            <text:p>0.96822</text:p>
          </table:table-cell>
          <table:table-cell office:value-type="float" office:value="-0.8218023956136356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176065" table:style-name="c1">
            <text:p>0.92176</text:p>
          </table:table-cell>
          <table:table-cell office:value-type="string" table:style-name="c1">
            <text:p>2026-05-01 13:45</text:p>
          </table:table-cell>
          <table:table-cell office:value-type="float" office:value="0.9197399" table:style-name="c1">
            <text:p>0.91974</text:p>
          </table:table-cell>
          <table:table-cell office:value-type="float" office:value="-0.418688957930668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0.9256626" table:style-name="c1">
            <text:p>0.92566</text:p>
          </table:table-cell>
          <table:table-cell office:value-type="string" table:style-name="c1">
            <text:p>2026-05-01 14:30</text:p>
          </table:table-cell>
          <table:table-cell office:value-type="float" office:value="0.9216389500000001" table:style-name="c1">
            <text:p>0.92164</text:p>
          </table:table-cell>
          <table:table-cell office:value-type="float" office:value="-0.6337088979343042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9273634499999999" table:style-name="c1">
            <text:p>0.92736</text:p>
          </table:table-cell>
          <table:table-cell office:value-type="string" table:style-name="c1">
            <text:p>2026-05-02 16:30</text:p>
          </table:table-cell>
          <table:table-cell office:value-type="float" office:value="0.9248373500000001" table:style-name="c1">
            <text:p>0.92484</text:p>
          </table:table-cell>
          <table:table-cell office:value-type="float" office:value="-0.47175137888492147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3 22:45</text:p>
          </table:table-cell>
          <table:table-cell office:value-type="float" office:value="0.9279358000000001" table:style-name="c1">
            <text:p>0.92794</text:p>
          </table:table-cell>
          <table:table-cell office:value-type="float" office:value="-0.2566759361913862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308652" table:style-name="c1">
            <text:p>0.93087</text:p>
          </table:table-cell>
          <table:table-cell office:value-type="string" table:style-name="c1">
            <text:p>2026-05-04 02:30</text:p>
          </table:table-cell>
          <table:table-cell office:value-type="float" office:value="0.9349323" table:style-name="c1">
            <text:p>0.93493</text:p>
          </table:table-cell>
          <table:table-cell office:value-type="float" office:value="0.23614271242498042" table:style-name="c11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3:15</text:p>
          </table:table-cell>
          <table:table-cell office:value-type="float" office:value="0.94077015" table:style-name="c1">
            <text:p>0.94077</text:p>
          </table:table-cell>
          <table:table-cell office:value-type="string" table:style-name="c1">
            <text:p>2026-05-04 03:45</text:p>
          </table:table-cell>
          <table:table-cell office:value-type="float" office:value="0.9370312500000001" table:style-name="c1">
            <text:p>0.93703</text:p>
          </table:table-cell>
          <table:table-cell office:value-type="float" office:value="-0.5965352396384849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9488742" table:style-name="c1">
            <text:p>0.94887</text:p>
          </table:table-cell>
          <table:table-cell office:value-type="string" table:style-name="c1">
            <text:p>2026-05-04 04:45</text:p>
          </table:table-cell>
          <table:table-cell office:value-type="float" office:value="0.9485255" table:style-name="c1">
            <text:p>0.94853</text:p>
          </table:table-cell>
          <table:table-cell office:value-type="float" office:value="-0.236575351558721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9546771" table:style-name="c1">
            <text:p>0.95468</text:p>
          </table:table-cell>
          <table:table-cell office:value-type="string" table:style-name="c1">
            <text:p>2026-05-05 11:15</text:p>
          </table:table-cell>
          <table:table-cell office:value-type="float" office:value="0.9527234000000001" table:style-name="c1">
            <text:p>0.95272</text:p>
          </table:table-cell>
          <table:table-cell office:value-type="float" office:value="-0.404136024274559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2:30</text:p>
          </table:table-cell>
          <table:table-cell office:value-type="float" office:value="0.9638817" table:style-name="c1">
            <text:p>0.96388</text:p>
          </table:table-cell>
          <table:table-cell office:value-type="string" table:style-name="c1">
            <text:p>2026-05-05 13:00</text:p>
          </table:table-cell>
          <table:table-cell office:value-type="float" office:value="0.97061445" table:style-name="c1">
            <text:p>0.97061</text:p>
          </table:table-cell>
          <table:table-cell office:value-type="float" office:value="0.4972074596343301" table:style-name="c11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0.9812903999999999" table:style-name="c1">
            <text:p>0.98129</text:p>
          </table:table-cell>
          <table:table-cell office:value-type="string" table:style-name="c1">
            <text:p>2026-05-05 13:45</text:p>
          </table:table-cell>
          <table:table-cell office:value-type="float" office:value="0.975512" table:style-name="c1">
            <text:p>0.97551</text:p>
          </table:table-cell>
          <table:table-cell office:value-type="float" office:value="-0.7875801585340847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7:15</text:p>
          </table:table-cell>
          <table:table-cell office:value-type="float" office:value="0.99339645" table:style-name="c1">
            <text:p>0.9934</text:p>
          </table:table-cell>
          <table:table-cell office:value-type="string" table:style-name="c1">
            <text:p>2026-05-06 07:45</text:p>
          </table:table-cell>
          <table:table-cell office:value-type="float" office:value="0.9944025500000001" table:style-name="c1">
            <text:p>0.9944</text:p>
          </table:table-cell>
          <table:table-cell office:value-type="float" office:value="-0.0988236567032063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1.00240095" table:style-name="c1">
            <text:p>1.0024</text:p>
          </table:table-cell>
          <table:table-cell office:value-type="string" table:style-name="c1">
            <text:p>2026-05-06 09:00</text:p>
          </table:table-cell>
          <table:table-cell office:value-type="float" office:value="1.01299325" table:style-name="c1">
            <text:p>1.013</text:p>
          </table:table-cell>
          <table:table-cell office:value-type="float" office:value="0.8546806039290145" table:style-name="c11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1.0014004499999998" table:style-name="c1">
            <text:p>1.0014</text:p>
          </table:table-cell>
          <table:table-cell office:value-type="string" table:style-name="c1">
            <text:p>2026-05-06 22:15</text:p>
          </table:table-cell>
          <table:table-cell office:value-type="float" office:value="0.9956019500000001" table:style-name="c1">
            <text:p>0.9956</text:p>
          </table:table-cell>
          <table:table-cell office:value-type="float" office:value="-0.7777815855834369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0.9852924" table:style-name="c1">
            <text:p>0.98529</text:p>
          </table:table-cell>
          <table:table-cell office:value-type="string" table:style-name="c1">
            <text:p>2026-05-07 06:15</text:p>
          </table:table-cell>
          <table:table-cell office:value-type="float" office:value="0.97881035" table:style-name="c1">
            <text:p>0.97881</text:p>
          </table:table-cell>
          <table:table-cell office:value-type="float" office:value="-0.8564657445495172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0.99759855" table:style-name="c1">
            <text:p>0.9976</text:p>
          </table:table-cell>
          <table:table-cell office:value-type="string" table:style-name="c1">
            <text:p>2026-05-07 07:15</text:p>
          </table:table-cell>
          <table:table-cell office:value-type="float" office:value="1.0087953500000002" table:style-name="c1">
            <text:p>1.0088</text:p>
          </table:table-cell>
          <table:table-cell office:value-type="float" office:value="0.9202316999508797" table:style-name="c11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8 15:30</text:p>
          </table:table-cell>
          <table:table-cell office:value-type="float" office:value="0.9995" table:style-name="c1">
            <text:p>0.9995</text:p>
          </table:table-cell>
          <table:table-cell office:value-type="float" office:value="-1.2183198502799475" table:style-name="c12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1.02661305" table:style-name="c1">
            <text:p>1.0266</text:p>
          </table:table-cell>
          <table:table-cell office:value-type="string" table:style-name="c1">
            <text:p>2026-05-08 18:15</text:p>
          </table:table-cell>
          <table:table-cell office:value-type="float" office:value="1.0258868" table:style-name="c1">
            <text:p>1.0259</text:p>
          </table:table-cell>
          <table:table-cell office:value-type="float" office:value="-0.27050091689365674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15</text:p>
          </table:table-cell>
          <table:table-cell office:value-type="float" office:value="1.02601275" table:style-name="c1">
            <text:p>1.026</text:p>
          </table:table-cell>
          <table:table-cell office:value-type="string" table:style-name="c1">
            <text:p>2026-05-08 19:45</text:p>
          </table:table-cell>
          <table:table-cell office:value-type="float" office:value="1.02258845" table:style-name="c1">
            <text:p>1.0226</text:p>
          </table:table-cell>
          <table:table-cell office:value-type="float" office:value="-0.5329811263602768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30</text:p>
          </table:table-cell>
          <table:table-cell office:value-type="float" office:value="1.0421208" table:style-name="c1">
            <text:p>1.0421</text:p>
          </table:table-cell>
          <table:table-cell office:value-type="string" table:style-name="c1">
            <text:p>2026-05-09 01:00</text:p>
          </table:table-cell>
          <table:table-cell office:value-type="float" office:value="1.0839577500000002" table:style-name="c1">
            <text:p>1.084</text:p>
          </table:table-cell>
          <table:table-cell office:value-type="float" office:value="3.806671784859317" table:style-name="c11">
            <text:p>+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0937465999999998" table:style-name="c1">
            <text:p>1.0937</text:p>
          </table:table-cell>
          <table:table-cell office:value-type="string" table:style-name="c1">
            <text:p>2026-05-09 01:45</text:p>
          </table:table-cell>
          <table:table-cell office:value-type="float" office:value="1.07836055" table:style-name="c1">
            <text:p>1.0784</text:p>
          </table:table-cell>
          <table:table-cell office:value-type="float" office:value="-1.6038168931862162" table:style-name="c12">
            <text:p>-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06503225" table:style-name="c1">
            <text:p>1.065</text:p>
          </table:table-cell>
          <table:table-cell office:value-type="string" table:style-name="c1">
            <text:p>2026-05-09 18:00</text:p>
          </table:table-cell>
          <table:table-cell office:value-type="float" office:value="1.0636679" table:style-name="c1">
            <text:p>1.0637</text:p>
          </table:table-cell>
          <table:table-cell office:value-type="float" office:value="-0.3277480219120332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1.0799397" table:style-name="c1">
            <text:p>1.0799</text:p>
          </table:table-cell>
          <table:table-cell office:value-type="string" table:style-name="c1">
            <text:p>2026-05-10 00:45</text:p>
          </table:table-cell>
          <table:table-cell office:value-type="float" office:value="1.08535705" table:style-name="c1">
            <text:p>1.0854</text:p>
          </table:table-cell>
          <table:table-cell office:value-type="float" office:value="0.3007317220628192" table:style-name="c11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3:15</text:p>
          </table:table-cell>
          <table:table-cell office:value-type="float" office:value="1.0935465" table:style-name="c1">
            <text:p>1.0935</text:p>
          </table:table-cell>
          <table:table-cell office:value-type="string" table:style-name="c1">
            <text:p>2026-05-10 03:45</text:p>
          </table:table-cell>
          <table:table-cell office:value-type="float" office:value="1.0882556" table:style-name="c1">
            <text:p>1.0883</text:p>
          </table:table-cell>
          <table:table-cell office:value-type="float" office:value="-0.6827622734287053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1.09064505" table:style-name="c1">
            <text:p>1.0906</text:p>
          </table:table-cell>
          <table:table-cell office:value-type="string" table:style-name="c1">
            <text:p>2026-05-10 08:00</text:p>
          </table:table-cell>
          <table:table-cell office:value-type="float" office:value="1.0915539500000002" table:style-name="c1">
            <text:p>1.0916</text:p>
          </table:table-cell>
          <table:table-cell office:value-type="float" office:value="-0.1167305849001709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1.10525235" table:style-name="c1">
            <text:p>1.1053</text:p>
          </table:table-cell>
          <table:table-cell office:value-type="string" table:style-name="c1">
            <text:p>2026-05-10 08:45</text:p>
          </table:table-cell>
          <table:table-cell office:value-type="float" office:value="1.12473735" table:style-name="c1">
            <text:p>1.1247</text:p>
          </table:table-cell>
          <table:table-cell office:value-type="float" office:value="1.5595216818448776" table:style-name="c11">
            <text:p>+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00</text:p>
          </table:table-cell>
          <table:table-cell office:value-type="float" office:value="1.1276635499999998" table:style-name="c1">
            <text:p>1.1277</text:p>
          </table:table-cell>
          <table:table-cell office:value-type="string" table:style-name="c1">
            <text:p>2026-05-10 09:30</text:p>
          </table:table-cell>
          <table:table-cell office:value-type="float" office:value="1.1228383" table:style-name="c1">
            <text:p>1.1228</text:p>
          </table:table-cell>
          <table:table-cell office:value-type="float" office:value="-0.6269426516180343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0:30</text:p>
          </table:table-cell>
          <table:table-cell office:value-type="float" office:value="1.14567255" table:style-name="c1">
            <text:p>1.1457</text:p>
          </table:table-cell>
          <table:table-cell office:value-type="string" table:style-name="c1">
            <text:p>2026-05-10 11:00</text:p>
          </table:table-cell>
          <table:table-cell office:value-type="float" office:value="1.1404295" table:style-name="c1">
            <text:p>1.1404</text:p>
          </table:table-cell>
          <table:table-cell office:value-type="float" office:value="-0.6566246673624043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15</text:p>
          </table:table-cell>
          <table:table-cell office:value-type="float" office:value="1.1717856" table:style-name="c1">
            <text:p>1.1718</text:p>
          </table:table-cell>
          <table:table-cell office:value-type="string" table:style-name="c1">
            <text:p>2026-05-10 15:45</text:p>
          </table:table-cell>
          <table:table-cell office:value-type="float" office:value="1.19550195" table:style-name="c1">
            <text:p>1.1955</text:p>
          </table:table-cell>
          <table:table-cell office:value-type="float" office:value="1.8200037278107928" table:style-name="c11">
            <text:p>+1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00</text:p>
          </table:table-cell>
          <table:table-cell office:value-type="float" office:value="1.2256125" table:style-name="c1">
            <text:p>1.2256</text:p>
          </table:table-cell>
          <table:table-cell office:value-type="string" table:style-name="c1">
            <text:p>2026-05-10 16:30</text:p>
          </table:table-cell>
          <table:table-cell office:value-type="float" office:value="1.2565714000000001" table:style-name="c1">
            <text:p>1.2566</text:p>
          </table:table-cell>
          <table:table-cell office:value-type="float" office:value="2.3210446834868614" table:style-name="c11">
            <text:p>+2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1.29834885" table:style-name="c1">
            <text:p>1.2983</text:p>
          </table:table-cell>
          <table:table-cell office:value-type="string" table:style-name="c1">
            <text:p>2026-05-10 17:45</text:p>
          </table:table-cell>
          <table:table-cell office:value-type="float" office:value="1.3471261" table:style-name="c1">
            <text:p>1.3471</text:p>
          </table:table-cell>
          <table:table-cell office:value-type="float" office:value="3.549457830697822" table:style-name="c11">
            <text:p>+3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30</text:p>
          </table:table-cell>
          <table:table-cell office:value-type="float" office:value="1.3128560999999999" table:style-name="c1">
            <text:p>1.3129</text:p>
          </table:table-cell>
          <table:table-cell office:value-type="string" table:style-name="c1">
            <text:p>2026-05-11 07:00</text:p>
          </table:table-cell>
          <table:table-cell office:value-type="float" office:value="1.2769612000000001" table:style-name="c1">
            <text:p>1.277</text:p>
          </table:table-cell>
          <table:table-cell office:value-type="float" office:value="-2.9285422399910943" table:style-name="c12">
            <text:p>-2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3:00</text:p>
          </table:table-cell>
          <table:table-cell office:value-type="float" office:value="1.26853395" table:style-name="c1">
            <text:p>1.2685</text:p>
          </table:table-cell>
          <table:table-cell office:value-type="string" table:style-name="c1">
            <text:p>2026-05-12 13:30</text:p>
          </table:table-cell>
          <table:table-cell office:value-type="float" office:value="1.2687653" table:style-name="c1">
            <text:p>1.2688</text:p>
          </table:table-cell>
          <table:table-cell office:value-type="float" office:value="-0.18169886857972717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1 01:30</text:p>
          </table:table-cell>
          <table:table-cell office:value-type="float" office:value="1.1002496000000002" table:style-name="c1">
            <text:p>1.1002</text:p>
          </table:table-cell>
          <table:table-cell office:value-type="float" office:value="-2.218331225548986" table:style-name="c12">
            <text:p>-2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00</text:p>
          </table:table-cell>
          <table:table-cell office:value-type="float" office:value="1.114557" table:style-name="c1">
            <text:p>1.1146</text:p>
          </table:table-cell>
          <table:table-cell office:value-type="string" table:style-name="c1">
            <text:p>2026-05-21 02:30</text:p>
          </table:table-cell>
          <table:table-cell office:value-type="float" office:value="1.1372311" table:style-name="c1">
            <text:p>1.1372</text:p>
          </table:table-cell>
          <table:table-cell office:value-type="float" office:value="1.8303931545089025" table:style-name="c11">
            <text:p>+1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1.1207601" table:style-name="c1">
            <text:p>1.1208</text:p>
          </table:table-cell>
          <table:table-cell office:value-type="string" table:style-name="c1">
            <text:p>2026-05-21 03:15</text:p>
          </table:table-cell>
          <table:table-cell office:value-type="float" office:value="1.11074435" table:style-name="c1">
            <text:p>1.1107</text:p>
          </table:table-cell>
          <table:table-cell office:value-type="float" office:value="-1.0917704828758645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1331663" table:style-name="c1">
            <text:p>1.1332</text:p>
          </table:table-cell>
          <table:table-cell office:value-type="string" table:style-name="c1">
            <text:p>2026-05-21 09:00</text:p>
          </table:table-cell>
          <table:table-cell office:value-type="float" office:value="1.11953995" table:style-name="c1">
            <text:p>1.1195</text:p>
          </table:table-cell>
          <table:table-cell office:value-type="float" office:value="-1.3999984256547249" table:style-name="c12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1.11105525" table:style-name="c1">
            <text:p>1.1111</text:p>
          </table:table-cell>
          <table:table-cell office:value-type="string" table:style-name="c1">
            <text:p>2026-05-21 15:45</text:p>
          </table:table-cell>
          <table:table-cell office:value-type="float" office:value="1.1050472" table:style-name="c1">
            <text:p>1.105</text:p>
          </table:table-cell>
          <table:table-cell office:value-type="float" office:value="-0.7395707236701354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1.15247595" table:style-name="c1">
            <text:p>1.1525</text:p>
          </table:table-cell>
          <table:table-cell office:value-type="string" table:style-name="c1">
            <text:p>2026-05-21 18:00</text:p>
          </table:table-cell>
          <table:table-cell office:value-type="float" office:value="1.14432755" table:style-name="c1">
            <text:p>1.1443</text:p>
          </table:table-cell>
          <table:table-cell office:value-type="float" office:value="-0.9055209154212429" table:style-name="c12">
            <text:p>-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5:45</text:p>
          </table:table-cell>
          <table:table-cell office:value-type="float" office:value="0.32296139999999995" table:style-name="c8">
            <text:p>0.32296</text:p>
          </table:table-cell>
          <table:table-cell office:value-type="string" table:style-name="c8">
            <text:p>2026-03-03 16:15</text:p>
          </table:table-cell>
          <table:table-cell office:value-type="float" office:value="0.33133425000000005" table:style-name="c8">
            <text:p>0.33133</text:p>
          </table:table-cell>
          <table:table-cell office:value-type="float" office:value="2.3874409865235036" table:style-name="c10">
            <text:p>+2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3 16:30</text:p>
          </table:table-cell>
          <table:table-cell office:value-type="float" office:value="0.3325662" table:style-name="c8">
            <text:p>0.33257</text:p>
          </table:table-cell>
          <table:table-cell office:value-type="string" table:style-name="c8">
            <text:p>2026-03-03 17:00</text:p>
          </table:table-cell>
          <table:table-cell office:value-type="float" office:value="0.32883550000000006" table:style-name="c8">
            <text:p>0.32884</text:p>
          </table:table-cell>
          <table:table-cell office:value-type="float" office:value="-1.3194492298074456" table:style-name="c9">
            <text:p>-1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30</text:p>
          </table:table-cell>
          <table:table-cell office:value-type="float" office:value="0.3457728" table:style-name="c8">
            <text:p>0.34577</text:p>
          </table:table-cell>
          <table:table-cell office:value-type="string" table:style-name="c8">
            <text:p>2026-03-04 10:00</text:p>
          </table:table-cell>
          <table:table-cell office:value-type="float" office:value="0.3470264" table:style-name="c8">
            <text:p>0.34703</text:p>
          </table:table-cell>
          <table:table-cell office:value-type="float" office:value="0.16192546851574452" table:style-name="c10">
            <text:p>+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19:15</text:p>
          </table:table-cell>
          <table:table-cell office:value-type="float" office:value="0.33986985" table:style-name="c8">
            <text:p>0.33987</text:p>
          </table:table-cell>
          <table:table-cell office:value-type="string" table:style-name="c8">
            <text:p>2026-03-05 19:45</text:p>
          </table:table-cell>
          <table:table-cell office:value-type="float" office:value="0.33683150000000006" table:style-name="c8">
            <text:p>0.33683</text:p>
          </table:table-cell>
          <table:table-cell office:value-type="float" office:value="-1.0920875059967527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20:15</text:p>
          </table:table-cell>
          <table:table-cell office:value-type="float" office:value="0.3403701" table:style-name="c8">
            <text:p>0.34037</text:p>
          </table:table-cell>
          <table:table-cell office:value-type="string" table:style-name="c8">
            <text:p>2026-03-05 20:45</text:p>
          </table:table-cell>
          <table:table-cell office:value-type="float" office:value="0.34312835" table:style-name="c8">
            <text:p>0.34313</text:p>
          </table:table-cell>
          <table:table-cell office:value-type="float" office:value="0.6088479653030499" table:style-name="c10">
            <text:p>+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1:15</text:p>
          </table:table-cell>
          <table:table-cell office:value-type="float" office:value="0.3277638" table:style-name="c8">
            <text:p>0.32776</text:p>
          </table:table-cell>
          <table:table-cell office:value-type="string" table:style-name="c8">
            <text:p>2026-03-10 01:45</text:p>
          </table:table-cell>
          <table:table-cell office:value-type="float" office:value="0.3248375" table:style-name="c8">
            <text:p>0.32484</text:p>
          </table:table-cell>
          <table:table-cell office:value-type="float" office:value="-1.0909228421503436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2:45</text:p>
          </table:table-cell>
          <table:table-cell office:value-type="float" office:value="0.33086535" table:style-name="c8">
            <text:p>0.33087</text:p>
          </table:table-cell>
          <table:table-cell office:value-type="string" table:style-name="c8">
            <text:p>2026-03-10 03:15</text:p>
          </table:table-cell>
          <table:table-cell office:value-type="float" office:value="0.33073455000000007" table:style-name="c8">
            <text:p>0.33073</text:p>
          </table:table-cell>
          <table:table-cell office:value-type="float" office:value="-0.23935367225669246" table:style-name="c9">
            <text:p>-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7:30</text:p>
          </table:table-cell>
          <table:table-cell office:value-type="float" office:value="0.33206594999999994" table:style-name="c8">
            <text:p>0.33207</text:p>
          </table:table-cell>
          <table:table-cell office:value-type="string" table:style-name="c8">
            <text:p>2026-03-10 08:00</text:p>
          </table:table-cell>
          <table:table-cell office:value-type="float" office:value="0.33153415" table:style-name="c8">
            <text:p>0.33153</text:p>
          </table:table-cell>
          <table:table-cell office:value-type="float" office:value="-0.3597287725073728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8:15</text:p>
          </table:table-cell>
          <table:table-cell office:value-type="float" office:value="0.3343671" table:style-name="c8">
            <text:p>0.33437</text:p>
          </table:table-cell>
          <table:table-cell office:value-type="string" table:style-name="c8">
            <text:p>2026-03-10 08:45</text:p>
          </table:table-cell>
          <table:table-cell office:value-type="float" office:value="0.33223379999999997" table:style-name="c8">
            <text:p>0.33223</text:p>
          </table:table-cell>
          <table:table-cell office:value-type="float" office:value="-0.8366359507858245" table:style-name="c9">
            <text:p>-0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09:30</text:p>
          </table:table-cell>
          <table:table-cell office:value-type="float" office:value="0.3391695" table:style-name="c8">
            <text:p>0.33917</text:p>
          </table:table-cell>
          <table:table-cell office:value-type="string" table:style-name="c8">
            <text:p>2026-03-10 10:00</text:p>
          </table:table-cell>
          <table:table-cell office:value-type="float" office:value="0.3376311" table:style-name="c8">
            <text:p>0.33763</text:p>
          </table:table-cell>
          <table:table-cell office:value-type="float" office:value="-0.6525718170118489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0:15</text:p>
          </table:table-cell>
          <table:table-cell office:value-type="float" office:value="0.33856919999999996" table:style-name="c8">
            <text:p>0.33857</text:p>
          </table:table-cell>
          <table:table-cell office:value-type="string" table:style-name="c8">
            <text:p>2026-03-10 10:45</text:p>
          </table:table-cell>
          <table:table-cell office:value-type="float" office:value="0.33533225000000005" table:style-name="c8">
            <text:p>0.33533</text:p>
          </table:table-cell>
          <table:table-cell office:value-type="float" office:value="-1.1540562956553369" table:style-name="c9">
            <text:p>-1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0 15:00</text:p>
          </table:table-cell>
          <table:table-cell office:value-type="float" office:value="0.34097039999999995" table:style-name="c8">
            <text:p>0.34097</text:p>
          </table:table-cell>
          <table:table-cell office:value-type="string" table:style-name="c8">
            <text:p>2026-03-10 15:30</text:p>
          </table:table-cell>
          <table:table-cell office:value-type="float" office:value="0.33733125" table:style-name="c8">
            <text:p>0.33733</text:p>
          </table:table-cell>
          <table:table-cell office:value-type="float" office:value="-1.2650585413718995" table:style-name="c9">
            <text:p>-1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1 12:15</text:p>
          </table:table-cell>
          <table:table-cell office:value-type="float" office:value="0.33306644999999996" table:style-name="c8">
            <text:p>0.33307</text:p>
          </table:table-cell>
          <table:table-cell office:value-type="string" table:style-name="c8">
            <text:p>2026-03-11 12:45</text:p>
          </table:table-cell>
          <table:table-cell office:value-type="float" office:value="0.33753115" table:style-name="c8">
            <text:p>0.33753</text:p>
          </table:table-cell>
          <table:table-cell office:value-type="float" office:value="1.13790363188786" table:style-name="c10">
            <text:p>+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09:45</text:p>
          </table:table-cell>
          <table:table-cell office:value-type="float" office:value="0.3351675" table:style-name="c8">
            <text:p>0.33517</text:p>
          </table:table-cell>
          <table:table-cell office:value-type="string" table:style-name="c8">
            <text:p>2026-03-12 10:15</text:p>
          </table:table-cell>
          <table:table-cell office:value-type="float" office:value="0.33263360000000003" table:style-name="c8">
            <text:p>0.33263</text:p>
          </table:table-cell>
          <table:table-cell office:value-type="float" office:value="-0.9543987905748619" table:style-name="c9">
            <text:p>-1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2 23:00</text:p>
          </table:table-cell>
          <table:table-cell office:value-type="float" office:value="0.34197089999999997" table:style-name="c8">
            <text:p>0.34197</text:p>
          </table:table-cell>
          <table:table-cell office:value-type="string" table:style-name="c8">
            <text:p>2026-03-12 23:30</text:p>
          </table:table-cell>
          <table:table-cell office:value-type="float" office:value="0.34032975000000004" table:style-name="c8">
            <text:p>0.34033</text:p>
          </table:table-cell>
          <table:table-cell office:value-type="float" office:value="-0.6788499168350115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0:30</text:p>
          </table:table-cell>
          <table:table-cell office:value-type="float" office:value="0.34487235" table:style-name="c8">
            <text:p>0.34487</text:p>
          </table:table-cell>
          <table:table-cell office:value-type="string" table:style-name="c8">
            <text:p>2026-03-13 01:00</text:p>
          </table:table-cell>
          <table:table-cell office:value-type="float" office:value="0.34382799999999997" table:style-name="c8">
            <text:p>0.34383</text:p>
          </table:table-cell>
          <table:table-cell office:value-type="float" office:value="-0.5021168475814242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4:00</text:p>
          </table:table-cell>
          <table:table-cell office:value-type="float" office:value="0.3595797" table:style-name="c8">
            <text:p>0.35958</text:p>
          </table:table-cell>
          <table:table-cell office:value-type="string" table:style-name="c8">
            <text:p>2026-03-13 14:30</text:p>
          </table:table-cell>
          <table:table-cell office:value-type="float" office:value="0.36021980000000003" table:style-name="c8">
            <text:p>0.36022</text:p>
          </table:table-cell>
          <table:table-cell office:value-type="float" office:value="-0.02224246257503948" table:style-name="c9">
            <text:p>-0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6:00</text:p>
          </table:table-cell>
          <table:table-cell office:value-type="float" office:value="0.35987985" table:style-name="c8">
            <text:p>0.35988</text:p>
          </table:table-cell>
          <table:table-cell office:value-type="string" table:style-name="c8">
            <text:p>2026-03-13 16:30</text:p>
          </table:table-cell>
          <table:table-cell office:value-type="float" office:value="0.3574212" table:style-name="c8">
            <text:p>0.35742</text:p>
          </table:table-cell>
          <table:table-cell office:value-type="float" office:value="-0.8817206572693692" table:style-name="c9">
            <text:p>-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12:00</text:p>
          </table:table-cell>
          <table:table-cell office:value-type="float" office:value="0.34567275" table:style-name="c8">
            <text:p>0.34567</text:p>
          </table:table-cell>
          <table:table-cell office:value-type="string" table:style-name="c8">
            <text:p>2026-03-14 12:30</text:p>
          </table:table-cell>
          <table:table-cell office:value-type="float" office:value="0.3460269" table:style-name="c8">
            <text:p>0.34603</text:p>
          </table:table-cell>
          <table:table-cell office:value-type="float" office:value="-0.09765241058196095" table:style-name="c9">
            <text:p>-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23:45</text:p>
          </table:table-cell>
          <table:table-cell office:value-type="float" office:value="0.34837409999999996" table:style-name="c8">
            <text:p>0.34837</text:p>
          </table:table-cell>
          <table:table-cell office:value-type="string" table:style-name="c8">
            <text:p>2026-03-15 00:15</text:p>
          </table:table-cell>
          <table:table-cell office:value-type="float" office:value="0.34772605" table:style-name="c8">
            <text:p>0.34773</text:p>
          </table:table-cell>
          <table:table-cell office:value-type="float" office:value="-0.3855494349177868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01:45</text:p>
          </table:table-cell>
          <table:table-cell office:value-type="float" office:value="0.35237609999999997" table:style-name="c8">
            <text:p>0.35238</text:p>
          </table:table-cell>
          <table:table-cell office:value-type="string" table:style-name="c8">
            <text:p>2026-03-15 02:15</text:p>
          </table:table-cell>
          <table:table-cell office:value-type="float" office:value="0.35412285000000004" table:style-name="c8">
            <text:p>0.35412</text:p>
          </table:table-cell>
          <table:table-cell office:value-type="float" office:value="0.29481523373748875" table:style-name="c10">
            <text:p>+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5 18:00</text:p>
          </table:table-cell>
          <table:table-cell office:value-type="float" office:value="0.35287635" table:style-name="c8">
            <text:p>0.35288</text:p>
          </table:table-cell>
          <table:table-cell office:value-type="string" table:style-name="c8">
            <text:p>2026-03-15 18:30</text:p>
          </table:table-cell>
          <table:table-cell office:value-type="float" office:value="0.35212385" table:style-name="c8">
            <text:p>0.35212</text:p>
          </table:table-cell>
          <table:table-cell office:value-type="float" office:value="-0.4127212198125396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0.32936459999999995" table:style-name="c8">
            <text:p>0.32936</text:p>
          </table:table-cell>
          <table:table-cell office:value-type="string" table:style-name="c8">
            <text:p>2026-03-24 21:00</text:p>
          </table:table-cell>
          <table:table-cell office:value-type="float" office:value="0.32923530000000006" table:style-name="c8">
            <text:p>0.32924</text:p>
          </table:table-cell>
          <table:table-cell office:value-type="float" office:value="-0.23907893097797617" table:style-name="c9">
            <text:p>-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2:15</text:p>
          </table:table-cell>
          <table:table-cell office:value-type="float" office:value="0.33206594999999994" table:style-name="c8">
            <text:p>0.33207</text:p>
          </table:table-cell>
          <table:table-cell office:value-type="string" table:style-name="c8">
            <text:p>2026-03-24 22:45</text:p>
          </table:table-cell>
          <table:table-cell office:value-type="float" office:value="0.33133425000000005" table:style-name="c8">
            <text:p>0.33133</text:p>
          </table:table-cell>
          <table:table-cell office:value-type="float" office:value="-0.4198073201271968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7:45</text:p>
          </table:table-cell>
          <table:table-cell office:value-type="float" office:value="0.3337668" table:style-name="c8">
            <text:p>0.33377</text:p>
          </table:table-cell>
          <table:table-cell office:value-type="string" table:style-name="c8">
            <text:p>2026-03-25 08:15</text:p>
          </table:table-cell>
          <table:table-cell office:value-type="float" office:value="0.33283350000000006" table:style-name="c8">
            <text:p>0.33283</text:p>
          </table:table-cell>
          <table:table-cell office:value-type="float" office:value="-0.47896740074205857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2:15</text:p>
          </table:table-cell>
          <table:table-cell office:value-type="float" office:value="0.33676829999999996" table:style-name="c8">
            <text:p>0.33677</text:p>
          </table:table-cell>
          <table:table-cell office:value-type="string" table:style-name="c8">
            <text:p>2026-03-25 12:45</text:p>
          </table:table-cell>
          <table:table-cell office:value-type="float" office:value="0.3350324" table:style-name="c8">
            <text:p>0.33503</text:p>
          </table:table-cell>
          <table:table-cell office:value-type="float" office:value="-0.7143278531857034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1 12:45</text:p>
          </table:table-cell>
          <table:table-cell office:value-type="float" office:value="0.30595289999999997" table:style-name="c8">
            <text:p>0.30595</text:p>
          </table:table-cell>
          <table:table-cell office:value-type="string" table:style-name="c8">
            <text:p>2026-04-01 13:15</text:p>
          </table:table-cell>
          <table:table-cell office:value-type="float" office:value="0.3032483" table:style-name="c8">
            <text:p>0.30325</text:p>
          </table:table-cell>
          <table:table-cell office:value-type="float" office:value="-1.0821251740708915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2 01:00</text:p>
          </table:table-cell>
          <table:table-cell office:value-type="float" office:value="0.2999499" table:style-name="c8">
            <text:p>0.29995</text:p>
          </table:table-cell>
          <table:table-cell office:value-type="string" table:style-name="c8">
            <text:p>2026-04-02 01:30</text:p>
          </table:table-cell>
          <table:table-cell office:value-type="float" office:value="0.29315335000000003" table:style-name="c8">
            <text:p>0.29315</text:p>
          </table:table-cell>
          <table:table-cell office:value-type="float" office:value="-2.4612655468963185" table:style-name="c9">
            <text:p>-2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09:30</text:p>
          </table:table-cell>
          <table:table-cell office:value-type="float" office:value="0.29614799999999997" table:style-name="c8">
            <text:p>0.29615</text:p>
          </table:table-cell>
          <table:table-cell office:value-type="string" table:style-name="c8">
            <text:p>2026-04-06 10:00</text:p>
          </table:table-cell>
          <table:table-cell office:value-type="float" office:value="0.29695145" table:style-name="c8">
            <text:p>0.29695</text:p>
          </table:table-cell>
          <table:table-cell office:value-type="float" office:value="0.07085783170914794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0.3091545" table:style-name="c8">
            <text:p>0.30915</text:p>
          </table:table-cell>
          <table:table-cell office:value-type="string" table:style-name="c8">
            <text:p>2026-04-07 23:30</text:p>
          </table:table-cell>
          <table:table-cell office:value-type="float" office:value="0.31094445" table:style-name="c8">
            <text:p>0.31094</text:p>
          </table:table-cell>
          <table:table-cell office:value-type="float" office:value="0.3779249677588359" table:style-name="c10">
            <text:p>+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45</text:p>
          </table:table-cell>
          <table:table-cell office:value-type="float" office:value="0.3115557" table:style-name="c8">
            <text:p>0.31156</text:p>
          </table:table-cell>
          <table:table-cell office:value-type="string" table:style-name="c8">
            <text:p>2026-04-08 00:15</text:p>
          </table:table-cell>
          <table:table-cell office:value-type="float" office:value="0.30934525" table:style-name="c8">
            <text:p>0.30935</text:p>
          </table:table-cell>
          <table:table-cell office:value-type="float" office:value="-0.9079696358468059" table:style-name="c9">
            <text:p>-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06:00</text:p>
          </table:table-cell>
          <table:table-cell office:value-type="float" office:value="0.3127563" table:style-name="c8">
            <text:p>0.31276</text:p>
          </table:table-cell>
          <table:table-cell office:value-type="string" table:style-name="c8">
            <text:p>2026-04-08 06:30</text:p>
          </table:table-cell>
          <table:table-cell office:value-type="float" office:value="0.3124437" table:style-name="c8">
            <text:p>0.31244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17:15</text:p>
          </table:table-cell>
          <table:table-cell office:value-type="float" office:value="0.30685334999999997" table:style-name="c8">
            <text:p>0.30685</text:p>
          </table:table-cell>
          <table:table-cell office:value-type="string" table:style-name="c8">
            <text:p>2026-04-08 17:45</text:p>
          </table:table-cell>
          <table:table-cell office:value-type="float" office:value="0.30454765000000006" table:style-name="c8">
            <text:p>0.30455</text:p>
          </table:table-cell>
          <table:table-cell office:value-type="float" office:value="-0.949799228963899" table:style-name="c9">
            <text:p>-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07:15</text:p>
          </table:table-cell>
          <table:table-cell office:value-type="float" office:value="0.29664824999999995" table:style-name="c8">
            <text:p>0.29665</text:p>
          </table:table-cell>
          <table:table-cell office:value-type="string" table:style-name="c8">
            <text:p>2026-04-09 07:45</text:p>
          </table:table-cell>
          <table:table-cell office:value-type="float" office:value="0.2964517" table:style-name="c8">
            <text:p>0.29645</text:p>
          </table:table-cell>
          <table:table-cell office:value-type="float" office:value="-0.2660244745417928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0.31015499999999996" table:style-name="c8">
            <text:p>0.31015</text:p>
          </table:table-cell>
          <table:table-cell office:value-type="string" table:style-name="c8">
            <text:p>2026-04-09 23:00</text:p>
          </table:table-cell>
          <table:table-cell office:value-type="float" office:value="0.30714635" table:style-name="c8">
            <text:p>0.30715</text:p>
          </table:table-cell>
          <table:table-cell office:value-type="float" office:value="-1.168008110025609" table:style-name="c9">
            <text:p>-1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00</text:p>
          </table:table-cell>
          <table:table-cell office:value-type="float" office:value="0.3135567" table:style-name="c8">
            <text:p>0.31356</text:p>
          </table:table-cell>
          <table:table-cell office:value-type="string" table:style-name="c8">
            <text:p>2026-04-13 23:30</text:p>
          </table:table-cell>
          <table:table-cell office:value-type="float" office:value="0.31464260000000005" table:style-name="c8">
            <text:p>0.31464</text:p>
          </table:table-cell>
          <table:table-cell office:value-type="float" office:value="0.14572466242945836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3 23:45</text:p>
          </table:table-cell>
          <table:table-cell office:value-type="float" office:value="0.31375679999999995" table:style-name="c8">
            <text:p>0.31376</text:p>
          </table:table-cell>
          <table:table-cell office:value-type="string" table:style-name="c8">
            <text:p>2026-04-14 00:15</text:p>
          </table:table-cell>
          <table:table-cell office:value-type="float" office:value="0.31494245" table:style-name="c8">
            <text:p>0.31494</text:p>
          </table:table-cell>
          <table:table-cell office:value-type="float" office:value="0.1772328256949285" table:style-name="c10">
            <text:p>+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0:15</text:p>
          </table:table-cell>
          <table:table-cell office:value-type="float" office:value="0.30785384999999993" table:style-name="c8">
            <text:p>0.30785</text:p>
          </table:table-cell>
          <table:table-cell office:value-type="string" table:style-name="c8">
            <text:p>2026-04-15 00:45</text:p>
          </table:table-cell>
          <table:table-cell office:value-type="float" office:value="0.30814585000000005" table:style-name="c8">
            <text:p>0.30815</text:p>
          </table:table-cell>
          <table:table-cell office:value-type="float" office:value="-0.10523940309660196" table:style-name="c9">
            <text:p>-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4:45</text:p>
          </table:table-cell>
          <table:table-cell office:value-type="float" office:value="0.31235609999999997" table:style-name="c8">
            <text:p>0.31236</text:p>
          </table:table-cell>
          <table:table-cell office:value-type="string" table:style-name="c8">
            <text:p>2026-04-15 05:15</text:p>
          </table:table-cell>
          <table:table-cell office:value-type="float" office:value="0.3128435" table:style-name="c8">
            <text:p>0.31284</text:p>
          </table:table-cell>
          <table:table-cell office:value-type="float" office:value="-0.04417207043496685" table:style-name="c9">
            <text:p>-0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0:15</text:p>
          </table:table-cell>
          <table:table-cell office:value-type="float" office:value="0.3125562" table:style-name="c8">
            <text:p>0.31256</text:p>
          </table:table-cell>
          <table:table-cell office:value-type="string" table:style-name="c8">
            <text:p>2026-04-15 10:45</text:p>
          </table:table-cell>
          <table:table-cell office:value-type="float" office:value="0.31454265" table:style-name="c8">
            <text:p>0.31454</text:p>
          </table:table-cell>
          <table:table-cell office:value-type="float" office:value="0.43437923888567376" table:style-name="c10">
            <text:p>+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1:00</text:p>
          </table:table-cell>
          <table:table-cell office:value-type="float" office:value="0.3145572" table:style-name="c8">
            <text:p>0.31456</text:p>
          </table:table-cell>
          <table:table-cell office:value-type="string" table:style-name="c8">
            <text:p>2026-04-15 11:30</text:p>
          </table:table-cell>
          <table:table-cell office:value-type="float" office:value="0.3164417" table:style-name="c8">
            <text:p>0.31644</text:p>
          </table:table-cell>
          <table:table-cell office:value-type="float" office:value="0.39799853308080113" table:style-name="c10">
            <text:p>+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00</text:p>
          </table:table-cell>
          <table:table-cell office:value-type="float" office:value="0.32005995" table:style-name="c8">
            <text:p>0.32006</text:p>
          </table:table-cell>
          <table:table-cell office:value-type="string" table:style-name="c8">
            <text:p>2026-04-15 12:30</text:p>
          </table:table-cell>
          <table:table-cell office:value-type="float" office:value="0.31924030000000003" table:style-name="c8">
            <text:p>0.31924</text:p>
          </table:table-cell>
          <table:table-cell office:value-type="float" office:value="-0.45548071844038196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15</text:p>
          </table:table-cell>
          <table:table-cell office:value-type="float" office:value="0.32486234999999997" table:style-name="c8">
            <text:p>0.32486</text:p>
          </table:table-cell>
          <table:table-cell office:value-type="string" table:style-name="c8">
            <text:p>2026-04-15 17:45</text:p>
          </table:table-cell>
          <table:table-cell office:value-type="float" office:value="0.32453765" table:style-name="c8">
            <text:p>0.32454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9:45</text:p>
          </table:table-cell>
          <table:table-cell office:value-type="float" office:value="0.3295647" table:style-name="c8">
            <text:p>0.32956</text:p>
          </table:table-cell>
          <table:table-cell office:value-type="string" table:style-name="c8">
            <text:p>2026-04-15 20:15</text:p>
          </table:table-cell>
          <table:table-cell office:value-type="float" office:value="0.32903540000000003" table:style-name="c8">
            <text:p>0.32904</text:p>
          </table:table-cell>
          <table:table-cell office:value-type="float" office:value="-0.3601847420551918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22:00</text:p>
          </table:table-cell>
          <table:table-cell office:value-type="float" office:value="0.33426705" table:style-name="c8">
            <text:p>0.33427</text:p>
          </table:table-cell>
          <table:table-cell office:value-type="string" table:style-name="c8">
            <text:p>2026-04-15 22:30</text:p>
          </table:table-cell>
          <table:table-cell office:value-type="float" office:value="0.33353315" table:style-name="c8">
            <text:p>0.33353</text:p>
          </table:table-cell>
          <table:table-cell office:value-type="float" office:value="-0.41901610309779125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2:15</text:p>
          </table:table-cell>
          <table:table-cell office:value-type="float" office:value="0.3371685" table:style-name="c8">
            <text:p>0.33717</text:p>
          </table:table-cell>
          <table:table-cell office:value-type="string" table:style-name="c8">
            <text:p>2026-04-16 02:45</text:p>
          </table:table-cell>
          <table:table-cell office:value-type="float" office:value="0.34072955" table:style-name="c8">
            <text:p>0.34073</text:p>
          </table:table-cell>
          <table:table-cell office:value-type="float" office:value="0.8541520425395577" table:style-name="c10">
            <text:p>+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4:45</text:p>
          </table:table-cell>
          <table:table-cell office:value-type="float" office:value="0.3487743" table:style-name="c8">
            <text:p>0.34877</text:p>
          </table:table-cell>
          <table:table-cell office:value-type="string" table:style-name="c8">
            <text:p>2026-04-16 05:15</text:p>
          </table:table-cell>
          <table:table-cell office:value-type="float" office:value="0.34752615000000003" table:style-name="c8">
            <text:p>0.34753</text:p>
          </table:table-cell>
          <table:table-cell office:value-type="float" office:value="-0.5570521606236278" table:style-name="c9">
            <text:p>-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00</text:p>
          </table:table-cell>
          <table:table-cell office:value-type="float" office:value="0.35677829999999994" table:style-name="c8">
            <text:p>0.35678</text:p>
          </table:table-cell>
          <table:table-cell office:value-type="string" table:style-name="c8">
            <text:p>2026-04-16 12:30</text:p>
          </table:table-cell>
          <table:table-cell office:value-type="float" office:value="0.36111935" table:style-name="c8">
            <text:p>0.36112</text:p>
          </table:table-cell>
          <table:table-cell office:value-type="float" office:value="1.0144037401798256" table:style-name="c10">
            <text:p>+1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30</text:p>
          </table:table-cell>
          <table:table-cell office:value-type="float" office:value="0.3769884" table:style-name="c8">
            <text:p>0.37699</text:p>
          </table:table-cell>
          <table:table-cell office:value-type="string" table:style-name="c8">
            <text:p>2026-04-16 14:00</text:p>
          </table:table-cell>
          <table:table-cell office:value-type="float" office:value="0.37811085000000005" table:style-name="c8">
            <text:p>0.37811</text:p>
          </table:table-cell>
          <table:table-cell office:value-type="float" office:value="0.09724607198791091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0.3925962" table:style-name="c8">
            <text:p>0.3926</text:p>
          </table:table-cell>
          <table:table-cell office:value-type="string" table:style-name="c8">
            <text:p>2026-04-16 16:15</text:p>
          </table:table-cell>
          <table:table-cell office:value-type="float" office:value="0.3876061" table:style-name="c8">
            <text:p>0.38761</text:p>
          </table:table-cell>
          <table:table-cell office:value-type="float" office:value="-1.4684106962573718" table:style-name="c9">
            <text:p>-1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23:00</text:p>
          </table:table-cell>
          <table:table-cell office:value-type="float" office:value="0.40310145" table:style-name="c8">
            <text:p>0.4031</text:p>
          </table:table-cell>
          <table:table-cell office:value-type="string" table:style-name="c8">
            <text:p>2026-04-16 23:30</text:p>
          </table:table-cell>
          <table:table-cell office:value-type="float" office:value="0.40279850000000006" table:style-name="c8">
            <text:p>0.4028</text:p>
          </table:table-cell>
          <table:table-cell office:value-type="float" office:value="-0.2749045436328479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21:30</text:p>
          </table:table-cell>
          <table:table-cell office:value-type="float" office:value="0.42431204999999994" table:style-name="c8">
            <text:p>0.42431</text:p>
          </table:table-cell>
          <table:table-cell office:value-type="string" table:style-name="c8">
            <text:p>2026-04-17 22:00</text:p>
          </table:table-cell>
          <table:table-cell office:value-type="float" office:value="0.4201898" table:style-name="c8">
            <text:p>0.42019</text:p>
          </table:table-cell>
          <table:table-cell office:value-type="float" office:value="-1.1694717154980383" table:style-name="c9">
            <text:p>-1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1:00</text:p>
          </table:table-cell>
          <table:table-cell office:value-type="float" office:value="0.43691834999999996" table:style-name="c8">
            <text:p>0.43692</text:p>
          </table:table-cell>
          <table:table-cell office:value-type="string" table:style-name="c8">
            <text:p>2026-04-18 01:30</text:p>
          </table:table-cell>
          <table:table-cell office:value-type="float" office:value="0.44347815" table:style-name="c8">
            <text:p>0.44348</text:p>
          </table:table-cell>
          <table:table-cell office:value-type="float" office:value="1.298477662508346" table:style-name="c10">
            <text:p>+1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9 04:15</text:p>
          </table:table-cell>
          <table:table-cell office:value-type="float" office:value="0.3967983" table:style-name="c8">
            <text:p>0.3968</text:p>
          </table:table-cell>
          <table:table-cell office:value-type="string" table:style-name="c8">
            <text:p>2026-04-19 04:45</text:p>
          </table:table-cell>
          <table:table-cell office:value-type="float" office:value="0.39320330000000003" table:style-name="c8">
            <text:p>0.3932</text:p>
          </table:table-cell>
          <table:table-cell office:value-type="float" office:value="-1.1040907677023593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00</text:p>
          </table:table-cell>
          <table:table-cell office:value-type="float" office:value="0.3597798" table:style-name="c8">
            <text:p>0.35978</text:p>
          </table:table-cell>
          <table:table-cell office:value-type="string" table:style-name="c8">
            <text:p>2026-04-27 01:30</text:p>
          </table:table-cell>
          <table:table-cell office:value-type="float" office:value="0.35872055" table:style-name="c8">
            <text:p>0.35872</text:p>
          </table:table-cell>
          <table:table-cell office:value-type="float" office:value="-0.4937276577089422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1:45</text:p>
          </table:table-cell>
          <table:table-cell office:value-type="float" office:value="0.36028004999999996" table:style-name="c8">
            <text:p>0.36028</text:p>
          </table:table-cell>
          <table:table-cell office:value-type="string" table:style-name="c8">
            <text:p>2026-04-27 02:15</text:p>
          </table:table-cell>
          <table:table-cell office:value-type="float" office:value="0.36021980000000003" table:style-name="c8">
            <text:p>0.36022</text:p>
          </table:table-cell>
          <table:table-cell office:value-type="float" office:value="-0.21658967245061778" table:style-name="c9">
            <text:p>-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7 03:00</text:p>
          </table:table-cell>
          <table:table-cell office:value-type="float" office:value="0.36208094999999996" table:style-name="c8">
            <text:p>0.36208</text:p>
          </table:table-cell>
          <table:table-cell office:value-type="string" table:style-name="c8">
            <text:p>2026-04-27 03:30</text:p>
          </table:table-cell>
          <table:table-cell office:value-type="float" office:value="0.36311835000000003" table:style-name="c8">
            <text:p>0.36312</text:p>
          </table:table-cell>
          <table:table-cell office:value-type="float" office:value="0.08603778197944223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15:45</text:p>
          </table:table-cell>
          <table:table-cell office:value-type="float" office:value="0.36878429999999995" table:style-name="c8">
            <text:p>0.36878</text:p>
          </table:table-cell>
          <table:table-cell office:value-type="string" table:style-name="c8">
            <text:p>2026-04-28 16:15</text:p>
          </table:table-cell>
          <table:table-cell office:value-type="float" office:value="0.37111435000000004" table:style-name="c8">
            <text:p>0.37111</text:p>
          </table:table-cell>
          <table:table-cell office:value-type="float" office:value="0.4306561896344485" table:style-name="c10">
            <text:p>+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16:30</text:p>
          </table:table-cell>
          <table:table-cell office:value-type="float" office:value="0.37408695" table:style-name="c8">
            <text:p>0.37409</text:p>
          </table:table-cell>
          <table:table-cell office:value-type="string" table:style-name="c8">
            <text:p>2026-04-28 17:00</text:p>
          </table:table-cell>
          <table:table-cell office:value-type="float" office:value="0.36451765" table:style-name="c8">
            <text:p>0.36452</text:p>
          </table:table-cell>
          <table:table-cell office:value-type="float" office:value="-2.7528281278857647" table:style-name="c9">
            <text:p>-2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3:00</text:p>
          </table:table-cell>
          <table:table-cell office:value-type="float" office:value="0.374187" table:style-name="c8">
            <text:p>0.37419</text:p>
          </table:table-cell>
          <table:table-cell office:value-type="string" table:style-name="c8">
            <text:p>2026-04-29 03:30</text:p>
          </table:table-cell>
          <table:table-cell office:value-type="float" office:value="0.3760119" table:style-name="c8">
            <text:p>0.37601</text:p>
          </table:table-cell>
          <table:table-cell office:value-type="float" office:value="0.28682242084840937" table:style-name="c10">
            <text:p>+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1:15</text:p>
          </table:table-cell>
          <table:table-cell office:value-type="float" office:value="0.3669834" table:style-name="c8">
            <text:p>0.36698</text:p>
          </table:table-cell>
          <table:table-cell office:value-type="string" table:style-name="c8">
            <text:p>2026-05-05 01:45</text:p>
          </table:table-cell>
          <table:table-cell office:value-type="float" office:value="0.37271355" table:style-name="c8">
            <text:p>0.37271</text:p>
          </table:table-cell>
          <table:table-cell office:value-type="float" office:value="1.3583981219722707" table:style-name="c10">
            <text:p>+1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2:00</text:p>
          </table:table-cell>
          <table:table-cell office:value-type="float" office:value="0.37368674999999996" table:style-name="c8">
            <text:p>0.37369</text:p>
          </table:table-cell>
          <table:table-cell office:value-type="string" table:style-name="c8">
            <text:p>2026-05-05 02:30</text:p>
          </table:table-cell>
          <table:table-cell office:value-type="float" office:value="0.37891045" table:style-name="c8">
            <text:p>0.37891</text:p>
          </table:table-cell>
          <table:table-cell office:value-type="float" office:value="1.1951876833872443" table:style-name="c10">
            <text:p>+1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30</text:p>
          </table:table-cell>
          <table:table-cell office:value-type="float" office:value="0.36938459999999995" table:style-name="c8">
            <text:p>0.36938</text:p>
          </table:table-cell>
          <table:table-cell office:value-type="string" table:style-name="c8">
            <text:p>2026-05-05 22:00</text:p>
          </table:table-cell>
          <table:table-cell office:value-type="float" office:value="0.36821580000000004" table:style-name="c8">
            <text:p>0.36822</text:p>
          </table:table-cell>
          <table:table-cell office:value-type="float" office:value="-0.5156856523525821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1:30</text:p>
          </table:table-cell>
          <table:table-cell office:value-type="float" office:value="0.3663831" table:style-name="c8">
            <text:p>0.36638</text:p>
          </table:table-cell>
          <table:table-cell office:value-type="string" table:style-name="c8">
            <text:p>2026-05-06 02:00</text:p>
          </table:table-cell>
          <table:table-cell office:value-type="float" office:value="0.37251365" table:style-name="c8">
            <text:p>0.37251</text:p>
          </table:table-cell>
          <table:table-cell office:value-type="float" office:value="1.4700173707930198" table:style-name="c10">
            <text:p>+1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3:30</text:p>
          </table:table-cell>
          <table:table-cell office:value-type="float" office:value="0.3775887" table:style-name="c8">
            <text:p>0.37759</text:p>
          </table:table-cell>
          <table:table-cell office:value-type="string" table:style-name="c8">
            <text:p>2026-05-06 04:00</text:p>
          </table:table-cell>
          <table:table-cell office:value-type="float" office:value="0.37611185" table:style-name="c8">
            <text:p>0.37611</text:p>
          </table:table-cell>
          <table:table-cell office:value-type="float" office:value="-0.5902447790810283" table:style-name="c9">
            <text:p>-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9:15</text:p>
          </table:table-cell>
          <table:table-cell office:value-type="float" office:value="0.382191" table:style-name="c8">
            <text:p>0.38219</text:p>
          </table:table-cell>
          <table:table-cell office:value-type="string" table:style-name="c8">
            <text:p>2026-05-06 09:45</text:p>
          </table:table-cell>
          <table:table-cell office:value-type="float" office:value="0.3814092" table:style-name="c8">
            <text:p>0.38141</text:p>
          </table:table-cell>
          <table:table-cell office:value-type="float" office:value="-0.4040484969033753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0:15</text:p>
          </table:table-cell>
          <table:table-cell office:value-type="float" office:value="0.384192" table:style-name="c8">
            <text:p>0.38419</text:p>
          </table:table-cell>
          <table:table-cell office:value-type="string" table:style-name="c8">
            <text:p>2026-05-06 10:45</text:p>
          </table:table-cell>
          <table:table-cell office:value-type="float" office:value="0.3820089" table:style-name="c8">
            <text:p>0.38201</text:p>
          </table:table-cell>
          <table:table-cell office:value-type="float" office:value="-0.7669956144584211" table:style-name="c9">
            <text:p>-0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16:15</text:p>
          </table:table-cell>
          <table:table-cell office:value-type="float" office:value="0.37908945" table:style-name="c8">
            <text:p>0.37909</text:p>
          </table:table-cell>
          <table:table-cell office:value-type="string" table:style-name="c8">
            <text:p>2026-05-06 16:45</text:p>
          </table:table-cell>
          <table:table-cell office:value-type="float" office:value="0.37731125000000004" table:style-name="c8">
            <text:p>0.37731</text:p>
          </table:table-cell>
          <table:table-cell office:value-type="float" office:value="-0.6680336761547778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7 18:30</text:p>
          </table:table-cell>
          <table:table-cell office:value-type="float" office:value="0.38689334999999997" table:style-name="c8">
            <text:p>0.38689</text:p>
          </table:table-cell>
          <table:table-cell office:value-type="string" table:style-name="c8">
            <text:p>2026-05-07 19:00</text:p>
          </table:table-cell>
          <table:table-cell office:value-type="float" office:value="0.3844077" table:style-name="c8">
            <text:p>0.38441</text:p>
          </table:table-cell>
          <table:table-cell office:value-type="float" office:value="-0.8410795875142374" table:style-name="c9">
            <text:p>-0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1:45</text:p>
          </table:table-cell>
          <table:table-cell office:value-type="float" office:value="0.41210594999999994" table:style-name="c8">
            <text:p>0.41211</text:p>
          </table:table-cell>
          <table:table-cell office:value-type="string" table:style-name="c8">
            <text:p>2026-05-08 12:15</text:p>
          </table:table-cell>
          <table:table-cell office:value-type="float" office:value="0.41149415000000006" table:style-name="c8">
            <text:p>0.41149</text:p>
          </table:table-cell>
          <table:table-cell office:value-type="float" office:value="-0.3480602029283686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4:15</text:p>
          </table:table-cell>
          <table:table-cell office:value-type="float" office:value="0.41710844999999996" table:style-name="c8">
            <text:p>0.41711</text:p>
          </table:table-cell>
          <table:table-cell office:value-type="string" table:style-name="c8">
            <text:p>2026-05-08 14:45</text:p>
          </table:table-cell>
          <table:table-cell office:value-type="float" office:value="0.42828575" table:style-name="c8">
            <text:p>0.42829</text:p>
          </table:table-cell>
          <table:table-cell office:value-type="float" office:value="2.474454014477545" table:style-name="c10">
            <text:p>+2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4:15</text:p>
          </table:table-cell>
          <table:table-cell office:value-type="float" office:value="0.45402689999999996" table:style-name="c8">
            <text:p>0.45403</text:p>
          </table:table-cell>
          <table:table-cell office:value-type="string" table:style-name="c8">
            <text:p>2026-05-09 04:45</text:p>
          </table:table-cell>
          <table:table-cell office:value-type="float" office:value="0.45267355000000004" table:style-name="c8">
            <text:p>0.45267</text:p>
          </table:table-cell>
          <table:table-cell office:value-type="float" office:value="-0.4973811962352692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7:30</text:p>
          </table:table-cell>
          <table:table-cell office:value-type="float" office:value="0.43211594999999997" table:style-name="c8">
            <text:p>0.43212</text:p>
          </table:table-cell>
          <table:table-cell office:value-type="string" table:style-name="c8">
            <text:p>2026-05-10 08:00</text:p>
          </table:table-cell>
          <table:table-cell office:value-type="float" office:value="0.42948515000000004" table:style-name="c8">
            <text:p>0.42949</text:p>
          </table:table-cell>
          <table:table-cell office:value-type="float" office:value="-0.8075010456915388" table:style-name="c9">
            <text:p>-0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8:30</text:p>
          </table:table-cell>
          <table:table-cell office:value-type="float" office:value="0.43451715" table:style-name="c8">
            <text:p>0.43452</text:p>
          </table:table-cell>
          <table:table-cell office:value-type="string" table:style-name="c8">
            <text:p>2026-05-10 09:00</text:p>
          </table:table-cell>
          <table:table-cell office:value-type="float" office:value="0.4361818" table:style-name="c8">
            <text:p>0.43618</text:p>
          </table:table-cell>
          <table:table-cell office:value-type="float" office:value="0.18243758199185667" table:style-name="c10">
            <text:p>+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6:30</text:p>
          </table:table-cell>
          <table:table-cell office:value-type="float" office:value="0.4554276" table:style-name="c8">
            <text:p>0.45543</text:p>
          </table:table-cell>
          <table:table-cell office:value-type="string" table:style-name="c8">
            <text:p>2026-05-10 17:00</text:p>
          </table:table-cell>
          <table:table-cell office:value-type="float" office:value="0.45767105" table:style-name="c8">
            <text:p>0.45767</text:p>
          </table:table-cell>
          <table:table-cell office:value-type="float" office:value="0.2917182821265296" table:style-name="c10">
            <text:p>+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23:45</text:p>
          </table:table-cell>
          <table:table-cell office:value-type="float" office:value="0.45672825" table:style-name="c8">
            <text:p>0.45673</text:p>
          </table:table-cell>
          <table:table-cell office:value-type="string" table:style-name="c8">
            <text:p>2026-05-11 00:15</text:p>
          </table:table-cell>
          <table:table-cell office:value-type="float" office:value="0.45277350000000005" table:style-name="c8">
            <text:p>0.45277</text:p>
          </table:table-cell>
          <table:table-cell office:value-type="float" office:value="-1.0640559734371613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07:00</text:p>
          </table:table-cell>
          <table:table-cell office:value-type="float" office:value="0.44192085" table:style-name="c8">
            <text:p>0.44192</text:p>
          </table:table-cell>
          <table:table-cell office:value-type="string" table:style-name="c8">
            <text:p>2026-05-11 07:30</text:p>
          </table:table-cell>
          <table:table-cell office:value-type="float" office:value="0.4423787" table:style-name="c8">
            <text:p>0.44238</text:p>
          </table:table-cell>
          <table:table-cell office:value-type="float" office:value="-0.0965025798850605" table:style-name="c9">
            <text:p>-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1:30</text:p>
          </table:table-cell>
          <table:table-cell office:value-type="float" office:value="0.46463219999999994" table:style-name="c8">
            <text:p>0.46463</text:p>
          </table:table-cell>
          <table:table-cell office:value-type="string" table:style-name="c8">
            <text:p>2026-05-11 12:00</text:p>
          </table:table-cell>
          <table:table-cell office:value-type="float" office:value="0.45277350000000005" table:style-name="c8">
            <text:p>0.45277</text:p>
          </table:table-cell>
          <table:table-cell office:value-type="float" office:value="-2.7470748317701355" table:style-name="c9">
            <text:p>-2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21:30</text:p>
          </table:table-cell>
          <table:table-cell office:value-type="float" office:value="0.45792884999999994" table:style-name="c8">
            <text:p>0.45793</text:p>
          </table:table-cell>
          <table:table-cell office:value-type="string" table:style-name="c8">
            <text:p>2026-05-11 22:00</text:p>
          </table:table-cell>
          <table:table-cell office:value-type="float" office:value="0.45287345" table:style-name="c8">
            <text:p>0.45287</text:p>
          </table:table-cell>
          <table:table-cell office:value-type="float" office:value="-1.3016637904665673" table:style-name="c9">
            <text:p>-1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05:00</text:p>
          </table:table-cell>
          <table:table-cell office:value-type="float" office:value="0.45622799999999997" table:style-name="c8">
            <text:p>0.45623</text:p>
          </table:table-cell>
          <table:table-cell office:value-type="string" table:style-name="c8">
            <text:p>2026-05-12 05:30</text:p>
          </table:table-cell>
          <table:table-cell office:value-type="float" office:value="0.45587195" table:style-name="c8">
            <text:p>0.45587</text:p>
          </table:table-cell>
          <table:table-cell office:value-type="float" office:value="-0.27778611309475787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06:00</text:p>
          </table:table-cell>
          <table:table-cell office:value-type="float" office:value="0.4594296" table:style-name="c8">
            <text:p>0.45943</text:p>
          </table:table-cell>
          <table:table-cell office:value-type="string" table:style-name="c8">
            <text:p>2026-05-12 06:30</text:p>
          </table:table-cell>
          <table:table-cell office:value-type="float" office:value="0.45767105" table:style-name="c8">
            <text:p>0.45767</text:p>
          </table:table-cell>
          <table:table-cell office:value-type="float" office:value="-0.5819029572648127" table:style-name="c9">
            <text:p>-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2 17:45</text:p>
          </table:table-cell>
          <table:table-cell office:value-type="float" office:value="0.4478238" table:style-name="c8">
            <text:p>0.44782</text:p>
          </table:table-cell>
          <table:table-cell office:value-type="string" table:style-name="c8">
            <text:p>2026-05-12 18:15</text:p>
          </table:table-cell>
          <table:table-cell office:value-type="float" office:value="0.4469764" table:style-name="c8">
            <text:p>0.44698</text:p>
          </table:table-cell>
          <table:table-cell office:value-type="float" office:value="-0.388747945866208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1:15</text:p>
          </table:table-cell>
          <table:table-cell office:value-type="float" office:value="0.47363669999999997" table:style-name="c8">
            <text:p>0.47364</text:p>
          </table:table-cell>
          <table:table-cell office:value-type="string" table:style-name="c8">
            <text:p>2026-05-13 01:45</text:p>
          </table:table-cell>
          <table:table-cell office:value-type="float" office:value="0.4821588" table:style-name="c8">
            <text:p>0.48216</text:p>
          </table:table-cell>
          <table:table-cell office:value-type="float" office:value="1.5957936871868306" table:style-name="c10">
            <text:p>+1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08:45</text:p>
          </table:table-cell>
          <table:table-cell office:value-type="float" office:value="0.5024510999999999" table:style-name="c8">
            <text:p>0.50245</text:p>
          </table:table-cell>
          <table:table-cell office:value-type="string" table:style-name="c8">
            <text:p>2026-05-13 09:15</text:p>
          </table:table-cell>
          <table:table-cell office:value-type="float" office:value="0.50404785" table:style-name="c8">
            <text:p>0.50405</text:p>
          </table:table-cell>
          <table:table-cell office:value-type="float" office:value="0.11725685302510502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3 18:45</text:p>
          </table:table-cell>
          <table:table-cell office:value-type="float" office:value="0.48074025" table:style-name="c8">
            <text:p>0.48074</text:p>
          </table:table-cell>
          <table:table-cell office:value-type="string" table:style-name="c8">
            <text:p>2026-05-13 19:15</text:p>
          </table:table-cell>
          <table:table-cell office:value-type="float" office:value="0.46846565" table:style-name="c8">
            <text:p>0.46847</text:p>
          </table:table-cell>
          <table:table-cell office:value-type="float" office:value="-2.748066723006859" table:style-name="c9">
            <text:p>-2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4 05:00</text:p>
          </table:table-cell>
          <table:table-cell office:value-type="float" office:value="0.4632315" table:style-name="c8">
            <text:p>0.46323</text:p>
          </table:table-cell>
          <table:table-cell office:value-type="string" table:style-name="c8">
            <text:p>2026-05-14 05:30</text:p>
          </table:table-cell>
          <table:table-cell office:value-type="float" office:value="0.4629684" table:style-name="c8">
            <text:p>0.46297</text:p>
          </table:table-cell>
          <table:table-cell office:value-type="float" office:value="-0.2565831191531531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9 14:00</text:p>
          </table:table-cell>
          <table:table-cell office:value-type="float" office:value="0.39859919999999993" table:style-name="c8">
            <text:p>0.3986</text:p>
          </table:table-cell>
          <table:table-cell office:value-type="string" table:style-name="c8">
            <text:p>2026-05-19 14:30</text:p>
          </table:table-cell>
          <table:table-cell office:value-type="float" office:value="0.39800090000000005" table:style-name="c8">
            <text:p>0.398</text:p>
          </table:table-cell>
          <table:table-cell office:value-type="float" office:value="-0.34970060128065583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09:30</text:p>
          </table:table-cell>
          <table:table-cell office:value-type="float" office:value="0.402201" table:style-name="c8">
            <text:p>0.4022</text:p>
          </table:table-cell>
          <table:table-cell office:value-type="string" table:style-name="c8">
            <text:p>2026-05-20 10:00</text:p>
          </table:table-cell>
          <table:table-cell office:value-type="float" office:value="0.4001998" table:style-name="c8">
            <text:p>0.4002</text:p>
          </table:table-cell>
          <table:table-cell office:value-type="float" office:value="-0.6964675374253049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4:15</text:p>
          </table:table-cell>
          <table:table-cell office:value-type="float" office:value="0.40150064999999996" table:style-name="c8">
            <text:p>0.4015</text:p>
          </table:table-cell>
          <table:table-cell office:value-type="string" table:style-name="c8">
            <text:p>2026-05-20 14:45</text:p>
          </table:table-cell>
          <table:table-cell office:value-type="float" office:value="0.40809585000000004" table:style-name="c8">
            <text:p>0.4081</text:p>
          </table:table-cell>
          <table:table-cell office:value-type="float" office:value="1.4394538080698238" table:style-name="c10">
            <text:p>+1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0.4086042" table:style-name="c8">
            <text:p>0.4086</text:p>
          </table:table-cell>
          <table:table-cell office:value-type="string" table:style-name="c8">
            <text:p>2026-05-20 16:00</text:p>
          </table:table-cell>
          <table:table-cell office:value-type="float" office:value="0.40739620000000004" table:style-name="c8">
            <text:p>0.4074</text:p>
          </table:table-cell>
          <table:table-cell office:value-type="float" office:value="-0.49494963678786696" table:style-name="c9">
            <text:p>-0.5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20:00</text:p>
          </table:table-cell>
          <table:table-cell office:value-type="float" office:value="0.4134066" table:style-name="c8">
            <text:p>0.41341</text:p>
          </table:table-cell>
          <table:table-cell office:value-type="string" table:style-name="c8">
            <text:p>2026-05-20 20:30</text:p>
          </table:table-cell>
          <table:table-cell office:value-type="float" office:value="0.41469255" table:style-name="c8">
            <text:p>0.41469</text:p>
          </table:table-cell>
          <table:table-cell office:value-type="float" office:value="0.11053998473899984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30</text:p>
          </table:table-cell>
          <table:table-cell office:value-type="float" office:value="0.4210104" table:style-name="c8">
            <text:p>0.42101</text:p>
          </table:table-cell>
          <table:table-cell office:value-type="string" table:style-name="c8">
            <text:p>2026-05-21 18:00</text:p>
          </table:table-cell>
          <table:table-cell office:value-type="float" office:value="0.4223887" table:style-name="c8">
            <text:p>0.42239</text:p>
          </table:table-cell>
          <table:table-cell office:value-type="float" office:value="0.12682465532918297" table:style-name="c10">
            <text:p>+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8:45</text:p>
          </table:table-cell>
          <table:table-cell office:value-type="float" office:value="0.428214" table:style-name="c8">
            <text:p>0.42821</text:p>
          </table:table-cell>
          <table:table-cell office:value-type="string" table:style-name="c8">
            <text:p>2026-05-21 19:15</text:p>
          </table:table-cell>
          <table:table-cell office:value-type="float" office:value="0.4203897" table:style-name="c8">
            <text:p>0.42039</text:p>
          </table:table-cell>
          <table:table-cell office:value-type="float" office:value="-2.023441319130148" table:style-name="c9">
            <text:p>-2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2:30</text:p>
          </table:table-cell>
          <table:table-cell office:value-type="float" office:value="0.43051515" table:style-name="c8">
            <text:p>0.43052</text:p>
          </table:table-cell>
          <table:table-cell office:value-type="string" table:style-name="c8">
            <text:p>2026-05-22 03:00</text:p>
          </table:table-cell>
          <table:table-cell office:value-type="float" office:value="0.4355821" table:style-name="c8">
            <text:p>0.43558</text:p>
          </table:table-cell>
          <table:table-cell office:value-type="float" office:value="0.9746977271531732" table:style-name="c10">
            <text:p>+1.0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3:15</text:p>
          </table:table-cell>
          <table:table-cell office:value-type="float" office:value="0.43741859999999994" table:style-name="c8">
            <text:p>0.43742</text:p>
          </table:table-cell>
          <table:table-cell office:value-type="string" table:style-name="c8">
            <text:p>2026-05-22 03:45</text:p>
          </table:table-cell>
          <table:table-cell office:value-type="float" office:value="0.44227875000000005" table:style-name="c8">
            <text:p>0.44228</text:p>
          </table:table-cell>
          <table:table-cell office:value-type="float" office:value="0.9089770711053768" table:style-name="c10">
            <text:p>+0.9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4:00</text:p>
          </table:table-cell>
          <table:table-cell office:value-type="float" office:value="0.44502239999999993" table:style-name="c8">
            <text:p>0.44502</text:p>
          </table:table-cell>
          <table:table-cell office:value-type="string" table:style-name="c8">
            <text:p>2026-05-22 04:30</text:p>
          </table:table-cell>
          <table:table-cell office:value-type="float" office:value="0.44547715" table:style-name="c8">
            <text:p>0.44548</text:p>
          </table:table-cell>
          <table:table-cell office:value-type="float" office:value="-0.09791840205121138" table:style-name="c9">
            <text:p>-0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8:15</text:p>
          </table:table-cell>
          <table:table-cell office:value-type="float" office:value="0.44452214999999995" table:style-name="c8">
            <text:p>0.44452</text:p>
          </table:table-cell>
          <table:table-cell office:value-type="string" table:style-name="c8">
            <text:p>2026-05-22 08:45</text:p>
          </table:table-cell>
          <table:table-cell office:value-type="float" office:value="0.44047965" table:style-name="c8">
            <text:p>0.44048</text:p>
          </table:table-cell>
          <table:table-cell office:value-type="float" office:value="-1.107485604564351" table:style-name="c9">
            <text:p>-1.1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12:15</text:p>
          </table:table-cell>
          <table:table-cell office:value-type="float" office:value="0.45292635" table:style-name="c8">
            <text:p>0.45293</text:p>
          </table:table-cell>
          <table:table-cell office:value-type="string" table:style-name="c8">
            <text:p>2026-05-22 12:45</text:p>
          </table:table-cell>
          <table:table-cell office:value-type="float" office:value="0.45247365" table:style-name="c8">
            <text:p>0.45247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3 20:45</text:p>
          </table:table-cell>
          <table:table-cell office:value-type="float" office:value="0.44982479999999997" table:style-name="c8">
            <text:p>0.44982</text:p>
          </table:table-cell>
          <table:table-cell office:value-type="string" table:style-name="c8">
            <text:p>2026-05-23 21:15</text:p>
          </table:table-cell>
          <table:table-cell office:value-type="float" office:value="0.44767605000000005" table:style-name="c8">
            <text:p>0.44768</text:p>
          </table:table-cell>
          <table:table-cell office:value-type="float" office:value="-0.6766310848023149" table:style-name="c9">
            <text:p>-0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3:30</text:p>
          </table:table-cell>
          <table:table-cell office:value-type="float" office:value="0.44032004999999996" table:style-name="c8">
            <text:p>0.44032</text:p>
          </table:table-cell>
          <table:table-cell office:value-type="string" table:style-name="c8">
            <text:p>2026-05-25 14:00</text:p>
          </table:table-cell>
          <table:table-cell office:value-type="float" office:value="0.44387795" table:style-name="c8">
            <text:p>0.44388</text:p>
          </table:table-cell>
          <table:table-cell office:value-type="float" office:value="0.6065106455974689" table:style-name="c10">
            <text:p>+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15</text:p>
          </table:table-cell>
          <table:table-cell office:value-type="float" office:value="0.4486242" table:style-name="c8">
            <text:p>0.44862</text:p>
          </table:table-cell>
          <table:table-cell office:value-type="string" table:style-name="c8">
            <text:p>2026-05-25 14:45</text:p>
          </table:table-cell>
          <table:table-cell office:value-type="float" office:value="0.443778" table:style-name="c8">
            <text:p>0.44378</text:p>
          </table:table-cell>
          <table:table-cell office:value-type="float" office:value="-1.2779765830733036" table:style-name="c9">
            <text:p>-1.3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5:45</text:p>
          </table:table-cell>
          <table:table-cell office:value-type="float" office:value="0.45272625" table:style-name="c8">
            <text:p>0.45273</text:p>
          </table:table-cell>
          <table:table-cell office:value-type="string" table:style-name="c8">
            <text:p>2026-05-25 16:15</text:p>
          </table:table-cell>
          <table:table-cell office:value-type="float" office:value="0.4509744" table:style-name="c8">
            <text:p>0.45097</text:p>
          </table:table-cell>
          <table:table-cell office:value-type="float" office:value="-0.5860821689928519" table:style-name="c9">
            <text:p>-0.6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6:30</text:p>
          </table:table-cell>
          <table:table-cell office:value-type="float" office:value="0.4554276" table:style-name="c8">
            <text:p>0.45543</text:p>
          </table:table-cell>
          <table:table-cell office:value-type="string" table:style-name="c8">
            <text:p>2026-05-25 17:00</text:p>
          </table:table-cell>
          <table:table-cell office:value-type="float" office:value="0.4685656" table:style-name="c8">
            <text:p>0.46857</text:p>
          </table:table-cell>
          <table:table-cell office:value-type="float" office:value="2.679094847479613" table:style-name="c10">
            <text:p>+2.7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7:15</text:p>
          </table:table-cell>
          <table:table-cell office:value-type="float" office:value="0.47593785" table:style-name="c8">
            <text:p>0.47594</text:p>
          </table:table-cell>
          <table:table-cell office:value-type="string" table:style-name="c8">
            <text:p>2026-05-25 17:45</text:p>
          </table:table-cell>
          <table:table-cell office:value-type="float" office:value="0.47866055" table:style-name="c8">
            <text:p>0.47866</text:p>
          </table:table-cell>
          <table:table-cell office:value-type="float" office:value="0.37102692306358875" table:style-name="c10">
            <text:p>+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8:00</text:p>
          </table:table-cell>
          <table:table-cell office:value-type="float" office:value="0.48294135" table:style-name="c8">
            <text:p>0.48294</text:p>
          </table:table-cell>
          <table:table-cell office:value-type="string" table:style-name="c8">
            <text:p>2026-05-25 18:30</text:p>
          </table:table-cell>
          <table:table-cell office:value-type="float" office:value="0.47516230000000004" table:style-name="c8">
            <text:p>0.47516</text:p>
          </table:table-cell>
          <table:table-cell office:value-type="float" office:value="-1.8074450319277902" table:style-name="c9">
            <text:p>-1.8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07:00</text:p>
          </table:table-cell>
          <table:table-cell office:value-type="float" office:value="0.4664331" table:style-name="c8">
            <text:p>0.46643</text:p>
          </table:table-cell>
          <table:table-cell office:value-type="string" table:style-name="c8">
            <text:p>2026-05-27 07:30</text:p>
          </table:table-cell>
          <table:table-cell office:value-type="float" office:value="0.46536720000000004" table:style-name="c8">
            <text:p>0.46537</text:p>
          </table:table-cell>
          <table:table-cell office:value-type="float" office:value="-0.4279647033625822" table:style-name="c9">
            <text:p>-0.4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07:45</text:p>
          </table:table-cell>
          <table:table-cell office:value-type="float" office:value="0.46713344999999995" table:style-name="c8">
            <text:p>0.46713</text:p>
          </table:table-cell>
          <table:table-cell office:value-type="string" table:style-name="c8">
            <text:p>2026-05-27 08:15</text:p>
          </table:table-cell>
          <table:table-cell office:value-type="float" office:value="0.46906535000000005" table:style-name="c8">
            <text:p>0.46907</text:p>
          </table:table-cell>
          <table:table-cell office:value-type="float" office:value="0.21283818689288303" table:style-name="c10">
            <text:p>+0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14:15</text:p>
          </table:table-cell>
          <table:table-cell office:value-type="float" office:value="0.46002989999999994" table:style-name="c8">
            <text:p>0.46003</text:p>
          </table:table-cell>
          <table:table-cell office:value-type="string" table:style-name="c8">
            <text:p>2026-05-27 14:45</text:p>
          </table:table-cell>
          <table:table-cell office:value-type="float" office:value="0.45067455000000006" table:style-name="c8">
            <text:p>0.45067</text:p>
          </table:table-cell>
          <table:table-cell office:value-type="float" office:value="-2.229474307093926" table:style-name="c9">
            <text:p>-2.2</text:p>
          </table:table-cell>
        </table:table-row>
        <table:table-row>
          <table:table-cell office:value-type="string" table:style-name="c7">
            <text:p>TIA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15:15</text:p>
          </table:table-cell>
          <table:table-cell office:value-type="float" office:value="0.4628313" table:style-name="c8">
            <text:p>0.46283</text:p>
          </table:table-cell>
          <table:table-cell office:value-type="string" table:style-name="c8">
            <text:p>2026-05-27 15:45</text:p>
          </table:table-cell>
          <table:table-cell office:value-type="float" office:value="0.46546715000000005" table:style-name="c8">
            <text:p>0.46547</text:p>
          </table:table-cell>
          <table:table-cell office:value-type="float" office:value="0.36846712120595093" table:style-name="c10">
            <text:p>+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3 16:00</text:p>
          </table:table-cell>
          <table:table-cell office:value-type="float" office:value="3.8479229999999998" table:style-name="c1">
            <text:p>3.8479</text:p>
          </table:table-cell>
          <table:table-cell office:value-type="string" table:style-name="c1">
            <text:p>2026-03-03 16:30</text:p>
          </table:table-cell>
          <table:table-cell office:value-type="float" office:value="3.9080450000000004" table:style-name="c1">
            <text:p>3.908</text:p>
          </table:table-cell>
          <table:table-cell office:value-type="float" office:value="1.3594299585776737" table:style-name="c11">
            <text:p>+1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15</text:p>
          </table:table-cell>
          <table:table-cell office:value-type="float" office:value="4.048023" table:style-name="c1">
            <text:p>4.048</text:p>
          </table:table-cell>
          <table:table-cell office:value-type="string" table:style-name="c1">
            <text:p>2026-03-04 09:45</text:p>
          </table:table-cell>
          <table:table-cell office:value-type="float" office:value="4.061968" table:style-name="c1">
            <text:p>4.062</text:p>
          </table:table-cell>
          <table:table-cell office:value-type="float" office:value="0.14390051558503814" table:style-name="c11">
            <text:p>+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30</text:p>
          </table:table-cell>
          <table:table-cell office:value-type="float" office:value="4.050024" table:style-name="c1">
            <text:p>4.05</text:p>
          </table:table-cell>
          <table:table-cell office:value-type="string" table:style-name="c1">
            <text:p>2026-03-04 16:00</text:p>
          </table:table-cell>
          <table:table-cell office:value-type="float" office:value="4.039979" table:style-name="c1">
            <text:p>4.04</text:p>
          </table:table-cell>
          <table:table-cell office:value-type="float" office:value="-0.44742742317083195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8:45</text:p>
          </table:table-cell>
          <table:table-cell office:value-type="float" office:value="4.040019" table:style-name="c1">
            <text:p>4.04</text:p>
          </table:table-cell>
          <table:table-cell office:value-type="string" table:style-name="c1">
            <text:p>2026-03-04 19:15</text:p>
          </table:table-cell>
          <table:table-cell office:value-type="float" office:value="4.061968" table:style-name="c1">
            <text:p>4.062</text:p>
          </table:table-cell>
          <table:table-cell office:value-type="float" office:value="0.3423034883746956" table:style-name="c11">
            <text:p>+0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1:15</text:p>
          </table:table-cell>
          <table:table-cell office:value-type="float" office:value="4.016007" table:style-name="c1">
            <text:p>4.016</text:p>
          </table:table-cell>
          <table:table-cell office:value-type="string" table:style-name="c1">
            <text:p>2026-03-05 01:45</text:p>
          </table:table-cell>
          <table:table-cell office:value-type="float" office:value="3.9670155" table:style-name="c1">
            <text:p>3.967</text:p>
          </table:table-cell>
          <table:table-cell office:value-type="float" office:value="-1.4173671506175212" table:style-name="c12">
            <text:p>-1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4.020009" table:style-name="c1">
            <text:p>4.02</text:p>
          </table:table-cell>
          <table:table-cell office:value-type="string" table:style-name="c1">
            <text:p>2026-03-05 19:45</text:p>
          </table:table-cell>
          <table:table-cell office:value-type="float" office:value="3.9850065000000003" table:style-name="c1">
            <text:p>3.985</text:p>
          </table:table-cell>
          <table:table-cell office:value-type="float" office:value="-1.0688664625750688" table:style-name="c12">
            <text:p>-1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4.014005999999999" table:style-name="c1">
            <text:p>4.014</text:p>
          </table:table-cell>
          <table:table-cell office:value-type="string" table:style-name="c1">
            <text:p>2026-03-06 08:30</text:p>
          </table:table-cell>
          <table:table-cell office:value-type="float" office:value="3.982008" table:style-name="c1">
            <text:p>3.982</text:p>
          </table:table-cell>
          <table:table-cell office:value-type="float" office:value="-0.9954652283030718" table:style-name="c12">
            <text:p>-1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3.9149564999999997" table:style-name="c1">
            <text:p>3.915</text:p>
          </table:table-cell>
          <table:table-cell office:value-type="string" table:style-name="c1">
            <text:p>2026-03-09 14:15</text:p>
          </table:table-cell>
          <table:table-cell office:value-type="float" office:value="3.8970505" table:style-name="c1">
            <text:p>3.8971</text:p>
          </table:table-cell>
          <table:table-cell office:value-type="float" office:value="-0.6563598841902718" table:style-name="c12">
            <text:p>-0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30</text:p>
          </table:table-cell>
          <table:table-cell office:value-type="float" office:value="3.919959" table:style-name="c1">
            <text:p>3.92</text:p>
          </table:table-cell>
          <table:table-cell office:value-type="string" table:style-name="c1">
            <text:p>2026-03-09 15:00</text:p>
          </table:table-cell>
          <table:table-cell office:value-type="float" office:value="3.9370305" table:style-name="c1">
            <text:p>3.937</text:p>
          </table:table-cell>
          <table:table-cell office:value-type="float" office:value="0.23473143546910435" table:style-name="c11">
            <text:p>+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3.9769875" table:style-name="c1">
            <text:p>3.977</text:p>
          </table:table-cell>
          <table:table-cell office:value-type="string" table:style-name="c1">
            <text:p>2026-03-09 20:00</text:p>
          </table:table-cell>
          <table:table-cell office:value-type="float" office:value="3.9250365000000005" table:style-name="c1">
            <text:p>3.925</text:p>
          </table:table-cell>
          <table:table-cell office:value-type="float" office:value="-1.5035789768889085" table:style-name="c12">
            <text:p>-1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9729855" table:style-name="c1">
            <text:p>3.973</text:p>
          </table:table-cell>
          <table:table-cell office:value-type="string" table:style-name="c1">
            <text:p>2026-03-10 15:30</text:p>
          </table:table-cell>
          <table:table-cell office:value-type="float" office:value="3.9310335" table:style-name="c1">
            <text:p>3.931</text:p>
          </table:table-cell>
          <table:table-cell office:value-type="float" office:value="-1.2537205576637622" table:style-name="c12">
            <text:p>-1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6:00</text:p>
          </table:table-cell>
          <table:table-cell office:value-type="float" office:value="3.943971" table:style-name="c1">
            <text:p>3.944</text:p>
          </table:table-cell>
          <table:table-cell office:value-type="string" table:style-name="c1">
            <text:p>2026-03-10 16:30</text:p>
          </table:table-cell>
          <table:table-cell office:value-type="float" office:value="3.930034" table:style-name="c1">
            <text:p>3.93</text:p>
          </table:table-cell>
          <table:table-cell office:value-type="float" office:value="-0.5525684130537334" table:style-name="c12">
            <text:p>-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3.9259619999999997" table:style-name="c1">
            <text:p>3.926</text:p>
          </table:table-cell>
          <table:table-cell office:value-type="string" table:style-name="c1">
            <text:p>2026-03-11 14:15</text:p>
          </table:table-cell>
          <table:table-cell office:value-type="float" office:value="3.91804" table:style-name="c1">
            <text:p>3.918</text:p>
          </table:table-cell>
          <table:table-cell office:value-type="float" office:value="-0.40128157022406574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3.887943" table:style-name="c1">
            <text:p>3.8879</text:p>
          </table:table-cell>
          <table:table-cell office:value-type="string" table:style-name="c1">
            <text:p>2026-03-12 08:15</text:p>
          </table:table-cell>
          <table:table-cell office:value-type="float" office:value="3.8820580000000002" table:style-name="c1">
            <text:p>3.8821</text:p>
          </table:table-cell>
          <table:table-cell office:value-type="float" office:value="-0.350962808405364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3.923961" table:style-name="c1">
            <text:p>3.924</text:p>
          </table:table-cell>
          <table:table-cell office:value-type="string" table:style-name="c1">
            <text:p>2026-03-12 10:15</text:p>
          </table:table-cell>
          <table:table-cell office:value-type="float" office:value="3.902048" table:style-name="c1">
            <text:p>3.902</text:p>
          </table:table-cell>
          <table:table-cell office:value-type="float" office:value="-0.7572244971853603" table:style-name="c12">
            <text:p>-0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3.9409695" table:style-name="c1">
            <text:p>3.941</text:p>
          </table:table-cell>
          <table:table-cell office:value-type="string" table:style-name="c1">
            <text:p>2026-03-12 11:15</text:p>
          </table:table-cell>
          <table:table-cell office:value-type="float" office:value="3.930034" table:style-name="c1">
            <text:p>3.93</text:p>
          </table:table-cell>
          <table:table-cell office:value-type="float" office:value="-0.47682779493726235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4.100048999999999" table:style-name="c1">
            <text:p>4.1</text:p>
          </table:table-cell>
          <table:table-cell office:value-type="string" table:style-name="c1">
            <text:p>2026-03-13 10:45</text:p>
          </table:table-cell>
          <table:table-cell office:value-type="float" office:value="4.0849565" table:style-name="c1">
            <text:p>4.085</text:p>
          </table:table-cell>
          <table:table-cell office:value-type="float" office:value="-0.5672695141814121" table:style-name="c12">
            <text:p>-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45</text:p>
          </table:table-cell>
          <table:table-cell office:value-type="float" office:value="3.9489734999999997" table:style-name="c1">
            <text:p>3.949</text:p>
          </table:table-cell>
          <table:table-cell office:value-type="string" table:style-name="c1">
            <text:p>2026-03-14 14:15</text:p>
          </table:table-cell>
          <table:table-cell office:value-type="float" office:value="3.9370305" table:style-name="c1">
            <text:p>3.937</text:p>
          </table:table-cell>
          <table:table-cell office:value-type="float" office:value="-0.5017284610671635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3.987993" table:style-name="c1">
            <text:p>3.988</text:p>
          </table:table-cell>
          <table:table-cell office:value-type="string" table:style-name="c1">
            <text:p>2026-03-15 11:30</text:p>
          </table:table-cell>
          <table:table-cell office:value-type="float" office:value="3.9850065000000003" table:style-name="c1">
            <text:p>3.985</text:p>
          </table:table-cell>
          <table:table-cell office:value-type="float" office:value="-0.27463759323298476" table:style-name="c12">
            <text:p>-0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4.068033" table:style-name="c1">
            <text:p>4.068</text:p>
          </table:table-cell>
          <table:table-cell office:value-type="string" table:style-name="c1">
            <text:p>2026-03-15 23:15</text:p>
          </table:table-cell>
          <table:table-cell office:value-type="float" office:value="4.0969505" table:style-name="c1">
            <text:p>4.097</text:p>
          </table:table-cell>
          <table:table-cell office:value-type="float" office:value="0.5095262489389851" table:style-name="c11">
            <text:p>+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3:30</text:p>
          </table:table-cell>
          <table:table-cell office:value-type="float" office:value="3.6178079999999997" table:style-name="c1">
            <text:p>3.6178</text:p>
          </table:table-cell>
          <table:table-cell office:value-type="string" table:style-name="c1">
            <text:p>2026-03-25 00:00</text:p>
          </table:table-cell>
          <table:table-cell office:value-type="float" office:value="3.6071955" table:style-name="c1">
            <text:p>3.6072</text:p>
          </table:table-cell>
          <table:table-cell office:value-type="float" office:value="-0.4926542205805351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7:15</text:p>
          </table:table-cell>
          <table:table-cell office:value-type="float" office:value="3.647823" table:style-name="c1">
            <text:p>3.6478</text:p>
          </table:table-cell>
          <table:table-cell office:value-type="string" table:style-name="c1">
            <text:p>2026-03-25 07:45</text:p>
          </table:table-cell>
          <table:table-cell office:value-type="float" office:value="3.6461760000000005" table:style-name="c1">
            <text:p>3.6462</text:p>
          </table:table-cell>
          <table:table-cell office:value-type="float" office:value="-0.2449599617086573" table:style-name="c12">
            <text:p>-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3.7088534999999996" table:style-name="c1">
            <text:p>3.7089</text:p>
          </table:table-cell>
          <table:table-cell office:value-type="string" table:style-name="c1">
            <text:p>2026-03-25 09:15</text:p>
          </table:table-cell>
          <table:table-cell office:value-type="float" office:value="3.6791595000000004" table:style-name="c1">
            <text:p>3.6792</text:p>
          </table:table-cell>
          <table:table-cell office:value-type="float" office:value="-0.998924326358519" table:style-name="c12">
            <text:p>-1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3.7508745" table:style-name="c1">
            <text:p>3.7509</text:p>
          </table:table-cell>
          <table:table-cell office:value-type="string" table:style-name="c1">
            <text:p>2026-03-25 13:45</text:p>
          </table:table-cell>
          <table:table-cell office:value-type="float" office:value="3.744127" table:style-name="c1">
            <text:p>3.7441</text:p>
          </table:table-cell>
          <table:table-cell office:value-type="float" office:value="-0.37943177978894127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7:15</text:p>
          </table:table-cell>
          <table:table-cell office:value-type="float" office:value="3.7348665" table:style-name="c1">
            <text:p>3.7349</text:p>
          </table:table-cell>
          <table:table-cell office:value-type="string" table:style-name="c1">
            <text:p>2026-03-25 17:45</text:p>
          </table:table-cell>
          <table:table-cell office:value-type="float" office:value="3.7171405" table:style-name="c1">
            <text:p>3.7171</text:p>
          </table:table-cell>
          <table:table-cell office:value-type="float" office:value="-0.6735599213385512" table:style-name="c12">
            <text:p>-0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3.5367675" table:style-name="c1">
            <text:p>3.5368</text:p>
          </table:table-cell>
          <table:table-cell office:value-type="string" table:style-name="c1">
            <text:p>2026-03-30 08:30</text:p>
          </table:table-cell>
          <table:table-cell office:value-type="float" office:value="3.5512235000000003" table:style-name="c1">
            <text:p>3.5512</text:p>
          </table:table-cell>
          <table:table-cell office:value-type="float" office:value="0.20801775133652" table:style-name="c11">
            <text:p>+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45</text:p>
          </table:table-cell>
          <table:table-cell office:value-type="float" office:value="3.5707845" table:style-name="c1">
            <text:p>3.5708</text:p>
          </table:table-cell>
          <table:table-cell office:value-type="string" table:style-name="c1">
            <text:p>2026-03-30 09:15</text:p>
          </table:table-cell>
          <table:table-cell office:value-type="float" office:value="3.5332325000000004" table:style-name="c1">
            <text:p>3.5332</text:p>
          </table:table-cell>
          <table:table-cell office:value-type="float" office:value="-1.2494434141152921" table:style-name="c12">
            <text:p>-1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3:15</text:p>
          </table:table-cell>
          <table:table-cell office:value-type="float" office:value="3.5557769999999995" table:style-name="c1">
            <text:p>3.5558</text:p>
          </table:table-cell>
          <table:table-cell office:value-type="string" table:style-name="c1">
            <text:p>2026-03-30 13:45</text:p>
          </table:table-cell>
          <table:table-cell office:value-type="float" office:value="3.5462260000000003" table:style-name="c1">
            <text:p>3.5462</text:p>
          </table:table-cell>
          <table:table-cell office:value-type="float" office:value="-0.4679682042490141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30</text:p>
          </table:table-cell>
          <table:table-cell office:value-type="float" office:value="3.547773" table:style-name="c1">
            <text:p>3.5478</text:p>
          </table:table-cell>
          <table:table-cell office:value-type="string" table:style-name="c1">
            <text:p>2026-03-31 15:00</text:p>
          </table:table-cell>
          <table:table-cell office:value-type="float" office:value="3.4942520000000004" table:style-name="c1">
            <text:p>3.4943</text:p>
          </table:table-cell>
          <table:table-cell office:value-type="float" office:value="-1.705464519516875" table:style-name="c12">
            <text:p>-1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30</text:p>
          </table:table-cell>
          <table:table-cell office:value-type="float" office:value="3.6278129999999997" table:style-name="c1">
            <text:p>3.6278</text:p>
          </table:table-cell>
          <table:table-cell office:value-type="string" table:style-name="c1">
            <text:p>2026-04-01 07:00</text:p>
          </table:table-cell>
          <table:table-cell office:value-type="float" office:value="3.648175" table:style-name="c1">
            <text:p>3.6482</text:p>
          </table:table-cell>
          <table:table-cell office:value-type="float" office:value="0.3602528072698563" table:style-name="c11">
            <text:p>+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15</text:p>
          </table:table-cell>
          <table:table-cell office:value-type="float" office:value="3.6608294999999997" table:style-name="c1">
            <text:p>3.6608</text:p>
          </table:table-cell>
          <table:table-cell office:value-type="string" table:style-name="c1">
            <text:p>2026-04-01 07:45</text:p>
          </table:table-cell>
          <table:table-cell office:value-type="float" office:value="3.6371805" table:style-name="c1">
            <text:p>3.6372</text:p>
          </table:table-cell>
          <table:table-cell office:value-type="float" office:value="-0.844609775448435" table:style-name="c12">
            <text:p>-0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3.6318149999999996" table:style-name="c1">
            <text:p>3.6318</text:p>
          </table:table-cell>
          <table:table-cell office:value-type="string" table:style-name="c1">
            <text:p>2026-04-01 13:15</text:p>
          </table:table-cell>
          <table:table-cell office:value-type="float" office:value="3.5982000000000003" table:style-name="c1">
            <text:p>3.5982</text:p>
          </table:table-cell>
          <table:table-cell office:value-type="float" office:value="-1.123620057739716" table:style-name="c12">
            <text:p>-1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15</text:p>
          </table:table-cell>
          <table:table-cell office:value-type="float" office:value="3.1785885" table:style-name="c1">
            <text:p>3.1786</text:p>
          </table:table-cell>
          <table:table-cell office:value-type="string" table:style-name="c1">
            <text:p>2026-04-06 09:45</text:p>
          </table:table-cell>
          <table:table-cell office:value-type="float" office:value="3.192403" table:style-name="c1">
            <text:p>3.1924</text:p>
          </table:table-cell>
          <table:table-cell office:value-type="float" office:value="0.23384236125563174" table:style-name="c11">
            <text:p>+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8:15</text:p>
          </table:table-cell>
          <table:table-cell office:value-type="float" office:value="3.2546265" table:style-name="c1">
            <text:p>3.2546</text:p>
          </table:table-cell>
          <table:table-cell office:value-type="string" table:style-name="c1">
            <text:p>2026-04-08 08:45</text:p>
          </table:table-cell>
          <table:table-cell office:value-type="float" office:value="3.250374" table:style-name="c1">
            <text:p>3.2504</text:p>
          </table:table-cell>
          <table:table-cell office:value-type="float" office:value="-0.33029896444338736" table:style-name="c12">
            <text:p>-0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3.1685834999999996" table:style-name="c1">
            <text:p>3.1686</text:p>
          </table:table-cell>
          <table:table-cell office:value-type="string" table:style-name="c1">
            <text:p>2026-04-11 17:30</text:p>
          </table:table-cell>
          <table:table-cell office:value-type="float" office:value="3.1574205" table:style-name="c1">
            <text:p>3.1574</text:p>
          </table:table-cell>
          <table:table-cell office:value-type="float" office:value="-0.5514982824186165" table:style-name="c12">
            <text:p>-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3.1965974999999998" table:style-name="c1">
            <text:p>3.1966</text:p>
          </table:table-cell>
          <table:table-cell office:value-type="string" table:style-name="c1">
            <text:p>2026-04-11 19:15</text:p>
          </table:table-cell>
          <table:table-cell office:value-type="float" office:value="3.1964010000000003" table:style-name="c1">
            <text:p>3.1964</text:p>
          </table:table-cell>
          <table:table-cell office:value-type="float" office:value="-0.2060348729860273" table:style-name="c12">
            <text:p>-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3.16158" table:style-name="c1">
            <text:p>3.1616</text:p>
          </table:table-cell>
          <table:table-cell office:value-type="string" table:style-name="c1">
            <text:p>2026-04-13 22:45</text:p>
          </table:table-cell>
          <table:table-cell office:value-type="float" office:value="3.2163910000000002" table:style-name="c1">
            <text:p>3.2164</text:p>
          </table:table-cell>
          <table:table-cell office:value-type="float" office:value="1.5302929038961466" table:style-name="c11">
            <text:p>+1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3.2146065" table:style-name="c1">
            <text:p>3.2146</text:p>
          </table:table-cell>
          <table:table-cell office:value-type="string" table:style-name="c1">
            <text:p>2026-04-13 23:30</text:p>
          </table:table-cell>
          <table:table-cell office:value-type="float" office:value="3.2523730000000004" table:style-name="c1">
            <text:p>3.2524</text:p>
          </table:table-cell>
          <table:table-cell office:value-type="float" office:value="0.9725920224761708" table:style-name="c11">
            <text:p>+1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45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4-14 00:15</text:p>
          </table:table-cell>
          <table:table-cell office:value-type="float" office:value="3.2213885" table:style-name="c1">
            <text:p>3.2214</text:p>
          </table:table-cell>
          <table:table-cell office:value-type="float" office:value="-1.0670482373191348" table:style-name="c12">
            <text:p>-1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30</text:p>
          </table:table-cell>
          <table:table-cell office:value-type="float" office:value="3.145572" table:style-name="c1">
            <text:p>3.1456</text:p>
          </table:table-cell>
          <table:table-cell office:value-type="string" table:style-name="c1">
            <text:p>2026-04-15 01:00</text:p>
          </table:table-cell>
          <table:table-cell office:value-type="float" office:value="3.142428" table:style-name="c1">
            <text:p>3.142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3.1865924999999997" table:style-name="c1">
            <text:p>3.1866</text:p>
          </table:table-cell>
          <table:table-cell office:value-type="string" table:style-name="c1">
            <text:p>2026-04-15 12:45</text:p>
          </table:table-cell>
          <table:table-cell office:value-type="float" office:value="3.188405" table:style-name="c1">
            <text:p>3.1884</text:p>
          </table:table-cell>
          <table:table-cell office:value-type="float" office:value="-0.14313476213227982" table:style-name="c12">
            <text:p>-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3.2106045" table:style-name="c1">
            <text:p>3.2106</text:p>
          </table:table-cell>
          <table:table-cell office:value-type="string" table:style-name="c1">
            <text:p>2026-04-15 15:00</text:p>
          </table:table-cell>
          <table:table-cell office:value-type="float" office:value="3.2133925" table:style-name="c1">
            <text:p>3.2134</text:p>
          </table:table-cell>
          <table:table-cell office:value-type="float" office:value="-0.11323635805968735" table:style-name="c12">
            <text:p>-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3.2466225" table:style-name="c1">
            <text:p>3.2466</text:p>
          </table:table-cell>
          <table:table-cell office:value-type="string" table:style-name="c1">
            <text:p>2026-04-15 20:15</text:p>
          </table:table-cell>
          <table:table-cell office:value-type="float" office:value="3.2233875000000003" table:style-name="c1">
            <text:p>3.2234</text:p>
          </table:table-cell>
          <table:table-cell office:value-type="float" office:value="-0.9141362019298493" table:style-name="c12">
            <text:p>-0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4-16 03:15</text:p>
          </table:table-cell>
          <table:table-cell office:value-type="float" office:value="3.2303840000000004" table:style-name="c1">
            <text:p>3.2304</text:p>
          </table:table-cell>
          <table:table-cell office:value-type="float" office:value="-0.7907849528437705" table:style-name="c12">
            <text:p>-0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2896439999999996" table:style-name="c1">
            <text:p>3.2896</text:p>
          </table:table-cell>
          <table:table-cell office:value-type="string" table:style-name="c1">
            <text:p>2026-04-16 12:45</text:p>
          </table:table-cell>
          <table:table-cell office:value-type="float" office:value="3.290354" table:style-name="c1">
            <text:p>3.2904</text:p>
          </table:table-cell>
          <table:table-cell office:value-type="float" office:value="-0.1783602616574953" table:style-name="c12">
            <text:p>-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3.3386685" table:style-name="c1">
            <text:p>3.3387</text:p>
          </table:table-cell>
          <table:table-cell office:value-type="string" table:style-name="c1">
            <text:p>2026-04-16 13:45</text:p>
          </table:table-cell>
          <table:table-cell office:value-type="float" office:value="3.3693145" table:style-name="c1">
            <text:p>3.3693</text:p>
          </table:table-cell>
          <table:table-cell office:value-type="float" office:value="0.7161759340437834" table:style-name="c11">
            <text:p>+0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3.3806895" table:style-name="c1">
            <text:p>3.3807</text:p>
          </table:table-cell>
          <table:table-cell office:value-type="string" table:style-name="c1">
            <text:p>2026-04-16 16:15</text:p>
          </table:table-cell>
          <table:table-cell office:value-type="float" office:value="3.3683150000000004" table:style-name="c1">
            <text:p>3.3683</text:p>
          </table:table-cell>
          <table:table-cell office:value-type="float" office:value="-0.5652030949603537" table:style-name="c12">
            <text:p>-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8:00</text:p>
          </table:table-cell>
          <table:table-cell office:value-type="float" office:value="3.3736859999999997" table:style-name="c1">
            <text:p>3.3737</text:p>
          </table:table-cell>
          <table:table-cell office:value-type="string" table:style-name="c1">
            <text:p>2026-04-16 18:30</text:p>
          </table:table-cell>
          <table:table-cell office:value-type="float" office:value="3.382308" table:style-name="c1">
            <text:p>3.3823</text:p>
          </table:table-cell>
          <table:table-cell office:value-type="float" office:value="0.05515529032638078" table:style-name="c11">
            <text:p>+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3.3976979999999997" table:style-name="c1">
            <text:p>3.3977</text:p>
          </table:table-cell>
          <table:table-cell office:value-type="string" table:style-name="c1">
            <text:p>2026-04-17 08:15</text:p>
          </table:table-cell>
          <table:table-cell office:value-type="float" office:value="3.402298" table:style-name="c1">
            <text:p>3.4023</text:p>
          </table:table-cell>
          <table:table-cell office:value-type="float" office:value="-0.06478485439257442" table:style-name="c12">
            <text:p>-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3.4227104999999995" table:style-name="c1">
            <text:p>3.4227</text:p>
          </table:table-cell>
          <table:table-cell office:value-type="string" table:style-name="c1">
            <text:p>2026-04-17 09:15</text:p>
          </table:table-cell>
          <table:table-cell office:value-type="float" office:value="3.4282850000000002" table:style-name="c1">
            <text:p>3.4283</text:p>
          </table:table-cell>
          <table:table-cell office:value-type="float" office:value="-0.03735757713074772" table:style-name="c12">
            <text:p>-0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1:45</text:p>
          </table:table-cell>
          <table:table-cell office:value-type="float" office:value="3.443721" table:style-name="c1">
            <text:p>3.4437</text:p>
          </table:table-cell>
          <table:table-cell office:value-type="string" table:style-name="c1">
            <text:p>2026-04-17 12:15</text:p>
          </table:table-cell>
          <table:table-cell office:value-type="float" office:value="3.4532725" table:style-name="c1">
            <text:p>3.4533</text:p>
          </table:table-cell>
          <table:table-cell office:value-type="float" office:value="0.07690542504750209" table:style-name="c11">
            <text:p>+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3.475737" table:style-name="c1">
            <text:p>3.4757</text:p>
          </table:table-cell>
          <table:table-cell office:value-type="string" table:style-name="c1">
            <text:p>2026-04-17 13:30</text:p>
          </table:table-cell>
          <table:table-cell office:value-type="float" office:value="3.4972505000000003" table:style-name="c1">
            <text:p>3.4973</text:p>
          </table:table-cell>
          <table:table-cell office:value-type="float" office:value="0.41782494620565824" table:style-name="c11">
            <text:p>+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3.5177579999999997" table:style-name="c1">
            <text:p>3.5178</text:p>
          </table:table-cell>
          <table:table-cell office:value-type="string" table:style-name="c1">
            <text:p>2026-04-17 14:15</text:p>
          </table:table-cell>
          <table:table-cell office:value-type="float" office:value="3.508245" table:style-name="c1">
            <text:p>3.5082</text:p>
          </table:table-cell>
          <table:table-cell office:value-type="float" office:value="-0.46978734054473614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3.577788" table:style-name="c1">
            <text:p>3.5778</text:p>
          </table:table-cell>
          <table:table-cell office:value-type="string" table:style-name="c1">
            <text:p>2026-04-17 17:30</text:p>
          </table:table-cell>
          <table:table-cell office:value-type="float" office:value="3.5152415" table:style-name="c1">
            <text:p>3.5152</text:p>
          </table:table-cell>
          <table:table-cell office:value-type="float" office:value="-1.944594474532857" table:style-name="c12">
            <text:p>-1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83691" table:style-name="c1">
            <text:p>3.3837</text:p>
          </table:table-cell>
          <table:table-cell office:value-type="string" table:style-name="c1">
            <text:p>2026-04-22 06:00</text:p>
          </table:table-cell>
          <table:table-cell office:value-type="float" office:value="3.3763110000000003" table:style-name="c1">
            <text:p>3.3763</text:p>
          </table:table-cell>
          <table:table-cell office:value-type="float" office:value="-0.417569030062126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00</text:p>
          </table:table-cell>
          <table:table-cell office:value-type="float" office:value="3.4107044999999996" table:style-name="c1">
            <text:p>3.4107</text:p>
          </table:table-cell>
          <table:table-cell office:value-type="string" table:style-name="c1">
            <text:p>2026-04-22 14:30</text:p>
          </table:table-cell>
          <table:table-cell office:value-type="float" office:value="3.4182900000000003" table:style-name="c1">
            <text:p>3.4183</text:p>
          </table:table-cell>
          <table:table-cell office:value-type="float" office:value="0.022058149276804606" table:style-name="c11">
            <text:p>+0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5:45</text:p>
          </table:table-cell>
          <table:table-cell office:value-type="float" office:value="3.4307144999999997" table:style-name="c1">
            <text:p>3.4307</text:p>
          </table:table-cell>
          <table:table-cell office:value-type="string" table:style-name="c1">
            <text:p>2026-04-22 16:15</text:p>
          </table:table-cell>
          <table:table-cell office:value-type="float" office:value="3.4112935" table:style-name="c1">
            <text:p>3.4113</text:p>
          </table:table-cell>
          <table:table-cell office:value-type="float" office:value="-0.764860372569609" table:style-name="c12">
            <text:p>-0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45</text:p>
          </table:table-cell>
          <table:table-cell office:value-type="float" office:value="3.3586785" table:style-name="c1">
            <text:p>3.3587</text:p>
          </table:table-cell>
          <table:table-cell office:value-type="string" table:style-name="c1">
            <text:p>2026-04-27 04:15</text:p>
          </table:table-cell>
          <table:table-cell office:value-type="float" office:value="3.3493245000000003" table:style-name="c1">
            <text:p>3.3493</text:p>
          </table:table-cell>
          <table:table-cell office:value-type="float" office:value="-0.4778456668448672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4:45</text:p>
          </table:table-cell>
          <table:table-cell office:value-type="float" office:value="3.2866425" table:style-name="c1">
            <text:p>3.2866</text:p>
          </table:table-cell>
          <table:table-cell office:value-type="string" table:style-name="c1">
            <text:p>2026-04-27 15:15</text:p>
          </table:table-cell>
          <table:table-cell office:value-type="float" office:value="3.2373805" table:style-name="c1">
            <text:p>3.2374</text:p>
          </table:table-cell>
          <table:table-cell office:value-type="float" office:value="-1.6957586235649247" table:style-name="c12">
            <text:p>-1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3.2966474999999997" table:style-name="c1">
            <text:p>3.2966</text:p>
          </table:table-cell>
          <table:table-cell office:value-type="string" table:style-name="c1">
            <text:p>2026-04-29 05:15</text:p>
          </table:table-cell>
          <table:table-cell office:value-type="float" office:value="3.2893545" table:style-name="c1">
            <text:p>3.2894</text:p>
          </table:table-cell>
          <table:table-cell office:value-type="float" office:value="-0.4206825159650762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3.3186585" table:style-name="c1">
            <text:p>3.3187</text:p>
          </table:table-cell>
          <table:table-cell office:value-type="string" table:style-name="c1">
            <text:p>2026-04-29 10:30</text:p>
          </table:table-cell>
          <table:table-cell office:value-type="float" office:value="3.3253365" table:style-name="c1">
            <text:p>3.3253</text:p>
          </table:table-cell>
          <table:table-cell office:value-type="float" office:value="0.0009236363578857265" table:style-name="c11">
            <text:p>+0.0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3.2686334999999995" table:style-name="c1">
            <text:p>3.2686</text:p>
          </table:table-cell>
          <table:table-cell office:value-type="string" table:style-name="c1">
            <text:p>2026-05-01 14:30</text:p>
          </table:table-cell>
          <table:table-cell office:value-type="float" office:value="3.2603690000000003" table:style-name="c1">
            <text:p>3.2604</text:p>
          </table:table-cell>
          <table:table-cell office:value-type="float" office:value="-0.4522372309712752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7:45</text:p>
          </table:table-cell>
          <table:table-cell office:value-type="float" office:value="3.2306144999999997" table:style-name="c1">
            <text:p>3.2306</text:p>
          </table:table-cell>
          <table:table-cell office:value-type="string" table:style-name="c1">
            <text:p>2026-05-03 08:15</text:p>
          </table:table-cell>
          <table:table-cell office:value-type="float" office:value="3.232383" table:style-name="c1">
            <text:p>3.2324</text:p>
          </table:table-cell>
          <table:table-cell office:value-type="float" office:value="-0.1452675216123578" table:style-name="c12">
            <text:p>-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5:00</text:p>
          </table:table-cell>
          <table:table-cell office:value-type="float" office:value="3.4467224999999995" table:style-name="c1">
            <text:p>3.4467</text:p>
          </table:table-cell>
          <table:table-cell office:value-type="string" table:style-name="c1">
            <text:p>2026-05-04 05:30</text:p>
          </table:table-cell>
          <table:table-cell office:value-type="float" office:value="3.4112935" table:style-name="c1">
            <text:p>3.4113</text:p>
          </table:table-cell>
          <table:table-cell office:value-type="float" office:value="-1.2257492648885648" table:style-name="c12">
            <text:p>-1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3.335667" table:style-name="c1">
            <text:p>3.3357</text:p>
          </table:table-cell>
          <table:table-cell office:value-type="string" table:style-name="c1">
            <text:p>2026-05-04 15:30</text:p>
          </table:table-cell>
          <table:table-cell office:value-type="float" office:value="3.2993495000000004" table:style-name="c1">
            <text:p>3.2993</text:p>
          </table:table-cell>
          <table:table-cell office:value-type="float" office:value="-1.2864863204420374" table:style-name="c12">
            <text:p>-1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45</text:p>
          </table:table-cell>
          <table:table-cell office:value-type="float" office:value="3.3526754999999997" table:style-name="c1">
            <text:p>3.3527</text:p>
          </table:table-cell>
          <table:table-cell office:value-type="string" table:style-name="c1">
            <text:p>2026-05-05 08:15</text:p>
          </table:table-cell>
          <table:table-cell office:value-type="float" office:value="3.3473255" table:style-name="c1">
            <text:p>3.3473</text:p>
          </table:table-cell>
          <table:table-cell office:value-type="float" office:value="-0.359155059131111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3.475737" table:style-name="c1">
            <text:p>3.4757</text:p>
          </table:table-cell>
          <table:table-cell office:value-type="string" table:style-name="c1">
            <text:p>2026-05-06 09:30</text:p>
          </table:table-cell>
          <table:table-cell office:value-type="float" office:value="3.4772605000000003" table:style-name="c1">
            <text:p>3.4773</text:p>
          </table:table-cell>
          <table:table-cell office:value-type="float" office:value="-0.15615519066889405" table:style-name="c12">
            <text:p>-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45</text:p>
          </table:table-cell>
          <table:table-cell office:value-type="float" office:value="3.5187584999999997" table:style-name="c1">
            <text:p>3.5188</text:p>
          </table:table-cell>
          <table:table-cell office:value-type="string" table:style-name="c1">
            <text:p>2026-05-06 10:15</text:p>
          </table:table-cell>
          <table:table-cell office:value-type="float" office:value="3.5382300000000004" table:style-name="c1">
            <text:p>3.5382</text:p>
          </table:table-cell>
          <table:table-cell office:value-type="float" office:value="0.35235661185615275" table:style-name="c11">
            <text:p>+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3.4567275" table:style-name="c1">
            <text:p>3.4567</text:p>
          </table:table-cell>
          <table:table-cell office:value-type="string" table:style-name="c1">
            <text:p>2026-05-07 06:15</text:p>
          </table:table-cell>
          <table:table-cell office:value-type="float" office:value="3.4312835" table:style-name="c1">
            <text:p>3.4313</text:p>
          </table:table-cell>
          <table:table-cell office:value-type="float" office:value="-0.9345004984193772" table:style-name="c12">
            <text:p>-0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0:15</text:p>
          </table:table-cell>
          <table:table-cell office:value-type="float" office:value="3.4447215" table:style-name="c1">
            <text:p>3.4447</text:p>
          </table:table-cell>
          <table:table-cell office:value-type="string" table:style-name="c1">
            <text:p>2026-05-08 00:45</text:p>
          </table:table-cell>
          <table:table-cell office:value-type="float" office:value="3.426286" table:style-name="c1">
            <text:p>3.4263</text:p>
          </table:table-cell>
          <table:table-cell office:value-type="float" office:value="-0.7340113188830988" table:style-name="c12">
            <text:p>-0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30</text:p>
          </table:table-cell>
          <table:table-cell office:value-type="float" office:value="3.5367675" table:style-name="c1">
            <text:p>3.5368</text:p>
          </table:table-cell>
          <table:table-cell office:value-type="string" table:style-name="c1">
            <text:p>2026-05-08 15:00</text:p>
          </table:table-cell>
          <table:table-cell office:value-type="float" office:value="3.5832075000000003" table:style-name="c1">
            <text:p>3.5832</text:p>
          </table:table-cell>
          <table:table-cell office:value-type="float" office:value="1.1105385979570448" table:style-name="c11">
            <text:p>+1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30</text:p>
          </table:table-cell>
          <table:table-cell office:value-type="float" office:value="3.6528254999999996" table:style-name="c1">
            <text:p>3.6528</text:p>
          </table:table-cell>
          <table:table-cell office:value-type="string" table:style-name="c1">
            <text:p>2026-05-08 17:00</text:p>
          </table:table-cell>
          <table:table-cell office:value-type="float" office:value="3.6771605" table:style-name="c1">
            <text:p>3.6772</text:p>
          </table:table-cell>
          <table:table-cell office:value-type="float" office:value="0.46496489253318174" table:style-name="c11">
            <text:p>+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45</text:p>
          </table:table-cell>
          <table:table-cell office:value-type="float" office:value="3.7858919999999996" table:style-name="c1">
            <text:p>3.7859</text:p>
          </table:table-cell>
          <table:table-cell office:value-type="string" table:style-name="c1">
            <text:p>2026-05-09 01:15</text:p>
          </table:table-cell>
          <table:table-cell office:value-type="float" office:value="3.774112" table:style-name="c1">
            <text:p>3.7741</text:p>
          </table:table-cell>
          <table:table-cell office:value-type="float" office:value="-0.5104332053846083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15</text:p>
          </table:table-cell>
          <table:table-cell office:value-type="float" office:value="3.679839" table:style-name="c1">
            <text:p>3.6798</text:p>
          </table:table-cell>
          <table:table-cell office:value-type="string" table:style-name="c1">
            <text:p>2026-05-09 17:45</text:p>
          </table:table-cell>
          <table:table-cell office:value-type="float" office:value="3.6921530000000002" table:style-name="c1">
            <text:p>3.6922</text:p>
          </table:table-cell>
          <table:table-cell office:value-type="float" office:value="0.1340652716871782" table:style-name="c11">
            <text:p>+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22:45</text:p>
          </table:table-cell>
          <table:table-cell office:value-type="float" office:value="3.7828904999999997" table:style-name="c1">
            <text:p>3.7829</text:p>
          </table:table-cell>
          <table:table-cell office:value-type="string" table:style-name="c1">
            <text:p>2026-05-09 23:15</text:p>
          </table:table-cell>
          <table:table-cell office:value-type="float" office:value="3.774112" table:style-name="c1">
            <text:p>3.7741</text:p>
          </table:table-cell>
          <table:table-cell office:value-type="float" office:value="-0.4314941150953322" table:style-name="c12">
            <text:p>-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23:30</text:p>
          </table:table-cell>
          <table:table-cell office:value-type="float" office:value="3.7788885" table:style-name="c1">
            <text:p>3.7789</text:p>
          </table:table-cell>
          <table:table-cell office:value-type="string" table:style-name="c1">
            <text:p>2026-05-10 00:00</text:p>
          </table:table-cell>
          <table:table-cell office:value-type="float" office:value="3.8080950000000002" table:style-name="c1">
            <text:p>3.8081</text:p>
          </table:table-cell>
          <table:table-cell office:value-type="float" office:value="0.5714409963406109" table:style-name="c11">
            <text:p>+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3.8219099999999995" table:style-name="c1">
            <text:p>3.8219</text:p>
          </table:table-cell>
          <table:table-cell office:value-type="string" table:style-name="c1">
            <text:p>2026-05-10 00:45</text:p>
          </table:table-cell>
          <table:table-cell office:value-type="float" office:value="3.77811" table:style-name="c1">
            <text:p>3.7781</text:p>
          </table:table-cell>
          <table:table-cell office:value-type="float" office:value="-1.3436329450457807" table:style-name="c12">
            <text:p>-1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5:15</text:p>
          </table:table-cell>
          <table:table-cell office:value-type="float" office:value="3.7768874999999995" table:style-name="c1">
            <text:p>3.7769</text:p>
          </table:table-cell>
          <table:table-cell office:value-type="string" table:style-name="c1">
            <text:p>2026-05-10 05:45</text:p>
          </table:table-cell>
          <table:table-cell office:value-type="float" office:value="3.9290345" table:style-name="c1">
            <text:p>3.929</text:p>
          </table:table-cell>
          <table:table-cell office:value-type="float" office:value="3.8204172095277045" table:style-name="c11">
            <text:p>+3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15</text:p>
          </table:table-cell>
          <table:table-cell office:value-type="float" office:value="3.9369674999999997" table:style-name="c1">
            <text:p>3.937</text:p>
          </table:table-cell>
          <table:table-cell office:value-type="string" table:style-name="c1">
            <text:p>2026-05-10 06:45</text:p>
          </table:table-cell>
          <table:table-cell office:value-type="float" office:value="3.9390295" table:style-name="c1">
            <text:p>3.939</text:p>
          </table:table-cell>
          <table:table-cell office:value-type="float" office:value="-0.14762936118978276" table:style-name="c12">
            <text:p>-0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15</text:p>
          </table:table-cell>
          <table:table-cell office:value-type="float" office:value="3.989994" table:style-name="c1">
            <text:p>3.99</text:p>
          </table:table-cell>
          <table:table-cell office:value-type="string" table:style-name="c1">
            <text:p>2026-05-10 07:45</text:p>
          </table:table-cell>
          <table:table-cell office:value-type="float" office:value="4.031983" table:style-name="c1">
            <text:p>4.032</text:p>
          </table:table-cell>
          <table:table-cell office:value-type="float" office:value="0.8503538096297891" table:style-name="c11">
            <text:p>+0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15</text:p>
          </table:table-cell>
          <table:table-cell office:value-type="float" office:value="4.0930455" table:style-name="c1">
            <text:p>4.093</text:p>
          </table:table-cell>
          <table:table-cell office:value-type="string" table:style-name="c1">
            <text:p>2026-05-10 13:45</text:p>
          </table:table-cell>
          <table:table-cell office:value-type="float" office:value="4.1089445" table:style-name="c1">
            <text:p>4.1089</text:p>
          </table:table-cell>
          <table:table-cell office:value-type="float" office:value="0.18776287594408636" table:style-name="c11">
            <text:p>+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6:15</text:p>
          </table:table-cell>
          <table:table-cell office:value-type="float" office:value="3.9259619999999997" table:style-name="c1">
            <text:p>3.926</text:p>
          </table:table-cell>
          <table:table-cell office:value-type="string" table:style-name="c1">
            <text:p>2026-05-11 16:45</text:p>
          </table:table-cell>
          <table:table-cell office:value-type="float" office:value="3.8680650000000005" table:style-name="c1">
            <text:p>3.8681</text:p>
          </table:table-cell>
          <table:table-cell office:value-type="float" office:value="-1.6716733869303724" table:style-name="c12">
            <text:p>-1.7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8:45</text:p>
          </table:table-cell>
          <table:table-cell office:value-type="float" office:value="3.72186" table:style-name="c1">
            <text:p>3.7219</text:p>
          </table:table-cell>
          <table:table-cell office:value-type="string" table:style-name="c1">
            <text:p>2026-05-15 09:15</text:p>
          </table:table-cell>
          <table:table-cell office:value-type="float" office:value="3.700149" table:style-name="c1">
            <text:p>3.7001</text:p>
          </table:table-cell>
          <table:table-cell office:value-type="float" office:value="-0.7820712721864909" table:style-name="c12">
            <text:p>-0.8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7:00</text:p>
          </table:table-cell>
          <table:table-cell office:value-type="float" office:value="3.5797889999999994" table:style-name="c1">
            <text:p>3.5798</text:p>
          </table:table-cell>
          <table:table-cell office:value-type="string" table:style-name="c1">
            <text:p>2026-05-20 07:30</text:p>
          </table:table-cell>
          <table:table-cell office:value-type="float" office:value="3.5812085000000002" table:style-name="c1">
            <text:p>3.5812</text:p>
          </table:table-cell>
          <table:table-cell office:value-type="float" office:value="-0.160326091607621" table:style-name="c12">
            <text:p>-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8:45</text:p>
          </table:table-cell>
          <table:table-cell office:value-type="float" office:value="3.6278129999999997" table:style-name="c1">
            <text:p>3.6278</text:p>
          </table:table-cell>
          <table:table-cell office:value-type="string" table:style-name="c1">
            <text:p>2026-05-20 09:15</text:p>
          </table:table-cell>
          <table:table-cell office:value-type="float" office:value="3.594202" table:style-name="c1">
            <text:p>3.5942</text:p>
          </table:table-cell>
          <table:table-cell office:value-type="float" office:value="-1.1245290150842857" table:style-name="c12">
            <text:p>-1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6:00</text:p>
          </table:table-cell>
          <table:table-cell office:value-type="float" office:value="3.6408194999999997" table:style-name="c1">
            <text:p>3.6408</text:p>
          </table:table-cell>
          <table:table-cell office:value-type="string" table:style-name="c1">
            <text:p>2026-05-20 16:30</text:p>
          </table:table-cell>
          <table:table-cell office:value-type="float" office:value="3.5952015000000004" table:style-name="c1">
            <text:p>3.5952</text:p>
          </table:table-cell>
          <table:table-cell office:value-type="float" office:value="-1.4503550038253543" table:style-name="c12">
            <text:p>-1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15</text:p>
          </table:table-cell>
          <table:table-cell office:value-type="float" office:value="3.6868425" table:style-name="c1">
            <text:p>3.6868</text:p>
          </table:table-cell>
          <table:table-cell office:value-type="string" table:style-name="c1">
            <text:p>2026-05-21 08:45</text:p>
          </table:table-cell>
          <table:table-cell office:value-type="float" office:value="3.6611685" table:style-name="c1">
            <text:p>3.6612</text:p>
          </table:table-cell>
          <table:table-cell office:value-type="float" office:value="-0.894876193694194" table:style-name="c12">
            <text:p>-0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3.6178079999999997" table:style-name="c1">
            <text:p>3.6178</text:p>
          </table:table-cell>
          <table:table-cell office:value-type="string" table:style-name="c1">
            <text:p>2026-05-21 18:15</text:p>
          </table:table-cell>
          <table:table-cell office:value-type="float" office:value="3.6081950000000003" table:style-name="c1">
            <text:p>3.6082</text:p>
          </table:table-cell>
          <table:table-cell office:value-type="float" office:value="-0.46508222119580056" table:style-name="c12">
            <text:p>-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1:45</text:p>
          </table:table-cell>
          <table:table-cell office:value-type="float" office:value="3.6248115" table:style-name="c1">
            <text:p>3.6248</text:p>
          </table:table-cell>
          <table:table-cell office:value-type="string" table:style-name="c1">
            <text:p>2026-05-22 12:15</text:p>
          </table:table-cell>
          <table:table-cell office:value-type="float" office:value="3.6451765" table:style-name="c1">
            <text:p>3.6452</text:p>
          </table:table-cell>
          <table:table-cell office:value-type="float" office:value="0.36079923539471537" table:style-name="c11">
            <text:p>+0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30</text:p>
          </table:table-cell>
          <table:table-cell office:value-type="float" office:value="3.6518249999999997" table:style-name="c1">
            <text:p>3.6518</text:p>
          </table:table-cell>
          <table:table-cell office:value-type="string" table:style-name="c1">
            <text:p>2026-05-22 13:00</text:p>
          </table:table-cell>
          <table:table-cell office:value-type="float" office:value="3.676161" table:style-name="c1">
            <text:p>3.6762</text:p>
          </table:table-cell>
          <table:table-cell office:value-type="float" office:value="0.46517437612703105" table:style-name="c11">
            <text:p>+0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3.653826" table:style-name="c1">
            <text:p>3.6538</text:p>
          </table:table-cell>
          <table:table-cell office:value-type="string" table:style-name="c1">
            <text:p>2026-05-22 18:15</text:p>
          </table:table-cell>
          <table:table-cell office:value-type="float" office:value="3.596201" table:style-name="c1">
            <text:p>3.5962</text:p>
          </table:table-cell>
          <table:table-cell office:value-type="float" office:value="-1.7738613113760682" table:style-name="c12">
            <text:p>-1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09:15</text:p>
          </table:table-cell>
          <table:table-cell office:value-type="float" office:value="0.212106" table:style-name="c8">
            <text:p>0.21211</text:p>
          </table:table-cell>
          <table:table-cell office:value-type="string" table:style-name="c8">
            <text:p>2026-03-04 09:45</text:p>
          </table:table-cell>
          <table:table-cell office:value-type="float" office:value="0.2128935" table:style-name="c8">
            <text:p>0.21289</text:p>
          </table:table-cell>
          <table:table-cell office:value-type="float" office:value="0.17063444386298254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0:00</text:p>
          </table:table-cell>
          <table:table-cell office:value-type="float" office:value="0.212106" table:style-name="c8">
            <text:p>0.21211</text:p>
          </table:table-cell>
          <table:table-cell office:value-type="string" table:style-name="c8">
            <text:p>2026-03-04 10:30</text:p>
          </table:table-cell>
          <table:table-cell office:value-type="float" office:value="0.2088955" table:style-name="c8">
            <text:p>0.2089</text:p>
          </table:table-cell>
          <table:table-cell office:value-type="float" office:value="-1.7105042311391538" table:style-name="c9">
            <text:p>-1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4:15</text:p>
          </table:table-cell>
          <table:table-cell office:value-type="float" office:value="0.21110549999999997" table:style-name="c8">
            <text:p>0.21111</text:p>
          </table:table-cell>
          <table:table-cell office:value-type="string" table:style-name="c8">
            <text:p>2026-03-04 14:45</text:p>
          </table:table-cell>
          <table:table-cell office:value-type="float" office:value="0.209895" table:style-name="c8">
            <text:p>0.20989</text:p>
          </table:table-cell>
          <table:table-cell office:value-type="float" office:value="-0.772163730930719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5:00</text:p>
          </table:table-cell>
          <table:table-cell office:value-type="float" office:value="0.21110549999999997" table:style-name="c8">
            <text:p>0.21111</text:p>
          </table:table-cell>
          <table:table-cell office:value-type="string" table:style-name="c8">
            <text:p>2026-03-04 15:30</text:p>
          </table:table-cell>
          <table:table-cell office:value-type="float" office:value="0.21489250000000001" table:style-name="c8">
            <text:p>0.21489</text:p>
          </table:table-cell>
          <table:table-cell office:value-type="float" office:value="1.5904037992852116" table:style-name="c10">
            <text:p>+1.6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6:30</text:p>
          </table:table-cell>
          <table:table-cell office:value-type="float" office:value="0.218109" table:style-name="c8">
            <text:p>0.21811</text:p>
          </table:table-cell>
          <table:table-cell office:value-type="string" table:style-name="c8">
            <text:p>2026-03-04 17:00</text:p>
          </table:table-cell>
          <table:table-cell office:value-type="float" office:value="0.21889050000000002" table:style-name="c8">
            <text:p>0.21889</text:p>
          </table:table-cell>
          <table:table-cell office:value-type="float" office:value="0.15769082912673316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8:45</text:p>
          </table:table-cell>
          <table:table-cell office:value-type="float" office:value="0.21710849999999998" table:style-name="c8">
            <text:p>0.21711</text:p>
          </table:table-cell>
          <table:table-cell office:value-type="string" table:style-name="c8">
            <text:p>2026-03-04 19:15</text:p>
          </table:table-cell>
          <table:table-cell office:value-type="float" office:value="0.22088950000000002" table:style-name="c8">
            <text:p>0.22089</text:p>
          </table:table-cell>
          <table:table-cell office:value-type="float" office:value="1.5381442410131507" table:style-name="c10">
            <text:p>+1.5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4 19:45</text:p>
          </table:table-cell>
          <table:table-cell office:value-type="float" office:value="0.22011" table:style-name="c8">
            <text:p>0.22011</text:p>
          </table:table-cell>
          <table:table-cell office:value-type="string" table:style-name="c8">
            <text:p>2026-03-04 20:15</text:p>
          </table:table-cell>
          <table:table-cell office:value-type="float" office:value="0.21889050000000002" table:style-name="c8">
            <text:p>0.21889</text:p>
          </table:table-cell>
          <table:table-cell office:value-type="float" office:value="-0.752833632956218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5 20:15</text:p>
          </table:table-cell>
          <table:table-cell office:value-type="float" office:value="0.216108" table:style-name="c8">
            <text:p>0.21611</text:p>
          </table:table-cell>
          <table:table-cell office:value-type="string" table:style-name="c8">
            <text:p>2026-03-05 20:45</text:p>
          </table:table-cell>
          <table:table-cell office:value-type="float" office:value="0.21689150000000001" table:style-name="c8">
            <text:p>0.21689</text:p>
          </table:table-cell>
          <table:table-cell office:value-type="float" office:value="0.16192546851574452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6 01:45</text:p>
          </table:table-cell>
          <table:table-cell office:value-type="float" office:value="0.21710849999999998" table:style-name="c8">
            <text:p>0.21711</text:p>
          </table:table-cell>
          <table:table-cell office:value-type="string" table:style-name="c8">
            <text:p>2026-03-06 02:15</text:p>
          </table:table-cell>
          <table:table-cell office:value-type="float" office:value="0.217891" table:style-name="c8">
            <text:p>0.21789</text:p>
          </table:table-cell>
          <table:table-cell office:value-type="float" office:value="0.15979839158761777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06 04:15</text:p>
          </table:table-cell>
          <table:table-cell office:value-type="float" office:value="0.218109" table:style-name="c8">
            <text:p>0.21811</text:p>
          </table:table-cell>
          <table:table-cell office:value-type="string" table:style-name="c8">
            <text:p>2026-03-06 04:45</text:p>
          </table:table-cell>
          <table:table-cell office:value-type="float" office:value="0.21489250000000001" table:style-name="c8">
            <text:p>0.21489</text:p>
          </table:table-cell>
          <table:table-cell office:value-type="float" office:value="-1.6716733869303724" table:style-name="c9">
            <text:p>-1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1:00</text:p>
          </table:table-cell>
          <table:table-cell office:value-type="float" office:value="0.172086" table:style-name="c8">
            <text:p>0.17209</text:p>
          </table:table-cell>
          <table:table-cell office:value-type="string" table:style-name="c8">
            <text:p>2026-03-13 01:30</text:p>
          </table:table-cell>
          <table:table-cell office:value-type="float" office:value="0.17091450000000002" table:style-name="c8">
            <text:p>0.17091</text:p>
          </table:table-cell>
          <table:table-cell office:value-type="float" office:value="-0.8793034212544848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09:45</text:p>
          </table:table-cell>
          <table:table-cell office:value-type="float" office:value="0.17008500000000001" table:style-name="c8">
            <text:p>0.17009</text:p>
          </table:table-cell>
          <table:table-cell office:value-type="string" table:style-name="c8">
            <text:p>2026-03-13 10:15</text:p>
          </table:table-cell>
          <table:table-cell office:value-type="float" office:value="0.17091450000000002" table:style-name="c8">
            <text:p>0.17091</text:p>
          </table:table-cell>
          <table:table-cell office:value-type="float" office:value="0.28682242084840937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0:30</text:p>
          </table:table-cell>
          <table:table-cell office:value-type="float" office:value="0.1710855" table:style-name="c8">
            <text:p>0.17109</text:p>
          </table:table-cell>
          <table:table-cell office:value-type="string" table:style-name="c8">
            <text:p>2026-03-13 11:00</text:p>
          </table:table-cell>
          <table:table-cell office:value-type="float" office:value="0.17191399999999998" table:style-name="c8">
            <text:p>0.17191</text:p>
          </table:table-cell>
          <table:table-cell office:value-type="float" office:value="0.2833927562534422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1:15</text:p>
          </table:table-cell>
          <table:table-cell office:value-type="float" office:value="0.17308649999999998" table:style-name="c8">
            <text:p>0.17309</text:p>
          </table:table-cell>
          <table:table-cell office:value-type="string" table:style-name="c8">
            <text:p>2026-03-13 11:45</text:p>
          </table:table-cell>
          <table:table-cell office:value-type="float" office:value="0.1749125" table:style-name="c8">
            <text:p>0.17491</text:p>
          </table:table-cell>
          <table:table-cell office:value-type="float" office:value="0.8529549748247378" table:style-name="c10">
            <text:p>+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00</text:p>
          </table:table-cell>
          <table:table-cell office:value-type="float" office:value="0.17708849999999998" table:style-name="c8">
            <text:p>0.17709</text:p>
          </table:table-cell>
          <table:table-cell office:value-type="string" table:style-name="c8">
            <text:p>2026-03-13 13:30</text:p>
          </table:table-cell>
          <table:table-cell office:value-type="float" office:value="0.1789105" table:style-name="c8">
            <text:p>0.17891</text:p>
          </table:table-cell>
          <table:table-cell office:value-type="float" office:value="0.8269073996900023" table:style-name="c10">
            <text:p>+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3 13:45</text:p>
          </table:table-cell>
          <table:table-cell office:value-type="float" office:value="0.1810905" table:style-name="c8">
            <text:p>0.18109</text:p>
          </table:table-cell>
          <table:table-cell office:value-type="string" table:style-name="c8">
            <text:p>2026-03-13 14:15</text:p>
          </table:table-cell>
          <table:table-cell office:value-type="float" office:value="0.1769115" table:style-name="c8">
            <text:p>0.17691</text:p>
          </table:table-cell>
          <table:table-cell office:value-type="float" office:value="-2.50297287185135" table:style-name="c9">
            <text:p>-2.5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4 03:45</text:p>
          </table:table-cell>
          <table:table-cell office:value-type="float" office:value="0.1690845" table:style-name="c8">
            <text:p>0.16908</text:p>
          </table:table-cell>
          <table:table-cell office:value-type="string" table:style-name="c8">
            <text:p>2026-03-14 04:15</text:p>
          </table:table-cell>
          <table:table-cell office:value-type="float" office:value="0.167916" table:style-name="c8">
            <text:p>0.16792</text:p>
          </table:table-cell>
          <table:table-cell office:value-type="float" office:value="-0.8895931229651377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3:45</text:p>
          </table:table-cell>
          <table:table-cell office:value-type="float" office:value="0.17308649999999998" table:style-name="c8">
            <text:p>0.17309</text:p>
          </table:table-cell>
          <table:table-cell office:value-type="string" table:style-name="c8">
            <text:p>2026-03-16 04:15</text:p>
          </table:table-cell>
          <table:table-cell office:value-type="float" office:value="0.1749125" table:style-name="c8">
            <text:p>0.17491</text:p>
          </table:table-cell>
          <table:table-cell office:value-type="float" office:value="0.8529549748247156" table:style-name="c10">
            <text:p>+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5:00</text:p>
          </table:table-cell>
          <table:table-cell office:value-type="float" office:value="0.17608799999999997" table:style-name="c8">
            <text:p>0.17609</text:p>
          </table:table-cell>
          <table:table-cell office:value-type="string" table:style-name="c8">
            <text:p>2026-03-16 05:30</text:p>
          </table:table-cell>
          <table:table-cell office:value-type="float" office:value="0.1769115" table:style-name="c8">
            <text:p>0.17691</text:p>
          </table:table-cell>
          <table:table-cell office:value-type="float" office:value="0.2668290351983238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8:45</text:p>
          </table:table-cell>
          <table:table-cell office:value-type="float" office:value="0.1850925" table:style-name="c8">
            <text:p>0.18509</text:p>
          </table:table-cell>
          <table:table-cell office:value-type="string" table:style-name="c8">
            <text:p>2026-03-16 09:15</text:p>
          </table:table-cell>
          <table:table-cell office:value-type="float" office:value="0.1849075" table:style-name="c8">
            <text:p>0.1849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09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16 10:15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8243889079144529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3:30</text:p>
          </table:table-cell>
          <table:table-cell office:value-type="float" office:value="0.18809399999999998" table:style-name="c8">
            <text:p>0.18809</text:p>
          </table:table-cell>
          <table:table-cell office:value-type="string" table:style-name="c8">
            <text:p>2026-03-16 14:00</text:p>
          </table:table-cell>
          <table:table-cell office:value-type="float" office:value="0.1869065" table:style-name="c8">
            <text:p>0.18691</text:p>
          </table:table-cell>
          <table:table-cell office:value-type="float" office:value="-0.8299712343296406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5:15</text:p>
          </table:table-cell>
          <table:table-cell office:value-type="float" office:value="0.1890945" table:style-name="c8">
            <text:p>0.18909</text:p>
          </table:table-cell>
          <table:table-cell office:value-type="string" table:style-name="c8">
            <text:p>2026-03-16 15:45</text:p>
          </table:table-cell>
          <table:table-cell office:value-type="float" office:value="0.1869065" table:style-name="c8">
            <text:p>0.18691</text:p>
          </table:table-cell>
          <table:table-cell office:value-type="float" office:value="-1.3546803812379493" table:style-name="c9">
            <text:p>-1.4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17:4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3-16 18:15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-1.8656243051249133" table:style-name="c9">
            <text:p>-1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6 23:00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16 23:30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8243889079144529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0:30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17 01:00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08:15</text:p>
          </table:table-cell>
          <table:table-cell office:value-type="float" office:value="0.1890945" table:style-name="c8">
            <text:p>0.18909</text:p>
          </table:table-cell>
          <table:table-cell office:value-type="string" table:style-name="c8">
            <text:p>2026-03-17 08:45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299650224887571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14:45</text:p>
          </table:table-cell>
          <table:table-cell office:value-type="float" office:value="0.18809399999999998" table:style-name="c8">
            <text:p>0.18809</text:p>
          </table:table-cell>
          <table:table-cell office:value-type="string" table:style-name="c8">
            <text:p>2026-03-17 15:15</text:p>
          </table:table-cell>
          <table:table-cell office:value-type="float" office:value="0.1869065" table:style-name="c8">
            <text:p>0.18691</text:p>
          </table:table-cell>
          <table:table-cell office:value-type="float" office:value="-0.829971234329618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7 21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17 22:1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18 05:1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3-18 05:4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-0.821641584966681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0 22:15</text:p>
          </table:table-cell>
          <table:table-cell office:value-type="float" office:value="0.18008999999999997" table:style-name="c8">
            <text:p>0.18009</text:p>
          </table:table-cell>
          <table:table-cell office:value-type="string" table:style-name="c8">
            <text:p>2026-03-20 22:45</text:p>
          </table:table-cell>
          <table:table-cell office:value-type="float" office:value="0.1789105" table:style-name="c8">
            <text:p>0.17891</text:p>
          </table:table-cell>
          <table:table-cell office:value-type="float" office:value="-0.8535410569714852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1 05:45</text:p>
          </table:table-cell>
          <table:table-cell office:value-type="float" office:value="0.1810905" table:style-name="c8">
            <text:p>0.18109</text:p>
          </table:table-cell>
          <table:table-cell office:value-type="string" table:style-name="c8">
            <text:p>2026-03-21 06:15</text:p>
          </table:table-cell>
          <table:table-cell office:value-type="float" office:value="0.1789105" table:style-name="c8">
            <text:p>0.17891</text:p>
          </table:table-cell>
          <table:table-cell office:value-type="float" office:value="-1.401311548369466" table:style-name="c9">
            <text:p>-1.4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1 09:15</text:p>
          </table:table-cell>
          <table:table-cell office:value-type="float" office:value="0.18008999999999997" table:style-name="c8">
            <text:p>0.18009</text:p>
          </table:table-cell>
          <table:table-cell office:value-type="string" table:style-name="c8">
            <text:p>2026-03-21 09:45</text:p>
          </table:table-cell>
          <table:table-cell office:value-type="float" office:value="0.17991000000000001" table:style-name="c8">
            <text:p>0.1799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1 15:30</text:p>
          </table:table-cell>
          <table:table-cell office:value-type="float" office:value="0.1810905" table:style-name="c8">
            <text:p>0.18109</text:p>
          </table:table-cell>
          <table:table-cell office:value-type="string" table:style-name="c8">
            <text:p>2026-03-21 16:00</text:p>
          </table:table-cell>
          <table:table-cell office:value-type="float" office:value="0.18190900000000002" table:style-name="c8">
            <text:p>0.18191</text:p>
          </table:table-cell>
          <table:table-cell office:value-type="float" office:value="0.2511804368534154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3 17:15</text:p>
          </table:table-cell>
          <table:table-cell office:value-type="float" office:value="0.1850925" table:style-name="c8">
            <text:p>0.18509</text:p>
          </table:table-cell>
          <table:table-cell office:value-type="string" table:style-name="c8">
            <text:p>2026-03-23 17:45</text:p>
          </table:table-cell>
          <table:table-cell office:value-type="float" office:value="0.1869065" table:style-name="c8">
            <text:p>0.18691</text:p>
          </table:table-cell>
          <table:table-cell office:value-type="float" office:value="0.7781913943028629" table:style-name="c10">
            <text:p>+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7:30</text:p>
          </table:table-cell>
          <table:table-cell office:value-type="float" office:value="0.1870935" table:style-name="c8">
            <text:p>0.18709</text:p>
          </table:table-cell>
          <table:table-cell office:value-type="string" table:style-name="c8">
            <text:p>2026-03-24 08:00</text:p>
          </table:table-cell>
          <table:table-cell office:value-type="float" office:value="0.1889055" table:style-name="c8">
            <text:p>0.18891</text:p>
          </table:table-cell>
          <table:table-cell office:value-type="float" office:value="0.7666636764505519" table:style-name="c10">
            <text:p>+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9:00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24 09:30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82438890791446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09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3-24 10:15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82438890791446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10:4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3-24 11:15</text:p>
          </table:table-cell>
          <table:table-cell office:value-type="float" office:value="0.1869065" table:style-name="c8">
            <text:p>0.18691</text:p>
          </table:table-cell>
          <table:table-cell office:value-type="float" office:value="-2.387615665204046" table:style-name="c9">
            <text:p>-2.4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4 20:3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3-24 21:0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5:00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3-25 05:30</text:p>
          </table:table-cell>
          <table:table-cell office:value-type="float" office:value="0.19390300000000002" table:style-name="c8">
            <text:p>0.193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06:30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3-25 07:00</text:p>
          </table:table-cell>
          <table:table-cell office:value-type="float" office:value="0.19590200000000002" table:style-name="c8">
            <text:p>0.195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25 13:00</text:p>
          </table:table-cell>
          <table:table-cell office:value-type="float" office:value="0.2001" table:style-name="c8">
            <text:p>0.2001</text:p>
          </table:table-cell>
          <table:table-cell office:value-type="string" table:style-name="c8">
            <text:p>2026-03-25 13:30</text:p>
          </table:table-cell>
          <table:table-cell office:value-type="float" office:value="0.20089950000000004" table:style-name="c8">
            <text:p>0.2009</text:p>
          </table:table-cell>
          <table:table-cell office:value-type="float" office:value="0.1988515239880195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1:30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3-30 12:00</text:p>
          </table:table-cell>
          <table:table-cell office:value-type="float" office:value="0.177911" table:style-name="c8">
            <text:p>0.17791</text:p>
          </table:table-cell>
          <table:table-cell office:value-type="float" office:value="-0.8566354191619108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13:30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3-30 14:00</text:p>
          </table:table-cell>
          <table:table-cell office:value-type="float" office:value="0.1789105" table:style-name="c8">
            <text:p>0.1789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1:15</text:p>
          </table:table-cell>
          <table:table-cell office:value-type="float" office:value="0.17708849999999998" table:style-name="c8">
            <text:p>0.17709</text:p>
          </table:table-cell>
          <table:table-cell office:value-type="string" table:style-name="c8">
            <text:p>2026-03-30 21:45</text:p>
          </table:table-cell>
          <table:table-cell office:value-type="float" office:value="0.177911" table:style-name="c8">
            <text:p>0.17791</text:p>
          </table:table-cell>
          <table:table-cell office:value-type="float" office:value="0.2636285874012323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0 22:00</text:p>
          </table:table-cell>
          <table:table-cell office:value-type="float" office:value="0.17808899999999997" table:style-name="c8">
            <text:p>0.17809</text:p>
          </table:table-cell>
          <table:table-cell office:value-type="string" table:style-name="c8">
            <text:p>2026-03-30 22:30</text:p>
          </table:table-cell>
          <table:table-cell office:value-type="float" office:value="0.1789105" table:style-name="c8">
            <text:p>0.17891</text:p>
          </table:table-cell>
          <table:table-cell office:value-type="float" office:value="0.26046409969171513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1:30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3-31 02:00</text:p>
          </table:table-cell>
          <table:table-cell office:value-type="float" office:value="0.1789105" table:style-name="c8">
            <text:p>0.1789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02:15</text:p>
          </table:table-cell>
          <table:table-cell office:value-type="float" office:value="0.18008999999999997" table:style-name="c8">
            <text:p>0.18009</text:p>
          </table:table-cell>
          <table:table-cell office:value-type="string" table:style-name="c8">
            <text:p>2026-03-31 02:45</text:p>
          </table:table-cell>
          <table:table-cell office:value-type="float" office:value="0.17991000000000001" table:style-name="c8">
            <text:p>0.1799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3-31 17:00</text:p>
          </table:table-cell>
          <table:table-cell office:value-type="float" office:value="0.18008999999999997" table:style-name="c8">
            <text:p>0.18009</text:p>
          </table:table-cell>
          <table:table-cell office:value-type="string" table:style-name="c8">
            <text:p>2026-03-31 17:30</text:p>
          </table:table-cell>
          <table:table-cell office:value-type="float" office:value="0.17991000000000001" table:style-name="c8">
            <text:p>0.17991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07:45</text:p>
          </table:table-cell>
          <table:table-cell office:value-type="float" office:value="0.18008999999999997" table:style-name="c8">
            <text:p>0.18009</text:p>
          </table:table-cell>
          <table:table-cell office:value-type="string" table:style-name="c8">
            <text:p>2026-04-04 08:15</text:p>
          </table:table-cell>
          <table:table-cell office:value-type="float" office:value="0.17991000000000001" table:style-name="c8">
            <text:p>0.17991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4 19:15</text:p>
          </table:table-cell>
          <table:table-cell office:value-type="float" office:value="0.18409199999999998" table:style-name="c8">
            <text:p>0.18409</text:p>
          </table:table-cell>
          <table:table-cell office:value-type="string" table:style-name="c8">
            <text:p>2026-04-04 19:45</text:p>
          </table:table-cell>
          <table:table-cell office:value-type="float" office:value="0.1829085" table:style-name="c8">
            <text:p>0.18291</text:p>
          </table:table-cell>
          <table:table-cell office:value-type="float" office:value="-0.8414999519262056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0:15</text:p>
          </table:table-cell>
          <table:table-cell office:value-type="float" office:value="0.18809399999999998" table:style-name="c8">
            <text:p>0.18809</text:p>
          </table:table-cell>
          <table:table-cell office:value-type="string" table:style-name="c8">
            <text:p>2026-04-06 10:45</text:p>
          </table:table-cell>
          <table:table-cell office:value-type="float" office:value="0.1889055" table:style-name="c8">
            <text:p>0.18891</text:p>
          </table:table-cell>
          <table:table-cell office:value-type="float" office:value="0.23067078455454304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1:00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4-06 11:30</text:p>
          </table:table-cell>
          <table:table-cell office:value-type="float" office:value="0.1889055" table:style-name="c8">
            <text:p>0.18891</text:p>
          </table:table-cell>
          <table:table-cell office:value-type="float" office:value="-0.824388907914464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6 12:1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4-06 12:4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-0.8216415849666592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2:15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4-07 22:45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1.756027090063239" table:style-name="c10">
            <text:p>+1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7 23:00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4-07 23:30</text:p>
          </table:table-cell>
          <table:table-cell office:value-type="float" office:value="0.20189900000000002" table:style-name="c8">
            <text:p>0.201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21:30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4-08 22:0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8083254788421979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8 22:45</text:p>
          </table:table-cell>
          <table:table-cell office:value-type="float" office:value="0.1970985" table:style-name="c8">
            <text:p>0.1971</text:p>
          </table:table-cell>
          <table:table-cell office:value-type="string" table:style-name="c8">
            <text:p>2026-04-08 23:15</text:p>
          </table:table-cell>
          <table:table-cell office:value-type="float" office:value="0.1949025" table:style-name="c8">
            <text:p>0.1949</text:p>
          </table:table-cell>
          <table:table-cell office:value-type="float" office:value="-1.3118365170206814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6:15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09 16:45</text:p>
          </table:table-cell>
          <table:table-cell office:value-type="float" office:value="0.1969015" table:style-name="c8">
            <text:p>0.1969</text:p>
          </table:table-cell>
          <table:table-cell office:value-type="float" office:value="-0.8031873449638849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7:00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09 17:30</text:p>
          </table:table-cell>
          <table:table-cell office:value-type="float" office:value="0.1969015" table:style-name="c8">
            <text:p>0.1969</text:p>
          </table:table-cell>
          <table:table-cell office:value-type="float" office:value="-0.8031873449638738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17:45</text:p>
          </table:table-cell>
          <table:table-cell office:value-type="float" office:value="0.2001" table:style-name="c8">
            <text:p>0.2001</text:p>
          </table:table-cell>
          <table:table-cell office:value-type="string" table:style-name="c8">
            <text:p>2026-04-09 18:15</text:p>
          </table:table-cell>
          <table:table-cell office:value-type="float" office:value="0.1989005" table:style-name="c8">
            <text:p>0.1989</text:p>
          </table:table-cell>
          <table:table-cell office:value-type="float" office:value="-0.7981519737631171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09 22:30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4-09 23:00</text:p>
          </table:table-cell>
          <table:table-cell office:value-type="float" office:value="0.19990000000000002" table:style-name="c8">
            <text:p>0.1999</text:p>
          </table:table-cell>
          <table:table-cell office:value-type="float" office:value="-1.286782400878772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0 14:30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10 15:00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09:3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4-11 10:0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0:15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4-11 10:45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18:45</text:p>
          </table:table-cell>
          <table:table-cell office:value-type="float" office:value="0.2001" table:style-name="c8">
            <text:p>0.2001</text:p>
          </table:table-cell>
          <table:table-cell office:value-type="string" table:style-name="c8">
            <text:p>2026-04-11 19:15</text:p>
          </table:table-cell>
          <table:table-cell office:value-type="float" office:value="0.19990000000000002" table:style-name="c8">
            <text:p>0.1999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1 20:15</text:p>
          </table:table-cell>
          <table:table-cell office:value-type="float" office:value="0.2031015" table:style-name="c8">
            <text:p>0.2031</text:p>
          </table:table-cell>
          <table:table-cell office:value-type="string" table:style-name="c8">
            <text:p>2026-04-11 20:45</text:p>
          </table:table-cell>
          <table:table-cell office:value-type="float" office:value="0.19990000000000002" table:style-name="c8">
            <text:p>0.1999</text:p>
          </table:table-cell>
          <table:table-cell office:value-type="float" office:value="-1.7730544087562028" table:style-name="c9">
            <text:p>-1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0:15</text:p>
          </table:table-cell>
          <table:table-cell office:value-type="float" office:value="0.1970985" table:style-name="c8">
            <text:p>0.1971</text:p>
          </table:table-cell>
          <table:table-cell office:value-type="string" table:style-name="c8">
            <text:p>2026-04-14 10:45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0.20644292117901752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3:45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14 14:15</text:p>
          </table:table-cell>
          <table:table-cell office:value-type="float" office:value="0.1989005" table:style-name="c8">
            <text:p>0.1989</text:p>
          </table:table-cell>
          <table:table-cell office:value-type="float" office:value="0.2038868951887762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4 14:30</text:p>
          </table:table-cell>
          <table:table-cell office:value-type="float" office:value="0.1990995" table:style-name="c8">
            <text:p>0.1991</text:p>
          </table:table-cell>
          <table:table-cell office:value-type="string" table:style-name="c8">
            <text:p>2026-04-14 15:00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-0.8006570076770747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0:15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4-15 00:45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02:0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4-15 02:3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00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4-15 12:30</text:p>
          </table:table-cell>
          <table:table-cell office:value-type="float" office:value="0.1949025" table:style-name="c8">
            <text:p>0.1949</text:p>
          </table:table-cell>
          <table:table-cell office:value-type="float" office:value="0.21426910385016207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2:45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4-15 13:15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71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4:15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4-15 14:45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0.7177002830217605" table:style-name="c10">
            <text:p>+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7:00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15 17:30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5 18:00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4-15 18:30</text:p>
          </table:table-cell>
          <table:table-cell office:value-type="float" office:value="0.19990000000000002" table:style-name="c8">
            <text:p>0.1999</text:p>
          </table:table-cell>
          <table:table-cell office:value-type="float" office:value="0.7074240152651123" table:style-name="c10">
            <text:p>+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0:45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4-16 01:15</text:p>
          </table:table-cell>
          <table:table-cell office:value-type="float" office:value="0.20089950000000004" table:style-name="c8">
            <text:p>0.2009</text:p>
          </table:table-cell>
          <table:table-cell office:value-type="float" office:value="-0.7932163128831271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1:45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4-16 02:15</text:p>
          </table:table-cell>
          <table:table-cell office:value-type="float" office:value="0.20289850000000004" table:style-name="c8">
            <text:p>0.2029</text:p>
          </table:table-cell>
          <table:table-cell office:value-type="float" office:value="0.19391586310808506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08:00</text:p>
          </table:table-cell>
          <table:table-cell office:value-type="float" office:value="0.212106" table:style-name="c8">
            <text:p>0.21211</text:p>
          </table:table-cell>
          <table:table-cell office:value-type="string" table:style-name="c8">
            <text:p>2026-04-16 08:30</text:p>
          </table:table-cell>
          <table:table-cell office:value-type="float" office:value="0.209895" table:style-name="c8">
            <text:p>0.20989</text:p>
          </table:table-cell>
          <table:table-cell office:value-type="float" office:value="-1.2402195623886114" table:style-name="c9">
            <text:p>-1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2:30</text:p>
          </table:table-cell>
          <table:table-cell office:value-type="float" office:value="0.212106" table:style-name="c8">
            <text:p>0.21211</text:p>
          </table:table-cell>
          <table:table-cell office:value-type="string" table:style-name="c8">
            <text:p>2026-04-16 13:00</text:p>
          </table:table-cell>
          <table:table-cell office:value-type="float" office:value="0.213893" table:style-name="c8">
            <text:p>0.21389</text:p>
          </table:table-cell>
          <table:table-cell office:value-type="float" office:value="0.6409191126135028" table:style-name="c10">
            <text:p>+0.6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3:15</text:p>
          </table:table-cell>
          <table:table-cell office:value-type="float" office:value="0.216108" table:style-name="c8">
            <text:p>0.21611</text:p>
          </table:table-cell>
          <table:table-cell office:value-type="string" table:style-name="c8">
            <text:p>2026-04-16 13:45</text:p>
          </table:table-cell>
          <table:table-cell office:value-type="float" office:value="0.21489250000000001" table:style-name="c8">
            <text:p>0.21489</text:p>
          </table:table-cell>
          <table:table-cell office:value-type="float" office:value="-0.761225918290831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5:45</text:p>
          </table:table-cell>
          <table:table-cell office:value-type="float" office:value="0.218109" table:style-name="c8">
            <text:p>0.21811</text:p>
          </table:table-cell>
          <table:table-cell office:value-type="string" table:style-name="c8">
            <text:p>2026-04-16 16:15</text:p>
          </table:table-cell>
          <table:table-cell office:value-type="float" office:value="0.215892" table:style-name="c8">
            <text:p>0.21589</text:p>
          </table:table-cell>
          <table:table-cell office:value-type="float" office:value="-1.2143323329161126" table:style-name="c9">
            <text:p>-1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6 18:45</text:p>
          </table:table-cell>
          <table:table-cell office:value-type="float" office:value="0.22011" table:style-name="c8">
            <text:p>0.22011</text:p>
          </table:table-cell>
          <table:table-cell office:value-type="string" table:style-name="c8">
            <text:p>2026-04-16 19:15</text:p>
          </table:table-cell>
          <table:table-cell office:value-type="float" office:value="0.223888" table:style-name="c8">
            <text:p>0.22389</text:p>
          </table:table-cell>
          <table:table-cell office:value-type="float" office:value="1.513083407387228" table:style-name="c10">
            <text:p>+1.5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8:45</text:p>
          </table:table-cell>
          <table:table-cell office:value-type="float" office:value="0.214107" table:style-name="c8">
            <text:p>0.21411</text:p>
          </table:table-cell>
          <table:table-cell office:value-type="string" table:style-name="c8">
            <text:p>2026-04-17 09:15</text:p>
          </table:table-cell>
          <table:table-cell office:value-type="float" office:value="0.213893" table:style-name="c8">
            <text:p>0.2138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09:30</text:p>
          </table:table-cell>
          <table:table-cell office:value-type="float" office:value="0.216108" table:style-name="c8">
            <text:p>0.21611</text:p>
          </table:table-cell>
          <table:table-cell office:value-type="string" table:style-name="c8">
            <text:p>2026-04-17 10:00</text:p>
          </table:table-cell>
          <table:table-cell office:value-type="float" office:value="0.21489250000000001" table:style-name="c8">
            <text:p>0.21489</text:p>
          </table:table-cell>
          <table:table-cell office:value-type="float" office:value="-0.7612259182908421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7 14:00</text:p>
          </table:table-cell>
          <table:table-cell office:value-type="float" office:value="0.2231115" table:style-name="c8">
            <text:p>0.22311</text:p>
          </table:table-cell>
          <table:table-cell office:value-type="string" table:style-name="c8">
            <text:p>2026-04-17 14:30</text:p>
          </table:table-cell>
          <table:table-cell office:value-type="float" office:value="0.223888" table:style-name="c8">
            <text:p>0.22389</text:p>
          </table:table-cell>
          <table:table-cell office:value-type="float" office:value="0.14743654540445572" table:style-name="c10">
            <text:p>+0.1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18 06:00</text:p>
          </table:table-cell>
          <table:table-cell office:value-type="float" office:value="0.21510749999999998" table:style-name="c8">
            <text:p>0.21511</text:p>
          </table:table-cell>
          <table:table-cell office:value-type="string" table:style-name="c8">
            <text:p>2026-04-18 06:30</text:p>
          </table:table-cell>
          <table:table-cell office:value-type="float" office:value="0.215892" table:style-name="c8">
            <text:p>0.21589</text:p>
          </table:table-cell>
          <table:table-cell office:value-type="float" office:value="0.16407233220601114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19:30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4-28 20:00</text:p>
          </table:table-cell>
          <table:table-cell office:value-type="float" office:value="0.17991000000000001" table:style-name="c8">
            <text:p>0.17991</text:p>
          </table:table-cell>
          <table:table-cell office:value-type="float" office:value="0.2573349693868243" table:style-name="c10">
            <text:p>+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8 21:15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4-28 21:45</text:p>
          </table:table-cell>
          <table:table-cell office:value-type="float" office:value="0.177911" table:style-name="c8">
            <text:p>0.17791</text:p>
          </table:table-cell>
          <table:table-cell office:value-type="float" office:value="-0.8566354191619219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0:00</text:p>
          </table:table-cell>
          <table:table-cell office:value-type="float" office:value="0.17908949999999998" table:style-name="c8">
            <text:p>0.17909</text:p>
          </table:table-cell>
          <table:table-cell office:value-type="string" table:style-name="c8">
            <text:p>2026-04-29 00:30</text:p>
          </table:table-cell>
          <table:table-cell office:value-type="float" office:value="0.177911" table:style-name="c8">
            <text:p>0.17791</text:p>
          </table:table-cell>
          <table:table-cell office:value-type="float" office:value="-0.8566354191619108" table:style-name="c9">
            <text:p>-0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7:45</text:p>
          </table:table-cell>
          <table:table-cell office:value-type="float" office:value="0.18209099999999998" table:style-name="c8">
            <text:p>0.18209</text:p>
          </table:table-cell>
          <table:table-cell office:value-type="string" table:style-name="c8">
            <text:p>2026-04-29 08:15</text:p>
          </table:table-cell>
          <table:table-cell office:value-type="float" office:value="0.1809095" table:style-name="c8">
            <text:p>0.18091</text:p>
          </table:table-cell>
          <table:table-cell office:value-type="float" office:value="-0.8474543445310179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09:45</text:p>
          </table:table-cell>
          <table:table-cell office:value-type="float" office:value="0.18409199999999998" table:style-name="c8">
            <text:p>0.18409</text:p>
          </table:table-cell>
          <table:table-cell office:value-type="string" table:style-name="c8">
            <text:p>2026-04-29 10:15</text:p>
          </table:table-cell>
          <table:table-cell office:value-type="float" office:value="0.1869065" table:style-name="c8">
            <text:p>0.18691</text:p>
          </table:table-cell>
          <table:table-cell office:value-type="float" office:value="1.3258989562284107" table:style-name="c10">
            <text:p>+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10:30</text:p>
          </table:table-cell>
          <table:table-cell office:value-type="float" office:value="0.18609299999999998" table:style-name="c8">
            <text:p>0.18609</text:p>
          </table:table-cell>
          <table:table-cell office:value-type="string" table:style-name="c8">
            <text:p>2026-04-29 11:00</text:p>
          </table:table-cell>
          <table:table-cell office:value-type="float" office:value="0.18590700000000002" table:style-name="c8">
            <text:p>0.18591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29 21:00</text:p>
          </table:table-cell>
          <table:table-cell office:value-type="float" office:value="0.17808899999999997" table:style-name="c8">
            <text:p>0.17809</text:p>
          </table:table-cell>
          <table:table-cell office:value-type="string" table:style-name="c8">
            <text:p>2026-04-29 21:30</text:p>
          </table:table-cell>
          <table:table-cell office:value-type="float" office:value="0.177911" table:style-name="c8">
            <text:p>0.17791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02:00</text:p>
          </table:table-cell>
          <table:table-cell office:value-type="float" office:value="0.18209099999999998" table:style-name="c8">
            <text:p>0.18209</text:p>
          </table:table-cell>
          <table:table-cell office:value-type="string" table:style-name="c8">
            <text:p>2026-04-30 02:30</text:p>
          </table:table-cell>
          <table:table-cell office:value-type="float" office:value="0.1809095" table:style-name="c8">
            <text:p>0.18091</text:p>
          </table:table-cell>
          <table:table-cell office:value-type="float" office:value="-0.8474543445310068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03:30</text:p>
          </table:table-cell>
          <table:table-cell office:value-type="float" office:value="0.1850925" table:style-name="c8">
            <text:p>0.18509</text:p>
          </table:table-cell>
          <table:table-cell office:value-type="string" table:style-name="c8">
            <text:p>2026-04-30 04:00</text:p>
          </table:table-cell>
          <table:table-cell office:value-type="float" office:value="0.1849075" table:style-name="c8">
            <text:p>0.18491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04:15</text:p>
          </table:table-cell>
          <table:table-cell office:value-type="float" office:value="0.18409199999999998" table:style-name="c8">
            <text:p>0.18409</text:p>
          </table:table-cell>
          <table:table-cell office:value-type="string" table:style-name="c8">
            <text:p>2026-04-30 04:45</text:p>
          </table:table-cell>
          <table:table-cell office:value-type="float" office:value="0.18390800000000002" table:style-name="c8">
            <text:p>0.18391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4-30 16:00</text:p>
          </table:table-cell>
          <table:table-cell office:value-type="float" office:value="0.1890945" table:style-name="c8">
            <text:p>0.18909</text:p>
          </table:table-cell>
          <table:table-cell office:value-type="string" table:style-name="c8">
            <text:p>2026-04-30 16:30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-0.8271653030627601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01:00</text:p>
          </table:table-cell>
          <table:table-cell office:value-type="float" office:value="0.1850925" table:style-name="c8">
            <text:p>0.18509</text:p>
          </table:table-cell>
          <table:table-cell office:value-type="string" table:style-name="c8">
            <text:p>2026-05-01 01:30</text:p>
          </table:table-cell>
          <table:table-cell office:value-type="float" office:value="0.18590700000000002" table:style-name="c8">
            <text:p>0.18591</text:p>
          </table:table-cell>
          <table:table-cell office:value-type="float" office:value="0.2392705847076737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03:30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5-01 04:00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-1.349127590941357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2:00</text:p>
          </table:table-cell>
          <table:table-cell office:value-type="float" office:value="0.1870935" table:style-name="c8">
            <text:p>0.18709</text:p>
          </table:table-cell>
          <table:table-cell office:value-type="string" table:style-name="c8">
            <text:p>2026-05-01 12:30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0.2335067257815071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3:45</text:p>
          </table:table-cell>
          <table:table-cell office:value-type="float" office:value="0.18809399999999998" table:style-name="c8">
            <text:p>0.18809</text:p>
          </table:table-cell>
          <table:table-cell office:value-type="string" table:style-name="c8">
            <text:p>2026-05-01 14:1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0.760991793996646" table:style-name="c10">
            <text:p>+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5:30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01 16:00</text:p>
          </table:table-cell>
          <table:table-cell office:value-type="float" office:value="0.19390300000000002" table:style-name="c8">
            <text:p>0.1939</text:p>
          </table:table-cell>
          <table:table-cell office:value-type="float" office:value="0.21693189829956605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1 16:15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5-01 16:45</text:p>
          </table:table-cell>
          <table:table-cell office:value-type="float" office:value="0.1969015" table:style-name="c8">
            <text:p>0.1969</text:p>
          </table:table-cell>
          <table:table-cell office:value-type="float" office:value="0.2090250290671225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09:45</text:p>
          </table:table-cell>
          <table:table-cell office:value-type="float" office:value="0.1870935" table:style-name="c8">
            <text:p>0.18709</text:p>
          </table:table-cell>
          <table:table-cell office:value-type="string" table:style-name="c8">
            <text:p>2026-05-02 10:15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0.2335067257814849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13:1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5-02 13:45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-1.8656243051249022" table:style-name="c9">
            <text:p>-1.9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2 14:15</text:p>
          </table:table-cell>
          <table:table-cell office:value-type="float" office:value="0.1910955" table:style-name="c8">
            <text:p>0.1911</text:p>
          </table:table-cell>
          <table:table-cell office:value-type="string" table:style-name="c8">
            <text:p>2026-05-02 14:45</text:p>
          </table:table-cell>
          <table:table-cell office:value-type="float" office:value="0.19190400000000002" table:style-name="c8">
            <text:p>0.1919</text:p>
          </table:table-cell>
          <table:table-cell office:value-type="float" office:value="0.2223411351915727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14:00</text:p>
          </table:table-cell>
          <table:table-cell office:value-type="float" office:value="0.18809399999999998" table:style-name="c8">
            <text:p>0.18809</text:p>
          </table:table-cell>
          <table:table-cell office:value-type="string" table:style-name="c8">
            <text:p>2026-05-03 14:30</text:p>
          </table:table-cell>
          <table:table-cell office:value-type="float" office:value="0.1869065" table:style-name="c8">
            <text:p>0.18691</text:p>
          </table:table-cell>
          <table:table-cell office:value-type="float" office:value="-0.8299712343296406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14:45</text:p>
          </table:table-cell>
          <table:table-cell office:value-type="float" office:value="0.1890945" table:style-name="c8">
            <text:p>0.18909</text:p>
          </table:table-cell>
          <table:table-cell office:value-type="string" table:style-name="c8">
            <text:p>2026-05-03 15:15</text:p>
          </table:table-cell>
          <table:table-cell office:value-type="float" office:value="0.1869065" table:style-name="c8">
            <text:p>0.18691</text:p>
          </table:table-cell>
          <table:table-cell office:value-type="float" office:value="-1.3546803812379382" table:style-name="c9">
            <text:p>-1.4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0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5-03 21:15</text:p>
          </table:table-cell>
          <table:table-cell office:value-type="float" office:value="0.18790600000000002" table:style-name="c8">
            <text:p>0.18791</text:p>
          </table:table-cell>
          <table:table-cell office:value-type="float" office:value="-1.3491275909413458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3 22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5-03 23:1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1:45</text:p>
          </table:table-cell>
          <table:table-cell office:value-type="float" office:value="0.190095" table:style-name="c8">
            <text:p>0.19009</text:p>
          </table:table-cell>
          <table:table-cell office:value-type="string" table:style-name="c8">
            <text:p>2026-05-04 02:30</text:p>
          </table:table-cell>
          <table:table-cell office:value-type="float" office:value="0.1909045" table:style-name="c8">
            <text:p>0.1909</text:p>
          </table:table-cell>
          <table:table-cell office:value-type="float" office:value="0.225088458139355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09:30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5-04 10:00</text:p>
          </table:table-cell>
          <table:table-cell office:value-type="float" office:value="0.19390300000000002" table:style-name="c8">
            <text:p>0.1939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2:45</text:p>
          </table:table-cell>
          <table:table-cell office:value-type="float" office:value="0.192096" table:style-name="c8">
            <text:p>0.1921</text:p>
          </table:table-cell>
          <table:table-cell office:value-type="string" table:style-name="c8">
            <text:p>2026-05-04 13:15</text:p>
          </table:table-cell>
          <table:table-cell office:value-type="float" office:value="0.1909045" table:style-name="c8">
            <text:p>0.1909</text:p>
          </table:table-cell>
          <table:table-cell office:value-type="float" office:value="-0.8189228799662662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5:00</text:p>
          </table:table-cell>
          <table:table-cell office:value-type="float" office:value="0.192096" table:style-name="c8">
            <text:p>0.1921</text:p>
          </table:table-cell>
          <table:table-cell office:value-type="string" table:style-name="c8">
            <text:p>2026-05-04 15:30</text:p>
          </table:table-cell>
          <table:table-cell office:value-type="float" office:value="0.19190400000000002" table:style-name="c8">
            <text:p>0.191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4 17:45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04 18:15</text:p>
          </table:table-cell>
          <table:table-cell office:value-type="float" office:value="0.1929035" table:style-name="c8">
            <text:p>0.192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1:45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05 02:15</text:p>
          </table:table-cell>
          <table:table-cell office:value-type="float" office:value="0.1929035" table:style-name="c8">
            <text:p>0.192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3:15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05 03:45</text:p>
          </table:table-cell>
          <table:table-cell office:value-type="float" office:value="0.1929035" table:style-name="c8">
            <text:p>0.192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5:15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05 05:45</text:p>
          </table:table-cell>
          <table:table-cell office:value-type="float" office:value="0.1929035" table:style-name="c8">
            <text:p>0.1929</text:p>
          </table:table-cell>
          <table:table-cell office:value-type="float" office:value="-0.299650224887571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07:3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5-05 08:00</text:p>
          </table:table-cell>
          <table:table-cell office:value-type="float" office:value="0.19390300000000002" table:style-name="c8">
            <text:p>0.1939</text:p>
          </table:table-cell>
          <table:table-cell office:value-type="float" office:value="-0.8109340698881362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18:30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5-05 19:00</text:p>
          </table:table-cell>
          <table:table-cell office:value-type="float" office:value="0.1969015" table:style-name="c8">
            <text:p>0.1969</text:p>
          </table:table-cell>
          <table:table-cell office:value-type="float" office:value="0.209025029067100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5 21:15</text:p>
          </table:table-cell>
          <table:table-cell office:value-type="float" office:value="0.1990995" table:style-name="c8">
            <text:p>0.1991</text:p>
          </table:table-cell>
          <table:table-cell office:value-type="string" table:style-name="c8">
            <text:p>2026-05-05 21:45</text:p>
          </table:table-cell>
          <table:table-cell office:value-type="float" office:value="0.1989005" table:style-name="c8">
            <text:p>0.198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1:00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5-06 01:30</text:p>
          </table:table-cell>
          <table:table-cell office:value-type="float" office:value="0.2048975" table:style-name="c8">
            <text:p>0.2049</text:p>
          </table:table-cell>
          <table:table-cell office:value-type="float" office:value="1.181048039099264" table:style-name="c10">
            <text:p>+1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2:00</text:p>
          </table:table-cell>
          <table:table-cell office:value-type="float" office:value="0.21110549999999997" table:style-name="c8">
            <text:p>0.21111</text:p>
          </table:table-cell>
          <table:table-cell office:value-type="string" table:style-name="c8">
            <text:p>2026-05-06 02:30</text:p>
          </table:table-cell>
          <table:table-cell office:value-type="float" office:value="0.211894" table:style-name="c8">
            <text:p>0.21189</text:p>
          </table:table-cell>
          <table:table-cell office:value-type="float" office:value="0.1728632811556663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2:45</text:p>
          </table:table-cell>
          <table:table-cell office:value-type="float" office:value="0.214107" table:style-name="c8">
            <text:p>0.21411</text:p>
          </table:table-cell>
          <table:table-cell office:value-type="string" table:style-name="c8">
            <text:p>2026-05-06 03:15</text:p>
          </table:table-cell>
          <table:table-cell office:value-type="float" office:value="0.2108945" table:style-name="c8">
            <text:p>0.21089</text:p>
          </table:table-cell>
          <table:table-cell office:value-type="float" office:value="-1.6973186796788386" table:style-name="c9">
            <text:p>-1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6 05:15</text:p>
          </table:table-cell>
          <table:table-cell office:value-type="float" office:value="0.23811899999999997" table:style-name="c8">
            <text:p>0.23812</text:p>
          </table:table-cell>
          <table:table-cell office:value-type="string" table:style-name="c8">
            <text:p>2026-05-06 05:45</text:p>
          </table:table-cell>
          <table:table-cell office:value-type="float" office:value="0.2408795" table:style-name="c8">
            <text:p>0.24088</text:p>
          </table:table-cell>
          <table:table-cell office:value-type="float" office:value="0.9570768731181012" table:style-name="c10">
            <text:p>+1.0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6:00</text:p>
          </table:table-cell>
          <table:table-cell office:value-type="float" office:value="0.2231115" table:style-name="c8">
            <text:p>0.22311</text:p>
          </table:table-cell>
          <table:table-cell office:value-type="string" table:style-name="c8">
            <text:p>2026-05-08 16:30</text:p>
          </table:table-cell>
          <table:table-cell office:value-type="float" office:value="0.22288850000000002" table:style-name="c8">
            <text:p>0.22289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8 18:15</text:p>
          </table:table-cell>
          <table:table-cell office:value-type="float" office:value="0.2251125" table:style-name="c8">
            <text:p>0.22511</text:p>
          </table:table-cell>
          <table:table-cell office:value-type="string" table:style-name="c8">
            <text:p>2026-05-08 18:45</text:p>
          </table:table-cell>
          <table:table-cell office:value-type="float" office:value="0.22488750000000002" table:style-name="c8">
            <text:p>0.2248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2:30</text:p>
          </table:table-cell>
          <table:table-cell office:value-type="float" office:value="0.2291145" table:style-name="c8">
            <text:p>0.22911</text:p>
          </table:table-cell>
          <table:table-cell office:value-type="string" table:style-name="c8">
            <text:p>2026-05-09 03:00</text:p>
          </table:table-cell>
          <table:table-cell office:value-type="float" office:value="0.22988500000000003" table:style-name="c8">
            <text:p>0.22989</text:p>
          </table:table-cell>
          <table:table-cell office:value-type="float" office:value="0.13572248155397926" table:style-name="c10">
            <text:p>+0.1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04:15</text:p>
          </table:table-cell>
          <table:table-cell office:value-type="float" office:value="0.2331165" table:style-name="c8">
            <text:p>0.23312</text:p>
          </table:table-cell>
          <table:table-cell office:value-type="string" table:style-name="c8">
            <text:p>2026-05-09 04:45</text:p>
          </table:table-cell>
          <table:table-cell office:value-type="float" office:value="0.22888550000000002" table:style-name="c8">
            <text:p>0.22889</text:p>
          </table:table-cell>
          <table:table-cell office:value-type="float" office:value="-2.0112442124431307" table:style-name="c9">
            <text:p>-2.0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2:30</text:p>
          </table:table-cell>
          <table:table-cell office:value-type="float" office:value="0.2291145" table:style-name="c8">
            <text:p>0.22911</text:p>
          </table:table-cell>
          <table:table-cell office:value-type="string" table:style-name="c8">
            <text:p>2026-05-09 13:00</text:p>
          </table:table-cell>
          <table:table-cell office:value-type="float" office:value="0.22888550000000002" table:style-name="c8">
            <text:p>0.2288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7:45</text:p>
          </table:table-cell>
          <table:table-cell office:value-type="float" office:value="0.22611299999999998" table:style-name="c8">
            <text:p>0.22611</text:p>
          </table:table-cell>
          <table:table-cell office:value-type="string" table:style-name="c8">
            <text:p>2026-05-09 18:15</text:p>
          </table:table-cell>
          <table:table-cell office:value-type="float" office:value="0.223888" table:style-name="c8">
            <text:p>0.22389</text:p>
          </table:table-cell>
          <table:table-cell office:value-type="float" office:value="-1.1819542051982657" table:style-name="c9">
            <text:p>-1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09 18:45</text:p>
          </table:table-cell>
          <table:table-cell office:value-type="float" office:value="0.22611299999999998" table:style-name="c8">
            <text:p>0.22611</text:p>
          </table:table-cell>
          <table:table-cell office:value-type="string" table:style-name="c8">
            <text:p>2026-05-09 19:15</text:p>
          </table:table-cell>
          <table:table-cell office:value-type="float" office:value="0.22488750000000002" table:style-name="c8">
            <text:p>0.22489</text:p>
          </table:table-cell>
          <table:table-cell office:value-type="float" office:value="-0.7408022150428906" table:style-name="c9">
            <text:p>-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0:30</text:p>
          </table:table-cell>
          <table:table-cell office:value-type="float" office:value="0.2251125" table:style-name="c8">
            <text:p>0.22511</text:p>
          </table:table-cell>
          <table:table-cell office:value-type="string" table:style-name="c8">
            <text:p>2026-05-10 01:00</text:p>
          </table:table-cell>
          <table:table-cell office:value-type="float" office:value="0.22288850000000002" table:style-name="c8">
            <text:p>0.22289</text:p>
          </table:table-cell>
          <table:table-cell office:value-type="float" office:value="-1.1858755562218826" table:style-name="c9">
            <text:p>-1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08:15</text:p>
          </table:table-cell>
          <table:table-cell office:value-type="float" office:value="0.224112" table:style-name="c8">
            <text:p>0.22411</text:p>
          </table:table-cell>
          <table:table-cell office:value-type="string" table:style-name="c8">
            <text:p>2026-05-10 08:45</text:p>
          </table:table-cell>
          <table:table-cell office:value-type="float" office:value="0.22588700000000003" table:style-name="c8">
            <text:p>0.22589</text:p>
          </table:table-cell>
          <table:table-cell office:value-type="float" office:value="0.5905314695330954" table:style-name="c10">
            <text:p>+0.6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0 19:00</text:p>
          </table:table-cell>
          <table:table-cell office:value-type="float" office:value="0.23811899999999997" table:style-name="c8">
            <text:p>0.23812</text:p>
          </table:table-cell>
          <table:table-cell office:value-type="string" table:style-name="c8">
            <text:p>2026-05-10 19:30</text:p>
          </table:table-cell>
          <table:table-cell office:value-type="float" office:value="0.237881" table:style-name="c8">
            <text:p>0.23788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1:30</text:p>
          </table:table-cell>
          <table:table-cell office:value-type="float" office:value="0.22811399999999998" table:style-name="c8">
            <text:p>0.22811</text:p>
          </table:table-cell>
          <table:table-cell office:value-type="string" table:style-name="c8">
            <text:p>2026-05-11 12:00</text:p>
          </table:table-cell>
          <table:table-cell office:value-type="float" office:value="0.22788600000000003" table:style-name="c8">
            <text:p>0.22789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11 13:15</text:p>
          </table:table-cell>
          <table:table-cell office:value-type="float" office:value="0.230115" table:style-name="c8">
            <text:p>0.23011</text:p>
          </table:table-cell>
          <table:table-cell office:value-type="string" table:style-name="c8">
            <text:p>2026-05-11 13:45</text:p>
          </table:table-cell>
          <table:table-cell office:value-type="float" office:value="0.22888550000000002" table:style-name="c8">
            <text:p>0.22889</text:p>
          </table:table-cell>
          <table:table-cell office:value-type="float" office:value="-0.7331300065184676" table:style-name="c9">
            <text:p>-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4:45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5-20 15:15</text:p>
          </table:table-cell>
          <table:table-cell office:value-type="float" office:value="0.1949025" table:style-name="c8">
            <text:p>0.1949</text:p>
          </table:table-cell>
          <table:table-cell office:value-type="float" office:value="0.21426910385016207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0 15:3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5-20 16:0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7:45</text:p>
          </table:table-cell>
          <table:table-cell office:value-type="float" office:value="0.1990995" table:style-name="c8">
            <text:p>0.1991</text:p>
          </table:table-cell>
          <table:table-cell office:value-type="string" table:style-name="c8">
            <text:p>2026-05-21 18:15</text:p>
          </table:table-cell>
          <table:table-cell office:value-type="float" office:value="0.20089950000000004" table:style-name="c8">
            <text:p>0.2009</text:p>
          </table:table-cell>
          <table:table-cell office:value-type="float" office:value="0.7023633406914698" table:style-name="c10">
            <text:p>+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1 19:00</text:p>
          </table:table-cell>
          <table:table-cell office:value-type="float" office:value="0.1990995" table:style-name="c8">
            <text:p>0.1991</text:p>
          </table:table-cell>
          <table:table-cell office:value-type="string" table:style-name="c8">
            <text:p>2026-05-21 19:30</text:p>
          </table:table-cell>
          <table:table-cell office:value-type="float" office:value="0.1989005" table:style-name="c8">
            <text:p>0.198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2:45</text:p>
          </table:table-cell>
          <table:table-cell office:value-type="float" office:value="0.2011005" table:style-name="c8">
            <text:p>0.2011</text:p>
          </table:table-cell>
          <table:table-cell office:value-type="string" table:style-name="c8">
            <text:p>2026-05-22 03:15</text:p>
          </table:table-cell>
          <table:table-cell office:value-type="float" office:value="0.19990000000000002" table:style-name="c8">
            <text:p>0.1999</text:p>
          </table:table-cell>
          <table:table-cell office:value-type="float" office:value="-0.7956718655597328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2 05:30</text:p>
          </table:table-cell>
          <table:table-cell office:value-type="float" office:value="0.202101" table:style-name="c8">
            <text:p>0.2021</text:p>
          </table:table-cell>
          <table:table-cell office:value-type="string" table:style-name="c8">
            <text:p>2026-05-22 06:00</text:p>
          </table:table-cell>
          <table:table-cell office:value-type="float" office:value="0.20089950000000004" table:style-name="c8">
            <text:p>0.2009</text:p>
          </table:table-cell>
          <table:table-cell office:value-type="float" office:value="-0.7932163128831493" table:style-name="c9">
            <text:p>-0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4:00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25 14:30</text:p>
          </table:table-cell>
          <table:table-cell office:value-type="float" office:value="0.1949025" table:style-name="c8">
            <text:p>0.1949</text:p>
          </table:table-cell>
          <table:table-cell office:value-type="float" office:value="0.7335140214866698" table:style-name="c10">
            <text:p>+0.7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5 16:15</text:p>
          </table:table-cell>
          <table:table-cell office:value-type="float" office:value="0.1990995" table:style-name="c8">
            <text:p>0.1991</text:p>
          </table:table-cell>
          <table:table-cell office:value-type="string" table:style-name="c8">
            <text:p>2026-05-25 16:45</text:p>
          </table:table-cell>
          <table:table-cell office:value-type="float" office:value="0.1989005" table:style-name="c8">
            <text:p>0.1989</text:p>
          </table:table-cell>
          <table:table-cell office:value-type="float" office:value="-0.2996502248875488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5:30</text:p>
          </table:table-cell>
          <table:table-cell office:value-type="float" office:value="0.1930965" table:style-name="c8">
            <text:p>0.1931</text:p>
          </table:table-cell>
          <table:table-cell office:value-type="string" table:style-name="c8">
            <text:p>2026-05-26 06:00</text:p>
          </table:table-cell>
          <table:table-cell office:value-type="float" office:value="0.19390300000000002" table:style-name="c8">
            <text:p>0.1939</text:p>
          </table:table-cell>
          <table:table-cell office:value-type="float" office:value="0.21693189829956605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7:00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5-26 07:30</text:p>
          </table:table-cell>
          <table:table-cell office:value-type="float" office:value="0.1929035" table:style-name="c8">
            <text:p>0.1929</text:p>
          </table:table-cell>
          <table:table-cell office:value-type="float" office:value="-1.8256759867515182" table:style-name="c9">
            <text:p>-1.8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08:15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5-26 08:45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6 10:30</text:p>
          </table:table-cell>
          <table:table-cell office:value-type="float" office:value="0.198099" table:style-name="c8">
            <text:p>0.1981</text:p>
          </table:table-cell>
          <table:table-cell office:value-type="string" table:style-name="c8">
            <text:p>2026-05-26 11:00</text:p>
          </table:table-cell>
          <table:table-cell office:value-type="float" office:value="0.19790100000000002" table:style-name="c8">
            <text:p>0.197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06:15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5-27 06:45</text:p>
          </table:table-cell>
          <table:table-cell office:value-type="float" office:value="0.1949025" table:style-name="c8">
            <text:p>0.1949</text:p>
          </table:table-cell>
          <table:table-cell office:value-type="float" office:value="0.21426910385013986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12:30</text:p>
          </table:table-cell>
          <table:table-cell office:value-type="float" office:value="0.196098" table:style-name="c8">
            <text:p>0.1961</text:p>
          </table:table-cell>
          <table:table-cell office:value-type="string" table:style-name="c8">
            <text:p>2026-05-27 13:00</text:p>
          </table:table-cell>
          <table:table-cell office:value-type="float" office:value="0.19590200000000002" table:style-name="c8">
            <text:p>0.1959</text:p>
          </table:table-cell>
          <table:table-cell office:value-type="float" office:value="-0.2996502248875599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27 15:30</text:p>
          </table:table-cell>
          <table:table-cell office:value-type="float" office:value="0.1950975" table:style-name="c8">
            <text:p>0.1951</text:p>
          </table:table-cell>
          <table:table-cell office:value-type="string" table:style-name="c8">
            <text:p>2026-05-27 16:00</text:p>
          </table:table-cell>
          <table:table-cell office:value-type="float" office:value="0.1949025" table:style-name="c8">
            <text:p>0.1949</text:p>
          </table:table-cell>
          <table:table-cell office:value-type="float" office:value="-0.2996502248875377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1:15</text:p>
          </table:table-cell>
          <table:table-cell office:value-type="float" office:value="0.1890945" table:style-name="c8">
            <text:p>0.18909</text:p>
          </table:table-cell>
          <table:table-cell office:value-type="string" table:style-name="c8">
            <text:p>2026-05-30 01:45</text:p>
          </table:table-cell>
          <table:table-cell office:value-type="float" office:value="0.18990500000000002" table:style-name="c8">
            <text:p>0.18991</text:p>
          </table:table-cell>
          <table:table-cell office:value-type="float" office:value="0.2278648532876515" table:style-name="c10">
            <text:p>+0.2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0 03:15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5-30 03:45</text:p>
          </table:table-cell>
          <table:table-cell office:value-type="float" office:value="0.19190400000000002" table:style-name="c8">
            <text:p>0.1919</text:p>
          </table:table-cell>
          <table:table-cell office:value-type="float" office:value="-1.327488882362926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5-31 03:45</text:p>
          </table:table-cell>
          <table:table-cell office:value-type="float" office:value="0.192096" table:style-name="c8">
            <text:p>0.1921</text:p>
          </table:table-cell>
          <table:table-cell office:value-type="string" table:style-name="c8">
            <text:p>2026-05-31 04:15</text:p>
          </table:table-cell>
          <table:table-cell office:value-type="float" office:value="0.19190400000000002" table:style-name="c8">
            <text:p>0.1919</text:p>
          </table:table-cell>
          <table:table-cell office:value-type="float" office:value="-0.2996502248875266" table:style-name="c9">
            <text:p>-0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0:45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6-01 01:15</text:p>
          </table:table-cell>
          <table:table-cell office:value-type="float" office:value="0.19190400000000002" table:style-name="c8">
            <text:p>0.1919</text:p>
          </table:table-cell>
          <table:table-cell office:value-type="float" office:value="-1.3274888823629372" table:style-name="c9">
            <text:p>-1.3</text:p>
          </table:table-cell>
        </table:table-row>
        <table:table-row>
          <table:table-cell office:value-type="string" table:style-name="c7">
            <text:p>WIF/USDT</text:p>
          </table:table-cell>
          <table:table-cell office:value-type="string" table:style-name="c8">
            <text:p>LONG</text:p>
          </table:table-cell>
          <table:table-cell office:value-type="string" table:style-name="c8">
            <text:p>2026-06-01 03:00</text:p>
          </table:table-cell>
          <table:table-cell office:value-type="float" office:value="0.194097" table:style-name="c8">
            <text:p>0.1941</text:p>
          </table:table-cell>
          <table:table-cell office:value-type="string" table:style-name="c8">
            <text:p>2026-06-01 03:30</text:p>
          </table:table-cell>
          <table:table-cell office:value-type="float" office:value="0.1949025" table:style-name="c8">
            <text:p>0.1949</text:p>
          </table:table-cell>
          <table:table-cell office:value-type="float" office:value="0.21426910385013986" table:style-name="c10">
            <text:p>+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00</text:p>
          </table:table-cell>
          <table:table-cell office:value-type="float" office:value="1.4043017999999998" table:style-name="c1">
            <text:p>1.4043</text:p>
          </table:table-cell>
          <table:table-cell office:value-type="string" table:style-name="c1">
            <text:p>2026-03-04 09:30</text:p>
          </table:table-cell>
          <table:table-cell office:value-type="float" office:value="1.4108942" table:style-name="c1">
            <text:p>1.4109</text:p>
          </table:table-cell>
          <table:table-cell office:value-type="float" office:value="0.26860483225188414" table:style-name="c11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09:45</text:p>
          </table:table-cell>
          <table:table-cell office:value-type="float" office:value="1.41880905" table:style-name="c1">
            <text:p>1.4188</text:p>
          </table:table-cell>
          <table:table-cell office:value-type="string" table:style-name="c1">
            <text:p>2026-03-04 10:15</text:p>
          </table:table-cell>
          <table:table-cell office:value-type="float" office:value="1.41739095" table:style-name="c1">
            <text:p>1.417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5:15</text:p>
          </table:table-cell>
          <table:table-cell office:value-type="float" office:value="1.4184088499999998" table:style-name="c1">
            <text:p>1.4184</text:p>
          </table:table-cell>
          <table:table-cell office:value-type="string" table:style-name="c1">
            <text:p>2026-03-04 15:45</text:p>
          </table:table-cell>
          <table:table-cell office:value-type="float" office:value="1.44317805" table:style-name="c1">
            <text:p>1.4432</text:p>
          </table:table-cell>
          <table:table-cell office:value-type="float" office:value="1.5428758131373899" table:style-name="c11">
            <text:p>+1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4 19:45</text:p>
          </table:table-cell>
          <table:table-cell office:value-type="float" office:value="1.4697345" table:style-name="c1">
            <text:p>1.4697</text:p>
          </table:table-cell>
          <table:table-cell office:value-type="string" table:style-name="c1">
            <text:p>2026-03-04 20:15</text:p>
          </table:table-cell>
          <table:table-cell office:value-type="float" office:value="1.45517205" table:style-name="c1">
            <text:p>1.4552</text:p>
          </table:table-cell>
          <table:table-cell office:value-type="float" office:value="-1.1887411588929808" table:style-name="c12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1.44862395" table:style-name="c1">
            <text:p>1.4486</text:p>
          </table:table-cell>
          <table:table-cell office:value-type="string" table:style-name="c1">
            <text:p>2026-03-05 11:30</text:p>
          </table:table-cell>
          <table:table-cell office:value-type="float" office:value="1.4448772" table:style-name="c1">
            <text:p>1.4449</text:p>
          </table:table-cell>
          <table:table-cell office:value-type="float" office:value="-0.4580249776209855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1.4084038499999998" table:style-name="c1">
            <text:p>1.4084</text:p>
          </table:table-cell>
          <table:table-cell office:value-type="string" table:style-name="c1">
            <text:p>2026-03-06 08:30</text:p>
          </table:table-cell>
          <table:table-cell office:value-type="float" office:value="1.40219855" table:style-name="c1">
            <text:p>1.4022</text:p>
          </table:table-cell>
          <table:table-cell office:value-type="float" office:value="-0.6396102155961758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1.40800365" table:style-name="c1">
            <text:p>1.408</text:p>
          </table:table-cell>
          <table:table-cell office:value-type="string" table:style-name="c1">
            <text:p>2026-03-10 09:15</text:p>
          </table:table-cell>
          <table:table-cell office:value-type="float" office:value="1.405297" table:style-name="c1">
            <text:p>1.4053</text:p>
          </table:table-cell>
          <table:table-cell office:value-type="float" office:value="-0.3917488923412926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1.4191092" table:style-name="c1">
            <text:p>1.4191</text:p>
          </table:table-cell>
          <table:table-cell office:value-type="string" table:style-name="c1">
            <text:p>2026-03-10 15:15</text:p>
          </table:table-cell>
          <table:table-cell office:value-type="float" office:value="1.42638645" table:style-name="c1">
            <text:p>1.4264</text:p>
          </table:table-cell>
          <table:table-cell office:value-type="float" office:value="0.3118789932762045" table:style-name="c11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3992993" table:style-name="c1">
            <text:p>1.3993</text:p>
          </table:table-cell>
          <table:table-cell office:value-type="string" table:style-name="c1">
            <text:p>2026-03-11 14:15</text:p>
          </table:table-cell>
          <table:table-cell office:value-type="float" office:value="1.3905044" table:style-name="c1">
            <text:p>1.3905</text:p>
          </table:table-cell>
          <table:table-cell office:value-type="float" office:value="-0.8271653030627601" table:style-name="c12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6:00</text:p>
          </table:table-cell>
          <table:table-cell office:value-type="float" office:value="1.4241116999999999" table:style-name="c1">
            <text:p>1.4241</text:p>
          </table:table-cell>
          <table:table-cell office:value-type="string" table:style-name="c1">
            <text:p>2026-03-13 06:30</text:p>
          </table:table-cell>
          <table:table-cell office:value-type="float" office:value="1.4123934500000002" table:style-name="c1">
            <text:p>1.4124</text:p>
          </table:table-cell>
          <table:table-cell office:value-type="float" office:value="-1.0211014000200858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1.4309150999999998" table:style-name="c1">
            <text:p>1.4309</text:p>
          </table:table-cell>
          <table:table-cell office:value-type="string" table:style-name="c1">
            <text:p>2026-03-13 09:15</text:p>
          </table:table-cell>
          <table:table-cell office:value-type="float" office:value="1.4330831" table:style-name="c1">
            <text:p>1.4331</text:p>
          </table:table-cell>
          <table:table-cell office:value-type="float" office:value="-0.0486914364730584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.43861895" table:style-name="c1">
            <text:p>1.4386</text:p>
          </table:table-cell>
          <table:table-cell office:value-type="string" table:style-name="c1">
            <text:p>2026-03-13 14:00</text:p>
          </table:table-cell>
          <table:table-cell office:value-type="float" office:value="1.44297815" table:style-name="c1">
            <text:p>1.443</text:p>
          </table:table-cell>
          <table:table-cell office:value-type="float" office:value="0.10250710781685157" table:style-name="c11">
            <text:p>+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5 02:45</text:p>
          </table:table-cell>
          <table:table-cell office:value-type="float" office:value="1.41699115" table:style-name="c1">
            <text:p>1.417</text:p>
          </table:table-cell>
          <table:table-cell office:value-type="float" office:value="-0.13058300277188906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3:00</text:p>
          </table:table-cell>
          <table:table-cell office:value-type="float" office:value="1.4245119" table:style-name="c1">
            <text:p>1.4245</text:p>
          </table:table-cell>
          <table:table-cell office:value-type="string" table:style-name="c1">
            <text:p>2026-03-15 13:30</text:p>
          </table:table-cell>
          <table:table-cell office:value-type="float" office:value="1.4230881" table:style-name="c1">
            <text:p>1.423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1.42801365" table:style-name="c1">
            <text:p>1.428</text:p>
          </table:table-cell>
          <table:table-cell office:value-type="string" table:style-name="c1">
            <text:p>2026-03-15 22:30</text:p>
          </table:table-cell>
          <table:table-cell office:value-type="float" office:value="1.4286853000000002" table:style-name="c1">
            <text:p>1.4287</text:p>
          </table:table-cell>
          <table:table-cell office:value-type="float" office:value="-0.15296015655730244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4523258" table:style-name="c1">
            <text:p>1.4523</text:p>
          </table:table-cell>
          <table:table-cell office:value-type="string" table:style-name="c1">
            <text:p>2026-03-15 23:15</text:p>
          </table:table-cell>
          <table:table-cell office:value-type="float" office:value="1.4496748" table:style-name="c1">
            <text:p>1.4497</text:p>
          </table:table-cell>
          <table:table-cell office:value-type="float" office:value="-0.3820699133210925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4711351999999998" table:style-name="c1">
            <text:p>1.4711</text:p>
          </table:table-cell>
          <table:table-cell office:value-type="string" table:style-name="c1">
            <text:p>2026-03-16 04:15</text:p>
          </table:table-cell>
          <table:table-cell office:value-type="float" office:value="1.47376275" table:style-name="c1">
            <text:p>1.4738</text:p>
          </table:table-cell>
          <table:table-cell office:value-type="float" office:value="-0.02165006569416761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1.4852422499999998" table:style-name="c1">
            <text:p>1.4852</text:p>
          </table:table-cell>
          <table:table-cell office:value-type="string" table:style-name="c1">
            <text:p>2026-03-16 14:15</text:p>
          </table:table-cell>
          <table:table-cell office:value-type="float" office:value="1.48735595" table:style-name="c1">
            <text:p>1.4874</text:p>
          </table:table-cell>
          <table:table-cell office:value-type="float" office:value="-0.0578710001045035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1.51005465" table:style-name="c1">
            <text:p>1.5101</text:p>
          </table:table-cell>
          <table:table-cell office:value-type="string" table:style-name="c1">
            <text:p>2026-03-16 15:30</text:p>
          </table:table-cell>
          <table:table-cell office:value-type="float" office:value="1.5102445" table:style-name="c1">
            <text:p>1.5102</text:p>
          </table:table-cell>
          <table:table-cell office:value-type="float" office:value="-0.1873527395515051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30</text:p>
          </table:table-cell>
          <table:table-cell office:value-type="float" office:value="1.54227075" table:style-name="c1">
            <text:p>1.5423</text:p>
          </table:table-cell>
          <table:table-cell office:value-type="string" table:style-name="c1">
            <text:p>2026-03-16 19:00</text:p>
          </table:table-cell>
          <table:table-cell office:value-type="float" office:value="1.5348322" table:style-name="c1">
            <text:p>1.5348</text:p>
          </table:table-cell>
          <table:table-cell office:value-type="float" office:value="-0.6812474118308876" table:style-name="c12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1.5521756999999998" table:style-name="c1">
            <text:p>1.5522</text:p>
          </table:table-cell>
          <table:table-cell office:value-type="string" table:style-name="c1">
            <text:p>2026-03-16 23:30</text:p>
          </table:table-cell>
          <table:table-cell office:value-type="float" office:value="1.5458267" table:style-name="c1">
            <text:p>1.5458</text:p>
          </table:table-cell>
          <table:table-cell office:value-type="float" office:value="-0.6081210763252853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1:15</text:p>
          </table:table-cell>
          <table:table-cell office:value-type="float" office:value="1.56568245" table:style-name="c1">
            <text:p>1.5657</text:p>
          </table:table-cell>
          <table:table-cell office:value-type="string" table:style-name="c1">
            <text:p>2026-03-17 01:45</text:p>
          </table:table-cell>
          <table:table-cell office:value-type="float" office:value="1.5644174" table:style-name="c1">
            <text:p>1.5644</text:p>
          </table:table-cell>
          <table:table-cell office:value-type="float" office:value="-0.2805371154668057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30</text:p>
          </table:table-cell>
          <table:table-cell office:value-type="float" office:value="1.4230111499999998" table:style-name="c1">
            <text:p>1.423</text:p>
          </table:table-cell>
          <table:table-cell office:value-type="string" table:style-name="c1">
            <text:p>2026-03-24 08:00</text:p>
          </table:table-cell>
          <table:table-cell office:value-type="float" office:value="1.4304844" table:style-name="c1">
            <text:p>1.4305</text:p>
          </table:table-cell>
          <table:table-cell office:value-type="float" office:value="0.32422175219080085" table:style-name="c11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30</text:p>
          </table:table-cell>
          <table:table-cell office:value-type="float" office:value="1.4221107" table:style-name="c1">
            <text:p>1.4221</text:p>
          </table:table-cell>
          <table:table-cell office:value-type="string" table:style-name="c1">
            <text:p>2026-03-25 06:00</text:p>
          </table:table-cell>
          <table:table-cell office:value-type="float" office:value="1.4168912" table:style-name="c1">
            <text:p>1.4169</text:p>
          </table:table-cell>
          <table:table-cell office:value-type="float" office:value="-0.5661911909389139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15</text:p>
          </table:table-cell>
          <table:table-cell office:value-type="float" office:value="1.4317155" table:style-name="c1">
            <text:p>1.4317</text:p>
          </table:table-cell>
          <table:table-cell office:value-type="string" table:style-name="c1">
            <text:p>2026-03-25 11:45</text:p>
          </table:table-cell>
          <table:table-cell office:value-type="float" office:value="1.43098415" table:style-name="c1">
            <text:p>1.431</text:p>
          </table:table-cell>
          <table:table-cell office:value-type="float" office:value="-0.2508799629430625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1.3448721" table:style-name="c1">
            <text:p>1.3449</text:p>
          </table:table-cell>
          <table:table-cell office:value-type="string" table:style-name="c1">
            <text:p>2026-04-06 02:45</text:p>
          </table:table-cell>
          <table:table-cell office:value-type="float" office:value="1.3399297000000001" table:style-name="c1">
            <text:p>1.3399</text:p>
          </table:table-cell>
          <table:table-cell office:value-type="float" office:value="-0.5666649988723682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1.3532762999999999" table:style-name="c1">
            <text:p>1.3533</text:p>
          </table:table-cell>
          <table:table-cell office:value-type="string" table:style-name="c1">
            <text:p>2026-04-06 10:00</text:p>
          </table:table-cell>
          <table:table-cell office:value-type="float" office:value="1.3519237000000002" table:style-name="c1">
            <text:p>1.3519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9:00</text:p>
          </table:table-cell>
          <table:table-cell office:value-type="float" office:value="1.3202598" table:style-name="c1">
            <text:p>1.3203</text:p>
          </table:table-cell>
          <table:table-cell office:value-type="string" table:style-name="c1">
            <text:p>2026-04-07 09:30</text:p>
          </table:table-cell>
          <table:table-cell office:value-type="float" office:value="1.31884025" table:style-name="c1">
            <text:p>1.3188</text:p>
          </table:table-cell>
          <table:table-cell office:value-type="float" office:value="-0.3072055711875743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7 23:30</text:p>
          </table:table-cell>
          <table:table-cell office:value-type="float" office:value="1.39540195" table:style-name="c1">
            <text:p>1.3954</text:p>
          </table:table-cell>
          <table:table-cell office:value-type="float" office:value="1.3334728603920265" table:style-name="c11">
            <text:p>+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45</text:p>
          </table:table-cell>
          <table:table-cell office:value-type="float" office:value="1.3858925999999998" table:style-name="c1">
            <text:p>1.3859</text:p>
          </table:table-cell>
          <table:table-cell office:value-type="string" table:style-name="c1">
            <text:p>2026-04-08 00:15</text:p>
          </table:table-cell>
          <table:table-cell office:value-type="float" office:value="1.3744124500000001" table:style-name="c1">
            <text:p>1.3744</text:p>
          </table:table-cell>
          <table:table-cell office:value-type="float" office:value="-1.0266019522400027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4-11 19:15</text:p>
          </table:table-cell>
          <table:table-cell office:value-type="float" office:value="1.36701615" table:style-name="c1">
            <text:p>1.367</text:p>
          </table:table-cell>
          <table:table-cell office:value-type="float" office:value="-0.029202062007860352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1.3722857999999998" table:style-name="c1">
            <text:p>1.3723</text:p>
          </table:table-cell>
          <table:table-cell office:value-type="string" table:style-name="c1">
            <text:p>2026-04-13 23:00</text:p>
          </table:table-cell>
          <table:table-cell office:value-type="float" office:value="1.37401265" table:style-name="c1">
            <text:p>1.374</text:p>
          </table:table-cell>
          <table:table-cell office:value-type="float" office:value="-0.07431405960404147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1.3806899999999998" table:style-name="c1">
            <text:p>1.3807</text:p>
          </table:table-cell>
          <table:table-cell office:value-type="string" table:style-name="c1">
            <text:p>2026-04-14 00:00</text:p>
          </table:table-cell>
          <table:table-cell office:value-type="float" office:value="1.37501215" table:style-name="c1">
            <text:p>1.375</text:p>
          </table:table-cell>
          <table:table-cell office:value-type="float" office:value="-0.6103107350563519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4 14:30</text:p>
          </table:table-cell>
          <table:table-cell office:value-type="float" office:value="1.3875059" table:style-name="c1">
            <text:p>1.3875</text:p>
          </table:table-cell>
          <table:table-cell office:value-type="float" office:value="-0.6217953918208341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1.3641817499999997" table:style-name="c1">
            <text:p>1.3642</text:p>
          </table:table-cell>
          <table:table-cell office:value-type="string" table:style-name="c1">
            <text:p>2026-04-15 12:30</text:p>
          </table:table-cell>
          <table:table-cell office:value-type="float" office:value="1.36121905" table:style-name="c1">
            <text:p>1.3612</text:p>
          </table:table-cell>
          <table:table-cell office:value-type="float" office:value="-0.41664366796796415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1.37518725" table:style-name="c1">
            <text:p>1.3752</text:p>
          </table:table-cell>
          <table:table-cell office:value-type="string" table:style-name="c1">
            <text:p>2026-04-15 15:00</text:p>
          </table:table-cell>
          <table:table-cell office:value-type="float" office:value="1.3758117500000002" table:style-name="c1">
            <text:p>1.3758</text:p>
          </table:table-cell>
          <table:table-cell office:value-type="float" office:value="-0.15457878105326062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1.4024008499999998" table:style-name="c1">
            <text:p>1.4024</text:p>
          </table:table-cell>
          <table:table-cell office:value-type="string" table:style-name="c1">
            <text:p>2026-04-15 20:15</text:p>
          </table:table-cell>
          <table:table-cell office:value-type="float" office:value="1.3913039999999999" table:style-name="c1">
            <text:p>1.3913</text:p>
          </table:table-cell>
          <table:table-cell office:value-type="float" office:value="-0.9895934315784061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1:45</text:p>
          </table:table-cell>
          <table:table-cell office:value-type="float" office:value="1.4017005" table:style-name="c1">
            <text:p>1.4017</text:p>
          </table:table-cell>
          <table:table-cell office:value-type="string" table:style-name="c1">
            <text:p>2026-04-16 02:15</text:p>
          </table:table-cell>
          <table:table-cell office:value-type="float" office:value="1.3981006" table:style-name="c1">
            <text:p>1.3981</text:p>
          </table:table-cell>
          <table:table-cell office:value-type="float" office:value="-0.456210374427334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9:15</text:p>
          </table:table-cell>
          <table:table-cell office:value-type="float" office:value="1.4150071499999999" table:style-name="c1">
            <text:p>1.415</text:p>
          </table:table-cell>
          <table:table-cell office:value-type="string" table:style-name="c1">
            <text:p>2026-04-16 09:45</text:p>
          </table:table-cell>
          <table:table-cell office:value-type="float" office:value="1.4104944000000001" table:style-name="c1">
            <text:p>1.4105</text:p>
          </table:table-cell>
          <table:table-cell office:value-type="float" office:value="-0.5181831275976267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1.4235114" table:style-name="c1">
            <text:p>1.4235</text:p>
          </table:table-cell>
          <table:table-cell office:value-type="string" table:style-name="c1">
            <text:p>2026-04-16 15:45</text:p>
          </table:table-cell>
          <table:table-cell office:value-type="float" office:value="1.42658635" table:style-name="c1">
            <text:p>1.4266</text:p>
          </table:table-cell>
          <table:table-cell office:value-type="float" office:value="0.015679810245972092" table:style-name="c11">
            <text:p>+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1.42981455" table:style-name="c1">
            <text:p>1.4298</text:p>
          </table:table-cell>
          <table:table-cell office:value-type="string" table:style-name="c1">
            <text:p>2026-04-16 16:30</text:p>
          </table:table-cell>
          <table:table-cell office:value-type="float" office:value="1.4324834000000002" table:style-name="c1">
            <text:p>1.4325</text:p>
          </table:table-cell>
          <table:table-cell office:value-type="float" office:value="-0.013616053676313022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45962945" table:style-name="c1">
            <text:p>1.4596</text:p>
          </table:table-cell>
          <table:table-cell office:value-type="string" table:style-name="c1">
            <text:p>2026-04-17 13:30</text:p>
          </table:table-cell>
          <table:table-cell office:value-type="float" office:value="1.4699646499999999" table:style-name="c1">
            <text:p>1.47</text:p>
          </table:table-cell>
          <table:table-cell office:value-type="float" office:value="0.5067546879552021" table:style-name="c11">
            <text:p>+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1.4863427999999999" table:style-name="c1">
            <text:p>1.4863</text:p>
          </table:table-cell>
          <table:table-cell office:value-type="string" table:style-name="c1">
            <text:p>2026-04-17 14:15</text:p>
          </table:table-cell>
          <table:table-cell office:value-type="float" office:value="1.4863564500000002" table:style-name="c1">
            <text:p>1.4864</text:p>
          </table:table-cell>
          <table:table-cell office:value-type="float" office:value="-0.19898347430684638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7:00</text:p>
          </table:table-cell>
          <table:table-cell office:value-type="float" office:value="1.4377185" table:style-name="c1">
            <text:p>1.4377</text:p>
          </table:table-cell>
          <table:table-cell office:value-type="string" table:style-name="c1">
            <text:p>2026-04-21 07:30</text:p>
          </table:table-cell>
          <table:table-cell office:value-type="float" office:value="1.4389801500000001" table:style-name="c1">
            <text:p>1.439</text:p>
          </table:table-cell>
          <table:table-cell office:value-type="float" office:value="-0.1123218015105065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1.44942435" table:style-name="c1">
            <text:p>1.4494</text:p>
          </table:table-cell>
          <table:table-cell office:value-type="string" table:style-name="c1">
            <text:p>2026-04-22 03:30</text:p>
          </table:table-cell>
          <table:table-cell office:value-type="float" office:value="1.4456768" table:style-name="c1">
            <text:p>1.4457</text:p>
          </table:table-cell>
          <table:table-cell office:value-type="float" office:value="-0.45793752003682187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1.46002965" table:style-name="c1">
            <text:p>1.46</text:p>
          </table:table-cell>
          <table:table-cell office:value-type="string" table:style-name="c1">
            <text:p>2026-04-22 06:00</text:p>
          </table:table-cell>
          <table:table-cell office:value-type="float" office:value="1.4536728" table:style-name="c1">
            <text:p>1.4537</text:p>
          </table:table-cell>
          <table:table-cell office:value-type="float" office:value="-0.6344214946045756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6 22:45</text:p>
          </table:table-cell>
          <table:table-cell office:value-type="float" office:value="1.4262865000000002" table:style-name="c1">
            <text:p>1.4263</text:p>
          </table:table-cell>
          <table:table-cell office:value-type="float" office:value="-0.5713892451705282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1.3898945999999999" table:style-name="c1">
            <text:p>1.3899</text:p>
          </table:table-cell>
          <table:table-cell office:value-type="string" table:style-name="c1">
            <text:p>2026-05-01 13:45</text:p>
          </table:table-cell>
          <table:table-cell office:value-type="float" office:value="1.39120405" table:style-name="c1">
            <text:p>1.3912</text:p>
          </table:table-cell>
          <table:table-cell office:value-type="float" office:value="-0.1058761503174188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1.39919925" table:style-name="c1">
            <text:p>1.3992</text:p>
          </table:table-cell>
          <table:table-cell office:value-type="string" table:style-name="c1">
            <text:p>2026-05-01 14:30</text:p>
          </table:table-cell>
          <table:table-cell office:value-type="float" office:value="1.3911041" table:style-name="c1">
            <text:p>1.3911</text:p>
          </table:table-cell>
          <table:table-cell office:value-type="float" office:value="-0.7772993800489902" table:style-name="c12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1.4023008" table:style-name="c1">
            <text:p>1.4023</text:p>
          </table:table-cell>
          <table:table-cell office:value-type="string" table:style-name="c1">
            <text:p>2026-05-03 22:45</text:p>
          </table:table-cell>
          <table:table-cell office:value-type="float" office:value="1.39939995" table:style-name="c1">
            <text:p>1.3994</text:p>
          </table:table-cell>
          <table:table-cell office:value-type="float" office:value="-0.4063500855201574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4057024999999999" table:style-name="c1">
            <text:p>1.4057</text:p>
          </table:table-cell>
          <table:table-cell office:value-type="string" table:style-name="c1">
            <text:p>2026-05-04 02:30</text:p>
          </table:table-cell>
          <table:table-cell office:value-type="float" office:value="1.4046973" table:style-name="c1">
            <text:p>1.4047</text:p>
          </table:table-cell>
          <table:table-cell office:value-type="float" office:value="-0.27126578367041576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1.40740335" table:style-name="c1">
            <text:p>1.4074</text:p>
          </table:table-cell>
          <table:table-cell office:value-type="string" table:style-name="c1">
            <text:p>2026-05-04 15:45</text:p>
          </table:table-cell>
          <table:table-cell office:value-type="float" office:value="1.39820055" table:style-name="c1">
            <text:p>1.3982</text:p>
          </table:table-cell>
          <table:table-cell office:value-type="float" office:value="-0.8524779267755744" table:style-name="c12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1.4187089999999998" table:style-name="c1">
            <text:p>1.4187</text:p>
          </table:table-cell>
          <table:table-cell office:value-type="string" table:style-name="c1">
            <text:p>2026-05-05 13:45</text:p>
          </table:table-cell>
          <table:table-cell office:value-type="float" office:value="1.4137927500000003" table:style-name="c1">
            <text:p>1.4138</text:p>
          </table:table-cell>
          <table:table-cell office:value-type="float" office:value="-0.5457371248966281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06 09:30</text:p>
          </table:table-cell>
          <table:table-cell office:value-type="float" office:value="1.4396798" table:style-name="c1">
            <text:p>1.4397</text:p>
          </table:table-cell>
          <table:table-cell office:value-type="float" office:value="-0.472393224705824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15</text:p>
          </table:table-cell>
          <table:table-cell office:value-type="float" office:value="1.4195094" table:style-name="c1">
            <text:p>1.4195</text:p>
          </table:table-cell>
          <table:table-cell office:value-type="string" table:style-name="c1">
            <text:p>2026-05-07 07:45</text:p>
          </table:table-cell>
          <table:table-cell office:value-type="float" office:value="1.4198897000000001" table:style-name="c1">
            <text:p>1.4199</text:p>
          </table:table-cell>
          <table:table-cell office:value-type="float" office:value="-0.17316260887740853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4293143" table:style-name="c1">
            <text:p>1.4293</text:p>
          </table:table-cell>
          <table:table-cell office:value-type="string" table:style-name="c1">
            <text:p>2026-05-09 01:45</text:p>
          </table:table-cell>
          <table:table-cell office:value-type="float" office:value="1.42958485" table:style-name="c1">
            <text:p>1.4296</text:p>
          </table:table-cell>
          <table:table-cell office:value-type="float" office:value="-0.18100918147603284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45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10 16:15</text:p>
          </table:table-cell>
          <table:table-cell office:value-type="float" office:value="1.4508742000000001" table:style-name="c1">
            <text:p>1.4509</text:p>
          </table:table-cell>
          <table:table-cell office:value-type="float" office:value="0.30149541448003525" table:style-name="c11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30</text:p>
          </table:table-cell>
          <table:table-cell office:value-type="float" office:value="1.4697345" table:style-name="c1">
            <text:p>1.4697</text:p>
          </table:table-cell>
          <table:table-cell office:value-type="string" table:style-name="c1">
            <text:p>2026-05-10 17:00</text:p>
          </table:table-cell>
          <table:table-cell office:value-type="float" office:value="1.4712640000000001" table:style-name="c1">
            <text:p>1.4713</text:p>
          </table:table-cell>
          <table:table-cell office:value-type="float" office:value="-0.0960416140466158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1.48624275" table:style-name="c1">
            <text:p>1.4862</text:p>
          </table:table-cell>
          <table:table-cell office:value-type="string" table:style-name="c1">
            <text:p>2026-05-10 17:45</text:p>
          </table:table-cell>
          <table:table-cell office:value-type="float" office:value="1.49615155" table:style-name="c1">
            <text:p>1.4962</text:p>
          </table:table-cell>
          <table:table-cell office:value-type="float" office:value="0.46546858186859996" table:style-name="c11">
            <text:p>+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8:00</text:p>
          </table:table-cell>
          <table:table-cell office:value-type="float" office:value="1.5052522499999998" table:style-name="c1">
            <text:p>1.5053</text:p>
          </table:table-cell>
          <table:table-cell office:value-type="string" table:style-name="c1">
            <text:p>2026-05-10 18:30</text:p>
          </table:table-cell>
          <table:table-cell office:value-type="float" office:value="1.4990501" table:style-name="c1">
            <text:p>1.4991</text:p>
          </table:table-cell>
          <table:table-cell office:value-type="float" office:value="-0.6111102740354646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4717355" table:style-name="c1">
            <text:p>1.4717</text:p>
          </table:table-cell>
          <table:table-cell office:value-type="string" table:style-name="c1">
            <text:p>2026-05-14 15:30</text:p>
          </table:table-cell>
          <table:table-cell office:value-type="float" office:value="1.467266" table:style-name="c1">
            <text:p>1.4673</text:p>
          </table:table-cell>
          <table:table-cell office:value-type="float" office:value="-0.502982005530217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30</text:p>
          </table:table-cell>
          <table:table-cell office:value-type="float" office:value="1.5351671999999998" table:style-name="c1">
            <text:p>1.5352</text:p>
          </table:table-cell>
          <table:table-cell office:value-type="string" table:style-name="c1">
            <text:p>2026-05-14 19:00</text:p>
          </table:table-cell>
          <table:table-cell office:value-type="float" office:value="1.5354319" table:style-name="c1">
            <text:p>1.5354</text:p>
          </table:table-cell>
          <table:table-cell office:value-type="float" office:value="-0.18269204605855238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3839916499999998" table:style-name="c1">
            <text:p>1.384</text:p>
          </table:table-cell>
          <table:table-cell office:value-type="string" table:style-name="c1">
            <text:p>2026-05-21 09:00</text:p>
          </table:table-cell>
          <table:table-cell office:value-type="float" office:value="1.3796098500000002" table:style-name="c1">
            <text:p>1.3796</text:p>
          </table:table-cell>
          <table:table-cell office:value-type="float" office:value="-0.5158730610946627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1.3543768499999997" table:style-name="c1">
            <text:p>1.3544</text:p>
          </table:table-cell>
          <table:table-cell office:value-type="string" table:style-name="c1">
            <text:p>2026-05-25 00:15</text:p>
          </table:table-cell>
          <table:table-cell office:value-type="float" office:value="1.3522235500000002" table:style-name="c1">
            <text:p>1.3522</text:p>
          </table:table-cell>
          <table:table-cell office:value-type="float" office:value="-0.3585704286402813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0 01:45</text:p>
          </table:table-cell>
          <table:table-cell office:value-type="float" office:value="1.35862035" table:style-name="c1">
            <text:p>1.3586</text:p>
          </table:table-cell>
          <table:table-cell office:value-type="float" office:value="-0.012774495122946927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45</text:p>
          </table:table-cell>
          <table:table-cell office:value-type="float" office:value="1.3421707499999997" table:style-name="c1">
            <text:p>1.3422</text:p>
          </table:table-cell>
          <table:table-cell office:value-type="string" table:style-name="c1">
            <text:p>2026-05-31 10:15</text:p>
          </table:table-cell>
          <table:table-cell office:value-type="float" office:value="1.3377308" table:style-name="c1">
            <text:p>1.3377</text:p>
          </table:table-cell>
          <table:table-cell office:value-type="float" office:value="-0.5300423861270831" table:style-name="c12">
            <text:p>-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