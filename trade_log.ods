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drCell" style:family="table-cell" style:display-name="hdrCell">
      <style:table-cell-properties fo:border="0.5pt solid #d9d9d9" style:vertical-align="middle" fo:background-color="#1F3864"/>
      <style:text-properties fo:color="#FFFFFF" fo:font-weight="bold"/>
      <style:paragraph-properties fo:text-align="center"/>
    </style:style>
    <style:style style:name="dataCell" style:family="table-cell" style:display-name="dataCell">
      <style:table-cell-properties fo:border="0.5pt solid #d9d9d9" style:vertical-align="middle"/>
      <style:paragraph-properties fo:text-align="center"/>
    </style:style>
    <style:style style:name="coinLong" style:family="table-cell" style:display-name="coinLong">
      <style:table-cell-properties fo:border="0.5pt solid #d9d9d9" style:vertical-align="middle"/>
      <style:text-properties fo:color="#107C41" fo:font-weight="bold"/>
      <style:paragraph-properties fo:text-align="center"/>
    </style:style>
    <style:style style:name="coinShort" style:family="table-cell" style:display-name="coinShort">
      <style:table-cell-properties fo:border="0.5pt solid #d9d9d9" style:vertical-align="middle"/>
      <style:text-properties fo:color="#C00000" fo:font-weight="bold"/>
      <style:paragraph-properties fo:text-align="center"/>
    </style:style>
    <style:style style:name="resWin" style:family="table-cell" style:display-name="resWin">
      <style:table-cell-properties fo:border="0.5pt solid #d9d9d9" style:vertical-align="middle"/>
      <style:text-properties fo:color="#107C41" fo:font-weight="bold"/>
      <style:paragraph-properties fo:text-align="center"/>
    </style:style>
    <style:style style:name="resLoss" style:family="table-cell" style:display-name="resLoss">
      <style:table-cell-properties fo:border="0.5pt solid #d9d9d9" style:vertical-align="middle"/>
      <style:text-properties fo:color="#C00000" fo:font-weight="bold"/>
      <style:paragraph-properties fo:text-align="center"/>
    </style:style>
    <style:style style:name="noteCell" style:family="table-cell" style:display-name="noteCell">
      <style:table-cell-properties fo:border="0.5pt solid #d9d9d9" style:vertical-align="middle"/>
      <style:paragraph-properties fo:text-align="left"/>
    </style:style>
    <style:style style:name="co0" style:family="table-column" style:display-name="co0">
      <style:table-column-properties style:column-width="1.6cm"/>
    </style:style>
    <style:style style:name="co1" style:family="table-column" style:display-name="co1">
      <style:table-column-properties style:column-width="2.6cm"/>
    </style:style>
    <style:style style:name="co2" style:family="table-column" style:display-name="co2">
      <style:table-column-properties style:column-width="1.4cm"/>
    </style:style>
    <style:style style:name="co3" style:family="table-column" style:display-name="co3">
      <style:table-column-properties style:column-width="3.2cm"/>
    </style:style>
    <style:style style:name="co4" style:family="table-column" style:display-name="co4">
      <style:table-column-properties style:column-width="3.2cm"/>
    </style:style>
    <style:style style:name="co5" style:family="table-column" style:display-name="co5">
      <style:table-column-properties style:column-width="2.4cm"/>
    </style:style>
    <style:style style:name="co6" style:family="table-column" style:display-name="co6">
      <style:table-column-properties style:column-width="2.4cm"/>
    </style:style>
    <style:style style:name="co7" style:family="table-column" style:display-name="co7">
      <style:table-column-properties style:column-width="2.9cm"/>
    </style:style>
    <style:style style:name="co8" style:family="table-column" style:display-name="co8">
      <style:table-column-properties style:column-width="3.2cm"/>
    </style:style>
    <style:style style:name="co9" style:family="table-column" style:display-name="co9">
      <style:table-column-properties style:column-width="1.6cm"/>
    </style:style>
    <style:style style:name="co10" style:family="table-column" style:display-name="co10">
      <style:table-column-properties style:column-width="7cm"/>
    </style:style>
    <style:style style:name="co11" style:family="table-column" style:display-name="co11">
      <style:table-column-properties style:column-width="2.2cm"/>
    </style:style>
    <style:style style:name="co12" style:family="table-column" style:display-name="co12">
      <style:table-column-properties style:column-width="2.2cm"/>
    </style:style>
    <style:style style:name="co13" style:family="table-column" style:display-name="co13">
      <style:table-column-properties style:column-width="8cm"/>
    </style:style>
  </office:automatic-styles>
  <office:body>
    <office:spreadsheet>
      <table:table table:name="Sheet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13"/>
        <table:table-row>
          <table:table-cell office:value-type="string" table:style-name="hdrCell">
            <text:p>Trade</text:p>
          </table:table-cell>
          <table:table-cell office:value-type="string" table:style-name="hdrCell">
            <text:p>Stock Name</text:p>
          </table:table-cell>
          <table:table-cell office:value-type="string" table:style-name="hdrCell">
            <text:p>To</text:p>
          </table:table-cell>
          <table:table-cell office:value-type="string" table:style-name="hdrCell">
            <text:p>Başlangıç Fiyatı</text:p>
          </table:table-cell>
          <table:table-cell office:value-type="string" table:style-name="hdrCell">
            <text:p>Kapanış Fiyatı</text:p>
          </table:table-cell>
          <table:table-cell office:value-type="string" table:style-name="hdrCell">
            <text:p>Açılış Saat</text:p>
          </table:table-cell>
          <table:table-cell office:value-type="string" table:style-name="hdrCell">
            <text:p>Kap Saat</text:p>
          </table:table-cell>
          <table:table-cell office:value-type="string" table:style-name="hdrCell">
            <text:p>Tarih</text:p>
          </table:table-cell>
          <table:table-cell office:value-type="string" table:style-name="hdrCell">
            <text:p>Result</text:p>
          </table:table-cell>
          <table:table-cell office:value-type="string" table:style-name="hdrCell">
            <text:p>Signal</text:p>
          </table:table-cell>
          <table:table-cell office:value-type="string" table:style-name="hdrCell">
            <text:p>Signal Detail</text:p>
          </table:table-cell>
          <table:table-cell office:value-type="string" table:style-name="hdrCell">
            <text:p>Pozisyon</text:p>
          </table:table-cell>
          <table:table-cell office:value-type="string" table:style-name="hdrCell">
            <text:p>Trend (1s)</text:p>
          </table:table-cell>
          <table:table-cell office:value-type="string" table:style-name="hdrCell">
            <text:p>Not</text:p>
          </table:table-cell>
        </table:table-row>
        <table:table-row>
          <table:table-cell office:value-type="float" office:value="1" table:style-name="dataCell">
            <text:p>1</text:p>
          </table:table-cell>
          <table:table-cell office:value-type="string" table:style-name="coinLong">
            <text:p>DOGE</text:p>
          </table:table-cell>
          <table:table-cell office:value-type="string" table:style-name="dataCell">
            <text:p>USDT</text:p>
          </table:table-cell>
          <table:table-cell office:value-type="float" office:value="0.10142" table:style-name="dataCell">
            <text:p>0.10142</text:p>
          </table:table-cell>
          <table:table-cell office:value-type="float" office:value="0.10141" table:style-name="dataCell">
            <text:p>0.10141</text:p>
          </table:table-cell>
          <table:table-cell office:value-type="string" table:style-name="dataCell">
            <text:p>08:48</text:p>
          </table:table-cell>
          <table:table-cell office:value-type="string" table:style-name="dataCell">
            <text:p>08:58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0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/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" table:style-name="dataCell">
            <text:p>2</text:p>
          </table:table-cell>
          <table:table-cell office:value-type="string" table:style-name="coinShort">
            <text:p>HBAR</text:p>
          </table:table-cell>
          <table:table-cell office:value-type="string" table:style-name="dataCell">
            <text:p>USDT</text:p>
          </table:table-cell>
          <table:table-cell office:value-type="float" office:value="0.10121" table:style-name="dataCell">
            <text:p>0.10121</text:p>
          </table:table-cell>
          <table:table-cell office:value-type="float" office:value="0.10147" table:style-name="dataCell">
            <text:p>0.10147</text:p>
          </table:table-cell>
          <table:table-cell office:value-type="string" table:style-name="dataCell">
            <text:p>16:05</text:p>
          </table:table-cell>
          <table:table-cell office:value-type="string" table:style-name="dataCell">
            <text:p>16:15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26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RSI 71 | BB 0.26% | VOL 2.1x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" table:style-name="dataCell">
            <text:p>3</text:p>
          </table:table-cell>
          <table:table-cell office:value-type="string" table:style-name="coinLong">
            <text:p>FIL</text:p>
          </table:table-cell>
          <table:table-cell office:value-type="string" table:style-name="dataCell">
            <text:p>USDT</text:p>
          </table:table-cell>
          <table:table-cell office:value-type="float" office:value="0.984" table:style-name="dataCell">
            <text:p>0.984</text:p>
          </table:table-cell>
          <table:table-cell office:value-type="float" office:value="0.984" table:style-name="dataCell">
            <text:p>0.984</text:p>
          </table:table-cell>
          <table:table-cell office:value-type="string" table:style-name="dataCell">
            <text:p>17:04</text:p>
          </table:table-cell>
          <table:table-cell office:value-type="string" table:style-name="dataCell">
            <text:p>17:14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0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7% | EMA 0.02% | VOL 2.0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" table:style-name="dataCell">
            <text:p>4</text:p>
          </table:table-cell>
          <table:table-cell office:value-type="string" table:style-name="coinLong">
            <text:p>ETC</text:p>
          </table:table-cell>
          <table:table-cell office:value-type="string" table:style-name="dataCell">
            <text:p>USDT</text:p>
          </table:table-cell>
          <table:table-cell office:value-type="float" office:value="8.27" table:style-name="dataCell">
            <text:p>8.27</text:p>
          </table:table-cell>
          <table:table-cell office:value-type="float" office:value="8.27" table:style-name="dataCell">
            <text:p>8.27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7:32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0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2% | EMA 0.02% | VOL 2.5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" table:style-name="dataCell">
            <text:p>5</text:p>
          </table:table-cell>
          <table:table-cell office:value-type="string" table:style-name="coinLong">
            <text:p>FIL</text:p>
          </table:table-cell>
          <table:table-cell office:value-type="string" table:style-name="dataCell">
            <text:p>USDT</text:p>
          </table:table-cell>
          <table:table-cell office:value-type="float" office:value="0.988" table:style-name="dataCell">
            <text:p>0.988</text:p>
          </table:table-cell>
          <table:table-cell office:value-type="float" office:value="0.986" table:style-name="dataCell">
            <text:p>0.986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7:32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2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4% | EMA 0.19% | VOL 2.4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" table:style-name="dataCell">
            <text:p>6</text:p>
          </table:table-cell>
          <table:table-cell office:value-type="string" table:style-name="coinLong">
            <text:p>TON</text:p>
          </table:table-cell>
          <table:table-cell office:value-type="string" table:style-name="dataCell">
            <text:p>USDT</text:p>
          </table:table-cell>
          <table:table-cell office:value-type="float" office:value="1.77" table:style-name="dataCell">
            <text:p>1.77</text:p>
          </table:table-cell>
          <table:table-cell office:value-type="float" office:value="1.774" table:style-name="dataCell">
            <text:p>1.774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7:32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23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6% | EMA 0.17% | VOL 2.4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" table:style-name="dataCell">
            <text:p>7</text:p>
          </table:table-cell>
          <table:table-cell office:value-type="string" table:style-name="coinLong">
            <text:p>BTC</text:p>
          </table:table-cell>
          <table:table-cell office:value-type="string" table:style-name="dataCell">
            <text:p>USDT</text:p>
          </table:table-cell>
          <table:table-cell office:value-type="float" office:value="73823.0" table:style-name="dataCell">
            <text:p>73823</text:p>
          </table:table-cell>
          <table:table-cell office:value-type="float" office:value="74001.0" table:style-name="dataCell">
            <text:p>74001</text:p>
          </table:table-cell>
          <table:table-cell office:value-type="string" table:style-name="dataCell">
            <text:p>17:02</text:p>
          </table:table-cell>
          <table:table-cell office:value-type="string" table:style-name="dataCell">
            <text:p>17:12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24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2% | EMA 0.17% | VOL 3.2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8" table:style-name="dataCell">
            <text:p>8</text:p>
          </table:table-cell>
          <table:table-cell office:value-type="string" table:style-name="coinLong">
            <text:p>DOT</text:p>
          </table:table-cell>
          <table:table-cell office:value-type="string" table:style-name="dataCell">
            <text:p>USDT</text:p>
          </table:table-cell>
          <table:table-cell office:value-type="float" office:value="1.2" table:style-name="dataCell">
            <text:p>1.2</text:p>
          </table:table-cell>
          <table:table-cell office:value-type="float" office:value="1.195" table:style-name="dataCell">
            <text:p>1.195</text:p>
          </table:table-cell>
          <table:table-cell office:value-type="string" table:style-name="dataCell">
            <text:p>17:36</text:p>
          </table:table-cell>
          <table:table-cell office:value-type="string" table:style-name="dataCell">
            <text:p>17:46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42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4% | EMA 0.03% | VOL 2.1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9" table:style-name="dataCell">
            <text:p>9</text:p>
          </table:table-cell>
          <table:table-cell office:value-type="string" table:style-name="coinLong">
            <text:p>OP</text:p>
          </table:table-cell>
          <table:table-cell office:value-type="string" table:style-name="dataCell">
            <text:p>USDT</text:p>
          </table:table-cell>
          <table:table-cell office:value-type="float" office:value="0.1215" table:style-name="dataCell">
            <text:p>0.1215</text:p>
          </table:table-cell>
          <table:table-cell office:value-type="float" office:value="0.121" table:style-name="dataCell">
            <text:p>0.121</text:p>
          </table:table-cell>
          <table:table-cell office:value-type="string" table:style-name="dataCell">
            <text:p>17:36</text:p>
          </table:table-cell>
          <table:table-cell office:value-type="string" table:style-name="dataCell">
            <text:p>17:46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4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7% | EMA 0.09% | VOL 2.4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0" table:style-name="dataCell">
            <text:p>10</text:p>
          </table:table-cell>
          <table:table-cell office:value-type="string" table:style-name="coinLong">
            <text:p>ETC</text:p>
          </table:table-cell>
          <table:table-cell office:value-type="string" table:style-name="dataCell">
            <text:p>USDT</text:p>
          </table:table-cell>
          <table:table-cell office:value-type="float" office:value="8.27" table:style-name="dataCell">
            <text:p>8.27</text:p>
          </table:table-cell>
          <table:table-cell office:value-type="float" office:value="8.26" table:style-name="dataCell">
            <text:p>8.26</text:p>
          </table:table-cell>
          <table:table-cell office:value-type="string" table:style-name="dataCell">
            <text:p>17:36</text:p>
          </table:table-cell>
          <table:table-cell office:value-type="string" table:style-name="dataCell">
            <text:p>17:46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12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3% | EMA 0.04% | VOL 2.5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1" table:style-name="dataCell">
            <text:p>11</text:p>
          </table:table-cell>
          <table:table-cell office:value-type="string" table:style-name="coinShort">
            <text:p>LTC</text:p>
          </table:table-cell>
          <table:table-cell office:value-type="string" table:style-name="dataCell">
            <text:p>USDT</text:p>
          </table:table-cell>
          <table:table-cell office:value-type="float" office:value="52.52" table:style-name="dataCell">
            <text:p>52.52</text:p>
          </table:table-cell>
          <table:table-cell office:value-type="float" office:value="52.47" table:style-name="dataCell">
            <text:p>52.47</text:p>
          </table:table-cell>
          <table:table-cell office:value-type="string" table:style-name="dataCell">
            <text:p>17:40</text:p>
          </table:table-cell>
          <table:table-cell office:value-type="string" table:style-name="dataCell">
            <text:p>17:50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1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4% | EMA 0.01% | VOL 51.5x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2" table:style-name="dataCell">
            <text:p>12</text:p>
          </table:table-cell>
          <table:table-cell office:value-type="string" table:style-name="coinShort">
            <text:p>BNB</text:p>
          </table:table-cell>
          <table:table-cell office:value-type="string" table:style-name="dataCell">
            <text:p>USDT</text:p>
          </table:table-cell>
          <table:table-cell office:value-type="float" office:value="685.29" table:style-name="dataCell">
            <text:p>685.29</text:p>
          </table:table-cell>
          <table:table-cell office:value-type="float" office:value="686.26" table:style-name="dataCell">
            <text:p>686.26</text:p>
          </table:table-cell>
          <table:table-cell office:value-type="string" table:style-name="dataCell">
            <text:p>17:46</text:p>
          </table:table-cell>
          <table:table-cell office:value-type="string" table:style-name="dataCell">
            <text:p>17:56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14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RSI 82 | BB 0.21% | VOL 4.1x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3" table:style-name="dataCell">
            <text:p>13</text:p>
          </table:table-cell>
          <table:table-cell office:value-type="string" table:style-name="coinLong">
            <text:p>DOT</text:p>
          </table:table-cell>
          <table:table-cell office:value-type="string" table:style-name="dataCell">
            <text:p>USDT</text:p>
          </table:table-cell>
          <table:table-cell office:value-type="float" office:value="1.195" table:style-name="dataCell">
            <text:p>1.195</text:p>
          </table:table-cell>
          <table:table-cell office:value-type="float" office:value="1.196" table:style-name="dataCell">
            <text:p>1.196</text:p>
          </table:table-cell>
          <table:table-cell office:value-type="string" table:style-name="dataCell">
            <text:p>17:46</text:p>
          </table:table-cell>
          <table:table-cell office:value-type="string" table:style-name="dataCell">
            <text:p>17:56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08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2% | EMA 0.01% | VOL 2.1x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4" table:style-name="dataCell">
            <text:p>14</text:p>
          </table:table-cell>
          <table:table-cell office:value-type="string" table:style-name="coinShort">
            <text:p>LTC</text:p>
          </table:table-cell>
          <table:table-cell office:value-type="string" table:style-name="dataCell">
            <text:p>USDT</text:p>
          </table:table-cell>
          <table:table-cell office:value-type="float" office:value="52.47" table:style-name="dataCell">
            <text:p>52.47</text:p>
          </table:table-cell>
          <table:table-cell office:value-type="float" office:value="52.53" table:style-name="dataCell">
            <text:p>52.53</text:p>
          </table:table-cell>
          <table:table-cell office:value-type="string" table:style-name="dataCell">
            <text:p>17:50</text:p>
          </table:table-cell>
          <table:table-cell office:value-type="string" table:style-name="dataCell">
            <text:p>18:00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1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5% | EMA 0.05% | VOL 51.5x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5" table:style-name="dataCell">
            <text:p>15</text:p>
          </table:table-cell>
          <table:table-cell office:value-type="string" table:style-name="coinShort">
            <text:p>BNB</text:p>
          </table:table-cell>
          <table:table-cell office:value-type="string" table:style-name="dataCell">
            <text:p>USDT</text:p>
          </table:table-cell>
          <table:table-cell office:value-type="float" office:value="686.18" table:style-name="dataCell">
            <text:p>686.18</text:p>
          </table:table-cell>
          <table:table-cell office:value-type="float" office:value="686.19" table:style-name="dataCell">
            <text:p>686.19</text:p>
          </table:table-cell>
          <table:table-cell office:value-type="string" table:style-name="dataCell">
            <text:p>17:56</text:p>
          </table:table-cell>
          <table:table-cell office:value-type="string" table:style-name="dataCell">
            <text:p>18:06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0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RSI 82 | BB 0.10% | VOL 5.6x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>Algoritma Değiştirildi</text:p>
          </table:table-cell>
        </table:table-row>
        <table:table-row>
          <table:table-cell office:value-type="float" office:value="16" table:style-name="dataCell">
            <text:p>16</text:p>
          </table:table-cell>
          <table:table-cell office:value-type="string" table:style-name="coinShort">
            <text:p>TON</text:p>
          </table:table-cell>
          <table:table-cell office:value-type="string" table:style-name="dataCell">
            <text:p>USDT</text:p>
          </table:table-cell>
          <table:table-cell office:value-type="float" office:value="1.786" table:style-name="dataCell">
            <text:p>1.786</text:p>
          </table:table-cell>
          <table:table-cell office:value-type="float" office:value="1.784" table:style-name="dataCell">
            <text:p>1.784</text:p>
          </table:table-cell>
          <table:table-cell office:value-type="string" table:style-name="dataCell">
            <text:p>18:14</text:p>
          </table:table-cell>
          <table:table-cell office:value-type="string" table:style-name="dataCell">
            <text:p>18:24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11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RSI 73 | BB 0.09% | VOL 2.4x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7" table:style-name="dataCell">
            <text:p>17</text:p>
          </table:table-cell>
          <table:table-cell office:value-type="string" table:style-name="coinShort">
            <text:p>TON</text:p>
          </table:table-cell>
          <table:table-cell office:value-type="string" table:style-name="dataCell">
            <text:p>USDT</text:p>
          </table:table-cell>
          <table:table-cell office:value-type="float" office:value="1.792" table:style-name="dataCell">
            <text:p>1.792</text:p>
          </table:table-cell>
          <table:table-cell office:value-type="float" office:value="1.782" table:style-name="dataCell">
            <text:p>1.782</text:p>
          </table:table-cell>
          <table:table-cell office:value-type="string" table:style-name="dataCell">
            <text:p>18:27</text:p>
          </table:table-cell>
          <table:table-cell office:value-type="string" table:style-name="dataCell">
            <text:p>18:37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56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RSI 76 | BB 0.20% | VOL 2.4x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---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8" table:style-name="dataCell">
            <text:p>18</text:p>
          </table:table-cell>
          <table:table-cell office:value-type="string" table:style-name="coinLong">
            <text:p>BNB</text:p>
          </table:table-cell>
          <table:table-cell office:value-type="string" table:style-name="dataCell">
            <text:p>USDT</text:p>
          </table:table-cell>
          <table:table-cell office:value-type="float" office:value="701.19" table:style-name="dataCell">
            <text:p>701.19</text:p>
          </table:table-cell>
          <table:table-cell office:value-type="float" office:value="707.51" table:style-name="dataCell">
            <text:p>707.51</text:p>
          </table:table-cell>
          <table:table-cell office:value-type="string" table:style-name="dataCell">
            <text:p>19:28</text:p>
          </table:table-cell>
          <table:table-cell office:value-type="string" table:style-name="dataCell">
            <text:p>19:58</text:p>
          </table:table-cell>
          <table:table-cell office:value-type="string" table:style-name="dataCell">
            <text:p>30/05/2026</text:p>
          </table:table-cell>
          <table:table-cell office:value-type="string" table:style-name="resWin">
            <text:p>WIN +0.9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4.4x | VWAP +1.82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19" table:style-name="dataCell">
            <text:p>19</text:p>
          </table:table-cell>
          <table:table-cell office:value-type="string" table:style-name="coinLong">
            <text:p>SHIB</text:p>
          </table:table-cell>
          <table:table-cell office:value-type="string" table:style-name="dataCell">
            <text:p>USDT</text:p>
          </table:table-cell>
          <table:table-cell office:value-type="float" office:value="5.54e-06" table:style-name="dataCell">
            <text:p>0.00000554</text:p>
          </table:table-cell>
          <table:table-cell office:value-type="float" office:value="5.53e-06" table:style-name="dataCell">
            <text:p>0.00000553</text:p>
          </table:table-cell>
          <table:table-cell office:value-type="string" table:style-name="dataCell">
            <text:p>19:41</text:p>
          </table:table-cell>
          <table:table-cell office:value-type="string" table:style-name="dataCell">
            <text:p>20:11</text:p>
          </table:table-cell>
          <table:table-cell office:value-type="string" table:style-name="dataCell">
            <text:p>30/05/2026</text:p>
          </table:table-cell>
          <table:table-cell office:value-type="string" table:style-name="resLoss">
            <text:p>LOSS -0.18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1x | VWAP +0.5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0" table:style-name="dataCell">
            <text:p>20</text:p>
          </table:table-cell>
          <table:table-cell office:value-type="string" table:style-name="coinShort">
            <text:p>ARB</text:p>
          </table:table-cell>
          <table:table-cell office:value-type="string" table:style-name="dataCell">
            <text:p>USDT</text:p>
          </table:table-cell>
          <table:table-cell office:value-type="float" office:value="0.1038" table:style-name="dataCell">
            <text:p>0.1038</text:p>
          </table:table-cell>
          <table:table-cell office:value-type="float" office:value="0.1032" table:style-name="dataCell">
            <text:p>0.1032</text:p>
          </table:table-cell>
          <table:table-cell office:value-type="string" table:style-name="dataCell">
            <text:p>09:43</text:p>
          </table:table-cell>
          <table:table-cell office:value-type="string" table:style-name="dataCell">
            <text:p>10:13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58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EMA 0.07% | VOL 2.5x | VWAP -0.64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1" table:style-name="dataCell">
            <text:p>21</text:p>
          </table:table-cell>
          <table:table-cell office:value-type="string" table:style-name="coinShort">
            <text:p>SUI</text:p>
          </table:table-cell>
          <table:table-cell office:value-type="string" table:style-name="dataCell">
            <text:p>USDT</text:p>
          </table:table-cell>
          <table:table-cell office:value-type="float" office:value="0.911" table:style-name="dataCell">
            <text:p>0.911</text:p>
          </table:table-cell>
          <table:table-cell office:value-type="float" office:value="0.9051" table:style-name="dataCell">
            <text:p>0.9051</text:p>
          </table:table-cell>
          <table:table-cell office:value-type="string" table:style-name="dataCell">
            <text:p>09:43</text:p>
          </table:table-cell>
          <table:table-cell office:value-type="string" table:style-name="dataCell">
            <text:p>10:13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65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EMA 0.05% | VWAP -0.58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2" table:style-name="dataCell">
            <text:p>22</text:p>
          </table:table-cell>
          <table:table-cell office:value-type="string" table:style-name="coinLong">
            <text:p>SOL</text:p>
          </table:table-cell>
          <table:table-cell office:value-type="string" table:style-name="dataCell">
            <text:p>USDT</text:p>
          </table:table-cell>
          <table:table-cell office:value-type="float" office:value="82.52" table:style-name="dataCell">
            <text:p>82.52</text:p>
          </table:table-cell>
          <table:table-cell office:value-type="float" office:value="82.73" table:style-name="dataCell">
            <text:p>82.73</text:p>
          </table:table-cell>
          <table:table-cell office:value-type="string" table:style-name="dataCell">
            <text:p>10:32</text:p>
          </table:table-cell>
          <table:table-cell office:value-type="string" table:style-name="dataCell">
            <text:p>11:02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25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30 | BB 0.15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3" table:style-name="dataCell">
            <text:p>23</text:p>
          </table:table-cell>
          <table:table-cell office:value-type="string" table:style-name="coinLong">
            <text:p>DOGE</text:p>
          </table:table-cell>
          <table:table-cell office:value-type="string" table:style-name="dataCell">
            <text:p>USDT</text:p>
          </table:table-cell>
          <table:table-cell office:value-type="float" office:value="0.10022" table:style-name="dataCell">
            <text:p>0.10022</text:p>
          </table:table-cell>
          <table:table-cell office:value-type="float" office:value="0.10065" table:style-name="dataCell">
            <text:p>0.10065</text:p>
          </table:table-cell>
          <table:table-cell office:value-type="string" table:style-name="dataCell">
            <text:p>10:32</text:p>
          </table:table-cell>
          <table:table-cell office:value-type="string" table:style-name="dataCell">
            <text:p>11:02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43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9 | BB 0.1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4" table:style-name="dataCell">
            <text:p>24</text:p>
          </table:table-cell>
          <table:table-cell office:value-type="string" table:style-name="coinLong">
            <text:p>OP</text:p>
          </table:table-cell>
          <table:table-cell office:value-type="string" table:style-name="dataCell">
            <text:p>USDT</text:p>
          </table:table-cell>
          <table:table-cell office:value-type="float" office:value="0.1189" table:style-name="dataCell">
            <text:p>0.1189</text:p>
          </table:table-cell>
          <table:table-cell office:value-type="float" office:value="0.1194" table:style-name="dataCell">
            <text:p>0.1194</text:p>
          </table:table-cell>
          <table:table-cell office:value-type="string" table:style-name="dataCell">
            <text:p>10:32</text:p>
          </table:table-cell>
          <table:table-cell office:value-type="string" table:style-name="dataCell">
            <text:p>11:02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42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6 | BB 0.43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5" table:style-name="dataCell">
            <text:p>25</text:p>
          </table:table-cell>
          <table:table-cell office:value-type="string" table:style-name="coinLong">
            <text:p>APT</text:p>
          </table:table-cell>
          <table:table-cell office:value-type="string" table:style-name="dataCell">
            <text:p>USDT</text:p>
          </table:table-cell>
          <table:table-cell office:value-type="float" office:value="0.935" table:style-name="dataCell">
            <text:p>0.935</text:p>
          </table:table-cell>
          <table:table-cell office:value-type="float" office:value="0.941" table:style-name="dataCell">
            <text:p>0.941</text:p>
          </table:table-cell>
          <table:table-cell office:value-type="string" table:style-name="dataCell">
            <text:p>10:32</text:p>
          </table:table-cell>
          <table:table-cell office:value-type="string" table:style-name="dataCell">
            <text:p>11:02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64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9 | BB 0.3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6" table:style-name="dataCell">
            <text:p>26</text:p>
          </table:table-cell>
          <table:table-cell office:value-type="string" table:style-name="coinLong">
            <text:p>XRP</text:p>
          </table:table-cell>
          <table:table-cell office:value-type="string" table:style-name="dataCell">
            <text:p>USDT</text:p>
          </table:table-cell>
          <table:table-cell office:value-type="float" office:value="1.3336" table:style-name="dataCell">
            <text:p>1.3336</text:p>
          </table:table-cell>
          <table:table-cell office:value-type="float" office:value="1.3368" table:style-name="dataCell">
            <text:p>1.3368</text:p>
          </table:table-cell>
          <table:table-cell office:value-type="string" table:style-name="dataCell">
            <text:p>10:32</text:p>
          </table:table-cell>
          <table:table-cell office:value-type="string" table:style-name="dataCell">
            <text:p>11:02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24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6 | BB 0.14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7" table:style-name="dataCell">
            <text:p>27</text:p>
          </table:table-cell>
          <table:table-cell office:value-type="string" table:style-name="coinShort">
            <text:p>ATOM</text:p>
          </table:table-cell>
          <table:table-cell office:value-type="string" table:style-name="dataCell">
            <text:p>USDT</text:p>
          </table:table-cell>
          <table:table-cell office:value-type="float" office:value="1.976" table:style-name="dataCell">
            <text:p>1.976</text:p>
          </table:table-cell>
          <table:table-cell office:value-type="float" office:value="1.982" table:style-name="dataCell">
            <text:p>1.982</text:p>
          </table:table-cell>
          <table:table-cell office:value-type="string" table:style-name="dataCell">
            <text:p>10:32</text:p>
          </table:table-cell>
          <table:table-cell office:value-type="string" table:style-name="dataCell">
            <text:p>11:02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3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3.8x | VWAP -1.10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>SHORT TRADES</text:p>
          </table:table-cell>
        </table:table-row>
        <table:table-row>
          <table:table-cell office:value-type="float" office:value="28" table:style-name="dataCell">
            <text:p>28</text:p>
          </table:table-cell>
          <table:table-cell office:value-type="string" table:style-name="coinShort">
            <text:p>ARB</text:p>
          </table:table-cell>
          <table:table-cell office:value-type="string" table:style-name="dataCell">
            <text:p>USDT</text:p>
          </table:table-cell>
          <table:table-cell office:value-type="float" office:value="0.1025" table:style-name="dataCell">
            <text:p>0.1025</text:p>
          </table:table-cell>
          <table:table-cell office:value-type="float" office:value="0.103" table:style-name="dataCell">
            <text:p>0.103</text:p>
          </table:table-cell>
          <table:table-cell office:value-type="string" table:style-name="dataCell">
            <text:p>10:32</text:p>
          </table:table-cell>
          <table:table-cell office:value-type="string" table:style-name="dataCell">
            <text:p>11:02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49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6x | VWAP -1.63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29" table:style-name="dataCell">
            <text:p>29</text:p>
          </table:table-cell>
          <table:table-cell office:value-type="string" table:style-name="coinShort">
            <text:p>SUI</text:p>
          </table:table-cell>
          <table:table-cell office:value-type="string" table:style-name="dataCell">
            <text:p>USDT</text:p>
          </table:table-cell>
          <table:table-cell office:value-type="float" office:value="0.9007" table:style-name="dataCell">
            <text:p>0.9007</text:p>
          </table:table-cell>
          <table:table-cell office:value-type="float" office:value="0.9044" table:style-name="dataCell">
            <text:p>0.9044</text:p>
          </table:table-cell>
          <table:table-cell office:value-type="string" table:style-name="dataCell">
            <text:p>10:32</text:p>
          </table:table-cell>
          <table:table-cell office:value-type="string" table:style-name="dataCell">
            <text:p>11:02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4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4.2x | VWAP -1.23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0" table:style-name="dataCell">
            <text:p>30</text:p>
          </table:table-cell>
          <table:table-cell office:value-type="string" table:style-name="coinShort">
            <text:p>ARB</text:p>
          </table:table-cell>
          <table:table-cell office:value-type="string" table:style-name="dataCell">
            <text:p>USDT</text:p>
          </table:table-cell>
          <table:table-cell office:value-type="float" office:value="0.1021" table:style-name="dataCell">
            <text:p>0.1021</text:p>
          </table:table-cell>
          <table:table-cell office:value-type="float" office:value="0.1028" table:style-name="dataCell">
            <text:p>0.1028</text:p>
          </table:table-cell>
          <table:table-cell office:value-type="string" table:style-name="dataCell">
            <text:p>13:43</text:p>
          </table:table-cell>
          <table:table-cell office:value-type="string" table:style-name="dataCell">
            <text:p>14:13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69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2x | VWAP -0.86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1" table:style-name="dataCell">
            <text:p>31</text:p>
          </table:table-cell>
          <table:table-cell office:value-type="string" table:style-name="coinShort">
            <text:p>BTC</text:p>
          </table:table-cell>
          <table:table-cell office:value-type="string" table:style-name="dataCell">
            <text:p>USDT</text:p>
          </table:table-cell>
          <table:table-cell office:value-type="float" office:value="73814.01" table:style-name="dataCell">
            <text:p>73814.01</text:p>
          </table:table-cell>
          <table:table-cell office:value-type="float" office:value="73901.17" table:style-name="dataCell">
            <text:p>73901.17</text:p>
          </table:table-cell>
          <table:table-cell office:value-type="string" table:style-name="dataCell">
            <text:p>13:43</text:p>
          </table:table-cell>
          <table:table-cell office:value-type="string" table:style-name="dataCell">
            <text:p>14:13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12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5x | VWAP -0.13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2" table:style-name="dataCell">
            <text:p>32</text:p>
          </table:table-cell>
          <table:table-cell office:value-type="string" table:style-name="coinShort">
            <text:p>APT</text:p>
          </table:table-cell>
          <table:table-cell office:value-type="string" table:style-name="dataCell">
            <text:p>USDT</text:p>
          </table:table-cell>
          <table:table-cell office:value-type="float" office:value="0.932" table:style-name="dataCell">
            <text:p>0.932</text:p>
          </table:table-cell>
          <table:table-cell office:value-type="float" office:value="0.939" table:style-name="dataCell">
            <text:p>0.939</text:p>
          </table:table-cell>
          <table:table-cell office:value-type="string" table:style-name="dataCell">
            <text:p>13:43</text:p>
          </table:table-cell>
          <table:table-cell office:value-type="string" table:style-name="dataCell">
            <text:p>14:13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75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6x | VWAP -0.79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3" table:style-name="dataCell">
            <text:p>33</text:p>
          </table:table-cell>
          <table:table-cell office:value-type="string" table:style-name="coinShort">
            <text:p>OP</text:p>
          </table:table-cell>
          <table:table-cell office:value-type="string" table:style-name="dataCell">
            <text:p>USDT</text:p>
          </table:table-cell>
          <table:table-cell office:value-type="float" office:value="0.1187" table:style-name="dataCell">
            <text:p>0.1187</text:p>
          </table:table-cell>
          <table:table-cell office:value-type="float" office:value="0.1193" table:style-name="dataCell">
            <text:p>0.1193</text:p>
          </table:table-cell>
          <table:table-cell office:value-type="string" table:style-name="dataCell">
            <text:p>13:43</text:p>
          </table:table-cell>
          <table:table-cell office:value-type="string" table:style-name="dataCell">
            <text:p>14:13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5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6x | VWAP -0.59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4" table:style-name="dataCell">
            <text:p>34</text:p>
          </table:table-cell>
          <table:table-cell office:value-type="string" table:style-name="coinShort">
            <text:p>SUI</text:p>
          </table:table-cell>
          <table:table-cell office:value-type="string" table:style-name="dataCell">
            <text:p>USDT</text:p>
          </table:table-cell>
          <table:table-cell office:value-type="float" office:value="0.9021" table:style-name="dataCell">
            <text:p>0.9021</text:p>
          </table:table-cell>
          <table:table-cell office:value-type="float" office:value="0.9047" table:style-name="dataCell">
            <text:p>0.9047</text:p>
          </table:table-cell>
          <table:table-cell office:value-type="string" table:style-name="dataCell">
            <text:p>13:43</text:p>
          </table:table-cell>
          <table:table-cell office:value-type="string" table:style-name="dataCell">
            <text:p>14:13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29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2x | VWAP -0.30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>SHORT TRADES</text:p>
          </table:table-cell>
        </table:table-row>
        <table:table-row>
          <table:table-cell office:value-type="float" office:value="35" table:style-name="dataCell">
            <text:p>35</text:p>
          </table:table-cell>
          <table:table-cell office:value-type="string" table:style-name="coinLong">
            <text:p>BTC</text:p>
          </table:table-cell>
          <table:table-cell office:value-type="string" table:style-name="dataCell">
            <text:p>USDT</text:p>
          </table:table-cell>
          <table:table-cell office:value-type="float" office:value="73933.79" table:style-name="dataCell">
            <text:p>73933.79</text:p>
          </table:table-cell>
          <table:table-cell office:value-type="float" office:value="73946.67" table:style-name="dataCell">
            <text:p>73946.67</text:p>
          </table:table-cell>
          <table:table-cell office:value-type="string" table:style-name="dataCell">
            <text:p>14:27</text:p>
          </table:table-cell>
          <table:table-cell office:value-type="string" table:style-name="dataCell">
            <text:p>14:5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02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1% | VWAP +0.05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6" table:style-name="dataCell">
            <text:p>36</text:p>
          </table:table-cell>
          <table:table-cell office:value-type="string" table:style-name="coinLong">
            <text:p>XLM</text:p>
          </table:table-cell>
          <table:table-cell office:value-type="string" table:style-name="dataCell">
            <text:p>USDT</text:p>
          </table:table-cell>
          <table:table-cell office:value-type="float" office:value="0.2583" table:style-name="dataCell">
            <text:p>0.2583</text:p>
          </table:table-cell>
          <table:table-cell office:value-type="float" office:value="0.2635" table:style-name="dataCell">
            <text:p>0.2635</text:p>
          </table:table-cell>
          <table:table-cell office:value-type="string" table:style-name="dataCell">
            <text:p>14:27</text:p>
          </table:table-cell>
          <table:table-cell office:value-type="string" table:style-name="dataCell">
            <text:p>14:5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2.0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3.2x | VWAP +5.9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7" table:style-name="dataCell">
            <text:p>37</text:p>
          </table:table-cell>
          <table:table-cell office:value-type="string" table:style-name="coinLong">
            <text:p>HBAR</text:p>
          </table:table-cell>
          <table:table-cell office:value-type="string" table:style-name="dataCell">
            <text:p>USDT</text:p>
          </table:table-cell>
          <table:table-cell office:value-type="float" office:value="0.0984" table:style-name="dataCell">
            <text:p>0.0984</text:p>
          </table:table-cell>
          <table:table-cell office:value-type="float" office:value="0.09875" table:style-name="dataCell">
            <text:p>0.09875</text:p>
          </table:table-cell>
          <table:table-cell office:value-type="string" table:style-name="dataCell">
            <text:p>14:27</text:p>
          </table:table-cell>
          <table:table-cell office:value-type="string" table:style-name="dataCell">
            <text:p>14:5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36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1% | VWAP +1.47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8" table:style-name="dataCell">
            <text:p>38</text:p>
          </table:table-cell>
          <table:table-cell office:value-type="string" table:style-name="coinLong">
            <text:p>ALGO</text:p>
          </table:table-cell>
          <table:table-cell office:value-type="string" table:style-name="dataCell">
            <text:p>USDT</text:p>
          </table:table-cell>
          <table:table-cell office:value-type="float" office:value="0.1321" table:style-name="dataCell">
            <text:p>0.1321</text:p>
          </table:table-cell>
          <table:table-cell office:value-type="float" office:value="0.1325" table:style-name="dataCell">
            <text:p>0.1325</text:p>
          </table:table-cell>
          <table:table-cell office:value-type="string" table:style-name="dataCell">
            <text:p>14:27</text:p>
          </table:table-cell>
          <table:table-cell office:value-type="string" table:style-name="dataCell">
            <text:p>14:5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3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20% | VWAP +2.4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39" table:style-name="dataCell">
            <text:p>39</text:p>
          </table:table-cell>
          <table:table-cell office:value-type="string" table:style-name="coinShort">
            <text:p>SUI</text:p>
          </table:table-cell>
          <table:table-cell office:value-type="string" table:style-name="dataCell">
            <text:p>USDT</text:p>
          </table:table-cell>
          <table:table-cell office:value-type="float" office:value="0.9005" table:style-name="dataCell">
            <text:p>0.9005</text:p>
          </table:table-cell>
          <table:table-cell office:value-type="float" office:value="0.9028" table:style-name="dataCell">
            <text:p>0.9028</text:p>
          </table:table-cell>
          <table:table-cell office:value-type="string" table:style-name="dataCell">
            <text:p>15:10</text:p>
          </table:table-cell>
          <table:table-cell office:value-type="string" table:style-name="dataCell">
            <text:p>15:40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26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0% | VOL 2.0x | VWAP -0.28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0" table:style-name="dataCell">
            <text:p>40</text:p>
          </table:table-cell>
          <table:table-cell office:value-type="string" table:style-name="coinLong">
            <text:p>XLM</text:p>
          </table:table-cell>
          <table:table-cell office:value-type="string" table:style-name="dataCell">
            <text:p>USDT</text:p>
          </table:table-cell>
          <table:table-cell office:value-type="float" office:value="0.2585" table:style-name="dataCell">
            <text:p>0.2585</text:p>
          </table:table-cell>
          <table:table-cell office:value-type="float" office:value="0.2589" table:style-name="dataCell">
            <text:p>0.2589</text:p>
          </table:table-cell>
          <table:table-cell office:value-type="string" table:style-name="dataCell">
            <text:p>15:10</text:p>
          </table:table-cell>
          <table:table-cell office:value-type="string" table:style-name="dataCell">
            <text:p>15:40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15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0x | VWAP +3.68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1" table:style-name="dataCell">
            <text:p>41</text:p>
          </table:table-cell>
          <table:table-cell office:value-type="string" table:style-name="coinLong">
            <text:p>TON</text:p>
          </table:table-cell>
          <table:table-cell office:value-type="string" table:style-name="dataCell">
            <text:p>USDT</text:p>
          </table:table-cell>
          <table:table-cell office:value-type="float" office:value="1.908" table:style-name="dataCell">
            <text:p>1.908</text:p>
          </table:table-cell>
          <table:table-cell office:value-type="float" office:value="1.906" table:style-name="dataCell">
            <text:p>1.906</text:p>
          </table:table-cell>
          <table:table-cell office:value-type="string" table:style-name="dataCell">
            <text:p>15:39</text:p>
          </table:table-cell>
          <table:table-cell office:value-type="string" table:style-name="dataCell">
            <text:p>16:09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1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3.2x | VWAP +0.9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2" table:style-name="dataCell">
            <text:p>42</text:p>
          </table:table-cell>
          <table:table-cell office:value-type="string" table:style-name="coinLong">
            <text:p>HBAR</text:p>
          </table:table-cell>
          <table:table-cell office:value-type="string" table:style-name="dataCell">
            <text:p>USDT</text:p>
          </table:table-cell>
          <table:table-cell office:value-type="float" office:value="0.09815" table:style-name="dataCell">
            <text:p>0.09815</text:p>
          </table:table-cell>
          <table:table-cell office:value-type="float" office:value="0.09844" table:style-name="dataCell">
            <text:p>0.09844</text:p>
          </table:table-cell>
          <table:table-cell office:value-type="string" table:style-name="dataCell">
            <text:p>15:39</text:p>
          </table:table-cell>
          <table:table-cell office:value-type="string" table:style-name="dataCell">
            <text:p>16:09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3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2x | VWAP +0.4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3" table:style-name="dataCell">
            <text:p>43</text:p>
          </table:table-cell>
          <table:table-cell office:value-type="string" table:style-name="coinLong">
            <text:p>BNB</text:p>
          </table:table-cell>
          <table:table-cell office:value-type="string" table:style-name="dataCell">
            <text:p>USDT</text:p>
          </table:table-cell>
          <table:table-cell office:value-type="float" office:value="732.39" table:style-name="dataCell">
            <text:p>732.39</text:p>
          </table:table-cell>
          <table:table-cell office:value-type="float" office:value="727.84" table:style-name="dataCell">
            <text:p>727.84</text:p>
          </table:table-cell>
          <table:table-cell office:value-type="string" table:style-name="dataCell">
            <text:p>16:32</text:p>
          </table:table-cell>
          <table:table-cell office:value-type="string" table:style-name="dataCell">
            <text:p>17:02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62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EMA 0.16% | VOL 2.4x | VWAP +1.14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4" table:style-name="dataCell">
            <text:p>44</text:p>
          </table:table-cell>
          <table:table-cell office:value-type="string" table:style-name="coinShort">
            <text:p>UNI</text:p>
          </table:table-cell>
          <table:table-cell office:value-type="string" table:style-name="dataCell">
            <text:p>USDT</text:p>
          </table:table-cell>
          <table:table-cell office:value-type="float" office:value="3.032" table:style-name="dataCell">
            <text:p>3.032</text:p>
          </table:table-cell>
          <table:table-cell office:value-type="float" office:value="2.992" table:style-name="dataCell">
            <text:p>2.992</text:p>
          </table:table-cell>
          <table:table-cell office:value-type="string" table:style-name="dataCell">
            <text:p>16:57</text:p>
          </table:table-cell>
          <table:table-cell office:value-type="string" table:style-name="dataCell">
            <text:p>17:2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1.32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EMA 0.02% | VWAP -0.07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5" table:style-name="dataCell">
            <text:p>45</text:p>
          </table:table-cell>
          <table:table-cell office:value-type="string" table:style-name="coinShort">
            <text:p>ETC</text:p>
          </table:table-cell>
          <table:table-cell office:value-type="string" table:style-name="dataCell">
            <text:p>USDT</text:p>
          </table:table-cell>
          <table:table-cell office:value-type="float" office:value="8.18" table:style-name="dataCell">
            <text:p>8.18</text:p>
          </table:table-cell>
          <table:table-cell office:value-type="float" office:value="8.11" table:style-name="dataCell">
            <text:p>8.11</text:p>
          </table:table-cell>
          <table:table-cell office:value-type="string" table:style-name="dataCell">
            <text:p>16:57</text:p>
          </table:table-cell>
          <table:table-cell office:value-type="string" table:style-name="dataCell">
            <text:p>17:2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86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1% | VWAP -0.31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6" table:style-name="dataCell">
            <text:p>46</text:p>
          </table:table-cell>
          <table:table-cell office:value-type="string" table:style-name="coinShort">
            <text:p>ETH</text:p>
          </table:table-cell>
          <table:table-cell office:value-type="string" table:style-name="dataCell">
            <text:p>USDT</text:p>
          </table:table-cell>
          <table:table-cell office:value-type="float" office:value="2019.0" table:style-name="dataCell">
            <text:p>2019</text:p>
          </table:table-cell>
          <table:table-cell office:value-type="float" office:value="2012.25" table:style-name="dataCell">
            <text:p>2012.25</text:p>
          </table:table-cell>
          <table:table-cell office:value-type="string" table:style-name="dataCell">
            <text:p>17:03</text:p>
          </table:table-cell>
          <table:table-cell office:value-type="string" table:style-name="dataCell">
            <text:p>17:33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33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0% | VWAP -0.15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7" table:style-name="dataCell">
            <text:p>47</text:p>
          </table:table-cell>
          <table:table-cell office:value-type="string" table:style-name="coinShort">
            <text:p>FIL</text:p>
          </table:table-cell>
          <table:table-cell office:value-type="string" table:style-name="dataCell">
            <text:p>USDT</text:p>
          </table:table-cell>
          <table:table-cell office:value-type="float" office:value="0.953" table:style-name="dataCell">
            <text:p>0.953</text:p>
          </table:table-cell>
          <table:table-cell office:value-type="float" office:value="0.943" table:style-name="dataCell">
            <text:p>0.943</text:p>
          </table:table-cell>
          <table:table-cell office:value-type="string" table:style-name="dataCell">
            <text:p>17:03</text:p>
          </table:table-cell>
          <table:table-cell office:value-type="string" table:style-name="dataCell">
            <text:p>17:33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1.05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2% | VWAP -0.75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8" table:style-name="dataCell">
            <text:p>48</text:p>
          </table:table-cell>
          <table:table-cell office:value-type="string" table:style-name="coinShort">
            <text:p>ARB</text:p>
          </table:table-cell>
          <table:table-cell office:value-type="string" table:style-name="dataCell">
            <text:p>USDT</text:p>
          </table:table-cell>
          <table:table-cell office:value-type="float" office:value="0.1022" table:style-name="dataCell">
            <text:p>0.1022</text:p>
          </table:table-cell>
          <table:table-cell office:value-type="float" office:value="0.1013" table:style-name="dataCell">
            <text:p>0.1013</text:p>
          </table:table-cell>
          <table:table-cell office:value-type="string" table:style-name="dataCell">
            <text:p>17:03</text:p>
          </table:table-cell>
          <table:table-cell office:value-type="string" table:style-name="dataCell">
            <text:p>17:33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88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1% | VWAP -0.64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49" table:style-name="dataCell">
            <text:p>49</text:p>
          </table:table-cell>
          <table:table-cell office:value-type="string" table:style-name="coinLong">
            <text:p>DOGE</text:p>
          </table:table-cell>
          <table:table-cell office:value-type="string" table:style-name="dataCell">
            <text:p>USDT</text:p>
          </table:table-cell>
          <table:table-cell office:value-type="float" office:value="0.09995" table:style-name="dataCell">
            <text:p>0.09995</text:p>
          </table:table-cell>
          <table:table-cell office:value-type="float" office:value="0.10005" table:style-name="dataCell">
            <text:p>0.10005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8:0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1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9 | BB 0.24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0" table:style-name="dataCell">
            <text:p>50</text:p>
          </table:table-cell>
          <table:table-cell office:value-type="string" table:style-name="coinLong">
            <text:p>SOL</text:p>
          </table:table-cell>
          <table:table-cell office:value-type="string" table:style-name="dataCell">
            <text:p>USDT</text:p>
          </table:table-cell>
          <table:table-cell office:value-type="float" office:value="82.02" table:style-name="dataCell">
            <text:p>82.02</text:p>
          </table:table-cell>
          <table:table-cell office:value-type="float" office:value="82.03" table:style-name="dataCell">
            <text:p>82.03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8:0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0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8 | BB 0.35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1" table:style-name="dataCell">
            <text:p>51</text:p>
          </table:table-cell>
          <table:table-cell office:value-type="string" table:style-name="coinLong">
            <text:p>ADA</text:p>
          </table:table-cell>
          <table:table-cell office:value-type="string" table:style-name="dataCell">
            <text:p>USDT</text:p>
          </table:table-cell>
          <table:table-cell office:value-type="float" office:value="0.2343" table:style-name="dataCell">
            <text:p>0.2343</text:p>
          </table:table-cell>
          <table:table-cell office:value-type="float" office:value="0.2342" table:style-name="dataCell">
            <text:p>0.2342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8:07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04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6 | BB 0.44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2" table:style-name="dataCell">
            <text:p>52</text:p>
          </table:table-cell>
          <table:table-cell office:value-type="string" table:style-name="coinLong">
            <text:p>LINK</text:p>
          </table:table-cell>
          <table:table-cell office:value-type="string" table:style-name="dataCell">
            <text:p>USDT</text:p>
          </table:table-cell>
          <table:table-cell office:value-type="float" office:value="9.101" table:style-name="dataCell">
            <text:p>9.101</text:p>
          </table:table-cell>
          <table:table-cell office:value-type="float" office:value="9.102" table:style-name="dataCell">
            <text:p>9.102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8:0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0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9 | BB 0.3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3" table:style-name="dataCell">
            <text:p>53</text:p>
          </table:table-cell>
          <table:table-cell office:value-type="string" table:style-name="coinLong">
            <text:p>LTC</text:p>
          </table:table-cell>
          <table:table-cell office:value-type="string" table:style-name="dataCell">
            <text:p>USDT</text:p>
          </table:table-cell>
          <table:table-cell office:value-type="float" office:value="52.0" table:style-name="dataCell">
            <text:p>52</text:p>
          </table:table-cell>
          <table:table-cell office:value-type="float" office:value="52.05" table:style-name="dataCell">
            <text:p>52.05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8:0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1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9 | BB 0.24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4" table:style-name="dataCell">
            <text:p>54</text:p>
          </table:table-cell>
          <table:table-cell office:value-type="string" table:style-name="coinLong">
            <text:p>APT</text:p>
          </table:table-cell>
          <table:table-cell office:value-type="string" table:style-name="dataCell">
            <text:p>USDT</text:p>
          </table:table-cell>
          <table:table-cell office:value-type="float" office:value="0.922" table:style-name="dataCell">
            <text:p>0.922</text:p>
          </table:table-cell>
          <table:table-cell office:value-type="float" office:value="0.92" table:style-name="dataCell">
            <text:p>0.92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8:07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22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5 | BB 0.6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5" table:style-name="dataCell">
            <text:p>55</text:p>
          </table:table-cell>
          <table:table-cell office:value-type="string" table:style-name="coinLong">
            <text:p>VET</text:p>
          </table:table-cell>
          <table:table-cell office:value-type="string" table:style-name="dataCell">
            <text:p>USDT</text:p>
          </table:table-cell>
          <table:table-cell office:value-type="float" office:value="0.006" table:style-name="dataCell">
            <text:p>0.006</text:p>
          </table:table-cell>
          <table:table-cell office:value-type="float" office:value="0.006018" table:style-name="dataCell">
            <text:p>0.006018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8:07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3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6 | BB 0.49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6" table:style-name="dataCell">
            <text:p>56</text:p>
          </table:table-cell>
          <table:table-cell office:value-type="string" table:style-name="coinShort">
            <text:p>BTC</text:p>
          </table:table-cell>
          <table:table-cell office:value-type="string" table:style-name="dataCell">
            <text:p>USDT</text:p>
          </table:table-cell>
          <table:table-cell office:value-type="float" office:value="73596.62" table:style-name="dataCell">
            <text:p>73596.62</text:p>
          </table:table-cell>
          <table:table-cell office:value-type="float" office:value="73673.45" table:style-name="dataCell">
            <text:p>73673.45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7:52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1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3% | VOL 3.0x | VWAP -0.33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7" table:style-name="dataCell">
            <text:p>57</text:p>
          </table:table-cell>
          <table:table-cell office:value-type="string" table:style-name="coinShort">
            <text:p>OP</text:p>
          </table:table-cell>
          <table:table-cell office:value-type="string" table:style-name="dataCell">
            <text:p>USDT</text:p>
          </table:table-cell>
          <table:table-cell office:value-type="float" office:value="0.1173" table:style-name="dataCell">
            <text:p>0.1173</text:p>
          </table:table-cell>
          <table:table-cell office:value-type="float" office:value="0.1173" table:style-name="dataCell">
            <text:p>0.1173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7:52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0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10% | VOL 7.4x | VWAP -1.12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8" table:style-name="dataCell">
            <text:p>58</text:p>
          </table:table-cell>
          <table:table-cell office:value-type="string" table:style-name="coinShort">
            <text:p>SUI</text:p>
          </table:table-cell>
          <table:table-cell office:value-type="string" table:style-name="dataCell">
            <text:p>USDT</text:p>
          </table:table-cell>
          <table:table-cell office:value-type="float" office:value="0.8756" table:style-name="dataCell">
            <text:p>0.8756</text:p>
          </table:table-cell>
          <table:table-cell office:value-type="float" office:value="0.8782" table:style-name="dataCell">
            <text:p>0.8782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7:52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3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23% | VOL 15.0x | VWAP -1.50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59" table:style-name="dataCell">
            <text:p>59</text:p>
          </table:table-cell>
          <table:table-cell office:value-type="string" table:style-name="coinShort">
            <text:p>ATOM</text:p>
          </table:table-cell>
          <table:table-cell office:value-type="string" table:style-name="dataCell">
            <text:p>USDT</text:p>
          </table:table-cell>
          <table:table-cell office:value-type="float" office:value="1.967" table:style-name="dataCell">
            <text:p>1.967</text:p>
          </table:table-cell>
          <table:table-cell office:value-type="float" office:value="1.965" table:style-name="dataCell">
            <text:p>1.965</text:p>
          </table:table-cell>
          <table:table-cell office:value-type="string" table:style-name="dataCell">
            <text:p>17:22</text:p>
          </table:table-cell>
          <table:table-cell office:value-type="string" table:style-name="dataCell">
            <text:p>17:52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10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10% | VWAP -1.42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0" table:style-name="dataCell">
            <text:p>60</text:p>
          </table:table-cell>
          <table:table-cell office:value-type="string" table:style-name="coinLong">
            <text:p>BTC</text:p>
          </table:table-cell>
          <table:table-cell office:value-type="string" table:style-name="dataCell">
            <text:p>USDT</text:p>
          </table:table-cell>
          <table:table-cell office:value-type="float" office:value="73603.26" table:style-name="dataCell">
            <text:p>73603.26</text:p>
          </table:table-cell>
          <table:table-cell office:value-type="float" office:value="73625.99" table:style-name="dataCell">
            <text:p>73625.99</text:p>
          </table:table-cell>
          <table:table-cell office:value-type="string" table:style-name="dataCell">
            <text:p>17:31</text:p>
          </table:table-cell>
          <table:table-cell office:value-type="string" table:style-name="dataCell">
            <text:p>18:01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03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30 | BB 0.0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1" table:style-name="dataCell">
            <text:p>61</text:p>
          </table:table-cell>
          <table:table-cell office:value-type="string" table:style-name="coinLong">
            <text:p>AVAX</text:p>
          </table:table-cell>
          <table:table-cell office:value-type="string" table:style-name="dataCell">
            <text:p>USDT</text:p>
          </table:table-cell>
          <table:table-cell office:value-type="float" office:value="8.894" table:style-name="dataCell">
            <text:p>8.894</text:p>
          </table:table-cell>
          <table:table-cell office:value-type="float" office:value="8.884" table:style-name="dataCell">
            <text:p>8.884</text:p>
          </table:table-cell>
          <table:table-cell office:value-type="string" table:style-name="dataCell">
            <text:p>17:31</text:p>
          </table:table-cell>
          <table:table-cell office:value-type="string" table:style-name="dataCell">
            <text:p>18:01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1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5 | BB 0.22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2" table:style-name="dataCell">
            <text:p>62</text:p>
          </table:table-cell>
          <table:table-cell office:value-type="string" table:style-name="coinShort">
            <text:p>ETC</text:p>
          </table:table-cell>
          <table:table-cell office:value-type="string" table:style-name="dataCell">
            <text:p>USDT</text:p>
          </table:table-cell>
          <table:table-cell office:value-type="float" office:value="8.11" table:style-name="dataCell">
            <text:p>8.11</text:p>
          </table:table-cell>
          <table:table-cell office:value-type="float" office:value="8.1" table:style-name="dataCell">
            <text:p>8.1</text:p>
          </table:table-cell>
          <table:table-cell office:value-type="string" table:style-name="dataCell">
            <text:p>17:31</text:p>
          </table:table-cell>
          <table:table-cell office:value-type="string" table:style-name="dataCell">
            <text:p>18:01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12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7.3x | VWAP -0.65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3" table:style-name="dataCell">
            <text:p>63</text:p>
          </table:table-cell>
          <table:table-cell office:value-type="string" table:style-name="coinLong">
            <text:p>INJ</text:p>
          </table:table-cell>
          <table:table-cell office:value-type="string" table:style-name="dataCell">
            <text:p>USDT</text:p>
          </table:table-cell>
          <table:table-cell office:value-type="float" office:value="6.437" table:style-name="dataCell">
            <text:p>6.437</text:p>
          </table:table-cell>
          <table:table-cell office:value-type="float" office:value="6.369" table:style-name="dataCell">
            <text:p>6.369</text:p>
          </table:table-cell>
          <table:table-cell office:value-type="string" table:style-name="dataCell">
            <text:p>20:47</text:p>
          </table:table-cell>
          <table:table-cell office:value-type="string" table:style-name="dataCell">
            <text:p>21:17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1.06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7% | VWAP +0.04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4" table:style-name="dataCell">
            <text:p>64</text:p>
          </table:table-cell>
          <table:table-cell office:value-type="string" table:style-name="coinShort">
            <text:p>ETH</text:p>
          </table:table-cell>
          <table:table-cell office:value-type="string" table:style-name="dataCell">
            <text:p>USDT</text:p>
          </table:table-cell>
          <table:table-cell office:value-type="float" office:value="1999.65" table:style-name="dataCell">
            <text:p>1999.65</text:p>
          </table:table-cell>
          <table:table-cell office:value-type="float" office:value="1999.55" table:style-name="dataCell">
            <text:p>1999.55</text:p>
          </table:table-cell>
          <table:table-cell office:value-type="string" table:style-name="dataCell">
            <text:p>21:50</text:p>
          </table:table-cell>
          <table:table-cell office:value-type="string" table:style-name="dataCell">
            <text:p>22:20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0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0% | VWAP -0.35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5" table:style-name="dataCell">
            <text:p>65</text:p>
          </table:table-cell>
          <table:table-cell office:value-type="string" table:style-name="coinLong">
            <text:p>SHIB</text:p>
          </table:table-cell>
          <table:table-cell office:value-type="string" table:style-name="dataCell">
            <text:p>USDT</text:p>
          </table:table-cell>
          <table:table-cell office:value-type="float" office:value="5.45e-06" table:style-name="dataCell">
            <text:p>0.00000545</text:p>
          </table:table-cell>
          <table:table-cell office:value-type="float" office:value="5.46e-06" table:style-name="dataCell">
            <text:p>0.00000546</text:p>
          </table:table-cell>
          <table:table-cell office:value-type="string" table:style-name="dataCell">
            <text:p>23:06</text:p>
          </table:table-cell>
          <table:table-cell office:value-type="string" table:style-name="dataCell">
            <text:p>23:36</text:p>
          </table:table-cell>
          <table:table-cell office:value-type="string" table:style-name="dataCell">
            <text:p>31/05/2026</text:p>
          </table:table-cell>
          <table:table-cell office:value-type="string" table:style-name="resWin">
            <text:p>WIN +0.18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5x | VWAP +0.15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6" table:style-name="dataCell">
            <text:p>66</text:p>
          </table:table-cell>
          <table:table-cell office:value-type="string" table:style-name="coinShort">
            <text:p>ATOM</text:p>
          </table:table-cell>
          <table:table-cell office:value-type="string" table:style-name="dataCell">
            <text:p>USDT</text:p>
          </table:table-cell>
          <table:table-cell office:value-type="float" office:value="1.927" table:style-name="dataCell">
            <text:p>1.927</text:p>
          </table:table-cell>
          <table:table-cell office:value-type="float" office:value="1.937" table:style-name="dataCell">
            <text:p>1.937</text:p>
          </table:table-cell>
          <table:table-cell office:value-type="string" table:style-name="dataCell">
            <text:p>23:06</text:p>
          </table:table-cell>
          <table:table-cell office:value-type="string" table:style-name="dataCell">
            <text:p>23:36</text:p>
          </table:table-cell>
          <table:table-cell office:value-type="string" table:style-name="dataCell">
            <text:p>31/05/2026</text:p>
          </table:table-cell>
          <table:table-cell office:value-type="string" table:style-name="resLoss">
            <text:p>LOSS -0.52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2x | VWAP -0.48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7" table:style-name="dataCell">
            <text:p>67</text:p>
          </table:table-cell>
          <table:table-cell office:value-type="string" table:style-name="coinLong">
            <text:p>LINK</text:p>
          </table:table-cell>
          <table:table-cell office:value-type="string" table:style-name="dataCell">
            <text:p>USDT</text:p>
          </table:table-cell>
          <table:table-cell office:value-type="float" office:value="9.11" table:style-name="dataCell">
            <text:p>9.11</text:p>
          </table:table-cell>
          <table:table-cell office:value-type="float" office:value="9.127" table:style-name="dataCell">
            <text:p>9.127</text:p>
          </table:table-cell>
          <table:table-cell office:value-type="string" table:style-name="dataCell">
            <text:p>00:17</text:p>
          </table:table-cell>
          <table:table-cell office:value-type="string" table:style-name="dataCell">
            <text:p>00:47</text:p>
          </table:table-cell>
          <table:table-cell office:value-type="string" table:style-name="dataCell">
            <text:p>01/06/2026</text:p>
          </table:table-cell>
          <table:table-cell office:value-type="string" table:style-name="resWin">
            <text:p>WIN +0.19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EMA 0.01% | VWAP +0.70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NEUTRAL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8" table:style-name="dataCell">
            <text:p>68</text:p>
          </table:table-cell>
          <table:table-cell office:value-type="string" table:style-name="coinLong">
            <text:p>ALGO</text:p>
          </table:table-cell>
          <table:table-cell office:value-type="string" table:style-name="dataCell">
            <text:p>USDT</text:p>
          </table:table-cell>
          <table:table-cell office:value-type="float" office:value="0.129" table:style-name="dataCell">
            <text:p>0.129</text:p>
          </table:table-cell>
          <table:table-cell office:value-type="float" office:value="0.1286" table:style-name="dataCell">
            <text:p>0.1286</text:p>
          </table:table-cell>
          <table:table-cell office:value-type="string" table:style-name="dataCell">
            <text:p>00:17</text:p>
          </table:table-cell>
          <table:table-cell office:value-type="string" table:style-name="dataCell">
            <text:p>00:47</text:p>
          </table:table-cell>
          <table:table-cell office:value-type="string" table:style-name="dataCell">
            <text:p>01/06/2026</text:p>
          </table:table-cell>
          <table:table-cell office:value-type="string" table:style-name="resLoss">
            <text:p>LOSS -0.3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EMA 0.24% | VWAP +2.43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69" table:style-name="dataCell">
            <text:p>69</text:p>
          </table:table-cell>
          <table:table-cell office:value-type="string" table:style-name="coinLong">
            <text:p>INJ</text:p>
          </table:table-cell>
          <table:table-cell office:value-type="string" table:style-name="dataCell">
            <text:p>USDT</text:p>
          </table:table-cell>
          <table:table-cell office:value-type="float" office:value="6.632" table:style-name="dataCell">
            <text:p>6.632</text:p>
          </table:table-cell>
          <table:table-cell office:value-type="float" office:value="6.503" table:style-name="dataCell">
            <text:p>6.503</text:p>
          </table:table-cell>
          <table:table-cell office:value-type="string" table:style-name="dataCell">
            <text:p>09:03</text:p>
          </table:table-cell>
          <table:table-cell office:value-type="string" table:style-name="dataCell">
            <text:p>09:33</text:p>
          </table:table-cell>
          <table:table-cell office:value-type="string" table:style-name="dataCell">
            <text:p>01/06/2026</text:p>
          </table:table-cell>
          <table:table-cell office:value-type="string" table:style-name="resLoss">
            <text:p>LOSS -1.95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2% | VWAP +0.86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0" table:style-name="dataCell">
            <text:p>70</text:p>
          </table:table-cell>
          <table:table-cell office:value-type="string" table:style-name="coinLong">
            <text:p>SHIB</text:p>
          </table:table-cell>
          <table:table-cell office:value-type="string" table:style-name="dataCell">
            <text:p>USDT</text:p>
          </table:table-cell>
          <table:table-cell office:value-type="float" office:value="5.43e-06" table:style-name="dataCell">
            <text:p>0.00000543</text:p>
          </table:table-cell>
          <table:table-cell office:value-type="float" office:value="5.45e-06" table:style-name="dataCell">
            <text:p>0.00000545</text:p>
          </table:table-cell>
          <table:table-cell office:value-type="string" table:style-name="dataCell">
            <text:p>09:37</text:p>
          </table:table-cell>
          <table:table-cell office:value-type="string" table:style-name="dataCell">
            <text:p>10:07</text:p>
          </table:table-cell>
          <table:table-cell office:value-type="string" table:style-name="dataCell">
            <text:p>01/06/2026</text:p>
          </table:table-cell>
          <table:table-cell office:value-type="string" table:style-name="resWin">
            <text:p>WIN +0.37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RSI 25 | BB 0.11%</text:p>
          </table:table-cell>
          <table:table-cell office:value-type="string" table:style-name="coinLong">
            <text:p>Long</text:p>
          </table:table-cell>
          <table:table-cell office:value-type="string" table:style-name="dataCell">
            <text:p>UP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1" table:style-name="dataCell">
            <text:p>71</text:p>
          </table:table-cell>
          <table:table-cell office:value-type="string" table:style-name="coinShort">
            <text:p>BTC</text:p>
          </table:table-cell>
          <table:table-cell office:value-type="string" table:style-name="dataCell">
            <text:p>USDT</text:p>
          </table:table-cell>
          <table:table-cell office:value-type="float" office:value="72831.44" table:style-name="dataCell">
            <text:p>72831.44</text:p>
          </table:table-cell>
          <table:table-cell office:value-type="float" office:value="72693.82" table:style-name="dataCell">
            <text:p>72693.82</text:p>
          </table:table-cell>
          <table:table-cell office:value-type="string" table:style-name="dataCell">
            <text:p>11:03</text:p>
          </table:table-cell>
          <table:table-cell office:value-type="string" table:style-name="dataCell">
            <text:p>11:33</text:p>
          </table:table-cell>
          <table:table-cell office:value-type="string" table:style-name="dataCell">
            <text:p>01/06/2026</text:p>
          </table:table-cell>
          <table:table-cell office:value-type="string" table:style-name="resWin">
            <text:p>WIN +0.19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1x | VWAP -0.58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2" table:style-name="dataCell">
            <text:p>72</text:p>
          </table:table-cell>
          <table:table-cell office:value-type="string" table:style-name="coinShort">
            <text:p>ATOM</text:p>
          </table:table-cell>
          <table:table-cell office:value-type="string" table:style-name="dataCell">
            <text:p>USDT</text:p>
          </table:table-cell>
          <table:table-cell office:value-type="float" office:value="1.943" table:style-name="dataCell">
            <text:p>1.943</text:p>
          </table:table-cell>
          <table:table-cell office:value-type="float" office:value="1.944" table:style-name="dataCell">
            <text:p>1.944</text:p>
          </table:table-cell>
          <table:table-cell office:value-type="string" table:style-name="dataCell">
            <text:p>11:56</text:p>
          </table:table-cell>
          <table:table-cell office:value-type="string" table:style-name="dataCell">
            <text:p>12:26</text:p>
          </table:table-cell>
          <table:table-cell office:value-type="string" table:style-name="dataCell">
            <text:p>01/06/2026</text:p>
          </table:table-cell>
          <table:table-cell office:value-type="string" table:style-name="resLoss">
            <text:p>LOSS -0.05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VOL 2.3x | VWAP -0.45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3" table:style-name="dataCell">
            <text:p>73</text:p>
          </table:table-cell>
          <table:table-cell office:value-type="string" table:style-name="coinShort">
            <text:p>AVAX</text:p>
          </table:table-cell>
          <table:table-cell office:value-type="string" table:style-name="dataCell">
            <text:p>USDT</text:p>
          </table:table-cell>
          <table:table-cell office:value-type="float" office:value="8.681" table:style-name="dataCell">
            <text:p>8.681</text:p>
          </table:table-cell>
          <table:table-cell office:value-type="float" office:value="8.692" table:style-name="dataCell">
            <text:p>8.692</text:p>
          </table:table-cell>
          <table:table-cell office:value-type="string" table:style-name="dataCell">
            <text:p>12:24</text:p>
          </table:table-cell>
          <table:table-cell office:value-type="string" table:style-name="dataCell">
            <text:p>12:54</text:p>
          </table:table-cell>
          <table:table-cell office:value-type="string" table:style-name="dataCell">
            <text:p>02/06/2026</text:p>
          </table:table-cell>
          <table:table-cell office:value-type="string" table:style-name="resLoss">
            <text:p>LOSS -0.13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1% | VWAP -0.58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4" table:style-name="dataCell">
            <text:p>74</text:p>
          </table:table-cell>
          <table:table-cell office:value-type="string" table:style-name="coinShort">
            <text:p>XRP</text:p>
          </table:table-cell>
          <table:table-cell office:value-type="string" table:style-name="dataCell">
            <text:p>USDT</text:p>
          </table:table-cell>
          <table:table-cell office:value-type="float" office:value="1.2606" table:style-name="dataCell">
            <text:p>1.2606</text:p>
          </table:table-cell>
          <table:table-cell office:value-type="float" office:value="1.2605" table:style-name="dataCell">
            <text:p>1.2605</text:p>
          </table:table-cell>
          <table:table-cell office:value-type="string" table:style-name="dataCell">
            <text:p>12:24</text:p>
          </table:table-cell>
          <table:table-cell office:value-type="string" table:style-name="dataCell">
            <text:p>12:54</text:p>
          </table:table-cell>
          <table:table-cell office:value-type="string" table:style-name="dataCell">
            <text:p>02/06/2026</text:p>
          </table:table-cell>
          <table:table-cell office:value-type="string" table:style-name="resWin">
            <text:p>WIN +0.0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2% | VWAP -0.64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5" table:style-name="dataCell">
            <text:p>75</text:p>
          </table:table-cell>
          <table:table-cell office:value-type="string" table:style-name="coinShort">
            <text:p>UNI</text:p>
          </table:table-cell>
          <table:table-cell office:value-type="string" table:style-name="dataCell">
            <text:p>USDT</text:p>
          </table:table-cell>
          <table:table-cell office:value-type="float" office:value="2.9" table:style-name="dataCell">
            <text:p>2.9</text:p>
          </table:table-cell>
          <table:table-cell office:value-type="float" office:value="2.902" table:style-name="dataCell">
            <text:p>2.902</text:p>
          </table:table-cell>
          <table:table-cell office:value-type="string" table:style-name="dataCell">
            <text:p>12:24</text:p>
          </table:table-cell>
          <table:table-cell office:value-type="string" table:style-name="dataCell">
            <text:p>12:54</text:p>
          </table:table-cell>
          <table:table-cell office:value-type="string" table:style-name="dataCell">
            <text:p>02/06/2026</text:p>
          </table:table-cell>
          <table:table-cell office:value-type="string" table:style-name="resLoss">
            <text:p>LOSS -0.07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1% | VWAP -0.69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6" table:style-name="dataCell">
            <text:p>76</text:p>
          </table:table-cell>
          <table:table-cell office:value-type="string" table:style-name="coinShort">
            <text:p>ATOM</text:p>
          </table:table-cell>
          <table:table-cell office:value-type="string" table:style-name="dataCell">
            <text:p>USDT</text:p>
          </table:table-cell>
          <table:table-cell office:value-type="float" office:value="1.864" table:style-name="dataCell">
            <text:p>1.864</text:p>
          </table:table-cell>
          <table:table-cell office:value-type="float" office:value="1.862" table:style-name="dataCell">
            <text:p>1.862</text:p>
          </table:table-cell>
          <table:table-cell office:value-type="string" table:style-name="dataCell">
            <text:p>12:24</text:p>
          </table:table-cell>
          <table:table-cell office:value-type="string" table:style-name="dataCell">
            <text:p>12:54</text:p>
          </table:table-cell>
          <table:table-cell office:value-type="string" table:style-name="dataCell">
            <text:p>02/06/2026</text:p>
          </table:table-cell>
          <table:table-cell office:value-type="string" table:style-name="resWin">
            <text:p>WIN +0.11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1% | VWAP -0.50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7" table:style-name="dataCell">
            <text:p>77</text:p>
          </table:table-cell>
          <table:table-cell office:value-type="string" table:style-name="coinShort">
            <text:p>ETC</text:p>
          </table:table-cell>
          <table:table-cell office:value-type="string" table:style-name="dataCell">
            <text:p>USDT</text:p>
          </table:table-cell>
          <table:table-cell office:value-type="float" office:value="7.94" table:style-name="dataCell">
            <text:p>7.94</text:p>
          </table:table-cell>
          <table:table-cell office:value-type="float" office:value="7.96" table:style-name="dataCell">
            <text:p>7.96</text:p>
          </table:table-cell>
          <table:table-cell office:value-type="string" table:style-name="dataCell">
            <text:p>12:24</text:p>
          </table:table-cell>
          <table:table-cell office:value-type="string" table:style-name="dataCell">
            <text:p>12:54</text:p>
          </table:table-cell>
          <table:table-cell office:value-type="string" table:style-name="dataCell">
            <text:p>02/06/2026</text:p>
          </table:table-cell>
          <table:table-cell office:value-type="string" table:style-name="resLoss">
            <text:p>LOSS -0.25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5% | VWAP -0.67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8" table:style-name="dataCell">
            <text:p>78</text:p>
          </table:table-cell>
          <table:table-cell office:value-type="string" table:style-name="coinShort">
            <text:p>TRX</text:p>
          </table:table-cell>
          <table:table-cell office:value-type="string" table:style-name="dataCell">
            <text:p>USDT</text:p>
          </table:table-cell>
          <table:table-cell office:value-type="float" office:value="0.3406" table:style-name="dataCell">
            <text:p>0.3406</text:p>
          </table:table-cell>
          <table:table-cell office:value-type="float" office:value="0.3382" table:style-name="dataCell">
            <text:p>0.3382</text:p>
          </table:table-cell>
          <table:table-cell office:value-type="string" table:style-name="dataCell">
            <text:p>16:48</text:p>
          </table:table-cell>
          <table:table-cell office:value-type="string" table:style-name="dataCell">
            <text:p>17:18</text:p>
          </table:table-cell>
          <table:table-cell office:value-type="string" table:style-name="dataCell">
            <text:p>02/06/2026</text:p>
          </table:table-cell>
          <table:table-cell office:value-type="string" table:style-name="resWin">
            <text:p>WIN +0.70%</text:p>
          </table:table-cell>
          <table:table-cell office:value-type="float" office:value="3.0" table:style-name="dataCell">
            <text:p>3</text:p>
          </table:table-cell>
          <table:table-cell office:value-type="string" table:style-name="dataCell">
            <text:p>MACD 0.01% | VOL 3.3x | VWAP -0.21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  <table:table-row>
          <table:table-cell office:value-type="float" office:value="79" table:style-name="dataCell">
            <text:p>79</text:p>
          </table:table-cell>
          <table:table-cell office:value-type="string" table:style-name="coinShort">
            <text:p>BNB</text:p>
          </table:table-cell>
          <table:table-cell office:value-type="string" table:style-name="dataCell">
            <text:p>USDT</text:p>
          </table:table-cell>
          <table:table-cell office:value-type="float" office:value="675.48" table:style-name="dataCell">
            <text:p>675.48</text:p>
          </table:table-cell>
          <table:table-cell office:value-type="float" office:value="675.33" table:style-name="dataCell">
            <text:p>675.33</text:p>
          </table:table-cell>
          <table:table-cell office:value-type="string" table:style-name="dataCell">
            <text:p>16:48</text:p>
          </table:table-cell>
          <table:table-cell office:value-type="string" table:style-name="dataCell">
            <text:p>17:18</text:p>
          </table:table-cell>
          <table:table-cell office:value-type="string" table:style-name="dataCell">
            <text:p>02/06/2026</text:p>
          </table:table-cell>
          <table:table-cell office:value-type="string" table:style-name="resWin">
            <text:p>WIN +0.02%</text:p>
          </table:table-cell>
          <table:table-cell office:value-type="float" office:value="2.0" table:style-name="dataCell">
            <text:p>2</text:p>
          </table:table-cell>
          <table:table-cell office:value-type="string" table:style-name="dataCell">
            <text:p>MACD 0.01% | VWAP -0.27%</text:p>
          </table:table-cell>
          <table:table-cell office:value-type="string" table:style-name="coinShort">
            <text:p>Short</text:p>
          </table:table-cell>
          <table:table-cell office:value-type="string" table:style-name="dataCell">
            <text:p>DOWN</text:p>
          </table:table-cell>
          <table:table-cell office:value-type="string" table:style-name="noteCell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