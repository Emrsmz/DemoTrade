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automatic-styles>
    <style:style style:name="hdrCell" style:family="table-cell" style:display-name="hdrCell">
      <style:table-cell-properties fo:border="0.5pt solid #d9d9d9" style:vertical-align="middle" fo:background-color="#1F3864"/>
      <style:text-properties fo:color="#FFFFFF" fo:font-weight="bold"/>
      <style:paragraph-properties fo:text-align="center"/>
    </style:style>
    <style:style style:name="dataCell" style:family="table-cell" style:display-name="dataCell">
      <style:table-cell-properties fo:border="0.5pt solid #d9d9d9" style:vertical-align="middle"/>
      <style:paragraph-properties fo:text-align="center"/>
    </style:style>
    <style:style style:name="coinLong" style:family="table-cell" style:display-name="coinLong">
      <style:table-cell-properties fo:border="0.5pt solid #d9d9d9" style:vertical-align="middle"/>
      <style:text-properties fo:color="#107C41" fo:font-weight="bold"/>
      <style:paragraph-properties fo:text-align="center"/>
    </style:style>
    <style:style style:name="resWin" style:family="table-cell" style:display-name="resWin">
      <style:table-cell-properties fo:border="0.5pt solid #d9d9d9" style:vertical-align="middle"/>
      <style:text-properties fo:color="#107C41" fo:font-weight="bold"/>
      <style:paragraph-properties fo:text-align="center"/>
    </style:style>
    <style:style style:name="resLoss" style:family="table-cell" style:display-name="resLoss">
      <style:table-cell-properties fo:border="0.5pt solid #d9d9d9" style:vertical-align="middle"/>
      <style:text-properties fo:color="#C00000" fo:font-weight="bold"/>
      <style:paragraph-properties fo:text-align="center"/>
    </style:style>
    <style:style style:name="noteCell" style:family="table-cell" style:display-name="noteCell">
      <style:table-cell-properties fo:border="0.5pt solid #d9d9d9" style:vertical-align="middle"/>
      <style:paragraph-properties fo:text-align="left"/>
    </style:style>
    <style:style style:name="co0" style:family="table-column" style:display-name="co0">
      <style:table-column-properties style:column-width="1.6cm"/>
    </style:style>
    <style:style style:name="co1" style:family="table-column" style:display-name="co1">
      <style:table-column-properties style:column-width="2.6cm"/>
    </style:style>
    <style:style style:name="co2" style:family="table-column" style:display-name="co2">
      <style:table-column-properties style:column-width="1.4cm"/>
    </style:style>
    <style:style style:name="co3" style:family="table-column" style:display-name="co3">
      <style:table-column-properties style:column-width="3.2cm"/>
    </style:style>
    <style:style style:name="co4" style:family="table-column" style:display-name="co4">
      <style:table-column-properties style:column-width="3.2cm"/>
    </style:style>
    <style:style style:name="co5" style:family="table-column" style:display-name="co5">
      <style:table-column-properties style:column-width="2.4cm"/>
    </style:style>
    <style:style style:name="co6" style:family="table-column" style:display-name="co6">
      <style:table-column-properties style:column-width="2.4cm"/>
    </style:style>
    <style:style style:name="co7" style:family="table-column" style:display-name="co7">
      <style:table-column-properties style:column-width="2.9cm"/>
    </style:style>
    <style:style style:name="co8" style:family="table-column" style:display-name="co8">
      <style:table-column-properties style:column-width="3.2cm"/>
    </style:style>
    <style:style style:name="co9" style:family="table-column" style:display-name="co9">
      <style:table-column-properties style:column-width="1.6cm"/>
    </style:style>
    <style:style style:name="co10" style:family="table-column" style:display-name="co10">
      <style:table-column-properties style:column-width="7cm"/>
    </style:style>
    <style:style style:name="co11" style:family="table-column" style:display-name="co11">
      <style:table-column-properties style:column-width="2.2cm"/>
    </style:style>
    <style:style style:name="co12" style:family="table-column" style:display-name="co12">
      <style:table-column-properties style:column-width="2.2cm"/>
    </style:style>
    <style:style style:name="co13" style:family="table-column" style:display-name="co13">
      <style:table-column-properties style:column-width="8cm"/>
    </style:style>
  </office:automatic-styles>
  <office:body>
    <office:spreadsheet>
      <table:table table:name="Sheet1">
        <table:table-column table:style-name="co0"/>
        <table:table-column table:style-name="co1"/>
        <table:table-column table:style-name="co2"/>
        <table:table-column table:style-name="co3"/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13"/>
        <table:table-row>
          <table:table-cell office:value-type="string" table:style-name="hdrCell">
            <text:p>Trade</text:p>
          </table:table-cell>
          <table:table-cell office:value-type="string" table:style-name="hdrCell">
            <text:p>Stock Name</text:p>
          </table:table-cell>
          <table:table-cell office:value-type="string" table:style-name="hdrCell">
            <text:p>To</text:p>
          </table:table-cell>
          <table:table-cell office:value-type="string" table:style-name="hdrCell">
            <text:p>Başlangıç Fiyatı</text:p>
          </table:table-cell>
          <table:table-cell office:value-type="string" table:style-name="hdrCell">
            <text:p>Kapanış Fiyatı</text:p>
          </table:table-cell>
          <table:table-cell office:value-type="string" table:style-name="hdrCell">
            <text:p>Açılış Saat</text:p>
          </table:table-cell>
          <table:table-cell office:value-type="string" table:style-name="hdrCell">
            <text:p>Kap Saat</text:p>
          </table:table-cell>
          <table:table-cell office:value-type="string" table:style-name="hdrCell">
            <text:p>Tarih</text:p>
          </table:table-cell>
          <table:table-cell office:value-type="string" table:style-name="hdrCell">
            <text:p>Result</text:p>
          </table:table-cell>
          <table:table-cell office:value-type="string" table:style-name="hdrCell">
            <text:p>Signal</text:p>
          </table:table-cell>
          <table:table-cell office:value-type="string" table:style-name="hdrCell">
            <text:p>Signal Detail</text:p>
          </table:table-cell>
          <table:table-cell office:value-type="string" table:style-name="hdrCell">
            <text:p>Pozisyon</text:p>
          </table:table-cell>
          <table:table-cell office:value-type="string" table:style-name="hdrCell">
            <text:p>Trend (1s)</text:p>
          </table:table-cell>
          <table:table-cell office:value-type="string" table:style-name="hdrCell">
            <text:p>Not</text:p>
          </table:table-cell>
        </table:table-row>
        <table:table-row>
          <table:table-cell office:value-type="float" office:value="1" table:style-name="dataCell">
            <text:p>1</text:p>
          </table:table-cell>
          <table:table-cell office:value-type="string" table:style-name="coinLong">
            <text:p>SHIB</text:p>
          </table:table-cell>
          <table:table-cell office:value-type="string" table:style-name="dataCell">
            <text:p>USDT</text:p>
          </table:table-cell>
          <table:table-cell office:value-type="float" office:value="5.86e-06" table:style-name="dataCell">
            <text:p>0.00000586</text:p>
          </table:table-cell>
          <table:table-cell office:value-type="float" office:value="5.8e-06" table:style-name="dataCell">
            <text:p>0.0000058</text:p>
          </table:table-cell>
          <table:table-cell office:value-type="string" table:style-name="dataCell">
            <text:p>16:00</text:p>
          </table:table-cell>
          <table:table-cell office:value-type="string" table:style-name="dataCell">
            <text:p>16:00</text:p>
          </table:table-cell>
          <table:table-cell office:value-type="string" table:style-name="dataCell">
            <text:p>10/03/2026</text:p>
          </table:table-cell>
          <table:table-cell office:value-type="string" table:style-name="resLoss">
            <text:p>LOSS -1.02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14% | VOL 11.8x | VWAP +1.61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2" table:style-name="dataCell">
            <text:p>2</text:p>
          </table:table-cell>
          <table:table-cell office:value-type="string" table:style-name="coinLong">
            <text:p>XRP</text:p>
          </table:table-cell>
          <table:table-cell office:value-type="string" table:style-name="dataCell">
            <text:p>USDT</text:p>
          </table:table-cell>
          <table:table-cell office:value-type="float" office:value="1.4343" table:style-name="dataCell">
            <text:p>1.4343</text:p>
          </table:table-cell>
          <table:table-cell office:value-type="float" office:value="1.3921" table:style-name="dataCell">
            <text:p>1.3921</text:p>
          </table:table-cell>
          <table:table-cell office:value-type="string" table:style-name="dataCell">
            <text:p>17:45</text:p>
          </table:table-cell>
          <table:table-cell office:value-type="string" table:style-name="dataCell">
            <text:p>17:45</text:p>
          </table:table-cell>
          <table:table-cell office:value-type="string" table:style-name="dataCell">
            <text:p>10/03/2026</text:p>
          </table:table-cell>
          <table:table-cell office:value-type="string" table:style-name="resLoss">
            <text:p>LOSS -2.94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21% | EMA 0.39% | VWAP +2.09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3" table:style-name="dataCell">
            <text:p>3</text:p>
          </table:table-cell>
          <table:table-cell office:value-type="string" table:style-name="coinLong">
            <text:p>ADA</text:p>
          </table:table-cell>
          <table:table-cell office:value-type="string" table:style-name="dataCell">
            <text:p>USDT</text:p>
          </table:table-cell>
          <table:table-cell office:value-type="float" office:value="0.2721" table:style-name="dataCell">
            <text:p>0.2721</text:p>
          </table:table-cell>
          <table:table-cell office:value-type="float" office:value="0.2638" table:style-name="dataCell">
            <text:p>0.2638</text:p>
          </table:table-cell>
          <table:table-cell office:value-type="string" table:style-name="dataCell">
            <text:p>17:45</text:p>
          </table:table-cell>
          <table:table-cell office:value-type="string" table:style-name="dataCell">
            <text:p>17:45</text:p>
          </table:table-cell>
          <table:table-cell office:value-type="string" table:style-name="dataCell">
            <text:p>10/03/2026</text:p>
          </table:table-cell>
          <table:table-cell office:value-type="string" table:style-name="resLoss">
            <text:p>LOSS -3.05%</text:p>
          </table:table-cell>
          <table:table-cell office:value-type="float" office:value="4.0" table:style-name="dataCell">
            <text:p>4</text:p>
          </table:table-cell>
          <table:table-cell office:value-type="string" table:style-name="dataCell">
            <text:p>MACD 0.12% | EMA 0.40% | VOL 3.9x | VWAP +2.34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4" table:style-name="dataCell">
            <text:p>4</text:p>
          </table:table-cell>
          <table:table-cell office:value-type="string" table:style-name="coinLong">
            <text:p>AVAX</text:p>
          </table:table-cell>
          <table:table-cell office:value-type="string" table:style-name="dataCell">
            <text:p>USDT</text:p>
          </table:table-cell>
          <table:table-cell office:value-type="float" office:value="9.65" table:style-name="dataCell">
            <text:p>9.65</text:p>
          </table:table-cell>
          <table:table-cell office:value-type="float" office:value="9.68" table:style-name="dataCell">
            <text:p>9.68</text:p>
          </table:table-cell>
          <table:table-cell office:value-type="string" table:style-name="dataCell">
            <text:p>17:45</text:p>
          </table:table-cell>
          <table:table-cell office:value-type="string" table:style-name="dataCell">
            <text:p>17:45</text:p>
          </table:table-cell>
          <table:table-cell office:value-type="string" table:style-name="dataCell">
            <text:p>10/03/2026</text:p>
          </table:table-cell>
          <table:table-cell office:value-type="string" table:style-name="resWin">
            <text:p>WIN +0.31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EMA 0.09% | VOL 5.4x | VWAP +1.67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5" table:style-name="dataCell">
            <text:p>5</text:p>
          </table:table-cell>
          <table:table-cell office:value-type="string" table:style-name="coinLong">
            <text:p>XLM</text:p>
          </table:table-cell>
          <table:table-cell office:value-type="string" table:style-name="dataCell">
            <text:p>USDT</text:p>
          </table:table-cell>
          <table:table-cell office:value-type="float" office:value="0.1669" table:style-name="dataCell">
            <text:p>0.1669</text:p>
          </table:table-cell>
          <table:table-cell office:value-type="float" office:value="0.1603" table:style-name="dataCell">
            <text:p>0.1603</text:p>
          </table:table-cell>
          <table:table-cell office:value-type="string" table:style-name="dataCell">
            <text:p>17:45</text:p>
          </table:table-cell>
          <table:table-cell office:value-type="string" table:style-name="dataCell">
            <text:p>17:45</text:p>
          </table:table-cell>
          <table:table-cell office:value-type="string" table:style-name="dataCell">
            <text:p>10/03/2026</text:p>
          </table:table-cell>
          <table:table-cell office:value-type="string" table:style-name="resLoss">
            <text:p>LOSS -3.95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13% | VOL 4.1x | VWAP +2.90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6" table:style-name="dataCell">
            <text:p>6</text:p>
          </table:table-cell>
          <table:table-cell office:value-type="string" table:style-name="coinLong">
            <text:p>INJ</text:p>
          </table:table-cell>
          <table:table-cell office:value-type="string" table:style-name="dataCell">
            <text:p>USDT</text:p>
          </table:table-cell>
          <table:table-cell office:value-type="float" office:value="3.023" table:style-name="dataCell">
            <text:p>3.023</text:p>
          </table:table-cell>
          <table:table-cell office:value-type="float" office:value="2.99" table:style-name="dataCell">
            <text:p>2.99</text:p>
          </table:table-cell>
          <table:table-cell office:value-type="string" table:style-name="dataCell">
            <text:p>17:45</text:p>
          </table:table-cell>
          <table:table-cell office:value-type="string" table:style-name="dataCell">
            <text:p>17:45</text:p>
          </table:table-cell>
          <table:table-cell office:value-type="string" table:style-name="dataCell">
            <text:p>10/03/2026</text:p>
          </table:table-cell>
          <table:table-cell office:value-type="string" table:style-name="resLoss">
            <text:p>LOSS -1.09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09% | EMA 0.26% | VWAP +1.90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7" table:style-name="dataCell">
            <text:p>7</text:p>
          </table:table-cell>
          <table:table-cell office:value-type="string" table:style-name="coinLong">
            <text:p>HBAR</text:p>
          </table:table-cell>
          <table:table-cell office:value-type="string" table:style-name="dataCell">
            <text:p>USDT</text:p>
          </table:table-cell>
          <table:table-cell office:value-type="float" office:value="0.09874" table:style-name="dataCell">
            <text:p>0.09874</text:p>
          </table:table-cell>
          <table:table-cell office:value-type="float" office:value="0.09412" table:style-name="dataCell">
            <text:p>0.09412</text:p>
          </table:table-cell>
          <table:table-cell office:value-type="string" table:style-name="dataCell">
            <text:p>17:45</text:p>
          </table:table-cell>
          <table:table-cell office:value-type="string" table:style-name="dataCell">
            <text:p>08:45</text:p>
          </table:table-cell>
          <table:table-cell office:value-type="string" table:style-name="dataCell">
            <text:p>10/03/2026</text:p>
          </table:table-cell>
          <table:table-cell office:value-type="string" table:style-name="resLoss">
            <text:p>LOSS -4.68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12% | VOL 4.0x | VWAP +1.97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8" table:style-name="dataCell">
            <text:p>8</text:p>
          </table:table-cell>
          <table:table-cell office:value-type="string" table:style-name="coinLong">
            <text:p>ETH</text:p>
          </table:table-cell>
          <table:table-cell office:value-type="string" table:style-name="dataCell">
            <text:p>USDT</text:p>
          </table:table-cell>
          <table:table-cell office:value-type="float" office:value="2238.4" table:style-name="dataCell">
            <text:p>2238.4</text:p>
          </table:table-cell>
          <table:table-cell office:value-type="float" office:value="2316.4" table:style-name="dataCell">
            <text:p>2316.4</text:p>
          </table:table-cell>
          <table:table-cell office:value-type="string" table:style-name="dataCell">
            <text:p>06:30</text:p>
          </table:table-cell>
          <table:table-cell office:value-type="string" table:style-name="dataCell">
            <text:p>06:30</text:p>
          </table:table-cell>
          <table:table-cell office:value-type="string" table:style-name="dataCell">
            <text:p>16/03/2026</text:p>
          </table:table-cell>
          <table:table-cell office:value-type="string" table:style-name="resWin">
            <text:p>WIN +3.48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11% | VOL 7.1x | VWAP +1.86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9" table:style-name="dataCell">
            <text:p>9</text:p>
          </table:table-cell>
          <table:table-cell office:value-type="string" table:style-name="coinLong">
            <text:p>ADA</text:p>
          </table:table-cell>
          <table:table-cell office:value-type="string" table:style-name="dataCell">
            <text:p>USDT</text:p>
          </table:table-cell>
          <table:table-cell office:value-type="float" office:value="0.2782" table:style-name="dataCell">
            <text:p>0.2782</text:p>
          </table:table-cell>
          <table:table-cell office:value-type="float" office:value="0.2853" table:style-name="dataCell">
            <text:p>0.2853</text:p>
          </table:table-cell>
          <table:table-cell office:value-type="string" table:style-name="dataCell">
            <text:p>06:30</text:p>
          </table:table-cell>
          <table:table-cell office:value-type="string" table:style-name="dataCell">
            <text:p>06:30</text:p>
          </table:table-cell>
          <table:table-cell office:value-type="string" table:style-name="dataCell">
            <text:p>16/03/2026</text:p>
          </table:table-cell>
          <table:table-cell office:value-type="string" table:style-name="resWin">
            <text:p>WIN +2.55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13% | VOL 8.0x | VWAP +1.92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10" table:style-name="dataCell">
            <text:p>10</text:p>
          </table:table-cell>
          <table:table-cell office:value-type="string" table:style-name="coinLong">
            <text:p>AVAX</text:p>
          </table:table-cell>
          <table:table-cell office:value-type="string" table:style-name="dataCell">
            <text:p>USDT</text:p>
          </table:table-cell>
          <table:table-cell office:value-type="float" office:value="10.3" table:style-name="dataCell">
            <text:p>10.3</text:p>
          </table:table-cell>
          <table:table-cell office:value-type="float" office:value="10.3" table:style-name="dataCell">
            <text:p>10.3</text:p>
          </table:table-cell>
          <table:table-cell office:value-type="string" table:style-name="dataCell">
            <text:p>06:30</text:p>
          </table:table-cell>
          <table:table-cell office:value-type="string" table:style-name="dataCell">
            <text:p>06:30</text:p>
          </table:table-cell>
          <table:table-cell office:value-type="string" table:style-name="dataCell">
            <text:p>16/03/2026</text:p>
          </table:table-cell>
          <table:table-cell office:value-type="string" table:style-name="resWin">
            <text:p>WIN +0.00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22% | VOL 10.8x | VWAP +2.12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11" table:style-name="dataCell">
            <text:p>11</text:p>
          </table:table-cell>
          <table:table-cell office:value-type="string" table:style-name="coinLong">
            <text:p>LINK</text:p>
          </table:table-cell>
          <table:table-cell office:value-type="string" table:style-name="dataCell">
            <text:p>USDT</text:p>
          </table:table-cell>
          <table:table-cell office:value-type="float" office:value="9.72" table:style-name="dataCell">
            <text:p>9.72</text:p>
          </table:table-cell>
          <table:table-cell office:value-type="float" office:value="9.8" table:style-name="dataCell">
            <text:p>9.8</text:p>
          </table:table-cell>
          <table:table-cell office:value-type="string" table:style-name="dataCell">
            <text:p>06:30</text:p>
          </table:table-cell>
          <table:table-cell office:value-type="string" table:style-name="dataCell">
            <text:p>06:30</text:p>
          </table:table-cell>
          <table:table-cell office:value-type="string" table:style-name="dataCell">
            <text:p>16/03/2026</text:p>
          </table:table-cell>
          <table:table-cell office:value-type="string" table:style-name="resWin">
            <text:p>WIN +0.82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11% | VOL 6.5x | VWAP +1.83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12" table:style-name="dataCell">
            <text:p>12</text:p>
          </table:table-cell>
          <table:table-cell office:value-type="string" table:style-name="coinLong">
            <text:p>APT</text:p>
          </table:table-cell>
          <table:table-cell office:value-type="string" table:style-name="dataCell">
            <text:p>USDT</text:p>
          </table:table-cell>
          <table:table-cell office:value-type="float" office:value="1.012" table:style-name="dataCell">
            <text:p>1.012</text:p>
          </table:table-cell>
          <table:table-cell office:value-type="float" office:value="0.988" table:style-name="dataCell">
            <text:p>0.988</text:p>
          </table:table-cell>
          <table:table-cell office:value-type="string" table:style-name="dataCell">
            <text:p>16:45</text:p>
          </table:table-cell>
          <table:table-cell office:value-type="string" table:style-name="dataCell">
            <text:p>16:45</text:p>
          </table:table-cell>
          <table:table-cell office:value-type="string" table:style-name="dataCell">
            <text:p>16/03/2026</text:p>
          </table:table-cell>
          <table:table-cell office:value-type="string" table:style-name="resLoss">
            <text:p>LOSS -2.37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15% | VOL 9.0x | VWAP +1.76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13" table:style-name="dataCell">
            <text:p>13</text:p>
          </table:table-cell>
          <table:table-cell office:value-type="string" table:style-name="coinLong">
            <text:p>FIL</text:p>
          </table:table-cell>
          <table:table-cell office:value-type="string" table:style-name="dataCell">
            <text:p>USDT</text:p>
          </table:table-cell>
          <table:table-cell office:value-type="float" office:value="0.954" table:style-name="dataCell">
            <text:p>0.954</text:p>
          </table:table-cell>
          <table:table-cell office:value-type="float" office:value="0.965" table:style-name="dataCell">
            <text:p>0.965</text:p>
          </table:table-cell>
          <table:table-cell office:value-type="string" table:style-name="dataCell">
            <text:p>19:15</text:p>
          </table:table-cell>
          <table:table-cell office:value-type="string" table:style-name="dataCell">
            <text:p>19:15</text:p>
          </table:table-cell>
          <table:table-cell office:value-type="string" table:style-name="dataCell">
            <text:p>16/03/2026</text:p>
          </table:table-cell>
          <table:table-cell office:value-type="string" table:style-name="resWin">
            <text:p>WIN +1.15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10% | EMA 0.11% | VWAP +1.83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14" table:style-name="dataCell">
            <text:p>14</text:p>
          </table:table-cell>
          <table:table-cell office:value-type="string" table:style-name="coinLong">
            <text:p>XRP</text:p>
          </table:table-cell>
          <table:table-cell office:value-type="string" table:style-name="dataCell">
            <text:p>USDT</text:p>
          </table:table-cell>
          <table:table-cell office:value-type="float" office:value="1.5744" table:style-name="dataCell">
            <text:p>1.5744</text:p>
          </table:table-cell>
          <table:table-cell office:value-type="float" office:value="1.5189" table:style-name="dataCell">
            <text:p>1.5189</text:p>
          </table:table-cell>
          <table:table-cell office:value-type="string" table:style-name="dataCell">
            <text:p>04:15</text:p>
          </table:table-cell>
          <table:table-cell office:value-type="string" table:style-name="dataCell">
            <text:p>04:15</text:p>
          </table:table-cell>
          <table:table-cell office:value-type="string" table:style-name="dataCell">
            <text:p>17/03/2026</text:p>
          </table:table-cell>
          <table:table-cell office:value-type="string" table:style-name="resLoss">
            <text:p>LOSS -3.53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09% | VOL 4.4x | VWAP +1.79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15" table:style-name="dataCell">
            <text:p>15</text:p>
          </table:table-cell>
          <table:table-cell office:value-type="string" table:style-name="coinLong">
            <text:p>SOL</text:p>
          </table:table-cell>
          <table:table-cell office:value-type="string" table:style-name="dataCell">
            <text:p>USDT</text:p>
          </table:table-cell>
          <table:table-cell office:value-type="float" office:value="81.16" table:style-name="dataCell">
            <text:p>81.16</text:p>
          </table:table-cell>
          <table:table-cell office:value-type="float" office:value="79.9" table:style-name="dataCell">
            <text:p>79.9</text:p>
          </table:table-cell>
          <table:table-cell office:value-type="string" table:style-name="dataCell">
            <text:p>18:00</text:p>
          </table:table-cell>
          <table:table-cell office:value-type="string" table:style-name="dataCell">
            <text:p>14:45</text:p>
          </table:table-cell>
          <table:table-cell office:value-type="string" table:style-name="dataCell">
            <text:p>04/04/2026</text:p>
          </table:table-cell>
          <table:table-cell office:value-type="string" table:style-name="resLoss">
            <text:p>LOSS -1.55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09% | EMA 0.11% | VOL 18.6x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NEUTRAL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16" table:style-name="dataCell">
            <text:p>16</text:p>
          </table:table-cell>
          <table:table-cell office:value-type="string" table:style-name="coinLong">
            <text:p>DOGE</text:p>
          </table:table-cell>
          <table:table-cell office:value-type="string" table:style-name="dataCell">
            <text:p>USDT</text:p>
          </table:table-cell>
          <table:table-cell office:value-type="float" office:value="0.09302" table:style-name="dataCell">
            <text:p>0.09302</text:p>
          </table:table-cell>
          <table:table-cell office:value-type="float" office:value="0.09053" table:style-name="dataCell">
            <text:p>0.09053</text:p>
          </table:table-cell>
          <table:table-cell office:value-type="string" table:style-name="dataCell">
            <text:p>12:30</text:p>
          </table:table-cell>
          <table:table-cell office:value-type="string" table:style-name="dataCell">
            <text:p>06:45</text:p>
          </table:table-cell>
          <table:table-cell office:value-type="string" table:style-name="dataCell">
            <text:p>06/04/2026</text:p>
          </table:table-cell>
          <table:table-cell office:value-type="string" table:style-name="resLoss">
            <text:p>LOSS -2.68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08% | EMA 0.15% | VOL 6.3x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17" table:style-name="dataCell">
            <text:p>17</text:p>
          </table:table-cell>
          <table:table-cell office:value-type="string" table:style-name="coinLong">
            <text:p>NEAR</text:p>
          </table:table-cell>
          <table:table-cell office:value-type="string" table:style-name="dataCell">
            <text:p>USDT</text:p>
          </table:table-cell>
          <table:table-cell office:value-type="float" office:value="1.327" table:style-name="dataCell">
            <text:p>1.327</text:p>
          </table:table-cell>
          <table:table-cell office:value-type="float" office:value="1.343" table:style-name="dataCell">
            <text:p>1.343</text:p>
          </table:table-cell>
          <table:table-cell office:value-type="string" table:style-name="dataCell">
            <text:p>08:30</text:p>
          </table:table-cell>
          <table:table-cell office:value-type="string" table:style-name="dataCell">
            <text:p>08:30</text:p>
          </table:table-cell>
          <table:table-cell office:value-type="string" table:style-name="dataCell">
            <text:p>08/04/2026</text:p>
          </table:table-cell>
          <table:table-cell office:value-type="string" table:style-name="resWin">
            <text:p>WIN +1.21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13% | VOL 4.6x | VWAP +1.74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18" table:style-name="dataCell">
            <text:p>18</text:p>
          </table:table-cell>
          <table:table-cell office:value-type="string" table:style-name="coinLong">
            <text:p>UNI</text:p>
          </table:table-cell>
          <table:table-cell office:value-type="string" table:style-name="dataCell">
            <text:p>USDT</text:p>
          </table:table-cell>
          <table:table-cell office:value-type="float" office:value="3.209" table:style-name="dataCell">
            <text:p>3.209</text:p>
          </table:table-cell>
          <table:table-cell office:value-type="float" office:value="3.115" table:style-name="dataCell">
            <text:p>3.115</text:p>
          </table:table-cell>
          <table:table-cell office:value-type="string" table:style-name="dataCell">
            <text:p>01:15</text:p>
          </table:table-cell>
          <table:table-cell office:value-type="string" table:style-name="dataCell">
            <text:p>01:15</text:p>
          </table:table-cell>
          <table:table-cell office:value-type="string" table:style-name="dataCell">
            <text:p>14/04/2026</text:p>
          </table:table-cell>
          <table:table-cell office:value-type="string" table:style-name="resLoss">
            <text:p>LOSS -2.93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17% | VOL 9.9x | VWAP +1.97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NEUTRAL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19" table:style-name="dataCell">
            <text:p>19</text:p>
          </table:table-cell>
          <table:table-cell office:value-type="string" table:style-name="coinLong">
            <text:p>SUI</text:p>
          </table:table-cell>
          <table:table-cell office:value-type="string" table:style-name="dataCell">
            <text:p>USDT</text:p>
          </table:table-cell>
          <table:table-cell office:value-type="float" office:value="0.9571" table:style-name="dataCell">
            <text:p>0.9571</text:p>
          </table:table-cell>
          <table:table-cell office:value-type="float" office:value="0.9289" table:style-name="dataCell">
            <text:p>0.9289</text:p>
          </table:table-cell>
          <table:table-cell office:value-type="string" table:style-name="dataCell">
            <text:p>01:15</text:p>
          </table:table-cell>
          <table:table-cell office:value-type="string" table:style-name="dataCell">
            <text:p>01:15</text:p>
          </table:table-cell>
          <table:table-cell office:value-type="string" table:style-name="dataCell">
            <text:p>14/04/2026</text:p>
          </table:table-cell>
          <table:table-cell office:value-type="string" table:style-name="resLoss">
            <text:p>LOSS -2.95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19% | VOL 7.4x | VWAP +2.39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NEUTRAL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20" table:style-name="dataCell">
            <text:p>20</text:p>
          </table:table-cell>
          <table:table-cell office:value-type="string" table:style-name="coinLong">
            <text:p>BTC</text:p>
          </table:table-cell>
          <table:table-cell office:value-type="string" table:style-name="dataCell">
            <text:p>USDT</text:p>
          </table:table-cell>
          <table:table-cell office:value-type="float" office:value="75525.94" table:style-name="dataCell">
            <text:p>75525.94</text:p>
          </table:table-cell>
          <table:table-cell office:value-type="float" office:value="74063.92" table:style-name="dataCell">
            <text:p>74063.92</text:p>
          </table:table-cell>
          <table:table-cell office:value-type="string" table:style-name="dataCell">
            <text:p>16:45</text:p>
          </table:table-cell>
          <table:table-cell office:value-type="string" table:style-name="dataCell">
            <text:p>16:45</text:p>
          </table:table-cell>
          <table:table-cell office:value-type="string" table:style-name="dataCell">
            <text:p>14/04/2026</text:p>
          </table:table-cell>
          <table:table-cell office:value-type="string" table:style-name="resLoss">
            <text:p>LOSS -1.94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13% | EMA 0.23% | VOL 6.7x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21" table:style-name="dataCell">
            <text:p>21</text:p>
          </table:table-cell>
          <table:table-cell office:value-type="string" table:style-name="coinLong">
            <text:p>DOGE</text:p>
          </table:table-cell>
          <table:table-cell office:value-type="string" table:style-name="dataCell">
            <text:p>USDT</text:p>
          </table:table-cell>
          <table:table-cell office:value-type="float" office:value="0.09707" table:style-name="dataCell">
            <text:p>0.09707</text:p>
          </table:table-cell>
          <table:table-cell office:value-type="float" office:value="0.09344" table:style-name="dataCell">
            <text:p>0.09344</text:p>
          </table:table-cell>
          <table:table-cell office:value-type="string" table:style-name="dataCell">
            <text:p>16:45</text:p>
          </table:table-cell>
          <table:table-cell office:value-type="string" table:style-name="dataCell">
            <text:p>16:45</text:p>
          </table:table-cell>
          <table:table-cell office:value-type="string" table:style-name="dataCell">
            <text:p>14/04/2026</text:p>
          </table:table-cell>
          <table:table-cell office:value-type="string" table:style-name="resLoss">
            <text:p>LOSS -3.74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19% | VOL 6.9x | VWAP +2.03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22" table:style-name="dataCell">
            <text:p>22</text:p>
          </table:table-cell>
          <table:table-cell office:value-type="string" table:style-name="coinLong">
            <text:p>TRX</text:p>
          </table:table-cell>
          <table:table-cell office:value-type="string" table:style-name="dataCell">
            <text:p>USDT</text:p>
          </table:table-cell>
          <table:table-cell office:value-type="float" office:value="0.3268" table:style-name="dataCell">
            <text:p>0.3268</text:p>
          </table:table-cell>
          <table:table-cell office:value-type="float" office:value="0.3268" table:style-name="dataCell">
            <text:p>0.3268</text:p>
          </table:table-cell>
          <table:table-cell office:value-type="string" table:style-name="dataCell">
            <text:p>15:15</text:p>
          </table:table-cell>
          <table:table-cell office:value-type="string" table:style-name="dataCell">
            <text:p>15:15</text:p>
          </table:table-cell>
          <table:table-cell office:value-type="string" table:style-name="dataCell">
            <text:p>15/04/2026</text:p>
          </table:table-cell>
          <table:table-cell office:value-type="string" table:style-name="resWin">
            <text:p>WIN +0.00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13% | EMA 0.16% | VOL 5.8x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23" table:style-name="dataCell">
            <text:p>23</text:p>
          </table:table-cell>
          <table:table-cell office:value-type="string" table:style-name="coinLong">
            <text:p>DOGE</text:p>
          </table:table-cell>
          <table:table-cell office:value-type="string" table:style-name="dataCell">
            <text:p>USDT</text:p>
          </table:table-cell>
          <table:table-cell office:value-type="float" office:value="0.09642" table:style-name="dataCell">
            <text:p>0.09642</text:p>
          </table:table-cell>
          <table:table-cell office:value-type="float" office:value="0.09774" table:style-name="dataCell">
            <text:p>0.09774</text:p>
          </table:table-cell>
          <table:table-cell office:value-type="string" table:style-name="dataCell">
            <text:p>05:30</text:p>
          </table:table-cell>
          <table:table-cell office:value-type="string" table:style-name="dataCell">
            <text:p>05:30</text:p>
          </table:table-cell>
          <table:table-cell office:value-type="string" table:style-name="dataCell">
            <text:p>16/04/2026</text:p>
          </table:table-cell>
          <table:table-cell office:value-type="string" table:style-name="resWin">
            <text:p>WIN +1.37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13% | EMA 0.24% | VOL 4.5x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24" table:style-name="dataCell">
            <text:p>24</text:p>
          </table:table-cell>
          <table:table-cell office:value-type="string" table:style-name="coinLong">
            <text:p>LINK</text:p>
          </table:table-cell>
          <table:table-cell office:value-type="string" table:style-name="dataCell">
            <text:p>USDT</text:p>
          </table:table-cell>
          <table:table-cell office:value-type="float" office:value="9.46" table:style-name="dataCell">
            <text:p>9.46</text:p>
          </table:table-cell>
          <table:table-cell office:value-type="float" office:value="9.76" table:style-name="dataCell">
            <text:p>9.76</text:p>
          </table:table-cell>
          <table:table-cell office:value-type="string" table:style-name="dataCell">
            <text:p>18:45</text:p>
          </table:table-cell>
          <table:table-cell office:value-type="string" table:style-name="dataCell">
            <text:p>18:45</text:p>
          </table:table-cell>
          <table:table-cell office:value-type="string" table:style-name="dataCell">
            <text:p>16/04/2026</text:p>
          </table:table-cell>
          <table:table-cell office:value-type="string" table:style-name="resWin">
            <text:p>WIN +3.17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16% | EMA 0.27% | VWAP +1.71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25" table:style-name="dataCell">
            <text:p>25</text:p>
          </table:table-cell>
          <table:table-cell office:value-type="string" table:style-name="coinLong">
            <text:p>XLM</text:p>
          </table:table-cell>
          <table:table-cell office:value-type="string" table:style-name="dataCell">
            <text:p>USDT</text:p>
          </table:table-cell>
          <table:table-cell office:value-type="float" office:value="0.1644" table:style-name="dataCell">
            <text:p>0.1644</text:p>
          </table:table-cell>
          <table:table-cell office:value-type="float" office:value="0.1748" table:style-name="dataCell">
            <text:p>0.1748</text:p>
          </table:table-cell>
          <table:table-cell office:value-type="string" table:style-name="dataCell">
            <text:p>18:45</text:p>
          </table:table-cell>
          <table:table-cell office:value-type="string" table:style-name="dataCell">
            <text:p>18:45</text:p>
          </table:table-cell>
          <table:table-cell office:value-type="string" table:style-name="dataCell">
            <text:p>16/04/2026</text:p>
          </table:table-cell>
          <table:table-cell office:value-type="string" table:style-name="resWin">
            <text:p>WIN +6.33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14% | EMA 0.29% | VOL 5.6x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26" table:style-name="dataCell">
            <text:p>26</text:p>
          </table:table-cell>
          <table:table-cell office:value-type="string" table:style-name="coinLong">
            <text:p>HBAR</text:p>
          </table:table-cell>
          <table:table-cell office:value-type="string" table:style-name="dataCell">
            <text:p>USDT</text:p>
          </table:table-cell>
          <table:table-cell office:value-type="float" office:value="0.09094" table:style-name="dataCell">
            <text:p>0.09094</text:p>
          </table:table-cell>
          <table:table-cell office:value-type="float" office:value="0.09022" table:style-name="dataCell">
            <text:p>0.09022</text:p>
          </table:table-cell>
          <table:table-cell office:value-type="string" table:style-name="dataCell">
            <text:p>10:30</text:p>
          </table:table-cell>
          <table:table-cell office:value-type="string" table:style-name="dataCell">
            <text:p>10:30</text:p>
          </table:table-cell>
          <table:table-cell office:value-type="string" table:style-name="dataCell">
            <text:p>17/04/2026</text:p>
          </table:table-cell>
          <table:table-cell office:value-type="string" table:style-name="resLoss">
            <text:p>LOSS -0.79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EMA 0.23% | VOL 4.0x | VWAP +1.61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27" table:style-name="dataCell">
            <text:p>27</text:p>
          </table:table-cell>
          <table:table-cell office:value-type="string" table:style-name="coinLong">
            <text:p>ALGO</text:p>
          </table:table-cell>
          <table:table-cell office:value-type="string" table:style-name="dataCell">
            <text:p>USDT</text:p>
          </table:table-cell>
          <table:table-cell office:value-type="float" office:value="0.1091" table:style-name="dataCell">
            <text:p>0.1091</text:p>
          </table:table-cell>
          <table:table-cell office:value-type="float" office:value="0.1151" table:style-name="dataCell">
            <text:p>0.1151</text:p>
          </table:table-cell>
          <table:table-cell office:value-type="string" table:style-name="dataCell">
            <text:p>18:45</text:p>
          </table:table-cell>
          <table:table-cell office:value-type="string" table:style-name="dataCell">
            <text:p>18:45</text:p>
          </table:table-cell>
          <table:table-cell office:value-type="string" table:style-name="dataCell">
            <text:p>24/04/2026</text:p>
          </table:table-cell>
          <table:table-cell office:value-type="string" table:style-name="resWin">
            <text:p>WIN +5.50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08% | EMA 0.29% | VWAP +1.57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28" table:style-name="dataCell">
            <text:p>28</text:p>
          </table:table-cell>
          <table:table-cell office:value-type="string" table:style-name="coinLong">
            <text:p>OP</text:p>
          </table:table-cell>
          <table:table-cell office:value-type="string" table:style-name="dataCell">
            <text:p>USDT</text:p>
          </table:table-cell>
          <table:table-cell office:value-type="float" office:value="0.1324" table:style-name="dataCell">
            <text:p>0.1324</text:p>
          </table:table-cell>
          <table:table-cell office:value-type="float" office:value="0.1258" table:style-name="dataCell">
            <text:p>0.1258</text:p>
          </table:table-cell>
          <table:table-cell office:value-type="string" table:style-name="dataCell">
            <text:p>11:45</text:p>
          </table:table-cell>
          <table:table-cell office:value-type="string" table:style-name="dataCell">
            <text:p>11:45</text:p>
          </table:table-cell>
          <table:table-cell office:value-type="string" table:style-name="dataCell">
            <text:p>25/04/2026</text:p>
          </table:table-cell>
          <table:table-cell office:value-type="string" table:style-name="resLoss">
            <text:p>LOSS -4.98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08% | VOL 8.1x | VWAP +2.10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29" table:style-name="dataCell">
            <text:p>29</text:p>
          </table:table-cell>
          <table:table-cell office:value-type="string" table:style-name="coinLong">
            <text:p>FIL</text:p>
          </table:table-cell>
          <table:table-cell office:value-type="string" table:style-name="dataCell">
            <text:p>USDT</text:p>
          </table:table-cell>
          <table:table-cell office:value-type="float" office:value="0.963" table:style-name="dataCell">
            <text:p>0.963</text:p>
          </table:table-cell>
          <table:table-cell office:value-type="float" office:value="0.894" table:style-name="dataCell">
            <text:p>0.894</text:p>
          </table:table-cell>
          <table:table-cell office:value-type="string" table:style-name="dataCell">
            <text:p>13:00</text:p>
          </table:table-cell>
          <table:table-cell office:value-type="string" table:style-name="dataCell">
            <text:p>22:45</text:p>
          </table:table-cell>
          <table:table-cell office:value-type="string" table:style-name="dataCell">
            <text:p>29/04/2026</text:p>
          </table:table-cell>
          <table:table-cell office:value-type="string" table:style-name="resLoss">
            <text:p>LOSS -7.17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13% | VOL 6.2x | VWAP +1.66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30" table:style-name="dataCell">
            <text:p>30</text:p>
          </table:table-cell>
          <table:table-cell office:value-type="string" table:style-name="coinLong">
            <text:p>TRX</text:p>
          </table:table-cell>
          <table:table-cell office:value-type="string" table:style-name="dataCell">
            <text:p>USDT</text:p>
          </table:table-cell>
          <table:table-cell office:value-type="float" office:value="0.3371" table:style-name="dataCell">
            <text:p>0.3371</text:p>
          </table:table-cell>
          <table:table-cell office:value-type="float" office:value="0.3387" table:style-name="dataCell">
            <text:p>0.3387</text:p>
          </table:table-cell>
          <table:table-cell office:value-type="string" table:style-name="dataCell">
            <text:p>08:15</text:p>
          </table:table-cell>
          <table:table-cell office:value-type="string" table:style-name="dataCell">
            <text:p>08:15</text:p>
          </table:table-cell>
          <table:table-cell office:value-type="string" table:style-name="dataCell">
            <text:p>03/05/2026</text:p>
          </table:table-cell>
          <table:table-cell office:value-type="string" table:style-name="resWin">
            <text:p>WIN +0.47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14% | EMA 0.17% | VOL 39.6x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31" table:style-name="dataCell">
            <text:p>31</text:p>
          </table:table-cell>
          <table:table-cell office:value-type="string" table:style-name="coinLong">
            <text:p>FIL</text:p>
          </table:table-cell>
          <table:table-cell office:value-type="string" table:style-name="dataCell">
            <text:p>USDT</text:p>
          </table:table-cell>
          <table:table-cell office:value-type="float" office:value="0.948" table:style-name="dataCell">
            <text:p>0.948</text:p>
          </table:table-cell>
          <table:table-cell office:value-type="float" office:value="0.94" table:style-name="dataCell">
            <text:p>0.94</text:p>
          </table:table-cell>
          <table:table-cell office:value-type="string" table:style-name="dataCell">
            <text:p>04:45</text:p>
          </table:table-cell>
          <table:table-cell office:value-type="string" table:style-name="dataCell">
            <text:p>04:45</text:p>
          </table:table-cell>
          <table:table-cell office:value-type="string" table:style-name="dataCell">
            <text:p>04/05/2026</text:p>
          </table:table-cell>
          <table:table-cell office:value-type="string" table:style-name="resLoss">
            <text:p>LOSS -0.84%</text:p>
          </table:table-cell>
          <table:table-cell office:value-type="float" office:value="4.0" table:style-name="dataCell">
            <text:p>4</text:p>
          </table:table-cell>
          <table:table-cell office:value-type="string" table:style-name="dataCell">
            <text:p>MACD 0.17% | EMA 0.26% | VOL 5.5x | VWAP +1.69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32" table:style-name="dataCell">
            <text:p>32</text:p>
          </table:table-cell>
          <table:table-cell office:value-type="string" table:style-name="coinLong">
            <text:p>BTC</text:p>
          </table:table-cell>
          <table:table-cell office:value-type="string" table:style-name="dataCell">
            <text:p>USDT</text:p>
          </table:table-cell>
          <table:table-cell office:value-type="float" office:value="79932.69" table:style-name="dataCell">
            <text:p>79932.69</text:p>
          </table:table-cell>
          <table:table-cell office:value-type="float" office:value="80456.36" table:style-name="dataCell">
            <text:p>80456.36</text:p>
          </table:table-cell>
          <table:table-cell office:value-type="string" table:style-name="dataCell">
            <text:p>05:00</text:p>
          </table:table-cell>
          <table:table-cell office:value-type="string" table:style-name="dataCell">
            <text:p>05:00</text:p>
          </table:table-cell>
          <table:table-cell office:value-type="string" table:style-name="dataCell">
            <text:p>04/05/2026</text:p>
          </table:table-cell>
          <table:table-cell office:value-type="string" table:style-name="resWin">
            <text:p>WIN +0.66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14% | EMA 0.21% | VOL 5.7x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33" table:style-name="dataCell">
            <text:p>33</text:p>
          </table:table-cell>
          <table:table-cell office:value-type="string" table:style-name="coinLong">
            <text:p>BNB</text:p>
          </table:table-cell>
          <table:table-cell office:value-type="string" table:style-name="dataCell">
            <text:p>USDT</text:p>
          </table:table-cell>
          <table:table-cell office:value-type="float" office:value="623.52" table:style-name="dataCell">
            <text:p>623.52</text:p>
          </table:table-cell>
          <table:table-cell office:value-type="float" office:value="625.46" table:style-name="dataCell">
            <text:p>625.46</text:p>
          </table:table-cell>
          <table:table-cell office:value-type="string" table:style-name="dataCell">
            <text:p>05:00</text:p>
          </table:table-cell>
          <table:table-cell office:value-type="string" table:style-name="dataCell">
            <text:p>05:00</text:p>
          </table:table-cell>
          <table:table-cell office:value-type="string" table:style-name="dataCell">
            <text:p>04/05/2026</text:p>
          </table:table-cell>
          <table:table-cell office:value-type="string" table:style-name="resWin">
            <text:p>WIN +0.31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08% | EMA 0.08% | VOL 4.6x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NEUTRAL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34" table:style-name="dataCell">
            <text:p>34</text:p>
          </table:table-cell>
          <table:table-cell office:value-type="string" table:style-name="coinLong">
            <text:p>SOL</text:p>
          </table:table-cell>
          <table:table-cell office:value-type="string" table:style-name="dataCell">
            <text:p>USDT</text:p>
          </table:table-cell>
          <table:table-cell office:value-type="float" office:value="85.01" table:style-name="dataCell">
            <text:p>85.01</text:p>
          </table:table-cell>
          <table:table-cell office:value-type="float" office:value="84.58" table:style-name="dataCell">
            <text:p>84.58</text:p>
          </table:table-cell>
          <table:table-cell office:value-type="string" table:style-name="dataCell">
            <text:p>05:00</text:p>
          </table:table-cell>
          <table:table-cell office:value-type="string" table:style-name="dataCell">
            <text:p>05:00</text:p>
          </table:table-cell>
          <table:table-cell office:value-type="string" table:style-name="dataCell">
            <text:p>04/05/2026</text:p>
          </table:table-cell>
          <table:table-cell office:value-type="string" table:style-name="resLoss">
            <text:p>LOSS -0.51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11% | EMA 0.07% | VOL 4.7x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35" table:style-name="dataCell">
            <text:p>35</text:p>
          </table:table-cell>
          <table:table-cell office:value-type="string" table:style-name="coinLong">
            <text:p>XRP</text:p>
          </table:table-cell>
          <table:table-cell office:value-type="string" table:style-name="dataCell">
            <text:p>USDT</text:p>
          </table:table-cell>
          <table:table-cell office:value-type="float" office:value="1.4062" table:style-name="dataCell">
            <text:p>1.4062</text:p>
          </table:table-cell>
          <table:table-cell office:value-type="float" office:value="1.3984" table:style-name="dataCell">
            <text:p>1.3984</text:p>
          </table:table-cell>
          <table:table-cell office:value-type="string" table:style-name="dataCell">
            <text:p>05:00</text:p>
          </table:table-cell>
          <table:table-cell office:value-type="string" table:style-name="dataCell">
            <text:p>05:00</text:p>
          </table:table-cell>
          <table:table-cell office:value-type="string" table:style-name="dataCell">
            <text:p>04/05/2026</text:p>
          </table:table-cell>
          <table:table-cell office:value-type="string" table:style-name="resLoss">
            <text:p>LOSS -0.55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11% | EMA 0.10% | VOL 4.5x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36" table:style-name="dataCell">
            <text:p>36</text:p>
          </table:table-cell>
          <table:table-cell office:value-type="string" table:style-name="coinLong">
            <text:p>AVAX</text:p>
          </table:table-cell>
          <table:table-cell office:value-type="string" table:style-name="dataCell">
            <text:p>USDT</text:p>
          </table:table-cell>
          <table:table-cell office:value-type="float" office:value="9.21" table:style-name="dataCell">
            <text:p>9.21</text:p>
          </table:table-cell>
          <table:table-cell office:value-type="float" office:value="9.26" table:style-name="dataCell">
            <text:p>9.26</text:p>
          </table:table-cell>
          <table:table-cell office:value-type="string" table:style-name="dataCell">
            <text:p>05:00</text:p>
          </table:table-cell>
          <table:table-cell office:value-type="string" table:style-name="dataCell">
            <text:p>05:00</text:p>
          </table:table-cell>
          <table:table-cell office:value-type="string" table:style-name="dataCell">
            <text:p>04/05/2026</text:p>
          </table:table-cell>
          <table:table-cell office:value-type="string" table:style-name="resWin">
            <text:p>WIN +0.54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12% | EMA 0.11% | VOL 4.1x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NEUTRAL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37" table:style-name="dataCell">
            <text:p>37</text:p>
          </table:table-cell>
          <table:table-cell office:value-type="string" table:style-name="coinLong">
            <text:p>LTC</text:p>
          </table:table-cell>
          <table:table-cell office:value-type="string" table:style-name="dataCell">
            <text:p>USDT</text:p>
          </table:table-cell>
          <table:table-cell office:value-type="float" office:value="55.93" table:style-name="dataCell">
            <text:p>55.93</text:p>
          </table:table-cell>
          <table:table-cell office:value-type="float" office:value="54.96" table:style-name="dataCell">
            <text:p>54.96</text:p>
          </table:table-cell>
          <table:table-cell office:value-type="string" table:style-name="dataCell">
            <text:p>05:00</text:p>
          </table:table-cell>
          <table:table-cell office:value-type="string" table:style-name="dataCell">
            <text:p>02:45</text:p>
          </table:table-cell>
          <table:table-cell office:value-type="string" table:style-name="dataCell">
            <text:p>04/05/2026</text:p>
          </table:table-cell>
          <table:table-cell office:value-type="string" table:style-name="resLoss">
            <text:p>LOSS -1.73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09% | EMA 0.09% | VOL 7.6x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NEUTRAL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38" table:style-name="dataCell">
            <text:p>38</text:p>
          </table:table-cell>
          <table:table-cell office:value-type="string" table:style-name="coinLong">
            <text:p>ETC</text:p>
          </table:table-cell>
          <table:table-cell office:value-type="string" table:style-name="dataCell">
            <text:p>USDT</text:p>
          </table:table-cell>
          <table:table-cell office:value-type="float" office:value="8.6" table:style-name="dataCell">
            <text:p>8.6</text:p>
          </table:table-cell>
          <table:table-cell office:value-type="float" office:value="8.82" table:style-name="dataCell">
            <text:p>8.82</text:p>
          </table:table-cell>
          <table:table-cell office:value-type="string" table:style-name="dataCell">
            <text:p>05:00</text:p>
          </table:table-cell>
          <table:table-cell office:value-type="string" table:style-name="dataCell">
            <text:p>05:00</text:p>
          </table:table-cell>
          <table:table-cell office:value-type="string" table:style-name="dataCell">
            <text:p>04/05/2026</text:p>
          </table:table-cell>
          <table:table-cell office:value-type="string" table:style-name="resWin">
            <text:p>WIN +2.56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12% | EMA 0.21% | VOL 4.4x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39" table:style-name="dataCell">
            <text:p>39</text:p>
          </table:table-cell>
          <table:table-cell office:value-type="string" table:style-name="coinLong">
            <text:p>TON</text:p>
          </table:table-cell>
          <table:table-cell office:value-type="string" table:style-name="dataCell">
            <text:p>USDT</text:p>
          </table:table-cell>
          <table:table-cell office:value-type="float" office:value="1.453" table:style-name="dataCell">
            <text:p>1.453</text:p>
          </table:table-cell>
          <table:table-cell office:value-type="float" office:value="1.788" table:style-name="dataCell">
            <text:p>1.788</text:p>
          </table:table-cell>
          <table:table-cell office:value-type="string" table:style-name="dataCell">
            <text:p>17:45</text:p>
          </table:table-cell>
          <table:table-cell office:value-type="string" table:style-name="dataCell">
            <text:p>17:45</text:p>
          </table:table-cell>
          <table:table-cell office:value-type="string" table:style-name="dataCell">
            <text:p>04/05/2026</text:p>
          </table:table-cell>
          <table:table-cell office:value-type="string" table:style-name="resWin">
            <text:p>WIN +23.06%</text:p>
          </table:table-cell>
          <table:table-cell office:value-type="float" office:value="4.0" table:style-name="dataCell">
            <text:p>4</text:p>
          </table:table-cell>
          <table:table-cell office:value-type="string" table:style-name="dataCell">
            <text:p>MACD 0.34% | EMA 0.48% | VOL 13.4x | VWAP +3.91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40" table:style-name="dataCell">
            <text:p>40</text:p>
          </table:table-cell>
          <table:table-cell office:value-type="string" table:style-name="coinLong">
            <text:p>BCH</text:p>
          </table:table-cell>
          <table:table-cell office:value-type="string" table:style-name="dataCell">
            <text:p>USDT</text:p>
          </table:table-cell>
          <table:table-cell office:value-type="float" office:value="474.2" table:style-name="dataCell">
            <text:p>474.2</text:p>
          </table:table-cell>
          <table:table-cell office:value-type="float" office:value="460.2" table:style-name="dataCell">
            <text:p>460.2</text:p>
          </table:table-cell>
          <table:table-cell office:value-type="string" table:style-name="dataCell">
            <text:p>07:30</text:p>
          </table:table-cell>
          <table:table-cell office:value-type="string" table:style-name="dataCell">
            <text:p>07:30</text:p>
          </table:table-cell>
          <table:table-cell office:value-type="string" table:style-name="dataCell">
            <text:p>06/05/2026</text:p>
          </table:table-cell>
          <table:table-cell office:value-type="string" table:style-name="resLoss">
            <text:p>LOSS -2.95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09% | EMA 0.29% | VOL 214.8x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41" table:style-name="dataCell">
            <text:p>41</text:p>
          </table:table-cell>
          <table:table-cell office:value-type="string" table:style-name="coinLong">
            <text:p>INJ</text:p>
          </table:table-cell>
          <table:table-cell office:value-type="string" table:style-name="dataCell">
            <text:p>USDT</text:p>
          </table:table-cell>
          <table:table-cell office:value-type="float" office:value="4.035" table:style-name="dataCell">
            <text:p>4.035</text:p>
          </table:table-cell>
          <table:table-cell office:value-type="float" office:value="4.233" table:style-name="dataCell">
            <text:p>4.233</text:p>
          </table:table-cell>
          <table:table-cell office:value-type="string" table:style-name="dataCell">
            <text:p>10:45</text:p>
          </table:table-cell>
          <table:table-cell office:value-type="string" table:style-name="dataCell">
            <text:p>10:45</text:p>
          </table:table-cell>
          <table:table-cell office:value-type="string" table:style-name="dataCell">
            <text:p>08/05/2026</text:p>
          </table:table-cell>
          <table:table-cell office:value-type="string" table:style-name="resWin">
            <text:p>WIN +4.91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24% | VOL 7.2x | VWAP +2.81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42" table:style-name="dataCell">
            <text:p>42</text:p>
          </table:table-cell>
          <table:table-cell office:value-type="string" table:style-name="coinLong">
            <text:p>SUI</text:p>
          </table:table-cell>
          <table:table-cell office:value-type="string" table:style-name="dataCell">
            <text:p>USDT</text:p>
          </table:table-cell>
          <table:table-cell office:value-type="float" office:value="1.0666" table:style-name="dataCell">
            <text:p>1.0666</text:p>
          </table:table-cell>
          <table:table-cell office:value-type="float" office:value="1.086" table:style-name="dataCell">
            <text:p>1.086</text:p>
          </table:table-cell>
          <table:table-cell office:value-type="string" table:style-name="dataCell">
            <text:p>03:30</text:p>
          </table:table-cell>
          <table:table-cell office:value-type="string" table:style-name="dataCell">
            <text:p>03:30</text:p>
          </table:table-cell>
          <table:table-cell office:value-type="string" table:style-name="dataCell">
            <text:p>09/05/2026</text:p>
          </table:table-cell>
          <table:table-cell office:value-type="string" table:style-name="resWin">
            <text:p>WIN +1.82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23% | VOL 8.9x | VWAP +2.77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43" table:style-name="dataCell">
            <text:p>43</text:p>
          </table:table-cell>
          <table:table-cell office:value-type="string" table:style-name="coinLong">
            <text:p>UNI</text:p>
          </table:table-cell>
          <table:table-cell office:value-type="string" table:style-name="dataCell">
            <text:p>USDT</text:p>
          </table:table-cell>
          <table:table-cell office:value-type="float" office:value="3.854" table:style-name="dataCell">
            <text:p>3.854</text:p>
          </table:table-cell>
          <table:table-cell office:value-type="float" office:value="3.959" table:style-name="dataCell">
            <text:p>3.959</text:p>
          </table:table-cell>
          <table:table-cell office:value-type="string" table:style-name="dataCell">
            <text:p>08:15</text:p>
          </table:table-cell>
          <table:table-cell office:value-type="string" table:style-name="dataCell">
            <text:p>08:15</text:p>
          </table:table-cell>
          <table:table-cell office:value-type="string" table:style-name="dataCell">
            <text:p>10/05/2026</text:p>
          </table:table-cell>
          <table:table-cell office:value-type="string" table:style-name="resWin">
            <text:p>WIN +2.72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EMA 0.43% | VOL 5.9x | VWAP +2.48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44" table:style-name="dataCell">
            <text:p>44</text:p>
          </table:table-cell>
          <table:table-cell office:value-type="string" table:style-name="coinLong">
            <text:p>VET</text:p>
          </table:table-cell>
          <table:table-cell office:value-type="string" table:style-name="dataCell">
            <text:p>USDT</text:p>
          </table:table-cell>
          <table:table-cell office:value-type="float" office:value="0.007908" table:style-name="dataCell">
            <text:p>0.007908</text:p>
          </table:table-cell>
          <table:table-cell office:value-type="float" office:value="0.007791" table:style-name="dataCell">
            <text:p>0.007791</text:p>
          </table:table-cell>
          <table:table-cell office:value-type="string" table:style-name="dataCell">
            <text:p>15:45</text:p>
          </table:table-cell>
          <table:table-cell office:value-type="string" table:style-name="dataCell">
            <text:p>15:45</text:p>
          </table:table-cell>
          <table:table-cell office:value-type="string" table:style-name="dataCell">
            <text:p>10/05/2026</text:p>
          </table:table-cell>
          <table:table-cell office:value-type="string" table:style-name="resLoss">
            <text:p>LOSS -1.48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15% | VOL 6.0x | VWAP +1.71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45" table:style-name="dataCell">
            <text:p>45</text:p>
          </table:table-cell>
          <table:table-cell office:value-type="string" table:style-name="coinLong">
            <text:p>DOGE</text:p>
          </table:table-cell>
          <table:table-cell office:value-type="string" table:style-name="dataCell">
            <text:p>USDT</text:p>
          </table:table-cell>
          <table:table-cell office:value-type="float" office:value="0.11189" table:style-name="dataCell">
            <text:p>0.11189</text:p>
          </table:table-cell>
          <table:table-cell office:value-type="float" office:value="0.11145" table:style-name="dataCell">
            <text:p>0.11145</text:p>
          </table:table-cell>
          <table:table-cell office:value-type="string" table:style-name="dataCell">
            <text:p>01:45</text:p>
          </table:table-cell>
          <table:table-cell office:value-type="string" table:style-name="dataCell">
            <text:p>01:45</text:p>
          </table:table-cell>
          <table:table-cell office:value-type="string" table:style-name="dataCell">
            <text:p>11/05/2026</text:p>
          </table:table-cell>
          <table:table-cell office:value-type="string" table:style-name="resLoss">
            <text:p>LOSS -0.39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12% | EMA 0.17% | VWAP +2.01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46" table:style-name="dataCell">
            <text:p>46</text:p>
          </table:table-cell>
          <table:table-cell office:value-type="string" table:style-name="coinLong">
            <text:p>INJ</text:p>
          </table:table-cell>
          <table:table-cell office:value-type="string" table:style-name="dataCell">
            <text:p>USDT</text:p>
          </table:table-cell>
          <table:table-cell office:value-type="float" office:value="4.85" table:style-name="dataCell">
            <text:p>4.85</text:p>
          </table:table-cell>
          <table:table-cell office:value-type="float" office:value="5.273" table:style-name="dataCell">
            <text:p>5.273</text:p>
          </table:table-cell>
          <table:table-cell office:value-type="string" table:style-name="dataCell">
            <text:p>20:30</text:p>
          </table:table-cell>
          <table:table-cell office:value-type="string" table:style-name="dataCell">
            <text:p>20:30</text:p>
          </table:table-cell>
          <table:table-cell office:value-type="string" table:style-name="dataCell">
            <text:p>12/05/2026</text:p>
          </table:table-cell>
          <table:table-cell office:value-type="string" table:style-name="resWin">
            <text:p>WIN +8.72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32% | EMA 0.16% | VWAP +1.96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47" table:style-name="dataCell">
            <text:p>47</text:p>
          </table:table-cell>
          <table:table-cell office:value-type="string" table:style-name="coinLong">
            <text:p>NEAR</text:p>
          </table:table-cell>
          <table:table-cell office:value-type="string" table:style-name="dataCell">
            <text:p>USDT</text:p>
          </table:table-cell>
          <table:table-cell office:value-type="float" office:value="1.663" table:style-name="dataCell">
            <text:p>1.663</text:p>
          </table:table-cell>
          <table:table-cell office:value-type="float" office:value="1.589" table:style-name="dataCell">
            <text:p>1.589</text:p>
          </table:table-cell>
          <table:table-cell office:value-type="string" table:style-name="dataCell">
            <text:p>04:00</text:p>
          </table:table-cell>
          <table:table-cell office:value-type="string" table:style-name="dataCell">
            <text:p>04:00</text:p>
          </table:table-cell>
          <table:table-cell office:value-type="string" table:style-name="dataCell">
            <text:p>13/05/2026</text:p>
          </table:table-cell>
          <table:table-cell office:value-type="string" table:style-name="resLoss">
            <text:p>LOSS -4.45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13% | VOL 6.7x | VWAP +2.03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48" table:style-name="dataCell">
            <text:p>48</text:p>
          </table:table-cell>
          <table:table-cell office:value-type="string" table:style-name="coinLong">
            <text:p>TON</text:p>
          </table:table-cell>
          <table:table-cell office:value-type="string" table:style-name="dataCell">
            <text:p>USDT</text:p>
          </table:table-cell>
          <table:table-cell office:value-type="float" office:value="2.064" table:style-name="dataCell">
            <text:p>2.064</text:p>
          </table:table-cell>
          <table:table-cell office:value-type="float" office:value="1.997" table:style-name="dataCell">
            <text:p>1.997</text:p>
          </table:table-cell>
          <table:table-cell office:value-type="string" table:style-name="dataCell">
            <text:p>20:15</text:p>
          </table:table-cell>
          <table:table-cell office:value-type="string" table:style-name="dataCell">
            <text:p>14:45</text:p>
          </table:table-cell>
          <table:table-cell office:value-type="string" table:style-name="dataCell">
            <text:p>21/05/2026</text:p>
          </table:table-cell>
          <table:table-cell office:value-type="string" table:style-name="resLoss">
            <text:p>LOSS -3.25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EMA 0.23% | VOL 3.8x | VWAP +1.90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49" table:style-name="dataCell">
            <text:p>49</text:p>
          </table:table-cell>
          <table:table-cell office:value-type="string" table:style-name="coinLong">
            <text:p>FIL</text:p>
          </table:table-cell>
          <table:table-cell office:value-type="string" table:style-name="dataCell">
            <text:p>USDT</text:p>
          </table:table-cell>
          <table:table-cell office:value-type="float" office:value="1.036" table:style-name="dataCell">
            <text:p>1.036</text:p>
          </table:table-cell>
          <table:table-cell office:value-type="float" office:value="1.073" table:style-name="dataCell">
            <text:p>1.073</text:p>
          </table:table-cell>
          <table:table-cell office:value-type="string" table:style-name="dataCell">
            <text:p>16:45</text:p>
          </table:table-cell>
          <table:table-cell office:value-type="string" table:style-name="dataCell">
            <text:p>16:45</text:p>
          </table:table-cell>
          <table:table-cell office:value-type="string" table:style-name="dataCell">
            <text:p>26/05/2026</text:p>
          </table:table-cell>
          <table:table-cell office:value-type="string" table:style-name="resWin">
            <text:p>WIN +3.57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13% | VOL 4.5x | VWAP +2.05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50" table:style-name="dataCell">
            <text:p>50</text:p>
          </table:table-cell>
          <table:table-cell office:value-type="string" table:style-name="coinLong">
            <text:p>XLM</text:p>
          </table:table-cell>
          <table:table-cell office:value-type="string" table:style-name="dataCell">
            <text:p>USDT</text:p>
          </table:table-cell>
          <table:table-cell office:value-type="float" office:value="0.1694" table:style-name="dataCell">
            <text:p>0.1694</text:p>
          </table:table-cell>
          <table:table-cell office:value-type="float" office:value="0.2031" table:style-name="dataCell">
            <text:p>0.2031</text:p>
          </table:table-cell>
          <table:table-cell office:value-type="string" table:style-name="dataCell">
            <text:p>03:15</text:p>
          </table:table-cell>
          <table:table-cell office:value-type="string" table:style-name="dataCell">
            <text:p>03:15</text:p>
          </table:table-cell>
          <table:table-cell office:value-type="string" table:style-name="dataCell">
            <text:p>28/05/2026</text:p>
          </table:table-cell>
          <table:table-cell office:value-type="string" table:style-name="resWin">
            <text:p>WIN +19.89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13% | EMA 0.62% | VWAP +2.75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51" table:style-name="dataCell">
            <text:p>51</text:p>
          </table:table-cell>
          <table:table-cell office:value-type="string" table:style-name="coinLong">
            <text:p>HBAR</text:p>
          </table:table-cell>
          <table:table-cell office:value-type="string" table:style-name="dataCell">
            <text:p>USDT</text:p>
          </table:table-cell>
          <table:table-cell office:value-type="float" office:value="0.0963" table:style-name="dataCell">
            <text:p>0.0963</text:p>
          </table:table-cell>
          <table:table-cell office:value-type="float" office:value="0.0953" table:style-name="dataCell">
            <text:p>0.0953</text:p>
          </table:table-cell>
          <table:table-cell office:value-type="string" table:style-name="dataCell">
            <text:p>02:00</text:p>
          </table:table-cell>
          <table:table-cell office:value-type="string" table:style-name="dataCell">
            <text:p>02:00</text:p>
          </table:table-cell>
          <table:table-cell office:value-type="string" table:style-name="dataCell">
            <text:p>30/05/2026</text:p>
          </table:table-cell>
          <table:table-cell office:value-type="string" table:style-name="resLoss">
            <text:p>LOSS -1.04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19% | VOL 4.3x | VWAP +2.61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52" table:style-name="dataCell">
            <text:p>52</text:p>
          </table:table-cell>
          <table:table-cell office:value-type="string" table:style-name="coinLong">
            <text:p>INJ</text:p>
          </table:table-cell>
          <table:table-cell office:value-type="string" table:style-name="dataCell">
            <text:p>USDT</text:p>
          </table:table-cell>
          <table:table-cell office:value-type="float" office:value="6.746" table:style-name="dataCell">
            <text:p>6.746</text:p>
          </table:table-cell>
          <table:table-cell office:value-type="float" office:value="6.588" table:style-name="dataCell">
            <text:p>6.588</text:p>
          </table:table-cell>
          <table:table-cell office:value-type="string" table:style-name="dataCell">
            <text:p>07:45</text:p>
          </table:table-cell>
          <table:table-cell office:value-type="string" table:style-name="dataCell">
            <text:p>07:45</text:p>
          </table:table-cell>
          <table:table-cell office:value-type="string" table:style-name="dataCell">
            <text:p>30/05/2026</text:p>
          </table:table-cell>
          <table:table-cell office:value-type="string" table:style-name="resLoss">
            <text:p>LOSS -2.34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20% | VOL 5.5x | VWAP +2.59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53" table:style-name="dataCell">
            <text:p>53</text:p>
          </table:table-cell>
          <table:table-cell office:value-type="string" table:style-name="coinLong">
            <text:p>TON</text:p>
          </table:table-cell>
          <table:table-cell office:value-type="string" table:style-name="dataCell">
            <text:p>USDT</text:p>
          </table:table-cell>
          <table:table-cell office:value-type="float" office:value="1.893" table:style-name="dataCell">
            <text:p>1.893</text:p>
          </table:table-cell>
          <table:table-cell office:value-type="float" office:value="1.938" table:style-name="dataCell">
            <text:p>1.938</text:p>
          </table:table-cell>
          <table:table-cell office:value-type="string" table:style-name="dataCell">
            <text:p>03:45</text:p>
          </table:table-cell>
          <table:table-cell office:value-type="string" table:style-name="dataCell">
            <text:p>03:45</text:p>
          </table:table-cell>
          <table:table-cell office:value-type="string" table:style-name="dataCell">
            <text:p>31/05/2026</text:p>
          </table:table-cell>
          <table:table-cell office:value-type="string" table:style-name="resWin">
            <text:p>WIN +2.38%</text:p>
          </table:table-cell>
          <table:table-cell office:value-type="float" office:value="4.0" table:style-name="dataCell">
            <text:p>4</text:p>
          </table:table-cell>
          <table:table-cell office:value-type="string" table:style-name="dataCell">
            <text:p>MACD 0.22% | EMA 0.42% | VOL 10.5x | VWAP +2.20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54" table:style-name="dataCell">
            <text:p>54</text:p>
          </table:table-cell>
          <table:table-cell office:value-type="string" table:style-name="coinLong">
            <text:p>XLM</text:p>
          </table:table-cell>
          <table:table-cell office:value-type="string" table:style-name="dataCell">
            <text:p>USDT</text:p>
          </table:table-cell>
          <table:table-cell office:value-type="float" office:value="0.2411" table:style-name="dataCell">
            <text:p>0.2411</text:p>
          </table:table-cell>
          <table:table-cell office:value-type="float" office:value="0.2524" table:style-name="dataCell">
            <text:p>0.2524</text:p>
          </table:table-cell>
          <table:table-cell office:value-type="string" table:style-name="dataCell">
            <text:p>12:00</text:p>
          </table:table-cell>
          <table:table-cell office:value-type="string" table:style-name="dataCell">
            <text:p>12:00</text:p>
          </table:table-cell>
          <table:table-cell office:value-type="string" table:style-name="dataCell">
            <text:p>31/05/2026</text:p>
          </table:table-cell>
          <table:table-cell office:value-type="string" table:style-name="resWin">
            <text:p>WIN +4.69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21% | EMA 0.02% | VWAP +1.96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55" table:style-name="dataCell">
            <text:p>55</text:p>
          </table:table-cell>
          <table:table-cell office:value-type="string" table:style-name="coinLong">
            <text:p>HBAR</text:p>
          </table:table-cell>
          <table:table-cell office:value-type="string" table:style-name="dataCell">
            <text:p>USDT</text:p>
          </table:table-cell>
          <table:table-cell office:value-type="float" office:value="0.09787" table:style-name="dataCell">
            <text:p>0.09787</text:p>
          </table:table-cell>
          <table:table-cell office:value-type="float" office:value="0.09427" table:style-name="dataCell">
            <text:p>0.09427</text:p>
          </table:table-cell>
          <table:table-cell office:value-type="string" table:style-name="dataCell">
            <text:p>06:15</text:p>
          </table:table-cell>
          <table:table-cell office:value-type="string" table:style-name="dataCell">
            <text:p>14:45</text:p>
          </table:table-cell>
          <table:table-cell office:value-type="string" table:style-name="dataCell">
            <text:p>01/06/2026</text:p>
          </table:table-cell>
          <table:table-cell office:value-type="string" table:style-name="resLoss">
            <text:p>LOSS -3.68%</text:p>
          </table:table-cell>
          <table:table-cell office:value-type="float" office:value="4.0" table:style-name="dataCell">
            <text:p>4</text:p>
          </table:table-cell>
          <table:table-cell office:value-type="string" table:style-name="dataCell">
            <text:p>MACD 0.17% | EMA 0.12% | VOL 4.7x | VWAP +1.76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56" table:style-name="dataCell">
            <text:p>56</text:p>
          </table:table-cell>
          <table:table-cell office:value-type="string" table:style-name="coinLong">
            <text:p>BNB</text:p>
          </table:table-cell>
          <table:table-cell office:value-type="string" table:style-name="dataCell">
            <text:p>USDT</text:p>
          </table:table-cell>
          <table:table-cell office:value-type="float" office:value="717.56" table:style-name="dataCell">
            <text:p>717.56</text:p>
          </table:table-cell>
          <table:table-cell office:value-type="float" office:value="677.58" table:style-name="dataCell">
            <text:p>677.58</text:p>
          </table:table-cell>
          <table:table-cell office:value-type="string" table:style-name="dataCell">
            <text:p>12:30</text:p>
          </table:table-cell>
          <table:table-cell office:value-type="string" table:style-name="dataCell">
            <text:p>18:45</text:p>
          </table:table-cell>
          <table:table-cell office:value-type="string" table:style-name="dataCell">
            <text:p>01/06/2026</text:p>
          </table:table-cell>
          <table:table-cell office:value-type="string" table:style-name="resLoss">
            <text:p>LOSS -5.57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EMA 0.09% | VOL 7.1x | VWAP +2.90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